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43055555555556" calcext:value-type="float">
            <text:p>0,00000243055555555556</text:p>
          </table:table-cell>
          <table:table-cell table:formula="of:=[.D3]-[.D2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1" office:value-type="float" office:value="42" calcext:value-type="float">
            <text:p>4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486111111111111" calcext:value-type="float">
            <text:p>0,00000486111111111111</text:p>
          </table:table-cell>
          <table:table-cell table:formula="of:=[.D4]-[.D3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1" office:value-type="float" office:value="63" calcext:value-type="float">
            <text:p>6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729166666666667" calcext:value-type="float">
            <text:p>0,00000729166666666667</text:p>
          </table:table-cell>
          <table:table-cell table:formula="of:=[.D5]-[.D4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1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972222222222222" calcext:value-type="float">
            <text:p>0,00000972222222222222</text:p>
          </table:table-cell>
          <table:table-cell table:formula="of:=[.D6]-[.D5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1" office:value-type="float" office:value="105" calcext:value-type="float">
            <text:p>10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21527777777778" calcext:value-type="float">
            <text:p>0,00001215277777777780</text:p>
          </table:table-cell>
          <table:table-cell table:formula="of:=[.D7]-[.D6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1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45833333333333" calcext:value-type="float">
            <text:p>0,00001458333333333330</text:p>
          </table:table-cell>
          <table:table-cell table:formula="of:=[.D8]-[.D7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1" office:value-type="float" office:value="147" calcext:value-type="float">
            <text:p>14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70138888888889" calcext:value-type="float">
            <text:p>0,00001701388888888890</text:p>
          </table:table-cell>
          <table:table-cell table:formula="of:=[.D9]-[.D8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1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94444444444444" calcext:value-type="float">
            <text:p>0,00001944444444444450</text:p>
          </table:table-cell>
          <table:table-cell table:formula="of:=[.D10]-[.D9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1" office:value-type="float" office:value="189" calcext:value-type="float">
            <text:p>18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1875" calcext:value-type="float">
            <text:p>0,00002187500000000000</text:p>
          </table:table-cell>
          <table:table-cell table:formula="of:=[.D11]-[.D10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1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43055555555556" calcext:value-type="float">
            <text:p>0,00002430555555555560</text:p>
          </table:table-cell>
          <table:table-cell table:formula="of:=[.D12]-[.D11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1" office:value-type="float" office:value="231" calcext:value-type="float">
            <text:p>23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67361111111111" calcext:value-type="float">
            <text:p>0,00002673611111111110</text:p>
          </table:table-cell>
          <table:table-cell table:formula="of:=[.D13]-[.D12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1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91666666666667" calcext:value-type="float">
            <text:p>0,00002916666666666670</text:p>
          </table:table-cell>
          <table:table-cell table:formula="of:=[.D14]-[.D13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1" office:value-type="float" office:value="273" calcext:value-type="float">
            <text:p>27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15972222222222" calcext:value-type="float">
            <text:p>0,00003159722222222220</text:p>
          </table:table-cell>
          <table:table-cell table:formula="of:=[.D15]-[.D14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1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40277777777778" calcext:value-type="float">
            <text:p>0,00003402777777777780</text:p>
          </table:table-cell>
          <table:table-cell table:formula="of:=[.D16]-[.D15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1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64583333333333" calcext:value-type="float">
            <text:p>0,00003645833333333330</text:p>
          </table:table-cell>
          <table:table-cell table:formula="of:=[.D17]-[.D16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1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388888888888889" calcext:value-type="float">
            <text:p>0,00003888888888888890</text:p>
          </table:table-cell>
          <table:table-cell table:formula="of:=[.D18]-[.D17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1" office:value-type="float" office:value="357" calcext:value-type="float">
            <text:p>35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413194444444444" calcext:value-type="float">
            <text:p>0,00004131944444444450</text:p>
          </table:table-cell>
          <table:table-cell table:formula="of:=[.D19]-[.D18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1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4375" calcext:value-type="float">
            <text:p>0,00004375000000000000</text:p>
          </table:table-cell>
          <table:table-cell table:formula="of:=[.D20]-[.D19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1" office:value-type="float" office:value="399" calcext:value-type="float">
            <text:p>39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461805555555556" calcext:value-type="float">
            <text:p>0,00004618055555555560</text:p>
          </table:table-cell>
          <table:table-cell table:formula="of:=[.D21]-[.D20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1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486111111111111" calcext:value-type="float">
            <text:p>0,00004861111111111110</text:p>
          </table:table-cell>
          <table:table-cell table:formula="of:=[.D22]-[.D21]" office:value-type="float" office:value="0.00000243055555555556" calcext:value-type="float">
            <text:p>0,0000024305555555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1" office:value-type="float" office:value="441" calcext:value-type="float">
            <text:p>44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510416666666667" calcext:value-type="float">
            <text:p>0,00005104166666666670</text:p>
          </table:table-cell>
          <table:table-cell table:formula="of:=[.D23]-[.D22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1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534722222222222" calcext:value-type="float">
            <text:p>0,00005347222222222220</text:p>
          </table:table-cell>
          <table:table-cell table:formula="of:=[.D24]-[.D23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1" office:value-type="float" office:value="483" calcext:value-type="float">
            <text:p>48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559027777777778" calcext:value-type="float">
            <text:p>0,00005590277777777780</text:p>
          </table:table-cell>
          <table:table-cell table:formula="of:=[.D25]-[.D24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1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583333333333333" calcext:value-type="float">
            <text:p>0,00005833333333333330</text:p>
          </table:table-cell>
          <table:table-cell table:formula="of:=[.D26]-[.D25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1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607638888888889" calcext:value-type="float">
            <text:p>0,00006076388888888890</text:p>
          </table:table-cell>
          <table:table-cell table:formula="of:=[.D27]-[.D26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1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631944444444444" calcext:value-type="float">
            <text:p>0,00006319444444444440</text:p>
          </table:table-cell>
          <table:table-cell table:formula="of:=[.D28]-[.D27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1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65625" calcext:value-type="float">
            <text:p>0,00006562500000000000</text:p>
          </table:table-cell>
          <table:table-cell table:formula="of:=[.D29]-[.D28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1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680555555555556" calcext:value-type="float">
            <text:p>0,00006805555555555560</text:p>
          </table:table-cell>
          <table:table-cell table:formula="of:=[.D30]-[.D29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1" office:value-type="float" office:value="609" calcext:value-type="float">
            <text:p>60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704861111111111" calcext:value-type="float">
            <text:p>0,00007048611111111110</text:p>
          </table:table-cell>
          <table:table-cell table:formula="of:=[.D31]-[.D30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1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729166666666667" calcext:value-type="float">
            <text:p>0,00007291666666666670</text:p>
          </table:table-cell>
          <table:table-cell table:formula="of:=[.D32]-[.D31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1" office:value-type="float" office:value="651" calcext:value-type="float">
            <text:p>65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753472222222222" calcext:value-type="float">
            <text:p>0,00007534722222222220</text:p>
          </table:table-cell>
          <table:table-cell table:formula="of:=[.D33]-[.D32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1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777777777777778" calcext:value-type="float">
            <text:p>0,00007777777777777780</text:p>
          </table:table-cell>
          <table:table-cell table:formula="of:=[.D34]-[.D33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1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802083333333333" calcext:value-type="float">
            <text:p>0,00008020833333333330</text:p>
          </table:table-cell>
          <table:table-cell table:formula="of:=[.D35]-[.D34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1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826388888888889" calcext:value-type="float">
            <text:p>0,00008263888888888890</text:p>
          </table:table-cell>
          <table:table-cell table:formula="of:=[.D36]-[.D35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1" office:value-type="float" office:value="735" calcext:value-type="float">
            <text:p>73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850694444444444" calcext:value-type="float">
            <text:p>0,00008506944444444440</text:p>
          </table:table-cell>
          <table:table-cell table:formula="of:=[.D37]-[.D36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1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875" calcext:value-type="float">
            <text:p>0,00008750000000000000</text:p>
          </table:table-cell>
          <table:table-cell table:formula="of:=[.D38]-[.D37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1" office:value-type="float" office:value="777" calcext:value-type="float">
            <text:p>77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899305555555556" calcext:value-type="float">
            <text:p>0,00008993055555555560</text:p>
          </table:table-cell>
          <table:table-cell table:formula="of:=[.D39]-[.D38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1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923611111111111" calcext:value-type="float">
            <text:p>0,00009236111111111110</text:p>
          </table:table-cell>
          <table:table-cell table:formula="of:=[.D40]-[.D39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1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947916666666667" calcext:value-type="float">
            <text:p>0,00009479166666666670</text:p>
          </table:table-cell>
          <table:table-cell table:formula="of:=[.D41]-[.D40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1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972222222222222" calcext:value-type="float">
            <text:p>0,00009722222222222220</text:p>
          </table:table-cell>
          <table:table-cell table:formula="of:=[.D42]-[.D41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1" office:value-type="float" office:value="861" calcext:value-type="float">
            <text:p>86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996527777777778" calcext:value-type="float">
            <text:p>0,00009965277777777780</text:p>
          </table:table-cell>
          <table:table-cell table:formula="of:=[.D43]-[.D42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1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02083333333333" calcext:value-type="float">
            <text:p>0,00010208333333333300</text:p>
          </table:table-cell>
          <table:table-cell table:formula="of:=[.D44]-[.D43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1" office:value-type="float" office:value="903" calcext:value-type="float">
            <text:p>90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04513888888889" calcext:value-type="float">
            <text:p>0,00010451388888888900</text:p>
          </table:table-cell>
          <table:table-cell table:formula="of:=[.D45]-[.D44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1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06944444444444" calcext:value-type="float">
            <text:p>0,00010694444444444400</text:p>
          </table:table-cell>
          <table:table-cell table:formula="of:=[.D46]-[.D45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1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09375" calcext:value-type="float">
            <text:p>0,00010937500000000000</text:p>
          </table:table-cell>
          <table:table-cell table:formula="of:=[.D47]-[.D46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1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11805555555556" calcext:value-type="float">
            <text:p>0,00011180555555555600</text:p>
          </table:table-cell>
          <table:table-cell table:formula="of:=[.D48]-[.D47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1" office:value-type="float" office:value="987" calcext:value-type="float">
            <text:p>98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14236111111111" calcext:value-type="float">
            <text:p>0,00011423611111111100</text:p>
          </table:table-cell>
          <table:table-cell table:formula="of:=[.D49]-[.D48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1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16666666666667" calcext:value-type="float">
            <text:p>0,00011666666666666700</text:p>
          </table:table-cell>
          <table:table-cell table:formula="of:=[.D50]-[.D49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1" office:value-type="float" office:value="1029" calcext:value-type="float">
            <text:p>102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19097222222222" calcext:value-type="float">
            <text:p>0,00011909722222222200</text:p>
          </table:table-cell>
          <table:table-cell table:formula="of:=[.D51]-[.D50]" office:value-type="float" office:value="0.00000243055555555555" calcext:value-type="float">
            <text:p>0,000002430555555555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1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21527777777778" calcext:value-type="float">
            <text:p>0,00012152777777777800</text:p>
          </table:table-cell>
          <table:table-cell table:formula="of:=[.D52]-[.D51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1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23958333333333" calcext:value-type="float">
            <text:p>0,00012395833333333300</text:p>
          </table:table-cell>
          <table:table-cell table:formula="of:=[.D53]-[.D5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1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26388888888889" calcext:value-type="float">
            <text:p>0,00012638888888888900</text:p>
          </table:table-cell>
          <table:table-cell table:formula="of:=[.D54]-[.D53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1" office:value-type="float" office:value="1113" calcext:value-type="float">
            <text:p>111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28819444444444" calcext:value-type="float">
            <text:p>0,00012881944444444400</text:p>
          </table:table-cell>
          <table:table-cell table:formula="of:=[.D55]-[.D5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1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3125" calcext:value-type="float">
            <text:p>0,00013125000000000000</text:p>
          </table:table-cell>
          <table:table-cell table:formula="of:=[.D56]-[.D55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1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33680555555556" calcext:value-type="float">
            <text:p>0,00013368055555555600</text:p>
          </table:table-cell>
          <table:table-cell table:formula="of:=[.D57]-[.D5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1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36111111111111" calcext:value-type="float">
            <text:p>0,00013611111111111100</text:p>
          </table:table-cell>
          <table:table-cell table:formula="of:=[.D58]-[.D57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1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38541666666667" calcext:value-type="float">
            <text:p>0,00013854166666666700</text:p>
          </table:table-cell>
          <table:table-cell table:formula="of:=[.D59]-[.D5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1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40972222222222" calcext:value-type="float">
            <text:p>0,00014097222222222200</text:p>
          </table:table-cell>
          <table:table-cell table:formula="of:=[.D60]-[.D59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1" office:value-type="float" office:value="1239" calcext:value-type="float">
            <text:p>123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43402777777778" calcext:value-type="float">
            <text:p>0,00014340277777777800</text:p>
          </table:table-cell>
          <table:table-cell table:formula="of:=[.D61]-[.D60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1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45833333333333" calcext:value-type="float">
            <text:p>0,00014583333333333300</text:p>
          </table:table-cell>
          <table:table-cell table:formula="of:=[.D62]-[.D6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1" office:value-type="float" office:value="1281" calcext:value-type="float">
            <text:p>128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48263888888889" calcext:value-type="float">
            <text:p>0,00014826388888888900</text:p>
          </table:table-cell>
          <table:table-cell table:formula="of:=[.D63]-[.D62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1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50694444444444" calcext:value-type="float">
            <text:p>0,00015069444444444400</text:p>
          </table:table-cell>
          <table:table-cell table:formula="of:=[.D64]-[.D6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1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53125" calcext:value-type="float">
            <text:p>0,00015312500000000000</text:p>
          </table:table-cell>
          <table:table-cell table:formula="of:=[.D65]-[.D64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1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55555555555556" calcext:value-type="float">
            <text:p>0,00015555555555555600</text:p>
          </table:table-cell>
          <table:table-cell table:formula="of:=[.D66]-[.D6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1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57986111111111" calcext:value-type="float">
            <text:p>0,00015798611111111100</text:p>
          </table:table-cell>
          <table:table-cell table:formula="of:=[.D67]-[.D66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1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60416666666667" calcext:value-type="float">
            <text:p>0,00016041666666666700</text:p>
          </table:table-cell>
          <table:table-cell table:formula="of:=[.D68]-[.D6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1" office:value-type="float" office:value="1407" calcext:value-type="float">
            <text:p>140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62847222222222" calcext:value-type="float">
            <text:p>0,00016284722222222200</text:p>
          </table:table-cell>
          <table:table-cell table:formula="of:=[.D69]-[.D68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1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65277777777778" calcext:value-type="float">
            <text:p>0,00016527777777777800</text:p>
          </table:table-cell>
          <table:table-cell table:formula="of:=[.D70]-[.D6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1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67708333333333" calcext:value-type="float">
            <text:p>0,00016770833333333300</text:p>
          </table:table-cell>
          <table:table-cell table:formula="of:=[.D71]-[.D70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1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70138888888889" calcext:value-type="float">
            <text:p>0,00017013888888888900</text:p>
          </table:table-cell>
          <table:table-cell table:formula="of:=[.D72]-[.D71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1" office:value-type="float" office:value="1491" calcext:value-type="float">
            <text:p>149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72569444444444" calcext:value-type="float">
            <text:p>0,00017256944444444400</text:p>
          </table:table-cell>
          <table:table-cell table:formula="of:=[.D73]-[.D7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1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75" calcext:value-type="float">
            <text:p>0,00017500000000000000</text:p>
          </table:table-cell>
          <table:table-cell table:formula="of:=[.D74]-[.D73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1" office:value-type="float" office:value="1533" calcext:value-type="float">
            <text:p>153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77430555555556" calcext:value-type="float">
            <text:p>0,00017743055555555600</text:p>
          </table:table-cell>
          <table:table-cell table:formula="of:=[.D75]-[.D7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1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79861111111111" calcext:value-type="float">
            <text:p>0,00017986111111111100</text:p>
          </table:table-cell>
          <table:table-cell table:formula="of:=[.D76]-[.D75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1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82291666666667" calcext:value-type="float">
            <text:p>0,00018229166666666700</text:p>
          </table:table-cell>
          <table:table-cell table:formula="of:=[.D77]-[.D7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1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84722222222222" calcext:value-type="float">
            <text:p>0,00018472222222222200</text:p>
          </table:table-cell>
          <table:table-cell table:formula="of:=[.D78]-[.D77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1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87152777777778" calcext:value-type="float">
            <text:p>0,00018715277777777800</text:p>
          </table:table-cell>
          <table:table-cell table:formula="of:=[.D79]-[.D7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1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89583333333333" calcext:value-type="float">
            <text:p>0,00018958333333333300</text:p>
          </table:table-cell>
          <table:table-cell table:formula="of:=[.D80]-[.D79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1" office:value-type="float" office:value="1659" calcext:value-type="float">
            <text:p>165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92013888888889" calcext:value-type="float">
            <text:p>0,00019201388888888900</text:p>
          </table:table-cell>
          <table:table-cell table:formula="of:=[.D81]-[.D8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1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94444444444444" calcext:value-type="float">
            <text:p>0,00019444444444444400</text:p>
          </table:table-cell>
          <table:table-cell table:formula="of:=[.D82]-[.D81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1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96875" calcext:value-type="float">
            <text:p>0,00019687500000000000</text:p>
          </table:table-cell>
          <table:table-cell table:formula="of:=[.D83]-[.D8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1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99305555555556" calcext:value-type="float">
            <text:p>0,00019930555555555600</text:p>
          </table:table-cell>
          <table:table-cell table:formula="of:=[.D84]-[.D83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1" office:value-type="float" office:value="1743" calcext:value-type="float">
            <text:p>174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01736111111111" calcext:value-type="float">
            <text:p>0,00020173611111111100</text:p>
          </table:table-cell>
          <table:table-cell table:formula="of:=[.D85]-[.D84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1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04166666666667" calcext:value-type="float">
            <text:p>0,00020416666666666700</text:p>
          </table:table-cell>
          <table:table-cell table:formula="of:=[.D86]-[.D8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1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06597222222222" calcext:value-type="float">
            <text:p>0,00020659722222222200</text:p>
          </table:table-cell>
          <table:table-cell table:formula="of:=[.D87]-[.D86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1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09027777777778" calcext:value-type="float">
            <text:p>0,00020902777777777800</text:p>
          </table:table-cell>
          <table:table-cell table:formula="of:=[.D88]-[.D8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1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11458333333333" calcext:value-type="float">
            <text:p>0,00021145833333333300</text:p>
          </table:table-cell>
          <table:table-cell table:formula="of:=[.D89]-[.D88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1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13888888888889" calcext:value-type="float">
            <text:p>0,00021388888888888900</text:p>
          </table:table-cell>
          <table:table-cell table:formula="of:=[.D90]-[.D8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1" office:value-type="float" office:value="1869" calcext:value-type="float">
            <text:p>186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16319444444444" calcext:value-type="float">
            <text:p>0,00021631944444444400</text:p>
          </table:table-cell>
          <table:table-cell table:formula="of:=[.D91]-[.D90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1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1875" calcext:value-type="float">
            <text:p>0,00021875000000000000</text:p>
          </table:table-cell>
          <table:table-cell table:formula="of:=[.D92]-[.D9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1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21180555555556" calcext:value-type="float">
            <text:p>0,00022118055555555600</text:p>
          </table:table-cell>
          <table:table-cell table:formula="of:=[.D93]-[.D92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1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23611111111111" calcext:value-type="float">
            <text:p>0,00022361111111111100</text:p>
          </table:table-cell>
          <table:table-cell table:formula="of:=[.D94]-[.D9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1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26041666666667" calcext:value-type="float">
            <text:p>0,00022604166666666700</text:p>
          </table:table-cell>
          <table:table-cell table:formula="of:=[.D95]-[.D94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1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28472222222222" calcext:value-type="float">
            <text:p>0,00022847222222222200</text:p>
          </table:table-cell>
          <table:table-cell table:formula="of:=[.D96]-[.D95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1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30902777777778" calcext:value-type="float">
            <text:p>0,00023090277777777800</text:p>
          </table:table-cell>
          <table:table-cell table:formula="of:=[.D97]-[.D9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1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33333333333333" calcext:value-type="float">
            <text:p>0,00023333333333333300</text:p>
          </table:table-cell>
          <table:table-cell table:formula="of:=[.D98]-[.D97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1" office:value-type="float" office:value="2037" calcext:value-type="float">
            <text:p>203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35763888888889" calcext:value-type="float">
            <text:p>0,00023576388888888900</text:p>
          </table:table-cell>
          <table:table-cell table:formula="of:=[.D99]-[.D9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1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38194444444444" calcext:value-type="float">
            <text:p>0,00023819444444444400</text:p>
          </table:table-cell>
          <table:table-cell table:formula="of:=[.D100]-[.D99]" office:value-type="float" office:value="0.00000243055555555557" calcext:value-type="float">
            <text:p>0,000002430555555555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1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40625" calcext:value-type="float">
            <text:p>0,00024062500000000000</text:p>
          </table:table-cell>
          <table:table-cell table:formula="of:=[.D101]-[.D10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1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43055555555556" calcext:value-type="float">
            <text:p>0,00024305555555555600</text:p>
          </table:table-cell>
          <table:table-cell table:formula="of:=[.D102]-[.D10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1" office:value-type="float" office:value="2121" calcext:value-type="float">
            <text:p>212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45486111111111" calcext:value-type="float">
            <text:p>0,00024548611111111100</text:p>
          </table:table-cell>
          <table:table-cell table:formula="of:=[.D103]-[.D102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1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47916666666667" calcext:value-type="float">
            <text:p>0,00024791666666666700</text:p>
          </table:table-cell>
          <table:table-cell table:formula="of:=[.D104]-[.D10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1" office:value-type="float" office:value="2163" calcext:value-type="float">
            <text:p>216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50347222222222" calcext:value-type="float">
            <text:p>0,00025034722222222200</text:p>
          </table:table-cell>
          <table:table-cell table:formula="of:=[.D105]-[.D10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1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52777777777778" calcext:value-type="float">
            <text:p>0,00025277777777777800</text:p>
          </table:table-cell>
          <table:table-cell table:formula="of:=[.D106]-[.D10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1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55208333333333" calcext:value-type="float">
            <text:p>0,00025520833333333300</text:p>
          </table:table-cell>
          <table:table-cell table:formula="of:=[.D107]-[.D106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1" office:value-type="float" office:value="2226" calcext:value-type="float">
            <text:p>222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57638888888889" calcext:value-type="float">
            <text:p>0,00025763888888888900</text:p>
          </table:table-cell>
          <table:table-cell table:formula="of:=[.D108]-[.D10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1" office:value-type="float" office:value="2247" calcext:value-type="float">
            <text:p>224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60069444444444" calcext:value-type="float">
            <text:p>0,00026006944444444400</text:p>
          </table:table-cell>
          <table:table-cell table:formula="of:=[.D109]-[.D10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1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625" calcext:value-type="float">
            <text:p>0,00026250000000000000</text:p>
          </table:table-cell>
          <table:table-cell table:formula="of:=[.D110]-[.D109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1" office:value-type="float" office:value="2289" calcext:value-type="float">
            <text:p>228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64930555555556" calcext:value-type="float">
            <text:p>0,00026493055555555600</text:p>
          </table:table-cell>
          <table:table-cell table:formula="of:=[.D111]-[.D11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1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67361111111111" calcext:value-type="float">
            <text:p>0,00026736111111111100</text:p>
          </table:table-cell>
          <table:table-cell table:formula="of:=[.D112]-[.D11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1" office:value-type="float" office:value="2331" calcext:value-type="float">
            <text:p>233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69791666666667" calcext:value-type="float">
            <text:p>0,00026979166666666700</text:p>
          </table:table-cell>
          <table:table-cell table:formula="of:=[.D113]-[.D11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1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72222222222222" calcext:value-type="float">
            <text:p>0,00027222222222222200</text:p>
          </table:table-cell>
          <table:table-cell table:formula="of:=[.D114]-[.D113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1" office:value-type="float" office:value="2373" calcext:value-type="float">
            <text:p>237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74652777777778" calcext:value-type="float">
            <text:p>0,00027465277777777800</text:p>
          </table:table-cell>
          <table:table-cell table:formula="of:=[.D115]-[.D11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1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77083333333333" calcext:value-type="float">
            <text:p>0,00027708333333333300</text:p>
          </table:table-cell>
          <table:table-cell table:formula="of:=[.D116]-[.D11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1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79513888888889" calcext:value-type="float">
            <text:p>0,00027951388888888900</text:p>
          </table:table-cell>
          <table:table-cell table:formula="of:=[.D117]-[.D11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1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81944444444444" calcext:value-type="float">
            <text:p>0,00028194444444444400</text:p>
          </table:table-cell>
          <table:table-cell table:formula="of:=[.D118]-[.D117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1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84375" calcext:value-type="float">
            <text:p>0,00028437500000000000</text:p>
          </table:table-cell>
          <table:table-cell table:formula="of:=[.D119]-[.D11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1" office:value-type="float" office:value="2478" calcext:value-type="float">
            <text:p>247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86805555555556" calcext:value-type="float">
            <text:p>0,00028680555555555600</text:p>
          </table:table-cell>
          <table:table-cell table:formula="of:=[.D120]-[.D11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1" office:value-type="float" office:value="2499" calcext:value-type="float">
            <text:p>249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89236111111111" calcext:value-type="float">
            <text:p>0,00028923611111111100</text:p>
          </table:table-cell>
          <table:table-cell table:formula="of:=[.D121]-[.D120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1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91666666666667" calcext:value-type="float">
            <text:p>0,00029166666666666700</text:p>
          </table:table-cell>
          <table:table-cell table:formula="of:=[.D122]-[.D12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1" office:value-type="float" office:value="2541" calcext:value-type="float">
            <text:p>254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94097222222222" calcext:value-type="float">
            <text:p>0,00029409722222222200</text:p>
          </table:table-cell>
          <table:table-cell table:formula="of:=[.D123]-[.D12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1" office:value-type="float" office:value="2562" calcext:value-type="float">
            <text:p>256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96527777777778" calcext:value-type="float">
            <text:p>0,00029652777777777800</text:p>
          </table:table-cell>
          <table:table-cell table:formula="of:=[.D124]-[.D12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1" office:value-type="float" office:value="2583" calcext:value-type="float">
            <text:p>258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98958333333333" calcext:value-type="float">
            <text:p>0,00029895833333333300</text:p>
          </table:table-cell>
          <table:table-cell table:formula="of:=[.D125]-[.D124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1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01388888888889" calcext:value-type="float">
            <text:p>0,00030138888888888900</text:p>
          </table:table-cell>
          <table:table-cell table:formula="of:=[.D126]-[.D12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1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03819444444444" calcext:value-type="float">
            <text:p>0,00030381944444444400</text:p>
          </table:table-cell>
          <table:table-cell table:formula="of:=[.D127]-[.D12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1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0625" calcext:value-type="float">
            <text:p>0,00030625000000000000</text:p>
          </table:table-cell>
          <table:table-cell table:formula="of:=[.D128]-[.D12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1" office:value-type="float" office:value="2667" calcext:value-type="float">
            <text:p>266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08680555555556" calcext:value-type="float">
            <text:p>0,00030868055555555600</text:p>
          </table:table-cell>
          <table:table-cell table:formula="of:=[.D129]-[.D128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1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11111111111111" calcext:value-type="float">
            <text:p>0,00031111111111111100</text:p>
          </table:table-cell>
          <table:table-cell table:formula="of:=[.D130]-[.D12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1" office:value-type="float" office:value="2709" calcext:value-type="float">
            <text:p>270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13541666666667" calcext:value-type="float">
            <text:p>0,00031354166666666700</text:p>
          </table:table-cell>
          <table:table-cell table:formula="of:=[.D131]-[.D13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1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15972222222222" calcext:value-type="float">
            <text:p>0,00031597222222222200</text:p>
          </table:table-cell>
          <table:table-cell table:formula="of:=[.D132]-[.D131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1" office:value-type="float" office:value="2751" calcext:value-type="float">
            <text:p>275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18402777777778" calcext:value-type="float">
            <text:p>0,00031840277777777800</text:p>
          </table:table-cell>
          <table:table-cell table:formula="of:=[.D133]-[.D13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1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20833333333333" calcext:value-type="float">
            <text:p>0,00032083333333333300</text:p>
          </table:table-cell>
          <table:table-cell table:formula="of:=[.D134]-[.D13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1" office:value-type="float" office:value="2793" calcext:value-type="float">
            <text:p>279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23263888888889" calcext:value-type="float">
            <text:p>0,00032326388888888900</text:p>
          </table:table-cell>
          <table:table-cell table:formula="of:=[.D135]-[.D13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1" office:value-type="float" office:value="2814" calcext:value-type="float">
            <text:p>281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25694444444444" calcext:value-type="float">
            <text:p>0,00032569444444444400</text:p>
          </table:table-cell>
          <table:table-cell table:formula="of:=[.D136]-[.D135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1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28125" calcext:value-type="float">
            <text:p>0,00032812500000000000</text:p>
          </table:table-cell>
          <table:table-cell table:formula="of:=[.D137]-[.D13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1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30555555555556" calcext:value-type="float">
            <text:p>0,00033055555555555600</text:p>
          </table:table-cell>
          <table:table-cell table:formula="of:=[.D138]-[.D13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1" office:value-type="float" office:value="2877" calcext:value-type="float">
            <text:p>287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32986111111111" calcext:value-type="float">
            <text:p>0,00033298611111111100</text:p>
          </table:table-cell>
          <table:table-cell table:formula="of:=[.D139]-[.D13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1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35416666666667" calcext:value-type="float">
            <text:p>0,00033541666666666700</text:p>
          </table:table-cell>
          <table:table-cell table:formula="of:=[.D140]-[.D139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1" office:value-type="float" office:value="2919" calcext:value-type="float">
            <text:p>291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37847222222222" calcext:value-type="float">
            <text:p>0,00033784722222222200</text:p>
          </table:table-cell>
          <table:table-cell table:formula="of:=[.D141]-[.D14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1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40277777777778" calcext:value-type="float">
            <text:p>0,00034027777777777800</text:p>
          </table:table-cell>
          <table:table-cell table:formula="of:=[.D142]-[.D14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1" office:value-type="float" office:value="2961" calcext:value-type="float">
            <text:p>296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42708333333333" calcext:value-type="float">
            <text:p>0,00034270833333333300</text:p>
          </table:table-cell>
          <table:table-cell table:formula="of:=[.D143]-[.D142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1" office:value-type="float" office:value="2982" calcext:value-type="float">
            <text:p>298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45138888888889" calcext:value-type="float">
            <text:p>0,00034513888888888900</text:p>
          </table:table-cell>
          <table:table-cell table:formula="of:=[.D144]-[.D14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1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47569444444444" calcext:value-type="float">
            <text:p>0,00034756944444444400</text:p>
          </table:table-cell>
          <table:table-cell table:formula="of:=[.D145]-[.D14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1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5" calcext:value-type="float">
            <text:p>0,00035000000000000000</text:p>
          </table:table-cell>
          <table:table-cell table:formula="of:=[.D146]-[.D14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1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52430555555556" calcext:value-type="float">
            <text:p>0,00035243055555555600</text:p>
          </table:table-cell>
          <table:table-cell table:formula="of:=[.D147]-[.D146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1" office:value-type="float" office:value="3066" calcext:value-type="float">
            <text:p>306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54861111111111" calcext:value-type="float">
            <text:p>0,00035486111111111100</text:p>
          </table:table-cell>
          <table:table-cell table:formula="of:=[.D148]-[.D14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1" office:value-type="float" office:value="3087" calcext:value-type="float">
            <text:p>308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57291666666667" calcext:value-type="float">
            <text:p>0,00035729166666666700</text:p>
          </table:table-cell>
          <table:table-cell table:formula="of:=[.D149]-[.D14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1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59722222222222" calcext:value-type="float">
            <text:p>0,00035972222222222200</text:p>
          </table:table-cell>
          <table:table-cell table:formula="of:=[.D150]-[.D14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1" office:value-type="float" office:value="3129" calcext:value-type="float">
            <text:p>312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62152777777778" calcext:value-type="float">
            <text:p>0,00036215277777777800</text:p>
          </table:table-cell>
          <table:table-cell table:formula="of:=[.D151]-[.D150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1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64583333333333" calcext:value-type="float">
            <text:p>0,00036458333333333300</text:p>
          </table:table-cell>
          <table:table-cell table:formula="of:=[.D152]-[.D15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1" office:value-type="float" office:value="3171" calcext:value-type="float">
            <text:p>317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367013888888889" calcext:value-type="float">
            <text:p>0,00036701388888888900</text:p>
          </table:table-cell>
          <table:table-cell table:formula="of:=[.D153]-[.D15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1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369444444444444" calcext:value-type="float">
            <text:p>0,00036944444444444400</text:p>
          </table:table-cell>
          <table:table-cell table:formula="of:=[.D154]-[.D153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1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71875" calcext:value-type="float">
            <text:p>0,00037187500000000000</text:p>
          </table:table-cell>
          <table:table-cell table:formula="of:=[.D155]-[.D15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1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74305555555556" calcext:value-type="float">
            <text:p>0,00037430555555555600</text:p>
          </table:table-cell>
          <table:table-cell table:formula="of:=[.D156]-[.D15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1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76736111111111" calcext:value-type="float">
            <text:p>0,00037673611111111100</text:p>
          </table:table-cell>
          <table:table-cell table:formula="of:=[.D157]-[.D15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1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79166666666667" calcext:value-type="float">
            <text:p>0,00037916666666666700</text:p>
          </table:table-cell>
          <table:table-cell table:formula="of:=[.D158]-[.D157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1" office:value-type="float" office:value="3297" calcext:value-type="float">
            <text:p>329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81597222222222" calcext:value-type="float">
            <text:p>0,00038159722222222200</text:p>
          </table:table-cell>
          <table:table-cell table:formula="of:=[.D159]-[.D15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1" office:value-type="float" office:value="3318" calcext:value-type="float">
            <text:p>331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384027777777778" calcext:value-type="float">
            <text:p>0,00038402777777777800</text:p>
          </table:table-cell>
          <table:table-cell table:formula="of:=[.D160]-[.D15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1" office:value-type="float" office:value="3339" calcext:value-type="float">
            <text:p>333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386458333333333" calcext:value-type="float">
            <text:p>0,00038645833333333300</text:p>
          </table:table-cell>
          <table:table-cell table:formula="of:=[.D161]-[.D16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1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388888888888889" calcext:value-type="float">
            <text:p>0,00038888888888888900</text:p>
          </table:table-cell>
          <table:table-cell table:formula="of:=[.D162]-[.D161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1" office:value-type="float" office:value="3381" calcext:value-type="float">
            <text:p>338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391319444444444" calcext:value-type="float">
            <text:p>0,00039131944444444400</text:p>
          </table:table-cell>
          <table:table-cell table:formula="of:=[.D163]-[.D16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1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9375" calcext:value-type="float">
            <text:p>0,00039375000000000000</text:p>
          </table:table-cell>
          <table:table-cell table:formula="of:=[.D164]-[.D16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1" office:value-type="float" office:value="3423" calcext:value-type="float">
            <text:p>342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96180555555556" calcext:value-type="float">
            <text:p>0,00039618055555555600</text:p>
          </table:table-cell>
          <table:table-cell table:formula="of:=[.D165]-[.D16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1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98611111111111" calcext:value-type="float">
            <text:p>0,00039861111111111100</text:p>
          </table:table-cell>
          <table:table-cell table:formula="of:=[.D166]-[.D165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1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01041666666667" calcext:value-type="float">
            <text:p>0,00040104166666666700</text:p>
          </table:table-cell>
          <table:table-cell table:formula="of:=[.D167]-[.D16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1" office:value-type="float" office:value="3486" calcext:value-type="float">
            <text:p>348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03472222222222" calcext:value-type="float">
            <text:p>0,00040347222222222200</text:p>
          </table:table-cell>
          <table:table-cell table:formula="of:=[.D168]-[.D16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1" office:value-type="float" office:value="3507" calcext:value-type="float">
            <text:p>350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405902777777778" calcext:value-type="float">
            <text:p>0,00040590277777777800</text:p>
          </table:table-cell>
          <table:table-cell table:formula="of:=[.D169]-[.D168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1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408333333333333" calcext:value-type="float">
            <text:p>0,00040833333333333300</text:p>
          </table:table-cell>
          <table:table-cell table:formula="of:=[.D170]-[.D16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1" office:value-type="float" office:value="3549" calcext:value-type="float">
            <text:p>354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410763888888889" calcext:value-type="float">
            <text:p>0,00041076388888888900</text:p>
          </table:table-cell>
          <table:table-cell table:formula="of:=[.D171]-[.D17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1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413194444444444" calcext:value-type="float">
            <text:p>0,00041319444444444400</text:p>
          </table:table-cell>
          <table:table-cell table:formula="of:=[.D172]-[.D17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1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415625" calcext:value-type="float">
            <text:p>0,00041562500000000000</text:p>
          </table:table-cell>
          <table:table-cell table:formula="of:=[.D173]-[.D172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1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418055555555556" calcext:value-type="float">
            <text:p>0,00041805555555555600</text:p>
          </table:table-cell>
          <table:table-cell table:formula="of:=[.D174]-[.D17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1" office:value-type="float" office:value="3633" calcext:value-type="float">
            <text:p>363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420486111111111" calcext:value-type="float">
            <text:p>0,00042048611111111100</text:p>
          </table:table-cell>
          <table:table-cell table:formula="of:=[.D175]-[.D17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1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422916666666667" calcext:value-type="float">
            <text:p>0,00042291666666666700</text:p>
          </table:table-cell>
          <table:table-cell table:formula="of:=[.D176]-[.D17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1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425347222222222" calcext:value-type="float">
            <text:p>0,00042534722222222200</text:p>
          </table:table-cell>
          <table:table-cell table:formula="of:=[.D177]-[.D176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1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427777777777778" calcext:value-type="float">
            <text:p>0,00042777777777777800</text:p>
          </table:table-cell>
          <table:table-cell table:formula="of:=[.D178]-[.D17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1" office:value-type="float" office:value="3717" calcext:value-type="float">
            <text:p>371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430208333333333" calcext:value-type="float">
            <text:p>0,00043020833333333300</text:p>
          </table:table-cell>
          <table:table-cell table:formula="of:=[.D179]-[.D17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1" office:value-type="float" office:value="3738" calcext:value-type="float">
            <text:p>373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432638888888889" calcext:value-type="float">
            <text:p>0,00043263888888888900</text:p>
          </table:table-cell>
          <table:table-cell table:formula="of:=[.D180]-[.D179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1" office:value-type="float" office:value="3759" calcext:value-type="float">
            <text:p>375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435069444444444" calcext:value-type="float">
            <text:p>0,00043506944444444400</text:p>
          </table:table-cell>
          <table:table-cell table:formula="of:=[.D181]-[.D18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1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4375" calcext:value-type="float">
            <text:p>0,00043750000000000000</text:p>
          </table:table-cell>
          <table:table-cell table:formula="of:=[.D182]-[.D18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1" office:value-type="float" office:value="3801" calcext:value-type="float">
            <text:p>380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439930555555556" calcext:value-type="float">
            <text:p>0,00043993055555555600</text:p>
          </table:table-cell>
          <table:table-cell table:formula="of:=[.D183]-[.D18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1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442361111111111" calcext:value-type="float">
            <text:p>0,00044236111111111100</text:p>
          </table:table-cell>
          <table:table-cell table:formula="of:=[.D184]-[.D183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1" office:value-type="float" office:value="3843" calcext:value-type="float">
            <text:p>384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444791666666667" calcext:value-type="float">
            <text:p>0,00044479166666666700</text:p>
          </table:table-cell>
          <table:table-cell table:formula="of:=[.D185]-[.D18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1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447222222222222" calcext:value-type="float">
            <text:p>0,00044722222222222200</text:p>
          </table:table-cell>
          <table:table-cell table:formula="of:=[.D186]-[.D18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1" office:value-type="float" office:value="3885" calcext:value-type="float">
            <text:p>388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449652777777778" calcext:value-type="float">
            <text:p>0,00044965277777777800</text:p>
          </table:table-cell>
          <table:table-cell table:formula="of:=[.D187]-[.D18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1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452083333333333" calcext:value-type="float">
            <text:p>0,00045208333333333300</text:p>
          </table:table-cell>
          <table:table-cell table:formula="of:=[.D188]-[.D187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1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454513888888889" calcext:value-type="float">
            <text:p>0,00045451388888888900</text:p>
          </table:table-cell>
          <table:table-cell table:formula="of:=[.D189]-[.D18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1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456944444444444" calcext:value-type="float">
            <text:p>0,00045694444444444500</text:p>
          </table:table-cell>
          <table:table-cell table:formula="of:=[.D190]-[.D18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1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459375" calcext:value-type="float">
            <text:p>0,00045937500000000000</text:p>
          </table:table-cell>
          <table:table-cell table:formula="of:=[.D191]-[.D190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1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461805555555556" calcext:value-type="float">
            <text:p>0,00046180555555555600</text:p>
          </table:table-cell>
          <table:table-cell table:formula="of:=[.D192]-[.D19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1" office:value-type="float" office:value="4011" calcext:value-type="float">
            <text:p>401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464236111111111" calcext:value-type="float">
            <text:p>0,00046423611111111100</text:p>
          </table:table-cell>
          <table:table-cell table:formula="of:=[.D193]-[.D19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1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466666666666667" calcext:value-type="float">
            <text:p>0,00046666666666666700</text:p>
          </table:table-cell>
          <table:table-cell table:formula="of:=[.D194]-[.D19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1" office:value-type="float" office:value="4053" calcext:value-type="float">
            <text:p>405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469097222222222" calcext:value-type="float">
            <text:p>0,00046909722222222200</text:p>
          </table:table-cell>
          <table:table-cell table:formula="of:=[.D195]-[.D194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1" office:value-type="float" office:value="4074" calcext:value-type="float">
            <text:p>407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471527777777778" calcext:value-type="float">
            <text:p>0,00047152777777777800</text:p>
          </table:table-cell>
          <table:table-cell table:formula="of:=[.D196]-[.D19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1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473958333333333" calcext:value-type="float">
            <text:p>0,00047395833333333300</text:p>
          </table:table-cell>
          <table:table-cell table:formula="of:=[.D197]-[.D19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1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476388888888889" calcext:value-type="float">
            <text:p>0,00047638888888888900</text:p>
          </table:table-cell>
          <table:table-cell table:formula="of:=[.D198]-[.D19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1" office:value-type="float" office:value="4137" calcext:value-type="float">
            <text:p>413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478819444444444" calcext:value-type="float">
            <text:p>0,00047881944444444400</text:p>
          </table:table-cell>
          <table:table-cell table:formula="of:=[.D199]-[.D198]" office:value-type="float" office:value="0.0000024305555555556" calcext:value-type="float">
            <text:p>0,000002430555555555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1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48125" calcext:value-type="float">
            <text:p>0,00048125000000000000</text:p>
          </table:table-cell>
          <table:table-cell table:formula="of:=[.D200]-[.D19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1" office:value-type="float" office:value="4179" calcext:value-type="float">
            <text:p>417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483680555555556" calcext:value-type="float">
            <text:p>0,00048368055555555600</text:p>
          </table:table-cell>
          <table:table-cell table:formula="of:=[.D201]-[.D20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1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486111111111111" calcext:value-type="float">
            <text:p>0,00048611111111111100</text:p>
          </table:table-cell>
          <table:table-cell table:formula="of:=[.D202]-[.D20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1" office:value-type="float" office:value="4221" calcext:value-type="float">
            <text:p>422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488541666666667" calcext:value-type="float">
            <text:p>0,00048854166666666700</text:p>
          </table:table-cell>
          <table:table-cell table:formula="of:=[.D203]-[.D20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1" office:value-type="float" office:value="4242" calcext:value-type="float">
            <text:p>424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490972222222222" calcext:value-type="float">
            <text:p>0,00049097222222222200</text:p>
          </table:table-cell>
          <table:table-cell table:formula="of:=[.D204]-[.D20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1" office:value-type="float" office:value="4263" calcext:value-type="float">
            <text:p>426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493402777777778" calcext:value-type="float">
            <text:p>0,00049340277777777800</text:p>
          </table:table-cell>
          <table:table-cell table:formula="of:=[.D205]-[.D20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1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495833333333333" calcext:value-type="float">
            <text:p>0,00049583333333333300</text:p>
          </table:table-cell>
          <table:table-cell table:formula="of:=[.D206]-[.D20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1" office:value-type="float" office:value="4305" calcext:value-type="float">
            <text:p>430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498263888888889" calcext:value-type="float">
            <text:p>0,00049826388888888900</text:p>
          </table:table-cell>
          <table:table-cell table:formula="of:=[.D207]-[.D20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1" office:value-type="float" office:value="4326" calcext:value-type="float">
            <text:p>432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500694444444445" calcext:value-type="float">
            <text:p>0,00050069444444444500</text:p>
          </table:table-cell>
          <table:table-cell table:formula="of:=[.D208]-[.D20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1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503125" calcext:value-type="float">
            <text:p>0,00050312500000000000</text:p>
          </table:table-cell>
          <table:table-cell table:formula="of:=[.D209]-[.D20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1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505555555555556" calcext:value-type="float">
            <text:p>0,00050555555555555600</text:p>
          </table:table-cell>
          <table:table-cell table:formula="of:=[.D210]-[.D20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1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507986111111111" calcext:value-type="float">
            <text:p>0,00050798611111111100</text:p>
          </table:table-cell>
          <table:table-cell table:formula="of:=[.D211]-[.D21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1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510416666666667" calcext:value-type="float">
            <text:p>0,00051041666666666700</text:p>
          </table:table-cell>
          <table:table-cell table:formula="of:=[.D212]-[.D21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1" office:value-type="float" office:value="4431" calcext:value-type="float">
            <text:p>443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512847222222222" calcext:value-type="float">
            <text:p>0,00051284722222222200</text:p>
          </table:table-cell>
          <table:table-cell table:formula="of:=[.D213]-[.D21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1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515277777777778" calcext:value-type="float">
            <text:p>0,00051527777777777800</text:p>
          </table:table-cell>
          <table:table-cell table:formula="of:=[.D214]-[.D21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1" office:value-type="float" office:value="4473" calcext:value-type="float">
            <text:p>447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517708333333333" calcext:value-type="float">
            <text:p>0,00051770833333333300</text:p>
          </table:table-cell>
          <table:table-cell table:formula="of:=[.D215]-[.D21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1" office:value-type="float" office:value="4494" calcext:value-type="float">
            <text:p>449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520138888888889" calcext:value-type="float">
            <text:p>0,00052013888888888900</text:p>
          </table:table-cell>
          <table:table-cell table:formula="of:=[.D216]-[.D21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1" office:value-type="float" office:value="4515" calcext:value-type="float">
            <text:p>451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522569444444444" calcext:value-type="float">
            <text:p>0,00052256944444444400</text:p>
          </table:table-cell>
          <table:table-cell table:formula="of:=[.D217]-[.D21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1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525" calcext:value-type="float">
            <text:p>0,00052500000000000000</text:p>
          </table:table-cell>
          <table:table-cell table:formula="of:=[.D218]-[.D21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1" office:value-type="float" office:value="4557" calcext:value-type="float">
            <text:p>455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527430555555556" calcext:value-type="float">
            <text:p>0,00052743055555555600</text:p>
          </table:table-cell>
          <table:table-cell table:formula="of:=[.D219]-[.D21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1" office:value-type="float" office:value="4578" calcext:value-type="float">
            <text:p>457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529861111111111" calcext:value-type="float">
            <text:p>0,00052986111111111100</text:p>
          </table:table-cell>
          <table:table-cell table:formula="of:=[.D220]-[.D21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1" office:value-type="float" office:value="4599" calcext:value-type="float">
            <text:p>459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532291666666667" calcext:value-type="float">
            <text:p>0,00053229166666666700</text:p>
          </table:table-cell>
          <table:table-cell table:formula="of:=[.D221]-[.D22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1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534722222222222" calcext:value-type="float">
            <text:p>0,00053472222222222200</text:p>
          </table:table-cell>
          <table:table-cell table:formula="of:=[.D222]-[.D22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1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537152777777778" calcext:value-type="float">
            <text:p>0,00053715277777777800</text:p>
          </table:table-cell>
          <table:table-cell table:formula="of:=[.D223]-[.D22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1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539583333333333" calcext:value-type="float">
            <text:p>0,00053958333333333300</text:p>
          </table:table-cell>
          <table:table-cell table:formula="of:=[.D224]-[.D22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1" office:value-type="float" office:value="4683" calcext:value-type="float">
            <text:p>468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542013888888889" calcext:value-type="float">
            <text:p>0,00054201388888888900</text:p>
          </table:table-cell>
          <table:table-cell table:formula="of:=[.D225]-[.D22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1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544444444444444" calcext:value-type="float">
            <text:p>0,00054444444444444400</text:p>
          </table:table-cell>
          <table:table-cell table:formula="of:=[.D226]-[.D22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1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546875" calcext:value-type="float">
            <text:p>0,00054687500000000000</text:p>
          </table:table-cell>
          <table:table-cell table:formula="of:=[.D227]-[.D22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1" office:value-type="float" office:value="4746" calcext:value-type="float">
            <text:p>474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549305555555556" calcext:value-type="float">
            <text:p>0,00054930555555555600</text:p>
          </table:table-cell>
          <table:table-cell table:formula="of:=[.D228]-[.D22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1" office:value-type="float" office:value="4767" calcext:value-type="float">
            <text:p>476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551736111111111" calcext:value-type="float">
            <text:p>0,00055173611111111100</text:p>
          </table:table-cell>
          <table:table-cell table:formula="of:=[.D229]-[.D22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1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554166666666667" calcext:value-type="float">
            <text:p>0,00055416666666666700</text:p>
          </table:table-cell>
          <table:table-cell table:formula="of:=[.D230]-[.D22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1" office:value-type="float" office:value="4809" calcext:value-type="float">
            <text:p>480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556597222222222" calcext:value-type="float">
            <text:p>0,00055659722222222200</text:p>
          </table:table-cell>
          <table:table-cell table:formula="of:=[.D231]-[.D23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1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559027777777778" calcext:value-type="float">
            <text:p>0,00055902777777777800</text:p>
          </table:table-cell>
          <table:table-cell table:formula="of:=[.D232]-[.D23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1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561458333333333" calcext:value-type="float">
            <text:p>0,00056145833333333300</text:p>
          </table:table-cell>
          <table:table-cell table:formula="of:=[.D233]-[.D23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1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563888888888889" calcext:value-type="float">
            <text:p>0,00056388888888888900</text:p>
          </table:table-cell>
          <table:table-cell table:formula="of:=[.D234]-[.D23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1" office:value-type="float" office:value="4893" calcext:value-type="float">
            <text:p>489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566319444444445" calcext:value-type="float">
            <text:p>0,00056631944444444500</text:p>
          </table:table-cell>
          <table:table-cell table:formula="of:=[.D235]-[.D23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1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56875" calcext:value-type="float">
            <text:p>0,00056875000000000000</text:p>
          </table:table-cell>
          <table:table-cell table:formula="of:=[.D236]-[.D23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1" office:value-type="float" office:value="4935" calcext:value-type="float">
            <text:p>493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571180555555556" calcext:value-type="float">
            <text:p>0,00057118055555555600</text:p>
          </table:table-cell>
          <table:table-cell table:formula="of:=[.D237]-[.D23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1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573611111111111" calcext:value-type="float">
            <text:p>0,00057361111111111100</text:p>
          </table:table-cell>
          <table:table-cell table:formula="of:=[.D238]-[.D23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1" office:value-type="float" office:value="4977" calcext:value-type="float">
            <text:p>497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576041666666667" calcext:value-type="float">
            <text:p>0,00057604166666666700</text:p>
          </table:table-cell>
          <table:table-cell table:formula="of:=[.D239]-[.D23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1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578472222222222" calcext:value-type="float">
            <text:p>0,00057847222222222200</text:p>
          </table:table-cell>
          <table:table-cell table:formula="of:=[.D240]-[.D23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1" office:value-type="float" office:value="5019" calcext:value-type="float">
            <text:p>501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580902777777778" calcext:value-type="float">
            <text:p>0,00058090277777777800</text:p>
          </table:table-cell>
          <table:table-cell table:formula="of:=[.D241]-[.D24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1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583333333333333" calcext:value-type="float">
            <text:p>0,00058333333333333300</text:p>
          </table:table-cell>
          <table:table-cell table:formula="of:=[.D242]-[.D24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1" office:value-type="float" office:value="5061" calcext:value-type="float">
            <text:p>506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585763888888889" calcext:value-type="float">
            <text:p>0,00058576388888888900</text:p>
          </table:table-cell>
          <table:table-cell table:formula="of:=[.D243]-[.D24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1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588194444444445" calcext:value-type="float">
            <text:p>0,00058819444444444500</text:p>
          </table:table-cell>
          <table:table-cell table:formula="of:=[.D244]-[.D24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1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590625" calcext:value-type="float">
            <text:p>0,00059062500000000000</text:p>
          </table:table-cell>
          <table:table-cell table:formula="of:=[.D245]-[.D24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1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593055555555556" calcext:value-type="float">
            <text:p>0,00059305555555555600</text:p>
          </table:table-cell>
          <table:table-cell table:formula="of:=[.D246]-[.D24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1" office:value-type="float" office:value="5145" calcext:value-type="float">
            <text:p>514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595486111111111" calcext:value-type="float">
            <text:p>0,00059548611111111100</text:p>
          </table:table-cell>
          <table:table-cell table:formula="of:=[.D247]-[.D24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1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597916666666667" calcext:value-type="float">
            <text:p>0,00059791666666666700</text:p>
          </table:table-cell>
          <table:table-cell table:formula="of:=[.D248]-[.D24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1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600347222222222" calcext:value-type="float">
            <text:p>0,00060034722222222200</text:p>
          </table:table-cell>
          <table:table-cell table:formula="of:=[.D249]-[.D24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1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602777777777778" calcext:value-type="float">
            <text:p>0,00060277777777777800</text:p>
          </table:table-cell>
          <table:table-cell table:formula="of:=[.D250]-[.D24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1" office:value-type="float" office:value="5229" calcext:value-type="float">
            <text:p>522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605208333333333" calcext:value-type="float">
            <text:p>0,00060520833333333300</text:p>
          </table:table-cell>
          <table:table-cell table:formula="of:=[.D251]-[.D25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1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607638888888889" calcext:value-type="float">
            <text:p>0,00060763888888888900</text:p>
          </table:table-cell>
          <table:table-cell table:formula="of:=[.D252]-[.D25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1" office:value-type="float" office:value="5271" calcext:value-type="float">
            <text:p>527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610069444444444" calcext:value-type="float">
            <text:p>0,00061006944444444400</text:p>
          </table:table-cell>
          <table:table-cell table:formula="of:=[.D253]-[.D25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1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6125" calcext:value-type="float">
            <text:p>0,00061250000000000000</text:p>
          </table:table-cell>
          <table:table-cell table:formula="of:=[.D254]-[.D25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1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614930555555556" calcext:value-type="float">
            <text:p>0,00061493055555555600</text:p>
          </table:table-cell>
          <table:table-cell table:formula="of:=[.D255]-[.D25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1" office:value-type="float" office:value="5334" calcext:value-type="float">
            <text:p>533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617361111111111" calcext:value-type="float">
            <text:p>0,00061736111111111100</text:p>
          </table:table-cell>
          <table:table-cell table:formula="of:=[.D256]-[.D25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1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619791666666667" calcext:value-type="float">
            <text:p>0,00061979166666666700</text:p>
          </table:table-cell>
          <table:table-cell table:formula="of:=[.D257]-[.D25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1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622222222222222" calcext:value-type="float">
            <text:p>0,00062222222222222200</text:p>
          </table:table-cell>
          <table:table-cell table:formula="of:=[.D258]-[.D25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1" office:value-type="float" office:value="5397" calcext:value-type="float">
            <text:p>539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624652777777778" calcext:value-type="float">
            <text:p>0,00062465277777777800</text:p>
          </table:table-cell>
          <table:table-cell table:formula="of:=[.D259]-[.D25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1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627083333333333" calcext:value-type="float">
            <text:p>0,00062708333333333300</text:p>
          </table:table-cell>
          <table:table-cell table:formula="of:=[.D260]-[.D25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1" office:value-type="float" office:value="5439" calcext:value-type="float">
            <text:p>543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629513888888889" calcext:value-type="float">
            <text:p>0,00062951388888888900</text:p>
          </table:table-cell>
          <table:table-cell table:formula="of:=[.D261]-[.D26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1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631944444444444" calcext:value-type="float">
            <text:p>0,00063194444444444400</text:p>
          </table:table-cell>
          <table:table-cell table:formula="of:=[.D262]-[.D26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1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634375" calcext:value-type="float">
            <text:p>0,00063437500000000000</text:p>
          </table:table-cell>
          <table:table-cell table:formula="of:=[.D263]-[.D26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1" office:value-type="float" office:value="5502" calcext:value-type="float">
            <text:p>550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636805555555556" calcext:value-type="float">
            <text:p>0,00063680555555555600</text:p>
          </table:table-cell>
          <table:table-cell table:formula="of:=[.D264]-[.D26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1" office:value-type="float" office:value="5523" calcext:value-type="float">
            <text:p>552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639236111111111" calcext:value-type="float">
            <text:p>0,00063923611111111100</text:p>
          </table:table-cell>
          <table:table-cell table:formula="of:=[.D265]-[.D26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1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641666666666667" calcext:value-type="float">
            <text:p>0,00064166666666666700</text:p>
          </table:table-cell>
          <table:table-cell table:formula="of:=[.D266]-[.D26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1" office:value-type="float" office:value="5565" calcext:value-type="float">
            <text:p>556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644097222222222" calcext:value-type="float">
            <text:p>0,00064409722222222200</text:p>
          </table:table-cell>
          <table:table-cell table:formula="of:=[.D267]-[.D26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1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646527777777778" calcext:value-type="float">
            <text:p>0,00064652777777777800</text:p>
          </table:table-cell>
          <table:table-cell table:formula="of:=[.D268]-[.D26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1" office:value-type="float" office:value="5607" calcext:value-type="float">
            <text:p>560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648958333333333" calcext:value-type="float">
            <text:p>0,00064895833333333300</text:p>
          </table:table-cell>
          <table:table-cell table:formula="of:=[.D269]-[.D26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1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651388888888889" calcext:value-type="float">
            <text:p>0,00065138888888888900</text:p>
          </table:table-cell>
          <table:table-cell table:formula="of:=[.D270]-[.D26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1" office:value-type="float" office:value="5649" calcext:value-type="float">
            <text:p>564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653819444444444" calcext:value-type="float">
            <text:p>0,00065381944444444400</text:p>
          </table:table-cell>
          <table:table-cell table:formula="of:=[.D271]-[.D27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1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65625" calcext:value-type="float">
            <text:p>0,00065625000000000000</text:p>
          </table:table-cell>
          <table:table-cell table:formula="of:=[.D272]-[.D27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1" office:value-type="float" office:value="5691" calcext:value-type="float">
            <text:p>569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658680555555556" calcext:value-type="float">
            <text:p>0,00065868055555555600</text:p>
          </table:table-cell>
          <table:table-cell table:formula="of:=[.D273]-[.D27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1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661111111111111" calcext:value-type="float">
            <text:p>0,00066111111111111100</text:p>
          </table:table-cell>
          <table:table-cell table:formula="of:=[.D274]-[.D27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1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663541666666667" calcext:value-type="float">
            <text:p>0,00066354166666666700</text:p>
          </table:table-cell>
          <table:table-cell table:formula="of:=[.D275]-[.D27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1" office:value-type="float" office:value="5754" calcext:value-type="float">
            <text:p>575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665972222222222" calcext:value-type="float">
            <text:p>0,00066597222222222200</text:p>
          </table:table-cell>
          <table:table-cell table:formula="of:=[.D276]-[.D27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1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668402777777778" calcext:value-type="float">
            <text:p>0,00066840277777777800</text:p>
          </table:table-cell>
          <table:table-cell table:formula="of:=[.D277]-[.D27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1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670833333333333" calcext:value-type="float">
            <text:p>0,00067083333333333300</text:p>
          </table:table-cell>
          <table:table-cell table:formula="of:=[.D278]-[.D27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1" office:value-type="float" office:value="5817" calcext:value-type="float">
            <text:p>581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673263888888889" calcext:value-type="float">
            <text:p>0,00067326388888888900</text:p>
          </table:table-cell>
          <table:table-cell table:formula="of:=[.D279]-[.D27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1" office:value-type="float" office:value="5838" calcext:value-type="float">
            <text:p>583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675694444444445" calcext:value-type="float">
            <text:p>0,00067569444444444500</text:p>
          </table:table-cell>
          <table:table-cell table:formula="of:=[.D280]-[.D27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1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678125" calcext:value-type="float">
            <text:p>0,00067812500000000000</text:p>
          </table:table-cell>
          <table:table-cell table:formula="of:=[.D281]-[.D28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1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680555555555556" calcext:value-type="float">
            <text:p>0,00068055555555555600</text:p>
          </table:table-cell>
          <table:table-cell table:formula="of:=[.D282]-[.D28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1" office:value-type="float" office:value="5901" calcext:value-type="float">
            <text:p>590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682986111111111" calcext:value-type="float">
            <text:p>0,00068298611111111100</text:p>
          </table:table-cell>
          <table:table-cell table:formula="of:=[.D283]-[.D28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1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685416666666667" calcext:value-type="float">
            <text:p>0,00068541666666666700</text:p>
          </table:table-cell>
          <table:table-cell table:formula="of:=[.D284]-[.D28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1" office:value-type="float" office:value="5943" calcext:value-type="float">
            <text:p>594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687847222222222" calcext:value-type="float">
            <text:p>0,00068784722222222200</text:p>
          </table:table-cell>
          <table:table-cell table:formula="of:=[.D285]-[.D28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1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690277777777778" calcext:value-type="float">
            <text:p>0,00069027777777777800</text:p>
          </table:table-cell>
          <table:table-cell table:formula="of:=[.D286]-[.D28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1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692708333333333" calcext:value-type="float">
            <text:p>0,00069270833333333300</text:p>
          </table:table-cell>
          <table:table-cell table:formula="of:=[.D287]-[.D28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1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695138888888889" calcext:value-type="float">
            <text:p>0,00069513888888888900</text:p>
          </table:table-cell>
          <table:table-cell table:formula="of:=[.D288]-[.D28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1" office:value-type="float" office:value="6027" calcext:value-type="float">
            <text:p>602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697569444444445" calcext:value-type="float">
            <text:p>0,00069756944444444500</text:p>
          </table:table-cell>
          <table:table-cell table:formula="of:=[.D289]-[.D28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1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7" calcext:value-type="float">
            <text:p>0,00070000000000000000</text:p>
          </table:table-cell>
          <table:table-cell table:formula="of:=[.D290]-[.D28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1" office:value-type="float" office:value="6069" calcext:value-type="float">
            <text:p>606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702430555555556" calcext:value-type="float">
            <text:p>0,00070243055555555600</text:p>
          </table:table-cell>
          <table:table-cell table:formula="of:=[.D291]-[.D29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1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704861111111111" calcext:value-type="float">
            <text:p>0,00070486111111111100</text:p>
          </table:table-cell>
          <table:table-cell table:formula="of:=[.D292]-[.D29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1" office:value-type="float" office:value="6111" calcext:value-type="float">
            <text:p>611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707291666666667" calcext:value-type="float">
            <text:p>0,00070729166666666700</text:p>
          </table:table-cell>
          <table:table-cell table:formula="of:=[.D293]-[.D29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1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709722222222222" calcext:value-type="float">
            <text:p>0,00070972222222222200</text:p>
          </table:table-cell>
          <table:table-cell table:formula="of:=[.D294]-[.D29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1" office:value-type="float" office:value="6153" calcext:value-type="float">
            <text:p>615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712152777777778" calcext:value-type="float">
            <text:p>0,00071215277777777800</text:p>
          </table:table-cell>
          <table:table-cell table:formula="of:=[.D295]-[.D29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1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714583333333333" calcext:value-type="float">
            <text:p>0,00071458333333333300</text:p>
          </table:table-cell>
          <table:table-cell table:formula="of:=[.D296]-[.D29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1" office:value-type="float" office:value="6195" calcext:value-type="float">
            <text:p>619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717013888888889" calcext:value-type="float">
            <text:p>0,00071701388888888900</text:p>
          </table:table-cell>
          <table:table-cell table:formula="of:=[.D297]-[.D29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1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719444444444444" calcext:value-type="float">
            <text:p>0,00071944444444444400</text:p>
          </table:table-cell>
          <table:table-cell table:formula="of:=[.D298]-[.D29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1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721875" calcext:value-type="float">
            <text:p>0,00072187500000000000</text:p>
          </table:table-cell>
          <table:table-cell table:formula="of:=[.D299]-[.D29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1" office:value-type="float" office:value="6258" calcext:value-type="float">
            <text:p>625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724305555555556" calcext:value-type="float">
            <text:p>0,00072430555555555600</text:p>
          </table:table-cell>
          <table:table-cell table:formula="of:=[.D300]-[.D29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1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726736111111111" calcext:value-type="float">
            <text:p>0,00072673611111111100</text:p>
          </table:table-cell>
          <table:table-cell table:formula="of:=[.D301]-[.D30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1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729166666666667" calcext:value-type="float">
            <text:p>0,00072916666666666700</text:p>
          </table:table-cell>
          <table:table-cell table:formula="of:=[.D302]-[.D30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1" office:value-type="float" office:value="6321" calcext:value-type="float">
            <text:p>632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731597222222222" calcext:value-type="float">
            <text:p>0,00073159722222222200</text:p>
          </table:table-cell>
          <table:table-cell table:formula="of:=[.D303]-[.D30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1" office:value-type="float" office:value="6342" calcext:value-type="float">
            <text:p>634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734027777777778" calcext:value-type="float">
            <text:p>0,00073402777777777800</text:p>
          </table:table-cell>
          <table:table-cell table:formula="of:=[.D304]-[.D30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1" office:value-type="float" office:value="6363" calcext:value-type="float">
            <text:p>636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736458333333333" calcext:value-type="float">
            <text:p>0,00073645833333333300</text:p>
          </table:table-cell>
          <table:table-cell table:formula="of:=[.D305]-[.D30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1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738888888888889" calcext:value-type="float">
            <text:p>0,00073888888888888900</text:p>
          </table:table-cell>
          <table:table-cell table:formula="of:=[.D306]-[.D30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1" office:value-type="float" office:value="6405" calcext:value-type="float">
            <text:p>640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741319444444444" calcext:value-type="float">
            <text:p>0,00074131944444444500</text:p>
          </table:table-cell>
          <table:table-cell table:formula="of:=[.D307]-[.D30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1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74375" calcext:value-type="float">
            <text:p>0,00074375000000000000</text:p>
          </table:table-cell>
          <table:table-cell table:formula="of:=[.D308]-[.D30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1" office:value-type="float" office:value="6447" calcext:value-type="float">
            <text:p>644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746180555555556" calcext:value-type="float">
            <text:p>0,00074618055555555600</text:p>
          </table:table-cell>
          <table:table-cell table:formula="of:=[.D309]-[.D30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1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748611111111111" calcext:value-type="float">
            <text:p>0,00074861111111111100</text:p>
          </table:table-cell>
          <table:table-cell table:formula="of:=[.D310]-[.D30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1" office:value-type="float" office:value="6489" calcext:value-type="float">
            <text:p>648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751041666666667" calcext:value-type="float">
            <text:p>0,00075104166666666700</text:p>
          </table:table-cell>
          <table:table-cell table:formula="of:=[.D311]-[.D31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1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753472222222222" calcext:value-type="float">
            <text:p>0,00075347222222222200</text:p>
          </table:table-cell>
          <table:table-cell table:formula="of:=[.D312]-[.D31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1" office:value-type="float" office:value="6531" calcext:value-type="float">
            <text:p>653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755902777777778" calcext:value-type="float">
            <text:p>0,00075590277777777800</text:p>
          </table:table-cell>
          <table:table-cell table:formula="of:=[.D313]-[.D31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1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758333333333333" calcext:value-type="float">
            <text:p>0,00075833333333333300</text:p>
          </table:table-cell>
          <table:table-cell table:formula="of:=[.D314]-[.D31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1" office:value-type="float" office:value="6573" calcext:value-type="float">
            <text:p>657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760763888888889" calcext:value-type="float">
            <text:p>0,00076076388888888900</text:p>
          </table:table-cell>
          <table:table-cell table:formula="of:=[.D315]-[.D31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1" office:value-type="float" office:value="6594" calcext:value-type="float">
            <text:p>659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763194444444445" calcext:value-type="float">
            <text:p>0,00076319444444444500</text:p>
          </table:table-cell>
          <table:table-cell table:formula="of:=[.D316]-[.D31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1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765625" calcext:value-type="float">
            <text:p>0,00076562500000000000</text:p>
          </table:table-cell>
          <table:table-cell table:formula="of:=[.D317]-[.D31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1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768055555555556" calcext:value-type="float">
            <text:p>0,00076805555555555600</text:p>
          </table:table-cell>
          <table:table-cell table:formula="of:=[.D318]-[.D31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1" office:value-type="float" office:value="6657" calcext:value-type="float">
            <text:p>665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770486111111111" calcext:value-type="float">
            <text:p>0,00077048611111111100</text:p>
          </table:table-cell>
          <table:table-cell table:formula="of:=[.D319]-[.D31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1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772916666666667" calcext:value-type="float">
            <text:p>0,00077291666666666700</text:p>
          </table:table-cell>
          <table:table-cell table:formula="of:=[.D320]-[.D31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1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775347222222222" calcext:value-type="float">
            <text:p>0,00077534722222222200</text:p>
          </table:table-cell>
          <table:table-cell table:formula="of:=[.D321]-[.D32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1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777777777777778" calcext:value-type="float">
            <text:p>0,00077777777777777800</text:p>
          </table:table-cell>
          <table:table-cell table:formula="of:=[.D322]-[.D32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1" office:value-type="float" office:value="6741" calcext:value-type="float">
            <text:p>674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780208333333333" calcext:value-type="float">
            <text:p>0,00078020833333333400</text:p>
          </table:table-cell>
          <table:table-cell table:formula="of:=[.D323]-[.D32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1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782638888888889" calcext:value-type="float">
            <text:p>0,00078263888888888900</text:p>
          </table:table-cell>
          <table:table-cell table:formula="of:=[.D324]-[.D32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1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785069444444445" calcext:value-type="float">
            <text:p>0,00078506944444444500</text:p>
          </table:table-cell>
          <table:table-cell table:formula="of:=[.D325]-[.D32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1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7875" calcext:value-type="float">
            <text:p>0,00078750000000000000</text:p>
          </table:table-cell>
          <table:table-cell table:formula="of:=[.D326]-[.D32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1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789930555555556" calcext:value-type="float">
            <text:p>0,00078993055555555600</text:p>
          </table:table-cell>
          <table:table-cell table:formula="of:=[.D327]-[.D32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1" office:value-type="float" office:value="6846" calcext:value-type="float">
            <text:p>684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792361111111111" calcext:value-type="float">
            <text:p>0,00079236111111111100</text:p>
          </table:table-cell>
          <table:table-cell table:formula="of:=[.D328]-[.D32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1" office:value-type="float" office:value="6867" calcext:value-type="float">
            <text:p>686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794791666666667" calcext:value-type="float">
            <text:p>0,00079479166666666700</text:p>
          </table:table-cell>
          <table:table-cell table:formula="of:=[.D329]-[.D32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1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797222222222222" calcext:value-type="float">
            <text:p>0,00079722222222222200</text:p>
          </table:table-cell>
          <table:table-cell table:formula="of:=[.D330]-[.D32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1" office:value-type="float" office:value="6909" calcext:value-type="float">
            <text:p>690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799652777777778" calcext:value-type="float">
            <text:p>0,00079965277777777800</text:p>
          </table:table-cell>
          <table:table-cell table:formula="of:=[.D331]-[.D33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1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802083333333333" calcext:value-type="float">
            <text:p>0,00080208333333333300</text:p>
          </table:table-cell>
          <table:table-cell table:formula="of:=[.D332]-[.D33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1" office:value-type="float" office:value="6951" calcext:value-type="float">
            <text:p>695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804513888888889" calcext:value-type="float">
            <text:p>0,00080451388888888900</text:p>
          </table:table-cell>
          <table:table-cell table:formula="of:=[.D333]-[.D33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1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806944444444444" calcext:value-type="float">
            <text:p>0,00080694444444444400</text:p>
          </table:table-cell>
          <table:table-cell table:formula="of:=[.D334]-[.D33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1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809375" calcext:value-type="float">
            <text:p>0,00080937500000000000</text:p>
          </table:table-cell>
          <table:table-cell table:formula="of:=[.D335]-[.D33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1" office:value-type="float" office:value="7014" calcext:value-type="float">
            <text:p>701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811805555555556" calcext:value-type="float">
            <text:p>0,00081180555555555600</text:p>
          </table:table-cell>
          <table:table-cell table:formula="of:=[.D336]-[.D33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1" office:value-type="float" office:value="7035" calcext:value-type="float">
            <text:p>703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814236111111111" calcext:value-type="float">
            <text:p>0,00081423611111111100</text:p>
          </table:table-cell>
          <table:table-cell table:formula="of:=[.D337]-[.D33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1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816666666666667" calcext:value-type="float">
            <text:p>0,00081666666666666700</text:p>
          </table:table-cell>
          <table:table-cell table:formula="of:=[.D338]-[.D33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1" office:value-type="float" office:value="7077" calcext:value-type="float">
            <text:p>707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819097222222222" calcext:value-type="float">
            <text:p>0,00081909722222222200</text:p>
          </table:table-cell>
          <table:table-cell table:formula="of:=[.D339]-[.D33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1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821527777777778" calcext:value-type="float">
            <text:p>0,00082152777777777800</text:p>
          </table:table-cell>
          <table:table-cell table:formula="of:=[.D340]-[.D33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1" office:value-type="float" office:value="7119" calcext:value-type="float">
            <text:p>711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823958333333333" calcext:value-type="float">
            <text:p>0,00082395833333333300</text:p>
          </table:table-cell>
          <table:table-cell table:formula="of:=[.D341]-[.D34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1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826388888888889" calcext:value-type="float">
            <text:p>0,00082638888888888900</text:p>
          </table:table-cell>
          <table:table-cell table:formula="of:=[.D342]-[.D34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1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828819444444444" calcext:value-type="float">
            <text:p>0,00082881944444444500</text:p>
          </table:table-cell>
          <table:table-cell table:formula="of:=[.D343]-[.D34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1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83125" calcext:value-type="float">
            <text:p>0,00083125000000000000</text:p>
          </table:table-cell>
          <table:table-cell table:formula="of:=[.D344]-[.D34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1" office:value-type="float" office:value="7203" calcext:value-type="float">
            <text:p>720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833680555555556" calcext:value-type="float">
            <text:p>0,00083368055555555600</text:p>
          </table:table-cell>
          <table:table-cell table:formula="of:=[.D345]-[.D34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1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836111111111111" calcext:value-type="float">
            <text:p>0,00083611111111111100</text:p>
          </table:table-cell>
          <table:table-cell table:formula="of:=[.D346]-[.D34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1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838541666666667" calcext:value-type="float">
            <text:p>0,00083854166666666700</text:p>
          </table:table-cell>
          <table:table-cell table:formula="of:=[.D347]-[.D34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1" office:value-type="float" office:value="7266" calcext:value-type="float">
            <text:p>726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840972222222222" calcext:value-type="float">
            <text:p>0,00084097222222222200</text:p>
          </table:table-cell>
          <table:table-cell table:formula="of:=[.D348]-[.D34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1" office:value-type="float" office:value="7287" calcext:value-type="float">
            <text:p>728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843402777777778" calcext:value-type="float">
            <text:p>0,00084340277777777800</text:p>
          </table:table-cell>
          <table:table-cell table:formula="of:=[.D349]-[.D34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1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845833333333333" calcext:value-type="float">
            <text:p>0,00084583333333333300</text:p>
          </table:table-cell>
          <table:table-cell table:formula="of:=[.D350]-[.D34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1" office:value-type="float" office:value="7329" calcext:value-type="float">
            <text:p>732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848263888888889" calcext:value-type="float">
            <text:p>0,00084826388888888900</text:p>
          </table:table-cell>
          <table:table-cell table:formula="of:=[.D351]-[.D35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1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850694444444444" calcext:value-type="float">
            <text:p>0,00085069444444444400</text:p>
          </table:table-cell>
          <table:table-cell table:formula="of:=[.D352]-[.D35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1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853125" calcext:value-type="float">
            <text:p>0,00085312500000000000</text:p>
          </table:table-cell>
          <table:table-cell table:formula="of:=[.D353]-[.D35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1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855555555555556" calcext:value-type="float">
            <text:p>0,00085555555555555600</text:p>
          </table:table-cell>
          <table:table-cell table:formula="of:=[.D354]-[.D35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1" office:value-type="float" office:value="7413" calcext:value-type="float">
            <text:p>741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857986111111111" calcext:value-type="float">
            <text:p>0,00085798611111111100</text:p>
          </table:table-cell>
          <table:table-cell table:formula="of:=[.D355]-[.D35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1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860416666666667" calcext:value-type="float">
            <text:p>0,00086041666666666700</text:p>
          </table:table-cell>
          <table:table-cell table:formula="of:=[.D356]-[.D35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1" office:value-type="float" office:value="7455" calcext:value-type="float">
            <text:p>745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862847222222222" calcext:value-type="float">
            <text:p>0,00086284722222222200</text:p>
          </table:table-cell>
          <table:table-cell table:formula="of:=[.D357]-[.D35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1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865277777777778" calcext:value-type="float">
            <text:p>0,00086527777777777800</text:p>
          </table:table-cell>
          <table:table-cell table:formula="of:=[.D358]-[.D35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1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867708333333333" calcext:value-type="float">
            <text:p>0,00086770833333333300</text:p>
          </table:table-cell>
          <table:table-cell table:formula="of:=[.D359]-[.D35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1" office:value-type="float" office:value="7518" calcext:value-type="float">
            <text:p>751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870138888888889" calcext:value-type="float">
            <text:p>0,00087013888888888900</text:p>
          </table:table-cell>
          <table:table-cell table:formula="of:=[.D360]-[.D35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1" office:value-type="float" office:value="7539" calcext:value-type="float">
            <text:p>753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872569444444445" calcext:value-type="float">
            <text:p>0,00087256944444444500</text:p>
          </table:table-cell>
          <table:table-cell table:formula="of:=[.D361]-[.D36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1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875" calcext:value-type="float">
            <text:p>0,00087500000000000000</text:p>
          </table:table-cell>
          <table:table-cell table:formula="of:=[.D362]-[.D36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1" office:value-type="float" office:value="7581" calcext:value-type="float">
            <text:p>758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877430555555556" calcext:value-type="float">
            <text:p>0,00087743055555555600</text:p>
          </table:table-cell>
          <table:table-cell table:formula="of:=[.D363]-[.D36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1" office:value-type="float" office:value="7602" calcext:value-type="float">
            <text:p>760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879861111111111" calcext:value-type="float">
            <text:p>0,00087986111111111100</text:p>
          </table:table-cell>
          <table:table-cell table:formula="of:=[.D364]-[.D36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1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882291666666667" calcext:value-type="float">
            <text:p>0,00088229166666666700</text:p>
          </table:table-cell>
          <table:table-cell table:formula="of:=[.D365]-[.D36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1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884722222222222" calcext:value-type="float">
            <text:p>0,00088472222222222200</text:p>
          </table:table-cell>
          <table:table-cell table:formula="of:=[.D366]-[.D36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1" office:value-type="float" office:value="7665" calcext:value-type="float">
            <text:p>766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887152777777778" calcext:value-type="float">
            <text:p>0,00088715277777777800</text:p>
          </table:table-cell>
          <table:table-cell table:formula="of:=[.D367]-[.D36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1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889583333333333" calcext:value-type="float">
            <text:p>0,00088958333333333400</text:p>
          </table:table-cell>
          <table:table-cell table:formula="of:=[.D368]-[.D36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1" office:value-type="float" office:value="7707" calcext:value-type="float">
            <text:p>770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892013888888889" calcext:value-type="float">
            <text:p>0,00089201388888888900</text:p>
          </table:table-cell>
          <table:table-cell table:formula="of:=[.D369]-[.D36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1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894444444444445" calcext:value-type="float">
            <text:p>0,00089444444444444500</text:p>
          </table:table-cell>
          <table:table-cell table:formula="of:=[.D370]-[.D36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1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896875" calcext:value-type="float">
            <text:p>0,00089687500000000000</text:p>
          </table:table-cell>
          <table:table-cell table:formula="of:=[.D371]-[.D37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1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899305555555556" calcext:value-type="float">
            <text:p>0,00089930555555555600</text:p>
          </table:table-cell>
          <table:table-cell table:formula="of:=[.D372]-[.D37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1" office:value-type="float" office:value="7791" calcext:value-type="float">
            <text:p>779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901736111111111" calcext:value-type="float">
            <text:p>0,00090173611111111100</text:p>
          </table:table-cell>
          <table:table-cell table:formula="of:=[.D373]-[.D37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1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904166666666667" calcext:value-type="float">
            <text:p>0,00090416666666666700</text:p>
          </table:table-cell>
          <table:table-cell table:formula="of:=[.D374]-[.D37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1" office:value-type="float" office:value="7833" calcext:value-type="float">
            <text:p>783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906597222222222" calcext:value-type="float">
            <text:p>0,00090659722222222200</text:p>
          </table:table-cell>
          <table:table-cell table:formula="of:=[.D375]-[.D37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1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909027777777778" calcext:value-type="float">
            <text:p>0,00090902777777777800</text:p>
          </table:table-cell>
          <table:table-cell table:formula="of:=[.D376]-[.D37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1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911458333333333" calcext:value-type="float">
            <text:p>0,00091145833333333300</text:p>
          </table:table-cell>
          <table:table-cell table:formula="of:=[.D377]-[.D37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1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913888888888889" calcext:value-type="float">
            <text:p>0,00091388888888888900</text:p>
          </table:table-cell>
          <table:table-cell table:formula="of:=[.D378]-[.D37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1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916319444444444" calcext:value-type="float">
            <text:p>0,00091631944444444400</text:p>
          </table:table-cell>
          <table:table-cell table:formula="of:=[.D379]-[.D37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1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91875" calcext:value-type="float">
            <text:p>0,00091875000000000000</text:p>
          </table:table-cell>
          <table:table-cell table:formula="of:=[.D380]-[.D37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1" office:value-type="float" office:value="7959" calcext:value-type="float">
            <text:p>795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921180555555556" calcext:value-type="float">
            <text:p>0,00092118055555555600</text:p>
          </table:table-cell>
          <table:table-cell table:formula="of:=[.D381]-[.D38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1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923611111111111" calcext:value-type="float">
            <text:p>0,00092361111111111100</text:p>
          </table:table-cell>
          <table:table-cell table:formula="of:=[.D382]-[.D38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1" office:value-type="float" office:value="8001" calcext:value-type="float">
            <text:p>800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926041666666667" calcext:value-type="float">
            <text:p>0,00092604166666666700</text:p>
          </table:table-cell>
          <table:table-cell table:formula="of:=[.D383]-[.D38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1" office:value-type="float" office:value="8022" calcext:value-type="float">
            <text:p>802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928472222222222" calcext:value-type="float">
            <text:p>0,00092847222222222200</text:p>
          </table:table-cell>
          <table:table-cell table:formula="of:=[.D384]-[.D38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1" office:value-type="float" office:value="8043" calcext:value-type="float">
            <text:p>804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930902777777778" calcext:value-type="float">
            <text:p>0,00093090277777777800</text:p>
          </table:table-cell>
          <table:table-cell table:formula="of:=[.D385]-[.D38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1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933333333333333" calcext:value-type="float">
            <text:p>0,00093333333333333300</text:p>
          </table:table-cell>
          <table:table-cell table:formula="of:=[.D386]-[.D385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1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935763888888889" calcext:value-type="float">
            <text:p>0,00093576388888888900</text:p>
          </table:table-cell>
          <table:table-cell table:formula="of:=[.D387]-[.D38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1" office:value-type="float" office:value="8106" calcext:value-type="float">
            <text:p>810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938194444444444" calcext:value-type="float">
            <text:p>0,00093819444444444500</text:p>
          </table:table-cell>
          <table:table-cell table:formula="of:=[.D388]-[.D38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1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940625" calcext:value-type="float">
            <text:p>0,00094062500000000000</text:p>
          </table:table-cell>
          <table:table-cell table:formula="of:=[.D389]-[.D38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1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943055555555556" calcext:value-type="float">
            <text:p>0,00094305555555555600</text:p>
          </table:table-cell>
          <table:table-cell table:formula="of:=[.D390]-[.D38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1" office:value-type="float" office:value="8169" calcext:value-type="float">
            <text:p>816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945486111111111" calcext:value-type="float">
            <text:p>0,00094548611111111100</text:p>
          </table:table-cell>
          <table:table-cell table:formula="of:=[.D391]-[.D39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1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947916666666667" calcext:value-type="float">
            <text:p>0,00094791666666666700</text:p>
          </table:table-cell>
          <table:table-cell table:formula="of:=[.D392]-[.D39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1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950347222222222" calcext:value-type="float">
            <text:p>0,00095034722222222200</text:p>
          </table:table-cell>
          <table:table-cell table:formula="of:=[.D393]-[.D39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1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952777777777778" calcext:value-type="float">
            <text:p>0,00095277777777777800</text:p>
          </table:table-cell>
          <table:table-cell table:formula="of:=[.D394]-[.D393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1" office:value-type="float" office:value="8253" calcext:value-type="float">
            <text:p>825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955208333333333" calcext:value-type="float">
            <text:p>0,00095520833333333300</text:p>
          </table:table-cell>
          <table:table-cell table:formula="of:=[.D395]-[.D394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1" office:value-type="float" office:value="8274" calcext:value-type="float">
            <text:p>827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957638888888889" calcext:value-type="float">
            <text:p>0,00095763888888888900</text:p>
          </table:table-cell>
          <table:table-cell table:formula="of:=[.D396]-[.D39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1" office:value-type="float" office:value="8295" calcext:value-type="float">
            <text:p>829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960069444444445" calcext:value-type="float">
            <text:p>0,00096006944444444500</text:p>
          </table:table-cell>
          <table:table-cell table:formula="of:=[.D397]-[.D396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1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9625" calcext:value-type="float">
            <text:p>0,00096250000000000000</text:p>
          </table:table-cell>
          <table:table-cell table:formula="of:=[.D398]-[.D397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1" office:value-type="float" office:value="8337" calcext:value-type="float">
            <text:p>8337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964930555555556" calcext:value-type="float">
            <text:p>0,00096493055555555600</text:p>
          </table:table-cell>
          <table:table-cell table:formula="of:=[.D399]-[.D398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1" office:value-type="float" office:value="8358" calcext:value-type="float">
            <text:p>835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967361111111111" calcext:value-type="float">
            <text:p>0,00096736111111111100</text:p>
          </table:table-cell>
          <table:table-cell table:formula="of:=[.D400]-[.D399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1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969791666666667" calcext:value-type="float">
            <text:p>0,00096979166666666700</text:p>
          </table:table-cell>
          <table:table-cell table:formula="of:=[.D401]-[.D400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1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972222222222222" calcext:value-type="float">
            <text:p>0,00097222222222222200</text:p>
          </table:table-cell>
          <table:table-cell table:formula="of:=[.D402]-[.D401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1" office:value-type="float" office:value="8421" calcext:value-type="float">
            <text:p>8421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974652777777778" calcext:value-type="float">
            <text:p>0,00097465277777777800</text:p>
          </table:table-cell>
          <table:table-cell table:formula="of:=[.D403]-[.D402]" office:value-type="float" office:value="0.00000243055555555554" calcext:value-type="float">
            <text:p>0,0000024305555555555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1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977083333333333" calcext:value-type="float">
            <text:p>0,00097708333333333300</text:p>
          </table:table-cell>
          <table:table-cell table:formula="of:=[.D404]-[.D40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1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979513888888889" calcext:value-type="float">
            <text:p>0,00097951388888888900</text:p>
          </table:table-cell>
          <table:table-cell table:formula="of:=[.D405]-[.D40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1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981944444444444" calcext:value-type="float">
            <text:p>0,00098194444444444400</text:p>
          </table:table-cell>
          <table:table-cell table:formula="of:=[.D406]-[.D40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1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984375" calcext:value-type="float">
            <text:p>0,00098437500000000000</text:p>
          </table:table-cell>
          <table:table-cell table:formula="of:=[.D407]-[.D40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1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986805555555556" calcext:value-type="float">
            <text:p>0,00098680555555555600</text:p>
          </table:table-cell>
          <table:table-cell table:formula="of:=[.D408]-[.D40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1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989236111111111" calcext:value-type="float">
            <text:p>0,00098923611111111100</text:p>
          </table:table-cell>
          <table:table-cell table:formula="of:=[.D409]-[.D40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1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991666666666667" calcext:value-type="float">
            <text:p>0,00099166666666666700</text:p>
          </table:table-cell>
          <table:table-cell table:formula="of:=[.D410]-[.D40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1" office:value-type="float" office:value="8589" calcext:value-type="float">
            <text:p>8589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994097222222222" calcext:value-type="float">
            <text:p>0,00099409722222222200</text:p>
          </table:table-cell>
          <table:table-cell table:formula="of:=[.D411]-[.D41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1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996527777777778" calcext:value-type="float">
            <text:p>0,00099652777777777800</text:p>
          </table:table-cell>
          <table:table-cell table:formula="of:=[.D412]-[.D41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1" office:value-type="float" office:value="8631" calcext:value-type="float">
            <text:p>8631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998958333333333" calcext:value-type="float">
            <text:p>0,00099895833333333300</text:p>
          </table:table-cell>
          <table:table-cell table:formula="of:=[.D413]-[.D41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1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00138888888889" calcext:value-type="float">
            <text:p>0,00100138888888889000</text:p>
          </table:table-cell>
          <table:table-cell table:formula="of:=[.D414]-[.D41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1" office:value-type="float" office:value="8673" calcext:value-type="float">
            <text:p>8673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00381944444444" calcext:value-type="float">
            <text:p>0,00100381944444444000</text:p>
          </table:table-cell>
          <table:table-cell table:formula="of:=[.D415]-[.D4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1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00625" calcext:value-type="float">
            <text:p>0,00100625000000000000</text:p>
          </table:table-cell>
          <table:table-cell table:formula="of:=[.D416]-[.D41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1" office:value-type="float" office:value="8715" calcext:value-type="float">
            <text:p>871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00868055555556" calcext:value-type="float">
            <text:p>0,00100868055555556000</text:p>
          </table:table-cell>
          <table:table-cell table:formula="of:=[.D417]-[.D41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1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01111111111111" calcext:value-type="float">
            <text:p>0,00101111111111111000</text:p>
          </table:table-cell>
          <table:table-cell table:formula="of:=[.D418]-[.D41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1" office:value-type="float" office:value="8757" calcext:value-type="float">
            <text:p>8757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01354166666667" calcext:value-type="float">
            <text:p>0,00101354166666667000</text:p>
          </table:table-cell>
          <table:table-cell table:formula="of:=[.D419]-[.D41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1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01597222222222" calcext:value-type="float">
            <text:p>0,00101597222222222000</text:p>
          </table:table-cell>
          <table:table-cell table:formula="of:=[.D420]-[.D41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1" office:value-type="float" office:value="8799" calcext:value-type="float">
            <text:p>8799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01840277777778" calcext:value-type="float">
            <text:p>0,00101840277777778000</text:p>
          </table:table-cell>
          <table:table-cell table:formula="of:=[.D421]-[.D42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1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02083333333333" calcext:value-type="float">
            <text:p>0,00102083333333333000</text:p>
          </table:table-cell>
          <table:table-cell table:formula="of:=[.D422]-[.D42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1" office:value-type="float" office:value="8841" calcext:value-type="float">
            <text:p>8841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02326388888889" calcext:value-type="float">
            <text:p>0,00102326388888889000</text:p>
          </table:table-cell>
          <table:table-cell table:formula="of:=[.D423]-[.D42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1" office:value-type="float" office:value="8862" calcext:value-type="float">
            <text:p>886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02569444444444" calcext:value-type="float">
            <text:p>0,00102569444444444000</text:p>
          </table:table-cell>
          <table:table-cell table:formula="of:=[.D424]-[.D42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1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028125" calcext:value-type="float">
            <text:p>0,00102812500000000000</text:p>
          </table:table-cell>
          <table:table-cell table:formula="of:=[.D425]-[.D42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1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03055555555556" calcext:value-type="float">
            <text:p>0,00103055555555556000</text:p>
          </table:table-cell>
          <table:table-cell table:formula="of:=[.D426]-[.D42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1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03298611111111" calcext:value-type="float">
            <text:p>0,00103298611111111000</text:p>
          </table:table-cell>
          <table:table-cell table:formula="of:=[.D427]-[.D42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1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03541666666667" calcext:value-type="float">
            <text:p>0,00103541666666667000</text:p>
          </table:table-cell>
          <table:table-cell table:formula="of:=[.D428]-[.D42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1" office:value-type="float" office:value="8967" calcext:value-type="float">
            <text:p>8967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03784722222222" calcext:value-type="float">
            <text:p>0,00103784722222222000</text:p>
          </table:table-cell>
          <table:table-cell table:formula="of:=[.D429]-[.D42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1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04027777777778" calcext:value-type="float">
            <text:p>0,00104027777777778000</text:p>
          </table:table-cell>
          <table:table-cell table:formula="of:=[.D430]-[.D42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1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04270833333333" calcext:value-type="float">
            <text:p>0,00104270833333333000</text:p>
          </table:table-cell>
          <table:table-cell table:formula="of:=[.D431]-[.D43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1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04513888888889" calcext:value-type="float">
            <text:p>0,00104513888888889000</text:p>
          </table:table-cell>
          <table:table-cell table:formula="of:=[.D432]-[.D43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1" office:value-type="float" office:value="9051" calcext:value-type="float">
            <text:p>9051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04756944444444" calcext:value-type="float">
            <text:p>0,00104756944444444000</text:p>
          </table:table-cell>
          <table:table-cell table:formula="of:=[.D433]-[.D43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1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05" calcext:value-type="float">
            <text:p>0,00105000000000000000</text:p>
          </table:table-cell>
          <table:table-cell table:formula="of:=[.D434]-[.D43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1" office:value-type="float" office:value="9093" calcext:value-type="float">
            <text:p>9093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05243055555556" calcext:value-type="float">
            <text:p>0,00105243055555556000</text:p>
          </table:table-cell>
          <table:table-cell table:formula="of:=[.D435]-[.D43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1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05486111111111" calcext:value-type="float">
            <text:p>0,00105486111111111000</text:p>
          </table:table-cell>
          <table:table-cell table:formula="of:=[.D436]-[.D43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1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05729166666667" calcext:value-type="float">
            <text:p>0,00105729166666667000</text:p>
          </table:table-cell>
          <table:table-cell table:formula="of:=[.D437]-[.D43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1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05972222222222" calcext:value-type="float">
            <text:p>0,00105972222222222000</text:p>
          </table:table-cell>
          <table:table-cell table:formula="of:=[.D438]-[.D43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1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06215277777778" calcext:value-type="float">
            <text:p>0,00106215277777778000</text:p>
          </table:table-cell>
          <table:table-cell table:formula="of:=[.D439]-[.D43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1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06458333333333" calcext:value-type="float">
            <text:p>0,00106458333333333000</text:p>
          </table:table-cell>
          <table:table-cell table:formula="of:=[.D440]-[.D43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1" office:value-type="float" office:value="9219" calcext:value-type="float">
            <text:p>9219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06701388888889" calcext:value-type="float">
            <text:p>0,00106701388888889000</text:p>
          </table:table-cell>
          <table:table-cell table:formula="of:=[.D441]-[.D44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1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06944444444444" calcext:value-type="float">
            <text:p>0,00106944444444444000</text:p>
          </table:table-cell>
          <table:table-cell table:formula="of:=[.D442]-[.D44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1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071875" calcext:value-type="float">
            <text:p>0,00107187500000000000</text:p>
          </table:table-cell>
          <table:table-cell table:formula="of:=[.D443]-[.D44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1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07430555555556" calcext:value-type="float">
            <text:p>0,00107430555555556000</text:p>
          </table:table-cell>
          <table:table-cell table:formula="of:=[.D444]-[.D44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1" office:value-type="float" office:value="9303" calcext:value-type="float">
            <text:p>9303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07673611111111" calcext:value-type="float">
            <text:p>0,00107673611111111000</text:p>
          </table:table-cell>
          <table:table-cell table:formula="of:=[.D445]-[.D44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1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07916666666667" calcext:value-type="float">
            <text:p>0,00107916666666667000</text:p>
          </table:table-cell>
          <table:table-cell table:formula="of:=[.D446]-[.D44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1" office:value-type="float" office:value="9345" calcext:value-type="float">
            <text:p>934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08159722222222" calcext:value-type="float">
            <text:p>0,00108159722222222000</text:p>
          </table:table-cell>
          <table:table-cell table:formula="of:=[.D447]-[.D44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1" office:value-type="float" office:value="9366" calcext:value-type="float">
            <text:p>936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08402777777778" calcext:value-type="float">
            <text:p>0,00108402777777778000</text:p>
          </table:table-cell>
          <table:table-cell table:formula="of:=[.D448]-[.D44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1" office:value-type="float" office:value="9387" calcext:value-type="float">
            <text:p>9387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08645833333333" calcext:value-type="float">
            <text:p>0,00108645833333333000</text:p>
          </table:table-cell>
          <table:table-cell table:formula="of:=[.D449]-[.D44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1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08888888888889" calcext:value-type="float">
            <text:p>0,00108888888888889000</text:p>
          </table:table-cell>
          <table:table-cell table:formula="of:=[.D450]-[.D44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1" office:value-type="float" office:value="9429" calcext:value-type="float">
            <text:p>9429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09131944444444" calcext:value-type="float">
            <text:p>0,00109131944444444000</text:p>
          </table:table-cell>
          <table:table-cell table:formula="of:=[.D451]-[.D45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1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09375" calcext:value-type="float">
            <text:p>0,00109375000000000000</text:p>
          </table:table-cell>
          <table:table-cell table:formula="of:=[.D452]-[.D45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1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09618055555556" calcext:value-type="float">
            <text:p>0,00109618055555556000</text:p>
          </table:table-cell>
          <table:table-cell table:formula="of:=[.D453]-[.D45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1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09861111111111" calcext:value-type="float">
            <text:p>0,00109861111111111000</text:p>
          </table:table-cell>
          <table:table-cell table:formula="of:=[.D454]-[.D45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1" office:value-type="float" office:value="9513" calcext:value-type="float">
            <text:p>9513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10104166666667" calcext:value-type="float">
            <text:p>0,00110104166666667000</text:p>
          </table:table-cell>
          <table:table-cell table:formula="of:=[.D455]-[.D45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1" office:value-type="float" office:value="9534" calcext:value-type="float">
            <text:p>953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10347222222222" calcext:value-type="float">
            <text:p>0,00110347222222222000</text:p>
          </table:table-cell>
          <table:table-cell table:formula="of:=[.D456]-[.D45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1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10590277777778" calcext:value-type="float">
            <text:p>0,00110590277777778000</text:p>
          </table:table-cell>
          <table:table-cell table:formula="of:=[.D457]-[.D45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1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10833333333333" calcext:value-type="float">
            <text:p>0,00110833333333333000</text:p>
          </table:table-cell>
          <table:table-cell table:formula="of:=[.D458]-[.D45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1" office:value-type="float" office:value="9597" calcext:value-type="float">
            <text:p>9597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11076388888889" calcext:value-type="float">
            <text:p>0,00111076388888889000</text:p>
          </table:table-cell>
          <table:table-cell table:formula="of:=[.D459]-[.D45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1" office:value-type="float" office:value="9618" calcext:value-type="float">
            <text:p>961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11319444444444" calcext:value-type="float">
            <text:p>0,00111319444444444000</text:p>
          </table:table-cell>
          <table:table-cell table:formula="of:=[.D460]-[.D45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1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115625" calcext:value-type="float">
            <text:p>0,00111562500000000000</text:p>
          </table:table-cell>
          <table:table-cell table:formula="of:=[.D461]-[.D46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1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11805555555556" calcext:value-type="float">
            <text:p>0,00111805555555556000</text:p>
          </table:table-cell>
          <table:table-cell table:formula="of:=[.D462]-[.D46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1" office:value-type="float" office:value="9681" calcext:value-type="float">
            <text:p>9681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12048611111111" calcext:value-type="float">
            <text:p>0,00112048611111111000</text:p>
          </table:table-cell>
          <table:table-cell table:formula="of:=[.D463]-[.D46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1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12291666666667" calcext:value-type="float">
            <text:p>0,00112291666666667000</text:p>
          </table:table-cell>
          <table:table-cell table:formula="of:=[.D464]-[.D46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1" office:value-type="float" office:value="9723" calcext:value-type="float">
            <text:p>9723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12534722222222" calcext:value-type="float">
            <text:p>0,00112534722222222000</text:p>
          </table:table-cell>
          <table:table-cell table:formula="of:=[.D465]-[.D46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1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12777777777778" calcext:value-type="float">
            <text:p>0,00112777777777778000</text:p>
          </table:table-cell>
          <table:table-cell table:formula="of:=[.D466]-[.D46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1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13020833333333" calcext:value-type="float">
            <text:p>0,00113020833333333000</text:p>
          </table:table-cell>
          <table:table-cell table:formula="of:=[.D467]-[.D46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1" office:value-type="float" office:value="9786" calcext:value-type="float">
            <text:p>978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13263888888889" calcext:value-type="float">
            <text:p>0,00113263888888889000</text:p>
          </table:table-cell>
          <table:table-cell table:formula="of:=[.D468]-[.D46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1" office:value-type="float" office:value="9807" calcext:value-type="float">
            <text:p>9807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13506944444444" calcext:value-type="float">
            <text:p>0,00113506944444444000</text:p>
          </table:table-cell>
          <table:table-cell table:formula="of:=[.D469]-[.D46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1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1375" calcext:value-type="float">
            <text:p>0,00113750000000000000</text:p>
          </table:table-cell>
          <table:table-cell table:formula="of:=[.D470]-[.D46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1" office:value-type="float" office:value="9849" calcext:value-type="float">
            <text:p>9849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13993055555556" calcext:value-type="float">
            <text:p>0,00113993055555556000</text:p>
          </table:table-cell>
          <table:table-cell table:formula="of:=[.D471]-[.D47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1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14236111111111" calcext:value-type="float">
            <text:p>0,00114236111111111000</text:p>
          </table:table-cell>
          <table:table-cell table:formula="of:=[.D472]-[.D47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1" office:value-type="float" office:value="9891" calcext:value-type="float">
            <text:p>9891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14479166666667" calcext:value-type="float">
            <text:p>0,00114479166666667000</text:p>
          </table:table-cell>
          <table:table-cell table:formula="of:=[.D473]-[.D47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1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14722222222222" calcext:value-type="float">
            <text:p>0,00114722222222222000</text:p>
          </table:table-cell>
          <table:table-cell table:formula="of:=[.D474]-[.D47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1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14965277777778" calcext:value-type="float">
            <text:p>0,00114965277777778000</text:p>
          </table:table-cell>
          <table:table-cell table:formula="of:=[.D475]-[.D47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1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15208333333333" calcext:value-type="float">
            <text:p>0,00115208333333333000</text:p>
          </table:table-cell>
          <table:table-cell table:formula="of:=[.D476]-[.D47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1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15451388888889" calcext:value-type="float">
            <text:p>0,00115451388888889000</text:p>
          </table:table-cell>
          <table:table-cell table:formula="of:=[.D477]-[.D47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1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15694444444444" calcext:value-type="float">
            <text:p>0,00115694444444444000</text:p>
          </table:table-cell>
          <table:table-cell table:formula="of:=[.D478]-[.D47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1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159375" calcext:value-type="float">
            <text:p>0,00115937500000000000</text:p>
          </table:table-cell>
          <table:table-cell table:formula="of:=[.D479]-[.D47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1" office:value-type="float" office:value="10038" calcext:value-type="float">
            <text:p>1003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16180555555556" calcext:value-type="float">
            <text:p>0,00116180555555556000</text:p>
          </table:table-cell>
          <table:table-cell table:formula="of:=[.D480]-[.D47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1" office:value-type="float" office:value="10059" calcext:value-type="float">
            <text:p>10059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16423611111111" calcext:value-type="float">
            <text:p>0,00116423611111111000</text:p>
          </table:table-cell>
          <table:table-cell table:formula="of:=[.D481]-[.D48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1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16666666666667" calcext:value-type="float">
            <text:p>0,00116666666666667000</text:p>
          </table:table-cell>
          <table:table-cell table:formula="of:=[.D482]-[.D48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1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16909722222222" calcext:value-type="float">
            <text:p>0,00116909722222222000</text:p>
          </table:table-cell>
          <table:table-cell table:formula="of:=[.D483]-[.D48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1" office:value-type="float" office:value="10122" calcext:value-type="float">
            <text:p>1012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17152777777778" calcext:value-type="float">
            <text:p>0,00117152777777778000</text:p>
          </table:table-cell>
          <table:table-cell table:formula="of:=[.D484]-[.D48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1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17395833333333" calcext:value-type="float">
            <text:p>0,00117395833333333000</text:p>
          </table:table-cell>
          <table:table-cell table:formula="of:=[.D485]-[.D48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1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17638888888889" calcext:value-type="float">
            <text:p>0,00117638888888889000</text:p>
          </table:table-cell>
          <table:table-cell table:formula="of:=[.D486]-[.D48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1" office:value-type="float" office:value="10185" calcext:value-type="float">
            <text:p>1018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17881944444444" calcext:value-type="float">
            <text:p>0,00117881944444444000</text:p>
          </table:table-cell>
          <table:table-cell table:formula="of:=[.D487]-[.D48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1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18125" calcext:value-type="float">
            <text:p>0,00118125000000000000</text:p>
          </table:table-cell>
          <table:table-cell table:formula="of:=[.D488]-[.D48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1" office:value-type="float" office:value="10227" calcext:value-type="float">
            <text:p>10227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18368055555556" calcext:value-type="float">
            <text:p>0,00118368055555556000</text:p>
          </table:table-cell>
          <table:table-cell table:formula="of:=[.D489]-[.D48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1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18611111111111" calcext:value-type="float">
            <text:p>0,00118611111111111000</text:p>
          </table:table-cell>
          <table:table-cell table:formula="of:=[.D490]-[.D48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1" office:value-type="float" office:value="10269" calcext:value-type="float">
            <text:p>10269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18854166666667" calcext:value-type="float">
            <text:p>0,00118854166666667000</text:p>
          </table:table-cell>
          <table:table-cell table:formula="of:=[.D491]-[.D49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1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19097222222222" calcext:value-type="float">
            <text:p>0,00119097222222222000</text:p>
          </table:table-cell>
          <table:table-cell table:formula="of:=[.D492]-[.D49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1" office:value-type="float" office:value="10311" calcext:value-type="float">
            <text:p>10311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19340277777778" calcext:value-type="float">
            <text:p>0,00119340277777778000</text:p>
          </table:table-cell>
          <table:table-cell table:formula="of:=[.D493]-[.D49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1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19583333333333" calcext:value-type="float">
            <text:p>0,00119583333333333000</text:p>
          </table:table-cell>
          <table:table-cell table:formula="of:=[.D494]-[.D49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1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19826388888889" calcext:value-type="float">
            <text:p>0,00119826388888889000</text:p>
          </table:table-cell>
          <table:table-cell table:formula="of:=[.D495]-[.D49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1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20069444444444" calcext:value-type="float">
            <text:p>0,00120069444444444000</text:p>
          </table:table-cell>
          <table:table-cell table:formula="of:=[.D496]-[.D49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1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203125" calcext:value-type="float">
            <text:p>0,00120312500000000000</text:p>
          </table:table-cell>
          <table:table-cell table:formula="of:=[.D497]-[.D49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1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20555555555556" calcext:value-type="float">
            <text:p>0,00120555555555556000</text:p>
          </table:table-cell>
          <table:table-cell table:formula="of:=[.D498]-[.D49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1" office:value-type="float" office:value="10437" calcext:value-type="float">
            <text:p>10437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20798611111111" calcext:value-type="float">
            <text:p>0,00120798611111111000</text:p>
          </table:table-cell>
          <table:table-cell table:formula="of:=[.D499]-[.D49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1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21041666666667" calcext:value-type="float">
            <text:p>0,00121041666666667000</text:p>
          </table:table-cell>
          <table:table-cell table:formula="of:=[.D500]-[.D49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1" office:value-type="float" office:value="10479" calcext:value-type="float">
            <text:p>10479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21284722222222" calcext:value-type="float">
            <text:p>0,00121284722222222000</text:p>
          </table:table-cell>
          <table:table-cell table:formula="of:=[.D501]-[.D50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1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21527777777778" calcext:value-type="float">
            <text:p>0,00121527777777778000</text:p>
          </table:table-cell>
          <table:table-cell table:formula="of:=[.D502]-[.D50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1" office:value-type="float" office:value="10521" calcext:value-type="float">
            <text:p>10521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21770833333333" calcext:value-type="float">
            <text:p>0,00121770833333333000</text:p>
          </table:table-cell>
          <table:table-cell table:formula="of:=[.D503]-[.D50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1" office:value-type="float" office:value="10542" calcext:value-type="float">
            <text:p>1054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22013888888889" calcext:value-type="float">
            <text:p>0,00122013888888889000</text:p>
          </table:table-cell>
          <table:table-cell table:formula="of:=[.D504]-[.D50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1" office:value-type="float" office:value="10563" calcext:value-type="float">
            <text:p>10563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22256944444444" calcext:value-type="float">
            <text:p>0,00122256944444444000</text:p>
          </table:table-cell>
          <table:table-cell table:formula="of:=[.D505]-[.D50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1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225" calcext:value-type="float">
            <text:p>0,00122500000000000000</text:p>
          </table:table-cell>
          <table:table-cell table:formula="of:=[.D506]-[.D50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1" office:value-type="float" office:value="10605" calcext:value-type="float">
            <text:p>1060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22743055555556" calcext:value-type="float">
            <text:p>0,00122743055555556000</text:p>
          </table:table-cell>
          <table:table-cell table:formula="of:=[.D507]-[.D50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1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22986111111111" calcext:value-type="float">
            <text:p>0,00122986111111111000</text:p>
          </table:table-cell>
          <table:table-cell table:formula="of:=[.D508]-[.D50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1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23229166666667" calcext:value-type="float">
            <text:p>0,00123229166666667000</text:p>
          </table:table-cell>
          <table:table-cell table:formula="of:=[.D509]-[.D50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1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23472222222222" calcext:value-type="float">
            <text:p>0,00123472222222222000</text:p>
          </table:table-cell>
          <table:table-cell table:formula="of:=[.D510]-[.D50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1" office:value-type="float" office:value="10689" calcext:value-type="float">
            <text:p>10689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23715277777778" calcext:value-type="float">
            <text:p>0,00123715277777778000</text:p>
          </table:table-cell>
          <table:table-cell table:formula="of:=[.D511]-[.D51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1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23958333333333" calcext:value-type="float">
            <text:p>0,00123958333333333000</text:p>
          </table:table-cell>
          <table:table-cell table:formula="of:=[.D512]-[.D51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1" office:value-type="float" office:value="10731" calcext:value-type="float">
            <text:p>10731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24201388888889" calcext:value-type="float">
            <text:p>0,00124201388888889000</text:p>
          </table:table-cell>
          <table:table-cell table:formula="of:=[.D513]-[.D51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1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24444444444444" calcext:value-type="float">
            <text:p>0,00124444444444444000</text:p>
          </table:table-cell>
          <table:table-cell table:formula="of:=[.D514]-[.D51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1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246875" calcext:value-type="float">
            <text:p>0,00124687500000000000</text:p>
          </table:table-cell>
          <table:table-cell table:formula="of:=[.D515]-[.D51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1" office:value-type="float" office:value="10794" calcext:value-type="float">
            <text:p>1079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24930555555556" calcext:value-type="float">
            <text:p>0,00124930555555556000</text:p>
          </table:table-cell>
          <table:table-cell table:formula="of:=[.D516]-[.D51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1" office:value-type="float" office:value="10815" calcext:value-type="float">
            <text:p>1081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25173611111111" calcext:value-type="float">
            <text:p>0,00125173611111111000</text:p>
          </table:table-cell>
          <table:table-cell table:formula="of:=[.D517]-[.D51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1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25416666666667" calcext:value-type="float">
            <text:p>0,00125416666666667000</text:p>
          </table:table-cell>
          <table:table-cell table:formula="of:=[.D518]-[.D51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1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25659722222222" calcext:value-type="float">
            <text:p>0,00125659722222222000</text:p>
          </table:table-cell>
          <table:table-cell table:formula="of:=[.D519]-[.D51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1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25902777777778" calcext:value-type="float">
            <text:p>0,00125902777777778000</text:p>
          </table:table-cell>
          <table:table-cell table:formula="of:=[.D520]-[.D51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1" office:value-type="float" office:value="10899" calcext:value-type="float">
            <text:p>10899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26145833333333" calcext:value-type="float">
            <text:p>0,00126145833333333000</text:p>
          </table:table-cell>
          <table:table-cell table:formula="of:=[.D521]-[.D52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1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26388888888889" calcext:value-type="float">
            <text:p>0,00126388888888889000</text:p>
          </table:table-cell>
          <table:table-cell table:formula="of:=[.D522]-[.D52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1" office:value-type="float" office:value="10941" calcext:value-type="float">
            <text:p>10941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26631944444444" calcext:value-type="float">
            <text:p>0,00126631944444444000</text:p>
          </table:table-cell>
          <table:table-cell table:formula="of:=[.D523]-[.D52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1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26875" calcext:value-type="float">
            <text:p>0,00126875000000000000</text:p>
          </table:table-cell>
          <table:table-cell table:formula="of:=[.D524]-[.D52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1" office:value-type="float" office:value="10983" calcext:value-type="float">
            <text:p>10983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27118055555556" calcext:value-type="float">
            <text:p>0,00127118055555556000</text:p>
          </table:table-cell>
          <table:table-cell table:formula="of:=[.D525]-[.D52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1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27361111111111" calcext:value-type="float">
            <text:p>0,00127361111111111000</text:p>
          </table:table-cell>
          <table:table-cell table:formula="of:=[.D526]-[.D52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1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27604166666667" calcext:value-type="float">
            <text:p>0,00127604166666667000</text:p>
          </table:table-cell>
          <table:table-cell table:formula="of:=[.D527]-[.D52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1" office:value-type="float" office:value="11046" calcext:value-type="float">
            <text:p>1104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27847222222222" calcext:value-type="float">
            <text:p>0,00127847222222222000</text:p>
          </table:table-cell>
          <table:table-cell table:formula="of:=[.D528]-[.D52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1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28090277777778" calcext:value-type="float">
            <text:p>0,00128090277777778000</text:p>
          </table:table-cell>
          <table:table-cell table:formula="of:=[.D529]-[.D52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1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28333333333333" calcext:value-type="float">
            <text:p>0,00128333333333333000</text:p>
          </table:table-cell>
          <table:table-cell table:formula="of:=[.D530]-[.D52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1" office:value-type="float" office:value="11109" calcext:value-type="float">
            <text:p>11109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28576388888889" calcext:value-type="float">
            <text:p>0,00128576388888889000</text:p>
          </table:table-cell>
          <table:table-cell table:formula="of:=[.D531]-[.D53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1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28819444444444" calcext:value-type="float">
            <text:p>0,00128819444444444000</text:p>
          </table:table-cell>
          <table:table-cell table:formula="of:=[.D532]-[.D53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1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290625" calcext:value-type="float">
            <text:p>0,00129062500000000000</text:p>
          </table:table-cell>
          <table:table-cell table:formula="of:=[.D533]-[.D53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1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29305555555556" calcext:value-type="float">
            <text:p>0,00129305555555556000</text:p>
          </table:table-cell>
          <table:table-cell table:formula="of:=[.D534]-[.D53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1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29548611111111" calcext:value-type="float">
            <text:p>0,00129548611111111000</text:p>
          </table:table-cell>
          <table:table-cell table:formula="of:=[.D535]-[.D53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1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29791666666667" calcext:value-type="float">
            <text:p>0,00129791666666667000</text:p>
          </table:table-cell>
          <table:table-cell table:formula="of:=[.D536]-[.D53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1" office:value-type="float" office:value="11235" calcext:value-type="float">
            <text:p>1123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30034722222222" calcext:value-type="float">
            <text:p>0,00130034722222222000</text:p>
          </table:table-cell>
          <table:table-cell table:formula="of:=[.D537]-[.D53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1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30277777777778" calcext:value-type="float">
            <text:p>0,00130277777777778000</text:p>
          </table:table-cell>
          <table:table-cell table:formula="of:=[.D538]-[.D53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1" office:value-type="float" office:value="11277" calcext:value-type="float">
            <text:p>11277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30520833333333" calcext:value-type="float">
            <text:p>0,00130520833333333000</text:p>
          </table:table-cell>
          <table:table-cell table:formula="of:=[.D539]-[.D53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1" office:value-type="float" office:value="11298" calcext:value-type="float">
            <text:p>1129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30763888888889" calcext:value-type="float">
            <text:p>0,00130763888888889000</text:p>
          </table:table-cell>
          <table:table-cell table:formula="of:=[.D540]-[.D53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1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31006944444444" calcext:value-type="float">
            <text:p>0,00131006944444444000</text:p>
          </table:table-cell>
          <table:table-cell table:formula="of:=[.D541]-[.D54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1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3125" calcext:value-type="float">
            <text:p>0,00131250000000000000</text:p>
          </table:table-cell>
          <table:table-cell table:formula="of:=[.D542]-[.D54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1" office:value-type="float" office:value="11361" calcext:value-type="float">
            <text:p>11361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31493055555556" calcext:value-type="float">
            <text:p>0,00131493055555556000</text:p>
          </table:table-cell>
          <table:table-cell table:formula="of:=[.D543]-[.D54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1" office:value-type="float" office:value="11382" calcext:value-type="float">
            <text:p>1138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31736111111111" calcext:value-type="float">
            <text:p>0,00131736111111111000</text:p>
          </table:table-cell>
          <table:table-cell table:formula="of:=[.D544]-[.D54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1" office:value-type="float" office:value="11403" calcext:value-type="float">
            <text:p>11403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31979166666667" calcext:value-type="float">
            <text:p>0,00131979166666667000</text:p>
          </table:table-cell>
          <table:table-cell table:formula="of:=[.D545]-[.D54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1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32222222222222" calcext:value-type="float">
            <text:p>0,00132222222222222000</text:p>
          </table:table-cell>
          <table:table-cell table:formula="of:=[.D546]-[.D54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1" office:value-type="float" office:value="11445" calcext:value-type="float">
            <text:p>1144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32465277777778" calcext:value-type="float">
            <text:p>0,00132465277777778000</text:p>
          </table:table-cell>
          <table:table-cell table:formula="of:=[.D547]-[.D54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1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32708333333333" calcext:value-type="float">
            <text:p>0,00132708333333333000</text:p>
          </table:table-cell>
          <table:table-cell table:formula="of:=[.D548]-[.D54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1" office:value-type="float" office:value="11487" calcext:value-type="float">
            <text:p>11487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32951388888889" calcext:value-type="float">
            <text:p>0,00132951388888889000</text:p>
          </table:table-cell>
          <table:table-cell table:formula="of:=[.D549]-[.D54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1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33194444444444" calcext:value-type="float">
            <text:p>0,00133194444444444000</text:p>
          </table:table-cell>
          <table:table-cell table:formula="of:=[.D550]-[.D54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1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334375" calcext:value-type="float">
            <text:p>0,00133437500000000000</text:p>
          </table:table-cell>
          <table:table-cell table:formula="of:=[.D551]-[.D55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1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33680555555556" calcext:value-type="float">
            <text:p>0,00133680555555556000</text:p>
          </table:table-cell>
          <table:table-cell table:formula="of:=[.D552]-[.D55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1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33923611111111" calcext:value-type="float">
            <text:p>0,00133923611111111000</text:p>
          </table:table-cell>
          <table:table-cell table:formula="of:=[.D553]-[.D55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1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34166666666667" calcext:value-type="float">
            <text:p>0,00134166666666667000</text:p>
          </table:table-cell>
          <table:table-cell table:formula="of:=[.D554]-[.D55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1" office:value-type="float" office:value="11613" calcext:value-type="float">
            <text:p>11613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34409722222222" calcext:value-type="float">
            <text:p>0,00134409722222222000</text:p>
          </table:table-cell>
          <table:table-cell table:formula="of:=[.D555]-[.D55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1" office:value-type="float" office:value="11634" calcext:value-type="float">
            <text:p>1163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34652777777778" calcext:value-type="float">
            <text:p>0,00134652777777778000</text:p>
          </table:table-cell>
          <table:table-cell table:formula="of:=[.D556]-[.D55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1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34895833333333" calcext:value-type="float">
            <text:p>0,00134895833333333000</text:p>
          </table:table-cell>
          <table:table-cell table:formula="of:=[.D557]-[.D55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1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35138888888889" calcext:value-type="float">
            <text:p>0,00135138888888889000</text:p>
          </table:table-cell>
          <table:table-cell table:formula="of:=[.D558]-[.D55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1" office:value-type="float" office:value="11697" calcext:value-type="float">
            <text:p>11697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35381944444444" calcext:value-type="float">
            <text:p>0,00135381944444444000</text:p>
          </table:table-cell>
          <table:table-cell table:formula="of:=[.D559]-[.D55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1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35625" calcext:value-type="float">
            <text:p>0,00135625000000000000</text:p>
          </table:table-cell>
          <table:table-cell table:formula="of:=[.D560]-[.D55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1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35868055555556" calcext:value-type="float">
            <text:p>0,00135868055555556000</text:p>
          </table:table-cell>
          <table:table-cell table:formula="of:=[.D561]-[.D56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1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36111111111111" calcext:value-type="float">
            <text:p>0,00136111111111111000</text:p>
          </table:table-cell>
          <table:table-cell table:formula="of:=[.D562]-[.D56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1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36354166666667" calcext:value-type="float">
            <text:p>0,00136354166666667000</text:p>
          </table:table-cell>
          <table:table-cell table:formula="of:=[.D563]-[.D56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1" office:value-type="float" office:value="11802" calcext:value-type="float">
            <text:p>1180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36597222222222" calcext:value-type="float">
            <text:p>0,00136597222222222000</text:p>
          </table:table-cell>
          <table:table-cell table:formula="of:=[.D564]-[.D56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1" office:value-type="float" office:value="11823" calcext:value-type="float">
            <text:p>11823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36840277777778" calcext:value-type="float">
            <text:p>0,00136840277777778000</text:p>
          </table:table-cell>
          <table:table-cell table:formula="of:=[.D565]-[.D56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1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37083333333333" calcext:value-type="float">
            <text:p>0,00137083333333333000</text:p>
          </table:table-cell>
          <table:table-cell table:formula="of:=[.D566]-[.D56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1" office:value-type="float" office:value="11865" calcext:value-type="float">
            <text:p>1186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37326388888889" calcext:value-type="float">
            <text:p>0,00137326388888889000</text:p>
          </table:table-cell>
          <table:table-cell table:formula="of:=[.D567]-[.D56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1" office:value-type="float" office:value="11886" calcext:value-type="float">
            <text:p>1188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37569444444444" calcext:value-type="float">
            <text:p>0,00137569444444444000</text:p>
          </table:table-cell>
          <table:table-cell table:formula="of:=[.D568]-[.D56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1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378125" calcext:value-type="float">
            <text:p>0,00137812500000000000</text:p>
          </table:table-cell>
          <table:table-cell table:formula="of:=[.D569]-[.D56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1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38055555555556" calcext:value-type="float">
            <text:p>0,00138055555555556000</text:p>
          </table:table-cell>
          <table:table-cell table:formula="of:=[.D570]-[.D56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1" office:value-type="float" office:value="11949" calcext:value-type="float">
            <text:p>11949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38298611111111" calcext:value-type="float">
            <text:p>0,00138298611111111000</text:p>
          </table:table-cell>
          <table:table-cell table:formula="of:=[.D571]-[.D57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1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38541666666667" calcext:value-type="float">
            <text:p>0,00138541666666667000</text:p>
          </table:table-cell>
          <table:table-cell table:formula="of:=[.D572]-[.D57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1" office:value-type="float" office:value="11991" calcext:value-type="float">
            <text:p>11991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38784722222222" calcext:value-type="float">
            <text:p>0,00138784722222222000</text:p>
          </table:table-cell>
          <table:table-cell table:formula="of:=[.D573]-[.D57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1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39027777777778" calcext:value-type="float">
            <text:p>0,00139027777777778000</text:p>
          </table:table-cell>
          <table:table-cell table:formula="of:=[.D574]-[.D57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1" office:value-type="float" office:value="12033" calcext:value-type="float">
            <text:p>12033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39270833333333" calcext:value-type="float">
            <text:p>0,00139270833333333000</text:p>
          </table:table-cell>
          <table:table-cell table:formula="of:=[.D575]-[.D57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1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39513888888889" calcext:value-type="float">
            <text:p>0,00139513888888889000</text:p>
          </table:table-cell>
          <table:table-cell table:formula="of:=[.D576]-[.D57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1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39756944444444" calcext:value-type="float">
            <text:p>0,00139756944444444000</text:p>
          </table:table-cell>
          <table:table-cell table:formula="of:=[.D577]-[.D57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1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4" calcext:value-type="float">
            <text:p>0,00140000000000000000</text:p>
          </table:table-cell>
          <table:table-cell table:formula="of:=[.D578]-[.D57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1" office:value-type="float" office:value="12117" calcext:value-type="float">
            <text:p>12117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40243055555556" calcext:value-type="float">
            <text:p>0,00140243055555556000</text:p>
          </table:table-cell>
          <table:table-cell table:formula="of:=[.D579]-[.D57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1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40486111111111" calcext:value-type="float">
            <text:p>0,00140486111111111000</text:p>
          </table:table-cell>
          <table:table-cell table:formula="of:=[.D580]-[.D57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1" office:value-type="float" office:value="12159" calcext:value-type="float">
            <text:p>12159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40729166666667" calcext:value-type="float">
            <text:p>0,00140729166666667000</text:p>
          </table:table-cell>
          <table:table-cell table:formula="of:=[.D581]-[.D58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1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40972222222222" calcext:value-type="float">
            <text:p>0,00140972222222222000</text:p>
          </table:table-cell>
          <table:table-cell table:formula="of:=[.D582]-[.D58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1" office:value-type="float" office:value="12201" calcext:value-type="float">
            <text:p>12201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41215277777778" calcext:value-type="float">
            <text:p>0,00141215277777778000</text:p>
          </table:table-cell>
          <table:table-cell table:formula="of:=[.D583]-[.D58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1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41458333333333" calcext:value-type="float">
            <text:p>0,00141458333333333000</text:p>
          </table:table-cell>
          <table:table-cell table:formula="of:=[.D584]-[.D58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1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41701388888889" calcext:value-type="float">
            <text:p>0,00141701388888889000</text:p>
          </table:table-cell>
          <table:table-cell table:formula="of:=[.D585]-[.D58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1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41944444444444" calcext:value-type="float">
            <text:p>0,00141944444444444000</text:p>
          </table:table-cell>
          <table:table-cell table:formula="of:=[.D586]-[.D58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1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421875" calcext:value-type="float">
            <text:p>0,00142187500000000000</text:p>
          </table:table-cell>
          <table:table-cell table:formula="of:=[.D587]-[.D58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1" office:value-type="float" office:value="12306" calcext:value-type="float">
            <text:p>1230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42430555555556" calcext:value-type="float">
            <text:p>0,00142430555555556000</text:p>
          </table:table-cell>
          <table:table-cell table:formula="of:=[.D588]-[.D58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1" office:value-type="float" office:value="12327" calcext:value-type="float">
            <text:p>12327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42673611111111" calcext:value-type="float">
            <text:p>0,00142673611111111000</text:p>
          </table:table-cell>
          <table:table-cell table:formula="of:=[.D589]-[.D58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1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42916666666667" calcext:value-type="float">
            <text:p>0,00142916666666667000</text:p>
          </table:table-cell>
          <table:table-cell table:formula="of:=[.D590]-[.D58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1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43159722222222" calcext:value-type="float">
            <text:p>0,00143159722222222000</text:p>
          </table:table-cell>
          <table:table-cell table:formula="of:=[.D591]-[.D59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1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43402777777778" calcext:value-type="float">
            <text:p>0,00143402777777778000</text:p>
          </table:table-cell>
          <table:table-cell table:formula="of:=[.D592]-[.D59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1" office:value-type="float" office:value="12411" calcext:value-type="float">
            <text:p>12411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43645833333333" calcext:value-type="float">
            <text:p>0,00143645833333333000</text:p>
          </table:table-cell>
          <table:table-cell table:formula="of:=[.D593]-[.D59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1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43888888888889" calcext:value-type="float">
            <text:p>0,00143888888888889000</text:p>
          </table:table-cell>
          <table:table-cell table:formula="of:=[.D594]-[.D59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1" office:value-type="float" office:value="12453" calcext:value-type="float">
            <text:p>12453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44131944444444" calcext:value-type="float">
            <text:p>0,00144131944444444000</text:p>
          </table:table-cell>
          <table:table-cell table:formula="of:=[.D595]-[.D59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1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44375" calcext:value-type="float">
            <text:p>0,00144375000000000000</text:p>
          </table:table-cell>
          <table:table-cell table:formula="of:=[.D596]-[.D59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1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44618055555556" calcext:value-type="float">
            <text:p>0,00144618055555556000</text:p>
          </table:table-cell>
          <table:table-cell table:formula="of:=[.D597]-[.D59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1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44861111111111" calcext:value-type="float">
            <text:p>0,00144861111111111000</text:p>
          </table:table-cell>
          <table:table-cell table:formula="of:=[.D598]-[.D59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1" office:value-type="float" office:value="12537" calcext:value-type="float">
            <text:p>12537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45104166666667" calcext:value-type="float">
            <text:p>0,00145104166666667000</text:p>
          </table:table-cell>
          <table:table-cell table:formula="of:=[.D599]-[.D59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1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45347222222222" calcext:value-type="float">
            <text:p>0,00145347222222222000</text:p>
          </table:table-cell>
          <table:table-cell table:formula="of:=[.D600]-[.D59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1" office:value-type="float" office:value="12579" calcext:value-type="float">
            <text:p>12579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45590277777778" calcext:value-type="float">
            <text:p>0,00145590277777778000</text:p>
          </table:table-cell>
          <table:table-cell table:formula="of:=[.D601]-[.D60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1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45833333333333" calcext:value-type="float">
            <text:p>0,00145833333333333000</text:p>
          </table:table-cell>
          <table:table-cell table:formula="of:=[.D602]-[.D60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1" office:value-type="float" office:value="12621" calcext:value-type="float">
            <text:p>12621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46076388888889" calcext:value-type="float">
            <text:p>0,00146076388888889000</text:p>
          </table:table-cell>
          <table:table-cell table:formula="of:=[.D603]-[.D60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1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46319444444444" calcext:value-type="float">
            <text:p>0,00146319444444444000</text:p>
          </table:table-cell>
          <table:table-cell table:formula="of:=[.D604]-[.D60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1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465625" calcext:value-type="float">
            <text:p>0,00146562500000000000</text:p>
          </table:table-cell>
          <table:table-cell table:formula="of:=[.D605]-[.D60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1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46805555555556" calcext:value-type="float">
            <text:p>0,00146805555555556000</text:p>
          </table:table-cell>
          <table:table-cell table:formula="of:=[.D606]-[.D60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1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47048611111111" calcext:value-type="float">
            <text:p>0,00147048611111111000</text:p>
          </table:table-cell>
          <table:table-cell table:formula="of:=[.D607]-[.D60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1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47291666666667" calcext:value-type="float">
            <text:p>0,00147291666666667000</text:p>
          </table:table-cell>
          <table:table-cell table:formula="of:=[.D608]-[.D60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1" office:value-type="float" office:value="12747" calcext:value-type="float">
            <text:p>12747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47534722222222" calcext:value-type="float">
            <text:p>0,00147534722222222000</text:p>
          </table:table-cell>
          <table:table-cell table:formula="of:=[.D609]-[.D60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1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47777777777778" calcext:value-type="float">
            <text:p>0,00147777777777778000</text:p>
          </table:table-cell>
          <table:table-cell table:formula="of:=[.D610]-[.D60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1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48020833333333" calcext:value-type="float">
            <text:p>0,00148020833333333000</text:p>
          </table:table-cell>
          <table:table-cell table:formula="of:=[.D611]-[.D61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1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48263888888889" calcext:value-type="float">
            <text:p>0,00148263888888889000</text:p>
          </table:table-cell>
          <table:table-cell table:formula="of:=[.D612]-[.D61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1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48506944444444" calcext:value-type="float">
            <text:p>0,00148506944444444000</text:p>
          </table:table-cell>
          <table:table-cell table:formula="of:=[.D613]-[.D61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1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4875" calcext:value-type="float">
            <text:p>0,00148750000000000000</text:p>
          </table:table-cell>
          <table:table-cell table:formula="of:=[.D614]-[.D61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1" office:value-type="float" office:value="12873" calcext:value-type="float">
            <text:p>12873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48993055555556" calcext:value-type="float">
            <text:p>0,00148993055555556000</text:p>
          </table:table-cell>
          <table:table-cell table:formula="of:=[.D615]-[.D61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1" office:value-type="float" office:value="12894" calcext:value-type="float">
            <text:p>1289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49236111111111" calcext:value-type="float">
            <text:p>0,00149236111111111000</text:p>
          </table:table-cell>
          <table:table-cell table:formula="of:=[.D616]-[.D61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1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49479166666667" calcext:value-type="float">
            <text:p>0,00149479166666667000</text:p>
          </table:table-cell>
          <table:table-cell table:formula="of:=[.D617]-[.D61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1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49722222222222" calcext:value-type="float">
            <text:p>0,00149722222222222000</text:p>
          </table:table-cell>
          <table:table-cell table:formula="of:=[.D618]-[.D61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1" office:value-type="float" office:value="12957" calcext:value-type="float">
            <text:p>12957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49965277777778" calcext:value-type="float">
            <text:p>0,00149965277777778000</text:p>
          </table:table-cell>
          <table:table-cell table:formula="of:=[.D619]-[.D61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1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50208333333333" calcext:value-type="float">
            <text:p>0,00150208333333333000</text:p>
          </table:table-cell>
          <table:table-cell table:formula="of:=[.D620]-[.D61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1" office:value-type="float" office:value="12999" calcext:value-type="float">
            <text:p>12999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50451388888889" calcext:value-type="float">
            <text:p>0,00150451388888889000</text:p>
          </table:table-cell>
          <table:table-cell table:formula="of:=[.D621]-[.D62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1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50694444444444" calcext:value-type="float">
            <text:p>0,00150694444444444000</text:p>
          </table:table-cell>
          <table:table-cell table:formula="of:=[.D622]-[.D62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1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509375" calcext:value-type="float">
            <text:p>0,00150937500000000000</text:p>
          </table:table-cell>
          <table:table-cell table:formula="of:=[.D623]-[.D62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1" office:value-type="float" office:value="13062" calcext:value-type="float">
            <text:p>1306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51180555555556" calcext:value-type="float">
            <text:p>0,00151180555555556000</text:p>
          </table:table-cell>
          <table:table-cell table:formula="of:=[.D624]-[.D62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1" office:value-type="float" office:value="13083" calcext:value-type="float">
            <text:p>13083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51423611111111" calcext:value-type="float">
            <text:p>0,00151423611111111000</text:p>
          </table:table-cell>
          <table:table-cell table:formula="of:=[.D625]-[.D62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1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51666666666667" calcext:value-type="float">
            <text:p>0,00151666666666667000</text:p>
          </table:table-cell>
          <table:table-cell table:formula="of:=[.D626]-[.D62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1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51909722222222" calcext:value-type="float">
            <text:p>0,00151909722222222000</text:p>
          </table:table-cell>
          <table:table-cell table:formula="of:=[.D627]-[.D62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1" office:value-type="float" office:value="13146" calcext:value-type="float">
            <text:p>1314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52152777777778" calcext:value-type="float">
            <text:p>0,00152152777777778000</text:p>
          </table:table-cell>
          <table:table-cell table:formula="of:=[.D628]-[.D62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1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52395833333333" calcext:value-type="float">
            <text:p>0,00152395833333333000</text:p>
          </table:table-cell>
          <table:table-cell table:formula="of:=[.D629]-[.D62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1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52638888888889" calcext:value-type="float">
            <text:p>0,00152638888888889000</text:p>
          </table:table-cell>
          <table:table-cell table:formula="of:=[.D630]-[.D62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1" office:value-type="float" office:value="13209" calcext:value-type="float">
            <text:p>13209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52881944444444" calcext:value-type="float">
            <text:p>0,00152881944444444000</text:p>
          </table:table-cell>
          <table:table-cell table:formula="of:=[.D631]-[.D63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1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53125" calcext:value-type="float">
            <text:p>0,00153125000000000000</text:p>
          </table:table-cell>
          <table:table-cell table:formula="of:=[.D632]-[.D63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1" office:value-type="float" office:value="13251" calcext:value-type="float">
            <text:p>13251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53368055555556" calcext:value-type="float">
            <text:p>0,00153368055555556000</text:p>
          </table:table-cell>
          <table:table-cell table:formula="of:=[.D633]-[.D63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1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53611111111111" calcext:value-type="float">
            <text:p>0,00153611111111111000</text:p>
          </table:table-cell>
          <table:table-cell table:formula="of:=[.D634]-[.D63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1" office:value-type="float" office:value="13293" calcext:value-type="float">
            <text:p>13293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53854166666667" calcext:value-type="float">
            <text:p>0,00153854166666667000</text:p>
          </table:table-cell>
          <table:table-cell table:formula="of:=[.D635]-[.D63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1" office:value-type="float" office:value="13314" calcext:value-type="float">
            <text:p>1331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54097222222222" calcext:value-type="float">
            <text:p>0,00154097222222222000</text:p>
          </table:table-cell>
          <table:table-cell table:formula="of:=[.D636]-[.D63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1" office:value-type="float" office:value="13335" calcext:value-type="float">
            <text:p>1333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54340277777778" calcext:value-type="float">
            <text:p>0,00154340277777778000</text:p>
          </table:table-cell>
          <table:table-cell table:formula="of:=[.D637]-[.D63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1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54583333333333" calcext:value-type="float">
            <text:p>0,00154583333333333000</text:p>
          </table:table-cell>
          <table:table-cell table:formula="of:=[.D638]-[.D63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1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54826388888889" calcext:value-type="float">
            <text:p>0,00154826388888889000</text:p>
          </table:table-cell>
          <table:table-cell table:formula="of:=[.D639]-[.D63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1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55069444444444" calcext:value-type="float">
            <text:p>0,00155069444444444000</text:p>
          </table:table-cell>
          <table:table-cell table:formula="of:=[.D640]-[.D63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1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553125" calcext:value-type="float">
            <text:p>0,00155312500000000000</text:p>
          </table:table-cell>
          <table:table-cell table:formula="of:=[.D641]-[.D64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1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55555555555556" calcext:value-type="float">
            <text:p>0,00155555555555556000</text:p>
          </table:table-cell>
          <table:table-cell table:formula="of:=[.D642]-[.D64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1" office:value-type="float" office:value="13461" calcext:value-type="float">
            <text:p>13461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55798611111111" calcext:value-type="float">
            <text:p>0,00155798611111111000</text:p>
          </table:table-cell>
          <table:table-cell table:formula="of:=[.D643]-[.D64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1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56041666666667" calcext:value-type="float">
            <text:p>0,00156041666666667000</text:p>
          </table:table-cell>
          <table:table-cell table:formula="of:=[.D644]-[.D64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1" office:value-type="float" office:value="13503" calcext:value-type="float">
            <text:p>13503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56284722222222" calcext:value-type="float">
            <text:p>0,00156284722222222000</text:p>
          </table:table-cell>
          <table:table-cell table:formula="of:=[.D645]-[.D64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1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56527777777778" calcext:value-type="float">
            <text:p>0,00156527777777778000</text:p>
          </table:table-cell>
          <table:table-cell table:formula="of:=[.D646]-[.D64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1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56770833333333" calcext:value-type="float">
            <text:p>0,00156770833333333000</text:p>
          </table:table-cell>
          <table:table-cell table:formula="of:=[.D647]-[.D64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1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57013888888889" calcext:value-type="float">
            <text:p>0,00157013888888889000</text:p>
          </table:table-cell>
          <table:table-cell table:formula="of:=[.D648]-[.D64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1" office:value-type="float" office:value="13587" calcext:value-type="float">
            <text:p>13587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57256944444444" calcext:value-type="float">
            <text:p>0,00157256944444444000</text:p>
          </table:table-cell>
          <table:table-cell table:formula="of:=[.D649]-[.D64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1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575" calcext:value-type="float">
            <text:p>0,00157500000000000000</text:p>
          </table:table-cell>
          <table:table-cell table:formula="of:=[.D650]-[.D64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1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57743055555556" calcext:value-type="float">
            <text:p>0,00157743055555556000</text:p>
          </table:table-cell>
          <table:table-cell table:formula="of:=[.D651]-[.D65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1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57986111111111" calcext:value-type="float">
            <text:p>0,00157986111111111000</text:p>
          </table:table-cell>
          <table:table-cell table:formula="of:=[.D652]-[.D65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1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58229166666667" calcext:value-type="float">
            <text:p>0,00158229166666667000</text:p>
          </table:table-cell>
          <table:table-cell table:formula="of:=[.D653]-[.D65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1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58472222222222" calcext:value-type="float">
            <text:p>0,00158472222222222000</text:p>
          </table:table-cell>
          <table:table-cell table:formula="of:=[.D654]-[.D65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1" office:value-type="float" office:value="13713" calcext:value-type="float">
            <text:p>13713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58715277777778" calcext:value-type="float">
            <text:p>0,00158715277777778000</text:p>
          </table:table-cell>
          <table:table-cell table:formula="of:=[.D655]-[.D65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1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58958333333333" calcext:value-type="float">
            <text:p>0,00158958333333333000</text:p>
          </table:table-cell>
          <table:table-cell table:formula="of:=[.D656]-[.D65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1" office:value-type="float" office:value="13755" calcext:value-type="float">
            <text:p>1375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59201388888889" calcext:value-type="float">
            <text:p>0,00159201388888889000</text:p>
          </table:table-cell>
          <table:table-cell table:formula="of:=[.D657]-[.D65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1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59444444444444" calcext:value-type="float">
            <text:p>0,00159444444444444000</text:p>
          </table:table-cell>
          <table:table-cell table:formula="of:=[.D658]-[.D65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1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596875" calcext:value-type="float">
            <text:p>0,00159687500000000000</text:p>
          </table:table-cell>
          <table:table-cell table:formula="of:=[.D659]-[.D65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1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59930555555556" calcext:value-type="float">
            <text:p>0,00159930555555556000</text:p>
          </table:table-cell>
          <table:table-cell table:formula="of:=[.D660]-[.D65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1" office:value-type="float" office:value="13839" calcext:value-type="float">
            <text:p>13839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60173611111111" calcext:value-type="float">
            <text:p>0,00160173611111111000</text:p>
          </table:table-cell>
          <table:table-cell table:formula="of:=[.D661]-[.D66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1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60416666666667" calcext:value-type="float">
            <text:p>0,00160416666666667000</text:p>
          </table:table-cell>
          <table:table-cell table:formula="of:=[.D662]-[.D66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1" office:value-type="float" office:value="13881" calcext:value-type="float">
            <text:p>13881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60659722222222" calcext:value-type="float">
            <text:p>0,00160659722222222000</text:p>
          </table:table-cell>
          <table:table-cell table:formula="of:=[.D663]-[.D66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1" office:value-type="float" office:value="13902" calcext:value-type="float">
            <text:p>1390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60902777777778" calcext:value-type="float">
            <text:p>0,00160902777777778000</text:p>
          </table:table-cell>
          <table:table-cell table:formula="of:=[.D664]-[.D66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1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61145833333333" calcext:value-type="float">
            <text:p>0,00161145833333333000</text:p>
          </table:table-cell>
          <table:table-cell table:formula="of:=[.D665]-[.D66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1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61388888888889" calcext:value-type="float">
            <text:p>0,00161388888888889000</text:p>
          </table:table-cell>
          <table:table-cell table:formula="of:=[.D666]-[.D66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1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61631944444444" calcext:value-type="float">
            <text:p>0,00161631944444444000</text:p>
          </table:table-cell>
          <table:table-cell table:formula="of:=[.D667]-[.D66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1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61875" calcext:value-type="float">
            <text:p>0,00161875000000000000</text:p>
          </table:table-cell>
          <table:table-cell table:formula="of:=[.D668]-[.D66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1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62118055555556" calcext:value-type="float">
            <text:p>0,00162118055555556000</text:p>
          </table:table-cell>
          <table:table-cell table:formula="of:=[.D669]-[.D66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1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62361111111111" calcext:value-type="float">
            <text:p>0,00162361111111111000</text:p>
          </table:table-cell>
          <table:table-cell table:formula="of:=[.D670]-[.D66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1" office:value-type="float" office:value="14049" calcext:value-type="float">
            <text:p>14049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62604166666667" calcext:value-type="float">
            <text:p>0,00162604166666667000</text:p>
          </table:table-cell>
          <table:table-cell table:formula="of:=[.D671]-[.D67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1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62847222222222" calcext:value-type="float">
            <text:p>0,00162847222222222000</text:p>
          </table:table-cell>
          <table:table-cell table:formula="of:=[.D672]-[.D67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1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63090277777778" calcext:value-type="float">
            <text:p>0,00163090277777778000</text:p>
          </table:table-cell>
          <table:table-cell table:formula="of:=[.D673]-[.D67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1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63333333333333" calcext:value-type="float">
            <text:p>0,00163333333333333000</text:p>
          </table:table-cell>
          <table:table-cell table:formula="of:=[.D674]-[.D67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1" office:value-type="float" office:value="14133" calcext:value-type="float">
            <text:p>14133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63576388888889" calcext:value-type="float">
            <text:p>0,00163576388888889000</text:p>
          </table:table-cell>
          <table:table-cell table:formula="of:=[.D675]-[.D67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1" office:value-type="float" office:value="14154" calcext:value-type="float">
            <text:p>14154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63819444444444" calcext:value-type="float">
            <text:p>0,00163819444444444000</text:p>
          </table:table-cell>
          <table:table-cell table:formula="of:=[.D676]-[.D67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1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640625" calcext:value-type="float">
            <text:p>0,00164062500000000000</text:p>
          </table:table-cell>
          <table:table-cell table:formula="of:=[.D677]-[.D67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1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64305555555556" calcext:value-type="float">
            <text:p>0,00164305555555556000</text:p>
          </table:table-cell>
          <table:table-cell table:formula="of:=[.D678]-[.D67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1" office:value-type="float" office:value="14217" calcext:value-type="float">
            <text:p>14217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64548611111111" calcext:value-type="float">
            <text:p>0,00164548611111111000</text:p>
          </table:table-cell>
          <table:table-cell table:formula="of:=[.D679]-[.D67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1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64791666666667" calcext:value-type="float">
            <text:p>0,00164791666666667000</text:p>
          </table:table-cell>
          <table:table-cell table:formula="of:=[.D680]-[.D67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1" office:value-type="float" office:value="14259" calcext:value-type="float">
            <text:p>14259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65034722222222" calcext:value-type="float">
            <text:p>0,00165034722222222000</text:p>
          </table:table-cell>
          <table:table-cell table:formula="of:=[.D681]-[.D68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1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65277777777778" calcext:value-type="float">
            <text:p>0,00165277777777778000</text:p>
          </table:table-cell>
          <table:table-cell table:formula="of:=[.D682]-[.D68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1" office:value-type="float" office:value="14301" calcext:value-type="float">
            <text:p>14301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65520833333333" calcext:value-type="float">
            <text:p>0,00165520833333333000</text:p>
          </table:table-cell>
          <table:table-cell table:formula="of:=[.D683]-[.D68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1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65763888888889" calcext:value-type="float">
            <text:p>0,00165763888888889000</text:p>
          </table:table-cell>
          <table:table-cell table:formula="of:=[.D684]-[.D68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1" office:value-type="float" office:value="14343" calcext:value-type="float">
            <text:p>14343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66006944444444" calcext:value-type="float">
            <text:p>0,00166006944444444000</text:p>
          </table:table-cell>
          <table:table-cell table:formula="of:=[.D685]-[.D68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1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6625" calcext:value-type="float">
            <text:p>0,00166250000000000000</text:p>
          </table:table-cell>
          <table:table-cell table:formula="of:=[.D686]-[.D68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1" office:value-type="float" office:value="14385" calcext:value-type="float">
            <text:p>1438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66493055555556" calcext:value-type="float">
            <text:p>0,00166493055555556000</text:p>
          </table:table-cell>
          <table:table-cell table:formula="of:=[.D687]-[.D68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1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66736111111111" calcext:value-type="float">
            <text:p>0,00166736111111111000</text:p>
          </table:table-cell>
          <table:table-cell table:formula="of:=[.D688]-[.D68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1" office:value-type="float" office:value="14427" calcext:value-type="float">
            <text:p>14427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66979166666667" calcext:value-type="float">
            <text:p>0,00166979166666667000</text:p>
          </table:table-cell>
          <table:table-cell table:formula="of:=[.D689]-[.D68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1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67222222222222" calcext:value-type="float">
            <text:p>0,00167222222222222000</text:p>
          </table:table-cell>
          <table:table-cell table:formula="of:=[.D690]-[.D68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1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67465277777778" calcext:value-type="float">
            <text:p>0,00167465277777778000</text:p>
          </table:table-cell>
          <table:table-cell table:formula="of:=[.D691]-[.D69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1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67708333333333" calcext:value-type="float">
            <text:p>0,00167708333333333000</text:p>
          </table:table-cell>
          <table:table-cell table:formula="of:=[.D692]-[.D69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1" office:value-type="float" office:value="14511" calcext:value-type="float">
            <text:p>14511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67951388888889" calcext:value-type="float">
            <text:p>0,00167951388888889000</text:p>
          </table:table-cell>
          <table:table-cell table:formula="of:=[.D693]-[.D69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1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68194444444444" calcext:value-type="float">
            <text:p>0,00168194444444444000</text:p>
          </table:table-cell>
          <table:table-cell table:formula="of:=[.D694]-[.D69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1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684375" calcext:value-type="float">
            <text:p>0,00168437500000000000</text:p>
          </table:table-cell>
          <table:table-cell table:formula="of:=[.D695]-[.D69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1" office:value-type="float" office:value="14574" calcext:value-type="float">
            <text:p>14574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68680555555556" calcext:value-type="float">
            <text:p>0,00168680555555556000</text:p>
          </table:table-cell>
          <table:table-cell table:formula="of:=[.D696]-[.D69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1" office:value-type="float" office:value="14595" calcext:value-type="float">
            <text:p>1459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68923611111111" calcext:value-type="float">
            <text:p>0,00168923611111111000</text:p>
          </table:table-cell>
          <table:table-cell table:formula="of:=[.D697]-[.D69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1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69166666666667" calcext:value-type="float">
            <text:p>0,00169166666666667000</text:p>
          </table:table-cell>
          <table:table-cell table:formula="of:=[.D698]-[.D69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1" office:value-type="float" office:value="14637" calcext:value-type="float">
            <text:p>14637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69409722222222" calcext:value-type="float">
            <text:p>0,00169409722222222000</text:p>
          </table:table-cell>
          <table:table-cell table:formula="of:=[.D699]-[.D69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1" office:value-type="float" office:value="14658" calcext:value-type="float">
            <text:p>14658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69652777777778" calcext:value-type="float">
            <text:p>0,00169652777777778000</text:p>
          </table:table-cell>
          <table:table-cell table:formula="of:=[.D700]-[.D69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1" office:value-type="float" office:value="14679" calcext:value-type="float">
            <text:p>14679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69895833333333" calcext:value-type="float">
            <text:p>0,00169895833333333000</text:p>
          </table:table-cell>
          <table:table-cell table:formula="of:=[.D701]-[.D70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1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70138888888889" calcext:value-type="float">
            <text:p>0,00170138888888889000</text:p>
          </table:table-cell>
          <table:table-cell table:formula="of:=[.D702]-[.D70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1" office:value-type="float" office:value="14721" calcext:value-type="float">
            <text:p>14721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70381944444444" calcext:value-type="float">
            <text:p>0,00170381944444444000</text:p>
          </table:table-cell>
          <table:table-cell table:formula="of:=[.D703]-[.D70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1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70625" calcext:value-type="float">
            <text:p>0,00170625000000000000</text:p>
          </table:table-cell>
          <table:table-cell table:formula="of:=[.D704]-[.D70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1" office:value-type="float" office:value="14763" calcext:value-type="float">
            <text:p>14763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70868055555556" calcext:value-type="float">
            <text:p>0,00170868055555556000</text:p>
          </table:table-cell>
          <table:table-cell table:formula="of:=[.D705]-[.D70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1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71111111111111" calcext:value-type="float">
            <text:p>0,00171111111111111000</text:p>
          </table:table-cell>
          <table:table-cell table:formula="of:=[.D706]-[.D70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1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71354166666667" calcext:value-type="float">
            <text:p>0,00171354166666667000</text:p>
          </table:table-cell>
          <table:table-cell table:formula="of:=[.D707]-[.D70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1" office:value-type="float" office:value="14826" calcext:value-type="float">
            <text:p>14826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71597222222222" calcext:value-type="float">
            <text:p>0,00171597222222222000</text:p>
          </table:table-cell>
          <table:table-cell table:formula="of:=[.D708]-[.D70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1" office:value-type="float" office:value="14847" calcext:value-type="float">
            <text:p>14847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71840277777778" calcext:value-type="float">
            <text:p>0,00171840277777778000</text:p>
          </table:table-cell>
          <table:table-cell table:formula="of:=[.D709]-[.D70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1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72083333333333" calcext:value-type="float">
            <text:p>0,00172083333333333000</text:p>
          </table:table-cell>
          <table:table-cell table:formula="of:=[.D710]-[.D70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1" office:value-type="float" office:value="14889" calcext:value-type="float">
            <text:p>14889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72326388888889" calcext:value-type="float">
            <text:p>0,00172326388888889000</text:p>
          </table:table-cell>
          <table:table-cell table:formula="of:=[.D711]-[.D71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1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72569444444444" calcext:value-type="float">
            <text:p>0,00172569444444444000</text:p>
          </table:table-cell>
          <table:table-cell table:formula="of:=[.D712]-[.D71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1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728125" calcext:value-type="float">
            <text:p>0,00172812500000000000</text:p>
          </table:table-cell>
          <table:table-cell table:formula="of:=[.D713]-[.D71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1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73055555555556" calcext:value-type="float">
            <text:p>0,00173055555555556000</text:p>
          </table:table-cell>
          <table:table-cell table:formula="of:=[.D714]-[.D71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1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73298611111111" calcext:value-type="float">
            <text:p>0,00173298611111111000</text:p>
          </table:table-cell>
          <table:table-cell table:formula="of:=[.D715]-[.D7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1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73541666666667" calcext:value-type="float">
            <text:p>0,00173541666666667000</text:p>
          </table:table-cell>
          <table:table-cell table:formula="of:=[.D716]-[.D71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1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73784722222222" calcext:value-type="float">
            <text:p>0,00173784722222222000</text:p>
          </table:table-cell>
          <table:table-cell table:formula="of:=[.D717]-[.D71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1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74027777777778" calcext:value-type="float">
            <text:p>0,00174027777777778000</text:p>
          </table:table-cell>
          <table:table-cell table:formula="of:=[.D718]-[.D71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1" office:value-type="float" office:value="15057" calcext:value-type="float">
            <text:p>15057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74270833333333" calcext:value-type="float">
            <text:p>0,00174270833333333000</text:p>
          </table:table-cell>
          <table:table-cell table:formula="of:=[.D719]-[.D71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1" office:value-type="float" office:value="15078" calcext:value-type="float">
            <text:p>15078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74513888888889" calcext:value-type="float">
            <text:p>0,00174513888888889000</text:p>
          </table:table-cell>
          <table:table-cell table:formula="of:=[.D720]-[.D71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1" office:value-type="float" office:value="15099" calcext:value-type="float">
            <text:p>15099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74756944444444" calcext:value-type="float">
            <text:p>0,00174756944444444000</text:p>
          </table:table-cell>
          <table:table-cell table:formula="of:=[.D721]-[.D72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1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75" calcext:value-type="float">
            <text:p>0,00175000000000000000</text:p>
          </table:table-cell>
          <table:table-cell table:formula="of:=[.D722]-[.D72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1" office:value-type="float" office:value="15141" calcext:value-type="float">
            <text:p>15141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75243055555556" calcext:value-type="float">
            <text:p>0,00175243055555556000</text:p>
          </table:table-cell>
          <table:table-cell table:formula="of:=[.D723]-[.D72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1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75486111111111" calcext:value-type="float">
            <text:p>0,00175486111111111000</text:p>
          </table:table-cell>
          <table:table-cell table:formula="of:=[.D724]-[.D72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1" office:value-type="float" office:value="15183" calcext:value-type="float">
            <text:p>15183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75729166666667" calcext:value-type="float">
            <text:p>0,00175729166666667000</text:p>
          </table:table-cell>
          <table:table-cell table:formula="of:=[.D725]-[.D72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1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75972222222222" calcext:value-type="float">
            <text:p>0,00175972222222222000</text:p>
          </table:table-cell>
          <table:table-cell table:formula="of:=[.D726]-[.D72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1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76215277777778" calcext:value-type="float">
            <text:p>0,00176215277777778000</text:p>
          </table:table-cell>
          <table:table-cell table:formula="of:=[.D727]-[.D72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1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76458333333333" calcext:value-type="float">
            <text:p>0,00176458333333333000</text:p>
          </table:table-cell>
          <table:table-cell table:formula="of:=[.D728]-[.D72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1" office:value-type="float" office:value="15267" calcext:value-type="float">
            <text:p>15267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76701388888889" calcext:value-type="float">
            <text:p>0,00176701388888889000</text:p>
          </table:table-cell>
          <table:table-cell table:formula="of:=[.D729]-[.D72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1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76944444444444" calcext:value-type="float">
            <text:p>0,00176944444444444000</text:p>
          </table:table-cell>
          <table:table-cell table:formula="of:=[.D730]-[.D72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1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771875" calcext:value-type="float">
            <text:p>0,00177187500000000000</text:p>
          </table:table-cell>
          <table:table-cell table:formula="of:=[.D731]-[.D73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1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77430555555556" calcext:value-type="float">
            <text:p>0,00177430555555556000</text:p>
          </table:table-cell>
          <table:table-cell table:formula="of:=[.D732]-[.D73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1" office:value-type="float" office:value="15351" calcext:value-type="float">
            <text:p>15351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77673611111111" calcext:value-type="float">
            <text:p>0,00177673611111111000</text:p>
          </table:table-cell>
          <table:table-cell table:formula="of:=[.D733]-[.D73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1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77916666666667" calcext:value-type="float">
            <text:p>0,00177916666666667000</text:p>
          </table:table-cell>
          <table:table-cell table:formula="of:=[.D734]-[.D73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1" office:value-type="float" office:value="15393" calcext:value-type="float">
            <text:p>15393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78159722222222" calcext:value-type="float">
            <text:p>0,00178159722222222000</text:p>
          </table:table-cell>
          <table:table-cell table:formula="of:=[.D735]-[.D73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1" office:value-type="float" office:value="15414" calcext:value-type="float">
            <text:p>15414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78402777777778" calcext:value-type="float">
            <text:p>0,00178402777777778000</text:p>
          </table:table-cell>
          <table:table-cell table:formula="of:=[.D736]-[.D73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1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78645833333333" calcext:value-type="float">
            <text:p>0,00178645833333333000</text:p>
          </table:table-cell>
          <table:table-cell table:formula="of:=[.D737]-[.D73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1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78888888888889" calcext:value-type="float">
            <text:p>0,00178888888888889000</text:p>
          </table:table-cell>
          <table:table-cell table:formula="of:=[.D738]-[.D73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1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79131944444444" calcext:value-type="float">
            <text:p>0,00179131944444444000</text:p>
          </table:table-cell>
          <table:table-cell table:formula="of:=[.D739]-[.D73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1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79375" calcext:value-type="float">
            <text:p>0,00179375000000000000</text:p>
          </table:table-cell>
          <table:table-cell table:formula="of:=[.D740]-[.D73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1" office:value-type="float" office:value="15519" calcext:value-type="float">
            <text:p>15519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79618055555556" calcext:value-type="float">
            <text:p>0,00179618055555556000</text:p>
          </table:table-cell>
          <table:table-cell table:formula="of:=[.D741]-[.D74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1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79861111111111" calcext:value-type="float">
            <text:p>0,00179861111111111000</text:p>
          </table:table-cell>
          <table:table-cell table:formula="of:=[.D742]-[.D74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1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80104166666667" calcext:value-type="float">
            <text:p>0,00180104166666667000</text:p>
          </table:table-cell>
          <table:table-cell table:formula="of:=[.D743]-[.D74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1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80347222222222" calcext:value-type="float">
            <text:p>0,00180347222222222000</text:p>
          </table:table-cell>
          <table:table-cell table:formula="of:=[.D744]-[.D74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1" office:value-type="float" office:value="15603" calcext:value-type="float">
            <text:p>15603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80590277777778" calcext:value-type="float">
            <text:p>0,00180590277777778000</text:p>
          </table:table-cell>
          <table:table-cell table:formula="of:=[.D745]-[.D74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1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80833333333333" calcext:value-type="float">
            <text:p>0,00180833333333333000</text:p>
          </table:table-cell>
          <table:table-cell table:formula="of:=[.D746]-[.D74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1" office:value-type="float" office:value="15645" calcext:value-type="float">
            <text:p>1564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81076388888889" calcext:value-type="float">
            <text:p>0,00181076388888889000</text:p>
          </table:table-cell>
          <table:table-cell table:formula="of:=[.D747]-[.D74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1" office:value-type="float" office:value="15666" calcext:value-type="float">
            <text:p>15666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81319444444444" calcext:value-type="float">
            <text:p>0,00181319444444444000</text:p>
          </table:table-cell>
          <table:table-cell table:formula="of:=[.D748]-[.D74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1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815625" calcext:value-type="float">
            <text:p>0,00181562500000000000</text:p>
          </table:table-cell>
          <table:table-cell table:formula="of:=[.D749]-[.D74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1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81805555555556" calcext:value-type="float">
            <text:p>0,00181805555555556000</text:p>
          </table:table-cell>
          <table:table-cell table:formula="of:=[.D750]-[.D74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1" office:value-type="float" office:value="15729" calcext:value-type="float">
            <text:p>15729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82048611111111" calcext:value-type="float">
            <text:p>0,00182048611111111000</text:p>
          </table:table-cell>
          <table:table-cell table:formula="of:=[.D751]-[.D75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1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82291666666667" calcext:value-type="float">
            <text:p>0,00182291666666667000</text:p>
          </table:table-cell>
          <table:table-cell table:formula="of:=[.D752]-[.D75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1" office:value-type="float" office:value="15771" calcext:value-type="float">
            <text:p>15771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82534722222222" calcext:value-type="float">
            <text:p>0,00182534722222222000</text:p>
          </table:table-cell>
          <table:table-cell table:formula="of:=[.D753]-[.D75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1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82777777777778" calcext:value-type="float">
            <text:p>0,00182777777777778000</text:p>
          </table:table-cell>
          <table:table-cell table:formula="of:=[.D754]-[.D75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1" office:value-type="float" office:value="15813" calcext:value-type="float">
            <text:p>15813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83020833333333" calcext:value-type="float">
            <text:p>0,00183020833333333000</text:p>
          </table:table-cell>
          <table:table-cell table:formula="of:=[.D755]-[.D75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1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83263888888889" calcext:value-type="float">
            <text:p>0,00183263888888889000</text:p>
          </table:table-cell>
          <table:table-cell table:formula="of:=[.D756]-[.D75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1" office:value-type="float" office:value="15855" calcext:value-type="float">
            <text:p>1585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83506944444444" calcext:value-type="float">
            <text:p>0,00183506944444444000</text:p>
          </table:table-cell>
          <table:table-cell table:formula="of:=[.D757]-[.D75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1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8375" calcext:value-type="float">
            <text:p>0,00183750000000000000</text:p>
          </table:table-cell>
          <table:table-cell table:formula="of:=[.D758]-[.D75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1" office:value-type="float" office:value="15897" calcext:value-type="float">
            <text:p>15897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83993055555556" calcext:value-type="float">
            <text:p>0,00183993055555556000</text:p>
          </table:table-cell>
          <table:table-cell table:formula="of:=[.D759]-[.D75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1" office:value-type="float" office:value="15918" calcext:value-type="float">
            <text:p>15918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84236111111111" calcext:value-type="float">
            <text:p>0,00184236111111111000</text:p>
          </table:table-cell>
          <table:table-cell table:formula="of:=[.D760]-[.D75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1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84479166666667" calcext:value-type="float">
            <text:p>0,00184479166666667000</text:p>
          </table:table-cell>
          <table:table-cell table:formula="of:=[.D761]-[.D76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1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84722222222222" calcext:value-type="float">
            <text:p>0,00184722222222222000</text:p>
          </table:table-cell>
          <table:table-cell table:formula="of:=[.D762]-[.D76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1" office:value-type="float" office:value="15981" calcext:value-type="float">
            <text:p>15981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84965277777778" calcext:value-type="float">
            <text:p>0,00184965277777778000</text:p>
          </table:table-cell>
          <table:table-cell table:formula="of:=[.D763]-[.D76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1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85208333333333" calcext:value-type="float">
            <text:p>0,00185208333333333000</text:p>
          </table:table-cell>
          <table:table-cell table:formula="of:=[.D764]-[.D76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1" office:value-type="float" office:value="16023" calcext:value-type="float">
            <text:p>16023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85451388888889" calcext:value-type="float">
            <text:p>0,00185451388888889000</text:p>
          </table:table-cell>
          <table:table-cell table:formula="of:=[.D765]-[.D76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1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85694444444444" calcext:value-type="float">
            <text:p>0,00185694444444444000</text:p>
          </table:table-cell>
          <table:table-cell table:formula="of:=[.D766]-[.D76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1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859375" calcext:value-type="float">
            <text:p>0,00185937500000000000</text:p>
          </table:table-cell>
          <table:table-cell table:formula="of:=[.D767]-[.D76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1" office:value-type="float" office:value="16086" calcext:value-type="float">
            <text:p>16086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86180555555556" calcext:value-type="float">
            <text:p>0,00186180555555556000</text:p>
          </table:table-cell>
          <table:table-cell table:formula="of:=[.D768]-[.D76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1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86423611111111" calcext:value-type="float">
            <text:p>0,00186423611111111000</text:p>
          </table:table-cell>
          <table:table-cell table:formula="of:=[.D769]-[.D76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1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86666666666667" calcext:value-type="float">
            <text:p>0,00186666666666667000</text:p>
          </table:table-cell>
          <table:table-cell table:formula="of:=[.D770]-[.D76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1" office:value-type="float" office:value="16149" calcext:value-type="float">
            <text:p>16149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86909722222222" calcext:value-type="float">
            <text:p>0,00186909722222222000</text:p>
          </table:table-cell>
          <table:table-cell table:formula="of:=[.D771]-[.D77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1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87152777777778" calcext:value-type="float">
            <text:p>0,00187152777777778000</text:p>
          </table:table-cell>
          <table:table-cell table:formula="of:=[.D772]-[.D77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1" office:value-type="float" office:value="16191" calcext:value-type="float">
            <text:p>16191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87395833333333" calcext:value-type="float">
            <text:p>0,00187395833333333000</text:p>
          </table:table-cell>
          <table:table-cell table:formula="of:=[.D773]-[.D77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1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87638888888889" calcext:value-type="float">
            <text:p>0,00187638888888889000</text:p>
          </table:table-cell>
          <table:table-cell table:formula="of:=[.D774]-[.D77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1" office:value-type="float" office:value="16233" calcext:value-type="float">
            <text:p>16233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87881944444444" calcext:value-type="float">
            <text:p>0,00187881944444444000</text:p>
          </table:table-cell>
          <table:table-cell table:formula="of:=[.D775]-[.D77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1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88125" calcext:value-type="float">
            <text:p>0,00188125000000000000</text:p>
          </table:table-cell>
          <table:table-cell table:formula="of:=[.D776]-[.D77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1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88368055555556" calcext:value-type="float">
            <text:p>0,00188368055555556000</text:p>
          </table:table-cell>
          <table:table-cell table:formula="of:=[.D777]-[.D77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1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88611111111111" calcext:value-type="float">
            <text:p>0,00188611111111111000</text:p>
          </table:table-cell>
          <table:table-cell table:formula="of:=[.D778]-[.D77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1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88854166666667" calcext:value-type="float">
            <text:p>0,00188854166666667000</text:p>
          </table:table-cell>
          <table:table-cell table:formula="of:=[.D779]-[.D778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1" office:value-type="float" office:value="16338" calcext:value-type="float">
            <text:p>16338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89097222222222" calcext:value-type="float">
            <text:p>0,00189097222222222000</text:p>
          </table:table-cell>
          <table:table-cell table:formula="of:=[.D780]-[.D77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1" office:value-type="float" office:value="16359" calcext:value-type="float">
            <text:p>16359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89340277777778" calcext:value-type="float">
            <text:p>0,00189340277777778000</text:p>
          </table:table-cell>
          <table:table-cell table:formula="of:=[.D781]-[.D78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1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89583333333333" calcext:value-type="float">
            <text:p>0,00189583333333333000</text:p>
          </table:table-cell>
          <table:table-cell table:formula="of:=[.D782]-[.D78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1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89826388888889" calcext:value-type="float">
            <text:p>0,00189826388888889000</text:p>
          </table:table-cell>
          <table:table-cell table:formula="of:=[.D783]-[.D78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1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90069444444444" calcext:value-type="float">
            <text:p>0,00190069444444444000</text:p>
          </table:table-cell>
          <table:table-cell table:formula="of:=[.D784]-[.D78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1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903125" calcext:value-type="float">
            <text:p>0,00190312500000000000</text:p>
          </table:table-cell>
          <table:table-cell table:formula="of:=[.D785]-[.D78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1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90555555555556" calcext:value-type="float">
            <text:p>0,00190555555555556000</text:p>
          </table:table-cell>
          <table:table-cell table:formula="of:=[.D786]-[.D785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1" office:value-type="float" office:value="16485" calcext:value-type="float">
            <text:p>1648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90798611111111" calcext:value-type="float">
            <text:p>0,00190798611111111000</text:p>
          </table:table-cell>
          <table:table-cell table:formula="of:=[.D787]-[.D78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1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91041666666667" calcext:value-type="float">
            <text:p>0,00191041666666667000</text:p>
          </table:table-cell>
          <table:table-cell table:formula="of:=[.D788]-[.D78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1" office:value-type="float" office:value="16527" calcext:value-type="float">
            <text:p>16527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91284722222222" calcext:value-type="float">
            <text:p>0,00191284722222222000</text:p>
          </table:table-cell>
          <table:table-cell table:formula="of:=[.D789]-[.D78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1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91527777777778" calcext:value-type="float">
            <text:p>0,00191527777777778000</text:p>
          </table:table-cell>
          <table:table-cell table:formula="of:=[.D790]-[.D78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1" office:value-type="float" office:value="16569" calcext:value-type="float">
            <text:p>16569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91770833333333" calcext:value-type="float">
            <text:p>0,00191770833333333000</text:p>
          </table:table-cell>
          <table:table-cell table:formula="of:=[.D791]-[.D790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1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92013888888889" calcext:value-type="float">
            <text:p>0,00192013888888889000</text:p>
          </table:table-cell>
          <table:table-cell table:formula="of:=[.D792]-[.D79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1" office:value-type="float" office:value="16611" calcext:value-type="float">
            <text:p>16611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92256944444444" calcext:value-type="float">
            <text:p>0,00192256944444444000</text:p>
          </table:table-cell>
          <table:table-cell table:formula="of:=[.D793]-[.D792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1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925" calcext:value-type="float">
            <text:p>0,00192500000000000000</text:p>
          </table:table-cell>
          <table:table-cell table:formula="of:=[.D794]-[.D79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1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92743055555556" calcext:value-type="float">
            <text:p>0,00192743055555556000</text:p>
          </table:table-cell>
          <table:table-cell table:formula="of:=[.D795]-[.D794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1" office:value-type="float" office:value="16674" calcext:value-type="float">
            <text:p>16674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92986111111111" calcext:value-type="float">
            <text:p>0,00192986111111111000</text:p>
          </table:table-cell>
          <table:table-cell table:formula="of:=[.D796]-[.D79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1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93229166666667" calcext:value-type="float">
            <text:p>0,00193229166666667000</text:p>
          </table:table-cell>
          <table:table-cell table:formula="of:=[.D797]-[.D796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1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93472222222222" calcext:value-type="float">
            <text:p>0,00193472222222222000</text:p>
          </table:table-cell>
          <table:table-cell table:formula="of:=[.D798]-[.D797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1" office:value-type="float" office:value="16737" calcext:value-type="float">
            <text:p>16737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93715277777778" calcext:value-type="float">
            <text:p>0,00193715277777778000</text:p>
          </table:table-cell>
          <table:table-cell table:formula="of:=[.D799]-[.D79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1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93958333333333" calcext:value-type="float">
            <text:p>0,00193958333333333000</text:p>
          </table:table-cell>
          <table:table-cell table:formula="of:=[.D800]-[.D799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1" office:value-type="float" office:value="16779" calcext:value-type="float">
            <text:p>16779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94201388888889" calcext:value-type="float">
            <text:p>0,00194201388888889000</text:p>
          </table:table-cell>
          <table:table-cell table:formula="of:=[.D801]-[.D80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1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94444444444444" calcext:value-type="float">
            <text:p>0,00194444444444444000</text:p>
          </table:table-cell>
          <table:table-cell table:formula="of:=[.D802]-[.D801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1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946875" calcext:value-type="float">
            <text:p>0,00194687500000000000</text:p>
          </table:table-cell>
          <table:table-cell table:formula="of:=[.D803]-[.D80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1" office:value-type="float" office:value="16842" calcext:value-type="float">
            <text:p>16842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94930555555556" calcext:value-type="float">
            <text:p>0,00194930555555556000</text:p>
          </table:table-cell>
          <table:table-cell table:formula="of:=[.D804]-[.D803]" office:value-type="float" office:value="0.00000243055555555565" calcext:value-type="float">
            <text:p>0,0000024305555555556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1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95173611111111" calcext:value-type="float">
            <text:p>0,00195173611111111000</text:p>
          </table:table-cell>
          <table:table-cell table:formula="of:=[.D805]-[.D80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1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95416666666667" calcext:value-type="float">
            <text:p>0,00195416666666667000</text:p>
          </table:table-cell>
          <table:table-cell table:formula="of:=[.D806]-[.D80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1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95659722222222" calcext:value-type="float">
            <text:p>0,00195659722222222000</text:p>
          </table:table-cell>
          <table:table-cell table:formula="of:=[.D807]-[.D80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1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95902777777778" calcext:value-type="float">
            <text:p>0,00195902777777778000</text:p>
          </table:table-cell>
          <table:table-cell table:formula="of:=[.D808]-[.D80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1" office:value-type="float" office:value="16947" calcext:value-type="float">
            <text:p>16947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96145833333333" calcext:value-type="float">
            <text:p>0,00196145833333333000</text:p>
          </table:table-cell>
          <table:table-cell table:formula="of:=[.D809]-[.D80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1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96388888888889" calcext:value-type="float">
            <text:p>0,00196388888888889000</text:p>
          </table:table-cell>
          <table:table-cell table:formula="of:=[.D810]-[.D80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1" office:value-type="float" office:value="16989" calcext:value-type="float">
            <text:p>16989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96631944444444" calcext:value-type="float">
            <text:p>0,00196631944444444000</text:p>
          </table:table-cell>
          <table:table-cell table:formula="of:=[.D811]-[.D81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1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96875" calcext:value-type="float">
            <text:p>0,00196875000000000000</text:p>
          </table:table-cell>
          <table:table-cell table:formula="of:=[.D812]-[.D81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1" office:value-type="float" office:value="17031" calcext:value-type="float">
            <text:p>17031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97118055555556" calcext:value-type="float">
            <text:p>0,00197118055555556000</text:p>
          </table:table-cell>
          <table:table-cell table:formula="of:=[.D813]-[.D81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1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97361111111111" calcext:value-type="float">
            <text:p>0,00197361111111111000</text:p>
          </table:table-cell>
          <table:table-cell table:formula="of:=[.D814]-[.D81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1" office:value-type="float" office:value="17073" calcext:value-type="float">
            <text:p>17073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97604166666667" calcext:value-type="float">
            <text:p>0,00197604166666667000</text:p>
          </table:table-cell>
          <table:table-cell table:formula="of:=[.D815]-[.D8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1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97847222222222" calcext:value-type="float">
            <text:p>0,00197847222222222000</text:p>
          </table:table-cell>
          <table:table-cell table:formula="of:=[.D816]-[.D81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1" office:value-type="float" office:value="17115" calcext:value-type="float">
            <text:p>1711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98090277777778" calcext:value-type="float">
            <text:p>0,00198090277777778000</text:p>
          </table:table-cell>
          <table:table-cell table:formula="of:=[.D817]-[.D81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1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98333333333333" calcext:value-type="float">
            <text:p>0,00198333333333333000</text:p>
          </table:table-cell>
          <table:table-cell table:formula="of:=[.D818]-[.D81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1" office:value-type="float" office:value="17157" calcext:value-type="float">
            <text:p>17157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98576388888889" calcext:value-type="float">
            <text:p>0,00198576388888889000</text:p>
          </table:table-cell>
          <table:table-cell table:formula="of:=[.D819]-[.D81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1" office:value-type="float" office:value="17178" calcext:value-type="float">
            <text:p>17178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98819444444444" calcext:value-type="float">
            <text:p>0,00198819444444444000</text:p>
          </table:table-cell>
          <table:table-cell table:formula="of:=[.D820]-[.D81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1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990625" calcext:value-type="float">
            <text:p>0,00199062500000000000</text:p>
          </table:table-cell>
          <table:table-cell table:formula="of:=[.D821]-[.D82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1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99305555555556" calcext:value-type="float">
            <text:p>0,00199305555555556000</text:p>
          </table:table-cell>
          <table:table-cell table:formula="of:=[.D822]-[.D82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1" office:value-type="float" office:value="17241" calcext:value-type="float">
            <text:p>17241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99548611111111" calcext:value-type="float">
            <text:p>0,00199548611111111000</text:p>
          </table:table-cell>
          <table:table-cell table:formula="of:=[.D823]-[.D82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1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99791666666667" calcext:value-type="float">
            <text:p>0,00199791666666667000</text:p>
          </table:table-cell>
          <table:table-cell table:formula="of:=[.D824]-[.D82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1" office:value-type="float" office:value="17283" calcext:value-type="float">
            <text:p>17283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00034722222222" calcext:value-type="float">
            <text:p>0,00200034722222222000</text:p>
          </table:table-cell>
          <table:table-cell table:formula="of:=[.D825]-[.D82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1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00277777777778" calcext:value-type="float">
            <text:p>0,00200277777777778000</text:p>
          </table:table-cell>
          <table:table-cell table:formula="of:=[.D826]-[.D82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1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00520833333333" calcext:value-type="float">
            <text:p>0,00200520833333333000</text:p>
          </table:table-cell>
          <table:table-cell table:formula="of:=[.D827]-[.D82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1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00763888888889" calcext:value-type="float">
            <text:p>0,00200763888888889000</text:p>
          </table:table-cell>
          <table:table-cell table:formula="of:=[.D828]-[.D82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1" office:value-type="float" office:value="17367" calcext:value-type="float">
            <text:p>17367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01006944444444" calcext:value-type="float">
            <text:p>0,00201006944444444000</text:p>
          </table:table-cell>
          <table:table-cell table:formula="of:=[.D829]-[.D82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1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0125" calcext:value-type="float">
            <text:p>0,00201250000000000000</text:p>
          </table:table-cell>
          <table:table-cell table:formula="of:=[.D830]-[.D82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1" office:value-type="float" office:value="17409" calcext:value-type="float">
            <text:p>17409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01493055555556" calcext:value-type="float">
            <text:p>0,00201493055555556000</text:p>
          </table:table-cell>
          <table:table-cell table:formula="of:=[.D831]-[.D83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1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01736111111111" calcext:value-type="float">
            <text:p>0,00201736111111111000</text:p>
          </table:table-cell>
          <table:table-cell table:formula="of:=[.D832]-[.D83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1" office:value-type="float" office:value="17451" calcext:value-type="float">
            <text:p>17451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01979166666667" calcext:value-type="float">
            <text:p>0,00201979166666667000</text:p>
          </table:table-cell>
          <table:table-cell table:formula="of:=[.D833]-[.D83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1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02222222222222" calcext:value-type="float">
            <text:p>0,00202222222222222000</text:p>
          </table:table-cell>
          <table:table-cell table:formula="of:=[.D834]-[.D83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1" office:value-type="float" office:value="17493" calcext:value-type="float">
            <text:p>17493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02465277777778" calcext:value-type="float">
            <text:p>0,00202465277777778000</text:p>
          </table:table-cell>
          <table:table-cell table:formula="of:=[.D835]-[.D83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1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02708333333333" calcext:value-type="float">
            <text:p>0,00202708333333333000</text:p>
          </table:table-cell>
          <table:table-cell table:formula="of:=[.D836]-[.D83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1" office:value-type="float" office:value="17535" calcext:value-type="float">
            <text:p>1753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02951388888889" calcext:value-type="float">
            <text:p>0,00202951388888889000</text:p>
          </table:table-cell>
          <table:table-cell table:formula="of:=[.D837]-[.D83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1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03194444444444" calcext:value-type="float">
            <text:p>0,00203194444444444000</text:p>
          </table:table-cell>
          <table:table-cell table:formula="of:=[.D838]-[.D83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1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034375" calcext:value-type="float">
            <text:p>0,00203437500000000000</text:p>
          </table:table-cell>
          <table:table-cell table:formula="of:=[.D839]-[.D83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1" office:value-type="float" office:value="17598" calcext:value-type="float">
            <text:p>17598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03680555555556" calcext:value-type="float">
            <text:p>0,00203680555555556000</text:p>
          </table:table-cell>
          <table:table-cell table:formula="of:=[.D840]-[.D83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1" office:value-type="float" office:value="17619" calcext:value-type="float">
            <text:p>17619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03923611111111" calcext:value-type="float">
            <text:p>0,00203923611111111000</text:p>
          </table:table-cell>
          <table:table-cell table:formula="of:=[.D841]-[.D84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1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04166666666667" calcext:value-type="float">
            <text:p>0,00204166666666667000</text:p>
          </table:table-cell>
          <table:table-cell table:formula="of:=[.D842]-[.D84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1" office:value-type="float" office:value="17661" calcext:value-type="float">
            <text:p>17661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04409722222222" calcext:value-type="float">
            <text:p>0,00204409722222222000</text:p>
          </table:table-cell>
          <table:table-cell table:formula="of:=[.D843]-[.D84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1" office:value-type="float" office:value="17682" calcext:value-type="float">
            <text:p>17682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04652777777778" calcext:value-type="float">
            <text:p>0,00204652777777778000</text:p>
          </table:table-cell>
          <table:table-cell table:formula="of:=[.D844]-[.D84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1" office:value-type="float" office:value="17703" calcext:value-type="float">
            <text:p>17703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04895833333333" calcext:value-type="float">
            <text:p>0,00204895833333333000</text:p>
          </table:table-cell>
          <table:table-cell table:formula="of:=[.D845]-[.D84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1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05138888888889" calcext:value-type="float">
            <text:p>0,00205138888888889000</text:p>
          </table:table-cell>
          <table:table-cell table:formula="of:=[.D846]-[.D84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1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05381944444444" calcext:value-type="float">
            <text:p>0,00205381944444444000</text:p>
          </table:table-cell>
          <table:table-cell table:formula="of:=[.D847]-[.D84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1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05625" calcext:value-type="float">
            <text:p>0,00205625000000000000</text:p>
          </table:table-cell>
          <table:table-cell table:formula="of:=[.D848]-[.D84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1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05868055555556" calcext:value-type="float">
            <text:p>0,00205868055555556000</text:p>
          </table:table-cell>
          <table:table-cell table:formula="of:=[.D849]-[.D84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1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06111111111111" calcext:value-type="float">
            <text:p>0,00206111111111111000</text:p>
          </table:table-cell>
          <table:table-cell table:formula="of:=[.D850]-[.D84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1" office:value-type="float" office:value="17829" calcext:value-type="float">
            <text:p>17829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06354166666667" calcext:value-type="float">
            <text:p>0,00206354166666667000</text:p>
          </table:table-cell>
          <table:table-cell table:formula="of:=[.D851]-[.D85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1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06597222222222" calcext:value-type="float">
            <text:p>0,00206597222222222000</text:p>
          </table:table-cell>
          <table:table-cell table:formula="of:=[.D852]-[.D85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1" office:value-type="float" office:value="17871" calcext:value-type="float">
            <text:p>17871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06840277777778" calcext:value-type="float">
            <text:p>0,00206840277777778000</text:p>
          </table:table-cell>
          <table:table-cell table:formula="of:=[.D853]-[.D85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1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07083333333333" calcext:value-type="float">
            <text:p>0,00207083333333333000</text:p>
          </table:table-cell>
          <table:table-cell table:formula="of:=[.D854]-[.D85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1" office:value-type="float" office:value="17913" calcext:value-type="float">
            <text:p>17913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07326388888889" calcext:value-type="float">
            <text:p>0,00207326388888889000</text:p>
          </table:table-cell>
          <table:table-cell table:formula="of:=[.D855]-[.D85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1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07569444444444" calcext:value-type="float">
            <text:p>0,00207569444444444000</text:p>
          </table:table-cell>
          <table:table-cell table:formula="of:=[.D856]-[.D85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1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078125" calcext:value-type="float">
            <text:p>0,00207812500000000000</text:p>
          </table:table-cell>
          <table:table-cell table:formula="of:=[.D857]-[.D85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1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08055555555556" calcext:value-type="float">
            <text:p>0,00208055555555556000</text:p>
          </table:table-cell>
          <table:table-cell table:formula="of:=[.D858]-[.D85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1" office:value-type="float" office:value="17997" calcext:value-type="float">
            <text:p>17997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08298611111111" calcext:value-type="float">
            <text:p>0,00208298611111111000</text:p>
          </table:table-cell>
          <table:table-cell table:formula="of:=[.D859]-[.D85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1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08541666666667" calcext:value-type="float">
            <text:p>0,00208541666666667000</text:p>
          </table:table-cell>
          <table:table-cell table:formula="of:=[.D860]-[.D85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1" office:value-type="float" office:value="18039" calcext:value-type="float">
            <text:p>18039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08784722222222" calcext:value-type="float">
            <text:p>0,00208784722222222000</text:p>
          </table:table-cell>
          <table:table-cell table:formula="of:=[.D861]-[.D86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1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09027777777778" calcext:value-type="float">
            <text:p>0,00209027777777778000</text:p>
          </table:table-cell>
          <table:table-cell table:formula="of:=[.D862]-[.D86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1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09270833333333" calcext:value-type="float">
            <text:p>0,00209270833333333000</text:p>
          </table:table-cell>
          <table:table-cell table:formula="of:=[.D863]-[.D86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1" office:value-type="float" office:value="18102" calcext:value-type="float">
            <text:p>18102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09513888888889" calcext:value-type="float">
            <text:p>0,00209513888888889000</text:p>
          </table:table-cell>
          <table:table-cell table:formula="of:=[.D864]-[.D86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1" office:value-type="float" office:value="18123" calcext:value-type="float">
            <text:p>18123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09756944444444" calcext:value-type="float">
            <text:p>0,00209756944444444000</text:p>
          </table:table-cell>
          <table:table-cell table:formula="of:=[.D865]-[.D86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1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1" calcext:value-type="float">
            <text:p>0,00210000000000000000</text:p>
          </table:table-cell>
          <table:table-cell table:formula="of:=[.D866]-[.D86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1" office:value-type="float" office:value="18165" calcext:value-type="float">
            <text:p>1816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10243055555556" calcext:value-type="float">
            <text:p>0,00210243055555556000</text:p>
          </table:table-cell>
          <table:table-cell table:formula="of:=[.D867]-[.D86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1" office:value-type="float" office:value="18186" calcext:value-type="float">
            <text:p>18186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10486111111111" calcext:value-type="float">
            <text:p>0,00210486111111111000</text:p>
          </table:table-cell>
          <table:table-cell table:formula="of:=[.D868]-[.D86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1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10729166666667" calcext:value-type="float">
            <text:p>0,00210729166666667000</text:p>
          </table:table-cell>
          <table:table-cell table:formula="of:=[.D869]-[.D86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1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10972222222222" calcext:value-type="float">
            <text:p>0,00210972222222222000</text:p>
          </table:table-cell>
          <table:table-cell table:formula="of:=[.D870]-[.D86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1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11215277777778" calcext:value-type="float">
            <text:p>0,00211215277777778000</text:p>
          </table:table-cell>
          <table:table-cell table:formula="of:=[.D871]-[.D87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1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11458333333333" calcext:value-type="float">
            <text:p>0,00211458333333333000</text:p>
          </table:table-cell>
          <table:table-cell table:formula="of:=[.D872]-[.D87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1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11701388888889" calcext:value-type="float">
            <text:p>0,00211701388888889000</text:p>
          </table:table-cell>
          <table:table-cell table:formula="of:=[.D873]-[.D87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1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11944444444444" calcext:value-type="float">
            <text:p>0,00211944444444444000</text:p>
          </table:table-cell>
          <table:table-cell table:formula="of:=[.D874]-[.D87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1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121875" calcext:value-type="float">
            <text:p>0,00212187500000000000</text:p>
          </table:table-cell>
          <table:table-cell table:formula="of:=[.D875]-[.D87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1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12430555555556" calcext:value-type="float">
            <text:p>0,00212430555555556000</text:p>
          </table:table-cell>
          <table:table-cell table:formula="of:=[.D876]-[.D87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1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12673611111111" calcext:value-type="float">
            <text:p>0,00212673611111111000</text:p>
          </table:table-cell>
          <table:table-cell table:formula="of:=[.D877]-[.D87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1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12916666666667" calcext:value-type="float">
            <text:p>0,00212916666666667000</text:p>
          </table:table-cell>
          <table:table-cell table:formula="of:=[.D878]-[.D87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1" office:value-type="float" office:value="18417" calcext:value-type="float">
            <text:p>18417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13159722222222" calcext:value-type="float">
            <text:p>0,00213159722222222000</text:p>
          </table:table-cell>
          <table:table-cell table:formula="of:=[.D879]-[.D87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1" office:value-type="float" office:value="18438" calcext:value-type="float">
            <text:p>18438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13402777777778" calcext:value-type="float">
            <text:p>0,00213402777777778000</text:p>
          </table:table-cell>
          <table:table-cell table:formula="of:=[.D880]-[.D87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1" office:value-type="float" office:value="18459" calcext:value-type="float">
            <text:p>18459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13645833333333" calcext:value-type="float">
            <text:p>0,00213645833333333000</text:p>
          </table:table-cell>
          <table:table-cell table:formula="of:=[.D881]-[.D88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1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13888888888889" calcext:value-type="float">
            <text:p>0,00213888888888889000</text:p>
          </table:table-cell>
          <table:table-cell table:formula="of:=[.D882]-[.D88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1" office:value-type="float" office:value="18501" calcext:value-type="float">
            <text:p>18501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14131944444444" calcext:value-type="float">
            <text:p>0,00214131944444444000</text:p>
          </table:table-cell>
          <table:table-cell table:formula="of:=[.D883]-[.D88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1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14375" calcext:value-type="float">
            <text:p>0,00214375000000000000</text:p>
          </table:table-cell>
          <table:table-cell table:formula="of:=[.D884]-[.D88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1" office:value-type="float" office:value="18543" calcext:value-type="float">
            <text:p>18543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14618055555556" calcext:value-type="float">
            <text:p>0,00214618055555556000</text:p>
          </table:table-cell>
          <table:table-cell table:formula="of:=[.D885]-[.D88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1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14861111111111" calcext:value-type="float">
            <text:p>0,00214861111111111000</text:p>
          </table:table-cell>
          <table:table-cell table:formula="of:=[.D886]-[.D88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1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15104166666667" calcext:value-type="float">
            <text:p>0,00215104166666667000</text:p>
          </table:table-cell>
          <table:table-cell table:formula="of:=[.D887]-[.D88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1" office:value-type="float" office:value="18606" calcext:value-type="float">
            <text:p>18606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15347222222222" calcext:value-type="float">
            <text:p>0,00215347222222222000</text:p>
          </table:table-cell>
          <table:table-cell table:formula="of:=[.D888]-[.D88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1" office:value-type="float" office:value="18627" calcext:value-type="float">
            <text:p>18627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15590277777778" calcext:value-type="float">
            <text:p>0,00215590277777778000</text:p>
          </table:table-cell>
          <table:table-cell table:formula="of:=[.D889]-[.D88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1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15833333333333" calcext:value-type="float">
            <text:p>0,00215833333333333000</text:p>
          </table:table-cell>
          <table:table-cell table:formula="of:=[.D890]-[.D88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1" office:value-type="float" office:value="18669" calcext:value-type="float">
            <text:p>18669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16076388888889" calcext:value-type="float">
            <text:p>0,00216076388888889000</text:p>
          </table:table-cell>
          <table:table-cell table:formula="of:=[.D891]-[.D89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1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16319444444444" calcext:value-type="float">
            <text:p>0,00216319444444444000</text:p>
          </table:table-cell>
          <table:table-cell table:formula="of:=[.D892]-[.D89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1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165625" calcext:value-type="float">
            <text:p>0,00216562500000000000</text:p>
          </table:table-cell>
          <table:table-cell table:formula="of:=[.D893]-[.D89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1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16805555555556" calcext:value-type="float">
            <text:p>0,00216805555555556000</text:p>
          </table:table-cell>
          <table:table-cell table:formula="of:=[.D894]-[.D89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1" office:value-type="float" office:value="18753" calcext:value-type="float">
            <text:p>18753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17048611111111" calcext:value-type="float">
            <text:p>0,00217048611111111000</text:p>
          </table:table-cell>
          <table:table-cell table:formula="of:=[.D895]-[.D89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1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17291666666667" calcext:value-type="float">
            <text:p>0,00217291666666667000</text:p>
          </table:table-cell>
          <table:table-cell table:formula="of:=[.D896]-[.D89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1" office:value-type="float" office:value="18795" calcext:value-type="float">
            <text:p>1879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17534722222222" calcext:value-type="float">
            <text:p>0,00217534722222222000</text:p>
          </table:table-cell>
          <table:table-cell table:formula="of:=[.D897]-[.D89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1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17777777777778" calcext:value-type="float">
            <text:p>0,00217777777777778000</text:p>
          </table:table-cell>
          <table:table-cell table:formula="of:=[.D898]-[.D89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1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18020833333333" calcext:value-type="float">
            <text:p>0,00218020833333333000</text:p>
          </table:table-cell>
          <table:table-cell table:formula="of:=[.D899]-[.D89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1" office:value-type="float" office:value="18858" calcext:value-type="float">
            <text:p>18858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18263888888889" calcext:value-type="float">
            <text:p>0,00218263888888889000</text:p>
          </table:table-cell>
          <table:table-cell table:formula="of:=[.D900]-[.D89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1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18506944444444" calcext:value-type="float">
            <text:p>0,00218506944444444000</text:p>
          </table:table-cell>
          <table:table-cell table:formula="of:=[.D901]-[.D90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1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1875" calcext:value-type="float">
            <text:p>0,00218750000000000000</text:p>
          </table:table-cell>
          <table:table-cell table:formula="of:=[.D902]-[.D90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1" office:value-type="float" office:value="18921" calcext:value-type="float">
            <text:p>18921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18993055555556" calcext:value-type="float">
            <text:p>0,00218993055555556000</text:p>
          </table:table-cell>
          <table:table-cell table:formula="of:=[.D903]-[.D90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1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19236111111111" calcext:value-type="float">
            <text:p>0,00219236111111111000</text:p>
          </table:table-cell>
          <table:table-cell table:formula="of:=[.D904]-[.D90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1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19479166666667" calcext:value-type="float">
            <text:p>0,00219479166666667000</text:p>
          </table:table-cell>
          <table:table-cell table:formula="of:=[.D905]-[.D90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1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19722222222222" calcext:value-type="float">
            <text:p>0,00219722222222222000</text:p>
          </table:table-cell>
          <table:table-cell table:formula="of:=[.D906]-[.D90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1" office:value-type="float" office:value="19005" calcext:value-type="float">
            <text:p>1900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19965277777778" calcext:value-type="float">
            <text:p>0,00219965277777778000</text:p>
          </table:table-cell>
          <table:table-cell table:formula="of:=[.D907]-[.D90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1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20208333333333" calcext:value-type="float">
            <text:p>0,00220208333333333000</text:p>
          </table:table-cell>
          <table:table-cell table:formula="of:=[.D908]-[.D90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1" office:value-type="float" office:value="19047" calcext:value-type="float">
            <text:p>19047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20451388888889" calcext:value-type="float">
            <text:p>0,00220451388888889000</text:p>
          </table:table-cell>
          <table:table-cell table:formula="of:=[.D909]-[.D90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1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20694444444444" calcext:value-type="float">
            <text:p>0,00220694444444444000</text:p>
          </table:table-cell>
          <table:table-cell table:formula="of:=[.D910]-[.D90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1" office:value-type="float" office:value="19089" calcext:value-type="float">
            <text:p>19089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209375" calcext:value-type="float">
            <text:p>0,00220937500000000000</text:p>
          </table:table-cell>
          <table:table-cell table:formula="of:=[.D911]-[.D91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1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21180555555556" calcext:value-type="float">
            <text:p>0,00221180555555556000</text:p>
          </table:table-cell>
          <table:table-cell table:formula="of:=[.D912]-[.D91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1" office:value-type="float" office:value="19131" calcext:value-type="float">
            <text:p>19131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21423611111111" calcext:value-type="float">
            <text:p>0,00221423611111111000</text:p>
          </table:table-cell>
          <table:table-cell table:formula="of:=[.D913]-[.D91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1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21666666666667" calcext:value-type="float">
            <text:p>0,00221666666666667000</text:p>
          </table:table-cell>
          <table:table-cell table:formula="of:=[.D914]-[.D91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1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21909722222222" calcext:value-type="float">
            <text:p>0,00221909722222222000</text:p>
          </table:table-cell>
          <table:table-cell table:formula="of:=[.D915]-[.D9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1" office:value-type="float" office:value="19194" calcext:value-type="float">
            <text:p>19194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22152777777778" calcext:value-type="float">
            <text:p>0,00222152777777778000</text:p>
          </table:table-cell>
          <table:table-cell table:formula="of:=[.D916]-[.D91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1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22395833333333" calcext:value-type="float">
            <text:p>0,00222395833333333000</text:p>
          </table:table-cell>
          <table:table-cell table:formula="of:=[.D917]-[.D91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1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22638888888889" calcext:value-type="float">
            <text:p>0,00222638888888889000</text:p>
          </table:table-cell>
          <table:table-cell table:formula="of:=[.D918]-[.D91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1" office:value-type="float" office:value="19257" calcext:value-type="float">
            <text:p>19257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22881944444444" calcext:value-type="float">
            <text:p>0,00222881944444444000</text:p>
          </table:table-cell>
          <table:table-cell table:formula="of:=[.D919]-[.D91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1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23125" calcext:value-type="float">
            <text:p>0,00223125000000000000</text:p>
          </table:table-cell>
          <table:table-cell table:formula="of:=[.D920]-[.D91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1" office:value-type="float" office:value="19299" calcext:value-type="float">
            <text:p>19299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23368055555556" calcext:value-type="float">
            <text:p>0,00223368055555556000</text:p>
          </table:table-cell>
          <table:table-cell table:formula="of:=[.D921]-[.D92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1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23611111111111" calcext:value-type="float">
            <text:p>0,00223611111111111000</text:p>
          </table:table-cell>
          <table:table-cell table:formula="of:=[.D922]-[.D92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1" office:value-type="float" office:value="19341" calcext:value-type="float">
            <text:p>19341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23854166666667" calcext:value-type="float">
            <text:p>0,00223854166666667000</text:p>
          </table:table-cell>
          <table:table-cell table:formula="of:=[.D923]-[.D92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1" office:value-type="float" office:value="19362" calcext:value-type="float">
            <text:p>19362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24097222222222" calcext:value-type="float">
            <text:p>0,00224097222222222000</text:p>
          </table:table-cell>
          <table:table-cell table:formula="of:=[.D924]-[.D92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1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24340277777778" calcext:value-type="float">
            <text:p>0,00224340277777778000</text:p>
          </table:table-cell>
          <table:table-cell table:formula="of:=[.D925]-[.D92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1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24583333333333" calcext:value-type="float">
            <text:p>0,00224583333333333000</text:p>
          </table:table-cell>
          <table:table-cell table:formula="of:=[.D926]-[.D92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1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24826388888889" calcext:value-type="float">
            <text:p>0,00224826388888889000</text:p>
          </table:table-cell>
          <table:table-cell table:formula="of:=[.D927]-[.D92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1" office:value-type="float" office:value="19446" calcext:value-type="float">
            <text:p>19446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25069444444444" calcext:value-type="float">
            <text:p>0,00225069444444444000</text:p>
          </table:table-cell>
          <table:table-cell table:formula="of:=[.D928]-[.D92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1" office:value-type="float" office:value="19467" calcext:value-type="float">
            <text:p>19467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253125" calcext:value-type="float">
            <text:p>0,00225312500000000000</text:p>
          </table:table-cell>
          <table:table-cell table:formula="of:=[.D929]-[.D92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1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25555555555556" calcext:value-type="float">
            <text:p>0,00225555555555556000</text:p>
          </table:table-cell>
          <table:table-cell table:formula="of:=[.D930]-[.D92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1" office:value-type="float" office:value="19509" calcext:value-type="float">
            <text:p>19509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25798611111111" calcext:value-type="float">
            <text:p>0,00225798611111111000</text:p>
          </table:table-cell>
          <table:table-cell table:formula="of:=[.D931]-[.D93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1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26041666666667" calcext:value-type="float">
            <text:p>0,00226041666666667000</text:p>
          </table:table-cell>
          <table:table-cell table:formula="of:=[.D932]-[.D93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1" office:value-type="float" office:value="19551" calcext:value-type="float">
            <text:p>19551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26284722222222" calcext:value-type="float">
            <text:p>0,00226284722222222000</text:p>
          </table:table-cell>
          <table:table-cell table:formula="of:=[.D933]-[.D93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1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26527777777778" calcext:value-type="float">
            <text:p>0,00226527777777778000</text:p>
          </table:table-cell>
          <table:table-cell table:formula="of:=[.D934]-[.D93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1" office:value-type="float" office:value="19593" calcext:value-type="float">
            <text:p>19593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26770833333333" calcext:value-type="float">
            <text:p>0,00226770833333333000</text:p>
          </table:table-cell>
          <table:table-cell table:formula="of:=[.D935]-[.D93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1" office:value-type="float" office:value="19614" calcext:value-type="float">
            <text:p>19614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27013888888889" calcext:value-type="float">
            <text:p>0,00227013888888889000</text:p>
          </table:table-cell>
          <table:table-cell table:formula="of:=[.D936]-[.D93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1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27256944444444" calcext:value-type="float">
            <text:p>0,00227256944444444000</text:p>
          </table:table-cell>
          <table:table-cell table:formula="of:=[.D937]-[.D93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1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275" calcext:value-type="float">
            <text:p>0,00227500000000000000</text:p>
          </table:table-cell>
          <table:table-cell table:formula="of:=[.D938]-[.D93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1" office:value-type="float" office:value="19677" calcext:value-type="float">
            <text:p>19677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27743055555556" calcext:value-type="float">
            <text:p>0,00227743055555556000</text:p>
          </table:table-cell>
          <table:table-cell table:formula="of:=[.D939]-[.D93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1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27986111111111" calcext:value-type="float">
            <text:p>0,00227986111111111000</text:p>
          </table:table-cell>
          <table:table-cell table:formula="of:=[.D940]-[.D93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1" office:value-type="float" office:value="19719" calcext:value-type="float">
            <text:p>19719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28229166666667" calcext:value-type="float">
            <text:p>0,00228229166666667000</text:p>
          </table:table-cell>
          <table:table-cell table:formula="of:=[.D941]-[.D94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1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28472222222222" calcext:value-type="float">
            <text:p>0,00228472222222222000</text:p>
          </table:table-cell>
          <table:table-cell table:formula="of:=[.D942]-[.D94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1" office:value-type="float" office:value="19761" calcext:value-type="float">
            <text:p>19761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28715277777778" calcext:value-type="float">
            <text:p>0,00228715277777778000</text:p>
          </table:table-cell>
          <table:table-cell table:formula="of:=[.D943]-[.D94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1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28958333333333" calcext:value-type="float">
            <text:p>0,00228958333333333000</text:p>
          </table:table-cell>
          <table:table-cell table:formula="of:=[.D944]-[.D94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1" office:value-type="float" office:value="19803" calcext:value-type="float">
            <text:p>19803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29201388888889" calcext:value-type="float">
            <text:p>0,00229201388888889000</text:p>
          </table:table-cell>
          <table:table-cell table:formula="of:=[.D945]-[.D94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1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29444444444444" calcext:value-type="float">
            <text:p>0,00229444444444444000</text:p>
          </table:table-cell>
          <table:table-cell table:formula="of:=[.D946]-[.D94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1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296875" calcext:value-type="float">
            <text:p>0,00229687500000000000</text:p>
          </table:table-cell>
          <table:table-cell table:formula="of:=[.D947]-[.D94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1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29930555555556" calcext:value-type="float">
            <text:p>0,00229930555555556000</text:p>
          </table:table-cell>
          <table:table-cell table:formula="of:=[.D948]-[.D94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1" office:value-type="float" office:value="19887" calcext:value-type="float">
            <text:p>19887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30173611111111" calcext:value-type="float">
            <text:p>0,00230173611111111000</text:p>
          </table:table-cell>
          <table:table-cell table:formula="of:=[.D949]-[.D94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1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30416666666667" calcext:value-type="float">
            <text:p>0,00230416666666667000</text:p>
          </table:table-cell>
          <table:table-cell table:formula="of:=[.D950]-[.D94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1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30659722222222" calcext:value-type="float">
            <text:p>0,00230659722222222000</text:p>
          </table:table-cell>
          <table:table-cell table:formula="of:=[.D951]-[.D95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1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30902777777778" calcext:value-type="float">
            <text:p>0,00230902777777778000</text:p>
          </table:table-cell>
          <table:table-cell table:formula="of:=[.D952]-[.D95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1" office:value-type="float" office:value="19971" calcext:value-type="float">
            <text:p>19971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31145833333333" calcext:value-type="float">
            <text:p>0,00231145833333333000</text:p>
          </table:table-cell>
          <table:table-cell table:formula="of:=[.D953]-[.D95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1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31388888888889" calcext:value-type="float">
            <text:p>0,00231388888888889000</text:p>
          </table:table-cell>
          <table:table-cell table:formula="of:=[.D954]-[.D95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1" office:value-type="float" office:value="20013" calcext:value-type="float">
            <text:p>20013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31631944444444" calcext:value-type="float">
            <text:p>0,00231631944444444000</text:p>
          </table:table-cell>
          <table:table-cell table:formula="of:=[.D955]-[.D95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1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31875" calcext:value-type="float">
            <text:p>0,00231875000000000000</text:p>
          </table:table-cell>
          <table:table-cell table:formula="of:=[.D956]-[.D95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1" office:value-type="float" office:value="20055" calcext:value-type="float">
            <text:p>2005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32118055555556" calcext:value-type="float">
            <text:p>0,00232118055555556000</text:p>
          </table:table-cell>
          <table:table-cell table:formula="of:=[.D957]-[.D95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1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32361111111111" calcext:value-type="float">
            <text:p>0,00232361111111111000</text:p>
          </table:table-cell>
          <table:table-cell table:formula="of:=[.D958]-[.D95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1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32604166666667" calcext:value-type="float">
            <text:p>0,00232604166666667000</text:p>
          </table:table-cell>
          <table:table-cell table:formula="of:=[.D959]-[.D95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1" office:value-type="float" office:value="20118" calcext:value-type="float">
            <text:p>20118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32847222222222" calcext:value-type="float">
            <text:p>0,00232847222222222000</text:p>
          </table:table-cell>
          <table:table-cell table:formula="of:=[.D960]-[.D95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1" office:value-type="float" office:value="20139" calcext:value-type="float">
            <text:p>20139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33090277777778" calcext:value-type="float">
            <text:p>0,00233090277777778000</text:p>
          </table:table-cell>
          <table:table-cell table:formula="of:=[.D961]-[.D96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1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33333333333333" calcext:value-type="float">
            <text:p>0,00233333333333333000</text:p>
          </table:table-cell>
          <table:table-cell table:formula="of:=[.D962]-[.D96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21" office:value-type="float" office:value="20181" calcext:value-type="float">
            <text:p>20181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33576388888889" calcext:value-type="float">
            <text:p>0,00233576388888889000</text:p>
          </table:table-cell>
          <table:table-cell table:formula="of:=[.D963]-[.D96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21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33819444444444" calcext:value-type="float">
            <text:p>0,00233819444444444000</text:p>
          </table:table-cell>
          <table:table-cell table:formula="of:=[.D964]-[.D96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21" office:value-type="float" office:value="20223" calcext:value-type="float">
            <text:p>20223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340625" calcext:value-type="float">
            <text:p>0,00234062500000000000</text:p>
          </table:table-cell>
          <table:table-cell table:formula="of:=[.D965]-[.D96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21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34305555555556" calcext:value-type="float">
            <text:p>0,00234305555555556000</text:p>
          </table:table-cell>
          <table:table-cell table:formula="of:=[.D966]-[.D96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21" office:value-type="float" office:value="20265" calcext:value-type="float">
            <text:p>2026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34548611111111" calcext:value-type="float">
            <text:p>0,00234548611111111000</text:p>
          </table:table-cell>
          <table:table-cell table:formula="of:=[.D967]-[.D96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21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34791666666667" calcext:value-type="float">
            <text:p>0,00234791666666667000</text:p>
          </table:table-cell>
          <table:table-cell table:formula="of:=[.D968]-[.D96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21" office:value-type="float" office:value="20307" calcext:value-type="float">
            <text:p>20307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35034722222222" calcext:value-type="float">
            <text:p>0,00235034722222222000</text:p>
          </table:table-cell>
          <table:table-cell table:formula="of:=[.D969]-[.D96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21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35277777777778" calcext:value-type="float">
            <text:p>0,00235277777777778000</text:p>
          </table:table-cell>
          <table:table-cell table:formula="of:=[.D970]-[.D96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21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35520833333333" calcext:value-type="float">
            <text:p>0,00235520833333333000</text:p>
          </table:table-cell>
          <table:table-cell table:formula="of:=[.D971]-[.D97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21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35763888888889" calcext:value-type="float">
            <text:p>0,00235763888888889000</text:p>
          </table:table-cell>
          <table:table-cell table:formula="of:=[.D972]-[.D97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21" office:value-type="float" office:value="20391" calcext:value-type="float">
            <text:p>20391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36006944444444" calcext:value-type="float">
            <text:p>0,00236006944444444000</text:p>
          </table:table-cell>
          <table:table-cell table:formula="of:=[.D973]-[.D97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21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3625" calcext:value-type="float">
            <text:p>0,00236250000000000000</text:p>
          </table:table-cell>
          <table:table-cell table:formula="of:=[.D974]-[.D97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21" office:value-type="float" office:value="20433" calcext:value-type="float">
            <text:p>20433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36493055555556" calcext:value-type="float">
            <text:p>0,00236493055555556000</text:p>
          </table:table-cell>
          <table:table-cell table:formula="of:=[.D975]-[.D97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21" office:value-type="float" office:value="20454" calcext:value-type="float">
            <text:p>20454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36736111111111" calcext:value-type="float">
            <text:p>0,00236736111111111000</text:p>
          </table:table-cell>
          <table:table-cell table:formula="of:=[.D976]-[.D97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21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36979166666667" calcext:value-type="float">
            <text:p>0,00236979166666667000</text:p>
          </table:table-cell>
          <table:table-cell table:formula="of:=[.D977]-[.D97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21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37222222222222" calcext:value-type="float">
            <text:p>0,00237222222222222000</text:p>
          </table:table-cell>
          <table:table-cell table:formula="of:=[.D978]-[.D97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21" office:value-type="float" office:value="20517" calcext:value-type="float">
            <text:p>20517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37465277777778" calcext:value-type="float">
            <text:p>0,00237465277777778000</text:p>
          </table:table-cell>
          <table:table-cell table:formula="of:=[.D979]-[.D97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21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37708333333333" calcext:value-type="float">
            <text:p>0,00237708333333333000</text:p>
          </table:table-cell>
          <table:table-cell table:formula="of:=[.D980]-[.D97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21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37951388888889" calcext:value-type="float">
            <text:p>0,00237951388888889000</text:p>
          </table:table-cell>
          <table:table-cell table:formula="of:=[.D981]-[.D98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21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38194444444444" calcext:value-type="float">
            <text:p>0,00238194444444444000</text:p>
          </table:table-cell>
          <table:table-cell table:formula="of:=[.D982]-[.D98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21" office:value-type="float" office:value="20601" calcext:value-type="float">
            <text:p>20601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384375" calcext:value-type="float">
            <text:p>0,00238437500000000000</text:p>
          </table:table-cell>
          <table:table-cell table:formula="of:=[.D983]-[.D98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21" office:value-type="float" office:value="20622" calcext:value-type="float">
            <text:p>20622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38680555555556" calcext:value-type="float">
            <text:p>0,00238680555555556000</text:p>
          </table:table-cell>
          <table:table-cell table:formula="of:=[.D984]-[.D98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21" office:value-type="float" office:value="20643" calcext:value-type="float">
            <text:p>20643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38923611111111" calcext:value-type="float">
            <text:p>0,00238923611111111000</text:p>
          </table:table-cell>
          <table:table-cell table:formula="of:=[.D985]-[.D98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21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39166666666667" calcext:value-type="float">
            <text:p>0,00239166666666667000</text:p>
          </table:table-cell>
          <table:table-cell table:formula="of:=[.D986]-[.D98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21" office:value-type="float" office:value="20685" calcext:value-type="float">
            <text:p>2068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39409722222222" calcext:value-type="float">
            <text:p>0,00239409722222222000</text:p>
          </table:table-cell>
          <table:table-cell table:formula="of:=[.D987]-[.D98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21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39652777777778" calcext:value-type="float">
            <text:p>0,00239652777777778000</text:p>
          </table:table-cell>
          <table:table-cell table:formula="of:=[.D988]-[.D98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21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39895833333333" calcext:value-type="float">
            <text:p>0,00239895833333333000</text:p>
          </table:table-cell>
          <table:table-cell table:formula="of:=[.D989]-[.D98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21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40138888888889" calcext:value-type="float">
            <text:p>0,00240138888888889000</text:p>
          </table:table-cell>
          <table:table-cell table:formula="of:=[.D990]-[.D98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21" office:value-type="float" office:value="20769" calcext:value-type="float">
            <text:p>20769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40381944444444" calcext:value-type="float">
            <text:p>0,00240381944444444000</text:p>
          </table:table-cell>
          <table:table-cell table:formula="of:=[.D991]-[.D99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21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40625" calcext:value-type="float">
            <text:p>0,00240625000000000000</text:p>
          </table:table-cell>
          <table:table-cell table:formula="of:=[.D992]-[.D99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21" office:value-type="float" office:value="20811" calcext:value-type="float">
            <text:p>20811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40868055555556" calcext:value-type="float">
            <text:p>0,00240868055555556000</text:p>
          </table:table-cell>
          <table:table-cell table:formula="of:=[.D993]-[.D99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21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41111111111111" calcext:value-type="float">
            <text:p>0,00241111111111111000</text:p>
          </table:table-cell>
          <table:table-cell table:formula="of:=[.D994]-[.D99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21" office:value-type="float" office:value="20853" calcext:value-type="float">
            <text:p>20853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41354166666667" calcext:value-type="float">
            <text:p>0,00241354166666667000</text:p>
          </table:table-cell>
          <table:table-cell table:formula="of:=[.D995]-[.D99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21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41597222222222" calcext:value-type="float">
            <text:p>0,00241597222222222000</text:p>
          </table:table-cell>
          <table:table-cell table:formula="of:=[.D996]-[.D99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21" office:value-type="float" office:value="20895" calcext:value-type="float">
            <text:p>2089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41840277777778" calcext:value-type="float">
            <text:p>0,00241840277777778000</text:p>
          </table:table-cell>
          <table:table-cell table:formula="of:=[.D997]-[.D99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21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42083333333333" calcext:value-type="float">
            <text:p>0,00242083333333333000</text:p>
          </table:table-cell>
          <table:table-cell table:formula="of:=[.D998]-[.D99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21" office:value-type="float" office:value="20937" calcext:value-type="float">
            <text:p>20937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42326388888889" calcext:value-type="float">
            <text:p>0,00242326388888889000</text:p>
          </table:table-cell>
          <table:table-cell table:formula="of:=[.D999]-[.D99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21" office:value-type="float" office:value="20958" calcext:value-type="float">
            <text:p>20958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42569444444444" calcext:value-type="float">
            <text:p>0,00242569444444444000</text:p>
          </table:table-cell>
          <table:table-cell table:formula="of:=[.D1000]-[.D99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21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428125" calcext:value-type="float">
            <text:p>0,00242812500000000000</text:p>
          </table:table-cell>
          <table:table-cell table:formula="of:=[.D1001]-[.D100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21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43055555555556" calcext:value-type="float">
            <text:p>0,00243055555555556000</text:p>
          </table:table-cell>
          <table:table-cell table:formula="of:=[.D1002]-[.D100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21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43298611111111" calcext:value-type="float">
            <text:p>0,00243298611111111000</text:p>
          </table:table-cell>
          <table:table-cell table:formula="of:=[.D1003]-[.D100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21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43541666666667" calcext:value-type="float">
            <text:p>0,00243541666666667000</text:p>
          </table:table-cell>
          <table:table-cell table:formula="of:=[.D1004]-[.D100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21" office:value-type="float" office:value="21063" calcext:value-type="float">
            <text:p>21063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43784722222222" calcext:value-type="float">
            <text:p>0,00243784722222222000</text:p>
          </table:table-cell>
          <table:table-cell table:formula="of:=[.D1005]-[.D100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21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44027777777778" calcext:value-type="float">
            <text:p>0,00244027777777778000</text:p>
          </table:table-cell>
          <table:table-cell table:formula="of:=[.D1006]-[.D100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21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44270833333333" calcext:value-type="float">
            <text:p>0,00244270833333333000</text:p>
          </table:table-cell>
          <table:table-cell table:formula="of:=[.D1007]-[.D100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21" office:value-type="float" office:value="21126" calcext:value-type="float">
            <text:p>21126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44513888888889" calcext:value-type="float">
            <text:p>0,00244513888888889000</text:p>
          </table:table-cell>
          <table:table-cell table:formula="of:=[.D1008]-[.D100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21" office:value-type="float" office:value="21147" calcext:value-type="float">
            <text:p>21147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44756944444444" calcext:value-type="float">
            <text:p>0,00244756944444444000</text:p>
          </table:table-cell>
          <table:table-cell table:formula="of:=[.D1009]-[.D100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21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45" calcext:value-type="float">
            <text:p>0,00245000000000000000</text:p>
          </table:table-cell>
          <table:table-cell table:formula="of:=[.D1010]-[.D100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21" office:value-type="float" office:value="21189" calcext:value-type="float">
            <text:p>21189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45243055555556" calcext:value-type="float">
            <text:p>0,00245243055555556000</text:p>
          </table:table-cell>
          <table:table-cell table:formula="of:=[.D1011]-[.D101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21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45486111111111" calcext:value-type="float">
            <text:p>0,00245486111111111000</text:p>
          </table:table-cell>
          <table:table-cell table:formula="of:=[.D1012]-[.D101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21" office:value-type="float" office:value="21231" calcext:value-type="float">
            <text:p>21231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45729166666667" calcext:value-type="float">
            <text:p>0,00245729166666667000</text:p>
          </table:table-cell>
          <table:table-cell table:formula="of:=[.D1013]-[.D101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21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45972222222222" calcext:value-type="float">
            <text:p>0,00245972222222222000</text:p>
          </table:table-cell>
          <table:table-cell table:formula="of:=[.D1014]-[.D101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21" office:value-type="float" office:value="21273" calcext:value-type="float">
            <text:p>21273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46215277777778" calcext:value-type="float">
            <text:p>0,00246215277777778000</text:p>
          </table:table-cell>
          <table:table-cell table:formula="of:=[.D1015]-[.D10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21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46458333333333" calcext:value-type="float">
            <text:p>0,00246458333333333000</text:p>
          </table:table-cell>
          <table:table-cell table:formula="of:=[.D1016]-[.D101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21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46701388888889" calcext:value-type="float">
            <text:p>0,00246701388888889000</text:p>
          </table:table-cell>
          <table:table-cell table:formula="of:=[.D1017]-[.D101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21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46944444444444" calcext:value-type="float">
            <text:p>0,00246944444444444000</text:p>
          </table:table-cell>
          <table:table-cell table:formula="of:=[.D1018]-[.D101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21" office:value-type="float" office:value="21357" calcext:value-type="float">
            <text:p>21357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471875" calcext:value-type="float">
            <text:p>0,00247187500000000000</text:p>
          </table:table-cell>
          <table:table-cell table:formula="of:=[.D1019]-[.D101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21" office:value-type="float" office:value="21378" calcext:value-type="float">
            <text:p>21378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47430555555556" calcext:value-type="float">
            <text:p>0,00247430555555556000</text:p>
          </table:table-cell>
          <table:table-cell table:formula="of:=[.D1020]-[.D101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21" office:value-type="float" office:value="21399" calcext:value-type="float">
            <text:p>21399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47673611111111" calcext:value-type="float">
            <text:p>0,00247673611111111000</text:p>
          </table:table-cell>
          <table:table-cell table:formula="of:=[.D1021]-[.D102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21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47916666666667" calcext:value-type="float">
            <text:p>0,00247916666666667000</text:p>
          </table:table-cell>
          <table:table-cell table:formula="of:=[.D1022]-[.D102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21" office:value-type="float" office:value="21441" calcext:value-type="float">
            <text:p>21441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48159722222222" calcext:value-type="float">
            <text:p>0,00248159722222222000</text:p>
          </table:table-cell>
          <table:table-cell table:formula="of:=[.D1023]-[.D102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21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48402777777778" calcext:value-type="float">
            <text:p>0,00248402777777778000</text:p>
          </table:table-cell>
          <table:table-cell table:formula="of:=[.D1024]-[.D102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21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48645833333333" calcext:value-type="float">
            <text:p>0,00248645833333333000</text:p>
          </table:table-cell>
          <table:table-cell table:formula="of:=[.D1025]-[.D102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21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48888888888889" calcext:value-type="float">
            <text:p>0,00248888888888889000</text:p>
          </table:table-cell>
          <table:table-cell table:formula="of:=[.D1026]-[.D102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21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49131944444444" calcext:value-type="float">
            <text:p>0,00249131944444444000</text:p>
          </table:table-cell>
          <table:table-cell table:formula="of:=[.D1027]-[.D102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21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49375" calcext:value-type="float">
            <text:p>0,00249375000000000000</text:p>
          </table:table-cell>
          <table:table-cell table:formula="of:=[.D1028]-[.D102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21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49618055555556" calcext:value-type="float">
            <text:p>0,00249618055555556000</text:p>
          </table:table-cell>
          <table:table-cell table:formula="of:=[.D1029]-[.D102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21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49861111111111" calcext:value-type="float">
            <text:p>0,00249861111111111000</text:p>
          </table:table-cell>
          <table:table-cell table:formula="of:=[.D1030]-[.D102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21" office:value-type="float" office:value="21609" calcext:value-type="float">
            <text:p>21609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50104166666667" calcext:value-type="float">
            <text:p>0,00250104166666667000</text:p>
          </table:table-cell>
          <table:table-cell table:formula="of:=[.D1031]-[.D103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21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50347222222222" calcext:value-type="float">
            <text:p>0,00250347222222222000</text:p>
          </table:table-cell>
          <table:table-cell table:formula="of:=[.D1032]-[.D103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21" office:value-type="float" office:value="21651" calcext:value-type="float">
            <text:p>21651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50590277777778" calcext:value-type="float">
            <text:p>0,00250590277777778000</text:p>
          </table:table-cell>
          <table:table-cell table:formula="of:=[.D1033]-[.D103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21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50833333333333" calcext:value-type="float">
            <text:p>0,00250833333333333000</text:p>
          </table:table-cell>
          <table:table-cell table:formula="of:=[.D1034]-[.D103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21" office:value-type="float" office:value="21693" calcext:value-type="float">
            <text:p>21693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51076388888889" calcext:value-type="float">
            <text:p>0,00251076388888889000</text:p>
          </table:table-cell>
          <table:table-cell table:formula="of:=[.D1035]-[.D103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21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51319444444444" calcext:value-type="float">
            <text:p>0,00251319444444444000</text:p>
          </table:table-cell>
          <table:table-cell table:formula="of:=[.D1036]-[.D103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21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515625" calcext:value-type="float">
            <text:p>0,00251562500000000000</text:p>
          </table:table-cell>
          <table:table-cell table:formula="of:=[.D1037]-[.D103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21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51805555555556" calcext:value-type="float">
            <text:p>0,00251805555555556000</text:p>
          </table:table-cell>
          <table:table-cell table:formula="of:=[.D1038]-[.D103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21" office:value-type="float" office:value="21777" calcext:value-type="float">
            <text:p>21777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52048611111111" calcext:value-type="float">
            <text:p>0,00252048611111111000</text:p>
          </table:table-cell>
          <table:table-cell table:formula="of:=[.D1039]-[.D103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21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52291666666667" calcext:value-type="float">
            <text:p>0,00252291666666667000</text:p>
          </table:table-cell>
          <table:table-cell table:formula="of:=[.D1040]-[.D103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21" office:value-type="float" office:value="21819" calcext:value-type="float">
            <text:p>21819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52534722222222" calcext:value-type="float">
            <text:p>0,00252534722222222000</text:p>
          </table:table-cell>
          <table:table-cell table:formula="of:=[.D1041]-[.D104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21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52777777777778" calcext:value-type="float">
            <text:p>0,00252777777777778000</text:p>
          </table:table-cell>
          <table:table-cell table:formula="of:=[.D1042]-[.D104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21" office:value-type="float" office:value="21861" calcext:value-type="float">
            <text:p>21861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53020833333333" calcext:value-type="float">
            <text:p>0,00253020833333333000</text:p>
          </table:table-cell>
          <table:table-cell table:formula="of:=[.D1043]-[.D104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21" office:value-type="float" office:value="21882" calcext:value-type="float">
            <text:p>21882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53263888888889" calcext:value-type="float">
            <text:p>0,00253263888888889000</text:p>
          </table:table-cell>
          <table:table-cell table:formula="of:=[.D1044]-[.D104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21" office:value-type="float" office:value="21903" calcext:value-type="float">
            <text:p>21903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53506944444444" calcext:value-type="float">
            <text:p>0,00253506944444444000</text:p>
          </table:table-cell>
          <table:table-cell table:formula="of:=[.D1045]-[.D104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21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5375" calcext:value-type="float">
            <text:p>0,00253750000000000000</text:p>
          </table:table-cell>
          <table:table-cell table:formula="of:=[.D1046]-[.D104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21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53993055555556" calcext:value-type="float">
            <text:p>0,00253993055555556000</text:p>
          </table:table-cell>
          <table:table-cell table:formula="of:=[.D1047]-[.D104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21" office:value-type="float" office:value="21966" calcext:value-type="float">
            <text:p>21966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54236111111111" calcext:value-type="float">
            <text:p>0,00254236111111111000</text:p>
          </table:table-cell>
          <table:table-cell table:formula="of:=[.D1048]-[.D104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21" office:value-type="float" office:value="21987" calcext:value-type="float">
            <text:p>21987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54479166666667" calcext:value-type="float">
            <text:p>0,00254479166666667000</text:p>
          </table:table-cell>
          <table:table-cell table:formula="of:=[.D1049]-[.D104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21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54722222222222" calcext:value-type="float">
            <text:p>0,00254722222222222000</text:p>
          </table:table-cell>
          <table:table-cell table:formula="of:=[.D1050]-[.D104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21" office:value-type="float" office:value="22029" calcext:value-type="float">
            <text:p>22029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54965277777778" calcext:value-type="float">
            <text:p>0,00254965277777778000</text:p>
          </table:table-cell>
          <table:table-cell table:formula="of:=[.D1051]-[.D105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21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55208333333333" calcext:value-type="float">
            <text:p>0,00255208333333333000</text:p>
          </table:table-cell>
          <table:table-cell table:formula="of:=[.D1052]-[.D105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21" office:value-type="float" office:value="22071" calcext:value-type="float">
            <text:p>22071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55451388888889" calcext:value-type="float">
            <text:p>0,00255451388888889000</text:p>
          </table:table-cell>
          <table:table-cell table:formula="of:=[.D1053]-[.D105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21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55694444444444" calcext:value-type="float">
            <text:p>0,00255694444444444000</text:p>
          </table:table-cell>
          <table:table-cell table:formula="of:=[.D1054]-[.D105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21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559375" calcext:value-type="float">
            <text:p>0,00255937500000000000</text:p>
          </table:table-cell>
          <table:table-cell table:formula="of:=[.D1055]-[.D105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21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56180555555556" calcext:value-type="float">
            <text:p>0,00256180555555556000</text:p>
          </table:table-cell>
          <table:table-cell table:formula="of:=[.D1056]-[.D105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21" office:value-type="float" office:value="22155" calcext:value-type="float">
            <text:p>2215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56423611111111" calcext:value-type="float">
            <text:p>0,00256423611111111000</text:p>
          </table:table-cell>
          <table:table-cell table:formula="of:=[.D1057]-[.D105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21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56666666666667" calcext:value-type="float">
            <text:p>0,00256666666666667000</text:p>
          </table:table-cell>
          <table:table-cell table:formula="of:=[.D1058]-[.D105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21" office:value-type="float" office:value="22197" calcext:value-type="float">
            <text:p>22197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56909722222222" calcext:value-type="float">
            <text:p>0,00256909722222222000</text:p>
          </table:table-cell>
          <table:table-cell table:formula="of:=[.D1059]-[.D105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21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57152777777778" calcext:value-type="float">
            <text:p>0,00257152777777778000</text:p>
          </table:table-cell>
          <table:table-cell table:formula="of:=[.D1060]-[.D105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21" office:value-type="float" office:value="22239" calcext:value-type="float">
            <text:p>22239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57395833333333" calcext:value-type="float">
            <text:p>0,00257395833333333000</text:p>
          </table:table-cell>
          <table:table-cell table:formula="of:=[.D1061]-[.D106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21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57638888888889" calcext:value-type="float">
            <text:p>0,00257638888888889000</text:p>
          </table:table-cell>
          <table:table-cell table:formula="of:=[.D1062]-[.D106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21" office:value-type="float" office:value="22281" calcext:value-type="float">
            <text:p>22281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57881944444444" calcext:value-type="float">
            <text:p>0,00257881944444444000</text:p>
          </table:table-cell>
          <table:table-cell table:formula="of:=[.D1063]-[.D106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21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58125" calcext:value-type="float">
            <text:p>0,00258125000000000000</text:p>
          </table:table-cell>
          <table:table-cell table:formula="of:=[.D1064]-[.D106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21" office:value-type="float" office:value="22323" calcext:value-type="float">
            <text:p>22323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58368055555556" calcext:value-type="float">
            <text:p>0,00258368055555556000</text:p>
          </table:table-cell>
          <table:table-cell table:formula="of:=[.D1065]-[.D106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21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58611111111111" calcext:value-type="float">
            <text:p>0,00258611111111111000</text:p>
          </table:table-cell>
          <table:table-cell table:formula="of:=[.D1066]-[.D106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21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58854166666667" calcext:value-type="float">
            <text:p>0,00258854166666667000</text:p>
          </table:table-cell>
          <table:table-cell table:formula="of:=[.D1067]-[.D106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21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59097222222222" calcext:value-type="float">
            <text:p>0,00259097222222222000</text:p>
          </table:table-cell>
          <table:table-cell table:formula="of:=[.D1068]-[.D106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21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59340277777778" calcext:value-type="float">
            <text:p>0,00259340277777778000</text:p>
          </table:table-cell>
          <table:table-cell table:formula="of:=[.D1069]-[.D106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21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59583333333333" calcext:value-type="float">
            <text:p>0,00259583333333333000</text:p>
          </table:table-cell>
          <table:table-cell table:formula="of:=[.D1070]-[.D106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21" office:value-type="float" office:value="22449" calcext:value-type="float">
            <text:p>22449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59826388888889" calcext:value-type="float">
            <text:p>0,00259826388888889000</text:p>
          </table:table-cell>
          <table:table-cell table:formula="of:=[.D1071]-[.D107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21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60069444444444" calcext:value-type="float">
            <text:p>0,00260069444444444000</text:p>
          </table:table-cell>
          <table:table-cell table:formula="of:=[.D1072]-[.D107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21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603125" calcext:value-type="float">
            <text:p>0,00260312500000000000</text:p>
          </table:table-cell>
          <table:table-cell table:formula="of:=[.D1073]-[.D107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21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60555555555556" calcext:value-type="float">
            <text:p>0,00260555555555556000</text:p>
          </table:table-cell>
          <table:table-cell table:formula="of:=[.D1074]-[.D107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21" office:value-type="float" office:value="22533" calcext:value-type="float">
            <text:p>22533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60798611111111" calcext:value-type="float">
            <text:p>0,00260798611111111000</text:p>
          </table:table-cell>
          <table:table-cell table:formula="of:=[.D1075]-[.D107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21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61041666666667" calcext:value-type="float">
            <text:p>0,00261041666666667000</text:p>
          </table:table-cell>
          <table:table-cell table:formula="of:=[.D1076]-[.D107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21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61284722222222" calcext:value-type="float">
            <text:p>0,00261284722222222000</text:p>
          </table:table-cell>
          <table:table-cell table:formula="of:=[.D1077]-[.D107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21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61527777777778" calcext:value-type="float">
            <text:p>0,00261527777777778000</text:p>
          </table:table-cell>
          <table:table-cell table:formula="of:=[.D1078]-[.D107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21" office:value-type="float" office:value="22617" calcext:value-type="float">
            <text:p>22617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61770833333333" calcext:value-type="float">
            <text:p>0,00261770833333333000</text:p>
          </table:table-cell>
          <table:table-cell table:formula="of:=[.D1079]-[.D107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21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62013888888889" calcext:value-type="float">
            <text:p>0,00262013888888889000</text:p>
          </table:table-cell>
          <table:table-cell table:formula="of:=[.D1080]-[.D107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21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62256944444444" calcext:value-type="float">
            <text:p>0,00262256944444444000</text:p>
          </table:table-cell>
          <table:table-cell table:formula="of:=[.D1081]-[.D108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21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625" calcext:value-type="float">
            <text:p>0,00262500000000000000</text:p>
          </table:table-cell>
          <table:table-cell table:formula="of:=[.D1082]-[.D108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21" office:value-type="float" office:value="22701" calcext:value-type="float">
            <text:p>22701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62743055555556" calcext:value-type="float">
            <text:p>0,00262743055555556000</text:p>
          </table:table-cell>
          <table:table-cell table:formula="of:=[.D1083]-[.D108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21" office:value-type="float" office:value="22722" calcext:value-type="float">
            <text:p>22722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62986111111111" calcext:value-type="float">
            <text:p>0,00262986111111111000</text:p>
          </table:table-cell>
          <table:table-cell table:formula="of:=[.D1084]-[.D108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21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63229166666667" calcext:value-type="float">
            <text:p>0,00263229166666667000</text:p>
          </table:table-cell>
          <table:table-cell table:formula="of:=[.D1085]-[.D108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21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63472222222222" calcext:value-type="float">
            <text:p>0,00263472222222222000</text:p>
          </table:table-cell>
          <table:table-cell table:formula="of:=[.D1086]-[.D108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21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63715277777778" calcext:value-type="float">
            <text:p>0,00263715277777778000</text:p>
          </table:table-cell>
          <table:table-cell table:formula="of:=[.D1087]-[.D108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21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63958333333333" calcext:value-type="float">
            <text:p>0,00263958333333333000</text:p>
          </table:table-cell>
          <table:table-cell table:formula="of:=[.D1088]-[.D1087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21" office:value-type="float" office:value="22827" calcext:value-type="float">
            <text:p>22827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64201388888889" calcext:value-type="float">
            <text:p>0,00264201388888889000</text:p>
          </table:table-cell>
          <table:table-cell table:formula="of:=[.D1089]-[.D108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21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64444444444444" calcext:value-type="float">
            <text:p>0,00264444444444444000</text:p>
          </table:table-cell>
          <table:table-cell table:formula="of:=[.D1090]-[.D108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21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646875" calcext:value-type="float">
            <text:p>0,00264687500000000000</text:p>
          </table:table-cell>
          <table:table-cell table:formula="of:=[.D1091]-[.D109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21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64930555555556" calcext:value-type="float">
            <text:p>0,00264930555555556000</text:p>
          </table:table-cell>
          <table:table-cell table:formula="of:=[.D1092]-[.D109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21" office:value-type="float" office:value="22911" calcext:value-type="float">
            <text:p>22911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65173611111111" calcext:value-type="float">
            <text:p>0,00265173611111111000</text:p>
          </table:table-cell>
          <table:table-cell table:formula="of:=[.D1093]-[.D109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21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65416666666667" calcext:value-type="float">
            <text:p>0,00265416666666667000</text:p>
          </table:table-cell>
          <table:table-cell table:formula="of:=[.D1094]-[.D109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21" office:value-type="float" office:value="22953" calcext:value-type="float">
            <text:p>22953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65659722222222" calcext:value-type="float">
            <text:p>0,00265659722222222000</text:p>
          </table:table-cell>
          <table:table-cell table:formula="of:=[.D1095]-[.D1094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21" office:value-type="float" office:value="22974" calcext:value-type="float">
            <text:p>22974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65902777777778" calcext:value-type="float">
            <text:p>0,00265902777777778000</text:p>
          </table:table-cell>
          <table:table-cell table:formula="of:=[.D1096]-[.D109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21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66145833333333" calcext:value-type="float">
            <text:p>0,00266145833333333000</text:p>
          </table:table-cell>
          <table:table-cell table:formula="of:=[.D1097]-[.D109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21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66388888888889" calcext:value-type="float">
            <text:p>0,00266388888888889000</text:p>
          </table:table-cell>
          <table:table-cell table:formula="of:=[.D1098]-[.D109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21" office:value-type="float" office:value="23037" calcext:value-type="float">
            <text:p>23037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66631944444444" calcext:value-type="float">
            <text:p>0,00266631944444444000</text:p>
          </table:table-cell>
          <table:table-cell table:formula="of:=[.D1099]-[.D109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21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66875" calcext:value-type="float">
            <text:p>0,00266875000000000000</text:p>
          </table:table-cell>
          <table:table-cell table:formula="of:=[.D1100]-[.D109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21" office:value-type="float" office:value="23079" calcext:value-type="float">
            <text:p>23079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67118055555556" calcext:value-type="float">
            <text:p>0,00267118055555556000</text:p>
          </table:table-cell>
          <table:table-cell table:formula="of:=[.D1101]-[.D110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21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67361111111111" calcext:value-type="float">
            <text:p>0,00267361111111111000</text:p>
          </table:table-cell>
          <table:table-cell table:formula="of:=[.D1102]-[.D1101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21" office:value-type="float" office:value="23121" calcext:value-type="float">
            <text:p>23121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67604166666667" calcext:value-type="float">
            <text:p>0,00267604166666667000</text:p>
          </table:table-cell>
          <table:table-cell table:formula="of:=[.D1103]-[.D110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21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67847222222222" calcext:value-type="float">
            <text:p>0,00267847222222222000</text:p>
          </table:table-cell>
          <table:table-cell table:formula="of:=[.D1104]-[.D110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21" office:value-type="float" office:value="23163" calcext:value-type="float">
            <text:p>23163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68090277777778" calcext:value-type="float">
            <text:p>0,00268090277777778000</text:p>
          </table:table-cell>
          <table:table-cell table:formula="of:=[.D1105]-[.D110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21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68333333333333" calcext:value-type="float">
            <text:p>0,00268333333333333000</text:p>
          </table:table-cell>
          <table:table-cell table:formula="of:=[.D1106]-[.D110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21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68576388888889" calcext:value-type="float">
            <text:p>0,00268576388888889000</text:p>
          </table:table-cell>
          <table:table-cell table:formula="of:=[.D1107]-[.D110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21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68819444444444" calcext:value-type="float">
            <text:p>0,00268819444444444000</text:p>
          </table:table-cell>
          <table:table-cell table:formula="of:=[.D1108]-[.D110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21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690625" calcext:value-type="float">
            <text:p>0,00269062500000000000</text:p>
          </table:table-cell>
          <table:table-cell table:formula="of:=[.D1109]-[.D1108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21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69305555555556" calcext:value-type="float">
            <text:p>0,00269305555555556000</text:p>
          </table:table-cell>
          <table:table-cell table:formula="of:=[.D1110]-[.D110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21" office:value-type="float" office:value="23289" calcext:value-type="float">
            <text:p>23289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69548611111111" calcext:value-type="float">
            <text:p>0,00269548611111111000</text:p>
          </table:table-cell>
          <table:table-cell table:formula="of:=[.D1111]-[.D111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21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69791666666667" calcext:value-type="float">
            <text:p>0,00269791666666667000</text:p>
          </table:table-cell>
          <table:table-cell table:formula="of:=[.D1112]-[.D111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21" office:value-type="float" office:value="23331" calcext:value-type="float">
            <text:p>23331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70034722222222" calcext:value-type="float">
            <text:p>0,00270034722222222000</text:p>
          </table:table-cell>
          <table:table-cell table:formula="of:=[.D1113]-[.D111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21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70277777777778" calcext:value-type="float">
            <text:p>0,00270277777777778000</text:p>
          </table:table-cell>
          <table:table-cell table:formula="of:=[.D1114]-[.D111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21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70520833333333" calcext:value-type="float">
            <text:p>0,00270520833333333000</text:p>
          </table:table-cell>
          <table:table-cell table:formula="of:=[.D1115]-[.D111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21" office:value-type="float" office:value="23394" calcext:value-type="float">
            <text:p>23394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70763888888889" calcext:value-type="float">
            <text:p>0,00270763888888889000</text:p>
          </table:table-cell>
          <table:table-cell table:formula="of:=[.D1116]-[.D1115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21" office:value-type="float" office:value="23415" calcext:value-type="float">
            <text:p>2341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71006944444444" calcext:value-type="float">
            <text:p>0,00271006944444444000</text:p>
          </table:table-cell>
          <table:table-cell table:formula="of:=[.D1117]-[.D1116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21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7125" calcext:value-type="float">
            <text:p>0,00271250000000000000</text:p>
          </table:table-cell>
          <table:table-cell table:formula="of:=[.D1118]-[.D111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21" office:value-type="float" office:value="23457" calcext:value-type="float">
            <text:p>23457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71493055555556" calcext:value-type="float">
            <text:p>0,00271493055555556000</text:p>
          </table:table-cell>
          <table:table-cell table:formula="of:=[.D1119]-[.D111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21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71736111111111" calcext:value-type="float">
            <text:p>0,00271736111111111000</text:p>
          </table:table-cell>
          <table:table-cell table:formula="of:=[.D1120]-[.D111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21" office:value-type="float" office:value="23499" calcext:value-type="float">
            <text:p>23499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71979166666667" calcext:value-type="float">
            <text:p>0,00271979166666667000</text:p>
          </table:table-cell>
          <table:table-cell table:formula="of:=[.D1121]-[.D112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21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72222222222222" calcext:value-type="float">
            <text:p>0,00272222222222222000</text:p>
          </table:table-cell>
          <table:table-cell table:formula="of:=[.D1122]-[.D112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21" office:value-type="float" office:value="23541" calcext:value-type="float">
            <text:p>23541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72465277777778" calcext:value-type="float">
            <text:p>0,00272465277777778000</text:p>
          </table:table-cell>
          <table:table-cell table:formula="of:=[.D1123]-[.D1122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21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72708333333333" calcext:value-type="float">
            <text:p>0,00272708333333333000</text:p>
          </table:table-cell>
          <table:table-cell table:formula="of:=[.D1124]-[.D1123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21" office:value-type="float" office:value="23583" calcext:value-type="float">
            <text:p>23583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72951388888889" calcext:value-type="float">
            <text:p>0,00272951388888889000</text:p>
          </table:table-cell>
          <table:table-cell table:formula="of:=[.D1125]-[.D112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21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73194444444444" calcext:value-type="float">
            <text:p>0,00273194444444444000</text:p>
          </table:table-cell>
          <table:table-cell table:formula="of:=[.D1126]-[.D112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21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734375" calcext:value-type="float">
            <text:p>0,00273437500000000000</text:p>
          </table:table-cell>
          <table:table-cell table:formula="of:=[.D1127]-[.D112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21" office:value-type="float" office:value="23646" calcext:value-type="float">
            <text:p>23646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73680555555556" calcext:value-type="float">
            <text:p>0,00273680555555556000</text:p>
          </table:table-cell>
          <table:table-cell table:formula="of:=[.D1128]-[.D112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21" office:value-type="float" office:value="23667" calcext:value-type="float">
            <text:p>23667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73923611111111" calcext:value-type="float">
            <text:p>0,00273923611111111000</text:p>
          </table:table-cell>
          <table:table-cell table:formula="of:=[.D1129]-[.D112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21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74166666666667" calcext:value-type="float">
            <text:p>0,00274166666666667000</text:p>
          </table:table-cell>
          <table:table-cell table:formula="of:=[.D1130]-[.D1129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21" office:value-type="float" office:value="23709" calcext:value-type="float">
            <text:p>23709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74409722222222" calcext:value-type="float">
            <text:p>0,00274409722222222000</text:p>
          </table:table-cell>
          <table:table-cell table:formula="of:=[.D1131]-[.D1130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21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74652777777778" calcext:value-type="float">
            <text:p>0,00274652777777778000</text:p>
          </table:table-cell>
          <table:table-cell table:formula="of:=[.D1132]-[.D113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21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74895833333333" calcext:value-type="float">
            <text:p>0,00274895833333333000</text:p>
          </table:table-cell>
          <table:table-cell table:formula="of:=[.D1133]-[.D113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21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75138888888889" calcext:value-type="float">
            <text:p>0,00275138888888889000</text:p>
          </table:table-cell>
          <table:table-cell table:formula="of:=[.D1134]-[.D1133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21" office:value-type="float" office:value="23793" calcext:value-type="float">
            <text:p>23793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75381944444444" calcext:value-type="float">
            <text:p>0,00275381944444444000</text:p>
          </table:table-cell>
          <table:table-cell table:formula="of:=[.D1135]-[.D1134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21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75625" calcext:value-type="float">
            <text:p>0,00275625000000000000</text:p>
          </table:table-cell>
          <table:table-cell table:formula="of:=[.D1136]-[.D1135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21" office:value-type="float" office:value="23835" calcext:value-type="float">
            <text:p>2383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75868055555556" calcext:value-type="float">
            <text:p>0,00275868055555556000</text:p>
          </table:table-cell>
          <table:table-cell table:formula="of:=[.D1137]-[.D1136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21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76111111111111" calcext:value-type="float">
            <text:p>0,00276111111111111000</text:p>
          </table:table-cell>
          <table:table-cell table:formula="of:=[.D1138]-[.D1137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21" office:value-type="float" office:value="23877" calcext:value-type="float">
            <text:p>23877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76354166666667" calcext:value-type="float">
            <text:p>0,00276354166666667000</text:p>
          </table:table-cell>
          <table:table-cell table:formula="of:=[.D1139]-[.D1138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21" office:value-type="float" office:value="23898" calcext:value-type="float">
            <text:p>23898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76597222222222" calcext:value-type="float">
            <text:p>0,00276597222222222000</text:p>
          </table:table-cell>
          <table:table-cell table:formula="of:=[.D1140]-[.D1139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21" office:value-type="float" office:value="23919" calcext:value-type="float">
            <text:p>23919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76840277777778" calcext:value-type="float">
            <text:p>0,00276840277777778000</text:p>
          </table:table-cell>
          <table:table-cell table:formula="of:=[.D1141]-[.D1140]" office:value-type="float" office:value="0.00000243055555555587" calcext:value-type="float">
            <text:p>0,0000024305555555558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21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77083333333333" calcext:value-type="float">
            <text:p>0,00277083333333333000</text:p>
          </table:table-cell>
          <table:table-cell table:formula="of:=[.D1142]-[.D1141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21" office:value-type="float" office:value="23961" calcext:value-type="float">
            <text:p>23961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77326388888889" calcext:value-type="float">
            <text:p>0,00277326388888889000</text:p>
          </table:table-cell>
          <table:table-cell table:formula="of:=[.D1143]-[.D1142]" office:value-type="float" office:value="0.00000243055555555543" calcext:value-type="float">
            <text:p>0,000002430555555555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21" office:value-type="float" office:value="23982" calcext:value-type="float">
            <text:p>23982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77569444444444" calcext:value-type="float">
            <text:p>0,00277569444444444000</text:p>
          </table:table-cell>
          <table:table-cell table:formula="of:=#REF!-[.D1143]" office:value-type="string" office:string-value="" calcext:value-type="error">
            <text:p>#REF!</text:p>
          </table:table-cell>
        </table:table-row>
        <table:table-row table:style-name="ro1" table:number-rows-repeated="10474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0:18.911173657</meta:creation-date>
    <dc:date>2026-05-17T15:50:27.851757731</dc:date>
    <meta:editing-duration>PT10S</meta:editing-duration>
    <meta:editing-cycles>1</meta:editing-cycles>
    <meta:document-statistic meta:table-count="1" meta:cell-count="5715" meta:object-count="0"/>
    <meta:generator>LibreOffice/24.2.7.2$Linux_X86_64 LibreOffice_project/420$Build-2</meta:generator>
  </office:meta>
</office:document-meta>
</file>