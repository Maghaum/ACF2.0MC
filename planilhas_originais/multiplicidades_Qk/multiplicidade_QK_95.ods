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9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95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109953703703704" calcext:value-type="float">
            <text:p>0,00001099537037037040</text:p>
          </table:table-cell>
          <table:table-cell table:formula="of:=[.D3]-[.D2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95" office:value-type="float" office:value="190" calcext:value-type="float">
            <text:p>190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219907407407407" calcext:value-type="float">
            <text:p>0,00002199074074074070</text:p>
          </table:table-cell>
          <table:table-cell table:formula="of:=[.D4]-[.D3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95" office:value-type="float" office:value="285" calcext:value-type="float">
            <text:p>285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329861111111111" calcext:value-type="float">
            <text:p>0,00003298611111111110</text:p>
          </table:table-cell>
          <table:table-cell table:formula="of:=[.D5]-[.D4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95" office:value-type="float" office:value="380" calcext:value-type="float">
            <text:p>380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439814814814815" calcext:value-type="float">
            <text:p>0,00004398148148148150</text:p>
          </table:table-cell>
          <table:table-cell table:formula="of:=[.D6]-[.D5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95" office:value-type="float" office:value="475" calcext:value-type="float">
            <text:p>47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549768518518519" calcext:value-type="float">
            <text:p>0,00005497685185185190</text:p>
          </table:table-cell>
          <table:table-cell table:formula="of:=[.D7]-[.D6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95" office:value-type="float" office:value="570" calcext:value-type="float">
            <text:p>570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659722222222222" calcext:value-type="float">
            <text:p>0,00006597222222222220</text:p>
          </table:table-cell>
          <table:table-cell table:formula="of:=[.D8]-[.D7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95" office:value-type="float" office:value="665" calcext:value-type="float">
            <text:p>665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769675925925926" calcext:value-type="float">
            <text:p>0,00007696759259259260</text:p>
          </table:table-cell>
          <table:table-cell table:formula="of:=[.D9]-[.D8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95" office:value-type="float" office:value="760" calcext:value-type="float">
            <text:p>760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87962962962963" calcext:value-type="float">
            <text:p>0,00008796296296296300</text:p>
          </table:table-cell>
          <table:table-cell table:formula="of:=[.D10]-[.D9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95" office:value-type="float" office:value="855" calcext:value-type="float">
            <text:p>855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989583333333333" calcext:value-type="float">
            <text:p>0,00009895833333333330</text:p>
          </table:table-cell>
          <table:table-cell table:formula="of:=[.D11]-[.D1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95" office:value-type="float" office:value="950" calcext:value-type="float">
            <text:p>95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109953703703704" calcext:value-type="float">
            <text:p>0,00010995370370370400</text:p>
          </table:table-cell>
          <table:table-cell table:formula="of:=[.D12]-[.D11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95" office:value-type="float" office:value="1045" calcext:value-type="float">
            <text:p>1045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120949074074074" calcext:value-type="float">
            <text:p>0,00012094907407407400</text:p>
          </table:table-cell>
          <table:table-cell table:formula="of:=[.D13]-[.D12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95" office:value-type="float" office:value="1140" calcext:value-type="float">
            <text:p>1140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31944444444444" calcext:value-type="float">
            <text:p>0,00013194444444444400</text:p>
          </table:table-cell>
          <table:table-cell table:formula="of:=[.D14]-[.D13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95" office:value-type="float" office:value="1235" calcext:value-type="float">
            <text:p>1235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42939814814815" calcext:value-type="float">
            <text:p>0,00014293981481481500</text:p>
          </table:table-cell>
          <table:table-cell table:formula="of:=[.D15]-[.D14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95" office:value-type="float" office:value="1330" calcext:value-type="float">
            <text:p>1330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53935185185185" calcext:value-type="float">
            <text:p>0,00015393518518518500</text:p>
          </table:table-cell>
          <table:table-cell table:formula="of:=[.D16]-[.D15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95" office:value-type="float" office:value="1425" calcext:value-type="float">
            <text:p>142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64930555555556" calcext:value-type="float">
            <text:p>0,00016493055555555600</text:p>
          </table:table-cell>
          <table:table-cell table:formula="of:=[.D17]-[.D16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95" office:value-type="float" office:value="1520" calcext:value-type="float">
            <text:p>1520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75925925925926" calcext:value-type="float">
            <text:p>0,00017592592592592600</text:p>
          </table:table-cell>
          <table:table-cell table:formula="of:=[.D18]-[.D17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95" office:value-type="float" office:value="1615" calcext:value-type="float">
            <text:p>1615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86921296296296" calcext:value-type="float">
            <text:p>0,00018692129629629600</text:p>
          </table:table-cell>
          <table:table-cell table:formula="of:=[.D19]-[.D18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95" office:value-type="float" office:value="1710" calcext:value-type="float">
            <text:p>1710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97916666666667" calcext:value-type="float">
            <text:p>0,00019791666666666700</text:p>
          </table:table-cell>
          <table:table-cell table:formula="of:=[.D20]-[.D19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95" office:value-type="float" office:value="1805" calcext:value-type="float">
            <text:p>1805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208912037037037" calcext:value-type="float">
            <text:p>0,00020891203703703700</text:p>
          </table:table-cell>
          <table:table-cell table:formula="of:=[.D21]-[.D2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95" office:value-type="float" office:value="1900" calcext:value-type="float">
            <text:p>190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219907407407407" calcext:value-type="float">
            <text:p>0,00021990740740740700</text:p>
          </table:table-cell>
          <table:table-cell table:formula="of:=[.D22]-[.D21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95" office:value-type="float" office:value="1995" calcext:value-type="float">
            <text:p>1995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230902777777778" calcext:value-type="float">
            <text:p>0,00023090277777777800</text:p>
          </table:table-cell>
          <table:table-cell table:formula="of:=[.D23]-[.D22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95" office:value-type="float" office:value="2090" calcext:value-type="float">
            <text:p>2090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241898148148148" calcext:value-type="float">
            <text:p>0,00024189814814814800</text:p>
          </table:table-cell>
          <table:table-cell table:formula="of:=[.D24]-[.D23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95" office:value-type="float" office:value="2185" calcext:value-type="float">
            <text:p>2185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52893518518519" calcext:value-type="float">
            <text:p>0,00025289351851851900</text:p>
          </table:table-cell>
          <table:table-cell table:formula="of:=[.D25]-[.D24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95" office:value-type="float" office:value="2280" calcext:value-type="float">
            <text:p>2280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63888888888889" calcext:value-type="float">
            <text:p>0,00026388888888888900</text:p>
          </table:table-cell>
          <table:table-cell table:formula="of:=[.D26]-[.D25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95" office:value-type="float" office:value="2375" calcext:value-type="float">
            <text:p>237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74884259259259" calcext:value-type="float">
            <text:p>0,00027488425925925900</text:p>
          </table:table-cell>
          <table:table-cell table:formula="of:=[.D27]-[.D26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95" office:value-type="float" office:value="2470" calcext:value-type="float">
            <text:p>2470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8587962962963" calcext:value-type="float">
            <text:p>0,00028587962962963000</text:p>
          </table:table-cell>
          <table:table-cell table:formula="of:=[.D28]-[.D27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95" office:value-type="float" office:value="2565" calcext:value-type="float">
            <text:p>2565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96875" calcext:value-type="float">
            <text:p>0,00029687500000000000</text:p>
          </table:table-cell>
          <table:table-cell table:formula="of:=[.D29]-[.D28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95" office:value-type="float" office:value="2660" calcext:value-type="float">
            <text:p>2660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30787037037037" calcext:value-type="float">
            <text:p>0,00030787037037037000</text:p>
          </table:table-cell>
          <table:table-cell table:formula="of:=[.D30]-[.D29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95" office:value-type="float" office:value="2755" calcext:value-type="float">
            <text:p>2755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318865740740741" calcext:value-type="float">
            <text:p>0,00031886574074074100</text:p>
          </table:table-cell>
          <table:table-cell table:formula="of:=[.D31]-[.D3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95" office:value-type="float" office:value="2850" calcext:value-type="float">
            <text:p>285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329861111111111" calcext:value-type="float">
            <text:p>0,00032986111111111100</text:p>
          </table:table-cell>
          <table:table-cell table:formula="of:=[.D32]-[.D31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95" office:value-type="float" office:value="2945" calcext:value-type="float">
            <text:p>2945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340856481481482" calcext:value-type="float">
            <text:p>0,00034085648148148200</text:p>
          </table:table-cell>
          <table:table-cell table:formula="of:=[.D33]-[.D32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95" office:value-type="float" office:value="3040" calcext:value-type="float">
            <text:p>3040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351851851851852" calcext:value-type="float">
            <text:p>0,00035185185185185200</text:p>
          </table:table-cell>
          <table:table-cell table:formula="of:=[.D34]-[.D33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95" office:value-type="float" office:value="3135" calcext:value-type="float">
            <text:p>3135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362847222222222" calcext:value-type="float">
            <text:p>0,00036284722222222200</text:p>
          </table:table-cell>
          <table:table-cell table:formula="of:=[.D35]-[.D34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95" office:value-type="float" office:value="3230" calcext:value-type="float">
            <text:p>3230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373842592592593" calcext:value-type="float">
            <text:p>0,00037384259259259300</text:p>
          </table:table-cell>
          <table:table-cell table:formula="of:=[.D36]-[.D35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95" office:value-type="float" office:value="3325" calcext:value-type="float">
            <text:p>332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384837962962963" calcext:value-type="float">
            <text:p>0,00038483796296296300</text:p>
          </table:table-cell>
          <table:table-cell table:formula="of:=[.D37]-[.D36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95" office:value-type="float" office:value="3420" calcext:value-type="float">
            <text:p>3420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395833333333333" calcext:value-type="float">
            <text:p>0,00039583333333333300</text:p>
          </table:table-cell>
          <table:table-cell table:formula="of:=[.D38]-[.D37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95" office:value-type="float" office:value="3515" calcext:value-type="float">
            <text:p>3515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406828703703704" calcext:value-type="float">
            <text:p>0,00040682870370370400</text:p>
          </table:table-cell>
          <table:table-cell table:formula="of:=[.D39]-[.D38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95" office:value-type="float" office:value="3610" calcext:value-type="float">
            <text:p>3610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417824074074074" calcext:value-type="float">
            <text:p>0,00041782407407407400</text:p>
          </table:table-cell>
          <table:table-cell table:formula="of:=[.D40]-[.D39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95" office:value-type="float" office:value="3705" calcext:value-type="float">
            <text:p>3705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428819444444444" calcext:value-type="float">
            <text:p>0,00042881944444444500</text:p>
          </table:table-cell>
          <table:table-cell table:formula="of:=[.D41]-[.D4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95" office:value-type="float" office:value="3800" calcext:value-type="float">
            <text:p>380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439814814814815" calcext:value-type="float">
            <text:p>0,00043981481481481500</text:p>
          </table:table-cell>
          <table:table-cell table:formula="of:=[.D42]-[.D41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95" office:value-type="float" office:value="3895" calcext:value-type="float">
            <text:p>3895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450810185185185" calcext:value-type="float">
            <text:p>0,00045081018518518500</text:p>
          </table:table-cell>
          <table:table-cell table:formula="of:=[.D43]-[.D42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95" office:value-type="float" office:value="3990" calcext:value-type="float">
            <text:p>3990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461805555555556" calcext:value-type="float">
            <text:p>0,00046180555555555600</text:p>
          </table:table-cell>
          <table:table-cell table:formula="of:=[.D44]-[.D43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95" office:value-type="float" office:value="4085" calcext:value-type="float">
            <text:p>4085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472800925925926" calcext:value-type="float">
            <text:p>0,00047280092592592600</text:p>
          </table:table-cell>
          <table:table-cell table:formula="of:=[.D45]-[.D44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95" office:value-type="float" office:value="4180" calcext:value-type="float">
            <text:p>4180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483796296296296" calcext:value-type="float">
            <text:p>0,00048379629629629600</text:p>
          </table:table-cell>
          <table:table-cell table:formula="of:=[.D46]-[.D45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95" office:value-type="float" office:value="4275" calcext:value-type="float">
            <text:p>427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494791666666667" calcext:value-type="float">
            <text:p>0,00049479166666666700</text:p>
          </table:table-cell>
          <table:table-cell table:formula="of:=[.D47]-[.D46]" office:value-type="float" office:value="0.0000109953703703703" calcext:value-type="float">
            <text:p>0,00001099537037037030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95" office:value-type="float" office:value="4370" calcext:value-type="float">
            <text:p>4370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505787037037037" calcext:value-type="float">
            <text:p>0,00050578703703703700</text:p>
          </table:table-cell>
          <table:table-cell table:formula="of:=[.D48]-[.D47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95" office:value-type="float" office:value="4465" calcext:value-type="float">
            <text:p>4465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516782407407407" calcext:value-type="float">
            <text:p>0,00051678240740740700</text:p>
          </table:table-cell>
          <table:table-cell table:formula="of:=[.D49]-[.D48]" office:value-type="float" office:value="0.0000109953703703703" calcext:value-type="float">
            <text:p>0,00001099537037037030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95" office:value-type="float" office:value="4560" calcext:value-type="float">
            <text:p>4560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527777777777778" calcext:value-type="float">
            <text:p>0,00052777777777777800</text:p>
          </table:table-cell>
          <table:table-cell table:formula="of:=[.D50]-[.D49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95" office:value-type="float" office:value="4655" calcext:value-type="float">
            <text:p>4655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538773148148148" calcext:value-type="float">
            <text:p>0,00053877314814814800</text:p>
          </table:table-cell>
          <table:table-cell table:formula="of:=[.D51]-[.D5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95" office:value-type="float" office:value="4750" calcext:value-type="float">
            <text:p>47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549768518518519" calcext:value-type="float">
            <text:p>0,00054976851851851900</text:p>
          </table:table-cell>
          <table:table-cell table:formula="of:=[.D52]-[.D51]" office:value-type="float" office:value="0.0000109953703703703" calcext:value-type="float">
            <text:p>0,00001099537037037030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95" office:value-type="float" office:value="4845" calcext:value-type="float">
            <text:p>4845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560763888888889" calcext:value-type="float">
            <text:p>0,00056076388888888900</text:p>
          </table:table-cell>
          <table:table-cell table:formula="of:=[.D53]-[.D52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95" office:value-type="float" office:value="4940" calcext:value-type="float">
            <text:p>4940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571759259259259" calcext:value-type="float">
            <text:p>0,00057175925925925900</text:p>
          </table:table-cell>
          <table:table-cell table:formula="of:=[.D54]-[.D53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95" office:value-type="float" office:value="5035" calcext:value-type="float">
            <text:p>5035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58275462962963" calcext:value-type="float">
            <text:p>0,00058275462962963000</text:p>
          </table:table-cell>
          <table:table-cell table:formula="of:=[.D55]-[.D54]" office:value-type="float" office:value="0.0000109953703703703" calcext:value-type="float">
            <text:p>0,00001099537037037030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95" office:value-type="float" office:value="5130" calcext:value-type="float">
            <text:p>5130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59375" calcext:value-type="float">
            <text:p>0,00059375000000000000</text:p>
          </table:table-cell>
          <table:table-cell table:formula="of:=[.D56]-[.D55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95" office:value-type="float" office:value="5225" calcext:value-type="float">
            <text:p>522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60474537037037" calcext:value-type="float">
            <text:p>0,00060474537037037000</text:p>
          </table:table-cell>
          <table:table-cell table:formula="of:=[.D57]-[.D56]" office:value-type="float" office:value="0.0000109953703703703" calcext:value-type="float">
            <text:p>0,00001099537037037030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95" office:value-type="float" office:value="5320" calcext:value-type="float">
            <text:p>5320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615740740740741" calcext:value-type="float">
            <text:p>0,00061574074074074100</text:p>
          </table:table-cell>
          <table:table-cell table:formula="of:=[.D58]-[.D57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95" office:value-type="float" office:value="5415" calcext:value-type="float">
            <text:p>5415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626736111111111" calcext:value-type="float">
            <text:p>0,00062673611111111100</text:p>
          </table:table-cell>
          <table:table-cell table:formula="of:=[.D59]-[.D58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95" office:value-type="float" office:value="5510" calcext:value-type="float">
            <text:p>5510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637731481481482" calcext:value-type="float">
            <text:p>0,00063773148148148200</text:p>
          </table:table-cell>
          <table:table-cell table:formula="of:=[.D60]-[.D59]" office:value-type="float" office:value="0.0000109953703703703" calcext:value-type="float">
            <text:p>0,00001099537037037030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95" office:value-type="float" office:value="5605" calcext:value-type="float">
            <text:p>5605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648726851851852" calcext:value-type="float">
            <text:p>0,00064872685185185200</text:p>
          </table:table-cell>
          <table:table-cell table:formula="of:=[.D61]-[.D6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95" office:value-type="float" office:value="5700" calcext:value-type="float">
            <text:p>570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659722222222222" calcext:value-type="float">
            <text:p>0,00065972222222222200</text:p>
          </table:table-cell>
          <table:table-cell table:formula="of:=[.D62]-[.D61]" office:value-type="float" office:value="0.0000109953703703703" calcext:value-type="float">
            <text:p>0,00001099537037037030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95" office:value-type="float" office:value="5795" calcext:value-type="float">
            <text:p>5795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670717592592593" calcext:value-type="float">
            <text:p>0,00067071759259259300</text:p>
          </table:table-cell>
          <table:table-cell table:formula="of:=[.D63]-[.D62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95" office:value-type="float" office:value="5890" calcext:value-type="float">
            <text:p>5890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681712962962963" calcext:value-type="float">
            <text:p>0,00068171296296296300</text:p>
          </table:table-cell>
          <table:table-cell table:formula="of:=[.D64]-[.D63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95" office:value-type="float" office:value="5985" calcext:value-type="float">
            <text:p>5985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692708333333333" calcext:value-type="float">
            <text:p>0,00069270833333333300</text:p>
          </table:table-cell>
          <table:table-cell table:formula="of:=[.D65]-[.D64]" office:value-type="float" office:value="0.0000109953703703703" calcext:value-type="float">
            <text:p>0,00001099537037037030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95" office:value-type="float" office:value="6080" calcext:value-type="float">
            <text:p>6080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703703703703704" calcext:value-type="float">
            <text:p>0,00070370370370370400</text:p>
          </table:table-cell>
          <table:table-cell table:formula="of:=[.D66]-[.D65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95" office:value-type="float" office:value="6175" calcext:value-type="float">
            <text:p>617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714699074074074" calcext:value-type="float">
            <text:p>0,00071469907407407400</text:p>
          </table:table-cell>
          <table:table-cell table:formula="of:=[.D67]-[.D66]" office:value-type="float" office:value="0.0000109953703703703" calcext:value-type="float">
            <text:p>0,00001099537037037030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95" office:value-type="float" office:value="6270" calcext:value-type="float">
            <text:p>6270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725694444444444" calcext:value-type="float">
            <text:p>0,00072569444444444400</text:p>
          </table:table-cell>
          <table:table-cell table:formula="of:=[.D68]-[.D67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95" office:value-type="float" office:value="6365" calcext:value-type="float">
            <text:p>6365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736689814814815" calcext:value-type="float">
            <text:p>0,00073668981481481500</text:p>
          </table:table-cell>
          <table:table-cell table:formula="of:=[.D69]-[.D68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95" office:value-type="float" office:value="6460" calcext:value-type="float">
            <text:p>6460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747685185185185" calcext:value-type="float">
            <text:p>0,00074768518518518500</text:p>
          </table:table-cell>
          <table:table-cell table:formula="of:=[.D70]-[.D69]" office:value-type="float" office:value="0.0000109953703703703" calcext:value-type="float">
            <text:p>0,00001099537037037030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95" office:value-type="float" office:value="6555" calcext:value-type="float">
            <text:p>6555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758680555555556" calcext:value-type="float">
            <text:p>0,00075868055555555600</text:p>
          </table:table-cell>
          <table:table-cell table:formula="of:=[.D71]-[.D7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95" office:value-type="float" office:value="6650" calcext:value-type="float">
            <text:p>665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769675925925926" calcext:value-type="float">
            <text:p>0,00076967592592592600</text:p>
          </table:table-cell>
          <table:table-cell table:formula="of:=[.D72]-[.D71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95" office:value-type="float" office:value="6745" calcext:value-type="float">
            <text:p>6745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780671296296296" calcext:value-type="float">
            <text:p>0,00078067129629629600</text:p>
          </table:table-cell>
          <table:table-cell table:formula="of:=[.D73]-[.D72]" office:value-type="float" office:value="0.0000109953703703703" calcext:value-type="float">
            <text:p>0,00001099537037037030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95" office:value-type="float" office:value="6840" calcext:value-type="float">
            <text:p>6840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791666666666667" calcext:value-type="float">
            <text:p>0,00079166666666666700</text:p>
          </table:table-cell>
          <table:table-cell table:formula="of:=[.D74]-[.D73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95" office:value-type="float" office:value="6935" calcext:value-type="float">
            <text:p>6935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802662037037037" calcext:value-type="float">
            <text:p>0,00080266203703703700</text:p>
          </table:table-cell>
          <table:table-cell table:formula="of:=[.D75]-[.D74]" office:value-type="float" office:value="0.0000109953703703703" calcext:value-type="float">
            <text:p>0,00001099537037037030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95" office:value-type="float" office:value="7030" calcext:value-type="float">
            <text:p>7030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813657407407407" calcext:value-type="float">
            <text:p>0,00081365740740740700</text:p>
          </table:table-cell>
          <table:table-cell table:formula="of:=[.D76]-[.D75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95" office:value-type="float" office:value="7125" calcext:value-type="float">
            <text:p>712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824652777777778" calcext:value-type="float">
            <text:p>0,00082465277777777800</text:p>
          </table:table-cell>
          <table:table-cell table:formula="of:=[.D77]-[.D76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95" office:value-type="float" office:value="7220" calcext:value-type="float">
            <text:p>7220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835648148148148" calcext:value-type="float">
            <text:p>0,00083564814814814800</text:p>
          </table:table-cell>
          <table:table-cell table:formula="of:=[.D78]-[.D77]" office:value-type="float" office:value="0.0000109953703703703" calcext:value-type="float">
            <text:p>0,00001099537037037030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95" office:value-type="float" office:value="7315" calcext:value-type="float">
            <text:p>7315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846643518518519" calcext:value-type="float">
            <text:p>0,00084664351851851900</text:p>
          </table:table-cell>
          <table:table-cell table:formula="of:=[.D79]-[.D78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95" office:value-type="float" office:value="7410" calcext:value-type="float">
            <text:p>7410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857638888888889" calcext:value-type="float">
            <text:p>0,00085763888888888900</text:p>
          </table:table-cell>
          <table:table-cell table:formula="of:=[.D80]-[.D79]" office:value-type="float" office:value="0.0000109953703703703" calcext:value-type="float">
            <text:p>0,00001099537037037030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95" office:value-type="float" office:value="7505" calcext:value-type="float">
            <text:p>7505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868634259259259" calcext:value-type="float">
            <text:p>0,00086863425925925900</text:p>
          </table:table-cell>
          <table:table-cell table:formula="of:=[.D81]-[.D8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95" office:value-type="float" office:value="7600" calcext:value-type="float">
            <text:p>760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87962962962963" calcext:value-type="float">
            <text:p>0,00087962962962963000</text:p>
          </table:table-cell>
          <table:table-cell table:formula="of:=[.D82]-[.D81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95" office:value-type="float" office:value="7695" calcext:value-type="float">
            <text:p>7695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890625" calcext:value-type="float">
            <text:p>0,00089062500000000000</text:p>
          </table:table-cell>
          <table:table-cell table:formula="of:=[.D83]-[.D82]" office:value-type="float" office:value="0.0000109953703703703" calcext:value-type="float">
            <text:p>0,00001099537037037030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95" office:value-type="float" office:value="7790" calcext:value-type="float">
            <text:p>7790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90162037037037" calcext:value-type="float">
            <text:p>0,00090162037037037000</text:p>
          </table:table-cell>
          <table:table-cell table:formula="of:=[.D84]-[.D83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95" office:value-type="float" office:value="7885" calcext:value-type="float">
            <text:p>7885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912615740740741" calcext:value-type="float">
            <text:p>0,00091261574074074100</text:p>
          </table:table-cell>
          <table:table-cell table:formula="of:=[.D85]-[.D84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95" office:value-type="float" office:value="7980" calcext:value-type="float">
            <text:p>7980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923611111111111" calcext:value-type="float">
            <text:p>0,00092361111111111100</text:p>
          </table:table-cell>
          <table:table-cell table:formula="of:=[.D86]-[.D85]" office:value-type="float" office:value="0.0000109953703703703" calcext:value-type="float">
            <text:p>0,00001099537037037030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95" office:value-type="float" office:value="8075" calcext:value-type="float">
            <text:p>807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934606481481482" calcext:value-type="float">
            <text:p>0,00093460648148148200</text:p>
          </table:table-cell>
          <table:table-cell table:formula="of:=[.D87]-[.D86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95" office:value-type="float" office:value="8170" calcext:value-type="float">
            <text:p>8170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945601851851852" calcext:value-type="float">
            <text:p>0,00094560185185185200</text:p>
          </table:table-cell>
          <table:table-cell table:formula="of:=[.D88]-[.D87]" office:value-type="float" office:value="0.0000109953703703703" calcext:value-type="float">
            <text:p>0,00001099537037037030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95" office:value-type="float" office:value="8265" calcext:value-type="float">
            <text:p>8265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956597222222222" calcext:value-type="float">
            <text:p>0,00095659722222222200</text:p>
          </table:table-cell>
          <table:table-cell table:formula="of:=[.D89]-[.D88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95" office:value-type="float" office:value="8360" calcext:value-type="float">
            <text:p>8360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967592592592593" calcext:value-type="float">
            <text:p>0,00096759259259259300</text:p>
          </table:table-cell>
          <table:table-cell table:formula="of:=[.D90]-[.D89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95" office:value-type="float" office:value="8455" calcext:value-type="float">
            <text:p>8455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978587962962963" calcext:value-type="float">
            <text:p>0,00097858796296296300</text:p>
          </table:table-cell>
          <table:table-cell table:formula="of:=[.D91]-[.D9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95" office:value-type="float" office:value="8550" calcext:value-type="float">
            <text:p>855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989583333333333" calcext:value-type="float">
            <text:p>0,00098958333333333300</text:p>
          </table:table-cell>
          <table:table-cell table:formula="of:=[.D92]-[.D91]" office:value-type="float" office:value="0.0000109953703703702" calcext:value-type="float">
            <text:p>0,00001099537037037020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95" office:value-type="float" office:value="8645" calcext:value-type="float">
            <text:p>8645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10005787037037" calcext:value-type="float">
            <text:p>0,00100057870370370000</text:p>
          </table:table-cell>
          <table:table-cell table:formula="of:=[.D93]-[.D92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95" office:value-type="float" office:value="8740" calcext:value-type="float">
            <text:p>8740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101157407407407" calcext:value-type="float">
            <text:p>0,00101157407407407000</text:p>
          </table:table-cell>
          <table:table-cell table:formula="of:=[.D94]-[.D93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95" office:value-type="float" office:value="8835" calcext:value-type="float">
            <text:p>8835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102256944444444" calcext:value-type="float">
            <text:p>0,00102256944444444000</text:p>
          </table:table-cell>
          <table:table-cell table:formula="of:=[.D95]-[.D94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95" office:value-type="float" office:value="8930" calcext:value-type="float">
            <text:p>8930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103356481481481" calcext:value-type="float">
            <text:p>0,00103356481481481000</text:p>
          </table:table-cell>
          <table:table-cell table:formula="of:=[.D96]-[.D95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95" office:value-type="float" office:value="9025" calcext:value-type="float">
            <text:p>902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104456018518519" calcext:value-type="float">
            <text:p>0,00104456018518519000</text:p>
          </table:table-cell>
          <table:table-cell table:formula="of:=[.D97]-[.D96]" office:value-type="float" office:value="0.0000109953703703702" calcext:value-type="float">
            <text:p>0,00001099537037037020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95" office:value-type="float" office:value="9120" calcext:value-type="float">
            <text:p>9120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105555555555556" calcext:value-type="float">
            <text:p>0,00105555555555556000</text:p>
          </table:table-cell>
          <table:table-cell table:formula="of:=[.D98]-[.D97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95" office:value-type="float" office:value="9215" calcext:value-type="float">
            <text:p>9215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106655092592593" calcext:value-type="float">
            <text:p>0,00106655092592593000</text:p>
          </table:table-cell>
          <table:table-cell table:formula="of:=[.D99]-[.D98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95" office:value-type="float" office:value="9310" calcext:value-type="float">
            <text:p>9310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10775462962963" calcext:value-type="float">
            <text:p>0,00107754629629630000</text:p>
          </table:table-cell>
          <table:table-cell table:formula="of:=[.D100]-[.D99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95" office:value-type="float" office:value="9405" calcext:value-type="float">
            <text:p>9405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108854166666667" calcext:value-type="float">
            <text:p>0,00108854166666667000</text:p>
          </table:table-cell>
          <table:table-cell table:formula="of:=[.D101]-[.D10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95" office:value-type="float" office:value="9500" calcext:value-type="float">
            <text:p>95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109953703703704" calcext:value-type="float">
            <text:p>0,00109953703703704000</text:p>
          </table:table-cell>
          <table:table-cell table:formula="of:=[.D102]-[.D101]" office:value-type="float" office:value="0.0000109953703703702" calcext:value-type="float">
            <text:p>0,00001099537037037020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95" office:value-type="float" office:value="9595" calcext:value-type="float">
            <text:p>9595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111053240740741" calcext:value-type="float">
            <text:p>0,00111053240740741000</text:p>
          </table:table-cell>
          <table:table-cell table:formula="of:=[.D103]-[.D102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95" office:value-type="float" office:value="9690" calcext:value-type="float">
            <text:p>9690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112152777777778" calcext:value-type="float">
            <text:p>0,00112152777777778000</text:p>
          </table:table-cell>
          <table:table-cell table:formula="of:=[.D104]-[.D103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95" office:value-type="float" office:value="9785" calcext:value-type="float">
            <text:p>9785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113252314814815" calcext:value-type="float">
            <text:p>0,00113252314814815000</text:p>
          </table:table-cell>
          <table:table-cell table:formula="of:=[.D105]-[.D104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95" office:value-type="float" office:value="9880" calcext:value-type="float">
            <text:p>9880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114351851851852" calcext:value-type="float">
            <text:p>0,00114351851851852000</text:p>
          </table:table-cell>
          <table:table-cell table:formula="of:=[.D106]-[.D105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95" office:value-type="float" office:value="9975" calcext:value-type="float">
            <text:p>997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115451388888889" calcext:value-type="float">
            <text:p>0,00115451388888889000</text:p>
          </table:table-cell>
          <table:table-cell table:formula="of:=[.D107]-[.D106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95" office:value-type="float" office:value="10070" calcext:value-type="float">
            <text:p>10070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116550925925926" calcext:value-type="float">
            <text:p>0,00116550925925926000</text:p>
          </table:table-cell>
          <table:table-cell table:formula="of:=[.D108]-[.D107]" office:value-type="float" office:value="0.0000109953703703702" calcext:value-type="float">
            <text:p>0,00001099537037037020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95" office:value-type="float" office:value="10165" calcext:value-type="float">
            <text:p>10165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117650462962963" calcext:value-type="float">
            <text:p>0,00117650462962963000</text:p>
          </table:table-cell>
          <table:table-cell table:formula="of:=[.D109]-[.D108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95" office:value-type="float" office:value="10260" calcext:value-type="float">
            <text:p>10260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11875" calcext:value-type="float">
            <text:p>0,00118750000000000000</text:p>
          </table:table-cell>
          <table:table-cell table:formula="of:=[.D110]-[.D109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95" office:value-type="float" office:value="10355" calcext:value-type="float">
            <text:p>10355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119849537037037" calcext:value-type="float">
            <text:p>0,00119849537037037000</text:p>
          </table:table-cell>
          <table:table-cell table:formula="of:=[.D111]-[.D11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95" office:value-type="float" office:value="10450" calcext:value-type="float">
            <text:p>1045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120949074074074" calcext:value-type="float">
            <text:p>0,00120949074074074000</text:p>
          </table:table-cell>
          <table:table-cell table:formula="of:=[.D112]-[.D111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95" office:value-type="float" office:value="10545" calcext:value-type="float">
            <text:p>10545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122048611111111" calcext:value-type="float">
            <text:p>0,00122048611111111000</text:p>
          </table:table-cell>
          <table:table-cell table:formula="of:=[.D113]-[.D112]" office:value-type="float" office:value="0.0000109953703703702" calcext:value-type="float">
            <text:p>0,00001099537037037020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95" office:value-type="float" office:value="10640" calcext:value-type="float">
            <text:p>10640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123148148148148" calcext:value-type="float">
            <text:p>0,00123148148148148000</text:p>
          </table:table-cell>
          <table:table-cell table:formula="of:=[.D114]-[.D113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95" office:value-type="float" office:value="10735" calcext:value-type="float">
            <text:p>10735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124247685185185" calcext:value-type="float">
            <text:p>0,00124247685185185000</text:p>
          </table:table-cell>
          <table:table-cell table:formula="of:=[.D115]-[.D114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95" office:value-type="float" office:value="10830" calcext:value-type="float">
            <text:p>10830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25347222222222" calcext:value-type="float">
            <text:p>0,00125347222222222000</text:p>
          </table:table-cell>
          <table:table-cell table:formula="of:=[.D116]-[.D115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95" office:value-type="float" office:value="10925" calcext:value-type="float">
            <text:p>1092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26446759259259" calcext:value-type="float">
            <text:p>0,00126446759259259000</text:p>
          </table:table-cell>
          <table:table-cell table:formula="of:=[.D117]-[.D116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95" office:value-type="float" office:value="11020" calcext:value-type="float">
            <text:p>11020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27546296296296" calcext:value-type="float">
            <text:p>0,00127546296296296000</text:p>
          </table:table-cell>
          <table:table-cell table:formula="of:=[.D118]-[.D117]" office:value-type="float" office:value="0.0000109953703703702" calcext:value-type="float">
            <text:p>0,00001099537037037020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95" office:value-type="float" office:value="11115" calcext:value-type="float">
            <text:p>11115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28645833333333" calcext:value-type="float">
            <text:p>0,00128645833333333000</text:p>
          </table:table-cell>
          <table:table-cell table:formula="of:=[.D119]-[.D118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95" office:value-type="float" office:value="11210" calcext:value-type="float">
            <text:p>11210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2974537037037" calcext:value-type="float">
            <text:p>0,00129745370370370000</text:p>
          </table:table-cell>
          <table:table-cell table:formula="of:=[.D120]-[.D119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95" office:value-type="float" office:value="11305" calcext:value-type="float">
            <text:p>11305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30844907407407" calcext:value-type="float">
            <text:p>0,00130844907407407000</text:p>
          </table:table-cell>
          <table:table-cell table:formula="of:=[.D121]-[.D12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95" office:value-type="float" office:value="11400" calcext:value-type="float">
            <text:p>1140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31944444444444" calcext:value-type="float">
            <text:p>0,00131944444444444000</text:p>
          </table:table-cell>
          <table:table-cell table:formula="of:=[.D122]-[.D121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95" office:value-type="float" office:value="11495" calcext:value-type="float">
            <text:p>11495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33043981481482" calcext:value-type="float">
            <text:p>0,00133043981481482000</text:p>
          </table:table-cell>
          <table:table-cell table:formula="of:=[.D123]-[.D122]" office:value-type="float" office:value="0.0000109953703703702" calcext:value-type="float">
            <text:p>0,00001099537037037020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95" office:value-type="float" office:value="11590" calcext:value-type="float">
            <text:p>11590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34143518518519" calcext:value-type="float">
            <text:p>0,00134143518518519000</text:p>
          </table:table-cell>
          <table:table-cell table:formula="of:=[.D124]-[.D123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95" office:value-type="float" office:value="11685" calcext:value-type="float">
            <text:p>11685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35243055555556" calcext:value-type="float">
            <text:p>0,00135243055555556000</text:p>
          </table:table-cell>
          <table:table-cell table:formula="of:=[.D125]-[.D124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95" office:value-type="float" office:value="11780" calcext:value-type="float">
            <text:p>11780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36342592592593" calcext:value-type="float">
            <text:p>0,00136342592592593000</text:p>
          </table:table-cell>
          <table:table-cell table:formula="of:=[.D126]-[.D125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95" office:value-type="float" office:value="11875" calcext:value-type="float">
            <text:p>1187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3744212962963" calcext:value-type="float">
            <text:p>0,00137442129629630000</text:p>
          </table:table-cell>
          <table:table-cell table:formula="of:=[.D127]-[.D126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95" office:value-type="float" office:value="11970" calcext:value-type="float">
            <text:p>11970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38541666666667" calcext:value-type="float">
            <text:p>0,00138541666666667000</text:p>
          </table:table-cell>
          <table:table-cell table:formula="of:=[.D128]-[.D127]" office:value-type="float" office:value="0.0000109953703703702" calcext:value-type="float">
            <text:p>0,00001099537037037020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95" office:value-type="float" office:value="12065" calcext:value-type="float">
            <text:p>12065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39641203703704" calcext:value-type="float">
            <text:p>0,00139641203703704000</text:p>
          </table:table-cell>
          <table:table-cell table:formula="of:=[.D129]-[.D128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95" office:value-type="float" office:value="12160" calcext:value-type="float">
            <text:p>12160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40740740740741" calcext:value-type="float">
            <text:p>0,00140740740740741000</text:p>
          </table:table-cell>
          <table:table-cell table:formula="of:=[.D130]-[.D129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95" office:value-type="float" office:value="12255" calcext:value-type="float">
            <text:p>12255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41840277777778" calcext:value-type="float">
            <text:p>0,00141840277777778000</text:p>
          </table:table-cell>
          <table:table-cell table:formula="of:=[.D131]-[.D13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95" office:value-type="float" office:value="12350" calcext:value-type="float">
            <text:p>1235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42939814814815" calcext:value-type="float">
            <text:p>0,00142939814814815000</text:p>
          </table:table-cell>
          <table:table-cell table:formula="of:=[.D132]-[.D131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95" office:value-type="float" office:value="12445" calcext:value-type="float">
            <text:p>12445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44039351851852" calcext:value-type="float">
            <text:p>0,00144039351851852000</text:p>
          </table:table-cell>
          <table:table-cell table:formula="of:=[.D133]-[.D132]" office:value-type="float" office:value="0.0000109953703703702" calcext:value-type="float">
            <text:p>0,00001099537037037020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95" office:value-type="float" office:value="12540" calcext:value-type="float">
            <text:p>12540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45138888888889" calcext:value-type="float">
            <text:p>0,00145138888888889000</text:p>
          </table:table-cell>
          <table:table-cell table:formula="of:=[.D134]-[.D133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95" office:value-type="float" office:value="12635" calcext:value-type="float">
            <text:p>12635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46238425925926" calcext:value-type="float">
            <text:p>0,00146238425925926000</text:p>
          </table:table-cell>
          <table:table-cell table:formula="of:=[.D135]-[.D134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95" office:value-type="float" office:value="12730" calcext:value-type="float">
            <text:p>12730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47337962962963" calcext:value-type="float">
            <text:p>0,00147337962962963000</text:p>
          </table:table-cell>
          <table:table-cell table:formula="of:=[.D136]-[.D135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95" office:value-type="float" office:value="12825" calcext:value-type="float">
            <text:p>1282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484375" calcext:value-type="float">
            <text:p>0,00148437500000000000</text:p>
          </table:table-cell>
          <table:table-cell table:formula="of:=[.D137]-[.D136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95" office:value-type="float" office:value="12920" calcext:value-type="float">
            <text:p>12920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49537037037037" calcext:value-type="float">
            <text:p>0,00149537037037037000</text:p>
          </table:table-cell>
          <table:table-cell table:formula="of:=[.D138]-[.D137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95" office:value-type="float" office:value="13015" calcext:value-type="float">
            <text:p>13015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50636574074074" calcext:value-type="float">
            <text:p>0,00150636574074074000</text:p>
          </table:table-cell>
          <table:table-cell table:formula="of:=[.D139]-[.D138]" office:value-type="float" office:value="0.0000109953703703702" calcext:value-type="float">
            <text:p>0,00001099537037037020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95" office:value-type="float" office:value="13110" calcext:value-type="float">
            <text:p>13110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51736111111111" calcext:value-type="float">
            <text:p>0,00151736111111111000</text:p>
          </table:table-cell>
          <table:table-cell table:formula="of:=[.D140]-[.D139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95" office:value-type="float" office:value="13205" calcext:value-type="float">
            <text:p>13205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52835648148148" calcext:value-type="float">
            <text:p>0,00152835648148148000</text:p>
          </table:table-cell>
          <table:table-cell table:formula="of:=[.D141]-[.D14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95" office:value-type="float" office:value="13300" calcext:value-type="float">
            <text:p>1330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53935185185185" calcext:value-type="float">
            <text:p>0,00153935185185185000</text:p>
          </table:table-cell>
          <table:table-cell table:formula="of:=[.D142]-[.D141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95" office:value-type="float" office:value="13395" calcext:value-type="float">
            <text:p>13395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55034722222222" calcext:value-type="float">
            <text:p>0,00155034722222222000</text:p>
          </table:table-cell>
          <table:table-cell table:formula="of:=[.D143]-[.D142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95" office:value-type="float" office:value="13490" calcext:value-type="float">
            <text:p>13490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56134259259259" calcext:value-type="float">
            <text:p>0,00156134259259259000</text:p>
          </table:table-cell>
          <table:table-cell table:formula="of:=[.D144]-[.D143]" office:value-type="float" office:value="0.0000109953703703702" calcext:value-type="float">
            <text:p>0,00001099537037037020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95" office:value-type="float" office:value="13585" calcext:value-type="float">
            <text:p>13585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57233796296296" calcext:value-type="float">
            <text:p>0,00157233796296296000</text:p>
          </table:table-cell>
          <table:table-cell table:formula="of:=[.D145]-[.D144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95" office:value-type="float" office:value="13680" calcext:value-type="float">
            <text:p>13680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58333333333333" calcext:value-type="float">
            <text:p>0,00158333333333333000</text:p>
          </table:table-cell>
          <table:table-cell table:formula="of:=[.D146]-[.D145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95" office:value-type="float" office:value="13775" calcext:value-type="float">
            <text:p>1377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5943287037037" calcext:value-type="float">
            <text:p>0,00159432870370370000</text:p>
          </table:table-cell>
          <table:table-cell table:formula="of:=[.D147]-[.D146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95" office:value-type="float" office:value="13870" calcext:value-type="float">
            <text:p>13870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60532407407407" calcext:value-type="float">
            <text:p>0,00160532407407407000</text:p>
          </table:table-cell>
          <table:table-cell table:formula="of:=[.D148]-[.D147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95" office:value-type="float" office:value="13965" calcext:value-type="float">
            <text:p>13965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61631944444444" calcext:value-type="float">
            <text:p>0,00161631944444444000</text:p>
          </table:table-cell>
          <table:table-cell table:formula="of:=[.D149]-[.D148]" office:value-type="float" office:value="0.0000109953703703702" calcext:value-type="float">
            <text:p>0,00001099537037037020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95" office:value-type="float" office:value="14060" calcext:value-type="float">
            <text:p>14060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62731481481481" calcext:value-type="float">
            <text:p>0,00162731481481481000</text:p>
          </table:table-cell>
          <table:table-cell table:formula="of:=[.D150]-[.D149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95" office:value-type="float" office:value="14155" calcext:value-type="float">
            <text:p>14155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63831018518519" calcext:value-type="float">
            <text:p>0,00163831018518519000</text:p>
          </table:table-cell>
          <table:table-cell table:formula="of:=[.D151]-[.D15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95" office:value-type="float" office:value="14250" calcext:value-type="float">
            <text:p>142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64930555555556" calcext:value-type="float">
            <text:p>0,00164930555555556000</text:p>
          </table:table-cell>
          <table:table-cell table:formula="of:=[.D152]-[.D151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95" office:value-type="float" office:value="14345" calcext:value-type="float">
            <text:p>14345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66030092592593" calcext:value-type="float">
            <text:p>0,00166030092592593000</text:p>
          </table:table-cell>
          <table:table-cell table:formula="of:=[.D153]-[.D152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95" office:value-type="float" office:value="14440" calcext:value-type="float">
            <text:p>14440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6712962962963" calcext:value-type="float">
            <text:p>0,00167129629629630000</text:p>
          </table:table-cell>
          <table:table-cell table:formula="of:=[.D154]-[.D153]" office:value-type="float" office:value="0.0000109953703703702" calcext:value-type="float">
            <text:p>0,00001099537037037020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95" office:value-type="float" office:value="14535" calcext:value-type="float">
            <text:p>14535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68229166666667" calcext:value-type="float">
            <text:p>0,00168229166666667000</text:p>
          </table:table-cell>
          <table:table-cell table:formula="of:=[.D155]-[.D154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95" office:value-type="float" office:value="14630" calcext:value-type="float">
            <text:p>14630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69328703703704" calcext:value-type="float">
            <text:p>0,00169328703703704000</text:p>
          </table:table-cell>
          <table:table-cell table:formula="of:=[.D156]-[.D155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95" office:value-type="float" office:value="14725" calcext:value-type="float">
            <text:p>1472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70428240740741" calcext:value-type="float">
            <text:p>0,00170428240740741000</text:p>
          </table:table-cell>
          <table:table-cell table:formula="of:=[.D157]-[.D156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95" office:value-type="float" office:value="14820" calcext:value-type="float">
            <text:p>14820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71527777777778" calcext:value-type="float">
            <text:p>0,00171527777777778000</text:p>
          </table:table-cell>
          <table:table-cell table:formula="of:=[.D158]-[.D157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95" office:value-type="float" office:value="14915" calcext:value-type="float">
            <text:p>14915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72627314814815" calcext:value-type="float">
            <text:p>0,00172627314814815000</text:p>
          </table:table-cell>
          <table:table-cell table:formula="of:=[.D159]-[.D158]" office:value-type="float" office:value="0.0000109953703703702" calcext:value-type="float">
            <text:p>0,00001099537037037020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95" office:value-type="float" office:value="15010" calcext:value-type="float">
            <text:p>15010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73726851851852" calcext:value-type="float">
            <text:p>0,00173726851851852000</text:p>
          </table:table-cell>
          <table:table-cell table:formula="of:=[.D160]-[.D159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95" office:value-type="float" office:value="15105" calcext:value-type="float">
            <text:p>15105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74826388888889" calcext:value-type="float">
            <text:p>0,00174826388888889000</text:p>
          </table:table-cell>
          <table:table-cell table:formula="of:=[.D161]-[.D16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95" office:value-type="float" office:value="15200" calcext:value-type="float">
            <text:p>1520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75925925925926" calcext:value-type="float">
            <text:p>0,00175925925925926000</text:p>
          </table:table-cell>
          <table:table-cell table:formula="of:=[.D162]-[.D161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95" office:value-type="float" office:value="15295" calcext:value-type="float">
            <text:p>15295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77025462962963" calcext:value-type="float">
            <text:p>0,00177025462962963000</text:p>
          </table:table-cell>
          <table:table-cell table:formula="of:=[.D163]-[.D162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95" office:value-type="float" office:value="15390" calcext:value-type="float">
            <text:p>15390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78125" calcext:value-type="float">
            <text:p>0,00178125000000000000</text:p>
          </table:table-cell>
          <table:table-cell table:formula="of:=[.D164]-[.D163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95" office:value-type="float" office:value="15485" calcext:value-type="float">
            <text:p>15485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79224537037037" calcext:value-type="float">
            <text:p>0,00179224537037037000</text:p>
          </table:table-cell>
          <table:table-cell table:formula="of:=[.D165]-[.D164]" office:value-type="float" office:value="0.0000109953703703702" calcext:value-type="float">
            <text:p>0,00001099537037037020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95" office:value-type="float" office:value="15580" calcext:value-type="float">
            <text:p>15580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80324074074074" calcext:value-type="float">
            <text:p>0,00180324074074074000</text:p>
          </table:table-cell>
          <table:table-cell table:formula="of:=[.D166]-[.D165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95" office:value-type="float" office:value="15675" calcext:value-type="float">
            <text:p>1567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81423611111111" calcext:value-type="float">
            <text:p>0,00181423611111111000</text:p>
          </table:table-cell>
          <table:table-cell table:formula="of:=[.D167]-[.D166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95" office:value-type="float" office:value="15770" calcext:value-type="float">
            <text:p>15770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82523148148148" calcext:value-type="float">
            <text:p>0,00182523148148148000</text:p>
          </table:table-cell>
          <table:table-cell table:formula="of:=[.D168]-[.D167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95" office:value-type="float" office:value="15865" calcext:value-type="float">
            <text:p>15865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83622685185185" calcext:value-type="float">
            <text:p>0,00183622685185185000</text:p>
          </table:table-cell>
          <table:table-cell table:formula="of:=[.D169]-[.D168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95" office:value-type="float" office:value="15960" calcext:value-type="float">
            <text:p>15960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84722222222222" calcext:value-type="float">
            <text:p>0,00184722222222222000</text:p>
          </table:table-cell>
          <table:table-cell table:formula="of:=[.D170]-[.D169]" office:value-type="float" office:value="0.0000109953703703702" calcext:value-type="float">
            <text:p>0,00001099537037037020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95" office:value-type="float" office:value="16055" calcext:value-type="float">
            <text:p>16055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85821759259259" calcext:value-type="float">
            <text:p>0,00185821759259259000</text:p>
          </table:table-cell>
          <table:table-cell table:formula="of:=[.D171]-[.D17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95" office:value-type="float" office:value="16150" calcext:value-type="float">
            <text:p>1615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86921296296296" calcext:value-type="float">
            <text:p>0,00186921296296296000</text:p>
          </table:table-cell>
          <table:table-cell table:formula="of:=[.D172]-[.D171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95" office:value-type="float" office:value="16245" calcext:value-type="float">
            <text:p>16245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88020833333333" calcext:value-type="float">
            <text:p>0,00188020833333333000</text:p>
          </table:table-cell>
          <table:table-cell table:formula="of:=[.D173]-[.D172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95" office:value-type="float" office:value="16340" calcext:value-type="float">
            <text:p>16340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8912037037037" calcext:value-type="float">
            <text:p>0,00189120370370370000</text:p>
          </table:table-cell>
          <table:table-cell table:formula="of:=[.D174]-[.D173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95" office:value-type="float" office:value="16435" calcext:value-type="float">
            <text:p>16435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90219907407407" calcext:value-type="float">
            <text:p>0,00190219907407407000</text:p>
          </table:table-cell>
          <table:table-cell table:formula="of:=[.D175]-[.D174]" office:value-type="float" office:value="0.0000109953703703702" calcext:value-type="float">
            <text:p>0,00001099537037037020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95" office:value-type="float" office:value="16530" calcext:value-type="float">
            <text:p>16530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91319444444444" calcext:value-type="float">
            <text:p>0,00191319444444444000</text:p>
          </table:table-cell>
          <table:table-cell table:formula="of:=[.D176]-[.D175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95" office:value-type="float" office:value="16625" calcext:value-type="float">
            <text:p>1662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92418981481481" calcext:value-type="float">
            <text:p>0,00192418981481481000</text:p>
          </table:table-cell>
          <table:table-cell table:formula="of:=[.D177]-[.D176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95" office:value-type="float" office:value="16720" calcext:value-type="float">
            <text:p>16720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93518518518519" calcext:value-type="float">
            <text:p>0,00193518518518519000</text:p>
          </table:table-cell>
          <table:table-cell table:formula="of:=[.D178]-[.D177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95" office:value-type="float" office:value="16815" calcext:value-type="float">
            <text:p>16815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94618055555556" calcext:value-type="float">
            <text:p>0,00194618055555556000</text:p>
          </table:table-cell>
          <table:table-cell table:formula="of:=[.D179]-[.D178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95" office:value-type="float" office:value="16910" calcext:value-type="float">
            <text:p>16910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95717592592593" calcext:value-type="float">
            <text:p>0,00195717592592593000</text:p>
          </table:table-cell>
          <table:table-cell table:formula="of:=[.D180]-[.D179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95" office:value-type="float" office:value="17005" calcext:value-type="float">
            <text:p>17005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9681712962963" calcext:value-type="float">
            <text:p>0,00196817129629630000</text:p>
          </table:table-cell>
          <table:table-cell table:formula="of:=[.D181]-[.D18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95" office:value-type="float" office:value="17100" calcext:value-type="float">
            <text:p>1710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97916666666667" calcext:value-type="float">
            <text:p>0,00197916666666667000</text:p>
          </table:table-cell>
          <table:table-cell table:formula="of:=[.D182]-[.D181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95" office:value-type="float" office:value="17195" calcext:value-type="float">
            <text:p>17195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99016203703704" calcext:value-type="float">
            <text:p>0,00199016203703704000</text:p>
          </table:table-cell>
          <table:table-cell table:formula="of:=[.D183]-[.D182]" office:value-type="float" office:value="0.00001099537037037" calcext:value-type="float">
            <text:p>0,00001099537037037000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95" office:value-type="float" office:value="17290" calcext:value-type="float">
            <text:p>17290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200115740740741" calcext:value-type="float">
            <text:p>0,00200115740740741000</text:p>
          </table:table-cell>
          <table:table-cell table:formula="of:=[.D184]-[.D183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95" office:value-type="float" office:value="17385" calcext:value-type="float">
            <text:p>17385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201215277777778" calcext:value-type="float">
            <text:p>0,00201215277777778000</text:p>
          </table:table-cell>
          <table:table-cell table:formula="of:=[.D185]-[.D184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95" office:value-type="float" office:value="17480" calcext:value-type="float">
            <text:p>17480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202314814814815" calcext:value-type="float">
            <text:p>0,00202314814814815000</text:p>
          </table:table-cell>
          <table:table-cell table:formula="of:=[.D186]-[.D185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95" office:value-type="float" office:value="17575" calcext:value-type="float">
            <text:p>1757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203414351851852" calcext:value-type="float">
            <text:p>0,00203414351851852000</text:p>
          </table:table-cell>
          <table:table-cell table:formula="of:=[.D187]-[.D186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95" office:value-type="float" office:value="17670" calcext:value-type="float">
            <text:p>17670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204513888888889" calcext:value-type="float">
            <text:p>0,00204513888888889000</text:p>
          </table:table-cell>
          <table:table-cell table:formula="of:=[.D188]-[.D187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95" office:value-type="float" office:value="17765" calcext:value-type="float">
            <text:p>17765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205613425925926" calcext:value-type="float">
            <text:p>0,00205613425925926000</text:p>
          </table:table-cell>
          <table:table-cell table:formula="of:=[.D189]-[.D188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95" office:value-type="float" office:value="17860" calcext:value-type="float">
            <text:p>17860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206712962962963" calcext:value-type="float">
            <text:p>0,00206712962962963000</text:p>
          </table:table-cell>
          <table:table-cell table:formula="of:=[.D190]-[.D189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95" office:value-type="float" office:value="17955" calcext:value-type="float">
            <text:p>17955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2078125" calcext:value-type="float">
            <text:p>0,00207812500000000000</text:p>
          </table:table-cell>
          <table:table-cell table:formula="of:=[.D191]-[.D19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95" office:value-type="float" office:value="18050" calcext:value-type="float">
            <text:p>1805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208912037037037" calcext:value-type="float">
            <text:p>0,00208912037037037000</text:p>
          </table:table-cell>
          <table:table-cell table:formula="of:=[.D192]-[.D191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95" office:value-type="float" office:value="18145" calcext:value-type="float">
            <text:p>18145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210011574074074" calcext:value-type="float">
            <text:p>0,00210011574074074000</text:p>
          </table:table-cell>
          <table:table-cell table:formula="of:=[.D193]-[.D192]" office:value-type="float" office:value="0.00001099537037037" calcext:value-type="float">
            <text:p>0,00001099537037037000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95" office:value-type="float" office:value="18240" calcext:value-type="float">
            <text:p>18240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211111111111111" calcext:value-type="float">
            <text:p>0,00211111111111111000</text:p>
          </table:table-cell>
          <table:table-cell table:formula="of:=[.D194]-[.D193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95" office:value-type="float" office:value="18335" calcext:value-type="float">
            <text:p>18335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212210648148148" calcext:value-type="float">
            <text:p>0,00212210648148148000</text:p>
          </table:table-cell>
          <table:table-cell table:formula="of:=[.D195]-[.D194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95" office:value-type="float" office:value="18430" calcext:value-type="float">
            <text:p>18430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213310185185185" calcext:value-type="float">
            <text:p>0,00213310185185185000</text:p>
          </table:table-cell>
          <table:table-cell table:formula="of:=[.D196]-[.D195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95" office:value-type="float" office:value="18525" calcext:value-type="float">
            <text:p>1852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214409722222222" calcext:value-type="float">
            <text:p>0,00214409722222222000</text:p>
          </table:table-cell>
          <table:table-cell table:formula="of:=[.D197]-[.D196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95" office:value-type="float" office:value="18620" calcext:value-type="float">
            <text:p>18620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215509259259259" calcext:value-type="float">
            <text:p>0,00215509259259259000</text:p>
          </table:table-cell>
          <table:table-cell table:formula="of:=[.D198]-[.D197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95" office:value-type="float" office:value="18715" calcext:value-type="float">
            <text:p>18715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216608796296296" calcext:value-type="float">
            <text:p>0,00216608796296296000</text:p>
          </table:table-cell>
          <table:table-cell table:formula="of:=[.D199]-[.D198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95" office:value-type="float" office:value="18810" calcext:value-type="float">
            <text:p>18810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217708333333333" calcext:value-type="float">
            <text:p>0,00217708333333333000</text:p>
          </table:table-cell>
          <table:table-cell table:formula="of:=[.D200]-[.D199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95" office:value-type="float" office:value="18905" calcext:value-type="float">
            <text:p>18905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21880787037037" calcext:value-type="float">
            <text:p>0,00218807870370370000</text:p>
          </table:table-cell>
          <table:table-cell table:formula="of:=[.D201]-[.D20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95" office:value-type="float" office:value="19000" calcext:value-type="float">
            <text:p>190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219907407407407" calcext:value-type="float">
            <text:p>0,00219907407407407000</text:p>
          </table:table-cell>
          <table:table-cell table:formula="of:=[.D202]-[.D201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95" office:value-type="float" office:value="19095" calcext:value-type="float">
            <text:p>19095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221006944444444" calcext:value-type="float">
            <text:p>0,00221006944444444000</text:p>
          </table:table-cell>
          <table:table-cell table:formula="of:=[.D203]-[.D202]" office:value-type="float" office:value="0.00001099537037037" calcext:value-type="float">
            <text:p>0,00001099537037037000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95" office:value-type="float" office:value="19190" calcext:value-type="float">
            <text:p>19190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222106481481481" calcext:value-type="float">
            <text:p>0,00222106481481481000</text:p>
          </table:table-cell>
          <table:table-cell table:formula="of:=[.D204]-[.D203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95" office:value-type="float" office:value="19285" calcext:value-type="float">
            <text:p>19285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223206018518519" calcext:value-type="float">
            <text:p>0,00223206018518519000</text:p>
          </table:table-cell>
          <table:table-cell table:formula="of:=[.D205]-[.D204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95" office:value-type="float" office:value="19380" calcext:value-type="float">
            <text:p>19380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224305555555556" calcext:value-type="float">
            <text:p>0,00224305555555556000</text:p>
          </table:table-cell>
          <table:table-cell table:formula="of:=[.D206]-[.D205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95" office:value-type="float" office:value="19475" calcext:value-type="float">
            <text:p>1947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225405092592593" calcext:value-type="float">
            <text:p>0,00225405092592593000</text:p>
          </table:table-cell>
          <table:table-cell table:formula="of:=[.D207]-[.D206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95" office:value-type="float" office:value="19570" calcext:value-type="float">
            <text:p>19570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22650462962963" calcext:value-type="float">
            <text:p>0,00226504629629630000</text:p>
          </table:table-cell>
          <table:table-cell table:formula="of:=[.D208]-[.D207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95" office:value-type="float" office:value="19665" calcext:value-type="float">
            <text:p>19665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227604166666667" calcext:value-type="float">
            <text:p>0,00227604166666667000</text:p>
          </table:table-cell>
          <table:table-cell table:formula="of:=[.D209]-[.D208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95" office:value-type="float" office:value="19760" calcext:value-type="float">
            <text:p>19760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228703703703704" calcext:value-type="float">
            <text:p>0,00228703703703704000</text:p>
          </table:table-cell>
          <table:table-cell table:formula="of:=[.D210]-[.D209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95" office:value-type="float" office:value="19855" calcext:value-type="float">
            <text:p>19855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229803240740741" calcext:value-type="float">
            <text:p>0,00229803240740741000</text:p>
          </table:table-cell>
          <table:table-cell table:formula="of:=[.D211]-[.D21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95" office:value-type="float" office:value="19950" calcext:value-type="float">
            <text:p>1995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230902777777778" calcext:value-type="float">
            <text:p>0,00230902777777778000</text:p>
          </table:table-cell>
          <table:table-cell table:formula="of:=[.D212]-[.D211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95" office:value-type="float" office:value="20045" calcext:value-type="float">
            <text:p>20045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232002314814815" calcext:value-type="float">
            <text:p>0,00232002314814815000</text:p>
          </table:table-cell>
          <table:table-cell table:formula="of:=[.D213]-[.D212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95" office:value-type="float" office:value="20140" calcext:value-type="float">
            <text:p>20140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233101851851852" calcext:value-type="float">
            <text:p>0,00233101851851852000</text:p>
          </table:table-cell>
          <table:table-cell table:formula="of:=[.D214]-[.D213]" office:value-type="float" office:value="0.00001099537037037" calcext:value-type="float">
            <text:p>0,00001099537037037000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95" office:value-type="float" office:value="20235" calcext:value-type="float">
            <text:p>20235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234201388888889" calcext:value-type="float">
            <text:p>0,00234201388888889000</text:p>
          </table:table-cell>
          <table:table-cell table:formula="of:=[.D215]-[.D214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95" office:value-type="float" office:value="20330" calcext:value-type="float">
            <text:p>20330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235300925925926" calcext:value-type="float">
            <text:p>0,00235300925925926000</text:p>
          </table:table-cell>
          <table:table-cell table:formula="of:=[.D216]-[.D215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95" office:value-type="float" office:value="20425" calcext:value-type="float">
            <text:p>2042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236400462962963" calcext:value-type="float">
            <text:p>0,00236400462962963000</text:p>
          </table:table-cell>
          <table:table-cell table:formula="of:=[.D217]-[.D216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95" office:value-type="float" office:value="20520" calcext:value-type="float">
            <text:p>20520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2375" calcext:value-type="float">
            <text:p>0,00237500000000000000</text:p>
          </table:table-cell>
          <table:table-cell table:formula="of:=[.D218]-[.D217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95" office:value-type="float" office:value="20615" calcext:value-type="float">
            <text:p>20615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238599537037037" calcext:value-type="float">
            <text:p>0,00238599537037037000</text:p>
          </table:table-cell>
          <table:table-cell table:formula="of:=[.D219]-[.D218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95" office:value-type="float" office:value="20710" calcext:value-type="float">
            <text:p>20710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239699074074074" calcext:value-type="float">
            <text:p>0,00239699074074074000</text:p>
          </table:table-cell>
          <table:table-cell table:formula="of:=[.D220]-[.D219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95" office:value-type="float" office:value="20805" calcext:value-type="float">
            <text:p>20805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240798611111111" calcext:value-type="float">
            <text:p>0,00240798611111111000</text:p>
          </table:table-cell>
          <table:table-cell table:formula="of:=[.D221]-[.D22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95" office:value-type="float" office:value="20900" calcext:value-type="float">
            <text:p>2090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241898148148148" calcext:value-type="float">
            <text:p>0,00241898148148148000</text:p>
          </table:table-cell>
          <table:table-cell table:formula="of:=[.D222]-[.D221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95" office:value-type="float" office:value="20995" calcext:value-type="float">
            <text:p>20995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242997685185185" calcext:value-type="float">
            <text:p>0,00242997685185185000</text:p>
          </table:table-cell>
          <table:table-cell table:formula="of:=[.D223]-[.D222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95" office:value-type="float" office:value="21090" calcext:value-type="float">
            <text:p>21090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244097222222222" calcext:value-type="float">
            <text:p>0,00244097222222222000</text:p>
          </table:table-cell>
          <table:table-cell table:formula="of:=[.D224]-[.D223]" office:value-type="float" office:value="0.00001099537037037" calcext:value-type="float">
            <text:p>0,00001099537037037000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95" office:value-type="float" office:value="21185" calcext:value-type="float">
            <text:p>21185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245196759259259" calcext:value-type="float">
            <text:p>0,00245196759259259000</text:p>
          </table:table-cell>
          <table:table-cell table:formula="of:=[.D225]-[.D224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95" office:value-type="float" office:value="21280" calcext:value-type="float">
            <text:p>21280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246296296296296" calcext:value-type="float">
            <text:p>0,00246296296296296000</text:p>
          </table:table-cell>
          <table:table-cell table:formula="of:=[.D226]-[.D225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95" office:value-type="float" office:value="21375" calcext:value-type="float">
            <text:p>2137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247395833333333" calcext:value-type="float">
            <text:p>0,00247395833333333000</text:p>
          </table:table-cell>
          <table:table-cell table:formula="of:=[.D227]-[.D226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95" office:value-type="float" office:value="21470" calcext:value-type="float">
            <text:p>21470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24849537037037" calcext:value-type="float">
            <text:p>0,00248495370370370000</text:p>
          </table:table-cell>
          <table:table-cell table:formula="of:=[.D228]-[.D227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95" office:value-type="float" office:value="21565" calcext:value-type="float">
            <text:p>21565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249594907407407" calcext:value-type="float">
            <text:p>0,00249594907407407000</text:p>
          </table:table-cell>
          <table:table-cell table:formula="of:=[.D229]-[.D228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95" office:value-type="float" office:value="21660" calcext:value-type="float">
            <text:p>21660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50694444444444" calcext:value-type="float">
            <text:p>0,00250694444444444000</text:p>
          </table:table-cell>
          <table:table-cell table:formula="of:=[.D230]-[.D229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95" office:value-type="float" office:value="21755" calcext:value-type="float">
            <text:p>21755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51793981481482" calcext:value-type="float">
            <text:p>0,00251793981481482000</text:p>
          </table:table-cell>
          <table:table-cell table:formula="of:=[.D231]-[.D23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95" office:value-type="float" office:value="21850" calcext:value-type="float">
            <text:p>2185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52893518518519" calcext:value-type="float">
            <text:p>0,00252893518518519000</text:p>
          </table:table-cell>
          <table:table-cell table:formula="of:=[.D232]-[.D231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95" office:value-type="float" office:value="21945" calcext:value-type="float">
            <text:p>21945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53993055555556" calcext:value-type="float">
            <text:p>0,00253993055555556000</text:p>
          </table:table-cell>
          <table:table-cell table:formula="of:=[.D233]-[.D232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95" office:value-type="float" office:value="22040" calcext:value-type="float">
            <text:p>22040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55092592592593" calcext:value-type="float">
            <text:p>0,00255092592592593000</text:p>
          </table:table-cell>
          <table:table-cell table:formula="of:=[.D234]-[.D233]" office:value-type="float" office:value="0.00001099537037037" calcext:value-type="float">
            <text:p>0,00001099537037037000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95" office:value-type="float" office:value="22135" calcext:value-type="float">
            <text:p>22135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5619212962963" calcext:value-type="float">
            <text:p>0,00256192129629630000</text:p>
          </table:table-cell>
          <table:table-cell table:formula="of:=[.D235]-[.D234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95" office:value-type="float" office:value="22230" calcext:value-type="float">
            <text:p>22230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57291666666667" calcext:value-type="float">
            <text:p>0,00257291666666667000</text:p>
          </table:table-cell>
          <table:table-cell table:formula="of:=[.D236]-[.D235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95" office:value-type="float" office:value="22325" calcext:value-type="float">
            <text:p>2232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58391203703704" calcext:value-type="float">
            <text:p>0,00258391203703704000</text:p>
          </table:table-cell>
          <table:table-cell table:formula="of:=[.D237]-[.D236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95" office:value-type="float" office:value="22420" calcext:value-type="float">
            <text:p>22420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59490740740741" calcext:value-type="float">
            <text:p>0,00259490740740741000</text:p>
          </table:table-cell>
          <table:table-cell table:formula="of:=[.D238]-[.D237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95" office:value-type="float" office:value="22515" calcext:value-type="float">
            <text:p>22515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60590277777778" calcext:value-type="float">
            <text:p>0,00260590277777778000</text:p>
          </table:table-cell>
          <table:table-cell table:formula="of:=[.D239]-[.D238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95" office:value-type="float" office:value="22610" calcext:value-type="float">
            <text:p>22610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61689814814815" calcext:value-type="float">
            <text:p>0,00261689814814815000</text:p>
          </table:table-cell>
          <table:table-cell table:formula="of:=[.D240]-[.D239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95" office:value-type="float" office:value="22705" calcext:value-type="float">
            <text:p>22705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62789351851852" calcext:value-type="float">
            <text:p>0,00262789351851852000</text:p>
          </table:table-cell>
          <table:table-cell table:formula="of:=[.D241]-[.D24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95" office:value-type="float" office:value="22800" calcext:value-type="float">
            <text:p>2280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63888888888889" calcext:value-type="float">
            <text:p>0,00263888888888889000</text:p>
          </table:table-cell>
          <table:table-cell table:formula="of:=[.D242]-[.D241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95" office:value-type="float" office:value="22895" calcext:value-type="float">
            <text:p>22895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64988425925926" calcext:value-type="float">
            <text:p>0,00264988425925926000</text:p>
          </table:table-cell>
          <table:table-cell table:formula="of:=[.D243]-[.D242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95" office:value-type="float" office:value="22990" calcext:value-type="float">
            <text:p>22990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66087962962963" calcext:value-type="float">
            <text:p>0,00266087962962963000</text:p>
          </table:table-cell>
          <table:table-cell table:formula="of:=[.D244]-[.D243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95" office:value-type="float" office:value="23085" calcext:value-type="float">
            <text:p>23085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671875" calcext:value-type="float">
            <text:p>0,00267187500000000000</text:p>
          </table:table-cell>
          <table:table-cell table:formula="of:=[.D245]-[.D244]" office:value-type="float" office:value="0.00001099537037037" calcext:value-type="float">
            <text:p>0,00001099537037037000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95" office:value-type="float" office:value="23180" calcext:value-type="float">
            <text:p>23180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68287037037037" calcext:value-type="float">
            <text:p>0,00268287037037037000</text:p>
          </table:table-cell>
          <table:table-cell table:formula="of:=[.D246]-[.D245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95" office:value-type="float" office:value="23275" calcext:value-type="float">
            <text:p>2327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69386574074074" calcext:value-type="float">
            <text:p>0,00269386574074074000</text:p>
          </table:table-cell>
          <table:table-cell table:formula="of:=[.D247]-[.D246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95" office:value-type="float" office:value="23370" calcext:value-type="float">
            <text:p>23370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70486111111111" calcext:value-type="float">
            <text:p>0,00270486111111111000</text:p>
          </table:table-cell>
          <table:table-cell table:formula="of:=[.D248]-[.D247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95" office:value-type="float" office:value="23465" calcext:value-type="float">
            <text:p>23465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71585648148148" calcext:value-type="float">
            <text:p>0,00271585648148148000</text:p>
          </table:table-cell>
          <table:table-cell table:formula="of:=[.D249]-[.D248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95" office:value-type="float" office:value="23560" calcext:value-type="float">
            <text:p>23560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72685185185185" calcext:value-type="float">
            <text:p>0,00272685185185185000</text:p>
          </table:table-cell>
          <table:table-cell table:formula="of:=[.D250]-[.D249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95" office:value-type="float" office:value="23655" calcext:value-type="float">
            <text:p>23655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73784722222222" calcext:value-type="float">
            <text:p>0,00273784722222222000</text:p>
          </table:table-cell>
          <table:table-cell table:formula="of:=[.D251]-[.D250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95" office:value-type="float" office:value="23750" calcext:value-type="float">
            <text:p>237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74884259259259" calcext:value-type="float">
            <text:p>0,00274884259259259000</text:p>
          </table:table-cell>
          <table:table-cell table:formula="of:=[.D252]-[.D251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95" office:value-type="float" office:value="23845" calcext:value-type="float">
            <text:p>23845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75983796296296" calcext:value-type="float">
            <text:p>0,00275983796296296000</text:p>
          </table:table-cell>
          <table:table-cell table:formula="of:=[.D253]-[.D252]" office:value-type="float" office:value="0.0000109953703703704" calcext:value-type="float">
            <text:p>0,00001099537037037040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95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77083333333333" calcext:value-type="float">
            <text:p>0,00277083333333333000</text:p>
          </table:table-cell>
          <table:table-cell table:formula="of:=#REF!-[.D253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3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9:35:34.494962158</meta:creation-date>
    <dc:date>2026-05-17T19:35:43.287783378</dc:date>
    <meta:editing-duration>PT10S</meta:editing-duration>
    <meta:editing-cycles>1</meta:editing-cycles>
    <meta:document-statistic meta:table-count="1" meta:cell-count="1265" meta:object-count="0"/>
    <meta:generator>LibreOffice/24.2.7.2$Linux_X86_64 LibreOffice_project/420$Build-2</meta:generator>
  </office:meta>
</office:document-meta>
</file>