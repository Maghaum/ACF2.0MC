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5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51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590277777777778" calcext:value-type="float">
            <text:p>0,00000590277777777778</text:p>
          </table:table-cell>
          <table:table-cell table:formula="of:=[.D3]-[.D2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51" office:value-type="float" office:value="102" calcext:value-type="float">
            <text:p>10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18055555555556" calcext:value-type="float">
            <text:p>0,00001180555555555560</text:p>
          </table:table-cell>
          <table:table-cell table:formula="of:=[.D4]-[.D3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51" office:value-type="float" office:value="153" calcext:value-type="float">
            <text:p>153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77083333333333" calcext:value-type="float">
            <text:p>0,00001770833333333330</text:p>
          </table:table-cell>
          <table:table-cell table:formula="of:=[.D5]-[.D4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51" office:value-type="float" office:value="204" calcext:value-type="float">
            <text:p>20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36111111111111" calcext:value-type="float">
            <text:p>0,00002361111111111110</text:p>
          </table:table-cell>
          <table:table-cell table:formula="of:=[.D6]-[.D5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51" office:value-type="float" office:value="255" calcext:value-type="float">
            <text:p>25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95138888888889" calcext:value-type="float">
            <text:p>0,00002951388888888890</text:p>
          </table:table-cell>
          <table:table-cell table:formula="of:=[.D7]-[.D6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51" office:value-type="float" office:value="306" calcext:value-type="float">
            <text:p>30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54166666666667" calcext:value-type="float">
            <text:p>0,00003541666666666670</text:p>
          </table:table-cell>
          <table:table-cell table:formula="of:=[.D8]-[.D7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51" office:value-type="float" office:value="357" calcext:value-type="float">
            <text:p>357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413194444444444" calcext:value-type="float">
            <text:p>0,00004131944444444450</text:p>
          </table:table-cell>
          <table:table-cell table:formula="of:=[.D9]-[.D8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51" office:value-type="float" office:value="408" calcext:value-type="float">
            <text:p>40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472222222222222" calcext:value-type="float">
            <text:p>0,00004722222222222220</text:p>
          </table:table-cell>
          <table:table-cell table:formula="of:=[.D10]-[.D9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51" office:value-type="float" office:value="459" calcext:value-type="float">
            <text:p>459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53125" calcext:value-type="float">
            <text:p>0,00005312500000000000</text:p>
          </table:table-cell>
          <table:table-cell table:formula="of:=[.D11]-[.D10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51" office:value-type="float" office:value="510" calcext:value-type="float">
            <text:p>51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590277777777778" calcext:value-type="float">
            <text:p>0,00005902777777777780</text:p>
          </table:table-cell>
          <table:table-cell table:formula="of:=[.D12]-[.D11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51" office:value-type="float" office:value="561" calcext:value-type="float">
            <text:p>561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649305555555556" calcext:value-type="float">
            <text:p>0,00006493055555555560</text:p>
          </table:table-cell>
          <table:table-cell table:formula="of:=[.D13]-[.D12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51" office:value-type="float" office:value="612" calcext:value-type="float">
            <text:p>61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708333333333333" calcext:value-type="float">
            <text:p>0,00007083333333333330</text:p>
          </table:table-cell>
          <table:table-cell table:formula="of:=[.D14]-[.D13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51" office:value-type="float" office:value="663" calcext:value-type="float">
            <text:p>663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767361111111111" calcext:value-type="float">
            <text:p>0,00007673611111111110</text:p>
          </table:table-cell>
          <table:table-cell table:formula="of:=[.D15]-[.D14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51" office:value-type="float" office:value="714" calcext:value-type="float">
            <text:p>71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826388888888889" calcext:value-type="float">
            <text:p>0,00008263888888888890</text:p>
          </table:table-cell>
          <table:table-cell table:formula="of:=[.D16]-[.D15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51" office:value-type="float" office:value="765" calcext:value-type="float">
            <text:p>76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885416666666667" calcext:value-type="float">
            <text:p>0,00008854166666666670</text:p>
          </table:table-cell>
          <table:table-cell table:formula="of:=[.D17]-[.D16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51" office:value-type="float" office:value="816" calcext:value-type="float">
            <text:p>81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944444444444444" calcext:value-type="float">
            <text:p>0,00009444444444444440</text:p>
          </table:table-cell>
          <table:table-cell table:formula="of:=[.D18]-[.D17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51" office:value-type="float" office:value="867" calcext:value-type="float">
            <text:p>867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00347222222222" calcext:value-type="float">
            <text:p>0,00010034722222222200</text:p>
          </table:table-cell>
          <table:table-cell table:formula="of:=[.D19]-[.D18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51" office:value-type="float" office:value="918" calcext:value-type="float">
            <text:p>91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0625" calcext:value-type="float">
            <text:p>0,00010625000000000000</text:p>
          </table:table-cell>
          <table:table-cell table:formula="of:=[.D20]-[.D19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51" office:value-type="float" office:value="969" calcext:value-type="float">
            <text:p>969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12152777777778" calcext:value-type="float">
            <text:p>0,00011215277777777800</text:p>
          </table:table-cell>
          <table:table-cell table:formula="of:=[.D21]-[.D20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51" office:value-type="float" office:value="1020" calcext:value-type="float">
            <text:p>10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18055555555556" calcext:value-type="float">
            <text:p>0,00011805555555555600</text:p>
          </table:table-cell>
          <table:table-cell table:formula="of:=[.D22]-[.D21]" office:value-type="float" office:value="0.00000590277777777778" calcext:value-type="float">
            <text:p>0,00000590277777777778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51" office:value-type="float" office:value="1071" calcext:value-type="float">
            <text:p>1071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23958333333333" calcext:value-type="float">
            <text:p>0,00012395833333333300</text:p>
          </table:table-cell>
          <table:table-cell table:formula="of:=[.D23]-[.D22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51" office:value-type="float" office:value="1122" calcext:value-type="float">
            <text:p>112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29861111111111" calcext:value-type="float">
            <text:p>0,00012986111111111100</text:p>
          </table:table-cell>
          <table:table-cell table:formula="of:=[.D24]-[.D23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51" office:value-type="float" office:value="1173" calcext:value-type="float">
            <text:p>1173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35763888888889" calcext:value-type="float">
            <text:p>0,00013576388888888900</text:p>
          </table:table-cell>
          <table:table-cell table:formula="of:=[.D25]-[.D24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51" office:value-type="float" office:value="1224" calcext:value-type="float">
            <text:p>122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41666666666667" calcext:value-type="float">
            <text:p>0,00014166666666666700</text:p>
          </table:table-cell>
          <table:table-cell table:formula="of:=[.D26]-[.D25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51" office:value-type="float" office:value="1275" calcext:value-type="float">
            <text:p>12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47569444444444" calcext:value-type="float">
            <text:p>0,00014756944444444400</text:p>
          </table:table-cell>
          <table:table-cell table:formula="of:=[.D27]-[.D26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51" office:value-type="float" office:value="1326" calcext:value-type="float">
            <text:p>132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53472222222222" calcext:value-type="float">
            <text:p>0,00015347222222222200</text:p>
          </table:table-cell>
          <table:table-cell table:formula="of:=[.D28]-[.D27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51" office:value-type="float" office:value="1377" calcext:value-type="float">
            <text:p>1377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59375" calcext:value-type="float">
            <text:p>0,00015937500000000000</text:p>
          </table:table-cell>
          <table:table-cell table:formula="of:=[.D29]-[.D28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51" office:value-type="float" office:value="1428" calcext:value-type="float">
            <text:p>142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65277777777778" calcext:value-type="float">
            <text:p>0,00016527777777777800</text:p>
          </table:table-cell>
          <table:table-cell table:formula="of:=[.D30]-[.D29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51" office:value-type="float" office:value="1479" calcext:value-type="float">
            <text:p>1479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71180555555556" calcext:value-type="float">
            <text:p>0,00017118055555555600</text:p>
          </table:table-cell>
          <table:table-cell table:formula="of:=[.D31]-[.D30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51" office:value-type="float" office:value="1530" calcext:value-type="float">
            <text:p>153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77083333333333" calcext:value-type="float">
            <text:p>0,00017708333333333300</text:p>
          </table:table-cell>
          <table:table-cell table:formula="of:=[.D32]-[.D31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51" office:value-type="float" office:value="1581" calcext:value-type="float">
            <text:p>1581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82986111111111" calcext:value-type="float">
            <text:p>0,00018298611111111100</text:p>
          </table:table-cell>
          <table:table-cell table:formula="of:=[.D33]-[.D32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51" office:value-type="float" office:value="1632" calcext:value-type="float">
            <text:p>163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88888888888889" calcext:value-type="float">
            <text:p>0,00018888888888888900</text:p>
          </table:table-cell>
          <table:table-cell table:formula="of:=[.D34]-[.D33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51" office:value-type="float" office:value="1683" calcext:value-type="float">
            <text:p>1683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94791666666667" calcext:value-type="float">
            <text:p>0,00019479166666666700</text:p>
          </table:table-cell>
          <table:table-cell table:formula="of:=[.D35]-[.D34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51" office:value-type="float" office:value="1734" calcext:value-type="float">
            <text:p>173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00694444444444" calcext:value-type="float">
            <text:p>0,00020069444444444400</text:p>
          </table:table-cell>
          <table:table-cell table:formula="of:=[.D36]-[.D35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51" office:value-type="float" office:value="1785" calcext:value-type="float">
            <text:p>178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06597222222222" calcext:value-type="float">
            <text:p>0,00020659722222222200</text:p>
          </table:table-cell>
          <table:table-cell table:formula="of:=[.D37]-[.D36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51" office:value-type="float" office:value="1836" calcext:value-type="float">
            <text:p>183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125" calcext:value-type="float">
            <text:p>0,00021250000000000000</text:p>
          </table:table-cell>
          <table:table-cell table:formula="of:=[.D38]-[.D37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51" office:value-type="float" office:value="1887" calcext:value-type="float">
            <text:p>1887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18402777777778" calcext:value-type="float">
            <text:p>0,00021840277777777800</text:p>
          </table:table-cell>
          <table:table-cell table:formula="of:=[.D39]-[.D38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51" office:value-type="float" office:value="1938" calcext:value-type="float">
            <text:p>193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24305555555556" calcext:value-type="float">
            <text:p>0,00022430555555555600</text:p>
          </table:table-cell>
          <table:table-cell table:formula="of:=[.D40]-[.D39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51" office:value-type="float" office:value="1989" calcext:value-type="float">
            <text:p>1989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30208333333333" calcext:value-type="float">
            <text:p>0,00023020833333333300</text:p>
          </table:table-cell>
          <table:table-cell table:formula="of:=[.D41]-[.D40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51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36111111111111" calcext:value-type="float">
            <text:p>0,00023611111111111100</text:p>
          </table:table-cell>
          <table:table-cell table:formula="of:=[.D42]-[.D41]" office:value-type="float" office:value="0.00000590277777777777" calcext:value-type="float">
            <text:p>0,00000590277777777777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51" office:value-type="float" office:value="2091" calcext:value-type="float">
            <text:p>2091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42013888888889" calcext:value-type="float">
            <text:p>0,00024201388888888900</text:p>
          </table:table-cell>
          <table:table-cell table:formula="of:=[.D43]-[.D42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51" office:value-type="float" office:value="2142" calcext:value-type="float">
            <text:p>214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47916666666667" calcext:value-type="float">
            <text:p>0,00024791666666666700</text:p>
          </table:table-cell>
          <table:table-cell table:formula="of:=[.D44]-[.D43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51" office:value-type="float" office:value="2193" calcext:value-type="float">
            <text:p>2193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53819444444444" calcext:value-type="float">
            <text:p>0,00025381944444444400</text:p>
          </table:table-cell>
          <table:table-cell table:formula="of:=[.D45]-[.D44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51" office:value-type="float" office:value="2244" calcext:value-type="float">
            <text:p>224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59722222222222" calcext:value-type="float">
            <text:p>0,00025972222222222200</text:p>
          </table:table-cell>
          <table:table-cell table:formula="of:=[.D46]-[.D45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51" office:value-type="float" office:value="2295" calcext:value-type="float">
            <text:p>229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65625" calcext:value-type="float">
            <text:p>0,00026562500000000000</text:p>
          </table:table-cell>
          <table:table-cell table:formula="of:=[.D47]-[.D46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51" office:value-type="float" office:value="2346" calcext:value-type="float">
            <text:p>234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71527777777778" calcext:value-type="float">
            <text:p>0,00027152777777777800</text:p>
          </table:table-cell>
          <table:table-cell table:formula="of:=[.D48]-[.D47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51" office:value-type="float" office:value="2397" calcext:value-type="float">
            <text:p>2397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77430555555556" calcext:value-type="float">
            <text:p>0,00027743055555555600</text:p>
          </table:table-cell>
          <table:table-cell table:formula="of:=[.D49]-[.D48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51" office:value-type="float" office:value="2448" calcext:value-type="float">
            <text:p>244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83333333333333" calcext:value-type="float">
            <text:p>0,00028333333333333300</text:p>
          </table:table-cell>
          <table:table-cell table:formula="of:=[.D50]-[.D49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51" office:value-type="float" office:value="2499" calcext:value-type="float">
            <text:p>2499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89236111111111" calcext:value-type="float">
            <text:p>0,00028923611111111100</text:p>
          </table:table-cell>
          <table:table-cell table:formula="of:=[.D51]-[.D50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51" office:value-type="float" office:value="2550" calcext:value-type="float">
            <text:p>25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95138888888889" calcext:value-type="float">
            <text:p>0,00029513888888888900</text:p>
          </table:table-cell>
          <table:table-cell table:formula="of:=[.D52]-[.D51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51" office:value-type="float" office:value="2601" calcext:value-type="float">
            <text:p>2601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01041666666667" calcext:value-type="float">
            <text:p>0,00030104166666666700</text:p>
          </table:table-cell>
          <table:table-cell table:formula="of:=[.D53]-[.D52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51" office:value-type="float" office:value="2652" calcext:value-type="float">
            <text:p>265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06944444444444" calcext:value-type="float">
            <text:p>0,00030694444444444400</text:p>
          </table:table-cell>
          <table:table-cell table:formula="of:=[.D54]-[.D53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51" office:value-type="float" office:value="2703" calcext:value-type="float">
            <text:p>2703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12847222222222" calcext:value-type="float">
            <text:p>0,00031284722222222200</text:p>
          </table:table-cell>
          <table:table-cell table:formula="of:=[.D55]-[.D54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51" office:value-type="float" office:value="2754" calcext:value-type="float">
            <text:p>275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1875" calcext:value-type="float">
            <text:p>0,00031875000000000000</text:p>
          </table:table-cell>
          <table:table-cell table:formula="of:=[.D56]-[.D55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51" office:value-type="float" office:value="2805" calcext:value-type="float">
            <text:p>280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24652777777778" calcext:value-type="float">
            <text:p>0,00032465277777777800</text:p>
          </table:table-cell>
          <table:table-cell table:formula="of:=[.D57]-[.D56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51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30555555555556" calcext:value-type="float">
            <text:p>0,00033055555555555600</text:p>
          </table:table-cell>
          <table:table-cell table:formula="of:=[.D58]-[.D57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51" office:value-type="float" office:value="2907" calcext:value-type="float">
            <text:p>2907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36458333333333" calcext:value-type="float">
            <text:p>0,00033645833333333300</text:p>
          </table:table-cell>
          <table:table-cell table:formula="of:=[.D59]-[.D58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51" office:value-type="float" office:value="2958" calcext:value-type="float">
            <text:p>295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42361111111111" calcext:value-type="float">
            <text:p>0,00034236111111111100</text:p>
          </table:table-cell>
          <table:table-cell table:formula="of:=[.D60]-[.D59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51" office:value-type="float" office:value="3009" calcext:value-type="float">
            <text:p>3009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48263888888889" calcext:value-type="float">
            <text:p>0,00034826388888888900</text:p>
          </table:table-cell>
          <table:table-cell table:formula="of:=[.D61]-[.D60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51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54166666666667" calcext:value-type="float">
            <text:p>0,00035416666666666700</text:p>
          </table:table-cell>
          <table:table-cell table:formula="of:=[.D62]-[.D61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51" office:value-type="float" office:value="3111" calcext:value-type="float">
            <text:p>3111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60069444444444" calcext:value-type="float">
            <text:p>0,00036006944444444400</text:p>
          </table:table-cell>
          <table:table-cell table:formula="of:=[.D63]-[.D62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51" office:value-type="float" office:value="3162" calcext:value-type="float">
            <text:p>316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65972222222222" calcext:value-type="float">
            <text:p>0,00036597222222222200</text:p>
          </table:table-cell>
          <table:table-cell table:formula="of:=[.D64]-[.D63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51" office:value-type="float" office:value="3213" calcext:value-type="float">
            <text:p>3213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371875" calcext:value-type="float">
            <text:p>0,00037187500000000000</text:p>
          </table:table-cell>
          <table:table-cell table:formula="of:=[.D65]-[.D64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51" office:value-type="float" office:value="3264" calcext:value-type="float">
            <text:p>326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377777777777778" calcext:value-type="float">
            <text:p>0,00037777777777777800</text:p>
          </table:table-cell>
          <table:table-cell table:formula="of:=[.D66]-[.D65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51" office:value-type="float" office:value="3315" calcext:value-type="float">
            <text:p>331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83680555555556" calcext:value-type="float">
            <text:p>0,00038368055555555600</text:p>
          </table:table-cell>
          <table:table-cell table:formula="of:=[.D67]-[.D66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51" office:value-type="float" office:value="3366" calcext:value-type="float">
            <text:p>336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389583333333333" calcext:value-type="float">
            <text:p>0,00038958333333333300</text:p>
          </table:table-cell>
          <table:table-cell table:formula="of:=[.D68]-[.D67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51" office:value-type="float" office:value="3417" calcext:value-type="float">
            <text:p>3417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395486111111111" calcext:value-type="float">
            <text:p>0,00039548611111111100</text:p>
          </table:table-cell>
          <table:table-cell table:formula="of:=[.D69]-[.D68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51" office:value-type="float" office:value="3468" calcext:value-type="float">
            <text:p>346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401388888888889" calcext:value-type="float">
            <text:p>0,00040138888888888900</text:p>
          </table:table-cell>
          <table:table-cell table:formula="of:=[.D70]-[.D69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51" office:value-type="float" office:value="3519" calcext:value-type="float">
            <text:p>3519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407291666666667" calcext:value-type="float">
            <text:p>0,00040729166666666700</text:p>
          </table:table-cell>
          <table:table-cell table:formula="of:=[.D71]-[.D70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51" office:value-type="float" office:value="3570" calcext:value-type="float">
            <text:p>357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413194444444444" calcext:value-type="float">
            <text:p>0,00041319444444444400</text:p>
          </table:table-cell>
          <table:table-cell table:formula="of:=[.D72]-[.D71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51" office:value-type="float" office:value="3621" calcext:value-type="float">
            <text:p>3621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419097222222222" calcext:value-type="float">
            <text:p>0,00041909722222222200</text:p>
          </table:table-cell>
          <table:table-cell table:formula="of:=[.D73]-[.D72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51" office:value-type="float" office:value="3672" calcext:value-type="float">
            <text:p>367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425" calcext:value-type="float">
            <text:p>0,00042500000000000000</text:p>
          </table:table-cell>
          <table:table-cell table:formula="of:=[.D74]-[.D73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51" office:value-type="float" office:value="3723" calcext:value-type="float">
            <text:p>3723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430902777777778" calcext:value-type="float">
            <text:p>0,00043090277777777800</text:p>
          </table:table-cell>
          <table:table-cell table:formula="of:=[.D75]-[.D74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51" office:value-type="float" office:value="3774" calcext:value-type="float">
            <text:p>377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436805555555556" calcext:value-type="float">
            <text:p>0,00043680555555555600</text:p>
          </table:table-cell>
          <table:table-cell table:formula="of:=[.D76]-[.D75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51" office:value-type="float" office:value="3825" calcext:value-type="float">
            <text:p>38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442708333333333" calcext:value-type="float">
            <text:p>0,00044270833333333300</text:p>
          </table:table-cell>
          <table:table-cell table:formula="of:=[.D77]-[.D76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51" office:value-type="float" office:value="3876" calcext:value-type="float">
            <text:p>387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448611111111111" calcext:value-type="float">
            <text:p>0,00044861111111111100</text:p>
          </table:table-cell>
          <table:table-cell table:formula="of:=[.D78]-[.D77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51" office:value-type="float" office:value="3927" calcext:value-type="float">
            <text:p>3927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454513888888889" calcext:value-type="float">
            <text:p>0,00045451388888888900</text:p>
          </table:table-cell>
          <table:table-cell table:formula="of:=[.D79]-[.D78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51" office:value-type="float" office:value="3978" calcext:value-type="float">
            <text:p>397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460416666666667" calcext:value-type="float">
            <text:p>0,00046041666666666700</text:p>
          </table:table-cell>
          <table:table-cell table:formula="of:=[.D80]-[.D79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51" office:value-type="float" office:value="4029" calcext:value-type="float">
            <text:p>4029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466319444444444" calcext:value-type="float">
            <text:p>0,00046631944444444500</text:p>
          </table:table-cell>
          <table:table-cell table:formula="of:=[.D81]-[.D80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51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472222222222222" calcext:value-type="float">
            <text:p>0,00047222222222222200</text:p>
          </table:table-cell>
          <table:table-cell table:formula="of:=[.D82]-[.D81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51" office:value-type="float" office:value="4131" calcext:value-type="float">
            <text:p>4131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478125" calcext:value-type="float">
            <text:p>0,00047812500000000000</text:p>
          </table:table-cell>
          <table:table-cell table:formula="of:=[.D83]-[.D82]" office:value-type="float" office:value="0.0000059027777777778" calcext:value-type="float">
            <text:p>0,00000590277777777780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51" office:value-type="float" office:value="4182" calcext:value-type="float">
            <text:p>418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484027777777778" calcext:value-type="float">
            <text:p>0,00048402777777777800</text:p>
          </table:table-cell>
          <table:table-cell table:formula="of:=[.D84]-[.D83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51" office:value-type="float" office:value="4233" calcext:value-type="float">
            <text:p>4233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489930555555556" calcext:value-type="float">
            <text:p>0,00048993055555555600</text:p>
          </table:table-cell>
          <table:table-cell table:formula="of:=[.D85]-[.D8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51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495833333333333" calcext:value-type="float">
            <text:p>0,00049583333333333300</text:p>
          </table:table-cell>
          <table:table-cell table:formula="of:=[.D86]-[.D85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51" office:value-type="float" office:value="4335" calcext:value-type="float">
            <text:p>433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501736111111111" calcext:value-type="float">
            <text:p>0,00050173611111111100</text:p>
          </table:table-cell>
          <table:table-cell table:formula="of:=[.D87]-[.D86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51" office:value-type="float" office:value="4386" calcext:value-type="float">
            <text:p>438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507638888888889" calcext:value-type="float">
            <text:p>0,00050763888888888900</text:p>
          </table:table-cell>
          <table:table-cell table:formula="of:=[.D88]-[.D8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51" office:value-type="float" office:value="4437" calcext:value-type="float">
            <text:p>4437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513541666666667" calcext:value-type="float">
            <text:p>0,00051354166666666700</text:p>
          </table:table-cell>
          <table:table-cell table:formula="of:=[.D89]-[.D88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51" office:value-type="float" office:value="4488" calcext:value-type="float">
            <text:p>448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519444444444444" calcext:value-type="float">
            <text:p>0,00051944444444444400</text:p>
          </table:table-cell>
          <table:table-cell table:formula="of:=[.D90]-[.D89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51" office:value-type="float" office:value="4539" calcext:value-type="float">
            <text:p>4539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525347222222222" calcext:value-type="float">
            <text:p>0,00052534722222222200</text:p>
          </table:table-cell>
          <table:table-cell table:formula="of:=[.D91]-[.D9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51" office:value-type="float" office:value="4590" calcext:value-type="float">
            <text:p>459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53125" calcext:value-type="float">
            <text:p>0,00053125000000000000</text:p>
          </table:table-cell>
          <table:table-cell table:formula="of:=[.D92]-[.D91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51" office:value-type="float" office:value="4641" calcext:value-type="float">
            <text:p>4641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537152777777778" calcext:value-type="float">
            <text:p>0,00053715277777777800</text:p>
          </table:table-cell>
          <table:table-cell table:formula="of:=[.D93]-[.D92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51" office:value-type="float" office:value="4692" calcext:value-type="float">
            <text:p>469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543055555555556" calcext:value-type="float">
            <text:p>0,00054305555555555600</text:p>
          </table:table-cell>
          <table:table-cell table:formula="of:=[.D94]-[.D9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51" office:value-type="float" office:value="4743" calcext:value-type="float">
            <text:p>4743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548958333333333" calcext:value-type="float">
            <text:p>0,00054895833333333300</text:p>
          </table:table-cell>
          <table:table-cell table:formula="of:=[.D95]-[.D94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51" office:value-type="float" office:value="4794" calcext:value-type="float">
            <text:p>479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554861111111111" calcext:value-type="float">
            <text:p>0,00055486111111111100</text:p>
          </table:table-cell>
          <table:table-cell table:formula="of:=[.D96]-[.D95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51" office:value-type="float" office:value="4845" calcext:value-type="float">
            <text:p>484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560763888888889" calcext:value-type="float">
            <text:p>0,00056076388888888900</text:p>
          </table:table-cell>
          <table:table-cell table:formula="of:=[.D97]-[.D9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51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566666666666667" calcext:value-type="float">
            <text:p>0,00056666666666666700</text:p>
          </table:table-cell>
          <table:table-cell table:formula="of:=[.D98]-[.D97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51" office:value-type="float" office:value="4947" calcext:value-type="float">
            <text:p>4947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572569444444444" calcext:value-type="float">
            <text:p>0,00057256944444444400</text:p>
          </table:table-cell>
          <table:table-cell table:formula="of:=[.D99]-[.D98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51" office:value-type="float" office:value="4998" calcext:value-type="float">
            <text:p>499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578472222222222" calcext:value-type="float">
            <text:p>0,00057847222222222200</text:p>
          </table:table-cell>
          <table:table-cell table:formula="of:=[.D100]-[.D9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51" office:value-type="float" office:value="5049" calcext:value-type="float">
            <text:p>5049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584375" calcext:value-type="float">
            <text:p>0,00058437500000000000</text:p>
          </table:table-cell>
          <table:table-cell table:formula="of:=[.D101]-[.D100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51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590277777777778" calcext:value-type="float">
            <text:p>0,00059027777777777800</text:p>
          </table:table-cell>
          <table:table-cell table:formula="of:=[.D102]-[.D101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51" office:value-type="float" office:value="5151" calcext:value-type="float">
            <text:p>5151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596180555555556" calcext:value-type="float">
            <text:p>0,00059618055555555600</text:p>
          </table:table-cell>
          <table:table-cell table:formula="of:=[.D103]-[.D10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51" office:value-type="float" office:value="5202" calcext:value-type="float">
            <text:p>520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602083333333333" calcext:value-type="float">
            <text:p>0,00060208333333333300</text:p>
          </table:table-cell>
          <table:table-cell table:formula="of:=[.D104]-[.D103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51" office:value-type="float" office:value="5253" calcext:value-type="float">
            <text:p>5253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607986111111111" calcext:value-type="float">
            <text:p>0,00060798611111111100</text:p>
          </table:table-cell>
          <table:table-cell table:formula="of:=[.D105]-[.D104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51" office:value-type="float" office:value="5304" calcext:value-type="float">
            <text:p>530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613888888888889" calcext:value-type="float">
            <text:p>0,00061388888888888900</text:p>
          </table:table-cell>
          <table:table-cell table:formula="of:=[.D106]-[.D10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51" office:value-type="float" office:value="5355" calcext:value-type="float">
            <text:p>535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619791666666667" calcext:value-type="float">
            <text:p>0,00061979166666666700</text:p>
          </table:table-cell>
          <table:table-cell table:formula="of:=[.D107]-[.D106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51" office:value-type="float" office:value="5406" calcext:value-type="float">
            <text:p>540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625694444444445" calcext:value-type="float">
            <text:p>0,00062569444444444500</text:p>
          </table:table-cell>
          <table:table-cell table:formula="of:=[.D108]-[.D107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51" office:value-type="float" office:value="5457" calcext:value-type="float">
            <text:p>5457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631597222222222" calcext:value-type="float">
            <text:p>0,00063159722222222200</text:p>
          </table:table-cell>
          <table:table-cell table:formula="of:=[.D109]-[.D10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51" office:value-type="float" office:value="5508" calcext:value-type="float">
            <text:p>550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6375" calcext:value-type="float">
            <text:p>0,00063750000000000000</text:p>
          </table:table-cell>
          <table:table-cell table:formula="of:=[.D110]-[.D109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51" office:value-type="float" office:value="5559" calcext:value-type="float">
            <text:p>5559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643402777777778" calcext:value-type="float">
            <text:p>0,00064340277777777800</text:p>
          </table:table-cell>
          <table:table-cell table:formula="of:=[.D111]-[.D110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51" office:value-type="float" office:value="5610" calcext:value-type="float">
            <text:p>561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649305555555556" calcext:value-type="float">
            <text:p>0,00064930555555555600</text:p>
          </table:table-cell>
          <table:table-cell table:formula="of:=[.D112]-[.D11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51" office:value-type="float" office:value="5661" calcext:value-type="float">
            <text:p>5661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655208333333333" calcext:value-type="float">
            <text:p>0,00065520833333333300</text:p>
          </table:table-cell>
          <table:table-cell table:formula="of:=[.D113]-[.D112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51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661111111111111" calcext:value-type="float">
            <text:p>0,00066111111111111100</text:p>
          </table:table-cell>
          <table:table-cell table:formula="of:=[.D114]-[.D113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51" office:value-type="float" office:value="5763" calcext:value-type="float">
            <text:p>5763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667013888888889" calcext:value-type="float">
            <text:p>0,00066701388888888900</text:p>
          </table:table-cell>
          <table:table-cell table:formula="of:=[.D115]-[.D11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51" office:value-type="float" office:value="5814" calcext:value-type="float">
            <text:p>581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672916666666667" calcext:value-type="float">
            <text:p>0,00067291666666666700</text:p>
          </table:table-cell>
          <table:table-cell table:formula="of:=[.D116]-[.D115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51" office:value-type="float" office:value="5865" calcext:value-type="float">
            <text:p>586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678819444444445" calcext:value-type="float">
            <text:p>0,00067881944444444500</text:p>
          </table:table-cell>
          <table:table-cell table:formula="of:=[.D117]-[.D116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51" office:value-type="float" office:value="5916" calcext:value-type="float">
            <text:p>591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684722222222222" calcext:value-type="float">
            <text:p>0,00068472222222222200</text:p>
          </table:table-cell>
          <table:table-cell table:formula="of:=[.D118]-[.D11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51" office:value-type="float" office:value="5967" calcext:value-type="float">
            <text:p>5967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690625" calcext:value-type="float">
            <text:p>0,00069062500000000000</text:p>
          </table:table-cell>
          <table:table-cell table:formula="of:=[.D119]-[.D118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51" office:value-type="float" office:value="6018" calcext:value-type="float">
            <text:p>601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696527777777778" calcext:value-type="float">
            <text:p>0,00069652777777777800</text:p>
          </table:table-cell>
          <table:table-cell table:formula="of:=[.D120]-[.D119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51" office:value-type="float" office:value="6069" calcext:value-type="float">
            <text:p>6069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702430555555556" calcext:value-type="float">
            <text:p>0,00070243055555555600</text:p>
          </table:table-cell>
          <table:table-cell table:formula="of:=[.D121]-[.D12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51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708333333333333" calcext:value-type="float">
            <text:p>0,00070833333333333300</text:p>
          </table:table-cell>
          <table:table-cell table:formula="of:=[.D122]-[.D121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51" office:value-type="float" office:value="6171" calcext:value-type="float">
            <text:p>6171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714236111111111" calcext:value-type="float">
            <text:p>0,00071423611111111100</text:p>
          </table:table-cell>
          <table:table-cell table:formula="of:=[.D123]-[.D122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51" office:value-type="float" office:value="6222" calcext:value-type="float">
            <text:p>622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720138888888889" calcext:value-type="float">
            <text:p>0,00072013888888888900</text:p>
          </table:table-cell>
          <table:table-cell table:formula="of:=[.D124]-[.D12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51" office:value-type="float" office:value="6273" calcext:value-type="float">
            <text:p>6273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726041666666667" calcext:value-type="float">
            <text:p>0,00072604166666666700</text:p>
          </table:table-cell>
          <table:table-cell table:formula="of:=[.D125]-[.D124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51" office:value-type="float" office:value="6324" calcext:value-type="float">
            <text:p>632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731944444444445" calcext:value-type="float">
            <text:p>0,00073194444444444500</text:p>
          </table:table-cell>
          <table:table-cell table:formula="of:=[.D126]-[.D125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51" office:value-type="float" office:value="6375" calcext:value-type="float">
            <text:p>63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737847222222222" calcext:value-type="float">
            <text:p>0,00073784722222222200</text:p>
          </table:table-cell>
          <table:table-cell table:formula="of:=[.D127]-[.D12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51" office:value-type="float" office:value="6426" calcext:value-type="float">
            <text:p>642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74375" calcext:value-type="float">
            <text:p>0,00074375000000000000</text:p>
          </table:table-cell>
          <table:table-cell table:formula="of:=[.D128]-[.D127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51" office:value-type="float" office:value="6477" calcext:value-type="float">
            <text:p>6477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749652777777778" calcext:value-type="float">
            <text:p>0,00074965277777777800</text:p>
          </table:table-cell>
          <table:table-cell table:formula="of:=[.D129]-[.D128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51" office:value-type="float" office:value="6528" calcext:value-type="float">
            <text:p>652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755555555555556" calcext:value-type="float">
            <text:p>0,00075555555555555600</text:p>
          </table:table-cell>
          <table:table-cell table:formula="of:=[.D130]-[.D129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51" office:value-type="float" office:value="6579" calcext:value-type="float">
            <text:p>6579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761458333333333" calcext:value-type="float">
            <text:p>0,00076145833333333300</text:p>
          </table:table-cell>
          <table:table-cell table:formula="of:=[.D131]-[.D13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51" office:value-type="float" office:value="6630" calcext:value-type="float">
            <text:p>663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767361111111111" calcext:value-type="float">
            <text:p>0,00076736111111111100</text:p>
          </table:table-cell>
          <table:table-cell table:formula="of:=[.D132]-[.D131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51" office:value-type="float" office:value="6681" calcext:value-type="float">
            <text:p>6681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773263888888889" calcext:value-type="float">
            <text:p>0,00077326388888888900</text:p>
          </table:table-cell>
          <table:table-cell table:formula="of:=[.D133]-[.D132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51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779166666666667" calcext:value-type="float">
            <text:p>0,00077916666666666700</text:p>
          </table:table-cell>
          <table:table-cell table:formula="of:=[.D134]-[.D13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51" office:value-type="float" office:value="6783" calcext:value-type="float">
            <text:p>6783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785069444444445" calcext:value-type="float">
            <text:p>0,00078506944444444500</text:p>
          </table:table-cell>
          <table:table-cell table:formula="of:=[.D135]-[.D134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51" office:value-type="float" office:value="6834" calcext:value-type="float">
            <text:p>683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790972222222222" calcext:value-type="float">
            <text:p>0,00079097222222222200</text:p>
          </table:table-cell>
          <table:table-cell table:formula="of:=[.D136]-[.D135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51" office:value-type="float" office:value="6885" calcext:value-type="float">
            <text:p>688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796875" calcext:value-type="float">
            <text:p>0,00079687500000000000</text:p>
          </table:table-cell>
          <table:table-cell table:formula="of:=[.D137]-[.D13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51" office:value-type="float" office:value="6936" calcext:value-type="float">
            <text:p>693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802777777777778" calcext:value-type="float">
            <text:p>0,00080277777777777800</text:p>
          </table:table-cell>
          <table:table-cell table:formula="of:=[.D138]-[.D137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51" office:value-type="float" office:value="6987" calcext:value-type="float">
            <text:p>6987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808680555555556" calcext:value-type="float">
            <text:p>0,00080868055555555600</text:p>
          </table:table-cell>
          <table:table-cell table:formula="of:=[.D139]-[.D138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51" office:value-type="float" office:value="7038" calcext:value-type="float">
            <text:p>703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814583333333333" calcext:value-type="float">
            <text:p>0,00081458333333333300</text:p>
          </table:table-cell>
          <table:table-cell table:formula="of:=[.D140]-[.D13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51" office:value-type="float" office:value="7089" calcext:value-type="float">
            <text:p>7089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820486111111111" calcext:value-type="float">
            <text:p>0,00082048611111111100</text:p>
          </table:table-cell>
          <table:table-cell table:formula="of:=[.D141]-[.D140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51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826388888888889" calcext:value-type="float">
            <text:p>0,00082638888888888900</text:p>
          </table:table-cell>
          <table:table-cell table:formula="of:=[.D142]-[.D141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51" office:value-type="float" office:value="7191" calcext:value-type="float">
            <text:p>7191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832291666666667" calcext:value-type="float">
            <text:p>0,00083229166666666700</text:p>
          </table:table-cell>
          <table:table-cell table:formula="of:=[.D143]-[.D14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51" office:value-type="float" office:value="7242" calcext:value-type="float">
            <text:p>724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838194444444445" calcext:value-type="float">
            <text:p>0,00083819444444444500</text:p>
          </table:table-cell>
          <table:table-cell table:formula="of:=[.D144]-[.D143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51" office:value-type="float" office:value="7293" calcext:value-type="float">
            <text:p>7293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844097222222222" calcext:value-type="float">
            <text:p>0,00084409722222222200</text:p>
          </table:table-cell>
          <table:table-cell table:formula="of:=[.D145]-[.D144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51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85" calcext:value-type="float">
            <text:p>0,00085000000000000000</text:p>
          </table:table-cell>
          <table:table-cell table:formula="of:=[.D146]-[.D14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51" office:value-type="float" office:value="7395" calcext:value-type="float">
            <text:p>739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855902777777778" calcext:value-type="float">
            <text:p>0,00085590277777777800</text:p>
          </table:table-cell>
          <table:table-cell table:formula="of:=[.D147]-[.D146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51" office:value-type="float" office:value="7446" calcext:value-type="float">
            <text:p>744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861805555555556" calcext:value-type="float">
            <text:p>0,00086180555555555600</text:p>
          </table:table-cell>
          <table:table-cell table:formula="of:=[.D148]-[.D147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51" office:value-type="float" office:value="7497" calcext:value-type="float">
            <text:p>7497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867708333333333" calcext:value-type="float">
            <text:p>0,00086770833333333300</text:p>
          </table:table-cell>
          <table:table-cell table:formula="of:=[.D149]-[.D14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51" office:value-type="float" office:value="7548" calcext:value-type="float">
            <text:p>754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873611111111111" calcext:value-type="float">
            <text:p>0,00087361111111111100</text:p>
          </table:table-cell>
          <table:table-cell table:formula="of:=[.D150]-[.D149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51" office:value-type="float" office:value="7599" calcext:value-type="float">
            <text:p>7599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879513888888889" calcext:value-type="float">
            <text:p>0,00087951388888888900</text:p>
          </table:table-cell>
          <table:table-cell table:formula="of:=[.D151]-[.D150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51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885416666666667" calcext:value-type="float">
            <text:p>0,00088541666666666700</text:p>
          </table:table-cell>
          <table:table-cell table:formula="of:=[.D152]-[.D15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51" office:value-type="float" office:value="7701" calcext:value-type="float">
            <text:p>7701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891319444444445" calcext:value-type="float">
            <text:p>0,00089131944444444500</text:p>
          </table:table-cell>
          <table:table-cell table:formula="of:=[.D153]-[.D152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51" office:value-type="float" office:value="7752" calcext:value-type="float">
            <text:p>775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897222222222222" calcext:value-type="float">
            <text:p>0,00089722222222222200</text:p>
          </table:table-cell>
          <table:table-cell table:formula="of:=[.D154]-[.D153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51" office:value-type="float" office:value="7803" calcext:value-type="float">
            <text:p>7803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903125" calcext:value-type="float">
            <text:p>0,00090312500000000000</text:p>
          </table:table-cell>
          <table:table-cell table:formula="of:=[.D155]-[.D15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51" office:value-type="float" office:value="7854" calcext:value-type="float">
            <text:p>785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909027777777778" calcext:value-type="float">
            <text:p>0,00090902777777777800</text:p>
          </table:table-cell>
          <table:table-cell table:formula="of:=[.D156]-[.D155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51" office:value-type="float" office:value="7905" calcext:value-type="float">
            <text:p>790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914930555555556" calcext:value-type="float">
            <text:p>0,00091493055555555600</text:p>
          </table:table-cell>
          <table:table-cell table:formula="of:=[.D157]-[.D156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51" office:value-type="float" office:value="7956" calcext:value-type="float">
            <text:p>795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920833333333333" calcext:value-type="float">
            <text:p>0,00092083333333333300</text:p>
          </table:table-cell>
          <table:table-cell table:formula="of:=[.D158]-[.D15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51" office:value-type="float" office:value="8007" calcext:value-type="float">
            <text:p>8007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926736111111111" calcext:value-type="float">
            <text:p>0,00092673611111111100</text:p>
          </table:table-cell>
          <table:table-cell table:formula="of:=[.D159]-[.D158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51" office:value-type="float" office:value="8058" calcext:value-type="float">
            <text:p>805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932638888888889" calcext:value-type="float">
            <text:p>0,00093263888888888900</text:p>
          </table:table-cell>
          <table:table-cell table:formula="of:=[.D160]-[.D159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51" office:value-type="float" office:value="8109" calcext:value-type="float">
            <text:p>8109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938541666666667" calcext:value-type="float">
            <text:p>0,00093854166666666700</text:p>
          </table:table-cell>
          <table:table-cell table:formula="of:=[.D161]-[.D16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51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944444444444445" calcext:value-type="float">
            <text:p>0,00094444444444444500</text:p>
          </table:table-cell>
          <table:table-cell table:formula="of:=[.D162]-[.D161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51" office:value-type="float" office:value="8211" calcext:value-type="float">
            <text:p>8211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950347222222222" calcext:value-type="float">
            <text:p>0,00095034722222222200</text:p>
          </table:table-cell>
          <table:table-cell table:formula="of:=[.D163]-[.D162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51" office:value-type="float" office:value="8262" calcext:value-type="float">
            <text:p>826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95625" calcext:value-type="float">
            <text:p>0,00095625000000000000</text:p>
          </table:table-cell>
          <table:table-cell table:formula="of:=[.D164]-[.D16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51" office:value-type="float" office:value="8313" calcext:value-type="float">
            <text:p>8313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962152777777778" calcext:value-type="float">
            <text:p>0,00096215277777777800</text:p>
          </table:table-cell>
          <table:table-cell table:formula="of:=[.D165]-[.D164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51" office:value-type="float" office:value="8364" calcext:value-type="float">
            <text:p>836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968055555555556" calcext:value-type="float">
            <text:p>0,00096805555555555600</text:p>
          </table:table-cell>
          <table:table-cell table:formula="of:=[.D166]-[.D165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51" office:value-type="float" office:value="8415" calcext:value-type="float">
            <text:p>841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973958333333333" calcext:value-type="float">
            <text:p>0,00097395833333333300</text:p>
          </table:table-cell>
          <table:table-cell table:formula="of:=[.D167]-[.D166]" office:value-type="float" office:value="0.00000590277777777774" calcext:value-type="float">
            <text:p>0,00000590277777777774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51" office:value-type="float" office:value="8466" calcext:value-type="float">
            <text:p>846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979861111111111" calcext:value-type="float">
            <text:p>0,00097986111111111100</text:p>
          </table:table-cell>
          <table:table-cell table:formula="of:=[.D168]-[.D16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51" office:value-type="float" office:value="8517" calcext:value-type="float">
            <text:p>8517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985763888888889" calcext:value-type="float">
            <text:p>0,00098576388888888900</text:p>
          </table:table-cell>
          <table:table-cell table:formula="of:=[.D169]-[.D16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51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991666666666667" calcext:value-type="float">
            <text:p>0,00099166666666666700</text:p>
          </table:table-cell>
          <table:table-cell table:formula="of:=[.D170]-[.D169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51" office:value-type="float" office:value="8619" calcext:value-type="float">
            <text:p>8619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997569444444444" calcext:value-type="float">
            <text:p>0,00099756944444444400</text:p>
          </table:table-cell>
          <table:table-cell table:formula="of:=[.D171]-[.D17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51" office:value-type="float" office:value="8670" calcext:value-type="float">
            <text:p>867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00347222222222" calcext:value-type="float">
            <text:p>0,00100347222222222000</text:p>
          </table:table-cell>
          <table:table-cell table:formula="of:=[.D172]-[.D17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51" office:value-type="float" office:value="8721" calcext:value-type="float">
            <text:p>8721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009375" calcext:value-type="float">
            <text:p>0,00100937500000000000</text:p>
          </table:table-cell>
          <table:table-cell table:formula="of:=[.D173]-[.D172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51" office:value-type="float" office:value="8772" calcext:value-type="float">
            <text:p>877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01527777777778" calcext:value-type="float">
            <text:p>0,00101527777777778000</text:p>
          </table:table-cell>
          <table:table-cell table:formula="of:=[.D174]-[.D17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51" office:value-type="float" office:value="8823" calcext:value-type="float">
            <text:p>8823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02118055555556" calcext:value-type="float">
            <text:p>0,00102118055555556000</text:p>
          </table:table-cell>
          <table:table-cell table:formula="of:=[.D175]-[.D17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51" office:value-type="float" office:value="8874" calcext:value-type="float">
            <text:p>887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02708333333333" calcext:value-type="float">
            <text:p>0,00102708333333333000</text:p>
          </table:table-cell>
          <table:table-cell table:formula="of:=[.D176]-[.D175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51" office:value-type="float" office:value="8925" calcext:value-type="float">
            <text:p>89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03298611111111" calcext:value-type="float">
            <text:p>0,00103298611111111000</text:p>
          </table:table-cell>
          <table:table-cell table:formula="of:=[.D177]-[.D17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51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03888888888889" calcext:value-type="float">
            <text:p>0,00103888888888889000</text:p>
          </table:table-cell>
          <table:table-cell table:formula="of:=[.D178]-[.D17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51" office:value-type="float" office:value="9027" calcext:value-type="float">
            <text:p>9027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04479166666667" calcext:value-type="float">
            <text:p>0,00104479166666667000</text:p>
          </table:table-cell>
          <table:table-cell table:formula="of:=[.D179]-[.D178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51" office:value-type="float" office:value="9078" calcext:value-type="float">
            <text:p>907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05069444444444" calcext:value-type="float">
            <text:p>0,00105069444444444000</text:p>
          </table:table-cell>
          <table:table-cell table:formula="of:=[.D180]-[.D17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51" office:value-type="float" office:value="9129" calcext:value-type="float">
            <text:p>9129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05659722222222" calcext:value-type="float">
            <text:p>0,00105659722222222000</text:p>
          </table:table-cell>
          <table:table-cell table:formula="of:=[.D181]-[.D18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51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0625" calcext:value-type="float">
            <text:p>0,00106250000000000000</text:p>
          </table:table-cell>
          <table:table-cell table:formula="of:=[.D182]-[.D181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51" office:value-type="float" office:value="9231" calcext:value-type="float">
            <text:p>9231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06840277777778" calcext:value-type="float">
            <text:p>0,00106840277777778000</text:p>
          </table:table-cell>
          <table:table-cell table:formula="of:=[.D183]-[.D18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51" office:value-type="float" office:value="9282" calcext:value-type="float">
            <text:p>928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07430555555556" calcext:value-type="float">
            <text:p>0,00107430555555556000</text:p>
          </table:table-cell>
          <table:table-cell table:formula="of:=[.D184]-[.D18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51" office:value-type="float" office:value="9333" calcext:value-type="float">
            <text:p>9333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08020833333333" calcext:value-type="float">
            <text:p>0,00108020833333333000</text:p>
          </table:table-cell>
          <table:table-cell table:formula="of:=[.D185]-[.D184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51" office:value-type="float" office:value="9384" calcext:value-type="float">
            <text:p>938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08611111111111" calcext:value-type="float">
            <text:p>0,00108611111111111000</text:p>
          </table:table-cell>
          <table:table-cell table:formula="of:=[.D186]-[.D18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51" office:value-type="float" office:value="9435" calcext:value-type="float">
            <text:p>943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09201388888889" calcext:value-type="float">
            <text:p>0,00109201388888889000</text:p>
          </table:table-cell>
          <table:table-cell table:formula="of:=[.D187]-[.D18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51" office:value-type="float" office:value="9486" calcext:value-type="float">
            <text:p>948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09791666666667" calcext:value-type="float">
            <text:p>0,00109791666666667000</text:p>
          </table:table-cell>
          <table:table-cell table:formula="of:=[.D188]-[.D187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51" office:value-type="float" office:value="9537" calcext:value-type="float">
            <text:p>9537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10381944444444" calcext:value-type="float">
            <text:p>0,00110381944444444000</text:p>
          </table:table-cell>
          <table:table-cell table:formula="of:=[.D189]-[.D18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51" office:value-type="float" office:value="9588" calcext:value-type="float">
            <text:p>958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10972222222222" calcext:value-type="float">
            <text:p>0,00110972222222222000</text:p>
          </table:table-cell>
          <table:table-cell table:formula="of:=[.D190]-[.D18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51" office:value-type="float" office:value="9639" calcext:value-type="float">
            <text:p>9639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115625" calcext:value-type="float">
            <text:p>0,00111562500000000000</text:p>
          </table:table-cell>
          <table:table-cell table:formula="of:=[.D191]-[.D190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51" office:value-type="float" office:value="9690" calcext:value-type="float">
            <text:p>969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12152777777778" calcext:value-type="float">
            <text:p>0,00112152777777778000</text:p>
          </table:table-cell>
          <table:table-cell table:formula="of:=[.D192]-[.D19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51" office:value-type="float" office:value="9741" calcext:value-type="float">
            <text:p>9741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12743055555556" calcext:value-type="float">
            <text:p>0,00112743055555556000</text:p>
          </table:table-cell>
          <table:table-cell table:formula="of:=[.D193]-[.D19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51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13333333333333" calcext:value-type="float">
            <text:p>0,00113333333333333000</text:p>
          </table:table-cell>
          <table:table-cell table:formula="of:=[.D194]-[.D193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51" office:value-type="float" office:value="9843" calcext:value-type="float">
            <text:p>9843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13923611111111" calcext:value-type="float">
            <text:p>0,00113923611111111000</text:p>
          </table:table-cell>
          <table:table-cell table:formula="of:=[.D195]-[.D19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51" office:value-type="float" office:value="9894" calcext:value-type="float">
            <text:p>989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14513888888889" calcext:value-type="float">
            <text:p>0,00114513888888889000</text:p>
          </table:table-cell>
          <table:table-cell table:formula="of:=[.D196]-[.D19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51" office:value-type="float" office:value="9945" calcext:value-type="float">
            <text:p>994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15104166666667" calcext:value-type="float">
            <text:p>0,00115104166666667000</text:p>
          </table:table-cell>
          <table:table-cell table:formula="of:=[.D197]-[.D196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51" office:value-type="float" office:value="9996" calcext:value-type="float">
            <text:p>999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15694444444444" calcext:value-type="float">
            <text:p>0,00115694444444444000</text:p>
          </table:table-cell>
          <table:table-cell table:formula="of:=[.D198]-[.D19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51" office:value-type="float" office:value="10047" calcext:value-type="float">
            <text:p>10047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16284722222222" calcext:value-type="float">
            <text:p>0,00116284722222222000</text:p>
          </table:table-cell>
          <table:table-cell table:formula="of:=[.D199]-[.D19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51" office:value-type="float" office:value="10098" calcext:value-type="float">
            <text:p>1009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16875" calcext:value-type="float">
            <text:p>0,00116875000000000000</text:p>
          </table:table-cell>
          <table:table-cell table:formula="of:=[.D200]-[.D199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51" office:value-type="float" office:value="10149" calcext:value-type="float">
            <text:p>10149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17465277777778" calcext:value-type="float">
            <text:p>0,00117465277777778000</text:p>
          </table:table-cell>
          <table:table-cell table:formula="of:=[.D201]-[.D20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51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18055555555556" calcext:value-type="float">
            <text:p>0,00118055555555556000</text:p>
          </table:table-cell>
          <table:table-cell table:formula="of:=[.D202]-[.D20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51" office:value-type="float" office:value="10251" calcext:value-type="float">
            <text:p>10251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18645833333333" calcext:value-type="float">
            <text:p>0,00118645833333333000</text:p>
          </table:table-cell>
          <table:table-cell table:formula="of:=[.D203]-[.D202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51" office:value-type="float" office:value="10302" calcext:value-type="float">
            <text:p>1030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19236111111111" calcext:value-type="float">
            <text:p>0,00119236111111111000</text:p>
          </table:table-cell>
          <table:table-cell table:formula="of:=[.D204]-[.D20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51" office:value-type="float" office:value="10353" calcext:value-type="float">
            <text:p>10353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19826388888889" calcext:value-type="float">
            <text:p>0,00119826388888889000</text:p>
          </table:table-cell>
          <table:table-cell table:formula="of:=[.D205]-[.D20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51" office:value-type="float" office:value="10404" calcext:value-type="float">
            <text:p>1040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20416666666667" calcext:value-type="float">
            <text:p>0,00120416666666667000</text:p>
          </table:table-cell>
          <table:table-cell table:formula="of:=[.D206]-[.D205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51" office:value-type="float" office:value="10455" calcext:value-type="float">
            <text:p>1045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21006944444444" calcext:value-type="float">
            <text:p>0,00121006944444444000</text:p>
          </table:table-cell>
          <table:table-cell table:formula="of:=[.D207]-[.D20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51" office:value-type="float" office:value="10506" calcext:value-type="float">
            <text:p>1050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21597222222222" calcext:value-type="float">
            <text:p>0,00121597222222222000</text:p>
          </table:table-cell>
          <table:table-cell table:formula="of:=[.D208]-[.D20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51" office:value-type="float" office:value="10557" calcext:value-type="float">
            <text:p>10557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221875" calcext:value-type="float">
            <text:p>0,00122187500000000000</text:p>
          </table:table-cell>
          <table:table-cell table:formula="of:=[.D209]-[.D208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51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22777777777778" calcext:value-type="float">
            <text:p>0,00122777777777778000</text:p>
          </table:table-cell>
          <table:table-cell table:formula="of:=[.D210]-[.D20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51" office:value-type="float" office:value="10659" calcext:value-type="float">
            <text:p>10659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23368055555556" calcext:value-type="float">
            <text:p>0,00123368055555556000</text:p>
          </table:table-cell>
          <table:table-cell table:formula="of:=[.D211]-[.D21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51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23958333333333" calcext:value-type="float">
            <text:p>0,00123958333333333000</text:p>
          </table:table-cell>
          <table:table-cell table:formula="of:=[.D212]-[.D211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51" office:value-type="float" office:value="10761" calcext:value-type="float">
            <text:p>10761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24548611111111" calcext:value-type="float">
            <text:p>0,00124548611111111000</text:p>
          </table:table-cell>
          <table:table-cell table:formula="of:=[.D213]-[.D21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51" office:value-type="float" office:value="10812" calcext:value-type="float">
            <text:p>1081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25138888888889" calcext:value-type="float">
            <text:p>0,00125138888888889000</text:p>
          </table:table-cell>
          <table:table-cell table:formula="of:=[.D214]-[.D21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51" office:value-type="float" office:value="10863" calcext:value-type="float">
            <text:p>10863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25729166666667" calcext:value-type="float">
            <text:p>0,00125729166666667000</text:p>
          </table:table-cell>
          <table:table-cell table:formula="of:=[.D215]-[.D214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51" office:value-type="float" office:value="10914" calcext:value-type="float">
            <text:p>1091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26319444444444" calcext:value-type="float">
            <text:p>0,00126319444444444000</text:p>
          </table:table-cell>
          <table:table-cell table:formula="of:=[.D216]-[.D21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51" office:value-type="float" office:value="10965" calcext:value-type="float">
            <text:p>1096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26909722222222" calcext:value-type="float">
            <text:p>0,00126909722222222000</text:p>
          </table:table-cell>
          <table:table-cell table:formula="of:=[.D217]-[.D21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51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275" calcext:value-type="float">
            <text:p>0,00127500000000000000</text:p>
          </table:table-cell>
          <table:table-cell table:formula="of:=[.D218]-[.D217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51" office:value-type="float" office:value="11067" calcext:value-type="float">
            <text:p>11067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28090277777778" calcext:value-type="float">
            <text:p>0,00128090277777778000</text:p>
          </table:table-cell>
          <table:table-cell table:formula="of:=[.D219]-[.D21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51" office:value-type="float" office:value="11118" calcext:value-type="float">
            <text:p>1111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28680555555556" calcext:value-type="float">
            <text:p>0,00128680555555556000</text:p>
          </table:table-cell>
          <table:table-cell table:formula="of:=[.D220]-[.D21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51" office:value-type="float" office:value="11169" calcext:value-type="float">
            <text:p>11169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29270833333333" calcext:value-type="float">
            <text:p>0,00129270833333333000</text:p>
          </table:table-cell>
          <table:table-cell table:formula="of:=[.D221]-[.D220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51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29861111111111" calcext:value-type="float">
            <text:p>0,00129861111111111000</text:p>
          </table:table-cell>
          <table:table-cell table:formula="of:=[.D222]-[.D22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51" office:value-type="float" office:value="11271" calcext:value-type="float">
            <text:p>11271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30451388888889" calcext:value-type="float">
            <text:p>0,00130451388888889000</text:p>
          </table:table-cell>
          <table:table-cell table:formula="of:=[.D223]-[.D22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51" office:value-type="float" office:value="11322" calcext:value-type="float">
            <text:p>1132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31041666666667" calcext:value-type="float">
            <text:p>0,00131041666666667000</text:p>
          </table:table-cell>
          <table:table-cell table:formula="of:=[.D224]-[.D223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51" office:value-type="float" office:value="11373" calcext:value-type="float">
            <text:p>11373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31631944444444" calcext:value-type="float">
            <text:p>0,00131631944444444000</text:p>
          </table:table-cell>
          <table:table-cell table:formula="of:=[.D225]-[.D22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51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32222222222222" calcext:value-type="float">
            <text:p>0,00132222222222222000</text:p>
          </table:table-cell>
          <table:table-cell table:formula="of:=[.D226]-[.D22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51" office:value-type="float" office:value="11475" calcext:value-type="float">
            <text:p>114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328125" calcext:value-type="float">
            <text:p>0,00132812500000000000</text:p>
          </table:table-cell>
          <table:table-cell table:formula="of:=[.D227]-[.D226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51" office:value-type="float" office:value="11526" calcext:value-type="float">
            <text:p>1152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33402777777778" calcext:value-type="float">
            <text:p>0,00133402777777778000</text:p>
          </table:table-cell>
          <table:table-cell table:formula="of:=[.D228]-[.D22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51" office:value-type="float" office:value="11577" calcext:value-type="float">
            <text:p>11577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33993055555556" calcext:value-type="float">
            <text:p>0,00133993055555556000</text:p>
          </table:table-cell>
          <table:table-cell table:formula="of:=[.D229]-[.D22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51" office:value-type="float" office:value="11628" calcext:value-type="float">
            <text:p>1162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34583333333333" calcext:value-type="float">
            <text:p>0,00134583333333333000</text:p>
          </table:table-cell>
          <table:table-cell table:formula="of:=[.D230]-[.D229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51" office:value-type="float" office:value="11679" calcext:value-type="float">
            <text:p>11679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35173611111111" calcext:value-type="float">
            <text:p>0,00135173611111111000</text:p>
          </table:table-cell>
          <table:table-cell table:formula="of:=[.D231]-[.D23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51" office:value-type="float" office:value="11730" calcext:value-type="float">
            <text:p>1173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35763888888889" calcext:value-type="float">
            <text:p>0,00135763888888889000</text:p>
          </table:table-cell>
          <table:table-cell table:formula="of:=[.D232]-[.D23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51" office:value-type="float" office:value="11781" calcext:value-type="float">
            <text:p>11781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36354166666667" calcext:value-type="float">
            <text:p>0,00136354166666667000</text:p>
          </table:table-cell>
          <table:table-cell table:formula="of:=[.D233]-[.D232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51" office:value-type="float" office:value="11832" calcext:value-type="float">
            <text:p>1183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36944444444444" calcext:value-type="float">
            <text:p>0,00136944444444444000</text:p>
          </table:table-cell>
          <table:table-cell table:formula="of:=[.D234]-[.D23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51" office:value-type="float" office:value="11883" calcext:value-type="float">
            <text:p>11883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37534722222222" calcext:value-type="float">
            <text:p>0,00137534722222222000</text:p>
          </table:table-cell>
          <table:table-cell table:formula="of:=[.D235]-[.D23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51" office:value-type="float" office:value="11934" calcext:value-type="float">
            <text:p>1193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38125" calcext:value-type="float">
            <text:p>0,00138125000000000000</text:p>
          </table:table-cell>
          <table:table-cell table:formula="of:=[.D236]-[.D235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51" office:value-type="float" office:value="11985" calcext:value-type="float">
            <text:p>1198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38715277777778" calcext:value-type="float">
            <text:p>0,00138715277777778000</text:p>
          </table:table-cell>
          <table:table-cell table:formula="of:=[.D237]-[.D23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51" office:value-type="float" office:value="12036" calcext:value-type="float">
            <text:p>1203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39305555555556" calcext:value-type="float">
            <text:p>0,00139305555555556000</text:p>
          </table:table-cell>
          <table:table-cell table:formula="of:=[.D238]-[.D23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51" office:value-type="float" office:value="12087" calcext:value-type="float">
            <text:p>12087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39895833333333" calcext:value-type="float">
            <text:p>0,00139895833333333000</text:p>
          </table:table-cell>
          <table:table-cell table:formula="of:=[.D239]-[.D238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51" office:value-type="float" office:value="12138" calcext:value-type="float">
            <text:p>1213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40486111111111" calcext:value-type="float">
            <text:p>0,00140486111111111000</text:p>
          </table:table-cell>
          <table:table-cell table:formula="of:=[.D240]-[.D23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51" office:value-type="float" office:value="12189" calcext:value-type="float">
            <text:p>12189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41076388888889" calcext:value-type="float">
            <text:p>0,00141076388888889000</text:p>
          </table:table-cell>
          <table:table-cell table:formula="of:=[.D241]-[.D24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51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41666666666667" calcext:value-type="float">
            <text:p>0,00141666666666667000</text:p>
          </table:table-cell>
          <table:table-cell table:formula="of:=[.D242]-[.D241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51" office:value-type="float" office:value="12291" calcext:value-type="float">
            <text:p>12291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42256944444444" calcext:value-type="float">
            <text:p>0,00142256944444444000</text:p>
          </table:table-cell>
          <table:table-cell table:formula="of:=[.D243]-[.D24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51" office:value-type="float" office:value="12342" calcext:value-type="float">
            <text:p>1234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42847222222222" calcext:value-type="float">
            <text:p>0,00142847222222222000</text:p>
          </table:table-cell>
          <table:table-cell table:formula="of:=[.D244]-[.D24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51" office:value-type="float" office:value="12393" calcext:value-type="float">
            <text:p>12393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434375" calcext:value-type="float">
            <text:p>0,00143437500000000000</text:p>
          </table:table-cell>
          <table:table-cell table:formula="of:=[.D245]-[.D244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51" office:value-type="float" office:value="12444" calcext:value-type="float">
            <text:p>1244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44027777777778" calcext:value-type="float">
            <text:p>0,00144027777777778000</text:p>
          </table:table-cell>
          <table:table-cell table:formula="of:=[.D246]-[.D24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51" office:value-type="float" office:value="12495" calcext:value-type="float">
            <text:p>1249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44618055555556" calcext:value-type="float">
            <text:p>0,00144618055555556000</text:p>
          </table:table-cell>
          <table:table-cell table:formula="of:=[.D247]-[.D24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51" office:value-type="float" office:value="12546" calcext:value-type="float">
            <text:p>1254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45208333333333" calcext:value-type="float">
            <text:p>0,00145208333333333000</text:p>
          </table:table-cell>
          <table:table-cell table:formula="of:=[.D248]-[.D247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51" office:value-type="float" office:value="12597" calcext:value-type="float">
            <text:p>12597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45798611111111" calcext:value-type="float">
            <text:p>0,00145798611111111000</text:p>
          </table:table-cell>
          <table:table-cell table:formula="of:=[.D249]-[.D24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51" office:value-type="float" office:value="12648" calcext:value-type="float">
            <text:p>1264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46388888888889" calcext:value-type="float">
            <text:p>0,00146388888888889000</text:p>
          </table:table-cell>
          <table:table-cell table:formula="of:=[.D250]-[.D24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51" office:value-type="float" office:value="12699" calcext:value-type="float">
            <text:p>12699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46979166666667" calcext:value-type="float">
            <text:p>0,00146979166666667000</text:p>
          </table:table-cell>
          <table:table-cell table:formula="of:=[.D251]-[.D250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51" office:value-type="float" office:value="12750" calcext:value-type="float">
            <text:p>12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47569444444444" calcext:value-type="float">
            <text:p>0,00147569444444444000</text:p>
          </table:table-cell>
          <table:table-cell table:formula="of:=[.D252]-[.D25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51" office:value-type="float" office:value="12801" calcext:value-type="float">
            <text:p>12801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48159722222222" calcext:value-type="float">
            <text:p>0,00148159722222222000</text:p>
          </table:table-cell>
          <table:table-cell table:formula="of:=[.D253]-[.D25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51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4875" calcext:value-type="float">
            <text:p>0,00148750000000000000</text:p>
          </table:table-cell>
          <table:table-cell table:formula="of:=[.D254]-[.D253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51" office:value-type="float" office:value="12903" calcext:value-type="float">
            <text:p>12903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49340277777778" calcext:value-type="float">
            <text:p>0,00149340277777778000</text:p>
          </table:table-cell>
          <table:table-cell table:formula="of:=[.D255]-[.D25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51" office:value-type="float" office:value="12954" calcext:value-type="float">
            <text:p>1295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49930555555556" calcext:value-type="float">
            <text:p>0,00149930555555556000</text:p>
          </table:table-cell>
          <table:table-cell table:formula="of:=[.D256]-[.D25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51" office:value-type="float" office:value="13005" calcext:value-type="float">
            <text:p>1300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50520833333333" calcext:value-type="float">
            <text:p>0,00150520833333333000</text:p>
          </table:table-cell>
          <table:table-cell table:formula="of:=[.D257]-[.D256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51" office:value-type="float" office:value="13056" calcext:value-type="float">
            <text:p>1305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51111111111111" calcext:value-type="float">
            <text:p>0,00151111111111111000</text:p>
          </table:table-cell>
          <table:table-cell table:formula="of:=[.D258]-[.D25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51" office:value-type="float" office:value="13107" calcext:value-type="float">
            <text:p>13107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51701388888889" calcext:value-type="float">
            <text:p>0,00151701388888889000</text:p>
          </table:table-cell>
          <table:table-cell table:formula="of:=[.D259]-[.D258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51" office:value-type="float" office:value="13158" calcext:value-type="float">
            <text:p>1315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52291666666667" calcext:value-type="float">
            <text:p>0,00152291666666667000</text:p>
          </table:table-cell>
          <table:table-cell table:formula="of:=[.D260]-[.D25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51" office:value-type="float" office:value="13209" calcext:value-type="float">
            <text:p>13209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52881944444444" calcext:value-type="float">
            <text:p>0,00152881944444444000</text:p>
          </table:table-cell>
          <table:table-cell table:formula="of:=[.D261]-[.D26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51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53472222222222" calcext:value-type="float">
            <text:p>0,00153472222222222000</text:p>
          </table:table-cell>
          <table:table-cell table:formula="of:=[.D262]-[.D261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51" office:value-type="float" office:value="13311" calcext:value-type="float">
            <text:p>13311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540625" calcext:value-type="float">
            <text:p>0,00154062500000000000</text:p>
          </table:table-cell>
          <table:table-cell table:formula="of:=[.D263]-[.D26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51" office:value-type="float" office:value="13362" calcext:value-type="float">
            <text:p>1336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54652777777778" calcext:value-type="float">
            <text:p>0,00154652777777778000</text:p>
          </table:table-cell>
          <table:table-cell table:formula="of:=[.D264]-[.D26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51" office:value-type="float" office:value="13413" calcext:value-type="float">
            <text:p>13413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55243055555556" calcext:value-type="float">
            <text:p>0,00155243055555556000</text:p>
          </table:table-cell>
          <table:table-cell table:formula="of:=[.D265]-[.D264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51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55833333333333" calcext:value-type="float">
            <text:p>0,00155833333333333000</text:p>
          </table:table-cell>
          <table:table-cell table:formula="of:=[.D266]-[.D26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51" office:value-type="float" office:value="13515" calcext:value-type="float">
            <text:p>1351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56423611111111" calcext:value-type="float">
            <text:p>0,00156423611111111000</text:p>
          </table:table-cell>
          <table:table-cell table:formula="of:=[.D267]-[.D26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51" office:value-type="float" office:value="13566" calcext:value-type="float">
            <text:p>1356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57013888888889" calcext:value-type="float">
            <text:p>0,00157013888888889000</text:p>
          </table:table-cell>
          <table:table-cell table:formula="of:=[.D268]-[.D267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51" office:value-type="float" office:value="13617" calcext:value-type="float">
            <text:p>13617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57604166666667" calcext:value-type="float">
            <text:p>0,00157604166666667000</text:p>
          </table:table-cell>
          <table:table-cell table:formula="of:=[.D269]-[.D26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51" office:value-type="float" office:value="13668" calcext:value-type="float">
            <text:p>1366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58194444444444" calcext:value-type="float">
            <text:p>0,00158194444444444000</text:p>
          </table:table-cell>
          <table:table-cell table:formula="of:=[.D270]-[.D26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51" office:value-type="float" office:value="13719" calcext:value-type="float">
            <text:p>13719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58784722222222" calcext:value-type="float">
            <text:p>0,00158784722222222000</text:p>
          </table:table-cell>
          <table:table-cell table:formula="of:=[.D271]-[.D270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51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59375" calcext:value-type="float">
            <text:p>0,00159375000000000000</text:p>
          </table:table-cell>
          <table:table-cell table:formula="of:=[.D272]-[.D27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51" office:value-type="float" office:value="13821" calcext:value-type="float">
            <text:p>13821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59965277777778" calcext:value-type="float">
            <text:p>0,00159965277777778000</text:p>
          </table:table-cell>
          <table:table-cell table:formula="of:=[.D273]-[.D27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51" office:value-type="float" office:value="13872" calcext:value-type="float">
            <text:p>1387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60555555555556" calcext:value-type="float">
            <text:p>0,00160555555555556000</text:p>
          </table:table-cell>
          <table:table-cell table:formula="of:=[.D274]-[.D273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51" office:value-type="float" office:value="13923" calcext:value-type="float">
            <text:p>13923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61145833333333" calcext:value-type="float">
            <text:p>0,00161145833333333000</text:p>
          </table:table-cell>
          <table:table-cell table:formula="of:=[.D275]-[.D27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51" office:value-type="float" office:value="13974" calcext:value-type="float">
            <text:p>1397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61736111111111" calcext:value-type="float">
            <text:p>0,00161736111111111000</text:p>
          </table:table-cell>
          <table:table-cell table:formula="of:=[.D276]-[.D27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51" office:value-type="float" office:value="14025" calcext:value-type="float">
            <text:p>140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62326388888889" calcext:value-type="float">
            <text:p>0,00162326388888889000</text:p>
          </table:table-cell>
          <table:table-cell table:formula="of:=[.D277]-[.D276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51" office:value-type="float" office:value="14076" calcext:value-type="float">
            <text:p>1407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62916666666667" calcext:value-type="float">
            <text:p>0,00162916666666667000</text:p>
          </table:table-cell>
          <table:table-cell table:formula="of:=[.D278]-[.D27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51" office:value-type="float" office:value="14127" calcext:value-type="float">
            <text:p>14127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63506944444444" calcext:value-type="float">
            <text:p>0,00163506944444444000</text:p>
          </table:table-cell>
          <table:table-cell table:formula="of:=[.D279]-[.D27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51" office:value-type="float" office:value="14178" calcext:value-type="float">
            <text:p>1417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64097222222222" calcext:value-type="float">
            <text:p>0,00164097222222222000</text:p>
          </table:table-cell>
          <table:table-cell table:formula="of:=[.D280]-[.D279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51" office:value-type="float" office:value="14229" calcext:value-type="float">
            <text:p>14229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646875" calcext:value-type="float">
            <text:p>0,00164687500000000000</text:p>
          </table:table-cell>
          <table:table-cell table:formula="of:=[.D281]-[.D28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51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65277777777778" calcext:value-type="float">
            <text:p>0,00165277777777778000</text:p>
          </table:table-cell>
          <table:table-cell table:formula="of:=[.D282]-[.D28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51" office:value-type="float" office:value="14331" calcext:value-type="float">
            <text:p>14331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65868055555556" calcext:value-type="float">
            <text:p>0,00165868055555556000</text:p>
          </table:table-cell>
          <table:table-cell table:formula="of:=[.D283]-[.D282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51" office:value-type="float" office:value="14382" calcext:value-type="float">
            <text:p>1438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66458333333333" calcext:value-type="float">
            <text:p>0,00166458333333333000</text:p>
          </table:table-cell>
          <table:table-cell table:formula="of:=[.D284]-[.D28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51" office:value-type="float" office:value="14433" calcext:value-type="float">
            <text:p>14433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67048611111111" calcext:value-type="float">
            <text:p>0,00167048611111111000</text:p>
          </table:table-cell>
          <table:table-cell table:formula="of:=[.D285]-[.D28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51" office:value-type="float" office:value="14484" calcext:value-type="float">
            <text:p>1448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67638888888889" calcext:value-type="float">
            <text:p>0,00167638888888889000</text:p>
          </table:table-cell>
          <table:table-cell table:formula="of:=[.D286]-[.D285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51" office:value-type="float" office:value="14535" calcext:value-type="float">
            <text:p>1453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68229166666667" calcext:value-type="float">
            <text:p>0,00168229166666667000</text:p>
          </table:table-cell>
          <table:table-cell table:formula="of:=[.D287]-[.D28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51" office:value-type="float" office:value="14586" calcext:value-type="float">
            <text:p>1458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68819444444444" calcext:value-type="float">
            <text:p>0,00168819444444444000</text:p>
          </table:table-cell>
          <table:table-cell table:formula="of:=[.D288]-[.D28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51" office:value-type="float" office:value="14637" calcext:value-type="float">
            <text:p>14637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69409722222222" calcext:value-type="float">
            <text:p>0,00169409722222222000</text:p>
          </table:table-cell>
          <table:table-cell table:formula="of:=[.D289]-[.D288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51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7" calcext:value-type="float">
            <text:p>0,00170000000000000000</text:p>
          </table:table-cell>
          <table:table-cell table:formula="of:=[.D290]-[.D28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51" office:value-type="float" office:value="14739" calcext:value-type="float">
            <text:p>14739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70590277777778" calcext:value-type="float">
            <text:p>0,00170590277777778000</text:p>
          </table:table-cell>
          <table:table-cell table:formula="of:=[.D291]-[.D29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51" office:value-type="float" office:value="14790" calcext:value-type="float">
            <text:p>1479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71180555555556" calcext:value-type="float">
            <text:p>0,00171180555555556000</text:p>
          </table:table-cell>
          <table:table-cell table:formula="of:=[.D292]-[.D291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51" office:value-type="float" office:value="14841" calcext:value-type="float">
            <text:p>14841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71770833333333" calcext:value-type="float">
            <text:p>0,00171770833333333000</text:p>
          </table:table-cell>
          <table:table-cell table:formula="of:=[.D293]-[.D29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51" office:value-type="float" office:value="14892" calcext:value-type="float">
            <text:p>1489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72361111111111" calcext:value-type="float">
            <text:p>0,00172361111111111000</text:p>
          </table:table-cell>
          <table:table-cell table:formula="of:=[.D294]-[.D29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51" office:value-type="float" office:value="14943" calcext:value-type="float">
            <text:p>14943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72951388888889" calcext:value-type="float">
            <text:p>0,00172951388888889000</text:p>
          </table:table-cell>
          <table:table-cell table:formula="of:=[.D295]-[.D294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51" office:value-type="float" office:value="14994" calcext:value-type="float">
            <text:p>1499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73541666666667" calcext:value-type="float">
            <text:p>0,00173541666666667000</text:p>
          </table:table-cell>
          <table:table-cell table:formula="of:=[.D296]-[.D29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51" office:value-type="float" office:value="15045" calcext:value-type="float">
            <text:p>1504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74131944444444" calcext:value-type="float">
            <text:p>0,00174131944444444000</text:p>
          </table:table-cell>
          <table:table-cell table:formula="of:=[.D297]-[.D29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51" office:value-type="float" office:value="15096" calcext:value-type="float">
            <text:p>1509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74722222222222" calcext:value-type="float">
            <text:p>0,00174722222222222000</text:p>
          </table:table-cell>
          <table:table-cell table:formula="of:=[.D298]-[.D297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51" office:value-type="float" office:value="15147" calcext:value-type="float">
            <text:p>15147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753125" calcext:value-type="float">
            <text:p>0,00175312500000000000</text:p>
          </table:table-cell>
          <table:table-cell table:formula="of:=[.D299]-[.D29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51" office:value-type="float" office:value="15198" calcext:value-type="float">
            <text:p>1519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75902777777778" calcext:value-type="float">
            <text:p>0,00175902777777778000</text:p>
          </table:table-cell>
          <table:table-cell table:formula="of:=[.D300]-[.D29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51" office:value-type="float" office:value="15249" calcext:value-type="float">
            <text:p>15249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76493055555556" calcext:value-type="float">
            <text:p>0,00176493055555556000</text:p>
          </table:table-cell>
          <table:table-cell table:formula="of:=[.D301]-[.D300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51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77083333333333" calcext:value-type="float">
            <text:p>0,00177083333333333000</text:p>
          </table:table-cell>
          <table:table-cell table:formula="of:=[.D302]-[.D30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51" office:value-type="float" office:value="15351" calcext:value-type="float">
            <text:p>15351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77673611111111" calcext:value-type="float">
            <text:p>0,00177673611111111000</text:p>
          </table:table-cell>
          <table:table-cell table:formula="of:=[.D303]-[.D30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51" office:value-type="float" office:value="15402" calcext:value-type="float">
            <text:p>1540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78263888888889" calcext:value-type="float">
            <text:p>0,00178263888888889000</text:p>
          </table:table-cell>
          <table:table-cell table:formula="of:=[.D304]-[.D303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51" office:value-type="float" office:value="15453" calcext:value-type="float">
            <text:p>15453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78854166666667" calcext:value-type="float">
            <text:p>0,00178854166666667000</text:p>
          </table:table-cell>
          <table:table-cell table:formula="of:=[.D305]-[.D30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51" office:value-type="float" office:value="15504" calcext:value-type="float">
            <text:p>1550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79444444444444" calcext:value-type="float">
            <text:p>0,00179444444444444000</text:p>
          </table:table-cell>
          <table:table-cell table:formula="of:=[.D306]-[.D30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51" office:value-type="float" office:value="15555" calcext:value-type="float">
            <text:p>1555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80034722222222" calcext:value-type="float">
            <text:p>0,00180034722222222000</text:p>
          </table:table-cell>
          <table:table-cell table:formula="of:=[.D307]-[.D306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51" office:value-type="float" office:value="15606" calcext:value-type="float">
            <text:p>1560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80625" calcext:value-type="float">
            <text:p>0,00180625000000000000</text:p>
          </table:table-cell>
          <table:table-cell table:formula="of:=[.D308]-[.D30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51" office:value-type="float" office:value="15657" calcext:value-type="float">
            <text:p>15657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81215277777778" calcext:value-type="float">
            <text:p>0,00181215277777778000</text:p>
          </table:table-cell>
          <table:table-cell table:formula="of:=[.D309]-[.D30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51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81805555555556" calcext:value-type="float">
            <text:p>0,00181805555555556000</text:p>
          </table:table-cell>
          <table:table-cell table:formula="of:=[.D310]-[.D309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51" office:value-type="float" office:value="15759" calcext:value-type="float">
            <text:p>15759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82395833333333" calcext:value-type="float">
            <text:p>0,00182395833333333000</text:p>
          </table:table-cell>
          <table:table-cell table:formula="of:=[.D311]-[.D31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51" office:value-type="float" office:value="15810" calcext:value-type="float">
            <text:p>1581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82986111111111" calcext:value-type="float">
            <text:p>0,00182986111111111000</text:p>
          </table:table-cell>
          <table:table-cell table:formula="of:=[.D312]-[.D31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51" office:value-type="float" office:value="15861" calcext:value-type="float">
            <text:p>15861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83576388888889" calcext:value-type="float">
            <text:p>0,00183576388888889000</text:p>
          </table:table-cell>
          <table:table-cell table:formula="of:=[.D313]-[.D312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51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84166666666667" calcext:value-type="float">
            <text:p>0,00184166666666667000</text:p>
          </table:table-cell>
          <table:table-cell table:formula="of:=[.D314]-[.D31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51" office:value-type="float" office:value="15963" calcext:value-type="float">
            <text:p>15963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84756944444444" calcext:value-type="float">
            <text:p>0,00184756944444444000</text:p>
          </table:table-cell>
          <table:table-cell table:formula="of:=[.D315]-[.D31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51" office:value-type="float" office:value="16014" calcext:value-type="float">
            <text:p>1601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85347222222222" calcext:value-type="float">
            <text:p>0,00185347222222222000</text:p>
          </table:table-cell>
          <table:table-cell table:formula="of:=[.D316]-[.D315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51" office:value-type="float" office:value="16065" calcext:value-type="float">
            <text:p>1606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859375" calcext:value-type="float">
            <text:p>0,00185937500000000000</text:p>
          </table:table-cell>
          <table:table-cell table:formula="of:=[.D317]-[.D31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51" office:value-type="float" office:value="16116" calcext:value-type="float">
            <text:p>16116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86527777777778" calcext:value-type="float">
            <text:p>0,00186527777777778000</text:p>
          </table:table-cell>
          <table:table-cell table:formula="of:=[.D318]-[.D31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51" office:value-type="float" office:value="16167" calcext:value-type="float">
            <text:p>16167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87118055555556" calcext:value-type="float">
            <text:p>0,00187118055555556000</text:p>
          </table:table-cell>
          <table:table-cell table:formula="of:=[.D319]-[.D318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51" office:value-type="float" office:value="16218" calcext:value-type="float">
            <text:p>16218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87708333333333" calcext:value-type="float">
            <text:p>0,00187708333333333000</text:p>
          </table:table-cell>
          <table:table-cell table:formula="of:=[.D320]-[.D31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51" office:value-type="float" office:value="16269" calcext:value-type="float">
            <text:p>16269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88298611111111" calcext:value-type="float">
            <text:p>0,00188298611111111000</text:p>
          </table:table-cell>
          <table:table-cell table:formula="of:=[.D321]-[.D32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51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88888888888889" calcext:value-type="float">
            <text:p>0,00188888888888889000</text:p>
          </table:table-cell>
          <table:table-cell table:formula="of:=[.D322]-[.D321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51" office:value-type="float" office:value="16371" calcext:value-type="float">
            <text:p>16371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89479166666667" calcext:value-type="float">
            <text:p>0,00189479166666667000</text:p>
          </table:table-cell>
          <table:table-cell table:formula="of:=[.D323]-[.D32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51" office:value-type="float" office:value="16422" calcext:value-type="float">
            <text:p>16422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90069444444444" calcext:value-type="float">
            <text:p>0,00190069444444444000</text:p>
          </table:table-cell>
          <table:table-cell table:formula="of:=[.D324]-[.D32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51" office:value-type="float" office:value="16473" calcext:value-type="float">
            <text:p>16473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90659722222222" calcext:value-type="float">
            <text:p>0,00190659722222222000</text:p>
          </table:table-cell>
          <table:table-cell table:formula="of:=[.D325]-[.D324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51" office:value-type="float" office:value="16524" calcext:value-type="float">
            <text:p>16524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9125" calcext:value-type="float">
            <text:p>0,00191250000000000000</text:p>
          </table:table-cell>
          <table:table-cell table:formula="of:=[.D326]-[.D32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51" office:value-type="float" office:value="16575" calcext:value-type="float">
            <text:p>165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91840277777778" calcext:value-type="float">
            <text:p>0,00191840277777778000</text:p>
          </table:table-cell>
          <table:table-cell table:formula="of:=[.D327]-[.D32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51" office:value-type="float" office:value="16626" calcext:value-type="float">
            <text:p>16626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92430555555556" calcext:value-type="float">
            <text:p>0,00192430555555556000</text:p>
          </table:table-cell>
          <table:table-cell table:formula="of:=[.D328]-[.D327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51" office:value-type="float" office:value="16677" calcext:value-type="float">
            <text:p>16677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93020833333333" calcext:value-type="float">
            <text:p>0,00193020833333333000</text:p>
          </table:table-cell>
          <table:table-cell table:formula="of:=[.D329]-[.D32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51" office:value-type="float" office:value="16728" calcext:value-type="float">
            <text:p>16728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93611111111111" calcext:value-type="float">
            <text:p>0,00193611111111111000</text:p>
          </table:table-cell>
          <table:table-cell table:formula="of:=[.D330]-[.D32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51" office:value-type="float" office:value="16779" calcext:value-type="float">
            <text:p>16779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94201388888889" calcext:value-type="float">
            <text:p>0,00194201388888889000</text:p>
          </table:table-cell>
          <table:table-cell table:formula="of:=[.D331]-[.D330]" office:value-type="float" office:value="0.00000590277777777763" calcext:value-type="float">
            <text:p>0,00000590277777777763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51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94791666666667" calcext:value-type="float">
            <text:p>0,00194791666666667000</text:p>
          </table:table-cell>
          <table:table-cell table:formula="of:=[.D332]-[.D331]" office:value-type="float" office:value="0.00000590277777777807" calcext:value-type="float">
            <text:p>0,00000590277777777807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51" office:value-type="float" office:value="16881" calcext:value-type="float">
            <text:p>16881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95381944444444" calcext:value-type="float">
            <text:p>0,00195381944444444000</text:p>
          </table:table-cell>
          <table:table-cell table:formula="of:=[.D333]-[.D332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51" office:value-type="float" office:value="16932" calcext:value-type="float">
            <text:p>16932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95972222222222" calcext:value-type="float">
            <text:p>0,00195972222222222000</text:p>
          </table:table-cell>
          <table:table-cell table:formula="of:=[.D334]-[.D33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51" office:value-type="float" office:value="16983" calcext:value-type="float">
            <text:p>16983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965625" calcext:value-type="float">
            <text:p>0,00196562500000000000</text:p>
          </table:table-cell>
          <table:table-cell table:formula="of:=[.D335]-[.D33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51" office:value-type="float" office:value="17034" calcext:value-type="float">
            <text:p>17034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97152777777778" calcext:value-type="float">
            <text:p>0,00197152777777778000</text:p>
          </table:table-cell>
          <table:table-cell table:formula="of:=[.D336]-[.D33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51" office:value-type="float" office:value="17085" calcext:value-type="float">
            <text:p>1708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97743055555556" calcext:value-type="float">
            <text:p>0,00197743055555556000</text:p>
          </table:table-cell>
          <table:table-cell table:formula="of:=[.D337]-[.D33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51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98333333333333" calcext:value-type="float">
            <text:p>0,00198333333333333000</text:p>
          </table:table-cell>
          <table:table-cell table:formula="of:=[.D338]-[.D33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51" office:value-type="float" office:value="17187" calcext:value-type="float">
            <text:p>17187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98923611111111" calcext:value-type="float">
            <text:p>0,00198923611111111000</text:p>
          </table:table-cell>
          <table:table-cell table:formula="of:=[.D339]-[.D338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51" office:value-type="float" office:value="17238" calcext:value-type="float">
            <text:p>17238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99513888888889" calcext:value-type="float">
            <text:p>0,00199513888888889000</text:p>
          </table:table-cell>
          <table:table-cell table:formula="of:=[.D340]-[.D33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51" office:value-type="float" office:value="17289" calcext:value-type="float">
            <text:p>17289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00104166666667" calcext:value-type="float">
            <text:p>0,00200104166666667000</text:p>
          </table:table-cell>
          <table:table-cell table:formula="of:=[.D341]-[.D34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51" office:value-type="float" office:value="17340" calcext:value-type="float">
            <text:p>1734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00694444444444" calcext:value-type="float">
            <text:p>0,00200694444444444000</text:p>
          </table:table-cell>
          <table:table-cell table:formula="of:=[.D342]-[.D34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51" office:value-type="float" office:value="17391" calcext:value-type="float">
            <text:p>17391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01284722222222" calcext:value-type="float">
            <text:p>0,00201284722222222000</text:p>
          </table:table-cell>
          <table:table-cell table:formula="of:=[.D343]-[.D34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51" office:value-type="float" office:value="17442" calcext:value-type="float">
            <text:p>17442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01875" calcext:value-type="float">
            <text:p>0,00201875000000000000</text:p>
          </table:table-cell>
          <table:table-cell table:formula="of:=[.D344]-[.D343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51" office:value-type="float" office:value="17493" calcext:value-type="float">
            <text:p>17493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02465277777778" calcext:value-type="float">
            <text:p>0,00202465277777778000</text:p>
          </table:table-cell>
          <table:table-cell table:formula="of:=[.D345]-[.D34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51" office:value-type="float" office:value="17544" calcext:value-type="float">
            <text:p>17544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03055555555556" calcext:value-type="float">
            <text:p>0,00203055555555556000</text:p>
          </table:table-cell>
          <table:table-cell table:formula="of:=[.D346]-[.D34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51" office:value-type="float" office:value="17595" calcext:value-type="float">
            <text:p>1759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03645833333333" calcext:value-type="float">
            <text:p>0,00203645833333333000</text:p>
          </table:table-cell>
          <table:table-cell table:formula="of:=[.D347]-[.D34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51" office:value-type="float" office:value="17646" calcext:value-type="float">
            <text:p>17646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04236111111111" calcext:value-type="float">
            <text:p>0,00204236111111111000</text:p>
          </table:table-cell>
          <table:table-cell table:formula="of:=[.D348]-[.D34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51" office:value-type="float" office:value="17697" calcext:value-type="float">
            <text:p>17697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04826388888889" calcext:value-type="float">
            <text:p>0,00204826388888889000</text:p>
          </table:table-cell>
          <table:table-cell table:formula="of:=[.D349]-[.D34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51" office:value-type="float" office:value="17748" calcext:value-type="float">
            <text:p>17748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05416666666667" calcext:value-type="float">
            <text:p>0,00205416666666667000</text:p>
          </table:table-cell>
          <table:table-cell table:formula="of:=[.D350]-[.D349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51" office:value-type="float" office:value="17799" calcext:value-type="float">
            <text:p>17799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06006944444444" calcext:value-type="float">
            <text:p>0,00206006944444444000</text:p>
          </table:table-cell>
          <table:table-cell table:formula="of:=[.D351]-[.D35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51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06597222222222" calcext:value-type="float">
            <text:p>0,00206597222222222000</text:p>
          </table:table-cell>
          <table:table-cell table:formula="of:=[.D352]-[.D35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51" office:value-type="float" office:value="17901" calcext:value-type="float">
            <text:p>17901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071875" calcext:value-type="float">
            <text:p>0,00207187500000000000</text:p>
          </table:table-cell>
          <table:table-cell table:formula="of:=[.D353]-[.D35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51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07777777777778" calcext:value-type="float">
            <text:p>0,00207777777777778000</text:p>
          </table:table-cell>
          <table:table-cell table:formula="of:=[.D354]-[.D35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51" office:value-type="float" office:value="18003" calcext:value-type="float">
            <text:p>18003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08368055555556" calcext:value-type="float">
            <text:p>0,00208368055555556000</text:p>
          </table:table-cell>
          <table:table-cell table:formula="of:=[.D355]-[.D35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51" office:value-type="float" office:value="18054" calcext:value-type="float">
            <text:p>18054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08958333333333" calcext:value-type="float">
            <text:p>0,00208958333333333000</text:p>
          </table:table-cell>
          <table:table-cell table:formula="of:=[.D356]-[.D355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51" office:value-type="float" office:value="18105" calcext:value-type="float">
            <text:p>1810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09548611111111" calcext:value-type="float">
            <text:p>0,00209548611111111000</text:p>
          </table:table-cell>
          <table:table-cell table:formula="of:=[.D357]-[.D35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51" office:value-type="float" office:value="18156" calcext:value-type="float">
            <text:p>18156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10138888888889" calcext:value-type="float">
            <text:p>0,00210138888888889000</text:p>
          </table:table-cell>
          <table:table-cell table:formula="of:=[.D358]-[.D35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51" office:value-type="float" office:value="18207" calcext:value-type="float">
            <text:p>18207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10729166666667" calcext:value-type="float">
            <text:p>0,00210729166666667000</text:p>
          </table:table-cell>
          <table:table-cell table:formula="of:=[.D359]-[.D35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51" office:value-type="float" office:value="18258" calcext:value-type="float">
            <text:p>18258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11319444444444" calcext:value-type="float">
            <text:p>0,00211319444444444000</text:p>
          </table:table-cell>
          <table:table-cell table:formula="of:=[.D360]-[.D35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51" office:value-type="float" office:value="18309" calcext:value-type="float">
            <text:p>18309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11909722222222" calcext:value-type="float">
            <text:p>0,00211909722222222000</text:p>
          </table:table-cell>
          <table:table-cell table:formula="of:=[.D361]-[.D36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51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125" calcext:value-type="float">
            <text:p>0,00212500000000000000</text:p>
          </table:table-cell>
          <table:table-cell table:formula="of:=[.D362]-[.D361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51" office:value-type="float" office:value="18411" calcext:value-type="float">
            <text:p>18411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13090277777778" calcext:value-type="float">
            <text:p>0,00213090277777778000</text:p>
          </table:table-cell>
          <table:table-cell table:formula="of:=[.D363]-[.D36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51" office:value-type="float" office:value="18462" calcext:value-type="float">
            <text:p>18462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13680555555556" calcext:value-type="float">
            <text:p>0,00213680555555556000</text:p>
          </table:table-cell>
          <table:table-cell table:formula="of:=[.D364]-[.D36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51" office:value-type="float" office:value="18513" calcext:value-type="float">
            <text:p>18513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14270833333333" calcext:value-type="float">
            <text:p>0,00214270833333333000</text:p>
          </table:table-cell>
          <table:table-cell table:formula="of:=[.D365]-[.D36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51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14861111111111" calcext:value-type="float">
            <text:p>0,00214861111111111000</text:p>
          </table:table-cell>
          <table:table-cell table:formula="of:=[.D366]-[.D36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51" office:value-type="float" office:value="18615" calcext:value-type="float">
            <text:p>1861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15451388888889" calcext:value-type="float">
            <text:p>0,00215451388888889000</text:p>
          </table:table-cell>
          <table:table-cell table:formula="of:=[.D367]-[.D36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51" office:value-type="float" office:value="18666" calcext:value-type="float">
            <text:p>18666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16041666666667" calcext:value-type="float">
            <text:p>0,00216041666666667000</text:p>
          </table:table-cell>
          <table:table-cell table:formula="of:=[.D368]-[.D367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51" office:value-type="float" office:value="18717" calcext:value-type="float">
            <text:p>18717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16631944444444" calcext:value-type="float">
            <text:p>0,00216631944444444000</text:p>
          </table:table-cell>
          <table:table-cell table:formula="of:=[.D369]-[.D36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51" office:value-type="float" office:value="18768" calcext:value-type="float">
            <text:p>18768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17222222222222" calcext:value-type="float">
            <text:p>0,00217222222222222000</text:p>
          </table:table-cell>
          <table:table-cell table:formula="of:=[.D370]-[.D36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51" office:value-type="float" office:value="18819" calcext:value-type="float">
            <text:p>18819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178125" calcext:value-type="float">
            <text:p>0,00217812500000000000</text:p>
          </table:table-cell>
          <table:table-cell table:formula="of:=[.D371]-[.D37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51" office:value-type="float" office:value="18870" calcext:value-type="float">
            <text:p>1887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18402777777778" calcext:value-type="float">
            <text:p>0,00218402777777778000</text:p>
          </table:table-cell>
          <table:table-cell table:formula="of:=[.D372]-[.D37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51" office:value-type="float" office:value="18921" calcext:value-type="float">
            <text:p>18921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18993055555556" calcext:value-type="float">
            <text:p>0,00218993055555556000</text:p>
          </table:table-cell>
          <table:table-cell table:formula="of:=[.D373]-[.D37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51" office:value-type="float" office:value="18972" calcext:value-type="float">
            <text:p>18972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19583333333333" calcext:value-type="float">
            <text:p>0,00219583333333333000</text:p>
          </table:table-cell>
          <table:table-cell table:formula="of:=[.D374]-[.D373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51" office:value-type="float" office:value="19023" calcext:value-type="float">
            <text:p>19023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20173611111111" calcext:value-type="float">
            <text:p>0,00220173611111111000</text:p>
          </table:table-cell>
          <table:table-cell table:formula="of:=[.D375]-[.D37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51" office:value-type="float" office:value="19074" calcext:value-type="float">
            <text:p>19074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20763888888889" calcext:value-type="float">
            <text:p>0,00220763888888889000</text:p>
          </table:table-cell>
          <table:table-cell table:formula="of:=[.D376]-[.D37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51" office:value-type="float" office:value="19125" calcext:value-type="float">
            <text:p>191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21354166666667" calcext:value-type="float">
            <text:p>0,00221354166666667000</text:p>
          </table:table-cell>
          <table:table-cell table:formula="of:=[.D377]-[.D37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51" office:value-type="float" office:value="19176" calcext:value-type="float">
            <text:p>19176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21944444444444" calcext:value-type="float">
            <text:p>0,00221944444444444000</text:p>
          </table:table-cell>
          <table:table-cell table:formula="of:=[.D378]-[.D37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51" office:value-type="float" office:value="19227" calcext:value-type="float">
            <text:p>19227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22534722222222" calcext:value-type="float">
            <text:p>0,00222534722222222000</text:p>
          </table:table-cell>
          <table:table-cell table:formula="of:=[.D379]-[.D37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51" office:value-type="float" office:value="19278" calcext:value-type="float">
            <text:p>19278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23125" calcext:value-type="float">
            <text:p>0,00223125000000000000</text:p>
          </table:table-cell>
          <table:table-cell table:formula="of:=[.D380]-[.D379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51" office:value-type="float" office:value="19329" calcext:value-type="float">
            <text:p>19329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23715277777778" calcext:value-type="float">
            <text:p>0,00223715277777778000</text:p>
          </table:table-cell>
          <table:table-cell table:formula="of:=[.D381]-[.D38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51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24305555555556" calcext:value-type="float">
            <text:p>0,00224305555555556000</text:p>
          </table:table-cell>
          <table:table-cell table:formula="of:=[.D382]-[.D38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51" office:value-type="float" office:value="19431" calcext:value-type="float">
            <text:p>19431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24895833333333" calcext:value-type="float">
            <text:p>0,00224895833333333000</text:p>
          </table:table-cell>
          <table:table-cell table:formula="of:=[.D383]-[.D38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51" office:value-type="float" office:value="19482" calcext:value-type="float">
            <text:p>19482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25486111111111" calcext:value-type="float">
            <text:p>0,00225486111111111000</text:p>
          </table:table-cell>
          <table:table-cell table:formula="of:=[.D384]-[.D38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51" office:value-type="float" office:value="19533" calcext:value-type="float">
            <text:p>19533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26076388888889" calcext:value-type="float">
            <text:p>0,00226076388888889000</text:p>
          </table:table-cell>
          <table:table-cell table:formula="of:=[.D385]-[.D38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51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26666666666667" calcext:value-type="float">
            <text:p>0,00226666666666667000</text:p>
          </table:table-cell>
          <table:table-cell table:formula="of:=[.D386]-[.D385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51" office:value-type="float" office:value="19635" calcext:value-type="float">
            <text:p>1963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27256944444444" calcext:value-type="float">
            <text:p>0,00227256944444444000</text:p>
          </table:table-cell>
          <table:table-cell table:formula="of:=[.D387]-[.D38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51" office:value-type="float" office:value="19686" calcext:value-type="float">
            <text:p>19686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27847222222222" calcext:value-type="float">
            <text:p>0,00227847222222222000</text:p>
          </table:table-cell>
          <table:table-cell table:formula="of:=[.D388]-[.D38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51" office:value-type="float" office:value="19737" calcext:value-type="float">
            <text:p>19737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284375" calcext:value-type="float">
            <text:p>0,00228437500000000000</text:p>
          </table:table-cell>
          <table:table-cell table:formula="of:=[.D389]-[.D38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51" office:value-type="float" office:value="19788" calcext:value-type="float">
            <text:p>19788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29027777777778" calcext:value-type="float">
            <text:p>0,00229027777777778000</text:p>
          </table:table-cell>
          <table:table-cell table:formula="of:=[.D390]-[.D38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51" office:value-type="float" office:value="19839" calcext:value-type="float">
            <text:p>19839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29618055555556" calcext:value-type="float">
            <text:p>0,00229618055555556000</text:p>
          </table:table-cell>
          <table:table-cell table:formula="of:=[.D391]-[.D39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51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30208333333333" calcext:value-type="float">
            <text:p>0,00230208333333333000</text:p>
          </table:table-cell>
          <table:table-cell table:formula="of:=[.D392]-[.D391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51" office:value-type="float" office:value="19941" calcext:value-type="float">
            <text:p>19941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30798611111111" calcext:value-type="float">
            <text:p>0,00230798611111111000</text:p>
          </table:table-cell>
          <table:table-cell table:formula="of:=[.D393]-[.D39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51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31388888888889" calcext:value-type="float">
            <text:p>0,00231388888888889000</text:p>
          </table:table-cell>
          <table:table-cell table:formula="of:=[.D394]-[.D39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51" office:value-type="float" office:value="20043" calcext:value-type="float">
            <text:p>20043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31979166666667" calcext:value-type="float">
            <text:p>0,00231979166666667000</text:p>
          </table:table-cell>
          <table:table-cell table:formula="of:=[.D395]-[.D39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51" office:value-type="float" office:value="20094" calcext:value-type="float">
            <text:p>20094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32569444444444" calcext:value-type="float">
            <text:p>0,00232569444444444000</text:p>
          </table:table-cell>
          <table:table-cell table:formula="of:=[.D396]-[.D39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51" office:value-type="float" office:value="20145" calcext:value-type="float">
            <text:p>2014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33159722222222" calcext:value-type="float">
            <text:p>0,00233159722222222000</text:p>
          </table:table-cell>
          <table:table-cell table:formula="of:=[.D397]-[.D39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51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3375" calcext:value-type="float">
            <text:p>0,00233750000000000000</text:p>
          </table:table-cell>
          <table:table-cell table:formula="of:=[.D398]-[.D397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51" office:value-type="float" office:value="20247" calcext:value-type="float">
            <text:p>20247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34340277777778" calcext:value-type="float">
            <text:p>0,00234340277777778000</text:p>
          </table:table-cell>
          <table:table-cell table:formula="of:=[.D399]-[.D39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51" office:value-type="float" office:value="20298" calcext:value-type="float">
            <text:p>20298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34930555555556" calcext:value-type="float">
            <text:p>0,00234930555555556000</text:p>
          </table:table-cell>
          <table:table-cell table:formula="of:=[.D400]-[.D39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51" office:value-type="float" office:value="20349" calcext:value-type="float">
            <text:p>20349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35520833333333" calcext:value-type="float">
            <text:p>0,00235520833333333000</text:p>
          </table:table-cell>
          <table:table-cell table:formula="of:=[.D401]-[.D40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51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36111111111111" calcext:value-type="float">
            <text:p>0,00236111111111111000</text:p>
          </table:table-cell>
          <table:table-cell table:formula="of:=[.D402]-[.D40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51" office:value-type="float" office:value="20451" calcext:value-type="float">
            <text:p>20451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36701388888889" calcext:value-type="float">
            <text:p>0,00236701388888889000</text:p>
          </table:table-cell>
          <table:table-cell table:formula="of:=[.D403]-[.D40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51" office:value-type="float" office:value="20502" calcext:value-type="float">
            <text:p>20502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37291666666667" calcext:value-type="float">
            <text:p>0,00237291666666667000</text:p>
          </table:table-cell>
          <table:table-cell table:formula="of:=[.D404]-[.D403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51" office:value-type="float" office:value="20553" calcext:value-type="float">
            <text:p>20553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37881944444444" calcext:value-type="float">
            <text:p>0,00237881944444444000</text:p>
          </table:table-cell>
          <table:table-cell table:formula="of:=[.D405]-[.D40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51" office:value-type="float" office:value="20604" calcext:value-type="float">
            <text:p>20604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38472222222222" calcext:value-type="float">
            <text:p>0,00238472222222222000</text:p>
          </table:table-cell>
          <table:table-cell table:formula="of:=[.D406]-[.D40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51" office:value-type="float" office:value="20655" calcext:value-type="float">
            <text:p>2065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390625" calcext:value-type="float">
            <text:p>0,00239062500000000000</text:p>
          </table:table-cell>
          <table:table-cell table:formula="of:=[.D407]-[.D40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51" office:value-type="float" office:value="20706" calcext:value-type="float">
            <text:p>20706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39652777777778" calcext:value-type="float">
            <text:p>0,00239652777777778000</text:p>
          </table:table-cell>
          <table:table-cell table:formula="of:=[.D408]-[.D40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51" office:value-type="float" office:value="20757" calcext:value-type="float">
            <text:p>20757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40243055555556" calcext:value-type="float">
            <text:p>0,00240243055555556000</text:p>
          </table:table-cell>
          <table:table-cell table:formula="of:=[.D409]-[.D40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51" office:value-type="float" office:value="20808" calcext:value-type="float">
            <text:p>20808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40833333333333" calcext:value-type="float">
            <text:p>0,00240833333333333000</text:p>
          </table:table-cell>
          <table:table-cell table:formula="of:=[.D410]-[.D409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51" office:value-type="float" office:value="20859" calcext:value-type="float">
            <text:p>20859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41423611111111" calcext:value-type="float">
            <text:p>0,00241423611111111000</text:p>
          </table:table-cell>
          <table:table-cell table:formula="of:=[.D411]-[.D41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51" office:value-type="float" office:value="20910" calcext:value-type="float">
            <text:p>2091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42013888888889" calcext:value-type="float">
            <text:p>0,00242013888888889000</text:p>
          </table:table-cell>
          <table:table-cell table:formula="of:=[.D412]-[.D41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51" office:value-type="float" office:value="20961" calcext:value-type="float">
            <text:p>20961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42604166666667" calcext:value-type="float">
            <text:p>0,00242604166666667000</text:p>
          </table:table-cell>
          <table:table-cell table:formula="of:=[.D413]-[.D41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51" office:value-type="float" office:value="21012" calcext:value-type="float">
            <text:p>21012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43194444444444" calcext:value-type="float">
            <text:p>0,00243194444444444000</text:p>
          </table:table-cell>
          <table:table-cell table:formula="of:=[.D414]-[.D41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51" office:value-type="float" office:value="21063" calcext:value-type="float">
            <text:p>21063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43784722222222" calcext:value-type="float">
            <text:p>0,00243784722222222000</text:p>
          </table:table-cell>
          <table:table-cell table:formula="of:=[.D415]-[.D41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51" office:value-type="float" office:value="21114" calcext:value-type="float">
            <text:p>21114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44375" calcext:value-type="float">
            <text:p>0,00244375000000000000</text:p>
          </table:table-cell>
          <table:table-cell table:formula="of:=[.D416]-[.D415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51" office:value-type="float" office:value="21165" calcext:value-type="float">
            <text:p>2116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44965277777778" calcext:value-type="float">
            <text:p>0,00244965277777778000</text:p>
          </table:table-cell>
          <table:table-cell table:formula="of:=[.D417]-[.D41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51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45555555555556" calcext:value-type="float">
            <text:p>0,00245555555555556000</text:p>
          </table:table-cell>
          <table:table-cell table:formula="of:=[.D418]-[.D41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51" office:value-type="float" office:value="21267" calcext:value-type="float">
            <text:p>21267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46145833333333" calcext:value-type="float">
            <text:p>0,00246145833333333000</text:p>
          </table:table-cell>
          <table:table-cell table:formula="of:=[.D419]-[.D41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51" office:value-type="float" office:value="21318" calcext:value-type="float">
            <text:p>21318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46736111111111" calcext:value-type="float">
            <text:p>0,00246736111111111000</text:p>
          </table:table-cell>
          <table:table-cell table:formula="of:=[.D420]-[.D41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51" office:value-type="float" office:value="21369" calcext:value-type="float">
            <text:p>21369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47326388888889" calcext:value-type="float">
            <text:p>0,00247326388888889000</text:p>
          </table:table-cell>
          <table:table-cell table:formula="of:=[.D421]-[.D42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51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47916666666667" calcext:value-type="float">
            <text:p>0,00247916666666667000</text:p>
          </table:table-cell>
          <table:table-cell table:formula="of:=[.D422]-[.D421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51" office:value-type="float" office:value="21471" calcext:value-type="float">
            <text:p>21471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48506944444444" calcext:value-type="float">
            <text:p>0,00248506944444444000</text:p>
          </table:table-cell>
          <table:table-cell table:formula="of:=[.D423]-[.D42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51" office:value-type="float" office:value="21522" calcext:value-type="float">
            <text:p>21522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49097222222222" calcext:value-type="float">
            <text:p>0,00249097222222222000</text:p>
          </table:table-cell>
          <table:table-cell table:formula="of:=[.D424]-[.D42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51" office:value-type="float" office:value="21573" calcext:value-type="float">
            <text:p>21573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496875" calcext:value-type="float">
            <text:p>0,00249687500000000000</text:p>
          </table:table-cell>
          <table:table-cell table:formula="of:=[.D425]-[.D42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51" office:value-type="float" office:value="21624" calcext:value-type="float">
            <text:p>21624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50277777777778" calcext:value-type="float">
            <text:p>0,00250277777777778000</text:p>
          </table:table-cell>
          <table:table-cell table:formula="of:=[.D426]-[.D42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51" office:value-type="float" office:value="21675" calcext:value-type="float">
            <text:p>2167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50868055555556" calcext:value-type="float">
            <text:p>0,00250868055555556000</text:p>
          </table:table-cell>
          <table:table-cell table:formula="of:=[.D427]-[.D42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51" office:value-type="float" office:value="21726" calcext:value-type="float">
            <text:p>21726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51458333333333" calcext:value-type="float">
            <text:p>0,00251458333333333000</text:p>
          </table:table-cell>
          <table:table-cell table:formula="of:=[.D428]-[.D427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51" office:value-type="float" office:value="21777" calcext:value-type="float">
            <text:p>21777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52048611111111" calcext:value-type="float">
            <text:p>0,00252048611111111000</text:p>
          </table:table-cell>
          <table:table-cell table:formula="of:=[.D429]-[.D42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51" office:value-type="float" office:value="21828" calcext:value-type="float">
            <text:p>21828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52638888888889" calcext:value-type="float">
            <text:p>0,00252638888888889000</text:p>
          </table:table-cell>
          <table:table-cell table:formula="of:=[.D430]-[.D42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51" office:value-type="float" office:value="21879" calcext:value-type="float">
            <text:p>21879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53229166666667" calcext:value-type="float">
            <text:p>0,00253229166666667000</text:p>
          </table:table-cell>
          <table:table-cell table:formula="of:=[.D431]-[.D43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51" office:value-type="float" office:value="21930" calcext:value-type="float">
            <text:p>2193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53819444444444" calcext:value-type="float">
            <text:p>0,00253819444444444000</text:p>
          </table:table-cell>
          <table:table-cell table:formula="of:=[.D432]-[.D43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51" office:value-type="float" office:value="21981" calcext:value-type="float">
            <text:p>21981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54409722222222" calcext:value-type="float">
            <text:p>0,00254409722222222000</text:p>
          </table:table-cell>
          <table:table-cell table:formula="of:=[.D433]-[.D43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51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55" calcext:value-type="float">
            <text:p>0,00255000000000000000</text:p>
          </table:table-cell>
          <table:table-cell table:formula="of:=[.D434]-[.D433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51" office:value-type="float" office:value="22083" calcext:value-type="float">
            <text:p>22083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55590277777778" calcext:value-type="float">
            <text:p>0,00255590277777778000</text:p>
          </table:table-cell>
          <table:table-cell table:formula="of:=[.D435]-[.D43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51" office:value-type="float" office:value="22134" calcext:value-type="float">
            <text:p>22134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56180555555556" calcext:value-type="float">
            <text:p>0,00256180555555556000</text:p>
          </table:table-cell>
          <table:table-cell table:formula="of:=[.D436]-[.D43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51" office:value-type="float" office:value="22185" calcext:value-type="float">
            <text:p>2218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56770833333333" calcext:value-type="float">
            <text:p>0,00256770833333333000</text:p>
          </table:table-cell>
          <table:table-cell table:formula="of:=[.D437]-[.D43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51" office:value-type="float" office:value="22236" calcext:value-type="float">
            <text:p>22236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57361111111111" calcext:value-type="float">
            <text:p>0,00257361111111111000</text:p>
          </table:table-cell>
          <table:table-cell table:formula="of:=[.D438]-[.D43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51" office:value-type="float" office:value="22287" calcext:value-type="float">
            <text:p>22287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57951388888889" calcext:value-type="float">
            <text:p>0,00257951388888889000</text:p>
          </table:table-cell>
          <table:table-cell table:formula="of:=[.D439]-[.D43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51" office:value-type="float" office:value="22338" calcext:value-type="float">
            <text:p>22338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58541666666667" calcext:value-type="float">
            <text:p>0,00258541666666667000</text:p>
          </table:table-cell>
          <table:table-cell table:formula="of:=[.D440]-[.D439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51" office:value-type="float" office:value="22389" calcext:value-type="float">
            <text:p>22389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59131944444444" calcext:value-type="float">
            <text:p>0,00259131944444444000</text:p>
          </table:table-cell>
          <table:table-cell table:formula="of:=[.D441]-[.D44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51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59722222222222" calcext:value-type="float">
            <text:p>0,00259722222222222000</text:p>
          </table:table-cell>
          <table:table-cell table:formula="of:=[.D442]-[.D44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51" office:value-type="float" office:value="22491" calcext:value-type="float">
            <text:p>22491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603125" calcext:value-type="float">
            <text:p>0,00260312500000000000</text:p>
          </table:table-cell>
          <table:table-cell table:formula="of:=[.D443]-[.D44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51" office:value-type="float" office:value="22542" calcext:value-type="float">
            <text:p>22542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60902777777778" calcext:value-type="float">
            <text:p>0,00260902777777778000</text:p>
          </table:table-cell>
          <table:table-cell table:formula="of:=[.D444]-[.D44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51" office:value-type="float" office:value="22593" calcext:value-type="float">
            <text:p>22593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61493055555556" calcext:value-type="float">
            <text:p>0,00261493055555556000</text:p>
          </table:table-cell>
          <table:table-cell table:formula="of:=[.D445]-[.D44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51" office:value-type="float" office:value="22644" calcext:value-type="float">
            <text:p>22644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62083333333333" calcext:value-type="float">
            <text:p>0,00262083333333333000</text:p>
          </table:table-cell>
          <table:table-cell table:formula="of:=[.D446]-[.D445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51" office:value-type="float" office:value="22695" calcext:value-type="float">
            <text:p>2269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62673611111111" calcext:value-type="float">
            <text:p>0,00262673611111111000</text:p>
          </table:table-cell>
          <table:table-cell table:formula="of:=[.D447]-[.D44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51" office:value-type="float" office:value="22746" calcext:value-type="float">
            <text:p>22746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63263888888889" calcext:value-type="float">
            <text:p>0,00263263888888889000</text:p>
          </table:table-cell>
          <table:table-cell table:formula="of:=[.D448]-[.D44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51" office:value-type="float" office:value="22797" calcext:value-type="float">
            <text:p>22797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63854166666667" calcext:value-type="float">
            <text:p>0,00263854166666667000</text:p>
          </table:table-cell>
          <table:table-cell table:formula="of:=[.D449]-[.D44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51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64444444444444" calcext:value-type="float">
            <text:p>0,00264444444444444000</text:p>
          </table:table-cell>
          <table:table-cell table:formula="of:=[.D450]-[.D44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51" office:value-type="float" office:value="22899" calcext:value-type="float">
            <text:p>22899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65034722222222" calcext:value-type="float">
            <text:p>0,00265034722222222000</text:p>
          </table:table-cell>
          <table:table-cell table:formula="of:=[.D451]-[.D45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51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65625" calcext:value-type="float">
            <text:p>0,00265625000000000000</text:p>
          </table:table-cell>
          <table:table-cell table:formula="of:=[.D452]-[.D451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51" office:value-type="float" office:value="23001" calcext:value-type="float">
            <text:p>23001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66215277777778" calcext:value-type="float">
            <text:p>0,00266215277777778000</text:p>
          </table:table-cell>
          <table:table-cell table:formula="of:=[.D453]-[.D45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51" office:value-type="float" office:value="23052" calcext:value-type="float">
            <text:p>23052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66805555555556" calcext:value-type="float">
            <text:p>0,00266805555555556000</text:p>
          </table:table-cell>
          <table:table-cell table:formula="of:=[.D454]-[.D453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51" office:value-type="float" office:value="23103" calcext:value-type="float">
            <text:p>23103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67395833333333" calcext:value-type="float">
            <text:p>0,00267395833333333000</text:p>
          </table:table-cell>
          <table:table-cell table:formula="of:=[.D455]-[.D45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51" office:value-type="float" office:value="23154" calcext:value-type="float">
            <text:p>23154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67986111111111" calcext:value-type="float">
            <text:p>0,00267986111111111000</text:p>
          </table:table-cell>
          <table:table-cell table:formula="of:=[.D456]-[.D45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51" office:value-type="float" office:value="23205" calcext:value-type="float">
            <text:p>2320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68576388888889" calcext:value-type="float">
            <text:p>0,00268576388888889000</text:p>
          </table:table-cell>
          <table:table-cell table:formula="of:=[.D457]-[.D45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51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69166666666667" calcext:value-type="float">
            <text:p>0,00269166666666667000</text:p>
          </table:table-cell>
          <table:table-cell table:formula="of:=[.D458]-[.D457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51" office:value-type="float" office:value="23307" calcext:value-type="float">
            <text:p>23307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69756944444444" calcext:value-type="float">
            <text:p>0,00269756944444444000</text:p>
          </table:table-cell>
          <table:table-cell table:formula="of:=[.D459]-[.D45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51" office:value-type="float" office:value="23358" calcext:value-type="float">
            <text:p>23358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70347222222222" calcext:value-type="float">
            <text:p>0,00270347222222222000</text:p>
          </table:table-cell>
          <table:table-cell table:formula="of:=[.D460]-[.D459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51" office:value-type="float" office:value="23409" calcext:value-type="float">
            <text:p>23409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709375" calcext:value-type="float">
            <text:p>0,00270937500000000000</text:p>
          </table:table-cell>
          <table:table-cell table:formula="of:=[.D461]-[.D46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51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71527777777778" calcext:value-type="float">
            <text:p>0,00271527777777778000</text:p>
          </table:table-cell>
          <table:table-cell table:formula="of:=[.D462]-[.D461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51" office:value-type="float" office:value="23511" calcext:value-type="float">
            <text:p>23511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72118055555556" calcext:value-type="float">
            <text:p>0,00272118055555556000</text:p>
          </table:table-cell>
          <table:table-cell table:formula="of:=[.D463]-[.D462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51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72708333333333" calcext:value-type="float">
            <text:p>0,00272708333333333000</text:p>
          </table:table-cell>
          <table:table-cell table:formula="of:=[.D464]-[.D463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51" office:value-type="float" office:value="23613" calcext:value-type="float">
            <text:p>23613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73298611111111" calcext:value-type="float">
            <text:p>0,00273298611111111000</text:p>
          </table:table-cell>
          <table:table-cell table:formula="of:=[.D465]-[.D464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51" office:value-type="float" office:value="23664" calcext:value-type="float">
            <text:p>23664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73888888888889" calcext:value-type="float">
            <text:p>0,00273888888888889000</text:p>
          </table:table-cell>
          <table:table-cell table:formula="of:=[.D466]-[.D465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51" office:value-type="float" office:value="23715" calcext:value-type="float">
            <text:p>2371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74479166666667" calcext:value-type="float">
            <text:p>0,00274479166666667000</text:p>
          </table:table-cell>
          <table:table-cell table:formula="of:=[.D467]-[.D466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51" office:value-type="float" office:value="23766" calcext:value-type="float">
            <text:p>23766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75069444444444" calcext:value-type="float">
            <text:p>0,00275069444444444000</text:p>
          </table:table-cell>
          <table:table-cell table:formula="of:=[.D468]-[.D467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51" office:value-type="float" office:value="23817" calcext:value-type="float">
            <text:p>23817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75659722222222" calcext:value-type="float">
            <text:p>0,00275659722222222000</text:p>
          </table:table-cell>
          <table:table-cell table:formula="of:=[.D469]-[.D468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51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7625" calcext:value-type="float">
            <text:p>0,00276250000000000000</text:p>
          </table:table-cell>
          <table:table-cell table:formula="of:=[.D470]-[.D469]" office:value-type="float" office:value="0.00000590277777777742" calcext:value-type="float">
            <text:p>0,00000590277777777742</text:p>
          </table:table-cell>
          <table:table-cell table:number-columns-repeated="16379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51" office:value-type="float" office:value="23919" calcext:value-type="float">
            <text:p>23919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76840277777778" calcext:value-type="float">
            <text:p>0,00276840277777778000</text:p>
          </table:table-cell>
          <table:table-cell table:formula="of:=[.D471]-[.D470]" office:value-type="float" office:value="0.00000590277777777785" calcext:value-type="float">
            <text:p>0,00000590277777777785</text:p>
          </table:table-cell>
          <table:table-cell table:number-columns-repeated="16379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51" office:value-type="float" office:value="23970" calcext:value-type="float">
            <text:p>2397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77430555555556" calcext:value-type="float">
            <text:p>0,00277430555555556000</text:p>
          </table:table-cell>
          <table:table-cell table:formula="of:=#REF!-[.D471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1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46:31.369174044</meta:creation-date>
    <dc:date>2026-05-17T17:46:40.042778771</dc:date>
    <meta:editing-duration>PT10S</meta:editing-duration>
    <meta:editing-cycles>1</meta:editing-cycles>
    <meta:document-statistic meta:table-count="1" meta:cell-count="2355" meta:object-count="0"/>
    <meta:generator>LibreOffice/24.2.7.2$Linux_X86_64 LibreOffice_project/420$Build-2</meta:generator>
  </office:meta>
</office:document-meta>
</file>