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17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196759259259259" calcext:value-type="float">
            <text:p>0,00000196759259259259</text:p>
          </table:table-cell>
          <table:table-cell table:formula="of:=[.D3]-[.D2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7" office:value-type="float" office:value="34" calcext:value-type="float">
            <text:p>3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393518518518519" calcext:value-type="float">
            <text:p>0,00000393518518518519</text:p>
          </table:table-cell>
          <table:table-cell table:formula="of:=[.D4]-[.D3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7" office:value-type="float" office:value="51" calcext:value-type="float">
            <text:p>51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590277777777778" calcext:value-type="float">
            <text:p>0,00000590277777777778</text:p>
          </table:table-cell>
          <table:table-cell table:formula="of:=[.D5]-[.D4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17" office:value-type="float" office:value="68" calcext:value-type="float">
            <text:p>6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787037037037037" calcext:value-type="float">
            <text:p>0,00000787037037037037</text:p>
          </table:table-cell>
          <table:table-cell table:formula="of:=[.D6]-[.D5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7" office:value-type="float" office:value="85" calcext:value-type="float">
            <text:p>8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0983796296296296" calcext:value-type="float">
            <text:p>0,00000983796296296296</text:p>
          </table:table-cell>
          <table:table-cell table:formula="of:=[.D7]-[.D6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17" office:value-type="float" office:value="102" calcext:value-type="float">
            <text:p>10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18055555555556" calcext:value-type="float">
            <text:p>0,00001180555555555560</text:p>
          </table:table-cell>
          <table:table-cell table:formula="of:=[.D8]-[.D7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17" office:value-type="float" office:value="119" calcext:value-type="float">
            <text:p>119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137731481481481" calcext:value-type="float">
            <text:p>0,00001377314814814820</text:p>
          </table:table-cell>
          <table:table-cell table:formula="of:=[.D9]-[.D8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17" office:value-type="float" office:value="136" calcext:value-type="float">
            <text:p>13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157407407407407" calcext:value-type="float">
            <text:p>0,00001574074074074070</text:p>
          </table:table-cell>
          <table:table-cell table:formula="of:=[.D10]-[.D9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17" office:value-type="float" office:value="153" calcext:value-type="float">
            <text:p>153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177083333333333" calcext:value-type="float">
            <text:p>0,00001770833333333330</text:p>
          </table:table-cell>
          <table:table-cell table:formula="of:=[.D11]-[.D10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17" office:value-type="float" office:value="170" calcext:value-type="float">
            <text:p>17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196759259259259" calcext:value-type="float">
            <text:p>0,00001967592592592590</text:p>
          </table:table-cell>
          <table:table-cell table:formula="of:=[.D12]-[.D11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17" office:value-type="float" office:value="187" calcext:value-type="float">
            <text:p>187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216435185185185" calcext:value-type="float">
            <text:p>0,00002164351851851850</text:p>
          </table:table-cell>
          <table:table-cell table:formula="of:=[.D13]-[.D12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17" office:value-type="float" office:value="204" calcext:value-type="float">
            <text:p>20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236111111111111" calcext:value-type="float">
            <text:p>0,00002361111111111110</text:p>
          </table:table-cell>
          <table:table-cell table:formula="of:=[.D14]-[.D13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17" office:value-type="float" office:value="221" calcext:value-type="float">
            <text:p>221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255787037037037" calcext:value-type="float">
            <text:p>0,00002557870370370370</text:p>
          </table:table-cell>
          <table:table-cell table:formula="of:=[.D15]-[.D14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17" office:value-type="float" office:value="238" calcext:value-type="float">
            <text:p>23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275462962962963" calcext:value-type="float">
            <text:p>0,00002754629629629630</text:p>
          </table:table-cell>
          <table:table-cell table:formula="of:=[.D16]-[.D15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17" office:value-type="float" office:value="255" calcext:value-type="float">
            <text:p>25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295138888888889" calcext:value-type="float">
            <text:p>0,00002951388888888890</text:p>
          </table:table-cell>
          <table:table-cell table:formula="of:=[.D17]-[.D16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17" office:value-type="float" office:value="272" calcext:value-type="float">
            <text:p>27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314814814814815" calcext:value-type="float">
            <text:p>0,00003148148148148150</text:p>
          </table:table-cell>
          <table:table-cell table:formula="of:=[.D18]-[.D17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17" office:value-type="float" office:value="289" calcext:value-type="float">
            <text:p>289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334490740740741" calcext:value-type="float">
            <text:p>0,00003344907407407410</text:p>
          </table:table-cell>
          <table:table-cell table:formula="of:=[.D19]-[.D18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17" office:value-type="float" office:value="306" calcext:value-type="float">
            <text:p>30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354166666666667" calcext:value-type="float">
            <text:p>0,00003541666666666670</text:p>
          </table:table-cell>
          <table:table-cell table:formula="of:=[.D20]-[.D19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17" office:value-type="float" office:value="323" calcext:value-type="float">
            <text:p>323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373842592592593" calcext:value-type="float">
            <text:p>0,00003738425925925930</text:p>
          </table:table-cell>
          <table:table-cell table:formula="of:=[.D21]-[.D20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17" office:value-type="float" office:value="340" calcext:value-type="float">
            <text:p>3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393518518518519" calcext:value-type="float">
            <text:p>0,00003935185185185190</text:p>
          </table:table-cell>
          <table:table-cell table:formula="of:=[.D22]-[.D21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17" office:value-type="float" office:value="357" calcext:value-type="float">
            <text:p>357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413194444444444" calcext:value-type="float">
            <text:p>0,00004131944444444450</text:p>
          </table:table-cell>
          <table:table-cell table:formula="of:=[.D23]-[.D22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17" office:value-type="float" office:value="374" calcext:value-type="float">
            <text:p>37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43287037037037" calcext:value-type="float">
            <text:p>0,00004328703703703700</text:p>
          </table:table-cell>
          <table:table-cell table:formula="of:=[.D24]-[.D23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17" office:value-type="float" office:value="391" calcext:value-type="float">
            <text:p>391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452546296296296" calcext:value-type="float">
            <text:p>0,00004525462962962960</text:p>
          </table:table-cell>
          <table:table-cell table:formula="of:=[.D25]-[.D24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17" office:value-type="float" office:value="408" calcext:value-type="float">
            <text:p>40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472222222222222" calcext:value-type="float">
            <text:p>0,00004722222222222220</text:p>
          </table:table-cell>
          <table:table-cell table:formula="of:=[.D26]-[.D25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17" office:value-type="float" office:value="425" calcext:value-type="float">
            <text:p>4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491898148148148" calcext:value-type="float">
            <text:p>0,00004918981481481480</text:p>
          </table:table-cell>
          <table:table-cell table:formula="of:=[.D27]-[.D26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17" office:value-type="float" office:value="442" calcext:value-type="float">
            <text:p>44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511574074074074" calcext:value-type="float">
            <text:p>0,00005115740740740740</text:p>
          </table:table-cell>
          <table:table-cell table:formula="of:=[.D28]-[.D27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17" office:value-type="float" office:value="459" calcext:value-type="float">
            <text:p>459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53125" calcext:value-type="float">
            <text:p>0,00005312500000000000</text:p>
          </table:table-cell>
          <table:table-cell table:formula="of:=[.D29]-[.D28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17" office:value-type="float" office:value="476" calcext:value-type="float">
            <text:p>47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550925925925926" calcext:value-type="float">
            <text:p>0,00005509259259259260</text:p>
          </table:table-cell>
          <table:table-cell table:formula="of:=[.D30]-[.D29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17" office:value-type="float" office:value="493" calcext:value-type="float">
            <text:p>493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570601851851852" calcext:value-type="float">
            <text:p>0,00005706018518518520</text:p>
          </table:table-cell>
          <table:table-cell table:formula="of:=[.D31]-[.D30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17" office:value-type="float" office:value="510" calcext:value-type="float">
            <text:p>51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590277777777778" calcext:value-type="float">
            <text:p>0,00005902777777777780</text:p>
          </table:table-cell>
          <table:table-cell table:formula="of:=[.D32]-[.D31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17" office:value-type="float" office:value="527" calcext:value-type="float">
            <text:p>527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609953703703704" calcext:value-type="float">
            <text:p>0,00006099537037037040</text:p>
          </table:table-cell>
          <table:table-cell table:formula="of:=[.D33]-[.D32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17" office:value-type="float" office:value="544" calcext:value-type="float">
            <text:p>54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62962962962963" calcext:value-type="float">
            <text:p>0,00006296296296296300</text:p>
          </table:table-cell>
          <table:table-cell table:formula="of:=[.D34]-[.D33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17" office:value-type="float" office:value="561" calcext:value-type="float">
            <text:p>561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649305555555556" calcext:value-type="float">
            <text:p>0,00006493055555555560</text:p>
          </table:table-cell>
          <table:table-cell table:formula="of:=[.D35]-[.D34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17" office:value-type="float" office:value="578" calcext:value-type="float">
            <text:p>57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668981481481482" calcext:value-type="float">
            <text:p>0,00006689814814814820</text:p>
          </table:table-cell>
          <table:table-cell table:formula="of:=[.D36]-[.D35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17" office:value-type="float" office:value="595" calcext:value-type="float">
            <text:p>59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688657407407407" calcext:value-type="float">
            <text:p>0,00006886574074074070</text:p>
          </table:table-cell>
          <table:table-cell table:formula="of:=[.D37]-[.D36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17" office:value-type="float" office:value="612" calcext:value-type="float">
            <text:p>61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708333333333333" calcext:value-type="float">
            <text:p>0,00007083333333333330</text:p>
          </table:table-cell>
          <table:table-cell table:formula="of:=[.D38]-[.D37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17" office:value-type="float" office:value="629" calcext:value-type="float">
            <text:p>629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728009259259259" calcext:value-type="float">
            <text:p>0,00007280092592592590</text:p>
          </table:table-cell>
          <table:table-cell table:formula="of:=[.D39]-[.D3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17" office:value-type="float" office:value="646" calcext:value-type="float">
            <text:p>64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747685185185185" calcext:value-type="float">
            <text:p>0,00007476851851851850</text:p>
          </table:table-cell>
          <table:table-cell table:formula="of:=[.D40]-[.D39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17" office:value-type="float" office:value="663" calcext:value-type="float">
            <text:p>663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767361111111111" calcext:value-type="float">
            <text:p>0,00007673611111111110</text:p>
          </table:table-cell>
          <table:table-cell table:formula="of:=[.D41]-[.D40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17" office:value-type="float" office:value="680" calcext:value-type="float">
            <text:p>6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787037037037037" calcext:value-type="float">
            <text:p>0,00007870370370370370</text:p>
          </table:table-cell>
          <table:table-cell table:formula="of:=[.D42]-[.D41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17" office:value-type="float" office:value="697" calcext:value-type="float">
            <text:p>697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806712962962963" calcext:value-type="float">
            <text:p>0,00008067129629629630</text:p>
          </table:table-cell>
          <table:table-cell table:formula="of:=[.D43]-[.D42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17" office:value-type="float" office:value="714" calcext:value-type="float">
            <text:p>71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826388888888889" calcext:value-type="float">
            <text:p>0,00008263888888888890</text:p>
          </table:table-cell>
          <table:table-cell table:formula="of:=[.D44]-[.D43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17" office:value-type="float" office:value="731" calcext:value-type="float">
            <text:p>731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846064814814815" calcext:value-type="float">
            <text:p>0,00008460648148148150</text:p>
          </table:table-cell>
          <table:table-cell table:formula="of:=[.D45]-[.D44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17" office:value-type="float" office:value="748" calcext:value-type="float">
            <text:p>74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0865740740740741" calcext:value-type="float">
            <text:p>0,00008657407407407410</text:p>
          </table:table-cell>
          <table:table-cell table:formula="of:=[.D46]-[.D45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17" office:value-type="float" office:value="765" calcext:value-type="float">
            <text:p>76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0885416666666667" calcext:value-type="float">
            <text:p>0,00008854166666666670</text:p>
          </table:table-cell>
          <table:table-cell table:formula="of:=[.D47]-[.D4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17" office:value-type="float" office:value="782" calcext:value-type="float">
            <text:p>78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0905092592592593" calcext:value-type="float">
            <text:p>0,00009050925925925930</text:p>
          </table:table-cell>
          <table:table-cell table:formula="of:=[.D48]-[.D47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17" office:value-type="float" office:value="799" calcext:value-type="float">
            <text:p>799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0924768518518519" calcext:value-type="float">
            <text:p>0,00009247685185185180</text:p>
          </table:table-cell>
          <table:table-cell table:formula="of:=[.D49]-[.D48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17" office:value-type="float" office:value="816" calcext:value-type="float">
            <text:p>81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0944444444444444" calcext:value-type="float">
            <text:p>0,00009444444444444440</text:p>
          </table:table-cell>
          <table:table-cell table:formula="of:=[.D50]-[.D49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17" office:value-type="float" office:value="833" calcext:value-type="float">
            <text:p>833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096412037037037" calcext:value-type="float">
            <text:p>0,00009641203703703700</text:p>
          </table:table-cell>
          <table:table-cell table:formula="of:=[.D51]-[.D50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17" office:value-type="float" office:value="850" calcext:value-type="float">
            <text:p>8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0983796296296296" calcext:value-type="float">
            <text:p>0,00009837962962962960</text:p>
          </table:table-cell>
          <table:table-cell table:formula="of:=[.D52]-[.D51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17" office:value-type="float" office:value="867" calcext:value-type="float">
            <text:p>867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00347222222222" calcext:value-type="float">
            <text:p>0,00010034722222222200</text:p>
          </table:table-cell>
          <table:table-cell table:formula="of:=[.D53]-[.D52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17" office:value-type="float" office:value="884" calcext:value-type="float">
            <text:p>88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02314814814815" calcext:value-type="float">
            <text:p>0,00010231481481481500</text:p>
          </table:table-cell>
          <table:table-cell table:formula="of:=[.D54]-[.D53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17" office:value-type="float" office:value="901" calcext:value-type="float">
            <text:p>901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04282407407407" calcext:value-type="float">
            <text:p>0,00010428240740740700</text:p>
          </table:table-cell>
          <table:table-cell table:formula="of:=[.D55]-[.D5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17" office:value-type="float" office:value="918" calcext:value-type="float">
            <text:p>91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0625" calcext:value-type="float">
            <text:p>0,00010625000000000000</text:p>
          </table:table-cell>
          <table:table-cell table:formula="of:=[.D56]-[.D55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17" office:value-type="float" office:value="935" calcext:value-type="float">
            <text:p>93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08217592592593" calcext:value-type="float">
            <text:p>0,00010821759259259300</text:p>
          </table:table-cell>
          <table:table-cell table:formula="of:=[.D57]-[.D56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17" office:value-type="float" office:value="952" calcext:value-type="float">
            <text:p>95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10185185185185" calcext:value-type="float">
            <text:p>0,00011018518518518500</text:p>
          </table:table-cell>
          <table:table-cell table:formula="of:=[.D58]-[.D57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17" office:value-type="float" office:value="969" calcext:value-type="float">
            <text:p>969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12152777777778" calcext:value-type="float">
            <text:p>0,00011215277777777800</text:p>
          </table:table-cell>
          <table:table-cell table:formula="of:=[.D59]-[.D58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17" office:value-type="float" office:value="986" calcext:value-type="float">
            <text:p>98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1412037037037" calcext:value-type="float">
            <text:p>0,00011412037037037000</text:p>
          </table:table-cell>
          <table:table-cell table:formula="of:=[.D60]-[.D59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17" office:value-type="float" office:value="1003" calcext:value-type="float">
            <text:p>1003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16087962962963" calcext:value-type="float">
            <text:p>0,00011608796296296300</text:p>
          </table:table-cell>
          <table:table-cell table:formula="of:=[.D61]-[.D60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17" office:value-type="float" office:value="1020" calcext:value-type="float">
            <text:p>10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18055555555556" calcext:value-type="float">
            <text:p>0,00011805555555555600</text:p>
          </table:table-cell>
          <table:table-cell table:formula="of:=[.D62]-[.D61]" office:value-type="float" office:value="0.00000196759259259259" calcext:value-type="float">
            <text:p>0,000001967592592592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17" office:value-type="float" office:value="1037" calcext:value-type="float">
            <text:p>1037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20023148148148" calcext:value-type="float">
            <text:p>0,00012002314814814800</text:p>
          </table:table-cell>
          <table:table-cell table:formula="of:=[.D63]-[.D6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17" office:value-type="float" office:value="1054" calcext:value-type="float">
            <text:p>105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21990740740741" calcext:value-type="float">
            <text:p>0,00012199074074074100</text:p>
          </table:table-cell>
          <table:table-cell table:formula="of:=[.D64]-[.D63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17" office:value-type="float" office:value="1071" calcext:value-type="float">
            <text:p>1071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23958333333333" calcext:value-type="float">
            <text:p>0,00012395833333333300</text:p>
          </table:table-cell>
          <table:table-cell table:formula="of:=[.D65]-[.D6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17" office:value-type="float" office:value="1088" calcext:value-type="float">
            <text:p>108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125925925925926" calcext:value-type="float">
            <text:p>0,00012592592592592600</text:p>
          </table:table-cell>
          <table:table-cell table:formula="of:=[.D66]-[.D65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17" office:value-type="float" office:value="1105" calcext:value-type="float">
            <text:p>110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127893518518519" calcext:value-type="float">
            <text:p>0,00012789351851851900</text:p>
          </table:table-cell>
          <table:table-cell table:formula="of:=[.D67]-[.D6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17" office:value-type="float" office:value="1122" calcext:value-type="float">
            <text:p>112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129861111111111" calcext:value-type="float">
            <text:p>0,00012986111111111100</text:p>
          </table:table-cell>
          <table:table-cell table:formula="of:=[.D68]-[.D6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17" office:value-type="float" office:value="1139" calcext:value-type="float">
            <text:p>1139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131828703703704" calcext:value-type="float">
            <text:p>0,00013182870370370400</text:p>
          </table:table-cell>
          <table:table-cell table:formula="of:=[.D69]-[.D68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17" office:value-type="float" office:value="1156" calcext:value-type="float">
            <text:p>115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133796296296296" calcext:value-type="float">
            <text:p>0,00013379629629629600</text:p>
          </table:table-cell>
          <table:table-cell table:formula="of:=[.D70]-[.D6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17" office:value-type="float" office:value="1173" calcext:value-type="float">
            <text:p>1173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135763888888889" calcext:value-type="float">
            <text:p>0,00013576388888888900</text:p>
          </table:table-cell>
          <table:table-cell table:formula="of:=[.D71]-[.D70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17" office:value-type="float" office:value="1190" calcext:value-type="float">
            <text:p>119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137731481481482" calcext:value-type="float">
            <text:p>0,00013773148148148200</text:p>
          </table:table-cell>
          <table:table-cell table:formula="of:=[.D72]-[.D7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17" office:value-type="float" office:value="1207" calcext:value-type="float">
            <text:p>1207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139699074074074" calcext:value-type="float">
            <text:p>0,00013969907407407400</text:p>
          </table:table-cell>
          <table:table-cell table:formula="of:=[.D73]-[.D72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17" office:value-type="float" office:value="1224" calcext:value-type="float">
            <text:p>122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141666666666667" calcext:value-type="float">
            <text:p>0,00014166666666666700</text:p>
          </table:table-cell>
          <table:table-cell table:formula="of:=[.D74]-[.D7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17" office:value-type="float" office:value="1241" calcext:value-type="float">
            <text:p>1241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143634259259259" calcext:value-type="float">
            <text:p>0,00014363425925925900</text:p>
          </table:table-cell>
          <table:table-cell table:formula="of:=[.D75]-[.D74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17" office:value-type="float" office:value="1258" calcext:value-type="float">
            <text:p>125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145601851851852" calcext:value-type="float">
            <text:p>0,00014560185185185200</text:p>
          </table:table-cell>
          <table:table-cell table:formula="of:=[.D76]-[.D7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17" office:value-type="float" office:value="1275" calcext:value-type="float">
            <text:p>12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147569444444444" calcext:value-type="float">
            <text:p>0,00014756944444444400</text:p>
          </table:table-cell>
          <table:table-cell table:formula="of:=[.D77]-[.D7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17" office:value-type="float" office:value="1292" calcext:value-type="float">
            <text:p>129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149537037037037" calcext:value-type="float">
            <text:p>0,00014953703703703700</text:p>
          </table:table-cell>
          <table:table-cell table:formula="of:=[.D78]-[.D77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17" office:value-type="float" office:value="1309" calcext:value-type="float">
            <text:p>1309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15150462962963" calcext:value-type="float">
            <text:p>0,00015150462962963000</text:p>
          </table:table-cell>
          <table:table-cell table:formula="of:=[.D79]-[.D7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17" office:value-type="float" office:value="1326" calcext:value-type="float">
            <text:p>132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153472222222222" calcext:value-type="float">
            <text:p>0,00015347222222222200</text:p>
          </table:table-cell>
          <table:table-cell table:formula="of:=[.D80]-[.D79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17" office:value-type="float" office:value="1343" calcext:value-type="float">
            <text:p>1343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155439814814815" calcext:value-type="float">
            <text:p>0,00015543981481481500</text:p>
          </table:table-cell>
          <table:table-cell table:formula="of:=[.D81]-[.D8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17" office:value-type="float" office:value="1360" calcext:value-type="float">
            <text:p>13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157407407407407" calcext:value-type="float">
            <text:p>0,00015740740740740700</text:p>
          </table:table-cell>
          <table:table-cell table:formula="of:=[.D82]-[.D81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17" office:value-type="float" office:value="1377" calcext:value-type="float">
            <text:p>1377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159375" calcext:value-type="float">
            <text:p>0,00015937500000000000</text:p>
          </table:table-cell>
          <table:table-cell table:formula="of:=[.D83]-[.D8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17" office:value-type="float" office:value="1394" calcext:value-type="float">
            <text:p>139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161342592592593" calcext:value-type="float">
            <text:p>0,00016134259259259300</text:p>
          </table:table-cell>
          <table:table-cell table:formula="of:=[.D84]-[.D8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17" office:value-type="float" office:value="1411" calcext:value-type="float">
            <text:p>1411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163310185185185" calcext:value-type="float">
            <text:p>0,00016331018518518500</text:p>
          </table:table-cell>
          <table:table-cell table:formula="of:=[.D85]-[.D84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17" office:value-type="float" office:value="1428" calcext:value-type="float">
            <text:p>142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165277777777778" calcext:value-type="float">
            <text:p>0,00016527777777777800</text:p>
          </table:table-cell>
          <table:table-cell table:formula="of:=[.D86]-[.D8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17" office:value-type="float" office:value="1445" calcext:value-type="float">
            <text:p>144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16724537037037" calcext:value-type="float">
            <text:p>0,00016724537037037000</text:p>
          </table:table-cell>
          <table:table-cell table:formula="of:=[.D87]-[.D86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17" office:value-type="float" office:value="1462" calcext:value-type="float">
            <text:p>146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169212962962963" calcext:value-type="float">
            <text:p>0,00016921296296296300</text:p>
          </table:table-cell>
          <table:table-cell table:formula="of:=[.D88]-[.D8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17" office:value-type="float" office:value="1479" calcext:value-type="float">
            <text:p>1479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171180555555556" calcext:value-type="float">
            <text:p>0,00017118055555555600</text:p>
          </table:table-cell>
          <table:table-cell table:formula="of:=[.D89]-[.D88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17" office:value-type="float" office:value="1496" calcext:value-type="float">
            <text:p>149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173148148148148" calcext:value-type="float">
            <text:p>0,00017314814814814800</text:p>
          </table:table-cell>
          <table:table-cell table:formula="of:=[.D90]-[.D8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17" office:value-type="float" office:value="1513" calcext:value-type="float">
            <text:p>1513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175115740740741" calcext:value-type="float">
            <text:p>0,00017511574074074100</text:p>
          </table:table-cell>
          <table:table-cell table:formula="of:=[.D91]-[.D90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17" office:value-type="float" office:value="1530" calcext:value-type="float">
            <text:p>153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177083333333333" calcext:value-type="float">
            <text:p>0,00017708333333333300</text:p>
          </table:table-cell>
          <table:table-cell table:formula="of:=[.D92]-[.D9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17" office:value-type="float" office:value="1547" calcext:value-type="float">
            <text:p>1547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179050925925926" calcext:value-type="float">
            <text:p>0,00017905092592592600</text:p>
          </table:table-cell>
          <table:table-cell table:formula="of:=[.D93]-[.D9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17" office:value-type="float" office:value="1564" calcext:value-type="float">
            <text:p>156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181018518518519" calcext:value-type="float">
            <text:p>0,00018101851851851900</text:p>
          </table:table-cell>
          <table:table-cell table:formula="of:=[.D94]-[.D93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17" office:value-type="float" office:value="1581" calcext:value-type="float">
            <text:p>1581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182986111111111" calcext:value-type="float">
            <text:p>0,00018298611111111100</text:p>
          </table:table-cell>
          <table:table-cell table:formula="of:=[.D95]-[.D9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17" office:value-type="float" office:value="1598" calcext:value-type="float">
            <text:p>159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184953703703704" calcext:value-type="float">
            <text:p>0,00018495370370370400</text:p>
          </table:table-cell>
          <table:table-cell table:formula="of:=[.D96]-[.D95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17" office:value-type="float" office:value="1615" calcext:value-type="float">
            <text:p>161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186921296296296" calcext:value-type="float">
            <text:p>0,00018692129629629600</text:p>
          </table:table-cell>
          <table:table-cell table:formula="of:=[.D97]-[.D9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17" office:value-type="float" office:value="1632" calcext:value-type="float">
            <text:p>163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188888888888889" calcext:value-type="float">
            <text:p>0,00018888888888888900</text:p>
          </table:table-cell>
          <table:table-cell table:formula="of:=[.D98]-[.D97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17" office:value-type="float" office:value="1649" calcext:value-type="float">
            <text:p>1649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190856481481482" calcext:value-type="float">
            <text:p>0,00019085648148148200</text:p>
          </table:table-cell>
          <table:table-cell table:formula="of:=[.D99]-[.D9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17" office:value-type="float" office:value="1666" calcext:value-type="float">
            <text:p>166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192824074074074" calcext:value-type="float">
            <text:p>0,00019282407407407400</text:p>
          </table:table-cell>
          <table:table-cell table:formula="of:=[.D100]-[.D9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17" office:value-type="float" office:value="1683" calcext:value-type="float">
            <text:p>1683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194791666666667" calcext:value-type="float">
            <text:p>0,00019479166666666700</text:p>
          </table:table-cell>
          <table:table-cell table:formula="of:=[.D101]-[.D100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17" office:value-type="float" office:value="1700" calcext:value-type="float">
            <text:p>17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196759259259259" calcext:value-type="float">
            <text:p>0,00019675925925925900</text:p>
          </table:table-cell>
          <table:table-cell table:formula="of:=[.D102]-[.D10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17" office:value-type="float" office:value="1717" calcext:value-type="float">
            <text:p>1717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198726851851852" calcext:value-type="float">
            <text:p>0,00019872685185185200</text:p>
          </table:table-cell>
          <table:table-cell table:formula="of:=[.D103]-[.D102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17" office:value-type="float" office:value="1734" calcext:value-type="float">
            <text:p>173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200694444444444" calcext:value-type="float">
            <text:p>0,00020069444444444400</text:p>
          </table:table-cell>
          <table:table-cell table:formula="of:=[.D104]-[.D10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17" office:value-type="float" office:value="1751" calcext:value-type="float">
            <text:p>1751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202662037037037" calcext:value-type="float">
            <text:p>0,00020266203703703700</text:p>
          </table:table-cell>
          <table:table-cell table:formula="of:=[.D105]-[.D104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17" office:value-type="float" office:value="1768" calcext:value-type="float">
            <text:p>176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20462962962963" calcext:value-type="float">
            <text:p>0,00020462962962963000</text:p>
          </table:table-cell>
          <table:table-cell table:formula="of:=[.D106]-[.D10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17" office:value-type="float" office:value="1785" calcext:value-type="float">
            <text:p>178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206597222222222" calcext:value-type="float">
            <text:p>0,00020659722222222200</text:p>
          </table:table-cell>
          <table:table-cell table:formula="of:=[.D107]-[.D106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17" office:value-type="float" office:value="1802" calcext:value-type="float">
            <text:p>180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208564814814815" calcext:value-type="float">
            <text:p>0,00020856481481481500</text:p>
          </table:table-cell>
          <table:table-cell table:formula="of:=[.D108]-[.D10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17" office:value-type="float" office:value="1819" calcext:value-type="float">
            <text:p>1819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210532407407407" calcext:value-type="float">
            <text:p>0,00021053240740740700</text:p>
          </table:table-cell>
          <table:table-cell table:formula="of:=[.D109]-[.D10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17" office:value-type="float" office:value="1836" calcext:value-type="float">
            <text:p>183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2125" calcext:value-type="float">
            <text:p>0,00021250000000000000</text:p>
          </table:table-cell>
          <table:table-cell table:formula="of:=[.D110]-[.D109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17" office:value-type="float" office:value="1853" calcext:value-type="float">
            <text:p>1853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214467592592593" calcext:value-type="float">
            <text:p>0,00021446759259259300</text:p>
          </table:table-cell>
          <table:table-cell table:formula="of:=[.D111]-[.D11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17" office:value-type="float" office:value="1870" calcext:value-type="float">
            <text:p>187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216435185185185" calcext:value-type="float">
            <text:p>0,00021643518518518500</text:p>
          </table:table-cell>
          <table:table-cell table:formula="of:=[.D112]-[.D111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17" office:value-type="float" office:value="1887" calcext:value-type="float">
            <text:p>1887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218402777777778" calcext:value-type="float">
            <text:p>0,00021840277777777800</text:p>
          </table:table-cell>
          <table:table-cell table:formula="of:=[.D113]-[.D11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17" office:value-type="float" office:value="1904" calcext:value-type="float">
            <text:p>190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22037037037037" calcext:value-type="float">
            <text:p>0,00022037037037037000</text:p>
          </table:table-cell>
          <table:table-cell table:formula="of:=[.D114]-[.D113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17" office:value-type="float" office:value="1921" calcext:value-type="float">
            <text:p>1921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222337962962963" calcext:value-type="float">
            <text:p>0,00022233796296296300</text:p>
          </table:table-cell>
          <table:table-cell table:formula="of:=[.D115]-[.D11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17" office:value-type="float" office:value="1938" calcext:value-type="float">
            <text:p>193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224305555555556" calcext:value-type="float">
            <text:p>0,00022430555555555600</text:p>
          </table:table-cell>
          <table:table-cell table:formula="of:=[.D116]-[.D115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17" office:value-type="float" office:value="1955" calcext:value-type="float">
            <text:p>195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226273148148148" calcext:value-type="float">
            <text:p>0,00022627314814814800</text:p>
          </table:table-cell>
          <table:table-cell table:formula="of:=[.D117]-[.D11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17" office:value-type="float" office:value="1972" calcext:value-type="float">
            <text:p>197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228240740740741" calcext:value-type="float">
            <text:p>0,00022824074074074100</text:p>
          </table:table-cell>
          <table:table-cell table:formula="of:=[.D118]-[.D11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17" office:value-type="float" office:value="1989" calcext:value-type="float">
            <text:p>1989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230208333333333" calcext:value-type="float">
            <text:p>0,00023020833333333300</text:p>
          </table:table-cell>
          <table:table-cell table:formula="of:=[.D119]-[.D118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17" office:value-type="float" office:value="2006" calcext:value-type="float">
            <text:p>200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232175925925926" calcext:value-type="float">
            <text:p>0,00023217592592592600</text:p>
          </table:table-cell>
          <table:table-cell table:formula="of:=[.D120]-[.D11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17" office:value-type="float" office:value="2023" calcext:value-type="float">
            <text:p>2023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234143518518519" calcext:value-type="float">
            <text:p>0,00023414351851851900</text:p>
          </table:table-cell>
          <table:table-cell table:formula="of:=[.D121]-[.D120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17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236111111111111" calcext:value-type="float">
            <text:p>0,00023611111111111100</text:p>
          </table:table-cell>
          <table:table-cell table:formula="of:=[.D122]-[.D12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17" office:value-type="float" office:value="2057" calcext:value-type="float">
            <text:p>2057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238078703703704" calcext:value-type="float">
            <text:p>0,00023807870370370400</text:p>
          </table:table-cell>
          <table:table-cell table:formula="of:=[.D123]-[.D122]" office:value-type="float" office:value="0.00000196759259259261" calcext:value-type="float">
            <text:p>0,000001967592592592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17" office:value-type="float" office:value="2074" calcext:value-type="float">
            <text:p>207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240046296296296" calcext:value-type="float">
            <text:p>0,00024004629629629600</text:p>
          </table:table-cell>
          <table:table-cell table:formula="of:=[.D124]-[.D12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17" office:value-type="float" office:value="2091" calcext:value-type="float">
            <text:p>2091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242013888888889" calcext:value-type="float">
            <text:p>0,00024201388888888900</text:p>
          </table:table-cell>
          <table:table-cell table:formula="of:=[.D125]-[.D12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17" office:value-type="float" office:value="2108" calcext:value-type="float">
            <text:p>210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243981481481481" calcext:value-type="float">
            <text:p>0,00024398148148148100</text:p>
          </table:table-cell>
          <table:table-cell table:formula="of:=[.D126]-[.D12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17" office:value-type="float" office:value="2125" calcext:value-type="float">
            <text:p>21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245949074074074" calcext:value-type="float">
            <text:p>0,00024594907407407400</text:p>
          </table:table-cell>
          <table:table-cell table:formula="of:=[.D127]-[.D126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17" office:value-type="float" office:value="2142" calcext:value-type="float">
            <text:p>214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247916666666667" calcext:value-type="float">
            <text:p>0,00024791666666666700</text:p>
          </table:table-cell>
          <table:table-cell table:formula="of:=[.D128]-[.D12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17" office:value-type="float" office:value="2159" calcext:value-type="float">
            <text:p>2159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249884259259259" calcext:value-type="float">
            <text:p>0,00024988425925925900</text:p>
          </table:table-cell>
          <table:table-cell table:formula="of:=[.D129]-[.D12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17" office:value-type="float" office:value="2176" calcext:value-type="float">
            <text:p>217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251851851851852" calcext:value-type="float">
            <text:p>0,00025185185185185200</text:p>
          </table:table-cell>
          <table:table-cell table:formula="of:=[.D130]-[.D12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17" office:value-type="float" office:value="2193" calcext:value-type="float">
            <text:p>2193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253819444444444" calcext:value-type="float">
            <text:p>0,00025381944444444400</text:p>
          </table:table-cell>
          <table:table-cell table:formula="of:=[.D131]-[.D130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17" office:value-type="float" office:value="2210" calcext:value-type="float">
            <text:p>221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255787037037037" calcext:value-type="float">
            <text:p>0,00025578703703703700</text:p>
          </table:table-cell>
          <table:table-cell table:formula="of:=[.D132]-[.D13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17" office:value-type="float" office:value="2227" calcext:value-type="float">
            <text:p>2227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25775462962963" calcext:value-type="float">
            <text:p>0,00025775462962963000</text:p>
          </table:table-cell>
          <table:table-cell table:formula="of:=[.D133]-[.D13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17" office:value-type="float" office:value="2244" calcext:value-type="float">
            <text:p>224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259722222222222" calcext:value-type="float">
            <text:p>0,00025972222222222200</text:p>
          </table:table-cell>
          <table:table-cell table:formula="of:=[.D134]-[.D13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17" office:value-type="float" office:value="2261" calcext:value-type="float">
            <text:p>2261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261689814814815" calcext:value-type="float">
            <text:p>0,00026168981481481500</text:p>
          </table:table-cell>
          <table:table-cell table:formula="of:=[.D135]-[.D13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17" office:value-type="float" office:value="2278" calcext:value-type="float">
            <text:p>227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263657407407407" calcext:value-type="float">
            <text:p>0,00026365740740740700</text:p>
          </table:table-cell>
          <table:table-cell table:formula="of:=[.D136]-[.D135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17" office:value-type="float" office:value="2295" calcext:value-type="float">
            <text:p>229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265625" calcext:value-type="float">
            <text:p>0,00026562500000000000</text:p>
          </table:table-cell>
          <table:table-cell table:formula="of:=[.D137]-[.D13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17" office:value-type="float" office:value="2312" calcext:value-type="float">
            <text:p>231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267592592592593" calcext:value-type="float">
            <text:p>0,00026759259259259300</text:p>
          </table:table-cell>
          <table:table-cell table:formula="of:=[.D138]-[.D13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17" office:value-type="float" office:value="2329" calcext:value-type="float">
            <text:p>2329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269560185185185" calcext:value-type="float">
            <text:p>0,00026956018518518500</text:p>
          </table:table-cell>
          <table:table-cell table:formula="of:=[.D139]-[.D13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17" office:value-type="float" office:value="2346" calcext:value-type="float">
            <text:p>234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271527777777778" calcext:value-type="float">
            <text:p>0,00027152777777777800</text:p>
          </table:table-cell>
          <table:table-cell table:formula="of:=[.D140]-[.D139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17" office:value-type="float" office:value="2363" calcext:value-type="float">
            <text:p>2363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27349537037037" calcext:value-type="float">
            <text:p>0,00027349537037037000</text:p>
          </table:table-cell>
          <table:table-cell table:formula="of:=[.D141]-[.D14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17" office:value-type="float" office:value="2380" calcext:value-type="float">
            <text:p>23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275462962962963" calcext:value-type="float">
            <text:p>0,00027546296296296300</text:p>
          </table:table-cell>
          <table:table-cell table:formula="of:=[.D142]-[.D14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17" office:value-type="float" office:value="2397" calcext:value-type="float">
            <text:p>2397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277430555555556" calcext:value-type="float">
            <text:p>0,00027743055555555600</text:p>
          </table:table-cell>
          <table:table-cell table:formula="of:=[.D143]-[.D14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17" office:value-type="float" office:value="2414" calcext:value-type="float">
            <text:p>241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279398148148148" calcext:value-type="float">
            <text:p>0,00027939814814814800</text:p>
          </table:table-cell>
          <table:table-cell table:formula="of:=[.D144]-[.D14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17" office:value-type="float" office:value="2431" calcext:value-type="float">
            <text:p>2431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281365740740741" calcext:value-type="float">
            <text:p>0,00028136574074074100</text:p>
          </table:table-cell>
          <table:table-cell table:formula="of:=[.D145]-[.D144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17" office:value-type="float" office:value="2448" calcext:value-type="float">
            <text:p>244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283333333333333" calcext:value-type="float">
            <text:p>0,00028333333333333300</text:p>
          </table:table-cell>
          <table:table-cell table:formula="of:=[.D146]-[.D14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17" office:value-type="float" office:value="2465" calcext:value-type="float">
            <text:p>246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285300925925926" calcext:value-type="float">
            <text:p>0,00028530092592592600</text:p>
          </table:table-cell>
          <table:table-cell table:formula="of:=[.D147]-[.D14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17" office:value-type="float" office:value="2482" calcext:value-type="float">
            <text:p>248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287268518518519" calcext:value-type="float">
            <text:p>0,00028726851851851900</text:p>
          </table:table-cell>
          <table:table-cell table:formula="of:=[.D148]-[.D14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17" office:value-type="float" office:value="2499" calcext:value-type="float">
            <text:p>2499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289236111111111" calcext:value-type="float">
            <text:p>0,00028923611111111100</text:p>
          </table:table-cell>
          <table:table-cell table:formula="of:=[.D149]-[.D148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17" office:value-type="float" office:value="2516" calcext:value-type="float">
            <text:p>251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291203703703704" calcext:value-type="float">
            <text:p>0,00029120370370370400</text:p>
          </table:table-cell>
          <table:table-cell table:formula="of:=[.D150]-[.D14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17" office:value-type="float" office:value="2533" calcext:value-type="float">
            <text:p>2533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293171296296296" calcext:value-type="float">
            <text:p>0,00029317129629629600</text:p>
          </table:table-cell>
          <table:table-cell table:formula="of:=[.D151]-[.D15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17" office:value-type="float" office:value="2550" calcext:value-type="float">
            <text:p>25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295138888888889" calcext:value-type="float">
            <text:p>0,00029513888888888900</text:p>
          </table:table-cell>
          <table:table-cell table:formula="of:=[.D152]-[.D15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17" office:value-type="float" office:value="2567" calcext:value-type="float">
            <text:p>2567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297106481481481" calcext:value-type="float">
            <text:p>0,00029710648148148100</text:p>
          </table:table-cell>
          <table:table-cell table:formula="of:=[.D153]-[.D15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17" office:value-type="float" office:value="2584" calcext:value-type="float">
            <text:p>258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299074074074074" calcext:value-type="float">
            <text:p>0,00029907407407407400</text:p>
          </table:table-cell>
          <table:table-cell table:formula="of:=[.D154]-[.D153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17" office:value-type="float" office:value="2601" calcext:value-type="float">
            <text:p>2601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301041666666667" calcext:value-type="float">
            <text:p>0,00030104166666666700</text:p>
          </table:table-cell>
          <table:table-cell table:formula="of:=[.D155]-[.D15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17" office:value-type="float" office:value="2618" calcext:value-type="float">
            <text:p>261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303009259259259" calcext:value-type="float">
            <text:p>0,00030300925925925900</text:p>
          </table:table-cell>
          <table:table-cell table:formula="of:=[.D156]-[.D15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17" office:value-type="float" office:value="2635" calcext:value-type="float">
            <text:p>263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304976851851852" calcext:value-type="float">
            <text:p>0,00030497685185185200</text:p>
          </table:table-cell>
          <table:table-cell table:formula="of:=[.D157]-[.D15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17" office:value-type="float" office:value="2652" calcext:value-type="float">
            <text:p>265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306944444444444" calcext:value-type="float">
            <text:p>0,00030694444444444400</text:p>
          </table:table-cell>
          <table:table-cell table:formula="of:=[.D158]-[.D15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17" office:value-type="float" office:value="2669" calcext:value-type="float">
            <text:p>2669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308912037037037" calcext:value-type="float">
            <text:p>0,00030891203703703700</text:p>
          </table:table-cell>
          <table:table-cell table:formula="of:=[.D159]-[.D158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17" office:value-type="float" office:value="2686" calcext:value-type="float">
            <text:p>268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31087962962963" calcext:value-type="float">
            <text:p>0,00031087962962963000</text:p>
          </table:table-cell>
          <table:table-cell table:formula="of:=[.D160]-[.D15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17" office:value-type="float" office:value="2703" calcext:value-type="float">
            <text:p>2703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312847222222222" calcext:value-type="float">
            <text:p>0,00031284722222222200</text:p>
          </table:table-cell>
          <table:table-cell table:formula="of:=[.D161]-[.D16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17" office:value-type="float" office:value="2720" calcext:value-type="float">
            <text:p>27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314814814814815" calcext:value-type="float">
            <text:p>0,00031481481481481500</text:p>
          </table:table-cell>
          <table:table-cell table:formula="of:=[.D162]-[.D16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17" office:value-type="float" office:value="2737" calcext:value-type="float">
            <text:p>2737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316782407407407" calcext:value-type="float">
            <text:p>0,00031678240740740700</text:p>
          </table:table-cell>
          <table:table-cell table:formula="of:=[.D163]-[.D162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17" office:value-type="float" office:value="2754" calcext:value-type="float">
            <text:p>275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31875" calcext:value-type="float">
            <text:p>0,00031875000000000000</text:p>
          </table:table-cell>
          <table:table-cell table:formula="of:=[.D164]-[.D16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17" office:value-type="float" office:value="2771" calcext:value-type="float">
            <text:p>2771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320717592592593" calcext:value-type="float">
            <text:p>0,00032071759259259300</text:p>
          </table:table-cell>
          <table:table-cell table:formula="of:=[.D165]-[.D16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17" office:value-type="float" office:value="2788" calcext:value-type="float">
            <text:p>278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322685185185185" calcext:value-type="float">
            <text:p>0,00032268518518518500</text:p>
          </table:table-cell>
          <table:table-cell table:formula="of:=[.D166]-[.D16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17" office:value-type="float" office:value="2805" calcext:value-type="float">
            <text:p>280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324652777777778" calcext:value-type="float">
            <text:p>0,00032465277777777800</text:p>
          </table:table-cell>
          <table:table-cell table:formula="of:=[.D167]-[.D16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17" office:value-type="float" office:value="2822" calcext:value-type="float">
            <text:p>282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32662037037037" calcext:value-type="float">
            <text:p>0,00032662037037037000</text:p>
          </table:table-cell>
          <table:table-cell table:formula="of:=[.D168]-[.D167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17" office:value-type="float" office:value="2839" calcext:value-type="float">
            <text:p>2839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328587962962963" calcext:value-type="float">
            <text:p>0,00032858796296296300</text:p>
          </table:table-cell>
          <table:table-cell table:formula="of:=[.D169]-[.D16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17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330555555555556" calcext:value-type="float">
            <text:p>0,00033055555555555600</text:p>
          </table:table-cell>
          <table:table-cell table:formula="of:=[.D170]-[.D16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17" office:value-type="float" office:value="2873" calcext:value-type="float">
            <text:p>2873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332523148148148" calcext:value-type="float">
            <text:p>0,00033252314814814800</text:p>
          </table:table-cell>
          <table:table-cell table:formula="of:=[.D171]-[.D17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17" office:value-type="float" office:value="2890" calcext:value-type="float">
            <text:p>289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334490740740741" calcext:value-type="float">
            <text:p>0,00033449074074074100</text:p>
          </table:table-cell>
          <table:table-cell table:formula="of:=[.D172]-[.D171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17" office:value-type="float" office:value="2907" calcext:value-type="float">
            <text:p>2907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336458333333333" calcext:value-type="float">
            <text:p>0,00033645833333333300</text:p>
          </table:table-cell>
          <table:table-cell table:formula="of:=[.D173]-[.D17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17" office:value-type="float" office:value="2924" calcext:value-type="float">
            <text:p>292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338425925925926" calcext:value-type="float">
            <text:p>0,00033842592592592600</text:p>
          </table:table-cell>
          <table:table-cell table:formula="of:=[.D174]-[.D17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17" office:value-type="float" office:value="2941" calcext:value-type="float">
            <text:p>2941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340393518518519" calcext:value-type="float">
            <text:p>0,00034039351851851900</text:p>
          </table:table-cell>
          <table:table-cell table:formula="of:=[.D175]-[.D17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17" office:value-type="float" office:value="2958" calcext:value-type="float">
            <text:p>295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342361111111111" calcext:value-type="float">
            <text:p>0,00034236111111111100</text:p>
          </table:table-cell>
          <table:table-cell table:formula="of:=[.D176]-[.D17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17" office:value-type="float" office:value="2975" calcext:value-type="float">
            <text:p>29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344328703703704" calcext:value-type="float">
            <text:p>0,00034432870370370400</text:p>
          </table:table-cell>
          <table:table-cell table:formula="of:=[.D177]-[.D176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17" office:value-type="float" office:value="2992" calcext:value-type="float">
            <text:p>299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346296296296296" calcext:value-type="float">
            <text:p>0,00034629629629629600</text:p>
          </table:table-cell>
          <table:table-cell table:formula="of:=[.D178]-[.D17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17" office:value-type="float" office:value="3009" calcext:value-type="float">
            <text:p>3009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348263888888889" calcext:value-type="float">
            <text:p>0,00034826388888888900</text:p>
          </table:table-cell>
          <table:table-cell table:formula="of:=[.D179]-[.D17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17" office:value-type="float" office:value="3026" calcext:value-type="float">
            <text:p>302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350231481481482" calcext:value-type="float">
            <text:p>0,00035023148148148200</text:p>
          </table:table-cell>
          <table:table-cell table:formula="of:=[.D180]-[.D17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17" office:value-type="float" office:value="3043" calcext:value-type="float">
            <text:p>3043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352199074074074" calcext:value-type="float">
            <text:p>0,00035219907407407400</text:p>
          </table:table-cell>
          <table:table-cell table:formula="of:=[.D181]-[.D180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17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354166666666667" calcext:value-type="float">
            <text:p>0,00035416666666666700</text:p>
          </table:table-cell>
          <table:table-cell table:formula="of:=[.D182]-[.D18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17" office:value-type="float" office:value="3077" calcext:value-type="float">
            <text:p>3077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356134259259259" calcext:value-type="float">
            <text:p>0,00035613425925925900</text:p>
          </table:table-cell>
          <table:table-cell table:formula="of:=[.D183]-[.D18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17" office:value-type="float" office:value="3094" calcext:value-type="float">
            <text:p>309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358101851851852" calcext:value-type="float">
            <text:p>0,00035810185185185200</text:p>
          </table:table-cell>
          <table:table-cell table:formula="of:=[.D184]-[.D18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17" office:value-type="float" office:value="3111" calcext:value-type="float">
            <text:p>3111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360069444444444" calcext:value-type="float">
            <text:p>0,00036006944444444400</text:p>
          </table:table-cell>
          <table:table-cell table:formula="of:=[.D185]-[.D18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17" office:value-type="float" office:value="3128" calcext:value-type="float">
            <text:p>312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362037037037037" calcext:value-type="float">
            <text:p>0,00036203703703703700</text:p>
          </table:table-cell>
          <table:table-cell table:formula="of:=[.D186]-[.D185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17" office:value-type="float" office:value="3145" calcext:value-type="float">
            <text:p>314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36400462962963" calcext:value-type="float">
            <text:p>0,00036400462962963000</text:p>
          </table:table-cell>
          <table:table-cell table:formula="of:=[.D187]-[.D18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17" office:value-type="float" office:value="3162" calcext:value-type="float">
            <text:p>316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365972222222222" calcext:value-type="float">
            <text:p>0,00036597222222222200</text:p>
          </table:table-cell>
          <table:table-cell table:formula="of:=[.D188]-[.D18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17" office:value-type="float" office:value="3179" calcext:value-type="float">
            <text:p>3179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367939814814815" calcext:value-type="float">
            <text:p>0,00036793981481481500</text:p>
          </table:table-cell>
          <table:table-cell table:formula="of:=[.D189]-[.D18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17" office:value-type="float" office:value="3196" calcext:value-type="float">
            <text:p>319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369907407407407" calcext:value-type="float">
            <text:p>0,00036990740740740700</text:p>
          </table:table-cell>
          <table:table-cell table:formula="of:=[.D190]-[.D189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17" office:value-type="float" office:value="3213" calcext:value-type="float">
            <text:p>3213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371875" calcext:value-type="float">
            <text:p>0,00037187500000000000</text:p>
          </table:table-cell>
          <table:table-cell table:formula="of:=[.D191]-[.D19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17" office:value-type="float" office:value="3230" calcext:value-type="float">
            <text:p>323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373842592592593" calcext:value-type="float">
            <text:p>0,00037384259259259300</text:p>
          </table:table-cell>
          <table:table-cell table:formula="of:=[.D192]-[.D19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17" office:value-type="float" office:value="3247" calcext:value-type="float">
            <text:p>3247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375810185185185" calcext:value-type="float">
            <text:p>0,00037581018518518500</text:p>
          </table:table-cell>
          <table:table-cell table:formula="of:=[.D193]-[.D19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17" office:value-type="float" office:value="3264" calcext:value-type="float">
            <text:p>326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377777777777778" calcext:value-type="float">
            <text:p>0,00037777777777777800</text:p>
          </table:table-cell>
          <table:table-cell table:formula="of:=[.D194]-[.D19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17" office:value-type="float" office:value="3281" calcext:value-type="float">
            <text:p>3281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37974537037037" calcext:value-type="float">
            <text:p>0,00037974537037037000</text:p>
          </table:table-cell>
          <table:table-cell table:formula="of:=[.D195]-[.D194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17" office:value-type="float" office:value="3298" calcext:value-type="float">
            <text:p>329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381712962962963" calcext:value-type="float">
            <text:p>0,00038171296296296300</text:p>
          </table:table-cell>
          <table:table-cell table:formula="of:=[.D196]-[.D19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17" office:value-type="float" office:value="3315" calcext:value-type="float">
            <text:p>331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383680555555556" calcext:value-type="float">
            <text:p>0,00038368055555555600</text:p>
          </table:table-cell>
          <table:table-cell table:formula="of:=[.D197]-[.D19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17" office:value-type="float" office:value="3332" calcext:value-type="float">
            <text:p>333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385648148148148" calcext:value-type="float">
            <text:p>0,00038564814814814800</text:p>
          </table:table-cell>
          <table:table-cell table:formula="of:=[.D198]-[.D19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17" office:value-type="float" office:value="3349" calcext:value-type="float">
            <text:p>3349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387615740740741" calcext:value-type="float">
            <text:p>0,00038761574074074100</text:p>
          </table:table-cell>
          <table:table-cell table:formula="of:=[.D199]-[.D19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17" office:value-type="float" office:value="3366" calcext:value-type="float">
            <text:p>336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389583333333333" calcext:value-type="float">
            <text:p>0,00038958333333333300</text:p>
          </table:table-cell>
          <table:table-cell table:formula="of:=[.D200]-[.D199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17" office:value-type="float" office:value="3383" calcext:value-type="float">
            <text:p>3383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391550925925926" calcext:value-type="float">
            <text:p>0,00039155092592592600</text:p>
          </table:table-cell>
          <table:table-cell table:formula="of:=[.D201]-[.D20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17" office:value-type="float" office:value="3400" calcext:value-type="float">
            <text:p>3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393518518518519" calcext:value-type="float">
            <text:p>0,00039351851851851900</text:p>
          </table:table-cell>
          <table:table-cell table:formula="of:=[.D202]-[.D20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17" office:value-type="float" office:value="3417" calcext:value-type="float">
            <text:p>3417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395486111111111" calcext:value-type="float">
            <text:p>0,00039548611111111100</text:p>
          </table:table-cell>
          <table:table-cell table:formula="of:=[.D203]-[.D20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17" office:value-type="float" office:value="3434" calcext:value-type="float">
            <text:p>343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397453703703704" calcext:value-type="float">
            <text:p>0,00039745370370370400</text:p>
          </table:table-cell>
          <table:table-cell table:formula="of:=[.D204]-[.D203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17" office:value-type="float" office:value="3451" calcext:value-type="float">
            <text:p>3451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399421296296296" calcext:value-type="float">
            <text:p>0,00039942129629629600</text:p>
          </table:table-cell>
          <table:table-cell table:formula="of:=[.D205]-[.D20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17" office:value-type="float" office:value="3468" calcext:value-type="float">
            <text:p>346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401388888888889" calcext:value-type="float">
            <text:p>0,00040138888888888900</text:p>
          </table:table-cell>
          <table:table-cell table:formula="of:=[.D206]-[.D20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17" office:value-type="float" office:value="3485" calcext:value-type="float">
            <text:p>348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403356481481482" calcext:value-type="float">
            <text:p>0,00040335648148148200</text:p>
          </table:table-cell>
          <table:table-cell table:formula="of:=[.D207]-[.D20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17" office:value-type="float" office:value="3502" calcext:value-type="float">
            <text:p>350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405324074074074" calcext:value-type="float">
            <text:p>0,00040532407407407400</text:p>
          </table:table-cell>
          <table:table-cell table:formula="of:=[.D208]-[.D20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17" office:value-type="float" office:value="3519" calcext:value-type="float">
            <text:p>3519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407291666666667" calcext:value-type="float">
            <text:p>0,00040729166666666700</text:p>
          </table:table-cell>
          <table:table-cell table:formula="of:=[.D209]-[.D208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17" office:value-type="float" office:value="3536" calcext:value-type="float">
            <text:p>353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409259259259259" calcext:value-type="float">
            <text:p>0,00040925925925925900</text:p>
          </table:table-cell>
          <table:table-cell table:formula="of:=[.D210]-[.D20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17" office:value-type="float" office:value="3553" calcext:value-type="float">
            <text:p>3553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411226851851852" calcext:value-type="float">
            <text:p>0,00041122685185185200</text:p>
          </table:table-cell>
          <table:table-cell table:formula="of:=[.D211]-[.D21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17" office:value-type="float" office:value="3570" calcext:value-type="float">
            <text:p>357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413194444444444" calcext:value-type="float">
            <text:p>0,00041319444444444400</text:p>
          </table:table-cell>
          <table:table-cell table:formula="of:=[.D212]-[.D21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17" office:value-type="float" office:value="3587" calcext:value-type="float">
            <text:p>3587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415162037037037" calcext:value-type="float">
            <text:p>0,00041516203703703700</text:p>
          </table:table-cell>
          <table:table-cell table:formula="of:=[.D213]-[.D212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17" office:value-type="float" office:value="3604" calcext:value-type="float">
            <text:p>360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41712962962963" calcext:value-type="float">
            <text:p>0,00041712962962963000</text:p>
          </table:table-cell>
          <table:table-cell table:formula="of:=[.D214]-[.D21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17" office:value-type="float" office:value="3621" calcext:value-type="float">
            <text:p>3621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419097222222222" calcext:value-type="float">
            <text:p>0,00041909722222222200</text:p>
          </table:table-cell>
          <table:table-cell table:formula="of:=[.D215]-[.D21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17" office:value-type="float" office:value="3638" calcext:value-type="float">
            <text:p>363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421064814814815" calcext:value-type="float">
            <text:p>0,00042106481481481500</text:p>
          </table:table-cell>
          <table:table-cell table:formula="of:=[.D216]-[.D21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17" office:value-type="float" office:value="3655" calcext:value-type="float">
            <text:p>365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423032407407407" calcext:value-type="float">
            <text:p>0,00042303240740740700</text:p>
          </table:table-cell>
          <table:table-cell table:formula="of:=[.D217]-[.D21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17" office:value-type="float" office:value="3672" calcext:value-type="float">
            <text:p>367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425" calcext:value-type="float">
            <text:p>0,00042500000000000000</text:p>
          </table:table-cell>
          <table:table-cell table:formula="of:=[.D218]-[.D217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17" office:value-type="float" office:value="3689" calcext:value-type="float">
            <text:p>3689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426967592592593" calcext:value-type="float">
            <text:p>0,00042696759259259300</text:p>
          </table:table-cell>
          <table:table-cell table:formula="of:=[.D219]-[.D21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17" office:value-type="float" office:value="3706" calcext:value-type="float">
            <text:p>370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428935185185185" calcext:value-type="float">
            <text:p>0,00042893518518518500</text:p>
          </table:table-cell>
          <table:table-cell table:formula="of:=[.D220]-[.D21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17" office:value-type="float" office:value="3723" calcext:value-type="float">
            <text:p>3723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430902777777778" calcext:value-type="float">
            <text:p>0,00043090277777777800</text:p>
          </table:table-cell>
          <table:table-cell table:formula="of:=[.D221]-[.D22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17" office:value-type="float" office:value="3740" calcext:value-type="float">
            <text:p>37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43287037037037" calcext:value-type="float">
            <text:p>0,00043287037037037000</text:p>
          </table:table-cell>
          <table:table-cell table:formula="of:=[.D222]-[.D221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17" office:value-type="float" office:value="3757" calcext:value-type="float">
            <text:p>3757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434837962962963" calcext:value-type="float">
            <text:p>0,00043483796296296300</text:p>
          </table:table-cell>
          <table:table-cell table:formula="of:=[.D223]-[.D22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17" office:value-type="float" office:value="3774" calcext:value-type="float">
            <text:p>377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436805555555556" calcext:value-type="float">
            <text:p>0,00043680555555555600</text:p>
          </table:table-cell>
          <table:table-cell table:formula="of:=[.D224]-[.D22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17" office:value-type="float" office:value="3791" calcext:value-type="float">
            <text:p>3791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438773148148148" calcext:value-type="float">
            <text:p>0,00043877314814814800</text:p>
          </table:table-cell>
          <table:table-cell table:formula="of:=[.D225]-[.D22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17" office:value-type="float" office:value="3808" calcext:value-type="float">
            <text:p>380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440740740740741" calcext:value-type="float">
            <text:p>0,00044074074074074100</text:p>
          </table:table-cell>
          <table:table-cell table:formula="of:=[.D226]-[.D22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17" office:value-type="float" office:value="3825" calcext:value-type="float">
            <text:p>38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442708333333333" calcext:value-type="float">
            <text:p>0,00044270833333333300</text:p>
          </table:table-cell>
          <table:table-cell table:formula="of:=[.D227]-[.D226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17" office:value-type="float" office:value="3842" calcext:value-type="float">
            <text:p>384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444675925925926" calcext:value-type="float">
            <text:p>0,00044467592592592600</text:p>
          </table:table-cell>
          <table:table-cell table:formula="of:=[.D228]-[.D22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17" office:value-type="float" office:value="3859" calcext:value-type="float">
            <text:p>3859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446643518518519" calcext:value-type="float">
            <text:p>0,00044664351851851900</text:p>
          </table:table-cell>
          <table:table-cell table:formula="of:=[.D229]-[.D22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17" office:value-type="float" office:value="3876" calcext:value-type="float">
            <text:p>387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448611111111111" calcext:value-type="float">
            <text:p>0,00044861111111111100</text:p>
          </table:table-cell>
          <table:table-cell table:formula="of:=[.D230]-[.D22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17" office:value-type="float" office:value="3893" calcext:value-type="float">
            <text:p>3893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450578703703704" calcext:value-type="float">
            <text:p>0,00045057870370370400</text:p>
          </table:table-cell>
          <table:table-cell table:formula="of:=[.D231]-[.D230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17" office:value-type="float" office:value="3910" calcext:value-type="float">
            <text:p>391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452546296296296" calcext:value-type="float">
            <text:p>0,00045254629629629600</text:p>
          </table:table-cell>
          <table:table-cell table:formula="of:=[.D232]-[.D23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17" office:value-type="float" office:value="3927" calcext:value-type="float">
            <text:p>3927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454513888888889" calcext:value-type="float">
            <text:p>0,00045451388888888900</text:p>
          </table:table-cell>
          <table:table-cell table:formula="of:=[.D233]-[.D23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17" office:value-type="float" office:value="3944" calcext:value-type="float">
            <text:p>394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456481481481482" calcext:value-type="float">
            <text:p>0,00045648148148148200</text:p>
          </table:table-cell>
          <table:table-cell table:formula="of:=[.D234]-[.D23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17" office:value-type="float" office:value="3961" calcext:value-type="float">
            <text:p>3961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458449074074074" calcext:value-type="float">
            <text:p>0,00045844907407407400</text:p>
          </table:table-cell>
          <table:table-cell table:formula="of:=[.D235]-[.D23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17" office:value-type="float" office:value="3978" calcext:value-type="float">
            <text:p>397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460416666666667" calcext:value-type="float">
            <text:p>0,00046041666666666700</text:p>
          </table:table-cell>
          <table:table-cell table:formula="of:=[.D236]-[.D235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17" office:value-type="float" office:value="3995" calcext:value-type="float">
            <text:p>399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462384259259259" calcext:value-type="float">
            <text:p>0,00046238425925925900</text:p>
          </table:table-cell>
          <table:table-cell table:formula="of:=[.D237]-[.D23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17" office:value-type="float" office:value="4012" calcext:value-type="float">
            <text:p>401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464351851851852" calcext:value-type="float">
            <text:p>0,00046435185185185200</text:p>
          </table:table-cell>
          <table:table-cell table:formula="of:=[.D238]-[.D23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17" office:value-type="float" office:value="4029" calcext:value-type="float">
            <text:p>4029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466319444444444" calcext:value-type="float">
            <text:p>0,00046631944444444500</text:p>
          </table:table-cell>
          <table:table-cell table:formula="of:=[.D239]-[.D23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17" office:value-type="float" office:value="4046" calcext:value-type="float">
            <text:p>404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468287037037037" calcext:value-type="float">
            <text:p>0,00046828703703703700</text:p>
          </table:table-cell>
          <table:table-cell table:formula="of:=[.D240]-[.D23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17" office:value-type="float" office:value="4063" calcext:value-type="float">
            <text:p>4063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47025462962963" calcext:value-type="float">
            <text:p>0,00047025462962963000</text:p>
          </table:table-cell>
          <table:table-cell table:formula="of:=[.D241]-[.D240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17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472222222222222" calcext:value-type="float">
            <text:p>0,00047222222222222200</text:p>
          </table:table-cell>
          <table:table-cell table:formula="of:=[.D242]-[.D24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17" office:value-type="float" office:value="4097" calcext:value-type="float">
            <text:p>4097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474189814814815" calcext:value-type="float">
            <text:p>0,00047418981481481500</text:p>
          </table:table-cell>
          <table:table-cell table:formula="of:=[.D243]-[.D24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17" office:value-type="float" office:value="4114" calcext:value-type="float">
            <text:p>411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476157407407407" calcext:value-type="float">
            <text:p>0,00047615740740740700</text:p>
          </table:table-cell>
          <table:table-cell table:formula="of:=[.D244]-[.D24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17" office:value-type="float" office:value="4131" calcext:value-type="float">
            <text:p>4131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478125" calcext:value-type="float">
            <text:p>0,00047812500000000000</text:p>
          </table:table-cell>
          <table:table-cell table:formula="of:=[.D245]-[.D244]" office:value-type="float" office:value="0.00000196759259259264" calcext:value-type="float">
            <text:p>0,0000019675925925926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17" office:value-type="float" office:value="4148" calcext:value-type="float">
            <text:p>414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480092592592593" calcext:value-type="float">
            <text:p>0,00048009259259259300</text:p>
          </table:table-cell>
          <table:table-cell table:formula="of:=[.D246]-[.D24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17" office:value-type="float" office:value="4165" calcext:value-type="float">
            <text:p>416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482060185185185" calcext:value-type="float">
            <text:p>0,00048206018518518500</text:p>
          </table:table-cell>
          <table:table-cell table:formula="of:=[.D247]-[.D24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17" office:value-type="float" office:value="4182" calcext:value-type="float">
            <text:p>418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484027777777778" calcext:value-type="float">
            <text:p>0,00048402777777777800</text:p>
          </table:table-cell>
          <table:table-cell table:formula="of:=[.D248]-[.D24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17" office:value-type="float" office:value="4199" calcext:value-type="float">
            <text:p>4199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48599537037037" calcext:value-type="float">
            <text:p>0,00048599537037037000</text:p>
          </table:table-cell>
          <table:table-cell table:formula="of:=[.D249]-[.D24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17" office:value-type="float" office:value="4216" calcext:value-type="float">
            <text:p>421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487962962962963" calcext:value-type="float">
            <text:p>0,00048796296296296300</text:p>
          </table:table-cell>
          <table:table-cell table:formula="of:=[.D250]-[.D24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17" office:value-type="float" office:value="4233" calcext:value-type="float">
            <text:p>4233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489930555555556" calcext:value-type="float">
            <text:p>0,00048993055555555600</text:p>
          </table:table-cell>
          <table:table-cell table:formula="of:=[.D251]-[.D25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17" office:value-type="float" office:value="4250" calcext:value-type="float">
            <text:p>4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491898148148148" calcext:value-type="float">
            <text:p>0,00049189814814814800</text:p>
          </table:table-cell>
          <table:table-cell table:formula="of:=[.D252]-[.D25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17" office:value-type="float" office:value="4267" calcext:value-type="float">
            <text:p>4267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493865740740741" calcext:value-type="float">
            <text:p>0,00049386574074074100</text:p>
          </table:table-cell>
          <table:table-cell table:formula="of:=[.D253]-[.D25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17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495833333333333" calcext:value-type="float">
            <text:p>0,00049583333333333300</text:p>
          </table:table-cell>
          <table:table-cell table:formula="of:=[.D254]-[.D25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17" office:value-type="float" office:value="4301" calcext:value-type="float">
            <text:p>4301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497800925925926" calcext:value-type="float">
            <text:p>0,00049780092592592600</text:p>
          </table:table-cell>
          <table:table-cell table:formula="of:=[.D255]-[.D25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17" office:value-type="float" office:value="4318" calcext:value-type="float">
            <text:p>431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499768518518519" calcext:value-type="float">
            <text:p>0,00049976851851851900</text:p>
          </table:table-cell>
          <table:table-cell table:formula="of:=[.D256]-[.D25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17" office:value-type="float" office:value="4335" calcext:value-type="float">
            <text:p>433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501736111111111" calcext:value-type="float">
            <text:p>0,00050173611111111100</text:p>
          </table:table-cell>
          <table:table-cell table:formula="of:=[.D257]-[.D25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17" office:value-type="float" office:value="4352" calcext:value-type="float">
            <text:p>435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503703703703704" calcext:value-type="float">
            <text:p>0,00050370370370370400</text:p>
          </table:table-cell>
          <table:table-cell table:formula="of:=[.D258]-[.D25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17" office:value-type="float" office:value="4369" calcext:value-type="float">
            <text:p>4369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505671296296296" calcext:value-type="float">
            <text:p>0,00050567129629629600</text:p>
          </table:table-cell>
          <table:table-cell table:formula="of:=[.D259]-[.D25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17" office:value-type="float" office:value="4386" calcext:value-type="float">
            <text:p>438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507638888888889" calcext:value-type="float">
            <text:p>0,00050763888888888900</text:p>
          </table:table-cell>
          <table:table-cell table:formula="of:=[.D260]-[.D25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17" office:value-type="float" office:value="4403" calcext:value-type="float">
            <text:p>4403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509606481481481" calcext:value-type="float">
            <text:p>0,00050960648148148100</text:p>
          </table:table-cell>
          <table:table-cell table:formula="of:=[.D261]-[.D26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17" office:value-type="float" office:value="4420" calcext:value-type="float">
            <text:p>44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511574074074074" calcext:value-type="float">
            <text:p>0,00051157407407407400</text:p>
          </table:table-cell>
          <table:table-cell table:formula="of:=[.D262]-[.D26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17" office:value-type="float" office:value="4437" calcext:value-type="float">
            <text:p>4437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513541666666667" calcext:value-type="float">
            <text:p>0,00051354166666666700</text:p>
          </table:table-cell>
          <table:table-cell table:formula="of:=[.D263]-[.D26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17" office:value-type="float" office:value="4454" calcext:value-type="float">
            <text:p>445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515509259259259" calcext:value-type="float">
            <text:p>0,00051550925925925900</text:p>
          </table:table-cell>
          <table:table-cell table:formula="of:=[.D264]-[.D26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17" office:value-type="float" office:value="4471" calcext:value-type="float">
            <text:p>4471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517476851851852" calcext:value-type="float">
            <text:p>0,00051747685185185200</text:p>
          </table:table-cell>
          <table:table-cell table:formula="of:=[.D265]-[.D26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17" office:value-type="float" office:value="4488" calcext:value-type="float">
            <text:p>448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519444444444444" calcext:value-type="float">
            <text:p>0,00051944444444444400</text:p>
          </table:table-cell>
          <table:table-cell table:formula="of:=[.D266]-[.D26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17" office:value-type="float" office:value="4505" calcext:value-type="float">
            <text:p>450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521412037037037" calcext:value-type="float">
            <text:p>0,00052141203703703700</text:p>
          </table:table-cell>
          <table:table-cell table:formula="of:=[.D267]-[.D26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17" office:value-type="float" office:value="4522" calcext:value-type="float">
            <text:p>452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52337962962963" calcext:value-type="float">
            <text:p>0,00052337962962963000</text:p>
          </table:table-cell>
          <table:table-cell table:formula="of:=[.D268]-[.D26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17" office:value-type="float" office:value="4539" calcext:value-type="float">
            <text:p>4539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525347222222222" calcext:value-type="float">
            <text:p>0,00052534722222222200</text:p>
          </table:table-cell>
          <table:table-cell table:formula="of:=[.D269]-[.D26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17" office:value-type="float" office:value="4556" calcext:value-type="float">
            <text:p>455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527314814814815" calcext:value-type="float">
            <text:p>0,00052731481481481500</text:p>
          </table:table-cell>
          <table:table-cell table:formula="of:=[.D270]-[.D26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17" office:value-type="float" office:value="4573" calcext:value-type="float">
            <text:p>4573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529282407407408" calcext:value-type="float">
            <text:p>0,00052928240740740800</text:p>
          </table:table-cell>
          <table:table-cell table:formula="of:=[.D271]-[.D27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17" office:value-type="float" office:value="4590" calcext:value-type="float">
            <text:p>459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53125" calcext:value-type="float">
            <text:p>0,00053125000000000000</text:p>
          </table:table-cell>
          <table:table-cell table:formula="of:=[.D272]-[.D27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17" office:value-type="float" office:value="4607" calcext:value-type="float">
            <text:p>4607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533217592592593" calcext:value-type="float">
            <text:p>0,00053321759259259300</text:p>
          </table:table-cell>
          <table:table-cell table:formula="of:=[.D273]-[.D27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17" office:value-type="float" office:value="4624" calcext:value-type="float">
            <text:p>462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535185185185185" calcext:value-type="float">
            <text:p>0,00053518518518518500</text:p>
          </table:table-cell>
          <table:table-cell table:formula="of:=[.D274]-[.D27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17" office:value-type="float" office:value="4641" calcext:value-type="float">
            <text:p>4641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537152777777778" calcext:value-type="float">
            <text:p>0,00053715277777777800</text:p>
          </table:table-cell>
          <table:table-cell table:formula="of:=[.D275]-[.D27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17" office:value-type="float" office:value="4658" calcext:value-type="float">
            <text:p>465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53912037037037" calcext:value-type="float">
            <text:p>0,00053912037037037000</text:p>
          </table:table-cell>
          <table:table-cell table:formula="of:=[.D276]-[.D27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17" office:value-type="float" office:value="4675" calcext:value-type="float">
            <text:p>46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541087962962963" calcext:value-type="float">
            <text:p>0,00054108796296296300</text:p>
          </table:table-cell>
          <table:table-cell table:formula="of:=[.D277]-[.D27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17" office:value-type="float" office:value="4692" calcext:value-type="float">
            <text:p>469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543055555555556" calcext:value-type="float">
            <text:p>0,00054305555555555600</text:p>
          </table:table-cell>
          <table:table-cell table:formula="of:=[.D278]-[.D27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17" office:value-type="float" office:value="4709" calcext:value-type="float">
            <text:p>4709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545023148148148" calcext:value-type="float">
            <text:p>0,00054502314814814800</text:p>
          </table:table-cell>
          <table:table-cell table:formula="of:=[.D279]-[.D27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17" office:value-type="float" office:value="4726" calcext:value-type="float">
            <text:p>472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546990740740741" calcext:value-type="float">
            <text:p>0,00054699074074074100</text:p>
          </table:table-cell>
          <table:table-cell table:formula="of:=[.D280]-[.D27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17" office:value-type="float" office:value="4743" calcext:value-type="float">
            <text:p>4743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548958333333333" calcext:value-type="float">
            <text:p>0,00054895833333333300</text:p>
          </table:table-cell>
          <table:table-cell table:formula="of:=[.D281]-[.D28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17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550925925925926" calcext:value-type="float">
            <text:p>0,00055092592592592600</text:p>
          </table:table-cell>
          <table:table-cell table:formula="of:=[.D282]-[.D28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17" office:value-type="float" office:value="4777" calcext:value-type="float">
            <text:p>4777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552893518518519" calcext:value-type="float">
            <text:p>0,00055289351851851900</text:p>
          </table:table-cell>
          <table:table-cell table:formula="of:=[.D283]-[.D28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17" office:value-type="float" office:value="4794" calcext:value-type="float">
            <text:p>479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554861111111111" calcext:value-type="float">
            <text:p>0,00055486111111111100</text:p>
          </table:table-cell>
          <table:table-cell table:formula="of:=[.D284]-[.D28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17" office:value-type="float" office:value="4811" calcext:value-type="float">
            <text:p>4811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556828703703704" calcext:value-type="float">
            <text:p>0,00055682870370370400</text:p>
          </table:table-cell>
          <table:table-cell table:formula="of:=[.D285]-[.D28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17" office:value-type="float" office:value="4828" calcext:value-type="float">
            <text:p>482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558796296296296" calcext:value-type="float">
            <text:p>0,00055879629629629600</text:p>
          </table:table-cell>
          <table:table-cell table:formula="of:=[.D286]-[.D28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17" office:value-type="float" office:value="4845" calcext:value-type="float">
            <text:p>484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560763888888889" calcext:value-type="float">
            <text:p>0,00056076388888888900</text:p>
          </table:table-cell>
          <table:table-cell table:formula="of:=[.D287]-[.D28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17" office:value-type="float" office:value="4862" calcext:value-type="float">
            <text:p>486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562731481481481" calcext:value-type="float">
            <text:p>0,00056273148148148100</text:p>
          </table:table-cell>
          <table:table-cell table:formula="of:=[.D288]-[.D28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17" office:value-type="float" office:value="4879" calcext:value-type="float">
            <text:p>4879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564699074074074" calcext:value-type="float">
            <text:p>0,00056469907407407400</text:p>
          </table:table-cell>
          <table:table-cell table:formula="of:=[.D289]-[.D28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17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566666666666667" calcext:value-type="float">
            <text:p>0,00056666666666666700</text:p>
          </table:table-cell>
          <table:table-cell table:formula="of:=[.D290]-[.D28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17" office:value-type="float" office:value="4913" calcext:value-type="float">
            <text:p>4913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568634259259259" calcext:value-type="float">
            <text:p>0,00056863425925925900</text:p>
          </table:table-cell>
          <table:table-cell table:formula="of:=[.D291]-[.D29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17" office:value-type="float" office:value="4930" calcext:value-type="float">
            <text:p>493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570601851851852" calcext:value-type="float">
            <text:p>0,00057060185185185200</text:p>
          </table:table-cell>
          <table:table-cell table:formula="of:=[.D292]-[.D29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17" office:value-type="float" office:value="4947" calcext:value-type="float">
            <text:p>4947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572569444444444" calcext:value-type="float">
            <text:p>0,00057256944444444400</text:p>
          </table:table-cell>
          <table:table-cell table:formula="of:=[.D293]-[.D29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17" office:value-type="float" office:value="4964" calcext:value-type="float">
            <text:p>496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574537037037037" calcext:value-type="float">
            <text:p>0,00057453703703703700</text:p>
          </table:table-cell>
          <table:table-cell table:formula="of:=[.D294]-[.D29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17" office:value-type="float" office:value="4981" calcext:value-type="float">
            <text:p>4981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57650462962963" calcext:value-type="float">
            <text:p>0,00057650462962963000</text:p>
          </table:table-cell>
          <table:table-cell table:formula="of:=[.D295]-[.D29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17" office:value-type="float" office:value="4998" calcext:value-type="float">
            <text:p>499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578472222222222" calcext:value-type="float">
            <text:p>0,00057847222222222200</text:p>
          </table:table-cell>
          <table:table-cell table:formula="of:=[.D296]-[.D29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17" office:value-type="float" office:value="5015" calcext:value-type="float">
            <text:p>501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580439814814815" calcext:value-type="float">
            <text:p>0,00058043981481481500</text:p>
          </table:table-cell>
          <table:table-cell table:formula="of:=[.D297]-[.D29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17" office:value-type="float" office:value="5032" calcext:value-type="float">
            <text:p>503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582407407407408" calcext:value-type="float">
            <text:p>0,00058240740740740800</text:p>
          </table:table-cell>
          <table:table-cell table:formula="of:=[.D298]-[.D29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17" office:value-type="float" office:value="5049" calcext:value-type="float">
            <text:p>5049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584375" calcext:value-type="float">
            <text:p>0,00058437500000000000</text:p>
          </table:table-cell>
          <table:table-cell table:formula="of:=[.D299]-[.D29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17" office:value-type="float" office:value="5066" calcext:value-type="float">
            <text:p>506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586342592592593" calcext:value-type="float">
            <text:p>0,00058634259259259300</text:p>
          </table:table-cell>
          <table:table-cell table:formula="of:=[.D300]-[.D29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17" office:value-type="float" office:value="5083" calcext:value-type="float">
            <text:p>5083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588310185185185" calcext:value-type="float">
            <text:p>0,00058831018518518500</text:p>
          </table:table-cell>
          <table:table-cell table:formula="of:=[.D301]-[.D30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17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590277777777778" calcext:value-type="float">
            <text:p>0,00059027777777777800</text:p>
          </table:table-cell>
          <table:table-cell table:formula="of:=[.D302]-[.D30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17" office:value-type="float" office:value="5117" calcext:value-type="float">
            <text:p>5117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59224537037037" calcext:value-type="float">
            <text:p>0,00059224537037037000</text:p>
          </table:table-cell>
          <table:table-cell table:formula="of:=[.D303]-[.D30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17" office:value-type="float" office:value="5134" calcext:value-type="float">
            <text:p>513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594212962962963" calcext:value-type="float">
            <text:p>0,00059421296296296300</text:p>
          </table:table-cell>
          <table:table-cell table:formula="of:=[.D304]-[.D30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17" office:value-type="float" office:value="5151" calcext:value-type="float">
            <text:p>5151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596180555555556" calcext:value-type="float">
            <text:p>0,00059618055555555600</text:p>
          </table:table-cell>
          <table:table-cell table:formula="of:=[.D305]-[.D30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17" office:value-type="float" office:value="5168" calcext:value-type="float">
            <text:p>516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598148148148148" calcext:value-type="float">
            <text:p>0,00059814814814814800</text:p>
          </table:table-cell>
          <table:table-cell table:formula="of:=[.D306]-[.D30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17" office:value-type="float" office:value="5185" calcext:value-type="float">
            <text:p>518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600115740740741" calcext:value-type="float">
            <text:p>0,00060011574074074100</text:p>
          </table:table-cell>
          <table:table-cell table:formula="of:=[.D307]-[.D30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17" office:value-type="float" office:value="5202" calcext:value-type="float">
            <text:p>520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602083333333333" calcext:value-type="float">
            <text:p>0,00060208333333333300</text:p>
          </table:table-cell>
          <table:table-cell table:formula="of:=[.D308]-[.D30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17" office:value-type="float" office:value="5219" calcext:value-type="float">
            <text:p>5219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604050925925926" calcext:value-type="float">
            <text:p>0,00060405092592592600</text:p>
          </table:table-cell>
          <table:table-cell table:formula="of:=[.D309]-[.D30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17" office:value-type="float" office:value="5236" calcext:value-type="float">
            <text:p>523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606018518518519" calcext:value-type="float">
            <text:p>0,00060601851851851900</text:p>
          </table:table-cell>
          <table:table-cell table:formula="of:=[.D310]-[.D30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17" office:value-type="float" office:value="5253" calcext:value-type="float">
            <text:p>5253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607986111111111" calcext:value-type="float">
            <text:p>0,00060798611111111100</text:p>
          </table:table-cell>
          <table:table-cell table:formula="of:=[.D311]-[.D31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17" office:value-type="float" office:value="5270" calcext:value-type="float">
            <text:p>527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609953703703704" calcext:value-type="float">
            <text:p>0,00060995370370370400</text:p>
          </table:table-cell>
          <table:table-cell table:formula="of:=[.D312]-[.D31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17" office:value-type="float" office:value="5287" calcext:value-type="float">
            <text:p>5287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611921296296296" calcext:value-type="float">
            <text:p>0,00061192129629629600</text:p>
          </table:table-cell>
          <table:table-cell table:formula="of:=[.D313]-[.D31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17" office:value-type="float" office:value="5304" calcext:value-type="float">
            <text:p>530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613888888888889" calcext:value-type="float">
            <text:p>0,00061388888888888900</text:p>
          </table:table-cell>
          <table:table-cell table:formula="of:=[.D314]-[.D31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17" office:value-type="float" office:value="5321" calcext:value-type="float">
            <text:p>5321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615856481481481" calcext:value-type="float">
            <text:p>0,00061585648148148100</text:p>
          </table:table-cell>
          <table:table-cell table:formula="of:=[.D315]-[.D31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17" office:value-type="float" office:value="5338" calcext:value-type="float">
            <text:p>533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617824074074074" calcext:value-type="float">
            <text:p>0,00061782407407407400</text:p>
          </table:table-cell>
          <table:table-cell table:formula="of:=[.D316]-[.D31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17" office:value-type="float" office:value="5355" calcext:value-type="float">
            <text:p>535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619791666666667" calcext:value-type="float">
            <text:p>0,00061979166666666700</text:p>
          </table:table-cell>
          <table:table-cell table:formula="of:=[.D317]-[.D31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17" office:value-type="float" office:value="5372" calcext:value-type="float">
            <text:p>537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621759259259259" calcext:value-type="float">
            <text:p>0,00062175925925925900</text:p>
          </table:table-cell>
          <table:table-cell table:formula="of:=[.D318]-[.D31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17" office:value-type="float" office:value="5389" calcext:value-type="float">
            <text:p>5389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623726851851852" calcext:value-type="float">
            <text:p>0,00062372685185185200</text:p>
          </table:table-cell>
          <table:table-cell table:formula="of:=[.D319]-[.D31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17" office:value-type="float" office:value="5406" calcext:value-type="float">
            <text:p>540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625694444444445" calcext:value-type="float">
            <text:p>0,00062569444444444500</text:p>
          </table:table-cell>
          <table:table-cell table:formula="of:=[.D320]-[.D31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17" office:value-type="float" office:value="5423" calcext:value-type="float">
            <text:p>5423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627662037037037" calcext:value-type="float">
            <text:p>0,00062766203703703700</text:p>
          </table:table-cell>
          <table:table-cell table:formula="of:=[.D321]-[.D32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17" office:value-type="float" office:value="5440" calcext:value-type="float">
            <text:p>54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62962962962963" calcext:value-type="float">
            <text:p>0,00062962962962963000</text:p>
          </table:table-cell>
          <table:table-cell table:formula="of:=[.D322]-[.D32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17" office:value-type="float" office:value="5457" calcext:value-type="float">
            <text:p>5457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631597222222222" calcext:value-type="float">
            <text:p>0,00063159722222222200</text:p>
          </table:table-cell>
          <table:table-cell table:formula="of:=[.D323]-[.D32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17" office:value-type="float" office:value="5474" calcext:value-type="float">
            <text:p>547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633564814814815" calcext:value-type="float">
            <text:p>0,00063356481481481500</text:p>
          </table:table-cell>
          <table:table-cell table:formula="of:=[.D324]-[.D32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17" office:value-type="float" office:value="5491" calcext:value-type="float">
            <text:p>5491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635532407407407" calcext:value-type="float">
            <text:p>0,00063553240740740700</text:p>
          </table:table-cell>
          <table:table-cell table:formula="of:=[.D325]-[.D32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17" office:value-type="float" office:value="5508" calcext:value-type="float">
            <text:p>550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6375" calcext:value-type="float">
            <text:p>0,00063750000000000000</text:p>
          </table:table-cell>
          <table:table-cell table:formula="of:=[.D326]-[.D32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17" office:value-type="float" office:value="5525" calcext:value-type="float">
            <text:p>55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639467592592593" calcext:value-type="float">
            <text:p>0,00063946759259259300</text:p>
          </table:table-cell>
          <table:table-cell table:formula="of:=[.D327]-[.D32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17" office:value-type="float" office:value="5542" calcext:value-type="float">
            <text:p>554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641435185185185" calcext:value-type="float">
            <text:p>0,00064143518518518500</text:p>
          </table:table-cell>
          <table:table-cell table:formula="of:=[.D328]-[.D32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17" office:value-type="float" office:value="5559" calcext:value-type="float">
            <text:p>5559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643402777777778" calcext:value-type="float">
            <text:p>0,00064340277777777800</text:p>
          </table:table-cell>
          <table:table-cell table:formula="of:=[.D329]-[.D32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17" office:value-type="float" office:value="5576" calcext:value-type="float">
            <text:p>557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64537037037037" calcext:value-type="float">
            <text:p>0,00064537037037037000</text:p>
          </table:table-cell>
          <table:table-cell table:formula="of:=[.D330]-[.D32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17" office:value-type="float" office:value="5593" calcext:value-type="float">
            <text:p>5593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647337962962963" calcext:value-type="float">
            <text:p>0,00064733796296296300</text:p>
          </table:table-cell>
          <table:table-cell table:formula="of:=[.D331]-[.D33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17" office:value-type="float" office:value="5610" calcext:value-type="float">
            <text:p>561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649305555555556" calcext:value-type="float">
            <text:p>0,00064930555555555600</text:p>
          </table:table-cell>
          <table:table-cell table:formula="of:=[.D332]-[.D33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17" office:value-type="float" office:value="5627" calcext:value-type="float">
            <text:p>5627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651273148148148" calcext:value-type="float">
            <text:p>0,00065127314814814800</text:p>
          </table:table-cell>
          <table:table-cell table:formula="of:=[.D333]-[.D33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17" office:value-type="float" office:value="5644" calcext:value-type="float">
            <text:p>564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653240740740741" calcext:value-type="float">
            <text:p>0,00065324074074074100</text:p>
          </table:table-cell>
          <table:table-cell table:formula="of:=[.D334]-[.D33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17" office:value-type="float" office:value="5661" calcext:value-type="float">
            <text:p>5661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655208333333333" calcext:value-type="float">
            <text:p>0,00065520833333333300</text:p>
          </table:table-cell>
          <table:table-cell table:formula="of:=[.D335]-[.D33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17" office:value-type="float" office:value="5678" calcext:value-type="float">
            <text:p>5678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657175925925926" calcext:value-type="float">
            <text:p>0,00065717592592592600</text:p>
          </table:table-cell>
          <table:table-cell table:formula="of:=[.D336]-[.D33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17" office:value-type="float" office:value="5695" calcext:value-type="float">
            <text:p>569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659143518518519" calcext:value-type="float">
            <text:p>0,00065914351851851900</text:p>
          </table:table-cell>
          <table:table-cell table:formula="of:=[.D337]-[.D33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17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661111111111111" calcext:value-type="float">
            <text:p>0,00066111111111111100</text:p>
          </table:table-cell>
          <table:table-cell table:formula="of:=[.D338]-[.D33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17" office:value-type="float" office:value="5729" calcext:value-type="float">
            <text:p>5729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663078703703704" calcext:value-type="float">
            <text:p>0,00066307870370370400</text:p>
          </table:table-cell>
          <table:table-cell table:formula="of:=[.D339]-[.D33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17" office:value-type="float" office:value="5746" calcext:value-type="float">
            <text:p>5746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665046296296296" calcext:value-type="float">
            <text:p>0,00066504629629629600</text:p>
          </table:table-cell>
          <table:table-cell table:formula="of:=[.D340]-[.D33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17" office:value-type="float" office:value="5763" calcext:value-type="float">
            <text:p>5763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667013888888889" calcext:value-type="float">
            <text:p>0,00066701388888888900</text:p>
          </table:table-cell>
          <table:table-cell table:formula="of:=[.D341]-[.D34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17" office:value-type="float" office:value="5780" calcext:value-type="float">
            <text:p>578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668981481481481" calcext:value-type="float">
            <text:p>0,00066898148148148100</text:p>
          </table:table-cell>
          <table:table-cell table:formula="of:=[.D342]-[.D34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17" office:value-type="float" office:value="5797" calcext:value-type="float">
            <text:p>5797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670949074074074" calcext:value-type="float">
            <text:p>0,00067094907407407400</text:p>
          </table:table-cell>
          <table:table-cell table:formula="of:=[.D343]-[.D34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17" office:value-type="float" office:value="5814" calcext:value-type="float">
            <text:p>5814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672916666666667" calcext:value-type="float">
            <text:p>0,00067291666666666700</text:p>
          </table:table-cell>
          <table:table-cell table:formula="of:=[.D344]-[.D34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17" office:value-type="float" office:value="5831" calcext:value-type="float">
            <text:p>5831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674884259259259" calcext:value-type="float">
            <text:p>0,00067488425925925900</text:p>
          </table:table-cell>
          <table:table-cell table:formula="of:=[.D345]-[.D34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17" office:value-type="float" office:value="5848" calcext:value-type="float">
            <text:p>5848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676851851851852" calcext:value-type="float">
            <text:p>0,00067685185185185200</text:p>
          </table:table-cell>
          <table:table-cell table:formula="of:=[.D346]-[.D34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17" office:value-type="float" office:value="5865" calcext:value-type="float">
            <text:p>586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678819444444445" calcext:value-type="float">
            <text:p>0,00067881944444444500</text:p>
          </table:table-cell>
          <table:table-cell table:formula="of:=[.D347]-[.D34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17" office:value-type="float" office:value="5882" calcext:value-type="float">
            <text:p>5882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680787037037037" calcext:value-type="float">
            <text:p>0,00068078703703703700</text:p>
          </table:table-cell>
          <table:table-cell table:formula="of:=[.D348]-[.D34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17" office:value-type="float" office:value="5899" calcext:value-type="float">
            <text:p>5899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68275462962963" calcext:value-type="float">
            <text:p>0,00068275462962963000</text:p>
          </table:table-cell>
          <table:table-cell table:formula="of:=[.D349]-[.D34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17" office:value-type="float" office:value="5916" calcext:value-type="float">
            <text:p>5916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684722222222222" calcext:value-type="float">
            <text:p>0,00068472222222222200</text:p>
          </table:table-cell>
          <table:table-cell table:formula="of:=[.D350]-[.D34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17" office:value-type="float" office:value="5933" calcext:value-type="float">
            <text:p>5933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686689814814815" calcext:value-type="float">
            <text:p>0,00068668981481481500</text:p>
          </table:table-cell>
          <table:table-cell table:formula="of:=[.D351]-[.D35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17" office:value-type="float" office:value="5950" calcext:value-type="float">
            <text:p>59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688657407407407" calcext:value-type="float">
            <text:p>0,00068865740740740700</text:p>
          </table:table-cell>
          <table:table-cell table:formula="of:=[.D352]-[.D35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17" office:value-type="float" office:value="5967" calcext:value-type="float">
            <text:p>5967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690625" calcext:value-type="float">
            <text:p>0,00069062500000000000</text:p>
          </table:table-cell>
          <table:table-cell table:formula="of:=[.D353]-[.D35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17" office:value-type="float" office:value="5984" calcext:value-type="float">
            <text:p>5984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692592592592593" calcext:value-type="float">
            <text:p>0,00069259259259259300</text:p>
          </table:table-cell>
          <table:table-cell table:formula="of:=[.D354]-[.D35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17" office:value-type="float" office:value="6001" calcext:value-type="float">
            <text:p>6001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694560185185185" calcext:value-type="float">
            <text:p>0,00069456018518518500</text:p>
          </table:table-cell>
          <table:table-cell table:formula="of:=[.D355]-[.D35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17" office:value-type="float" office:value="6018" calcext:value-type="float">
            <text:p>6018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696527777777778" calcext:value-type="float">
            <text:p>0,00069652777777777800</text:p>
          </table:table-cell>
          <table:table-cell table:formula="of:=[.D356]-[.D35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17" office:value-type="float" office:value="6035" calcext:value-type="float">
            <text:p>603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69849537037037" calcext:value-type="float">
            <text:p>0,00069849537037037000</text:p>
          </table:table-cell>
          <table:table-cell table:formula="of:=[.D357]-[.D35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17" office:value-type="float" office:value="6052" calcext:value-type="float">
            <text:p>6052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700462962962963" calcext:value-type="float">
            <text:p>0,00070046296296296300</text:p>
          </table:table-cell>
          <table:table-cell table:formula="of:=[.D358]-[.D35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17" office:value-type="float" office:value="6069" calcext:value-type="float">
            <text:p>6069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702430555555556" calcext:value-type="float">
            <text:p>0,00070243055555555600</text:p>
          </table:table-cell>
          <table:table-cell table:formula="of:=[.D359]-[.D35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17" office:value-type="float" office:value="6086" calcext:value-type="float">
            <text:p>6086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704398148148148" calcext:value-type="float">
            <text:p>0,00070439814814814800</text:p>
          </table:table-cell>
          <table:table-cell table:formula="of:=[.D360]-[.D35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17" office:value-type="float" office:value="6103" calcext:value-type="float">
            <text:p>6103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706365740740741" calcext:value-type="float">
            <text:p>0,00070636574074074100</text:p>
          </table:table-cell>
          <table:table-cell table:formula="of:=[.D361]-[.D36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17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708333333333333" calcext:value-type="float">
            <text:p>0,00070833333333333300</text:p>
          </table:table-cell>
          <table:table-cell table:formula="of:=[.D362]-[.D36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17" office:value-type="float" office:value="6137" calcext:value-type="float">
            <text:p>6137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710300925925926" calcext:value-type="float">
            <text:p>0,00071030092592592600</text:p>
          </table:table-cell>
          <table:table-cell table:formula="of:=[.D363]-[.D36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17" office:value-type="float" office:value="6154" calcext:value-type="float">
            <text:p>6154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712268518518519" calcext:value-type="float">
            <text:p>0,00071226851851851900</text:p>
          </table:table-cell>
          <table:table-cell table:formula="of:=[.D364]-[.D36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17" office:value-type="float" office:value="6171" calcext:value-type="float">
            <text:p>6171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714236111111111" calcext:value-type="float">
            <text:p>0,00071423611111111100</text:p>
          </table:table-cell>
          <table:table-cell table:formula="of:=[.D365]-[.D36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17" office:value-type="float" office:value="6188" calcext:value-type="float">
            <text:p>6188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716203703703704" calcext:value-type="float">
            <text:p>0,00071620370370370400</text:p>
          </table:table-cell>
          <table:table-cell table:formula="of:=[.D366]-[.D36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17" office:value-type="float" office:value="6205" calcext:value-type="float">
            <text:p>620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718171296296296" calcext:value-type="float">
            <text:p>0,00071817129629629600</text:p>
          </table:table-cell>
          <table:table-cell table:formula="of:=[.D367]-[.D36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17" office:value-type="float" office:value="6222" calcext:value-type="float">
            <text:p>6222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720138888888889" calcext:value-type="float">
            <text:p>0,00072013888888888900</text:p>
          </table:table-cell>
          <table:table-cell table:formula="of:=[.D368]-[.D36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17" office:value-type="float" office:value="6239" calcext:value-type="float">
            <text:p>6239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722106481481481" calcext:value-type="float">
            <text:p>0,00072210648148148100</text:p>
          </table:table-cell>
          <table:table-cell table:formula="of:=[.D369]-[.D36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17" office:value-type="float" office:value="6256" calcext:value-type="float">
            <text:p>6256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724074074074074" calcext:value-type="float">
            <text:p>0,00072407407407407400</text:p>
          </table:table-cell>
          <table:table-cell table:formula="of:=[.D370]-[.D36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17" office:value-type="float" office:value="6273" calcext:value-type="float">
            <text:p>6273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726041666666667" calcext:value-type="float">
            <text:p>0,00072604166666666700</text:p>
          </table:table-cell>
          <table:table-cell table:formula="of:=[.D371]-[.D37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17" office:value-type="float" office:value="6290" calcext:value-type="float">
            <text:p>629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728009259259259" calcext:value-type="float">
            <text:p>0,00072800925925925900</text:p>
          </table:table-cell>
          <table:table-cell table:formula="of:=[.D372]-[.D37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17" office:value-type="float" office:value="6307" calcext:value-type="float">
            <text:p>6307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729976851851852" calcext:value-type="float">
            <text:p>0,00072997685185185200</text:p>
          </table:table-cell>
          <table:table-cell table:formula="of:=[.D373]-[.D37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17" office:value-type="float" office:value="6324" calcext:value-type="float">
            <text:p>6324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731944444444445" calcext:value-type="float">
            <text:p>0,00073194444444444500</text:p>
          </table:table-cell>
          <table:table-cell table:formula="of:=[.D374]-[.D37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17" office:value-type="float" office:value="6341" calcext:value-type="float">
            <text:p>6341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733912037037037" calcext:value-type="float">
            <text:p>0,00073391203703703700</text:p>
          </table:table-cell>
          <table:table-cell table:formula="of:=[.D375]-[.D37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17" office:value-type="float" office:value="6358" calcext:value-type="float">
            <text:p>6358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73587962962963" calcext:value-type="float">
            <text:p>0,00073587962962963000</text:p>
          </table:table-cell>
          <table:table-cell table:formula="of:=[.D376]-[.D37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17" office:value-type="float" office:value="6375" calcext:value-type="float">
            <text:p>63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737847222222222" calcext:value-type="float">
            <text:p>0,00073784722222222200</text:p>
          </table:table-cell>
          <table:table-cell table:formula="of:=[.D377]-[.D37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17" office:value-type="float" office:value="6392" calcext:value-type="float">
            <text:p>6392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739814814814815" calcext:value-type="float">
            <text:p>0,00073981481481481500</text:p>
          </table:table-cell>
          <table:table-cell table:formula="of:=[.D378]-[.D37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17" office:value-type="float" office:value="6409" calcext:value-type="float">
            <text:p>6409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741782407407407" calcext:value-type="float">
            <text:p>0,00074178240740740700</text:p>
          </table:table-cell>
          <table:table-cell table:formula="of:=[.D379]-[.D37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17" office:value-type="float" office:value="6426" calcext:value-type="float">
            <text:p>6426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74375" calcext:value-type="float">
            <text:p>0,00074375000000000000</text:p>
          </table:table-cell>
          <table:table-cell table:formula="of:=[.D380]-[.D37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17" office:value-type="float" office:value="6443" calcext:value-type="float">
            <text:p>6443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745717592592593" calcext:value-type="float">
            <text:p>0,00074571759259259300</text:p>
          </table:table-cell>
          <table:table-cell table:formula="of:=[.D381]-[.D38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17" office:value-type="float" office:value="6460" calcext:value-type="float">
            <text:p>646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747685185185185" calcext:value-type="float">
            <text:p>0,00074768518518518500</text:p>
          </table:table-cell>
          <table:table-cell table:formula="of:=[.D382]-[.D38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17" office:value-type="float" office:value="6477" calcext:value-type="float">
            <text:p>6477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749652777777778" calcext:value-type="float">
            <text:p>0,00074965277777777800</text:p>
          </table:table-cell>
          <table:table-cell table:formula="of:=[.D383]-[.D38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17" office:value-type="float" office:value="6494" calcext:value-type="float">
            <text:p>6494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75162037037037" calcext:value-type="float">
            <text:p>0,00075162037037037000</text:p>
          </table:table-cell>
          <table:table-cell table:formula="of:=[.D384]-[.D38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17" office:value-type="float" office:value="6511" calcext:value-type="float">
            <text:p>6511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753587962962963" calcext:value-type="float">
            <text:p>0,00075358796296296300</text:p>
          </table:table-cell>
          <table:table-cell table:formula="of:=[.D385]-[.D38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17" office:value-type="float" office:value="6528" calcext:value-type="float">
            <text:p>6528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755555555555556" calcext:value-type="float">
            <text:p>0,00075555555555555600</text:p>
          </table:table-cell>
          <table:table-cell table:formula="of:=[.D386]-[.D38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17" office:value-type="float" office:value="6545" calcext:value-type="float">
            <text:p>654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757523148148148" calcext:value-type="float">
            <text:p>0,00075752314814814800</text:p>
          </table:table-cell>
          <table:table-cell table:formula="of:=[.D387]-[.D38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17" office:value-type="float" office:value="6562" calcext:value-type="float">
            <text:p>6562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759490740740741" calcext:value-type="float">
            <text:p>0,00075949074074074100</text:p>
          </table:table-cell>
          <table:table-cell table:formula="of:=[.D388]-[.D38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17" office:value-type="float" office:value="6579" calcext:value-type="float">
            <text:p>6579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761458333333333" calcext:value-type="float">
            <text:p>0,00076145833333333300</text:p>
          </table:table-cell>
          <table:table-cell table:formula="of:=[.D389]-[.D38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17" office:value-type="float" office:value="6596" calcext:value-type="float">
            <text:p>6596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763425925925926" calcext:value-type="float">
            <text:p>0,00076342592592592600</text:p>
          </table:table-cell>
          <table:table-cell table:formula="of:=[.D390]-[.D38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17" office:value-type="float" office:value="6613" calcext:value-type="float">
            <text:p>6613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765393518518519" calcext:value-type="float">
            <text:p>0,00076539351851851900</text:p>
          </table:table-cell>
          <table:table-cell table:formula="of:=[.D391]-[.D39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17" office:value-type="float" office:value="6630" calcext:value-type="float">
            <text:p>663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767361111111111" calcext:value-type="float">
            <text:p>0,00076736111111111100</text:p>
          </table:table-cell>
          <table:table-cell table:formula="of:=[.D392]-[.D39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17" office:value-type="float" office:value="6647" calcext:value-type="float">
            <text:p>6647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769328703703704" calcext:value-type="float">
            <text:p>0,00076932870370370400</text:p>
          </table:table-cell>
          <table:table-cell table:formula="of:=[.D393]-[.D39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17" office:value-type="float" office:value="6664" calcext:value-type="float">
            <text:p>6664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771296296296296" calcext:value-type="float">
            <text:p>0,00077129629629629600</text:p>
          </table:table-cell>
          <table:table-cell table:formula="of:=[.D394]-[.D39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17" office:value-type="float" office:value="6681" calcext:value-type="float">
            <text:p>6681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773263888888889" calcext:value-type="float">
            <text:p>0,00077326388888888900</text:p>
          </table:table-cell>
          <table:table-cell table:formula="of:=[.D395]-[.D39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17" office:value-type="float" office:value="6698" calcext:value-type="float">
            <text:p>6698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775231481481482" calcext:value-type="float">
            <text:p>0,00077523148148148200</text:p>
          </table:table-cell>
          <table:table-cell table:formula="of:=[.D396]-[.D39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17" office:value-type="float" office:value="6715" calcext:value-type="float">
            <text:p>671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777199074074074" calcext:value-type="float">
            <text:p>0,00077719907407407400</text:p>
          </table:table-cell>
          <table:table-cell table:formula="of:=[.D397]-[.D39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17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779166666666667" calcext:value-type="float">
            <text:p>0,00077916666666666700</text:p>
          </table:table-cell>
          <table:table-cell table:formula="of:=[.D398]-[.D39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17" office:value-type="float" office:value="6749" calcext:value-type="float">
            <text:p>6749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781134259259259" calcext:value-type="float">
            <text:p>0,00078113425925925900</text:p>
          </table:table-cell>
          <table:table-cell table:formula="of:=[.D399]-[.D39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17" office:value-type="float" office:value="6766" calcext:value-type="float">
            <text:p>6766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783101851851852" calcext:value-type="float">
            <text:p>0,00078310185185185200</text:p>
          </table:table-cell>
          <table:table-cell table:formula="of:=[.D400]-[.D39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17" office:value-type="float" office:value="6783" calcext:value-type="float">
            <text:p>6783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785069444444445" calcext:value-type="float">
            <text:p>0,00078506944444444500</text:p>
          </table:table-cell>
          <table:table-cell table:formula="of:=[.D401]-[.D40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17" office:value-type="float" office:value="6800" calcext:value-type="float">
            <text:p>68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787037037037037" calcext:value-type="float">
            <text:p>0,00078703703703703700</text:p>
          </table:table-cell>
          <table:table-cell table:formula="of:=[.D402]-[.D40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17" office:value-type="float" office:value="6817" calcext:value-type="float">
            <text:p>6817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78900462962963" calcext:value-type="float">
            <text:p>0,00078900462962963000</text:p>
          </table:table-cell>
          <table:table-cell table:formula="of:=[.D403]-[.D40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17" office:value-type="float" office:value="6834" calcext:value-type="float">
            <text:p>6834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790972222222222" calcext:value-type="float">
            <text:p>0,00079097222222222200</text:p>
          </table:table-cell>
          <table:table-cell table:formula="of:=[.D404]-[.D40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17" office:value-type="float" office:value="6851" calcext:value-type="float">
            <text:p>6851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792939814814815" calcext:value-type="float">
            <text:p>0,00079293981481481500</text:p>
          </table:table-cell>
          <table:table-cell table:formula="of:=[.D405]-[.D40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17" office:value-type="float" office:value="6868" calcext:value-type="float">
            <text:p>6868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794907407407407" calcext:value-type="float">
            <text:p>0,00079490740740740700</text:p>
          </table:table-cell>
          <table:table-cell table:formula="of:=[.D406]-[.D40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17" office:value-type="float" office:value="6885" calcext:value-type="float">
            <text:p>688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796875" calcext:value-type="float">
            <text:p>0,00079687500000000000</text:p>
          </table:table-cell>
          <table:table-cell table:formula="of:=[.D407]-[.D40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17" office:value-type="float" office:value="6902" calcext:value-type="float">
            <text:p>6902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798842592592593" calcext:value-type="float">
            <text:p>0,00079884259259259300</text:p>
          </table:table-cell>
          <table:table-cell table:formula="of:=[.D408]-[.D40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17" office:value-type="float" office:value="6919" calcext:value-type="float">
            <text:p>6919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800810185185185" calcext:value-type="float">
            <text:p>0,00080081018518518500</text:p>
          </table:table-cell>
          <table:table-cell table:formula="of:=[.D409]-[.D40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17" office:value-type="float" office:value="6936" calcext:value-type="float">
            <text:p>6936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802777777777778" calcext:value-type="float">
            <text:p>0,00080277777777777800</text:p>
          </table:table-cell>
          <table:table-cell table:formula="of:=[.D410]-[.D40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17" office:value-type="float" office:value="6953" calcext:value-type="float">
            <text:p>6953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80474537037037" calcext:value-type="float">
            <text:p>0,00080474537037037000</text:p>
          </table:table-cell>
          <table:table-cell table:formula="of:=[.D411]-[.D41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17" office:value-type="float" office:value="6970" calcext:value-type="float">
            <text:p>697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806712962962963" calcext:value-type="float">
            <text:p>0,00080671296296296300</text:p>
          </table:table-cell>
          <table:table-cell table:formula="of:=[.D412]-[.D41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17" office:value-type="float" office:value="6987" calcext:value-type="float">
            <text:p>6987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808680555555556" calcext:value-type="float">
            <text:p>0,00080868055555555600</text:p>
          </table:table-cell>
          <table:table-cell table:formula="of:=[.D413]-[.D41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17" office:value-type="float" office:value="7004" calcext:value-type="float">
            <text:p>7004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810648148148148" calcext:value-type="float">
            <text:p>0,00081064814814814800</text:p>
          </table:table-cell>
          <table:table-cell table:formula="of:=[.D414]-[.D41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17" office:value-type="float" office:value="7021" calcext:value-type="float">
            <text:p>7021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812615740740741" calcext:value-type="float">
            <text:p>0,00081261574074074100</text:p>
          </table:table-cell>
          <table:table-cell table:formula="of:=[.D415]-[.D41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17" office:value-type="float" office:value="7038" calcext:value-type="float">
            <text:p>7038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814583333333333" calcext:value-type="float">
            <text:p>0,00081458333333333300</text:p>
          </table:table-cell>
          <table:table-cell table:formula="of:=[.D416]-[.D41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17" office:value-type="float" office:value="7055" calcext:value-type="float">
            <text:p>705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816550925925926" calcext:value-type="float">
            <text:p>0,00081655092592592600</text:p>
          </table:table-cell>
          <table:table-cell table:formula="of:=[.D417]-[.D41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17" office:value-type="float" office:value="7072" calcext:value-type="float">
            <text:p>7072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818518518518519" calcext:value-type="float">
            <text:p>0,00081851851851851900</text:p>
          </table:table-cell>
          <table:table-cell table:formula="of:=[.D418]-[.D41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17" office:value-type="float" office:value="7089" calcext:value-type="float">
            <text:p>7089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820486111111111" calcext:value-type="float">
            <text:p>0,00082048611111111100</text:p>
          </table:table-cell>
          <table:table-cell table:formula="of:=[.D419]-[.D41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17" office:value-type="float" office:value="7106" calcext:value-type="float">
            <text:p>7106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822453703703704" calcext:value-type="float">
            <text:p>0,00082245370370370400</text:p>
          </table:table-cell>
          <table:table-cell table:formula="of:=[.D420]-[.D41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17" office:value-type="float" office:value="7123" calcext:value-type="float">
            <text:p>7123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824421296296296" calcext:value-type="float">
            <text:p>0,00082442129629629600</text:p>
          </table:table-cell>
          <table:table-cell table:formula="of:=[.D421]-[.D42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17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826388888888889" calcext:value-type="float">
            <text:p>0,00082638888888888900</text:p>
          </table:table-cell>
          <table:table-cell table:formula="of:=[.D422]-[.D42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17" office:value-type="float" office:value="7157" calcext:value-type="float">
            <text:p>7157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828356481481482" calcext:value-type="float">
            <text:p>0,00082835648148148200</text:p>
          </table:table-cell>
          <table:table-cell table:formula="of:=[.D423]-[.D42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17" office:value-type="float" office:value="7174" calcext:value-type="float">
            <text:p>7174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830324074074074" calcext:value-type="float">
            <text:p>0,00083032407407407400</text:p>
          </table:table-cell>
          <table:table-cell table:formula="of:=[.D424]-[.D42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17" office:value-type="float" office:value="7191" calcext:value-type="float">
            <text:p>7191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832291666666667" calcext:value-type="float">
            <text:p>0,00083229166666666700</text:p>
          </table:table-cell>
          <table:table-cell table:formula="of:=[.D425]-[.D42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17" office:value-type="float" office:value="7208" calcext:value-type="float">
            <text:p>7208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834259259259259" calcext:value-type="float">
            <text:p>0,00083425925925925900</text:p>
          </table:table-cell>
          <table:table-cell table:formula="of:=[.D426]-[.D42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17" office:value-type="float" office:value="7225" calcext:value-type="float">
            <text:p>722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836226851851852" calcext:value-type="float">
            <text:p>0,00083622685185185200</text:p>
          </table:table-cell>
          <table:table-cell table:formula="of:=[.D427]-[.D42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17" office:value-type="float" office:value="7242" calcext:value-type="float">
            <text:p>7242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838194444444445" calcext:value-type="float">
            <text:p>0,00083819444444444500</text:p>
          </table:table-cell>
          <table:table-cell table:formula="of:=[.D428]-[.D42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17" office:value-type="float" office:value="7259" calcext:value-type="float">
            <text:p>7259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840162037037037" calcext:value-type="float">
            <text:p>0,00084016203703703700</text:p>
          </table:table-cell>
          <table:table-cell table:formula="of:=[.D429]-[.D42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17" office:value-type="float" office:value="7276" calcext:value-type="float">
            <text:p>7276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84212962962963" calcext:value-type="float">
            <text:p>0,00084212962962963000</text:p>
          </table:table-cell>
          <table:table-cell table:formula="of:=[.D430]-[.D42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17" office:value-type="float" office:value="7293" calcext:value-type="float">
            <text:p>7293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844097222222222" calcext:value-type="float">
            <text:p>0,00084409722222222200</text:p>
          </table:table-cell>
          <table:table-cell table:formula="of:=[.D431]-[.D43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17" office:value-type="float" office:value="7310" calcext:value-type="float">
            <text:p>731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846064814814815" calcext:value-type="float">
            <text:p>0,00084606481481481500</text:p>
          </table:table-cell>
          <table:table-cell table:formula="of:=[.D432]-[.D43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17" office:value-type="float" office:value="7327" calcext:value-type="float">
            <text:p>7327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848032407407407" calcext:value-type="float">
            <text:p>0,00084803240740740700</text:p>
          </table:table-cell>
          <table:table-cell table:formula="of:=[.D433]-[.D43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17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085" calcext:value-type="float">
            <text:p>0,00085000000000000000</text:p>
          </table:table-cell>
          <table:table-cell table:formula="of:=[.D434]-[.D43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17" office:value-type="float" office:value="7361" calcext:value-type="float">
            <text:p>7361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0851967592592593" calcext:value-type="float">
            <text:p>0,00085196759259259300</text:p>
          </table:table-cell>
          <table:table-cell table:formula="of:=[.D435]-[.D43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17" office:value-type="float" office:value="7378" calcext:value-type="float">
            <text:p>7378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0853935185185185" calcext:value-type="float">
            <text:p>0,00085393518518518500</text:p>
          </table:table-cell>
          <table:table-cell table:formula="of:=[.D436]-[.D43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17" office:value-type="float" office:value="7395" calcext:value-type="float">
            <text:p>739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0855902777777778" calcext:value-type="float">
            <text:p>0,00085590277777777800</text:p>
          </table:table-cell>
          <table:table-cell table:formula="of:=[.D437]-[.D43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17" office:value-type="float" office:value="7412" calcext:value-type="float">
            <text:p>7412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085787037037037" calcext:value-type="float">
            <text:p>0,00085787037037037000</text:p>
          </table:table-cell>
          <table:table-cell table:formula="of:=[.D438]-[.D43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17" office:value-type="float" office:value="7429" calcext:value-type="float">
            <text:p>7429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0859837962962963" calcext:value-type="float">
            <text:p>0,00085983796296296300</text:p>
          </table:table-cell>
          <table:table-cell table:formula="of:=[.D439]-[.D43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17" office:value-type="float" office:value="7446" calcext:value-type="float">
            <text:p>7446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0861805555555556" calcext:value-type="float">
            <text:p>0,00086180555555555600</text:p>
          </table:table-cell>
          <table:table-cell table:formula="of:=[.D440]-[.D43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17" office:value-type="float" office:value="7463" calcext:value-type="float">
            <text:p>7463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0863773148148148" calcext:value-type="float">
            <text:p>0,00086377314814814800</text:p>
          </table:table-cell>
          <table:table-cell table:formula="of:=[.D441]-[.D44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17" office:value-type="float" office:value="7480" calcext:value-type="float">
            <text:p>748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0865740740740741" calcext:value-type="float">
            <text:p>0,00086574074074074100</text:p>
          </table:table-cell>
          <table:table-cell table:formula="of:=[.D442]-[.D44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17" office:value-type="float" office:value="7497" calcext:value-type="float">
            <text:p>7497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0867708333333333" calcext:value-type="float">
            <text:p>0,00086770833333333300</text:p>
          </table:table-cell>
          <table:table-cell table:formula="of:=[.D443]-[.D44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17" office:value-type="float" office:value="7514" calcext:value-type="float">
            <text:p>7514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0869675925925926" calcext:value-type="float">
            <text:p>0,00086967592592592600</text:p>
          </table:table-cell>
          <table:table-cell table:formula="of:=[.D444]-[.D44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17" office:value-type="float" office:value="7531" calcext:value-type="float">
            <text:p>7531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0871643518518519" calcext:value-type="float">
            <text:p>0,00087164351851851900</text:p>
          </table:table-cell>
          <table:table-cell table:formula="of:=[.D445]-[.D44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17" office:value-type="float" office:value="7548" calcext:value-type="float">
            <text:p>7548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0873611111111111" calcext:value-type="float">
            <text:p>0,00087361111111111100</text:p>
          </table:table-cell>
          <table:table-cell table:formula="of:=[.D446]-[.D44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17" office:value-type="float" office:value="7565" calcext:value-type="float">
            <text:p>756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0875578703703704" calcext:value-type="float">
            <text:p>0,00087557870370370400</text:p>
          </table:table-cell>
          <table:table-cell table:formula="of:=[.D447]-[.D44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17" office:value-type="float" office:value="7582" calcext:value-type="float">
            <text:p>7582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0877546296296296" calcext:value-type="float">
            <text:p>0,00087754629629629600</text:p>
          </table:table-cell>
          <table:table-cell table:formula="of:=[.D448]-[.D44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17" office:value-type="float" office:value="7599" calcext:value-type="float">
            <text:p>7599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0879513888888889" calcext:value-type="float">
            <text:p>0,00087951388888888900</text:p>
          </table:table-cell>
          <table:table-cell table:formula="of:=[.D449]-[.D44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17" office:value-type="float" office:value="7616" calcext:value-type="float">
            <text:p>7616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0881481481481482" calcext:value-type="float">
            <text:p>0,00088148148148148200</text:p>
          </table:table-cell>
          <table:table-cell table:formula="of:=[.D450]-[.D44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17" office:value-type="float" office:value="7633" calcext:value-type="float">
            <text:p>7633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0883449074074074" calcext:value-type="float">
            <text:p>0,00088344907407407400</text:p>
          </table:table-cell>
          <table:table-cell table:formula="of:=[.D451]-[.D45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17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0885416666666667" calcext:value-type="float">
            <text:p>0,00088541666666666700</text:p>
          </table:table-cell>
          <table:table-cell table:formula="of:=[.D452]-[.D45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17" office:value-type="float" office:value="7667" calcext:value-type="float">
            <text:p>7667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0887384259259259" calcext:value-type="float">
            <text:p>0,00088738425925925900</text:p>
          </table:table-cell>
          <table:table-cell table:formula="of:=[.D453]-[.D45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17" office:value-type="float" office:value="7684" calcext:value-type="float">
            <text:p>7684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0889351851851852" calcext:value-type="float">
            <text:p>0,00088935185185185200</text:p>
          </table:table-cell>
          <table:table-cell table:formula="of:=[.D454]-[.D45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17" office:value-type="float" office:value="7701" calcext:value-type="float">
            <text:p>7701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0891319444444445" calcext:value-type="float">
            <text:p>0,00089131944444444500</text:p>
          </table:table-cell>
          <table:table-cell table:formula="of:=[.D455]-[.D45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17" office:value-type="float" office:value="7718" calcext:value-type="float">
            <text:p>7718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0893287037037037" calcext:value-type="float">
            <text:p>0,00089328703703703700</text:p>
          </table:table-cell>
          <table:table-cell table:formula="of:=[.D456]-[.D45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17" office:value-type="float" office:value="7735" calcext:value-type="float">
            <text:p>773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089525462962963" calcext:value-type="float">
            <text:p>0,00089525462962963000</text:p>
          </table:table-cell>
          <table:table-cell table:formula="of:=[.D457]-[.D45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17" office:value-type="float" office:value="7752" calcext:value-type="float">
            <text:p>7752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0897222222222222" calcext:value-type="float">
            <text:p>0,00089722222222222200</text:p>
          </table:table-cell>
          <table:table-cell table:formula="of:=[.D458]-[.D45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17" office:value-type="float" office:value="7769" calcext:value-type="float">
            <text:p>7769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0899189814814815" calcext:value-type="float">
            <text:p>0,00089918981481481500</text:p>
          </table:table-cell>
          <table:table-cell table:formula="of:=[.D459]-[.D45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17" office:value-type="float" office:value="7786" calcext:value-type="float">
            <text:p>7786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0901157407407407" calcext:value-type="float">
            <text:p>0,00090115740740740700</text:p>
          </table:table-cell>
          <table:table-cell table:formula="of:=[.D460]-[.D45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17" office:value-type="float" office:value="7803" calcext:value-type="float">
            <text:p>7803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0903125" calcext:value-type="float">
            <text:p>0,00090312500000000000</text:p>
          </table:table-cell>
          <table:table-cell table:formula="of:=[.D461]-[.D46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17" office:value-type="float" office:value="7820" calcext:value-type="float">
            <text:p>782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0905092592592593" calcext:value-type="float">
            <text:p>0,00090509259259259300</text:p>
          </table:table-cell>
          <table:table-cell table:formula="of:=[.D462]-[.D46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17" office:value-type="float" office:value="7837" calcext:value-type="float">
            <text:p>7837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0907060185185185" calcext:value-type="float">
            <text:p>0,00090706018518518500</text:p>
          </table:table-cell>
          <table:table-cell table:formula="of:=[.D463]-[.D46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17" office:value-type="float" office:value="7854" calcext:value-type="float">
            <text:p>7854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0909027777777778" calcext:value-type="float">
            <text:p>0,00090902777777777800</text:p>
          </table:table-cell>
          <table:table-cell table:formula="of:=[.D464]-[.D46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17" office:value-type="float" office:value="7871" calcext:value-type="float">
            <text:p>7871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091099537037037" calcext:value-type="float">
            <text:p>0,00091099537037037000</text:p>
          </table:table-cell>
          <table:table-cell table:formula="of:=[.D465]-[.D46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17" office:value-type="float" office:value="7888" calcext:value-type="float">
            <text:p>7888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0912962962962963" calcext:value-type="float">
            <text:p>0,00091296296296296300</text:p>
          </table:table-cell>
          <table:table-cell table:formula="of:=[.D466]-[.D46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17" office:value-type="float" office:value="7905" calcext:value-type="float">
            <text:p>790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0914930555555556" calcext:value-type="float">
            <text:p>0,00091493055555555600</text:p>
          </table:table-cell>
          <table:table-cell table:formula="of:=[.D467]-[.D46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17" office:value-type="float" office:value="7922" calcext:value-type="float">
            <text:p>7922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0916898148148148" calcext:value-type="float">
            <text:p>0,00091689814814814800</text:p>
          </table:table-cell>
          <table:table-cell table:formula="of:=[.D468]-[.D46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17" office:value-type="float" office:value="7939" calcext:value-type="float">
            <text:p>7939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0918865740740741" calcext:value-type="float">
            <text:p>0,00091886574074074100</text:p>
          </table:table-cell>
          <table:table-cell table:formula="of:=[.D469]-[.D46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17" office:value-type="float" office:value="7956" calcext:value-type="float">
            <text:p>7956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0920833333333333" calcext:value-type="float">
            <text:p>0,00092083333333333300</text:p>
          </table:table-cell>
          <table:table-cell table:formula="of:=[.D470]-[.D46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17" office:value-type="float" office:value="7973" calcext:value-type="float">
            <text:p>7973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0922800925925926" calcext:value-type="float">
            <text:p>0,00092280092592592600</text:p>
          </table:table-cell>
          <table:table-cell table:formula="of:=[.D471]-[.D47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17" office:value-type="float" office:value="7990" calcext:value-type="float">
            <text:p>799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0924768518518519" calcext:value-type="float">
            <text:p>0,00092476851851851900</text:p>
          </table:table-cell>
          <table:table-cell table:formula="of:=[.D472]-[.D47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17" office:value-type="float" office:value="8007" calcext:value-type="float">
            <text:p>8007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0926736111111111" calcext:value-type="float">
            <text:p>0,00092673611111111100</text:p>
          </table:table-cell>
          <table:table-cell table:formula="of:=[.D473]-[.D47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17" office:value-type="float" office:value="8024" calcext:value-type="float">
            <text:p>8024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0928703703703704" calcext:value-type="float">
            <text:p>0,00092870370370370400</text:p>
          </table:table-cell>
          <table:table-cell table:formula="of:=[.D474]-[.D47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17" office:value-type="float" office:value="8041" calcext:value-type="float">
            <text:p>8041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0930671296296296" calcext:value-type="float">
            <text:p>0,00093067129629629600</text:p>
          </table:table-cell>
          <table:table-cell table:formula="of:=[.D475]-[.D47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17" office:value-type="float" office:value="8058" calcext:value-type="float">
            <text:p>8058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0932638888888889" calcext:value-type="float">
            <text:p>0,00093263888888888900</text:p>
          </table:table-cell>
          <table:table-cell table:formula="of:=[.D476]-[.D47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17" office:value-type="float" office:value="8075" calcext:value-type="float">
            <text:p>807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0934606481481482" calcext:value-type="float">
            <text:p>0,00093460648148148200</text:p>
          </table:table-cell>
          <table:table-cell table:formula="of:=[.D477]-[.D47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17" office:value-type="float" office:value="8092" calcext:value-type="float">
            <text:p>8092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0936574074074074" calcext:value-type="float">
            <text:p>0,00093657407407407400</text:p>
          </table:table-cell>
          <table:table-cell table:formula="of:=[.D478]-[.D47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17" office:value-type="float" office:value="8109" calcext:value-type="float">
            <text:p>8109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0938541666666667" calcext:value-type="float">
            <text:p>0,00093854166666666700</text:p>
          </table:table-cell>
          <table:table-cell table:formula="of:=[.D479]-[.D478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17" office:value-type="float" office:value="8126" calcext:value-type="float">
            <text:p>8126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0940509259259259" calcext:value-type="float">
            <text:p>0,00094050925925925900</text:p>
          </table:table-cell>
          <table:table-cell table:formula="of:=[.D480]-[.D47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17" office:value-type="float" office:value="8143" calcext:value-type="float">
            <text:p>8143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0942476851851852" calcext:value-type="float">
            <text:p>0,00094247685185185200</text:p>
          </table:table-cell>
          <table:table-cell table:formula="of:=[.D481]-[.D48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17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0944444444444445" calcext:value-type="float">
            <text:p>0,00094444444444444500</text:p>
          </table:table-cell>
          <table:table-cell table:formula="of:=[.D482]-[.D48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17" office:value-type="float" office:value="8177" calcext:value-type="float">
            <text:p>8177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0946412037037037" calcext:value-type="float">
            <text:p>0,00094641203703703700</text:p>
          </table:table-cell>
          <table:table-cell table:formula="of:=[.D483]-[.D48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17" office:value-type="float" office:value="8194" calcext:value-type="float">
            <text:p>8194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094837962962963" calcext:value-type="float">
            <text:p>0,00094837962962963000</text:p>
          </table:table-cell>
          <table:table-cell table:formula="of:=[.D484]-[.D48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17" office:value-type="float" office:value="8211" calcext:value-type="float">
            <text:p>8211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0950347222222222" calcext:value-type="float">
            <text:p>0,00095034722222222200</text:p>
          </table:table-cell>
          <table:table-cell table:formula="of:=[.D485]-[.D48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17" office:value-type="float" office:value="8228" calcext:value-type="float">
            <text:p>8228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0952314814814815" calcext:value-type="float">
            <text:p>0,00095231481481481500</text:p>
          </table:table-cell>
          <table:table-cell table:formula="of:=[.D486]-[.D48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17" office:value-type="float" office:value="8245" calcext:value-type="float">
            <text:p>824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0954282407407407" calcext:value-type="float">
            <text:p>0,00095428240740740700</text:p>
          </table:table-cell>
          <table:table-cell table:formula="of:=[.D487]-[.D48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17" office:value-type="float" office:value="8262" calcext:value-type="float">
            <text:p>8262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095625" calcext:value-type="float">
            <text:p>0,00095625000000000000</text:p>
          </table:table-cell>
          <table:table-cell table:formula="of:=[.D488]-[.D487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17" office:value-type="float" office:value="8279" calcext:value-type="float">
            <text:p>8279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0958217592592593" calcext:value-type="float">
            <text:p>0,00095821759259259200</text:p>
          </table:table-cell>
          <table:table-cell table:formula="of:=[.D489]-[.D48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17" office:value-type="float" office:value="8296" calcext:value-type="float">
            <text:p>8296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0960185185185185" calcext:value-type="float">
            <text:p>0,00096018518518518500</text:p>
          </table:table-cell>
          <table:table-cell table:formula="of:=[.D490]-[.D489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17" office:value-type="float" office:value="8313" calcext:value-type="float">
            <text:p>8313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0962152777777778" calcext:value-type="float">
            <text:p>0,00096215277777777800</text:p>
          </table:table-cell>
          <table:table-cell table:formula="of:=[.D491]-[.D490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17" office:value-type="float" office:value="8330" calcext:value-type="float">
            <text:p>833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096412037037037" calcext:value-type="float">
            <text:p>0,00096412037037037000</text:p>
          </table:table-cell>
          <table:table-cell table:formula="of:=[.D492]-[.D491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17" office:value-type="float" office:value="8347" calcext:value-type="float">
            <text:p>8347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0966087962962963" calcext:value-type="float">
            <text:p>0,00096608796296296300</text:p>
          </table:table-cell>
          <table:table-cell table:formula="of:=[.D493]-[.D492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17" office:value-type="float" office:value="8364" calcext:value-type="float">
            <text:p>8364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0968055555555556" calcext:value-type="float">
            <text:p>0,00096805555555555600</text:p>
          </table:table-cell>
          <table:table-cell table:formula="of:=[.D494]-[.D493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17" office:value-type="float" office:value="8381" calcext:value-type="float">
            <text:p>8381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0970023148148148" calcext:value-type="float">
            <text:p>0,00097002314814814800</text:p>
          </table:table-cell>
          <table:table-cell table:formula="of:=[.D495]-[.D494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17" office:value-type="float" office:value="8398" calcext:value-type="float">
            <text:p>8398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0971990740740741" calcext:value-type="float">
            <text:p>0,00097199074074074100</text:p>
          </table:table-cell>
          <table:table-cell table:formula="of:=[.D496]-[.D495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17" office:value-type="float" office:value="8415" calcext:value-type="float">
            <text:p>841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0973958333333333" calcext:value-type="float">
            <text:p>0,00097395833333333300</text:p>
          </table:table-cell>
          <table:table-cell table:formula="of:=[.D497]-[.D496]" office:value-type="float" office:value="0.00000196759259259258" calcext:value-type="float">
            <text:p>0,0000019675925925925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17" office:value-type="float" office:value="8432" calcext:value-type="float">
            <text:p>8432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0975925925925926" calcext:value-type="float">
            <text:p>0,00097592592592592600</text:p>
          </table:table-cell>
          <table:table-cell table:formula="of:=[.D498]-[.D49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17" office:value-type="float" office:value="8449" calcext:value-type="float">
            <text:p>8449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0977893518518519" calcext:value-type="float">
            <text:p>0,00097789351851851900</text:p>
          </table:table-cell>
          <table:table-cell table:formula="of:=[.D499]-[.D49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17" office:value-type="float" office:value="8466" calcext:value-type="float">
            <text:p>8466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0979861111111111" calcext:value-type="float">
            <text:p>0,00097986111111111100</text:p>
          </table:table-cell>
          <table:table-cell table:formula="of:=[.D500]-[.D49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17" office:value-type="float" office:value="8483" calcext:value-type="float">
            <text:p>8483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0981828703703704" calcext:value-type="float">
            <text:p>0,00098182870370370400</text:p>
          </table:table-cell>
          <table:table-cell table:formula="of:=[.D501]-[.D50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17" office:value-type="float" office:value="8500" calcext:value-type="float">
            <text:p>8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0983796296296296" calcext:value-type="float">
            <text:p>0,00098379629629629600</text:p>
          </table:table-cell>
          <table:table-cell table:formula="of:=[.D502]-[.D50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17" office:value-type="float" office:value="8517" calcext:value-type="float">
            <text:p>8517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0985763888888889" calcext:value-type="float">
            <text:p>0,00098576388888888900</text:p>
          </table:table-cell>
          <table:table-cell table:formula="of:=[.D503]-[.D50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17" office:value-type="float" office:value="8534" calcext:value-type="float">
            <text:p>8534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0987731481481482" calcext:value-type="float">
            <text:p>0,00098773148148148200</text:p>
          </table:table-cell>
          <table:table-cell table:formula="of:=[.D504]-[.D50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17" office:value-type="float" office:value="8551" calcext:value-type="float">
            <text:p>8551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0989699074074074" calcext:value-type="float">
            <text:p>0,00098969907407407400</text:p>
          </table:table-cell>
          <table:table-cell table:formula="of:=[.D505]-[.D50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17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0991666666666667" calcext:value-type="float">
            <text:p>0,00099166666666666700</text:p>
          </table:table-cell>
          <table:table-cell table:formula="of:=[.D506]-[.D50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17" office:value-type="float" office:value="8585" calcext:value-type="float">
            <text:p>858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0993634259259259" calcext:value-type="float">
            <text:p>0,00099363425925925900</text:p>
          </table:table-cell>
          <table:table-cell table:formula="of:=[.D507]-[.D50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17" office:value-type="float" office:value="8602" calcext:value-type="float">
            <text:p>8602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0995601851851852" calcext:value-type="float">
            <text:p>0,00099560185185185200</text:p>
          </table:table-cell>
          <table:table-cell table:formula="of:=[.D508]-[.D50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17" office:value-type="float" office:value="8619" calcext:value-type="float">
            <text:p>8619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0997569444444444" calcext:value-type="float">
            <text:p>0,00099756944444444400</text:p>
          </table:table-cell>
          <table:table-cell table:formula="of:=[.D509]-[.D50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17" office:value-type="float" office:value="8636" calcext:value-type="float">
            <text:p>8636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0999537037037037" calcext:value-type="float">
            <text:p>0,00099953703703703700</text:p>
          </table:table-cell>
          <table:table-cell table:formula="of:=[.D510]-[.D50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17" office:value-type="float" office:value="8653" calcext:value-type="float">
            <text:p>8653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00150462962963" calcext:value-type="float">
            <text:p>0,00100150462962963000</text:p>
          </table:table-cell>
          <table:table-cell table:formula="of:=[.D511]-[.D51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17" office:value-type="float" office:value="8670" calcext:value-type="float">
            <text:p>867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00347222222222" calcext:value-type="float">
            <text:p>0,00100347222222222000</text:p>
          </table:table-cell>
          <table:table-cell table:formula="of:=[.D512]-[.D51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17" office:value-type="float" office:value="8687" calcext:value-type="float">
            <text:p>8687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00543981481482" calcext:value-type="float">
            <text:p>0,00100543981481482000</text:p>
          </table:table-cell>
          <table:table-cell table:formula="of:=[.D513]-[.D51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17" office:value-type="float" office:value="8704" calcext:value-type="float">
            <text:p>8704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00740740740741" calcext:value-type="float">
            <text:p>0,00100740740740741000</text:p>
          </table:table-cell>
          <table:table-cell table:formula="of:=[.D514]-[.D51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17" office:value-type="float" office:value="8721" calcext:value-type="float">
            <text:p>8721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009375" calcext:value-type="float">
            <text:p>0,00100937500000000000</text:p>
          </table:table-cell>
          <table:table-cell table:formula="of:=[.D515]-[.D51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17" office:value-type="float" office:value="8738" calcext:value-type="float">
            <text:p>8738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01134259259259" calcext:value-type="float">
            <text:p>0,00101134259259259000</text:p>
          </table:table-cell>
          <table:table-cell table:formula="of:=[.D516]-[.D51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17" office:value-type="float" office:value="8755" calcext:value-type="float">
            <text:p>875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01331018518519" calcext:value-type="float">
            <text:p>0,00101331018518519000</text:p>
          </table:table-cell>
          <table:table-cell table:formula="of:=[.D517]-[.D51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17" office:value-type="float" office:value="8772" calcext:value-type="float">
            <text:p>8772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01527777777778" calcext:value-type="float">
            <text:p>0,00101527777777778000</text:p>
          </table:table-cell>
          <table:table-cell table:formula="of:=[.D518]-[.D51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17" office:value-type="float" office:value="8789" calcext:value-type="float">
            <text:p>8789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01724537037037" calcext:value-type="float">
            <text:p>0,00101724537037037000</text:p>
          </table:table-cell>
          <table:table-cell table:formula="of:=[.D519]-[.D51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17" office:value-type="float" office:value="8806" calcext:value-type="float">
            <text:p>8806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01921296296296" calcext:value-type="float">
            <text:p>0,00101921296296296000</text:p>
          </table:table-cell>
          <table:table-cell table:formula="of:=[.D520]-[.D51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17" office:value-type="float" office:value="8823" calcext:value-type="float">
            <text:p>8823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02118055555556" calcext:value-type="float">
            <text:p>0,00102118055555556000</text:p>
          </table:table-cell>
          <table:table-cell table:formula="of:=[.D521]-[.D52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17" office:value-type="float" office:value="8840" calcext:value-type="float">
            <text:p>884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02314814814815" calcext:value-type="float">
            <text:p>0,00102314814814815000</text:p>
          </table:table-cell>
          <table:table-cell table:formula="of:=[.D522]-[.D52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17" office:value-type="float" office:value="8857" calcext:value-type="float">
            <text:p>8857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02511574074074" calcext:value-type="float">
            <text:p>0,00102511574074074000</text:p>
          </table:table-cell>
          <table:table-cell table:formula="of:=[.D523]-[.D52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17" office:value-type="float" office:value="8874" calcext:value-type="float">
            <text:p>8874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02708333333333" calcext:value-type="float">
            <text:p>0,00102708333333333000</text:p>
          </table:table-cell>
          <table:table-cell table:formula="of:=[.D524]-[.D52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17" office:value-type="float" office:value="8891" calcext:value-type="float">
            <text:p>8891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02905092592593" calcext:value-type="float">
            <text:p>0,00102905092592593000</text:p>
          </table:table-cell>
          <table:table-cell table:formula="of:=[.D525]-[.D52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17" office:value-type="float" office:value="8908" calcext:value-type="float">
            <text:p>8908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03101851851852" calcext:value-type="float">
            <text:p>0,00103101851851852000</text:p>
          </table:table-cell>
          <table:table-cell table:formula="of:=[.D526]-[.D52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17" office:value-type="float" office:value="8925" calcext:value-type="float">
            <text:p>892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03298611111111" calcext:value-type="float">
            <text:p>0,00103298611111111000</text:p>
          </table:table-cell>
          <table:table-cell table:formula="of:=[.D527]-[.D52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17" office:value-type="float" office:value="8942" calcext:value-type="float">
            <text:p>8942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0349537037037" calcext:value-type="float">
            <text:p>0,00103495370370370000</text:p>
          </table:table-cell>
          <table:table-cell table:formula="of:=[.D528]-[.D52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17" office:value-type="float" office:value="8959" calcext:value-type="float">
            <text:p>8959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0369212962963" calcext:value-type="float">
            <text:p>0,00103692129629630000</text:p>
          </table:table-cell>
          <table:table-cell table:formula="of:=[.D529]-[.D52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17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03888888888889" calcext:value-type="float">
            <text:p>0,00103888888888889000</text:p>
          </table:table-cell>
          <table:table-cell table:formula="of:=[.D530]-[.D52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17" office:value-type="float" office:value="8993" calcext:value-type="float">
            <text:p>8993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04085648148148" calcext:value-type="float">
            <text:p>0,00104085648148148000</text:p>
          </table:table-cell>
          <table:table-cell table:formula="of:=[.D531]-[.D53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17" office:value-type="float" office:value="9010" calcext:value-type="float">
            <text:p>901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04282407407407" calcext:value-type="float">
            <text:p>0,00104282407407407000</text:p>
          </table:table-cell>
          <table:table-cell table:formula="of:=[.D532]-[.D53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17" office:value-type="float" office:value="9027" calcext:value-type="float">
            <text:p>9027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04479166666667" calcext:value-type="float">
            <text:p>0,00104479166666667000</text:p>
          </table:table-cell>
          <table:table-cell table:formula="of:=[.D533]-[.D53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17" office:value-type="float" office:value="9044" calcext:value-type="float">
            <text:p>9044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04675925925926" calcext:value-type="float">
            <text:p>0,00104675925925926000</text:p>
          </table:table-cell>
          <table:table-cell table:formula="of:=[.D534]-[.D53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17" office:value-type="float" office:value="9061" calcext:value-type="float">
            <text:p>9061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04872685185185" calcext:value-type="float">
            <text:p>0,00104872685185185000</text:p>
          </table:table-cell>
          <table:table-cell table:formula="of:=[.D535]-[.D53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17" office:value-type="float" office:value="9078" calcext:value-type="float">
            <text:p>9078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05069444444444" calcext:value-type="float">
            <text:p>0,00105069444444444000</text:p>
          </table:table-cell>
          <table:table-cell table:formula="of:=[.D536]-[.D53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17" office:value-type="float" office:value="9095" calcext:value-type="float">
            <text:p>909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05266203703704" calcext:value-type="float">
            <text:p>0,00105266203703704000</text:p>
          </table:table-cell>
          <table:table-cell table:formula="of:=[.D537]-[.D53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17" office:value-type="float" office:value="9112" calcext:value-type="float">
            <text:p>9112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05462962962963" calcext:value-type="float">
            <text:p>0,00105462962962963000</text:p>
          </table:table-cell>
          <table:table-cell table:formula="of:=[.D538]-[.D53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17" office:value-type="float" office:value="9129" calcext:value-type="float">
            <text:p>9129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05659722222222" calcext:value-type="float">
            <text:p>0,00105659722222222000</text:p>
          </table:table-cell>
          <table:table-cell table:formula="of:=[.D539]-[.D53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17" office:value-type="float" office:value="9146" calcext:value-type="float">
            <text:p>9146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05856481481482" calcext:value-type="float">
            <text:p>0,00105856481481482000</text:p>
          </table:table-cell>
          <table:table-cell table:formula="of:=[.D540]-[.D53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17" office:value-type="float" office:value="9163" calcext:value-type="float">
            <text:p>9163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06053240740741" calcext:value-type="float">
            <text:p>0,00106053240740741000</text:p>
          </table:table-cell>
          <table:table-cell table:formula="of:=[.D541]-[.D54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17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0625" calcext:value-type="float">
            <text:p>0,00106250000000000000</text:p>
          </table:table-cell>
          <table:table-cell table:formula="of:=[.D542]-[.D54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17" office:value-type="float" office:value="9197" calcext:value-type="float">
            <text:p>9197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06446759259259" calcext:value-type="float">
            <text:p>0,00106446759259259000</text:p>
          </table:table-cell>
          <table:table-cell table:formula="of:=[.D543]-[.D54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17" office:value-type="float" office:value="9214" calcext:value-type="float">
            <text:p>9214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06643518518519" calcext:value-type="float">
            <text:p>0,00106643518518519000</text:p>
          </table:table-cell>
          <table:table-cell table:formula="of:=[.D544]-[.D54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17" office:value-type="float" office:value="9231" calcext:value-type="float">
            <text:p>9231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06840277777778" calcext:value-type="float">
            <text:p>0,00106840277777778000</text:p>
          </table:table-cell>
          <table:table-cell table:formula="of:=[.D545]-[.D54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17" office:value-type="float" office:value="9248" calcext:value-type="float">
            <text:p>9248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07037037037037" calcext:value-type="float">
            <text:p>0,00107037037037037000</text:p>
          </table:table-cell>
          <table:table-cell table:formula="of:=[.D546]-[.D54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17" office:value-type="float" office:value="9265" calcext:value-type="float">
            <text:p>926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07233796296296" calcext:value-type="float">
            <text:p>0,00107233796296296000</text:p>
          </table:table-cell>
          <table:table-cell table:formula="of:=[.D547]-[.D54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17" office:value-type="float" office:value="9282" calcext:value-type="float">
            <text:p>9282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07430555555556" calcext:value-type="float">
            <text:p>0,00107430555555556000</text:p>
          </table:table-cell>
          <table:table-cell table:formula="of:=[.D548]-[.D54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17" office:value-type="float" office:value="9299" calcext:value-type="float">
            <text:p>9299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07627314814815" calcext:value-type="float">
            <text:p>0,00107627314814815000</text:p>
          </table:table-cell>
          <table:table-cell table:formula="of:=[.D549]-[.D54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17" office:value-type="float" office:value="9316" calcext:value-type="float">
            <text:p>9316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07824074074074" calcext:value-type="float">
            <text:p>0,00107824074074074000</text:p>
          </table:table-cell>
          <table:table-cell table:formula="of:=[.D550]-[.D54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17" office:value-type="float" office:value="9333" calcext:value-type="float">
            <text:p>9333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08020833333333" calcext:value-type="float">
            <text:p>0,00108020833333333000</text:p>
          </table:table-cell>
          <table:table-cell table:formula="of:=[.D551]-[.D55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17" office:value-type="float" office:value="9350" calcext:value-type="float">
            <text:p>93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08217592592593" calcext:value-type="float">
            <text:p>0,00108217592592593000</text:p>
          </table:table-cell>
          <table:table-cell table:formula="of:=[.D552]-[.D55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17" office:value-type="float" office:value="9367" calcext:value-type="float">
            <text:p>9367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08414351851852" calcext:value-type="float">
            <text:p>0,00108414351851852000</text:p>
          </table:table-cell>
          <table:table-cell table:formula="of:=[.D553]-[.D55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17" office:value-type="float" office:value="9384" calcext:value-type="float">
            <text:p>9384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08611111111111" calcext:value-type="float">
            <text:p>0,00108611111111111000</text:p>
          </table:table-cell>
          <table:table-cell table:formula="of:=[.D554]-[.D55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17" office:value-type="float" office:value="9401" calcext:value-type="float">
            <text:p>9401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0880787037037" calcext:value-type="float">
            <text:p>0,00108807870370370000</text:p>
          </table:table-cell>
          <table:table-cell table:formula="of:=[.D555]-[.D55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17" office:value-type="float" office:value="9418" calcext:value-type="float">
            <text:p>9418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0900462962963" calcext:value-type="float">
            <text:p>0,00109004629629630000</text:p>
          </table:table-cell>
          <table:table-cell table:formula="of:=[.D556]-[.D55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17" office:value-type="float" office:value="9435" calcext:value-type="float">
            <text:p>943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09201388888889" calcext:value-type="float">
            <text:p>0,00109201388888889000</text:p>
          </table:table-cell>
          <table:table-cell table:formula="of:=[.D557]-[.D55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17" office:value-type="float" office:value="9452" calcext:value-type="float">
            <text:p>9452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09398148148148" calcext:value-type="float">
            <text:p>0,00109398148148148000</text:p>
          </table:table-cell>
          <table:table-cell table:formula="of:=[.D558]-[.D55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17" office:value-type="float" office:value="9469" calcext:value-type="float">
            <text:p>9469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09594907407407" calcext:value-type="float">
            <text:p>0,00109594907407407000</text:p>
          </table:table-cell>
          <table:table-cell table:formula="of:=[.D559]-[.D55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17" office:value-type="float" office:value="9486" calcext:value-type="float">
            <text:p>9486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09791666666667" calcext:value-type="float">
            <text:p>0,00109791666666667000</text:p>
          </table:table-cell>
          <table:table-cell table:formula="of:=[.D560]-[.D55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17" office:value-type="float" office:value="9503" calcext:value-type="float">
            <text:p>9503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09988425925926" calcext:value-type="float">
            <text:p>0,00109988425925926000</text:p>
          </table:table-cell>
          <table:table-cell table:formula="of:=[.D561]-[.D56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17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10185185185185" calcext:value-type="float">
            <text:p>0,00110185185185185000</text:p>
          </table:table-cell>
          <table:table-cell table:formula="of:=[.D562]-[.D56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17" office:value-type="float" office:value="9537" calcext:value-type="float">
            <text:p>9537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10381944444444" calcext:value-type="float">
            <text:p>0,00110381944444444000</text:p>
          </table:table-cell>
          <table:table-cell table:formula="of:=[.D563]-[.D56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17" office:value-type="float" office:value="9554" calcext:value-type="float">
            <text:p>9554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10578703703704" calcext:value-type="float">
            <text:p>0,00110578703703704000</text:p>
          </table:table-cell>
          <table:table-cell table:formula="of:=[.D564]-[.D56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17" office:value-type="float" office:value="9571" calcext:value-type="float">
            <text:p>9571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10775462962963" calcext:value-type="float">
            <text:p>0,00110775462962963000</text:p>
          </table:table-cell>
          <table:table-cell table:formula="of:=[.D565]-[.D56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17" office:value-type="float" office:value="9588" calcext:value-type="float">
            <text:p>9588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10972222222222" calcext:value-type="float">
            <text:p>0,00110972222222222000</text:p>
          </table:table-cell>
          <table:table-cell table:formula="of:=[.D566]-[.D56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17" office:value-type="float" office:value="9605" calcext:value-type="float">
            <text:p>960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11168981481482" calcext:value-type="float">
            <text:p>0,00111168981481482000</text:p>
          </table:table-cell>
          <table:table-cell table:formula="of:=[.D567]-[.D56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17" office:value-type="float" office:value="9622" calcext:value-type="float">
            <text:p>9622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11365740740741" calcext:value-type="float">
            <text:p>0,00111365740740741000</text:p>
          </table:table-cell>
          <table:table-cell table:formula="of:=[.D568]-[.D56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17" office:value-type="float" office:value="9639" calcext:value-type="float">
            <text:p>9639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115625" calcext:value-type="float">
            <text:p>0,00111562500000000000</text:p>
          </table:table-cell>
          <table:table-cell table:formula="of:=[.D569]-[.D56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17" office:value-type="float" office:value="9656" calcext:value-type="float">
            <text:p>9656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11759259259259" calcext:value-type="float">
            <text:p>0,00111759259259259000</text:p>
          </table:table-cell>
          <table:table-cell table:formula="of:=[.D570]-[.D56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17" office:value-type="float" office:value="9673" calcext:value-type="float">
            <text:p>9673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11956018518519" calcext:value-type="float">
            <text:p>0,00111956018518519000</text:p>
          </table:table-cell>
          <table:table-cell table:formula="of:=[.D571]-[.D57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17" office:value-type="float" office:value="9690" calcext:value-type="float">
            <text:p>969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12152777777778" calcext:value-type="float">
            <text:p>0,00112152777777778000</text:p>
          </table:table-cell>
          <table:table-cell table:formula="of:=[.D572]-[.D57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17" office:value-type="float" office:value="9707" calcext:value-type="float">
            <text:p>9707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12349537037037" calcext:value-type="float">
            <text:p>0,00112349537037037000</text:p>
          </table:table-cell>
          <table:table-cell table:formula="of:=[.D573]-[.D57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17" office:value-type="float" office:value="9724" calcext:value-type="float">
            <text:p>9724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12546296296296" calcext:value-type="float">
            <text:p>0,00112546296296296000</text:p>
          </table:table-cell>
          <table:table-cell table:formula="of:=[.D574]-[.D57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17" office:value-type="float" office:value="9741" calcext:value-type="float">
            <text:p>9741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12743055555556" calcext:value-type="float">
            <text:p>0,00112743055555556000</text:p>
          </table:table-cell>
          <table:table-cell table:formula="of:=[.D575]-[.D57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17" office:value-type="float" office:value="9758" calcext:value-type="float">
            <text:p>9758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12939814814815" calcext:value-type="float">
            <text:p>0,00112939814814815000</text:p>
          </table:table-cell>
          <table:table-cell table:formula="of:=[.D576]-[.D57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17" office:value-type="float" office:value="9775" calcext:value-type="float">
            <text:p>977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13136574074074" calcext:value-type="float">
            <text:p>0,00113136574074074000</text:p>
          </table:table-cell>
          <table:table-cell table:formula="of:=[.D577]-[.D57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17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13333333333333" calcext:value-type="float">
            <text:p>0,00113333333333333000</text:p>
          </table:table-cell>
          <table:table-cell table:formula="of:=[.D578]-[.D57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17" office:value-type="float" office:value="9809" calcext:value-type="float">
            <text:p>9809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13530092592593" calcext:value-type="float">
            <text:p>0,00113530092592593000</text:p>
          </table:table-cell>
          <table:table-cell table:formula="of:=[.D579]-[.D57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17" office:value-type="float" office:value="9826" calcext:value-type="float">
            <text:p>9826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13726851851852" calcext:value-type="float">
            <text:p>0,00113726851851852000</text:p>
          </table:table-cell>
          <table:table-cell table:formula="of:=[.D580]-[.D57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17" office:value-type="float" office:value="9843" calcext:value-type="float">
            <text:p>9843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13923611111111" calcext:value-type="float">
            <text:p>0,00113923611111111000</text:p>
          </table:table-cell>
          <table:table-cell table:formula="of:=[.D581]-[.D58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17" office:value-type="float" office:value="9860" calcext:value-type="float">
            <text:p>986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1412037037037" calcext:value-type="float">
            <text:p>0,00114120370370370000</text:p>
          </table:table-cell>
          <table:table-cell table:formula="of:=[.D582]-[.D58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17" office:value-type="float" office:value="9877" calcext:value-type="float">
            <text:p>9877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1431712962963" calcext:value-type="float">
            <text:p>0,00114317129629630000</text:p>
          </table:table-cell>
          <table:table-cell table:formula="of:=[.D583]-[.D58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17" office:value-type="float" office:value="9894" calcext:value-type="float">
            <text:p>9894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14513888888889" calcext:value-type="float">
            <text:p>0,00114513888888889000</text:p>
          </table:table-cell>
          <table:table-cell table:formula="of:=[.D584]-[.D58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17" office:value-type="float" office:value="9911" calcext:value-type="float">
            <text:p>9911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14710648148148" calcext:value-type="float">
            <text:p>0,00114710648148148000</text:p>
          </table:table-cell>
          <table:table-cell table:formula="of:=[.D585]-[.D58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17" office:value-type="float" office:value="9928" calcext:value-type="float">
            <text:p>9928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14907407407407" calcext:value-type="float">
            <text:p>0,00114907407407407000</text:p>
          </table:table-cell>
          <table:table-cell table:formula="of:=[.D586]-[.D58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17" office:value-type="float" office:value="9945" calcext:value-type="float">
            <text:p>994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15104166666667" calcext:value-type="float">
            <text:p>0,00115104166666667000</text:p>
          </table:table-cell>
          <table:table-cell table:formula="of:=[.D587]-[.D58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17" office:value-type="float" office:value="9962" calcext:value-type="float">
            <text:p>9962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15300925925926" calcext:value-type="float">
            <text:p>0,00115300925925926000</text:p>
          </table:table-cell>
          <table:table-cell table:formula="of:=[.D588]-[.D58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17" office:value-type="float" office:value="9979" calcext:value-type="float">
            <text:p>9979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15497685185185" calcext:value-type="float">
            <text:p>0,00115497685185185000</text:p>
          </table:table-cell>
          <table:table-cell table:formula="of:=[.D589]-[.D58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17" office:value-type="float" office:value="9996" calcext:value-type="float">
            <text:p>9996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15694444444444" calcext:value-type="float">
            <text:p>0,00115694444444444000</text:p>
          </table:table-cell>
          <table:table-cell table:formula="of:=[.D590]-[.D58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17" office:value-type="float" office:value="10013" calcext:value-type="float">
            <text:p>10013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15891203703704" calcext:value-type="float">
            <text:p>0,00115891203703704000</text:p>
          </table:table-cell>
          <table:table-cell table:formula="of:=[.D591]-[.D59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17" office:value-type="float" office:value="10030" calcext:value-type="float">
            <text:p>1003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16087962962963" calcext:value-type="float">
            <text:p>0,00116087962962963000</text:p>
          </table:table-cell>
          <table:table-cell table:formula="of:=[.D592]-[.D59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17" office:value-type="float" office:value="10047" calcext:value-type="float">
            <text:p>10047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16284722222222" calcext:value-type="float">
            <text:p>0,00116284722222222000</text:p>
          </table:table-cell>
          <table:table-cell table:formula="of:=[.D593]-[.D59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17" office:value-type="float" office:value="10064" calcext:value-type="float">
            <text:p>10064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16481481481482" calcext:value-type="float">
            <text:p>0,00116481481481482000</text:p>
          </table:table-cell>
          <table:table-cell table:formula="of:=[.D594]-[.D59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17" office:value-type="float" office:value="10081" calcext:value-type="float">
            <text:p>10081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16678240740741" calcext:value-type="float">
            <text:p>0,00116678240740741000</text:p>
          </table:table-cell>
          <table:table-cell table:formula="of:=[.D595]-[.D59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17" office:value-type="float" office:value="10098" calcext:value-type="float">
            <text:p>10098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16875" calcext:value-type="float">
            <text:p>0,00116875000000000000</text:p>
          </table:table-cell>
          <table:table-cell table:formula="of:=[.D596]-[.D59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17" office:value-type="float" office:value="10115" calcext:value-type="float">
            <text:p>1011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17071759259259" calcext:value-type="float">
            <text:p>0,00117071759259259000</text:p>
          </table:table-cell>
          <table:table-cell table:formula="of:=[.D597]-[.D59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17" office:value-type="float" office:value="10132" calcext:value-type="float">
            <text:p>10132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17268518518519" calcext:value-type="float">
            <text:p>0,00117268518518519000</text:p>
          </table:table-cell>
          <table:table-cell table:formula="of:=[.D598]-[.D59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17" office:value-type="float" office:value="10149" calcext:value-type="float">
            <text:p>10149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17465277777778" calcext:value-type="float">
            <text:p>0,00117465277777778000</text:p>
          </table:table-cell>
          <table:table-cell table:formula="of:=[.D599]-[.D59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17" office:value-type="float" office:value="10166" calcext:value-type="float">
            <text:p>10166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17662037037037" calcext:value-type="float">
            <text:p>0,00117662037037037000</text:p>
          </table:table-cell>
          <table:table-cell table:formula="of:=[.D600]-[.D59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17" office:value-type="float" office:value="10183" calcext:value-type="float">
            <text:p>10183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17858796296296" calcext:value-type="float">
            <text:p>0,00117858796296296000</text:p>
          </table:table-cell>
          <table:table-cell table:formula="of:=[.D601]-[.D60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17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18055555555556" calcext:value-type="float">
            <text:p>0,00118055555555556000</text:p>
          </table:table-cell>
          <table:table-cell table:formula="of:=[.D602]-[.D60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17" office:value-type="float" office:value="10217" calcext:value-type="float">
            <text:p>10217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18252314814815" calcext:value-type="float">
            <text:p>0,00118252314814815000</text:p>
          </table:table-cell>
          <table:table-cell table:formula="of:=[.D603]-[.D60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17" office:value-type="float" office:value="10234" calcext:value-type="float">
            <text:p>10234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18449074074074" calcext:value-type="float">
            <text:p>0,00118449074074074000</text:p>
          </table:table-cell>
          <table:table-cell table:formula="of:=[.D604]-[.D60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17" office:value-type="float" office:value="10251" calcext:value-type="float">
            <text:p>10251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18645833333333" calcext:value-type="float">
            <text:p>0,00118645833333333000</text:p>
          </table:table-cell>
          <table:table-cell table:formula="of:=[.D605]-[.D60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17" office:value-type="float" office:value="10268" calcext:value-type="float">
            <text:p>10268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18842592592593" calcext:value-type="float">
            <text:p>0,00118842592592593000</text:p>
          </table:table-cell>
          <table:table-cell table:formula="of:=[.D606]-[.D60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17" office:value-type="float" office:value="10285" calcext:value-type="float">
            <text:p>1028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19039351851852" calcext:value-type="float">
            <text:p>0,00119039351851852000</text:p>
          </table:table-cell>
          <table:table-cell table:formula="of:=[.D607]-[.D60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17" office:value-type="float" office:value="10302" calcext:value-type="float">
            <text:p>10302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19236111111111" calcext:value-type="float">
            <text:p>0,00119236111111111000</text:p>
          </table:table-cell>
          <table:table-cell table:formula="of:=[.D608]-[.D60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17" office:value-type="float" office:value="10319" calcext:value-type="float">
            <text:p>10319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1943287037037" calcext:value-type="float">
            <text:p>0,00119432870370370000</text:p>
          </table:table-cell>
          <table:table-cell table:formula="of:=[.D609]-[.D60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17" office:value-type="float" office:value="10336" calcext:value-type="float">
            <text:p>10336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1962962962963" calcext:value-type="float">
            <text:p>0,00119629629629630000</text:p>
          </table:table-cell>
          <table:table-cell table:formula="of:=[.D610]-[.D60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17" office:value-type="float" office:value="10353" calcext:value-type="float">
            <text:p>10353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19826388888889" calcext:value-type="float">
            <text:p>0,00119826388888889000</text:p>
          </table:table-cell>
          <table:table-cell table:formula="of:=[.D611]-[.D61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17" office:value-type="float" office:value="10370" calcext:value-type="float">
            <text:p>1037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20023148148148" calcext:value-type="float">
            <text:p>0,00120023148148148000</text:p>
          </table:table-cell>
          <table:table-cell table:formula="of:=[.D612]-[.D61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17" office:value-type="float" office:value="10387" calcext:value-type="float">
            <text:p>10387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20219907407407" calcext:value-type="float">
            <text:p>0,00120219907407407000</text:p>
          </table:table-cell>
          <table:table-cell table:formula="of:=[.D613]-[.D61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17" office:value-type="float" office:value="10404" calcext:value-type="float">
            <text:p>10404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20416666666667" calcext:value-type="float">
            <text:p>0,00120416666666667000</text:p>
          </table:table-cell>
          <table:table-cell table:formula="of:=[.D614]-[.D61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17" office:value-type="float" office:value="10421" calcext:value-type="float">
            <text:p>10421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20613425925926" calcext:value-type="float">
            <text:p>0,00120613425925926000</text:p>
          </table:table-cell>
          <table:table-cell table:formula="of:=[.D615]-[.D61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17" office:value-type="float" office:value="10438" calcext:value-type="float">
            <text:p>10438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20810185185185" calcext:value-type="float">
            <text:p>0,00120810185185185000</text:p>
          </table:table-cell>
          <table:table-cell table:formula="of:=[.D616]-[.D61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17" office:value-type="float" office:value="10455" calcext:value-type="float">
            <text:p>1045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21006944444444" calcext:value-type="float">
            <text:p>0,00121006944444444000</text:p>
          </table:table-cell>
          <table:table-cell table:formula="of:=[.D617]-[.D61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17" office:value-type="float" office:value="10472" calcext:value-type="float">
            <text:p>10472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21203703703704" calcext:value-type="float">
            <text:p>0,00121203703703704000</text:p>
          </table:table-cell>
          <table:table-cell table:formula="of:=[.D618]-[.D61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17" office:value-type="float" office:value="10489" calcext:value-type="float">
            <text:p>10489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21400462962963" calcext:value-type="float">
            <text:p>0,00121400462962963000</text:p>
          </table:table-cell>
          <table:table-cell table:formula="of:=[.D619]-[.D61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17" office:value-type="float" office:value="10506" calcext:value-type="float">
            <text:p>10506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21597222222222" calcext:value-type="float">
            <text:p>0,00121597222222222000</text:p>
          </table:table-cell>
          <table:table-cell table:formula="of:=[.D620]-[.D61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17" office:value-type="float" office:value="10523" calcext:value-type="float">
            <text:p>10523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21793981481481" calcext:value-type="float">
            <text:p>0,00121793981481481000</text:p>
          </table:table-cell>
          <table:table-cell table:formula="of:=[.D621]-[.D62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17" office:value-type="float" office:value="10540" calcext:value-type="float">
            <text:p>1054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21990740740741" calcext:value-type="float">
            <text:p>0,00121990740740741000</text:p>
          </table:table-cell>
          <table:table-cell table:formula="of:=[.D622]-[.D62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17" office:value-type="float" office:value="10557" calcext:value-type="float">
            <text:p>10557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221875" calcext:value-type="float">
            <text:p>0,00122187500000000000</text:p>
          </table:table-cell>
          <table:table-cell table:formula="of:=[.D623]-[.D62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17" office:value-type="float" office:value="10574" calcext:value-type="float">
            <text:p>10574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22384259259259" calcext:value-type="float">
            <text:p>0,00122384259259259000</text:p>
          </table:table-cell>
          <table:table-cell table:formula="of:=[.D624]-[.D62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17" office:value-type="float" office:value="10591" calcext:value-type="float">
            <text:p>10591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22581018518519" calcext:value-type="float">
            <text:p>0,00122581018518519000</text:p>
          </table:table-cell>
          <table:table-cell table:formula="of:=[.D625]-[.D62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17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22777777777778" calcext:value-type="float">
            <text:p>0,00122777777777778000</text:p>
          </table:table-cell>
          <table:table-cell table:formula="of:=[.D626]-[.D62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17" office:value-type="float" office:value="10625" calcext:value-type="float">
            <text:p>1062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22974537037037" calcext:value-type="float">
            <text:p>0,00122974537037037000</text:p>
          </table:table-cell>
          <table:table-cell table:formula="of:=[.D627]-[.D62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17" office:value-type="float" office:value="10642" calcext:value-type="float">
            <text:p>10642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23171296296296" calcext:value-type="float">
            <text:p>0,00123171296296296000</text:p>
          </table:table-cell>
          <table:table-cell table:formula="of:=[.D628]-[.D62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17" office:value-type="float" office:value="10659" calcext:value-type="float">
            <text:p>10659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23368055555556" calcext:value-type="float">
            <text:p>0,00123368055555556000</text:p>
          </table:table-cell>
          <table:table-cell table:formula="of:=[.D629]-[.D62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17" office:value-type="float" office:value="10676" calcext:value-type="float">
            <text:p>10676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23564814814815" calcext:value-type="float">
            <text:p>0,00123564814814815000</text:p>
          </table:table-cell>
          <table:table-cell table:formula="of:=[.D630]-[.D62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17" office:value-type="float" office:value="10693" calcext:value-type="float">
            <text:p>10693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23761574074074" calcext:value-type="float">
            <text:p>0,00123761574074074000</text:p>
          </table:table-cell>
          <table:table-cell table:formula="of:=[.D631]-[.D63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17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23958333333333" calcext:value-type="float">
            <text:p>0,00123958333333333000</text:p>
          </table:table-cell>
          <table:table-cell table:formula="of:=[.D632]-[.D63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17" office:value-type="float" office:value="10727" calcext:value-type="float">
            <text:p>10727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24155092592593" calcext:value-type="float">
            <text:p>0,00124155092592593000</text:p>
          </table:table-cell>
          <table:table-cell table:formula="of:=[.D633]-[.D63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17" office:value-type="float" office:value="10744" calcext:value-type="float">
            <text:p>10744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24351851851852" calcext:value-type="float">
            <text:p>0,00124351851851852000</text:p>
          </table:table-cell>
          <table:table-cell table:formula="of:=[.D634]-[.D63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17" office:value-type="float" office:value="10761" calcext:value-type="float">
            <text:p>10761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24548611111111" calcext:value-type="float">
            <text:p>0,00124548611111111000</text:p>
          </table:table-cell>
          <table:table-cell table:formula="of:=[.D635]-[.D63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17" office:value-type="float" office:value="10778" calcext:value-type="float">
            <text:p>10778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2474537037037" calcext:value-type="float">
            <text:p>0,00124745370370370000</text:p>
          </table:table-cell>
          <table:table-cell table:formula="of:=[.D636]-[.D63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17" office:value-type="float" office:value="10795" calcext:value-type="float">
            <text:p>1079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2494212962963" calcext:value-type="float">
            <text:p>0,00124942129629630000</text:p>
          </table:table-cell>
          <table:table-cell table:formula="of:=[.D637]-[.D63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17" office:value-type="float" office:value="10812" calcext:value-type="float">
            <text:p>10812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25138888888889" calcext:value-type="float">
            <text:p>0,00125138888888889000</text:p>
          </table:table-cell>
          <table:table-cell table:formula="of:=[.D638]-[.D63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17" office:value-type="float" office:value="10829" calcext:value-type="float">
            <text:p>10829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25335648148148" calcext:value-type="float">
            <text:p>0,00125335648148148000</text:p>
          </table:table-cell>
          <table:table-cell table:formula="of:=[.D639]-[.D63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17" office:value-type="float" office:value="10846" calcext:value-type="float">
            <text:p>10846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25532407407407" calcext:value-type="float">
            <text:p>0,00125532407407407000</text:p>
          </table:table-cell>
          <table:table-cell table:formula="of:=[.D640]-[.D63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17" office:value-type="float" office:value="10863" calcext:value-type="float">
            <text:p>10863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25729166666667" calcext:value-type="float">
            <text:p>0,00125729166666667000</text:p>
          </table:table-cell>
          <table:table-cell table:formula="of:=[.D641]-[.D64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17" office:value-type="float" office:value="10880" calcext:value-type="float">
            <text:p>1088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125925925925926" calcext:value-type="float">
            <text:p>0,00125925925925926000</text:p>
          </table:table-cell>
          <table:table-cell table:formula="of:=[.D642]-[.D64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17" office:value-type="float" office:value="10897" calcext:value-type="float">
            <text:p>10897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126122685185185" calcext:value-type="float">
            <text:p>0,00126122685185185000</text:p>
          </table:table-cell>
          <table:table-cell table:formula="of:=[.D643]-[.D64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17" office:value-type="float" office:value="10914" calcext:value-type="float">
            <text:p>10914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126319444444444" calcext:value-type="float">
            <text:p>0,00126319444444444000</text:p>
          </table:table-cell>
          <table:table-cell table:formula="of:=[.D644]-[.D64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17" office:value-type="float" office:value="10931" calcext:value-type="float">
            <text:p>10931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126516203703704" calcext:value-type="float">
            <text:p>0,00126516203703704000</text:p>
          </table:table-cell>
          <table:table-cell table:formula="of:=[.D645]-[.D64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17" office:value-type="float" office:value="10948" calcext:value-type="float">
            <text:p>10948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126712962962963" calcext:value-type="float">
            <text:p>0,00126712962962963000</text:p>
          </table:table-cell>
          <table:table-cell table:formula="of:=[.D646]-[.D64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17" office:value-type="float" office:value="10965" calcext:value-type="float">
            <text:p>1096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126909722222222" calcext:value-type="float">
            <text:p>0,00126909722222222000</text:p>
          </table:table-cell>
          <table:table-cell table:formula="of:=[.D647]-[.D64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17" office:value-type="float" office:value="10982" calcext:value-type="float">
            <text:p>10982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127106481481481" calcext:value-type="float">
            <text:p>0,00127106481481481000</text:p>
          </table:table-cell>
          <table:table-cell table:formula="of:=[.D648]-[.D64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17" office:value-type="float" office:value="10999" calcext:value-type="float">
            <text:p>10999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127303240740741" calcext:value-type="float">
            <text:p>0,00127303240740741000</text:p>
          </table:table-cell>
          <table:table-cell table:formula="of:=[.D649]-[.D64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17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1275" calcext:value-type="float">
            <text:p>0,00127500000000000000</text:p>
          </table:table-cell>
          <table:table-cell table:formula="of:=[.D650]-[.D64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17" office:value-type="float" office:value="11033" calcext:value-type="float">
            <text:p>11033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127696759259259" calcext:value-type="float">
            <text:p>0,00127696759259259000</text:p>
          </table:table-cell>
          <table:table-cell table:formula="of:=[.D651]-[.D65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17" office:value-type="float" office:value="11050" calcext:value-type="float">
            <text:p>110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127893518518519" calcext:value-type="float">
            <text:p>0,00127893518518519000</text:p>
          </table:table-cell>
          <table:table-cell table:formula="of:=[.D652]-[.D65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17" office:value-type="float" office:value="11067" calcext:value-type="float">
            <text:p>11067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128090277777778" calcext:value-type="float">
            <text:p>0,00128090277777778000</text:p>
          </table:table-cell>
          <table:table-cell table:formula="of:=[.D653]-[.D65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17" office:value-type="float" office:value="11084" calcext:value-type="float">
            <text:p>11084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128287037037037" calcext:value-type="float">
            <text:p>0,00128287037037037000</text:p>
          </table:table-cell>
          <table:table-cell table:formula="of:=[.D654]-[.D65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17" office:value-type="float" office:value="11101" calcext:value-type="float">
            <text:p>11101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128483796296296" calcext:value-type="float">
            <text:p>0,00128483796296296000</text:p>
          </table:table-cell>
          <table:table-cell table:formula="of:=[.D655]-[.D65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17" office:value-type="float" office:value="11118" calcext:value-type="float">
            <text:p>11118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128680555555556" calcext:value-type="float">
            <text:p>0,00128680555555556000</text:p>
          </table:table-cell>
          <table:table-cell table:formula="of:=[.D656]-[.D65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17" office:value-type="float" office:value="11135" calcext:value-type="float">
            <text:p>1113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128877314814815" calcext:value-type="float">
            <text:p>0,00128877314814815000</text:p>
          </table:table-cell>
          <table:table-cell table:formula="of:=[.D657]-[.D65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17" office:value-type="float" office:value="11152" calcext:value-type="float">
            <text:p>11152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129074074074074" calcext:value-type="float">
            <text:p>0,00129074074074074000</text:p>
          </table:table-cell>
          <table:table-cell table:formula="of:=[.D658]-[.D65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17" office:value-type="float" office:value="11169" calcext:value-type="float">
            <text:p>11169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129270833333333" calcext:value-type="float">
            <text:p>0,00129270833333333000</text:p>
          </table:table-cell>
          <table:table-cell table:formula="of:=[.D659]-[.D65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17" office:value-type="float" office:value="11186" calcext:value-type="float">
            <text:p>11186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129467592592593" calcext:value-type="float">
            <text:p>0,00129467592592593000</text:p>
          </table:table-cell>
          <table:table-cell table:formula="of:=[.D660]-[.D65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17" office:value-type="float" office:value="11203" calcext:value-type="float">
            <text:p>11203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129664351851852" calcext:value-type="float">
            <text:p>0,00129664351851852000</text:p>
          </table:table-cell>
          <table:table-cell table:formula="of:=[.D661]-[.D66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17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129861111111111" calcext:value-type="float">
            <text:p>0,00129861111111111000</text:p>
          </table:table-cell>
          <table:table-cell table:formula="of:=[.D662]-[.D66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17" office:value-type="float" office:value="11237" calcext:value-type="float">
            <text:p>11237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13005787037037" calcext:value-type="float">
            <text:p>0,00130057870370370000</text:p>
          </table:table-cell>
          <table:table-cell table:formula="of:=[.D663]-[.D66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17" office:value-type="float" office:value="11254" calcext:value-type="float">
            <text:p>11254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13025462962963" calcext:value-type="float">
            <text:p>0,00130254629629630000</text:p>
          </table:table-cell>
          <table:table-cell table:formula="of:=[.D664]-[.D66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17" office:value-type="float" office:value="11271" calcext:value-type="float">
            <text:p>11271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130451388888889" calcext:value-type="float">
            <text:p>0,00130451388888889000</text:p>
          </table:table-cell>
          <table:table-cell table:formula="of:=[.D665]-[.D66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17" office:value-type="float" office:value="11288" calcext:value-type="float">
            <text:p>11288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130648148148148" calcext:value-type="float">
            <text:p>0,00130648148148148000</text:p>
          </table:table-cell>
          <table:table-cell table:formula="of:=[.D666]-[.D66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17" office:value-type="float" office:value="11305" calcext:value-type="float">
            <text:p>1130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130844907407407" calcext:value-type="float">
            <text:p>0,00130844907407407000</text:p>
          </table:table-cell>
          <table:table-cell table:formula="of:=[.D667]-[.D66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17" office:value-type="float" office:value="11322" calcext:value-type="float">
            <text:p>11322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131041666666667" calcext:value-type="float">
            <text:p>0,00131041666666667000</text:p>
          </table:table-cell>
          <table:table-cell table:formula="of:=[.D668]-[.D66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17" office:value-type="float" office:value="11339" calcext:value-type="float">
            <text:p>11339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131238425925926" calcext:value-type="float">
            <text:p>0,00131238425925926000</text:p>
          </table:table-cell>
          <table:table-cell table:formula="of:=[.D669]-[.D66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17" office:value-type="float" office:value="11356" calcext:value-type="float">
            <text:p>11356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131435185185185" calcext:value-type="float">
            <text:p>0,00131435185185185000</text:p>
          </table:table-cell>
          <table:table-cell table:formula="of:=[.D670]-[.D66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17" office:value-type="float" office:value="11373" calcext:value-type="float">
            <text:p>11373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131631944444444" calcext:value-type="float">
            <text:p>0,00131631944444444000</text:p>
          </table:table-cell>
          <table:table-cell table:formula="of:=[.D671]-[.D67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17" office:value-type="float" office:value="11390" calcext:value-type="float">
            <text:p>1139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131828703703704" calcext:value-type="float">
            <text:p>0,00131828703703704000</text:p>
          </table:table-cell>
          <table:table-cell table:formula="of:=[.D672]-[.D67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17" office:value-type="float" office:value="11407" calcext:value-type="float">
            <text:p>11407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132025462962963" calcext:value-type="float">
            <text:p>0,00132025462962963000</text:p>
          </table:table-cell>
          <table:table-cell table:formula="of:=[.D673]-[.D67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17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132222222222222" calcext:value-type="float">
            <text:p>0,00132222222222222000</text:p>
          </table:table-cell>
          <table:table-cell table:formula="of:=[.D674]-[.D67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17" office:value-type="float" office:value="11441" calcext:value-type="float">
            <text:p>11441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132418981481481" calcext:value-type="float">
            <text:p>0,00132418981481481000</text:p>
          </table:table-cell>
          <table:table-cell table:formula="of:=[.D675]-[.D67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17" office:value-type="float" office:value="11458" calcext:value-type="float">
            <text:p>11458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132615740740741" calcext:value-type="float">
            <text:p>0,00132615740740741000</text:p>
          </table:table-cell>
          <table:table-cell table:formula="of:=[.D676]-[.D67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17" office:value-type="float" office:value="11475" calcext:value-type="float">
            <text:p>1147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1328125" calcext:value-type="float">
            <text:p>0,00132812500000000000</text:p>
          </table:table-cell>
          <table:table-cell table:formula="of:=[.D677]-[.D67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17" office:value-type="float" office:value="11492" calcext:value-type="float">
            <text:p>11492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133009259259259" calcext:value-type="float">
            <text:p>0,00133009259259259000</text:p>
          </table:table-cell>
          <table:table-cell table:formula="of:=[.D678]-[.D67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17" office:value-type="float" office:value="11509" calcext:value-type="float">
            <text:p>11509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133206018518519" calcext:value-type="float">
            <text:p>0,00133206018518519000</text:p>
          </table:table-cell>
          <table:table-cell table:formula="of:=[.D679]-[.D67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17" office:value-type="float" office:value="11526" calcext:value-type="float">
            <text:p>11526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133402777777778" calcext:value-type="float">
            <text:p>0,00133402777777778000</text:p>
          </table:table-cell>
          <table:table-cell table:formula="of:=[.D680]-[.D67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17" office:value-type="float" office:value="11543" calcext:value-type="float">
            <text:p>11543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133599537037037" calcext:value-type="float">
            <text:p>0,00133599537037037000</text:p>
          </table:table-cell>
          <table:table-cell table:formula="of:=[.D681]-[.D68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17" office:value-type="float" office:value="11560" calcext:value-type="float">
            <text:p>1156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133796296296296" calcext:value-type="float">
            <text:p>0,00133796296296296000</text:p>
          </table:table-cell>
          <table:table-cell table:formula="of:=[.D682]-[.D68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17" office:value-type="float" office:value="11577" calcext:value-type="float">
            <text:p>11577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133993055555556" calcext:value-type="float">
            <text:p>0,00133993055555556000</text:p>
          </table:table-cell>
          <table:table-cell table:formula="of:=[.D683]-[.D68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17" office:value-type="float" office:value="11594" calcext:value-type="float">
            <text:p>11594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134189814814815" calcext:value-type="float">
            <text:p>0,00134189814814815000</text:p>
          </table:table-cell>
          <table:table-cell table:formula="of:=[.D684]-[.D68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17" office:value-type="float" office:value="11611" calcext:value-type="float">
            <text:p>11611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134386574074074" calcext:value-type="float">
            <text:p>0,00134386574074074000</text:p>
          </table:table-cell>
          <table:table-cell table:formula="of:=[.D685]-[.D68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17" office:value-type="float" office:value="11628" calcext:value-type="float">
            <text:p>11628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134583333333333" calcext:value-type="float">
            <text:p>0,00134583333333333000</text:p>
          </table:table-cell>
          <table:table-cell table:formula="of:=[.D686]-[.D68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17" office:value-type="float" office:value="11645" calcext:value-type="float">
            <text:p>1164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134780092592593" calcext:value-type="float">
            <text:p>0,00134780092592593000</text:p>
          </table:table-cell>
          <table:table-cell table:formula="of:=[.D687]-[.D68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17" office:value-type="float" office:value="11662" calcext:value-type="float">
            <text:p>11662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134976851851852" calcext:value-type="float">
            <text:p>0,00134976851851852000</text:p>
          </table:table-cell>
          <table:table-cell table:formula="of:=[.D688]-[.D68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17" office:value-type="float" office:value="11679" calcext:value-type="float">
            <text:p>11679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135173611111111" calcext:value-type="float">
            <text:p>0,00135173611111111000</text:p>
          </table:table-cell>
          <table:table-cell table:formula="of:=[.D689]-[.D68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17" office:value-type="float" office:value="11696" calcext:value-type="float">
            <text:p>11696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13537037037037" calcext:value-type="float">
            <text:p>0,00135370370370370000</text:p>
          </table:table-cell>
          <table:table-cell table:formula="of:=[.D690]-[.D68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17" office:value-type="float" office:value="11713" calcext:value-type="float">
            <text:p>11713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13556712962963" calcext:value-type="float">
            <text:p>0,00135567129629630000</text:p>
          </table:table-cell>
          <table:table-cell table:formula="of:=[.D691]-[.D69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17" office:value-type="float" office:value="11730" calcext:value-type="float">
            <text:p>1173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135763888888889" calcext:value-type="float">
            <text:p>0,00135763888888889000</text:p>
          </table:table-cell>
          <table:table-cell table:formula="of:=[.D692]-[.D69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17" office:value-type="float" office:value="11747" calcext:value-type="float">
            <text:p>11747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135960648148148" calcext:value-type="float">
            <text:p>0,00135960648148148000</text:p>
          </table:table-cell>
          <table:table-cell table:formula="of:=[.D693]-[.D69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17" office:value-type="float" office:value="11764" calcext:value-type="float">
            <text:p>11764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136157407407407" calcext:value-type="float">
            <text:p>0,00136157407407407000</text:p>
          </table:table-cell>
          <table:table-cell table:formula="of:=[.D694]-[.D69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17" office:value-type="float" office:value="11781" calcext:value-type="float">
            <text:p>11781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136354166666667" calcext:value-type="float">
            <text:p>0,00136354166666667000</text:p>
          </table:table-cell>
          <table:table-cell table:formula="of:=[.D695]-[.D69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17" office:value-type="float" office:value="11798" calcext:value-type="float">
            <text:p>11798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136550925925926" calcext:value-type="float">
            <text:p>0,00136550925925926000</text:p>
          </table:table-cell>
          <table:table-cell table:formula="of:=[.D696]-[.D69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17" office:value-type="float" office:value="11815" calcext:value-type="float">
            <text:p>1181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136747685185185" calcext:value-type="float">
            <text:p>0,00136747685185185000</text:p>
          </table:table-cell>
          <table:table-cell table:formula="of:=[.D697]-[.D69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17" office:value-type="float" office:value="11832" calcext:value-type="float">
            <text:p>11832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136944444444444" calcext:value-type="float">
            <text:p>0,00136944444444444000</text:p>
          </table:table-cell>
          <table:table-cell table:formula="of:=[.D698]-[.D69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17" office:value-type="float" office:value="11849" calcext:value-type="float">
            <text:p>11849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137141203703704" calcext:value-type="float">
            <text:p>0,00137141203703704000</text:p>
          </table:table-cell>
          <table:table-cell table:formula="of:=[.D699]-[.D69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17" office:value-type="float" office:value="11866" calcext:value-type="float">
            <text:p>11866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137337962962963" calcext:value-type="float">
            <text:p>0,00137337962962963000</text:p>
          </table:table-cell>
          <table:table-cell table:formula="of:=[.D700]-[.D69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17" office:value-type="float" office:value="11883" calcext:value-type="float">
            <text:p>11883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137534722222222" calcext:value-type="float">
            <text:p>0,00137534722222222000</text:p>
          </table:table-cell>
          <table:table-cell table:formula="of:=[.D701]-[.D70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17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137731481481481" calcext:value-type="float">
            <text:p>0,00137731481481481000</text:p>
          </table:table-cell>
          <table:table-cell table:formula="of:=[.D702]-[.D70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17" office:value-type="float" office:value="11917" calcext:value-type="float">
            <text:p>11917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137928240740741" calcext:value-type="float">
            <text:p>0,00137928240740741000</text:p>
          </table:table-cell>
          <table:table-cell table:formula="of:=[.D703]-[.D70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17" office:value-type="float" office:value="11934" calcext:value-type="float">
            <text:p>11934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138125" calcext:value-type="float">
            <text:p>0,00138125000000000000</text:p>
          </table:table-cell>
          <table:table-cell table:formula="of:=[.D704]-[.D70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17" office:value-type="float" office:value="11951" calcext:value-type="float">
            <text:p>11951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138321759259259" calcext:value-type="float">
            <text:p>0,00138321759259259000</text:p>
          </table:table-cell>
          <table:table-cell table:formula="of:=[.D705]-[.D70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17" office:value-type="float" office:value="11968" calcext:value-type="float">
            <text:p>11968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138518518518519" calcext:value-type="float">
            <text:p>0,00138518518518519000</text:p>
          </table:table-cell>
          <table:table-cell table:formula="of:=[.D706]-[.D70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17" office:value-type="float" office:value="11985" calcext:value-type="float">
            <text:p>1198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138715277777778" calcext:value-type="float">
            <text:p>0,00138715277777778000</text:p>
          </table:table-cell>
          <table:table-cell table:formula="of:=[.D707]-[.D70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17" office:value-type="float" office:value="12002" calcext:value-type="float">
            <text:p>12002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138912037037037" calcext:value-type="float">
            <text:p>0,00138912037037037000</text:p>
          </table:table-cell>
          <table:table-cell table:formula="of:=[.D708]-[.D70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17" office:value-type="float" office:value="12019" calcext:value-type="float">
            <text:p>12019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139108796296296" calcext:value-type="float">
            <text:p>0,00139108796296296000</text:p>
          </table:table-cell>
          <table:table-cell table:formula="of:=[.D709]-[.D70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17" office:value-type="float" office:value="12036" calcext:value-type="float">
            <text:p>12036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139305555555556" calcext:value-type="float">
            <text:p>0,00139305555555556000</text:p>
          </table:table-cell>
          <table:table-cell table:formula="of:=[.D710]-[.D70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17" office:value-type="float" office:value="12053" calcext:value-type="float">
            <text:p>12053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139502314814815" calcext:value-type="float">
            <text:p>0,00139502314814815000</text:p>
          </table:table-cell>
          <table:table-cell table:formula="of:=[.D711]-[.D71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17" office:value-type="float" office:value="12070" calcext:value-type="float">
            <text:p>1207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139699074074074" calcext:value-type="float">
            <text:p>0,00139699074074074000</text:p>
          </table:table-cell>
          <table:table-cell table:formula="of:=[.D712]-[.D71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17" office:value-type="float" office:value="12087" calcext:value-type="float">
            <text:p>12087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139895833333333" calcext:value-type="float">
            <text:p>0,00139895833333333000</text:p>
          </table:table-cell>
          <table:table-cell table:formula="of:=[.D713]-[.D71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17" office:value-type="float" office:value="12104" calcext:value-type="float">
            <text:p>12104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140092592592593" calcext:value-type="float">
            <text:p>0,00140092592592593000</text:p>
          </table:table-cell>
          <table:table-cell table:formula="of:=[.D714]-[.D71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17" office:value-type="float" office:value="12121" calcext:value-type="float">
            <text:p>12121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140289351851852" calcext:value-type="float">
            <text:p>0,00140289351851852000</text:p>
          </table:table-cell>
          <table:table-cell table:formula="of:=[.D715]-[.D71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17" office:value-type="float" office:value="12138" calcext:value-type="float">
            <text:p>12138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140486111111111" calcext:value-type="float">
            <text:p>0,00140486111111111000</text:p>
          </table:table-cell>
          <table:table-cell table:formula="of:=[.D716]-[.D71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17" office:value-type="float" office:value="12155" calcext:value-type="float">
            <text:p>1215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14068287037037" calcext:value-type="float">
            <text:p>0,00140682870370370000</text:p>
          </table:table-cell>
          <table:table-cell table:formula="of:=[.D717]-[.D71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17" office:value-type="float" office:value="12172" calcext:value-type="float">
            <text:p>12172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14087962962963" calcext:value-type="float">
            <text:p>0,00140879629629630000</text:p>
          </table:table-cell>
          <table:table-cell table:formula="of:=[.D718]-[.D71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17" office:value-type="float" office:value="12189" calcext:value-type="float">
            <text:p>12189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141076388888889" calcext:value-type="float">
            <text:p>0,00141076388888889000</text:p>
          </table:table-cell>
          <table:table-cell table:formula="of:=[.D719]-[.D71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17" office:value-type="float" office:value="12206" calcext:value-type="float">
            <text:p>12206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141273148148148" calcext:value-type="float">
            <text:p>0,00141273148148148000</text:p>
          </table:table-cell>
          <table:table-cell table:formula="of:=[.D720]-[.D71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17" office:value-type="float" office:value="12223" calcext:value-type="float">
            <text:p>12223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141469907407407" calcext:value-type="float">
            <text:p>0,00141469907407407000</text:p>
          </table:table-cell>
          <table:table-cell table:formula="of:=[.D721]-[.D72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17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141666666666667" calcext:value-type="float">
            <text:p>0,00141666666666667000</text:p>
          </table:table-cell>
          <table:table-cell table:formula="of:=[.D722]-[.D72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17" office:value-type="float" office:value="12257" calcext:value-type="float">
            <text:p>12257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141863425925926" calcext:value-type="float">
            <text:p>0,00141863425925926000</text:p>
          </table:table-cell>
          <table:table-cell table:formula="of:=[.D723]-[.D72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17" office:value-type="float" office:value="12274" calcext:value-type="float">
            <text:p>12274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142060185185185" calcext:value-type="float">
            <text:p>0,00142060185185185000</text:p>
          </table:table-cell>
          <table:table-cell table:formula="of:=[.D724]-[.D72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17" office:value-type="float" office:value="12291" calcext:value-type="float">
            <text:p>12291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142256944444444" calcext:value-type="float">
            <text:p>0,00142256944444444000</text:p>
          </table:table-cell>
          <table:table-cell table:formula="of:=[.D725]-[.D72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17" office:value-type="float" office:value="12308" calcext:value-type="float">
            <text:p>12308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142453703703704" calcext:value-type="float">
            <text:p>0,00142453703703704000</text:p>
          </table:table-cell>
          <table:table-cell table:formula="of:=[.D726]-[.D72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17" office:value-type="float" office:value="12325" calcext:value-type="float">
            <text:p>1232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142650462962963" calcext:value-type="float">
            <text:p>0,00142650462962963000</text:p>
          </table:table-cell>
          <table:table-cell table:formula="of:=[.D727]-[.D72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17" office:value-type="float" office:value="12342" calcext:value-type="float">
            <text:p>12342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142847222222222" calcext:value-type="float">
            <text:p>0,00142847222222222000</text:p>
          </table:table-cell>
          <table:table-cell table:formula="of:=[.D728]-[.D72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17" office:value-type="float" office:value="12359" calcext:value-type="float">
            <text:p>12359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143043981481481" calcext:value-type="float">
            <text:p>0,00143043981481481000</text:p>
          </table:table-cell>
          <table:table-cell table:formula="of:=[.D729]-[.D72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17" office:value-type="float" office:value="12376" calcext:value-type="float">
            <text:p>12376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143240740740741" calcext:value-type="float">
            <text:p>0,00143240740740741000</text:p>
          </table:table-cell>
          <table:table-cell table:formula="of:=[.D730]-[.D72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17" office:value-type="float" office:value="12393" calcext:value-type="float">
            <text:p>12393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1434375" calcext:value-type="float">
            <text:p>0,00143437500000000000</text:p>
          </table:table-cell>
          <table:table-cell table:formula="of:=[.D731]-[.D73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17" office:value-type="float" office:value="12410" calcext:value-type="float">
            <text:p>1241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143634259259259" calcext:value-type="float">
            <text:p>0,00143634259259259000</text:p>
          </table:table-cell>
          <table:table-cell table:formula="of:=[.D732]-[.D73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17" office:value-type="float" office:value="12427" calcext:value-type="float">
            <text:p>12427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143831018518519" calcext:value-type="float">
            <text:p>0,00143831018518519000</text:p>
          </table:table-cell>
          <table:table-cell table:formula="of:=[.D733]-[.D73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17" office:value-type="float" office:value="12444" calcext:value-type="float">
            <text:p>12444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144027777777778" calcext:value-type="float">
            <text:p>0,00144027777777778000</text:p>
          </table:table-cell>
          <table:table-cell table:formula="of:=[.D734]-[.D73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17" office:value-type="float" office:value="12461" calcext:value-type="float">
            <text:p>12461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144224537037037" calcext:value-type="float">
            <text:p>0,00144224537037037000</text:p>
          </table:table-cell>
          <table:table-cell table:formula="of:=[.D735]-[.D73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17" office:value-type="float" office:value="12478" calcext:value-type="float">
            <text:p>12478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144421296296296" calcext:value-type="float">
            <text:p>0,00144421296296296000</text:p>
          </table:table-cell>
          <table:table-cell table:formula="of:=[.D736]-[.D73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17" office:value-type="float" office:value="12495" calcext:value-type="float">
            <text:p>12495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144618055555556" calcext:value-type="float">
            <text:p>0,00144618055555556000</text:p>
          </table:table-cell>
          <table:table-cell table:formula="of:=[.D737]-[.D73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17" office:value-type="float" office:value="12512" calcext:value-type="float">
            <text:p>12512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144814814814815" calcext:value-type="float">
            <text:p>0,00144814814814815000</text:p>
          </table:table-cell>
          <table:table-cell table:formula="of:=[.D738]-[.D73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17" office:value-type="float" office:value="12529" calcext:value-type="float">
            <text:p>12529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145011574074074" calcext:value-type="float">
            <text:p>0,00145011574074074000</text:p>
          </table:table-cell>
          <table:table-cell table:formula="of:=[.D739]-[.D73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17" office:value-type="float" office:value="12546" calcext:value-type="float">
            <text:p>12546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145208333333333" calcext:value-type="float">
            <text:p>0,00145208333333333000</text:p>
          </table:table-cell>
          <table:table-cell table:formula="of:=[.D740]-[.D73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17" office:value-type="float" office:value="12563" calcext:value-type="float">
            <text:p>12563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145405092592593" calcext:value-type="float">
            <text:p>0,00145405092592593000</text:p>
          </table:table-cell>
          <table:table-cell table:formula="of:=[.D741]-[.D74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17" office:value-type="float" office:value="12580" calcext:value-type="float">
            <text:p>1258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145601851851852" calcext:value-type="float">
            <text:p>0,00145601851851852000</text:p>
          </table:table-cell>
          <table:table-cell table:formula="of:=[.D742]-[.D74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17" office:value-type="float" office:value="12597" calcext:value-type="float">
            <text:p>12597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145798611111111" calcext:value-type="float">
            <text:p>0,00145798611111111000</text:p>
          </table:table-cell>
          <table:table-cell table:formula="of:=[.D743]-[.D74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17" office:value-type="float" office:value="12614" calcext:value-type="float">
            <text:p>12614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14599537037037" calcext:value-type="float">
            <text:p>0,00145995370370370000</text:p>
          </table:table-cell>
          <table:table-cell table:formula="of:=[.D744]-[.D74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17" office:value-type="float" office:value="12631" calcext:value-type="float">
            <text:p>12631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14619212962963" calcext:value-type="float">
            <text:p>0,00146192129629630000</text:p>
          </table:table-cell>
          <table:table-cell table:formula="of:=[.D745]-[.D74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17" office:value-type="float" office:value="12648" calcext:value-type="float">
            <text:p>12648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146388888888889" calcext:value-type="float">
            <text:p>0,00146388888888889000</text:p>
          </table:table-cell>
          <table:table-cell table:formula="of:=[.D746]-[.D74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17" office:value-type="float" office:value="12665" calcext:value-type="float">
            <text:p>12665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146585648148148" calcext:value-type="float">
            <text:p>0,00146585648148148000</text:p>
          </table:table-cell>
          <table:table-cell table:formula="of:=[.D747]-[.D74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17" office:value-type="float" office:value="12682" calcext:value-type="float">
            <text:p>12682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146782407407407" calcext:value-type="float">
            <text:p>0,00146782407407407000</text:p>
          </table:table-cell>
          <table:table-cell table:formula="of:=[.D748]-[.D74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17" office:value-type="float" office:value="12699" calcext:value-type="float">
            <text:p>12699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146979166666667" calcext:value-type="float">
            <text:p>0,00146979166666667000</text:p>
          </table:table-cell>
          <table:table-cell table:formula="of:=[.D749]-[.D74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17" office:value-type="float" office:value="12716" calcext:value-type="float">
            <text:p>12716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147175925925926" calcext:value-type="float">
            <text:p>0,00147175925925926000</text:p>
          </table:table-cell>
          <table:table-cell table:formula="of:=[.D750]-[.D74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17" office:value-type="float" office:value="12733" calcext:value-type="float">
            <text:p>12733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147372685185185" calcext:value-type="float">
            <text:p>0,00147372685185185000</text:p>
          </table:table-cell>
          <table:table-cell table:formula="of:=[.D751]-[.D75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17" office:value-type="float" office:value="12750" calcext:value-type="float">
            <text:p>1275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147569444444444" calcext:value-type="float">
            <text:p>0,00147569444444444000</text:p>
          </table:table-cell>
          <table:table-cell table:formula="of:=[.D752]-[.D75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17" office:value-type="float" office:value="12767" calcext:value-type="float">
            <text:p>12767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147766203703704" calcext:value-type="float">
            <text:p>0,00147766203703704000</text:p>
          </table:table-cell>
          <table:table-cell table:formula="of:=[.D753]-[.D75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17" office:value-type="float" office:value="12784" calcext:value-type="float">
            <text:p>12784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147962962962963" calcext:value-type="float">
            <text:p>0,00147962962962963000</text:p>
          </table:table-cell>
          <table:table-cell table:formula="of:=[.D754]-[.D75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17" office:value-type="float" office:value="12801" calcext:value-type="float">
            <text:p>12801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148159722222222" calcext:value-type="float">
            <text:p>0,00148159722222222000</text:p>
          </table:table-cell>
          <table:table-cell table:formula="of:=[.D755]-[.D75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17" office:value-type="float" office:value="12818" calcext:value-type="float">
            <text:p>12818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148356481481481" calcext:value-type="float">
            <text:p>0,00148356481481481000</text:p>
          </table:table-cell>
          <table:table-cell table:formula="of:=[.D756]-[.D75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17" office:value-type="float" office:value="12835" calcext:value-type="float">
            <text:p>12835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148553240740741" calcext:value-type="float">
            <text:p>0,00148553240740741000</text:p>
          </table:table-cell>
          <table:table-cell table:formula="of:=[.D757]-[.D75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17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14875" calcext:value-type="float">
            <text:p>0,00148750000000000000</text:p>
          </table:table-cell>
          <table:table-cell table:formula="of:=[.D758]-[.D75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17" office:value-type="float" office:value="12869" calcext:value-type="float">
            <text:p>12869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148946759259259" calcext:value-type="float">
            <text:p>0,00148946759259259000</text:p>
          </table:table-cell>
          <table:table-cell table:formula="of:=[.D759]-[.D75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17" office:value-type="float" office:value="12886" calcext:value-type="float">
            <text:p>12886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149143518518519" calcext:value-type="float">
            <text:p>0,00149143518518519000</text:p>
          </table:table-cell>
          <table:table-cell table:formula="of:=[.D760]-[.D75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17" office:value-type="float" office:value="12903" calcext:value-type="float">
            <text:p>12903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149340277777778" calcext:value-type="float">
            <text:p>0,00149340277777778000</text:p>
          </table:table-cell>
          <table:table-cell table:formula="of:=[.D761]-[.D76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17" office:value-type="float" office:value="12920" calcext:value-type="float">
            <text:p>1292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149537037037037" calcext:value-type="float">
            <text:p>0,00149537037037037000</text:p>
          </table:table-cell>
          <table:table-cell table:formula="of:=[.D762]-[.D76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17" office:value-type="float" office:value="12937" calcext:value-type="float">
            <text:p>12937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149733796296296" calcext:value-type="float">
            <text:p>0,00149733796296296000</text:p>
          </table:table-cell>
          <table:table-cell table:formula="of:=[.D763]-[.D76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17" office:value-type="float" office:value="12954" calcext:value-type="float">
            <text:p>12954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149930555555556" calcext:value-type="float">
            <text:p>0,00149930555555556000</text:p>
          </table:table-cell>
          <table:table-cell table:formula="of:=[.D764]-[.D76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17" office:value-type="float" office:value="12971" calcext:value-type="float">
            <text:p>12971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150127314814815" calcext:value-type="float">
            <text:p>0,00150127314814815000</text:p>
          </table:table-cell>
          <table:table-cell table:formula="of:=[.D765]-[.D76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17" office:value-type="float" office:value="12988" calcext:value-type="float">
            <text:p>12988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150324074074074" calcext:value-type="float">
            <text:p>0,00150324074074074000</text:p>
          </table:table-cell>
          <table:table-cell table:formula="of:=[.D766]-[.D76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17" office:value-type="float" office:value="13005" calcext:value-type="float">
            <text:p>13005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150520833333333" calcext:value-type="float">
            <text:p>0,00150520833333333000</text:p>
          </table:table-cell>
          <table:table-cell table:formula="of:=[.D767]-[.D76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17" office:value-type="float" office:value="13022" calcext:value-type="float">
            <text:p>13022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150717592592593" calcext:value-type="float">
            <text:p>0,00150717592592593000</text:p>
          </table:table-cell>
          <table:table-cell table:formula="of:=[.D768]-[.D76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17" office:value-type="float" office:value="13039" calcext:value-type="float">
            <text:p>13039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150914351851852" calcext:value-type="float">
            <text:p>0,00150914351851852000</text:p>
          </table:table-cell>
          <table:table-cell table:formula="of:=[.D769]-[.D76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17" office:value-type="float" office:value="13056" calcext:value-type="float">
            <text:p>13056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151111111111111" calcext:value-type="float">
            <text:p>0,00151111111111111000</text:p>
          </table:table-cell>
          <table:table-cell table:formula="of:=[.D770]-[.D76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17" office:value-type="float" office:value="13073" calcext:value-type="float">
            <text:p>13073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15130787037037" calcext:value-type="float">
            <text:p>0,00151307870370370000</text:p>
          </table:table-cell>
          <table:table-cell table:formula="of:=[.D771]-[.D77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17" office:value-type="float" office:value="13090" calcext:value-type="float">
            <text:p>1309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15150462962963" calcext:value-type="float">
            <text:p>0,00151504629629630000</text:p>
          </table:table-cell>
          <table:table-cell table:formula="of:=[.D772]-[.D77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17" office:value-type="float" office:value="13107" calcext:value-type="float">
            <text:p>13107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151701388888889" calcext:value-type="float">
            <text:p>0,00151701388888889000</text:p>
          </table:table-cell>
          <table:table-cell table:formula="of:=[.D773]-[.D77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17" office:value-type="float" office:value="13124" calcext:value-type="float">
            <text:p>13124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151898148148148" calcext:value-type="float">
            <text:p>0,00151898148148148000</text:p>
          </table:table-cell>
          <table:table-cell table:formula="of:=[.D774]-[.D77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17" office:value-type="float" office:value="13141" calcext:value-type="float">
            <text:p>13141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152094907407407" calcext:value-type="float">
            <text:p>0,00152094907407407000</text:p>
          </table:table-cell>
          <table:table-cell table:formula="of:=[.D775]-[.D77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17" office:value-type="float" office:value="13158" calcext:value-type="float">
            <text:p>13158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152291666666667" calcext:value-type="float">
            <text:p>0,00152291666666667000</text:p>
          </table:table-cell>
          <table:table-cell table:formula="of:=[.D776]-[.D77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17" office:value-type="float" office:value="13175" calcext:value-type="float">
            <text:p>13175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152488425925926" calcext:value-type="float">
            <text:p>0,00152488425925926000</text:p>
          </table:table-cell>
          <table:table-cell table:formula="of:=[.D777]-[.D77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17" office:value-type="float" office:value="13192" calcext:value-type="float">
            <text:p>13192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152685185185185" calcext:value-type="float">
            <text:p>0,00152685185185185000</text:p>
          </table:table-cell>
          <table:table-cell table:formula="of:=[.D778]-[.D77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17" office:value-type="float" office:value="13209" calcext:value-type="float">
            <text:p>13209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152881944444444" calcext:value-type="float">
            <text:p>0,00152881944444444000</text:p>
          </table:table-cell>
          <table:table-cell table:formula="of:=[.D779]-[.D77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17" office:value-type="float" office:value="13226" calcext:value-type="float">
            <text:p>13226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153078703703704" calcext:value-type="float">
            <text:p>0,00153078703703704000</text:p>
          </table:table-cell>
          <table:table-cell table:formula="of:=[.D780]-[.D77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17" office:value-type="float" office:value="13243" calcext:value-type="float">
            <text:p>13243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153275462962963" calcext:value-type="float">
            <text:p>0,00153275462962963000</text:p>
          </table:table-cell>
          <table:table-cell table:formula="of:=[.D781]-[.D78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17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153472222222222" calcext:value-type="float">
            <text:p>0,00153472222222222000</text:p>
          </table:table-cell>
          <table:table-cell table:formula="of:=[.D782]-[.D78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17" office:value-type="float" office:value="13277" calcext:value-type="float">
            <text:p>13277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153668981481481" calcext:value-type="float">
            <text:p>0,00153668981481481000</text:p>
          </table:table-cell>
          <table:table-cell table:formula="of:=[.D783]-[.D78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17" office:value-type="float" office:value="13294" calcext:value-type="float">
            <text:p>13294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153865740740741" calcext:value-type="float">
            <text:p>0,00153865740740741000</text:p>
          </table:table-cell>
          <table:table-cell table:formula="of:=[.D784]-[.D78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17" office:value-type="float" office:value="13311" calcext:value-type="float">
            <text:p>13311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1540625" calcext:value-type="float">
            <text:p>0,00154062500000000000</text:p>
          </table:table-cell>
          <table:table-cell table:formula="of:=[.D785]-[.D78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17" office:value-type="float" office:value="13328" calcext:value-type="float">
            <text:p>13328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154259259259259" calcext:value-type="float">
            <text:p>0,00154259259259259000</text:p>
          </table:table-cell>
          <table:table-cell table:formula="of:=[.D786]-[.D78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17" office:value-type="float" office:value="13345" calcext:value-type="float">
            <text:p>13345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154456018518519" calcext:value-type="float">
            <text:p>0,00154456018518519000</text:p>
          </table:table-cell>
          <table:table-cell table:formula="of:=[.D787]-[.D78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17" office:value-type="float" office:value="13362" calcext:value-type="float">
            <text:p>13362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154652777777778" calcext:value-type="float">
            <text:p>0,00154652777777778000</text:p>
          </table:table-cell>
          <table:table-cell table:formula="of:=[.D788]-[.D78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17" office:value-type="float" office:value="13379" calcext:value-type="float">
            <text:p>13379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154849537037037" calcext:value-type="float">
            <text:p>0,00154849537037037000</text:p>
          </table:table-cell>
          <table:table-cell table:formula="of:=[.D789]-[.D78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17" office:value-type="float" office:value="13396" calcext:value-type="float">
            <text:p>13396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155046296296296" calcext:value-type="float">
            <text:p>0,00155046296296296000</text:p>
          </table:table-cell>
          <table:table-cell table:formula="of:=[.D790]-[.D78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17" office:value-type="float" office:value="13413" calcext:value-type="float">
            <text:p>13413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155243055555556" calcext:value-type="float">
            <text:p>0,00155243055555556000</text:p>
          </table:table-cell>
          <table:table-cell table:formula="of:=[.D791]-[.D79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17" office:value-type="float" office:value="13430" calcext:value-type="float">
            <text:p>1343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155439814814815" calcext:value-type="float">
            <text:p>0,00155439814814815000</text:p>
          </table:table-cell>
          <table:table-cell table:formula="of:=[.D792]-[.D79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17" office:value-type="float" office:value="13447" calcext:value-type="float">
            <text:p>13447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155636574074074" calcext:value-type="float">
            <text:p>0,00155636574074074000</text:p>
          </table:table-cell>
          <table:table-cell table:formula="of:=[.D793]-[.D79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17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155833333333333" calcext:value-type="float">
            <text:p>0,00155833333333333000</text:p>
          </table:table-cell>
          <table:table-cell table:formula="of:=[.D794]-[.D79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17" office:value-type="float" office:value="13481" calcext:value-type="float">
            <text:p>13481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156030092592593" calcext:value-type="float">
            <text:p>0,00156030092592593000</text:p>
          </table:table-cell>
          <table:table-cell table:formula="of:=[.D795]-[.D79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17" office:value-type="float" office:value="13498" calcext:value-type="float">
            <text:p>13498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156226851851852" calcext:value-type="float">
            <text:p>0,00156226851851852000</text:p>
          </table:table-cell>
          <table:table-cell table:formula="of:=[.D796]-[.D79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17" office:value-type="float" office:value="13515" calcext:value-type="float">
            <text:p>13515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156423611111111" calcext:value-type="float">
            <text:p>0,00156423611111111000</text:p>
          </table:table-cell>
          <table:table-cell table:formula="of:=[.D797]-[.D79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17" office:value-type="float" office:value="13532" calcext:value-type="float">
            <text:p>13532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15662037037037" calcext:value-type="float">
            <text:p>0,00156620370370370000</text:p>
          </table:table-cell>
          <table:table-cell table:formula="of:=[.D798]-[.D79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17" office:value-type="float" office:value="13549" calcext:value-type="float">
            <text:p>13549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15681712962963" calcext:value-type="float">
            <text:p>0,00156817129629630000</text:p>
          </table:table-cell>
          <table:table-cell table:formula="of:=[.D799]-[.D79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17" office:value-type="float" office:value="13566" calcext:value-type="float">
            <text:p>13566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157013888888889" calcext:value-type="float">
            <text:p>0,00157013888888889000</text:p>
          </table:table-cell>
          <table:table-cell table:formula="of:=[.D800]-[.D79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17" office:value-type="float" office:value="13583" calcext:value-type="float">
            <text:p>13583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157210648148148" calcext:value-type="float">
            <text:p>0,00157210648148148000</text:p>
          </table:table-cell>
          <table:table-cell table:formula="of:=[.D801]-[.D80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17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157407407407407" calcext:value-type="float">
            <text:p>0,00157407407407407000</text:p>
          </table:table-cell>
          <table:table-cell table:formula="of:=[.D802]-[.D80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17" office:value-type="float" office:value="13617" calcext:value-type="float">
            <text:p>13617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157604166666667" calcext:value-type="float">
            <text:p>0,00157604166666667000</text:p>
          </table:table-cell>
          <table:table-cell table:formula="of:=[.D803]-[.D80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17" office:value-type="float" office:value="13634" calcext:value-type="float">
            <text:p>13634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157800925925926" calcext:value-type="float">
            <text:p>0,00157800925925926000</text:p>
          </table:table-cell>
          <table:table-cell table:formula="of:=[.D804]-[.D80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17" office:value-type="float" office:value="13651" calcext:value-type="float">
            <text:p>13651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157997685185185" calcext:value-type="float">
            <text:p>0,00157997685185185000</text:p>
          </table:table-cell>
          <table:table-cell table:formula="of:=[.D805]-[.D80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17" office:value-type="float" office:value="13668" calcext:value-type="float">
            <text:p>13668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158194444444444" calcext:value-type="float">
            <text:p>0,00158194444444444000</text:p>
          </table:table-cell>
          <table:table-cell table:formula="of:=[.D806]-[.D80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17" office:value-type="float" office:value="13685" calcext:value-type="float">
            <text:p>13685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158391203703704" calcext:value-type="float">
            <text:p>0,00158391203703704000</text:p>
          </table:table-cell>
          <table:table-cell table:formula="of:=[.D807]-[.D80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17" office:value-type="float" office:value="13702" calcext:value-type="float">
            <text:p>13702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158587962962963" calcext:value-type="float">
            <text:p>0,00158587962962963000</text:p>
          </table:table-cell>
          <table:table-cell table:formula="of:=[.D808]-[.D80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17" office:value-type="float" office:value="13719" calcext:value-type="float">
            <text:p>13719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158784722222222" calcext:value-type="float">
            <text:p>0,00158784722222222000</text:p>
          </table:table-cell>
          <table:table-cell table:formula="of:=[.D809]-[.D80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17" office:value-type="float" office:value="13736" calcext:value-type="float">
            <text:p>13736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158981481481481" calcext:value-type="float">
            <text:p>0,00158981481481481000</text:p>
          </table:table-cell>
          <table:table-cell table:formula="of:=[.D810]-[.D80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17" office:value-type="float" office:value="13753" calcext:value-type="float">
            <text:p>13753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159178240740741" calcext:value-type="float">
            <text:p>0,00159178240740741000</text:p>
          </table:table-cell>
          <table:table-cell table:formula="of:=[.D811]-[.D81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17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159375" calcext:value-type="float">
            <text:p>0,00159375000000000000</text:p>
          </table:table-cell>
          <table:table-cell table:formula="of:=[.D812]-[.D81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17" office:value-type="float" office:value="13787" calcext:value-type="float">
            <text:p>13787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159571759259259" calcext:value-type="float">
            <text:p>0,00159571759259259000</text:p>
          </table:table-cell>
          <table:table-cell table:formula="of:=[.D813]-[.D81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17" office:value-type="float" office:value="13804" calcext:value-type="float">
            <text:p>13804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159768518518519" calcext:value-type="float">
            <text:p>0,00159768518518519000</text:p>
          </table:table-cell>
          <table:table-cell table:formula="of:=[.D814]-[.D81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17" office:value-type="float" office:value="13821" calcext:value-type="float">
            <text:p>13821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159965277777778" calcext:value-type="float">
            <text:p>0,00159965277777778000</text:p>
          </table:table-cell>
          <table:table-cell table:formula="of:=[.D815]-[.D81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17" office:value-type="float" office:value="13838" calcext:value-type="float">
            <text:p>13838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160162037037037" calcext:value-type="float">
            <text:p>0,00160162037037037000</text:p>
          </table:table-cell>
          <table:table-cell table:formula="of:=[.D816]-[.D81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17" office:value-type="float" office:value="13855" calcext:value-type="float">
            <text:p>13855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160358796296296" calcext:value-type="float">
            <text:p>0,00160358796296296000</text:p>
          </table:table-cell>
          <table:table-cell table:formula="of:=[.D817]-[.D81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17" office:value-type="float" office:value="13872" calcext:value-type="float">
            <text:p>13872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160555555555556" calcext:value-type="float">
            <text:p>0,00160555555555556000</text:p>
          </table:table-cell>
          <table:table-cell table:formula="of:=[.D818]-[.D81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17" office:value-type="float" office:value="13889" calcext:value-type="float">
            <text:p>13889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160752314814815" calcext:value-type="float">
            <text:p>0,00160752314814815000</text:p>
          </table:table-cell>
          <table:table-cell table:formula="of:=[.D819]-[.D81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17" office:value-type="float" office:value="13906" calcext:value-type="float">
            <text:p>13906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160949074074074" calcext:value-type="float">
            <text:p>0,00160949074074074000</text:p>
          </table:table-cell>
          <table:table-cell table:formula="of:=[.D820]-[.D81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17" office:value-type="float" office:value="13923" calcext:value-type="float">
            <text:p>13923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161145833333333" calcext:value-type="float">
            <text:p>0,00161145833333333000</text:p>
          </table:table-cell>
          <table:table-cell table:formula="of:=[.D821]-[.D82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17" office:value-type="float" office:value="13940" calcext:value-type="float">
            <text:p>1394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161342592592593" calcext:value-type="float">
            <text:p>0,00161342592592593000</text:p>
          </table:table-cell>
          <table:table-cell table:formula="of:=[.D822]-[.D82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17" office:value-type="float" office:value="13957" calcext:value-type="float">
            <text:p>13957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161539351851852" calcext:value-type="float">
            <text:p>0,00161539351851852000</text:p>
          </table:table-cell>
          <table:table-cell table:formula="of:=[.D823]-[.D82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17" office:value-type="float" office:value="13974" calcext:value-type="float">
            <text:p>13974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161736111111111" calcext:value-type="float">
            <text:p>0,00161736111111111000</text:p>
          </table:table-cell>
          <table:table-cell table:formula="of:=[.D824]-[.D82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17" office:value-type="float" office:value="13991" calcext:value-type="float">
            <text:p>13991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16193287037037" calcext:value-type="float">
            <text:p>0,00161932870370370000</text:p>
          </table:table-cell>
          <table:table-cell table:formula="of:=[.D825]-[.D82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17" office:value-type="float" office:value="14008" calcext:value-type="float">
            <text:p>14008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16212962962963" calcext:value-type="float">
            <text:p>0,00162129629629630000</text:p>
          </table:table-cell>
          <table:table-cell table:formula="of:=[.D826]-[.D82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17" office:value-type="float" office:value="14025" calcext:value-type="float">
            <text:p>14025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162326388888889" calcext:value-type="float">
            <text:p>0,00162326388888889000</text:p>
          </table:table-cell>
          <table:table-cell table:formula="of:=[.D827]-[.D82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17" office:value-type="float" office:value="14042" calcext:value-type="float">
            <text:p>14042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162523148148148" calcext:value-type="float">
            <text:p>0,00162523148148148000</text:p>
          </table:table-cell>
          <table:table-cell table:formula="of:=[.D828]-[.D82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17" office:value-type="float" office:value="14059" calcext:value-type="float">
            <text:p>14059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162719907407407" calcext:value-type="float">
            <text:p>0,00162719907407407000</text:p>
          </table:table-cell>
          <table:table-cell table:formula="of:=[.D829]-[.D82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17" office:value-type="float" office:value="14076" calcext:value-type="float">
            <text:p>14076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162916666666667" calcext:value-type="float">
            <text:p>0,00162916666666667000</text:p>
          </table:table-cell>
          <table:table-cell table:formula="of:=[.D830]-[.D82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17" office:value-type="float" office:value="14093" calcext:value-type="float">
            <text:p>14093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163113425925926" calcext:value-type="float">
            <text:p>0,00163113425925926000</text:p>
          </table:table-cell>
          <table:table-cell table:formula="of:=[.D831]-[.D83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17" office:value-type="float" office:value="14110" calcext:value-type="float">
            <text:p>1411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163310185185185" calcext:value-type="float">
            <text:p>0,00163310185185185000</text:p>
          </table:table-cell>
          <table:table-cell table:formula="of:=[.D832]-[.D83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17" office:value-type="float" office:value="14127" calcext:value-type="float">
            <text:p>14127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163506944444444" calcext:value-type="float">
            <text:p>0,00163506944444444000</text:p>
          </table:table-cell>
          <table:table-cell table:formula="of:=[.D833]-[.D83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17" office:value-type="float" office:value="14144" calcext:value-type="float">
            <text:p>14144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163703703703704" calcext:value-type="float">
            <text:p>0,00163703703703704000</text:p>
          </table:table-cell>
          <table:table-cell table:formula="of:=[.D834]-[.D83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17" office:value-type="float" office:value="14161" calcext:value-type="float">
            <text:p>14161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163900462962963" calcext:value-type="float">
            <text:p>0,00163900462962963000</text:p>
          </table:table-cell>
          <table:table-cell table:formula="of:=[.D835]-[.D83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17" office:value-type="float" office:value="14178" calcext:value-type="float">
            <text:p>14178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164097222222222" calcext:value-type="float">
            <text:p>0,00164097222222222000</text:p>
          </table:table-cell>
          <table:table-cell table:formula="of:=[.D836]-[.D83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17" office:value-type="float" office:value="14195" calcext:value-type="float">
            <text:p>14195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164293981481481" calcext:value-type="float">
            <text:p>0,00164293981481481000</text:p>
          </table:table-cell>
          <table:table-cell table:formula="of:=[.D837]-[.D83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17" office:value-type="float" office:value="14212" calcext:value-type="float">
            <text:p>14212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164490740740741" calcext:value-type="float">
            <text:p>0,00164490740740741000</text:p>
          </table:table-cell>
          <table:table-cell table:formula="of:=[.D838]-[.D83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17" office:value-type="float" office:value="14229" calcext:value-type="float">
            <text:p>14229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1646875" calcext:value-type="float">
            <text:p>0,00164687500000000000</text:p>
          </table:table-cell>
          <table:table-cell table:formula="of:=[.D839]-[.D83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17" office:value-type="float" office:value="14246" calcext:value-type="float">
            <text:p>14246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164884259259259" calcext:value-type="float">
            <text:p>0,00164884259259259000</text:p>
          </table:table-cell>
          <table:table-cell table:formula="of:=[.D840]-[.D83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17" office:value-type="float" office:value="14263" calcext:value-type="float">
            <text:p>14263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165081018518519" calcext:value-type="float">
            <text:p>0,00165081018518519000</text:p>
          </table:table-cell>
          <table:table-cell table:formula="of:=[.D841]-[.D84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17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165277777777778" calcext:value-type="float">
            <text:p>0,00165277777777778000</text:p>
          </table:table-cell>
          <table:table-cell table:formula="of:=[.D842]-[.D84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17" office:value-type="float" office:value="14297" calcext:value-type="float">
            <text:p>14297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165474537037037" calcext:value-type="float">
            <text:p>0,00165474537037037000</text:p>
          </table:table-cell>
          <table:table-cell table:formula="of:=[.D843]-[.D84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17" office:value-type="float" office:value="14314" calcext:value-type="float">
            <text:p>14314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165671296296296" calcext:value-type="float">
            <text:p>0,00165671296296296000</text:p>
          </table:table-cell>
          <table:table-cell table:formula="of:=[.D844]-[.D84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17" office:value-type="float" office:value="14331" calcext:value-type="float">
            <text:p>14331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165868055555556" calcext:value-type="float">
            <text:p>0,00165868055555556000</text:p>
          </table:table-cell>
          <table:table-cell table:formula="of:=[.D845]-[.D84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17" office:value-type="float" office:value="14348" calcext:value-type="float">
            <text:p>14348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166064814814815" calcext:value-type="float">
            <text:p>0,00166064814814815000</text:p>
          </table:table-cell>
          <table:table-cell table:formula="of:=[.D846]-[.D84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17" office:value-type="float" office:value="14365" calcext:value-type="float">
            <text:p>14365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166261574074074" calcext:value-type="float">
            <text:p>0,00166261574074074000</text:p>
          </table:table-cell>
          <table:table-cell table:formula="of:=[.D847]-[.D84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17" office:value-type="float" office:value="14382" calcext:value-type="float">
            <text:p>14382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166458333333333" calcext:value-type="float">
            <text:p>0,00166458333333333000</text:p>
          </table:table-cell>
          <table:table-cell table:formula="of:=[.D848]-[.D84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17" office:value-type="float" office:value="14399" calcext:value-type="float">
            <text:p>14399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166655092592593" calcext:value-type="float">
            <text:p>0,00166655092592593000</text:p>
          </table:table-cell>
          <table:table-cell table:formula="of:=[.D849]-[.D84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17" office:value-type="float" office:value="14416" calcext:value-type="float">
            <text:p>14416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166851851851852" calcext:value-type="float">
            <text:p>0,00166851851851852000</text:p>
          </table:table-cell>
          <table:table-cell table:formula="of:=[.D850]-[.D84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17" office:value-type="float" office:value="14433" calcext:value-type="float">
            <text:p>14433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167048611111111" calcext:value-type="float">
            <text:p>0,00167048611111111000</text:p>
          </table:table-cell>
          <table:table-cell table:formula="of:=[.D851]-[.D85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17" office:value-type="float" office:value="14450" calcext:value-type="float">
            <text:p>1445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16724537037037" calcext:value-type="float">
            <text:p>0,00167245370370370000</text:p>
          </table:table-cell>
          <table:table-cell table:formula="of:=[.D852]-[.D85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17" office:value-type="float" office:value="14467" calcext:value-type="float">
            <text:p>14467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16744212962963" calcext:value-type="float">
            <text:p>0,00167442129629630000</text:p>
          </table:table-cell>
          <table:table-cell table:formula="of:=[.D853]-[.D85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17" office:value-type="float" office:value="14484" calcext:value-type="float">
            <text:p>14484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167638888888889" calcext:value-type="float">
            <text:p>0,00167638888888889000</text:p>
          </table:table-cell>
          <table:table-cell table:formula="of:=[.D854]-[.D85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17" office:value-type="float" office:value="14501" calcext:value-type="float">
            <text:p>14501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167835648148148" calcext:value-type="float">
            <text:p>0,00167835648148148000</text:p>
          </table:table-cell>
          <table:table-cell table:formula="of:=[.D855]-[.D85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17" office:value-type="float" office:value="14518" calcext:value-type="float">
            <text:p>14518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168032407407407" calcext:value-type="float">
            <text:p>0,00168032407407407000</text:p>
          </table:table-cell>
          <table:table-cell table:formula="of:=[.D856]-[.D85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17" office:value-type="float" office:value="14535" calcext:value-type="float">
            <text:p>14535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168229166666667" calcext:value-type="float">
            <text:p>0,00168229166666667000</text:p>
          </table:table-cell>
          <table:table-cell table:formula="of:=[.D857]-[.D85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17" office:value-type="float" office:value="14552" calcext:value-type="float">
            <text:p>14552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168425925925926" calcext:value-type="float">
            <text:p>0,00168425925925926000</text:p>
          </table:table-cell>
          <table:table-cell table:formula="of:=[.D858]-[.D85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17" office:value-type="float" office:value="14569" calcext:value-type="float">
            <text:p>14569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168622685185185" calcext:value-type="float">
            <text:p>0,00168622685185185000</text:p>
          </table:table-cell>
          <table:table-cell table:formula="of:=[.D859]-[.D85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17" office:value-type="float" office:value="14586" calcext:value-type="float">
            <text:p>14586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168819444444444" calcext:value-type="float">
            <text:p>0,00168819444444444000</text:p>
          </table:table-cell>
          <table:table-cell table:formula="of:=[.D860]-[.D85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17" office:value-type="float" office:value="14603" calcext:value-type="float">
            <text:p>14603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169016203703704" calcext:value-type="float">
            <text:p>0,00169016203703704000</text:p>
          </table:table-cell>
          <table:table-cell table:formula="of:=[.D861]-[.D86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17" office:value-type="float" office:value="14620" calcext:value-type="float">
            <text:p>1462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169212962962963" calcext:value-type="float">
            <text:p>0,00169212962962963000</text:p>
          </table:table-cell>
          <table:table-cell table:formula="of:=[.D862]-[.D86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17" office:value-type="float" office:value="14637" calcext:value-type="float">
            <text:p>14637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169409722222222" calcext:value-type="float">
            <text:p>0,00169409722222222000</text:p>
          </table:table-cell>
          <table:table-cell table:formula="of:=[.D863]-[.D86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17" office:value-type="float" office:value="14654" calcext:value-type="float">
            <text:p>14654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169606481481481" calcext:value-type="float">
            <text:p>0,00169606481481481000</text:p>
          </table:table-cell>
          <table:table-cell table:formula="of:=[.D864]-[.D86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17" office:value-type="float" office:value="14671" calcext:value-type="float">
            <text:p>14671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169803240740741" calcext:value-type="float">
            <text:p>0,00169803240740741000</text:p>
          </table:table-cell>
          <table:table-cell table:formula="of:=[.D865]-[.D86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17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17" calcext:value-type="float">
            <text:p>0,00170000000000000000</text:p>
          </table:table-cell>
          <table:table-cell table:formula="of:=[.D866]-[.D86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17" office:value-type="float" office:value="14705" calcext:value-type="float">
            <text:p>14705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170196759259259" calcext:value-type="float">
            <text:p>0,00170196759259259000</text:p>
          </table:table-cell>
          <table:table-cell table:formula="of:=[.D867]-[.D86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17" office:value-type="float" office:value="14722" calcext:value-type="float">
            <text:p>14722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170393518518519" calcext:value-type="float">
            <text:p>0,00170393518518519000</text:p>
          </table:table-cell>
          <table:table-cell table:formula="of:=[.D868]-[.D86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17" office:value-type="float" office:value="14739" calcext:value-type="float">
            <text:p>14739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170590277777778" calcext:value-type="float">
            <text:p>0,00170590277777778000</text:p>
          </table:table-cell>
          <table:table-cell table:formula="of:=[.D869]-[.D86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17" office:value-type="float" office:value="14756" calcext:value-type="float">
            <text:p>14756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170787037037037" calcext:value-type="float">
            <text:p>0,00170787037037037000</text:p>
          </table:table-cell>
          <table:table-cell table:formula="of:=[.D870]-[.D86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17" office:value-type="float" office:value="14773" calcext:value-type="float">
            <text:p>14773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170983796296296" calcext:value-type="float">
            <text:p>0,00170983796296296000</text:p>
          </table:table-cell>
          <table:table-cell table:formula="of:=[.D871]-[.D87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17" office:value-type="float" office:value="14790" calcext:value-type="float">
            <text:p>1479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171180555555556" calcext:value-type="float">
            <text:p>0,00171180555555556000</text:p>
          </table:table-cell>
          <table:table-cell table:formula="of:=[.D872]-[.D87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17" office:value-type="float" office:value="14807" calcext:value-type="float">
            <text:p>14807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171377314814815" calcext:value-type="float">
            <text:p>0,00171377314814815000</text:p>
          </table:table-cell>
          <table:table-cell table:formula="of:=[.D873]-[.D87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17" office:value-type="float" office:value="14824" calcext:value-type="float">
            <text:p>14824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171574074074074" calcext:value-type="float">
            <text:p>0,00171574074074074000</text:p>
          </table:table-cell>
          <table:table-cell table:formula="of:=[.D874]-[.D87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17" office:value-type="float" office:value="14841" calcext:value-type="float">
            <text:p>14841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171770833333333" calcext:value-type="float">
            <text:p>0,00171770833333333000</text:p>
          </table:table-cell>
          <table:table-cell table:formula="of:=[.D875]-[.D87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17" office:value-type="float" office:value="14858" calcext:value-type="float">
            <text:p>14858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171967592592593" calcext:value-type="float">
            <text:p>0,00171967592592593000</text:p>
          </table:table-cell>
          <table:table-cell table:formula="of:=[.D876]-[.D87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17" office:value-type="float" office:value="14875" calcext:value-type="float">
            <text:p>14875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172164351851852" calcext:value-type="float">
            <text:p>0,00172164351851852000</text:p>
          </table:table-cell>
          <table:table-cell table:formula="of:=[.D877]-[.D87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17" office:value-type="float" office:value="14892" calcext:value-type="float">
            <text:p>14892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172361111111111" calcext:value-type="float">
            <text:p>0,00172361111111111000</text:p>
          </table:table-cell>
          <table:table-cell table:formula="of:=[.D878]-[.D87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17" office:value-type="float" office:value="14909" calcext:value-type="float">
            <text:p>14909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17255787037037" calcext:value-type="float">
            <text:p>0,00172557870370370000</text:p>
          </table:table-cell>
          <table:table-cell table:formula="of:=[.D879]-[.D87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17" office:value-type="float" office:value="14926" calcext:value-type="float">
            <text:p>14926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17275462962963" calcext:value-type="float">
            <text:p>0,00172754629629630000</text:p>
          </table:table-cell>
          <table:table-cell table:formula="of:=[.D880]-[.D87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17" office:value-type="float" office:value="14943" calcext:value-type="float">
            <text:p>14943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172951388888889" calcext:value-type="float">
            <text:p>0,00172951388888889000</text:p>
          </table:table-cell>
          <table:table-cell table:formula="of:=[.D881]-[.D88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17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173148148148148" calcext:value-type="float">
            <text:p>0,00173148148148148000</text:p>
          </table:table-cell>
          <table:table-cell table:formula="of:=[.D882]-[.D88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17" office:value-type="float" office:value="14977" calcext:value-type="float">
            <text:p>14977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173344907407407" calcext:value-type="float">
            <text:p>0,00173344907407407000</text:p>
          </table:table-cell>
          <table:table-cell table:formula="of:=[.D883]-[.D88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17" office:value-type="float" office:value="14994" calcext:value-type="float">
            <text:p>14994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173541666666667" calcext:value-type="float">
            <text:p>0,00173541666666667000</text:p>
          </table:table-cell>
          <table:table-cell table:formula="of:=[.D884]-[.D88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17" office:value-type="float" office:value="15011" calcext:value-type="float">
            <text:p>15011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173738425925926" calcext:value-type="float">
            <text:p>0,00173738425925926000</text:p>
          </table:table-cell>
          <table:table-cell table:formula="of:=[.D885]-[.D88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17" office:value-type="float" office:value="15028" calcext:value-type="float">
            <text:p>15028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173935185185185" calcext:value-type="float">
            <text:p>0,00173935185185185000</text:p>
          </table:table-cell>
          <table:table-cell table:formula="of:=[.D886]-[.D88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17" office:value-type="float" office:value="15045" calcext:value-type="float">
            <text:p>15045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174131944444444" calcext:value-type="float">
            <text:p>0,00174131944444444000</text:p>
          </table:table-cell>
          <table:table-cell table:formula="of:=[.D887]-[.D88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17" office:value-type="float" office:value="15062" calcext:value-type="float">
            <text:p>15062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174328703703704" calcext:value-type="float">
            <text:p>0,00174328703703704000</text:p>
          </table:table-cell>
          <table:table-cell table:formula="of:=[.D888]-[.D88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17" office:value-type="float" office:value="15079" calcext:value-type="float">
            <text:p>15079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174525462962963" calcext:value-type="float">
            <text:p>0,00174525462962963000</text:p>
          </table:table-cell>
          <table:table-cell table:formula="of:=[.D889]-[.D88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17" office:value-type="float" office:value="15096" calcext:value-type="float">
            <text:p>15096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174722222222222" calcext:value-type="float">
            <text:p>0,00174722222222222000</text:p>
          </table:table-cell>
          <table:table-cell table:formula="of:=[.D890]-[.D88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17" office:value-type="float" office:value="15113" calcext:value-type="float">
            <text:p>15113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174918981481481" calcext:value-type="float">
            <text:p>0,00174918981481481000</text:p>
          </table:table-cell>
          <table:table-cell table:formula="of:=[.D891]-[.D89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17" office:value-type="float" office:value="15130" calcext:value-type="float">
            <text:p>1513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175115740740741" calcext:value-type="float">
            <text:p>0,00175115740740741000</text:p>
          </table:table-cell>
          <table:table-cell table:formula="of:=[.D892]-[.D89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17" office:value-type="float" office:value="15147" calcext:value-type="float">
            <text:p>15147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1753125" calcext:value-type="float">
            <text:p>0,00175312500000000000</text:p>
          </table:table-cell>
          <table:table-cell table:formula="of:=[.D893]-[.D89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17" office:value-type="float" office:value="15164" calcext:value-type="float">
            <text:p>15164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175509259259259" calcext:value-type="float">
            <text:p>0,00175509259259259000</text:p>
          </table:table-cell>
          <table:table-cell table:formula="of:=[.D894]-[.D89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17" office:value-type="float" office:value="15181" calcext:value-type="float">
            <text:p>15181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175706018518519" calcext:value-type="float">
            <text:p>0,00175706018518519000</text:p>
          </table:table-cell>
          <table:table-cell table:formula="of:=[.D895]-[.D89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17" office:value-type="float" office:value="15198" calcext:value-type="float">
            <text:p>15198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175902777777778" calcext:value-type="float">
            <text:p>0,00175902777777778000</text:p>
          </table:table-cell>
          <table:table-cell table:formula="of:=[.D896]-[.D89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17" office:value-type="float" office:value="15215" calcext:value-type="float">
            <text:p>15215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176099537037037" calcext:value-type="float">
            <text:p>0,00176099537037037000</text:p>
          </table:table-cell>
          <table:table-cell table:formula="of:=[.D897]-[.D89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17" office:value-type="float" office:value="15232" calcext:value-type="float">
            <text:p>15232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176296296296296" calcext:value-type="float">
            <text:p>0,00176296296296296000</text:p>
          </table:table-cell>
          <table:table-cell table:formula="of:=[.D898]-[.D89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17" office:value-type="float" office:value="15249" calcext:value-type="float">
            <text:p>15249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176493055555556" calcext:value-type="float">
            <text:p>0,00176493055555556000</text:p>
          </table:table-cell>
          <table:table-cell table:formula="of:=[.D899]-[.D89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17" office:value-type="float" office:value="15266" calcext:value-type="float">
            <text:p>15266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176689814814815" calcext:value-type="float">
            <text:p>0,00176689814814815000</text:p>
          </table:table-cell>
          <table:table-cell table:formula="of:=[.D900]-[.D89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17" office:value-type="float" office:value="15283" calcext:value-type="float">
            <text:p>15283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176886574074074" calcext:value-type="float">
            <text:p>0,00176886574074074000</text:p>
          </table:table-cell>
          <table:table-cell table:formula="of:=[.D901]-[.D90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17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177083333333333" calcext:value-type="float">
            <text:p>0,00177083333333333000</text:p>
          </table:table-cell>
          <table:table-cell table:formula="of:=[.D902]-[.D90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17" office:value-type="float" office:value="15317" calcext:value-type="float">
            <text:p>15317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177280092592593" calcext:value-type="float">
            <text:p>0,00177280092592593000</text:p>
          </table:table-cell>
          <table:table-cell table:formula="of:=[.D903]-[.D90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17" office:value-type="float" office:value="15334" calcext:value-type="float">
            <text:p>15334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177476851851852" calcext:value-type="float">
            <text:p>0,00177476851851852000</text:p>
          </table:table-cell>
          <table:table-cell table:formula="of:=[.D904]-[.D90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17" office:value-type="float" office:value="15351" calcext:value-type="float">
            <text:p>15351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177673611111111" calcext:value-type="float">
            <text:p>0,00177673611111111000</text:p>
          </table:table-cell>
          <table:table-cell table:formula="of:=[.D905]-[.D90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17" office:value-type="float" office:value="15368" calcext:value-type="float">
            <text:p>15368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17787037037037" calcext:value-type="float">
            <text:p>0,00177870370370370000</text:p>
          </table:table-cell>
          <table:table-cell table:formula="of:=[.D906]-[.D90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17" office:value-type="float" office:value="15385" calcext:value-type="float">
            <text:p>15385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17806712962963" calcext:value-type="float">
            <text:p>0,00178067129629630000</text:p>
          </table:table-cell>
          <table:table-cell table:formula="of:=[.D907]-[.D90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17" office:value-type="float" office:value="15402" calcext:value-type="float">
            <text:p>15402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178263888888889" calcext:value-type="float">
            <text:p>0,00178263888888889000</text:p>
          </table:table-cell>
          <table:table-cell table:formula="of:=[.D908]-[.D90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17" office:value-type="float" office:value="15419" calcext:value-type="float">
            <text:p>15419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178460648148148" calcext:value-type="float">
            <text:p>0,00178460648148148000</text:p>
          </table:table-cell>
          <table:table-cell table:formula="of:=[.D909]-[.D90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17" office:value-type="float" office:value="15436" calcext:value-type="float">
            <text:p>15436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178657407407407" calcext:value-type="float">
            <text:p>0,00178657407407407000</text:p>
          </table:table-cell>
          <table:table-cell table:formula="of:=[.D910]-[.D90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17" office:value-type="float" office:value="15453" calcext:value-type="float">
            <text:p>15453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178854166666667" calcext:value-type="float">
            <text:p>0,00178854166666667000</text:p>
          </table:table-cell>
          <table:table-cell table:formula="of:=[.D911]-[.D91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17" office:value-type="float" office:value="15470" calcext:value-type="float">
            <text:p>1547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179050925925926" calcext:value-type="float">
            <text:p>0,00179050925925926000</text:p>
          </table:table-cell>
          <table:table-cell table:formula="of:=[.D912]-[.D91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17" office:value-type="float" office:value="15487" calcext:value-type="float">
            <text:p>15487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179247685185185" calcext:value-type="float">
            <text:p>0,00179247685185185000</text:p>
          </table:table-cell>
          <table:table-cell table:formula="of:=[.D913]-[.D91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17" office:value-type="float" office:value="15504" calcext:value-type="float">
            <text:p>15504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179444444444444" calcext:value-type="float">
            <text:p>0,00179444444444444000</text:p>
          </table:table-cell>
          <table:table-cell table:formula="of:=[.D914]-[.D91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17" office:value-type="float" office:value="15521" calcext:value-type="float">
            <text:p>15521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179641203703704" calcext:value-type="float">
            <text:p>0,00179641203703704000</text:p>
          </table:table-cell>
          <table:table-cell table:formula="of:=[.D915]-[.D91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17" office:value-type="float" office:value="15538" calcext:value-type="float">
            <text:p>15538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179837962962963" calcext:value-type="float">
            <text:p>0,00179837962962963000</text:p>
          </table:table-cell>
          <table:table-cell table:formula="of:=[.D916]-[.D91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17" office:value-type="float" office:value="15555" calcext:value-type="float">
            <text:p>15555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180034722222222" calcext:value-type="float">
            <text:p>0,00180034722222222000</text:p>
          </table:table-cell>
          <table:table-cell table:formula="of:=[.D917]-[.D91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17" office:value-type="float" office:value="15572" calcext:value-type="float">
            <text:p>15572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180231481481481" calcext:value-type="float">
            <text:p>0,00180231481481481000</text:p>
          </table:table-cell>
          <table:table-cell table:formula="of:=[.D918]-[.D91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17" office:value-type="float" office:value="15589" calcext:value-type="float">
            <text:p>15589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180428240740741" calcext:value-type="float">
            <text:p>0,00180428240740741000</text:p>
          </table:table-cell>
          <table:table-cell table:formula="of:=[.D919]-[.D91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17" office:value-type="float" office:value="15606" calcext:value-type="float">
            <text:p>15606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180625" calcext:value-type="float">
            <text:p>0,00180625000000000000</text:p>
          </table:table-cell>
          <table:table-cell table:formula="of:=[.D920]-[.D91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17" office:value-type="float" office:value="15623" calcext:value-type="float">
            <text:p>15623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180821759259259" calcext:value-type="float">
            <text:p>0,00180821759259259000</text:p>
          </table:table-cell>
          <table:table-cell table:formula="of:=[.D921]-[.D92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17" office:value-type="float" office:value="15640" calcext:value-type="float">
            <text:p>1564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181018518518519" calcext:value-type="float">
            <text:p>0,00181018518518519000</text:p>
          </table:table-cell>
          <table:table-cell table:formula="of:=[.D922]-[.D92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17" office:value-type="float" office:value="15657" calcext:value-type="float">
            <text:p>15657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181215277777778" calcext:value-type="float">
            <text:p>0,00181215277777778000</text:p>
          </table:table-cell>
          <table:table-cell table:formula="of:=[.D923]-[.D92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17" office:value-type="float" office:value="15674" calcext:value-type="float">
            <text:p>15674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181412037037037" calcext:value-type="float">
            <text:p>0,00181412037037037000</text:p>
          </table:table-cell>
          <table:table-cell table:formula="of:=[.D924]-[.D92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17" office:value-type="float" office:value="15691" calcext:value-type="float">
            <text:p>15691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181608796296296" calcext:value-type="float">
            <text:p>0,00181608796296296000</text:p>
          </table:table-cell>
          <table:table-cell table:formula="of:=[.D925]-[.D92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17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181805555555556" calcext:value-type="float">
            <text:p>0,00181805555555556000</text:p>
          </table:table-cell>
          <table:table-cell table:formula="of:=[.D926]-[.D92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17" office:value-type="float" office:value="15725" calcext:value-type="float">
            <text:p>15725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182002314814815" calcext:value-type="float">
            <text:p>0,00182002314814815000</text:p>
          </table:table-cell>
          <table:table-cell table:formula="of:=[.D927]-[.D92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17" office:value-type="float" office:value="15742" calcext:value-type="float">
            <text:p>15742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182199074074074" calcext:value-type="float">
            <text:p>0,00182199074074074000</text:p>
          </table:table-cell>
          <table:table-cell table:formula="of:=[.D928]-[.D92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17" office:value-type="float" office:value="15759" calcext:value-type="float">
            <text:p>15759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182395833333333" calcext:value-type="float">
            <text:p>0,00182395833333333000</text:p>
          </table:table-cell>
          <table:table-cell table:formula="of:=[.D929]-[.D92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17" office:value-type="float" office:value="15776" calcext:value-type="float">
            <text:p>15776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182592592592593" calcext:value-type="float">
            <text:p>0,00182592592592593000</text:p>
          </table:table-cell>
          <table:table-cell table:formula="of:=[.D930]-[.D92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17" office:value-type="float" office:value="15793" calcext:value-type="float">
            <text:p>15793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182789351851852" calcext:value-type="float">
            <text:p>0,00182789351851852000</text:p>
          </table:table-cell>
          <table:table-cell table:formula="of:=[.D931]-[.D93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17" office:value-type="float" office:value="15810" calcext:value-type="float">
            <text:p>1581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182986111111111" calcext:value-type="float">
            <text:p>0,00182986111111111000</text:p>
          </table:table-cell>
          <table:table-cell table:formula="of:=[.D932]-[.D93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17" office:value-type="float" office:value="15827" calcext:value-type="float">
            <text:p>15827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18318287037037" calcext:value-type="float">
            <text:p>0,00183182870370370000</text:p>
          </table:table-cell>
          <table:table-cell table:formula="of:=[.D933]-[.D93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17" office:value-type="float" office:value="15844" calcext:value-type="float">
            <text:p>15844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18337962962963" calcext:value-type="float">
            <text:p>0,00183379629629630000</text:p>
          </table:table-cell>
          <table:table-cell table:formula="of:=[.D934]-[.D93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17" office:value-type="float" office:value="15861" calcext:value-type="float">
            <text:p>15861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183576388888889" calcext:value-type="float">
            <text:p>0,00183576388888889000</text:p>
          </table:table-cell>
          <table:table-cell table:formula="of:=[.D935]-[.D93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17" office:value-type="float" office:value="15878" calcext:value-type="float">
            <text:p>15878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183773148148148" calcext:value-type="float">
            <text:p>0,00183773148148148000</text:p>
          </table:table-cell>
          <table:table-cell table:formula="of:=[.D936]-[.D93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17" office:value-type="float" office:value="15895" calcext:value-type="float">
            <text:p>15895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183969907407407" calcext:value-type="float">
            <text:p>0,00183969907407407000</text:p>
          </table:table-cell>
          <table:table-cell table:formula="of:=[.D937]-[.D93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17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184166666666667" calcext:value-type="float">
            <text:p>0,00184166666666667000</text:p>
          </table:table-cell>
          <table:table-cell table:formula="of:=[.D938]-[.D93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17" office:value-type="float" office:value="15929" calcext:value-type="float">
            <text:p>15929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184363425925926" calcext:value-type="float">
            <text:p>0,00184363425925926000</text:p>
          </table:table-cell>
          <table:table-cell table:formula="of:=[.D939]-[.D93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17" office:value-type="float" office:value="15946" calcext:value-type="float">
            <text:p>15946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184560185185185" calcext:value-type="float">
            <text:p>0,00184560185185185000</text:p>
          </table:table-cell>
          <table:table-cell table:formula="of:=[.D940]-[.D93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17" office:value-type="float" office:value="15963" calcext:value-type="float">
            <text:p>15963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184756944444444" calcext:value-type="float">
            <text:p>0,00184756944444444000</text:p>
          </table:table-cell>
          <table:table-cell table:formula="of:=[.D941]-[.D94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17" office:value-type="float" office:value="15980" calcext:value-type="float">
            <text:p>1598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184953703703704" calcext:value-type="float">
            <text:p>0,00184953703703704000</text:p>
          </table:table-cell>
          <table:table-cell table:formula="of:=[.D942]-[.D94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17" office:value-type="float" office:value="15997" calcext:value-type="float">
            <text:p>15997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185150462962963" calcext:value-type="float">
            <text:p>0,00185150462962963000</text:p>
          </table:table-cell>
          <table:table-cell table:formula="of:=[.D943]-[.D94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17" office:value-type="float" office:value="16014" calcext:value-type="float">
            <text:p>16014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185347222222222" calcext:value-type="float">
            <text:p>0,00185347222222222000</text:p>
          </table:table-cell>
          <table:table-cell table:formula="of:=[.D944]-[.D94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17" office:value-type="float" office:value="16031" calcext:value-type="float">
            <text:p>16031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185543981481481" calcext:value-type="float">
            <text:p>0,00185543981481481000</text:p>
          </table:table-cell>
          <table:table-cell table:formula="of:=[.D945]-[.D94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17" office:value-type="float" office:value="16048" calcext:value-type="float">
            <text:p>16048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185740740740741" calcext:value-type="float">
            <text:p>0,00185740740740741000</text:p>
          </table:table-cell>
          <table:table-cell table:formula="of:=[.D946]-[.D94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17" office:value-type="float" office:value="16065" calcext:value-type="float">
            <text:p>16065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1859375" calcext:value-type="float">
            <text:p>0,00185937500000000000</text:p>
          </table:table-cell>
          <table:table-cell table:formula="of:=[.D947]-[.D94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17" office:value-type="float" office:value="16082" calcext:value-type="float">
            <text:p>16082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186134259259259" calcext:value-type="float">
            <text:p>0,00186134259259259000</text:p>
          </table:table-cell>
          <table:table-cell table:formula="of:=[.D948]-[.D94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17" office:value-type="float" office:value="16099" calcext:value-type="float">
            <text:p>16099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186331018518519" calcext:value-type="float">
            <text:p>0,00186331018518518000</text:p>
          </table:table-cell>
          <table:table-cell table:formula="of:=[.D949]-[.D94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17" office:value-type="float" office:value="16116" calcext:value-type="float">
            <text:p>16116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186527777777778" calcext:value-type="float">
            <text:p>0,00186527777777778000</text:p>
          </table:table-cell>
          <table:table-cell table:formula="of:=[.D950]-[.D94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17" office:value-type="float" office:value="16133" calcext:value-type="float">
            <text:p>16133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186724537037037" calcext:value-type="float">
            <text:p>0,00186724537037037000</text:p>
          </table:table-cell>
          <table:table-cell table:formula="of:=[.D951]-[.D95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17" office:value-type="float" office:value="16150" calcext:value-type="float">
            <text:p>1615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186921296296296" calcext:value-type="float">
            <text:p>0,00186921296296296000</text:p>
          </table:table-cell>
          <table:table-cell table:formula="of:=[.D952]-[.D95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17" office:value-type="float" office:value="16167" calcext:value-type="float">
            <text:p>16167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187118055555556" calcext:value-type="float">
            <text:p>0,00187118055555556000</text:p>
          </table:table-cell>
          <table:table-cell table:formula="of:=[.D953]-[.D95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17" office:value-type="float" office:value="16184" calcext:value-type="float">
            <text:p>16184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187314814814815" calcext:value-type="float">
            <text:p>0,00187314814814815000</text:p>
          </table:table-cell>
          <table:table-cell table:formula="of:=[.D954]-[.D95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17" office:value-type="float" office:value="16201" calcext:value-type="float">
            <text:p>16201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187511574074074" calcext:value-type="float">
            <text:p>0,00187511574074074000</text:p>
          </table:table-cell>
          <table:table-cell table:formula="of:=[.D955]-[.D95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17" office:value-type="float" office:value="16218" calcext:value-type="float">
            <text:p>16218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187708333333333" calcext:value-type="float">
            <text:p>0,00187708333333333000</text:p>
          </table:table-cell>
          <table:table-cell table:formula="of:=[.D956]-[.D95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17" office:value-type="float" office:value="16235" calcext:value-type="float">
            <text:p>16235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187905092592593" calcext:value-type="float">
            <text:p>0,00187905092592593000</text:p>
          </table:table-cell>
          <table:table-cell table:formula="of:=[.D957]-[.D95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17" office:value-type="float" office:value="16252" calcext:value-type="float">
            <text:p>16252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188101851851852" calcext:value-type="float">
            <text:p>0,00188101851851852000</text:p>
          </table:table-cell>
          <table:table-cell table:formula="of:=[.D958]-[.D95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17" office:value-type="float" office:value="16269" calcext:value-type="float">
            <text:p>16269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188298611111111" calcext:value-type="float">
            <text:p>0,00188298611111111000</text:p>
          </table:table-cell>
          <table:table-cell table:formula="of:=[.D959]-[.D95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17" office:value-type="float" office:value="16286" calcext:value-type="float">
            <text:p>16286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18849537037037" calcext:value-type="float">
            <text:p>0,00188495370370370000</text:p>
          </table:table-cell>
          <table:table-cell table:formula="of:=[.D960]-[.D95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17" office:value-type="float" office:value="16303" calcext:value-type="float">
            <text:p>16303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18869212962963" calcext:value-type="float">
            <text:p>0,00188692129629630000</text:p>
          </table:table-cell>
          <table:table-cell table:formula="of:=[.D961]-[.D96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17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188888888888889" calcext:value-type="float">
            <text:p>0,00188888888888889000</text:p>
          </table:table-cell>
          <table:table-cell table:formula="of:=[.D962]-[.D96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17" office:value-type="float" office:value="16337" calcext:value-type="float">
            <text:p>16337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189085648148148" calcext:value-type="float">
            <text:p>0,00189085648148148000</text:p>
          </table:table-cell>
          <table:table-cell table:formula="of:=[.D963]-[.D96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17" office:value-type="float" office:value="16354" calcext:value-type="float">
            <text:p>16354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189282407407407" calcext:value-type="float">
            <text:p>0,00189282407407407000</text:p>
          </table:table-cell>
          <table:table-cell table:formula="of:=[.D964]-[.D96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17" office:value-type="float" office:value="16371" calcext:value-type="float">
            <text:p>16371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189479166666667" calcext:value-type="float">
            <text:p>0,00189479166666667000</text:p>
          </table:table-cell>
          <table:table-cell table:formula="of:=[.D965]-[.D96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17" office:value-type="float" office:value="16388" calcext:value-type="float">
            <text:p>16388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189675925925926" calcext:value-type="float">
            <text:p>0,00189675925925926000</text:p>
          </table:table-cell>
          <table:table-cell table:formula="of:=[.D966]-[.D96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17" office:value-type="float" office:value="16405" calcext:value-type="float">
            <text:p>16405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189872685185185" calcext:value-type="float">
            <text:p>0,00189872685185185000</text:p>
          </table:table-cell>
          <table:table-cell table:formula="of:=[.D967]-[.D96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17" office:value-type="float" office:value="16422" calcext:value-type="float">
            <text:p>16422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190069444444444" calcext:value-type="float">
            <text:p>0,00190069444444444000</text:p>
          </table:table-cell>
          <table:table-cell table:formula="of:=[.D968]-[.D96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17" office:value-type="float" office:value="16439" calcext:value-type="float">
            <text:p>16439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190266203703704" calcext:value-type="float">
            <text:p>0,00190266203703704000</text:p>
          </table:table-cell>
          <table:table-cell table:formula="of:=[.D969]-[.D96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17" office:value-type="float" office:value="16456" calcext:value-type="float">
            <text:p>16456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190462962962963" calcext:value-type="float">
            <text:p>0,00190462962962963000</text:p>
          </table:table-cell>
          <table:table-cell table:formula="of:=[.D970]-[.D96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17" office:value-type="float" office:value="16473" calcext:value-type="float">
            <text:p>16473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190659722222222" calcext:value-type="float">
            <text:p>0,00190659722222222000</text:p>
          </table:table-cell>
          <table:table-cell table:formula="of:=[.D971]-[.D97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17" office:value-type="float" office:value="16490" calcext:value-type="float">
            <text:p>1649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190856481481481" calcext:value-type="float">
            <text:p>0,00190856481481481000</text:p>
          </table:table-cell>
          <table:table-cell table:formula="of:=[.D972]-[.D97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17" office:value-type="float" office:value="16507" calcext:value-type="float">
            <text:p>16507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191053240740741" calcext:value-type="float">
            <text:p>0,00191053240740741000</text:p>
          </table:table-cell>
          <table:table-cell table:formula="of:=[.D973]-[.D97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17" office:value-type="float" office:value="16524" calcext:value-type="float">
            <text:p>16524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19125" calcext:value-type="float">
            <text:p>0,00191250000000000000</text:p>
          </table:table-cell>
          <table:table-cell table:formula="of:=[.D974]-[.D973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17" office:value-type="float" office:value="16541" calcext:value-type="float">
            <text:p>16541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191446759259259" calcext:value-type="float">
            <text:p>0,00191446759259259000</text:p>
          </table:table-cell>
          <table:table-cell table:formula="of:=[.D975]-[.D97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17" office:value-type="float" office:value="16558" calcext:value-type="float">
            <text:p>16558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191643518518519" calcext:value-type="float">
            <text:p>0,00191643518518518000</text:p>
          </table:table-cell>
          <table:table-cell table:formula="of:=[.D976]-[.D97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17" office:value-type="float" office:value="16575" calcext:value-type="float">
            <text:p>16575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191840277777778" calcext:value-type="float">
            <text:p>0,00191840277777778000</text:p>
          </table:table-cell>
          <table:table-cell table:formula="of:=[.D977]-[.D976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17" office:value-type="float" office:value="16592" calcext:value-type="float">
            <text:p>16592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192037037037037" calcext:value-type="float">
            <text:p>0,00192037037037037000</text:p>
          </table:table-cell>
          <table:table-cell table:formula="of:=[.D978]-[.D97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17" office:value-type="float" office:value="16609" calcext:value-type="float">
            <text:p>16609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192233796296296" calcext:value-type="float">
            <text:p>0,00192233796296296000</text:p>
          </table:table-cell>
          <table:table-cell table:formula="of:=[.D979]-[.D978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17" office:value-type="float" office:value="16626" calcext:value-type="float">
            <text:p>16626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192430555555556" calcext:value-type="float">
            <text:p>0,00192430555555556000</text:p>
          </table:table-cell>
          <table:table-cell table:formula="of:=[.D980]-[.D97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17" office:value-type="float" office:value="16643" calcext:value-type="float">
            <text:p>16643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192627314814815" calcext:value-type="float">
            <text:p>0,00192627314814815000</text:p>
          </table:table-cell>
          <table:table-cell table:formula="of:=[.D981]-[.D980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17" office:value-type="float" office:value="16660" calcext:value-type="float">
            <text:p>1666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192824074074074" calcext:value-type="float">
            <text:p>0,00192824074074074000</text:p>
          </table:table-cell>
          <table:table-cell table:formula="of:=[.D982]-[.D98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17" office:value-type="float" office:value="16677" calcext:value-type="float">
            <text:p>16677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193020833333333" calcext:value-type="float">
            <text:p>0,00193020833333333000</text:p>
          </table:table-cell>
          <table:table-cell table:formula="of:=[.D983]-[.D982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17" office:value-type="float" office:value="16694" calcext:value-type="float">
            <text:p>16694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193217592592593" calcext:value-type="float">
            <text:p>0,00193217592592593000</text:p>
          </table:table-cell>
          <table:table-cell table:formula="of:=[.D984]-[.D98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17" office:value-type="float" office:value="16711" calcext:value-type="float">
            <text:p>16711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193414351851852" calcext:value-type="float">
            <text:p>0,00193414351851852000</text:p>
          </table:table-cell>
          <table:table-cell table:formula="of:=[.D985]-[.D984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17" office:value-type="float" office:value="16728" calcext:value-type="float">
            <text:p>16728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193611111111111" calcext:value-type="float">
            <text:p>0,00193611111111111000</text:p>
          </table:table-cell>
          <table:table-cell table:formula="of:=[.D986]-[.D985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17" office:value-type="float" office:value="16745" calcext:value-type="float">
            <text:p>16745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19380787037037" calcext:value-type="float">
            <text:p>0,00193807870370370000</text:p>
          </table:table-cell>
          <table:table-cell table:formula="of:=[.D987]-[.D98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17" office:value-type="float" office:value="16762" calcext:value-type="float">
            <text:p>16762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19400462962963" calcext:value-type="float">
            <text:p>0,00194004629629630000</text:p>
          </table:table-cell>
          <table:table-cell table:formula="of:=[.D988]-[.D987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17" office:value-type="float" office:value="16779" calcext:value-type="float">
            <text:p>16779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194201388888889" calcext:value-type="float">
            <text:p>0,00194201388888889000</text:p>
          </table:table-cell>
          <table:table-cell table:formula="of:=[.D989]-[.D98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17" office:value-type="float" office:value="16796" calcext:value-type="float">
            <text:p>16796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194398148148148" calcext:value-type="float">
            <text:p>0,00194398148148148000</text:p>
          </table:table-cell>
          <table:table-cell table:formula="of:=[.D990]-[.D989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17" office:value-type="float" office:value="16813" calcext:value-type="float">
            <text:p>16813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194594907407407" calcext:value-type="float">
            <text:p>0,00194594907407407000</text:p>
          </table:table-cell>
          <table:table-cell table:formula="of:=[.D991]-[.D99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17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194791666666667" calcext:value-type="float">
            <text:p>0,00194791666666667000</text:p>
          </table:table-cell>
          <table:table-cell table:formula="of:=[.D992]-[.D991]" office:value-type="float" office:value="0.00000196759259259269" calcext:value-type="float">
            <text:p>0,0000019675925925926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17" office:value-type="float" office:value="16847" calcext:value-type="float">
            <text:p>16847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194988425925926" calcext:value-type="float">
            <text:p>0,00194988425925926000</text:p>
          </table:table-cell>
          <table:table-cell table:formula="of:=[.D993]-[.D99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17" office:value-type="float" office:value="16864" calcext:value-type="float">
            <text:p>16864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195185185185185" calcext:value-type="float">
            <text:p>0,00195185185185185000</text:p>
          </table:table-cell>
          <table:table-cell table:formula="of:=[.D994]-[.D993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17" office:value-type="float" office:value="16881" calcext:value-type="float">
            <text:p>16881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195381944444444" calcext:value-type="float">
            <text:p>0,00195381944444444000</text:p>
          </table:table-cell>
          <table:table-cell table:formula="of:=[.D995]-[.D99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17" office:value-type="float" office:value="16898" calcext:value-type="float">
            <text:p>16898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195578703703704" calcext:value-type="float">
            <text:p>0,00195578703703704000</text:p>
          </table:table-cell>
          <table:table-cell table:formula="of:=[.D996]-[.D99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17" office:value-type="float" office:value="16915" calcext:value-type="float">
            <text:p>16915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195775462962963" calcext:value-type="float">
            <text:p>0,00195775462962963000</text:p>
          </table:table-cell>
          <table:table-cell table:formula="of:=[.D997]-[.D99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17" office:value-type="float" office:value="16932" calcext:value-type="float">
            <text:p>16932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195972222222222" calcext:value-type="float">
            <text:p>0,00195972222222222000</text:p>
          </table:table-cell>
          <table:table-cell table:formula="of:=[.D998]-[.D997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17" office:value-type="float" office:value="16949" calcext:value-type="float">
            <text:p>16949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196168981481482" calcext:value-type="float">
            <text:p>0,00196168981481482000</text:p>
          </table:table-cell>
          <table:table-cell table:formula="of:=[.D999]-[.D99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17" office:value-type="float" office:value="16966" calcext:value-type="float">
            <text:p>16966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196365740740741" calcext:value-type="float">
            <text:p>0,00196365740740741000</text:p>
          </table:table-cell>
          <table:table-cell table:formula="of:=[.D1000]-[.D99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17" office:value-type="float" office:value="16983" calcext:value-type="float">
            <text:p>16983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1965625" calcext:value-type="float">
            <text:p>0,00196562500000000000</text:p>
          </table:table-cell>
          <table:table-cell table:formula="of:=[.D1001]-[.D100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17" office:value-type="float" office:value="17000" calcext:value-type="float">
            <text:p>17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196759259259259" calcext:value-type="float">
            <text:p>0,00196759259259259000</text:p>
          </table:table-cell>
          <table:table-cell table:formula="of:=[.D1002]-[.D1001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17" office:value-type="float" office:value="17017" calcext:value-type="float">
            <text:p>17017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196956018518519" calcext:value-type="float">
            <text:p>0,00196956018518519000</text:p>
          </table:table-cell>
          <table:table-cell table:formula="of:=[.D1003]-[.D100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17" office:value-type="float" office:value="17034" calcext:value-type="float">
            <text:p>17034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197152777777778" calcext:value-type="float">
            <text:p>0,00197152777777778000</text:p>
          </table:table-cell>
          <table:table-cell table:formula="of:=[.D1004]-[.D100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17" office:value-type="float" office:value="17051" calcext:value-type="float">
            <text:p>17051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197349537037037" calcext:value-type="float">
            <text:p>0,00197349537037037000</text:p>
          </table:table-cell>
          <table:table-cell table:formula="of:=[.D1005]-[.D1004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17" office:value-type="float" office:value="17068" calcext:value-type="float">
            <text:p>17068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197546296296296" calcext:value-type="float">
            <text:p>0,00197546296296296000</text:p>
          </table:table-cell>
          <table:table-cell table:formula="of:=[.D1006]-[.D100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17" office:value-type="float" office:value="17085" calcext:value-type="float">
            <text:p>17085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197743055555556" calcext:value-type="float">
            <text:p>0,00197743055555556000</text:p>
          </table:table-cell>
          <table:table-cell table:formula="of:=[.D1007]-[.D100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17" office:value-type="float" office:value="17102" calcext:value-type="float">
            <text:p>17102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197939814814815" calcext:value-type="float">
            <text:p>0,00197939814814815000</text:p>
          </table:table-cell>
          <table:table-cell table:formula="of:=[.D1008]-[.D100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17" office:value-type="float" office:value="17119" calcext:value-type="float">
            <text:p>17119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198136574074074" calcext:value-type="float">
            <text:p>0,00198136574074074000</text:p>
          </table:table-cell>
          <table:table-cell table:formula="of:=[.D1009]-[.D1008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17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198333333333333" calcext:value-type="float">
            <text:p>0,00198333333333333000</text:p>
          </table:table-cell>
          <table:table-cell table:formula="of:=[.D1010]-[.D100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17" office:value-type="float" office:value="17153" calcext:value-type="float">
            <text:p>17153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198530092592593" calcext:value-type="float">
            <text:p>0,00198530092592593000</text:p>
          </table:table-cell>
          <table:table-cell table:formula="of:=[.D1011]-[.D101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17" office:value-type="float" office:value="17170" calcext:value-type="float">
            <text:p>1717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198726851851852" calcext:value-type="float">
            <text:p>0,00198726851851852000</text:p>
          </table:table-cell>
          <table:table-cell table:formula="of:=[.D1012]-[.D1011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17" office:value-type="float" office:value="17187" calcext:value-type="float">
            <text:p>17187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198923611111111" calcext:value-type="float">
            <text:p>0,00198923611111111000</text:p>
          </table:table-cell>
          <table:table-cell table:formula="of:=[.D1013]-[.D101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17" office:value-type="float" office:value="17204" calcext:value-type="float">
            <text:p>17204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19912037037037" calcext:value-type="float">
            <text:p>0,00199120370370370000</text:p>
          </table:table-cell>
          <table:table-cell table:formula="of:=[.D1014]-[.D101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17" office:value-type="float" office:value="17221" calcext:value-type="float">
            <text:p>17221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19931712962963" calcext:value-type="float">
            <text:p>0,00199317129629630000</text:p>
          </table:table-cell>
          <table:table-cell table:formula="of:=[.D1015]-[.D101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17" office:value-type="float" office:value="17238" calcext:value-type="float">
            <text:p>17238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199513888888889" calcext:value-type="float">
            <text:p>0,00199513888888889000</text:p>
          </table:table-cell>
          <table:table-cell table:formula="of:=[.D1016]-[.D1015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17" office:value-type="float" office:value="17255" calcext:value-type="float">
            <text:p>17255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199710648148148" calcext:value-type="float">
            <text:p>0,00199710648148148000</text:p>
          </table:table-cell>
          <table:table-cell table:formula="of:=[.D1017]-[.D101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17" office:value-type="float" office:value="17272" calcext:value-type="float">
            <text:p>17272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199907407407407" calcext:value-type="float">
            <text:p>0,00199907407407407000</text:p>
          </table:table-cell>
          <table:table-cell table:formula="of:=[.D1018]-[.D101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17" office:value-type="float" office:value="17289" calcext:value-type="float">
            <text:p>17289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200104166666667" calcext:value-type="float">
            <text:p>0,00200104166666667000</text:p>
          </table:table-cell>
          <table:table-cell table:formula="of:=[.D1019]-[.D101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17" office:value-type="float" office:value="17306" calcext:value-type="float">
            <text:p>17306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200300925925926" calcext:value-type="float">
            <text:p>0,00200300925925926000</text:p>
          </table:table-cell>
          <table:table-cell table:formula="of:=[.D1020]-[.D1019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17" office:value-type="float" office:value="17323" calcext:value-type="float">
            <text:p>17323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200497685185185" calcext:value-type="float">
            <text:p>0,00200497685185185000</text:p>
          </table:table-cell>
          <table:table-cell table:formula="of:=[.D1021]-[.D102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17" office:value-type="float" office:value="17340" calcext:value-type="float">
            <text:p>1734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200694444444444" calcext:value-type="float">
            <text:p>0,00200694444444444000</text:p>
          </table:table-cell>
          <table:table-cell table:formula="of:=[.D1022]-[.D102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17" office:value-type="float" office:value="17357" calcext:value-type="float">
            <text:p>17357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200891203703704" calcext:value-type="float">
            <text:p>0,00200891203703704000</text:p>
          </table:table-cell>
          <table:table-cell table:formula="of:=[.D1023]-[.D1022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17" office:value-type="float" office:value="17374" calcext:value-type="float">
            <text:p>17374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201087962962963" calcext:value-type="float">
            <text:p>0,00201087962962963000</text:p>
          </table:table-cell>
          <table:table-cell table:formula="of:=[.D1024]-[.D102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17" office:value-type="float" office:value="17391" calcext:value-type="float">
            <text:p>17391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201284722222222" calcext:value-type="float">
            <text:p>0,00201284722222222000</text:p>
          </table:table-cell>
          <table:table-cell table:formula="of:=[.D1025]-[.D102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17" office:value-type="float" office:value="17408" calcext:value-type="float">
            <text:p>17408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201481481481481" calcext:value-type="float">
            <text:p>0,00201481481481481000</text:p>
          </table:table-cell>
          <table:table-cell table:formula="of:=[.D1026]-[.D102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17" office:value-type="float" office:value="17425" calcext:value-type="float">
            <text:p>17425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201678240740741" calcext:value-type="float">
            <text:p>0,00201678240740741000</text:p>
          </table:table-cell>
          <table:table-cell table:formula="of:=[.D1027]-[.D1026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17" office:value-type="float" office:value="17442" calcext:value-type="float">
            <text:p>17442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201875" calcext:value-type="float">
            <text:p>0,00201875000000000000</text:p>
          </table:table-cell>
          <table:table-cell table:formula="of:=[.D1028]-[.D102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17" office:value-type="float" office:value="17459" calcext:value-type="float">
            <text:p>17459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202071759259259" calcext:value-type="float">
            <text:p>0,00202071759259259000</text:p>
          </table:table-cell>
          <table:table-cell table:formula="of:=[.D1029]-[.D102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17" office:value-type="float" office:value="17476" calcext:value-type="float">
            <text:p>17476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202268518518519" calcext:value-type="float">
            <text:p>0,00202268518518519000</text:p>
          </table:table-cell>
          <table:table-cell table:formula="of:=[.D1030]-[.D102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17" office:value-type="float" office:value="17493" calcext:value-type="float">
            <text:p>17493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202465277777778" calcext:value-type="float">
            <text:p>0,00202465277777778000</text:p>
          </table:table-cell>
          <table:table-cell table:formula="of:=[.D1031]-[.D1030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17" office:value-type="float" office:value="17510" calcext:value-type="float">
            <text:p>1751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202662037037037" calcext:value-type="float">
            <text:p>0,00202662037037037000</text:p>
          </table:table-cell>
          <table:table-cell table:formula="of:=[.D1032]-[.D103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17" office:value-type="float" office:value="17527" calcext:value-type="float">
            <text:p>17527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202858796296296" calcext:value-type="float">
            <text:p>0,00202858796296296000</text:p>
          </table:table-cell>
          <table:table-cell table:formula="of:=[.D1033]-[.D103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17" office:value-type="float" office:value="17544" calcext:value-type="float">
            <text:p>17544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203055555555556" calcext:value-type="float">
            <text:p>0,00203055555555556000</text:p>
          </table:table-cell>
          <table:table-cell table:formula="of:=[.D1034]-[.D1033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17" office:value-type="float" office:value="17561" calcext:value-type="float">
            <text:p>17561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203252314814815" calcext:value-type="float">
            <text:p>0,00203252314814815000</text:p>
          </table:table-cell>
          <table:table-cell table:formula="of:=[.D1035]-[.D103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17" office:value-type="float" office:value="17578" calcext:value-type="float">
            <text:p>17578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203449074074074" calcext:value-type="float">
            <text:p>0,00203449074074074000</text:p>
          </table:table-cell>
          <table:table-cell table:formula="of:=[.D1036]-[.D103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17" office:value-type="float" office:value="17595" calcext:value-type="float">
            <text:p>17595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203645833333333" calcext:value-type="float">
            <text:p>0,00203645833333333000</text:p>
          </table:table-cell>
          <table:table-cell table:formula="of:=[.D1037]-[.D103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17" office:value-type="float" office:value="17612" calcext:value-type="float">
            <text:p>17612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203842592592593" calcext:value-type="float">
            <text:p>0,00203842592592593000</text:p>
          </table:table-cell>
          <table:table-cell table:formula="of:=[.D1038]-[.D1037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17" office:value-type="float" office:value="17629" calcext:value-type="float">
            <text:p>17629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204039351851852" calcext:value-type="float">
            <text:p>0,00204039351851852000</text:p>
          </table:table-cell>
          <table:table-cell table:formula="of:=[.D1039]-[.D103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17" office:value-type="float" office:value="17646" calcext:value-type="float">
            <text:p>17646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204236111111111" calcext:value-type="float">
            <text:p>0,00204236111111111000</text:p>
          </table:table-cell>
          <table:table-cell table:formula="of:=[.D1040]-[.D103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17" office:value-type="float" office:value="17663" calcext:value-type="float">
            <text:p>17663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20443287037037" calcext:value-type="float">
            <text:p>0,00204432870370370000</text:p>
          </table:table-cell>
          <table:table-cell table:formula="of:=[.D1041]-[.D1040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17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20462962962963" calcext:value-type="float">
            <text:p>0,00204629629629630000</text:p>
          </table:table-cell>
          <table:table-cell table:formula="of:=[.D1042]-[.D104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17" office:value-type="float" office:value="17697" calcext:value-type="float">
            <text:p>17697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204826388888889" calcext:value-type="float">
            <text:p>0,00204826388888889000</text:p>
          </table:table-cell>
          <table:table-cell table:formula="of:=[.D1043]-[.D104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17" office:value-type="float" office:value="17714" calcext:value-type="float">
            <text:p>17714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205023148148148" calcext:value-type="float">
            <text:p>0,00205023148148148000</text:p>
          </table:table-cell>
          <table:table-cell table:formula="of:=[.D1044]-[.D104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17" office:value-type="float" office:value="17731" calcext:value-type="float">
            <text:p>17731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205219907407407" calcext:value-type="float">
            <text:p>0,00205219907407407000</text:p>
          </table:table-cell>
          <table:table-cell table:formula="of:=[.D1045]-[.D1044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17" office:value-type="float" office:value="17748" calcext:value-type="float">
            <text:p>17748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205416666666667" calcext:value-type="float">
            <text:p>0,00205416666666667000</text:p>
          </table:table-cell>
          <table:table-cell table:formula="of:=[.D1046]-[.D104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17" office:value-type="float" office:value="17765" calcext:value-type="float">
            <text:p>17765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205613425925926" calcext:value-type="float">
            <text:p>0,00205613425925926000</text:p>
          </table:table-cell>
          <table:table-cell table:formula="of:=[.D1047]-[.D104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17" office:value-type="float" office:value="17782" calcext:value-type="float">
            <text:p>17782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205810185185185" calcext:value-type="float">
            <text:p>0,00205810185185185000</text:p>
          </table:table-cell>
          <table:table-cell table:formula="of:=[.D1048]-[.D104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17" office:value-type="float" office:value="17799" calcext:value-type="float">
            <text:p>17799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206006944444444" calcext:value-type="float">
            <text:p>0,00206006944444444000</text:p>
          </table:table-cell>
          <table:table-cell table:formula="of:=[.D1049]-[.D1048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17" office:value-type="float" office:value="17816" calcext:value-type="float">
            <text:p>17816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206203703703704" calcext:value-type="float">
            <text:p>0,00206203703703704000</text:p>
          </table:table-cell>
          <table:table-cell table:formula="of:=[.D1050]-[.D104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17" office:value-type="float" office:value="17833" calcext:value-type="float">
            <text:p>17833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206400462962963" calcext:value-type="float">
            <text:p>0,00206400462962963000</text:p>
          </table:table-cell>
          <table:table-cell table:formula="of:=[.D1051]-[.D105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17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206597222222222" calcext:value-type="float">
            <text:p>0,00206597222222222000</text:p>
          </table:table-cell>
          <table:table-cell table:formula="of:=[.D1052]-[.D1051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17" office:value-type="float" office:value="17867" calcext:value-type="float">
            <text:p>17867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206793981481482" calcext:value-type="float">
            <text:p>0,00206793981481482000</text:p>
          </table:table-cell>
          <table:table-cell table:formula="of:=[.D1053]-[.D105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17" office:value-type="float" office:value="17884" calcext:value-type="float">
            <text:p>17884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206990740740741" calcext:value-type="float">
            <text:p>0,00206990740740741000</text:p>
          </table:table-cell>
          <table:table-cell table:formula="of:=[.D1054]-[.D105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17" office:value-type="float" office:value="17901" calcext:value-type="float">
            <text:p>17901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2071875" calcext:value-type="float">
            <text:p>0,00207187500000000000</text:p>
          </table:table-cell>
          <table:table-cell table:formula="of:=[.D1055]-[.D105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17" office:value-type="float" office:value="17918" calcext:value-type="float">
            <text:p>17918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207384259259259" calcext:value-type="float">
            <text:p>0,00207384259259259000</text:p>
          </table:table-cell>
          <table:table-cell table:formula="of:=[.D1056]-[.D1055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17" office:value-type="float" office:value="17935" calcext:value-type="float">
            <text:p>17935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207581018518519" calcext:value-type="float">
            <text:p>0,00207581018518519000</text:p>
          </table:table-cell>
          <table:table-cell table:formula="of:=[.D1057]-[.D105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17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207777777777778" calcext:value-type="float">
            <text:p>0,00207777777777778000</text:p>
          </table:table-cell>
          <table:table-cell table:formula="of:=[.D1058]-[.D105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17" office:value-type="float" office:value="17969" calcext:value-type="float">
            <text:p>17969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207974537037037" calcext:value-type="float">
            <text:p>0,00207974537037037000</text:p>
          </table:table-cell>
          <table:table-cell table:formula="of:=[.D1059]-[.D1058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17" office:value-type="float" office:value="17986" calcext:value-type="float">
            <text:p>17986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208171296296296" calcext:value-type="float">
            <text:p>0,00208171296296296000</text:p>
          </table:table-cell>
          <table:table-cell table:formula="of:=[.D1060]-[.D105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17" office:value-type="float" office:value="18003" calcext:value-type="float">
            <text:p>18003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208368055555556" calcext:value-type="float">
            <text:p>0,00208368055555556000</text:p>
          </table:table-cell>
          <table:table-cell table:formula="of:=[.D1061]-[.D106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17" office:value-type="float" office:value="18020" calcext:value-type="float">
            <text:p>1802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208564814814815" calcext:value-type="float">
            <text:p>0,00208564814814815000</text:p>
          </table:table-cell>
          <table:table-cell table:formula="of:=[.D1062]-[.D106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17" office:value-type="float" office:value="18037" calcext:value-type="float">
            <text:p>18037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208761574074074" calcext:value-type="float">
            <text:p>0,00208761574074074000</text:p>
          </table:table-cell>
          <table:table-cell table:formula="of:=[.D1063]-[.D1062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17" office:value-type="float" office:value="18054" calcext:value-type="float">
            <text:p>18054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208958333333333" calcext:value-type="float">
            <text:p>0,00208958333333333000</text:p>
          </table:table-cell>
          <table:table-cell table:formula="of:=[.D1064]-[.D106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17" office:value-type="float" office:value="18071" calcext:value-type="float">
            <text:p>18071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209155092592593" calcext:value-type="float">
            <text:p>0,00209155092592593000</text:p>
          </table:table-cell>
          <table:table-cell table:formula="of:=[.D1065]-[.D106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17" office:value-type="float" office:value="18088" calcext:value-type="float">
            <text:p>18088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209351851851852" calcext:value-type="float">
            <text:p>0,00209351851851852000</text:p>
          </table:table-cell>
          <table:table-cell table:formula="of:=[.D1066]-[.D106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17" office:value-type="float" office:value="18105" calcext:value-type="float">
            <text:p>18105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209548611111111" calcext:value-type="float">
            <text:p>0,00209548611111111000</text:p>
          </table:table-cell>
          <table:table-cell table:formula="of:=[.D1067]-[.D1066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17" office:value-type="float" office:value="18122" calcext:value-type="float">
            <text:p>18122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20974537037037" calcext:value-type="float">
            <text:p>0,00209745370370370000</text:p>
          </table:table-cell>
          <table:table-cell table:formula="of:=[.D1068]-[.D106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17" office:value-type="float" office:value="18139" calcext:value-type="float">
            <text:p>18139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20994212962963" calcext:value-type="float">
            <text:p>0,00209942129629630000</text:p>
          </table:table-cell>
          <table:table-cell table:formula="of:=[.D1069]-[.D106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17" office:value-type="float" office:value="18156" calcext:value-type="float">
            <text:p>18156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210138888888889" calcext:value-type="float">
            <text:p>0,00210138888888889000</text:p>
          </table:table-cell>
          <table:table-cell table:formula="of:=[.D1070]-[.D1069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17" office:value-type="float" office:value="18173" calcext:value-type="float">
            <text:p>18173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210335648148148" calcext:value-type="float">
            <text:p>0,00210335648148148000</text:p>
          </table:table-cell>
          <table:table-cell table:formula="of:=[.D1071]-[.D107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17" office:value-type="float" office:value="18190" calcext:value-type="float">
            <text:p>1819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210532407407407" calcext:value-type="float">
            <text:p>0,00210532407407407000</text:p>
          </table:table-cell>
          <table:table-cell table:formula="of:=[.D1072]-[.D107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17" office:value-type="float" office:value="18207" calcext:value-type="float">
            <text:p>18207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210729166666667" calcext:value-type="float">
            <text:p>0,00210729166666667000</text:p>
          </table:table-cell>
          <table:table-cell table:formula="of:=[.D1073]-[.D107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17" office:value-type="float" office:value="18224" calcext:value-type="float">
            <text:p>18224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210925925925926" calcext:value-type="float">
            <text:p>0,00210925925925926000</text:p>
          </table:table-cell>
          <table:table-cell table:formula="of:=[.D1074]-[.D1073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17" office:value-type="float" office:value="18241" calcext:value-type="float">
            <text:p>18241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211122685185185" calcext:value-type="float">
            <text:p>0,00211122685185185000</text:p>
          </table:table-cell>
          <table:table-cell table:formula="of:=[.D1075]-[.D107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17" office:value-type="float" office:value="18258" calcext:value-type="float">
            <text:p>18258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211319444444444" calcext:value-type="float">
            <text:p>0,00211319444444444000</text:p>
          </table:table-cell>
          <table:table-cell table:formula="of:=[.D1076]-[.D107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17" office:value-type="float" office:value="18275" calcext:value-type="float">
            <text:p>18275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211516203703704" calcext:value-type="float">
            <text:p>0,00211516203703704000</text:p>
          </table:table-cell>
          <table:table-cell table:formula="of:=[.D1077]-[.D1076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17" office:value-type="float" office:value="18292" calcext:value-type="float">
            <text:p>18292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211712962962963" calcext:value-type="float">
            <text:p>0,00211712962962963000</text:p>
          </table:table-cell>
          <table:table-cell table:formula="of:=[.D1078]-[.D107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17" office:value-type="float" office:value="18309" calcext:value-type="float">
            <text:p>18309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211909722222222" calcext:value-type="float">
            <text:p>0,00211909722222222000</text:p>
          </table:table-cell>
          <table:table-cell table:formula="of:=[.D1079]-[.D107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17" office:value-type="float" office:value="18326" calcext:value-type="float">
            <text:p>18326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212106481481481" calcext:value-type="float">
            <text:p>0,00212106481481481000</text:p>
          </table:table-cell>
          <table:table-cell table:formula="of:=[.D1080]-[.D107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17" office:value-type="float" office:value="18343" calcext:value-type="float">
            <text:p>18343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212303240740741" calcext:value-type="float">
            <text:p>0,00212303240740741000</text:p>
          </table:table-cell>
          <table:table-cell table:formula="of:=[.D1081]-[.D1080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17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2125" calcext:value-type="float">
            <text:p>0,00212500000000000000</text:p>
          </table:table-cell>
          <table:table-cell table:formula="of:=[.D1082]-[.D108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17" office:value-type="float" office:value="18377" calcext:value-type="float">
            <text:p>18377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212696759259259" calcext:value-type="float">
            <text:p>0,00212696759259259000</text:p>
          </table:table-cell>
          <table:table-cell table:formula="of:=[.D1083]-[.D108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17" office:value-type="float" office:value="18394" calcext:value-type="float">
            <text:p>18394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212893518518519" calcext:value-type="float">
            <text:p>0,00212893518518519000</text:p>
          </table:table-cell>
          <table:table-cell table:formula="of:=[.D1084]-[.D108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17" office:value-type="float" office:value="18411" calcext:value-type="float">
            <text:p>18411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213090277777778" calcext:value-type="float">
            <text:p>0,00213090277777778000</text:p>
          </table:table-cell>
          <table:table-cell table:formula="of:=[.D1085]-[.D1084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17" office:value-type="float" office:value="18428" calcext:value-type="float">
            <text:p>18428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213287037037037" calcext:value-type="float">
            <text:p>0,00213287037037037000</text:p>
          </table:table-cell>
          <table:table-cell table:formula="of:=[.D1086]-[.D108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17" office:value-type="float" office:value="18445" calcext:value-type="float">
            <text:p>18445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213483796296296" calcext:value-type="float">
            <text:p>0,00213483796296296000</text:p>
          </table:table-cell>
          <table:table-cell table:formula="of:=[.D1087]-[.D108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17" office:value-type="float" office:value="18462" calcext:value-type="float">
            <text:p>18462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213680555555556" calcext:value-type="float">
            <text:p>0,00213680555555556000</text:p>
          </table:table-cell>
          <table:table-cell table:formula="of:=[.D1088]-[.D1087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17" office:value-type="float" office:value="18479" calcext:value-type="float">
            <text:p>18479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213877314814815" calcext:value-type="float">
            <text:p>0,00213877314814815000</text:p>
          </table:table-cell>
          <table:table-cell table:formula="of:=[.D1089]-[.D108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17" office:value-type="float" office:value="18496" calcext:value-type="float">
            <text:p>18496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214074074074074" calcext:value-type="float">
            <text:p>0,00214074074074074000</text:p>
          </table:table-cell>
          <table:table-cell table:formula="of:=[.D1090]-[.D108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17" office:value-type="float" office:value="18513" calcext:value-type="float">
            <text:p>18513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214270833333333" calcext:value-type="float">
            <text:p>0,00214270833333333000</text:p>
          </table:table-cell>
          <table:table-cell table:formula="of:=[.D1091]-[.D109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17" office:value-type="float" office:value="18530" calcext:value-type="float">
            <text:p>1853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214467592592593" calcext:value-type="float">
            <text:p>0,00214467592592593000</text:p>
          </table:table-cell>
          <table:table-cell table:formula="of:=[.D1092]-[.D1091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17" office:value-type="float" office:value="18547" calcext:value-type="float">
            <text:p>18547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214664351851852" calcext:value-type="float">
            <text:p>0,00214664351851852000</text:p>
          </table:table-cell>
          <table:table-cell table:formula="of:=[.D1093]-[.D109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17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214861111111111" calcext:value-type="float">
            <text:p>0,00214861111111111000</text:p>
          </table:table-cell>
          <table:table-cell table:formula="of:=[.D1094]-[.D109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17" office:value-type="float" office:value="18581" calcext:value-type="float">
            <text:p>18581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21505787037037" calcext:value-type="float">
            <text:p>0,00215057870370370000</text:p>
          </table:table-cell>
          <table:table-cell table:formula="of:=[.D1095]-[.D1094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17" office:value-type="float" office:value="18598" calcext:value-type="float">
            <text:p>18598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21525462962963" calcext:value-type="float">
            <text:p>0,00215254629629630000</text:p>
          </table:table-cell>
          <table:table-cell table:formula="of:=[.D1096]-[.D109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17" office:value-type="float" office:value="18615" calcext:value-type="float">
            <text:p>18615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215451388888889" calcext:value-type="float">
            <text:p>0,00215451388888889000</text:p>
          </table:table-cell>
          <table:table-cell table:formula="of:=[.D1097]-[.D109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17" office:value-type="float" office:value="18632" calcext:value-type="float">
            <text:p>18632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215648148148148" calcext:value-type="float">
            <text:p>0,00215648148148148000</text:p>
          </table:table-cell>
          <table:table-cell table:formula="of:=[.D1098]-[.D109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17" office:value-type="float" office:value="18649" calcext:value-type="float">
            <text:p>18649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215844907407407" calcext:value-type="float">
            <text:p>0,00215844907407407000</text:p>
          </table:table-cell>
          <table:table-cell table:formula="of:=[.D1099]-[.D1098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17" office:value-type="float" office:value="18666" calcext:value-type="float">
            <text:p>18666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216041666666667" calcext:value-type="float">
            <text:p>0,00216041666666667000</text:p>
          </table:table-cell>
          <table:table-cell table:formula="of:=[.D1100]-[.D109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17" office:value-type="float" office:value="18683" calcext:value-type="float">
            <text:p>18683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216238425925926" calcext:value-type="float">
            <text:p>0,00216238425925926000</text:p>
          </table:table-cell>
          <table:table-cell table:formula="of:=[.D1101]-[.D110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17" office:value-type="float" office:value="18700" calcext:value-type="float">
            <text:p>187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216435185185185" calcext:value-type="float">
            <text:p>0,00216435185185185000</text:p>
          </table:table-cell>
          <table:table-cell table:formula="of:=[.D1102]-[.D110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17" office:value-type="float" office:value="18717" calcext:value-type="float">
            <text:p>18717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216631944444444" calcext:value-type="float">
            <text:p>0,00216631944444444000</text:p>
          </table:table-cell>
          <table:table-cell table:formula="of:=[.D1103]-[.D1102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17" office:value-type="float" office:value="18734" calcext:value-type="float">
            <text:p>18734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216828703703704" calcext:value-type="float">
            <text:p>0,00216828703703704000</text:p>
          </table:table-cell>
          <table:table-cell table:formula="of:=[.D1104]-[.D110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17" office:value-type="float" office:value="18751" calcext:value-type="float">
            <text:p>18751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217025462962963" calcext:value-type="float">
            <text:p>0,00217025462962963000</text:p>
          </table:table-cell>
          <table:table-cell table:formula="of:=[.D1105]-[.D110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17" office:value-type="float" office:value="18768" calcext:value-type="float">
            <text:p>18768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217222222222222" calcext:value-type="float">
            <text:p>0,00217222222222222000</text:p>
          </table:table-cell>
          <table:table-cell table:formula="of:=[.D1106]-[.D1105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17" office:value-type="float" office:value="18785" calcext:value-type="float">
            <text:p>18785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217418981481482" calcext:value-type="float">
            <text:p>0,00217418981481482000</text:p>
          </table:table-cell>
          <table:table-cell table:formula="of:=[.D1107]-[.D110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17" office:value-type="float" office:value="18802" calcext:value-type="float">
            <text:p>18802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217615740740741" calcext:value-type="float">
            <text:p>0,00217615740740741000</text:p>
          </table:table-cell>
          <table:table-cell table:formula="of:=[.D1108]-[.D110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17" office:value-type="float" office:value="18819" calcext:value-type="float">
            <text:p>18819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2178125" calcext:value-type="float">
            <text:p>0,00217812500000000000</text:p>
          </table:table-cell>
          <table:table-cell table:formula="of:=[.D1109]-[.D110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17" office:value-type="float" office:value="18836" calcext:value-type="float">
            <text:p>18836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218009259259259" calcext:value-type="float">
            <text:p>0,00218009259259259000</text:p>
          </table:table-cell>
          <table:table-cell table:formula="of:=[.D1110]-[.D1109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17" office:value-type="float" office:value="18853" calcext:value-type="float">
            <text:p>18853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218206018518519" calcext:value-type="float">
            <text:p>0,00218206018518519000</text:p>
          </table:table-cell>
          <table:table-cell table:formula="of:=[.D1111]-[.D111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17" office:value-type="float" office:value="18870" calcext:value-type="float">
            <text:p>1887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218402777777778" calcext:value-type="float">
            <text:p>0,00218402777777778000</text:p>
          </table:table-cell>
          <table:table-cell table:formula="of:=[.D1112]-[.D111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17" office:value-type="float" office:value="18887" calcext:value-type="float">
            <text:p>18887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218599537037037" calcext:value-type="float">
            <text:p>0,00218599537037037000</text:p>
          </table:table-cell>
          <table:table-cell table:formula="of:=[.D1113]-[.D1112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17" office:value-type="float" office:value="18904" calcext:value-type="float">
            <text:p>18904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218796296296296" calcext:value-type="float">
            <text:p>0,00218796296296296000</text:p>
          </table:table-cell>
          <table:table-cell table:formula="of:=[.D1114]-[.D111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17" office:value-type="float" office:value="18921" calcext:value-type="float">
            <text:p>18921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218993055555556" calcext:value-type="float">
            <text:p>0,00218993055555556000</text:p>
          </table:table-cell>
          <table:table-cell table:formula="of:=[.D1115]-[.D111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17" office:value-type="float" office:value="18938" calcext:value-type="float">
            <text:p>18938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219189814814815" calcext:value-type="float">
            <text:p>0,00219189814814815000</text:p>
          </table:table-cell>
          <table:table-cell table:formula="of:=[.D1116]-[.D111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17" office:value-type="float" office:value="18955" calcext:value-type="float">
            <text:p>18955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219386574074074" calcext:value-type="float">
            <text:p>0,00219386574074074000</text:p>
          </table:table-cell>
          <table:table-cell table:formula="of:=[.D1117]-[.D1116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17" office:value-type="float" office:value="18972" calcext:value-type="float">
            <text:p>18972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219583333333333" calcext:value-type="float">
            <text:p>0,00219583333333333000</text:p>
          </table:table-cell>
          <table:table-cell table:formula="of:=[.D1118]-[.D111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17" office:value-type="float" office:value="18989" calcext:value-type="float">
            <text:p>18989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219780092592593" calcext:value-type="float">
            <text:p>0,00219780092592593000</text:p>
          </table:table-cell>
          <table:table-cell table:formula="of:=[.D1119]-[.D111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17" office:value-type="float" office:value="19006" calcext:value-type="float">
            <text:p>19006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219976851851852" calcext:value-type="float">
            <text:p>0,00219976851851852000</text:p>
          </table:table-cell>
          <table:table-cell table:formula="of:=[.D1120]-[.D111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17" office:value-type="float" office:value="19023" calcext:value-type="float">
            <text:p>19023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220173611111111" calcext:value-type="float">
            <text:p>0,00220173611111111000</text:p>
          </table:table-cell>
          <table:table-cell table:formula="of:=[.D1121]-[.D1120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17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22037037037037" calcext:value-type="float">
            <text:p>0,00220370370370370000</text:p>
          </table:table-cell>
          <table:table-cell table:formula="of:=[.D1122]-[.D112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17" office:value-type="float" office:value="19057" calcext:value-type="float">
            <text:p>19057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22056712962963" calcext:value-type="float">
            <text:p>0,00220567129629630000</text:p>
          </table:table-cell>
          <table:table-cell table:formula="of:=[.D1123]-[.D112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17" office:value-type="float" office:value="19074" calcext:value-type="float">
            <text:p>19074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220763888888889" calcext:value-type="float">
            <text:p>0,00220763888888889000</text:p>
          </table:table-cell>
          <table:table-cell table:formula="of:=[.D1124]-[.D1123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17" office:value-type="float" office:value="19091" calcext:value-type="float">
            <text:p>19091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220960648148148" calcext:value-type="float">
            <text:p>0,00220960648148148000</text:p>
          </table:table-cell>
          <table:table-cell table:formula="of:=[.D1125]-[.D112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17" office:value-type="float" office:value="19108" calcext:value-type="float">
            <text:p>19108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221157407407407" calcext:value-type="float">
            <text:p>0,00221157407407407000</text:p>
          </table:table-cell>
          <table:table-cell table:formula="of:=[.D1126]-[.D112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17" office:value-type="float" office:value="19125" calcext:value-type="float">
            <text:p>19125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221354166666667" calcext:value-type="float">
            <text:p>0,00221354166666667000</text:p>
          </table:table-cell>
          <table:table-cell table:formula="of:=[.D1127]-[.D112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17" office:value-type="float" office:value="19142" calcext:value-type="float">
            <text:p>19142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221550925925926" calcext:value-type="float">
            <text:p>0,00221550925925926000</text:p>
          </table:table-cell>
          <table:table-cell table:formula="of:=[.D1128]-[.D1127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17" office:value-type="float" office:value="19159" calcext:value-type="float">
            <text:p>19159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221747685185185" calcext:value-type="float">
            <text:p>0,00221747685185185000</text:p>
          </table:table-cell>
          <table:table-cell table:formula="of:=[.D1129]-[.D112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17" office:value-type="float" office:value="19176" calcext:value-type="float">
            <text:p>19176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221944444444444" calcext:value-type="float">
            <text:p>0,00221944444444444000</text:p>
          </table:table-cell>
          <table:table-cell table:formula="of:=[.D1130]-[.D112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17" office:value-type="float" office:value="19193" calcext:value-type="float">
            <text:p>19193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222141203703704" calcext:value-type="float">
            <text:p>0,00222141203703704000</text:p>
          </table:table-cell>
          <table:table-cell table:formula="of:=[.D1131]-[.D1130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17" office:value-type="float" office:value="19210" calcext:value-type="float">
            <text:p>1921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222337962962963" calcext:value-type="float">
            <text:p>0,00222337962962963000</text:p>
          </table:table-cell>
          <table:table-cell table:formula="of:=[.D1132]-[.D113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17" office:value-type="float" office:value="19227" calcext:value-type="float">
            <text:p>19227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222534722222222" calcext:value-type="float">
            <text:p>0,00222534722222222000</text:p>
          </table:table-cell>
          <table:table-cell table:formula="of:=[.D1133]-[.D113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17" office:value-type="float" office:value="19244" calcext:value-type="float">
            <text:p>19244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222731481481481" calcext:value-type="float">
            <text:p>0,00222731481481481000</text:p>
          </table:table-cell>
          <table:table-cell table:formula="of:=[.D1134]-[.D113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17" office:value-type="float" office:value="19261" calcext:value-type="float">
            <text:p>19261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222928240740741" calcext:value-type="float">
            <text:p>0,00222928240740741000</text:p>
          </table:table-cell>
          <table:table-cell table:formula="of:=[.D1135]-[.D1134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17" office:value-type="float" office:value="19278" calcext:value-type="float">
            <text:p>19278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223125" calcext:value-type="float">
            <text:p>0,00223125000000000000</text:p>
          </table:table-cell>
          <table:table-cell table:formula="of:=[.D1136]-[.D113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17" office:value-type="float" office:value="19295" calcext:value-type="float">
            <text:p>19295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223321759259259" calcext:value-type="float">
            <text:p>0,00223321759259259000</text:p>
          </table:table-cell>
          <table:table-cell table:formula="of:=[.D1137]-[.D113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17" office:value-type="float" office:value="19312" calcext:value-type="float">
            <text:p>19312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223518518518519" calcext:value-type="float">
            <text:p>0,00223518518518519000</text:p>
          </table:table-cell>
          <table:table-cell table:formula="of:=[.D1138]-[.D113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17" office:value-type="float" office:value="19329" calcext:value-type="float">
            <text:p>19329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223715277777778" calcext:value-type="float">
            <text:p>0,00223715277777778000</text:p>
          </table:table-cell>
          <table:table-cell table:formula="of:=[.D1139]-[.D1138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17" office:value-type="float" office:value="19346" calcext:value-type="float">
            <text:p>19346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223912037037037" calcext:value-type="float">
            <text:p>0,00223912037037037000</text:p>
          </table:table-cell>
          <table:table-cell table:formula="of:=[.D1140]-[.D113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17" office:value-type="float" office:value="19363" calcext:value-type="float">
            <text:p>19363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224108796296296" calcext:value-type="float">
            <text:p>0,00224108796296296000</text:p>
          </table:table-cell>
          <table:table-cell table:formula="of:=[.D1141]-[.D114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17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224305555555556" calcext:value-type="float">
            <text:p>0,00224305555555556000</text:p>
          </table:table-cell>
          <table:table-cell table:formula="of:=[.D1142]-[.D1141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17" office:value-type="float" office:value="19397" calcext:value-type="float">
            <text:p>19397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224502314814815" calcext:value-type="float">
            <text:p>0,00224502314814815000</text:p>
          </table:table-cell>
          <table:table-cell table:formula="of:=[.D1143]-[.D114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17" office:value-type="float" office:value="19414" calcext:value-type="float">
            <text:p>19414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224699074074074" calcext:value-type="float">
            <text:p>0,00224699074074074000</text:p>
          </table:table-cell>
          <table:table-cell table:formula="of:=[.D1144]-[.D114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17" office:value-type="float" office:value="19431" calcext:value-type="float">
            <text:p>19431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224895833333333" calcext:value-type="float">
            <text:p>0,00224895833333333000</text:p>
          </table:table-cell>
          <table:table-cell table:formula="of:=[.D1145]-[.D114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17" office:value-type="float" office:value="19448" calcext:value-type="float">
            <text:p>19448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225092592592593" calcext:value-type="float">
            <text:p>0,00225092592592593000</text:p>
          </table:table-cell>
          <table:table-cell table:formula="of:=[.D1146]-[.D1145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17" office:value-type="float" office:value="19465" calcext:value-type="float">
            <text:p>19465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225289351851852" calcext:value-type="float">
            <text:p>0,00225289351851852000</text:p>
          </table:table-cell>
          <table:table-cell table:formula="of:=[.D1147]-[.D114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17" office:value-type="float" office:value="19482" calcext:value-type="float">
            <text:p>19482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225486111111111" calcext:value-type="float">
            <text:p>0,00225486111111111000</text:p>
          </table:table-cell>
          <table:table-cell table:formula="of:=[.D1148]-[.D114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17" office:value-type="float" office:value="19499" calcext:value-type="float">
            <text:p>19499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22568287037037" calcext:value-type="float">
            <text:p>0,00225682870370370000</text:p>
          </table:table-cell>
          <table:table-cell table:formula="of:=[.D1149]-[.D1148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17" office:value-type="float" office:value="19516" calcext:value-type="float">
            <text:p>19516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22587962962963" calcext:value-type="float">
            <text:p>0,00225879629629630000</text:p>
          </table:table-cell>
          <table:table-cell table:formula="of:=[.D1150]-[.D114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17" office:value-type="float" office:value="19533" calcext:value-type="float">
            <text:p>19533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226076388888889" calcext:value-type="float">
            <text:p>0,00226076388888889000</text:p>
          </table:table-cell>
          <table:table-cell table:formula="of:=[.D1151]-[.D115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17" office:value-type="float" office:value="19550" calcext:value-type="float">
            <text:p>1955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226273148148148" calcext:value-type="float">
            <text:p>0,00226273148148148000</text:p>
          </table:table-cell>
          <table:table-cell table:formula="of:=[.D1152]-[.D115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17" office:value-type="float" office:value="19567" calcext:value-type="float">
            <text:p>19567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226469907407407" calcext:value-type="float">
            <text:p>0,00226469907407407000</text:p>
          </table:table-cell>
          <table:table-cell table:formula="of:=[.D1153]-[.D1152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17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226666666666667" calcext:value-type="float">
            <text:p>0,00226666666666667000</text:p>
          </table:table-cell>
          <table:table-cell table:formula="of:=[.D1154]-[.D115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17" office:value-type="float" office:value="19601" calcext:value-type="float">
            <text:p>19601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226863425925926" calcext:value-type="float">
            <text:p>0,00226863425925926000</text:p>
          </table:table-cell>
          <table:table-cell table:formula="of:=[.D1155]-[.D115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17" office:value-type="float" office:value="19618" calcext:value-type="float">
            <text:p>19618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227060185185185" calcext:value-type="float">
            <text:p>0,00227060185185185000</text:p>
          </table:table-cell>
          <table:table-cell table:formula="of:=[.D1156]-[.D115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17" office:value-type="float" office:value="19635" calcext:value-type="float">
            <text:p>19635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227256944444444" calcext:value-type="float">
            <text:p>0,00227256944444444000</text:p>
          </table:table-cell>
          <table:table-cell table:formula="of:=[.D1157]-[.D1156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17" office:value-type="float" office:value="19652" calcext:value-type="float">
            <text:p>19652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227453703703704" calcext:value-type="float">
            <text:p>0,00227453703703704000</text:p>
          </table:table-cell>
          <table:table-cell table:formula="of:=[.D1158]-[.D115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17" office:value-type="float" office:value="19669" calcext:value-type="float">
            <text:p>19669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227650462962963" calcext:value-type="float">
            <text:p>0,00227650462962963000</text:p>
          </table:table-cell>
          <table:table-cell table:formula="of:=[.D1159]-[.D115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17" office:value-type="float" office:value="19686" calcext:value-type="float">
            <text:p>19686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227847222222222" calcext:value-type="float">
            <text:p>0,00227847222222222000</text:p>
          </table:table-cell>
          <table:table-cell table:formula="of:=[.D1160]-[.D1159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17" office:value-type="float" office:value="19703" calcext:value-type="float">
            <text:p>19703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228043981481482" calcext:value-type="float">
            <text:p>0,00228043981481482000</text:p>
          </table:table-cell>
          <table:table-cell table:formula="of:=[.D1161]-[.D116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17" office:value-type="float" office:value="19720" calcext:value-type="float">
            <text:p>1972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228240740740741" calcext:value-type="float">
            <text:p>0,00228240740740741000</text:p>
          </table:table-cell>
          <table:table-cell table:formula="of:=[.D1162]-[.D116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17" office:value-type="float" office:value="19737" calcext:value-type="float">
            <text:p>19737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2284375" calcext:value-type="float">
            <text:p>0,00228437500000000000</text:p>
          </table:table-cell>
          <table:table-cell table:formula="of:=[.D1163]-[.D116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17" office:value-type="float" office:value="19754" calcext:value-type="float">
            <text:p>19754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228634259259259" calcext:value-type="float">
            <text:p>0,00228634259259259000</text:p>
          </table:table-cell>
          <table:table-cell table:formula="of:=[.D1164]-[.D1163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17" office:value-type="float" office:value="19771" calcext:value-type="float">
            <text:p>19771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228831018518519" calcext:value-type="float">
            <text:p>0,00228831018518519000</text:p>
          </table:table-cell>
          <table:table-cell table:formula="of:=[.D1165]-[.D116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17" office:value-type="float" office:value="19788" calcext:value-type="float">
            <text:p>19788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229027777777778" calcext:value-type="float">
            <text:p>0,00229027777777778000</text:p>
          </table:table-cell>
          <table:table-cell table:formula="of:=[.D1166]-[.D116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17" office:value-type="float" office:value="19805" calcext:value-type="float">
            <text:p>19805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229224537037037" calcext:value-type="float">
            <text:p>0,00229224537037037000</text:p>
          </table:table-cell>
          <table:table-cell table:formula="of:=[.D1167]-[.D1166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17" office:value-type="float" office:value="19822" calcext:value-type="float">
            <text:p>19822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229421296296296" calcext:value-type="float">
            <text:p>0,00229421296296296000</text:p>
          </table:table-cell>
          <table:table-cell table:formula="of:=[.D1168]-[.D116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17" office:value-type="float" office:value="19839" calcext:value-type="float">
            <text:p>19839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229618055555556" calcext:value-type="float">
            <text:p>0,00229618055555556000</text:p>
          </table:table-cell>
          <table:table-cell table:formula="of:=[.D1169]-[.D116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17" office:value-type="float" office:value="19856" calcext:value-type="float">
            <text:p>19856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229814814814815" calcext:value-type="float">
            <text:p>0,00229814814814815000</text:p>
          </table:table-cell>
          <table:table-cell table:formula="of:=[.D1170]-[.D116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17" office:value-type="float" office:value="19873" calcext:value-type="float">
            <text:p>19873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230011574074074" calcext:value-type="float">
            <text:p>0,00230011574074074000</text:p>
          </table:table-cell>
          <table:table-cell table:formula="of:=[.D1171]-[.D1170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17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230208333333333" calcext:value-type="float">
            <text:p>0,00230208333333333000</text:p>
          </table:table-cell>
          <table:table-cell table:formula="of:=[.D1172]-[.D117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17" office:value-type="float" office:value="19907" calcext:value-type="float">
            <text:p>19907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230405092592593" calcext:value-type="float">
            <text:p>0,00230405092592593000</text:p>
          </table:table-cell>
          <table:table-cell table:formula="of:=[.D1173]-[.D117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17" office:value-type="float" office:value="19924" calcext:value-type="float">
            <text:p>19924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230601851851852" calcext:value-type="float">
            <text:p>0,00230601851851852000</text:p>
          </table:table-cell>
          <table:table-cell table:formula="of:=[.D1174]-[.D117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17" office:value-type="float" office:value="19941" calcext:value-type="float">
            <text:p>19941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230798611111111" calcext:value-type="float">
            <text:p>0,00230798611111111000</text:p>
          </table:table-cell>
          <table:table-cell table:formula="of:=[.D1175]-[.D1174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17" office:value-type="float" office:value="19958" calcext:value-type="float">
            <text:p>19958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23099537037037" calcext:value-type="float">
            <text:p>0,00230995370370370000</text:p>
          </table:table-cell>
          <table:table-cell table:formula="of:=[.D1176]-[.D117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17" office:value-type="float" office:value="19975" calcext:value-type="float">
            <text:p>19975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23119212962963" calcext:value-type="float">
            <text:p>0,00231192129629630000</text:p>
          </table:table-cell>
          <table:table-cell table:formula="of:=[.D1177]-[.D117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17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231388888888889" calcext:value-type="float">
            <text:p>0,00231388888888889000</text:p>
          </table:table-cell>
          <table:table-cell table:formula="of:=[.D1178]-[.D1177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17" office:value-type="float" office:value="20009" calcext:value-type="float">
            <text:p>20009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231585648148148" calcext:value-type="float">
            <text:p>0,00231585648148148000</text:p>
          </table:table-cell>
          <table:table-cell table:formula="of:=[.D1179]-[.D117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17" office:value-type="float" office:value="20026" calcext:value-type="float">
            <text:p>20026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231782407407407" calcext:value-type="float">
            <text:p>0,00231782407407407000</text:p>
          </table:table-cell>
          <table:table-cell table:formula="of:=[.D1180]-[.D117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17" office:value-type="float" office:value="20043" calcext:value-type="float">
            <text:p>20043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231979166666667" calcext:value-type="float">
            <text:p>0,00231979166666667000</text:p>
          </table:table-cell>
          <table:table-cell table:formula="of:=[.D1181]-[.D118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17" office:value-type="float" office:value="20060" calcext:value-type="float">
            <text:p>2006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232175925925926" calcext:value-type="float">
            <text:p>0,00232175925925926000</text:p>
          </table:table-cell>
          <table:table-cell table:formula="of:=[.D1182]-[.D1181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17" office:value-type="float" office:value="20077" calcext:value-type="float">
            <text:p>20077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232372685185185" calcext:value-type="float">
            <text:p>0,00232372685185185000</text:p>
          </table:table-cell>
          <table:table-cell table:formula="of:=[.D1183]-[.D118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17" office:value-type="float" office:value="20094" calcext:value-type="float">
            <text:p>20094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232569444444444" calcext:value-type="float">
            <text:p>0,00232569444444444000</text:p>
          </table:table-cell>
          <table:table-cell table:formula="of:=[.D1184]-[.D118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17" office:value-type="float" office:value="20111" calcext:value-type="float">
            <text:p>20111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232766203703704" calcext:value-type="float">
            <text:p>0,00232766203703704000</text:p>
          </table:table-cell>
          <table:table-cell table:formula="of:=[.D1185]-[.D1184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17" office:value-type="float" office:value="20128" calcext:value-type="float">
            <text:p>20128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232962962962963" calcext:value-type="float">
            <text:p>0,00232962962962963000</text:p>
          </table:table-cell>
          <table:table-cell table:formula="of:=[.D1186]-[.D118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17" office:value-type="float" office:value="20145" calcext:value-type="float">
            <text:p>20145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233159722222222" calcext:value-type="float">
            <text:p>0,00233159722222222000</text:p>
          </table:table-cell>
          <table:table-cell table:formula="of:=[.D1187]-[.D118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17" office:value-type="float" office:value="20162" calcext:value-type="float">
            <text:p>20162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233356481481482" calcext:value-type="float">
            <text:p>0,00233356481481482000</text:p>
          </table:table-cell>
          <table:table-cell table:formula="of:=[.D1188]-[.D118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17" office:value-type="float" office:value="20179" calcext:value-type="float">
            <text:p>20179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233553240740741" calcext:value-type="float">
            <text:p>0,00233553240740741000</text:p>
          </table:table-cell>
          <table:table-cell table:formula="of:=[.D1189]-[.D1188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17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23375" calcext:value-type="float">
            <text:p>0,00233750000000000000</text:p>
          </table:table-cell>
          <table:table-cell table:formula="of:=[.D1190]-[.D118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17" office:value-type="float" office:value="20213" calcext:value-type="float">
            <text:p>20213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233946759259259" calcext:value-type="float">
            <text:p>0,00233946759259259000</text:p>
          </table:table-cell>
          <table:table-cell table:formula="of:=[.D1191]-[.D119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17" office:value-type="float" office:value="20230" calcext:value-type="float">
            <text:p>2023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234143518518519" calcext:value-type="float">
            <text:p>0,00234143518518519000</text:p>
          </table:table-cell>
          <table:table-cell table:formula="of:=[.D1192]-[.D119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17" office:value-type="float" office:value="20247" calcext:value-type="float">
            <text:p>20247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234340277777778" calcext:value-type="float">
            <text:p>0,00234340277777778000</text:p>
          </table:table-cell>
          <table:table-cell table:formula="of:=[.D1193]-[.D1192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17" office:value-type="float" office:value="20264" calcext:value-type="float">
            <text:p>20264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234537037037037" calcext:value-type="float">
            <text:p>0,00234537037037037000</text:p>
          </table:table-cell>
          <table:table-cell table:formula="of:=[.D1194]-[.D119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17" office:value-type="float" office:value="20281" calcext:value-type="float">
            <text:p>20281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234733796296296" calcext:value-type="float">
            <text:p>0,00234733796296296000</text:p>
          </table:table-cell>
          <table:table-cell table:formula="of:=[.D1195]-[.D119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17" office:value-type="float" office:value="20298" calcext:value-type="float">
            <text:p>20298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234930555555556" calcext:value-type="float">
            <text:p>0,00234930555555556000</text:p>
          </table:table-cell>
          <table:table-cell table:formula="of:=[.D1196]-[.D1195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17" office:value-type="float" office:value="20315" calcext:value-type="float">
            <text:p>20315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235127314814815" calcext:value-type="float">
            <text:p>0,00235127314814815000</text:p>
          </table:table-cell>
          <table:table-cell table:formula="of:=[.D1197]-[.D119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17" office:value-type="float" office:value="20332" calcext:value-type="float">
            <text:p>20332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235324074074074" calcext:value-type="float">
            <text:p>0,00235324074074074000</text:p>
          </table:table-cell>
          <table:table-cell table:formula="of:=[.D1198]-[.D119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17" office:value-type="float" office:value="20349" calcext:value-type="float">
            <text:p>20349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235520833333333" calcext:value-type="float">
            <text:p>0,00235520833333333000</text:p>
          </table:table-cell>
          <table:table-cell table:formula="of:=[.D1199]-[.D119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17" office:value-type="float" office:value="20366" calcext:value-type="float">
            <text:p>20366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235717592592593" calcext:value-type="float">
            <text:p>0,00235717592592593000</text:p>
          </table:table-cell>
          <table:table-cell table:formula="of:=[.D1200]-[.D1199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17" office:value-type="float" office:value="20383" calcext:value-type="float">
            <text:p>20383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235914351851852" calcext:value-type="float">
            <text:p>0,00235914351851852000</text:p>
          </table:table-cell>
          <table:table-cell table:formula="of:=[.D1201]-[.D120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17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236111111111111" calcext:value-type="float">
            <text:p>0,00236111111111111000</text:p>
          </table:table-cell>
          <table:table-cell table:formula="of:=[.D1202]-[.D120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17" office:value-type="float" office:value="20417" calcext:value-type="float">
            <text:p>20417</text:p>
          </table:table-cell>
          <table:table-cell office:value-type="float" office:value="8640000" calcext:value-type="float">
            <text:p>8640000</text:p>
          </table:table-cell>
          <table:table-cell table:formula="of:=[.B1202]/[.C1202]" office:value-type="float" office:value="0.0023630787037037" calcext:value-type="float">
            <text:p>0,00236307870370370000</text:p>
          </table:table-cell>
          <table:table-cell table:formula="of:=[.D1203]-[.D120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17" office:value-type="float" office:value="20434" calcext:value-type="float">
            <text:p>20434</text:p>
          </table:table-cell>
          <table:table-cell office:value-type="float" office:value="8640000" calcext:value-type="float">
            <text:p>8640000</text:p>
          </table:table-cell>
          <table:table-cell table:formula="of:=[.B1203]/[.C1203]" office:value-type="float" office:value="0.0023650462962963" calcext:value-type="float">
            <text:p>0,00236504629629630000</text:p>
          </table:table-cell>
          <table:table-cell table:formula="of:=[.D1204]-[.D1203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17" office:value-type="float" office:value="20451" calcext:value-type="float">
            <text:p>20451</text:p>
          </table:table-cell>
          <table:table-cell office:value-type="float" office:value="8640000" calcext:value-type="float">
            <text:p>8640000</text:p>
          </table:table-cell>
          <table:table-cell table:formula="of:=[.B1204]/[.C1204]" office:value-type="float" office:value="0.00236701388888889" calcext:value-type="float">
            <text:p>0,00236701388888889000</text:p>
          </table:table-cell>
          <table:table-cell table:formula="of:=[.D1205]-[.D120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17" office:value-type="float" office:value="20468" calcext:value-type="float">
            <text:p>20468</text:p>
          </table:table-cell>
          <table:table-cell office:value-type="float" office:value="8640000" calcext:value-type="float">
            <text:p>8640000</text:p>
          </table:table-cell>
          <table:table-cell table:formula="of:=[.B1205]/[.C1205]" office:value-type="float" office:value="0.00236898148148148" calcext:value-type="float">
            <text:p>0,00236898148148148000</text:p>
          </table:table-cell>
          <table:table-cell table:formula="of:=[.D1206]-[.D120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17" office:value-type="float" office:value="20485" calcext:value-type="float">
            <text:p>20485</text:p>
          </table:table-cell>
          <table:table-cell office:value-type="float" office:value="8640000" calcext:value-type="float">
            <text:p>8640000</text:p>
          </table:table-cell>
          <table:table-cell table:formula="of:=[.B1206]/[.C1206]" office:value-type="float" office:value="0.00237094907407407" calcext:value-type="float">
            <text:p>0,00237094907407407000</text:p>
          </table:table-cell>
          <table:table-cell table:formula="of:=[.D1207]-[.D1206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17" office:value-type="float" office:value="20502" calcext:value-type="float">
            <text:p>20502</text:p>
          </table:table-cell>
          <table:table-cell office:value-type="float" office:value="8640000" calcext:value-type="float">
            <text:p>8640000</text:p>
          </table:table-cell>
          <table:table-cell table:formula="of:=[.B1207]/[.C1207]" office:value-type="float" office:value="0.00237291666666667" calcext:value-type="float">
            <text:p>0,00237291666666667000</text:p>
          </table:table-cell>
          <table:table-cell table:formula="of:=[.D1208]-[.D120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17" office:value-type="float" office:value="20519" calcext:value-type="float">
            <text:p>20519</text:p>
          </table:table-cell>
          <table:table-cell office:value-type="float" office:value="8640000" calcext:value-type="float">
            <text:p>8640000</text:p>
          </table:table-cell>
          <table:table-cell table:formula="of:=[.B1208]/[.C1208]" office:value-type="float" office:value="0.00237488425925926" calcext:value-type="float">
            <text:p>0,00237488425925926000</text:p>
          </table:table-cell>
          <table:table-cell table:formula="of:=[.D1209]-[.D120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17" office:value-type="float" office:value="20536" calcext:value-type="float">
            <text:p>20536</text:p>
          </table:table-cell>
          <table:table-cell office:value-type="float" office:value="8640000" calcext:value-type="float">
            <text:p>8640000</text:p>
          </table:table-cell>
          <table:table-cell table:formula="of:=[.B1209]/[.C1209]" office:value-type="float" office:value="0.00237685185185185" calcext:value-type="float">
            <text:p>0,00237685185185185000</text:p>
          </table:table-cell>
          <table:table-cell table:formula="of:=[.D1210]-[.D120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17" office:value-type="float" office:value="20553" calcext:value-type="float">
            <text:p>20553</text:p>
          </table:table-cell>
          <table:table-cell office:value-type="float" office:value="8640000" calcext:value-type="float">
            <text:p>8640000</text:p>
          </table:table-cell>
          <table:table-cell table:formula="of:=[.B1210]/[.C1210]" office:value-type="float" office:value="0.00237881944444444" calcext:value-type="float">
            <text:p>0,00237881944444444000</text:p>
          </table:table-cell>
          <table:table-cell table:formula="of:=[.D1211]-[.D1210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17" office:value-type="float" office:value="20570" calcext:value-type="float">
            <text:p>20570</text:p>
          </table:table-cell>
          <table:table-cell office:value-type="float" office:value="8640000" calcext:value-type="float">
            <text:p>8640000</text:p>
          </table:table-cell>
          <table:table-cell table:formula="of:=[.B1211]/[.C1211]" office:value-type="float" office:value="0.00238078703703704" calcext:value-type="float">
            <text:p>0,00238078703703704000</text:p>
          </table:table-cell>
          <table:table-cell table:formula="of:=[.D1212]-[.D121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17" office:value-type="float" office:value="20587" calcext:value-type="float">
            <text:p>20587</text:p>
          </table:table-cell>
          <table:table-cell office:value-type="float" office:value="8640000" calcext:value-type="float">
            <text:p>8640000</text:p>
          </table:table-cell>
          <table:table-cell table:formula="of:=[.B1212]/[.C1212]" office:value-type="float" office:value="0.00238275462962963" calcext:value-type="float">
            <text:p>0,00238275462962963000</text:p>
          </table:table-cell>
          <table:table-cell table:formula="of:=[.D1213]-[.D121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17" office:value-type="float" office:value="20604" calcext:value-type="float">
            <text:p>20604</text:p>
          </table:table-cell>
          <table:table-cell office:value-type="float" office:value="8640000" calcext:value-type="float">
            <text:p>8640000</text:p>
          </table:table-cell>
          <table:table-cell table:formula="of:=[.B1213]/[.C1213]" office:value-type="float" office:value="0.00238472222222222" calcext:value-type="float">
            <text:p>0,00238472222222222000</text:p>
          </table:table-cell>
          <table:table-cell table:formula="of:=[.D1214]-[.D1213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17" office:value-type="float" office:value="20621" calcext:value-type="float">
            <text:p>20621</text:p>
          </table:table-cell>
          <table:table-cell office:value-type="float" office:value="8640000" calcext:value-type="float">
            <text:p>8640000</text:p>
          </table:table-cell>
          <table:table-cell table:formula="of:=[.B1214]/[.C1214]" office:value-type="float" office:value="0.00238668981481482" calcext:value-type="float">
            <text:p>0,00238668981481482000</text:p>
          </table:table-cell>
          <table:table-cell table:formula="of:=[.D1215]-[.D121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17" office:value-type="float" office:value="20638" calcext:value-type="float">
            <text:p>20638</text:p>
          </table:table-cell>
          <table:table-cell office:value-type="float" office:value="8640000" calcext:value-type="float">
            <text:p>8640000</text:p>
          </table:table-cell>
          <table:table-cell table:formula="of:=[.B1215]/[.C1215]" office:value-type="float" office:value="0.00238865740740741" calcext:value-type="float">
            <text:p>0,00238865740740741000</text:p>
          </table:table-cell>
          <table:table-cell table:formula="of:=[.D1216]-[.D121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17" office:value-type="float" office:value="20655" calcext:value-type="float">
            <text:p>20655</text:p>
          </table:table-cell>
          <table:table-cell office:value-type="float" office:value="8640000" calcext:value-type="float">
            <text:p>8640000</text:p>
          </table:table-cell>
          <table:table-cell table:formula="of:=[.B1216]/[.C1216]" office:value-type="float" office:value="0.002390625" calcext:value-type="float">
            <text:p>0,00239062500000000000</text:p>
          </table:table-cell>
          <table:table-cell table:formula="of:=[.D1217]-[.D121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17" office:value-type="float" office:value="20672" calcext:value-type="float">
            <text:p>20672</text:p>
          </table:table-cell>
          <table:table-cell office:value-type="float" office:value="8640000" calcext:value-type="float">
            <text:p>8640000</text:p>
          </table:table-cell>
          <table:table-cell table:formula="of:=[.B1217]/[.C1217]" office:value-type="float" office:value="0.00239259259259259" calcext:value-type="float">
            <text:p>0,00239259259259259000</text:p>
          </table:table-cell>
          <table:table-cell table:formula="of:=[.D1218]-[.D1217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17" office:value-type="float" office:value="20689" calcext:value-type="float">
            <text:p>20689</text:p>
          </table:table-cell>
          <table:table-cell office:value-type="float" office:value="8640000" calcext:value-type="float">
            <text:p>8640000</text:p>
          </table:table-cell>
          <table:table-cell table:formula="of:=[.B1218]/[.C1218]" office:value-type="float" office:value="0.00239456018518519" calcext:value-type="float">
            <text:p>0,00239456018518519000</text:p>
          </table:table-cell>
          <table:table-cell table:formula="of:=[.D1219]-[.D121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17" office:value-type="float" office:value="20706" calcext:value-type="float">
            <text:p>20706</text:p>
          </table:table-cell>
          <table:table-cell office:value-type="float" office:value="8640000" calcext:value-type="float">
            <text:p>8640000</text:p>
          </table:table-cell>
          <table:table-cell table:formula="of:=[.B1219]/[.C1219]" office:value-type="float" office:value="0.00239652777777778" calcext:value-type="float">
            <text:p>0,00239652777777778000</text:p>
          </table:table-cell>
          <table:table-cell table:formula="of:=[.D1220]-[.D121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17" office:value-type="float" office:value="20723" calcext:value-type="float">
            <text:p>20723</text:p>
          </table:table-cell>
          <table:table-cell office:value-type="float" office:value="8640000" calcext:value-type="float">
            <text:p>8640000</text:p>
          </table:table-cell>
          <table:table-cell table:formula="of:=[.B1220]/[.C1220]" office:value-type="float" office:value="0.00239849537037037" calcext:value-type="float">
            <text:p>0,00239849537037037000</text:p>
          </table:table-cell>
          <table:table-cell table:formula="of:=[.D1221]-[.D122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17" office:value-type="float" office:value="20740" calcext:value-type="float">
            <text:p>20740</text:p>
          </table:table-cell>
          <table:table-cell office:value-type="float" office:value="8640000" calcext:value-type="float">
            <text:p>8640000</text:p>
          </table:table-cell>
          <table:table-cell table:formula="of:=[.B1221]/[.C1221]" office:value-type="float" office:value="0.00240046296296296" calcext:value-type="float">
            <text:p>0,00240046296296296000</text:p>
          </table:table-cell>
          <table:table-cell table:formula="of:=[.D1222]-[.D1221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17" office:value-type="float" office:value="20757" calcext:value-type="float">
            <text:p>20757</text:p>
          </table:table-cell>
          <table:table-cell office:value-type="float" office:value="8640000" calcext:value-type="float">
            <text:p>8640000</text:p>
          </table:table-cell>
          <table:table-cell table:formula="of:=[.B1222]/[.C1222]" office:value-type="float" office:value="0.00240243055555556" calcext:value-type="float">
            <text:p>0,00240243055555556000</text:p>
          </table:table-cell>
          <table:table-cell table:formula="of:=[.D1223]-[.D122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17" office:value-type="float" office:value="20774" calcext:value-type="float">
            <text:p>20774</text:p>
          </table:table-cell>
          <table:table-cell office:value-type="float" office:value="8640000" calcext:value-type="float">
            <text:p>8640000</text:p>
          </table:table-cell>
          <table:table-cell table:formula="of:=[.B1223]/[.C1223]" office:value-type="float" office:value="0.00240439814814815" calcext:value-type="float">
            <text:p>0,00240439814814815000</text:p>
          </table:table-cell>
          <table:table-cell table:formula="of:=[.D1224]-[.D122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17" office:value-type="float" office:value="20791" calcext:value-type="float">
            <text:p>20791</text:p>
          </table:table-cell>
          <table:table-cell office:value-type="float" office:value="8640000" calcext:value-type="float">
            <text:p>8640000</text:p>
          </table:table-cell>
          <table:table-cell table:formula="of:=[.B1224]/[.C1224]" office:value-type="float" office:value="0.00240636574074074" calcext:value-type="float">
            <text:p>0,00240636574074074000</text:p>
          </table:table-cell>
          <table:table-cell table:formula="of:=[.D1225]-[.D1224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17" office:value-type="float" office:value="20808" calcext:value-type="float">
            <text:p>20808</text:p>
          </table:table-cell>
          <table:table-cell office:value-type="float" office:value="8640000" calcext:value-type="float">
            <text:p>8640000</text:p>
          </table:table-cell>
          <table:table-cell table:formula="of:=[.B1225]/[.C1225]" office:value-type="float" office:value="0.00240833333333333" calcext:value-type="float">
            <text:p>0,00240833333333333000</text:p>
          </table:table-cell>
          <table:table-cell table:formula="of:=[.D1226]-[.D122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17" office:value-type="float" office:value="20825" calcext:value-type="float">
            <text:p>20825</text:p>
          </table:table-cell>
          <table:table-cell office:value-type="float" office:value="8640000" calcext:value-type="float">
            <text:p>8640000</text:p>
          </table:table-cell>
          <table:table-cell table:formula="of:=[.B1226]/[.C1226]" office:value-type="float" office:value="0.00241030092592593" calcext:value-type="float">
            <text:p>0,00241030092592593000</text:p>
          </table:table-cell>
          <table:table-cell table:formula="of:=[.D1227]-[.D122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17" office:value-type="float" office:value="20842" calcext:value-type="float">
            <text:p>20842</text:p>
          </table:table-cell>
          <table:table-cell office:value-type="float" office:value="8640000" calcext:value-type="float">
            <text:p>8640000</text:p>
          </table:table-cell>
          <table:table-cell table:formula="of:=[.B1227]/[.C1227]" office:value-type="float" office:value="0.00241226851851852" calcext:value-type="float">
            <text:p>0,00241226851851852000</text:p>
          </table:table-cell>
          <table:table-cell table:formula="of:=[.D1228]-[.D122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17" office:value-type="float" office:value="20859" calcext:value-type="float">
            <text:p>20859</text:p>
          </table:table-cell>
          <table:table-cell office:value-type="float" office:value="8640000" calcext:value-type="float">
            <text:p>8640000</text:p>
          </table:table-cell>
          <table:table-cell table:formula="of:=[.B1228]/[.C1228]" office:value-type="float" office:value="0.00241423611111111" calcext:value-type="float">
            <text:p>0,00241423611111111000</text:p>
          </table:table-cell>
          <table:table-cell table:formula="of:=[.D1229]-[.D1228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17" office:value-type="float" office:value="20876" calcext:value-type="float">
            <text:p>20876</text:p>
          </table:table-cell>
          <table:table-cell office:value-type="float" office:value="8640000" calcext:value-type="float">
            <text:p>8640000</text:p>
          </table:table-cell>
          <table:table-cell table:formula="of:=[.B1229]/[.C1229]" office:value-type="float" office:value="0.0024162037037037" calcext:value-type="float">
            <text:p>0,00241620370370370000</text:p>
          </table:table-cell>
          <table:table-cell table:formula="of:=[.D1230]-[.D122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17" office:value-type="float" office:value="20893" calcext:value-type="float">
            <text:p>20893</text:p>
          </table:table-cell>
          <table:table-cell office:value-type="float" office:value="8640000" calcext:value-type="float">
            <text:p>8640000</text:p>
          </table:table-cell>
          <table:table-cell table:formula="of:=[.B1230]/[.C1230]" office:value-type="float" office:value="0.0024181712962963" calcext:value-type="float">
            <text:p>0,00241817129629630000</text:p>
          </table:table-cell>
          <table:table-cell table:formula="of:=[.D1231]-[.D123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17" office:value-type="float" office:value="20910" calcext:value-type="float">
            <text:p>20910</text:p>
          </table:table-cell>
          <table:table-cell office:value-type="float" office:value="8640000" calcext:value-type="float">
            <text:p>8640000</text:p>
          </table:table-cell>
          <table:table-cell table:formula="of:=[.B1231]/[.C1231]" office:value-type="float" office:value="0.00242013888888889" calcext:value-type="float">
            <text:p>0,00242013888888889000</text:p>
          </table:table-cell>
          <table:table-cell table:formula="of:=[.D1232]-[.D1231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17" office:value-type="float" office:value="20927" calcext:value-type="float">
            <text:p>20927</text:p>
          </table:table-cell>
          <table:table-cell office:value-type="float" office:value="8640000" calcext:value-type="float">
            <text:p>8640000</text:p>
          </table:table-cell>
          <table:table-cell table:formula="of:=[.B1232]/[.C1232]" office:value-type="float" office:value="0.00242210648148148" calcext:value-type="float">
            <text:p>0,00242210648148148000</text:p>
          </table:table-cell>
          <table:table-cell table:formula="of:=[.D1233]-[.D123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17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1233]/[.C1233]" office:value-type="float" office:value="0.00242407407407407" calcext:value-type="float">
            <text:p>0,00242407407407407000</text:p>
          </table:table-cell>
          <table:table-cell table:formula="of:=[.D1234]-[.D123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17" office:value-type="float" office:value="20961" calcext:value-type="float">
            <text:p>20961</text:p>
          </table:table-cell>
          <table:table-cell office:value-type="float" office:value="8640000" calcext:value-type="float">
            <text:p>8640000</text:p>
          </table:table-cell>
          <table:table-cell table:formula="of:=[.B1234]/[.C1234]" office:value-type="float" office:value="0.00242604166666667" calcext:value-type="float">
            <text:p>0,00242604166666667000</text:p>
          </table:table-cell>
          <table:table-cell table:formula="of:=[.D1235]-[.D123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17" office:value-type="float" office:value="20978" calcext:value-type="float">
            <text:p>20978</text:p>
          </table:table-cell>
          <table:table-cell office:value-type="float" office:value="8640000" calcext:value-type="float">
            <text:p>8640000</text:p>
          </table:table-cell>
          <table:table-cell table:formula="of:=[.B1235]/[.C1235]" office:value-type="float" office:value="0.00242800925925926" calcext:value-type="float">
            <text:p>0,00242800925925926000</text:p>
          </table:table-cell>
          <table:table-cell table:formula="of:=[.D1236]-[.D1235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17" office:value-type="float" office:value="20995" calcext:value-type="float">
            <text:p>20995</text:p>
          </table:table-cell>
          <table:table-cell office:value-type="float" office:value="8640000" calcext:value-type="float">
            <text:p>8640000</text:p>
          </table:table-cell>
          <table:table-cell table:formula="of:=[.B1236]/[.C1236]" office:value-type="float" office:value="0.00242997685185185" calcext:value-type="float">
            <text:p>0,00242997685185185000</text:p>
          </table:table-cell>
          <table:table-cell table:formula="of:=[.D1237]-[.D123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17" office:value-type="float" office:value="21012" calcext:value-type="float">
            <text:p>21012</text:p>
          </table:table-cell>
          <table:table-cell office:value-type="float" office:value="8640000" calcext:value-type="float">
            <text:p>8640000</text:p>
          </table:table-cell>
          <table:table-cell table:formula="of:=[.B1237]/[.C1237]" office:value-type="float" office:value="0.00243194444444444" calcext:value-type="float">
            <text:p>0,00243194444444444000</text:p>
          </table:table-cell>
          <table:table-cell table:formula="of:=[.D1238]-[.D123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17" office:value-type="float" office:value="21029" calcext:value-type="float">
            <text:p>21029</text:p>
          </table:table-cell>
          <table:table-cell office:value-type="float" office:value="8640000" calcext:value-type="float">
            <text:p>8640000</text:p>
          </table:table-cell>
          <table:table-cell table:formula="of:=[.B1238]/[.C1238]" office:value-type="float" office:value="0.00243391203703704" calcext:value-type="float">
            <text:p>0,00243391203703704000</text:p>
          </table:table-cell>
          <table:table-cell table:formula="of:=[.D1239]-[.D123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17" office:value-type="float" office:value="21046" calcext:value-type="float">
            <text:p>21046</text:p>
          </table:table-cell>
          <table:table-cell office:value-type="float" office:value="8640000" calcext:value-type="float">
            <text:p>8640000</text:p>
          </table:table-cell>
          <table:table-cell table:formula="of:=[.B1239]/[.C1239]" office:value-type="float" office:value="0.00243587962962963" calcext:value-type="float">
            <text:p>0,00243587962962963000</text:p>
          </table:table-cell>
          <table:table-cell table:formula="of:=[.D1240]-[.D1239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17" office:value-type="float" office:value="21063" calcext:value-type="float">
            <text:p>21063</text:p>
          </table:table-cell>
          <table:table-cell office:value-type="float" office:value="8640000" calcext:value-type="float">
            <text:p>8640000</text:p>
          </table:table-cell>
          <table:table-cell table:formula="of:=[.B1240]/[.C1240]" office:value-type="float" office:value="0.00243784722222222" calcext:value-type="float">
            <text:p>0,00243784722222222000</text:p>
          </table:table-cell>
          <table:table-cell table:formula="of:=[.D1241]-[.D124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17" office:value-type="float" office:value="21080" calcext:value-type="float">
            <text:p>21080</text:p>
          </table:table-cell>
          <table:table-cell office:value-type="float" office:value="8640000" calcext:value-type="float">
            <text:p>8640000</text:p>
          </table:table-cell>
          <table:table-cell table:formula="of:=[.B1241]/[.C1241]" office:value-type="float" office:value="0.00243981481481482" calcext:value-type="float">
            <text:p>0,00243981481481482000</text:p>
          </table:table-cell>
          <table:table-cell table:formula="of:=[.D1242]-[.D124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17" office:value-type="float" office:value="21097" calcext:value-type="float">
            <text:p>21097</text:p>
          </table:table-cell>
          <table:table-cell office:value-type="float" office:value="8640000" calcext:value-type="float">
            <text:p>8640000</text:p>
          </table:table-cell>
          <table:table-cell table:formula="of:=[.B1242]/[.C1242]" office:value-type="float" office:value="0.00244178240740741" calcext:value-type="float">
            <text:p>0,00244178240740741000</text:p>
          </table:table-cell>
          <table:table-cell table:formula="of:=[.D1243]-[.D1242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17" office:value-type="float" office:value="21114" calcext:value-type="float">
            <text:p>21114</text:p>
          </table:table-cell>
          <table:table-cell office:value-type="float" office:value="8640000" calcext:value-type="float">
            <text:p>8640000</text:p>
          </table:table-cell>
          <table:table-cell table:formula="of:=[.B1243]/[.C1243]" office:value-type="float" office:value="0.00244375" calcext:value-type="float">
            <text:p>0,00244375000000000000</text:p>
          </table:table-cell>
          <table:table-cell table:formula="of:=[.D1244]-[.D124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17" office:value-type="float" office:value="21131" calcext:value-type="float">
            <text:p>21131</text:p>
          </table:table-cell>
          <table:table-cell office:value-type="float" office:value="8640000" calcext:value-type="float">
            <text:p>8640000</text:p>
          </table:table-cell>
          <table:table-cell table:formula="of:=[.B1244]/[.C1244]" office:value-type="float" office:value="0.00244571759259259" calcext:value-type="float">
            <text:p>0,00244571759259259000</text:p>
          </table:table-cell>
          <table:table-cell table:formula="of:=[.D1245]-[.D124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17" office:value-type="float" office:value="21148" calcext:value-type="float">
            <text:p>21148</text:p>
          </table:table-cell>
          <table:table-cell office:value-type="float" office:value="8640000" calcext:value-type="float">
            <text:p>8640000</text:p>
          </table:table-cell>
          <table:table-cell table:formula="of:=[.B1245]/[.C1245]" office:value-type="float" office:value="0.00244768518518519" calcext:value-type="float">
            <text:p>0,00244768518518519000</text:p>
          </table:table-cell>
          <table:table-cell table:formula="of:=[.D1246]-[.D124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17" office:value-type="float" office:value="21165" calcext:value-type="float">
            <text:p>21165</text:p>
          </table:table-cell>
          <table:table-cell office:value-type="float" office:value="8640000" calcext:value-type="float">
            <text:p>8640000</text:p>
          </table:table-cell>
          <table:table-cell table:formula="of:=[.B1246]/[.C1246]" office:value-type="float" office:value="0.00244965277777778" calcext:value-type="float">
            <text:p>0,00244965277777778000</text:p>
          </table:table-cell>
          <table:table-cell table:formula="of:=[.D1247]-[.D1246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17" office:value-type="float" office:value="21182" calcext:value-type="float">
            <text:p>21182</text:p>
          </table:table-cell>
          <table:table-cell office:value-type="float" office:value="8640000" calcext:value-type="float">
            <text:p>8640000</text:p>
          </table:table-cell>
          <table:table-cell table:formula="of:=[.B1247]/[.C1247]" office:value-type="float" office:value="0.00245162037037037" calcext:value-type="float">
            <text:p>0,00245162037037037000</text:p>
          </table:table-cell>
          <table:table-cell table:formula="of:=[.D1248]-[.D124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17" office:value-type="float" office:value="21199" calcext:value-type="float">
            <text:p>21199</text:p>
          </table:table-cell>
          <table:table-cell office:value-type="float" office:value="8640000" calcext:value-type="float">
            <text:p>8640000</text:p>
          </table:table-cell>
          <table:table-cell table:formula="of:=[.B1248]/[.C1248]" office:value-type="float" office:value="0.00245358796296296" calcext:value-type="float">
            <text:p>0,00245358796296296000</text:p>
          </table:table-cell>
          <table:table-cell table:formula="of:=[.D1249]-[.D124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17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1249]/[.C1249]" office:value-type="float" office:value="0.00245555555555556" calcext:value-type="float">
            <text:p>0,00245555555555556000</text:p>
          </table:table-cell>
          <table:table-cell table:formula="of:=[.D1250]-[.D1249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17" office:value-type="float" office:value="21233" calcext:value-type="float">
            <text:p>21233</text:p>
          </table:table-cell>
          <table:table-cell office:value-type="float" office:value="8640000" calcext:value-type="float">
            <text:p>8640000</text:p>
          </table:table-cell>
          <table:table-cell table:formula="of:=[.B1250]/[.C1250]" office:value-type="float" office:value="0.00245752314814815" calcext:value-type="float">
            <text:p>0,00245752314814815000</text:p>
          </table:table-cell>
          <table:table-cell table:formula="of:=[.D1251]-[.D125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17" office:value-type="float" office:value="21250" calcext:value-type="float">
            <text:p>21250</text:p>
          </table:table-cell>
          <table:table-cell office:value-type="float" office:value="8640000" calcext:value-type="float">
            <text:p>8640000</text:p>
          </table:table-cell>
          <table:table-cell table:formula="of:=[.B1251]/[.C1251]" office:value-type="float" office:value="0.00245949074074074" calcext:value-type="float">
            <text:p>0,00245949074074074000</text:p>
          </table:table-cell>
          <table:table-cell table:formula="of:=[.D1252]-[.D125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17" office:value-type="float" office:value="21267" calcext:value-type="float">
            <text:p>21267</text:p>
          </table:table-cell>
          <table:table-cell office:value-type="float" office:value="8640000" calcext:value-type="float">
            <text:p>8640000</text:p>
          </table:table-cell>
          <table:table-cell table:formula="of:=[.B1252]/[.C1252]" office:value-type="float" office:value="0.00246145833333333" calcext:value-type="float">
            <text:p>0,00246145833333333000</text:p>
          </table:table-cell>
          <table:table-cell table:formula="of:=[.D1253]-[.D125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17" office:value-type="float" office:value="21284" calcext:value-type="float">
            <text:p>21284</text:p>
          </table:table-cell>
          <table:table-cell office:value-type="float" office:value="8640000" calcext:value-type="float">
            <text:p>8640000</text:p>
          </table:table-cell>
          <table:table-cell table:formula="of:=[.B1253]/[.C1253]" office:value-type="float" office:value="0.00246342592592593" calcext:value-type="float">
            <text:p>0,00246342592592593000</text:p>
          </table:table-cell>
          <table:table-cell table:formula="of:=[.D1254]-[.D1253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17" office:value-type="float" office:value="21301" calcext:value-type="float">
            <text:p>21301</text:p>
          </table:table-cell>
          <table:table-cell office:value-type="float" office:value="8640000" calcext:value-type="float">
            <text:p>8640000</text:p>
          </table:table-cell>
          <table:table-cell table:formula="of:=[.B1254]/[.C1254]" office:value-type="float" office:value="0.00246539351851852" calcext:value-type="float">
            <text:p>0,00246539351851852000</text:p>
          </table:table-cell>
          <table:table-cell table:formula="of:=[.D1255]-[.D125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17" office:value-type="float" office:value="21318" calcext:value-type="float">
            <text:p>21318</text:p>
          </table:table-cell>
          <table:table-cell office:value-type="float" office:value="8640000" calcext:value-type="float">
            <text:p>8640000</text:p>
          </table:table-cell>
          <table:table-cell table:formula="of:=[.B1255]/[.C1255]" office:value-type="float" office:value="0.00246736111111111" calcext:value-type="float">
            <text:p>0,00246736111111111000</text:p>
          </table:table-cell>
          <table:table-cell table:formula="of:=[.D1256]-[.D125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17" office:value-type="float" office:value="21335" calcext:value-type="float">
            <text:p>21335</text:p>
          </table:table-cell>
          <table:table-cell office:value-type="float" office:value="8640000" calcext:value-type="float">
            <text:p>8640000</text:p>
          </table:table-cell>
          <table:table-cell table:formula="of:=[.B1256]/[.C1256]" office:value-type="float" office:value="0.0024693287037037" calcext:value-type="float">
            <text:p>0,00246932870370370000</text:p>
          </table:table-cell>
          <table:table-cell table:formula="of:=[.D1257]-[.D125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17" office:value-type="float" office:value="21352" calcext:value-type="float">
            <text:p>21352</text:p>
          </table:table-cell>
          <table:table-cell office:value-type="float" office:value="8640000" calcext:value-type="float">
            <text:p>8640000</text:p>
          </table:table-cell>
          <table:table-cell table:formula="of:=[.B1257]/[.C1257]" office:value-type="float" office:value="0.0024712962962963" calcext:value-type="float">
            <text:p>0,00247129629629630000</text:p>
          </table:table-cell>
          <table:table-cell table:formula="of:=[.D1258]-[.D1257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17" office:value-type="float" office:value="21369" calcext:value-type="float">
            <text:p>21369</text:p>
          </table:table-cell>
          <table:table-cell office:value-type="float" office:value="8640000" calcext:value-type="float">
            <text:p>8640000</text:p>
          </table:table-cell>
          <table:table-cell table:formula="of:=[.B1258]/[.C1258]" office:value-type="float" office:value="0.00247326388888889" calcext:value-type="float">
            <text:p>0,00247326388888889000</text:p>
          </table:table-cell>
          <table:table-cell table:formula="of:=[.D1259]-[.D125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17" office:value-type="float" office:value="21386" calcext:value-type="float">
            <text:p>21386</text:p>
          </table:table-cell>
          <table:table-cell office:value-type="float" office:value="8640000" calcext:value-type="float">
            <text:p>8640000</text:p>
          </table:table-cell>
          <table:table-cell table:formula="of:=[.B1259]/[.C1259]" office:value-type="float" office:value="0.00247523148148148" calcext:value-type="float">
            <text:p>0,00247523148148148000</text:p>
          </table:table-cell>
          <table:table-cell table:formula="of:=[.D1260]-[.D125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17" office:value-type="float" office:value="21403" calcext:value-type="float">
            <text:p>21403</text:p>
          </table:table-cell>
          <table:table-cell office:value-type="float" office:value="8640000" calcext:value-type="float">
            <text:p>8640000</text:p>
          </table:table-cell>
          <table:table-cell table:formula="of:=[.B1260]/[.C1260]" office:value-type="float" office:value="0.00247719907407407" calcext:value-type="float">
            <text:p>0,00247719907407407000</text:p>
          </table:table-cell>
          <table:table-cell table:formula="of:=[.D1261]-[.D1260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17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1261]/[.C1261]" office:value-type="float" office:value="0.00247916666666667" calcext:value-type="float">
            <text:p>0,00247916666666667000</text:p>
          </table:table-cell>
          <table:table-cell table:formula="of:=[.D1262]-[.D126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17" office:value-type="float" office:value="21437" calcext:value-type="float">
            <text:p>21437</text:p>
          </table:table-cell>
          <table:table-cell office:value-type="float" office:value="8640000" calcext:value-type="float">
            <text:p>8640000</text:p>
          </table:table-cell>
          <table:table-cell table:formula="of:=[.B1262]/[.C1262]" office:value-type="float" office:value="0.00248113425925926" calcext:value-type="float">
            <text:p>0,00248113425925926000</text:p>
          </table:table-cell>
          <table:table-cell table:formula="of:=[.D1263]-[.D126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17" office:value-type="float" office:value="21454" calcext:value-type="float">
            <text:p>21454</text:p>
          </table:table-cell>
          <table:table-cell office:value-type="float" office:value="8640000" calcext:value-type="float">
            <text:p>8640000</text:p>
          </table:table-cell>
          <table:table-cell table:formula="of:=[.B1263]/[.C1263]" office:value-type="float" office:value="0.00248310185185185" calcext:value-type="float">
            <text:p>0,00248310185185185000</text:p>
          </table:table-cell>
          <table:table-cell table:formula="of:=[.D1264]-[.D126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17" office:value-type="float" office:value="21471" calcext:value-type="float">
            <text:p>21471</text:p>
          </table:table-cell>
          <table:table-cell office:value-type="float" office:value="8640000" calcext:value-type="float">
            <text:p>8640000</text:p>
          </table:table-cell>
          <table:table-cell table:formula="of:=[.B1264]/[.C1264]" office:value-type="float" office:value="0.00248506944444444" calcext:value-type="float">
            <text:p>0,00248506944444444000</text:p>
          </table:table-cell>
          <table:table-cell table:formula="of:=[.D1265]-[.D1264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1264]+17" office:value-type="float" office:value="21488" calcext:value-type="float">
            <text:p>21488</text:p>
          </table:table-cell>
          <table:table-cell office:value-type="float" office:value="8640000" calcext:value-type="float">
            <text:p>8640000</text:p>
          </table:table-cell>
          <table:table-cell table:formula="of:=[.B1265]/[.C1265]" office:value-type="float" office:value="0.00248703703703704" calcext:value-type="float">
            <text:p>0,00248703703703704000</text:p>
          </table:table-cell>
          <table:table-cell table:formula="of:=[.D1266]-[.D126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1265]+17" office:value-type="float" office:value="21505" calcext:value-type="float">
            <text:p>21505</text:p>
          </table:table-cell>
          <table:table-cell office:value-type="float" office:value="8640000" calcext:value-type="float">
            <text:p>8640000</text:p>
          </table:table-cell>
          <table:table-cell table:formula="of:=[.B1266]/[.C1266]" office:value-type="float" office:value="0.00248900462962963" calcext:value-type="float">
            <text:p>0,00248900462962963000</text:p>
          </table:table-cell>
          <table:table-cell table:formula="of:=[.D1267]-[.D126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1266]+17" office:value-type="float" office:value="21522" calcext:value-type="float">
            <text:p>21522</text:p>
          </table:table-cell>
          <table:table-cell office:value-type="float" office:value="8640000" calcext:value-type="float">
            <text:p>8640000</text:p>
          </table:table-cell>
          <table:table-cell table:formula="of:=[.B1267]/[.C1267]" office:value-type="float" office:value="0.00249097222222222" calcext:value-type="float">
            <text:p>0,00249097222222222000</text:p>
          </table:table-cell>
          <table:table-cell table:formula="of:=[.D1268]-[.D1267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1267]+17" office:value-type="float" office:value="21539" calcext:value-type="float">
            <text:p>21539</text:p>
          </table:table-cell>
          <table:table-cell office:value-type="float" office:value="8640000" calcext:value-type="float">
            <text:p>8640000</text:p>
          </table:table-cell>
          <table:table-cell table:formula="of:=[.B1268]/[.C1268]" office:value-type="float" office:value="0.00249293981481482" calcext:value-type="float">
            <text:p>0,00249293981481482000</text:p>
          </table:table-cell>
          <table:table-cell table:formula="of:=[.D1269]-[.D126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1268]+17" office:value-type="float" office:value="21556" calcext:value-type="float">
            <text:p>21556</text:p>
          </table:table-cell>
          <table:table-cell office:value-type="float" office:value="8640000" calcext:value-type="float">
            <text:p>8640000</text:p>
          </table:table-cell>
          <table:table-cell table:formula="of:=[.B1269]/[.C1269]" office:value-type="float" office:value="0.00249490740740741" calcext:value-type="float">
            <text:p>0,00249490740740741000</text:p>
          </table:table-cell>
          <table:table-cell table:formula="of:=[.D1270]-[.D126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1269]+17" office:value-type="float" office:value="21573" calcext:value-type="float">
            <text:p>21573</text:p>
          </table:table-cell>
          <table:table-cell office:value-type="float" office:value="8640000" calcext:value-type="float">
            <text:p>8640000</text:p>
          </table:table-cell>
          <table:table-cell table:formula="of:=[.B1270]/[.C1270]" office:value-type="float" office:value="0.002496875" calcext:value-type="float">
            <text:p>0,00249687500000000000</text:p>
          </table:table-cell>
          <table:table-cell table:formula="of:=[.D1271]-[.D127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1270]+17" office:value-type="float" office:value="21590" calcext:value-type="float">
            <text:p>21590</text:p>
          </table:table-cell>
          <table:table-cell office:value-type="float" office:value="8640000" calcext:value-type="float">
            <text:p>8640000</text:p>
          </table:table-cell>
          <table:table-cell table:formula="of:=[.B1271]/[.C1271]" office:value-type="float" office:value="0.00249884259259259" calcext:value-type="float">
            <text:p>0,00249884259259259000</text:p>
          </table:table-cell>
          <table:table-cell table:formula="of:=[.D1272]-[.D1271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1271]+17" office:value-type="float" office:value="21607" calcext:value-type="float">
            <text:p>21607</text:p>
          </table:table-cell>
          <table:table-cell office:value-type="float" office:value="8640000" calcext:value-type="float">
            <text:p>8640000</text:p>
          </table:table-cell>
          <table:table-cell table:formula="of:=[.B1272]/[.C1272]" office:value-type="float" office:value="0.00250081018518519" calcext:value-type="float">
            <text:p>0,00250081018518519000</text:p>
          </table:table-cell>
          <table:table-cell table:formula="of:=[.D1273]-[.D127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1272]+17" office:value-type="float" office:value="21624" calcext:value-type="float">
            <text:p>21624</text:p>
          </table:table-cell>
          <table:table-cell office:value-type="float" office:value="8640000" calcext:value-type="float">
            <text:p>8640000</text:p>
          </table:table-cell>
          <table:table-cell table:formula="of:=[.B1273]/[.C1273]" office:value-type="float" office:value="0.00250277777777778" calcext:value-type="float">
            <text:p>0,00250277777777778000</text:p>
          </table:table-cell>
          <table:table-cell table:formula="of:=[.D1274]-[.D127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1273]+17" office:value-type="float" office:value="21641" calcext:value-type="float">
            <text:p>21641</text:p>
          </table:table-cell>
          <table:table-cell office:value-type="float" office:value="8640000" calcext:value-type="float">
            <text:p>8640000</text:p>
          </table:table-cell>
          <table:table-cell table:formula="of:=[.B1274]/[.C1274]" office:value-type="float" office:value="0.00250474537037037" calcext:value-type="float">
            <text:p>0,00250474537037037000</text:p>
          </table:table-cell>
          <table:table-cell table:formula="of:=[.D1275]-[.D127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1274]+17" office:value-type="float" office:value="21658" calcext:value-type="float">
            <text:p>21658</text:p>
          </table:table-cell>
          <table:table-cell office:value-type="float" office:value="8640000" calcext:value-type="float">
            <text:p>8640000</text:p>
          </table:table-cell>
          <table:table-cell table:formula="of:=[.B1275]/[.C1275]" office:value-type="float" office:value="0.00250671296296296" calcext:value-type="float">
            <text:p>0,00250671296296296000</text:p>
          </table:table-cell>
          <table:table-cell table:formula="of:=[.D1276]-[.D1275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1275]+17" office:value-type="float" office:value="21675" calcext:value-type="float">
            <text:p>21675</text:p>
          </table:table-cell>
          <table:table-cell office:value-type="float" office:value="8640000" calcext:value-type="float">
            <text:p>8640000</text:p>
          </table:table-cell>
          <table:table-cell table:formula="of:=[.B1276]/[.C1276]" office:value-type="float" office:value="0.00250868055555556" calcext:value-type="float">
            <text:p>0,00250868055555556000</text:p>
          </table:table-cell>
          <table:table-cell table:formula="of:=[.D1277]-[.D127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1276]+17" office:value-type="float" office:value="21692" calcext:value-type="float">
            <text:p>21692</text:p>
          </table:table-cell>
          <table:table-cell office:value-type="float" office:value="8640000" calcext:value-type="float">
            <text:p>8640000</text:p>
          </table:table-cell>
          <table:table-cell table:formula="of:=[.B1277]/[.C1277]" office:value-type="float" office:value="0.00251064814814815" calcext:value-type="float">
            <text:p>0,00251064814814815000</text:p>
          </table:table-cell>
          <table:table-cell table:formula="of:=[.D1278]-[.D127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1277]+17" office:value-type="float" office:value="21709" calcext:value-type="float">
            <text:p>21709</text:p>
          </table:table-cell>
          <table:table-cell office:value-type="float" office:value="8640000" calcext:value-type="float">
            <text:p>8640000</text:p>
          </table:table-cell>
          <table:table-cell table:formula="of:=[.B1278]/[.C1278]" office:value-type="float" office:value="0.00251261574074074" calcext:value-type="float">
            <text:p>0,00251261574074074000</text:p>
          </table:table-cell>
          <table:table-cell table:formula="of:=[.D1279]-[.D1278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1278]+17" office:value-type="float" office:value="21726" calcext:value-type="float">
            <text:p>21726</text:p>
          </table:table-cell>
          <table:table-cell office:value-type="float" office:value="8640000" calcext:value-type="float">
            <text:p>8640000</text:p>
          </table:table-cell>
          <table:table-cell table:formula="of:=[.B1279]/[.C1279]" office:value-type="float" office:value="0.00251458333333333" calcext:value-type="float">
            <text:p>0,00251458333333333000</text:p>
          </table:table-cell>
          <table:table-cell table:formula="of:=[.D1280]-[.D127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1279]+17" office:value-type="float" office:value="21743" calcext:value-type="float">
            <text:p>21743</text:p>
          </table:table-cell>
          <table:table-cell office:value-type="float" office:value="8640000" calcext:value-type="float">
            <text:p>8640000</text:p>
          </table:table-cell>
          <table:table-cell table:formula="of:=[.B1280]/[.C1280]" office:value-type="float" office:value="0.00251655092592593" calcext:value-type="float">
            <text:p>0,00251655092592593000</text:p>
          </table:table-cell>
          <table:table-cell table:formula="of:=[.D1281]-[.D128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1280]+17" office:value-type="float" office:value="21760" calcext:value-type="float">
            <text:p>21760</text:p>
          </table:table-cell>
          <table:table-cell office:value-type="float" office:value="8640000" calcext:value-type="float">
            <text:p>8640000</text:p>
          </table:table-cell>
          <table:table-cell table:formula="of:=[.B1281]/[.C1281]" office:value-type="float" office:value="0.00251851851851852" calcext:value-type="float">
            <text:p>0,00251851851851852000</text:p>
          </table:table-cell>
          <table:table-cell table:formula="of:=[.D1282]-[.D128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1281]+17" office:value-type="float" office:value="21777" calcext:value-type="float">
            <text:p>21777</text:p>
          </table:table-cell>
          <table:table-cell office:value-type="float" office:value="8640000" calcext:value-type="float">
            <text:p>8640000</text:p>
          </table:table-cell>
          <table:table-cell table:formula="of:=[.B1282]/[.C1282]" office:value-type="float" office:value="0.00252048611111111" calcext:value-type="float">
            <text:p>0,00252048611111111000</text:p>
          </table:table-cell>
          <table:table-cell table:formula="of:=[.D1283]-[.D1282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1282]+17" office:value-type="float" office:value="21794" calcext:value-type="float">
            <text:p>21794</text:p>
          </table:table-cell>
          <table:table-cell office:value-type="float" office:value="8640000" calcext:value-type="float">
            <text:p>8640000</text:p>
          </table:table-cell>
          <table:table-cell table:formula="of:=[.B1283]/[.C1283]" office:value-type="float" office:value="0.0025224537037037" calcext:value-type="float">
            <text:p>0,00252245370370370000</text:p>
          </table:table-cell>
          <table:table-cell table:formula="of:=[.D1284]-[.D128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1283]+17" office:value-type="float" office:value="21811" calcext:value-type="float">
            <text:p>21811</text:p>
          </table:table-cell>
          <table:table-cell office:value-type="float" office:value="8640000" calcext:value-type="float">
            <text:p>8640000</text:p>
          </table:table-cell>
          <table:table-cell table:formula="of:=[.B1284]/[.C1284]" office:value-type="float" office:value="0.0025244212962963" calcext:value-type="float">
            <text:p>0,00252442129629630000</text:p>
          </table:table-cell>
          <table:table-cell table:formula="of:=[.D1285]-[.D128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1284]+17" office:value-type="float" office:value="21828" calcext:value-type="float">
            <text:p>21828</text:p>
          </table:table-cell>
          <table:table-cell office:value-type="float" office:value="8640000" calcext:value-type="float">
            <text:p>8640000</text:p>
          </table:table-cell>
          <table:table-cell table:formula="of:=[.B1285]/[.C1285]" office:value-type="float" office:value="0.00252638888888889" calcext:value-type="float">
            <text:p>0,00252638888888889000</text:p>
          </table:table-cell>
          <table:table-cell table:formula="of:=[.D1286]-[.D1285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1285]+17" office:value-type="float" office:value="21845" calcext:value-type="float">
            <text:p>21845</text:p>
          </table:table-cell>
          <table:table-cell office:value-type="float" office:value="8640000" calcext:value-type="float">
            <text:p>8640000</text:p>
          </table:table-cell>
          <table:table-cell table:formula="of:=[.B1286]/[.C1286]" office:value-type="float" office:value="0.00252835648148148" calcext:value-type="float">
            <text:p>0,00252835648148148000</text:p>
          </table:table-cell>
          <table:table-cell table:formula="of:=[.D1287]-[.D128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1286]+17" office:value-type="float" office:value="21862" calcext:value-type="float">
            <text:p>21862</text:p>
          </table:table-cell>
          <table:table-cell office:value-type="float" office:value="8640000" calcext:value-type="float">
            <text:p>8640000</text:p>
          </table:table-cell>
          <table:table-cell table:formula="of:=[.B1287]/[.C1287]" office:value-type="float" office:value="0.00253032407407407" calcext:value-type="float">
            <text:p>0,00253032407407407000</text:p>
          </table:table-cell>
          <table:table-cell table:formula="of:=[.D1288]-[.D128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1287]+17" office:value-type="float" office:value="21879" calcext:value-type="float">
            <text:p>21879</text:p>
          </table:table-cell>
          <table:table-cell office:value-type="float" office:value="8640000" calcext:value-type="float">
            <text:p>8640000</text:p>
          </table:table-cell>
          <table:table-cell table:formula="of:=[.B1288]/[.C1288]" office:value-type="float" office:value="0.00253229166666667" calcext:value-type="float">
            <text:p>0,00253229166666667000</text:p>
          </table:table-cell>
          <table:table-cell table:formula="of:=[.D1289]-[.D128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1288]+17" office:value-type="float" office:value="21896" calcext:value-type="float">
            <text:p>21896</text:p>
          </table:table-cell>
          <table:table-cell office:value-type="float" office:value="8640000" calcext:value-type="float">
            <text:p>8640000</text:p>
          </table:table-cell>
          <table:table-cell table:formula="of:=[.B1289]/[.C1289]" office:value-type="float" office:value="0.00253425925925926" calcext:value-type="float">
            <text:p>0,00253425925925926000</text:p>
          </table:table-cell>
          <table:table-cell table:formula="of:=[.D1290]-[.D1289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1289]+17" office:value-type="float" office:value="21913" calcext:value-type="float">
            <text:p>21913</text:p>
          </table:table-cell>
          <table:table-cell office:value-type="float" office:value="8640000" calcext:value-type="float">
            <text:p>8640000</text:p>
          </table:table-cell>
          <table:table-cell table:formula="of:=[.B1290]/[.C1290]" office:value-type="float" office:value="0.00253622685185185" calcext:value-type="float">
            <text:p>0,00253622685185185000</text:p>
          </table:table-cell>
          <table:table-cell table:formula="of:=[.D1291]-[.D129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1290]+17" office:value-type="float" office:value="21930" calcext:value-type="float">
            <text:p>21930</text:p>
          </table:table-cell>
          <table:table-cell office:value-type="float" office:value="8640000" calcext:value-type="float">
            <text:p>8640000</text:p>
          </table:table-cell>
          <table:table-cell table:formula="of:=[.B1291]/[.C1291]" office:value-type="float" office:value="0.00253819444444444" calcext:value-type="float">
            <text:p>0,00253819444444444000</text:p>
          </table:table-cell>
          <table:table-cell table:formula="of:=[.D1292]-[.D129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1291]+17" office:value-type="float" office:value="21947" calcext:value-type="float">
            <text:p>21947</text:p>
          </table:table-cell>
          <table:table-cell office:value-type="float" office:value="8640000" calcext:value-type="float">
            <text:p>8640000</text:p>
          </table:table-cell>
          <table:table-cell table:formula="of:=[.B1292]/[.C1292]" office:value-type="float" office:value="0.00254016203703704" calcext:value-type="float">
            <text:p>0,00254016203703704000</text:p>
          </table:table-cell>
          <table:table-cell table:formula="of:=[.D1293]-[.D129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1292]+17" office:value-type="float" office:value="21964" calcext:value-type="float">
            <text:p>21964</text:p>
          </table:table-cell>
          <table:table-cell office:value-type="float" office:value="8640000" calcext:value-type="float">
            <text:p>8640000</text:p>
          </table:table-cell>
          <table:table-cell table:formula="of:=[.B1293]/[.C1293]" office:value-type="float" office:value="0.00254212962962963" calcext:value-type="float">
            <text:p>0,00254212962962963000</text:p>
          </table:table-cell>
          <table:table-cell table:formula="of:=[.D1294]-[.D1293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1293]+17" office:value-type="float" office:value="21981" calcext:value-type="float">
            <text:p>21981</text:p>
          </table:table-cell>
          <table:table-cell office:value-type="float" office:value="8640000" calcext:value-type="float">
            <text:p>8640000</text:p>
          </table:table-cell>
          <table:table-cell table:formula="of:=[.B1294]/[.C1294]" office:value-type="float" office:value="0.00254409722222222" calcext:value-type="float">
            <text:p>0,00254409722222222000</text:p>
          </table:table-cell>
          <table:table-cell table:formula="of:=[.D1295]-[.D129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1294]+17" office:value-type="float" office:value="21998" calcext:value-type="float">
            <text:p>21998</text:p>
          </table:table-cell>
          <table:table-cell office:value-type="float" office:value="8640000" calcext:value-type="float">
            <text:p>8640000</text:p>
          </table:table-cell>
          <table:table-cell table:formula="of:=[.B1295]/[.C1295]" office:value-type="float" office:value="0.00254606481481482" calcext:value-type="float">
            <text:p>0,00254606481481482000</text:p>
          </table:table-cell>
          <table:table-cell table:formula="of:=[.D1296]-[.D129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1295]+17" office:value-type="float" office:value="22015" calcext:value-type="float">
            <text:p>22015</text:p>
          </table:table-cell>
          <table:table-cell office:value-type="float" office:value="8640000" calcext:value-type="float">
            <text:p>8640000</text:p>
          </table:table-cell>
          <table:table-cell table:formula="of:=[.B1296]/[.C1296]" office:value-type="float" office:value="0.00254803240740741" calcext:value-type="float">
            <text:p>0,00254803240740741000</text:p>
          </table:table-cell>
          <table:table-cell table:formula="of:=[.D1297]-[.D1296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1296]+17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1297]/[.C1297]" office:value-type="float" office:value="0.00255" calcext:value-type="float">
            <text:p>0,00255000000000000000</text:p>
          </table:table-cell>
          <table:table-cell table:formula="of:=[.D1298]-[.D129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1297]+17" office:value-type="float" office:value="22049" calcext:value-type="float">
            <text:p>22049</text:p>
          </table:table-cell>
          <table:table-cell office:value-type="float" office:value="8640000" calcext:value-type="float">
            <text:p>8640000</text:p>
          </table:table-cell>
          <table:table-cell table:formula="of:=[.B1298]/[.C1298]" office:value-type="float" office:value="0.00255196759259259" calcext:value-type="float">
            <text:p>0,00255196759259259000</text:p>
          </table:table-cell>
          <table:table-cell table:formula="of:=[.D1299]-[.D129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1298]+17" office:value-type="float" office:value="22066" calcext:value-type="float">
            <text:p>22066</text:p>
          </table:table-cell>
          <table:table-cell office:value-type="float" office:value="8640000" calcext:value-type="float">
            <text:p>8640000</text:p>
          </table:table-cell>
          <table:table-cell table:formula="of:=[.B1299]/[.C1299]" office:value-type="float" office:value="0.00255393518518519" calcext:value-type="float">
            <text:p>0,00255393518518519000</text:p>
          </table:table-cell>
          <table:table-cell table:formula="of:=[.D1300]-[.D129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1299]+17" office:value-type="float" office:value="22083" calcext:value-type="float">
            <text:p>22083</text:p>
          </table:table-cell>
          <table:table-cell office:value-type="float" office:value="8640000" calcext:value-type="float">
            <text:p>8640000</text:p>
          </table:table-cell>
          <table:table-cell table:formula="of:=[.B1300]/[.C1300]" office:value-type="float" office:value="0.00255590277777778" calcext:value-type="float">
            <text:p>0,00255590277777778000</text:p>
          </table:table-cell>
          <table:table-cell table:formula="of:=[.D1301]-[.D1300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1300]+17" office:value-type="float" office:value="22100" calcext:value-type="float">
            <text:p>22100</text:p>
          </table:table-cell>
          <table:table-cell office:value-type="float" office:value="8640000" calcext:value-type="float">
            <text:p>8640000</text:p>
          </table:table-cell>
          <table:table-cell table:formula="of:=[.B1301]/[.C1301]" office:value-type="float" office:value="0.00255787037037037" calcext:value-type="float">
            <text:p>0,00255787037037037000</text:p>
          </table:table-cell>
          <table:table-cell table:formula="of:=[.D1302]-[.D130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1301]+17" office:value-type="float" office:value="22117" calcext:value-type="float">
            <text:p>22117</text:p>
          </table:table-cell>
          <table:table-cell office:value-type="float" office:value="8640000" calcext:value-type="float">
            <text:p>8640000</text:p>
          </table:table-cell>
          <table:table-cell table:formula="of:=[.B1302]/[.C1302]" office:value-type="float" office:value="0.00255983796296296" calcext:value-type="float">
            <text:p>0,00255983796296296000</text:p>
          </table:table-cell>
          <table:table-cell table:formula="of:=[.D1303]-[.D130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1302]+17" office:value-type="float" office:value="22134" calcext:value-type="float">
            <text:p>22134</text:p>
          </table:table-cell>
          <table:table-cell office:value-type="float" office:value="8640000" calcext:value-type="float">
            <text:p>8640000</text:p>
          </table:table-cell>
          <table:table-cell table:formula="of:=[.B1303]/[.C1303]" office:value-type="float" office:value="0.00256180555555556" calcext:value-type="float">
            <text:p>0,00256180555555556000</text:p>
          </table:table-cell>
          <table:table-cell table:formula="of:=[.D1304]-[.D1303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1303]+17" office:value-type="float" office:value="22151" calcext:value-type="float">
            <text:p>22151</text:p>
          </table:table-cell>
          <table:table-cell office:value-type="float" office:value="8640000" calcext:value-type="float">
            <text:p>8640000</text:p>
          </table:table-cell>
          <table:table-cell table:formula="of:=[.B1304]/[.C1304]" office:value-type="float" office:value="0.00256377314814815" calcext:value-type="float">
            <text:p>0,00256377314814815000</text:p>
          </table:table-cell>
          <table:table-cell table:formula="of:=[.D1305]-[.D130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1304]+17" office:value-type="float" office:value="22168" calcext:value-type="float">
            <text:p>22168</text:p>
          </table:table-cell>
          <table:table-cell office:value-type="float" office:value="8640000" calcext:value-type="float">
            <text:p>8640000</text:p>
          </table:table-cell>
          <table:table-cell table:formula="of:=[.B1305]/[.C1305]" office:value-type="float" office:value="0.00256574074074074" calcext:value-type="float">
            <text:p>0,00256574074074074000</text:p>
          </table:table-cell>
          <table:table-cell table:formula="of:=[.D1306]-[.D130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1305]+17" office:value-type="float" office:value="22185" calcext:value-type="float">
            <text:p>22185</text:p>
          </table:table-cell>
          <table:table-cell office:value-type="float" office:value="8640000" calcext:value-type="float">
            <text:p>8640000</text:p>
          </table:table-cell>
          <table:table-cell table:formula="of:=[.B1306]/[.C1306]" office:value-type="float" office:value="0.00256770833333333" calcext:value-type="float">
            <text:p>0,00256770833333333000</text:p>
          </table:table-cell>
          <table:table-cell table:formula="of:=[.D1307]-[.D130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1306]+17" office:value-type="float" office:value="22202" calcext:value-type="float">
            <text:p>22202</text:p>
          </table:table-cell>
          <table:table-cell office:value-type="float" office:value="8640000" calcext:value-type="float">
            <text:p>8640000</text:p>
          </table:table-cell>
          <table:table-cell table:formula="of:=[.B1307]/[.C1307]" office:value-type="float" office:value="0.00256967592592593" calcext:value-type="float">
            <text:p>0,00256967592592593000</text:p>
          </table:table-cell>
          <table:table-cell table:formula="of:=[.D1308]-[.D1307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1307]+17" office:value-type="float" office:value="22219" calcext:value-type="float">
            <text:p>22219</text:p>
          </table:table-cell>
          <table:table-cell office:value-type="float" office:value="8640000" calcext:value-type="float">
            <text:p>8640000</text:p>
          </table:table-cell>
          <table:table-cell table:formula="of:=[.B1308]/[.C1308]" office:value-type="float" office:value="0.00257164351851852" calcext:value-type="float">
            <text:p>0,00257164351851852000</text:p>
          </table:table-cell>
          <table:table-cell table:formula="of:=[.D1309]-[.D130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1308]+17" office:value-type="float" office:value="22236" calcext:value-type="float">
            <text:p>22236</text:p>
          </table:table-cell>
          <table:table-cell office:value-type="float" office:value="8640000" calcext:value-type="float">
            <text:p>8640000</text:p>
          </table:table-cell>
          <table:table-cell table:formula="of:=[.B1309]/[.C1309]" office:value-type="float" office:value="0.00257361111111111" calcext:value-type="float">
            <text:p>0,00257361111111111000</text:p>
          </table:table-cell>
          <table:table-cell table:formula="of:=[.D1310]-[.D130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1309]+17" office:value-type="float" office:value="22253" calcext:value-type="float">
            <text:p>22253</text:p>
          </table:table-cell>
          <table:table-cell office:value-type="float" office:value="8640000" calcext:value-type="float">
            <text:p>8640000</text:p>
          </table:table-cell>
          <table:table-cell table:formula="of:=[.B1310]/[.C1310]" office:value-type="float" office:value="0.0025755787037037" calcext:value-type="float">
            <text:p>0,00257557870370370000</text:p>
          </table:table-cell>
          <table:table-cell table:formula="of:=[.D1311]-[.D131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1310]+17" office:value-type="float" office:value="22270" calcext:value-type="float">
            <text:p>22270</text:p>
          </table:table-cell>
          <table:table-cell office:value-type="float" office:value="8640000" calcext:value-type="float">
            <text:p>8640000</text:p>
          </table:table-cell>
          <table:table-cell table:formula="of:=[.B1311]/[.C1311]" office:value-type="float" office:value="0.0025775462962963" calcext:value-type="float">
            <text:p>0,00257754629629630000</text:p>
          </table:table-cell>
          <table:table-cell table:formula="of:=[.D1312]-[.D1311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1311]+17" office:value-type="float" office:value="22287" calcext:value-type="float">
            <text:p>22287</text:p>
          </table:table-cell>
          <table:table-cell office:value-type="float" office:value="8640000" calcext:value-type="float">
            <text:p>8640000</text:p>
          </table:table-cell>
          <table:table-cell table:formula="of:=[.B1312]/[.C1312]" office:value-type="float" office:value="0.00257951388888889" calcext:value-type="float">
            <text:p>0,00257951388888889000</text:p>
          </table:table-cell>
          <table:table-cell table:formula="of:=[.D1313]-[.D131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1312]+17" office:value-type="float" office:value="22304" calcext:value-type="float">
            <text:p>22304</text:p>
          </table:table-cell>
          <table:table-cell office:value-type="float" office:value="8640000" calcext:value-type="float">
            <text:p>8640000</text:p>
          </table:table-cell>
          <table:table-cell table:formula="of:=[.B1313]/[.C1313]" office:value-type="float" office:value="0.00258148148148148" calcext:value-type="float">
            <text:p>0,00258148148148148000</text:p>
          </table:table-cell>
          <table:table-cell table:formula="of:=[.D1314]-[.D131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1313]+17" office:value-type="float" office:value="22321" calcext:value-type="float">
            <text:p>22321</text:p>
          </table:table-cell>
          <table:table-cell office:value-type="float" office:value="8640000" calcext:value-type="float">
            <text:p>8640000</text:p>
          </table:table-cell>
          <table:table-cell table:formula="of:=[.B1314]/[.C1314]" office:value-type="float" office:value="0.00258344907407407" calcext:value-type="float">
            <text:p>0,00258344907407407000</text:p>
          </table:table-cell>
          <table:table-cell table:formula="of:=[.D1315]-[.D1314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1314]+17" office:value-type="float" office:value="22338" calcext:value-type="float">
            <text:p>22338</text:p>
          </table:table-cell>
          <table:table-cell office:value-type="float" office:value="8640000" calcext:value-type="float">
            <text:p>8640000</text:p>
          </table:table-cell>
          <table:table-cell table:formula="of:=[.B1315]/[.C1315]" office:value-type="float" office:value="0.00258541666666667" calcext:value-type="float">
            <text:p>0,00258541666666667000</text:p>
          </table:table-cell>
          <table:table-cell table:formula="of:=[.D1316]-[.D131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1315]+17" office:value-type="float" office:value="22355" calcext:value-type="float">
            <text:p>22355</text:p>
          </table:table-cell>
          <table:table-cell office:value-type="float" office:value="8640000" calcext:value-type="float">
            <text:p>8640000</text:p>
          </table:table-cell>
          <table:table-cell table:formula="of:=[.B1316]/[.C1316]" office:value-type="float" office:value="0.00258738425925926" calcext:value-type="float">
            <text:p>0,00258738425925926000</text:p>
          </table:table-cell>
          <table:table-cell table:formula="of:=[.D1317]-[.D131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1316]+17" office:value-type="float" office:value="22372" calcext:value-type="float">
            <text:p>22372</text:p>
          </table:table-cell>
          <table:table-cell office:value-type="float" office:value="8640000" calcext:value-type="float">
            <text:p>8640000</text:p>
          </table:table-cell>
          <table:table-cell table:formula="of:=[.B1317]/[.C1317]" office:value-type="float" office:value="0.00258935185185185" calcext:value-type="float">
            <text:p>0,00258935185185185000</text:p>
          </table:table-cell>
          <table:table-cell table:formula="of:=[.D1318]-[.D131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1317]+17" office:value-type="float" office:value="22389" calcext:value-type="float">
            <text:p>22389</text:p>
          </table:table-cell>
          <table:table-cell office:value-type="float" office:value="8640000" calcext:value-type="float">
            <text:p>8640000</text:p>
          </table:table-cell>
          <table:table-cell table:formula="of:=[.B1318]/[.C1318]" office:value-type="float" office:value="0.00259131944444444" calcext:value-type="float">
            <text:p>0,00259131944444444000</text:p>
          </table:table-cell>
          <table:table-cell table:formula="of:=[.D1319]-[.D1318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1318]+17" office:value-type="float" office:value="22406" calcext:value-type="float">
            <text:p>22406</text:p>
          </table:table-cell>
          <table:table-cell office:value-type="float" office:value="8640000" calcext:value-type="float">
            <text:p>8640000</text:p>
          </table:table-cell>
          <table:table-cell table:formula="of:=[.B1319]/[.C1319]" office:value-type="float" office:value="0.00259328703703704" calcext:value-type="float">
            <text:p>0,00259328703703704000</text:p>
          </table:table-cell>
          <table:table-cell table:formula="of:=[.D1320]-[.D131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1319]+17" office:value-type="float" office:value="22423" calcext:value-type="float">
            <text:p>22423</text:p>
          </table:table-cell>
          <table:table-cell office:value-type="float" office:value="8640000" calcext:value-type="float">
            <text:p>8640000</text:p>
          </table:table-cell>
          <table:table-cell table:formula="of:=[.B1320]/[.C1320]" office:value-type="float" office:value="0.00259525462962963" calcext:value-type="float">
            <text:p>0,00259525462962963000</text:p>
          </table:table-cell>
          <table:table-cell table:formula="of:=[.D1321]-[.D132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1320]+17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1321]/[.C1321]" office:value-type="float" office:value="0.00259722222222222" calcext:value-type="float">
            <text:p>0,00259722222222222000</text:p>
          </table:table-cell>
          <table:table-cell table:formula="of:=[.D1322]-[.D1321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1321]+17" office:value-type="float" office:value="22457" calcext:value-type="float">
            <text:p>22457</text:p>
          </table:table-cell>
          <table:table-cell office:value-type="float" office:value="8640000" calcext:value-type="float">
            <text:p>8640000</text:p>
          </table:table-cell>
          <table:table-cell table:formula="of:=[.B1322]/[.C1322]" office:value-type="float" office:value="0.00259918981481482" calcext:value-type="float">
            <text:p>0,00259918981481482000</text:p>
          </table:table-cell>
          <table:table-cell table:formula="of:=[.D1323]-[.D132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1322]+17" office:value-type="float" office:value="22474" calcext:value-type="float">
            <text:p>22474</text:p>
          </table:table-cell>
          <table:table-cell office:value-type="float" office:value="8640000" calcext:value-type="float">
            <text:p>8640000</text:p>
          </table:table-cell>
          <table:table-cell table:formula="of:=[.B1323]/[.C1323]" office:value-type="float" office:value="0.00260115740740741" calcext:value-type="float">
            <text:p>0,00260115740740741000</text:p>
          </table:table-cell>
          <table:table-cell table:formula="of:=[.D1324]-[.D132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1323]+17" office:value-type="float" office:value="22491" calcext:value-type="float">
            <text:p>22491</text:p>
          </table:table-cell>
          <table:table-cell office:value-type="float" office:value="8640000" calcext:value-type="float">
            <text:p>8640000</text:p>
          </table:table-cell>
          <table:table-cell table:formula="of:=[.B1324]/[.C1324]" office:value-type="float" office:value="0.002603125" calcext:value-type="float">
            <text:p>0,00260312500000000000</text:p>
          </table:table-cell>
          <table:table-cell table:formula="of:=[.D1325]-[.D132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1324]+17" office:value-type="float" office:value="22508" calcext:value-type="float">
            <text:p>22508</text:p>
          </table:table-cell>
          <table:table-cell office:value-type="float" office:value="8640000" calcext:value-type="float">
            <text:p>8640000</text:p>
          </table:table-cell>
          <table:table-cell table:formula="of:=[.B1325]/[.C1325]" office:value-type="float" office:value="0.00260509259259259" calcext:value-type="float">
            <text:p>0,00260509259259259000</text:p>
          </table:table-cell>
          <table:table-cell table:formula="of:=[.D1326]-[.D1325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1325]+17" office:value-type="float" office:value="22525" calcext:value-type="float">
            <text:p>22525</text:p>
          </table:table-cell>
          <table:table-cell office:value-type="float" office:value="8640000" calcext:value-type="float">
            <text:p>8640000</text:p>
          </table:table-cell>
          <table:table-cell table:formula="of:=[.B1326]/[.C1326]" office:value-type="float" office:value="0.00260706018518519" calcext:value-type="float">
            <text:p>0,00260706018518519000</text:p>
          </table:table-cell>
          <table:table-cell table:formula="of:=[.D1327]-[.D132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1326]+17" office:value-type="float" office:value="22542" calcext:value-type="float">
            <text:p>22542</text:p>
          </table:table-cell>
          <table:table-cell office:value-type="float" office:value="8640000" calcext:value-type="float">
            <text:p>8640000</text:p>
          </table:table-cell>
          <table:table-cell table:formula="of:=[.B1327]/[.C1327]" office:value-type="float" office:value="0.00260902777777778" calcext:value-type="float">
            <text:p>0,00260902777777778000</text:p>
          </table:table-cell>
          <table:table-cell table:formula="of:=[.D1328]-[.D132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1327]+17" office:value-type="float" office:value="22559" calcext:value-type="float">
            <text:p>22559</text:p>
          </table:table-cell>
          <table:table-cell office:value-type="float" office:value="8640000" calcext:value-type="float">
            <text:p>8640000</text:p>
          </table:table-cell>
          <table:table-cell table:formula="of:=[.B1328]/[.C1328]" office:value-type="float" office:value="0.00261099537037037" calcext:value-type="float">
            <text:p>0,00261099537037037000</text:p>
          </table:table-cell>
          <table:table-cell table:formula="of:=[.D1329]-[.D132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1328]+17" office:value-type="float" office:value="22576" calcext:value-type="float">
            <text:p>22576</text:p>
          </table:table-cell>
          <table:table-cell office:value-type="float" office:value="8640000" calcext:value-type="float">
            <text:p>8640000</text:p>
          </table:table-cell>
          <table:table-cell table:formula="of:=[.B1329]/[.C1329]" office:value-type="float" office:value="0.00261296296296296" calcext:value-type="float">
            <text:p>0,00261296296296296000</text:p>
          </table:table-cell>
          <table:table-cell table:formula="of:=[.D1330]-[.D1329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1329]+17" office:value-type="float" office:value="22593" calcext:value-type="float">
            <text:p>22593</text:p>
          </table:table-cell>
          <table:table-cell office:value-type="float" office:value="8640000" calcext:value-type="float">
            <text:p>8640000</text:p>
          </table:table-cell>
          <table:table-cell table:formula="of:=[.B1330]/[.C1330]" office:value-type="float" office:value="0.00261493055555556" calcext:value-type="float">
            <text:p>0,00261493055555556000</text:p>
          </table:table-cell>
          <table:table-cell table:formula="of:=[.D1331]-[.D133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1330]+17" office:value-type="float" office:value="22610" calcext:value-type="float">
            <text:p>22610</text:p>
          </table:table-cell>
          <table:table-cell office:value-type="float" office:value="8640000" calcext:value-type="float">
            <text:p>8640000</text:p>
          </table:table-cell>
          <table:table-cell table:formula="of:=[.B1331]/[.C1331]" office:value-type="float" office:value="0.00261689814814815" calcext:value-type="float">
            <text:p>0,00261689814814815000</text:p>
          </table:table-cell>
          <table:table-cell table:formula="of:=[.D1332]-[.D133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1331]+17" office:value-type="float" office:value="22627" calcext:value-type="float">
            <text:p>22627</text:p>
          </table:table-cell>
          <table:table-cell office:value-type="float" office:value="8640000" calcext:value-type="float">
            <text:p>8640000</text:p>
          </table:table-cell>
          <table:table-cell table:formula="of:=[.B1332]/[.C1332]" office:value-type="float" office:value="0.00261886574074074" calcext:value-type="float">
            <text:p>0,00261886574074074000</text:p>
          </table:table-cell>
          <table:table-cell table:formula="of:=[.D1333]-[.D1332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1332]+17" office:value-type="float" office:value="22644" calcext:value-type="float">
            <text:p>22644</text:p>
          </table:table-cell>
          <table:table-cell office:value-type="float" office:value="8640000" calcext:value-type="float">
            <text:p>8640000</text:p>
          </table:table-cell>
          <table:table-cell table:formula="of:=[.B1333]/[.C1333]" office:value-type="float" office:value="0.00262083333333333" calcext:value-type="float">
            <text:p>0,00262083333333333000</text:p>
          </table:table-cell>
          <table:table-cell table:formula="of:=[.D1334]-[.D133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1333]+17" office:value-type="float" office:value="22661" calcext:value-type="float">
            <text:p>22661</text:p>
          </table:table-cell>
          <table:table-cell office:value-type="float" office:value="8640000" calcext:value-type="float">
            <text:p>8640000</text:p>
          </table:table-cell>
          <table:table-cell table:formula="of:=[.B1334]/[.C1334]" office:value-type="float" office:value="0.00262280092592593" calcext:value-type="float">
            <text:p>0,00262280092592593000</text:p>
          </table:table-cell>
          <table:table-cell table:formula="of:=[.D1335]-[.D133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B1334]+17" office:value-type="float" office:value="22678" calcext:value-type="float">
            <text:p>22678</text:p>
          </table:table-cell>
          <table:table-cell office:value-type="float" office:value="8640000" calcext:value-type="float">
            <text:p>8640000</text:p>
          </table:table-cell>
          <table:table-cell table:formula="of:=[.B1335]/[.C1335]" office:value-type="float" office:value="0.00262476851851852" calcext:value-type="float">
            <text:p>0,00262476851851852000</text:p>
          </table:table-cell>
          <table:table-cell table:formula="of:=[.D1336]-[.D133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B1335]+17" office:value-type="float" office:value="22695" calcext:value-type="float">
            <text:p>22695</text:p>
          </table:table-cell>
          <table:table-cell office:value-type="float" office:value="8640000" calcext:value-type="float">
            <text:p>8640000</text:p>
          </table:table-cell>
          <table:table-cell table:formula="of:=[.B1336]/[.C1336]" office:value-type="float" office:value="0.00262673611111111" calcext:value-type="float">
            <text:p>0,00262673611111111000</text:p>
          </table:table-cell>
          <table:table-cell table:formula="of:=[.D1337]-[.D1336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B1336]+17" office:value-type="float" office:value="22712" calcext:value-type="float">
            <text:p>22712</text:p>
          </table:table-cell>
          <table:table-cell office:value-type="float" office:value="8640000" calcext:value-type="float">
            <text:p>8640000</text:p>
          </table:table-cell>
          <table:table-cell table:formula="of:=[.B1337]/[.C1337]" office:value-type="float" office:value="0.0026287037037037" calcext:value-type="float">
            <text:p>0,00262870370370370000</text:p>
          </table:table-cell>
          <table:table-cell table:formula="of:=[.D1338]-[.D133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B1337]+17" office:value-type="float" office:value="22729" calcext:value-type="float">
            <text:p>22729</text:p>
          </table:table-cell>
          <table:table-cell office:value-type="float" office:value="8640000" calcext:value-type="float">
            <text:p>8640000</text:p>
          </table:table-cell>
          <table:table-cell table:formula="of:=[.B1338]/[.C1338]" office:value-type="float" office:value="0.0026306712962963" calcext:value-type="float">
            <text:p>0,00263067129629630000</text:p>
          </table:table-cell>
          <table:table-cell table:formula="of:=[.D1339]-[.D133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B1338]+17" office:value-type="float" office:value="22746" calcext:value-type="float">
            <text:p>22746</text:p>
          </table:table-cell>
          <table:table-cell office:value-type="float" office:value="8640000" calcext:value-type="float">
            <text:p>8640000</text:p>
          </table:table-cell>
          <table:table-cell table:formula="of:=[.B1339]/[.C1339]" office:value-type="float" office:value="0.00263263888888889" calcext:value-type="float">
            <text:p>0,00263263888888889000</text:p>
          </table:table-cell>
          <table:table-cell table:formula="of:=[.D1340]-[.D1339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B1339]+17" office:value-type="float" office:value="22763" calcext:value-type="float">
            <text:p>22763</text:p>
          </table:table-cell>
          <table:table-cell office:value-type="float" office:value="8640000" calcext:value-type="float">
            <text:p>8640000</text:p>
          </table:table-cell>
          <table:table-cell table:formula="of:=[.B1340]/[.C1340]" office:value-type="float" office:value="0.00263460648148148" calcext:value-type="float">
            <text:p>0,00263460648148148000</text:p>
          </table:table-cell>
          <table:table-cell table:formula="of:=[.D1341]-[.D134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B1340]+17" office:value-type="float" office:value="22780" calcext:value-type="float">
            <text:p>22780</text:p>
          </table:table-cell>
          <table:table-cell office:value-type="float" office:value="8640000" calcext:value-type="float">
            <text:p>8640000</text:p>
          </table:table-cell>
          <table:table-cell table:formula="of:=[.B1341]/[.C1341]" office:value-type="float" office:value="0.00263657407407407" calcext:value-type="float">
            <text:p>0,00263657407407407000</text:p>
          </table:table-cell>
          <table:table-cell table:formula="of:=[.D1342]-[.D134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B1341]+17" office:value-type="float" office:value="22797" calcext:value-type="float">
            <text:p>22797</text:p>
          </table:table-cell>
          <table:table-cell office:value-type="float" office:value="8640000" calcext:value-type="float">
            <text:p>8640000</text:p>
          </table:table-cell>
          <table:table-cell table:formula="of:=[.B1342]/[.C1342]" office:value-type="float" office:value="0.00263854166666667" calcext:value-type="float">
            <text:p>0,00263854166666667000</text:p>
          </table:table-cell>
          <table:table-cell table:formula="of:=[.D1343]-[.D134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B1342]+17" office:value-type="float" office:value="22814" calcext:value-type="float">
            <text:p>22814</text:p>
          </table:table-cell>
          <table:table-cell office:value-type="float" office:value="8640000" calcext:value-type="float">
            <text:p>8640000</text:p>
          </table:table-cell>
          <table:table-cell table:formula="of:=[.B1343]/[.C1343]" office:value-type="float" office:value="0.00264050925925926" calcext:value-type="float">
            <text:p>0,00264050925925926000</text:p>
          </table:table-cell>
          <table:table-cell table:formula="of:=[.D1344]-[.D1343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B1343]+17" office:value-type="float" office:value="22831" calcext:value-type="float">
            <text:p>22831</text:p>
          </table:table-cell>
          <table:table-cell office:value-type="float" office:value="8640000" calcext:value-type="float">
            <text:p>8640000</text:p>
          </table:table-cell>
          <table:table-cell table:formula="of:=[.B1344]/[.C1344]" office:value-type="float" office:value="0.00264247685185185" calcext:value-type="float">
            <text:p>0,00264247685185185000</text:p>
          </table:table-cell>
          <table:table-cell table:formula="of:=[.D1345]-[.D134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B1344]+17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1345]/[.C1345]" office:value-type="float" office:value="0.00264444444444444" calcext:value-type="float">
            <text:p>0,00264444444444444000</text:p>
          </table:table-cell>
          <table:table-cell table:formula="of:=[.D1346]-[.D134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B1345]+17" office:value-type="float" office:value="22865" calcext:value-type="float">
            <text:p>22865</text:p>
          </table:table-cell>
          <table:table-cell office:value-type="float" office:value="8640000" calcext:value-type="float">
            <text:p>8640000</text:p>
          </table:table-cell>
          <table:table-cell table:formula="of:=[.B1346]/[.C1346]" office:value-type="float" office:value="0.00264641203703704" calcext:value-type="float">
            <text:p>0,00264641203703704000</text:p>
          </table:table-cell>
          <table:table-cell table:formula="of:=[.D1347]-[.D134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B1346]+17" office:value-type="float" office:value="22882" calcext:value-type="float">
            <text:p>22882</text:p>
          </table:table-cell>
          <table:table-cell office:value-type="float" office:value="8640000" calcext:value-type="float">
            <text:p>8640000</text:p>
          </table:table-cell>
          <table:table-cell table:formula="of:=[.B1347]/[.C1347]" office:value-type="float" office:value="0.00264837962962963" calcext:value-type="float">
            <text:p>0,00264837962962963000</text:p>
          </table:table-cell>
          <table:table-cell table:formula="of:=[.D1348]-[.D1347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B1347]+17" office:value-type="float" office:value="22899" calcext:value-type="float">
            <text:p>22899</text:p>
          </table:table-cell>
          <table:table-cell office:value-type="float" office:value="8640000" calcext:value-type="float">
            <text:p>8640000</text:p>
          </table:table-cell>
          <table:table-cell table:formula="of:=[.B1348]/[.C1348]" office:value-type="float" office:value="0.00265034722222222" calcext:value-type="float">
            <text:p>0,00265034722222222000</text:p>
          </table:table-cell>
          <table:table-cell table:formula="of:=[.D1349]-[.D134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B1348]+17" office:value-type="float" office:value="22916" calcext:value-type="float">
            <text:p>22916</text:p>
          </table:table-cell>
          <table:table-cell office:value-type="float" office:value="8640000" calcext:value-type="float">
            <text:p>8640000</text:p>
          </table:table-cell>
          <table:table-cell table:formula="of:=[.B1349]/[.C1349]" office:value-type="float" office:value="0.00265231481481482" calcext:value-type="float">
            <text:p>0,00265231481481482000</text:p>
          </table:table-cell>
          <table:table-cell table:formula="of:=[.D1350]-[.D134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B1349]+17" office:value-type="float" office:value="22933" calcext:value-type="float">
            <text:p>22933</text:p>
          </table:table-cell>
          <table:table-cell office:value-type="float" office:value="8640000" calcext:value-type="float">
            <text:p>8640000</text:p>
          </table:table-cell>
          <table:table-cell table:formula="of:=[.B1350]/[.C1350]" office:value-type="float" office:value="0.00265428240740741" calcext:value-type="float">
            <text:p>0,00265428240740741000</text:p>
          </table:table-cell>
          <table:table-cell table:formula="of:=[.D1351]-[.D1350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1350]+17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1351]/[.C1351]" office:value-type="float" office:value="0.00265625" calcext:value-type="float">
            <text:p>0,00265625000000000000</text:p>
          </table:table-cell>
          <table:table-cell table:formula="of:=[.D1352]-[.D135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B1351]+17" office:value-type="float" office:value="22967" calcext:value-type="float">
            <text:p>22967</text:p>
          </table:table-cell>
          <table:table-cell office:value-type="float" office:value="8640000" calcext:value-type="float">
            <text:p>8640000</text:p>
          </table:table-cell>
          <table:table-cell table:formula="of:=[.B1352]/[.C1352]" office:value-type="float" office:value="0.00265821759259259" calcext:value-type="float">
            <text:p>0,00265821759259259000</text:p>
          </table:table-cell>
          <table:table-cell table:formula="of:=[.D1353]-[.D135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B1352]+17" office:value-type="float" office:value="22984" calcext:value-type="float">
            <text:p>22984</text:p>
          </table:table-cell>
          <table:table-cell office:value-type="float" office:value="8640000" calcext:value-type="float">
            <text:p>8640000</text:p>
          </table:table-cell>
          <table:table-cell table:formula="of:=[.B1353]/[.C1353]" office:value-type="float" office:value="0.00266018518518519" calcext:value-type="float">
            <text:p>0,00266018518518519000</text:p>
          </table:table-cell>
          <table:table-cell table:formula="of:=[.D1354]-[.D135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B1353]+17" office:value-type="float" office:value="23001" calcext:value-type="float">
            <text:p>23001</text:p>
          </table:table-cell>
          <table:table-cell office:value-type="float" office:value="8640000" calcext:value-type="float">
            <text:p>8640000</text:p>
          </table:table-cell>
          <table:table-cell table:formula="of:=[.B1354]/[.C1354]" office:value-type="float" office:value="0.00266215277777778" calcext:value-type="float">
            <text:p>0,00266215277777778000</text:p>
          </table:table-cell>
          <table:table-cell table:formula="of:=[.D1355]-[.D1354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B1354]+17" office:value-type="float" office:value="23018" calcext:value-type="float">
            <text:p>23018</text:p>
          </table:table-cell>
          <table:table-cell office:value-type="float" office:value="8640000" calcext:value-type="float">
            <text:p>8640000</text:p>
          </table:table-cell>
          <table:table-cell table:formula="of:=[.B1355]/[.C1355]" office:value-type="float" office:value="0.00266412037037037" calcext:value-type="float">
            <text:p>0,00266412037037037000</text:p>
          </table:table-cell>
          <table:table-cell table:formula="of:=[.D1356]-[.D135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B1355]+17" office:value-type="float" office:value="23035" calcext:value-type="float">
            <text:p>23035</text:p>
          </table:table-cell>
          <table:table-cell office:value-type="float" office:value="8640000" calcext:value-type="float">
            <text:p>8640000</text:p>
          </table:table-cell>
          <table:table-cell table:formula="of:=[.B1356]/[.C1356]" office:value-type="float" office:value="0.00266608796296296" calcext:value-type="float">
            <text:p>0,00266608796296296000</text:p>
          </table:table-cell>
          <table:table-cell table:formula="of:=[.D1357]-[.D135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B1356]+17" office:value-type="float" office:value="23052" calcext:value-type="float">
            <text:p>23052</text:p>
          </table:table-cell>
          <table:table-cell office:value-type="float" office:value="8640000" calcext:value-type="float">
            <text:p>8640000</text:p>
          </table:table-cell>
          <table:table-cell table:formula="of:=[.B1357]/[.C1357]" office:value-type="float" office:value="0.00266805555555556" calcext:value-type="float">
            <text:p>0,00266805555555556000</text:p>
          </table:table-cell>
          <table:table-cell table:formula="of:=[.D1358]-[.D1357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B1357]+17" office:value-type="float" office:value="23069" calcext:value-type="float">
            <text:p>23069</text:p>
          </table:table-cell>
          <table:table-cell office:value-type="float" office:value="8640000" calcext:value-type="float">
            <text:p>8640000</text:p>
          </table:table-cell>
          <table:table-cell table:formula="of:=[.B1358]/[.C1358]" office:value-type="float" office:value="0.00267002314814815" calcext:value-type="float">
            <text:p>0,00267002314814815000</text:p>
          </table:table-cell>
          <table:table-cell table:formula="of:=[.D1359]-[.D135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B1358]+17" office:value-type="float" office:value="23086" calcext:value-type="float">
            <text:p>23086</text:p>
          </table:table-cell>
          <table:table-cell office:value-type="float" office:value="8640000" calcext:value-type="float">
            <text:p>8640000</text:p>
          </table:table-cell>
          <table:table-cell table:formula="of:=[.B1359]/[.C1359]" office:value-type="float" office:value="0.00267199074074074" calcext:value-type="float">
            <text:p>0,00267199074074074000</text:p>
          </table:table-cell>
          <table:table-cell table:formula="of:=[.D1360]-[.D135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B1359]+17" office:value-type="float" office:value="23103" calcext:value-type="float">
            <text:p>23103</text:p>
          </table:table-cell>
          <table:table-cell office:value-type="float" office:value="8640000" calcext:value-type="float">
            <text:p>8640000</text:p>
          </table:table-cell>
          <table:table-cell table:formula="of:=[.B1360]/[.C1360]" office:value-type="float" office:value="0.00267395833333333" calcext:value-type="float">
            <text:p>0,00267395833333333000</text:p>
          </table:table-cell>
          <table:table-cell table:formula="of:=[.D1361]-[.D136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B1360]+17" office:value-type="float" office:value="23120" calcext:value-type="float">
            <text:p>23120</text:p>
          </table:table-cell>
          <table:table-cell office:value-type="float" office:value="8640000" calcext:value-type="float">
            <text:p>8640000</text:p>
          </table:table-cell>
          <table:table-cell table:formula="of:=[.B1361]/[.C1361]" office:value-type="float" office:value="0.00267592592592593" calcext:value-type="float">
            <text:p>0,00267592592592593000</text:p>
          </table:table-cell>
          <table:table-cell table:formula="of:=[.D1362]-[.D1361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B1361]+17" office:value-type="float" office:value="23137" calcext:value-type="float">
            <text:p>23137</text:p>
          </table:table-cell>
          <table:table-cell office:value-type="float" office:value="8640000" calcext:value-type="float">
            <text:p>8640000</text:p>
          </table:table-cell>
          <table:table-cell table:formula="of:=[.B1362]/[.C1362]" office:value-type="float" office:value="0.00267789351851852" calcext:value-type="float">
            <text:p>0,00267789351851852000</text:p>
          </table:table-cell>
          <table:table-cell table:formula="of:=[.D1363]-[.D136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B1362]+17" office:value-type="float" office:value="23154" calcext:value-type="float">
            <text:p>23154</text:p>
          </table:table-cell>
          <table:table-cell office:value-type="float" office:value="8640000" calcext:value-type="float">
            <text:p>8640000</text:p>
          </table:table-cell>
          <table:table-cell table:formula="of:=[.B1363]/[.C1363]" office:value-type="float" office:value="0.00267986111111111" calcext:value-type="float">
            <text:p>0,00267986111111111000</text:p>
          </table:table-cell>
          <table:table-cell table:formula="of:=[.D1364]-[.D136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B1363]+17" office:value-type="float" office:value="23171" calcext:value-type="float">
            <text:p>23171</text:p>
          </table:table-cell>
          <table:table-cell office:value-type="float" office:value="8640000" calcext:value-type="float">
            <text:p>8640000</text:p>
          </table:table-cell>
          <table:table-cell table:formula="of:=[.B1364]/[.C1364]" office:value-type="float" office:value="0.0026818287037037" calcext:value-type="float">
            <text:p>0,00268182870370370000</text:p>
          </table:table-cell>
          <table:table-cell table:formula="of:=[.D1365]-[.D136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B1364]+17" office:value-type="float" office:value="23188" calcext:value-type="float">
            <text:p>23188</text:p>
          </table:table-cell>
          <table:table-cell office:value-type="float" office:value="8640000" calcext:value-type="float">
            <text:p>8640000</text:p>
          </table:table-cell>
          <table:table-cell table:formula="of:=[.B1365]/[.C1365]" office:value-type="float" office:value="0.0026837962962963" calcext:value-type="float">
            <text:p>0,00268379629629630000</text:p>
          </table:table-cell>
          <table:table-cell table:formula="of:=[.D1366]-[.D1365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B1365]+17" office:value-type="float" office:value="23205" calcext:value-type="float">
            <text:p>23205</text:p>
          </table:table-cell>
          <table:table-cell office:value-type="float" office:value="8640000" calcext:value-type="float">
            <text:p>8640000</text:p>
          </table:table-cell>
          <table:table-cell table:formula="of:=[.B1366]/[.C1366]" office:value-type="float" office:value="0.00268576388888889" calcext:value-type="float">
            <text:p>0,00268576388888889000</text:p>
          </table:table-cell>
          <table:table-cell table:formula="of:=[.D1367]-[.D136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B1366]+17" office:value-type="float" office:value="23222" calcext:value-type="float">
            <text:p>23222</text:p>
          </table:table-cell>
          <table:table-cell office:value-type="float" office:value="8640000" calcext:value-type="float">
            <text:p>8640000</text:p>
          </table:table-cell>
          <table:table-cell table:formula="of:=[.B1367]/[.C1367]" office:value-type="float" office:value="0.00268773148148148" calcext:value-type="float">
            <text:p>0,00268773148148148000</text:p>
          </table:table-cell>
          <table:table-cell table:formula="of:=[.D1368]-[.D136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B1367]+17" office:value-type="float" office:value="23239" calcext:value-type="float">
            <text:p>23239</text:p>
          </table:table-cell>
          <table:table-cell office:value-type="float" office:value="8640000" calcext:value-type="float">
            <text:p>8640000</text:p>
          </table:table-cell>
          <table:table-cell table:formula="of:=[.B1368]/[.C1368]" office:value-type="float" office:value="0.00268969907407407" calcext:value-type="float">
            <text:p>0,00268969907407407000</text:p>
          </table:table-cell>
          <table:table-cell table:formula="of:=[.D1369]-[.D1368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B1368]+17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1369]/[.C1369]" office:value-type="float" office:value="0.00269166666666667" calcext:value-type="float">
            <text:p>0,00269166666666667000</text:p>
          </table:table-cell>
          <table:table-cell table:formula="of:=[.D1370]-[.D136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B1369]+17" office:value-type="float" office:value="23273" calcext:value-type="float">
            <text:p>23273</text:p>
          </table:table-cell>
          <table:table-cell office:value-type="float" office:value="8640000" calcext:value-type="float">
            <text:p>8640000</text:p>
          </table:table-cell>
          <table:table-cell table:formula="of:=[.B1370]/[.C1370]" office:value-type="float" office:value="0.00269363425925926" calcext:value-type="float">
            <text:p>0,00269363425925926000</text:p>
          </table:table-cell>
          <table:table-cell table:formula="of:=[.D1371]-[.D137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B1370]+17" office:value-type="float" office:value="23290" calcext:value-type="float">
            <text:p>23290</text:p>
          </table:table-cell>
          <table:table-cell office:value-type="float" office:value="8640000" calcext:value-type="float">
            <text:p>8640000</text:p>
          </table:table-cell>
          <table:table-cell table:formula="of:=[.B1371]/[.C1371]" office:value-type="float" office:value="0.00269560185185185" calcext:value-type="float">
            <text:p>0,00269560185185185000</text:p>
          </table:table-cell>
          <table:table-cell table:formula="of:=[.D1372]-[.D137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B1371]+17" office:value-type="float" office:value="23307" calcext:value-type="float">
            <text:p>23307</text:p>
          </table:table-cell>
          <table:table-cell office:value-type="float" office:value="8640000" calcext:value-type="float">
            <text:p>8640000</text:p>
          </table:table-cell>
          <table:table-cell table:formula="of:=[.B1372]/[.C1372]" office:value-type="float" office:value="0.00269756944444444" calcext:value-type="float">
            <text:p>0,00269756944444444000</text:p>
          </table:table-cell>
          <table:table-cell table:formula="of:=[.D1373]-[.D1372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B1372]+17" office:value-type="float" office:value="23324" calcext:value-type="float">
            <text:p>23324</text:p>
          </table:table-cell>
          <table:table-cell office:value-type="float" office:value="8640000" calcext:value-type="float">
            <text:p>8640000</text:p>
          </table:table-cell>
          <table:table-cell table:formula="of:=[.B1373]/[.C1373]" office:value-type="float" office:value="0.00269953703703704" calcext:value-type="float">
            <text:p>0,00269953703703704000</text:p>
          </table:table-cell>
          <table:table-cell table:formula="of:=[.D1374]-[.D137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B1373]+17" office:value-type="float" office:value="23341" calcext:value-type="float">
            <text:p>23341</text:p>
          </table:table-cell>
          <table:table-cell office:value-type="float" office:value="8640000" calcext:value-type="float">
            <text:p>8640000</text:p>
          </table:table-cell>
          <table:table-cell table:formula="of:=[.B1374]/[.C1374]" office:value-type="float" office:value="0.00270150462962963" calcext:value-type="float">
            <text:p>0,00270150462962963000</text:p>
          </table:table-cell>
          <table:table-cell table:formula="of:=[.D1375]-[.D137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B1374]+17" office:value-type="float" office:value="23358" calcext:value-type="float">
            <text:p>23358</text:p>
          </table:table-cell>
          <table:table-cell office:value-type="float" office:value="8640000" calcext:value-type="float">
            <text:p>8640000</text:p>
          </table:table-cell>
          <table:table-cell table:formula="of:=[.B1375]/[.C1375]" office:value-type="float" office:value="0.00270347222222222" calcext:value-type="float">
            <text:p>0,00270347222222222000</text:p>
          </table:table-cell>
          <table:table-cell table:formula="of:=[.D1376]-[.D137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B1375]+17" office:value-type="float" office:value="23375" calcext:value-type="float">
            <text:p>23375</text:p>
          </table:table-cell>
          <table:table-cell office:value-type="float" office:value="8640000" calcext:value-type="float">
            <text:p>8640000</text:p>
          </table:table-cell>
          <table:table-cell table:formula="of:=[.B1376]/[.C1376]" office:value-type="float" office:value="0.00270543981481481" calcext:value-type="float">
            <text:p>0,00270543981481481000</text:p>
          </table:table-cell>
          <table:table-cell table:formula="of:=[.D1377]-[.D1376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B1376]+17" office:value-type="float" office:value="23392" calcext:value-type="float">
            <text:p>23392</text:p>
          </table:table-cell>
          <table:table-cell office:value-type="float" office:value="8640000" calcext:value-type="float">
            <text:p>8640000</text:p>
          </table:table-cell>
          <table:table-cell table:formula="of:=[.B1377]/[.C1377]" office:value-type="float" office:value="0.00270740740740741" calcext:value-type="float">
            <text:p>0,00270740740740741000</text:p>
          </table:table-cell>
          <table:table-cell table:formula="of:=[.D1378]-[.D137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B1377]+17" office:value-type="float" office:value="23409" calcext:value-type="float">
            <text:p>23409</text:p>
          </table:table-cell>
          <table:table-cell office:value-type="float" office:value="8640000" calcext:value-type="float">
            <text:p>8640000</text:p>
          </table:table-cell>
          <table:table-cell table:formula="of:=[.B1378]/[.C1378]" office:value-type="float" office:value="0.002709375" calcext:value-type="float">
            <text:p>0,00270937500000000000</text:p>
          </table:table-cell>
          <table:table-cell table:formula="of:=[.D1379]-[.D137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B1378]+17" office:value-type="float" office:value="23426" calcext:value-type="float">
            <text:p>23426</text:p>
          </table:table-cell>
          <table:table-cell office:value-type="float" office:value="8640000" calcext:value-type="float">
            <text:p>8640000</text:p>
          </table:table-cell>
          <table:table-cell table:formula="of:=[.B1379]/[.C1379]" office:value-type="float" office:value="0.00271134259259259" calcext:value-type="float">
            <text:p>0,00271134259259259000</text:p>
          </table:table-cell>
          <table:table-cell table:formula="of:=[.D1380]-[.D1379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B1379]+17" office:value-type="float" office:value="23443" calcext:value-type="float">
            <text:p>23443</text:p>
          </table:table-cell>
          <table:table-cell office:value-type="float" office:value="8640000" calcext:value-type="float">
            <text:p>8640000</text:p>
          </table:table-cell>
          <table:table-cell table:formula="of:=[.B1380]/[.C1380]" office:value-type="float" office:value="0.00271331018518519" calcext:value-type="float">
            <text:p>0,00271331018518519000</text:p>
          </table:table-cell>
          <table:table-cell table:formula="of:=[.D1381]-[.D138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B1380]+17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1381]/[.C1381]" office:value-type="float" office:value="0.00271527777777778" calcext:value-type="float">
            <text:p>0,00271527777777778000</text:p>
          </table:table-cell>
          <table:table-cell table:formula="of:=[.D1382]-[.D138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B1381]+17" office:value-type="float" office:value="23477" calcext:value-type="float">
            <text:p>23477</text:p>
          </table:table-cell>
          <table:table-cell office:value-type="float" office:value="8640000" calcext:value-type="float">
            <text:p>8640000</text:p>
          </table:table-cell>
          <table:table-cell table:formula="of:=[.B1382]/[.C1382]" office:value-type="float" office:value="0.00271724537037037" calcext:value-type="float">
            <text:p>0,00271724537037037000</text:p>
          </table:table-cell>
          <table:table-cell table:formula="of:=[.D1383]-[.D138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B1382]+17" office:value-type="float" office:value="23494" calcext:value-type="float">
            <text:p>23494</text:p>
          </table:table-cell>
          <table:table-cell office:value-type="float" office:value="8640000" calcext:value-type="float">
            <text:p>8640000</text:p>
          </table:table-cell>
          <table:table-cell table:formula="of:=[.B1383]/[.C1383]" office:value-type="float" office:value="0.00271921296296296" calcext:value-type="float">
            <text:p>0,00271921296296296000</text:p>
          </table:table-cell>
          <table:table-cell table:formula="of:=[.D1384]-[.D1383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B1383]+17" office:value-type="float" office:value="23511" calcext:value-type="float">
            <text:p>23511</text:p>
          </table:table-cell>
          <table:table-cell office:value-type="float" office:value="8640000" calcext:value-type="float">
            <text:p>8640000</text:p>
          </table:table-cell>
          <table:table-cell table:formula="of:=[.B1384]/[.C1384]" office:value-type="float" office:value="0.00272118055555556" calcext:value-type="float">
            <text:p>0,00272118055555556000</text:p>
          </table:table-cell>
          <table:table-cell table:formula="of:=[.D1385]-[.D1384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B1384]+17" office:value-type="float" office:value="23528" calcext:value-type="float">
            <text:p>23528</text:p>
          </table:table-cell>
          <table:table-cell office:value-type="float" office:value="8640000" calcext:value-type="float">
            <text:p>8640000</text:p>
          </table:table-cell>
          <table:table-cell table:formula="of:=[.B1385]/[.C1385]" office:value-type="float" office:value="0.00272314814814815" calcext:value-type="float">
            <text:p>0,00272314814814815000</text:p>
          </table:table-cell>
          <table:table-cell table:formula="of:=[.D1386]-[.D138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B1385]+17" office:value-type="float" office:value="23545" calcext:value-type="float">
            <text:p>23545</text:p>
          </table:table-cell>
          <table:table-cell office:value-type="float" office:value="8640000" calcext:value-type="float">
            <text:p>8640000</text:p>
          </table:table-cell>
          <table:table-cell table:formula="of:=[.B1386]/[.C1386]" office:value-type="float" office:value="0.00272511574074074" calcext:value-type="float">
            <text:p>0,00272511574074074000</text:p>
          </table:table-cell>
          <table:table-cell table:formula="of:=[.D1387]-[.D1386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1386]+17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1387]/[.C1387]" office:value-type="float" office:value="0.00272708333333333" calcext:value-type="float">
            <text:p>0,00272708333333333000</text:p>
          </table:table-cell>
          <table:table-cell table:formula="of:=[.D1388]-[.D138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B1387]+17" office:value-type="float" office:value="23579" calcext:value-type="float">
            <text:p>23579</text:p>
          </table:table-cell>
          <table:table-cell office:value-type="float" office:value="8640000" calcext:value-type="float">
            <text:p>8640000</text:p>
          </table:table-cell>
          <table:table-cell table:formula="of:=[.B1388]/[.C1388]" office:value-type="float" office:value="0.00272905092592593" calcext:value-type="float">
            <text:p>0,00272905092592593000</text:p>
          </table:table-cell>
          <table:table-cell table:formula="of:=[.D1389]-[.D138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B1388]+17" office:value-type="float" office:value="23596" calcext:value-type="float">
            <text:p>23596</text:p>
          </table:table-cell>
          <table:table-cell office:value-type="float" office:value="8640000" calcext:value-type="float">
            <text:p>8640000</text:p>
          </table:table-cell>
          <table:table-cell table:formula="of:=[.B1389]/[.C1389]" office:value-type="float" office:value="0.00273101851851852" calcext:value-type="float">
            <text:p>0,00273101851851852000</text:p>
          </table:table-cell>
          <table:table-cell table:formula="of:=[.D1390]-[.D138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B1389]+17" office:value-type="float" office:value="23613" calcext:value-type="float">
            <text:p>23613</text:p>
          </table:table-cell>
          <table:table-cell office:value-type="float" office:value="8640000" calcext:value-type="float">
            <text:p>8640000</text:p>
          </table:table-cell>
          <table:table-cell table:formula="of:=[.B1390]/[.C1390]" office:value-type="float" office:value="0.00273298611111111" calcext:value-type="float">
            <text:p>0,00273298611111111000</text:p>
          </table:table-cell>
          <table:table-cell table:formula="of:=[.D1391]-[.D1390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B1390]+17" office:value-type="float" office:value="23630" calcext:value-type="float">
            <text:p>23630</text:p>
          </table:table-cell>
          <table:table-cell office:value-type="float" office:value="8640000" calcext:value-type="float">
            <text:p>8640000</text:p>
          </table:table-cell>
          <table:table-cell table:formula="of:=[.B1391]/[.C1391]" office:value-type="float" office:value="0.0027349537037037" calcext:value-type="float">
            <text:p>0,00273495370370370000</text:p>
          </table:table-cell>
          <table:table-cell table:formula="of:=[.D1392]-[.D139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B1391]+17" office:value-type="float" office:value="23647" calcext:value-type="float">
            <text:p>23647</text:p>
          </table:table-cell>
          <table:table-cell office:value-type="float" office:value="8640000" calcext:value-type="float">
            <text:p>8640000</text:p>
          </table:table-cell>
          <table:table-cell table:formula="of:=[.B1392]/[.C1392]" office:value-type="float" office:value="0.0027369212962963" calcext:value-type="float">
            <text:p>0,00273692129629630000</text:p>
          </table:table-cell>
          <table:table-cell table:formula="of:=[.D1393]-[.D139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B1392]+17" office:value-type="float" office:value="23664" calcext:value-type="float">
            <text:p>23664</text:p>
          </table:table-cell>
          <table:table-cell office:value-type="float" office:value="8640000" calcext:value-type="float">
            <text:p>8640000</text:p>
          </table:table-cell>
          <table:table-cell table:formula="of:=[.B1393]/[.C1393]" office:value-type="float" office:value="0.00273888888888889" calcext:value-type="float">
            <text:p>0,00273888888888889000</text:p>
          </table:table-cell>
          <table:table-cell table:formula="of:=[.D1394]-[.D139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B1393]+17" office:value-type="float" office:value="23681" calcext:value-type="float">
            <text:p>23681</text:p>
          </table:table-cell>
          <table:table-cell office:value-type="float" office:value="8640000" calcext:value-type="float">
            <text:p>8640000</text:p>
          </table:table-cell>
          <table:table-cell table:formula="of:=[.B1394]/[.C1394]" office:value-type="float" office:value="0.00274085648148148" calcext:value-type="float">
            <text:p>0,00274085648148148000</text:p>
          </table:table-cell>
          <table:table-cell table:formula="of:=[.D1395]-[.D1394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B1394]+17" office:value-type="float" office:value="23698" calcext:value-type="float">
            <text:p>23698</text:p>
          </table:table-cell>
          <table:table-cell office:value-type="float" office:value="8640000" calcext:value-type="float">
            <text:p>8640000</text:p>
          </table:table-cell>
          <table:table-cell table:formula="of:=[.B1395]/[.C1395]" office:value-type="float" office:value="0.00274282407407407" calcext:value-type="float">
            <text:p>0,00274282407407407000</text:p>
          </table:table-cell>
          <table:table-cell table:formula="of:=[.D1396]-[.D139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B1395]+17" office:value-type="float" office:value="23715" calcext:value-type="float">
            <text:p>23715</text:p>
          </table:table-cell>
          <table:table-cell office:value-type="float" office:value="8640000" calcext:value-type="float">
            <text:p>8640000</text:p>
          </table:table-cell>
          <table:table-cell table:formula="of:=[.B1396]/[.C1396]" office:value-type="float" office:value="0.00274479166666667" calcext:value-type="float">
            <text:p>0,00274479166666667000</text:p>
          </table:table-cell>
          <table:table-cell table:formula="of:=[.D1397]-[.D139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B1396]+17" office:value-type="float" office:value="23732" calcext:value-type="float">
            <text:p>23732</text:p>
          </table:table-cell>
          <table:table-cell office:value-type="float" office:value="8640000" calcext:value-type="float">
            <text:p>8640000</text:p>
          </table:table-cell>
          <table:table-cell table:formula="of:=[.B1397]/[.C1397]" office:value-type="float" office:value="0.00274675925925926" calcext:value-type="float">
            <text:p>0,00274675925925926000</text:p>
          </table:table-cell>
          <table:table-cell table:formula="of:=[.D1398]-[.D1397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B1397]+17" office:value-type="float" office:value="23749" calcext:value-type="float">
            <text:p>23749</text:p>
          </table:table-cell>
          <table:table-cell office:value-type="float" office:value="8640000" calcext:value-type="float">
            <text:p>8640000</text:p>
          </table:table-cell>
          <table:table-cell table:formula="of:=[.B1398]/[.C1398]" office:value-type="float" office:value="0.00274872685185185" calcext:value-type="float">
            <text:p>0,00274872685185185000</text:p>
          </table:table-cell>
          <table:table-cell table:formula="of:=[.D1399]-[.D1398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B1398]+17" office:value-type="float" office:value="23766" calcext:value-type="float">
            <text:p>23766</text:p>
          </table:table-cell>
          <table:table-cell office:value-type="float" office:value="8640000" calcext:value-type="float">
            <text:p>8640000</text:p>
          </table:table-cell>
          <table:table-cell table:formula="of:=[.B1399]/[.C1399]" office:value-type="float" office:value="0.00275069444444444" calcext:value-type="float">
            <text:p>0,00275069444444444000</text:p>
          </table:table-cell>
          <table:table-cell table:formula="of:=[.D1400]-[.D139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B1399]+17" office:value-type="float" office:value="23783" calcext:value-type="float">
            <text:p>23783</text:p>
          </table:table-cell>
          <table:table-cell office:value-type="float" office:value="8640000" calcext:value-type="float">
            <text:p>8640000</text:p>
          </table:table-cell>
          <table:table-cell table:formula="of:=[.B1400]/[.C1400]" office:value-type="float" office:value="0.00275266203703704" calcext:value-type="float">
            <text:p>0,00275266203703704000</text:p>
          </table:table-cell>
          <table:table-cell table:formula="of:=[.D1401]-[.D140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1400]+17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1401]/[.C1401]" office:value-type="float" office:value="0.00275462962962963" calcext:value-type="float">
            <text:p>0,00275462962962963000</text:p>
          </table:table-cell>
          <table:table-cell table:formula="of:=[.D1402]-[.D1401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B1401]+17" office:value-type="float" office:value="23817" calcext:value-type="float">
            <text:p>23817</text:p>
          </table:table-cell>
          <table:table-cell office:value-type="float" office:value="8640000" calcext:value-type="float">
            <text:p>8640000</text:p>
          </table:table-cell>
          <table:table-cell table:formula="of:=[.B1402]/[.C1402]" office:value-type="float" office:value="0.00275659722222222" calcext:value-type="float">
            <text:p>0,00275659722222222000</text:p>
          </table:table-cell>
          <table:table-cell table:formula="of:=[.D1403]-[.D1402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B1402]+17" office:value-type="float" office:value="23834" calcext:value-type="float">
            <text:p>23834</text:p>
          </table:table-cell>
          <table:table-cell office:value-type="float" office:value="8640000" calcext:value-type="float">
            <text:p>8640000</text:p>
          </table:table-cell>
          <table:table-cell table:formula="of:=[.B1403]/[.C1403]" office:value-type="float" office:value="0.00275856481481482" calcext:value-type="float">
            <text:p>0,00275856481481482000</text:p>
          </table:table-cell>
          <table:table-cell table:formula="of:=[.D1404]-[.D1403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B1403]+17" office:value-type="float" office:value="23851" calcext:value-type="float">
            <text:p>23851</text:p>
          </table:table-cell>
          <table:table-cell office:value-type="float" office:value="8640000" calcext:value-type="float">
            <text:p>8640000</text:p>
          </table:table-cell>
          <table:table-cell table:formula="of:=[.B1404]/[.C1404]" office:value-type="float" office:value="0.00276053240740741" calcext:value-type="float">
            <text:p>0,00276053240740741000</text:p>
          </table:table-cell>
          <table:table-cell table:formula="of:=[.D1405]-[.D1404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B1404]+17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1405]/[.C1405]" office:value-type="float" office:value="0.0027625" calcext:value-type="float">
            <text:p>0,00276250000000000000</text:p>
          </table:table-cell>
          <table:table-cell table:formula="of:=[.D1406]-[.D1405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B1405]+17" office:value-type="float" office:value="23885" calcext:value-type="float">
            <text:p>23885</text:p>
          </table:table-cell>
          <table:table-cell office:value-type="float" office:value="8640000" calcext:value-type="float">
            <text:p>8640000</text:p>
          </table:table-cell>
          <table:table-cell table:formula="of:=[.B1406]/[.C1406]" office:value-type="float" office:value="0.00276446759259259" calcext:value-type="float">
            <text:p>0,00276446759259259000</text:p>
          </table:table-cell>
          <table:table-cell table:formula="of:=[.D1407]-[.D1406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B1406]+17" office:value-type="float" office:value="23902" calcext:value-type="float">
            <text:p>23902</text:p>
          </table:table-cell>
          <table:table-cell office:value-type="float" office:value="8640000" calcext:value-type="float">
            <text:p>8640000</text:p>
          </table:table-cell>
          <table:table-cell table:formula="of:=[.B1407]/[.C1407]" office:value-type="float" office:value="0.00276643518518519" calcext:value-type="float">
            <text:p>0,00276643518518519000</text:p>
          </table:table-cell>
          <table:table-cell table:formula="of:=[.D1408]-[.D1407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B1407]+17" office:value-type="float" office:value="23919" calcext:value-type="float">
            <text:p>23919</text:p>
          </table:table-cell>
          <table:table-cell office:value-type="float" office:value="8640000" calcext:value-type="float">
            <text:p>8640000</text:p>
          </table:table-cell>
          <table:table-cell table:formula="of:=[.B1408]/[.C1408]" office:value-type="float" office:value="0.00276840277777778" calcext:value-type="float">
            <text:p>0,00276840277777778000</text:p>
          </table:table-cell>
          <table:table-cell table:formula="of:=[.D1409]-[.D1408]" office:value-type="float" office:value="0.00000196759259259291" calcext:value-type="float">
            <text:p>0,0000019675925925929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B1408]+17" office:value-type="float" office:value="23936" calcext:value-type="float">
            <text:p>23936</text:p>
          </table:table-cell>
          <table:table-cell office:value-type="float" office:value="8640000" calcext:value-type="float">
            <text:p>8640000</text:p>
          </table:table-cell>
          <table:table-cell table:formula="of:=[.B1409]/[.C1409]" office:value-type="float" office:value="0.00277037037037037" calcext:value-type="float">
            <text:p>0,00277037037037037000</text:p>
          </table:table-cell>
          <table:table-cell table:formula="of:=[.D1410]-[.D1409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1409]+17" office:value-type="float" office:value="23953" calcext:value-type="float">
            <text:p>23953</text:p>
          </table:table-cell>
          <table:table-cell office:value-type="float" office:value="8640000" calcext:value-type="float">
            <text:p>8640000</text:p>
          </table:table-cell>
          <table:table-cell table:formula="of:=[.B1410]/[.C1410]" office:value-type="float" office:value="0.00277233796296296" calcext:value-type="float">
            <text:p>0,00277233796296296000</text:p>
          </table:table-cell>
          <table:table-cell table:formula="of:=[.D1411]-[.D1410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B1410]+17" office:value-type="float" office:value="23970" calcext:value-type="float">
            <text:p>23970</text:p>
          </table:table-cell>
          <table:table-cell office:value-type="float" office:value="8640000" calcext:value-type="float">
            <text:p>8640000</text:p>
          </table:table-cell>
          <table:table-cell table:formula="of:=[.B1411]/[.C1411]" office:value-type="float" office:value="0.00277430555555556" calcext:value-type="float">
            <text:p>0,00277430555555556000</text:p>
          </table:table-cell>
          <table:table-cell table:formula="of:=[.D1412]-[.D1411]" office:value-type="float" office:value="0.00000196759259259247" calcext:value-type="float">
            <text:p>0,0000019675925925924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B1411]+17" office:value-type="float" office:value="23987" calcext:value-type="float">
            <text:p>23987</text:p>
          </table:table-cell>
          <table:table-cell office:value-type="float" office:value="8640000" calcext:value-type="float">
            <text:p>8640000</text:p>
          </table:table-cell>
          <table:table-cell table:formula="of:=[.B1412]/[.C1412]" office:value-type="float" office:value="0.00277627314814815" calcext:value-type="float">
            <text:p>0,00277627314814815000</text:p>
          </table:table-cell>
          <table:table-cell table:formula="of:=#REF!-[.D1412]" office:value-type="string" office:string-value="" calcext:value-type="error">
            <text:p>#REF!</text:p>
          </table:table-cell>
        </table:table-row>
        <table:table-row table:style-name="ro1" table:number-rows-repeated="10471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6:43.375921969</meta:creation-date>
    <dc:date>2026-05-17T15:36:56.865871562</dc:date>
    <meta:editing-duration>PT15S</meta:editing-duration>
    <meta:editing-cycles>1</meta:editing-cycles>
    <meta:document-statistic meta:table-count="1" meta:cell-count="7060" meta:object-count="0"/>
    <meta:generator>LibreOffice/24.2.7.2$Linux_X86_64 LibreOffice_project/420$Build-2</meta:generator>
  </office:meta>
</office:document-meta>
</file>