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23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266203703703704" calcext:value-type="float">
            <text:p>0,00000266203703703704</text:p>
          </table:table-cell>
          <table:table-cell table:formula="of:=[.D3]-[.D2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23" office:value-type="float" office:value="46" calcext:value-type="float">
            <text:p>46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0532407407407407" calcext:value-type="float">
            <text:p>0,00000532407407407407</text:p>
          </table:table-cell>
          <table:table-cell table:formula="of:=[.D4]-[.D3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23" office:value-type="float" office:value="69" calcext:value-type="float">
            <text:p>69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0798611111111111" calcext:value-type="float">
            <text:p>0,00000798611111111111</text:p>
          </table:table-cell>
          <table:table-cell table:formula="of:=[.D5]-[.D4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3" office:value-type="float" office:value="92" calcext:value-type="float">
            <text:p>92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106481481481481" calcext:value-type="float">
            <text:p>0,00001064814814814820</text:p>
          </table:table-cell>
          <table:table-cell table:formula="of:=[.D6]-[.D5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3" office:value-type="float" office:value="115" calcext:value-type="float">
            <text:p>11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133101851851852" calcext:value-type="float">
            <text:p>0,00001331018518518520</text:p>
          </table:table-cell>
          <table:table-cell table:formula="of:=[.D7]-[.D6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23" office:value-type="float" office:value="138" calcext:value-type="float">
            <text:p>138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159722222222222" calcext:value-type="float">
            <text:p>0,00001597222222222220</text:p>
          </table:table-cell>
          <table:table-cell table:formula="of:=[.D8]-[.D7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23" office:value-type="float" office:value="161" calcext:value-type="float">
            <text:p>161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186342592592593" calcext:value-type="float">
            <text:p>0,00001863425925925930</text:p>
          </table:table-cell>
          <table:table-cell table:formula="of:=[.D9]-[.D8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23" office:value-type="float" office:value="184" calcext:value-type="float">
            <text:p>184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212962962962963" calcext:value-type="float">
            <text:p>0,00002129629629629630</text:p>
          </table:table-cell>
          <table:table-cell table:formula="of:=[.D10]-[.D9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23" office:value-type="float" office:value="207" calcext:value-type="float">
            <text:p>207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239583333333333" calcext:value-type="float">
            <text:p>0,00002395833333333330</text:p>
          </table:table-cell>
          <table:table-cell table:formula="of:=[.D11]-[.D10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23" office:value-type="float" office:value="230" calcext:value-type="float">
            <text:p>23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266203703703704" calcext:value-type="float">
            <text:p>0,00002662037037037040</text:p>
          </table:table-cell>
          <table:table-cell table:formula="of:=[.D12]-[.D11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23" office:value-type="float" office:value="253" calcext:value-type="float">
            <text:p>253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292824074074074" calcext:value-type="float">
            <text:p>0,00002928240740740740</text:p>
          </table:table-cell>
          <table:table-cell table:formula="of:=[.D13]-[.D12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23" office:value-type="float" office:value="276" calcext:value-type="float">
            <text:p>276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319444444444445" calcext:value-type="float">
            <text:p>0,00003194444444444450</text:p>
          </table:table-cell>
          <table:table-cell table:formula="of:=[.D14]-[.D13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23" office:value-type="float" office:value="299" calcext:value-type="float">
            <text:p>299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346064814814815" calcext:value-type="float">
            <text:p>0,00003460648148148150</text:p>
          </table:table-cell>
          <table:table-cell table:formula="of:=[.D15]-[.D14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23" office:value-type="float" office:value="322" calcext:value-type="float">
            <text:p>322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372685185185185" calcext:value-type="float">
            <text:p>0,00003726851851851850</text:p>
          </table:table-cell>
          <table:table-cell table:formula="of:=[.D16]-[.D15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23" office:value-type="float" office:value="345" calcext:value-type="float">
            <text:p>34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399305555555556" calcext:value-type="float">
            <text:p>0,00003993055555555560</text:p>
          </table:table-cell>
          <table:table-cell table:formula="of:=[.D17]-[.D16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23" office:value-type="float" office:value="368" calcext:value-type="float">
            <text:p>368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425925925925926" calcext:value-type="float">
            <text:p>0,00004259259259259260</text:p>
          </table:table-cell>
          <table:table-cell table:formula="of:=[.D18]-[.D17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23" office:value-type="float" office:value="391" calcext:value-type="float">
            <text:p>391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0452546296296296" calcext:value-type="float">
            <text:p>0,00004525462962962960</text:p>
          </table:table-cell>
          <table:table-cell table:formula="of:=[.D19]-[.D18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23" office:value-type="float" office:value="414" calcext:value-type="float">
            <text:p>414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0479166666666667" calcext:value-type="float">
            <text:p>0,00004791666666666670</text:p>
          </table:table-cell>
          <table:table-cell table:formula="of:=[.D20]-[.D19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23" office:value-type="float" office:value="437" calcext:value-type="float">
            <text:p>437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0505787037037037" calcext:value-type="float">
            <text:p>0,00005057870370370370</text:p>
          </table:table-cell>
          <table:table-cell table:formula="of:=[.D21]-[.D20]" office:value-type="float" office:value="0.00000266203703703704" calcext:value-type="float">
            <text:p>0,00000266203703703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23" office:value-type="float" office:value="460" calcext:value-type="float">
            <text:p>46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0532407407407407" calcext:value-type="float">
            <text:p>0,00005324074074074070</text:p>
          </table:table-cell>
          <table:table-cell table:formula="of:=[.D22]-[.D21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23" office:value-type="float" office:value="483" calcext:value-type="float">
            <text:p>483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0559027777777778" calcext:value-type="float">
            <text:p>0,00005590277777777780</text:p>
          </table:table-cell>
          <table:table-cell table:formula="of:=[.D23]-[.D22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23" office:value-type="float" office:value="506" calcext:value-type="float">
            <text:p>506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0585648148148148" calcext:value-type="float">
            <text:p>0,00005856481481481480</text:p>
          </table:table-cell>
          <table:table-cell table:formula="of:=[.D24]-[.D23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23" office:value-type="float" office:value="529" calcext:value-type="float">
            <text:p>529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0612268518518519" calcext:value-type="float">
            <text:p>0,00006122685185185190</text:p>
          </table:table-cell>
          <table:table-cell table:formula="of:=[.D25]-[.D24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23" office:value-type="float" office:value="552" calcext:value-type="float">
            <text:p>552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0638888888888889" calcext:value-type="float">
            <text:p>0,00006388888888888890</text:p>
          </table:table-cell>
          <table:table-cell table:formula="of:=[.D26]-[.D25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23" office:value-type="float" office:value="575" calcext:value-type="float">
            <text:p>57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0665509259259259" calcext:value-type="float">
            <text:p>0,00006655092592592590</text:p>
          </table:table-cell>
          <table:table-cell table:formula="of:=[.D27]-[.D26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23" office:value-type="float" office:value="598" calcext:value-type="float">
            <text:p>598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069212962962963" calcext:value-type="float">
            <text:p>0,00006921296296296300</text:p>
          </table:table-cell>
          <table:table-cell table:formula="of:=[.D28]-[.D27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23" office:value-type="float" office:value="621" calcext:value-type="float">
            <text:p>621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071875" calcext:value-type="float">
            <text:p>0,00007187500000000000</text:p>
          </table:table-cell>
          <table:table-cell table:formula="of:=[.D29]-[.D28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23" office:value-type="float" office:value="644" calcext:value-type="float">
            <text:p>644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074537037037037" calcext:value-type="float">
            <text:p>0,00007453703703703700</text:p>
          </table:table-cell>
          <table:table-cell table:formula="of:=[.D30]-[.D29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23" office:value-type="float" office:value="667" calcext:value-type="float">
            <text:p>667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0771990740740741" calcext:value-type="float">
            <text:p>0,00007719907407407410</text:p>
          </table:table-cell>
          <table:table-cell table:formula="of:=[.D31]-[.D3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3" office:value-type="float" office:value="690" calcext:value-type="float">
            <text:p>69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0798611111111111" calcext:value-type="float">
            <text:p>0,00007986111111111110</text:p>
          </table:table-cell>
          <table:table-cell table:formula="of:=[.D32]-[.D31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3" office:value-type="float" office:value="713" calcext:value-type="float">
            <text:p>713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0825231481481482" calcext:value-type="float">
            <text:p>0,00008252314814814820</text:p>
          </table:table-cell>
          <table:table-cell table:formula="of:=[.D33]-[.D32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3" office:value-type="float" office:value="736" calcext:value-type="float">
            <text:p>736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0851851851851852" calcext:value-type="float">
            <text:p>0,00008518518518518520</text:p>
          </table:table-cell>
          <table:table-cell table:formula="of:=[.D34]-[.D33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3" office:value-type="float" office:value="759" calcext:value-type="float">
            <text:p>759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0878472222222222" calcext:value-type="float">
            <text:p>0,00008784722222222220</text:p>
          </table:table-cell>
          <table:table-cell table:formula="of:=[.D35]-[.D34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3" office:value-type="float" office:value="782" calcext:value-type="float">
            <text:p>782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0905092592592593" calcext:value-type="float">
            <text:p>0,00009050925925925930</text:p>
          </table:table-cell>
          <table:table-cell table:formula="of:=[.D36]-[.D35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3" office:value-type="float" office:value="805" calcext:value-type="float">
            <text:p>80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0931712962962963" calcext:value-type="float">
            <text:p>0,00009317129629629630</text:p>
          </table:table-cell>
          <table:table-cell table:formula="of:=[.D37]-[.D36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3" office:value-type="float" office:value="828" calcext:value-type="float">
            <text:p>828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0958333333333333" calcext:value-type="float">
            <text:p>0,00009583333333333330</text:p>
          </table:table-cell>
          <table:table-cell table:formula="of:=[.D38]-[.D37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3" office:value-type="float" office:value="851" calcext:value-type="float">
            <text:p>851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0984953703703704" calcext:value-type="float">
            <text:p>0,00009849537037037040</text:p>
          </table:table-cell>
          <table:table-cell table:formula="of:=[.D39]-[.D38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3" office:value-type="float" office:value="874" calcext:value-type="float">
            <text:p>874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101157407407407" calcext:value-type="float">
            <text:p>0,00010115740740740700</text:p>
          </table:table-cell>
          <table:table-cell table:formula="of:=[.D40]-[.D39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3" office:value-type="float" office:value="897" calcext:value-type="float">
            <text:p>897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103819444444444" calcext:value-type="float">
            <text:p>0,00010381944444444400</text:p>
          </table:table-cell>
          <table:table-cell table:formula="of:=[.D41]-[.D4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3" office:value-type="float" office:value="920" calcext:value-type="float">
            <text:p>92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106481481481481" calcext:value-type="float">
            <text:p>0,00010648148148148100</text:p>
          </table:table-cell>
          <table:table-cell table:formula="of:=[.D42]-[.D41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3" office:value-type="float" office:value="943" calcext:value-type="float">
            <text:p>943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109143518518519" calcext:value-type="float">
            <text:p>0,00010914351851851900</text:p>
          </table:table-cell>
          <table:table-cell table:formula="of:=[.D43]-[.D42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3" office:value-type="float" office:value="966" calcext:value-type="float">
            <text:p>966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111805555555556" calcext:value-type="float">
            <text:p>0,00011180555555555600</text:p>
          </table:table-cell>
          <table:table-cell table:formula="of:=[.D44]-[.D43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3" office:value-type="float" office:value="989" calcext:value-type="float">
            <text:p>989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114467592592593" calcext:value-type="float">
            <text:p>0,00011446759259259300</text:p>
          </table:table-cell>
          <table:table-cell table:formula="of:=[.D45]-[.D44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3" office:value-type="float" office:value="1012" calcext:value-type="float">
            <text:p>1012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11712962962963" calcext:value-type="float">
            <text:p>0,00011712962962963000</text:p>
          </table:table-cell>
          <table:table-cell table:formula="of:=[.D46]-[.D45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3" office:value-type="float" office:value="1035" calcext:value-type="float">
            <text:p>103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119791666666667" calcext:value-type="float">
            <text:p>0,00011979166666666700</text:p>
          </table:table-cell>
          <table:table-cell table:formula="of:=[.D47]-[.D46]" office:value-type="float" office:value="0.00000266203703703703" calcext:value-type="float">
            <text:p>0,000002662037037037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3" office:value-type="float" office:value="1058" calcext:value-type="float">
            <text:p>1058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122453703703704" calcext:value-type="float">
            <text:p>0,00012245370370370400</text:p>
          </table:table-cell>
          <table:table-cell table:formula="of:=[.D48]-[.D47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3" office:value-type="float" office:value="1081" calcext:value-type="float">
            <text:p>1081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125115740740741" calcext:value-type="float">
            <text:p>0,00012511574074074100</text:p>
          </table:table-cell>
          <table:table-cell table:formula="of:=[.D49]-[.D48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3" office:value-type="float" office:value="1104" calcext:value-type="float">
            <text:p>1104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127777777777778" calcext:value-type="float">
            <text:p>0,00012777777777777800</text:p>
          </table:table-cell>
          <table:table-cell table:formula="of:=[.D50]-[.D4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3" office:value-type="float" office:value="1127" calcext:value-type="float">
            <text:p>1127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130439814814815" calcext:value-type="float">
            <text:p>0,00013043981481481500</text:p>
          </table:table-cell>
          <table:table-cell table:formula="of:=[.D51]-[.D5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3" office:value-type="float" office:value="1150" calcext:value-type="float">
            <text:p>11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133101851851852" calcext:value-type="float">
            <text:p>0,00013310185185185200</text:p>
          </table:table-cell>
          <table:table-cell table:formula="of:=[.D52]-[.D5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3" office:value-type="float" office:value="1173" calcext:value-type="float">
            <text:p>1173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135763888888889" calcext:value-type="float">
            <text:p>0,00013576388888888900</text:p>
          </table:table-cell>
          <table:table-cell table:formula="of:=[.D53]-[.D52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3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138425925925926" calcext:value-type="float">
            <text:p>0,00013842592592592600</text:p>
          </table:table-cell>
          <table:table-cell table:formula="of:=[.D54]-[.D5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3" office:value-type="float" office:value="1219" calcext:value-type="float">
            <text:p>1219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141087962962963" calcext:value-type="float">
            <text:p>0,00014108796296296300</text:p>
          </table:table-cell>
          <table:table-cell table:formula="of:=[.D55]-[.D54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3" office:value-type="float" office:value="1242" calcext:value-type="float">
            <text:p>1242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14375" calcext:value-type="float">
            <text:p>0,00014375000000000000</text:p>
          </table:table-cell>
          <table:table-cell table:formula="of:=[.D56]-[.D55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3" office:value-type="float" office:value="1265" calcext:value-type="float">
            <text:p>126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146412037037037" calcext:value-type="float">
            <text:p>0,00014641203703703700</text:p>
          </table:table-cell>
          <table:table-cell table:formula="of:=[.D57]-[.D5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3" office:value-type="float" office:value="1288" calcext:value-type="float">
            <text:p>1288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149074074074074" calcext:value-type="float">
            <text:p>0,00014907407407407400</text:p>
          </table:table-cell>
          <table:table-cell table:formula="of:=[.D58]-[.D57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3" office:value-type="float" office:value="1311" calcext:value-type="float">
            <text:p>1311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151736111111111" calcext:value-type="float">
            <text:p>0,00015173611111111100</text:p>
          </table:table-cell>
          <table:table-cell table:formula="of:=[.D59]-[.D5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3" office:value-type="float" office:value="1334" calcext:value-type="float">
            <text:p>1334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154398148148148" calcext:value-type="float">
            <text:p>0,00015439814814814800</text:p>
          </table:table-cell>
          <table:table-cell table:formula="of:=[.D60]-[.D59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3" office:value-type="float" office:value="1357" calcext:value-type="float">
            <text:p>1357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157060185185185" calcext:value-type="float">
            <text:p>0,00015706018518518500</text:p>
          </table:table-cell>
          <table:table-cell table:formula="of:=[.D61]-[.D6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3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159722222222222" calcext:value-type="float">
            <text:p>0,00015972222222222200</text:p>
          </table:table-cell>
          <table:table-cell table:formula="of:=[.D62]-[.D6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3" office:value-type="float" office:value="1403" calcext:value-type="float">
            <text:p>1403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162384259259259" calcext:value-type="float">
            <text:p>0,00016238425925925900</text:p>
          </table:table-cell>
          <table:table-cell table:formula="of:=[.D63]-[.D62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3" office:value-type="float" office:value="1426" calcext:value-type="float">
            <text:p>1426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165046296296296" calcext:value-type="float">
            <text:p>0,00016504629629629600</text:p>
          </table:table-cell>
          <table:table-cell table:formula="of:=[.D64]-[.D6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3" office:value-type="float" office:value="1449" calcext:value-type="float">
            <text:p>1449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167708333333333" calcext:value-type="float">
            <text:p>0,00016770833333333300</text:p>
          </table:table-cell>
          <table:table-cell table:formula="of:=[.D65]-[.D64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3" office:value-type="float" office:value="1472" calcext:value-type="float">
            <text:p>1472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17037037037037" calcext:value-type="float">
            <text:p>0,00017037037037037000</text:p>
          </table:table-cell>
          <table:table-cell table:formula="of:=[.D66]-[.D65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3" office:value-type="float" office:value="1495" calcext:value-type="float">
            <text:p>149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173032407407407" calcext:value-type="float">
            <text:p>0,00017303240740740700</text:p>
          </table:table-cell>
          <table:table-cell table:formula="of:=[.D67]-[.D6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3" office:value-type="float" office:value="1518" calcext:value-type="float">
            <text:p>1518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175694444444444" calcext:value-type="float">
            <text:p>0,00017569444444444400</text:p>
          </table:table-cell>
          <table:table-cell table:formula="of:=[.D68]-[.D67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3" office:value-type="float" office:value="1541" calcext:value-type="float">
            <text:p>1541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178356481481482" calcext:value-type="float">
            <text:p>0,00017835648148148200</text:p>
          </table:table-cell>
          <table:table-cell table:formula="of:=[.D69]-[.D6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3" office:value-type="float" office:value="1564" calcext:value-type="float">
            <text:p>1564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181018518518519" calcext:value-type="float">
            <text:p>0,00018101851851851900</text:p>
          </table:table-cell>
          <table:table-cell table:formula="of:=[.D70]-[.D69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3" office:value-type="float" office:value="1587" calcext:value-type="float">
            <text:p>1587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183680555555556" calcext:value-type="float">
            <text:p>0,00018368055555555600</text:p>
          </table:table-cell>
          <table:table-cell table:formula="of:=[.D71]-[.D7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3" office:value-type="float" office:value="1610" calcext:value-type="float">
            <text:p>161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186342592592593" calcext:value-type="float">
            <text:p>0,00018634259259259300</text:p>
          </table:table-cell>
          <table:table-cell table:formula="of:=[.D72]-[.D7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3" office:value-type="float" office:value="1633" calcext:value-type="float">
            <text:p>1633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18900462962963" calcext:value-type="float">
            <text:p>0,00018900462962963000</text:p>
          </table:table-cell>
          <table:table-cell table:formula="of:=[.D73]-[.D72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3" office:value-type="float" office:value="1656" calcext:value-type="float">
            <text:p>1656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191666666666667" calcext:value-type="float">
            <text:p>0,00019166666666666700</text:p>
          </table:table-cell>
          <table:table-cell table:formula="of:=[.D74]-[.D7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3" office:value-type="float" office:value="1679" calcext:value-type="float">
            <text:p>1679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194328703703704" calcext:value-type="float">
            <text:p>0,00019432870370370400</text:p>
          </table:table-cell>
          <table:table-cell table:formula="of:=[.D75]-[.D74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3" office:value-type="float" office:value="1702" calcext:value-type="float">
            <text:p>1702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196990740740741" calcext:value-type="float">
            <text:p>0,00019699074074074100</text:p>
          </table:table-cell>
          <table:table-cell table:formula="of:=[.D76]-[.D75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3" office:value-type="float" office:value="1725" calcext:value-type="float">
            <text:p>172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199652777777778" calcext:value-type="float">
            <text:p>0,00019965277777777800</text:p>
          </table:table-cell>
          <table:table-cell table:formula="of:=[.D77]-[.D7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3" office:value-type="float" office:value="1748" calcext:value-type="float">
            <text:p>1748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202314814814815" calcext:value-type="float">
            <text:p>0,00020231481481481500</text:p>
          </table:table-cell>
          <table:table-cell table:formula="of:=[.D78]-[.D77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3" office:value-type="float" office:value="1771" calcext:value-type="float">
            <text:p>1771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204976851851852" calcext:value-type="float">
            <text:p>0,00020497685185185200</text:p>
          </table:table-cell>
          <table:table-cell table:formula="of:=[.D79]-[.D7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3" office:value-type="float" office:value="1794" calcext:value-type="float">
            <text:p>1794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207638888888889" calcext:value-type="float">
            <text:p>0,00020763888888888900</text:p>
          </table:table-cell>
          <table:table-cell table:formula="of:=[.D80]-[.D79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3" office:value-type="float" office:value="1817" calcext:value-type="float">
            <text:p>1817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210300925925926" calcext:value-type="float">
            <text:p>0,00021030092592592600</text:p>
          </table:table-cell>
          <table:table-cell table:formula="of:=[.D81]-[.D80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3" office:value-type="float" office:value="1840" calcext:value-type="float">
            <text:p>184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212962962962963" calcext:value-type="float">
            <text:p>0,00021296296296296300</text:p>
          </table:table-cell>
          <table:table-cell table:formula="of:=[.D82]-[.D8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3" office:value-type="float" office:value="1863" calcext:value-type="float">
            <text:p>1863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215625" calcext:value-type="float">
            <text:p>0,00021562500000000000</text:p>
          </table:table-cell>
          <table:table-cell table:formula="of:=[.D83]-[.D82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3" office:value-type="float" office:value="1886" calcext:value-type="float">
            <text:p>1886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218287037037037" calcext:value-type="float">
            <text:p>0,00021828703703703700</text:p>
          </table:table-cell>
          <table:table-cell table:formula="of:=[.D84]-[.D8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3" office:value-type="float" office:value="1909" calcext:value-type="float">
            <text:p>1909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220949074074074" calcext:value-type="float">
            <text:p>0,00022094907407407400</text:p>
          </table:table-cell>
          <table:table-cell table:formula="of:=[.D85]-[.D84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3" office:value-type="float" office:value="1932" calcext:value-type="float">
            <text:p>1932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223611111111111" calcext:value-type="float">
            <text:p>0,00022361111111111100</text:p>
          </table:table-cell>
          <table:table-cell table:formula="of:=[.D86]-[.D85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3" office:value-type="float" office:value="1955" calcext:value-type="float">
            <text:p>195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226273148148148" calcext:value-type="float">
            <text:p>0,00022627314814814800</text:p>
          </table:table-cell>
          <table:table-cell table:formula="of:=[.D87]-[.D8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3" office:value-type="float" office:value="1978" calcext:value-type="float">
            <text:p>1978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228935185185185" calcext:value-type="float">
            <text:p>0,00022893518518518500</text:p>
          </table:table-cell>
          <table:table-cell table:formula="of:=[.D88]-[.D87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3" office:value-type="float" office:value="2001" calcext:value-type="float">
            <text:p>2001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231597222222222" calcext:value-type="float">
            <text:p>0,00023159722222222200</text:p>
          </table:table-cell>
          <table:table-cell table:formula="of:=[.D89]-[.D8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3" office:value-type="float" office:value="2024" calcext:value-type="float">
            <text:p>2024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234259259259259" calcext:value-type="float">
            <text:p>0,00023425925925925900</text:p>
          </table:table-cell>
          <table:table-cell table:formula="of:=[.D90]-[.D89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3" office:value-type="float" office:value="2047" calcext:value-type="float">
            <text:p>2047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236921296296296" calcext:value-type="float">
            <text:p>0,00023692129629629600</text:p>
          </table:table-cell>
          <table:table-cell table:formula="of:=[.D91]-[.D9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23" office:value-type="float" office:value="2070" calcext:value-type="float">
            <text:p>207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239583333333333" calcext:value-type="float">
            <text:p>0,00023958333333333300</text:p>
          </table:table-cell>
          <table:table-cell table:formula="of:=[.D92]-[.D91]" office:value-type="float" office:value="0.00000266203703703705" calcext:value-type="float">
            <text:p>0,000002662037037037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23" office:value-type="float" office:value="2093" calcext:value-type="float">
            <text:p>2093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24224537037037" calcext:value-type="float">
            <text:p>0,00024224537037037000</text:p>
          </table:table-cell>
          <table:table-cell table:formula="of:=[.D93]-[.D9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23" office:value-type="float" office:value="2116" calcext:value-type="float">
            <text:p>2116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244907407407407" calcext:value-type="float">
            <text:p>0,00024490740740740700</text:p>
          </table:table-cell>
          <table:table-cell table:formula="of:=[.D94]-[.D93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23" office:value-type="float" office:value="2139" calcext:value-type="float">
            <text:p>2139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247569444444444" calcext:value-type="float">
            <text:p>0,00024756944444444400</text:p>
          </table:table-cell>
          <table:table-cell table:formula="of:=[.D95]-[.D9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23" office:value-type="float" office:value="2162" calcext:value-type="float">
            <text:p>2162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250231481481482" calcext:value-type="float">
            <text:p>0,00025023148148148200</text:p>
          </table:table-cell>
          <table:table-cell table:formula="of:=[.D96]-[.D9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23" office:value-type="float" office:value="2185" calcext:value-type="float">
            <text:p>218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252893518518519" calcext:value-type="float">
            <text:p>0,00025289351851851900</text:p>
          </table:table-cell>
          <table:table-cell table:formula="of:=[.D97]-[.D96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23" office:value-type="float" office:value="2208" calcext:value-type="float">
            <text:p>2208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255555555555556" calcext:value-type="float">
            <text:p>0,00025555555555555600</text:p>
          </table:table-cell>
          <table:table-cell table:formula="of:=[.D98]-[.D9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23" office:value-type="float" office:value="2231" calcext:value-type="float">
            <text:p>2231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258217592592593" calcext:value-type="float">
            <text:p>0,00025821759259259300</text:p>
          </table:table-cell>
          <table:table-cell table:formula="of:=[.D99]-[.D9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23" office:value-type="float" office:value="2254" calcext:value-type="float">
            <text:p>2254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26087962962963" calcext:value-type="float">
            <text:p>0,00026087962962963000</text:p>
          </table:table-cell>
          <table:table-cell table:formula="of:=[.D100]-[.D9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23" office:value-type="float" office:value="2277" calcext:value-type="float">
            <text:p>2277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263541666666667" calcext:value-type="float">
            <text:p>0,00026354166666666700</text:p>
          </table:table-cell>
          <table:table-cell table:formula="of:=[.D101]-[.D10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23" office:value-type="float" office:value="2300" calcext:value-type="float">
            <text:p>23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266203703703704" calcext:value-type="float">
            <text:p>0,00026620370370370400</text:p>
          </table:table-cell>
          <table:table-cell table:formula="of:=[.D102]-[.D10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23" office:value-type="float" office:value="2323" calcext:value-type="float">
            <text:p>2323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268865740740741" calcext:value-type="float">
            <text:p>0,00026886574074074100</text:p>
          </table:table-cell>
          <table:table-cell table:formula="of:=[.D103]-[.D10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23" office:value-type="float" office:value="2346" calcext:value-type="float">
            <text:p>2346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271527777777778" calcext:value-type="float">
            <text:p>0,00027152777777777800</text:p>
          </table:table-cell>
          <table:table-cell table:formula="of:=[.D104]-[.D103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23" office:value-type="float" office:value="2369" calcext:value-type="float">
            <text:p>2369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274189814814815" calcext:value-type="float">
            <text:p>0,00027418981481481500</text:p>
          </table:table-cell>
          <table:table-cell table:formula="of:=[.D105]-[.D10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23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276851851851852" calcext:value-type="float">
            <text:p>0,00027685185185185200</text:p>
          </table:table-cell>
          <table:table-cell table:formula="of:=[.D106]-[.D10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23" office:value-type="float" office:value="2415" calcext:value-type="float">
            <text:p>241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279513888888889" calcext:value-type="float">
            <text:p>0,00027951388888888900</text:p>
          </table:table-cell>
          <table:table-cell table:formula="of:=[.D107]-[.D10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23" office:value-type="float" office:value="2438" calcext:value-type="float">
            <text:p>2438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282175925925926" calcext:value-type="float">
            <text:p>0,00028217592592592600</text:p>
          </table:table-cell>
          <table:table-cell table:formula="of:=[.D108]-[.D10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23" office:value-type="float" office:value="2461" calcext:value-type="float">
            <text:p>2461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284837962962963" calcext:value-type="float">
            <text:p>0,00028483796296296300</text:p>
          </table:table-cell>
          <table:table-cell table:formula="of:=[.D109]-[.D10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23" office:value-type="float" office:value="2484" calcext:value-type="float">
            <text:p>2484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2875" calcext:value-type="float">
            <text:p>0,00028750000000000000</text:p>
          </table:table-cell>
          <table:table-cell table:formula="of:=[.D110]-[.D10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23" office:value-type="float" office:value="2507" calcext:value-type="float">
            <text:p>2507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290162037037037" calcext:value-type="float">
            <text:p>0,00029016203703703700</text:p>
          </table:table-cell>
          <table:table-cell table:formula="of:=[.D111]-[.D11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23" office:value-type="float" office:value="2530" calcext:value-type="float">
            <text:p>253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292824074074074" calcext:value-type="float">
            <text:p>0,00029282407407407400</text:p>
          </table:table-cell>
          <table:table-cell table:formula="of:=[.D112]-[.D11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23" office:value-type="float" office:value="2553" calcext:value-type="float">
            <text:p>2553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295486111111111" calcext:value-type="float">
            <text:p>0,00029548611111111100</text:p>
          </table:table-cell>
          <table:table-cell table:formula="of:=[.D113]-[.D11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23" office:value-type="float" office:value="2576" calcext:value-type="float">
            <text:p>2576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298148148148148" calcext:value-type="float">
            <text:p>0,00029814814814814800</text:p>
          </table:table-cell>
          <table:table-cell table:formula="of:=[.D114]-[.D113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23" office:value-type="float" office:value="2599" calcext:value-type="float">
            <text:p>2599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300810185185185" calcext:value-type="float">
            <text:p>0,00030081018518518500</text:p>
          </table:table-cell>
          <table:table-cell table:formula="of:=[.D115]-[.D11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23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303472222222222" calcext:value-type="float">
            <text:p>0,00030347222222222200</text:p>
          </table:table-cell>
          <table:table-cell table:formula="of:=[.D116]-[.D11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23" office:value-type="float" office:value="2645" calcext:value-type="float">
            <text:p>264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306134259259259" calcext:value-type="float">
            <text:p>0,00030613425925925900</text:p>
          </table:table-cell>
          <table:table-cell table:formula="of:=[.D117]-[.D11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23" office:value-type="float" office:value="2668" calcext:value-type="float">
            <text:p>2668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308796296296296" calcext:value-type="float">
            <text:p>0,00030879629629629600</text:p>
          </table:table-cell>
          <table:table-cell table:formula="of:=[.D118]-[.D11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23" office:value-type="float" office:value="2691" calcext:value-type="float">
            <text:p>2691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311458333333333" calcext:value-type="float">
            <text:p>0,00031145833333333300</text:p>
          </table:table-cell>
          <table:table-cell table:formula="of:=[.D119]-[.D11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23" office:value-type="float" office:value="2714" calcext:value-type="float">
            <text:p>2714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31412037037037" calcext:value-type="float">
            <text:p>0,00031412037037037000</text:p>
          </table:table-cell>
          <table:table-cell table:formula="of:=[.D120]-[.D11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23" office:value-type="float" office:value="2737" calcext:value-type="float">
            <text:p>2737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316782407407407" calcext:value-type="float">
            <text:p>0,00031678240740740700</text:p>
          </table:table-cell>
          <table:table-cell table:formula="of:=[.D121]-[.D12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23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319444444444444" calcext:value-type="float">
            <text:p>0,00031944444444444400</text:p>
          </table:table-cell>
          <table:table-cell table:formula="of:=[.D122]-[.D12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23" office:value-type="float" office:value="2783" calcext:value-type="float">
            <text:p>2783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322106481481482" calcext:value-type="float">
            <text:p>0,00032210648148148200</text:p>
          </table:table-cell>
          <table:table-cell table:formula="of:=[.D123]-[.D12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23" office:value-type="float" office:value="2806" calcext:value-type="float">
            <text:p>2806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324768518518519" calcext:value-type="float">
            <text:p>0,00032476851851851900</text:p>
          </table:table-cell>
          <table:table-cell table:formula="of:=[.D124]-[.D123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23" office:value-type="float" office:value="2829" calcext:value-type="float">
            <text:p>2829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327430555555556" calcext:value-type="float">
            <text:p>0,00032743055555555600</text:p>
          </table:table-cell>
          <table:table-cell table:formula="of:=[.D125]-[.D12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23" office:value-type="float" office:value="2852" calcext:value-type="float">
            <text:p>2852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330092592592593" calcext:value-type="float">
            <text:p>0,00033009259259259300</text:p>
          </table:table-cell>
          <table:table-cell table:formula="of:=[.D126]-[.D12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23" office:value-type="float" office:value="2875" calcext:value-type="float">
            <text:p>287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33275462962963" calcext:value-type="float">
            <text:p>0,00033275462962963000</text:p>
          </table:table-cell>
          <table:table-cell table:formula="of:=[.D127]-[.D12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23" office:value-type="float" office:value="2898" calcext:value-type="float">
            <text:p>2898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335416666666667" calcext:value-type="float">
            <text:p>0,00033541666666666700</text:p>
          </table:table-cell>
          <table:table-cell table:formula="of:=[.D128]-[.D12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23" office:value-type="float" office:value="2921" calcext:value-type="float">
            <text:p>2921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338078703703704" calcext:value-type="float">
            <text:p>0,00033807870370370400</text:p>
          </table:table-cell>
          <table:table-cell table:formula="of:=[.D129]-[.D12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23" office:value-type="float" office:value="2944" calcext:value-type="float">
            <text:p>2944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340740740740741" calcext:value-type="float">
            <text:p>0,00034074074074074100</text:p>
          </table:table-cell>
          <table:table-cell table:formula="of:=[.D130]-[.D12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23" office:value-type="float" office:value="2967" calcext:value-type="float">
            <text:p>2967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343402777777778" calcext:value-type="float">
            <text:p>0,00034340277777777800</text:p>
          </table:table-cell>
          <table:table-cell table:formula="of:=[.D131]-[.D13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23" office:value-type="float" office:value="2990" calcext:value-type="float">
            <text:p>299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346064814814815" calcext:value-type="float">
            <text:p>0,00034606481481481500</text:p>
          </table:table-cell>
          <table:table-cell table:formula="of:=[.D132]-[.D13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23" office:value-type="float" office:value="3013" calcext:value-type="float">
            <text:p>3013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348726851851852" calcext:value-type="float">
            <text:p>0,00034872685185185200</text:p>
          </table:table-cell>
          <table:table-cell table:formula="of:=[.D133]-[.D13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23" office:value-type="float" office:value="3036" calcext:value-type="float">
            <text:p>3036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351388888888889" calcext:value-type="float">
            <text:p>0,00035138888888888900</text:p>
          </table:table-cell>
          <table:table-cell table:formula="of:=[.D134]-[.D133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23" office:value-type="float" office:value="3059" calcext:value-type="float">
            <text:p>3059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354050925925926" calcext:value-type="float">
            <text:p>0,00035405092592592600</text:p>
          </table:table-cell>
          <table:table-cell table:formula="of:=[.D135]-[.D13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23" office:value-type="float" office:value="3082" calcext:value-type="float">
            <text:p>3082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356712962962963" calcext:value-type="float">
            <text:p>0,00035671296296296300</text:p>
          </table:table-cell>
          <table:table-cell table:formula="of:=[.D136]-[.D13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23" office:value-type="float" office:value="3105" calcext:value-type="float">
            <text:p>310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359375" calcext:value-type="float">
            <text:p>0,00035937500000000000</text:p>
          </table:table-cell>
          <table:table-cell table:formula="of:=[.D137]-[.D13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23" office:value-type="float" office:value="3128" calcext:value-type="float">
            <text:p>3128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362037037037037" calcext:value-type="float">
            <text:p>0,00036203703703703700</text:p>
          </table:table-cell>
          <table:table-cell table:formula="of:=[.D138]-[.D13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23" office:value-type="float" office:value="3151" calcext:value-type="float">
            <text:p>3151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364699074074074" calcext:value-type="float">
            <text:p>0,00036469907407407400</text:p>
          </table:table-cell>
          <table:table-cell table:formula="of:=[.D139]-[.D13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23" office:value-type="float" office:value="3174" calcext:value-type="float">
            <text:p>3174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367361111111111" calcext:value-type="float">
            <text:p>0,00036736111111111100</text:p>
          </table:table-cell>
          <table:table-cell table:formula="of:=[.D140]-[.D13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23" office:value-type="float" office:value="3197" calcext:value-type="float">
            <text:p>3197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370023148148148" calcext:value-type="float">
            <text:p>0,00037002314814814800</text:p>
          </table:table-cell>
          <table:table-cell table:formula="of:=[.D141]-[.D14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23" office:value-type="float" office:value="3220" calcext:value-type="float">
            <text:p>322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372685185185185" calcext:value-type="float">
            <text:p>0,00037268518518518500</text:p>
          </table:table-cell>
          <table:table-cell table:formula="of:=[.D142]-[.D14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23" office:value-type="float" office:value="3243" calcext:value-type="float">
            <text:p>3243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375347222222222" calcext:value-type="float">
            <text:p>0,00037534722222222200</text:p>
          </table:table-cell>
          <table:table-cell table:formula="of:=[.D143]-[.D14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23" office:value-type="float" office:value="3266" calcext:value-type="float">
            <text:p>3266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378009259259259" calcext:value-type="float">
            <text:p>0,00037800925925925900</text:p>
          </table:table-cell>
          <table:table-cell table:formula="of:=[.D144]-[.D14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23" office:value-type="float" office:value="3289" calcext:value-type="float">
            <text:p>3289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380671296296296" calcext:value-type="float">
            <text:p>0,00038067129629629600</text:p>
          </table:table-cell>
          <table:table-cell table:formula="of:=[.D145]-[.D144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23" office:value-type="float" office:value="3312" calcext:value-type="float">
            <text:p>3312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383333333333333" calcext:value-type="float">
            <text:p>0,00038333333333333300</text:p>
          </table:table-cell>
          <table:table-cell table:formula="of:=[.D146]-[.D14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23" office:value-type="float" office:value="3335" calcext:value-type="float">
            <text:p>333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38599537037037" calcext:value-type="float">
            <text:p>0,00038599537037037000</text:p>
          </table:table-cell>
          <table:table-cell table:formula="of:=[.D147]-[.D14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23" office:value-type="float" office:value="3358" calcext:value-type="float">
            <text:p>3358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388657407407407" calcext:value-type="float">
            <text:p>0,00038865740740740700</text:p>
          </table:table-cell>
          <table:table-cell table:formula="of:=[.D148]-[.D14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23" office:value-type="float" office:value="3381" calcext:value-type="float">
            <text:p>3381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391319444444444" calcext:value-type="float">
            <text:p>0,00039131944444444400</text:p>
          </table:table-cell>
          <table:table-cell table:formula="of:=[.D149]-[.D14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23" office:value-type="float" office:value="3404" calcext:value-type="float">
            <text:p>3404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393981481481482" calcext:value-type="float">
            <text:p>0,00039398148148148200</text:p>
          </table:table-cell>
          <table:table-cell table:formula="of:=[.D150]-[.D14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23" office:value-type="float" office:value="3427" calcext:value-type="float">
            <text:p>3427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396643518518519" calcext:value-type="float">
            <text:p>0,00039664351851851900</text:p>
          </table:table-cell>
          <table:table-cell table:formula="of:=[.D151]-[.D15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23" office:value-type="float" office:value="3450" calcext:value-type="float">
            <text:p>34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399305555555556" calcext:value-type="float">
            <text:p>0,00039930555555555600</text:p>
          </table:table-cell>
          <table:table-cell table:formula="of:=[.D152]-[.D15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23" office:value-type="float" office:value="3473" calcext:value-type="float">
            <text:p>3473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401967592592593" calcext:value-type="float">
            <text:p>0,00040196759259259300</text:p>
          </table:table-cell>
          <table:table-cell table:formula="of:=[.D153]-[.D15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23" office:value-type="float" office:value="3496" calcext:value-type="float">
            <text:p>3496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40462962962963" calcext:value-type="float">
            <text:p>0,00040462962962963000</text:p>
          </table:table-cell>
          <table:table-cell table:formula="of:=[.D154]-[.D15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23" office:value-type="float" office:value="3519" calcext:value-type="float">
            <text:p>3519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407291666666667" calcext:value-type="float">
            <text:p>0,00040729166666666700</text:p>
          </table:table-cell>
          <table:table-cell table:formula="of:=[.D155]-[.D154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23" office:value-type="float" office:value="3542" calcext:value-type="float">
            <text:p>3542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409953703703704" calcext:value-type="float">
            <text:p>0,00040995370370370400</text:p>
          </table:table-cell>
          <table:table-cell table:formula="of:=[.D156]-[.D15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23" office:value-type="float" office:value="3565" calcext:value-type="float">
            <text:p>356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412615740740741" calcext:value-type="float">
            <text:p>0,00041261574074074100</text:p>
          </table:table-cell>
          <table:table-cell table:formula="of:=[.D157]-[.D15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23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415277777777778" calcext:value-type="float">
            <text:p>0,00041527777777777800</text:p>
          </table:table-cell>
          <table:table-cell table:formula="of:=[.D158]-[.D15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23" office:value-type="float" office:value="3611" calcext:value-type="float">
            <text:p>3611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417939814814815" calcext:value-type="float">
            <text:p>0,00041793981481481500</text:p>
          </table:table-cell>
          <table:table-cell table:formula="of:=[.D159]-[.D15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23" office:value-type="float" office:value="3634" calcext:value-type="float">
            <text:p>3634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420601851851852" calcext:value-type="float">
            <text:p>0,00042060185185185200</text:p>
          </table:table-cell>
          <table:table-cell table:formula="of:=[.D160]-[.D15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23" office:value-type="float" office:value="3657" calcext:value-type="float">
            <text:p>3657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423263888888889" calcext:value-type="float">
            <text:p>0,00042326388888888900</text:p>
          </table:table-cell>
          <table:table-cell table:formula="of:=[.D161]-[.D16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23" office:value-type="float" office:value="3680" calcext:value-type="float">
            <text:p>368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425925925925926" calcext:value-type="float">
            <text:p>0,00042592592592592600</text:p>
          </table:table-cell>
          <table:table-cell table:formula="of:=[.D162]-[.D16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23" office:value-type="float" office:value="3703" calcext:value-type="float">
            <text:p>3703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428587962962963" calcext:value-type="float">
            <text:p>0,00042858796296296300</text:p>
          </table:table-cell>
          <table:table-cell table:formula="of:=[.D163]-[.D16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23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43125" calcext:value-type="float">
            <text:p>0,00043125000000000000</text:p>
          </table:table-cell>
          <table:table-cell table:formula="of:=[.D164]-[.D16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23" office:value-type="float" office:value="3749" calcext:value-type="float">
            <text:p>3749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433912037037037" calcext:value-type="float">
            <text:p>0,00043391203703703700</text:p>
          </table:table-cell>
          <table:table-cell table:formula="of:=[.D165]-[.D164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23" office:value-type="float" office:value="3772" calcext:value-type="float">
            <text:p>3772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436574074074074" calcext:value-type="float">
            <text:p>0,00043657407407407400</text:p>
          </table:table-cell>
          <table:table-cell table:formula="of:=[.D166]-[.D16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23" office:value-type="float" office:value="3795" calcext:value-type="float">
            <text:p>379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439236111111111" calcext:value-type="float">
            <text:p>0,00043923611111111100</text:p>
          </table:table-cell>
          <table:table-cell table:formula="of:=[.D167]-[.D16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23" office:value-type="float" office:value="3818" calcext:value-type="float">
            <text:p>3818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441898148148148" calcext:value-type="float">
            <text:p>0,00044189814814814800</text:p>
          </table:table-cell>
          <table:table-cell table:formula="of:=[.D168]-[.D16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23" office:value-type="float" office:value="3841" calcext:value-type="float">
            <text:p>3841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0444560185185185" calcext:value-type="float">
            <text:p>0,00044456018518518500</text:p>
          </table:table-cell>
          <table:table-cell table:formula="of:=[.D169]-[.D16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23" office:value-type="float" office:value="3864" calcext:value-type="float">
            <text:p>3864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0447222222222222" calcext:value-type="float">
            <text:p>0,00044722222222222200</text:p>
          </table:table-cell>
          <table:table-cell table:formula="of:=[.D170]-[.D16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23" office:value-type="float" office:value="3887" calcext:value-type="float">
            <text:p>3887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0449884259259259" calcext:value-type="float">
            <text:p>0,00044988425925925900</text:p>
          </table:table-cell>
          <table:table-cell table:formula="of:=[.D171]-[.D170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23" office:value-type="float" office:value="3910" calcext:value-type="float">
            <text:p>391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0452546296296296" calcext:value-type="float">
            <text:p>0,00045254629629629600</text:p>
          </table:table-cell>
          <table:table-cell table:formula="of:=[.D172]-[.D17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23" office:value-type="float" office:value="3933" calcext:value-type="float">
            <text:p>3933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0455208333333333" calcext:value-type="float">
            <text:p>0,00045520833333333300</text:p>
          </table:table-cell>
          <table:table-cell table:formula="of:=[.D173]-[.D17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23" office:value-type="float" office:value="3956" calcext:value-type="float">
            <text:p>3956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045787037037037" calcext:value-type="float">
            <text:p>0,00045787037037037000</text:p>
          </table:table-cell>
          <table:table-cell table:formula="of:=[.D174]-[.D17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23" office:value-type="float" office:value="3979" calcext:value-type="float">
            <text:p>3979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0460532407407407" calcext:value-type="float">
            <text:p>0,00046053240740740700</text:p>
          </table:table-cell>
          <table:table-cell table:formula="of:=[.D175]-[.D174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23" office:value-type="float" office:value="4002" calcext:value-type="float">
            <text:p>4002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0463194444444444" calcext:value-type="float">
            <text:p>0,00046319444444444400</text:p>
          </table:table-cell>
          <table:table-cell table:formula="of:=[.D176]-[.D17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23" office:value-type="float" office:value="4025" calcext:value-type="float">
            <text:p>402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0465856481481482" calcext:value-type="float">
            <text:p>0,00046585648148148200</text:p>
          </table:table-cell>
          <table:table-cell table:formula="of:=[.D177]-[.D17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23" office:value-type="float" office:value="4048" calcext:value-type="float">
            <text:p>4048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0468518518518519" calcext:value-type="float">
            <text:p>0,00046851851851851900</text:p>
          </table:table-cell>
          <table:table-cell table:formula="of:=[.D178]-[.D177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23" office:value-type="float" office:value="4071" calcext:value-type="float">
            <text:p>4071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0471180555555556" calcext:value-type="float">
            <text:p>0,00047118055555555600</text:p>
          </table:table-cell>
          <table:table-cell table:formula="of:=[.D179]-[.D17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23" office:value-type="float" office:value="4094" calcext:value-type="float">
            <text:p>4094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0473842592592593" calcext:value-type="float">
            <text:p>0,00047384259259259300</text:p>
          </table:table-cell>
          <table:table-cell table:formula="of:=[.D180]-[.D17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23" office:value-type="float" office:value="4117" calcext:value-type="float">
            <text:p>4117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047650462962963" calcext:value-type="float">
            <text:p>0,00047650462962963000</text:p>
          </table:table-cell>
          <table:table-cell table:formula="of:=[.D181]-[.D18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23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0479166666666667" calcext:value-type="float">
            <text:p>0,00047916666666666700</text:p>
          </table:table-cell>
          <table:table-cell table:formula="of:=[.D182]-[.D181]" office:value-type="float" office:value="0.00000266203703703708" calcext:value-type="float">
            <text:p>0,000002662037037037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23" office:value-type="float" office:value="4163" calcext:value-type="float">
            <text:p>4163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0481828703703704" calcext:value-type="float">
            <text:p>0,00048182870370370400</text:p>
          </table:table-cell>
          <table:table-cell table:formula="of:=[.D183]-[.D18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23" office:value-type="float" office:value="4186" calcext:value-type="float">
            <text:p>4186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0484490740740741" calcext:value-type="float">
            <text:p>0,00048449074074074100</text:p>
          </table:table-cell>
          <table:table-cell table:formula="of:=[.D184]-[.D18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23" office:value-type="float" office:value="4209" calcext:value-type="float">
            <text:p>4209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0487152777777778" calcext:value-type="float">
            <text:p>0,00048715277777777800</text:p>
          </table:table-cell>
          <table:table-cell table:formula="of:=[.D185]-[.D18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23" office:value-type="float" office:value="4232" calcext:value-type="float">
            <text:p>4232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0489814814814815" calcext:value-type="float">
            <text:p>0,00048981481481481500</text:p>
          </table:table-cell>
          <table:table-cell table:formula="of:=[.D186]-[.D18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23" office:value-type="float" office:value="4255" calcext:value-type="float">
            <text:p>425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0492476851851852" calcext:value-type="float">
            <text:p>0,00049247685185185200</text:p>
          </table:table-cell>
          <table:table-cell table:formula="of:=[.D187]-[.D1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23" office:value-type="float" office:value="4278" calcext:value-type="float">
            <text:p>4278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0495138888888889" calcext:value-type="float">
            <text:p>0,00049513888888888900</text:p>
          </table:table-cell>
          <table:table-cell table:formula="of:=[.D188]-[.D18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23" office:value-type="float" office:value="4301" calcext:value-type="float">
            <text:p>4301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0497800925925926" calcext:value-type="float">
            <text:p>0,00049780092592592600</text:p>
          </table:table-cell>
          <table:table-cell table:formula="of:=[.D189]-[.D18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23" office:value-type="float" office:value="4324" calcext:value-type="float">
            <text:p>4324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0500462962962963" calcext:value-type="float">
            <text:p>0,00050046296296296300</text:p>
          </table:table-cell>
          <table:table-cell table:formula="of:=[.D190]-[.D18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23" office:value-type="float" office:value="4347" calcext:value-type="float">
            <text:p>4347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0503125" calcext:value-type="float">
            <text:p>0,00050312500000000000</text:p>
          </table:table-cell>
          <table:table-cell table:formula="of:=[.D191]-[.D19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23" office:value-type="float" office:value="4370" calcext:value-type="float">
            <text:p>437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0505787037037037" calcext:value-type="float">
            <text:p>0,00050578703703703700</text:p>
          </table:table-cell>
          <table:table-cell table:formula="of:=[.D192]-[.D19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23" office:value-type="float" office:value="4393" calcext:value-type="float">
            <text:p>4393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0508449074074074" calcext:value-type="float">
            <text:p>0,00050844907407407400</text:p>
          </table:table-cell>
          <table:table-cell table:formula="of:=[.D193]-[.D19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23" office:value-type="float" office:value="4416" calcext:value-type="float">
            <text:p>4416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0511111111111111" calcext:value-type="float">
            <text:p>0,00051111111111111100</text:p>
          </table:table-cell>
          <table:table-cell table:formula="of:=[.D194]-[.D19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23" office:value-type="float" office:value="4439" calcext:value-type="float">
            <text:p>4439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0513773148148148" calcext:value-type="float">
            <text:p>0,00051377314814814800</text:p>
          </table:table-cell>
          <table:table-cell table:formula="of:=[.D195]-[.D19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23" office:value-type="float" office:value="4462" calcext:value-type="float">
            <text:p>4462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0516435185185185" calcext:value-type="float">
            <text:p>0,00051643518518518500</text:p>
          </table:table-cell>
          <table:table-cell table:formula="of:=[.D196]-[.D19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23" office:value-type="float" office:value="4485" calcext:value-type="float">
            <text:p>448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0519097222222222" calcext:value-type="float">
            <text:p>0,00051909722222222200</text:p>
          </table:table-cell>
          <table:table-cell table:formula="of:=[.D197]-[.D19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23" office:value-type="float" office:value="4508" calcext:value-type="float">
            <text:p>4508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0521759259259259" calcext:value-type="float">
            <text:p>0,00052175925925925900</text:p>
          </table:table-cell>
          <table:table-cell table:formula="of:=[.D198]-[.D19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23" office:value-type="float" office:value="4531" calcext:value-type="float">
            <text:p>4531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0524421296296296" calcext:value-type="float">
            <text:p>0,00052442129629629600</text:p>
          </table:table-cell>
          <table:table-cell table:formula="of:=[.D199]-[.D19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23" office:value-type="float" office:value="4554" calcext:value-type="float">
            <text:p>4554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0527083333333333" calcext:value-type="float">
            <text:p>0,00052708333333333300</text:p>
          </table:table-cell>
          <table:table-cell table:formula="of:=[.D200]-[.D19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23" office:value-type="float" office:value="4577" calcext:value-type="float">
            <text:p>4577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052974537037037" calcext:value-type="float">
            <text:p>0,00052974537037037000</text:p>
          </table:table-cell>
          <table:table-cell table:formula="of:=[.D201]-[.D20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23" office:value-type="float" office:value="4600" calcext:value-type="float">
            <text:p>46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0532407407407407" calcext:value-type="float">
            <text:p>0,00053240740740740700</text:p>
          </table:table-cell>
          <table:table-cell table:formula="of:=[.D202]-[.D20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23" office:value-type="float" office:value="4623" calcext:value-type="float">
            <text:p>4623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0535069444444445" calcext:value-type="float">
            <text:p>0,00053506944444444500</text:p>
          </table:table-cell>
          <table:table-cell table:formula="of:=[.D203]-[.D20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23" office:value-type="float" office:value="4646" calcext:value-type="float">
            <text:p>4646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0537731481481482" calcext:value-type="float">
            <text:p>0,00053773148148148200</text:p>
          </table:table-cell>
          <table:table-cell table:formula="of:=[.D204]-[.D20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23" office:value-type="float" office:value="4669" calcext:value-type="float">
            <text:p>4669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0540393518518519" calcext:value-type="float">
            <text:p>0,00054039351851851900</text:p>
          </table:table-cell>
          <table:table-cell table:formula="of:=[.D205]-[.D20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23" office:value-type="float" office:value="4692" calcext:value-type="float">
            <text:p>4692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0543055555555556" calcext:value-type="float">
            <text:p>0,00054305555555555600</text:p>
          </table:table-cell>
          <table:table-cell table:formula="of:=[.D206]-[.D20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23" office:value-type="float" office:value="4715" calcext:value-type="float">
            <text:p>471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0545717592592593" calcext:value-type="float">
            <text:p>0,00054571759259259300</text:p>
          </table:table-cell>
          <table:table-cell table:formula="of:=[.D207]-[.D20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23" office:value-type="float" office:value="4738" calcext:value-type="float">
            <text:p>4738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054837962962963" calcext:value-type="float">
            <text:p>0,00054837962962963000</text:p>
          </table:table-cell>
          <table:table-cell table:formula="of:=[.D208]-[.D20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23" office:value-type="float" office:value="4761" calcext:value-type="float">
            <text:p>4761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0551041666666667" calcext:value-type="float">
            <text:p>0,00055104166666666700</text:p>
          </table:table-cell>
          <table:table-cell table:formula="of:=[.D209]-[.D20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23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0553703703703704" calcext:value-type="float">
            <text:p>0,00055370370370370400</text:p>
          </table:table-cell>
          <table:table-cell table:formula="of:=[.D210]-[.D20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23" office:value-type="float" office:value="4807" calcext:value-type="float">
            <text:p>4807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0556365740740741" calcext:value-type="float">
            <text:p>0,00055636574074074100</text:p>
          </table:table-cell>
          <table:table-cell table:formula="of:=[.D211]-[.D21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3" office:value-type="float" office:value="4830" calcext:value-type="float">
            <text:p>483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0559027777777778" calcext:value-type="float">
            <text:p>0,00055902777777777800</text:p>
          </table:table-cell>
          <table:table-cell table:formula="of:=[.D212]-[.D21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3" office:value-type="float" office:value="4853" calcext:value-type="float">
            <text:p>4853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0561689814814815" calcext:value-type="float">
            <text:p>0,00056168981481481500</text:p>
          </table:table-cell>
          <table:table-cell table:formula="of:=[.D213]-[.D21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3" office:value-type="float" office:value="4876" calcext:value-type="float">
            <text:p>4876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0564351851851852" calcext:value-type="float">
            <text:p>0,00056435185185185200</text:p>
          </table:table-cell>
          <table:table-cell table:formula="of:=[.D214]-[.D2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3" office:value-type="float" office:value="4899" calcext:value-type="float">
            <text:p>4899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0567013888888889" calcext:value-type="float">
            <text:p>0,00056701388888888900</text:p>
          </table:table-cell>
          <table:table-cell table:formula="of:=[.D215]-[.D21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3" office:value-type="float" office:value="4922" calcext:value-type="float">
            <text:p>4922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0569675925925926" calcext:value-type="float">
            <text:p>0,00056967592592592600</text:p>
          </table:table-cell>
          <table:table-cell table:formula="of:=[.D216]-[.D21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3" office:value-type="float" office:value="4945" calcext:value-type="float">
            <text:p>494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0572337962962963" calcext:value-type="float">
            <text:p>0,00057233796296296300</text:p>
          </table:table-cell>
          <table:table-cell table:formula="of:=[.D217]-[.D21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3" office:value-type="float" office:value="4968" calcext:value-type="float">
            <text:p>4968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0575" calcext:value-type="float">
            <text:p>0,00057500000000000000</text:p>
          </table:table-cell>
          <table:table-cell table:formula="of:=[.D218]-[.D21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3" office:value-type="float" office:value="4991" calcext:value-type="float">
            <text:p>4991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0577662037037037" calcext:value-type="float">
            <text:p>0,00057766203703703700</text:p>
          </table:table-cell>
          <table:table-cell table:formula="of:=[.D219]-[.D21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3" office:value-type="float" office:value="5014" calcext:value-type="float">
            <text:p>5014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0580324074074074" calcext:value-type="float">
            <text:p>0,00058032407407407400</text:p>
          </table:table-cell>
          <table:table-cell table:formula="of:=[.D220]-[.D2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3" office:value-type="float" office:value="5037" calcext:value-type="float">
            <text:p>5037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0582986111111111" calcext:value-type="float">
            <text:p>0,00058298611111111100</text:p>
          </table:table-cell>
          <table:table-cell table:formula="of:=[.D221]-[.D22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3" office:value-type="float" office:value="5060" calcext:value-type="float">
            <text:p>506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0585648148148148" calcext:value-type="float">
            <text:p>0,00058564814814814800</text:p>
          </table:table-cell>
          <table:table-cell table:formula="of:=[.D222]-[.D22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3" office:value-type="float" office:value="5083" calcext:value-type="float">
            <text:p>5083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0588310185185185" calcext:value-type="float">
            <text:p>0,00058831018518518500</text:p>
          </table:table-cell>
          <table:table-cell table:formula="of:=[.D223]-[.D22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3" office:value-type="float" office:value="5106" calcext:value-type="float">
            <text:p>5106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0590972222222222" calcext:value-type="float">
            <text:p>0,00059097222222222200</text:p>
          </table:table-cell>
          <table:table-cell table:formula="of:=[.D224]-[.D22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3" office:value-type="float" office:value="5129" calcext:value-type="float">
            <text:p>5129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0593634259259259" calcext:value-type="float">
            <text:p>0,00059363425925925900</text:p>
          </table:table-cell>
          <table:table-cell table:formula="of:=[.D225]-[.D22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3" office:value-type="float" office:value="5152" calcext:value-type="float">
            <text:p>5152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0596296296296296" calcext:value-type="float">
            <text:p>0,00059629629629629600</text:p>
          </table:table-cell>
          <table:table-cell table:formula="of:=[.D226]-[.D22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3" office:value-type="float" office:value="5175" calcext:value-type="float">
            <text:p>517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0598958333333333" calcext:value-type="float">
            <text:p>0,00059895833333333300</text:p>
          </table:table-cell>
          <table:table-cell table:formula="of:=[.D227]-[.D2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3" office:value-type="float" office:value="5198" calcext:value-type="float">
            <text:p>5198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060162037037037" calcext:value-type="float">
            <text:p>0,00060162037037037000</text:p>
          </table:table-cell>
          <table:table-cell table:formula="of:=[.D228]-[.D22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3" office:value-type="float" office:value="5221" calcext:value-type="float">
            <text:p>5221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0604282407407407" calcext:value-type="float">
            <text:p>0,00060428240740740700</text:p>
          </table:table-cell>
          <table:table-cell table:formula="of:=[.D229]-[.D22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3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0606944444444445" calcext:value-type="float">
            <text:p>0,00060694444444444500</text:p>
          </table:table-cell>
          <table:table-cell table:formula="of:=[.D230]-[.D22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3" office:value-type="float" office:value="5267" calcext:value-type="float">
            <text:p>5267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0609606481481482" calcext:value-type="float">
            <text:p>0,00060960648148148200</text:p>
          </table:table-cell>
          <table:table-cell table:formula="of:=[.D231]-[.D23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3" office:value-type="float" office:value="5290" calcext:value-type="float">
            <text:p>529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0612268518518519" calcext:value-type="float">
            <text:p>0,00061226851851851900</text:p>
          </table:table-cell>
          <table:table-cell table:formula="of:=[.D232]-[.D23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3" office:value-type="float" office:value="5313" calcext:value-type="float">
            <text:p>5313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0614930555555556" calcext:value-type="float">
            <text:p>0,00061493055555555600</text:p>
          </table:table-cell>
          <table:table-cell table:formula="of:=[.D233]-[.D23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3" office:value-type="float" office:value="5336" calcext:value-type="float">
            <text:p>5336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0617592592592593" calcext:value-type="float">
            <text:p>0,00061759259259259300</text:p>
          </table:table-cell>
          <table:table-cell table:formula="of:=[.D234]-[.D2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3" office:value-type="float" office:value="5359" calcext:value-type="float">
            <text:p>5359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062025462962963" calcext:value-type="float">
            <text:p>0,00062025462962963000</text:p>
          </table:table-cell>
          <table:table-cell table:formula="of:=[.D235]-[.D23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3" office:value-type="float" office:value="5382" calcext:value-type="float">
            <text:p>5382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0622916666666667" calcext:value-type="float">
            <text:p>0,00062291666666666700</text:p>
          </table:table-cell>
          <table:table-cell table:formula="of:=[.D236]-[.D23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3" office:value-type="float" office:value="5405" calcext:value-type="float">
            <text:p>540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0625578703703704" calcext:value-type="float">
            <text:p>0,00062557870370370400</text:p>
          </table:table-cell>
          <table:table-cell table:formula="of:=[.D237]-[.D23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3" office:value-type="float" office:value="5428" calcext:value-type="float">
            <text:p>5428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0628240740740741" calcext:value-type="float">
            <text:p>0,00062824074074074100</text:p>
          </table:table-cell>
          <table:table-cell table:formula="of:=[.D238]-[.D23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3" office:value-type="float" office:value="5451" calcext:value-type="float">
            <text:p>5451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0630902777777778" calcext:value-type="float">
            <text:p>0,00063090277777777800</text:p>
          </table:table-cell>
          <table:table-cell table:formula="of:=[.D239]-[.D23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3" office:value-type="float" office:value="5474" calcext:value-type="float">
            <text:p>5474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0633564814814815" calcext:value-type="float">
            <text:p>0,00063356481481481500</text:p>
          </table:table-cell>
          <table:table-cell table:formula="of:=[.D240]-[.D2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3" office:value-type="float" office:value="5497" calcext:value-type="float">
            <text:p>5497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0636226851851852" calcext:value-type="float">
            <text:p>0,00063622685185185200</text:p>
          </table:table-cell>
          <table:table-cell table:formula="of:=[.D241]-[.D24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3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0638888888888889" calcext:value-type="float">
            <text:p>0,00063888888888888900</text:p>
          </table:table-cell>
          <table:table-cell table:formula="of:=[.D242]-[.D24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3" office:value-type="float" office:value="5543" calcext:value-type="float">
            <text:p>5543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0641550925925926" calcext:value-type="float">
            <text:p>0,00064155092592592600</text:p>
          </table:table-cell>
          <table:table-cell table:formula="of:=[.D243]-[.D24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3" office:value-type="float" office:value="5566" calcext:value-type="float">
            <text:p>5566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0644212962962963" calcext:value-type="float">
            <text:p>0,00064421296296296300</text:p>
          </table:table-cell>
          <table:table-cell table:formula="of:=[.D244]-[.D24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3" office:value-type="float" office:value="5589" calcext:value-type="float">
            <text:p>5589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0646875" calcext:value-type="float">
            <text:p>0,00064687500000000000</text:p>
          </table:table-cell>
          <table:table-cell table:formula="of:=[.D245]-[.D24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3" office:value-type="float" office:value="5612" calcext:value-type="float">
            <text:p>5612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0649537037037037" calcext:value-type="float">
            <text:p>0,00064953703703703700</text:p>
          </table:table-cell>
          <table:table-cell table:formula="of:=[.D246]-[.D24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3" office:value-type="float" office:value="5635" calcext:value-type="float">
            <text:p>563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0652199074074074" calcext:value-type="float">
            <text:p>0,00065219907407407400</text:p>
          </table:table-cell>
          <table:table-cell table:formula="of:=[.D247]-[.D2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3" office:value-type="float" office:value="5658" calcext:value-type="float">
            <text:p>5658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0654861111111111" calcext:value-type="float">
            <text:p>0,00065486111111111100</text:p>
          </table:table-cell>
          <table:table-cell table:formula="of:=[.D248]-[.D24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3" office:value-type="float" office:value="5681" calcext:value-type="float">
            <text:p>5681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0657523148148148" calcext:value-type="float">
            <text:p>0,00065752314814814800</text:p>
          </table:table-cell>
          <table:table-cell table:formula="of:=[.D249]-[.D24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3" office:value-type="float" office:value="5704" calcext:value-type="float">
            <text:p>5704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0660185185185185" calcext:value-type="float">
            <text:p>0,00066018518518518500</text:p>
          </table:table-cell>
          <table:table-cell table:formula="of:=[.D250]-[.D24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3" office:value-type="float" office:value="5727" calcext:value-type="float">
            <text:p>5727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0662847222222222" calcext:value-type="float">
            <text:p>0,00066284722222222200</text:p>
          </table:table-cell>
          <table:table-cell table:formula="of:=[.D251]-[.D25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3" office:value-type="float" office:value="5750" calcext:value-type="float">
            <text:p>57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0665509259259259" calcext:value-type="float">
            <text:p>0,00066550925925925900</text:p>
          </table:table-cell>
          <table:table-cell table:formula="of:=[.D252]-[.D25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3" office:value-type="float" office:value="5773" calcext:value-type="float">
            <text:p>5773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0668171296296296" calcext:value-type="float">
            <text:p>0,00066817129629629600</text:p>
          </table:table-cell>
          <table:table-cell table:formula="of:=[.D253]-[.D25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3" office:value-type="float" office:value="5796" calcext:value-type="float">
            <text:p>5796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0670833333333333" calcext:value-type="float">
            <text:p>0,00067083333333333300</text:p>
          </table:table-cell>
          <table:table-cell table:formula="of:=[.D254]-[.D25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3" office:value-type="float" office:value="5819" calcext:value-type="float">
            <text:p>5819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067349537037037" calcext:value-type="float">
            <text:p>0,00067349537037037000</text:p>
          </table:table-cell>
          <table:table-cell table:formula="of:=[.D255]-[.D25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3" office:value-type="float" office:value="5842" calcext:value-type="float">
            <text:p>5842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0676157407407407" calcext:value-type="float">
            <text:p>0,00067615740740740700</text:p>
          </table:table-cell>
          <table:table-cell table:formula="of:=[.D256]-[.D25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23" office:value-type="float" office:value="5865" calcext:value-type="float">
            <text:p>586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0678819444444445" calcext:value-type="float">
            <text:p>0,00067881944444444500</text:p>
          </table:table-cell>
          <table:table-cell table:formula="of:=[.D257]-[.D25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23" office:value-type="float" office:value="5888" calcext:value-type="float">
            <text:p>5888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0681481481481482" calcext:value-type="float">
            <text:p>0,00068148148148148200</text:p>
          </table:table-cell>
          <table:table-cell table:formula="of:=[.D258]-[.D25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23" office:value-type="float" office:value="5911" calcext:value-type="float">
            <text:p>5911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0684143518518519" calcext:value-type="float">
            <text:p>0,00068414351851851900</text:p>
          </table:table-cell>
          <table:table-cell table:formula="of:=[.D259]-[.D25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23" office:value-type="float" office:value="5934" calcext:value-type="float">
            <text:p>5934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0686805555555556" calcext:value-type="float">
            <text:p>0,00068680555555555600</text:p>
          </table:table-cell>
          <table:table-cell table:formula="of:=[.D260]-[.D25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23" office:value-type="float" office:value="5957" calcext:value-type="float">
            <text:p>5957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0689467592592593" calcext:value-type="float">
            <text:p>0,00068946759259259300</text:p>
          </table:table-cell>
          <table:table-cell table:formula="of:=[.D261]-[.D2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23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069212962962963" calcext:value-type="float">
            <text:p>0,00069212962962963000</text:p>
          </table:table-cell>
          <table:table-cell table:formula="of:=[.D262]-[.D26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23" office:value-type="float" office:value="6003" calcext:value-type="float">
            <text:p>6003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0694791666666667" calcext:value-type="float">
            <text:p>0,00069479166666666700</text:p>
          </table:table-cell>
          <table:table-cell table:formula="of:=[.D263]-[.D26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23" office:value-type="float" office:value="6026" calcext:value-type="float">
            <text:p>6026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0697453703703704" calcext:value-type="float">
            <text:p>0,00069745370370370400</text:p>
          </table:table-cell>
          <table:table-cell table:formula="of:=[.D264]-[.D26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23" office:value-type="float" office:value="6049" calcext:value-type="float">
            <text:p>6049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0700115740740741" calcext:value-type="float">
            <text:p>0,00070011574074074100</text:p>
          </table:table-cell>
          <table:table-cell table:formula="of:=[.D265]-[.D26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23" office:value-type="float" office:value="6072" calcext:value-type="float">
            <text:p>6072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0702777777777778" calcext:value-type="float">
            <text:p>0,00070277777777777800</text:p>
          </table:table-cell>
          <table:table-cell table:formula="of:=[.D266]-[.D26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23" office:value-type="float" office:value="6095" calcext:value-type="float">
            <text:p>609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0705439814814815" calcext:value-type="float">
            <text:p>0,00070543981481481500</text:p>
          </table:table-cell>
          <table:table-cell table:formula="of:=[.D267]-[.D26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23" office:value-type="float" office:value="6118" calcext:value-type="float">
            <text:p>6118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0708101851851852" calcext:value-type="float">
            <text:p>0,00070810185185185200</text:p>
          </table:table-cell>
          <table:table-cell table:formula="of:=[.D268]-[.D26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23" office:value-type="float" office:value="6141" calcext:value-type="float">
            <text:p>6141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0710763888888889" calcext:value-type="float">
            <text:p>0,00071076388888888900</text:p>
          </table:table-cell>
          <table:table-cell table:formula="of:=[.D269]-[.D26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23" office:value-type="float" office:value="6164" calcext:value-type="float">
            <text:p>6164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0713425925925926" calcext:value-type="float">
            <text:p>0,00071342592592592600</text:p>
          </table:table-cell>
          <table:table-cell table:formula="of:=[.D270]-[.D26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23" office:value-type="float" office:value="6187" calcext:value-type="float">
            <text:p>6187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0716087962962963" calcext:value-type="float">
            <text:p>0,00071608796296296300</text:p>
          </table:table-cell>
          <table:table-cell table:formula="of:=[.D271]-[.D27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23" office:value-type="float" office:value="6210" calcext:value-type="float">
            <text:p>621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071875" calcext:value-type="float">
            <text:p>0,00071875000000000000</text:p>
          </table:table-cell>
          <table:table-cell table:formula="of:=[.D272]-[.D27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23" office:value-type="float" office:value="6233" calcext:value-type="float">
            <text:p>6233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0721412037037037" calcext:value-type="float">
            <text:p>0,00072141203703703700</text:p>
          </table:table-cell>
          <table:table-cell table:formula="of:=[.D273]-[.D27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23" office:value-type="float" office:value="6256" calcext:value-type="float">
            <text:p>6256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0724074074074074" calcext:value-type="float">
            <text:p>0,00072407407407407400</text:p>
          </table:table-cell>
          <table:table-cell table:formula="of:=[.D274]-[.D27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23" office:value-type="float" office:value="6279" calcext:value-type="float">
            <text:p>6279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0726736111111111" calcext:value-type="float">
            <text:p>0,00072673611111111100</text:p>
          </table:table-cell>
          <table:table-cell table:formula="of:=[.D275]-[.D27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23" office:value-type="float" office:value="6302" calcext:value-type="float">
            <text:p>6302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0729398148148148" calcext:value-type="float">
            <text:p>0,00072939814814814800</text:p>
          </table:table-cell>
          <table:table-cell table:formula="of:=[.D276]-[.D27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23" office:value-type="float" office:value="6325" calcext:value-type="float">
            <text:p>632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0732060185185185" calcext:value-type="float">
            <text:p>0,00073206018518518500</text:p>
          </table:table-cell>
          <table:table-cell table:formula="of:=[.D277]-[.D27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23" office:value-type="float" office:value="6348" calcext:value-type="float">
            <text:p>6348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0734722222222222" calcext:value-type="float">
            <text:p>0,00073472222222222200</text:p>
          </table:table-cell>
          <table:table-cell table:formula="of:=[.D278]-[.D27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23" office:value-type="float" office:value="6371" calcext:value-type="float">
            <text:p>6371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0737384259259259" calcext:value-type="float">
            <text:p>0,00073738425925925900</text:p>
          </table:table-cell>
          <table:table-cell table:formula="of:=[.D279]-[.D27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23" office:value-type="float" office:value="6394" calcext:value-type="float">
            <text:p>6394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0740046296296296" calcext:value-type="float">
            <text:p>0,00074004629629629600</text:p>
          </table:table-cell>
          <table:table-cell table:formula="of:=[.D280]-[.D27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23" office:value-type="float" office:value="6417" calcext:value-type="float">
            <text:p>6417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0742708333333333" calcext:value-type="float">
            <text:p>0,00074270833333333300</text:p>
          </table:table-cell>
          <table:table-cell table:formula="of:=[.D281]-[.D28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23" office:value-type="float" office:value="6440" calcext:value-type="float">
            <text:p>644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074537037037037" calcext:value-type="float">
            <text:p>0,00074537037037037000</text:p>
          </table:table-cell>
          <table:table-cell table:formula="of:=[.D282]-[.D28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23" office:value-type="float" office:value="6463" calcext:value-type="float">
            <text:p>6463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0748032407407407" calcext:value-type="float">
            <text:p>0,00074803240740740700</text:p>
          </table:table-cell>
          <table:table-cell table:formula="of:=[.D283]-[.D28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23" office:value-type="float" office:value="6486" calcext:value-type="float">
            <text:p>6486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0750694444444445" calcext:value-type="float">
            <text:p>0,00075069444444444500</text:p>
          </table:table-cell>
          <table:table-cell table:formula="of:=[.D284]-[.D28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23" office:value-type="float" office:value="6509" calcext:value-type="float">
            <text:p>6509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0753356481481482" calcext:value-type="float">
            <text:p>0,00075335648148148200</text:p>
          </table:table-cell>
          <table:table-cell table:formula="of:=[.D285]-[.D28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23" office:value-type="float" office:value="6532" calcext:value-type="float">
            <text:p>6532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0756018518518519" calcext:value-type="float">
            <text:p>0,00075601851851851900</text:p>
          </table:table-cell>
          <table:table-cell table:formula="of:=[.D286]-[.D28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23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0758680555555556" calcext:value-type="float">
            <text:p>0,00075868055555555600</text:p>
          </table:table-cell>
          <table:table-cell table:formula="of:=[.D287]-[.D28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23" office:value-type="float" office:value="6578" calcext:value-type="float">
            <text:p>6578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0761342592592593" calcext:value-type="float">
            <text:p>0,00076134259259259200</text:p>
          </table:table-cell>
          <table:table-cell table:formula="of:=[.D288]-[.D28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23" office:value-type="float" office:value="6601" calcext:value-type="float">
            <text:p>6601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076400462962963" calcext:value-type="float">
            <text:p>0,00076400462962963000</text:p>
          </table:table-cell>
          <table:table-cell table:formula="of:=[.D289]-[.D28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23" office:value-type="float" office:value="6624" calcext:value-type="float">
            <text:p>6624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0766666666666667" calcext:value-type="float">
            <text:p>0,00076666666666666700</text:p>
          </table:table-cell>
          <table:table-cell table:formula="of:=[.D290]-[.D28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23" office:value-type="float" office:value="6647" calcext:value-type="float">
            <text:p>6647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0769328703703704" calcext:value-type="float">
            <text:p>0,00076932870370370400</text:p>
          </table:table-cell>
          <table:table-cell table:formula="of:=[.D291]-[.D29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23" office:value-type="float" office:value="6670" calcext:value-type="float">
            <text:p>667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0771990740740741" calcext:value-type="float">
            <text:p>0,00077199074074074100</text:p>
          </table:table-cell>
          <table:table-cell table:formula="of:=[.D292]-[.D29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23" office:value-type="float" office:value="6693" calcext:value-type="float">
            <text:p>6693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0774652777777778" calcext:value-type="float">
            <text:p>0,00077465277777777800</text:p>
          </table:table-cell>
          <table:table-cell table:formula="of:=[.D293]-[.D29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23" office:value-type="float" office:value="6716" calcext:value-type="float">
            <text:p>6716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0777314814814815" calcext:value-type="float">
            <text:p>0,00077731481481481500</text:p>
          </table:table-cell>
          <table:table-cell table:formula="of:=[.D294]-[.D2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23" office:value-type="float" office:value="6739" calcext:value-type="float">
            <text:p>6739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0779976851851852" calcext:value-type="float">
            <text:p>0,00077997685185185200</text:p>
          </table:table-cell>
          <table:table-cell table:formula="of:=[.D295]-[.D29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23" office:value-type="float" office:value="6762" calcext:value-type="float">
            <text:p>6762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0782638888888889" calcext:value-type="float">
            <text:p>0,00078263888888888900</text:p>
          </table:table-cell>
          <table:table-cell table:formula="of:=[.D296]-[.D29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23" office:value-type="float" office:value="6785" calcext:value-type="float">
            <text:p>678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0785300925925926" calcext:value-type="float">
            <text:p>0,00078530092592592600</text:p>
          </table:table-cell>
          <table:table-cell table:formula="of:=[.D297]-[.D29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23" office:value-type="float" office:value="6808" calcext:value-type="float">
            <text:p>6808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0787962962962963" calcext:value-type="float">
            <text:p>0,00078796296296296300</text:p>
          </table:table-cell>
          <table:table-cell table:formula="of:=[.D298]-[.D29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23" office:value-type="float" office:value="6831" calcext:value-type="float">
            <text:p>6831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0790625" calcext:value-type="float">
            <text:p>0,00079062500000000000</text:p>
          </table:table-cell>
          <table:table-cell table:formula="of:=[.D299]-[.D29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23" office:value-type="float" office:value="6854" calcext:value-type="float">
            <text:p>6854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0793287037037037" calcext:value-type="float">
            <text:p>0,00079328703703703700</text:p>
          </table:table-cell>
          <table:table-cell table:formula="of:=[.D300]-[.D29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23" office:value-type="float" office:value="6877" calcext:value-type="float">
            <text:p>6877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0795949074074074" calcext:value-type="float">
            <text:p>0,00079594907407407400</text:p>
          </table:table-cell>
          <table:table-cell table:formula="of:=[.D301]-[.D3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23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0798611111111111" calcext:value-type="float">
            <text:p>0,00079861111111111100</text:p>
          </table:table-cell>
          <table:table-cell table:formula="of:=[.D302]-[.D30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23" office:value-type="float" office:value="6923" calcext:value-type="float">
            <text:p>6923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0801273148148148" calcext:value-type="float">
            <text:p>0,00080127314814814800</text:p>
          </table:table-cell>
          <table:table-cell table:formula="of:=[.D303]-[.D30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23" office:value-type="float" office:value="6946" calcext:value-type="float">
            <text:p>6946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0803935185185185" calcext:value-type="float">
            <text:p>0,00080393518518518500</text:p>
          </table:table-cell>
          <table:table-cell table:formula="of:=[.D304]-[.D30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23" office:value-type="float" office:value="6969" calcext:value-type="float">
            <text:p>6969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0806597222222222" calcext:value-type="float">
            <text:p>0,00080659722222222200</text:p>
          </table:table-cell>
          <table:table-cell table:formula="of:=[.D305]-[.D30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23" office:value-type="float" office:value="6992" calcext:value-type="float">
            <text:p>6992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0809259259259259" calcext:value-type="float">
            <text:p>0,00080925925925925900</text:p>
          </table:table-cell>
          <table:table-cell table:formula="of:=[.D306]-[.D30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23" office:value-type="float" office:value="7015" calcext:value-type="float">
            <text:p>701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0811921296296296" calcext:value-type="float">
            <text:p>0,00081192129629629600</text:p>
          </table:table-cell>
          <table:table-cell table:formula="of:=[.D307]-[.D30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23" office:value-type="float" office:value="7038" calcext:value-type="float">
            <text:p>7038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0814583333333333" calcext:value-type="float">
            <text:p>0,00081458333333333300</text:p>
          </table:table-cell>
          <table:table-cell table:formula="of:=[.D308]-[.D3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23" office:value-type="float" office:value="7061" calcext:value-type="float">
            <text:p>7061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081724537037037" calcext:value-type="float">
            <text:p>0,00081724537037037000</text:p>
          </table:table-cell>
          <table:table-cell table:formula="of:=[.D309]-[.D30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23" office:value-type="float" office:value="7084" calcext:value-type="float">
            <text:p>7084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0819907407407407" calcext:value-type="float">
            <text:p>0,00081990740740740700</text:p>
          </table:table-cell>
          <table:table-cell table:formula="of:=[.D310]-[.D30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23" office:value-type="float" office:value="7107" calcext:value-type="float">
            <text:p>7107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0822569444444445" calcext:value-type="float">
            <text:p>0,00082256944444444500</text:p>
          </table:table-cell>
          <table:table-cell table:formula="of:=[.D311]-[.D31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23" office:value-type="float" office:value="7130" calcext:value-type="float">
            <text:p>713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0825231481481482" calcext:value-type="float">
            <text:p>0,00082523148148148200</text:p>
          </table:table-cell>
          <table:table-cell table:formula="of:=[.D312]-[.D31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23" office:value-type="float" office:value="7153" calcext:value-type="float">
            <text:p>7153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0827893518518519" calcext:value-type="float">
            <text:p>0,00082789351851851900</text:p>
          </table:table-cell>
          <table:table-cell table:formula="of:=[.D313]-[.D31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23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0830555555555556" calcext:value-type="float">
            <text:p>0,00083055555555555600</text:p>
          </table:table-cell>
          <table:table-cell table:formula="of:=[.D314]-[.D3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23" office:value-type="float" office:value="7199" calcext:value-type="float">
            <text:p>7199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0833217592592593" calcext:value-type="float">
            <text:p>0,00083321759259259300</text:p>
          </table:table-cell>
          <table:table-cell table:formula="of:=[.D315]-[.D31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23" office:value-type="float" office:value="7222" calcext:value-type="float">
            <text:p>7222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083587962962963" calcext:value-type="float">
            <text:p>0,00083587962962963000</text:p>
          </table:table-cell>
          <table:table-cell table:formula="of:=[.D316]-[.D31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23" office:value-type="float" office:value="7245" calcext:value-type="float">
            <text:p>724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0838541666666667" calcext:value-type="float">
            <text:p>0,00083854166666666700</text:p>
          </table:table-cell>
          <table:table-cell table:formula="of:=[.D317]-[.D31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23" office:value-type="float" office:value="7268" calcext:value-type="float">
            <text:p>7268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0841203703703704" calcext:value-type="float">
            <text:p>0,00084120370370370400</text:p>
          </table:table-cell>
          <table:table-cell table:formula="of:=[.D318]-[.D31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23" office:value-type="float" office:value="7291" calcext:value-type="float">
            <text:p>7291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0843865740740741" calcext:value-type="float">
            <text:p>0,00084386574074074100</text:p>
          </table:table-cell>
          <table:table-cell table:formula="of:=[.D319]-[.D31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23" office:value-type="float" office:value="7314" calcext:value-type="float">
            <text:p>7314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0846527777777778" calcext:value-type="float">
            <text:p>0,00084652777777777800</text:p>
          </table:table-cell>
          <table:table-cell table:formula="of:=[.D320]-[.D31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23" office:value-type="float" office:value="7337" calcext:value-type="float">
            <text:p>7337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0849189814814815" calcext:value-type="float">
            <text:p>0,00084918981481481500</text:p>
          </table:table-cell>
          <table:table-cell table:formula="of:=[.D321]-[.D32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23" office:value-type="float" office:value="7360" calcext:value-type="float">
            <text:p>736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0851851851851852" calcext:value-type="float">
            <text:p>0,00085185185185185200</text:p>
          </table:table-cell>
          <table:table-cell table:formula="of:=[.D322]-[.D32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23" office:value-type="float" office:value="7383" calcext:value-type="float">
            <text:p>7383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0854513888888889" calcext:value-type="float">
            <text:p>0,00085451388888888900</text:p>
          </table:table-cell>
          <table:table-cell table:formula="of:=[.D323]-[.D32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23" office:value-type="float" office:value="7406" calcext:value-type="float">
            <text:p>7406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0857175925925926" calcext:value-type="float">
            <text:p>0,00085717592592592600</text:p>
          </table:table-cell>
          <table:table-cell table:formula="of:=[.D324]-[.D32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23" office:value-type="float" office:value="7429" calcext:value-type="float">
            <text:p>7429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0859837962962963" calcext:value-type="float">
            <text:p>0,00085983796296296300</text:p>
          </table:table-cell>
          <table:table-cell table:formula="of:=[.D325]-[.D32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23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08625" calcext:value-type="float">
            <text:p>0,00086250000000000000</text:p>
          </table:table-cell>
          <table:table-cell table:formula="of:=[.D326]-[.D32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23" office:value-type="float" office:value="7475" calcext:value-type="float">
            <text:p>747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0865162037037037" calcext:value-type="float">
            <text:p>0,00086516203703703700</text:p>
          </table:table-cell>
          <table:table-cell table:formula="of:=[.D327]-[.D32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23" office:value-type="float" office:value="7498" calcext:value-type="float">
            <text:p>7498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0867824074074074" calcext:value-type="float">
            <text:p>0,00086782407407407400</text:p>
          </table:table-cell>
          <table:table-cell table:formula="of:=[.D328]-[.D32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23" office:value-type="float" office:value="7521" calcext:value-type="float">
            <text:p>7521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0870486111111111" calcext:value-type="float">
            <text:p>0,00087048611111111100</text:p>
          </table:table-cell>
          <table:table-cell table:formula="of:=[.D329]-[.D32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23" office:value-type="float" office:value="7544" calcext:value-type="float">
            <text:p>7544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0873148148148148" calcext:value-type="float">
            <text:p>0,00087314814814814800</text:p>
          </table:table-cell>
          <table:table-cell table:formula="of:=[.D330]-[.D32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23" office:value-type="float" office:value="7567" calcext:value-type="float">
            <text:p>7567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0875810185185185" calcext:value-type="float">
            <text:p>0,00087581018518518500</text:p>
          </table:table-cell>
          <table:table-cell table:formula="of:=[.D331]-[.D33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23" office:value-type="float" office:value="7590" calcext:value-type="float">
            <text:p>759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0878472222222222" calcext:value-type="float">
            <text:p>0,00087847222222222200</text:p>
          </table:table-cell>
          <table:table-cell table:formula="of:=[.D332]-[.D33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23" office:value-type="float" office:value="7613" calcext:value-type="float">
            <text:p>7613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0881134259259259" calcext:value-type="float">
            <text:p>0,00088113425925925900</text:p>
          </table:table-cell>
          <table:table-cell table:formula="of:=[.D333]-[.D33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23" office:value-type="float" office:value="7636" calcext:value-type="float">
            <text:p>7636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0883796296296296" calcext:value-type="float">
            <text:p>0,00088379629629629600</text:p>
          </table:table-cell>
          <table:table-cell table:formula="of:=[.D334]-[.D33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23" office:value-type="float" office:value="7659" calcext:value-type="float">
            <text:p>7659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0886458333333333" calcext:value-type="float">
            <text:p>0,00088645833333333300</text:p>
          </table:table-cell>
          <table:table-cell table:formula="of:=[.D335]-[.D33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23" office:value-type="float" office:value="7682" calcext:value-type="float">
            <text:p>7682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088912037037037" calcext:value-type="float">
            <text:p>0,00088912037037037000</text:p>
          </table:table-cell>
          <table:table-cell table:formula="of:=[.D336]-[.D33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23" office:value-type="float" office:value="7705" calcext:value-type="float">
            <text:p>770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0891782407407407" calcext:value-type="float">
            <text:p>0,00089178240740740700</text:p>
          </table:table-cell>
          <table:table-cell table:formula="of:=[.D337]-[.D33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23" office:value-type="float" office:value="7728" calcext:value-type="float">
            <text:p>7728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0894444444444445" calcext:value-type="float">
            <text:p>0,00089444444444444500</text:p>
          </table:table-cell>
          <table:table-cell table:formula="of:=[.D338]-[.D33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23" office:value-type="float" office:value="7751" calcext:value-type="float">
            <text:p>7751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0897106481481482" calcext:value-type="float">
            <text:p>0,00089710648148148200</text:p>
          </table:table-cell>
          <table:table-cell table:formula="of:=[.D339]-[.D33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23" office:value-type="float" office:value="7774" calcext:value-type="float">
            <text:p>7774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0899768518518519" calcext:value-type="float">
            <text:p>0,00089976851851851900</text:p>
          </table:table-cell>
          <table:table-cell table:formula="of:=[.D340]-[.D33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23" office:value-type="float" office:value="7797" calcext:value-type="float">
            <text:p>7797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0902430555555556" calcext:value-type="float">
            <text:p>0,00090243055555555600</text:p>
          </table:table-cell>
          <table:table-cell table:formula="of:=[.D341]-[.D3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23" office:value-type="float" office:value="7820" calcext:value-type="float">
            <text:p>782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0905092592592593" calcext:value-type="float">
            <text:p>0,00090509259259259300</text:p>
          </table:table-cell>
          <table:table-cell table:formula="of:=[.D342]-[.D34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23" office:value-type="float" office:value="7843" calcext:value-type="float">
            <text:p>7843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090775462962963" calcext:value-type="float">
            <text:p>0,00090775462962963000</text:p>
          </table:table-cell>
          <table:table-cell table:formula="of:=[.D343]-[.D34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23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0910416666666667" calcext:value-type="float">
            <text:p>0,00091041666666666700</text:p>
          </table:table-cell>
          <table:table-cell table:formula="of:=[.D344]-[.D34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23" office:value-type="float" office:value="7889" calcext:value-type="float">
            <text:p>7889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0913078703703704" calcext:value-type="float">
            <text:p>0,00091307870370370400</text:p>
          </table:table-cell>
          <table:table-cell table:formula="of:=[.D345]-[.D34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23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0915740740740741" calcext:value-type="float">
            <text:p>0,00091574074074074100</text:p>
          </table:table-cell>
          <table:table-cell table:formula="of:=[.D346]-[.D34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23" office:value-type="float" office:value="7935" calcext:value-type="float">
            <text:p>793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0918402777777778" calcext:value-type="float">
            <text:p>0,00091840277777777800</text:p>
          </table:table-cell>
          <table:table-cell table:formula="of:=[.D347]-[.D34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23" office:value-type="float" office:value="7958" calcext:value-type="float">
            <text:p>7958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0921064814814815" calcext:value-type="float">
            <text:p>0,00092106481481481500</text:p>
          </table:table-cell>
          <table:table-cell table:formula="of:=[.D348]-[.D34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23" office:value-type="float" office:value="7981" calcext:value-type="float">
            <text:p>7981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0923726851851852" calcext:value-type="float">
            <text:p>0,00092372685185185200</text:p>
          </table:table-cell>
          <table:table-cell table:formula="of:=[.D349]-[.D34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23" office:value-type="float" office:value="8004" calcext:value-type="float">
            <text:p>8004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0926388888888889" calcext:value-type="float">
            <text:p>0,00092638888888888900</text:p>
          </table:table-cell>
          <table:table-cell table:formula="of:=[.D350]-[.D34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23" office:value-type="float" office:value="8027" calcext:value-type="float">
            <text:p>8027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0929050925925926" calcext:value-type="float">
            <text:p>0,00092905092592592600</text:p>
          </table:table-cell>
          <table:table-cell table:formula="of:=[.D351]-[.D35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23" office:value-type="float" office:value="8050" calcext:value-type="float">
            <text:p>80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0931712962962963" calcext:value-type="float">
            <text:p>0,00093171296296296300</text:p>
          </table:table-cell>
          <table:table-cell table:formula="of:=[.D352]-[.D351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23" office:value-type="float" office:value="8073" calcext:value-type="float">
            <text:p>8073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0934375" calcext:value-type="float">
            <text:p>0,00093437500000000000</text:p>
          </table:table-cell>
          <table:table-cell table:formula="of:=[.D353]-[.D35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23" office:value-type="float" office:value="8096" calcext:value-type="float">
            <text:p>8096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0937037037037037" calcext:value-type="float">
            <text:p>0,00093703703703703700</text:p>
          </table:table-cell>
          <table:table-cell table:formula="of:=[.D354]-[.D35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23" office:value-type="float" office:value="8119" calcext:value-type="float">
            <text:p>8119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0939699074074074" calcext:value-type="float">
            <text:p>0,00093969907407407400</text:p>
          </table:table-cell>
          <table:table-cell table:formula="of:=[.D355]-[.D3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23" office:value-type="float" office:value="8142" calcext:value-type="float">
            <text:p>8142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0942361111111111" calcext:value-type="float">
            <text:p>0,00094236111111111100</text:p>
          </table:table-cell>
          <table:table-cell table:formula="of:=[.D356]-[.D35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23" office:value-type="float" office:value="8165" calcext:value-type="float">
            <text:p>816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0945023148148148" calcext:value-type="float">
            <text:p>0,00094502314814814800</text:p>
          </table:table-cell>
          <table:table-cell table:formula="of:=[.D357]-[.D35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23" office:value-type="float" office:value="8188" calcext:value-type="float">
            <text:p>8188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0947685185185185" calcext:value-type="float">
            <text:p>0,00094768518518518500</text:p>
          </table:table-cell>
          <table:table-cell table:formula="of:=[.D358]-[.D357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23" office:value-type="float" office:value="8211" calcext:value-type="float">
            <text:p>8211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0950347222222222" calcext:value-type="float">
            <text:p>0,00095034722222222200</text:p>
          </table:table-cell>
          <table:table-cell table:formula="of:=[.D359]-[.D358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23" office:value-type="float" office:value="8234" calcext:value-type="float">
            <text:p>8234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0953009259259259" calcext:value-type="float">
            <text:p>0,00095300925925925900</text:p>
          </table:table-cell>
          <table:table-cell table:formula="of:=[.D360]-[.D359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23" office:value-type="float" office:value="8257" calcext:value-type="float">
            <text:p>8257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0955671296296296" calcext:value-type="float">
            <text:p>0,00095567129629629600</text:p>
          </table:table-cell>
          <table:table-cell table:formula="of:=[.D361]-[.D360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23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0958333333333333" calcext:value-type="float">
            <text:p>0,00095833333333333300</text:p>
          </table:table-cell>
          <table:table-cell table:formula="of:=[.D362]-[.D36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23" office:value-type="float" office:value="8303" calcext:value-type="float">
            <text:p>8303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096099537037037" calcext:value-type="float">
            <text:p>0,00096099537037037000</text:p>
          </table:table-cell>
          <table:table-cell table:formula="of:=[.D363]-[.D362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23" office:value-type="float" office:value="8326" calcext:value-type="float">
            <text:p>8326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0963657407407407" calcext:value-type="float">
            <text:p>0,00096365740740740700</text:p>
          </table:table-cell>
          <table:table-cell table:formula="of:=[.D364]-[.D363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23" office:value-type="float" office:value="8349" calcext:value-type="float">
            <text:p>8349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0966319444444445" calcext:value-type="float">
            <text:p>0,00096631944444444500</text:p>
          </table:table-cell>
          <table:table-cell table:formula="of:=[.D365]-[.D364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23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0968981481481482" calcext:value-type="float">
            <text:p>0,00096898148148148200</text:p>
          </table:table-cell>
          <table:table-cell table:formula="of:=[.D366]-[.D365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23" office:value-type="float" office:value="8395" calcext:value-type="float">
            <text:p>839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0971643518518519" calcext:value-type="float">
            <text:p>0,00097164351851851900</text:p>
          </table:table-cell>
          <table:table-cell table:formula="of:=[.D367]-[.D366]" office:value-type="float" office:value="0.00000266203703703702" calcext:value-type="float">
            <text:p>0,000002662037037037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23" office:value-type="float" office:value="8418" calcext:value-type="float">
            <text:p>8418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0974305555555556" calcext:value-type="float">
            <text:p>0,00097430555555555600</text:p>
          </table:table-cell>
          <table:table-cell table:formula="of:=[.D368]-[.D36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23" office:value-type="float" office:value="8441" calcext:value-type="float">
            <text:p>8441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0976967592592593" calcext:value-type="float">
            <text:p>0,00097696759259259300</text:p>
          </table:table-cell>
          <table:table-cell table:formula="of:=[.D369]-[.D36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23" office:value-type="float" office:value="8464" calcext:value-type="float">
            <text:p>8464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097962962962963" calcext:value-type="float">
            <text:p>0,00097962962962963000</text:p>
          </table:table-cell>
          <table:table-cell table:formula="of:=[.D370]-[.D36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23" office:value-type="float" office:value="8487" calcext:value-type="float">
            <text:p>8487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0982291666666667" calcext:value-type="float">
            <text:p>0,00098229166666666700</text:p>
          </table:table-cell>
          <table:table-cell table:formula="of:=[.D371]-[.D37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23" office:value-type="float" office:value="8510" calcext:value-type="float">
            <text:p>851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0984953703703704" calcext:value-type="float">
            <text:p>0,00098495370370370400</text:p>
          </table:table-cell>
          <table:table-cell table:formula="of:=[.D372]-[.D37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23" office:value-type="float" office:value="8533" calcext:value-type="float">
            <text:p>8533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0987615740740741" calcext:value-type="float">
            <text:p>0,00098761574074074100</text:p>
          </table:table-cell>
          <table:table-cell table:formula="of:=[.D373]-[.D37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23" office:value-type="float" office:value="8556" calcext:value-type="float">
            <text:p>8556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0990277777777778" calcext:value-type="float">
            <text:p>0,00099027777777777800</text:p>
          </table:table-cell>
          <table:table-cell table:formula="of:=[.D374]-[.D37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23" office:value-type="float" office:value="8579" calcext:value-type="float">
            <text:p>8579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0992939814814815" calcext:value-type="float">
            <text:p>0,00099293981481481500</text:p>
          </table:table-cell>
          <table:table-cell table:formula="of:=[.D375]-[.D3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23" office:value-type="float" office:value="8602" calcext:value-type="float">
            <text:p>8602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0995601851851852" calcext:value-type="float">
            <text:p>0,00099560185185185200</text:p>
          </table:table-cell>
          <table:table-cell table:formula="of:=[.D376]-[.D37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23" office:value-type="float" office:value="8625" calcext:value-type="float">
            <text:p>862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0998263888888889" calcext:value-type="float">
            <text:p>0,00099826388888888900</text:p>
          </table:table-cell>
          <table:table-cell table:formula="of:=[.D377]-[.D37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23" office:value-type="float" office:value="8648" calcext:value-type="float">
            <text:p>8648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100092592592593" calcext:value-type="float">
            <text:p>0,00100092592592593000</text:p>
          </table:table-cell>
          <table:table-cell table:formula="of:=[.D378]-[.D37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23" office:value-type="float" office:value="8671" calcext:value-type="float">
            <text:p>8671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100358796296296" calcext:value-type="float">
            <text:p>0,00100358796296296000</text:p>
          </table:table-cell>
          <table:table-cell table:formula="of:=[.D379]-[.D37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23" office:value-type="float" office:value="8694" calcext:value-type="float">
            <text:p>8694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100625" calcext:value-type="float">
            <text:p>0,00100625000000000000</text:p>
          </table:table-cell>
          <table:table-cell table:formula="of:=[.D380]-[.D3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23" office:value-type="float" office:value="8717" calcext:value-type="float">
            <text:p>8717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100891203703704" calcext:value-type="float">
            <text:p>0,00100891203703704000</text:p>
          </table:table-cell>
          <table:table-cell table:formula="of:=[.D381]-[.D38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23" office:value-type="float" office:value="8740" calcext:value-type="float">
            <text:p>874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101157407407407" calcext:value-type="float">
            <text:p>0,00101157407407407000</text:p>
          </table:table-cell>
          <table:table-cell table:formula="of:=[.D382]-[.D38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23" office:value-type="float" office:value="8763" calcext:value-type="float">
            <text:p>8763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101423611111111" calcext:value-type="float">
            <text:p>0,00101423611111111000</text:p>
          </table:table-cell>
          <table:table-cell table:formula="of:=[.D383]-[.D38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23" office:value-type="float" office:value="8786" calcext:value-type="float">
            <text:p>8786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101689814814815" calcext:value-type="float">
            <text:p>0,00101689814814815000</text:p>
          </table:table-cell>
          <table:table-cell table:formula="of:=[.D384]-[.D38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23" office:value-type="float" office:value="8809" calcext:value-type="float">
            <text:p>8809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101956018518519" calcext:value-type="float">
            <text:p>0,00101956018518519000</text:p>
          </table:table-cell>
          <table:table-cell table:formula="of:=[.D385]-[.D3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23" office:value-type="float" office:value="8832" calcext:value-type="float">
            <text:p>8832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102222222222222" calcext:value-type="float">
            <text:p>0,00102222222222222000</text:p>
          </table:table-cell>
          <table:table-cell table:formula="of:=[.D386]-[.D38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23" office:value-type="float" office:value="8855" calcext:value-type="float">
            <text:p>885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102488425925926" calcext:value-type="float">
            <text:p>0,00102488425925926000</text:p>
          </table:table-cell>
          <table:table-cell table:formula="of:=[.D387]-[.D3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23" office:value-type="float" office:value="8878" calcext:value-type="float">
            <text:p>8878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10275462962963" calcext:value-type="float">
            <text:p>0,00102754629629630000</text:p>
          </table:table-cell>
          <table:table-cell table:formula="of:=[.D388]-[.D38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23" office:value-type="float" office:value="8901" calcext:value-type="float">
            <text:p>8901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103020833333333" calcext:value-type="float">
            <text:p>0,00103020833333333000</text:p>
          </table:table-cell>
          <table:table-cell table:formula="of:=[.D389]-[.D38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23" office:value-type="float" office:value="8924" calcext:value-type="float">
            <text:p>8924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103287037037037" calcext:value-type="float">
            <text:p>0,00103287037037037000</text:p>
          </table:table-cell>
          <table:table-cell table:formula="of:=[.D390]-[.D38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23" office:value-type="float" office:value="8947" calcext:value-type="float">
            <text:p>8947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103553240740741" calcext:value-type="float">
            <text:p>0,00103553240740741000</text:p>
          </table:table-cell>
          <table:table-cell table:formula="of:=[.D391]-[.D39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23" office:value-type="float" office:value="8970" calcext:value-type="float">
            <text:p>897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103819444444444" calcext:value-type="float">
            <text:p>0,00103819444444444000</text:p>
          </table:table-cell>
          <table:table-cell table:formula="of:=[.D392]-[.D39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23" office:value-type="float" office:value="8993" calcext:value-type="float">
            <text:p>8993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104085648148148" calcext:value-type="float">
            <text:p>0,00104085648148148000</text:p>
          </table:table-cell>
          <table:table-cell table:formula="of:=[.D393]-[.D39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23" office:value-type="float" office:value="9016" calcext:value-type="float">
            <text:p>9016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104351851851852" calcext:value-type="float">
            <text:p>0,00104351851851852000</text:p>
          </table:table-cell>
          <table:table-cell table:formula="of:=[.D394]-[.D3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23" office:value-type="float" office:value="9039" calcext:value-type="float">
            <text:p>9039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104618055555556" calcext:value-type="float">
            <text:p>0,00104618055555556000</text:p>
          </table:table-cell>
          <table:table-cell table:formula="of:=[.D395]-[.D39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23" office:value-type="float" office:value="9062" calcext:value-type="float">
            <text:p>9062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104884259259259" calcext:value-type="float">
            <text:p>0,00104884259259259000</text:p>
          </table:table-cell>
          <table:table-cell table:formula="of:=[.D396]-[.D39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23" office:value-type="float" office:value="9085" calcext:value-type="float">
            <text:p>908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105150462962963" calcext:value-type="float">
            <text:p>0,00105150462962963000</text:p>
          </table:table-cell>
          <table:table-cell table:formula="of:=[.D397]-[.D39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23" office:value-type="float" office:value="9108" calcext:value-type="float">
            <text:p>9108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105416666666667" calcext:value-type="float">
            <text:p>0,00105416666666667000</text:p>
          </table:table-cell>
          <table:table-cell table:formula="of:=[.D398]-[.D39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23" office:value-type="float" office:value="9131" calcext:value-type="float">
            <text:p>9131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10568287037037" calcext:value-type="float">
            <text:p>0,00105682870370370000</text:p>
          </table:table-cell>
          <table:table-cell table:formula="of:=[.D399]-[.D3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23" office:value-type="float" office:value="9154" calcext:value-type="float">
            <text:p>9154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105949074074074" calcext:value-type="float">
            <text:p>0,00105949074074074000</text:p>
          </table:table-cell>
          <table:table-cell table:formula="of:=[.D400]-[.D39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23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106215277777778" calcext:value-type="float">
            <text:p>0,00106215277777778000</text:p>
          </table:table-cell>
          <table:table-cell table:formula="of:=[.D401]-[.D4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23" office:value-type="float" office:value="9200" calcext:value-type="float">
            <text:p>92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106481481481481" calcext:value-type="float">
            <text:p>0,00106481481481481000</text:p>
          </table:table-cell>
          <table:table-cell table:formula="of:=[.D402]-[.D40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23" office:value-type="float" office:value="9223" calcext:value-type="float">
            <text:p>9223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106747685185185" calcext:value-type="float">
            <text:p>0,00106747685185185000</text:p>
          </table:table-cell>
          <table:table-cell table:formula="of:=[.D403]-[.D40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23" office:value-type="float" office:value="9246" calcext:value-type="float">
            <text:p>9246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107013888888889" calcext:value-type="float">
            <text:p>0,00107013888888889000</text:p>
          </table:table-cell>
          <table:table-cell table:formula="of:=[.D404]-[.D40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23" office:value-type="float" office:value="9269" calcext:value-type="float">
            <text:p>9269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107280092592593" calcext:value-type="float">
            <text:p>0,00107280092592593000</text:p>
          </table:table-cell>
          <table:table-cell table:formula="of:=[.D405]-[.D40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23" office:value-type="float" office:value="9292" calcext:value-type="float">
            <text:p>9292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107546296296296" calcext:value-type="float">
            <text:p>0,00107546296296296000</text:p>
          </table:table-cell>
          <table:table-cell table:formula="of:=[.D406]-[.D40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23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1078125" calcext:value-type="float">
            <text:p>0,00107812500000000000</text:p>
          </table:table-cell>
          <table:table-cell table:formula="of:=[.D407]-[.D40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23" office:value-type="float" office:value="9338" calcext:value-type="float">
            <text:p>9338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108078703703704" calcext:value-type="float">
            <text:p>0,00108078703703704000</text:p>
          </table:table-cell>
          <table:table-cell table:formula="of:=[.D408]-[.D4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23" office:value-type="float" office:value="9361" calcext:value-type="float">
            <text:p>9361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108344907407407" calcext:value-type="float">
            <text:p>0,00108344907407407000</text:p>
          </table:table-cell>
          <table:table-cell table:formula="of:=[.D409]-[.D40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23" office:value-type="float" office:value="9384" calcext:value-type="float">
            <text:p>9384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108611111111111" calcext:value-type="float">
            <text:p>0,00108611111111111000</text:p>
          </table:table-cell>
          <table:table-cell table:formula="of:=[.D410]-[.D40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23" office:value-type="float" office:value="9407" calcext:value-type="float">
            <text:p>9407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108877314814815" calcext:value-type="float">
            <text:p>0,00108877314814815000</text:p>
          </table:table-cell>
          <table:table-cell table:formula="of:=[.D411]-[.D41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23" office:value-type="float" office:value="9430" calcext:value-type="float">
            <text:p>943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109143518518519" calcext:value-type="float">
            <text:p>0,00109143518518519000</text:p>
          </table:table-cell>
          <table:table-cell table:formula="of:=[.D412]-[.D41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23" office:value-type="float" office:value="9453" calcext:value-type="float">
            <text:p>9453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109409722222222" calcext:value-type="float">
            <text:p>0,00109409722222222000</text:p>
          </table:table-cell>
          <table:table-cell table:formula="of:=[.D413]-[.D4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23" office:value-type="float" office:value="9476" calcext:value-type="float">
            <text:p>9476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109675925925926" calcext:value-type="float">
            <text:p>0,00109675925925926000</text:p>
          </table:table-cell>
          <table:table-cell table:formula="of:=[.D414]-[.D41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23" office:value-type="float" office:value="9499" calcext:value-type="float">
            <text:p>9499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10994212962963" calcext:value-type="float">
            <text:p>0,00109942129629630000</text:p>
          </table:table-cell>
          <table:table-cell table:formula="of:=[.D415]-[.D41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23" office:value-type="float" office:value="9522" calcext:value-type="float">
            <text:p>9522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110208333333333" calcext:value-type="float">
            <text:p>0,00110208333333333000</text:p>
          </table:table-cell>
          <table:table-cell table:formula="of:=[.D416]-[.D41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23" office:value-type="float" office:value="9545" calcext:value-type="float">
            <text:p>954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110474537037037" calcext:value-type="float">
            <text:p>0,00110474537037037000</text:p>
          </table:table-cell>
          <table:table-cell table:formula="of:=[.D417]-[.D41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23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110740740740741" calcext:value-type="float">
            <text:p>0,00110740740740741000</text:p>
          </table:table-cell>
          <table:table-cell table:formula="of:=[.D418]-[.D41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23" office:value-type="float" office:value="9591" calcext:value-type="float">
            <text:p>9591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111006944444444" calcext:value-type="float">
            <text:p>0,00111006944444444000</text:p>
          </table:table-cell>
          <table:table-cell table:formula="of:=[.D419]-[.D41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23" office:value-type="float" office:value="9614" calcext:value-type="float">
            <text:p>9614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111273148148148" calcext:value-type="float">
            <text:p>0,00111273148148148000</text:p>
          </table:table-cell>
          <table:table-cell table:formula="of:=[.D420]-[.D4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23" office:value-type="float" office:value="9637" calcext:value-type="float">
            <text:p>9637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111539351851852" calcext:value-type="float">
            <text:p>0,00111539351851852000</text:p>
          </table:table-cell>
          <table:table-cell table:formula="of:=[.D421]-[.D42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23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111805555555556" calcext:value-type="float">
            <text:p>0,00111805555555556000</text:p>
          </table:table-cell>
          <table:table-cell table:formula="of:=[.D422]-[.D4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23" office:value-type="float" office:value="9683" calcext:value-type="float">
            <text:p>9683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112071759259259" calcext:value-type="float">
            <text:p>0,00112071759259259000</text:p>
          </table:table-cell>
          <table:table-cell table:formula="of:=[.D423]-[.D42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23" office:value-type="float" office:value="9706" calcext:value-type="float">
            <text:p>9706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112337962962963" calcext:value-type="float">
            <text:p>0,00112337962962963000</text:p>
          </table:table-cell>
          <table:table-cell table:formula="of:=[.D424]-[.D42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23" office:value-type="float" office:value="9729" calcext:value-type="float">
            <text:p>9729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112604166666667" calcext:value-type="float">
            <text:p>0,00112604166666667000</text:p>
          </table:table-cell>
          <table:table-cell table:formula="of:=[.D425]-[.D42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23" office:value-type="float" office:value="9752" calcext:value-type="float">
            <text:p>9752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11287037037037" calcext:value-type="float">
            <text:p>0,00112870370370370000</text:p>
          </table:table-cell>
          <table:table-cell table:formula="of:=[.D426]-[.D42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23" office:value-type="float" office:value="9775" calcext:value-type="float">
            <text:p>9775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113136574074074" calcext:value-type="float">
            <text:p>0,00113136574074074000</text:p>
          </table:table-cell>
          <table:table-cell table:formula="of:=[.D427]-[.D4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23" office:value-type="float" office:value="9798" calcext:value-type="float">
            <text:p>9798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113402777777778" calcext:value-type="float">
            <text:p>0,00113402777777778000</text:p>
          </table:table-cell>
          <table:table-cell table:formula="of:=[.D428]-[.D42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23" office:value-type="float" office:value="9821" calcext:value-type="float">
            <text:p>9821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113668981481481" calcext:value-type="float">
            <text:p>0,00113668981481481000</text:p>
          </table:table-cell>
          <table:table-cell table:formula="of:=[.D429]-[.D42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23" office:value-type="float" office:value="9844" calcext:value-type="float">
            <text:p>9844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113935185185185" calcext:value-type="float">
            <text:p>0,00113935185185185000</text:p>
          </table:table-cell>
          <table:table-cell table:formula="of:=[.D430]-[.D42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23" office:value-type="float" office:value="9867" calcext:value-type="float">
            <text:p>9867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114201388888889" calcext:value-type="float">
            <text:p>0,00114201388888889000</text:p>
          </table:table-cell>
          <table:table-cell table:formula="of:=[.D431]-[.D43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23" office:value-type="float" office:value="9890" calcext:value-type="float">
            <text:p>989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114467592592593" calcext:value-type="float">
            <text:p>0,00114467592592593000</text:p>
          </table:table-cell>
          <table:table-cell table:formula="of:=[.D432]-[.D4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23" office:value-type="float" office:value="9913" calcext:value-type="float">
            <text:p>9913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114733796296296" calcext:value-type="float">
            <text:p>0,00114733796296296000</text:p>
          </table:table-cell>
          <table:table-cell table:formula="of:=[.D433]-[.D43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23" office:value-type="float" office:value="9936" calcext:value-type="float">
            <text:p>9936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115" calcext:value-type="float">
            <text:p>0,00115000000000000000</text:p>
          </table:table-cell>
          <table:table-cell table:formula="of:=[.D434]-[.D4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23" office:value-type="float" office:value="9959" calcext:value-type="float">
            <text:p>9959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115266203703704" calcext:value-type="float">
            <text:p>0,00115266203703704000</text:p>
          </table:table-cell>
          <table:table-cell table:formula="of:=[.D435]-[.D43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23" office:value-type="float" office:value="9982" calcext:value-type="float">
            <text:p>9982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115532407407407" calcext:value-type="float">
            <text:p>0,00115532407407407000</text:p>
          </table:table-cell>
          <table:table-cell table:formula="of:=[.D436]-[.D4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23" office:value-type="float" office:value="10005" calcext:value-type="float">
            <text:p>10005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115798611111111" calcext:value-type="float">
            <text:p>0,00115798611111111000</text:p>
          </table:table-cell>
          <table:table-cell table:formula="of:=[.D437]-[.D43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23" office:value-type="float" office:value="10028" calcext:value-type="float">
            <text:p>10028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116064814814815" calcext:value-type="float">
            <text:p>0,00116064814814815000</text:p>
          </table:table-cell>
          <table:table-cell table:formula="of:=[.D438]-[.D4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23" office:value-type="float" office:value="10051" calcext:value-type="float">
            <text:p>10051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116331018518519" calcext:value-type="float">
            <text:p>0,00116331018518519000</text:p>
          </table:table-cell>
          <table:table-cell table:formula="of:=[.D439]-[.D43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23" office:value-type="float" office:value="10074" calcext:value-type="float">
            <text:p>10074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116597222222222" calcext:value-type="float">
            <text:p>0,00116597222222222000</text:p>
          </table:table-cell>
          <table:table-cell table:formula="of:=[.D440]-[.D43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23" office:value-type="float" office:value="10097" calcext:value-type="float">
            <text:p>10097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116863425925926" calcext:value-type="float">
            <text:p>0,00116863425925926000</text:p>
          </table:table-cell>
          <table:table-cell table:formula="of:=[.D441]-[.D4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23" office:value-type="float" office:value="10120" calcext:value-type="float">
            <text:p>1012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11712962962963" calcext:value-type="float">
            <text:p>0,00117129629629630000</text:p>
          </table:table-cell>
          <table:table-cell table:formula="of:=[.D442]-[.D44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23" office:value-type="float" office:value="10143" calcext:value-type="float">
            <text:p>10143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117395833333333" calcext:value-type="float">
            <text:p>0,00117395833333333000</text:p>
          </table:table-cell>
          <table:table-cell table:formula="of:=[.D443]-[.D44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23" office:value-type="float" office:value="10166" calcext:value-type="float">
            <text:p>10166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117662037037037" calcext:value-type="float">
            <text:p>0,00117662037037037000</text:p>
          </table:table-cell>
          <table:table-cell table:formula="of:=[.D444]-[.D44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23" office:value-type="float" office:value="10189" calcext:value-type="float">
            <text:p>10189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117928240740741" calcext:value-type="float">
            <text:p>0,00117928240740741000</text:p>
          </table:table-cell>
          <table:table-cell table:formula="of:=[.D445]-[.D44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23" office:value-type="float" office:value="10212" calcext:value-type="float">
            <text:p>10212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118194444444444" calcext:value-type="float">
            <text:p>0,00118194444444444000</text:p>
          </table:table-cell>
          <table:table-cell table:formula="of:=[.D446]-[.D44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23" office:value-type="float" office:value="10235" calcext:value-type="float">
            <text:p>10235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118460648148148" calcext:value-type="float">
            <text:p>0,00118460648148148000</text:p>
          </table:table-cell>
          <table:table-cell table:formula="of:=[.D447]-[.D44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23" office:value-type="float" office:value="10258" calcext:value-type="float">
            <text:p>10258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118726851851852" calcext:value-type="float">
            <text:p>0,00118726851851852000</text:p>
          </table:table-cell>
          <table:table-cell table:formula="of:=[.D448]-[.D44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23" office:value-type="float" office:value="10281" calcext:value-type="float">
            <text:p>10281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118993055555556" calcext:value-type="float">
            <text:p>0,00118993055555556000</text:p>
          </table:table-cell>
          <table:table-cell table:formula="of:=[.D449]-[.D44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23" office:value-type="float" office:value="10304" calcext:value-type="float">
            <text:p>10304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119259259259259" calcext:value-type="float">
            <text:p>0,00119259259259259000</text:p>
          </table:table-cell>
          <table:table-cell table:formula="of:=[.D450]-[.D44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23" office:value-type="float" office:value="10327" calcext:value-type="float">
            <text:p>10327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119525462962963" calcext:value-type="float">
            <text:p>0,00119525462962963000</text:p>
          </table:table-cell>
          <table:table-cell table:formula="of:=[.D451]-[.D45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23" office:value-type="float" office:value="10350" calcext:value-type="float">
            <text:p>1035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119791666666667" calcext:value-type="float">
            <text:p>0,00119791666666667000</text:p>
          </table:table-cell>
          <table:table-cell table:formula="of:=[.D452]-[.D45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23" office:value-type="float" office:value="10373" calcext:value-type="float">
            <text:p>10373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12005787037037" calcext:value-type="float">
            <text:p>0,00120057870370370000</text:p>
          </table:table-cell>
          <table:table-cell table:formula="of:=[.D453]-[.D45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23" office:value-type="float" office:value="10396" calcext:value-type="float">
            <text:p>10396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120324074074074" calcext:value-type="float">
            <text:p>0,00120324074074074000</text:p>
          </table:table-cell>
          <table:table-cell table:formula="of:=[.D454]-[.D45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23" office:value-type="float" office:value="10419" calcext:value-type="float">
            <text:p>10419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120590277777778" calcext:value-type="float">
            <text:p>0,00120590277777778000</text:p>
          </table:table-cell>
          <table:table-cell table:formula="of:=[.D455]-[.D4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23" office:value-type="float" office:value="10442" calcext:value-type="float">
            <text:p>10442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120856481481481" calcext:value-type="float">
            <text:p>0,00120856481481481000</text:p>
          </table:table-cell>
          <table:table-cell table:formula="of:=[.D456]-[.D45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23" office:value-type="float" office:value="10465" calcext:value-type="float">
            <text:p>10465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121122685185185" calcext:value-type="float">
            <text:p>0,00121122685185185000</text:p>
          </table:table-cell>
          <table:table-cell table:formula="of:=[.D457]-[.D45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23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121388888888889" calcext:value-type="float">
            <text:p>0,00121388888888889000</text:p>
          </table:table-cell>
          <table:table-cell table:formula="of:=[.D458]-[.D45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23" office:value-type="float" office:value="10511" calcext:value-type="float">
            <text:p>10511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121655092592593" calcext:value-type="float">
            <text:p>0,00121655092592593000</text:p>
          </table:table-cell>
          <table:table-cell table:formula="of:=[.D459]-[.D45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23" office:value-type="float" office:value="10534" calcext:value-type="float">
            <text:p>10534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121921296296296" calcext:value-type="float">
            <text:p>0,00121921296296296000</text:p>
          </table:table-cell>
          <table:table-cell table:formula="of:=[.D460]-[.D45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23" office:value-type="float" office:value="10557" calcext:value-type="float">
            <text:p>10557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1221875" calcext:value-type="float">
            <text:p>0,00122187500000000000</text:p>
          </table:table-cell>
          <table:table-cell table:formula="of:=[.D461]-[.D46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23" office:value-type="float" office:value="10580" calcext:value-type="float">
            <text:p>1058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122453703703704" calcext:value-type="float">
            <text:p>0,00122453703703704000</text:p>
          </table:table-cell>
          <table:table-cell table:formula="of:=[.D462]-[.D46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23" office:value-type="float" office:value="10603" calcext:value-type="float">
            <text:p>10603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122719907407407" calcext:value-type="float">
            <text:p>0,00122719907407407000</text:p>
          </table:table-cell>
          <table:table-cell table:formula="of:=[.D463]-[.D46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23" office:value-type="float" office:value="10626" calcext:value-type="float">
            <text:p>10626</text:p>
          </table:table-cell>
          <table:table-cell office:value-type="float" office:value="8640000" calcext:value-type="float">
            <text:p>8640000</text:p>
          </table:table-cell>
          <table:table-cell table:formula="of:=[.B463]/[.C463]" office:value-type="float" office:value="0.00122986111111111" calcext:value-type="float">
            <text:p>0,00122986111111111000</text:p>
          </table:table-cell>
          <table:table-cell table:formula="of:=[.D464]-[.D46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23" office:value-type="float" office:value="10649" calcext:value-type="float">
            <text:p>10649</text:p>
          </table:table-cell>
          <table:table-cell office:value-type="float" office:value="8640000" calcext:value-type="float">
            <text:p>8640000</text:p>
          </table:table-cell>
          <table:table-cell table:formula="of:=[.B464]/[.C464]" office:value-type="float" office:value="0.00123252314814815" calcext:value-type="float">
            <text:p>0,00123252314814815000</text:p>
          </table:table-cell>
          <table:table-cell table:formula="of:=[.D465]-[.D46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23" office:value-type="float" office:value="10672" calcext:value-type="float">
            <text:p>10672</text:p>
          </table:table-cell>
          <table:table-cell office:value-type="float" office:value="8640000" calcext:value-type="float">
            <text:p>8640000</text:p>
          </table:table-cell>
          <table:table-cell table:formula="of:=[.B465]/[.C465]" office:value-type="float" office:value="0.00123518518518519" calcext:value-type="float">
            <text:p>0,00123518518518519000</text:p>
          </table:table-cell>
          <table:table-cell table:formula="of:=[.D466]-[.D46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23" office:value-type="float" office:value="10695" calcext:value-type="float">
            <text:p>10695</text:p>
          </table:table-cell>
          <table:table-cell office:value-type="float" office:value="8640000" calcext:value-type="float">
            <text:p>8640000</text:p>
          </table:table-cell>
          <table:table-cell table:formula="of:=[.B466]/[.C466]" office:value-type="float" office:value="0.00123784722222222" calcext:value-type="float">
            <text:p>0,00123784722222222000</text:p>
          </table:table-cell>
          <table:table-cell table:formula="of:=[.D467]-[.D46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23" office:value-type="float" office:value="10718" calcext:value-type="float">
            <text:p>10718</text:p>
          </table:table-cell>
          <table:table-cell office:value-type="float" office:value="8640000" calcext:value-type="float">
            <text:p>8640000</text:p>
          </table:table-cell>
          <table:table-cell table:formula="of:=[.B467]/[.C467]" office:value-type="float" office:value="0.00124050925925926" calcext:value-type="float">
            <text:p>0,00124050925925926000</text:p>
          </table:table-cell>
          <table:table-cell table:formula="of:=[.D468]-[.D46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23" office:value-type="float" office:value="10741" calcext:value-type="float">
            <text:p>10741</text:p>
          </table:table-cell>
          <table:table-cell office:value-type="float" office:value="8640000" calcext:value-type="float">
            <text:p>8640000</text:p>
          </table:table-cell>
          <table:table-cell table:formula="of:=[.B468]/[.C468]" office:value-type="float" office:value="0.0012431712962963" calcext:value-type="float">
            <text:p>0,00124317129629630000</text:p>
          </table:table-cell>
          <table:table-cell table:formula="of:=[.D469]-[.D46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23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469]/[.C469]" office:value-type="float" office:value="0.00124583333333333" calcext:value-type="float">
            <text:p>0,00124583333333333000</text:p>
          </table:table-cell>
          <table:table-cell table:formula="of:=[.D470]-[.D46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23" office:value-type="float" office:value="10787" calcext:value-type="float">
            <text:p>10787</text:p>
          </table:table-cell>
          <table:table-cell office:value-type="float" office:value="8640000" calcext:value-type="float">
            <text:p>8640000</text:p>
          </table:table-cell>
          <table:table-cell table:formula="of:=[.B470]/[.C470]" office:value-type="float" office:value="0.00124849537037037" calcext:value-type="float">
            <text:p>0,00124849537037037000</text:p>
          </table:table-cell>
          <table:table-cell table:formula="of:=[.D471]-[.D47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23" office:value-type="float" office:value="10810" calcext:value-type="float">
            <text:p>10810</text:p>
          </table:table-cell>
          <table:table-cell office:value-type="float" office:value="8640000" calcext:value-type="float">
            <text:p>8640000</text:p>
          </table:table-cell>
          <table:table-cell table:formula="of:=[.B471]/[.C471]" office:value-type="float" office:value="0.00125115740740741" calcext:value-type="float">
            <text:p>0,00125115740740741000</text:p>
          </table:table-cell>
          <table:table-cell table:formula="of:=[.D472]-[.D47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23" office:value-type="float" office:value="10833" calcext:value-type="float">
            <text:p>10833</text:p>
          </table:table-cell>
          <table:table-cell office:value-type="float" office:value="8640000" calcext:value-type="float">
            <text:p>8640000</text:p>
          </table:table-cell>
          <table:table-cell table:formula="of:=[.B472]/[.C472]" office:value-type="float" office:value="0.00125381944444444" calcext:value-type="float">
            <text:p>0,00125381944444444000</text:p>
          </table:table-cell>
          <table:table-cell table:formula="of:=[.D473]-[.D47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23" office:value-type="float" office:value="10856" calcext:value-type="float">
            <text:p>10856</text:p>
          </table:table-cell>
          <table:table-cell office:value-type="float" office:value="8640000" calcext:value-type="float">
            <text:p>8640000</text:p>
          </table:table-cell>
          <table:table-cell table:formula="of:=[.B473]/[.C473]" office:value-type="float" office:value="0.00125648148148148" calcext:value-type="float">
            <text:p>0,00125648148148148000</text:p>
          </table:table-cell>
          <table:table-cell table:formula="of:=[.D474]-[.D47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23" office:value-type="float" office:value="10879" calcext:value-type="float">
            <text:p>10879</text:p>
          </table:table-cell>
          <table:table-cell office:value-type="float" office:value="8640000" calcext:value-type="float">
            <text:p>8640000</text:p>
          </table:table-cell>
          <table:table-cell table:formula="of:=[.B474]/[.C474]" office:value-type="float" office:value="0.00125914351851852" calcext:value-type="float">
            <text:p>0,00125914351851852000</text:p>
          </table:table-cell>
          <table:table-cell table:formula="of:=[.D475]-[.D47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23" office:value-type="float" office:value="10902" calcext:value-type="float">
            <text:p>10902</text:p>
          </table:table-cell>
          <table:table-cell office:value-type="float" office:value="8640000" calcext:value-type="float">
            <text:p>8640000</text:p>
          </table:table-cell>
          <table:table-cell table:formula="of:=[.B475]/[.C475]" office:value-type="float" office:value="0.00126180555555556" calcext:value-type="float">
            <text:p>0,00126180555555556000</text:p>
          </table:table-cell>
          <table:table-cell table:formula="of:=[.D476]-[.D47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23" office:value-type="float" office:value="10925" calcext:value-type="float">
            <text:p>10925</text:p>
          </table:table-cell>
          <table:table-cell office:value-type="float" office:value="8640000" calcext:value-type="float">
            <text:p>8640000</text:p>
          </table:table-cell>
          <table:table-cell table:formula="of:=[.B476]/[.C476]" office:value-type="float" office:value="0.00126446759259259" calcext:value-type="float">
            <text:p>0,00126446759259259000</text:p>
          </table:table-cell>
          <table:table-cell table:formula="of:=[.D477]-[.D47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23" office:value-type="float" office:value="10948" calcext:value-type="float">
            <text:p>10948</text:p>
          </table:table-cell>
          <table:table-cell office:value-type="float" office:value="8640000" calcext:value-type="float">
            <text:p>8640000</text:p>
          </table:table-cell>
          <table:table-cell table:formula="of:=[.B477]/[.C477]" office:value-type="float" office:value="0.00126712962962963" calcext:value-type="float">
            <text:p>0,00126712962962963000</text:p>
          </table:table-cell>
          <table:table-cell table:formula="of:=[.D478]-[.D47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23" office:value-type="float" office:value="10971" calcext:value-type="float">
            <text:p>10971</text:p>
          </table:table-cell>
          <table:table-cell office:value-type="float" office:value="8640000" calcext:value-type="float">
            <text:p>8640000</text:p>
          </table:table-cell>
          <table:table-cell table:formula="of:=[.B478]/[.C478]" office:value-type="float" office:value="0.00126979166666667" calcext:value-type="float">
            <text:p>0,00126979166666667000</text:p>
          </table:table-cell>
          <table:table-cell table:formula="of:=[.D479]-[.D47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23" office:value-type="float" office:value="10994" calcext:value-type="float">
            <text:p>10994</text:p>
          </table:table-cell>
          <table:table-cell office:value-type="float" office:value="8640000" calcext:value-type="float">
            <text:p>8640000</text:p>
          </table:table-cell>
          <table:table-cell table:formula="of:=[.B479]/[.C479]" office:value-type="float" office:value="0.0012724537037037" calcext:value-type="float">
            <text:p>0,00127245370370370000</text:p>
          </table:table-cell>
          <table:table-cell table:formula="of:=[.D480]-[.D47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23" office:value-type="float" office:value="11017" calcext:value-type="float">
            <text:p>11017</text:p>
          </table:table-cell>
          <table:table-cell office:value-type="float" office:value="8640000" calcext:value-type="float">
            <text:p>8640000</text:p>
          </table:table-cell>
          <table:table-cell table:formula="of:=[.B480]/[.C480]" office:value-type="float" office:value="0.00127511574074074" calcext:value-type="float">
            <text:p>0,00127511574074074000</text:p>
          </table:table-cell>
          <table:table-cell table:formula="of:=[.D481]-[.D48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23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481]/[.C481]" office:value-type="float" office:value="0.00127777777777778" calcext:value-type="float">
            <text:p>0,00127777777777778000</text:p>
          </table:table-cell>
          <table:table-cell table:formula="of:=[.D482]-[.D48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23" office:value-type="float" office:value="11063" calcext:value-type="float">
            <text:p>11063</text:p>
          </table:table-cell>
          <table:table-cell office:value-type="float" office:value="8640000" calcext:value-type="float">
            <text:p>8640000</text:p>
          </table:table-cell>
          <table:table-cell table:formula="of:=[.B482]/[.C482]" office:value-type="float" office:value="0.00128043981481481" calcext:value-type="float">
            <text:p>0,00128043981481481000</text:p>
          </table:table-cell>
          <table:table-cell table:formula="of:=[.D483]-[.D48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23" office:value-type="float" office:value="11086" calcext:value-type="float">
            <text:p>11086</text:p>
          </table:table-cell>
          <table:table-cell office:value-type="float" office:value="8640000" calcext:value-type="float">
            <text:p>8640000</text:p>
          </table:table-cell>
          <table:table-cell table:formula="of:=[.B483]/[.C483]" office:value-type="float" office:value="0.00128310185185185" calcext:value-type="float">
            <text:p>0,00128310185185185000</text:p>
          </table:table-cell>
          <table:table-cell table:formula="of:=[.D484]-[.D48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23" office:value-type="float" office:value="11109" calcext:value-type="float">
            <text:p>11109</text:p>
          </table:table-cell>
          <table:table-cell office:value-type="float" office:value="8640000" calcext:value-type="float">
            <text:p>8640000</text:p>
          </table:table-cell>
          <table:table-cell table:formula="of:=[.B484]/[.C484]" office:value-type="float" office:value="0.00128576388888889" calcext:value-type="float">
            <text:p>0,00128576388888889000</text:p>
          </table:table-cell>
          <table:table-cell table:formula="of:=[.D485]-[.D4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23" office:value-type="float" office:value="11132" calcext:value-type="float">
            <text:p>11132</text:p>
          </table:table-cell>
          <table:table-cell office:value-type="float" office:value="8640000" calcext:value-type="float">
            <text:p>8640000</text:p>
          </table:table-cell>
          <table:table-cell table:formula="of:=[.B485]/[.C485]" office:value-type="float" office:value="0.00128842592592593" calcext:value-type="float">
            <text:p>0,00128842592592593000</text:p>
          </table:table-cell>
          <table:table-cell table:formula="of:=[.D486]-[.D48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23" office:value-type="float" office:value="11155" calcext:value-type="float">
            <text:p>11155</text:p>
          </table:table-cell>
          <table:table-cell office:value-type="float" office:value="8640000" calcext:value-type="float">
            <text:p>8640000</text:p>
          </table:table-cell>
          <table:table-cell table:formula="of:=[.B486]/[.C486]" office:value-type="float" office:value="0.00129108796296296" calcext:value-type="float">
            <text:p>0,00129108796296296000</text:p>
          </table:table-cell>
          <table:table-cell table:formula="of:=[.D487]-[.D48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23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487]/[.C487]" office:value-type="float" office:value="0.00129375" calcext:value-type="float">
            <text:p>0,00129375000000000000</text:p>
          </table:table-cell>
          <table:table-cell table:formula="of:=[.D488]-[.D48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23" office:value-type="float" office:value="11201" calcext:value-type="float">
            <text:p>11201</text:p>
          </table:table-cell>
          <table:table-cell office:value-type="float" office:value="8640000" calcext:value-type="float">
            <text:p>8640000</text:p>
          </table:table-cell>
          <table:table-cell table:formula="of:=[.B488]/[.C488]" office:value-type="float" office:value="0.00129641203703704" calcext:value-type="float">
            <text:p>0,00129641203703704000</text:p>
          </table:table-cell>
          <table:table-cell table:formula="of:=[.D489]-[.D48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23" office:value-type="float" office:value="11224" calcext:value-type="float">
            <text:p>11224</text:p>
          </table:table-cell>
          <table:table-cell office:value-type="float" office:value="8640000" calcext:value-type="float">
            <text:p>8640000</text:p>
          </table:table-cell>
          <table:table-cell table:formula="of:=[.B489]/[.C489]" office:value-type="float" office:value="0.00129907407407407" calcext:value-type="float">
            <text:p>0,00129907407407407000</text:p>
          </table:table-cell>
          <table:table-cell table:formula="of:=[.D490]-[.D48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23" office:value-type="float" office:value="11247" calcext:value-type="float">
            <text:p>11247</text:p>
          </table:table-cell>
          <table:table-cell office:value-type="float" office:value="8640000" calcext:value-type="float">
            <text:p>8640000</text:p>
          </table:table-cell>
          <table:table-cell table:formula="of:=[.B490]/[.C490]" office:value-type="float" office:value="0.00130173611111111" calcext:value-type="float">
            <text:p>0,00130173611111111000</text:p>
          </table:table-cell>
          <table:table-cell table:formula="of:=[.D491]-[.D49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23" office:value-type="float" office:value="11270" calcext:value-type="float">
            <text:p>11270</text:p>
          </table:table-cell>
          <table:table-cell office:value-type="float" office:value="8640000" calcext:value-type="float">
            <text:p>8640000</text:p>
          </table:table-cell>
          <table:table-cell table:formula="of:=[.B491]/[.C491]" office:value-type="float" office:value="0.00130439814814815" calcext:value-type="float">
            <text:p>0,00130439814814815000</text:p>
          </table:table-cell>
          <table:table-cell table:formula="of:=[.D492]-[.D49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23" office:value-type="float" office:value="11293" calcext:value-type="float">
            <text:p>11293</text:p>
          </table:table-cell>
          <table:table-cell office:value-type="float" office:value="8640000" calcext:value-type="float">
            <text:p>8640000</text:p>
          </table:table-cell>
          <table:table-cell table:formula="of:=[.B492]/[.C492]" office:value-type="float" office:value="0.00130706018518519" calcext:value-type="float">
            <text:p>0,00130706018518519000</text:p>
          </table:table-cell>
          <table:table-cell table:formula="of:=[.D493]-[.D49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23" office:value-type="float" office:value="11316" calcext:value-type="float">
            <text:p>11316</text:p>
          </table:table-cell>
          <table:table-cell office:value-type="float" office:value="8640000" calcext:value-type="float">
            <text:p>8640000</text:p>
          </table:table-cell>
          <table:table-cell table:formula="of:=[.B493]/[.C493]" office:value-type="float" office:value="0.00130972222222222" calcext:value-type="float">
            <text:p>0,00130972222222222000</text:p>
          </table:table-cell>
          <table:table-cell table:formula="of:=[.D494]-[.D49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23" office:value-type="float" office:value="11339" calcext:value-type="float">
            <text:p>11339</text:p>
          </table:table-cell>
          <table:table-cell office:value-type="float" office:value="8640000" calcext:value-type="float">
            <text:p>8640000</text:p>
          </table:table-cell>
          <table:table-cell table:formula="of:=[.B494]/[.C494]" office:value-type="float" office:value="0.00131238425925926" calcext:value-type="float">
            <text:p>0,00131238425925926000</text:p>
          </table:table-cell>
          <table:table-cell table:formula="of:=[.D495]-[.D49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23" office:value-type="float" office:value="11362" calcext:value-type="float">
            <text:p>11362</text:p>
          </table:table-cell>
          <table:table-cell office:value-type="float" office:value="8640000" calcext:value-type="float">
            <text:p>8640000</text:p>
          </table:table-cell>
          <table:table-cell table:formula="of:=[.B495]/[.C495]" office:value-type="float" office:value="0.0013150462962963" calcext:value-type="float">
            <text:p>0,00131504629629630000</text:p>
          </table:table-cell>
          <table:table-cell table:formula="of:=[.D496]-[.D49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23" office:value-type="float" office:value="11385" calcext:value-type="float">
            <text:p>11385</text:p>
          </table:table-cell>
          <table:table-cell office:value-type="float" office:value="8640000" calcext:value-type="float">
            <text:p>8640000</text:p>
          </table:table-cell>
          <table:table-cell table:formula="of:=[.B496]/[.C496]" office:value-type="float" office:value="0.00131770833333333" calcext:value-type="float">
            <text:p>0,00131770833333333000</text:p>
          </table:table-cell>
          <table:table-cell table:formula="of:=[.D497]-[.D49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23" office:value-type="float" office:value="11408" calcext:value-type="float">
            <text:p>11408</text:p>
          </table:table-cell>
          <table:table-cell office:value-type="float" office:value="8640000" calcext:value-type="float">
            <text:p>8640000</text:p>
          </table:table-cell>
          <table:table-cell table:formula="of:=[.B497]/[.C497]" office:value-type="float" office:value="0.00132037037037037" calcext:value-type="float">
            <text:p>0,00132037037037037000</text:p>
          </table:table-cell>
          <table:table-cell table:formula="of:=[.D498]-[.D49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23" office:value-type="float" office:value="11431" calcext:value-type="float">
            <text:p>11431</text:p>
          </table:table-cell>
          <table:table-cell office:value-type="float" office:value="8640000" calcext:value-type="float">
            <text:p>8640000</text:p>
          </table:table-cell>
          <table:table-cell table:formula="of:=[.B498]/[.C498]" office:value-type="float" office:value="0.00132303240740741" calcext:value-type="float">
            <text:p>0,00132303240740741000</text:p>
          </table:table-cell>
          <table:table-cell table:formula="of:=[.D499]-[.D4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23" office:value-type="float" office:value="11454" calcext:value-type="float">
            <text:p>11454</text:p>
          </table:table-cell>
          <table:table-cell office:value-type="float" office:value="8640000" calcext:value-type="float">
            <text:p>8640000</text:p>
          </table:table-cell>
          <table:table-cell table:formula="of:=[.B499]/[.C499]" office:value-type="float" office:value="0.00132569444444444" calcext:value-type="float">
            <text:p>0,00132569444444444000</text:p>
          </table:table-cell>
          <table:table-cell table:formula="of:=[.D500]-[.D49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23" office:value-type="float" office:value="11477" calcext:value-type="float">
            <text:p>11477</text:p>
          </table:table-cell>
          <table:table-cell office:value-type="float" office:value="8640000" calcext:value-type="float">
            <text:p>8640000</text:p>
          </table:table-cell>
          <table:table-cell table:formula="of:=[.B500]/[.C500]" office:value-type="float" office:value="0.00132835648148148" calcext:value-type="float">
            <text:p>0,00132835648148148000</text:p>
          </table:table-cell>
          <table:table-cell table:formula="of:=[.D501]-[.D50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23" office:value-type="float" office:value="11500" calcext:value-type="float">
            <text:p>11500</text:p>
          </table:table-cell>
          <table:table-cell office:value-type="float" office:value="8640000" calcext:value-type="float">
            <text:p>8640000</text:p>
          </table:table-cell>
          <table:table-cell table:formula="of:=[.B501]/[.C501]" office:value-type="float" office:value="0.00133101851851852" calcext:value-type="float">
            <text:p>0,00133101851851852000</text:p>
          </table:table-cell>
          <table:table-cell table:formula="of:=[.D502]-[.D50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23" office:value-type="float" office:value="11523" calcext:value-type="float">
            <text:p>11523</text:p>
          </table:table-cell>
          <table:table-cell office:value-type="float" office:value="8640000" calcext:value-type="float">
            <text:p>8640000</text:p>
          </table:table-cell>
          <table:table-cell table:formula="of:=[.B502]/[.C502]" office:value-type="float" office:value="0.00133368055555556" calcext:value-type="float">
            <text:p>0,00133368055555556000</text:p>
          </table:table-cell>
          <table:table-cell table:formula="of:=[.D503]-[.D50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23" office:value-type="float" office:value="11546" calcext:value-type="float">
            <text:p>11546</text:p>
          </table:table-cell>
          <table:table-cell office:value-type="float" office:value="8640000" calcext:value-type="float">
            <text:p>8640000</text:p>
          </table:table-cell>
          <table:table-cell table:formula="of:=[.B503]/[.C503]" office:value-type="float" office:value="0.00133634259259259" calcext:value-type="float">
            <text:p>0,00133634259259259000</text:p>
          </table:table-cell>
          <table:table-cell table:formula="of:=[.D504]-[.D50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23" office:value-type="float" office:value="11569" calcext:value-type="float">
            <text:p>11569</text:p>
          </table:table-cell>
          <table:table-cell office:value-type="float" office:value="8640000" calcext:value-type="float">
            <text:p>8640000</text:p>
          </table:table-cell>
          <table:table-cell table:formula="of:=[.B504]/[.C504]" office:value-type="float" office:value="0.00133900462962963" calcext:value-type="float">
            <text:p>0,00133900462962963000</text:p>
          </table:table-cell>
          <table:table-cell table:formula="of:=[.D505]-[.D50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23" office:value-type="float" office:value="11592" calcext:value-type="float">
            <text:p>11592</text:p>
          </table:table-cell>
          <table:table-cell office:value-type="float" office:value="8640000" calcext:value-type="float">
            <text:p>8640000</text:p>
          </table:table-cell>
          <table:table-cell table:formula="of:=[.B505]/[.C505]" office:value-type="float" office:value="0.00134166666666667" calcext:value-type="float">
            <text:p>0,00134166666666667000</text:p>
          </table:table-cell>
          <table:table-cell table:formula="of:=[.D506]-[.D50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23" office:value-type="float" office:value="11615" calcext:value-type="float">
            <text:p>11615</text:p>
          </table:table-cell>
          <table:table-cell office:value-type="float" office:value="8640000" calcext:value-type="float">
            <text:p>8640000</text:p>
          </table:table-cell>
          <table:table-cell table:formula="of:=[.B506]/[.C506]" office:value-type="float" office:value="0.0013443287037037" calcext:value-type="float">
            <text:p>0,00134432870370370000</text:p>
          </table:table-cell>
          <table:table-cell table:formula="of:=[.D507]-[.D50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23" office:value-type="float" office:value="11638" calcext:value-type="float">
            <text:p>11638</text:p>
          </table:table-cell>
          <table:table-cell office:value-type="float" office:value="8640000" calcext:value-type="float">
            <text:p>8640000</text:p>
          </table:table-cell>
          <table:table-cell table:formula="of:=[.B507]/[.C507]" office:value-type="float" office:value="0.00134699074074074" calcext:value-type="float">
            <text:p>0,00134699074074074000</text:p>
          </table:table-cell>
          <table:table-cell table:formula="of:=[.D508]-[.D50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23" office:value-type="float" office:value="11661" calcext:value-type="float">
            <text:p>11661</text:p>
          </table:table-cell>
          <table:table-cell office:value-type="float" office:value="8640000" calcext:value-type="float">
            <text:p>8640000</text:p>
          </table:table-cell>
          <table:table-cell table:formula="of:=[.B508]/[.C508]" office:value-type="float" office:value="0.00134965277777778" calcext:value-type="float">
            <text:p>0,00134965277777778000</text:p>
          </table:table-cell>
          <table:table-cell table:formula="of:=[.D509]-[.D50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23" office:value-type="float" office:value="11684" calcext:value-type="float">
            <text:p>11684</text:p>
          </table:table-cell>
          <table:table-cell office:value-type="float" office:value="8640000" calcext:value-type="float">
            <text:p>8640000</text:p>
          </table:table-cell>
          <table:table-cell table:formula="of:=[.B509]/[.C509]" office:value-type="float" office:value="0.00135231481481481" calcext:value-type="float">
            <text:p>0,00135231481481481000</text:p>
          </table:table-cell>
          <table:table-cell table:formula="of:=[.D510]-[.D50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23" office:value-type="float" office:value="11707" calcext:value-type="float">
            <text:p>11707</text:p>
          </table:table-cell>
          <table:table-cell office:value-type="float" office:value="8640000" calcext:value-type="float">
            <text:p>8640000</text:p>
          </table:table-cell>
          <table:table-cell table:formula="of:=[.B510]/[.C510]" office:value-type="float" office:value="0.00135497685185185" calcext:value-type="float">
            <text:p>0,00135497685185185000</text:p>
          </table:table-cell>
          <table:table-cell table:formula="of:=[.D511]-[.D51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23" office:value-type="float" office:value="11730" calcext:value-type="float">
            <text:p>11730</text:p>
          </table:table-cell>
          <table:table-cell office:value-type="float" office:value="8640000" calcext:value-type="float">
            <text:p>8640000</text:p>
          </table:table-cell>
          <table:table-cell table:formula="of:=[.B511]/[.C511]" office:value-type="float" office:value="0.00135763888888889" calcext:value-type="float">
            <text:p>0,00135763888888889000</text:p>
          </table:table-cell>
          <table:table-cell table:formula="of:=[.D512]-[.D51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23" office:value-type="float" office:value="11753" calcext:value-type="float">
            <text:p>11753</text:p>
          </table:table-cell>
          <table:table-cell office:value-type="float" office:value="8640000" calcext:value-type="float">
            <text:p>8640000</text:p>
          </table:table-cell>
          <table:table-cell table:formula="of:=[.B512]/[.C512]" office:value-type="float" office:value="0.00136030092592593" calcext:value-type="float">
            <text:p>0,00136030092592593000</text:p>
          </table:table-cell>
          <table:table-cell table:formula="of:=[.D513]-[.D5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23" office:value-type="float" office:value="11776" calcext:value-type="float">
            <text:p>11776</text:p>
          </table:table-cell>
          <table:table-cell office:value-type="float" office:value="8640000" calcext:value-type="float">
            <text:p>8640000</text:p>
          </table:table-cell>
          <table:table-cell table:formula="of:=[.B513]/[.C513]" office:value-type="float" office:value="0.00136296296296296" calcext:value-type="float">
            <text:p>0,00136296296296296000</text:p>
          </table:table-cell>
          <table:table-cell table:formula="of:=[.D514]-[.D5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23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514]/[.C514]" office:value-type="float" office:value="0.001365625" calcext:value-type="float">
            <text:p>0,00136562500000000000</text:p>
          </table:table-cell>
          <table:table-cell table:formula="of:=[.D515]-[.D51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23" office:value-type="float" office:value="11822" calcext:value-type="float">
            <text:p>11822</text:p>
          </table:table-cell>
          <table:table-cell office:value-type="float" office:value="8640000" calcext:value-type="float">
            <text:p>8640000</text:p>
          </table:table-cell>
          <table:table-cell table:formula="of:=[.B515]/[.C515]" office:value-type="float" office:value="0.00136828703703704" calcext:value-type="float">
            <text:p>0,00136828703703704000</text:p>
          </table:table-cell>
          <table:table-cell table:formula="of:=[.D516]-[.D51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23" office:value-type="float" office:value="11845" calcext:value-type="float">
            <text:p>11845</text:p>
          </table:table-cell>
          <table:table-cell office:value-type="float" office:value="8640000" calcext:value-type="float">
            <text:p>8640000</text:p>
          </table:table-cell>
          <table:table-cell table:formula="of:=[.B516]/[.C516]" office:value-type="float" office:value="0.00137094907407407" calcext:value-type="float">
            <text:p>0,00137094907407407000</text:p>
          </table:table-cell>
          <table:table-cell table:formula="of:=[.D517]-[.D51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23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517]/[.C517]" office:value-type="float" office:value="0.00137361111111111" calcext:value-type="float">
            <text:p>0,00137361111111111000</text:p>
          </table:table-cell>
          <table:table-cell table:formula="of:=[.D518]-[.D51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23" office:value-type="float" office:value="11891" calcext:value-type="float">
            <text:p>11891</text:p>
          </table:table-cell>
          <table:table-cell office:value-type="float" office:value="8640000" calcext:value-type="float">
            <text:p>8640000</text:p>
          </table:table-cell>
          <table:table-cell table:formula="of:=[.B518]/[.C518]" office:value-type="float" office:value="0.00137627314814815" calcext:value-type="float">
            <text:p>0,00137627314814815000</text:p>
          </table:table-cell>
          <table:table-cell table:formula="of:=[.D519]-[.D51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23" office:value-type="float" office:value="11914" calcext:value-type="float">
            <text:p>11914</text:p>
          </table:table-cell>
          <table:table-cell office:value-type="float" office:value="8640000" calcext:value-type="float">
            <text:p>8640000</text:p>
          </table:table-cell>
          <table:table-cell table:formula="of:=[.B519]/[.C519]" office:value-type="float" office:value="0.00137893518518519" calcext:value-type="float">
            <text:p>0,00137893518518519000</text:p>
          </table:table-cell>
          <table:table-cell table:formula="of:=[.D520]-[.D5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23" office:value-type="float" office:value="11937" calcext:value-type="float">
            <text:p>11937</text:p>
          </table:table-cell>
          <table:table-cell office:value-type="float" office:value="8640000" calcext:value-type="float">
            <text:p>8640000</text:p>
          </table:table-cell>
          <table:table-cell table:formula="of:=[.B520]/[.C520]" office:value-type="float" office:value="0.00138159722222222" calcext:value-type="float">
            <text:p>0,00138159722222222000</text:p>
          </table:table-cell>
          <table:table-cell table:formula="of:=[.D521]-[.D52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23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521]/[.C521]" office:value-type="float" office:value="0.00138425925925926" calcext:value-type="float">
            <text:p>0,00138425925925926000</text:p>
          </table:table-cell>
          <table:table-cell table:formula="of:=[.D522]-[.D52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23" office:value-type="float" office:value="11983" calcext:value-type="float">
            <text:p>11983</text:p>
          </table:table-cell>
          <table:table-cell office:value-type="float" office:value="8640000" calcext:value-type="float">
            <text:p>8640000</text:p>
          </table:table-cell>
          <table:table-cell table:formula="of:=[.B522]/[.C522]" office:value-type="float" office:value="0.0013869212962963" calcext:value-type="float">
            <text:p>0,00138692129629630000</text:p>
          </table:table-cell>
          <table:table-cell table:formula="of:=[.D523]-[.D52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23" office:value-type="float" office:value="12006" calcext:value-type="float">
            <text:p>12006</text:p>
          </table:table-cell>
          <table:table-cell office:value-type="float" office:value="8640000" calcext:value-type="float">
            <text:p>8640000</text:p>
          </table:table-cell>
          <table:table-cell table:formula="of:=[.B523]/[.C523]" office:value-type="float" office:value="0.00138958333333333" calcext:value-type="float">
            <text:p>0,00138958333333333000</text:p>
          </table:table-cell>
          <table:table-cell table:formula="of:=[.D524]-[.D52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23" office:value-type="float" office:value="12029" calcext:value-type="float">
            <text:p>12029</text:p>
          </table:table-cell>
          <table:table-cell office:value-type="float" office:value="8640000" calcext:value-type="float">
            <text:p>8640000</text:p>
          </table:table-cell>
          <table:table-cell table:formula="of:=[.B524]/[.C524]" office:value-type="float" office:value="0.00139224537037037" calcext:value-type="float">
            <text:p>0,00139224537037037000</text:p>
          </table:table-cell>
          <table:table-cell table:formula="of:=[.D525]-[.D52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23" office:value-type="float" office:value="12052" calcext:value-type="float">
            <text:p>12052</text:p>
          </table:table-cell>
          <table:table-cell office:value-type="float" office:value="8640000" calcext:value-type="float">
            <text:p>8640000</text:p>
          </table:table-cell>
          <table:table-cell table:formula="of:=[.B525]/[.C525]" office:value-type="float" office:value="0.00139490740740741" calcext:value-type="float">
            <text:p>0,00139490740740741000</text:p>
          </table:table-cell>
          <table:table-cell table:formula="of:=[.D526]-[.D52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23" office:value-type="float" office:value="12075" calcext:value-type="float">
            <text:p>12075</text:p>
          </table:table-cell>
          <table:table-cell office:value-type="float" office:value="8640000" calcext:value-type="float">
            <text:p>8640000</text:p>
          </table:table-cell>
          <table:table-cell table:formula="of:=[.B526]/[.C526]" office:value-type="float" office:value="0.00139756944444444" calcext:value-type="float">
            <text:p>0,00139756944444444000</text:p>
          </table:table-cell>
          <table:table-cell table:formula="of:=[.D527]-[.D5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23" office:value-type="float" office:value="12098" calcext:value-type="float">
            <text:p>12098</text:p>
          </table:table-cell>
          <table:table-cell office:value-type="float" office:value="8640000" calcext:value-type="float">
            <text:p>8640000</text:p>
          </table:table-cell>
          <table:table-cell table:formula="of:=[.B527]/[.C527]" office:value-type="float" office:value="0.00140023148148148" calcext:value-type="float">
            <text:p>0,00140023148148148000</text:p>
          </table:table-cell>
          <table:table-cell table:formula="of:=[.D528]-[.D52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23" office:value-type="float" office:value="12121" calcext:value-type="float">
            <text:p>12121</text:p>
          </table:table-cell>
          <table:table-cell office:value-type="float" office:value="8640000" calcext:value-type="float">
            <text:p>8640000</text:p>
          </table:table-cell>
          <table:table-cell table:formula="of:=[.B528]/[.C528]" office:value-type="float" office:value="0.00140289351851852" calcext:value-type="float">
            <text:p>0,00140289351851852000</text:p>
          </table:table-cell>
          <table:table-cell table:formula="of:=[.D529]-[.D52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23" office:value-type="float" office:value="12144" calcext:value-type="float">
            <text:p>12144</text:p>
          </table:table-cell>
          <table:table-cell office:value-type="float" office:value="8640000" calcext:value-type="float">
            <text:p>8640000</text:p>
          </table:table-cell>
          <table:table-cell table:formula="of:=[.B529]/[.C529]" office:value-type="float" office:value="0.00140555555555556" calcext:value-type="float">
            <text:p>0,00140555555555556000</text:p>
          </table:table-cell>
          <table:table-cell table:formula="of:=[.D530]-[.D52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23" office:value-type="float" office:value="12167" calcext:value-type="float">
            <text:p>12167</text:p>
          </table:table-cell>
          <table:table-cell office:value-type="float" office:value="8640000" calcext:value-type="float">
            <text:p>8640000</text:p>
          </table:table-cell>
          <table:table-cell table:formula="of:=[.B530]/[.C530]" office:value-type="float" office:value="0.00140821759259259" calcext:value-type="float">
            <text:p>0,00140821759259259000</text:p>
          </table:table-cell>
          <table:table-cell table:formula="of:=[.D531]-[.D53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23" office:value-type="float" office:value="12190" calcext:value-type="float">
            <text:p>12190</text:p>
          </table:table-cell>
          <table:table-cell office:value-type="float" office:value="8640000" calcext:value-type="float">
            <text:p>8640000</text:p>
          </table:table-cell>
          <table:table-cell table:formula="of:=[.B531]/[.C531]" office:value-type="float" office:value="0.00141087962962963" calcext:value-type="float">
            <text:p>0,00141087962962963000</text:p>
          </table:table-cell>
          <table:table-cell table:formula="of:=[.D532]-[.D5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23" office:value-type="float" office:value="12213" calcext:value-type="float">
            <text:p>12213</text:p>
          </table:table-cell>
          <table:table-cell office:value-type="float" office:value="8640000" calcext:value-type="float">
            <text:p>8640000</text:p>
          </table:table-cell>
          <table:table-cell table:formula="of:=[.B532]/[.C532]" office:value-type="float" office:value="0.00141354166666667" calcext:value-type="float">
            <text:p>0,00141354166666667000</text:p>
          </table:table-cell>
          <table:table-cell table:formula="of:=[.D533]-[.D53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23" office:value-type="float" office:value="12236" calcext:value-type="float">
            <text:p>12236</text:p>
          </table:table-cell>
          <table:table-cell office:value-type="float" office:value="8640000" calcext:value-type="float">
            <text:p>8640000</text:p>
          </table:table-cell>
          <table:table-cell table:formula="of:=[.B533]/[.C533]" office:value-type="float" office:value="0.0014162037037037" calcext:value-type="float">
            <text:p>0,00141620370370370000</text:p>
          </table:table-cell>
          <table:table-cell table:formula="of:=[.D534]-[.D53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23" office:value-type="float" office:value="12259" calcext:value-type="float">
            <text:p>12259</text:p>
          </table:table-cell>
          <table:table-cell office:value-type="float" office:value="8640000" calcext:value-type="float">
            <text:p>8640000</text:p>
          </table:table-cell>
          <table:table-cell table:formula="of:=[.B534]/[.C534]" office:value-type="float" office:value="0.00141886574074074" calcext:value-type="float">
            <text:p>0,00141886574074074000</text:p>
          </table:table-cell>
          <table:table-cell table:formula="of:=[.D535]-[.D53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23" office:value-type="float" office:value="12282" calcext:value-type="float">
            <text:p>12282</text:p>
          </table:table-cell>
          <table:table-cell office:value-type="float" office:value="8640000" calcext:value-type="float">
            <text:p>8640000</text:p>
          </table:table-cell>
          <table:table-cell table:formula="of:=[.B535]/[.C535]" office:value-type="float" office:value="0.00142152777777778" calcext:value-type="float">
            <text:p>0,00142152777777778000</text:p>
          </table:table-cell>
          <table:table-cell table:formula="of:=[.D536]-[.D53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23" office:value-type="float" office:value="12305" calcext:value-type="float">
            <text:p>12305</text:p>
          </table:table-cell>
          <table:table-cell office:value-type="float" office:value="8640000" calcext:value-type="float">
            <text:p>8640000</text:p>
          </table:table-cell>
          <table:table-cell table:formula="of:=[.B536]/[.C536]" office:value-type="float" office:value="0.00142418981481481" calcext:value-type="float">
            <text:p>0,00142418981481481000</text:p>
          </table:table-cell>
          <table:table-cell table:formula="of:=[.D537]-[.D53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23" office:value-type="float" office:value="12328" calcext:value-type="float">
            <text:p>12328</text:p>
          </table:table-cell>
          <table:table-cell office:value-type="float" office:value="8640000" calcext:value-type="float">
            <text:p>8640000</text:p>
          </table:table-cell>
          <table:table-cell table:formula="of:=[.B537]/[.C537]" office:value-type="float" office:value="0.00142685185185185" calcext:value-type="float">
            <text:p>0,00142685185185185000</text:p>
          </table:table-cell>
          <table:table-cell table:formula="of:=[.D538]-[.D53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23" office:value-type="float" office:value="12351" calcext:value-type="float">
            <text:p>12351</text:p>
          </table:table-cell>
          <table:table-cell office:value-type="float" office:value="8640000" calcext:value-type="float">
            <text:p>8640000</text:p>
          </table:table-cell>
          <table:table-cell table:formula="of:=[.B538]/[.C538]" office:value-type="float" office:value="0.00142951388888889" calcext:value-type="float">
            <text:p>0,00142951388888889000</text:p>
          </table:table-cell>
          <table:table-cell table:formula="of:=[.D539]-[.D53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23" office:value-type="float" office:value="12374" calcext:value-type="float">
            <text:p>12374</text:p>
          </table:table-cell>
          <table:table-cell office:value-type="float" office:value="8640000" calcext:value-type="float">
            <text:p>8640000</text:p>
          </table:table-cell>
          <table:table-cell table:formula="of:=[.B539]/[.C539]" office:value-type="float" office:value="0.00143217592592593" calcext:value-type="float">
            <text:p>0,00143217592592593000</text:p>
          </table:table-cell>
          <table:table-cell table:formula="of:=[.D540]-[.D5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23" office:value-type="float" office:value="12397" calcext:value-type="float">
            <text:p>12397</text:p>
          </table:table-cell>
          <table:table-cell office:value-type="float" office:value="8640000" calcext:value-type="float">
            <text:p>8640000</text:p>
          </table:table-cell>
          <table:table-cell table:formula="of:=[.B540]/[.C540]" office:value-type="float" office:value="0.00143483796296296" calcext:value-type="float">
            <text:p>0,00143483796296296000</text:p>
          </table:table-cell>
          <table:table-cell table:formula="of:=[.D541]-[.D54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23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541]/[.C541]" office:value-type="float" office:value="0.0014375" calcext:value-type="float">
            <text:p>0,00143750000000000000</text:p>
          </table:table-cell>
          <table:table-cell table:formula="of:=[.D542]-[.D54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23" office:value-type="float" office:value="12443" calcext:value-type="float">
            <text:p>12443</text:p>
          </table:table-cell>
          <table:table-cell office:value-type="float" office:value="8640000" calcext:value-type="float">
            <text:p>8640000</text:p>
          </table:table-cell>
          <table:table-cell table:formula="of:=[.B542]/[.C542]" office:value-type="float" office:value="0.00144016203703704" calcext:value-type="float">
            <text:p>0,00144016203703704000</text:p>
          </table:table-cell>
          <table:table-cell table:formula="of:=[.D543]-[.D54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23" office:value-type="float" office:value="12466" calcext:value-type="float">
            <text:p>12466</text:p>
          </table:table-cell>
          <table:table-cell office:value-type="float" office:value="8640000" calcext:value-type="float">
            <text:p>8640000</text:p>
          </table:table-cell>
          <table:table-cell table:formula="of:=[.B543]/[.C543]" office:value-type="float" office:value="0.00144282407407407" calcext:value-type="float">
            <text:p>0,00144282407407407000</text:p>
          </table:table-cell>
          <table:table-cell table:formula="of:=[.D544]-[.D54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23" office:value-type="float" office:value="12489" calcext:value-type="float">
            <text:p>12489</text:p>
          </table:table-cell>
          <table:table-cell office:value-type="float" office:value="8640000" calcext:value-type="float">
            <text:p>8640000</text:p>
          </table:table-cell>
          <table:table-cell table:formula="of:=[.B544]/[.C544]" office:value-type="float" office:value="0.00144548611111111" calcext:value-type="float">
            <text:p>0,00144548611111111000</text:p>
          </table:table-cell>
          <table:table-cell table:formula="of:=[.D545]-[.D54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23" office:value-type="float" office:value="12512" calcext:value-type="float">
            <text:p>12512</text:p>
          </table:table-cell>
          <table:table-cell office:value-type="float" office:value="8640000" calcext:value-type="float">
            <text:p>8640000</text:p>
          </table:table-cell>
          <table:table-cell table:formula="of:=[.B545]/[.C545]" office:value-type="float" office:value="0.00144814814814815" calcext:value-type="float">
            <text:p>0,00144814814814815000</text:p>
          </table:table-cell>
          <table:table-cell table:formula="of:=[.D546]-[.D54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23" office:value-type="float" office:value="12535" calcext:value-type="float">
            <text:p>12535</text:p>
          </table:table-cell>
          <table:table-cell office:value-type="float" office:value="8640000" calcext:value-type="float">
            <text:p>8640000</text:p>
          </table:table-cell>
          <table:table-cell table:formula="of:=[.B546]/[.C546]" office:value-type="float" office:value="0.00145081018518519" calcext:value-type="float">
            <text:p>0,00145081018518519000</text:p>
          </table:table-cell>
          <table:table-cell table:formula="of:=[.D547]-[.D5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23" office:value-type="float" office:value="12558" calcext:value-type="float">
            <text:p>12558</text:p>
          </table:table-cell>
          <table:table-cell office:value-type="float" office:value="8640000" calcext:value-type="float">
            <text:p>8640000</text:p>
          </table:table-cell>
          <table:table-cell table:formula="of:=[.B547]/[.C547]" office:value-type="float" office:value="0.00145347222222222" calcext:value-type="float">
            <text:p>0,00145347222222222000</text:p>
          </table:table-cell>
          <table:table-cell table:formula="of:=[.D548]-[.D54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23" office:value-type="float" office:value="12581" calcext:value-type="float">
            <text:p>12581</text:p>
          </table:table-cell>
          <table:table-cell office:value-type="float" office:value="8640000" calcext:value-type="float">
            <text:p>8640000</text:p>
          </table:table-cell>
          <table:table-cell table:formula="of:=[.B548]/[.C548]" office:value-type="float" office:value="0.00145613425925926" calcext:value-type="float">
            <text:p>0,00145613425925926000</text:p>
          </table:table-cell>
          <table:table-cell table:formula="of:=[.D549]-[.D54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23" office:value-type="float" office:value="12604" calcext:value-type="float">
            <text:p>12604</text:p>
          </table:table-cell>
          <table:table-cell office:value-type="float" office:value="8640000" calcext:value-type="float">
            <text:p>8640000</text:p>
          </table:table-cell>
          <table:table-cell table:formula="of:=[.B549]/[.C549]" office:value-type="float" office:value="0.0014587962962963" calcext:value-type="float">
            <text:p>0,00145879629629630000</text:p>
          </table:table-cell>
          <table:table-cell table:formula="of:=[.D550]-[.D54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23" office:value-type="float" office:value="12627" calcext:value-type="float">
            <text:p>12627</text:p>
          </table:table-cell>
          <table:table-cell office:value-type="float" office:value="8640000" calcext:value-type="float">
            <text:p>8640000</text:p>
          </table:table-cell>
          <table:table-cell table:formula="of:=[.B550]/[.C550]" office:value-type="float" office:value="0.00146145833333333" calcext:value-type="float">
            <text:p>0,00146145833333333000</text:p>
          </table:table-cell>
          <table:table-cell table:formula="of:=[.D551]-[.D55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23" office:value-type="float" office:value="12650" calcext:value-type="float">
            <text:p>12650</text:p>
          </table:table-cell>
          <table:table-cell office:value-type="float" office:value="8640000" calcext:value-type="float">
            <text:p>8640000</text:p>
          </table:table-cell>
          <table:table-cell table:formula="of:=[.B551]/[.C551]" office:value-type="float" office:value="0.00146412037037037" calcext:value-type="float">
            <text:p>0,00146412037037037000</text:p>
          </table:table-cell>
          <table:table-cell table:formula="of:=[.D552]-[.D55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23" office:value-type="float" office:value="12673" calcext:value-type="float">
            <text:p>12673</text:p>
          </table:table-cell>
          <table:table-cell office:value-type="float" office:value="8640000" calcext:value-type="float">
            <text:p>8640000</text:p>
          </table:table-cell>
          <table:table-cell table:formula="of:=[.B552]/[.C552]" office:value-type="float" office:value="0.00146678240740741" calcext:value-type="float">
            <text:p>0,00146678240740741000</text:p>
          </table:table-cell>
          <table:table-cell table:formula="of:=[.D553]-[.D55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23" office:value-type="float" office:value="12696" calcext:value-type="float">
            <text:p>12696</text:p>
          </table:table-cell>
          <table:table-cell office:value-type="float" office:value="8640000" calcext:value-type="float">
            <text:p>8640000</text:p>
          </table:table-cell>
          <table:table-cell table:formula="of:=[.B553]/[.C553]" office:value-type="float" office:value="0.00146944444444444" calcext:value-type="float">
            <text:p>0,00146944444444444000</text:p>
          </table:table-cell>
          <table:table-cell table:formula="of:=[.D554]-[.D55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23" office:value-type="float" office:value="12719" calcext:value-type="float">
            <text:p>12719</text:p>
          </table:table-cell>
          <table:table-cell office:value-type="float" office:value="8640000" calcext:value-type="float">
            <text:p>8640000</text:p>
          </table:table-cell>
          <table:table-cell table:formula="of:=[.B554]/[.C554]" office:value-type="float" office:value="0.00147210648148148" calcext:value-type="float">
            <text:p>0,00147210648148148000</text:p>
          </table:table-cell>
          <table:table-cell table:formula="of:=[.D555]-[.D55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23" office:value-type="float" office:value="12742" calcext:value-type="float">
            <text:p>12742</text:p>
          </table:table-cell>
          <table:table-cell office:value-type="float" office:value="8640000" calcext:value-type="float">
            <text:p>8640000</text:p>
          </table:table-cell>
          <table:table-cell table:formula="of:=[.B555]/[.C555]" office:value-type="float" office:value="0.00147476851851852" calcext:value-type="float">
            <text:p>0,00147476851851852000</text:p>
          </table:table-cell>
          <table:table-cell table:formula="of:=[.D556]-[.D55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23" office:value-type="float" office:value="12765" calcext:value-type="float">
            <text:p>12765</text:p>
          </table:table-cell>
          <table:table-cell office:value-type="float" office:value="8640000" calcext:value-type="float">
            <text:p>8640000</text:p>
          </table:table-cell>
          <table:table-cell table:formula="of:=[.B556]/[.C556]" office:value-type="float" office:value="0.00147743055555556" calcext:value-type="float">
            <text:p>0,00147743055555556000</text:p>
          </table:table-cell>
          <table:table-cell table:formula="of:=[.D557]-[.D55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23" office:value-type="float" office:value="12788" calcext:value-type="float">
            <text:p>12788</text:p>
          </table:table-cell>
          <table:table-cell office:value-type="float" office:value="8640000" calcext:value-type="float">
            <text:p>8640000</text:p>
          </table:table-cell>
          <table:table-cell table:formula="of:=[.B557]/[.C557]" office:value-type="float" office:value="0.00148009259259259" calcext:value-type="float">
            <text:p>0,00148009259259259000</text:p>
          </table:table-cell>
          <table:table-cell table:formula="of:=[.D558]-[.D55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23" office:value-type="float" office:value="12811" calcext:value-type="float">
            <text:p>12811</text:p>
          </table:table-cell>
          <table:table-cell office:value-type="float" office:value="8640000" calcext:value-type="float">
            <text:p>8640000</text:p>
          </table:table-cell>
          <table:table-cell table:formula="of:=[.B558]/[.C558]" office:value-type="float" office:value="0.00148275462962963" calcext:value-type="float">
            <text:p>0,00148275462962963000</text:p>
          </table:table-cell>
          <table:table-cell table:formula="of:=[.D559]-[.D55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23" office:value-type="float" office:value="12834" calcext:value-type="float">
            <text:p>12834</text:p>
          </table:table-cell>
          <table:table-cell office:value-type="float" office:value="8640000" calcext:value-type="float">
            <text:p>8640000</text:p>
          </table:table-cell>
          <table:table-cell table:formula="of:=[.B559]/[.C559]" office:value-type="float" office:value="0.00148541666666667" calcext:value-type="float">
            <text:p>0,00148541666666667000</text:p>
          </table:table-cell>
          <table:table-cell table:formula="of:=[.D560]-[.D55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23" office:value-type="float" office:value="12857" calcext:value-type="float">
            <text:p>12857</text:p>
          </table:table-cell>
          <table:table-cell office:value-type="float" office:value="8640000" calcext:value-type="float">
            <text:p>8640000</text:p>
          </table:table-cell>
          <table:table-cell table:formula="of:=[.B560]/[.C560]" office:value-type="float" office:value="0.0014880787037037" calcext:value-type="float">
            <text:p>0,00148807870370370000</text:p>
          </table:table-cell>
          <table:table-cell table:formula="of:=[.D561]-[.D5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23" office:value-type="float" office:value="12880" calcext:value-type="float">
            <text:p>12880</text:p>
          </table:table-cell>
          <table:table-cell office:value-type="float" office:value="8640000" calcext:value-type="float">
            <text:p>8640000</text:p>
          </table:table-cell>
          <table:table-cell table:formula="of:=[.B561]/[.C561]" office:value-type="float" office:value="0.00149074074074074" calcext:value-type="float">
            <text:p>0,00149074074074074000</text:p>
          </table:table-cell>
          <table:table-cell table:formula="of:=[.D562]-[.D56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23" office:value-type="float" office:value="12903" calcext:value-type="float">
            <text:p>12903</text:p>
          </table:table-cell>
          <table:table-cell office:value-type="float" office:value="8640000" calcext:value-type="float">
            <text:p>8640000</text:p>
          </table:table-cell>
          <table:table-cell table:formula="of:=[.B562]/[.C562]" office:value-type="float" office:value="0.00149340277777778" calcext:value-type="float">
            <text:p>0,00149340277777778000</text:p>
          </table:table-cell>
          <table:table-cell table:formula="of:=[.D563]-[.D56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23" office:value-type="float" office:value="12926" calcext:value-type="float">
            <text:p>12926</text:p>
          </table:table-cell>
          <table:table-cell office:value-type="float" office:value="8640000" calcext:value-type="float">
            <text:p>8640000</text:p>
          </table:table-cell>
          <table:table-cell table:formula="of:=[.B563]/[.C563]" office:value-type="float" office:value="0.00149606481481481" calcext:value-type="float">
            <text:p>0,00149606481481481000</text:p>
          </table:table-cell>
          <table:table-cell table:formula="of:=[.D564]-[.D56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23" office:value-type="float" office:value="12949" calcext:value-type="float">
            <text:p>12949</text:p>
          </table:table-cell>
          <table:table-cell office:value-type="float" office:value="8640000" calcext:value-type="float">
            <text:p>8640000</text:p>
          </table:table-cell>
          <table:table-cell table:formula="of:=[.B564]/[.C564]" office:value-type="float" office:value="0.00149872685185185" calcext:value-type="float">
            <text:p>0,00149872685185185000</text:p>
          </table:table-cell>
          <table:table-cell table:formula="of:=[.D565]-[.D56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23" office:value-type="float" office:value="12972" calcext:value-type="float">
            <text:p>12972</text:p>
          </table:table-cell>
          <table:table-cell office:value-type="float" office:value="8640000" calcext:value-type="float">
            <text:p>8640000</text:p>
          </table:table-cell>
          <table:table-cell table:formula="of:=[.B565]/[.C565]" office:value-type="float" office:value="0.00150138888888889" calcext:value-type="float">
            <text:p>0,00150138888888889000</text:p>
          </table:table-cell>
          <table:table-cell table:formula="of:=[.D566]-[.D56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23" office:value-type="float" office:value="12995" calcext:value-type="float">
            <text:p>12995</text:p>
          </table:table-cell>
          <table:table-cell office:value-type="float" office:value="8640000" calcext:value-type="float">
            <text:p>8640000</text:p>
          </table:table-cell>
          <table:table-cell table:formula="of:=[.B566]/[.C566]" office:value-type="float" office:value="0.00150405092592593" calcext:value-type="float">
            <text:p>0,00150405092592593000</text:p>
          </table:table-cell>
          <table:table-cell table:formula="of:=[.D567]-[.D56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23" office:value-type="float" office:value="13018" calcext:value-type="float">
            <text:p>13018</text:p>
          </table:table-cell>
          <table:table-cell office:value-type="float" office:value="8640000" calcext:value-type="float">
            <text:p>8640000</text:p>
          </table:table-cell>
          <table:table-cell table:formula="of:=[.B567]/[.C567]" office:value-type="float" office:value="0.00150671296296296" calcext:value-type="float">
            <text:p>0,00150671296296296000</text:p>
          </table:table-cell>
          <table:table-cell table:formula="of:=[.D568]-[.D56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23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568]/[.C568]" office:value-type="float" office:value="0.001509375" calcext:value-type="float">
            <text:p>0,00150937500000000000</text:p>
          </table:table-cell>
          <table:table-cell table:formula="of:=[.D569]-[.D56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23" office:value-type="float" office:value="13064" calcext:value-type="float">
            <text:p>13064</text:p>
          </table:table-cell>
          <table:table-cell office:value-type="float" office:value="8640000" calcext:value-type="float">
            <text:p>8640000</text:p>
          </table:table-cell>
          <table:table-cell table:formula="of:=[.B569]/[.C569]" office:value-type="float" office:value="0.00151203703703704" calcext:value-type="float">
            <text:p>0,00151203703703704000</text:p>
          </table:table-cell>
          <table:table-cell table:formula="of:=[.D570]-[.D56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23" office:value-type="float" office:value="13087" calcext:value-type="float">
            <text:p>13087</text:p>
          </table:table-cell>
          <table:table-cell office:value-type="float" office:value="8640000" calcext:value-type="float">
            <text:p>8640000</text:p>
          </table:table-cell>
          <table:table-cell table:formula="of:=[.B570]/[.C570]" office:value-type="float" office:value="0.00151469907407407" calcext:value-type="float">
            <text:p>0,00151469907407407000</text:p>
          </table:table-cell>
          <table:table-cell table:formula="of:=[.D571]-[.D57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23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571]/[.C571]" office:value-type="float" office:value="0.00151736111111111" calcext:value-type="float">
            <text:p>0,00151736111111111000</text:p>
          </table:table-cell>
          <table:table-cell table:formula="of:=[.D572]-[.D57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23" office:value-type="float" office:value="13133" calcext:value-type="float">
            <text:p>13133</text:p>
          </table:table-cell>
          <table:table-cell office:value-type="float" office:value="8640000" calcext:value-type="float">
            <text:p>8640000</text:p>
          </table:table-cell>
          <table:table-cell table:formula="of:=[.B572]/[.C572]" office:value-type="float" office:value="0.00152002314814815" calcext:value-type="float">
            <text:p>0,00152002314814815000</text:p>
          </table:table-cell>
          <table:table-cell table:formula="of:=[.D573]-[.D57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23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573]/[.C573]" office:value-type="float" office:value="0.00152268518518519" calcext:value-type="float">
            <text:p>0,00152268518518518000</text:p>
          </table:table-cell>
          <table:table-cell table:formula="of:=[.D574]-[.D57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23" office:value-type="float" office:value="13179" calcext:value-type="float">
            <text:p>13179</text:p>
          </table:table-cell>
          <table:table-cell office:value-type="float" office:value="8640000" calcext:value-type="float">
            <text:p>8640000</text:p>
          </table:table-cell>
          <table:table-cell table:formula="of:=[.B574]/[.C574]" office:value-type="float" office:value="0.00152534722222222" calcext:value-type="float">
            <text:p>0,00152534722222222000</text:p>
          </table:table-cell>
          <table:table-cell table:formula="of:=[.D575]-[.D5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23" office:value-type="float" office:value="13202" calcext:value-type="float">
            <text:p>13202</text:p>
          </table:table-cell>
          <table:table-cell office:value-type="float" office:value="8640000" calcext:value-type="float">
            <text:p>8640000</text:p>
          </table:table-cell>
          <table:table-cell table:formula="of:=[.B575]/[.C575]" office:value-type="float" office:value="0.00152800925925926" calcext:value-type="float">
            <text:p>0,00152800925925926000</text:p>
          </table:table-cell>
          <table:table-cell table:formula="of:=[.D576]-[.D57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23" office:value-type="float" office:value="13225" calcext:value-type="float">
            <text:p>13225</text:p>
          </table:table-cell>
          <table:table-cell office:value-type="float" office:value="8640000" calcext:value-type="float">
            <text:p>8640000</text:p>
          </table:table-cell>
          <table:table-cell table:formula="of:=[.B576]/[.C576]" office:value-type="float" office:value="0.0015306712962963" calcext:value-type="float">
            <text:p>0,00153067129629630000</text:p>
          </table:table-cell>
          <table:table-cell table:formula="of:=[.D577]-[.D57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23" office:value-type="float" office:value="13248" calcext:value-type="float">
            <text:p>13248</text:p>
          </table:table-cell>
          <table:table-cell office:value-type="float" office:value="8640000" calcext:value-type="float">
            <text:p>8640000</text:p>
          </table:table-cell>
          <table:table-cell table:formula="of:=[.B577]/[.C577]" office:value-type="float" office:value="0.00153333333333333" calcext:value-type="float">
            <text:p>0,00153333333333333000</text:p>
          </table:table-cell>
          <table:table-cell table:formula="of:=[.D578]-[.D57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23" office:value-type="float" office:value="13271" calcext:value-type="float">
            <text:p>13271</text:p>
          </table:table-cell>
          <table:table-cell office:value-type="float" office:value="8640000" calcext:value-type="float">
            <text:p>8640000</text:p>
          </table:table-cell>
          <table:table-cell table:formula="of:=[.B578]/[.C578]" office:value-type="float" office:value="0.00153599537037037" calcext:value-type="float">
            <text:p>0,00153599537037037000</text:p>
          </table:table-cell>
          <table:table-cell table:formula="of:=[.D579]-[.D57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23" office:value-type="float" office:value="13294" calcext:value-type="float">
            <text:p>13294</text:p>
          </table:table-cell>
          <table:table-cell office:value-type="float" office:value="8640000" calcext:value-type="float">
            <text:p>8640000</text:p>
          </table:table-cell>
          <table:table-cell table:formula="of:=[.B579]/[.C579]" office:value-type="float" office:value="0.00153865740740741" calcext:value-type="float">
            <text:p>0,00153865740740741000</text:p>
          </table:table-cell>
          <table:table-cell table:formula="of:=[.D580]-[.D5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23" office:value-type="float" office:value="13317" calcext:value-type="float">
            <text:p>13317</text:p>
          </table:table-cell>
          <table:table-cell office:value-type="float" office:value="8640000" calcext:value-type="float">
            <text:p>8640000</text:p>
          </table:table-cell>
          <table:table-cell table:formula="of:=[.B580]/[.C580]" office:value-type="float" office:value="0.00154131944444444" calcext:value-type="float">
            <text:p>0,00154131944444444000</text:p>
          </table:table-cell>
          <table:table-cell table:formula="of:=[.D581]-[.D58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23" office:value-type="float" office:value="13340" calcext:value-type="float">
            <text:p>13340</text:p>
          </table:table-cell>
          <table:table-cell office:value-type="float" office:value="8640000" calcext:value-type="float">
            <text:p>8640000</text:p>
          </table:table-cell>
          <table:table-cell table:formula="of:=[.B581]/[.C581]" office:value-type="float" office:value="0.00154398148148148" calcext:value-type="float">
            <text:p>0,00154398148148148000</text:p>
          </table:table-cell>
          <table:table-cell table:formula="of:=[.D582]-[.D58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23" office:value-type="float" office:value="13363" calcext:value-type="float">
            <text:p>13363</text:p>
          </table:table-cell>
          <table:table-cell office:value-type="float" office:value="8640000" calcext:value-type="float">
            <text:p>8640000</text:p>
          </table:table-cell>
          <table:table-cell table:formula="of:=[.B582]/[.C582]" office:value-type="float" office:value="0.00154664351851852" calcext:value-type="float">
            <text:p>0,00154664351851852000</text:p>
          </table:table-cell>
          <table:table-cell table:formula="of:=[.D583]-[.D58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23" office:value-type="float" office:value="13386" calcext:value-type="float">
            <text:p>13386</text:p>
          </table:table-cell>
          <table:table-cell office:value-type="float" office:value="8640000" calcext:value-type="float">
            <text:p>8640000</text:p>
          </table:table-cell>
          <table:table-cell table:formula="of:=[.B583]/[.C583]" office:value-type="float" office:value="0.00154930555555556" calcext:value-type="float">
            <text:p>0,00154930555555556000</text:p>
          </table:table-cell>
          <table:table-cell table:formula="of:=[.D584]-[.D58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23" office:value-type="float" office:value="13409" calcext:value-type="float">
            <text:p>13409</text:p>
          </table:table-cell>
          <table:table-cell office:value-type="float" office:value="8640000" calcext:value-type="float">
            <text:p>8640000</text:p>
          </table:table-cell>
          <table:table-cell table:formula="of:=[.B584]/[.C584]" office:value-type="float" office:value="0.00155196759259259" calcext:value-type="float">
            <text:p>0,00155196759259259000</text:p>
          </table:table-cell>
          <table:table-cell table:formula="of:=[.D585]-[.D58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23" office:value-type="float" office:value="13432" calcext:value-type="float">
            <text:p>13432</text:p>
          </table:table-cell>
          <table:table-cell office:value-type="float" office:value="8640000" calcext:value-type="float">
            <text:p>8640000</text:p>
          </table:table-cell>
          <table:table-cell table:formula="of:=[.B585]/[.C585]" office:value-type="float" office:value="0.00155462962962963" calcext:value-type="float">
            <text:p>0,00155462962962963000</text:p>
          </table:table-cell>
          <table:table-cell table:formula="of:=[.D586]-[.D58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23" office:value-type="float" office:value="13455" calcext:value-type="float">
            <text:p>13455</text:p>
          </table:table-cell>
          <table:table-cell office:value-type="float" office:value="8640000" calcext:value-type="float">
            <text:p>8640000</text:p>
          </table:table-cell>
          <table:table-cell table:formula="of:=[.B586]/[.C586]" office:value-type="float" office:value="0.00155729166666667" calcext:value-type="float">
            <text:p>0,00155729166666667000</text:p>
          </table:table-cell>
          <table:table-cell table:formula="of:=[.D587]-[.D5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23" office:value-type="float" office:value="13478" calcext:value-type="float">
            <text:p>13478</text:p>
          </table:table-cell>
          <table:table-cell office:value-type="float" office:value="8640000" calcext:value-type="float">
            <text:p>8640000</text:p>
          </table:table-cell>
          <table:table-cell table:formula="of:=[.B587]/[.C587]" office:value-type="float" office:value="0.0015599537037037" calcext:value-type="float">
            <text:p>0,00155995370370370000</text:p>
          </table:table-cell>
          <table:table-cell table:formula="of:=[.D588]-[.D58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23" office:value-type="float" office:value="13501" calcext:value-type="float">
            <text:p>13501</text:p>
          </table:table-cell>
          <table:table-cell office:value-type="float" office:value="8640000" calcext:value-type="float">
            <text:p>8640000</text:p>
          </table:table-cell>
          <table:table-cell table:formula="of:=[.B588]/[.C588]" office:value-type="float" office:value="0.00156261574074074" calcext:value-type="float">
            <text:p>0,00156261574074074000</text:p>
          </table:table-cell>
          <table:table-cell table:formula="of:=[.D589]-[.D58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23" office:value-type="float" office:value="13524" calcext:value-type="float">
            <text:p>13524</text:p>
          </table:table-cell>
          <table:table-cell office:value-type="float" office:value="8640000" calcext:value-type="float">
            <text:p>8640000</text:p>
          </table:table-cell>
          <table:table-cell table:formula="of:=[.B589]/[.C589]" office:value-type="float" office:value="0.00156527777777778" calcext:value-type="float">
            <text:p>0,00156527777777778000</text:p>
          </table:table-cell>
          <table:table-cell table:formula="of:=[.D590]-[.D58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23" office:value-type="float" office:value="13547" calcext:value-type="float">
            <text:p>13547</text:p>
          </table:table-cell>
          <table:table-cell office:value-type="float" office:value="8640000" calcext:value-type="float">
            <text:p>8640000</text:p>
          </table:table-cell>
          <table:table-cell table:formula="of:=[.B590]/[.C590]" office:value-type="float" office:value="0.00156793981481481" calcext:value-type="float">
            <text:p>0,00156793981481481000</text:p>
          </table:table-cell>
          <table:table-cell table:formula="of:=[.D591]-[.D59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23" office:value-type="float" office:value="13570" calcext:value-type="float">
            <text:p>13570</text:p>
          </table:table-cell>
          <table:table-cell office:value-type="float" office:value="8640000" calcext:value-type="float">
            <text:p>8640000</text:p>
          </table:table-cell>
          <table:table-cell table:formula="of:=[.B591]/[.C591]" office:value-type="float" office:value="0.00157060185185185" calcext:value-type="float">
            <text:p>0,00157060185185185000</text:p>
          </table:table-cell>
          <table:table-cell table:formula="of:=[.D592]-[.D59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23" office:value-type="float" office:value="13593" calcext:value-type="float">
            <text:p>13593</text:p>
          </table:table-cell>
          <table:table-cell office:value-type="float" office:value="8640000" calcext:value-type="float">
            <text:p>8640000</text:p>
          </table:table-cell>
          <table:table-cell table:formula="of:=[.B592]/[.C592]" office:value-type="float" office:value="0.00157326388888889" calcext:value-type="float">
            <text:p>0,00157326388888889000</text:p>
          </table:table-cell>
          <table:table-cell table:formula="of:=[.D593]-[.D59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23" office:value-type="float" office:value="13616" calcext:value-type="float">
            <text:p>13616</text:p>
          </table:table-cell>
          <table:table-cell office:value-type="float" office:value="8640000" calcext:value-type="float">
            <text:p>8640000</text:p>
          </table:table-cell>
          <table:table-cell table:formula="of:=[.B593]/[.C593]" office:value-type="float" office:value="0.00157592592592593" calcext:value-type="float">
            <text:p>0,00157592592592593000</text:p>
          </table:table-cell>
          <table:table-cell table:formula="of:=[.D594]-[.D5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23" office:value-type="float" office:value="13639" calcext:value-type="float">
            <text:p>13639</text:p>
          </table:table-cell>
          <table:table-cell office:value-type="float" office:value="8640000" calcext:value-type="float">
            <text:p>8640000</text:p>
          </table:table-cell>
          <table:table-cell table:formula="of:=[.B594]/[.C594]" office:value-type="float" office:value="0.00157858796296296" calcext:value-type="float">
            <text:p>0,00157858796296296000</text:p>
          </table:table-cell>
          <table:table-cell table:formula="of:=[.D595]-[.D59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23" office:value-type="float" office:value="13662" calcext:value-type="float">
            <text:p>13662</text:p>
          </table:table-cell>
          <table:table-cell office:value-type="float" office:value="8640000" calcext:value-type="float">
            <text:p>8640000</text:p>
          </table:table-cell>
          <table:table-cell table:formula="of:=[.B595]/[.C595]" office:value-type="float" office:value="0.00158125" calcext:value-type="float">
            <text:p>0,00158125000000000000</text:p>
          </table:table-cell>
          <table:table-cell table:formula="of:=[.D596]-[.D59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23" office:value-type="float" office:value="13685" calcext:value-type="float">
            <text:p>13685</text:p>
          </table:table-cell>
          <table:table-cell office:value-type="float" office:value="8640000" calcext:value-type="float">
            <text:p>8640000</text:p>
          </table:table-cell>
          <table:table-cell table:formula="of:=[.B596]/[.C596]" office:value-type="float" office:value="0.00158391203703704" calcext:value-type="float">
            <text:p>0,00158391203703704000</text:p>
          </table:table-cell>
          <table:table-cell table:formula="of:=[.D597]-[.D59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23" office:value-type="float" office:value="13708" calcext:value-type="float">
            <text:p>13708</text:p>
          </table:table-cell>
          <table:table-cell office:value-type="float" office:value="8640000" calcext:value-type="float">
            <text:p>8640000</text:p>
          </table:table-cell>
          <table:table-cell table:formula="of:=[.B597]/[.C597]" office:value-type="float" office:value="0.00158657407407407" calcext:value-type="float">
            <text:p>0,00158657407407407000</text:p>
          </table:table-cell>
          <table:table-cell table:formula="of:=[.D598]-[.D59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23" office:value-type="float" office:value="13731" calcext:value-type="float">
            <text:p>13731</text:p>
          </table:table-cell>
          <table:table-cell office:value-type="float" office:value="8640000" calcext:value-type="float">
            <text:p>8640000</text:p>
          </table:table-cell>
          <table:table-cell table:formula="of:=[.B598]/[.C598]" office:value-type="float" office:value="0.00158923611111111" calcext:value-type="float">
            <text:p>0,00158923611111111000</text:p>
          </table:table-cell>
          <table:table-cell table:formula="of:=[.D599]-[.D59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23" office:value-type="float" office:value="13754" calcext:value-type="float">
            <text:p>13754</text:p>
          </table:table-cell>
          <table:table-cell office:value-type="float" office:value="8640000" calcext:value-type="float">
            <text:p>8640000</text:p>
          </table:table-cell>
          <table:table-cell table:formula="of:=[.B599]/[.C599]" office:value-type="float" office:value="0.00159189814814815" calcext:value-type="float">
            <text:p>0,00159189814814815000</text:p>
          </table:table-cell>
          <table:table-cell table:formula="of:=[.D600]-[.D59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23" office:value-type="float" office:value="13777" calcext:value-type="float">
            <text:p>13777</text:p>
          </table:table-cell>
          <table:table-cell office:value-type="float" office:value="8640000" calcext:value-type="float">
            <text:p>8640000</text:p>
          </table:table-cell>
          <table:table-cell table:formula="of:=[.B600]/[.C600]" office:value-type="float" office:value="0.00159456018518519" calcext:value-type="float">
            <text:p>0,00159456018518519000</text:p>
          </table:table-cell>
          <table:table-cell table:formula="of:=[.D601]-[.D6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23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601]/[.C601]" office:value-type="float" office:value="0.00159722222222222" calcext:value-type="float">
            <text:p>0,00159722222222222000</text:p>
          </table:table-cell>
          <table:table-cell table:formula="of:=[.D602]-[.D60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23" office:value-type="float" office:value="13823" calcext:value-type="float">
            <text:p>13823</text:p>
          </table:table-cell>
          <table:table-cell office:value-type="float" office:value="8640000" calcext:value-type="float">
            <text:p>8640000</text:p>
          </table:table-cell>
          <table:table-cell table:formula="of:=[.B602]/[.C602]" office:value-type="float" office:value="0.00159988425925926" calcext:value-type="float">
            <text:p>0,00159988425925926000</text:p>
          </table:table-cell>
          <table:table-cell table:formula="of:=[.D603]-[.D60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23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603]/[.C603]" office:value-type="float" office:value="0.0016025462962963" calcext:value-type="float">
            <text:p>0,00160254629629630000</text:p>
          </table:table-cell>
          <table:table-cell table:formula="of:=[.D604]-[.D60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23" office:value-type="float" office:value="13869" calcext:value-type="float">
            <text:p>13869</text:p>
          </table:table-cell>
          <table:table-cell office:value-type="float" office:value="8640000" calcext:value-type="float">
            <text:p>8640000</text:p>
          </table:table-cell>
          <table:table-cell table:formula="of:=[.B604]/[.C604]" office:value-type="float" office:value="0.00160520833333333" calcext:value-type="float">
            <text:p>0,00160520833333333000</text:p>
          </table:table-cell>
          <table:table-cell table:formula="of:=[.D605]-[.D60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23" office:value-type="float" office:value="13892" calcext:value-type="float">
            <text:p>13892</text:p>
          </table:table-cell>
          <table:table-cell office:value-type="float" office:value="8640000" calcext:value-type="float">
            <text:p>8640000</text:p>
          </table:table-cell>
          <table:table-cell table:formula="of:=[.B605]/[.C605]" office:value-type="float" office:value="0.00160787037037037" calcext:value-type="float">
            <text:p>0,00160787037037037000</text:p>
          </table:table-cell>
          <table:table-cell table:formula="of:=[.D606]-[.D60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23" office:value-type="float" office:value="13915" calcext:value-type="float">
            <text:p>13915</text:p>
          </table:table-cell>
          <table:table-cell office:value-type="float" office:value="8640000" calcext:value-type="float">
            <text:p>8640000</text:p>
          </table:table-cell>
          <table:table-cell table:formula="of:=[.B606]/[.C606]" office:value-type="float" office:value="0.00161053240740741" calcext:value-type="float">
            <text:p>0,00161053240740741000</text:p>
          </table:table-cell>
          <table:table-cell table:formula="of:=[.D607]-[.D60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23" office:value-type="float" office:value="13938" calcext:value-type="float">
            <text:p>13938</text:p>
          </table:table-cell>
          <table:table-cell office:value-type="float" office:value="8640000" calcext:value-type="float">
            <text:p>8640000</text:p>
          </table:table-cell>
          <table:table-cell table:formula="of:=[.B607]/[.C607]" office:value-type="float" office:value="0.00161319444444444" calcext:value-type="float">
            <text:p>0,00161319444444444000</text:p>
          </table:table-cell>
          <table:table-cell table:formula="of:=[.D608]-[.D6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23" office:value-type="float" office:value="13961" calcext:value-type="float">
            <text:p>13961</text:p>
          </table:table-cell>
          <table:table-cell office:value-type="float" office:value="8640000" calcext:value-type="float">
            <text:p>8640000</text:p>
          </table:table-cell>
          <table:table-cell table:formula="of:=[.B608]/[.C608]" office:value-type="float" office:value="0.00161585648148148" calcext:value-type="float">
            <text:p>0,00161585648148148000</text:p>
          </table:table-cell>
          <table:table-cell table:formula="of:=[.D609]-[.D60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23" office:value-type="float" office:value="13984" calcext:value-type="float">
            <text:p>13984</text:p>
          </table:table-cell>
          <table:table-cell office:value-type="float" office:value="8640000" calcext:value-type="float">
            <text:p>8640000</text:p>
          </table:table-cell>
          <table:table-cell table:formula="of:=[.B609]/[.C609]" office:value-type="float" office:value="0.00161851851851852" calcext:value-type="float">
            <text:p>0,00161851851851852000</text:p>
          </table:table-cell>
          <table:table-cell table:formula="of:=[.D610]-[.D60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23" office:value-type="float" office:value="14007" calcext:value-type="float">
            <text:p>14007</text:p>
          </table:table-cell>
          <table:table-cell office:value-type="float" office:value="8640000" calcext:value-type="float">
            <text:p>8640000</text:p>
          </table:table-cell>
          <table:table-cell table:formula="of:=[.B610]/[.C610]" office:value-type="float" office:value="0.00162118055555556" calcext:value-type="float">
            <text:p>0,00162118055555556000</text:p>
          </table:table-cell>
          <table:table-cell table:formula="of:=[.D611]-[.D61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23" office:value-type="float" office:value="14030" calcext:value-type="float">
            <text:p>14030</text:p>
          </table:table-cell>
          <table:table-cell office:value-type="float" office:value="8640000" calcext:value-type="float">
            <text:p>8640000</text:p>
          </table:table-cell>
          <table:table-cell table:formula="of:=[.B611]/[.C611]" office:value-type="float" office:value="0.00162384259259259" calcext:value-type="float">
            <text:p>0,00162384259259259000</text:p>
          </table:table-cell>
          <table:table-cell table:formula="of:=[.D612]-[.D61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23" office:value-type="float" office:value="14053" calcext:value-type="float">
            <text:p>14053</text:p>
          </table:table-cell>
          <table:table-cell office:value-type="float" office:value="8640000" calcext:value-type="float">
            <text:p>8640000</text:p>
          </table:table-cell>
          <table:table-cell table:formula="of:=[.B612]/[.C612]" office:value-type="float" office:value="0.00162650462962963" calcext:value-type="float">
            <text:p>0,00162650462962963000</text:p>
          </table:table-cell>
          <table:table-cell table:formula="of:=[.D613]-[.D61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23" office:value-type="float" office:value="14076" calcext:value-type="float">
            <text:p>14076</text:p>
          </table:table-cell>
          <table:table-cell office:value-type="float" office:value="8640000" calcext:value-type="float">
            <text:p>8640000</text:p>
          </table:table-cell>
          <table:table-cell table:formula="of:=[.B613]/[.C613]" office:value-type="float" office:value="0.00162916666666667" calcext:value-type="float">
            <text:p>0,00162916666666667000</text:p>
          </table:table-cell>
          <table:table-cell table:formula="of:=[.D614]-[.D6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23" office:value-type="float" office:value="14099" calcext:value-type="float">
            <text:p>14099</text:p>
          </table:table-cell>
          <table:table-cell office:value-type="float" office:value="8640000" calcext:value-type="float">
            <text:p>8640000</text:p>
          </table:table-cell>
          <table:table-cell table:formula="of:=[.B614]/[.C614]" office:value-type="float" office:value="0.0016318287037037" calcext:value-type="float">
            <text:p>0,00163182870370370000</text:p>
          </table:table-cell>
          <table:table-cell table:formula="of:=[.D615]-[.D61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23" office:value-type="float" office:value="14122" calcext:value-type="float">
            <text:p>14122</text:p>
          </table:table-cell>
          <table:table-cell office:value-type="float" office:value="8640000" calcext:value-type="float">
            <text:p>8640000</text:p>
          </table:table-cell>
          <table:table-cell table:formula="of:=[.B615]/[.C615]" office:value-type="float" office:value="0.00163449074074074" calcext:value-type="float">
            <text:p>0,00163449074074074000</text:p>
          </table:table-cell>
          <table:table-cell table:formula="of:=[.D616]-[.D61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23" office:value-type="float" office:value="14145" calcext:value-type="float">
            <text:p>14145</text:p>
          </table:table-cell>
          <table:table-cell office:value-type="float" office:value="8640000" calcext:value-type="float">
            <text:p>8640000</text:p>
          </table:table-cell>
          <table:table-cell table:formula="of:=[.B616]/[.C616]" office:value-type="float" office:value="0.00163715277777778" calcext:value-type="float">
            <text:p>0,00163715277777778000</text:p>
          </table:table-cell>
          <table:table-cell table:formula="of:=[.D617]-[.D61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23" office:value-type="float" office:value="14168" calcext:value-type="float">
            <text:p>14168</text:p>
          </table:table-cell>
          <table:table-cell office:value-type="float" office:value="8640000" calcext:value-type="float">
            <text:p>8640000</text:p>
          </table:table-cell>
          <table:table-cell table:formula="of:=[.B617]/[.C617]" office:value-type="float" office:value="0.00163981481481481" calcext:value-type="float">
            <text:p>0,00163981481481481000</text:p>
          </table:table-cell>
          <table:table-cell table:formula="of:=[.D618]-[.D61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23" office:value-type="float" office:value="14191" calcext:value-type="float">
            <text:p>14191</text:p>
          </table:table-cell>
          <table:table-cell office:value-type="float" office:value="8640000" calcext:value-type="float">
            <text:p>8640000</text:p>
          </table:table-cell>
          <table:table-cell table:formula="of:=[.B618]/[.C618]" office:value-type="float" office:value="0.00164247685185185" calcext:value-type="float">
            <text:p>0,00164247685185185000</text:p>
          </table:table-cell>
          <table:table-cell table:formula="of:=[.D619]-[.D61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23" office:value-type="float" office:value="14214" calcext:value-type="float">
            <text:p>14214</text:p>
          </table:table-cell>
          <table:table-cell office:value-type="float" office:value="8640000" calcext:value-type="float">
            <text:p>8640000</text:p>
          </table:table-cell>
          <table:table-cell table:formula="of:=[.B619]/[.C619]" office:value-type="float" office:value="0.00164513888888889" calcext:value-type="float">
            <text:p>0,00164513888888889000</text:p>
          </table:table-cell>
          <table:table-cell table:formula="of:=[.D620]-[.D61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23" office:value-type="float" office:value="14237" calcext:value-type="float">
            <text:p>14237</text:p>
          </table:table-cell>
          <table:table-cell office:value-type="float" office:value="8640000" calcext:value-type="float">
            <text:p>8640000</text:p>
          </table:table-cell>
          <table:table-cell table:formula="of:=[.B620]/[.C620]" office:value-type="float" office:value="0.00164780092592593" calcext:value-type="float">
            <text:p>0,00164780092592593000</text:p>
          </table:table-cell>
          <table:table-cell table:formula="of:=[.D621]-[.D62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23" office:value-type="float" office:value="14260" calcext:value-type="float">
            <text:p>14260</text:p>
          </table:table-cell>
          <table:table-cell office:value-type="float" office:value="8640000" calcext:value-type="float">
            <text:p>8640000</text:p>
          </table:table-cell>
          <table:table-cell table:formula="of:=[.B621]/[.C621]" office:value-type="float" office:value="0.00165046296296296" calcext:value-type="float">
            <text:p>0,00165046296296296000</text:p>
          </table:table-cell>
          <table:table-cell table:formula="of:=[.D622]-[.D6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23" office:value-type="float" office:value="14283" calcext:value-type="float">
            <text:p>14283</text:p>
          </table:table-cell>
          <table:table-cell office:value-type="float" office:value="8640000" calcext:value-type="float">
            <text:p>8640000</text:p>
          </table:table-cell>
          <table:table-cell table:formula="of:=[.B622]/[.C622]" office:value-type="float" office:value="0.001653125" calcext:value-type="float">
            <text:p>0,00165312500000000000</text:p>
          </table:table-cell>
          <table:table-cell table:formula="of:=[.D623]-[.D62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23" office:value-type="float" office:value="14306" calcext:value-type="float">
            <text:p>14306</text:p>
          </table:table-cell>
          <table:table-cell office:value-type="float" office:value="8640000" calcext:value-type="float">
            <text:p>8640000</text:p>
          </table:table-cell>
          <table:table-cell table:formula="of:=[.B623]/[.C623]" office:value-type="float" office:value="0.00165578703703704" calcext:value-type="float">
            <text:p>0,00165578703703704000</text:p>
          </table:table-cell>
          <table:table-cell table:formula="of:=[.D624]-[.D62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23" office:value-type="float" office:value="14329" calcext:value-type="float">
            <text:p>14329</text:p>
          </table:table-cell>
          <table:table-cell office:value-type="float" office:value="8640000" calcext:value-type="float">
            <text:p>8640000</text:p>
          </table:table-cell>
          <table:table-cell table:formula="of:=[.B624]/[.C624]" office:value-type="float" office:value="0.00165844907407407" calcext:value-type="float">
            <text:p>0,00165844907407407000</text:p>
          </table:table-cell>
          <table:table-cell table:formula="of:=[.D625]-[.D62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23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625]/[.C625]" office:value-type="float" office:value="0.00166111111111111" calcext:value-type="float">
            <text:p>0,00166111111111111000</text:p>
          </table:table-cell>
          <table:table-cell table:formula="of:=[.D626]-[.D62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23" office:value-type="float" office:value="14375" calcext:value-type="float">
            <text:p>14375</text:p>
          </table:table-cell>
          <table:table-cell office:value-type="float" office:value="8640000" calcext:value-type="float">
            <text:p>8640000</text:p>
          </table:table-cell>
          <table:table-cell table:formula="of:=[.B626]/[.C626]" office:value-type="float" office:value="0.00166377314814815" calcext:value-type="float">
            <text:p>0,00166377314814815000</text:p>
          </table:table-cell>
          <table:table-cell table:formula="of:=[.D627]-[.D6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23" office:value-type="float" office:value="14398" calcext:value-type="float">
            <text:p>14398</text:p>
          </table:table-cell>
          <table:table-cell office:value-type="float" office:value="8640000" calcext:value-type="float">
            <text:p>8640000</text:p>
          </table:table-cell>
          <table:table-cell table:formula="of:=[.B627]/[.C627]" office:value-type="float" office:value="0.00166643518518519" calcext:value-type="float">
            <text:p>0,00166643518518519000</text:p>
          </table:table-cell>
          <table:table-cell table:formula="of:=[.D628]-[.D62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23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628]/[.C628]" office:value-type="float" office:value="0.00166909722222222" calcext:value-type="float">
            <text:p>0,00166909722222222000</text:p>
          </table:table-cell>
          <table:table-cell table:formula="of:=[.D629]-[.D62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23" office:value-type="float" office:value="14444" calcext:value-type="float">
            <text:p>14444</text:p>
          </table:table-cell>
          <table:table-cell office:value-type="float" office:value="8640000" calcext:value-type="float">
            <text:p>8640000</text:p>
          </table:table-cell>
          <table:table-cell table:formula="of:=[.B629]/[.C629]" office:value-type="float" office:value="0.00167175925925926" calcext:value-type="float">
            <text:p>0,00167175925925926000</text:p>
          </table:table-cell>
          <table:table-cell table:formula="of:=[.D630]-[.D62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23" office:value-type="float" office:value="14467" calcext:value-type="float">
            <text:p>14467</text:p>
          </table:table-cell>
          <table:table-cell office:value-type="float" office:value="8640000" calcext:value-type="float">
            <text:p>8640000</text:p>
          </table:table-cell>
          <table:table-cell table:formula="of:=[.B630]/[.C630]" office:value-type="float" office:value="0.0016744212962963" calcext:value-type="float">
            <text:p>0,00167442129629630000</text:p>
          </table:table-cell>
          <table:table-cell table:formula="of:=[.D631]-[.D63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23" office:value-type="float" office:value="14490" calcext:value-type="float">
            <text:p>14490</text:p>
          </table:table-cell>
          <table:table-cell office:value-type="float" office:value="8640000" calcext:value-type="float">
            <text:p>8640000</text:p>
          </table:table-cell>
          <table:table-cell table:formula="of:=[.B631]/[.C631]" office:value-type="float" office:value="0.00167708333333333" calcext:value-type="float">
            <text:p>0,00167708333333333000</text:p>
          </table:table-cell>
          <table:table-cell table:formula="of:=[.D632]-[.D63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23" office:value-type="float" office:value="14513" calcext:value-type="float">
            <text:p>14513</text:p>
          </table:table-cell>
          <table:table-cell office:value-type="float" office:value="8640000" calcext:value-type="float">
            <text:p>8640000</text:p>
          </table:table-cell>
          <table:table-cell table:formula="of:=[.B632]/[.C632]" office:value-type="float" office:value="0.00167974537037037" calcext:value-type="float">
            <text:p>0,00167974537037037000</text:p>
          </table:table-cell>
          <table:table-cell table:formula="of:=[.D633]-[.D63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23" office:value-type="float" office:value="14536" calcext:value-type="float">
            <text:p>14536</text:p>
          </table:table-cell>
          <table:table-cell office:value-type="float" office:value="8640000" calcext:value-type="float">
            <text:p>8640000</text:p>
          </table:table-cell>
          <table:table-cell table:formula="of:=[.B633]/[.C633]" office:value-type="float" office:value="0.00168240740740741" calcext:value-type="float">
            <text:p>0,00168240740740741000</text:p>
          </table:table-cell>
          <table:table-cell table:formula="of:=[.D634]-[.D6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23" office:value-type="float" office:value="14559" calcext:value-type="float">
            <text:p>14559</text:p>
          </table:table-cell>
          <table:table-cell office:value-type="float" office:value="8640000" calcext:value-type="float">
            <text:p>8640000</text:p>
          </table:table-cell>
          <table:table-cell table:formula="of:=[.B634]/[.C634]" office:value-type="float" office:value="0.00168506944444444" calcext:value-type="float">
            <text:p>0,00168506944444444000</text:p>
          </table:table-cell>
          <table:table-cell table:formula="of:=[.D635]-[.D63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23" office:value-type="float" office:value="14582" calcext:value-type="float">
            <text:p>14582</text:p>
          </table:table-cell>
          <table:table-cell office:value-type="float" office:value="8640000" calcext:value-type="float">
            <text:p>8640000</text:p>
          </table:table-cell>
          <table:table-cell table:formula="of:=[.B635]/[.C635]" office:value-type="float" office:value="0.00168773148148148" calcext:value-type="float">
            <text:p>0,00168773148148148000</text:p>
          </table:table-cell>
          <table:table-cell table:formula="of:=[.D636]-[.D6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23" office:value-type="float" office:value="14605" calcext:value-type="float">
            <text:p>14605</text:p>
          </table:table-cell>
          <table:table-cell office:value-type="float" office:value="8640000" calcext:value-type="float">
            <text:p>8640000</text:p>
          </table:table-cell>
          <table:table-cell table:formula="of:=[.B636]/[.C636]" office:value-type="float" office:value="0.00169039351851852" calcext:value-type="float">
            <text:p>0,00169039351851852000</text:p>
          </table:table-cell>
          <table:table-cell table:formula="of:=[.D637]-[.D63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23" office:value-type="float" office:value="14628" calcext:value-type="float">
            <text:p>14628</text:p>
          </table:table-cell>
          <table:table-cell office:value-type="float" office:value="8640000" calcext:value-type="float">
            <text:p>8640000</text:p>
          </table:table-cell>
          <table:table-cell table:formula="of:=[.B637]/[.C637]" office:value-type="float" office:value="0.00169305555555556" calcext:value-type="float">
            <text:p>0,00169305555555556000</text:p>
          </table:table-cell>
          <table:table-cell table:formula="of:=[.D638]-[.D6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23" office:value-type="float" office:value="14651" calcext:value-type="float">
            <text:p>14651</text:p>
          </table:table-cell>
          <table:table-cell office:value-type="float" office:value="8640000" calcext:value-type="float">
            <text:p>8640000</text:p>
          </table:table-cell>
          <table:table-cell table:formula="of:=[.B638]/[.C638]" office:value-type="float" office:value="0.00169571759259259" calcext:value-type="float">
            <text:p>0,00169571759259259000</text:p>
          </table:table-cell>
          <table:table-cell table:formula="of:=[.D639]-[.D63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23" office:value-type="float" office:value="14674" calcext:value-type="float">
            <text:p>14674</text:p>
          </table:table-cell>
          <table:table-cell office:value-type="float" office:value="8640000" calcext:value-type="float">
            <text:p>8640000</text:p>
          </table:table-cell>
          <table:table-cell table:formula="of:=[.B639]/[.C639]" office:value-type="float" office:value="0.00169837962962963" calcext:value-type="float">
            <text:p>0,00169837962962963000</text:p>
          </table:table-cell>
          <table:table-cell table:formula="of:=[.D640]-[.D6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23" office:value-type="float" office:value="14697" calcext:value-type="float">
            <text:p>14697</text:p>
          </table:table-cell>
          <table:table-cell office:value-type="float" office:value="8640000" calcext:value-type="float">
            <text:p>8640000</text:p>
          </table:table-cell>
          <table:table-cell table:formula="of:=[.B640]/[.C640]" office:value-type="float" office:value="0.00170104166666667" calcext:value-type="float">
            <text:p>0,00170104166666667000</text:p>
          </table:table-cell>
          <table:table-cell table:formula="of:=[.D641]-[.D6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23" office:value-type="float" office:value="14720" calcext:value-type="float">
            <text:p>14720</text:p>
          </table:table-cell>
          <table:table-cell office:value-type="float" office:value="8640000" calcext:value-type="float">
            <text:p>8640000</text:p>
          </table:table-cell>
          <table:table-cell table:formula="of:=[.B641]/[.C641]" office:value-type="float" office:value="0.0017037037037037" calcext:value-type="float">
            <text:p>0,00170370370370370000</text:p>
          </table:table-cell>
          <table:table-cell table:formula="of:=[.D642]-[.D64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23" office:value-type="float" office:value="14743" calcext:value-type="float">
            <text:p>14743</text:p>
          </table:table-cell>
          <table:table-cell office:value-type="float" office:value="8640000" calcext:value-type="float">
            <text:p>8640000</text:p>
          </table:table-cell>
          <table:table-cell table:formula="of:=[.B642]/[.C642]" office:value-type="float" office:value="0.00170636574074074" calcext:value-type="float">
            <text:p>0,00170636574074074000</text:p>
          </table:table-cell>
          <table:table-cell table:formula="of:=[.D643]-[.D64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23" office:value-type="float" office:value="14766" calcext:value-type="float">
            <text:p>14766</text:p>
          </table:table-cell>
          <table:table-cell office:value-type="float" office:value="8640000" calcext:value-type="float">
            <text:p>8640000</text:p>
          </table:table-cell>
          <table:table-cell table:formula="of:=[.B643]/[.C643]" office:value-type="float" office:value="0.00170902777777778" calcext:value-type="float">
            <text:p>0,00170902777777778000</text:p>
          </table:table-cell>
          <table:table-cell table:formula="of:=[.D644]-[.D64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23" office:value-type="float" office:value="14789" calcext:value-type="float">
            <text:p>14789</text:p>
          </table:table-cell>
          <table:table-cell office:value-type="float" office:value="8640000" calcext:value-type="float">
            <text:p>8640000</text:p>
          </table:table-cell>
          <table:table-cell table:formula="of:=[.B644]/[.C644]" office:value-type="float" office:value="0.00171168981481481" calcext:value-type="float">
            <text:p>0,00171168981481481000</text:p>
          </table:table-cell>
          <table:table-cell table:formula="of:=[.D645]-[.D64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23" office:value-type="float" office:value="14812" calcext:value-type="float">
            <text:p>14812</text:p>
          </table:table-cell>
          <table:table-cell office:value-type="float" office:value="8640000" calcext:value-type="float">
            <text:p>8640000</text:p>
          </table:table-cell>
          <table:table-cell table:formula="of:=[.B645]/[.C645]" office:value-type="float" office:value="0.00171435185185185" calcext:value-type="float">
            <text:p>0,00171435185185185000</text:p>
          </table:table-cell>
          <table:table-cell table:formula="of:=[.D646]-[.D64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23" office:value-type="float" office:value="14835" calcext:value-type="float">
            <text:p>14835</text:p>
          </table:table-cell>
          <table:table-cell office:value-type="float" office:value="8640000" calcext:value-type="float">
            <text:p>8640000</text:p>
          </table:table-cell>
          <table:table-cell table:formula="of:=[.B646]/[.C646]" office:value-type="float" office:value="0.00171701388888889" calcext:value-type="float">
            <text:p>0,00171701388888889000</text:p>
          </table:table-cell>
          <table:table-cell table:formula="of:=[.D647]-[.D6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23" office:value-type="float" office:value="14858" calcext:value-type="float">
            <text:p>14858</text:p>
          </table:table-cell>
          <table:table-cell office:value-type="float" office:value="8640000" calcext:value-type="float">
            <text:p>8640000</text:p>
          </table:table-cell>
          <table:table-cell table:formula="of:=[.B647]/[.C647]" office:value-type="float" office:value="0.00171967592592593" calcext:value-type="float">
            <text:p>0,00171967592592593000</text:p>
          </table:table-cell>
          <table:table-cell table:formula="of:=[.D648]-[.D64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23" office:value-type="float" office:value="14881" calcext:value-type="float">
            <text:p>14881</text:p>
          </table:table-cell>
          <table:table-cell office:value-type="float" office:value="8640000" calcext:value-type="float">
            <text:p>8640000</text:p>
          </table:table-cell>
          <table:table-cell table:formula="of:=[.B648]/[.C648]" office:value-type="float" office:value="0.00172233796296296" calcext:value-type="float">
            <text:p>0,00172233796296296000</text:p>
          </table:table-cell>
          <table:table-cell table:formula="of:=[.D649]-[.D64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23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649]/[.C649]" office:value-type="float" office:value="0.001725" calcext:value-type="float">
            <text:p>0,00172500000000000000</text:p>
          </table:table-cell>
          <table:table-cell table:formula="of:=[.D650]-[.D64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23" office:value-type="float" office:value="14927" calcext:value-type="float">
            <text:p>14927</text:p>
          </table:table-cell>
          <table:table-cell office:value-type="float" office:value="8640000" calcext:value-type="float">
            <text:p>8640000</text:p>
          </table:table-cell>
          <table:table-cell table:formula="of:=[.B650]/[.C650]" office:value-type="float" office:value="0.00172766203703704" calcext:value-type="float">
            <text:p>0,00172766203703704000</text:p>
          </table:table-cell>
          <table:table-cell table:formula="of:=[.D651]-[.D65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23" office:value-type="float" office:value="14950" calcext:value-type="float">
            <text:p>14950</text:p>
          </table:table-cell>
          <table:table-cell office:value-type="float" office:value="8640000" calcext:value-type="float">
            <text:p>8640000</text:p>
          </table:table-cell>
          <table:table-cell table:formula="of:=[.B651]/[.C651]" office:value-type="float" office:value="0.00173032407407407" calcext:value-type="float">
            <text:p>0,00173032407407407000</text:p>
          </table:table-cell>
          <table:table-cell table:formula="of:=[.D652]-[.D65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23" office:value-type="float" office:value="14973" calcext:value-type="float">
            <text:p>14973</text:p>
          </table:table-cell>
          <table:table-cell office:value-type="float" office:value="8640000" calcext:value-type="float">
            <text:p>8640000</text:p>
          </table:table-cell>
          <table:table-cell table:formula="of:=[.B652]/[.C652]" office:value-type="float" office:value="0.00173298611111111" calcext:value-type="float">
            <text:p>0,00173298611111111000</text:p>
          </table:table-cell>
          <table:table-cell table:formula="of:=[.D653]-[.D65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23" office:value-type="float" office:value="14996" calcext:value-type="float">
            <text:p>14996</text:p>
          </table:table-cell>
          <table:table-cell office:value-type="float" office:value="8640000" calcext:value-type="float">
            <text:p>8640000</text:p>
          </table:table-cell>
          <table:table-cell table:formula="of:=[.B653]/[.C653]" office:value-type="float" office:value="0.00173564814814815" calcext:value-type="float">
            <text:p>0,00173564814814815000</text:p>
          </table:table-cell>
          <table:table-cell table:formula="of:=[.D654]-[.D65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23" office:value-type="float" office:value="15019" calcext:value-type="float">
            <text:p>15019</text:p>
          </table:table-cell>
          <table:table-cell office:value-type="float" office:value="8640000" calcext:value-type="float">
            <text:p>8640000</text:p>
          </table:table-cell>
          <table:table-cell table:formula="of:=[.B654]/[.C654]" office:value-type="float" office:value="0.00173831018518519" calcext:value-type="float">
            <text:p>0,00173831018518519000</text:p>
          </table:table-cell>
          <table:table-cell table:formula="of:=[.D655]-[.D6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23" office:value-type="float" office:value="15042" calcext:value-type="float">
            <text:p>15042</text:p>
          </table:table-cell>
          <table:table-cell office:value-type="float" office:value="8640000" calcext:value-type="float">
            <text:p>8640000</text:p>
          </table:table-cell>
          <table:table-cell table:formula="of:=[.B655]/[.C655]" office:value-type="float" office:value="0.00174097222222222" calcext:value-type="float">
            <text:p>0,00174097222222222000</text:p>
          </table:table-cell>
          <table:table-cell table:formula="of:=[.D656]-[.D65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23" office:value-type="float" office:value="15065" calcext:value-type="float">
            <text:p>15065</text:p>
          </table:table-cell>
          <table:table-cell office:value-type="float" office:value="8640000" calcext:value-type="float">
            <text:p>8640000</text:p>
          </table:table-cell>
          <table:table-cell table:formula="of:=[.B656]/[.C656]" office:value-type="float" office:value="0.00174363425925926" calcext:value-type="float">
            <text:p>0,00174363425925926000</text:p>
          </table:table-cell>
          <table:table-cell table:formula="of:=[.D657]-[.D65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23" office:value-type="float" office:value="15088" calcext:value-type="float">
            <text:p>15088</text:p>
          </table:table-cell>
          <table:table-cell office:value-type="float" office:value="8640000" calcext:value-type="float">
            <text:p>8640000</text:p>
          </table:table-cell>
          <table:table-cell table:formula="of:=[.B657]/[.C657]" office:value-type="float" office:value="0.0017462962962963" calcext:value-type="float">
            <text:p>0,00174629629629630000</text:p>
          </table:table-cell>
          <table:table-cell table:formula="of:=[.D658]-[.D65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23" office:value-type="float" office:value="15111" calcext:value-type="float">
            <text:p>15111</text:p>
          </table:table-cell>
          <table:table-cell office:value-type="float" office:value="8640000" calcext:value-type="float">
            <text:p>8640000</text:p>
          </table:table-cell>
          <table:table-cell table:formula="of:=[.B658]/[.C658]" office:value-type="float" office:value="0.00174895833333333" calcext:value-type="float">
            <text:p>0,00174895833333333000</text:p>
          </table:table-cell>
          <table:table-cell table:formula="of:=[.D659]-[.D65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23" office:value-type="float" office:value="15134" calcext:value-type="float">
            <text:p>15134</text:p>
          </table:table-cell>
          <table:table-cell office:value-type="float" office:value="8640000" calcext:value-type="float">
            <text:p>8640000</text:p>
          </table:table-cell>
          <table:table-cell table:formula="of:=[.B659]/[.C659]" office:value-type="float" office:value="0.00175162037037037" calcext:value-type="float">
            <text:p>0,00175162037037037000</text:p>
          </table:table-cell>
          <table:table-cell table:formula="of:=[.D660]-[.D65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23" office:value-type="float" office:value="15157" calcext:value-type="float">
            <text:p>15157</text:p>
          </table:table-cell>
          <table:table-cell office:value-type="float" office:value="8640000" calcext:value-type="float">
            <text:p>8640000</text:p>
          </table:table-cell>
          <table:table-cell table:formula="of:=[.B660]/[.C660]" office:value-type="float" office:value="0.00175428240740741" calcext:value-type="float">
            <text:p>0,00175428240740741000</text:p>
          </table:table-cell>
          <table:table-cell table:formula="of:=[.D661]-[.D6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23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661]/[.C661]" office:value-type="float" office:value="0.00175694444444444" calcext:value-type="float">
            <text:p>0,00175694444444444000</text:p>
          </table:table-cell>
          <table:table-cell table:formula="of:=[.D662]-[.D66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23" office:value-type="float" office:value="15203" calcext:value-type="float">
            <text:p>15203</text:p>
          </table:table-cell>
          <table:table-cell office:value-type="float" office:value="8640000" calcext:value-type="float">
            <text:p>8640000</text:p>
          </table:table-cell>
          <table:table-cell table:formula="of:=[.B662]/[.C662]" office:value-type="float" office:value="0.00175960648148148" calcext:value-type="float">
            <text:p>0,00175960648148148000</text:p>
          </table:table-cell>
          <table:table-cell table:formula="of:=[.D663]-[.D66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23" office:value-type="float" office:value="15226" calcext:value-type="float">
            <text:p>15226</text:p>
          </table:table-cell>
          <table:table-cell office:value-type="float" office:value="8640000" calcext:value-type="float">
            <text:p>8640000</text:p>
          </table:table-cell>
          <table:table-cell table:formula="of:=[.B663]/[.C663]" office:value-type="float" office:value="0.00176226851851852" calcext:value-type="float">
            <text:p>0,00176226851851852000</text:p>
          </table:table-cell>
          <table:table-cell table:formula="of:=[.D664]-[.D66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23" office:value-type="float" office:value="15249" calcext:value-type="float">
            <text:p>15249</text:p>
          </table:table-cell>
          <table:table-cell office:value-type="float" office:value="8640000" calcext:value-type="float">
            <text:p>8640000</text:p>
          </table:table-cell>
          <table:table-cell table:formula="of:=[.B664]/[.C664]" office:value-type="float" office:value="0.00176493055555556" calcext:value-type="float">
            <text:p>0,00176493055555556000</text:p>
          </table:table-cell>
          <table:table-cell table:formula="of:=[.D665]-[.D66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23" office:value-type="float" office:value="15272" calcext:value-type="float">
            <text:p>15272</text:p>
          </table:table-cell>
          <table:table-cell office:value-type="float" office:value="8640000" calcext:value-type="float">
            <text:p>8640000</text:p>
          </table:table-cell>
          <table:table-cell table:formula="of:=[.B665]/[.C665]" office:value-type="float" office:value="0.00176759259259259" calcext:value-type="float">
            <text:p>0,00176759259259259000</text:p>
          </table:table-cell>
          <table:table-cell table:formula="of:=[.D666]-[.D66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23" office:value-type="float" office:value="15295" calcext:value-type="float">
            <text:p>15295</text:p>
          </table:table-cell>
          <table:table-cell office:value-type="float" office:value="8640000" calcext:value-type="float">
            <text:p>8640000</text:p>
          </table:table-cell>
          <table:table-cell table:formula="of:=[.B666]/[.C666]" office:value-type="float" office:value="0.00177025462962963" calcext:value-type="float">
            <text:p>0,00177025462962963000</text:p>
          </table:table-cell>
          <table:table-cell table:formula="of:=[.D667]-[.D66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23" office:value-type="float" office:value="15318" calcext:value-type="float">
            <text:p>15318</text:p>
          </table:table-cell>
          <table:table-cell office:value-type="float" office:value="8640000" calcext:value-type="float">
            <text:p>8640000</text:p>
          </table:table-cell>
          <table:table-cell table:formula="of:=[.B667]/[.C667]" office:value-type="float" office:value="0.00177291666666667" calcext:value-type="float">
            <text:p>0,00177291666666667000</text:p>
          </table:table-cell>
          <table:table-cell table:formula="of:=[.D668]-[.D66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23" office:value-type="float" office:value="15341" calcext:value-type="float">
            <text:p>15341</text:p>
          </table:table-cell>
          <table:table-cell office:value-type="float" office:value="8640000" calcext:value-type="float">
            <text:p>8640000</text:p>
          </table:table-cell>
          <table:table-cell table:formula="of:=[.B668]/[.C668]" office:value-type="float" office:value="0.0017755787037037" calcext:value-type="float">
            <text:p>0,00177557870370370000</text:p>
          </table:table-cell>
          <table:table-cell table:formula="of:=[.D669]-[.D66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23" office:value-type="float" office:value="15364" calcext:value-type="float">
            <text:p>15364</text:p>
          </table:table-cell>
          <table:table-cell office:value-type="float" office:value="8640000" calcext:value-type="float">
            <text:p>8640000</text:p>
          </table:table-cell>
          <table:table-cell table:formula="of:=[.B669]/[.C669]" office:value-type="float" office:value="0.00177824074074074" calcext:value-type="float">
            <text:p>0,00177824074074074000</text:p>
          </table:table-cell>
          <table:table-cell table:formula="of:=[.D670]-[.D66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23" office:value-type="float" office:value="15387" calcext:value-type="float">
            <text:p>15387</text:p>
          </table:table-cell>
          <table:table-cell office:value-type="float" office:value="8640000" calcext:value-type="float">
            <text:p>8640000</text:p>
          </table:table-cell>
          <table:table-cell table:formula="of:=[.B670]/[.C670]" office:value-type="float" office:value="0.00178090277777778" calcext:value-type="float">
            <text:p>0,00178090277777778000</text:p>
          </table:table-cell>
          <table:table-cell table:formula="of:=[.D671]-[.D67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23" office:value-type="float" office:value="15410" calcext:value-type="float">
            <text:p>15410</text:p>
          </table:table-cell>
          <table:table-cell office:value-type="float" office:value="8640000" calcext:value-type="float">
            <text:p>8640000</text:p>
          </table:table-cell>
          <table:table-cell table:formula="of:=[.B671]/[.C671]" office:value-type="float" office:value="0.00178356481481481" calcext:value-type="float">
            <text:p>0,00178356481481481000</text:p>
          </table:table-cell>
          <table:table-cell table:formula="of:=[.D672]-[.D67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23" office:value-type="float" office:value="15433" calcext:value-type="float">
            <text:p>15433</text:p>
          </table:table-cell>
          <table:table-cell office:value-type="float" office:value="8640000" calcext:value-type="float">
            <text:p>8640000</text:p>
          </table:table-cell>
          <table:table-cell table:formula="of:=[.B672]/[.C672]" office:value-type="float" office:value="0.00178622685185185" calcext:value-type="float">
            <text:p>0,00178622685185185000</text:p>
          </table:table-cell>
          <table:table-cell table:formula="of:=[.D673]-[.D67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23" office:value-type="float" office:value="15456" calcext:value-type="float">
            <text:p>15456</text:p>
          </table:table-cell>
          <table:table-cell office:value-type="float" office:value="8640000" calcext:value-type="float">
            <text:p>8640000</text:p>
          </table:table-cell>
          <table:table-cell table:formula="of:=[.B673]/[.C673]" office:value-type="float" office:value="0.00178888888888889" calcext:value-type="float">
            <text:p>0,00178888888888889000</text:p>
          </table:table-cell>
          <table:table-cell table:formula="of:=[.D674]-[.D67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23" office:value-type="float" office:value="15479" calcext:value-type="float">
            <text:p>15479</text:p>
          </table:table-cell>
          <table:table-cell office:value-type="float" office:value="8640000" calcext:value-type="float">
            <text:p>8640000</text:p>
          </table:table-cell>
          <table:table-cell table:formula="of:=[.B674]/[.C674]" office:value-type="float" office:value="0.00179155092592593" calcext:value-type="float">
            <text:p>0,00179155092592593000</text:p>
          </table:table-cell>
          <table:table-cell table:formula="of:=[.D675]-[.D6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23" office:value-type="float" office:value="15502" calcext:value-type="float">
            <text:p>15502</text:p>
          </table:table-cell>
          <table:table-cell office:value-type="float" office:value="8640000" calcext:value-type="float">
            <text:p>8640000</text:p>
          </table:table-cell>
          <table:table-cell table:formula="of:=[.B675]/[.C675]" office:value-type="float" office:value="0.00179421296296296" calcext:value-type="float">
            <text:p>0,00179421296296296000</text:p>
          </table:table-cell>
          <table:table-cell table:formula="of:=[.D676]-[.D67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23" office:value-type="float" office:value="15525" calcext:value-type="float">
            <text:p>15525</text:p>
          </table:table-cell>
          <table:table-cell office:value-type="float" office:value="8640000" calcext:value-type="float">
            <text:p>8640000</text:p>
          </table:table-cell>
          <table:table-cell table:formula="of:=[.B676]/[.C676]" office:value-type="float" office:value="0.001796875" calcext:value-type="float">
            <text:p>0,00179687500000000000</text:p>
          </table:table-cell>
          <table:table-cell table:formula="of:=[.D677]-[.D67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23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677]/[.C677]" office:value-type="float" office:value="0.00179953703703704" calcext:value-type="float">
            <text:p>0,00179953703703704000</text:p>
          </table:table-cell>
          <table:table-cell table:formula="of:=[.D678]-[.D67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23" office:value-type="float" office:value="15571" calcext:value-type="float">
            <text:p>15571</text:p>
          </table:table-cell>
          <table:table-cell office:value-type="float" office:value="8640000" calcext:value-type="float">
            <text:p>8640000</text:p>
          </table:table-cell>
          <table:table-cell table:formula="of:=[.B678]/[.C678]" office:value-type="float" office:value="0.00180219907407407" calcext:value-type="float">
            <text:p>0,00180219907407407000</text:p>
          </table:table-cell>
          <table:table-cell table:formula="of:=[.D679]-[.D67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23" office:value-type="float" office:value="15594" calcext:value-type="float">
            <text:p>15594</text:p>
          </table:table-cell>
          <table:table-cell office:value-type="float" office:value="8640000" calcext:value-type="float">
            <text:p>8640000</text:p>
          </table:table-cell>
          <table:table-cell table:formula="of:=[.B679]/[.C679]" office:value-type="float" office:value="0.00180486111111111" calcext:value-type="float">
            <text:p>0,00180486111111111000</text:p>
          </table:table-cell>
          <table:table-cell table:formula="of:=[.D680]-[.D6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23" office:value-type="float" office:value="15617" calcext:value-type="float">
            <text:p>15617</text:p>
          </table:table-cell>
          <table:table-cell office:value-type="float" office:value="8640000" calcext:value-type="float">
            <text:p>8640000</text:p>
          </table:table-cell>
          <table:table-cell table:formula="of:=[.B680]/[.C680]" office:value-type="float" office:value="0.00180752314814815" calcext:value-type="float">
            <text:p>0,00180752314814815000</text:p>
          </table:table-cell>
          <table:table-cell table:formula="of:=[.D681]-[.D68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23" office:value-type="float" office:value="15640" calcext:value-type="float">
            <text:p>15640</text:p>
          </table:table-cell>
          <table:table-cell office:value-type="float" office:value="8640000" calcext:value-type="float">
            <text:p>8640000</text:p>
          </table:table-cell>
          <table:table-cell table:formula="of:=[.B681]/[.C681]" office:value-type="float" office:value="0.00181018518518519" calcext:value-type="float">
            <text:p>0,00181018518518519000</text:p>
          </table:table-cell>
          <table:table-cell table:formula="of:=[.D682]-[.D68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23" office:value-type="float" office:value="15663" calcext:value-type="float">
            <text:p>15663</text:p>
          </table:table-cell>
          <table:table-cell office:value-type="float" office:value="8640000" calcext:value-type="float">
            <text:p>8640000</text:p>
          </table:table-cell>
          <table:table-cell table:formula="of:=[.B682]/[.C682]" office:value-type="float" office:value="0.00181284722222222" calcext:value-type="float">
            <text:p>0,00181284722222222000</text:p>
          </table:table-cell>
          <table:table-cell table:formula="of:=[.D683]-[.D68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23" office:value-type="float" office:value="15686" calcext:value-type="float">
            <text:p>15686</text:p>
          </table:table-cell>
          <table:table-cell office:value-type="float" office:value="8640000" calcext:value-type="float">
            <text:p>8640000</text:p>
          </table:table-cell>
          <table:table-cell table:formula="of:=[.B683]/[.C683]" office:value-type="float" office:value="0.00181550925925926" calcext:value-type="float">
            <text:p>0,00181550925925926000</text:p>
          </table:table-cell>
          <table:table-cell table:formula="of:=[.D684]-[.D68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23" office:value-type="float" office:value="15709" calcext:value-type="float">
            <text:p>15709</text:p>
          </table:table-cell>
          <table:table-cell office:value-type="float" office:value="8640000" calcext:value-type="float">
            <text:p>8640000</text:p>
          </table:table-cell>
          <table:table-cell table:formula="of:=[.B684]/[.C684]" office:value-type="float" office:value="0.0018181712962963" calcext:value-type="float">
            <text:p>0,00181817129629630000</text:p>
          </table:table-cell>
          <table:table-cell table:formula="of:=[.D685]-[.D6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23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685]/[.C685]" office:value-type="float" office:value="0.00182083333333333" calcext:value-type="float">
            <text:p>0,00182083333333333000</text:p>
          </table:table-cell>
          <table:table-cell table:formula="of:=[.D686]-[.D68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23" office:value-type="float" office:value="15755" calcext:value-type="float">
            <text:p>15755</text:p>
          </table:table-cell>
          <table:table-cell office:value-type="float" office:value="8640000" calcext:value-type="float">
            <text:p>8640000</text:p>
          </table:table-cell>
          <table:table-cell table:formula="of:=[.B686]/[.C686]" office:value-type="float" office:value="0.00182349537037037" calcext:value-type="float">
            <text:p>0,00182349537037037000</text:p>
          </table:table-cell>
          <table:table-cell table:formula="of:=[.D687]-[.D6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23" office:value-type="float" office:value="15778" calcext:value-type="float">
            <text:p>15778</text:p>
          </table:table-cell>
          <table:table-cell office:value-type="float" office:value="8640000" calcext:value-type="float">
            <text:p>8640000</text:p>
          </table:table-cell>
          <table:table-cell table:formula="of:=[.B687]/[.C687]" office:value-type="float" office:value="0.00182615740740741" calcext:value-type="float">
            <text:p>0,00182615740740741000</text:p>
          </table:table-cell>
          <table:table-cell table:formula="of:=[.D688]-[.D68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23" office:value-type="float" office:value="15801" calcext:value-type="float">
            <text:p>15801</text:p>
          </table:table-cell>
          <table:table-cell office:value-type="float" office:value="8640000" calcext:value-type="float">
            <text:p>8640000</text:p>
          </table:table-cell>
          <table:table-cell table:formula="of:=[.B688]/[.C688]" office:value-type="float" office:value="0.00182881944444444" calcext:value-type="float">
            <text:p>0,00182881944444444000</text:p>
          </table:table-cell>
          <table:table-cell table:formula="of:=[.D689]-[.D68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23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689]/[.C689]" office:value-type="float" office:value="0.00183148148148148" calcext:value-type="float">
            <text:p>0,00183148148148148000</text:p>
          </table:table-cell>
          <table:table-cell table:formula="of:=[.D690]-[.D68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23" office:value-type="float" office:value="15847" calcext:value-type="float">
            <text:p>15847</text:p>
          </table:table-cell>
          <table:table-cell office:value-type="float" office:value="8640000" calcext:value-type="float">
            <text:p>8640000</text:p>
          </table:table-cell>
          <table:table-cell table:formula="of:=[.B690]/[.C690]" office:value-type="float" office:value="0.00183414351851852" calcext:value-type="float">
            <text:p>0,00183414351851852000</text:p>
          </table:table-cell>
          <table:table-cell table:formula="of:=[.D691]-[.D69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23" office:value-type="float" office:value="15870" calcext:value-type="float">
            <text:p>15870</text:p>
          </table:table-cell>
          <table:table-cell office:value-type="float" office:value="8640000" calcext:value-type="float">
            <text:p>8640000</text:p>
          </table:table-cell>
          <table:table-cell table:formula="of:=[.B691]/[.C691]" office:value-type="float" office:value="0.00183680555555556" calcext:value-type="float">
            <text:p>0,00183680555555556000</text:p>
          </table:table-cell>
          <table:table-cell table:formula="of:=[.D692]-[.D69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23" office:value-type="float" office:value="15893" calcext:value-type="float">
            <text:p>15893</text:p>
          </table:table-cell>
          <table:table-cell office:value-type="float" office:value="8640000" calcext:value-type="float">
            <text:p>8640000</text:p>
          </table:table-cell>
          <table:table-cell table:formula="of:=[.B692]/[.C692]" office:value-type="float" office:value="0.00183946759259259" calcext:value-type="float">
            <text:p>0,00183946759259259000</text:p>
          </table:table-cell>
          <table:table-cell table:formula="of:=[.D693]-[.D69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23" office:value-type="float" office:value="15916" calcext:value-type="float">
            <text:p>15916</text:p>
          </table:table-cell>
          <table:table-cell office:value-type="float" office:value="8640000" calcext:value-type="float">
            <text:p>8640000</text:p>
          </table:table-cell>
          <table:table-cell table:formula="of:=[.B693]/[.C693]" office:value-type="float" office:value="0.00184212962962963" calcext:value-type="float">
            <text:p>0,00184212962962963000</text:p>
          </table:table-cell>
          <table:table-cell table:formula="of:=[.D694]-[.D6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23" office:value-type="float" office:value="15939" calcext:value-type="float">
            <text:p>15939</text:p>
          </table:table-cell>
          <table:table-cell office:value-type="float" office:value="8640000" calcext:value-type="float">
            <text:p>8640000</text:p>
          </table:table-cell>
          <table:table-cell table:formula="of:=[.B694]/[.C694]" office:value-type="float" office:value="0.00184479166666667" calcext:value-type="float">
            <text:p>0,00184479166666667000</text:p>
          </table:table-cell>
          <table:table-cell table:formula="of:=[.D695]-[.D69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23" office:value-type="float" office:value="15962" calcext:value-type="float">
            <text:p>15962</text:p>
          </table:table-cell>
          <table:table-cell office:value-type="float" office:value="8640000" calcext:value-type="float">
            <text:p>8640000</text:p>
          </table:table-cell>
          <table:table-cell table:formula="of:=[.B695]/[.C695]" office:value-type="float" office:value="0.0018474537037037" calcext:value-type="float">
            <text:p>0,00184745370370370000</text:p>
          </table:table-cell>
          <table:table-cell table:formula="of:=[.D696]-[.D69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23" office:value-type="float" office:value="15985" calcext:value-type="float">
            <text:p>15985</text:p>
          </table:table-cell>
          <table:table-cell office:value-type="float" office:value="8640000" calcext:value-type="float">
            <text:p>8640000</text:p>
          </table:table-cell>
          <table:table-cell table:formula="of:=[.B696]/[.C696]" office:value-type="float" office:value="0.00185011574074074" calcext:value-type="float">
            <text:p>0,00185011574074074000</text:p>
          </table:table-cell>
          <table:table-cell table:formula="of:=[.D697]-[.D69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23" office:value-type="float" office:value="16008" calcext:value-type="float">
            <text:p>16008</text:p>
          </table:table-cell>
          <table:table-cell office:value-type="float" office:value="8640000" calcext:value-type="float">
            <text:p>8640000</text:p>
          </table:table-cell>
          <table:table-cell table:formula="of:=[.B697]/[.C697]" office:value-type="float" office:value="0.00185277777777778" calcext:value-type="float">
            <text:p>0,00185277777777778000</text:p>
          </table:table-cell>
          <table:table-cell table:formula="of:=[.D698]-[.D697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23" office:value-type="float" office:value="16031" calcext:value-type="float">
            <text:p>16031</text:p>
          </table:table-cell>
          <table:table-cell office:value-type="float" office:value="8640000" calcext:value-type="float">
            <text:p>8640000</text:p>
          </table:table-cell>
          <table:table-cell table:formula="of:=[.B698]/[.C698]" office:value-type="float" office:value="0.00185543981481481" calcext:value-type="float">
            <text:p>0,00185543981481481000</text:p>
          </table:table-cell>
          <table:table-cell table:formula="of:=[.D699]-[.D6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23" office:value-type="float" office:value="16054" calcext:value-type="float">
            <text:p>16054</text:p>
          </table:table-cell>
          <table:table-cell office:value-type="float" office:value="8640000" calcext:value-type="float">
            <text:p>8640000</text:p>
          </table:table-cell>
          <table:table-cell table:formula="of:=[.B699]/[.C699]" office:value-type="float" office:value="0.00185810185185185" calcext:value-type="float">
            <text:p>0,00185810185185185000</text:p>
          </table:table-cell>
          <table:table-cell table:formula="of:=[.D700]-[.D69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23" office:value-type="float" office:value="16077" calcext:value-type="float">
            <text:p>16077</text:p>
          </table:table-cell>
          <table:table-cell office:value-type="float" office:value="8640000" calcext:value-type="float">
            <text:p>8640000</text:p>
          </table:table-cell>
          <table:table-cell table:formula="of:=[.B700]/[.C700]" office:value-type="float" office:value="0.00186076388888889" calcext:value-type="float">
            <text:p>0,00186076388888889000</text:p>
          </table:table-cell>
          <table:table-cell table:formula="of:=[.D701]-[.D7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23" office:value-type="float" office:value="16100" calcext:value-type="float">
            <text:p>16100</text:p>
          </table:table-cell>
          <table:table-cell office:value-type="float" office:value="8640000" calcext:value-type="float">
            <text:p>8640000</text:p>
          </table:table-cell>
          <table:table-cell table:formula="of:=[.B701]/[.C701]" office:value-type="float" office:value="0.00186342592592593" calcext:value-type="float">
            <text:p>0,00186342592592593000</text:p>
          </table:table-cell>
          <table:table-cell table:formula="of:=[.D702]-[.D70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23" office:value-type="float" office:value="16123" calcext:value-type="float">
            <text:p>16123</text:p>
          </table:table-cell>
          <table:table-cell office:value-type="float" office:value="8640000" calcext:value-type="float">
            <text:p>8640000</text:p>
          </table:table-cell>
          <table:table-cell table:formula="of:=[.B702]/[.C702]" office:value-type="float" office:value="0.00186608796296296" calcext:value-type="float">
            <text:p>0,00186608796296296000</text:p>
          </table:table-cell>
          <table:table-cell table:formula="of:=[.D703]-[.D70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23" office:value-type="float" office:value="16146" calcext:value-type="float">
            <text:p>16146</text:p>
          </table:table-cell>
          <table:table-cell office:value-type="float" office:value="8640000" calcext:value-type="float">
            <text:p>8640000</text:p>
          </table:table-cell>
          <table:table-cell table:formula="of:=[.B703]/[.C703]" office:value-type="float" office:value="0.00186875" calcext:value-type="float">
            <text:p>0,00186875000000000000</text:p>
          </table:table-cell>
          <table:table-cell table:formula="of:=[.D704]-[.D70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23" office:value-type="float" office:value="16169" calcext:value-type="float">
            <text:p>16169</text:p>
          </table:table-cell>
          <table:table-cell office:value-type="float" office:value="8640000" calcext:value-type="float">
            <text:p>8640000</text:p>
          </table:table-cell>
          <table:table-cell table:formula="of:=[.B704]/[.C704]" office:value-type="float" office:value="0.00187141203703704" calcext:value-type="float">
            <text:p>0,00187141203703704000</text:p>
          </table:table-cell>
          <table:table-cell table:formula="of:=[.D705]-[.D704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23" office:value-type="float" office:value="16192" calcext:value-type="float">
            <text:p>16192</text:p>
          </table:table-cell>
          <table:table-cell office:value-type="float" office:value="8640000" calcext:value-type="float">
            <text:p>8640000</text:p>
          </table:table-cell>
          <table:table-cell table:formula="of:=[.B705]/[.C705]" office:value-type="float" office:value="0.00187407407407407" calcext:value-type="float">
            <text:p>0,00187407407407407000</text:p>
          </table:table-cell>
          <table:table-cell table:formula="of:=[.D706]-[.D70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23" office:value-type="float" office:value="16215" calcext:value-type="float">
            <text:p>16215</text:p>
          </table:table-cell>
          <table:table-cell office:value-type="float" office:value="8640000" calcext:value-type="float">
            <text:p>8640000</text:p>
          </table:table-cell>
          <table:table-cell table:formula="of:=[.B706]/[.C706]" office:value-type="float" office:value="0.00187673611111111" calcext:value-type="float">
            <text:p>0,00187673611111111000</text:p>
          </table:table-cell>
          <table:table-cell table:formula="of:=[.D707]-[.D70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23" office:value-type="float" office:value="16238" calcext:value-type="float">
            <text:p>16238</text:p>
          </table:table-cell>
          <table:table-cell office:value-type="float" office:value="8640000" calcext:value-type="float">
            <text:p>8640000</text:p>
          </table:table-cell>
          <table:table-cell table:formula="of:=[.B707]/[.C707]" office:value-type="float" office:value="0.00187939814814815" calcext:value-type="float">
            <text:p>0,00187939814814815000</text:p>
          </table:table-cell>
          <table:table-cell table:formula="of:=[.D708]-[.D7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23" office:value-type="float" office:value="16261" calcext:value-type="float">
            <text:p>16261</text:p>
          </table:table-cell>
          <table:table-cell office:value-type="float" office:value="8640000" calcext:value-type="float">
            <text:p>8640000</text:p>
          </table:table-cell>
          <table:table-cell table:formula="of:=[.B708]/[.C708]" office:value-type="float" office:value="0.00188206018518519" calcext:value-type="float">
            <text:p>0,00188206018518519000</text:p>
          </table:table-cell>
          <table:table-cell table:formula="of:=[.D709]-[.D70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23" office:value-type="float" office:value="16284" calcext:value-type="float">
            <text:p>16284</text:p>
          </table:table-cell>
          <table:table-cell office:value-type="float" office:value="8640000" calcext:value-type="float">
            <text:p>8640000</text:p>
          </table:table-cell>
          <table:table-cell table:formula="of:=[.B709]/[.C709]" office:value-type="float" office:value="0.00188472222222222" calcext:value-type="float">
            <text:p>0,00188472222222222000</text:p>
          </table:table-cell>
          <table:table-cell table:formula="of:=[.D710]-[.D709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23" office:value-type="float" office:value="16307" calcext:value-type="float">
            <text:p>16307</text:p>
          </table:table-cell>
          <table:table-cell office:value-type="float" office:value="8640000" calcext:value-type="float">
            <text:p>8640000</text:p>
          </table:table-cell>
          <table:table-cell table:formula="of:=[.B710]/[.C710]" office:value-type="float" office:value="0.00188738425925926" calcext:value-type="float">
            <text:p>0,00188738425925926000</text:p>
          </table:table-cell>
          <table:table-cell table:formula="of:=[.D711]-[.D71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23" office:value-type="float" office:value="16330" calcext:value-type="float">
            <text:p>16330</text:p>
          </table:table-cell>
          <table:table-cell office:value-type="float" office:value="8640000" calcext:value-type="float">
            <text:p>8640000</text:p>
          </table:table-cell>
          <table:table-cell table:formula="of:=[.B711]/[.C711]" office:value-type="float" office:value="0.0018900462962963" calcext:value-type="float">
            <text:p>0,00189004629629630000</text:p>
          </table:table-cell>
          <table:table-cell table:formula="of:=[.D712]-[.D711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23" office:value-type="float" office:value="16353" calcext:value-type="float">
            <text:p>16353</text:p>
          </table:table-cell>
          <table:table-cell office:value-type="float" office:value="8640000" calcext:value-type="float">
            <text:p>8640000</text:p>
          </table:table-cell>
          <table:table-cell table:formula="of:=[.B712]/[.C712]" office:value-type="float" office:value="0.00189270833333333" calcext:value-type="float">
            <text:p>0,00189270833333333000</text:p>
          </table:table-cell>
          <table:table-cell table:formula="of:=[.D713]-[.D7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23" office:value-type="float" office:value="16376" calcext:value-type="float">
            <text:p>16376</text:p>
          </table:table-cell>
          <table:table-cell office:value-type="float" office:value="8640000" calcext:value-type="float">
            <text:p>8640000</text:p>
          </table:table-cell>
          <table:table-cell table:formula="of:=[.B713]/[.C713]" office:value-type="float" office:value="0.00189537037037037" calcext:value-type="float">
            <text:p>0,00189537037037037000</text:p>
          </table:table-cell>
          <table:table-cell table:formula="of:=[.D714]-[.D71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23" office:value-type="float" office:value="16399" calcext:value-type="float">
            <text:p>16399</text:p>
          </table:table-cell>
          <table:table-cell office:value-type="float" office:value="8640000" calcext:value-type="float">
            <text:p>8640000</text:p>
          </table:table-cell>
          <table:table-cell table:formula="of:=[.B714]/[.C714]" office:value-type="float" office:value="0.00189803240740741" calcext:value-type="float">
            <text:p>0,00189803240740741000</text:p>
          </table:table-cell>
          <table:table-cell table:formula="of:=[.D715]-[.D71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23" office:value-type="float" office:value="16422" calcext:value-type="float">
            <text:p>16422</text:p>
          </table:table-cell>
          <table:table-cell office:value-type="float" office:value="8640000" calcext:value-type="float">
            <text:p>8640000</text:p>
          </table:table-cell>
          <table:table-cell table:formula="of:=[.B715]/[.C715]" office:value-type="float" office:value="0.00190069444444444" calcext:value-type="float">
            <text:p>0,00190069444444444000</text:p>
          </table:table-cell>
          <table:table-cell table:formula="of:=[.D716]-[.D71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23" office:value-type="float" office:value="16445" calcext:value-type="float">
            <text:p>16445</text:p>
          </table:table-cell>
          <table:table-cell office:value-type="float" office:value="8640000" calcext:value-type="float">
            <text:p>8640000</text:p>
          </table:table-cell>
          <table:table-cell table:formula="of:=[.B716]/[.C716]" office:value-type="float" office:value="0.00190335648148148" calcext:value-type="float">
            <text:p>0,00190335648148148000</text:p>
          </table:table-cell>
          <table:table-cell table:formula="of:=[.D717]-[.D716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23" office:value-type="float" office:value="16468" calcext:value-type="float">
            <text:p>16468</text:p>
          </table:table-cell>
          <table:table-cell office:value-type="float" office:value="8640000" calcext:value-type="float">
            <text:p>8640000</text:p>
          </table:table-cell>
          <table:table-cell table:formula="of:=[.B717]/[.C717]" office:value-type="float" office:value="0.00190601851851852" calcext:value-type="float">
            <text:p>0,00190601851851852000</text:p>
          </table:table-cell>
          <table:table-cell table:formula="of:=[.D718]-[.D71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23" office:value-type="float" office:value="16491" calcext:value-type="float">
            <text:p>16491</text:p>
          </table:table-cell>
          <table:table-cell office:value-type="float" office:value="8640000" calcext:value-type="float">
            <text:p>8640000</text:p>
          </table:table-cell>
          <table:table-cell table:formula="of:=[.B718]/[.C718]" office:value-type="float" office:value="0.00190868055555556" calcext:value-type="float">
            <text:p>0,00190868055555556000</text:p>
          </table:table-cell>
          <table:table-cell table:formula="of:=[.D719]-[.D71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23" office:value-type="float" office:value="16514" calcext:value-type="float">
            <text:p>16514</text:p>
          </table:table-cell>
          <table:table-cell office:value-type="float" office:value="8640000" calcext:value-type="float">
            <text:p>8640000</text:p>
          </table:table-cell>
          <table:table-cell table:formula="of:=[.B719]/[.C719]" office:value-type="float" office:value="0.00191134259259259" calcext:value-type="float">
            <text:p>0,00191134259259259000</text:p>
          </table:table-cell>
          <table:table-cell table:formula="of:=[.D720]-[.D7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23" office:value-type="float" office:value="16537" calcext:value-type="float">
            <text:p>16537</text:p>
          </table:table-cell>
          <table:table-cell office:value-type="float" office:value="8640000" calcext:value-type="float">
            <text:p>8640000</text:p>
          </table:table-cell>
          <table:table-cell table:formula="of:=[.B720]/[.C720]" office:value-type="float" office:value="0.00191400462962963" calcext:value-type="float">
            <text:p>0,00191400462962963000</text:p>
          </table:table-cell>
          <table:table-cell table:formula="of:=[.D721]-[.D72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23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721]/[.C721]" office:value-type="float" office:value="0.00191666666666667" calcext:value-type="float">
            <text:p>0,00191666666666667000</text:p>
          </table:table-cell>
          <table:table-cell table:formula="of:=[.D722]-[.D7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23" office:value-type="float" office:value="16583" calcext:value-type="float">
            <text:p>16583</text:p>
          </table:table-cell>
          <table:table-cell office:value-type="float" office:value="8640000" calcext:value-type="float">
            <text:p>8640000</text:p>
          </table:table-cell>
          <table:table-cell table:formula="of:=[.B722]/[.C722]" office:value-type="float" office:value="0.0019193287037037" calcext:value-type="float">
            <text:p>0,00191932870370370000</text:p>
          </table:table-cell>
          <table:table-cell table:formula="of:=[.D723]-[.D72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23" office:value-type="float" office:value="16606" calcext:value-type="float">
            <text:p>16606</text:p>
          </table:table-cell>
          <table:table-cell office:value-type="float" office:value="8640000" calcext:value-type="float">
            <text:p>8640000</text:p>
          </table:table-cell>
          <table:table-cell table:formula="of:=[.B723]/[.C723]" office:value-type="float" office:value="0.00192199074074074" calcext:value-type="float">
            <text:p>0,00192199074074074000</text:p>
          </table:table-cell>
          <table:table-cell table:formula="of:=[.D724]-[.D723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23" office:value-type="float" office:value="16629" calcext:value-type="float">
            <text:p>16629</text:p>
          </table:table-cell>
          <table:table-cell office:value-type="float" office:value="8640000" calcext:value-type="float">
            <text:p>8640000</text:p>
          </table:table-cell>
          <table:table-cell table:formula="of:=[.B724]/[.C724]" office:value-type="float" office:value="0.00192465277777778" calcext:value-type="float">
            <text:p>0,00192465277777778000</text:p>
          </table:table-cell>
          <table:table-cell table:formula="of:=[.D725]-[.D72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23" office:value-type="float" office:value="16652" calcext:value-type="float">
            <text:p>16652</text:p>
          </table:table-cell>
          <table:table-cell office:value-type="float" office:value="8640000" calcext:value-type="float">
            <text:p>8640000</text:p>
          </table:table-cell>
          <table:table-cell table:formula="of:=[.B725]/[.C725]" office:value-type="float" office:value="0.00192731481481481" calcext:value-type="float">
            <text:p>0,00192731481481481000</text:p>
          </table:table-cell>
          <table:table-cell table:formula="of:=[.D726]-[.D725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23" office:value-type="float" office:value="16675" calcext:value-type="float">
            <text:p>16675</text:p>
          </table:table-cell>
          <table:table-cell office:value-type="float" office:value="8640000" calcext:value-type="float">
            <text:p>8640000</text:p>
          </table:table-cell>
          <table:table-cell table:formula="of:=[.B726]/[.C726]" office:value-type="float" office:value="0.00192997685185185" calcext:value-type="float">
            <text:p>0,00192997685185185000</text:p>
          </table:table-cell>
          <table:table-cell table:formula="of:=[.D727]-[.D7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23" office:value-type="float" office:value="16698" calcext:value-type="float">
            <text:p>16698</text:p>
          </table:table-cell>
          <table:table-cell office:value-type="float" office:value="8640000" calcext:value-type="float">
            <text:p>8640000</text:p>
          </table:table-cell>
          <table:table-cell table:formula="of:=[.B727]/[.C727]" office:value-type="float" office:value="0.00193263888888889" calcext:value-type="float">
            <text:p>0,00193263888888889000</text:p>
          </table:table-cell>
          <table:table-cell table:formula="of:=[.D728]-[.D72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23" office:value-type="float" office:value="16721" calcext:value-type="float">
            <text:p>16721</text:p>
          </table:table-cell>
          <table:table-cell office:value-type="float" office:value="8640000" calcext:value-type="float">
            <text:p>8640000</text:p>
          </table:table-cell>
          <table:table-cell table:formula="of:=[.B728]/[.C728]" office:value-type="float" office:value="0.00193530092592593" calcext:value-type="float">
            <text:p>0,00193530092592593000</text:p>
          </table:table-cell>
          <table:table-cell table:formula="of:=[.D729]-[.D728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23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729]/[.C729]" office:value-type="float" office:value="0.00193796296296296" calcext:value-type="float">
            <text:p>0,00193796296296296000</text:p>
          </table:table-cell>
          <table:table-cell table:formula="of:=[.D730]-[.D72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23" office:value-type="float" office:value="16767" calcext:value-type="float">
            <text:p>16767</text:p>
          </table:table-cell>
          <table:table-cell office:value-type="float" office:value="8640000" calcext:value-type="float">
            <text:p>8640000</text:p>
          </table:table-cell>
          <table:table-cell table:formula="of:=[.B730]/[.C730]" office:value-type="float" office:value="0.001940625" calcext:value-type="float">
            <text:p>0,00194062500000000000</text:p>
          </table:table-cell>
          <table:table-cell table:formula="of:=[.D731]-[.D730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23" office:value-type="float" office:value="16790" calcext:value-type="float">
            <text:p>16790</text:p>
          </table:table-cell>
          <table:table-cell office:value-type="float" office:value="8640000" calcext:value-type="float">
            <text:p>8640000</text:p>
          </table:table-cell>
          <table:table-cell table:formula="of:=[.B731]/[.C731]" office:value-type="float" office:value="0.00194328703703704" calcext:value-type="float">
            <text:p>0,00194328703703704000</text:p>
          </table:table-cell>
          <table:table-cell table:formula="of:=[.D732]-[.D7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23" office:value-type="float" office:value="16813" calcext:value-type="float">
            <text:p>16813</text:p>
          </table:table-cell>
          <table:table-cell office:value-type="float" office:value="8640000" calcext:value-type="float">
            <text:p>8640000</text:p>
          </table:table-cell>
          <table:table-cell table:formula="of:=[.B732]/[.C732]" office:value-type="float" office:value="0.00194594907407407" calcext:value-type="float">
            <text:p>0,00194594907407407000</text:p>
          </table:table-cell>
          <table:table-cell table:formula="of:=[.D733]-[.D732]" office:value-type="float" office:value="0.00000266203703703691" calcext:value-type="float">
            <text:p>0,0000026620370370369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23" office:value-type="float" office:value="16836" calcext:value-type="float">
            <text:p>16836</text:p>
          </table:table-cell>
          <table:table-cell office:value-type="float" office:value="8640000" calcext:value-type="float">
            <text:p>8640000</text:p>
          </table:table-cell>
          <table:table-cell table:formula="of:=[.B733]/[.C733]" office:value-type="float" office:value="0.00194861111111111" calcext:value-type="float">
            <text:p>0,00194861111111111000</text:p>
          </table:table-cell>
          <table:table-cell table:formula="of:=[.D734]-[.D7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23" office:value-type="float" office:value="16859" calcext:value-type="float">
            <text:p>16859</text:p>
          </table:table-cell>
          <table:table-cell office:value-type="float" office:value="8640000" calcext:value-type="float">
            <text:p>8640000</text:p>
          </table:table-cell>
          <table:table-cell table:formula="of:=[.B734]/[.C734]" office:value-type="float" office:value="0.00195127314814815" calcext:value-type="float">
            <text:p>0,00195127314814815000</text:p>
          </table:table-cell>
          <table:table-cell table:formula="of:=[.D735]-[.D73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23" office:value-type="float" office:value="16882" calcext:value-type="float">
            <text:p>16882</text:p>
          </table:table-cell>
          <table:table-cell office:value-type="float" office:value="8640000" calcext:value-type="float">
            <text:p>8640000</text:p>
          </table:table-cell>
          <table:table-cell table:formula="of:=[.B735]/[.C735]" office:value-type="float" office:value="0.00195393518518519" calcext:value-type="float">
            <text:p>0,00195393518518519000</text:p>
          </table:table-cell>
          <table:table-cell table:formula="of:=[.D736]-[.D7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23" office:value-type="float" office:value="16905" calcext:value-type="float">
            <text:p>16905</text:p>
          </table:table-cell>
          <table:table-cell office:value-type="float" office:value="8640000" calcext:value-type="float">
            <text:p>8640000</text:p>
          </table:table-cell>
          <table:table-cell table:formula="of:=[.B736]/[.C736]" office:value-type="float" office:value="0.00195659722222222" calcext:value-type="float">
            <text:p>0,00195659722222222000</text:p>
          </table:table-cell>
          <table:table-cell table:formula="of:=[.D737]-[.D73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23" office:value-type="float" office:value="16928" calcext:value-type="float">
            <text:p>16928</text:p>
          </table:table-cell>
          <table:table-cell office:value-type="float" office:value="8640000" calcext:value-type="float">
            <text:p>8640000</text:p>
          </table:table-cell>
          <table:table-cell table:formula="of:=[.B737]/[.C737]" office:value-type="float" office:value="0.00195925925925926" calcext:value-type="float">
            <text:p>0,00195925925925926000</text:p>
          </table:table-cell>
          <table:table-cell table:formula="of:=[.D738]-[.D7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23" office:value-type="float" office:value="16951" calcext:value-type="float">
            <text:p>16951</text:p>
          </table:table-cell>
          <table:table-cell office:value-type="float" office:value="8640000" calcext:value-type="float">
            <text:p>8640000</text:p>
          </table:table-cell>
          <table:table-cell table:formula="of:=[.B738]/[.C738]" office:value-type="float" office:value="0.0019619212962963" calcext:value-type="float">
            <text:p>0,00196192129629630000</text:p>
          </table:table-cell>
          <table:table-cell table:formula="of:=[.D739]-[.D73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23" office:value-type="float" office:value="16974" calcext:value-type="float">
            <text:p>16974</text:p>
          </table:table-cell>
          <table:table-cell office:value-type="float" office:value="8640000" calcext:value-type="float">
            <text:p>8640000</text:p>
          </table:table-cell>
          <table:table-cell table:formula="of:=[.B739]/[.C739]" office:value-type="float" office:value="0.00196458333333333" calcext:value-type="float">
            <text:p>0,00196458333333333000</text:p>
          </table:table-cell>
          <table:table-cell table:formula="of:=[.D740]-[.D7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23" office:value-type="float" office:value="16997" calcext:value-type="float">
            <text:p>16997</text:p>
          </table:table-cell>
          <table:table-cell office:value-type="float" office:value="8640000" calcext:value-type="float">
            <text:p>8640000</text:p>
          </table:table-cell>
          <table:table-cell table:formula="of:=[.B740]/[.C740]" office:value-type="float" office:value="0.00196724537037037" calcext:value-type="float">
            <text:p>0,00196724537037037000</text:p>
          </table:table-cell>
          <table:table-cell table:formula="of:=[.D741]-[.D74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23" office:value-type="float" office:value="17020" calcext:value-type="float">
            <text:p>17020</text:p>
          </table:table-cell>
          <table:table-cell office:value-type="float" office:value="8640000" calcext:value-type="float">
            <text:p>8640000</text:p>
          </table:table-cell>
          <table:table-cell table:formula="of:=[.B741]/[.C741]" office:value-type="float" office:value="0.00196990740740741" calcext:value-type="float">
            <text:p>0,00196990740740741000</text:p>
          </table:table-cell>
          <table:table-cell table:formula="of:=[.D742]-[.D74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23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742]/[.C742]" office:value-type="float" office:value="0.00197256944444444" calcext:value-type="float">
            <text:p>0,00197256944444444000</text:p>
          </table:table-cell>
          <table:table-cell table:formula="of:=[.D743]-[.D74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23" office:value-type="float" office:value="17066" calcext:value-type="float">
            <text:p>17066</text:p>
          </table:table-cell>
          <table:table-cell office:value-type="float" office:value="8640000" calcext:value-type="float">
            <text:p>8640000</text:p>
          </table:table-cell>
          <table:table-cell table:formula="of:=[.B743]/[.C743]" office:value-type="float" office:value="0.00197523148148148" calcext:value-type="float">
            <text:p>0,00197523148148148000</text:p>
          </table:table-cell>
          <table:table-cell table:formula="of:=[.D744]-[.D74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23" office:value-type="float" office:value="17089" calcext:value-type="float">
            <text:p>17089</text:p>
          </table:table-cell>
          <table:table-cell office:value-type="float" office:value="8640000" calcext:value-type="float">
            <text:p>8640000</text:p>
          </table:table-cell>
          <table:table-cell table:formula="of:=[.B744]/[.C744]" office:value-type="float" office:value="0.00197789351851852" calcext:value-type="float">
            <text:p>0,00197789351851852000</text:p>
          </table:table-cell>
          <table:table-cell table:formula="of:=[.D745]-[.D74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23" office:value-type="float" office:value="17112" calcext:value-type="float">
            <text:p>17112</text:p>
          </table:table-cell>
          <table:table-cell office:value-type="float" office:value="8640000" calcext:value-type="float">
            <text:p>8640000</text:p>
          </table:table-cell>
          <table:table-cell table:formula="of:=[.B745]/[.C745]" office:value-type="float" office:value="0.00198055555555556" calcext:value-type="float">
            <text:p>0,00198055555555556000</text:p>
          </table:table-cell>
          <table:table-cell table:formula="of:=[.D746]-[.D74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23" office:value-type="float" office:value="17135" calcext:value-type="float">
            <text:p>17135</text:p>
          </table:table-cell>
          <table:table-cell office:value-type="float" office:value="8640000" calcext:value-type="float">
            <text:p>8640000</text:p>
          </table:table-cell>
          <table:table-cell table:formula="of:=[.B746]/[.C746]" office:value-type="float" office:value="0.00198321759259259" calcext:value-type="float">
            <text:p>0,00198321759259259000</text:p>
          </table:table-cell>
          <table:table-cell table:formula="of:=[.D747]-[.D7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23" office:value-type="float" office:value="17158" calcext:value-type="float">
            <text:p>17158</text:p>
          </table:table-cell>
          <table:table-cell office:value-type="float" office:value="8640000" calcext:value-type="float">
            <text:p>8640000</text:p>
          </table:table-cell>
          <table:table-cell table:formula="of:=[.B747]/[.C747]" office:value-type="float" office:value="0.00198587962962963" calcext:value-type="float">
            <text:p>0,00198587962962963000</text:p>
          </table:table-cell>
          <table:table-cell table:formula="of:=[.D748]-[.D74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23" office:value-type="float" office:value="17181" calcext:value-type="float">
            <text:p>17181</text:p>
          </table:table-cell>
          <table:table-cell office:value-type="float" office:value="8640000" calcext:value-type="float">
            <text:p>8640000</text:p>
          </table:table-cell>
          <table:table-cell table:formula="of:=[.B748]/[.C748]" office:value-type="float" office:value="0.00198854166666667" calcext:value-type="float">
            <text:p>0,00198854166666667000</text:p>
          </table:table-cell>
          <table:table-cell table:formula="of:=[.D749]-[.D74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23" office:value-type="float" office:value="17204" calcext:value-type="float">
            <text:p>17204</text:p>
          </table:table-cell>
          <table:table-cell office:value-type="float" office:value="8640000" calcext:value-type="float">
            <text:p>8640000</text:p>
          </table:table-cell>
          <table:table-cell table:formula="of:=[.B749]/[.C749]" office:value-type="float" office:value="0.0019912037037037" calcext:value-type="float">
            <text:p>0,00199120370370370000</text:p>
          </table:table-cell>
          <table:table-cell table:formula="of:=[.D750]-[.D74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23" office:value-type="float" office:value="17227" calcext:value-type="float">
            <text:p>17227</text:p>
          </table:table-cell>
          <table:table-cell office:value-type="float" office:value="8640000" calcext:value-type="float">
            <text:p>8640000</text:p>
          </table:table-cell>
          <table:table-cell table:formula="of:=[.B750]/[.C750]" office:value-type="float" office:value="0.00199386574074074" calcext:value-type="float">
            <text:p>0,00199386574074074000</text:p>
          </table:table-cell>
          <table:table-cell table:formula="of:=[.D751]-[.D75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23" office:value-type="float" office:value="17250" calcext:value-type="float">
            <text:p>17250</text:p>
          </table:table-cell>
          <table:table-cell office:value-type="float" office:value="8640000" calcext:value-type="float">
            <text:p>8640000</text:p>
          </table:table-cell>
          <table:table-cell table:formula="of:=[.B751]/[.C751]" office:value-type="float" office:value="0.00199652777777778" calcext:value-type="float">
            <text:p>0,00199652777777778000</text:p>
          </table:table-cell>
          <table:table-cell table:formula="of:=[.D752]-[.D75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23" office:value-type="float" office:value="17273" calcext:value-type="float">
            <text:p>17273</text:p>
          </table:table-cell>
          <table:table-cell office:value-type="float" office:value="8640000" calcext:value-type="float">
            <text:p>8640000</text:p>
          </table:table-cell>
          <table:table-cell table:formula="of:=[.B752]/[.C752]" office:value-type="float" office:value="0.00199918981481481" calcext:value-type="float">
            <text:p>0,00199918981481481000</text:p>
          </table:table-cell>
          <table:table-cell table:formula="of:=[.D753]-[.D75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23" office:value-type="float" office:value="17296" calcext:value-type="float">
            <text:p>17296</text:p>
          </table:table-cell>
          <table:table-cell office:value-type="float" office:value="8640000" calcext:value-type="float">
            <text:p>8640000</text:p>
          </table:table-cell>
          <table:table-cell table:formula="of:=[.B753]/[.C753]" office:value-type="float" office:value="0.00200185185185185" calcext:value-type="float">
            <text:p>0,00200185185185185000</text:p>
          </table:table-cell>
          <table:table-cell table:formula="of:=[.D754]-[.D75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23" office:value-type="float" office:value="17319" calcext:value-type="float">
            <text:p>17319</text:p>
          </table:table-cell>
          <table:table-cell office:value-type="float" office:value="8640000" calcext:value-type="float">
            <text:p>8640000</text:p>
          </table:table-cell>
          <table:table-cell table:formula="of:=[.B754]/[.C754]" office:value-type="float" office:value="0.00200451388888889" calcext:value-type="float">
            <text:p>0,00200451388888889000</text:p>
          </table:table-cell>
          <table:table-cell table:formula="of:=[.D755]-[.D7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23" office:value-type="float" office:value="17342" calcext:value-type="float">
            <text:p>17342</text:p>
          </table:table-cell>
          <table:table-cell office:value-type="float" office:value="8640000" calcext:value-type="float">
            <text:p>8640000</text:p>
          </table:table-cell>
          <table:table-cell table:formula="of:=[.B755]/[.C755]" office:value-type="float" office:value="0.00200717592592593" calcext:value-type="float">
            <text:p>0,00200717592592593000</text:p>
          </table:table-cell>
          <table:table-cell table:formula="of:=[.D756]-[.D75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23" office:value-type="float" office:value="17365" calcext:value-type="float">
            <text:p>17365</text:p>
          </table:table-cell>
          <table:table-cell office:value-type="float" office:value="8640000" calcext:value-type="float">
            <text:p>8640000</text:p>
          </table:table-cell>
          <table:table-cell table:formula="of:=[.B756]/[.C756]" office:value-type="float" office:value="0.00200983796296296" calcext:value-type="float">
            <text:p>0,00200983796296296000</text:p>
          </table:table-cell>
          <table:table-cell table:formula="of:=[.D757]-[.D75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23" office:value-type="float" office:value="17388" calcext:value-type="float">
            <text:p>17388</text:p>
          </table:table-cell>
          <table:table-cell office:value-type="float" office:value="8640000" calcext:value-type="float">
            <text:p>8640000</text:p>
          </table:table-cell>
          <table:table-cell table:formula="of:=[.B757]/[.C757]" office:value-type="float" office:value="0.0020125" calcext:value-type="float">
            <text:p>0,00201250000000000000</text:p>
          </table:table-cell>
          <table:table-cell table:formula="of:=[.D758]-[.D75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23" office:value-type="float" office:value="17411" calcext:value-type="float">
            <text:p>17411</text:p>
          </table:table-cell>
          <table:table-cell office:value-type="float" office:value="8640000" calcext:value-type="float">
            <text:p>8640000</text:p>
          </table:table-cell>
          <table:table-cell table:formula="of:=[.B758]/[.C758]" office:value-type="float" office:value="0.00201516203703704" calcext:value-type="float">
            <text:p>0,00201516203703704000</text:p>
          </table:table-cell>
          <table:table-cell table:formula="of:=[.D759]-[.D75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23" office:value-type="float" office:value="17434" calcext:value-type="float">
            <text:p>17434</text:p>
          </table:table-cell>
          <table:table-cell office:value-type="float" office:value="8640000" calcext:value-type="float">
            <text:p>8640000</text:p>
          </table:table-cell>
          <table:table-cell table:formula="of:=[.B759]/[.C759]" office:value-type="float" office:value="0.00201782407407407" calcext:value-type="float">
            <text:p>0,00201782407407407000</text:p>
          </table:table-cell>
          <table:table-cell table:formula="of:=[.D760]-[.D75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23" office:value-type="float" office:value="17457" calcext:value-type="float">
            <text:p>17457</text:p>
          </table:table-cell>
          <table:table-cell office:value-type="float" office:value="8640000" calcext:value-type="float">
            <text:p>8640000</text:p>
          </table:table-cell>
          <table:table-cell table:formula="of:=[.B760]/[.C760]" office:value-type="float" office:value="0.00202048611111111" calcext:value-type="float">
            <text:p>0,00202048611111111000</text:p>
          </table:table-cell>
          <table:table-cell table:formula="of:=[.D761]-[.D7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23" office:value-type="float" office:value="17480" calcext:value-type="float">
            <text:p>17480</text:p>
          </table:table-cell>
          <table:table-cell office:value-type="float" office:value="8640000" calcext:value-type="float">
            <text:p>8640000</text:p>
          </table:table-cell>
          <table:table-cell table:formula="of:=[.B761]/[.C761]" office:value-type="float" office:value="0.00202314814814815" calcext:value-type="float">
            <text:p>0,00202314814814815000</text:p>
          </table:table-cell>
          <table:table-cell table:formula="of:=[.D762]-[.D76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23" office:value-type="float" office:value="17503" calcext:value-type="float">
            <text:p>17503</text:p>
          </table:table-cell>
          <table:table-cell office:value-type="float" office:value="8640000" calcext:value-type="float">
            <text:p>8640000</text:p>
          </table:table-cell>
          <table:table-cell table:formula="of:=[.B762]/[.C762]" office:value-type="float" office:value="0.00202581018518519" calcext:value-type="float">
            <text:p>0,00202581018518519000</text:p>
          </table:table-cell>
          <table:table-cell table:formula="of:=[.D763]-[.D76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23" office:value-type="float" office:value="17526" calcext:value-type="float">
            <text:p>17526</text:p>
          </table:table-cell>
          <table:table-cell office:value-type="float" office:value="8640000" calcext:value-type="float">
            <text:p>8640000</text:p>
          </table:table-cell>
          <table:table-cell table:formula="of:=[.B763]/[.C763]" office:value-type="float" office:value="0.00202847222222222" calcext:value-type="float">
            <text:p>0,00202847222222222000</text:p>
          </table:table-cell>
          <table:table-cell table:formula="of:=[.D764]-[.D76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23" office:value-type="float" office:value="17549" calcext:value-type="float">
            <text:p>17549</text:p>
          </table:table-cell>
          <table:table-cell office:value-type="float" office:value="8640000" calcext:value-type="float">
            <text:p>8640000</text:p>
          </table:table-cell>
          <table:table-cell table:formula="of:=[.B764]/[.C764]" office:value-type="float" office:value="0.00203113425925926" calcext:value-type="float">
            <text:p>0,00203113425925926000</text:p>
          </table:table-cell>
          <table:table-cell table:formula="of:=[.D765]-[.D76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23" office:value-type="float" office:value="17572" calcext:value-type="float">
            <text:p>17572</text:p>
          </table:table-cell>
          <table:table-cell office:value-type="float" office:value="8640000" calcext:value-type="float">
            <text:p>8640000</text:p>
          </table:table-cell>
          <table:table-cell table:formula="of:=[.B765]/[.C765]" office:value-type="float" office:value="0.0020337962962963" calcext:value-type="float">
            <text:p>0,00203379629629630000</text:p>
          </table:table-cell>
          <table:table-cell table:formula="of:=[.D766]-[.D76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23" office:value-type="float" office:value="17595" calcext:value-type="float">
            <text:p>17595</text:p>
          </table:table-cell>
          <table:table-cell office:value-type="float" office:value="8640000" calcext:value-type="float">
            <text:p>8640000</text:p>
          </table:table-cell>
          <table:table-cell table:formula="of:=[.B766]/[.C766]" office:value-type="float" office:value="0.00203645833333333" calcext:value-type="float">
            <text:p>0,00203645833333333000</text:p>
          </table:table-cell>
          <table:table-cell table:formula="of:=[.D767]-[.D76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23" office:value-type="float" office:value="17618" calcext:value-type="float">
            <text:p>17618</text:p>
          </table:table-cell>
          <table:table-cell office:value-type="float" office:value="8640000" calcext:value-type="float">
            <text:p>8640000</text:p>
          </table:table-cell>
          <table:table-cell table:formula="of:=[.B767]/[.C767]" office:value-type="float" office:value="0.00203912037037037" calcext:value-type="float">
            <text:p>0,00203912037037037000</text:p>
          </table:table-cell>
          <table:table-cell table:formula="of:=[.D768]-[.D76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23" office:value-type="float" office:value="17641" calcext:value-type="float">
            <text:p>17641</text:p>
          </table:table-cell>
          <table:table-cell office:value-type="float" office:value="8640000" calcext:value-type="float">
            <text:p>8640000</text:p>
          </table:table-cell>
          <table:table-cell table:formula="of:=[.B768]/[.C768]" office:value-type="float" office:value="0.00204178240740741" calcext:value-type="float">
            <text:p>0,00204178240740741000</text:p>
          </table:table-cell>
          <table:table-cell table:formula="of:=[.D769]-[.D76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23" office:value-type="float" office:value="17664" calcext:value-type="float">
            <text:p>17664</text:p>
          </table:table-cell>
          <table:table-cell office:value-type="float" office:value="8640000" calcext:value-type="float">
            <text:p>8640000</text:p>
          </table:table-cell>
          <table:table-cell table:formula="of:=[.B769]/[.C769]" office:value-type="float" office:value="0.00204444444444444" calcext:value-type="float">
            <text:p>0,00204444444444444000</text:p>
          </table:table-cell>
          <table:table-cell table:formula="of:=[.D770]-[.D76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23" office:value-type="float" office:value="17687" calcext:value-type="float">
            <text:p>17687</text:p>
          </table:table-cell>
          <table:table-cell office:value-type="float" office:value="8640000" calcext:value-type="float">
            <text:p>8640000</text:p>
          </table:table-cell>
          <table:table-cell table:formula="of:=[.B770]/[.C770]" office:value-type="float" office:value="0.00204710648148148" calcext:value-type="float">
            <text:p>0,00204710648148148000</text:p>
          </table:table-cell>
          <table:table-cell table:formula="of:=[.D771]-[.D77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23" office:value-type="float" office:value="17710" calcext:value-type="float">
            <text:p>17710</text:p>
          </table:table-cell>
          <table:table-cell office:value-type="float" office:value="8640000" calcext:value-type="float">
            <text:p>8640000</text:p>
          </table:table-cell>
          <table:table-cell table:formula="of:=[.B771]/[.C771]" office:value-type="float" office:value="0.00204976851851852" calcext:value-type="float">
            <text:p>0,00204976851851852000</text:p>
          </table:table-cell>
          <table:table-cell table:formula="of:=[.D772]-[.D77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23" office:value-type="float" office:value="17733" calcext:value-type="float">
            <text:p>17733</text:p>
          </table:table-cell>
          <table:table-cell office:value-type="float" office:value="8640000" calcext:value-type="float">
            <text:p>8640000</text:p>
          </table:table-cell>
          <table:table-cell table:formula="of:=[.B772]/[.C772]" office:value-type="float" office:value="0.00205243055555556" calcext:value-type="float">
            <text:p>0,00205243055555556000</text:p>
          </table:table-cell>
          <table:table-cell table:formula="of:=[.D773]-[.D77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23" office:value-type="float" office:value="17756" calcext:value-type="float">
            <text:p>17756</text:p>
          </table:table-cell>
          <table:table-cell office:value-type="float" office:value="8640000" calcext:value-type="float">
            <text:p>8640000</text:p>
          </table:table-cell>
          <table:table-cell table:formula="of:=[.B773]/[.C773]" office:value-type="float" office:value="0.00205509259259259" calcext:value-type="float">
            <text:p>0,00205509259259259000</text:p>
          </table:table-cell>
          <table:table-cell table:formula="of:=[.D774]-[.D77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23" office:value-type="float" office:value="17779" calcext:value-type="float">
            <text:p>17779</text:p>
          </table:table-cell>
          <table:table-cell office:value-type="float" office:value="8640000" calcext:value-type="float">
            <text:p>8640000</text:p>
          </table:table-cell>
          <table:table-cell table:formula="of:=[.B774]/[.C774]" office:value-type="float" office:value="0.00205775462962963" calcext:value-type="float">
            <text:p>0,00205775462962963000</text:p>
          </table:table-cell>
          <table:table-cell table:formula="of:=[.D775]-[.D7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23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775]/[.C775]" office:value-type="float" office:value="0.00206041666666667" calcext:value-type="float">
            <text:p>0,00206041666666667000</text:p>
          </table:table-cell>
          <table:table-cell table:formula="of:=[.D776]-[.D77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23" office:value-type="float" office:value="17825" calcext:value-type="float">
            <text:p>17825</text:p>
          </table:table-cell>
          <table:table-cell office:value-type="float" office:value="8640000" calcext:value-type="float">
            <text:p>8640000</text:p>
          </table:table-cell>
          <table:table-cell table:formula="of:=[.B776]/[.C776]" office:value-type="float" office:value="0.0020630787037037" calcext:value-type="float">
            <text:p>0,00206307870370370000</text:p>
          </table:table-cell>
          <table:table-cell table:formula="of:=[.D777]-[.D77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23" office:value-type="float" office:value="17848" calcext:value-type="float">
            <text:p>17848</text:p>
          </table:table-cell>
          <table:table-cell office:value-type="float" office:value="8640000" calcext:value-type="float">
            <text:p>8640000</text:p>
          </table:table-cell>
          <table:table-cell table:formula="of:=[.B777]/[.C777]" office:value-type="float" office:value="0.00206574074074074" calcext:value-type="float">
            <text:p>0,00206574074074074000</text:p>
          </table:table-cell>
          <table:table-cell table:formula="of:=[.D778]-[.D77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23" office:value-type="float" office:value="17871" calcext:value-type="float">
            <text:p>17871</text:p>
          </table:table-cell>
          <table:table-cell office:value-type="float" office:value="8640000" calcext:value-type="float">
            <text:p>8640000</text:p>
          </table:table-cell>
          <table:table-cell table:formula="of:=[.B778]/[.C778]" office:value-type="float" office:value="0.00206840277777778" calcext:value-type="float">
            <text:p>0,00206840277777778000</text:p>
          </table:table-cell>
          <table:table-cell table:formula="of:=[.D779]-[.D77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23" office:value-type="float" office:value="17894" calcext:value-type="float">
            <text:p>17894</text:p>
          </table:table-cell>
          <table:table-cell office:value-type="float" office:value="8640000" calcext:value-type="float">
            <text:p>8640000</text:p>
          </table:table-cell>
          <table:table-cell table:formula="of:=[.B779]/[.C779]" office:value-type="float" office:value="0.00207106481481481" calcext:value-type="float">
            <text:p>0,00207106481481481000</text:p>
          </table:table-cell>
          <table:table-cell table:formula="of:=[.D780]-[.D7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23" office:value-type="float" office:value="17917" calcext:value-type="float">
            <text:p>17917</text:p>
          </table:table-cell>
          <table:table-cell office:value-type="float" office:value="8640000" calcext:value-type="float">
            <text:p>8640000</text:p>
          </table:table-cell>
          <table:table-cell table:formula="of:=[.B780]/[.C780]" office:value-type="float" office:value="0.00207372685185185" calcext:value-type="float">
            <text:p>0,00207372685185185000</text:p>
          </table:table-cell>
          <table:table-cell table:formula="of:=[.D781]-[.D78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23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781]/[.C781]" office:value-type="float" office:value="0.00207638888888889" calcext:value-type="float">
            <text:p>0,00207638888888889000</text:p>
          </table:table-cell>
          <table:table-cell table:formula="of:=[.D782]-[.D78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23" office:value-type="float" office:value="17963" calcext:value-type="float">
            <text:p>17963</text:p>
          </table:table-cell>
          <table:table-cell office:value-type="float" office:value="8640000" calcext:value-type="float">
            <text:p>8640000</text:p>
          </table:table-cell>
          <table:table-cell table:formula="of:=[.B782]/[.C782]" office:value-type="float" office:value="0.00207905092592593" calcext:value-type="float">
            <text:p>0,00207905092592593000</text:p>
          </table:table-cell>
          <table:table-cell table:formula="of:=[.D783]-[.D78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23" office:value-type="float" office:value="17986" calcext:value-type="float">
            <text:p>17986</text:p>
          </table:table-cell>
          <table:table-cell office:value-type="float" office:value="8640000" calcext:value-type="float">
            <text:p>8640000</text:p>
          </table:table-cell>
          <table:table-cell table:formula="of:=[.B783]/[.C783]" office:value-type="float" office:value="0.00208171296296296" calcext:value-type="float">
            <text:p>0,00208171296296296000</text:p>
          </table:table-cell>
          <table:table-cell table:formula="of:=[.D784]-[.D78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23" office:value-type="float" office:value="18009" calcext:value-type="float">
            <text:p>18009</text:p>
          </table:table-cell>
          <table:table-cell office:value-type="float" office:value="8640000" calcext:value-type="float">
            <text:p>8640000</text:p>
          </table:table-cell>
          <table:table-cell table:formula="of:=[.B784]/[.C784]" office:value-type="float" office:value="0.002084375" calcext:value-type="float">
            <text:p>0,00208437500000000000</text:p>
          </table:table-cell>
          <table:table-cell table:formula="of:=[.D785]-[.D7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23" office:value-type="float" office:value="18032" calcext:value-type="float">
            <text:p>18032</text:p>
          </table:table-cell>
          <table:table-cell office:value-type="float" office:value="8640000" calcext:value-type="float">
            <text:p>8640000</text:p>
          </table:table-cell>
          <table:table-cell table:formula="of:=[.B785]/[.C785]" office:value-type="float" office:value="0.00208703703703704" calcext:value-type="float">
            <text:p>0,00208703703703704000</text:p>
          </table:table-cell>
          <table:table-cell table:formula="of:=[.D786]-[.D78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23" office:value-type="float" office:value="18055" calcext:value-type="float">
            <text:p>18055</text:p>
          </table:table-cell>
          <table:table-cell office:value-type="float" office:value="8640000" calcext:value-type="float">
            <text:p>8640000</text:p>
          </table:table-cell>
          <table:table-cell table:formula="of:=[.B786]/[.C786]" office:value-type="float" office:value="0.00208969907407407" calcext:value-type="float">
            <text:p>0,00208969907407407000</text:p>
          </table:table-cell>
          <table:table-cell table:formula="of:=[.D787]-[.D7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23" office:value-type="float" office:value="18078" calcext:value-type="float">
            <text:p>18078</text:p>
          </table:table-cell>
          <table:table-cell office:value-type="float" office:value="8640000" calcext:value-type="float">
            <text:p>8640000</text:p>
          </table:table-cell>
          <table:table-cell table:formula="of:=[.B787]/[.C787]" office:value-type="float" office:value="0.00209236111111111" calcext:value-type="float">
            <text:p>0,00209236111111111000</text:p>
          </table:table-cell>
          <table:table-cell table:formula="of:=[.D788]-[.D78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23" office:value-type="float" office:value="18101" calcext:value-type="float">
            <text:p>18101</text:p>
          </table:table-cell>
          <table:table-cell office:value-type="float" office:value="8640000" calcext:value-type="float">
            <text:p>8640000</text:p>
          </table:table-cell>
          <table:table-cell table:formula="of:=[.B788]/[.C788]" office:value-type="float" office:value="0.00209502314814815" calcext:value-type="float">
            <text:p>0,00209502314814815000</text:p>
          </table:table-cell>
          <table:table-cell table:formula="of:=[.D789]-[.D78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23" office:value-type="float" office:value="18124" calcext:value-type="float">
            <text:p>18124</text:p>
          </table:table-cell>
          <table:table-cell office:value-type="float" office:value="8640000" calcext:value-type="float">
            <text:p>8640000</text:p>
          </table:table-cell>
          <table:table-cell table:formula="of:=[.B789]/[.C789]" office:value-type="float" office:value="0.00209768518518519" calcext:value-type="float">
            <text:p>0,00209768518518519000</text:p>
          </table:table-cell>
          <table:table-cell table:formula="of:=[.D790]-[.D78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23" office:value-type="float" office:value="18147" calcext:value-type="float">
            <text:p>18147</text:p>
          </table:table-cell>
          <table:table-cell office:value-type="float" office:value="8640000" calcext:value-type="float">
            <text:p>8640000</text:p>
          </table:table-cell>
          <table:table-cell table:formula="of:=[.B790]/[.C790]" office:value-type="float" office:value="0.00210034722222222" calcext:value-type="float">
            <text:p>0,00210034722222222000</text:p>
          </table:table-cell>
          <table:table-cell table:formula="of:=[.D791]-[.D79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23" office:value-type="float" office:value="18170" calcext:value-type="float">
            <text:p>18170</text:p>
          </table:table-cell>
          <table:table-cell office:value-type="float" office:value="8640000" calcext:value-type="float">
            <text:p>8640000</text:p>
          </table:table-cell>
          <table:table-cell table:formula="of:=[.B791]/[.C791]" office:value-type="float" office:value="0.00210300925925926" calcext:value-type="float">
            <text:p>0,00210300925925926000</text:p>
          </table:table-cell>
          <table:table-cell table:formula="of:=[.D792]-[.D79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23" office:value-type="float" office:value="18193" calcext:value-type="float">
            <text:p>18193</text:p>
          </table:table-cell>
          <table:table-cell office:value-type="float" office:value="8640000" calcext:value-type="float">
            <text:p>8640000</text:p>
          </table:table-cell>
          <table:table-cell table:formula="of:=[.B792]/[.C792]" office:value-type="float" office:value="0.0021056712962963" calcext:value-type="float">
            <text:p>0,00210567129629630000</text:p>
          </table:table-cell>
          <table:table-cell table:formula="of:=[.D793]-[.D79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23" office:value-type="float" office:value="18216" calcext:value-type="float">
            <text:p>18216</text:p>
          </table:table-cell>
          <table:table-cell office:value-type="float" office:value="8640000" calcext:value-type="float">
            <text:p>8640000</text:p>
          </table:table-cell>
          <table:table-cell table:formula="of:=[.B793]/[.C793]" office:value-type="float" office:value="0.00210833333333333" calcext:value-type="float">
            <text:p>0,00210833333333333000</text:p>
          </table:table-cell>
          <table:table-cell table:formula="of:=[.D794]-[.D7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23" office:value-type="float" office:value="18239" calcext:value-type="float">
            <text:p>18239</text:p>
          </table:table-cell>
          <table:table-cell office:value-type="float" office:value="8640000" calcext:value-type="float">
            <text:p>8640000</text:p>
          </table:table-cell>
          <table:table-cell table:formula="of:=[.B794]/[.C794]" office:value-type="float" office:value="0.00211099537037037" calcext:value-type="float">
            <text:p>0,00211099537037037000</text:p>
          </table:table-cell>
          <table:table-cell table:formula="of:=[.D795]-[.D79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23" office:value-type="float" office:value="18262" calcext:value-type="float">
            <text:p>18262</text:p>
          </table:table-cell>
          <table:table-cell office:value-type="float" office:value="8640000" calcext:value-type="float">
            <text:p>8640000</text:p>
          </table:table-cell>
          <table:table-cell table:formula="of:=[.B795]/[.C795]" office:value-type="float" office:value="0.00211365740740741" calcext:value-type="float">
            <text:p>0,00211365740740741000</text:p>
          </table:table-cell>
          <table:table-cell table:formula="of:=[.D796]-[.D79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23" office:value-type="float" office:value="18285" calcext:value-type="float">
            <text:p>18285</text:p>
          </table:table-cell>
          <table:table-cell office:value-type="float" office:value="8640000" calcext:value-type="float">
            <text:p>8640000</text:p>
          </table:table-cell>
          <table:table-cell table:formula="of:=[.B796]/[.C796]" office:value-type="float" office:value="0.00211631944444444" calcext:value-type="float">
            <text:p>0,00211631944444444000</text:p>
          </table:table-cell>
          <table:table-cell table:formula="of:=[.D797]-[.D79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23" office:value-type="float" office:value="18308" calcext:value-type="float">
            <text:p>18308</text:p>
          </table:table-cell>
          <table:table-cell office:value-type="float" office:value="8640000" calcext:value-type="float">
            <text:p>8640000</text:p>
          </table:table-cell>
          <table:table-cell table:formula="of:=[.B797]/[.C797]" office:value-type="float" office:value="0.00211898148148148" calcext:value-type="float">
            <text:p>0,00211898148148148000</text:p>
          </table:table-cell>
          <table:table-cell table:formula="of:=[.D798]-[.D79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23" office:value-type="float" office:value="18331" calcext:value-type="float">
            <text:p>18331</text:p>
          </table:table-cell>
          <table:table-cell office:value-type="float" office:value="8640000" calcext:value-type="float">
            <text:p>8640000</text:p>
          </table:table-cell>
          <table:table-cell table:formula="of:=[.B798]/[.C798]" office:value-type="float" office:value="0.00212164351851852" calcext:value-type="float">
            <text:p>0,00212164351851852000</text:p>
          </table:table-cell>
          <table:table-cell table:formula="of:=[.D799]-[.D7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23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799]/[.C799]" office:value-type="float" office:value="0.00212430555555556" calcext:value-type="float">
            <text:p>0,00212430555555556000</text:p>
          </table:table-cell>
          <table:table-cell table:formula="of:=[.D800]-[.D79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23" office:value-type="float" office:value="18377" calcext:value-type="float">
            <text:p>18377</text:p>
          </table:table-cell>
          <table:table-cell office:value-type="float" office:value="8640000" calcext:value-type="float">
            <text:p>8640000</text:p>
          </table:table-cell>
          <table:table-cell table:formula="of:=[.B800]/[.C800]" office:value-type="float" office:value="0.00212696759259259" calcext:value-type="float">
            <text:p>0,00212696759259259000</text:p>
          </table:table-cell>
          <table:table-cell table:formula="of:=[.D801]-[.D8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23" office:value-type="float" office:value="18400" calcext:value-type="float">
            <text:p>18400</text:p>
          </table:table-cell>
          <table:table-cell office:value-type="float" office:value="8640000" calcext:value-type="float">
            <text:p>8640000</text:p>
          </table:table-cell>
          <table:table-cell table:formula="of:=[.B801]/[.C801]" office:value-type="float" office:value="0.00212962962962963" calcext:value-type="float">
            <text:p>0,00212962962962963000</text:p>
          </table:table-cell>
          <table:table-cell table:formula="of:=[.D802]-[.D80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23" office:value-type="float" office:value="18423" calcext:value-type="float">
            <text:p>18423</text:p>
          </table:table-cell>
          <table:table-cell office:value-type="float" office:value="8640000" calcext:value-type="float">
            <text:p>8640000</text:p>
          </table:table-cell>
          <table:table-cell table:formula="of:=[.B802]/[.C802]" office:value-type="float" office:value="0.00213229166666667" calcext:value-type="float">
            <text:p>0,00213229166666667000</text:p>
          </table:table-cell>
          <table:table-cell table:formula="of:=[.D803]-[.D80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23" office:value-type="float" office:value="18446" calcext:value-type="float">
            <text:p>18446</text:p>
          </table:table-cell>
          <table:table-cell office:value-type="float" office:value="8640000" calcext:value-type="float">
            <text:p>8640000</text:p>
          </table:table-cell>
          <table:table-cell table:formula="of:=[.B803]/[.C803]" office:value-type="float" office:value="0.0021349537037037" calcext:value-type="float">
            <text:p>0,00213495370370370000</text:p>
          </table:table-cell>
          <table:table-cell table:formula="of:=[.D804]-[.D80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23" office:value-type="float" office:value="18469" calcext:value-type="float">
            <text:p>18469</text:p>
          </table:table-cell>
          <table:table-cell office:value-type="float" office:value="8640000" calcext:value-type="float">
            <text:p>8640000</text:p>
          </table:table-cell>
          <table:table-cell table:formula="of:=[.B804]/[.C804]" office:value-type="float" office:value="0.00213761574074074" calcext:value-type="float">
            <text:p>0,00213761574074074000</text:p>
          </table:table-cell>
          <table:table-cell table:formula="of:=[.D805]-[.D80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23" office:value-type="float" office:value="18492" calcext:value-type="float">
            <text:p>18492</text:p>
          </table:table-cell>
          <table:table-cell office:value-type="float" office:value="8640000" calcext:value-type="float">
            <text:p>8640000</text:p>
          </table:table-cell>
          <table:table-cell table:formula="of:=[.B805]/[.C805]" office:value-type="float" office:value="0.00214027777777778" calcext:value-type="float">
            <text:p>0,00214027777777778000</text:p>
          </table:table-cell>
          <table:table-cell table:formula="of:=[.D806]-[.D80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23" office:value-type="float" office:value="18515" calcext:value-type="float">
            <text:p>18515</text:p>
          </table:table-cell>
          <table:table-cell office:value-type="float" office:value="8640000" calcext:value-type="float">
            <text:p>8640000</text:p>
          </table:table-cell>
          <table:table-cell table:formula="of:=[.B806]/[.C806]" office:value-type="float" office:value="0.00214293981481482" calcext:value-type="float">
            <text:p>0,00214293981481482000</text:p>
          </table:table-cell>
          <table:table-cell table:formula="of:=[.D807]-[.D80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23" office:value-type="float" office:value="18538" calcext:value-type="float">
            <text:p>18538</text:p>
          </table:table-cell>
          <table:table-cell office:value-type="float" office:value="8640000" calcext:value-type="float">
            <text:p>8640000</text:p>
          </table:table-cell>
          <table:table-cell table:formula="of:=[.B807]/[.C807]" office:value-type="float" office:value="0.00214560185185185" calcext:value-type="float">
            <text:p>0,00214560185185185000</text:p>
          </table:table-cell>
          <table:table-cell table:formula="of:=[.D808]-[.D8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23" office:value-type="float" office:value="18561" calcext:value-type="float">
            <text:p>18561</text:p>
          </table:table-cell>
          <table:table-cell office:value-type="float" office:value="8640000" calcext:value-type="float">
            <text:p>8640000</text:p>
          </table:table-cell>
          <table:table-cell table:formula="of:=[.B808]/[.C808]" office:value-type="float" office:value="0.00214826388888889" calcext:value-type="float">
            <text:p>0,00214826388888889000</text:p>
          </table:table-cell>
          <table:table-cell table:formula="of:=[.D809]-[.D80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23" office:value-type="float" office:value="18584" calcext:value-type="float">
            <text:p>18584</text:p>
          </table:table-cell>
          <table:table-cell office:value-type="float" office:value="8640000" calcext:value-type="float">
            <text:p>8640000</text:p>
          </table:table-cell>
          <table:table-cell table:formula="of:=[.B809]/[.C809]" office:value-type="float" office:value="0.00215092592592593" calcext:value-type="float">
            <text:p>0,00215092592592593000</text:p>
          </table:table-cell>
          <table:table-cell table:formula="of:=[.D810]-[.D80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23" office:value-type="float" office:value="18607" calcext:value-type="float">
            <text:p>18607</text:p>
          </table:table-cell>
          <table:table-cell office:value-type="float" office:value="8640000" calcext:value-type="float">
            <text:p>8640000</text:p>
          </table:table-cell>
          <table:table-cell table:formula="of:=[.B810]/[.C810]" office:value-type="float" office:value="0.00215358796296296" calcext:value-type="float">
            <text:p>0,00215358796296296000</text:p>
          </table:table-cell>
          <table:table-cell table:formula="of:=[.D811]-[.D81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23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811]/[.C811]" office:value-type="float" office:value="0.00215625" calcext:value-type="float">
            <text:p>0,00215625000000000000</text:p>
          </table:table-cell>
          <table:table-cell table:formula="of:=[.D812]-[.D81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23" office:value-type="float" office:value="18653" calcext:value-type="float">
            <text:p>18653</text:p>
          </table:table-cell>
          <table:table-cell office:value-type="float" office:value="8640000" calcext:value-type="float">
            <text:p>8640000</text:p>
          </table:table-cell>
          <table:table-cell table:formula="of:=[.B812]/[.C812]" office:value-type="float" office:value="0.00215891203703704" calcext:value-type="float">
            <text:p>0,00215891203703704000</text:p>
          </table:table-cell>
          <table:table-cell table:formula="of:=[.D813]-[.D8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23" office:value-type="float" office:value="18676" calcext:value-type="float">
            <text:p>18676</text:p>
          </table:table-cell>
          <table:table-cell office:value-type="float" office:value="8640000" calcext:value-type="float">
            <text:p>8640000</text:p>
          </table:table-cell>
          <table:table-cell table:formula="of:=[.B813]/[.C813]" office:value-type="float" office:value="0.00216157407407407" calcext:value-type="float">
            <text:p>0,00216157407407407000</text:p>
          </table:table-cell>
          <table:table-cell table:formula="of:=[.D814]-[.D8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23" office:value-type="float" office:value="18699" calcext:value-type="float">
            <text:p>18699</text:p>
          </table:table-cell>
          <table:table-cell office:value-type="float" office:value="8640000" calcext:value-type="float">
            <text:p>8640000</text:p>
          </table:table-cell>
          <table:table-cell table:formula="of:=[.B814]/[.C814]" office:value-type="float" office:value="0.00216423611111111" calcext:value-type="float">
            <text:p>0,00216423611111111000</text:p>
          </table:table-cell>
          <table:table-cell table:formula="of:=[.D815]-[.D81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23" office:value-type="float" office:value="18722" calcext:value-type="float">
            <text:p>18722</text:p>
          </table:table-cell>
          <table:table-cell office:value-type="float" office:value="8640000" calcext:value-type="float">
            <text:p>8640000</text:p>
          </table:table-cell>
          <table:table-cell table:formula="of:=[.B815]/[.C815]" office:value-type="float" office:value="0.00216689814814815" calcext:value-type="float">
            <text:p>0,00216689814814815000</text:p>
          </table:table-cell>
          <table:table-cell table:formula="of:=[.D816]-[.D81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23" office:value-type="float" office:value="18745" calcext:value-type="float">
            <text:p>18745</text:p>
          </table:table-cell>
          <table:table-cell office:value-type="float" office:value="8640000" calcext:value-type="float">
            <text:p>8640000</text:p>
          </table:table-cell>
          <table:table-cell table:formula="of:=[.B816]/[.C816]" office:value-type="float" office:value="0.00216956018518519" calcext:value-type="float">
            <text:p>0,00216956018518519000</text:p>
          </table:table-cell>
          <table:table-cell table:formula="of:=[.D817]-[.D81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23" office:value-type="float" office:value="18768" calcext:value-type="float">
            <text:p>18768</text:p>
          </table:table-cell>
          <table:table-cell office:value-type="float" office:value="8640000" calcext:value-type="float">
            <text:p>8640000</text:p>
          </table:table-cell>
          <table:table-cell table:formula="of:=[.B817]/[.C817]" office:value-type="float" office:value="0.00217222222222222" calcext:value-type="float">
            <text:p>0,00217222222222222000</text:p>
          </table:table-cell>
          <table:table-cell table:formula="of:=[.D818]-[.D81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23" office:value-type="float" office:value="18791" calcext:value-type="float">
            <text:p>18791</text:p>
          </table:table-cell>
          <table:table-cell office:value-type="float" office:value="8640000" calcext:value-type="float">
            <text:p>8640000</text:p>
          </table:table-cell>
          <table:table-cell table:formula="of:=[.B818]/[.C818]" office:value-type="float" office:value="0.00217488425925926" calcext:value-type="float">
            <text:p>0,00217488425925926000</text:p>
          </table:table-cell>
          <table:table-cell table:formula="of:=[.D819]-[.D81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23" office:value-type="float" office:value="18814" calcext:value-type="float">
            <text:p>18814</text:p>
          </table:table-cell>
          <table:table-cell office:value-type="float" office:value="8640000" calcext:value-type="float">
            <text:p>8640000</text:p>
          </table:table-cell>
          <table:table-cell table:formula="of:=[.B819]/[.C819]" office:value-type="float" office:value="0.0021775462962963" calcext:value-type="float">
            <text:p>0,00217754629629630000</text:p>
          </table:table-cell>
          <table:table-cell table:formula="of:=[.D820]-[.D8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23" office:value-type="float" office:value="18837" calcext:value-type="float">
            <text:p>18837</text:p>
          </table:table-cell>
          <table:table-cell office:value-type="float" office:value="8640000" calcext:value-type="float">
            <text:p>8640000</text:p>
          </table:table-cell>
          <table:table-cell table:formula="of:=[.B820]/[.C820]" office:value-type="float" office:value="0.00218020833333333" calcext:value-type="float">
            <text:p>0,00218020833333333000</text:p>
          </table:table-cell>
          <table:table-cell table:formula="of:=[.D821]-[.D82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23" office:value-type="float" office:value="18860" calcext:value-type="float">
            <text:p>18860</text:p>
          </table:table-cell>
          <table:table-cell office:value-type="float" office:value="8640000" calcext:value-type="float">
            <text:p>8640000</text:p>
          </table:table-cell>
          <table:table-cell table:formula="of:=[.B821]/[.C821]" office:value-type="float" office:value="0.00218287037037037" calcext:value-type="float">
            <text:p>0,00218287037037037000</text:p>
          </table:table-cell>
          <table:table-cell table:formula="of:=[.D822]-[.D8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23" office:value-type="float" office:value="18883" calcext:value-type="float">
            <text:p>18883</text:p>
          </table:table-cell>
          <table:table-cell office:value-type="float" office:value="8640000" calcext:value-type="float">
            <text:p>8640000</text:p>
          </table:table-cell>
          <table:table-cell table:formula="of:=[.B822]/[.C822]" office:value-type="float" office:value="0.00218553240740741" calcext:value-type="float">
            <text:p>0,00218553240740741000</text:p>
          </table:table-cell>
          <table:table-cell table:formula="of:=[.D823]-[.D82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23" office:value-type="float" office:value="18906" calcext:value-type="float">
            <text:p>18906</text:p>
          </table:table-cell>
          <table:table-cell office:value-type="float" office:value="8640000" calcext:value-type="float">
            <text:p>8640000</text:p>
          </table:table-cell>
          <table:table-cell table:formula="of:=[.B823]/[.C823]" office:value-type="float" office:value="0.00218819444444444" calcext:value-type="float">
            <text:p>0,00218819444444444000</text:p>
          </table:table-cell>
          <table:table-cell table:formula="of:=[.D824]-[.D82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23" office:value-type="float" office:value="18929" calcext:value-type="float">
            <text:p>18929</text:p>
          </table:table-cell>
          <table:table-cell office:value-type="float" office:value="8640000" calcext:value-type="float">
            <text:p>8640000</text:p>
          </table:table-cell>
          <table:table-cell table:formula="of:=[.B824]/[.C824]" office:value-type="float" office:value="0.00219085648148148" calcext:value-type="float">
            <text:p>0,00219085648148148000</text:p>
          </table:table-cell>
          <table:table-cell table:formula="of:=[.D825]-[.D82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23" office:value-type="float" office:value="18952" calcext:value-type="float">
            <text:p>18952</text:p>
          </table:table-cell>
          <table:table-cell office:value-type="float" office:value="8640000" calcext:value-type="float">
            <text:p>8640000</text:p>
          </table:table-cell>
          <table:table-cell table:formula="of:=[.B825]/[.C825]" office:value-type="float" office:value="0.00219351851851852" calcext:value-type="float">
            <text:p>0,00219351851851852000</text:p>
          </table:table-cell>
          <table:table-cell table:formula="of:=[.D826]-[.D82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23" office:value-type="float" office:value="18975" calcext:value-type="float">
            <text:p>18975</text:p>
          </table:table-cell>
          <table:table-cell office:value-type="float" office:value="8640000" calcext:value-type="float">
            <text:p>8640000</text:p>
          </table:table-cell>
          <table:table-cell table:formula="of:=[.B826]/[.C826]" office:value-type="float" office:value="0.00219618055555556" calcext:value-type="float">
            <text:p>0,00219618055555556000</text:p>
          </table:table-cell>
          <table:table-cell table:formula="of:=[.D827]-[.D8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23" office:value-type="float" office:value="18998" calcext:value-type="float">
            <text:p>18998</text:p>
          </table:table-cell>
          <table:table-cell office:value-type="float" office:value="8640000" calcext:value-type="float">
            <text:p>8640000</text:p>
          </table:table-cell>
          <table:table-cell table:formula="of:=[.B827]/[.C827]" office:value-type="float" office:value="0.00219884259259259" calcext:value-type="float">
            <text:p>0,00219884259259259000</text:p>
          </table:table-cell>
          <table:table-cell table:formula="of:=[.D828]-[.D82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23" office:value-type="float" office:value="19021" calcext:value-type="float">
            <text:p>19021</text:p>
          </table:table-cell>
          <table:table-cell office:value-type="float" office:value="8640000" calcext:value-type="float">
            <text:p>8640000</text:p>
          </table:table-cell>
          <table:table-cell table:formula="of:=[.B828]/[.C828]" office:value-type="float" office:value="0.00220150462962963" calcext:value-type="float">
            <text:p>0,00220150462962963000</text:p>
          </table:table-cell>
          <table:table-cell table:formula="of:=[.D829]-[.D82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23" office:value-type="float" office:value="19044" calcext:value-type="float">
            <text:p>19044</text:p>
          </table:table-cell>
          <table:table-cell office:value-type="float" office:value="8640000" calcext:value-type="float">
            <text:p>8640000</text:p>
          </table:table-cell>
          <table:table-cell table:formula="of:=[.B829]/[.C829]" office:value-type="float" office:value="0.00220416666666667" calcext:value-type="float">
            <text:p>0,00220416666666667000</text:p>
          </table:table-cell>
          <table:table-cell table:formula="of:=[.D830]-[.D82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23" office:value-type="float" office:value="19067" calcext:value-type="float">
            <text:p>19067</text:p>
          </table:table-cell>
          <table:table-cell office:value-type="float" office:value="8640000" calcext:value-type="float">
            <text:p>8640000</text:p>
          </table:table-cell>
          <table:table-cell table:formula="of:=[.B830]/[.C830]" office:value-type="float" office:value="0.0022068287037037" calcext:value-type="float">
            <text:p>0,00220682870370370000</text:p>
          </table:table-cell>
          <table:table-cell table:formula="of:=[.D831]-[.D83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23" office:value-type="float" office:value="19090" calcext:value-type="float">
            <text:p>19090</text:p>
          </table:table-cell>
          <table:table-cell office:value-type="float" office:value="8640000" calcext:value-type="float">
            <text:p>8640000</text:p>
          </table:table-cell>
          <table:table-cell table:formula="of:=[.B831]/[.C831]" office:value-type="float" office:value="0.00220949074074074" calcext:value-type="float">
            <text:p>0,00220949074074074000</text:p>
          </table:table-cell>
          <table:table-cell table:formula="of:=[.D832]-[.D8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23" office:value-type="float" office:value="19113" calcext:value-type="float">
            <text:p>19113</text:p>
          </table:table-cell>
          <table:table-cell office:value-type="float" office:value="8640000" calcext:value-type="float">
            <text:p>8640000</text:p>
          </table:table-cell>
          <table:table-cell table:formula="of:=[.B832]/[.C832]" office:value-type="float" office:value="0.00221215277777778" calcext:value-type="float">
            <text:p>0,00221215277777778000</text:p>
          </table:table-cell>
          <table:table-cell table:formula="of:=[.D833]-[.D83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23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833]/[.C833]" office:value-type="float" office:value="0.00221481481481482" calcext:value-type="float">
            <text:p>0,00221481481481482000</text:p>
          </table:table-cell>
          <table:table-cell table:formula="of:=[.D834]-[.D8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23" office:value-type="float" office:value="19159" calcext:value-type="float">
            <text:p>19159</text:p>
          </table:table-cell>
          <table:table-cell office:value-type="float" office:value="8640000" calcext:value-type="float">
            <text:p>8640000</text:p>
          </table:table-cell>
          <table:table-cell table:formula="of:=[.B834]/[.C834]" office:value-type="float" office:value="0.00221747685185185" calcext:value-type="float">
            <text:p>0,00221747685185185000</text:p>
          </table:table-cell>
          <table:table-cell table:formula="of:=[.D835]-[.D83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23" office:value-type="float" office:value="19182" calcext:value-type="float">
            <text:p>19182</text:p>
          </table:table-cell>
          <table:table-cell office:value-type="float" office:value="8640000" calcext:value-type="float">
            <text:p>8640000</text:p>
          </table:table-cell>
          <table:table-cell table:formula="of:=[.B835]/[.C835]" office:value-type="float" office:value="0.00222013888888889" calcext:value-type="float">
            <text:p>0,00222013888888889000</text:p>
          </table:table-cell>
          <table:table-cell table:formula="of:=[.D836]-[.D8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23" office:value-type="float" office:value="19205" calcext:value-type="float">
            <text:p>19205</text:p>
          </table:table-cell>
          <table:table-cell office:value-type="float" office:value="8640000" calcext:value-type="float">
            <text:p>8640000</text:p>
          </table:table-cell>
          <table:table-cell table:formula="of:=[.B836]/[.C836]" office:value-type="float" office:value="0.00222280092592593" calcext:value-type="float">
            <text:p>0,00222280092592593000</text:p>
          </table:table-cell>
          <table:table-cell table:formula="of:=[.D837]-[.D83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23" office:value-type="float" office:value="19228" calcext:value-type="float">
            <text:p>19228</text:p>
          </table:table-cell>
          <table:table-cell office:value-type="float" office:value="8640000" calcext:value-type="float">
            <text:p>8640000</text:p>
          </table:table-cell>
          <table:table-cell table:formula="of:=[.B837]/[.C837]" office:value-type="float" office:value="0.00222546296296296" calcext:value-type="float">
            <text:p>0,00222546296296296000</text:p>
          </table:table-cell>
          <table:table-cell table:formula="of:=[.D838]-[.D8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23" office:value-type="float" office:value="19251" calcext:value-type="float">
            <text:p>19251</text:p>
          </table:table-cell>
          <table:table-cell office:value-type="float" office:value="8640000" calcext:value-type="float">
            <text:p>8640000</text:p>
          </table:table-cell>
          <table:table-cell table:formula="of:=[.B838]/[.C838]" office:value-type="float" office:value="0.002228125" calcext:value-type="float">
            <text:p>0,00222812500000000000</text:p>
          </table:table-cell>
          <table:table-cell table:formula="of:=[.D839]-[.D83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23" office:value-type="float" office:value="19274" calcext:value-type="float">
            <text:p>19274</text:p>
          </table:table-cell>
          <table:table-cell office:value-type="float" office:value="8640000" calcext:value-type="float">
            <text:p>8640000</text:p>
          </table:table-cell>
          <table:table-cell table:formula="of:=[.B839]/[.C839]" office:value-type="float" office:value="0.00223078703703704" calcext:value-type="float">
            <text:p>0,00223078703703704000</text:p>
          </table:table-cell>
          <table:table-cell table:formula="of:=[.D840]-[.D83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23" office:value-type="float" office:value="19297" calcext:value-type="float">
            <text:p>19297</text:p>
          </table:table-cell>
          <table:table-cell office:value-type="float" office:value="8640000" calcext:value-type="float">
            <text:p>8640000</text:p>
          </table:table-cell>
          <table:table-cell table:formula="of:=[.B840]/[.C840]" office:value-type="float" office:value="0.00223344907407407" calcext:value-type="float">
            <text:p>0,00223344907407407000</text:p>
          </table:table-cell>
          <table:table-cell table:formula="of:=[.D841]-[.D8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23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841]/[.C841]" office:value-type="float" office:value="0.00223611111111111" calcext:value-type="float">
            <text:p>0,00223611111111111000</text:p>
          </table:table-cell>
          <table:table-cell table:formula="of:=[.D842]-[.D84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23" office:value-type="float" office:value="19343" calcext:value-type="float">
            <text:p>19343</text:p>
          </table:table-cell>
          <table:table-cell office:value-type="float" office:value="8640000" calcext:value-type="float">
            <text:p>8640000</text:p>
          </table:table-cell>
          <table:table-cell table:formula="of:=[.B842]/[.C842]" office:value-type="float" office:value="0.00223877314814815" calcext:value-type="float">
            <text:p>0,00223877314814815000</text:p>
          </table:table-cell>
          <table:table-cell table:formula="of:=[.D843]-[.D84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23" office:value-type="float" office:value="19366" calcext:value-type="float">
            <text:p>19366</text:p>
          </table:table-cell>
          <table:table-cell office:value-type="float" office:value="8640000" calcext:value-type="float">
            <text:p>8640000</text:p>
          </table:table-cell>
          <table:table-cell table:formula="of:=[.B843]/[.C843]" office:value-type="float" office:value="0.00224143518518519" calcext:value-type="float">
            <text:p>0,00224143518518519000</text:p>
          </table:table-cell>
          <table:table-cell table:formula="of:=[.D844]-[.D84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23" office:value-type="float" office:value="19389" calcext:value-type="float">
            <text:p>19389</text:p>
          </table:table-cell>
          <table:table-cell office:value-type="float" office:value="8640000" calcext:value-type="float">
            <text:p>8640000</text:p>
          </table:table-cell>
          <table:table-cell table:formula="of:=[.B844]/[.C844]" office:value-type="float" office:value="0.00224409722222222" calcext:value-type="float">
            <text:p>0,00224409722222222000</text:p>
          </table:table-cell>
          <table:table-cell table:formula="of:=[.D845]-[.D84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23" office:value-type="float" office:value="19412" calcext:value-type="float">
            <text:p>19412</text:p>
          </table:table-cell>
          <table:table-cell office:value-type="float" office:value="8640000" calcext:value-type="float">
            <text:p>8640000</text:p>
          </table:table-cell>
          <table:table-cell table:formula="of:=[.B845]/[.C845]" office:value-type="float" office:value="0.00224675925925926" calcext:value-type="float">
            <text:p>0,00224675925925926000</text:p>
          </table:table-cell>
          <table:table-cell table:formula="of:=[.D846]-[.D84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23" office:value-type="float" office:value="19435" calcext:value-type="float">
            <text:p>19435</text:p>
          </table:table-cell>
          <table:table-cell office:value-type="float" office:value="8640000" calcext:value-type="float">
            <text:p>8640000</text:p>
          </table:table-cell>
          <table:table-cell table:formula="of:=[.B846]/[.C846]" office:value-type="float" office:value="0.0022494212962963" calcext:value-type="float">
            <text:p>0,00224942129629630000</text:p>
          </table:table-cell>
          <table:table-cell table:formula="of:=[.D847]-[.D8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23" office:value-type="float" office:value="19458" calcext:value-type="float">
            <text:p>19458</text:p>
          </table:table-cell>
          <table:table-cell office:value-type="float" office:value="8640000" calcext:value-type="float">
            <text:p>8640000</text:p>
          </table:table-cell>
          <table:table-cell table:formula="of:=[.B847]/[.C847]" office:value-type="float" office:value="0.00225208333333333" calcext:value-type="float">
            <text:p>0,00225208333333333000</text:p>
          </table:table-cell>
          <table:table-cell table:formula="of:=[.D848]-[.D84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23" office:value-type="float" office:value="19481" calcext:value-type="float">
            <text:p>19481</text:p>
          </table:table-cell>
          <table:table-cell office:value-type="float" office:value="8640000" calcext:value-type="float">
            <text:p>8640000</text:p>
          </table:table-cell>
          <table:table-cell table:formula="of:=[.B848]/[.C848]" office:value-type="float" office:value="0.00225474537037037" calcext:value-type="float">
            <text:p>0,00225474537037037000</text:p>
          </table:table-cell>
          <table:table-cell table:formula="of:=[.D849]-[.D84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23" office:value-type="float" office:value="19504" calcext:value-type="float">
            <text:p>19504</text:p>
          </table:table-cell>
          <table:table-cell office:value-type="float" office:value="8640000" calcext:value-type="float">
            <text:p>8640000</text:p>
          </table:table-cell>
          <table:table-cell table:formula="of:=[.B849]/[.C849]" office:value-type="float" office:value="0.00225740740740741" calcext:value-type="float">
            <text:p>0,00225740740740741000</text:p>
          </table:table-cell>
          <table:table-cell table:formula="of:=[.D850]-[.D84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23" office:value-type="float" office:value="19527" calcext:value-type="float">
            <text:p>19527</text:p>
          </table:table-cell>
          <table:table-cell office:value-type="float" office:value="8640000" calcext:value-type="float">
            <text:p>8640000</text:p>
          </table:table-cell>
          <table:table-cell table:formula="of:=[.B850]/[.C850]" office:value-type="float" office:value="0.00226006944444444" calcext:value-type="float">
            <text:p>0,00226006944444444000</text:p>
          </table:table-cell>
          <table:table-cell table:formula="of:=[.D851]-[.D85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23" office:value-type="float" office:value="19550" calcext:value-type="float">
            <text:p>19550</text:p>
          </table:table-cell>
          <table:table-cell office:value-type="float" office:value="8640000" calcext:value-type="float">
            <text:p>8640000</text:p>
          </table:table-cell>
          <table:table-cell table:formula="of:=[.B851]/[.C851]" office:value-type="float" office:value="0.00226273148148148" calcext:value-type="float">
            <text:p>0,00226273148148148000</text:p>
          </table:table-cell>
          <table:table-cell table:formula="of:=[.D852]-[.D85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23" office:value-type="float" office:value="19573" calcext:value-type="float">
            <text:p>19573</text:p>
          </table:table-cell>
          <table:table-cell office:value-type="float" office:value="8640000" calcext:value-type="float">
            <text:p>8640000</text:p>
          </table:table-cell>
          <table:table-cell table:formula="of:=[.B852]/[.C852]" office:value-type="float" office:value="0.00226539351851852" calcext:value-type="float">
            <text:p>0,00226539351851852000</text:p>
          </table:table-cell>
          <table:table-cell table:formula="of:=[.D853]-[.D85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23" office:value-type="float" office:value="19596" calcext:value-type="float">
            <text:p>19596</text:p>
          </table:table-cell>
          <table:table-cell office:value-type="float" office:value="8640000" calcext:value-type="float">
            <text:p>8640000</text:p>
          </table:table-cell>
          <table:table-cell table:formula="of:=[.B853]/[.C853]" office:value-type="float" office:value="0.00226805555555556" calcext:value-type="float">
            <text:p>0,00226805555555556000</text:p>
          </table:table-cell>
          <table:table-cell table:formula="of:=[.D854]-[.D85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23" office:value-type="float" office:value="19619" calcext:value-type="float">
            <text:p>19619</text:p>
          </table:table-cell>
          <table:table-cell office:value-type="float" office:value="8640000" calcext:value-type="float">
            <text:p>8640000</text:p>
          </table:table-cell>
          <table:table-cell table:formula="of:=[.B854]/[.C854]" office:value-type="float" office:value="0.00227071759259259" calcext:value-type="float">
            <text:p>0,00227071759259259000</text:p>
          </table:table-cell>
          <table:table-cell table:formula="of:=[.D855]-[.D8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23" office:value-type="float" office:value="19642" calcext:value-type="float">
            <text:p>19642</text:p>
          </table:table-cell>
          <table:table-cell office:value-type="float" office:value="8640000" calcext:value-type="float">
            <text:p>8640000</text:p>
          </table:table-cell>
          <table:table-cell table:formula="of:=[.B855]/[.C855]" office:value-type="float" office:value="0.00227337962962963" calcext:value-type="float">
            <text:p>0,00227337962962963000</text:p>
          </table:table-cell>
          <table:table-cell table:formula="of:=[.D856]-[.D85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23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856]/[.C856]" office:value-type="float" office:value="0.00227604166666667" calcext:value-type="float">
            <text:p>0,00227604166666667000</text:p>
          </table:table-cell>
          <table:table-cell table:formula="of:=[.D857]-[.D85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23" office:value-type="float" office:value="19688" calcext:value-type="float">
            <text:p>19688</text:p>
          </table:table-cell>
          <table:table-cell office:value-type="float" office:value="8640000" calcext:value-type="float">
            <text:p>8640000</text:p>
          </table:table-cell>
          <table:table-cell table:formula="of:=[.B857]/[.C857]" office:value-type="float" office:value="0.0022787037037037" calcext:value-type="float">
            <text:p>0,00227870370370370000</text:p>
          </table:table-cell>
          <table:table-cell table:formula="of:=[.D858]-[.D85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23" office:value-type="float" office:value="19711" calcext:value-type="float">
            <text:p>19711</text:p>
          </table:table-cell>
          <table:table-cell office:value-type="float" office:value="8640000" calcext:value-type="float">
            <text:p>8640000</text:p>
          </table:table-cell>
          <table:table-cell table:formula="of:=[.B858]/[.C858]" office:value-type="float" office:value="0.00228136574074074" calcext:value-type="float">
            <text:p>0,00228136574074074000</text:p>
          </table:table-cell>
          <table:table-cell table:formula="of:=[.D859]-[.D85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23" office:value-type="float" office:value="19734" calcext:value-type="float">
            <text:p>19734</text:p>
          </table:table-cell>
          <table:table-cell office:value-type="float" office:value="8640000" calcext:value-type="float">
            <text:p>8640000</text:p>
          </table:table-cell>
          <table:table-cell table:formula="of:=[.B859]/[.C859]" office:value-type="float" office:value="0.00228402777777778" calcext:value-type="float">
            <text:p>0,00228402777777778000</text:p>
          </table:table-cell>
          <table:table-cell table:formula="of:=[.D860]-[.D85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23" office:value-type="float" office:value="19757" calcext:value-type="float">
            <text:p>19757</text:p>
          </table:table-cell>
          <table:table-cell office:value-type="float" office:value="8640000" calcext:value-type="float">
            <text:p>8640000</text:p>
          </table:table-cell>
          <table:table-cell table:formula="of:=[.B860]/[.C860]" office:value-type="float" office:value="0.00228668981481481" calcext:value-type="float">
            <text:p>0,00228668981481481000</text:p>
          </table:table-cell>
          <table:table-cell table:formula="of:=[.D861]-[.D8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23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861]/[.C861]" office:value-type="float" office:value="0.00228935185185185" calcext:value-type="float">
            <text:p>0,00228935185185185000</text:p>
          </table:table-cell>
          <table:table-cell table:formula="of:=[.D862]-[.D86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23" office:value-type="float" office:value="19803" calcext:value-type="float">
            <text:p>19803</text:p>
          </table:table-cell>
          <table:table-cell office:value-type="float" office:value="8640000" calcext:value-type="float">
            <text:p>8640000</text:p>
          </table:table-cell>
          <table:table-cell table:formula="of:=[.B862]/[.C862]" office:value-type="float" office:value="0.00229201388888889" calcext:value-type="float">
            <text:p>0,00229201388888889000</text:p>
          </table:table-cell>
          <table:table-cell table:formula="of:=[.D863]-[.D86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23" office:value-type="float" office:value="19826" calcext:value-type="float">
            <text:p>19826</text:p>
          </table:table-cell>
          <table:table-cell office:value-type="float" office:value="8640000" calcext:value-type="float">
            <text:p>8640000</text:p>
          </table:table-cell>
          <table:table-cell table:formula="of:=[.B863]/[.C863]" office:value-type="float" office:value="0.00229467592592593" calcext:value-type="float">
            <text:p>0,00229467592592593000</text:p>
          </table:table-cell>
          <table:table-cell table:formula="of:=[.D864]-[.D86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23" office:value-type="float" office:value="19849" calcext:value-type="float">
            <text:p>19849</text:p>
          </table:table-cell>
          <table:table-cell office:value-type="float" office:value="8640000" calcext:value-type="float">
            <text:p>8640000</text:p>
          </table:table-cell>
          <table:table-cell table:formula="of:=[.B864]/[.C864]" office:value-type="float" office:value="0.00229733796296296" calcext:value-type="float">
            <text:p>0,00229733796296296000</text:p>
          </table:table-cell>
          <table:table-cell table:formula="of:=[.D865]-[.D86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23" office:value-type="float" office:value="19872" calcext:value-type="float">
            <text:p>19872</text:p>
          </table:table-cell>
          <table:table-cell office:value-type="float" office:value="8640000" calcext:value-type="float">
            <text:p>8640000</text:p>
          </table:table-cell>
          <table:table-cell table:formula="of:=[.B865]/[.C865]" office:value-type="float" office:value="0.0023" calcext:value-type="float">
            <text:p>0,00230000000000000000</text:p>
          </table:table-cell>
          <table:table-cell table:formula="of:=[.D866]-[.D86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23" office:value-type="float" office:value="19895" calcext:value-type="float">
            <text:p>19895</text:p>
          </table:table-cell>
          <table:table-cell office:value-type="float" office:value="8640000" calcext:value-type="float">
            <text:p>8640000</text:p>
          </table:table-cell>
          <table:table-cell table:formula="of:=[.B866]/[.C866]" office:value-type="float" office:value="0.00230266203703704" calcext:value-type="float">
            <text:p>0,00230266203703704000</text:p>
          </table:table-cell>
          <table:table-cell table:formula="of:=[.D867]-[.D86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23" office:value-type="float" office:value="19918" calcext:value-type="float">
            <text:p>19918</text:p>
          </table:table-cell>
          <table:table-cell office:value-type="float" office:value="8640000" calcext:value-type="float">
            <text:p>8640000</text:p>
          </table:table-cell>
          <table:table-cell table:formula="of:=[.B867]/[.C867]" office:value-type="float" office:value="0.00230532407407407" calcext:value-type="float">
            <text:p>0,00230532407407407000</text:p>
          </table:table-cell>
          <table:table-cell table:formula="of:=[.D868]-[.D86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23" office:value-type="float" office:value="19941" calcext:value-type="float">
            <text:p>19941</text:p>
          </table:table-cell>
          <table:table-cell office:value-type="float" office:value="8640000" calcext:value-type="float">
            <text:p>8640000</text:p>
          </table:table-cell>
          <table:table-cell table:formula="of:=[.B868]/[.C868]" office:value-type="float" office:value="0.00230798611111111" calcext:value-type="float">
            <text:p>0,00230798611111111000</text:p>
          </table:table-cell>
          <table:table-cell table:formula="of:=[.D869]-[.D86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23" office:value-type="float" office:value="19964" calcext:value-type="float">
            <text:p>19964</text:p>
          </table:table-cell>
          <table:table-cell office:value-type="float" office:value="8640000" calcext:value-type="float">
            <text:p>8640000</text:p>
          </table:table-cell>
          <table:table-cell table:formula="of:=[.B869]/[.C869]" office:value-type="float" office:value="0.00231064814814815" calcext:value-type="float">
            <text:p>0,00231064814814815000</text:p>
          </table:table-cell>
          <table:table-cell table:formula="of:=[.D870]-[.D86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23" office:value-type="float" office:value="19987" calcext:value-type="float">
            <text:p>19987</text:p>
          </table:table-cell>
          <table:table-cell office:value-type="float" office:value="8640000" calcext:value-type="float">
            <text:p>8640000</text:p>
          </table:table-cell>
          <table:table-cell table:formula="of:=[.B870]/[.C870]" office:value-type="float" office:value="0.00231331018518519" calcext:value-type="float">
            <text:p>0,00231331018518519000</text:p>
          </table:table-cell>
          <table:table-cell table:formula="of:=[.D871]-[.D87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23" office:value-type="float" office:value="20010" calcext:value-type="float">
            <text:p>20010</text:p>
          </table:table-cell>
          <table:table-cell office:value-type="float" office:value="8640000" calcext:value-type="float">
            <text:p>8640000</text:p>
          </table:table-cell>
          <table:table-cell table:formula="of:=[.B871]/[.C871]" office:value-type="float" office:value="0.00231597222222222" calcext:value-type="float">
            <text:p>0,00231597222222222000</text:p>
          </table:table-cell>
          <table:table-cell table:formula="of:=[.D872]-[.D87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23" office:value-type="float" office:value="20033" calcext:value-type="float">
            <text:p>20033</text:p>
          </table:table-cell>
          <table:table-cell office:value-type="float" office:value="8640000" calcext:value-type="float">
            <text:p>8640000</text:p>
          </table:table-cell>
          <table:table-cell table:formula="of:=[.B872]/[.C872]" office:value-type="float" office:value="0.00231863425925926" calcext:value-type="float">
            <text:p>0,00231863425925926000</text:p>
          </table:table-cell>
          <table:table-cell table:formula="of:=[.D873]-[.D87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23" office:value-type="float" office:value="20056" calcext:value-type="float">
            <text:p>20056</text:p>
          </table:table-cell>
          <table:table-cell office:value-type="float" office:value="8640000" calcext:value-type="float">
            <text:p>8640000</text:p>
          </table:table-cell>
          <table:table-cell table:formula="of:=[.B873]/[.C873]" office:value-type="float" office:value="0.0023212962962963" calcext:value-type="float">
            <text:p>0,00232129629629630000</text:p>
          </table:table-cell>
          <table:table-cell table:formula="of:=[.D874]-[.D87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23" office:value-type="float" office:value="20079" calcext:value-type="float">
            <text:p>20079</text:p>
          </table:table-cell>
          <table:table-cell office:value-type="float" office:value="8640000" calcext:value-type="float">
            <text:p>8640000</text:p>
          </table:table-cell>
          <table:table-cell table:formula="of:=[.B874]/[.C874]" office:value-type="float" office:value="0.00232395833333333" calcext:value-type="float">
            <text:p>0,00232395833333333000</text:p>
          </table:table-cell>
          <table:table-cell table:formula="of:=[.D875]-[.D8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23" office:value-type="float" office:value="20102" calcext:value-type="float">
            <text:p>20102</text:p>
          </table:table-cell>
          <table:table-cell office:value-type="float" office:value="8640000" calcext:value-type="float">
            <text:p>8640000</text:p>
          </table:table-cell>
          <table:table-cell table:formula="of:=[.B875]/[.C875]" office:value-type="float" office:value="0.00232662037037037" calcext:value-type="float">
            <text:p>0,00232662037037037000</text:p>
          </table:table-cell>
          <table:table-cell table:formula="of:=[.D876]-[.D87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23" office:value-type="float" office:value="20125" calcext:value-type="float">
            <text:p>20125</text:p>
          </table:table-cell>
          <table:table-cell office:value-type="float" office:value="8640000" calcext:value-type="float">
            <text:p>8640000</text:p>
          </table:table-cell>
          <table:table-cell table:formula="of:=[.B876]/[.C876]" office:value-type="float" office:value="0.00232928240740741" calcext:value-type="float">
            <text:p>0,00232928240740741000</text:p>
          </table:table-cell>
          <table:table-cell table:formula="of:=[.D877]-[.D87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23" office:value-type="float" office:value="20148" calcext:value-type="float">
            <text:p>20148</text:p>
          </table:table-cell>
          <table:table-cell office:value-type="float" office:value="8640000" calcext:value-type="float">
            <text:p>8640000</text:p>
          </table:table-cell>
          <table:table-cell table:formula="of:=[.B877]/[.C877]" office:value-type="float" office:value="0.00233194444444444" calcext:value-type="float">
            <text:p>0,00233194444444444000</text:p>
          </table:table-cell>
          <table:table-cell table:formula="of:=[.D878]-[.D87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23" office:value-type="float" office:value="20171" calcext:value-type="float">
            <text:p>20171</text:p>
          </table:table-cell>
          <table:table-cell office:value-type="float" office:value="8640000" calcext:value-type="float">
            <text:p>8640000</text:p>
          </table:table-cell>
          <table:table-cell table:formula="of:=[.B878]/[.C878]" office:value-type="float" office:value="0.00233460648148148" calcext:value-type="float">
            <text:p>0,00233460648148148000</text:p>
          </table:table-cell>
          <table:table-cell table:formula="of:=[.D879]-[.D87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23" office:value-type="float" office:value="20194" calcext:value-type="float">
            <text:p>20194</text:p>
          </table:table-cell>
          <table:table-cell office:value-type="float" office:value="8640000" calcext:value-type="float">
            <text:p>8640000</text:p>
          </table:table-cell>
          <table:table-cell table:formula="of:=[.B879]/[.C879]" office:value-type="float" office:value="0.00233726851851852" calcext:value-type="float">
            <text:p>0,00233726851851852000</text:p>
          </table:table-cell>
          <table:table-cell table:formula="of:=[.D880]-[.D8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23" office:value-type="float" office:value="20217" calcext:value-type="float">
            <text:p>20217</text:p>
          </table:table-cell>
          <table:table-cell office:value-type="float" office:value="8640000" calcext:value-type="float">
            <text:p>8640000</text:p>
          </table:table-cell>
          <table:table-cell table:formula="of:=[.B880]/[.C880]" office:value-type="float" office:value="0.00233993055555556" calcext:value-type="float">
            <text:p>0,00233993055555556000</text:p>
          </table:table-cell>
          <table:table-cell table:formula="of:=[.D881]-[.D88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23" office:value-type="float" office:value="20240" calcext:value-type="float">
            <text:p>20240</text:p>
          </table:table-cell>
          <table:table-cell office:value-type="float" office:value="8640000" calcext:value-type="float">
            <text:p>8640000</text:p>
          </table:table-cell>
          <table:table-cell table:formula="of:=[.B881]/[.C881]" office:value-type="float" office:value="0.00234259259259259" calcext:value-type="float">
            <text:p>0,00234259259259259000</text:p>
          </table:table-cell>
          <table:table-cell table:formula="of:=[.D882]-[.D88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23" office:value-type="float" office:value="20263" calcext:value-type="float">
            <text:p>20263</text:p>
          </table:table-cell>
          <table:table-cell office:value-type="float" office:value="8640000" calcext:value-type="float">
            <text:p>8640000</text:p>
          </table:table-cell>
          <table:table-cell table:formula="of:=[.B882]/[.C882]" office:value-type="float" office:value="0.00234525462962963" calcext:value-type="float">
            <text:p>0,00234525462962963000</text:p>
          </table:table-cell>
          <table:table-cell table:formula="of:=[.D883]-[.D88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23" office:value-type="float" office:value="20286" calcext:value-type="float">
            <text:p>20286</text:p>
          </table:table-cell>
          <table:table-cell office:value-type="float" office:value="8640000" calcext:value-type="float">
            <text:p>8640000</text:p>
          </table:table-cell>
          <table:table-cell table:formula="of:=[.B883]/[.C883]" office:value-type="float" office:value="0.00234791666666667" calcext:value-type="float">
            <text:p>0,00234791666666667000</text:p>
          </table:table-cell>
          <table:table-cell table:formula="of:=[.D884]-[.D88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23" office:value-type="float" office:value="20309" calcext:value-type="float">
            <text:p>20309</text:p>
          </table:table-cell>
          <table:table-cell office:value-type="float" office:value="8640000" calcext:value-type="float">
            <text:p>8640000</text:p>
          </table:table-cell>
          <table:table-cell table:formula="of:=[.B884]/[.C884]" office:value-type="float" office:value="0.0023505787037037" calcext:value-type="float">
            <text:p>0,00235057870370370000</text:p>
          </table:table-cell>
          <table:table-cell table:formula="of:=[.D885]-[.D8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23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885]/[.C885]" office:value-type="float" office:value="0.00235324074074074" calcext:value-type="float">
            <text:p>0,00235324074074074000</text:p>
          </table:table-cell>
          <table:table-cell table:formula="of:=[.D886]-[.D88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23" office:value-type="float" office:value="20355" calcext:value-type="float">
            <text:p>20355</text:p>
          </table:table-cell>
          <table:table-cell office:value-type="float" office:value="8640000" calcext:value-type="float">
            <text:p>8640000</text:p>
          </table:table-cell>
          <table:table-cell table:formula="of:=[.B886]/[.C886]" office:value-type="float" office:value="0.00235590277777778" calcext:value-type="float">
            <text:p>0,00235590277777778000</text:p>
          </table:table-cell>
          <table:table-cell table:formula="of:=[.D887]-[.D88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23" office:value-type="float" office:value="20378" calcext:value-type="float">
            <text:p>20378</text:p>
          </table:table-cell>
          <table:table-cell office:value-type="float" office:value="8640000" calcext:value-type="float">
            <text:p>8640000</text:p>
          </table:table-cell>
          <table:table-cell table:formula="of:=[.B887]/[.C887]" office:value-type="float" office:value="0.00235856481481481" calcext:value-type="float">
            <text:p>0,00235856481481481000</text:p>
          </table:table-cell>
          <table:table-cell table:formula="of:=[.D888]-[.D88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23" office:value-type="float" office:value="20401" calcext:value-type="float">
            <text:p>20401</text:p>
          </table:table-cell>
          <table:table-cell office:value-type="float" office:value="8640000" calcext:value-type="float">
            <text:p>8640000</text:p>
          </table:table-cell>
          <table:table-cell table:formula="of:=[.B888]/[.C888]" office:value-type="float" office:value="0.00236122685185185" calcext:value-type="float">
            <text:p>0,00236122685185185000</text:p>
          </table:table-cell>
          <table:table-cell table:formula="of:=[.D889]-[.D88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23" office:value-type="float" office:value="20424" calcext:value-type="float">
            <text:p>20424</text:p>
          </table:table-cell>
          <table:table-cell office:value-type="float" office:value="8640000" calcext:value-type="float">
            <text:p>8640000</text:p>
          </table:table-cell>
          <table:table-cell table:formula="of:=[.B889]/[.C889]" office:value-type="float" office:value="0.00236388888888889" calcext:value-type="float">
            <text:p>0,00236388888888889000</text:p>
          </table:table-cell>
          <table:table-cell table:formula="of:=[.D890]-[.D88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23" office:value-type="float" office:value="20447" calcext:value-type="float">
            <text:p>20447</text:p>
          </table:table-cell>
          <table:table-cell office:value-type="float" office:value="8640000" calcext:value-type="float">
            <text:p>8640000</text:p>
          </table:table-cell>
          <table:table-cell table:formula="of:=[.B890]/[.C890]" office:value-type="float" office:value="0.00236655092592593" calcext:value-type="float">
            <text:p>0,00236655092592593000</text:p>
          </table:table-cell>
          <table:table-cell table:formula="of:=[.D891]-[.D89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23" office:value-type="float" office:value="20470" calcext:value-type="float">
            <text:p>20470</text:p>
          </table:table-cell>
          <table:table-cell office:value-type="float" office:value="8640000" calcext:value-type="float">
            <text:p>8640000</text:p>
          </table:table-cell>
          <table:table-cell table:formula="of:=[.B891]/[.C891]" office:value-type="float" office:value="0.00236921296296296" calcext:value-type="float">
            <text:p>0,00236921296296296000</text:p>
          </table:table-cell>
          <table:table-cell table:formula="of:=[.D892]-[.D89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23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892]/[.C892]" office:value-type="float" office:value="0.002371875" calcext:value-type="float">
            <text:p>0,00237187500000000000</text:p>
          </table:table-cell>
          <table:table-cell table:formula="of:=[.D893]-[.D89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23" office:value-type="float" office:value="20516" calcext:value-type="float">
            <text:p>20516</text:p>
          </table:table-cell>
          <table:table-cell office:value-type="float" office:value="8640000" calcext:value-type="float">
            <text:p>8640000</text:p>
          </table:table-cell>
          <table:table-cell table:formula="of:=[.B893]/[.C893]" office:value-type="float" office:value="0.00237453703703704" calcext:value-type="float">
            <text:p>0,00237453703703704000</text:p>
          </table:table-cell>
          <table:table-cell table:formula="of:=[.D894]-[.D8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23" office:value-type="float" office:value="20539" calcext:value-type="float">
            <text:p>20539</text:p>
          </table:table-cell>
          <table:table-cell office:value-type="float" office:value="8640000" calcext:value-type="float">
            <text:p>8640000</text:p>
          </table:table-cell>
          <table:table-cell table:formula="of:=[.B894]/[.C894]" office:value-type="float" office:value="0.00237719907407407" calcext:value-type="float">
            <text:p>0,00237719907407407000</text:p>
          </table:table-cell>
          <table:table-cell table:formula="of:=[.D895]-[.D89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23" office:value-type="float" office:value="20562" calcext:value-type="float">
            <text:p>20562</text:p>
          </table:table-cell>
          <table:table-cell office:value-type="float" office:value="8640000" calcext:value-type="float">
            <text:p>8640000</text:p>
          </table:table-cell>
          <table:table-cell table:formula="of:=[.B895]/[.C895]" office:value-type="float" office:value="0.00237986111111111" calcext:value-type="float">
            <text:p>0,00237986111111111000</text:p>
          </table:table-cell>
          <table:table-cell table:formula="of:=[.D896]-[.D89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23" office:value-type="float" office:value="20585" calcext:value-type="float">
            <text:p>20585</text:p>
          </table:table-cell>
          <table:table-cell office:value-type="float" office:value="8640000" calcext:value-type="float">
            <text:p>8640000</text:p>
          </table:table-cell>
          <table:table-cell table:formula="of:=[.B896]/[.C896]" office:value-type="float" office:value="0.00238252314814815" calcext:value-type="float">
            <text:p>0,00238252314814815000</text:p>
          </table:table-cell>
          <table:table-cell table:formula="of:=[.D897]-[.D89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23" office:value-type="float" office:value="20608" calcext:value-type="float">
            <text:p>20608</text:p>
          </table:table-cell>
          <table:table-cell office:value-type="float" office:value="8640000" calcext:value-type="float">
            <text:p>8640000</text:p>
          </table:table-cell>
          <table:table-cell table:formula="of:=[.B897]/[.C897]" office:value-type="float" office:value="0.00238518518518519" calcext:value-type="float">
            <text:p>0,00238518518518519000</text:p>
          </table:table-cell>
          <table:table-cell table:formula="of:=[.D898]-[.D89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23" office:value-type="float" office:value="20631" calcext:value-type="float">
            <text:p>20631</text:p>
          </table:table-cell>
          <table:table-cell office:value-type="float" office:value="8640000" calcext:value-type="float">
            <text:p>8640000</text:p>
          </table:table-cell>
          <table:table-cell table:formula="of:=[.B898]/[.C898]" office:value-type="float" office:value="0.00238784722222222" calcext:value-type="float">
            <text:p>0,00238784722222222000</text:p>
          </table:table-cell>
          <table:table-cell table:formula="of:=[.D899]-[.D8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23" office:value-type="float" office:value="20654" calcext:value-type="float">
            <text:p>20654</text:p>
          </table:table-cell>
          <table:table-cell office:value-type="float" office:value="8640000" calcext:value-type="float">
            <text:p>8640000</text:p>
          </table:table-cell>
          <table:table-cell table:formula="of:=[.B899]/[.C899]" office:value-type="float" office:value="0.00239050925925926" calcext:value-type="float">
            <text:p>0,00239050925925926000</text:p>
          </table:table-cell>
          <table:table-cell table:formula="of:=[.D900]-[.D89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23" office:value-type="float" office:value="20677" calcext:value-type="float">
            <text:p>20677</text:p>
          </table:table-cell>
          <table:table-cell office:value-type="float" office:value="8640000" calcext:value-type="float">
            <text:p>8640000</text:p>
          </table:table-cell>
          <table:table-cell table:formula="of:=[.B900]/[.C900]" office:value-type="float" office:value="0.0023931712962963" calcext:value-type="float">
            <text:p>0,00239317129629630000</text:p>
          </table:table-cell>
          <table:table-cell table:formula="of:=[.D901]-[.D90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23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901]/[.C901]" office:value-type="float" office:value="0.00239583333333333" calcext:value-type="float">
            <text:p>0,00239583333333333000</text:p>
          </table:table-cell>
          <table:table-cell table:formula="of:=[.D902]-[.D90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23" office:value-type="float" office:value="20723" calcext:value-type="float">
            <text:p>20723</text:p>
          </table:table-cell>
          <table:table-cell office:value-type="float" office:value="8640000" calcext:value-type="float">
            <text:p>8640000</text:p>
          </table:table-cell>
          <table:table-cell table:formula="of:=[.B902]/[.C902]" office:value-type="float" office:value="0.00239849537037037" calcext:value-type="float">
            <text:p>0,00239849537037037000</text:p>
          </table:table-cell>
          <table:table-cell table:formula="of:=[.D903]-[.D90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23" office:value-type="float" office:value="20746" calcext:value-type="float">
            <text:p>20746</text:p>
          </table:table-cell>
          <table:table-cell office:value-type="float" office:value="8640000" calcext:value-type="float">
            <text:p>8640000</text:p>
          </table:table-cell>
          <table:table-cell table:formula="of:=[.B903]/[.C903]" office:value-type="float" office:value="0.00240115740740741" calcext:value-type="float">
            <text:p>0,00240115740740741000</text:p>
          </table:table-cell>
          <table:table-cell table:formula="of:=[.D904]-[.D90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23" office:value-type="float" office:value="20769" calcext:value-type="float">
            <text:p>20769</text:p>
          </table:table-cell>
          <table:table-cell office:value-type="float" office:value="8640000" calcext:value-type="float">
            <text:p>8640000</text:p>
          </table:table-cell>
          <table:table-cell table:formula="of:=[.B904]/[.C904]" office:value-type="float" office:value="0.00240381944444444" calcext:value-type="float">
            <text:p>0,00240381944444444000</text:p>
          </table:table-cell>
          <table:table-cell table:formula="of:=[.D905]-[.D90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23" office:value-type="float" office:value="20792" calcext:value-type="float">
            <text:p>20792</text:p>
          </table:table-cell>
          <table:table-cell office:value-type="float" office:value="8640000" calcext:value-type="float">
            <text:p>8640000</text:p>
          </table:table-cell>
          <table:table-cell table:formula="of:=[.B905]/[.C905]" office:value-type="float" office:value="0.00240648148148148" calcext:value-type="float">
            <text:p>0,00240648148148148000</text:p>
          </table:table-cell>
          <table:table-cell table:formula="of:=[.D906]-[.D90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23" office:value-type="float" office:value="20815" calcext:value-type="float">
            <text:p>20815</text:p>
          </table:table-cell>
          <table:table-cell office:value-type="float" office:value="8640000" calcext:value-type="float">
            <text:p>8640000</text:p>
          </table:table-cell>
          <table:table-cell table:formula="of:=[.B906]/[.C906]" office:value-type="float" office:value="0.00240914351851852" calcext:value-type="float">
            <text:p>0,00240914351851852000</text:p>
          </table:table-cell>
          <table:table-cell table:formula="of:=[.D907]-[.D90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23" office:value-type="float" office:value="20838" calcext:value-type="float">
            <text:p>20838</text:p>
          </table:table-cell>
          <table:table-cell office:value-type="float" office:value="8640000" calcext:value-type="float">
            <text:p>8640000</text:p>
          </table:table-cell>
          <table:table-cell table:formula="of:=[.B907]/[.C907]" office:value-type="float" office:value="0.00241180555555556" calcext:value-type="float">
            <text:p>0,00241180555555556000</text:p>
          </table:table-cell>
          <table:table-cell table:formula="of:=[.D908]-[.D9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23" office:value-type="float" office:value="20861" calcext:value-type="float">
            <text:p>20861</text:p>
          </table:table-cell>
          <table:table-cell office:value-type="float" office:value="8640000" calcext:value-type="float">
            <text:p>8640000</text:p>
          </table:table-cell>
          <table:table-cell table:formula="of:=[.B908]/[.C908]" office:value-type="float" office:value="0.00241446759259259" calcext:value-type="float">
            <text:p>0,00241446759259259000</text:p>
          </table:table-cell>
          <table:table-cell table:formula="of:=[.D909]-[.D90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23" office:value-type="float" office:value="20884" calcext:value-type="float">
            <text:p>20884</text:p>
          </table:table-cell>
          <table:table-cell office:value-type="float" office:value="8640000" calcext:value-type="float">
            <text:p>8640000</text:p>
          </table:table-cell>
          <table:table-cell table:formula="of:=[.B909]/[.C909]" office:value-type="float" office:value="0.00241712962962963" calcext:value-type="float">
            <text:p>0,00241712962962963000</text:p>
          </table:table-cell>
          <table:table-cell table:formula="of:=[.D910]-[.D90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23" office:value-type="float" office:value="20907" calcext:value-type="float">
            <text:p>20907</text:p>
          </table:table-cell>
          <table:table-cell office:value-type="float" office:value="8640000" calcext:value-type="float">
            <text:p>8640000</text:p>
          </table:table-cell>
          <table:table-cell table:formula="of:=[.B910]/[.C910]" office:value-type="float" office:value="0.00241979166666667" calcext:value-type="float">
            <text:p>0,00241979166666667000</text:p>
          </table:table-cell>
          <table:table-cell table:formula="of:=[.D911]-[.D91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23" office:value-type="float" office:value="20930" calcext:value-type="float">
            <text:p>20930</text:p>
          </table:table-cell>
          <table:table-cell office:value-type="float" office:value="8640000" calcext:value-type="float">
            <text:p>8640000</text:p>
          </table:table-cell>
          <table:table-cell table:formula="of:=[.B911]/[.C911]" office:value-type="float" office:value="0.0024224537037037" calcext:value-type="float">
            <text:p>0,00242245370370370000</text:p>
          </table:table-cell>
          <table:table-cell table:formula="of:=[.D912]-[.D91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23" office:value-type="float" office:value="20953" calcext:value-type="float">
            <text:p>20953</text:p>
          </table:table-cell>
          <table:table-cell office:value-type="float" office:value="8640000" calcext:value-type="float">
            <text:p>8640000</text:p>
          </table:table-cell>
          <table:table-cell table:formula="of:=[.B912]/[.C912]" office:value-type="float" office:value="0.00242511574074074" calcext:value-type="float">
            <text:p>0,00242511574074074000</text:p>
          </table:table-cell>
          <table:table-cell table:formula="of:=[.D913]-[.D9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23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913]/[.C913]" office:value-type="float" office:value="0.00242777777777778" calcext:value-type="float">
            <text:p>0,00242777777777778000</text:p>
          </table:table-cell>
          <table:table-cell table:formula="of:=[.D914]-[.D91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23" office:value-type="float" office:value="20999" calcext:value-type="float">
            <text:p>20999</text:p>
          </table:table-cell>
          <table:table-cell office:value-type="float" office:value="8640000" calcext:value-type="float">
            <text:p>8640000</text:p>
          </table:table-cell>
          <table:table-cell table:formula="of:=[.B914]/[.C914]" office:value-type="float" office:value="0.00243043981481482" calcext:value-type="float">
            <text:p>0,00243043981481482000</text:p>
          </table:table-cell>
          <table:table-cell table:formula="of:=[.D915]-[.D91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23" office:value-type="float" office:value="21022" calcext:value-type="float">
            <text:p>21022</text:p>
          </table:table-cell>
          <table:table-cell office:value-type="float" office:value="8640000" calcext:value-type="float">
            <text:p>8640000</text:p>
          </table:table-cell>
          <table:table-cell table:formula="of:=[.B915]/[.C915]" office:value-type="float" office:value="0.00243310185185185" calcext:value-type="float">
            <text:p>0,00243310185185185000</text:p>
          </table:table-cell>
          <table:table-cell table:formula="of:=[.D916]-[.D91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23" office:value-type="float" office:value="21045" calcext:value-type="float">
            <text:p>21045</text:p>
          </table:table-cell>
          <table:table-cell office:value-type="float" office:value="8640000" calcext:value-type="float">
            <text:p>8640000</text:p>
          </table:table-cell>
          <table:table-cell table:formula="of:=[.B916]/[.C916]" office:value-type="float" office:value="0.00243576388888889" calcext:value-type="float">
            <text:p>0,00243576388888889000</text:p>
          </table:table-cell>
          <table:table-cell table:formula="of:=[.D917]-[.D91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23" office:value-type="float" office:value="21068" calcext:value-type="float">
            <text:p>21068</text:p>
          </table:table-cell>
          <table:table-cell office:value-type="float" office:value="8640000" calcext:value-type="float">
            <text:p>8640000</text:p>
          </table:table-cell>
          <table:table-cell table:formula="of:=[.B917]/[.C917]" office:value-type="float" office:value="0.00243842592592593" calcext:value-type="float">
            <text:p>0,00243842592592593000</text:p>
          </table:table-cell>
          <table:table-cell table:formula="of:=[.D918]-[.D91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23" office:value-type="float" office:value="21091" calcext:value-type="float">
            <text:p>21091</text:p>
          </table:table-cell>
          <table:table-cell office:value-type="float" office:value="8640000" calcext:value-type="float">
            <text:p>8640000</text:p>
          </table:table-cell>
          <table:table-cell table:formula="of:=[.B918]/[.C918]" office:value-type="float" office:value="0.00244108796296296" calcext:value-type="float">
            <text:p>0,00244108796296296000</text:p>
          </table:table-cell>
          <table:table-cell table:formula="of:=[.D919]-[.D91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23" office:value-type="float" office:value="21114" calcext:value-type="float">
            <text:p>21114</text:p>
          </table:table-cell>
          <table:table-cell office:value-type="float" office:value="8640000" calcext:value-type="float">
            <text:p>8640000</text:p>
          </table:table-cell>
          <table:table-cell table:formula="of:=[.B919]/[.C919]" office:value-type="float" office:value="0.00244375" calcext:value-type="float">
            <text:p>0,00244375000000000000</text:p>
          </table:table-cell>
          <table:table-cell table:formula="of:=[.D920]-[.D91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23" office:value-type="float" office:value="21137" calcext:value-type="float">
            <text:p>21137</text:p>
          </table:table-cell>
          <table:table-cell office:value-type="float" office:value="8640000" calcext:value-type="float">
            <text:p>8640000</text:p>
          </table:table-cell>
          <table:table-cell table:formula="of:=[.B920]/[.C920]" office:value-type="float" office:value="0.00244641203703704" calcext:value-type="float">
            <text:p>0,00244641203703704000</text:p>
          </table:table-cell>
          <table:table-cell table:formula="of:=[.D921]-[.D92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23" office:value-type="float" office:value="21160" calcext:value-type="float">
            <text:p>21160</text:p>
          </table:table-cell>
          <table:table-cell office:value-type="float" office:value="8640000" calcext:value-type="float">
            <text:p>8640000</text:p>
          </table:table-cell>
          <table:table-cell table:formula="of:=[.B921]/[.C921]" office:value-type="float" office:value="0.00244907407407407" calcext:value-type="float">
            <text:p>0,00244907407407407000</text:p>
          </table:table-cell>
          <table:table-cell table:formula="of:=[.D922]-[.D9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23" office:value-type="float" office:value="21183" calcext:value-type="float">
            <text:p>21183</text:p>
          </table:table-cell>
          <table:table-cell office:value-type="float" office:value="8640000" calcext:value-type="float">
            <text:p>8640000</text:p>
          </table:table-cell>
          <table:table-cell table:formula="of:=[.B922]/[.C922]" office:value-type="float" office:value="0.00245173611111111" calcext:value-type="float">
            <text:p>0,00245173611111111000</text:p>
          </table:table-cell>
          <table:table-cell table:formula="of:=[.D923]-[.D92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23" office:value-type="float" office:value="21206" calcext:value-type="float">
            <text:p>21206</text:p>
          </table:table-cell>
          <table:table-cell office:value-type="float" office:value="8640000" calcext:value-type="float">
            <text:p>8640000</text:p>
          </table:table-cell>
          <table:table-cell table:formula="of:=[.B923]/[.C923]" office:value-type="float" office:value="0.00245439814814815" calcext:value-type="float">
            <text:p>0,00245439814814815000</text:p>
          </table:table-cell>
          <table:table-cell table:formula="of:=[.D924]-[.D92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23" office:value-type="float" office:value="21229" calcext:value-type="float">
            <text:p>21229</text:p>
          </table:table-cell>
          <table:table-cell office:value-type="float" office:value="8640000" calcext:value-type="float">
            <text:p>8640000</text:p>
          </table:table-cell>
          <table:table-cell table:formula="of:=[.B924]/[.C924]" office:value-type="float" office:value="0.00245706018518519" calcext:value-type="float">
            <text:p>0,00245706018518519000</text:p>
          </table:table-cell>
          <table:table-cell table:formula="of:=[.D925]-[.D92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23" office:value-type="float" office:value="21252" calcext:value-type="float">
            <text:p>21252</text:p>
          </table:table-cell>
          <table:table-cell office:value-type="float" office:value="8640000" calcext:value-type="float">
            <text:p>8640000</text:p>
          </table:table-cell>
          <table:table-cell table:formula="of:=[.B925]/[.C925]" office:value-type="float" office:value="0.00245972222222222" calcext:value-type="float">
            <text:p>0,00245972222222222000</text:p>
          </table:table-cell>
          <table:table-cell table:formula="of:=[.D926]-[.D92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23" office:value-type="float" office:value="21275" calcext:value-type="float">
            <text:p>21275</text:p>
          </table:table-cell>
          <table:table-cell office:value-type="float" office:value="8640000" calcext:value-type="float">
            <text:p>8640000</text:p>
          </table:table-cell>
          <table:table-cell table:formula="of:=[.B926]/[.C926]" office:value-type="float" office:value="0.00246238425925926" calcext:value-type="float">
            <text:p>0,00246238425925926000</text:p>
          </table:table-cell>
          <table:table-cell table:formula="of:=[.D927]-[.D9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23" office:value-type="float" office:value="21298" calcext:value-type="float">
            <text:p>21298</text:p>
          </table:table-cell>
          <table:table-cell office:value-type="float" office:value="8640000" calcext:value-type="float">
            <text:p>8640000</text:p>
          </table:table-cell>
          <table:table-cell table:formula="of:=[.B927]/[.C927]" office:value-type="float" office:value="0.0024650462962963" calcext:value-type="float">
            <text:p>0,00246504629629630000</text:p>
          </table:table-cell>
          <table:table-cell table:formula="of:=[.D928]-[.D92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23" office:value-type="float" office:value="21321" calcext:value-type="float">
            <text:p>21321</text:p>
          </table:table-cell>
          <table:table-cell office:value-type="float" office:value="8640000" calcext:value-type="float">
            <text:p>8640000</text:p>
          </table:table-cell>
          <table:table-cell table:formula="of:=[.B928]/[.C928]" office:value-type="float" office:value="0.00246770833333333" calcext:value-type="float">
            <text:p>0,00246770833333333000</text:p>
          </table:table-cell>
          <table:table-cell table:formula="of:=[.D929]-[.D92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23" office:value-type="float" office:value="21344" calcext:value-type="float">
            <text:p>21344</text:p>
          </table:table-cell>
          <table:table-cell office:value-type="float" office:value="8640000" calcext:value-type="float">
            <text:p>8640000</text:p>
          </table:table-cell>
          <table:table-cell table:formula="of:=[.B929]/[.C929]" office:value-type="float" office:value="0.00247037037037037" calcext:value-type="float">
            <text:p>0,00247037037037037000</text:p>
          </table:table-cell>
          <table:table-cell table:formula="of:=[.D930]-[.D92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23" office:value-type="float" office:value="21367" calcext:value-type="float">
            <text:p>21367</text:p>
          </table:table-cell>
          <table:table-cell office:value-type="float" office:value="8640000" calcext:value-type="float">
            <text:p>8640000</text:p>
          </table:table-cell>
          <table:table-cell table:formula="of:=[.B930]/[.C930]" office:value-type="float" office:value="0.00247303240740741" calcext:value-type="float">
            <text:p>0,00247303240740741000</text:p>
          </table:table-cell>
          <table:table-cell table:formula="of:=[.D931]-[.D93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23" office:value-type="float" office:value="21390" calcext:value-type="float">
            <text:p>21390</text:p>
          </table:table-cell>
          <table:table-cell office:value-type="float" office:value="8640000" calcext:value-type="float">
            <text:p>8640000</text:p>
          </table:table-cell>
          <table:table-cell table:formula="of:=[.B931]/[.C931]" office:value-type="float" office:value="0.00247569444444444" calcext:value-type="float">
            <text:p>0,00247569444444444000</text:p>
          </table:table-cell>
          <table:table-cell table:formula="of:=[.D932]-[.D9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23" office:value-type="float" office:value="21413" calcext:value-type="float">
            <text:p>21413</text:p>
          </table:table-cell>
          <table:table-cell office:value-type="float" office:value="8640000" calcext:value-type="float">
            <text:p>8640000</text:p>
          </table:table-cell>
          <table:table-cell table:formula="of:=[.B932]/[.C932]" office:value-type="float" office:value="0.00247835648148148" calcext:value-type="float">
            <text:p>0,00247835648148148000</text:p>
          </table:table-cell>
          <table:table-cell table:formula="of:=[.D933]-[.D93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23" office:value-type="float" office:value="21436" calcext:value-type="float">
            <text:p>21436</text:p>
          </table:table-cell>
          <table:table-cell office:value-type="float" office:value="8640000" calcext:value-type="float">
            <text:p>8640000</text:p>
          </table:table-cell>
          <table:table-cell table:formula="of:=[.B933]/[.C933]" office:value-type="float" office:value="0.00248101851851852" calcext:value-type="float">
            <text:p>0,00248101851851852000</text:p>
          </table:table-cell>
          <table:table-cell table:formula="of:=[.D934]-[.D93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23" office:value-type="float" office:value="21459" calcext:value-type="float">
            <text:p>21459</text:p>
          </table:table-cell>
          <table:table-cell office:value-type="float" office:value="8640000" calcext:value-type="float">
            <text:p>8640000</text:p>
          </table:table-cell>
          <table:table-cell table:formula="of:=[.B934]/[.C934]" office:value-type="float" office:value="0.00248368055555556" calcext:value-type="float">
            <text:p>0,00248368055555556000</text:p>
          </table:table-cell>
          <table:table-cell table:formula="of:=[.D935]-[.D93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23" office:value-type="float" office:value="21482" calcext:value-type="float">
            <text:p>21482</text:p>
          </table:table-cell>
          <table:table-cell office:value-type="float" office:value="8640000" calcext:value-type="float">
            <text:p>8640000</text:p>
          </table:table-cell>
          <table:table-cell table:formula="of:=[.B935]/[.C935]" office:value-type="float" office:value="0.00248634259259259" calcext:value-type="float">
            <text:p>0,00248634259259259000</text:p>
          </table:table-cell>
          <table:table-cell table:formula="of:=[.D936]-[.D9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23" office:value-type="float" office:value="21505" calcext:value-type="float">
            <text:p>21505</text:p>
          </table:table-cell>
          <table:table-cell office:value-type="float" office:value="8640000" calcext:value-type="float">
            <text:p>8640000</text:p>
          </table:table-cell>
          <table:table-cell table:formula="of:=[.B936]/[.C936]" office:value-type="float" office:value="0.00248900462962963" calcext:value-type="float">
            <text:p>0,00248900462962963000</text:p>
          </table:table-cell>
          <table:table-cell table:formula="of:=[.D937]-[.D93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23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937]/[.C937]" office:value-type="float" office:value="0.00249166666666667" calcext:value-type="float">
            <text:p>0,00249166666666667000</text:p>
          </table:table-cell>
          <table:table-cell table:formula="of:=[.D938]-[.D9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23" office:value-type="float" office:value="21551" calcext:value-type="float">
            <text:p>21551</text:p>
          </table:table-cell>
          <table:table-cell office:value-type="float" office:value="8640000" calcext:value-type="float">
            <text:p>8640000</text:p>
          </table:table-cell>
          <table:table-cell table:formula="of:=[.B938]/[.C938]" office:value-type="float" office:value="0.0024943287037037" calcext:value-type="float">
            <text:p>0,00249432870370370000</text:p>
          </table:table-cell>
          <table:table-cell table:formula="of:=[.D939]-[.D93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23" office:value-type="float" office:value="21574" calcext:value-type="float">
            <text:p>21574</text:p>
          </table:table-cell>
          <table:table-cell office:value-type="float" office:value="8640000" calcext:value-type="float">
            <text:p>8640000</text:p>
          </table:table-cell>
          <table:table-cell table:formula="of:=[.B939]/[.C939]" office:value-type="float" office:value="0.00249699074074074" calcext:value-type="float">
            <text:p>0,00249699074074074000</text:p>
          </table:table-cell>
          <table:table-cell table:formula="of:=[.D940]-[.D9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23" office:value-type="float" office:value="21597" calcext:value-type="float">
            <text:p>21597</text:p>
          </table:table-cell>
          <table:table-cell office:value-type="float" office:value="8640000" calcext:value-type="float">
            <text:p>8640000</text:p>
          </table:table-cell>
          <table:table-cell table:formula="of:=[.B940]/[.C940]" office:value-type="float" office:value="0.00249965277777778" calcext:value-type="float">
            <text:p>0,00249965277777778000</text:p>
          </table:table-cell>
          <table:table-cell table:formula="of:=[.D941]-[.D9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23" office:value-type="float" office:value="21620" calcext:value-type="float">
            <text:p>21620</text:p>
          </table:table-cell>
          <table:table-cell office:value-type="float" office:value="8640000" calcext:value-type="float">
            <text:p>8640000</text:p>
          </table:table-cell>
          <table:table-cell table:formula="of:=[.B941]/[.C941]" office:value-type="float" office:value="0.00250231481481482" calcext:value-type="float">
            <text:p>0,00250231481481482000</text:p>
          </table:table-cell>
          <table:table-cell table:formula="of:=[.D942]-[.D94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23" office:value-type="float" office:value="21643" calcext:value-type="float">
            <text:p>21643</text:p>
          </table:table-cell>
          <table:table-cell office:value-type="float" office:value="8640000" calcext:value-type="float">
            <text:p>8640000</text:p>
          </table:table-cell>
          <table:table-cell table:formula="of:=[.B942]/[.C942]" office:value-type="float" office:value="0.00250497685185185" calcext:value-type="float">
            <text:p>0,00250497685185185000</text:p>
          </table:table-cell>
          <table:table-cell table:formula="of:=[.D943]-[.D94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23" office:value-type="float" office:value="21666" calcext:value-type="float">
            <text:p>21666</text:p>
          </table:table-cell>
          <table:table-cell office:value-type="float" office:value="8640000" calcext:value-type="float">
            <text:p>8640000</text:p>
          </table:table-cell>
          <table:table-cell table:formula="of:=[.B943]/[.C943]" office:value-type="float" office:value="0.00250763888888889" calcext:value-type="float">
            <text:p>0,00250763888888889000</text:p>
          </table:table-cell>
          <table:table-cell table:formula="of:=[.D944]-[.D94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23" office:value-type="float" office:value="21689" calcext:value-type="float">
            <text:p>21689</text:p>
          </table:table-cell>
          <table:table-cell office:value-type="float" office:value="8640000" calcext:value-type="float">
            <text:p>8640000</text:p>
          </table:table-cell>
          <table:table-cell table:formula="of:=[.B944]/[.C944]" office:value-type="float" office:value="0.00251030092592593" calcext:value-type="float">
            <text:p>0,00251030092592593000</text:p>
          </table:table-cell>
          <table:table-cell table:formula="of:=[.D945]-[.D94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23" office:value-type="float" office:value="21712" calcext:value-type="float">
            <text:p>21712</text:p>
          </table:table-cell>
          <table:table-cell office:value-type="float" office:value="8640000" calcext:value-type="float">
            <text:p>8640000</text:p>
          </table:table-cell>
          <table:table-cell table:formula="of:=[.B945]/[.C945]" office:value-type="float" office:value="0.00251296296296296" calcext:value-type="float">
            <text:p>0,00251296296296296000</text:p>
          </table:table-cell>
          <table:table-cell table:formula="of:=[.D946]-[.D94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23" office:value-type="float" office:value="21735" calcext:value-type="float">
            <text:p>21735</text:p>
          </table:table-cell>
          <table:table-cell office:value-type="float" office:value="8640000" calcext:value-type="float">
            <text:p>8640000</text:p>
          </table:table-cell>
          <table:table-cell table:formula="of:=[.B946]/[.C946]" office:value-type="float" office:value="0.002515625" calcext:value-type="float">
            <text:p>0,00251562500000000000</text:p>
          </table:table-cell>
          <table:table-cell table:formula="of:=[.D947]-[.D94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23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947]/[.C947]" office:value-type="float" office:value="0.00251828703703704" calcext:value-type="float">
            <text:p>0,00251828703703704000</text:p>
          </table:table-cell>
          <table:table-cell table:formula="of:=[.D948]-[.D94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23" office:value-type="float" office:value="21781" calcext:value-type="float">
            <text:p>21781</text:p>
          </table:table-cell>
          <table:table-cell office:value-type="float" office:value="8640000" calcext:value-type="float">
            <text:p>8640000</text:p>
          </table:table-cell>
          <table:table-cell table:formula="of:=[.B948]/[.C948]" office:value-type="float" office:value="0.00252094907407407" calcext:value-type="float">
            <text:p>0,00252094907407407000</text:p>
          </table:table-cell>
          <table:table-cell table:formula="of:=[.D949]-[.D94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23" office:value-type="float" office:value="21804" calcext:value-type="float">
            <text:p>21804</text:p>
          </table:table-cell>
          <table:table-cell office:value-type="float" office:value="8640000" calcext:value-type="float">
            <text:p>8640000</text:p>
          </table:table-cell>
          <table:table-cell table:formula="of:=[.B949]/[.C949]" office:value-type="float" office:value="0.00252361111111111" calcext:value-type="float">
            <text:p>0,00252361111111111000</text:p>
          </table:table-cell>
          <table:table-cell table:formula="of:=[.D950]-[.D94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23" office:value-type="float" office:value="21827" calcext:value-type="float">
            <text:p>21827</text:p>
          </table:table-cell>
          <table:table-cell office:value-type="float" office:value="8640000" calcext:value-type="float">
            <text:p>8640000</text:p>
          </table:table-cell>
          <table:table-cell table:formula="of:=[.B950]/[.C950]" office:value-type="float" office:value="0.00252627314814815" calcext:value-type="float">
            <text:p>0,00252627314814815000</text:p>
          </table:table-cell>
          <table:table-cell table:formula="of:=[.D951]-[.D95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23" office:value-type="float" office:value="21850" calcext:value-type="float">
            <text:p>21850</text:p>
          </table:table-cell>
          <table:table-cell office:value-type="float" office:value="8640000" calcext:value-type="float">
            <text:p>8640000</text:p>
          </table:table-cell>
          <table:table-cell table:formula="of:=[.B951]/[.C951]" office:value-type="float" office:value="0.00252893518518519" calcext:value-type="float">
            <text:p>0,00252893518518519000</text:p>
          </table:table-cell>
          <table:table-cell table:formula="of:=[.D952]-[.D95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23" office:value-type="float" office:value="21873" calcext:value-type="float">
            <text:p>21873</text:p>
          </table:table-cell>
          <table:table-cell office:value-type="float" office:value="8640000" calcext:value-type="float">
            <text:p>8640000</text:p>
          </table:table-cell>
          <table:table-cell table:formula="of:=[.B952]/[.C952]" office:value-type="float" office:value="0.00253159722222222" calcext:value-type="float">
            <text:p>0,00253159722222222000</text:p>
          </table:table-cell>
          <table:table-cell table:formula="of:=[.D953]-[.D95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23" office:value-type="float" office:value="21896" calcext:value-type="float">
            <text:p>21896</text:p>
          </table:table-cell>
          <table:table-cell office:value-type="float" office:value="8640000" calcext:value-type="float">
            <text:p>8640000</text:p>
          </table:table-cell>
          <table:table-cell table:formula="of:=[.B953]/[.C953]" office:value-type="float" office:value="0.00253425925925926" calcext:value-type="float">
            <text:p>0,00253425925925926000</text:p>
          </table:table-cell>
          <table:table-cell table:formula="of:=[.D954]-[.D95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23" office:value-type="float" office:value="21919" calcext:value-type="float">
            <text:p>21919</text:p>
          </table:table-cell>
          <table:table-cell office:value-type="float" office:value="8640000" calcext:value-type="float">
            <text:p>8640000</text:p>
          </table:table-cell>
          <table:table-cell table:formula="of:=[.B954]/[.C954]" office:value-type="float" office:value="0.0025369212962963" calcext:value-type="float">
            <text:p>0,00253692129629630000</text:p>
          </table:table-cell>
          <table:table-cell table:formula="of:=[.D955]-[.D95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23" office:value-type="float" office:value="21942" calcext:value-type="float">
            <text:p>21942</text:p>
          </table:table-cell>
          <table:table-cell office:value-type="float" office:value="8640000" calcext:value-type="float">
            <text:p>8640000</text:p>
          </table:table-cell>
          <table:table-cell table:formula="of:=[.B955]/[.C955]" office:value-type="float" office:value="0.00253958333333333" calcext:value-type="float">
            <text:p>0,00253958333333333000</text:p>
          </table:table-cell>
          <table:table-cell table:formula="of:=[.D956]-[.D95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23" office:value-type="float" office:value="21965" calcext:value-type="float">
            <text:p>21965</text:p>
          </table:table-cell>
          <table:table-cell office:value-type="float" office:value="8640000" calcext:value-type="float">
            <text:p>8640000</text:p>
          </table:table-cell>
          <table:table-cell table:formula="of:=[.B956]/[.C956]" office:value-type="float" office:value="0.00254224537037037" calcext:value-type="float">
            <text:p>0,00254224537037037000</text:p>
          </table:table-cell>
          <table:table-cell table:formula="of:=[.D957]-[.D95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23" office:value-type="float" office:value="21988" calcext:value-type="float">
            <text:p>21988</text:p>
          </table:table-cell>
          <table:table-cell office:value-type="float" office:value="8640000" calcext:value-type="float">
            <text:p>8640000</text:p>
          </table:table-cell>
          <table:table-cell table:formula="of:=[.B957]/[.C957]" office:value-type="float" office:value="0.00254490740740741" calcext:value-type="float">
            <text:p>0,00254490740740741000</text:p>
          </table:table-cell>
          <table:table-cell table:formula="of:=[.D958]-[.D95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23" office:value-type="float" office:value="22011" calcext:value-type="float">
            <text:p>22011</text:p>
          </table:table-cell>
          <table:table-cell office:value-type="float" office:value="8640000" calcext:value-type="float">
            <text:p>8640000</text:p>
          </table:table-cell>
          <table:table-cell table:formula="of:=[.B958]/[.C958]" office:value-type="float" office:value="0.00254756944444444" calcext:value-type="float">
            <text:p>0,00254756944444444000</text:p>
          </table:table-cell>
          <table:table-cell table:formula="of:=[.D959]-[.D95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23" office:value-type="float" office:value="22034" calcext:value-type="float">
            <text:p>22034</text:p>
          </table:table-cell>
          <table:table-cell office:value-type="float" office:value="8640000" calcext:value-type="float">
            <text:p>8640000</text:p>
          </table:table-cell>
          <table:table-cell table:formula="of:=[.B959]/[.C959]" office:value-type="float" office:value="0.00255023148148148" calcext:value-type="float">
            <text:p>0,00255023148148148000</text:p>
          </table:table-cell>
          <table:table-cell table:formula="of:=[.D960]-[.D95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23" office:value-type="float" office:value="22057" calcext:value-type="float">
            <text:p>22057</text:p>
          </table:table-cell>
          <table:table-cell office:value-type="float" office:value="8640000" calcext:value-type="float">
            <text:p>8640000</text:p>
          </table:table-cell>
          <table:table-cell table:formula="of:=[.B960]/[.C960]" office:value-type="float" office:value="0.00255289351851852" calcext:value-type="float">
            <text:p>0,00255289351851852000</text:p>
          </table:table-cell>
          <table:table-cell table:formula="of:=[.D961]-[.D96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23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961]/[.C961]" office:value-type="float" office:value="0.00255555555555556" calcext:value-type="float">
            <text:p>0,00255555555555556000</text:p>
          </table:table-cell>
          <table:table-cell table:formula="of:=[.D962]-[.D96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23" office:value-type="float" office:value="22103" calcext:value-type="float">
            <text:p>22103</text:p>
          </table:table-cell>
          <table:table-cell office:value-type="float" office:value="8640000" calcext:value-type="float">
            <text:p>8640000</text:p>
          </table:table-cell>
          <table:table-cell table:formula="of:=[.B962]/[.C962]" office:value-type="float" office:value="0.00255821759259259" calcext:value-type="float">
            <text:p>0,00255821759259259000</text:p>
          </table:table-cell>
          <table:table-cell table:formula="of:=[.D963]-[.D96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23" office:value-type="float" office:value="22126" calcext:value-type="float">
            <text:p>22126</text:p>
          </table:table-cell>
          <table:table-cell office:value-type="float" office:value="8640000" calcext:value-type="float">
            <text:p>8640000</text:p>
          </table:table-cell>
          <table:table-cell table:formula="of:=[.B963]/[.C963]" office:value-type="float" office:value="0.00256087962962963" calcext:value-type="float">
            <text:p>0,00256087962962963000</text:p>
          </table:table-cell>
          <table:table-cell table:formula="of:=[.D964]-[.D96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23" office:value-type="float" office:value="22149" calcext:value-type="float">
            <text:p>22149</text:p>
          </table:table-cell>
          <table:table-cell office:value-type="float" office:value="8640000" calcext:value-type="float">
            <text:p>8640000</text:p>
          </table:table-cell>
          <table:table-cell table:formula="of:=[.B964]/[.C964]" office:value-type="float" office:value="0.00256354166666667" calcext:value-type="float">
            <text:p>0,00256354166666667000</text:p>
          </table:table-cell>
          <table:table-cell table:formula="of:=[.D965]-[.D96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23" office:value-type="float" office:value="22172" calcext:value-type="float">
            <text:p>22172</text:p>
          </table:table-cell>
          <table:table-cell office:value-type="float" office:value="8640000" calcext:value-type="float">
            <text:p>8640000</text:p>
          </table:table-cell>
          <table:table-cell table:formula="of:=[.B965]/[.C965]" office:value-type="float" office:value="0.0025662037037037" calcext:value-type="float">
            <text:p>0,00256620370370370000</text:p>
          </table:table-cell>
          <table:table-cell table:formula="of:=[.D966]-[.D96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23" office:value-type="float" office:value="22195" calcext:value-type="float">
            <text:p>22195</text:p>
          </table:table-cell>
          <table:table-cell office:value-type="float" office:value="8640000" calcext:value-type="float">
            <text:p>8640000</text:p>
          </table:table-cell>
          <table:table-cell table:formula="of:=[.B966]/[.C966]" office:value-type="float" office:value="0.00256886574074074" calcext:value-type="float">
            <text:p>0,00256886574074074000</text:p>
          </table:table-cell>
          <table:table-cell table:formula="of:=[.D967]-[.D96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23" office:value-type="float" office:value="22218" calcext:value-type="float">
            <text:p>22218</text:p>
          </table:table-cell>
          <table:table-cell office:value-type="float" office:value="8640000" calcext:value-type="float">
            <text:p>8640000</text:p>
          </table:table-cell>
          <table:table-cell table:formula="of:=[.B967]/[.C967]" office:value-type="float" office:value="0.00257152777777778" calcext:value-type="float">
            <text:p>0,00257152777777778000</text:p>
          </table:table-cell>
          <table:table-cell table:formula="of:=[.D968]-[.D96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23" office:value-type="float" office:value="22241" calcext:value-type="float">
            <text:p>22241</text:p>
          </table:table-cell>
          <table:table-cell office:value-type="float" office:value="8640000" calcext:value-type="float">
            <text:p>8640000</text:p>
          </table:table-cell>
          <table:table-cell table:formula="of:=[.B968]/[.C968]" office:value-type="float" office:value="0.00257418981481481" calcext:value-type="float">
            <text:p>0,00257418981481481000</text:p>
          </table:table-cell>
          <table:table-cell table:formula="of:=[.D969]-[.D96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23" office:value-type="float" office:value="22264" calcext:value-type="float">
            <text:p>22264</text:p>
          </table:table-cell>
          <table:table-cell office:value-type="float" office:value="8640000" calcext:value-type="float">
            <text:p>8640000</text:p>
          </table:table-cell>
          <table:table-cell table:formula="of:=[.B969]/[.C969]" office:value-type="float" office:value="0.00257685185185185" calcext:value-type="float">
            <text:p>0,00257685185185185000</text:p>
          </table:table-cell>
          <table:table-cell table:formula="of:=[.D970]-[.D96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23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970]/[.C970]" office:value-type="float" office:value="0.00257951388888889" calcext:value-type="float">
            <text:p>0,00257951388888889000</text:p>
          </table:table-cell>
          <table:table-cell table:formula="of:=[.D971]-[.D97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23" office:value-type="float" office:value="22310" calcext:value-type="float">
            <text:p>22310</text:p>
          </table:table-cell>
          <table:table-cell office:value-type="float" office:value="8640000" calcext:value-type="float">
            <text:p>8640000</text:p>
          </table:table-cell>
          <table:table-cell table:formula="of:=[.B971]/[.C971]" office:value-type="float" office:value="0.00258217592592593" calcext:value-type="float">
            <text:p>0,00258217592592593000</text:p>
          </table:table-cell>
          <table:table-cell table:formula="of:=[.D972]-[.D97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23" office:value-type="float" office:value="22333" calcext:value-type="float">
            <text:p>22333</text:p>
          </table:table-cell>
          <table:table-cell office:value-type="float" office:value="8640000" calcext:value-type="float">
            <text:p>8640000</text:p>
          </table:table-cell>
          <table:table-cell table:formula="of:=[.B972]/[.C972]" office:value-type="float" office:value="0.00258483796296296" calcext:value-type="float">
            <text:p>0,00258483796296296000</text:p>
          </table:table-cell>
          <table:table-cell table:formula="of:=[.D973]-[.D97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23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973]/[.C973]" office:value-type="float" office:value="0.0025875" calcext:value-type="float">
            <text:p>0,00258750000000000000</text:p>
          </table:table-cell>
          <table:table-cell table:formula="of:=[.D974]-[.D97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23" office:value-type="float" office:value="22379" calcext:value-type="float">
            <text:p>22379</text:p>
          </table:table-cell>
          <table:table-cell office:value-type="float" office:value="8640000" calcext:value-type="float">
            <text:p>8640000</text:p>
          </table:table-cell>
          <table:table-cell table:formula="of:=[.B974]/[.C974]" office:value-type="float" office:value="0.00259016203703704" calcext:value-type="float">
            <text:p>0,00259016203703704000</text:p>
          </table:table-cell>
          <table:table-cell table:formula="of:=[.D975]-[.D97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23" office:value-type="float" office:value="22402" calcext:value-type="float">
            <text:p>22402</text:p>
          </table:table-cell>
          <table:table-cell office:value-type="float" office:value="8640000" calcext:value-type="float">
            <text:p>8640000</text:p>
          </table:table-cell>
          <table:table-cell table:formula="of:=[.B975]/[.C975]" office:value-type="float" office:value="0.00259282407407407" calcext:value-type="float">
            <text:p>0,00259282407407407000</text:p>
          </table:table-cell>
          <table:table-cell table:formula="of:=[.D976]-[.D97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23" office:value-type="float" office:value="22425" calcext:value-type="float">
            <text:p>22425</text:p>
          </table:table-cell>
          <table:table-cell office:value-type="float" office:value="8640000" calcext:value-type="float">
            <text:p>8640000</text:p>
          </table:table-cell>
          <table:table-cell table:formula="of:=[.B976]/[.C976]" office:value-type="float" office:value="0.00259548611111111" calcext:value-type="float">
            <text:p>0,00259548611111111000</text:p>
          </table:table-cell>
          <table:table-cell table:formula="of:=[.D977]-[.D97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23" office:value-type="float" office:value="22448" calcext:value-type="float">
            <text:p>22448</text:p>
          </table:table-cell>
          <table:table-cell office:value-type="float" office:value="8640000" calcext:value-type="float">
            <text:p>8640000</text:p>
          </table:table-cell>
          <table:table-cell table:formula="of:=[.B977]/[.C977]" office:value-type="float" office:value="0.00259814814814815" calcext:value-type="float">
            <text:p>0,00259814814814815000</text:p>
          </table:table-cell>
          <table:table-cell table:formula="of:=[.D978]-[.D97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23" office:value-type="float" office:value="22471" calcext:value-type="float">
            <text:p>22471</text:p>
          </table:table-cell>
          <table:table-cell office:value-type="float" office:value="8640000" calcext:value-type="float">
            <text:p>8640000</text:p>
          </table:table-cell>
          <table:table-cell table:formula="of:=[.B978]/[.C978]" office:value-type="float" office:value="0.00260081018518519" calcext:value-type="float">
            <text:p>0,00260081018518519000</text:p>
          </table:table-cell>
          <table:table-cell table:formula="of:=[.D979]-[.D97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23" office:value-type="float" office:value="22494" calcext:value-type="float">
            <text:p>22494</text:p>
          </table:table-cell>
          <table:table-cell office:value-type="float" office:value="8640000" calcext:value-type="float">
            <text:p>8640000</text:p>
          </table:table-cell>
          <table:table-cell table:formula="of:=[.B979]/[.C979]" office:value-type="float" office:value="0.00260347222222222" calcext:value-type="float">
            <text:p>0,00260347222222222000</text:p>
          </table:table-cell>
          <table:table-cell table:formula="of:=[.D980]-[.D97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23" office:value-type="float" office:value="22517" calcext:value-type="float">
            <text:p>22517</text:p>
          </table:table-cell>
          <table:table-cell office:value-type="float" office:value="8640000" calcext:value-type="float">
            <text:p>8640000</text:p>
          </table:table-cell>
          <table:table-cell table:formula="of:=[.B980]/[.C980]" office:value-type="float" office:value="0.00260613425925926" calcext:value-type="float">
            <text:p>0,00260613425925926000</text:p>
          </table:table-cell>
          <table:table-cell table:formula="of:=[.D981]-[.D980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23" office:value-type="float" office:value="22540" calcext:value-type="float">
            <text:p>22540</text:p>
          </table:table-cell>
          <table:table-cell office:value-type="float" office:value="8640000" calcext:value-type="float">
            <text:p>8640000</text:p>
          </table:table-cell>
          <table:table-cell table:formula="of:=[.B981]/[.C981]" office:value-type="float" office:value="0.0026087962962963" calcext:value-type="float">
            <text:p>0,00260879629629630000</text:p>
          </table:table-cell>
          <table:table-cell table:formula="of:=[.D982]-[.D98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23" office:value-type="float" office:value="22563" calcext:value-type="float">
            <text:p>22563</text:p>
          </table:table-cell>
          <table:table-cell office:value-type="float" office:value="8640000" calcext:value-type="float">
            <text:p>8640000</text:p>
          </table:table-cell>
          <table:table-cell table:formula="of:=[.B982]/[.C982]" office:value-type="float" office:value="0.00261145833333333" calcext:value-type="float">
            <text:p>0,00261145833333333000</text:p>
          </table:table-cell>
          <table:table-cell table:formula="of:=[.D983]-[.D98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23" office:value-type="float" office:value="22586" calcext:value-type="float">
            <text:p>22586</text:p>
          </table:table-cell>
          <table:table-cell office:value-type="float" office:value="8640000" calcext:value-type="float">
            <text:p>8640000</text:p>
          </table:table-cell>
          <table:table-cell table:formula="of:=[.B983]/[.C983]" office:value-type="float" office:value="0.00261412037037037" calcext:value-type="float">
            <text:p>0,00261412037037037000</text:p>
          </table:table-cell>
          <table:table-cell table:formula="of:=[.D984]-[.D98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23" office:value-type="float" office:value="22609" calcext:value-type="float">
            <text:p>22609</text:p>
          </table:table-cell>
          <table:table-cell office:value-type="float" office:value="8640000" calcext:value-type="float">
            <text:p>8640000</text:p>
          </table:table-cell>
          <table:table-cell table:formula="of:=[.B984]/[.C984]" office:value-type="float" office:value="0.00261678240740741" calcext:value-type="float">
            <text:p>0,00261678240740741000</text:p>
          </table:table-cell>
          <table:table-cell table:formula="of:=[.D985]-[.D98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23" office:value-type="float" office:value="22632" calcext:value-type="float">
            <text:p>22632</text:p>
          </table:table-cell>
          <table:table-cell office:value-type="float" office:value="8640000" calcext:value-type="float">
            <text:p>8640000</text:p>
          </table:table-cell>
          <table:table-cell table:formula="of:=[.B985]/[.C985]" office:value-type="float" office:value="0.00261944444444444" calcext:value-type="float">
            <text:p>0,00261944444444444000</text:p>
          </table:table-cell>
          <table:table-cell table:formula="of:=[.D986]-[.D985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23" office:value-type="float" office:value="22655" calcext:value-type="float">
            <text:p>22655</text:p>
          </table:table-cell>
          <table:table-cell office:value-type="float" office:value="8640000" calcext:value-type="float">
            <text:p>8640000</text:p>
          </table:table-cell>
          <table:table-cell table:formula="of:=[.B986]/[.C986]" office:value-type="float" office:value="0.00262210648148148" calcext:value-type="float">
            <text:p>0,00262210648148148000</text:p>
          </table:table-cell>
          <table:table-cell table:formula="of:=[.D987]-[.D98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23" office:value-type="float" office:value="22678" calcext:value-type="float">
            <text:p>22678</text:p>
          </table:table-cell>
          <table:table-cell office:value-type="float" office:value="8640000" calcext:value-type="float">
            <text:p>8640000</text:p>
          </table:table-cell>
          <table:table-cell table:formula="of:=[.B987]/[.C987]" office:value-type="float" office:value="0.00262476851851852" calcext:value-type="float">
            <text:p>0,00262476851851852000</text:p>
          </table:table-cell>
          <table:table-cell table:formula="of:=[.D988]-[.D98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23" office:value-type="float" office:value="22701" calcext:value-type="float">
            <text:p>22701</text:p>
          </table:table-cell>
          <table:table-cell office:value-type="float" office:value="8640000" calcext:value-type="float">
            <text:p>8640000</text:p>
          </table:table-cell>
          <table:table-cell table:formula="of:=[.B988]/[.C988]" office:value-type="float" office:value="0.00262743055555556" calcext:value-type="float">
            <text:p>0,00262743055555556000</text:p>
          </table:table-cell>
          <table:table-cell table:formula="of:=[.D989]-[.D98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23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989]/[.C989]" office:value-type="float" office:value="0.00263009259259259" calcext:value-type="float">
            <text:p>0,00263009259259259000</text:p>
          </table:table-cell>
          <table:table-cell table:formula="of:=[.D990]-[.D98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23" office:value-type="float" office:value="22747" calcext:value-type="float">
            <text:p>22747</text:p>
          </table:table-cell>
          <table:table-cell office:value-type="float" office:value="8640000" calcext:value-type="float">
            <text:p>8640000</text:p>
          </table:table-cell>
          <table:table-cell table:formula="of:=[.B990]/[.C990]" office:value-type="float" office:value="0.00263275462962963" calcext:value-type="float">
            <text:p>0,00263275462962963000</text:p>
          </table:table-cell>
          <table:table-cell table:formula="of:=[.D991]-[.D99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23" office:value-type="float" office:value="22770" calcext:value-type="float">
            <text:p>22770</text:p>
          </table:table-cell>
          <table:table-cell office:value-type="float" office:value="8640000" calcext:value-type="float">
            <text:p>8640000</text:p>
          </table:table-cell>
          <table:table-cell table:formula="of:=[.B991]/[.C991]" office:value-type="float" office:value="0.00263541666666667" calcext:value-type="float">
            <text:p>0,00263541666666667000</text:p>
          </table:table-cell>
          <table:table-cell table:formula="of:=[.D992]-[.D99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23" office:value-type="float" office:value="22793" calcext:value-type="float">
            <text:p>22793</text:p>
          </table:table-cell>
          <table:table-cell office:value-type="float" office:value="8640000" calcext:value-type="float">
            <text:p>8640000</text:p>
          </table:table-cell>
          <table:table-cell table:formula="of:=[.B992]/[.C992]" office:value-type="float" office:value="0.0026380787037037" calcext:value-type="float">
            <text:p>0,00263807870370370000</text:p>
          </table:table-cell>
          <table:table-cell table:formula="of:=[.D993]-[.D99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23" office:value-type="float" office:value="22816" calcext:value-type="float">
            <text:p>22816</text:p>
          </table:table-cell>
          <table:table-cell office:value-type="float" office:value="8640000" calcext:value-type="float">
            <text:p>8640000</text:p>
          </table:table-cell>
          <table:table-cell table:formula="of:=[.B993]/[.C993]" office:value-type="float" office:value="0.00264074074074074" calcext:value-type="float">
            <text:p>0,00264074074074074000</text:p>
          </table:table-cell>
          <table:table-cell table:formula="of:=[.D994]-[.D99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23" office:value-type="float" office:value="22839" calcext:value-type="float">
            <text:p>22839</text:p>
          </table:table-cell>
          <table:table-cell office:value-type="float" office:value="8640000" calcext:value-type="float">
            <text:p>8640000</text:p>
          </table:table-cell>
          <table:table-cell table:formula="of:=[.B994]/[.C994]" office:value-type="float" office:value="0.00264340277777778" calcext:value-type="float">
            <text:p>0,00264340277777778000</text:p>
          </table:table-cell>
          <table:table-cell table:formula="of:=[.D995]-[.D99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23" office:value-type="float" office:value="22862" calcext:value-type="float">
            <text:p>22862</text:p>
          </table:table-cell>
          <table:table-cell office:value-type="float" office:value="8640000" calcext:value-type="float">
            <text:p>8640000</text:p>
          </table:table-cell>
          <table:table-cell table:formula="of:=[.B995]/[.C995]" office:value-type="float" office:value="0.00264606481481481" calcext:value-type="float">
            <text:p>0,00264606481481481000</text:p>
          </table:table-cell>
          <table:table-cell table:formula="of:=[.D996]-[.D99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23" office:value-type="float" office:value="22885" calcext:value-type="float">
            <text:p>22885</text:p>
          </table:table-cell>
          <table:table-cell office:value-type="float" office:value="8640000" calcext:value-type="float">
            <text:p>8640000</text:p>
          </table:table-cell>
          <table:table-cell table:formula="of:=[.B996]/[.C996]" office:value-type="float" office:value="0.00264872685185185" calcext:value-type="float">
            <text:p>0,00264872685185185000</text:p>
          </table:table-cell>
          <table:table-cell table:formula="of:=[.D997]-[.D99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23" office:value-type="float" office:value="22908" calcext:value-type="float">
            <text:p>22908</text:p>
          </table:table-cell>
          <table:table-cell office:value-type="float" office:value="8640000" calcext:value-type="float">
            <text:p>8640000</text:p>
          </table:table-cell>
          <table:table-cell table:formula="of:=[.B997]/[.C997]" office:value-type="float" office:value="0.00265138888888889" calcext:value-type="float">
            <text:p>0,00265138888888889000</text:p>
          </table:table-cell>
          <table:table-cell table:formula="of:=[.D998]-[.D99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23" office:value-type="float" office:value="22931" calcext:value-type="float">
            <text:p>22931</text:p>
          </table:table-cell>
          <table:table-cell office:value-type="float" office:value="8640000" calcext:value-type="float">
            <text:p>8640000</text:p>
          </table:table-cell>
          <table:table-cell table:formula="of:=[.B998]/[.C998]" office:value-type="float" office:value="0.00265405092592593" calcext:value-type="float">
            <text:p>0,00265405092592593000</text:p>
          </table:table-cell>
          <table:table-cell table:formula="of:=[.D999]-[.D99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23" office:value-type="float" office:value="22954" calcext:value-type="float">
            <text:p>22954</text:p>
          </table:table-cell>
          <table:table-cell office:value-type="float" office:value="8640000" calcext:value-type="float">
            <text:p>8640000</text:p>
          </table:table-cell>
          <table:table-cell table:formula="of:=[.B999]/[.C999]" office:value-type="float" office:value="0.00265671296296296" calcext:value-type="float">
            <text:p>0,00265671296296296000</text:p>
          </table:table-cell>
          <table:table-cell table:formula="of:=[.D1000]-[.D999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23" office:value-type="float" office:value="22977" calcext:value-type="float">
            <text:p>22977</text:p>
          </table:table-cell>
          <table:table-cell office:value-type="float" office:value="8640000" calcext:value-type="float">
            <text:p>8640000</text:p>
          </table:table-cell>
          <table:table-cell table:formula="of:=[.B1000]/[.C1000]" office:value-type="float" office:value="0.002659375" calcext:value-type="float">
            <text:p>0,00265937500000000000</text:p>
          </table:table-cell>
          <table:table-cell table:formula="of:=[.D1001]-[.D100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23" office:value-type="float" office:value="23000" calcext:value-type="float">
            <text:p>23000</text:p>
          </table:table-cell>
          <table:table-cell office:value-type="float" office:value="8640000" calcext:value-type="float">
            <text:p>8640000</text:p>
          </table:table-cell>
          <table:table-cell table:formula="of:=[.B1001]/[.C1001]" office:value-type="float" office:value="0.00266203703703704" calcext:value-type="float">
            <text:p>0,00266203703703704000</text:p>
          </table:table-cell>
          <table:table-cell table:formula="of:=[.D1002]-[.D100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23" office:value-type="float" office:value="23023" calcext:value-type="float">
            <text:p>23023</text:p>
          </table:table-cell>
          <table:table-cell office:value-type="float" office:value="8640000" calcext:value-type="float">
            <text:p>8640000</text:p>
          </table:table-cell>
          <table:table-cell table:formula="of:=[.B1002]/[.C1002]" office:value-type="float" office:value="0.00266469907407407" calcext:value-type="float">
            <text:p>0,00266469907407407000</text:p>
          </table:table-cell>
          <table:table-cell table:formula="of:=[.D1003]-[.D100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23" office:value-type="float" office:value="23046" calcext:value-type="float">
            <text:p>23046</text:p>
          </table:table-cell>
          <table:table-cell office:value-type="float" office:value="8640000" calcext:value-type="float">
            <text:p>8640000</text:p>
          </table:table-cell>
          <table:table-cell table:formula="of:=[.B1003]/[.C1003]" office:value-type="float" office:value="0.00266736111111111" calcext:value-type="float">
            <text:p>0,00266736111111111000</text:p>
          </table:table-cell>
          <table:table-cell table:formula="of:=[.D1004]-[.D100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23" office:value-type="float" office:value="23069" calcext:value-type="float">
            <text:p>23069</text:p>
          </table:table-cell>
          <table:table-cell office:value-type="float" office:value="8640000" calcext:value-type="float">
            <text:p>8640000</text:p>
          </table:table-cell>
          <table:table-cell table:formula="of:=[.B1004]/[.C1004]" office:value-type="float" office:value="0.00267002314814815" calcext:value-type="float">
            <text:p>0,00267002314814815000</text:p>
          </table:table-cell>
          <table:table-cell table:formula="of:=[.D1005]-[.D1004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23" office:value-type="float" office:value="23092" calcext:value-type="float">
            <text:p>23092</text:p>
          </table:table-cell>
          <table:table-cell office:value-type="float" office:value="8640000" calcext:value-type="float">
            <text:p>8640000</text:p>
          </table:table-cell>
          <table:table-cell table:formula="of:=[.B1005]/[.C1005]" office:value-type="float" office:value="0.00267268518518519" calcext:value-type="float">
            <text:p>0,00267268518518519000</text:p>
          </table:table-cell>
          <table:table-cell table:formula="of:=[.D1006]-[.D100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23" office:value-type="float" office:value="23115" calcext:value-type="float">
            <text:p>23115</text:p>
          </table:table-cell>
          <table:table-cell office:value-type="float" office:value="8640000" calcext:value-type="float">
            <text:p>8640000</text:p>
          </table:table-cell>
          <table:table-cell table:formula="of:=[.B1006]/[.C1006]" office:value-type="float" office:value="0.00267534722222222" calcext:value-type="float">
            <text:p>0,00267534722222222000</text:p>
          </table:table-cell>
          <table:table-cell table:formula="of:=[.D1007]-[.D100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23" office:value-type="float" office:value="23138" calcext:value-type="float">
            <text:p>23138</text:p>
          </table:table-cell>
          <table:table-cell office:value-type="float" office:value="8640000" calcext:value-type="float">
            <text:p>8640000</text:p>
          </table:table-cell>
          <table:table-cell table:formula="of:=[.B1007]/[.C1007]" office:value-type="float" office:value="0.00267800925925926" calcext:value-type="float">
            <text:p>0,00267800925925926000</text:p>
          </table:table-cell>
          <table:table-cell table:formula="of:=[.D1008]-[.D100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23" office:value-type="float" office:value="23161" calcext:value-type="float">
            <text:p>23161</text:p>
          </table:table-cell>
          <table:table-cell office:value-type="float" office:value="8640000" calcext:value-type="float">
            <text:p>8640000</text:p>
          </table:table-cell>
          <table:table-cell table:formula="of:=[.B1008]/[.C1008]" office:value-type="float" office:value="0.0026806712962963" calcext:value-type="float">
            <text:p>0,00268067129629630000</text:p>
          </table:table-cell>
          <table:table-cell table:formula="of:=[.D1009]-[.D100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23" office:value-type="float" office:value="23184" calcext:value-type="float">
            <text:p>23184</text:p>
          </table:table-cell>
          <table:table-cell office:value-type="float" office:value="8640000" calcext:value-type="float">
            <text:p>8640000</text:p>
          </table:table-cell>
          <table:table-cell table:formula="of:=[.B1009]/[.C1009]" office:value-type="float" office:value="0.00268333333333333" calcext:value-type="float">
            <text:p>0,00268333333333333000</text:p>
          </table:table-cell>
          <table:table-cell table:formula="of:=[.D1010]-[.D100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23" office:value-type="float" office:value="23207" calcext:value-type="float">
            <text:p>23207</text:p>
          </table:table-cell>
          <table:table-cell office:value-type="float" office:value="8640000" calcext:value-type="float">
            <text:p>8640000</text:p>
          </table:table-cell>
          <table:table-cell table:formula="of:=[.B1010]/[.C1010]" office:value-type="float" office:value="0.00268599537037037" calcext:value-type="float">
            <text:p>0,00268599537037037000</text:p>
          </table:table-cell>
          <table:table-cell table:formula="of:=[.D1011]-[.D101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23" office:value-type="float" office:value="23230" calcext:value-type="float">
            <text:p>23230</text:p>
          </table:table-cell>
          <table:table-cell office:value-type="float" office:value="8640000" calcext:value-type="float">
            <text:p>8640000</text:p>
          </table:table-cell>
          <table:table-cell table:formula="of:=[.B1011]/[.C1011]" office:value-type="float" office:value="0.00268865740740741" calcext:value-type="float">
            <text:p>0,00268865740740741000</text:p>
          </table:table-cell>
          <table:table-cell table:formula="of:=[.D1012]-[.D101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23" office:value-type="float" office:value="23253" calcext:value-type="float">
            <text:p>23253</text:p>
          </table:table-cell>
          <table:table-cell office:value-type="float" office:value="8640000" calcext:value-type="float">
            <text:p>8640000</text:p>
          </table:table-cell>
          <table:table-cell table:formula="of:=[.B1012]/[.C1012]" office:value-type="float" office:value="0.00269131944444444" calcext:value-type="float">
            <text:p>0,00269131944444444000</text:p>
          </table:table-cell>
          <table:table-cell table:formula="of:=[.D1013]-[.D101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23" office:value-type="float" office:value="23276" calcext:value-type="float">
            <text:p>23276</text:p>
          </table:table-cell>
          <table:table-cell office:value-type="float" office:value="8640000" calcext:value-type="float">
            <text:p>8640000</text:p>
          </table:table-cell>
          <table:table-cell table:formula="of:=[.B1013]/[.C1013]" office:value-type="float" office:value="0.00269398148148148" calcext:value-type="float">
            <text:p>0,00269398148148148000</text:p>
          </table:table-cell>
          <table:table-cell table:formula="of:=[.D1014]-[.D1013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23" office:value-type="float" office:value="23299" calcext:value-type="float">
            <text:p>23299</text:p>
          </table:table-cell>
          <table:table-cell office:value-type="float" office:value="8640000" calcext:value-type="float">
            <text:p>8640000</text:p>
          </table:table-cell>
          <table:table-cell table:formula="of:=[.B1014]/[.C1014]" office:value-type="float" office:value="0.00269664351851852" calcext:value-type="float">
            <text:p>0,00269664351851852000</text:p>
          </table:table-cell>
          <table:table-cell table:formula="of:=[.D1015]-[.D101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23" office:value-type="float" office:value="23322" calcext:value-type="float">
            <text:p>23322</text:p>
          </table:table-cell>
          <table:table-cell office:value-type="float" office:value="8640000" calcext:value-type="float">
            <text:p>8640000</text:p>
          </table:table-cell>
          <table:table-cell table:formula="of:=[.B1015]/[.C1015]" office:value-type="float" office:value="0.00269930555555556" calcext:value-type="float">
            <text:p>0,00269930555555556000</text:p>
          </table:table-cell>
          <table:table-cell table:formula="of:=[.D1016]-[.D101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23" office:value-type="float" office:value="23345" calcext:value-type="float">
            <text:p>23345</text:p>
          </table:table-cell>
          <table:table-cell office:value-type="float" office:value="8640000" calcext:value-type="float">
            <text:p>8640000</text:p>
          </table:table-cell>
          <table:table-cell table:formula="of:=[.B1016]/[.C1016]" office:value-type="float" office:value="0.00270196759259259" calcext:value-type="float">
            <text:p>0,00270196759259259000</text:p>
          </table:table-cell>
          <table:table-cell table:formula="of:=[.D1017]-[.D101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23" office:value-type="float" office:value="23368" calcext:value-type="float">
            <text:p>23368</text:p>
          </table:table-cell>
          <table:table-cell office:value-type="float" office:value="8640000" calcext:value-type="float">
            <text:p>8640000</text:p>
          </table:table-cell>
          <table:table-cell table:formula="of:=[.B1017]/[.C1017]" office:value-type="float" office:value="0.00270462962962963" calcext:value-type="float">
            <text:p>0,00270462962962963000</text:p>
          </table:table-cell>
          <table:table-cell table:formula="of:=[.D1018]-[.D101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23" office:value-type="float" office:value="23391" calcext:value-type="float">
            <text:p>23391</text:p>
          </table:table-cell>
          <table:table-cell office:value-type="float" office:value="8640000" calcext:value-type="float">
            <text:p>8640000</text:p>
          </table:table-cell>
          <table:table-cell table:formula="of:=[.B1018]/[.C1018]" office:value-type="float" office:value="0.00270729166666667" calcext:value-type="float">
            <text:p>0,00270729166666667000</text:p>
          </table:table-cell>
          <table:table-cell table:formula="of:=[.D1019]-[.D1018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23" office:value-type="float" office:value="23414" calcext:value-type="float">
            <text:p>23414</text:p>
          </table:table-cell>
          <table:table-cell office:value-type="float" office:value="8640000" calcext:value-type="float">
            <text:p>8640000</text:p>
          </table:table-cell>
          <table:table-cell table:formula="of:=[.B1019]/[.C1019]" office:value-type="float" office:value="0.0027099537037037" calcext:value-type="float">
            <text:p>0,00270995370370370000</text:p>
          </table:table-cell>
          <table:table-cell table:formula="of:=[.D1020]-[.D101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23" office:value-type="float" office:value="23437" calcext:value-type="float">
            <text:p>23437</text:p>
          </table:table-cell>
          <table:table-cell office:value-type="float" office:value="8640000" calcext:value-type="float">
            <text:p>8640000</text:p>
          </table:table-cell>
          <table:table-cell table:formula="of:=[.B1020]/[.C1020]" office:value-type="float" office:value="0.00271261574074074" calcext:value-type="float">
            <text:p>0,00271261574074074000</text:p>
          </table:table-cell>
          <table:table-cell table:formula="of:=[.D1021]-[.D102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23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1021]/[.C1021]" office:value-type="float" office:value="0.00271527777777778" calcext:value-type="float">
            <text:p>0,00271527777777778000</text:p>
          </table:table-cell>
          <table:table-cell table:formula="of:=[.D1022]-[.D102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23" office:value-type="float" office:value="23483" calcext:value-type="float">
            <text:p>23483</text:p>
          </table:table-cell>
          <table:table-cell office:value-type="float" office:value="8640000" calcext:value-type="float">
            <text:p>8640000</text:p>
          </table:table-cell>
          <table:table-cell table:formula="of:=[.B1022]/[.C1022]" office:value-type="float" office:value="0.00271793981481482" calcext:value-type="float">
            <text:p>0,00271793981481482000</text:p>
          </table:table-cell>
          <table:table-cell table:formula="of:=[.D1023]-[.D102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23" office:value-type="float" office:value="23506" calcext:value-type="float">
            <text:p>23506</text:p>
          </table:table-cell>
          <table:table-cell office:value-type="float" office:value="8640000" calcext:value-type="float">
            <text:p>8640000</text:p>
          </table:table-cell>
          <table:table-cell table:formula="of:=[.B1023]/[.C1023]" office:value-type="float" office:value="0.00272060185185185" calcext:value-type="float">
            <text:p>0,00272060185185185000</text:p>
          </table:table-cell>
          <table:table-cell table:formula="of:=[.D1024]-[.D102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23" office:value-type="float" office:value="23529" calcext:value-type="float">
            <text:p>23529</text:p>
          </table:table-cell>
          <table:table-cell office:value-type="float" office:value="8640000" calcext:value-type="float">
            <text:p>8640000</text:p>
          </table:table-cell>
          <table:table-cell table:formula="of:=[.B1024]/[.C1024]" office:value-type="float" office:value="0.00272326388888889" calcext:value-type="float">
            <text:p>0,00272326388888889000</text:p>
          </table:table-cell>
          <table:table-cell table:formula="of:=[.D1025]-[.D102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23" office:value-type="float" office:value="23552" calcext:value-type="float">
            <text:p>23552</text:p>
          </table:table-cell>
          <table:table-cell office:value-type="float" office:value="8640000" calcext:value-type="float">
            <text:p>8640000</text:p>
          </table:table-cell>
          <table:table-cell table:formula="of:=[.B1025]/[.C1025]" office:value-type="float" office:value="0.00272592592592593" calcext:value-type="float">
            <text:p>0,00272592592592593000</text:p>
          </table:table-cell>
          <table:table-cell table:formula="of:=[.D1026]-[.D102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23" office:value-type="float" office:value="23575" calcext:value-type="float">
            <text:p>23575</text:p>
          </table:table-cell>
          <table:table-cell office:value-type="float" office:value="8640000" calcext:value-type="float">
            <text:p>8640000</text:p>
          </table:table-cell>
          <table:table-cell table:formula="of:=[.B1026]/[.C1026]" office:value-type="float" office:value="0.00272858796296296" calcext:value-type="float">
            <text:p>0,00272858796296296000</text:p>
          </table:table-cell>
          <table:table-cell table:formula="of:=[.D1027]-[.D1026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23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1027]/[.C1027]" office:value-type="float" office:value="0.00273125" calcext:value-type="float">
            <text:p>0,00273125000000000000</text:p>
          </table:table-cell>
          <table:table-cell table:formula="of:=[.D1028]-[.D1027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23" office:value-type="float" office:value="23621" calcext:value-type="float">
            <text:p>23621</text:p>
          </table:table-cell>
          <table:table-cell office:value-type="float" office:value="8640000" calcext:value-type="float">
            <text:p>8640000</text:p>
          </table:table-cell>
          <table:table-cell table:formula="of:=[.B1028]/[.C1028]" office:value-type="float" office:value="0.00273391203703704" calcext:value-type="float">
            <text:p>0,00273391203703704000</text:p>
          </table:table-cell>
          <table:table-cell table:formula="of:=[.D1029]-[.D102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23" office:value-type="float" office:value="23644" calcext:value-type="float">
            <text:p>23644</text:p>
          </table:table-cell>
          <table:table-cell office:value-type="float" office:value="8640000" calcext:value-type="float">
            <text:p>8640000</text:p>
          </table:table-cell>
          <table:table-cell table:formula="of:=[.B1029]/[.C1029]" office:value-type="float" office:value="0.00273657407407407" calcext:value-type="float">
            <text:p>0,00273657407407407000</text:p>
          </table:table-cell>
          <table:table-cell table:formula="of:=[.D1030]-[.D102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23" office:value-type="float" office:value="23667" calcext:value-type="float">
            <text:p>23667</text:p>
          </table:table-cell>
          <table:table-cell office:value-type="float" office:value="8640000" calcext:value-type="float">
            <text:p>8640000</text:p>
          </table:table-cell>
          <table:table-cell table:formula="of:=[.B1030]/[.C1030]" office:value-type="float" office:value="0.00273923611111111" calcext:value-type="float">
            <text:p>0,00273923611111111000</text:p>
          </table:table-cell>
          <table:table-cell table:formula="of:=[.D1031]-[.D103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23" office:value-type="float" office:value="23690" calcext:value-type="float">
            <text:p>23690</text:p>
          </table:table-cell>
          <table:table-cell office:value-type="float" office:value="8640000" calcext:value-type="float">
            <text:p>8640000</text:p>
          </table:table-cell>
          <table:table-cell table:formula="of:=[.B1031]/[.C1031]" office:value-type="float" office:value="0.00274189814814815" calcext:value-type="float">
            <text:p>0,00274189814814815000</text:p>
          </table:table-cell>
          <table:table-cell table:formula="of:=[.D1032]-[.D1031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23" office:value-type="float" office:value="23713" calcext:value-type="float">
            <text:p>23713</text:p>
          </table:table-cell>
          <table:table-cell office:value-type="float" office:value="8640000" calcext:value-type="float">
            <text:p>8640000</text:p>
          </table:table-cell>
          <table:table-cell table:formula="of:=[.B1032]/[.C1032]" office:value-type="float" office:value="0.00274456018518519" calcext:value-type="float">
            <text:p>0,00274456018518519000</text:p>
          </table:table-cell>
          <table:table-cell table:formula="of:=[.D1033]-[.D1032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23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1033]/[.C1033]" office:value-type="float" office:value="0.00274722222222222" calcext:value-type="float">
            <text:p>0,00274722222222222000</text:p>
          </table:table-cell>
          <table:table-cell table:formula="of:=[.D1034]-[.D103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23" office:value-type="float" office:value="23759" calcext:value-type="float">
            <text:p>23759</text:p>
          </table:table-cell>
          <table:table-cell office:value-type="float" office:value="8640000" calcext:value-type="float">
            <text:p>8640000</text:p>
          </table:table-cell>
          <table:table-cell table:formula="of:=[.B1034]/[.C1034]" office:value-type="float" office:value="0.00274988425925926" calcext:value-type="float">
            <text:p>0,00274988425925926000</text:p>
          </table:table-cell>
          <table:table-cell table:formula="of:=[.D1035]-[.D1034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23" office:value-type="float" office:value="23782" calcext:value-type="float">
            <text:p>23782</text:p>
          </table:table-cell>
          <table:table-cell office:value-type="float" office:value="8640000" calcext:value-type="float">
            <text:p>8640000</text:p>
          </table:table-cell>
          <table:table-cell table:formula="of:=[.B1035]/[.C1035]" office:value-type="float" office:value="0.0027525462962963" calcext:value-type="float">
            <text:p>0,00275254629629630000</text:p>
          </table:table-cell>
          <table:table-cell table:formula="of:=[.D1036]-[.D1035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23" office:value-type="float" office:value="23805" calcext:value-type="float">
            <text:p>23805</text:p>
          </table:table-cell>
          <table:table-cell office:value-type="float" office:value="8640000" calcext:value-type="float">
            <text:p>8640000</text:p>
          </table:table-cell>
          <table:table-cell table:formula="of:=[.B1036]/[.C1036]" office:value-type="float" office:value="0.00275520833333333" calcext:value-type="float">
            <text:p>0,00275520833333333000</text:p>
          </table:table-cell>
          <table:table-cell table:formula="of:=[.D1037]-[.D1036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23" office:value-type="float" office:value="23828" calcext:value-type="float">
            <text:p>23828</text:p>
          </table:table-cell>
          <table:table-cell office:value-type="float" office:value="8640000" calcext:value-type="float">
            <text:p>8640000</text:p>
          </table:table-cell>
          <table:table-cell table:formula="of:=[.B1037]/[.C1037]" office:value-type="float" office:value="0.00275787037037037" calcext:value-type="float">
            <text:p>0,00275787037037037000</text:p>
          </table:table-cell>
          <table:table-cell table:formula="of:=[.D1038]-[.D1037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23" office:value-type="float" office:value="23851" calcext:value-type="float">
            <text:p>23851</text:p>
          </table:table-cell>
          <table:table-cell office:value-type="float" office:value="8640000" calcext:value-type="float">
            <text:p>8640000</text:p>
          </table:table-cell>
          <table:table-cell table:formula="of:=[.B1038]/[.C1038]" office:value-type="float" office:value="0.00276053240740741" calcext:value-type="float">
            <text:p>0,00276053240740741000</text:p>
          </table:table-cell>
          <table:table-cell table:formula="of:=[.D1039]-[.D1038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23" office:value-type="float" office:value="23874" calcext:value-type="float">
            <text:p>23874</text:p>
          </table:table-cell>
          <table:table-cell office:value-type="float" office:value="8640000" calcext:value-type="float">
            <text:p>8640000</text:p>
          </table:table-cell>
          <table:table-cell table:formula="of:=[.B1039]/[.C1039]" office:value-type="float" office:value="0.00276319444444444" calcext:value-type="float">
            <text:p>0,00276319444444444000</text:p>
          </table:table-cell>
          <table:table-cell table:formula="of:=[.D1040]-[.D1039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23" office:value-type="float" office:value="23897" calcext:value-type="float">
            <text:p>23897</text:p>
          </table:table-cell>
          <table:table-cell office:value-type="float" office:value="8640000" calcext:value-type="float">
            <text:p>8640000</text:p>
          </table:table-cell>
          <table:table-cell table:formula="of:=[.B1040]/[.C1040]" office:value-type="float" office:value="0.00276585648148148" calcext:value-type="float">
            <text:p>0,00276585648148148000</text:p>
          </table:table-cell>
          <table:table-cell table:formula="of:=[.D1041]-[.D1040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23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1041]/[.C1041]" office:value-type="float" office:value="0.00276851851851852" calcext:value-type="float">
            <text:p>0,00276851851851852000</text:p>
          </table:table-cell>
          <table:table-cell table:formula="of:=[.D1042]-[.D1041]" office:value-type="float" office:value="0.0000026620370370367" calcext:value-type="float">
            <text:p>0,0000026620370370367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23" office:value-type="float" office:value="23943" calcext:value-type="float">
            <text:p>23943</text:p>
          </table:table-cell>
          <table:table-cell office:value-type="float" office:value="8640000" calcext:value-type="float">
            <text:p>8640000</text:p>
          </table:table-cell>
          <table:table-cell table:formula="of:=[.B1042]/[.C1042]" office:value-type="float" office:value="0.00277118055555556" calcext:value-type="float">
            <text:p>0,00277118055555556000</text:p>
          </table:table-cell>
          <table:table-cell table:formula="of:=[.D1043]-[.D1042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23" office:value-type="float" office:value="23966" calcext:value-type="float">
            <text:p>23966</text:p>
          </table:table-cell>
          <table:table-cell office:value-type="float" office:value="8640000" calcext:value-type="float">
            <text:p>8640000</text:p>
          </table:table-cell>
          <table:table-cell table:formula="of:=[.B1043]/[.C1043]" office:value-type="float" office:value="0.00277384259259259" calcext:value-type="float">
            <text:p>0,00277384259259259000</text:p>
          </table:table-cell>
          <table:table-cell table:formula="of:=[.D1044]-[.D1043]" office:value-type="float" office:value="0.00000266203703703713" calcext:value-type="float">
            <text:p>0,0000026620370370371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23" office:value-type="float" office:value="23989" calcext:value-type="float">
            <text:p>23989</text:p>
          </table:table-cell>
          <table:table-cell office:value-type="float" office:value="8640000" calcext:value-type="float">
            <text:p>8640000</text:p>
          </table:table-cell>
          <table:table-cell table:formula="of:=[.B1044]/[.C1044]" office:value-type="float" office:value="0.00277650462962963" calcext:value-type="float">
            <text:p>0,00277650462962963000</text:p>
          </table:table-cell>
          <table:table-cell table:formula="of:=#REF!-[.D1044]" office:value-type="string" office:string-value="" calcext:value-type="error">
            <text:p>#REF!</text:p>
          </table:table-cell>
        </table:table-row>
        <table:table-row table:style-name="ro1" table:number-rows-repeated="1047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5:51:33.398909613</meta:creation-date>
    <dc:date>2026-05-17T15:51:41.191809711</dc:date>
    <meta:editing-duration>PT9S</meta:editing-duration>
    <meta:editing-cycles>1</meta:editing-cycles>
    <meta:document-statistic meta:table-count="1" meta:cell-count="5220" meta:object-count="0"/>
    <meta:generator>LibreOffice/24.2.7.2$Linux_X86_64 LibreOffice_project/420$Build-2</meta:generator>
  </office:meta>
</office:document-meta>
</file>