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185185185185185" calcext:value-type="float">
            <text:p>0,00000185185185185185</text:p>
          </table:table-cell>
          <table:table-cell table:formula="of:=[.D3]-[.D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6" office:value-type="float" office:value="32" calcext:value-type="float">
            <text:p>3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37037037037037" calcext:value-type="float">
            <text:p>0,00000370370370370370</text:p>
          </table:table-cell>
          <table:table-cell table:formula="of:=[.D4]-[.D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6" office:value-type="float" office:value="48" calcext:value-type="float">
            <text:p>4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555555555555556" calcext:value-type="float">
            <text:p>0,00000555555555555556</text:p>
          </table:table-cell>
          <table:table-cell table:formula="of:=[.D5]-[.D4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6" office:value-type="float" office:value="64" calcext:value-type="float">
            <text:p>6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740740740740741" calcext:value-type="float">
            <text:p>0,00000740740740740741</text:p>
          </table:table-cell>
          <table:table-cell table:formula="of:=[.D6]-[.D5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6" office:value-type="float" office:value="80" calcext:value-type="float">
            <text:p>8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0925925925925926" calcext:value-type="float">
            <text:p>0,00000925925925925926</text:p>
          </table:table-cell>
          <table:table-cell table:formula="of:=[.D7]-[.D6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6" office:value-type="float" office:value="96" calcext:value-type="float">
            <text:p>9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11111111111111" calcext:value-type="float">
            <text:p>0,00001111111111111110</text:p>
          </table:table-cell>
          <table:table-cell table:formula="of:=[.D8]-[.D7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6" office:value-type="float" office:value="112" calcext:value-type="float">
            <text:p>11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2962962962963" calcext:value-type="float">
            <text:p>0,00001296296296296300</text:p>
          </table:table-cell>
          <table:table-cell table:formula="of:=[.D9]-[.D8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6" office:value-type="float" office:value="128" calcext:value-type="float">
            <text:p>12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48148148148148" calcext:value-type="float">
            <text:p>0,00001481481481481480</text:p>
          </table:table-cell>
          <table:table-cell table:formula="of:=[.D10]-[.D9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6" office:value-type="float" office:value="144" calcext:value-type="float">
            <text:p>14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66666666666667" calcext:value-type="float">
            <text:p>0,00001666666666666670</text:p>
          </table:table-cell>
          <table:table-cell table:formula="of:=[.D11]-[.D10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6" office:value-type="float" office:value="160" calcext:value-type="float">
            <text:p>1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185185185185185" calcext:value-type="float">
            <text:p>0,00001851851851851850</text:p>
          </table:table-cell>
          <table:table-cell table:formula="of:=[.D12]-[.D11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6" office:value-type="float" office:value="176" calcext:value-type="float">
            <text:p>17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03703703703704" calcext:value-type="float">
            <text:p>0,00002037037037037040</text:p>
          </table:table-cell>
          <table:table-cell table:formula="of:=[.D13]-[.D1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6" office:value-type="float" office:value="192" calcext:value-type="float">
            <text:p>19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22222222222222" calcext:value-type="float">
            <text:p>0,00002222222222222220</text:p>
          </table:table-cell>
          <table:table-cell table:formula="of:=[.D14]-[.D1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6" office:value-type="float" office:value="208" calcext:value-type="float">
            <text:p>20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240740740740741" calcext:value-type="float">
            <text:p>0,00002407407407407410</text:p>
          </table:table-cell>
          <table:table-cell table:formula="of:=[.D15]-[.D14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6" office:value-type="float" office:value="224" calcext:value-type="float">
            <text:p>22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259259259259259" calcext:value-type="float">
            <text:p>0,00002592592592592590</text:p>
          </table:table-cell>
          <table:table-cell table:formula="of:=[.D16]-[.D15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6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277777777777778" calcext:value-type="float">
            <text:p>0,00002777777777777780</text:p>
          </table:table-cell>
          <table:table-cell table:formula="of:=[.D17]-[.D16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6" office:value-type="float" office:value="256" calcext:value-type="float">
            <text:p>25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296296296296296" calcext:value-type="float">
            <text:p>0,00002962962962962960</text:p>
          </table:table-cell>
          <table:table-cell table:formula="of:=[.D18]-[.D17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6" office:value-type="float" office:value="272" calcext:value-type="float">
            <text:p>27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314814814814815" calcext:value-type="float">
            <text:p>0,00003148148148148150</text:p>
          </table:table-cell>
          <table:table-cell table:formula="of:=[.D19]-[.D18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6" office:value-type="float" office:value="288" calcext:value-type="float">
            <text:p>28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333333333333333" calcext:value-type="float">
            <text:p>0,00003333333333333330</text:p>
          </table:table-cell>
          <table:table-cell table:formula="of:=[.D20]-[.D19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6" office:value-type="float" office:value="304" calcext:value-type="float">
            <text:p>30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351851851851852" calcext:value-type="float">
            <text:p>0,00003518518518518520</text:p>
          </table:table-cell>
          <table:table-cell table:formula="of:=[.D21]-[.D20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6" office:value-type="float" office:value="320" calcext:value-type="float">
            <text:p>3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37037037037037" calcext:value-type="float">
            <text:p>0,00003703703703703700</text:p>
          </table:table-cell>
          <table:table-cell table:formula="of:=[.D22]-[.D21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6" office:value-type="float" office:value="336" calcext:value-type="float">
            <text:p>33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388888888888889" calcext:value-type="float">
            <text:p>0,00003888888888888890</text:p>
          </table:table-cell>
          <table:table-cell table:formula="of:=[.D23]-[.D2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6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407407407407407" calcext:value-type="float">
            <text:p>0,00004074074074074070</text:p>
          </table:table-cell>
          <table:table-cell table:formula="of:=[.D24]-[.D2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6" office:value-type="float" office:value="368" calcext:value-type="float">
            <text:p>36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425925925925926" calcext:value-type="float">
            <text:p>0,00004259259259259260</text:p>
          </table:table-cell>
          <table:table-cell table:formula="of:=[.D25]-[.D24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6" office:value-type="float" office:value="384" calcext:value-type="float">
            <text:p>38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444444444444444" calcext:value-type="float">
            <text:p>0,00004444444444444450</text:p>
          </table:table-cell>
          <table:table-cell table:formula="of:=[.D26]-[.D25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6" office:value-type="float" office:value="400" calcext:value-type="float">
            <text:p>4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462962962962963" calcext:value-type="float">
            <text:p>0,00004629629629629630</text:p>
          </table:table-cell>
          <table:table-cell table:formula="of:=[.D27]-[.D26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6" office:value-type="float" office:value="416" calcext:value-type="float">
            <text:p>41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481481481481482" calcext:value-type="float">
            <text:p>0,00004814814814814820</text:p>
          </table:table-cell>
          <table:table-cell table:formula="of:=[.D28]-[.D27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6" office:value-type="float" office:value="432" calcext:value-type="float">
            <text:p>43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5" calcext:value-type="float">
            <text:p>0,00005000000000000000</text:p>
          </table:table-cell>
          <table:table-cell table:formula="of:=[.D29]-[.D28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6" office:value-type="float" office:value="448" calcext:value-type="float">
            <text:p>44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518518518518519" calcext:value-type="float">
            <text:p>0,00005185185185185190</text:p>
          </table:table-cell>
          <table:table-cell table:formula="of:=[.D30]-[.D29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6" office:value-type="float" office:value="464" calcext:value-type="float">
            <text:p>46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537037037037037" calcext:value-type="float">
            <text:p>0,00005370370370370370</text:p>
          </table:table-cell>
          <table:table-cell table:formula="of:=[.D31]-[.D30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6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555555555555556" calcext:value-type="float">
            <text:p>0,00005555555555555560</text:p>
          </table:table-cell>
          <table:table-cell table:formula="of:=[.D32]-[.D31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6" office:value-type="float" office:value="496" calcext:value-type="float">
            <text:p>49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574074074074074" calcext:value-type="float">
            <text:p>0,00005740740740740740</text:p>
          </table:table-cell>
          <table:table-cell table:formula="of:=[.D33]-[.D3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6" office:value-type="float" office:value="512" calcext:value-type="float">
            <text:p>51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592592592592593" calcext:value-type="float">
            <text:p>0,00005925925925925930</text:p>
          </table:table-cell>
          <table:table-cell table:formula="of:=[.D34]-[.D3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6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611111111111111" calcext:value-type="float">
            <text:p>0,00006111111111111110</text:p>
          </table:table-cell>
          <table:table-cell table:formula="of:=[.D35]-[.D34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6" office:value-type="float" office:value="544" calcext:value-type="float">
            <text:p>54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62962962962963" calcext:value-type="float">
            <text:p>0,00006296296296296300</text:p>
          </table:table-cell>
          <table:table-cell table:formula="of:=[.D36]-[.D35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6" office:value-type="float" office:value="560" calcext:value-type="float">
            <text:p>56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648148148148148" calcext:value-type="float">
            <text:p>0,00006481481481481480</text:p>
          </table:table-cell>
          <table:table-cell table:formula="of:=[.D37]-[.D36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6" office:value-type="float" office:value="576" calcext:value-type="float">
            <text:p>57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666666666666667" calcext:value-type="float">
            <text:p>0,00006666666666666670</text:p>
          </table:table-cell>
          <table:table-cell table:formula="of:=[.D38]-[.D37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6" office:value-type="float" office:value="592" calcext:value-type="float">
            <text:p>59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685185185185185" calcext:value-type="float">
            <text:p>0,00006851851851851850</text:p>
          </table:table-cell>
          <table:table-cell table:formula="of:=[.D39]-[.D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6" office:value-type="float" office:value="608" calcext:value-type="float">
            <text:p>60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703703703703704" calcext:value-type="float">
            <text:p>0,00007037037037037040</text:p>
          </table:table-cell>
          <table:table-cell table:formula="of:=[.D40]-[.D39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6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722222222222222" calcext:value-type="float">
            <text:p>0,00007222222222222220</text:p>
          </table:table-cell>
          <table:table-cell table:formula="of:=[.D41]-[.D40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6" office:value-type="float" office:value="640" calcext:value-type="float">
            <text:p>6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740740740740741" calcext:value-type="float">
            <text:p>0,00007407407407407410</text:p>
          </table:table-cell>
          <table:table-cell table:formula="of:=[.D42]-[.D41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6" office:value-type="float" office:value="656" calcext:value-type="float">
            <text:p>65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759259259259259" calcext:value-type="float">
            <text:p>0,00007592592592592590</text:p>
          </table:table-cell>
          <table:table-cell table:formula="of:=[.D43]-[.D4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6" office:value-type="float" office:value="672" calcext:value-type="float">
            <text:p>67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777777777777778" calcext:value-type="float">
            <text:p>0,00007777777777777780</text:p>
          </table:table-cell>
          <table:table-cell table:formula="of:=[.D44]-[.D4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6" office:value-type="float" office:value="688" calcext:value-type="float">
            <text:p>68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796296296296296" calcext:value-type="float">
            <text:p>0,00007962962962962960</text:p>
          </table:table-cell>
          <table:table-cell table:formula="of:=[.D45]-[.D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6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814814814814815" calcext:value-type="float">
            <text:p>0,00008148148148148150</text:p>
          </table:table-cell>
          <table:table-cell table:formula="of:=[.D46]-[.D45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6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833333333333333" calcext:value-type="float">
            <text:p>0,00008333333333333330</text:p>
          </table:table-cell>
          <table:table-cell table:formula="of:=[.D47]-[.D46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6" office:value-type="float" office:value="736" calcext:value-type="float">
            <text:p>73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0851851851851852" calcext:value-type="float">
            <text:p>0,00008518518518518520</text:p>
          </table:table-cell>
          <table:table-cell table:formula="of:=[.D48]-[.D47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6" office:value-type="float" office:value="752" calcext:value-type="float">
            <text:p>75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087037037037037" calcext:value-type="float">
            <text:p>0,00008703703703703700</text:p>
          </table:table-cell>
          <table:table-cell table:formula="of:=[.D49]-[.D48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6" office:value-type="float" office:value="768" calcext:value-type="float">
            <text:p>76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0888888888888889" calcext:value-type="float">
            <text:p>0,00008888888888888890</text:p>
          </table:table-cell>
          <table:table-cell table:formula="of:=[.D50]-[.D49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6" office:value-type="float" office:value="784" calcext:value-type="float">
            <text:p>78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0907407407407408" calcext:value-type="float">
            <text:p>0,00009074074074074070</text:p>
          </table:table-cell>
          <table:table-cell table:formula="of:=[.D51]-[.D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6" office:value-type="float" office:value="800" calcext:value-type="float">
            <text:p>8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0925925925925926" calcext:value-type="float">
            <text:p>0,00009259259259259260</text:p>
          </table:table-cell>
          <table:table-cell table:formula="of:=[.D52]-[.D51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6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0944444444444444" calcext:value-type="float">
            <text:p>0,00009444444444444440</text:p>
          </table:table-cell>
          <table:table-cell table:formula="of:=[.D53]-[.D5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6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0962962962962963" calcext:value-type="float">
            <text:p>0,00009629629629629630</text:p>
          </table:table-cell>
          <table:table-cell table:formula="of:=[.D54]-[.D5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6" office:value-type="float" office:value="848" calcext:value-type="float">
            <text:p>84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0981481481481482" calcext:value-type="float">
            <text:p>0,00009814814814814820</text:p>
          </table:table-cell>
          <table:table-cell table:formula="of:=[.D55]-[.D54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6" office:value-type="float" office:value="864" calcext:value-type="float">
            <text:p>86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" calcext:value-type="float">
            <text:p>0,00010000000000000000</text:p>
          </table:table-cell>
          <table:table-cell table:formula="of:=[.D56]-[.D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6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01851851851852" calcext:value-type="float">
            <text:p>0,00010185185185185200</text:p>
          </table:table-cell>
          <table:table-cell table:formula="of:=[.D57]-[.D56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6" office:value-type="float" office:value="896" calcext:value-type="float">
            <text:p>89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03703703703704" calcext:value-type="float">
            <text:p>0,00010370370370370400</text:p>
          </table:table-cell>
          <table:table-cell table:formula="of:=[.D58]-[.D57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6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05555555555556" calcext:value-type="float">
            <text:p>0,00010555555555555600</text:p>
          </table:table-cell>
          <table:table-cell table:formula="of:=[.D59]-[.D58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6" office:value-type="float" office:value="928" calcext:value-type="float">
            <text:p>92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07407407407407" calcext:value-type="float">
            <text:p>0,00010740740740740700</text:p>
          </table:table-cell>
          <table:table-cell table:formula="of:=[.D60]-[.D59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6" office:value-type="float" office:value="944" calcext:value-type="float">
            <text:p>94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09259259259259" calcext:value-type="float">
            <text:p>0,00010925925925925900</text:p>
          </table:table-cell>
          <table:table-cell table:formula="of:=[.D61]-[.D60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6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11111111111111" calcext:value-type="float">
            <text:p>0,00011111111111111100</text:p>
          </table:table-cell>
          <table:table-cell table:formula="of:=[.D62]-[.D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6" office:value-type="float" office:value="976" calcext:value-type="float">
            <text:p>97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12962962962963" calcext:value-type="float">
            <text:p>0,00011296296296296300</text:p>
          </table:table-cell>
          <table:table-cell table:formula="of:=[.D63]-[.D62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6" office:value-type="float" office:value="992" calcext:value-type="float">
            <text:p>99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14814814814815" calcext:value-type="float">
            <text:p>0,00011481481481481500</text:p>
          </table:table-cell>
          <table:table-cell table:formula="of:=[.D64]-[.D63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6" office:value-type="float" office:value="1008" calcext:value-type="float">
            <text:p>100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16666666666667" calcext:value-type="float">
            <text:p>0,00011666666666666700</text:p>
          </table:table-cell>
          <table:table-cell table:formula="of:=[.D65]-[.D64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6" office:value-type="float" office:value="1024" calcext:value-type="float">
            <text:p>102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18518518518519" calcext:value-type="float">
            <text:p>0,00011851851851851900</text:p>
          </table:table-cell>
          <table:table-cell table:formula="of:=[.D66]-[.D65]" office:value-type="float" office:value="0.00000185185185185185" calcext:value-type="float">
            <text:p>0,000001851851851851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6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2037037037037" calcext:value-type="float">
            <text:p>0,00012037037037037000</text:p>
          </table:table-cell>
          <table:table-cell table:formula="of:=[.D67]-[.D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6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22222222222222" calcext:value-type="float">
            <text:p>0,00012222222222222200</text:p>
          </table:table-cell>
          <table:table-cell table:formula="of:=[.D68]-[.D67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6" office:value-type="float" office:value="1072" calcext:value-type="float">
            <text:p>107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24074074074074" calcext:value-type="float">
            <text:p>0,00012407407407407400</text:p>
          </table:table-cell>
          <table:table-cell table:formula="of:=[.D69]-[.D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6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25925925925926" calcext:value-type="float">
            <text:p>0,00012592592592592600</text:p>
          </table:table-cell>
          <table:table-cell table:formula="of:=[.D70]-[.D69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6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27777777777778" calcext:value-type="float">
            <text:p>0,00012777777777777800</text:p>
          </table:table-cell>
          <table:table-cell table:formula="of:=[.D71]-[.D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6" office:value-type="float" office:value="1120" calcext:value-type="float">
            <text:p>11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2962962962963" calcext:value-type="float">
            <text:p>0,00012962962962963000</text:p>
          </table:table-cell>
          <table:table-cell table:formula="of:=[.D72]-[.D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6" office:value-type="float" office:value="1136" calcext:value-type="float">
            <text:p>113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31481481481481" calcext:value-type="float">
            <text:p>0,00013148148148148100</text:p>
          </table:table-cell>
          <table:table-cell table:formula="of:=[.D73]-[.D72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6" office:value-type="float" office:value="1152" calcext:value-type="float">
            <text:p>115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33333333333333" calcext:value-type="float">
            <text:p>0,00013333333333333300</text:p>
          </table:table-cell>
          <table:table-cell table:formula="of:=[.D74]-[.D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6" office:value-type="float" office:value="1168" calcext:value-type="float">
            <text:p>116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35185185185185" calcext:value-type="float">
            <text:p>0,00013518518518518500</text:p>
          </table:table-cell>
          <table:table-cell table:formula="of:=[.D75]-[.D74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6" office:value-type="float" office:value="1184" calcext:value-type="float">
            <text:p>118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37037037037037" calcext:value-type="float">
            <text:p>0,00013703703703703700</text:p>
          </table:table-cell>
          <table:table-cell table:formula="of:=[.D76]-[.D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6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38888888888889" calcext:value-type="float">
            <text:p>0,00013888888888888900</text:p>
          </table:table-cell>
          <table:table-cell table:formula="of:=[.D77]-[.D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6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40740740740741" calcext:value-type="float">
            <text:p>0,00014074074074074100</text:p>
          </table:table-cell>
          <table:table-cell table:formula="of:=[.D78]-[.D77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6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42592592592593" calcext:value-type="float">
            <text:p>0,00014259259259259300</text:p>
          </table:table-cell>
          <table:table-cell table:formula="of:=[.D79]-[.D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6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44444444444444" calcext:value-type="float">
            <text:p>0,00014444444444444400</text:p>
          </table:table-cell>
          <table:table-cell table:formula="of:=[.D80]-[.D79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6" office:value-type="float" office:value="1264" calcext:value-type="float">
            <text:p>126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46296296296296" calcext:value-type="float">
            <text:p>0,00014629629629629600</text:p>
          </table:table-cell>
          <table:table-cell table:formula="of:=[.D81]-[.D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6" office:value-type="float" office:value="1280" calcext:value-type="float">
            <text:p>12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48148148148148" calcext:value-type="float">
            <text:p>0,00014814814814814800</text:p>
          </table:table-cell>
          <table:table-cell table:formula="of:=[.D82]-[.D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6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5" calcext:value-type="float">
            <text:p>0,00015000000000000000</text:p>
          </table:table-cell>
          <table:table-cell table:formula="of:=[.D83]-[.D82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6" office:value-type="float" office:value="1312" calcext:value-type="float">
            <text:p>131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51851851851852" calcext:value-type="float">
            <text:p>0,00015185185185185200</text:p>
          </table:table-cell>
          <table:table-cell table:formula="of:=[.D84]-[.D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6" office:value-type="float" office:value="1328" calcext:value-type="float">
            <text:p>132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53703703703704" calcext:value-type="float">
            <text:p>0,00015370370370370400</text:p>
          </table:table-cell>
          <table:table-cell table:formula="of:=[.D85]-[.D84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6" office:value-type="float" office:value="1344" calcext:value-type="float">
            <text:p>134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55555555555556" calcext:value-type="float">
            <text:p>0,00015555555555555600</text:p>
          </table:table-cell>
          <table:table-cell table:formula="of:=[.D86]-[.D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6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57407407407407" calcext:value-type="float">
            <text:p>0,00015740740740740700</text:p>
          </table:table-cell>
          <table:table-cell table:formula="of:=[.D87]-[.D86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6" office:value-type="float" office:value="1376" calcext:value-type="float">
            <text:p>137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59259259259259" calcext:value-type="float">
            <text:p>0,00015925925925925900</text:p>
          </table:table-cell>
          <table:table-cell table:formula="of:=[.D88]-[.D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6" office:value-type="float" office:value="1392" calcext:value-type="float">
            <text:p>139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61111111111111" calcext:value-type="float">
            <text:p>0,00016111111111111100</text:p>
          </table:table-cell>
          <table:table-cell table:formula="of:=[.D89]-[.D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6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62962962962963" calcext:value-type="float">
            <text:p>0,00016296296296296300</text:p>
          </table:table-cell>
          <table:table-cell table:formula="of:=[.D90]-[.D89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6" office:value-type="float" office:value="1424" calcext:value-type="float">
            <text:p>142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64814814814815" calcext:value-type="float">
            <text:p>0,00016481481481481500</text:p>
          </table:table-cell>
          <table:table-cell table:formula="of:=[.D91]-[.D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6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66666666666667" calcext:value-type="float">
            <text:p>0,00016666666666666700</text:p>
          </table:table-cell>
          <table:table-cell table:formula="of:=[.D92]-[.D91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6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168518518518519" calcext:value-type="float">
            <text:p>0,00016851851851851900</text:p>
          </table:table-cell>
          <table:table-cell table:formula="of:=[.D93]-[.D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6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17037037037037" calcext:value-type="float">
            <text:p>0,00017037037037037000</text:p>
          </table:table-cell>
          <table:table-cell table:formula="of:=[.D94]-[.D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6" office:value-type="float" office:value="1488" calcext:value-type="float">
            <text:p>148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172222222222222" calcext:value-type="float">
            <text:p>0,00017222222222222200</text:p>
          </table:table-cell>
          <table:table-cell table:formula="of:=[.D95]-[.D94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6" office:value-type="float" office:value="1504" calcext:value-type="float">
            <text:p>150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174074074074074" calcext:value-type="float">
            <text:p>0,00017407407407407400</text:p>
          </table:table-cell>
          <table:table-cell table:formula="of:=[.D96]-[.D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6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175925925925926" calcext:value-type="float">
            <text:p>0,00017592592592592600</text:p>
          </table:table-cell>
          <table:table-cell table:formula="of:=[.D97]-[.D96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6" office:value-type="float" office:value="1536" calcext:value-type="float">
            <text:p>153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177777777777778" calcext:value-type="float">
            <text:p>0,00017777777777777800</text:p>
          </table:table-cell>
          <table:table-cell table:formula="of:=[.D98]-[.D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6" office:value-type="float" office:value="1552" calcext:value-type="float">
            <text:p>155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17962962962963" calcext:value-type="float">
            <text:p>0,00017962962962963000</text:p>
          </table:table-cell>
          <table:table-cell table:formula="of:=[.D99]-[.D98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6" office:value-type="float" office:value="1568" calcext:value-type="float">
            <text:p>156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181481481481482" calcext:value-type="float">
            <text:p>0,00018148148148148100</text:p>
          </table:table-cell>
          <table:table-cell table:formula="of:=[.D100]-[.D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6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183333333333333" calcext:value-type="float">
            <text:p>0,00018333333333333300</text:p>
          </table:table-cell>
          <table:table-cell table:formula="of:=[.D101]-[.D1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6" office:value-type="float" office:value="1600" calcext:value-type="float">
            <text:p>1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185185185185185" calcext:value-type="float">
            <text:p>0,00018518518518518500</text:p>
          </table:table-cell>
          <table:table-cell table:formula="of:=[.D102]-[.D101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6" office:value-type="float" office:value="1616" calcext:value-type="float">
            <text:p>161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187037037037037" calcext:value-type="float">
            <text:p>0,00018703703703703700</text:p>
          </table:table-cell>
          <table:table-cell table:formula="of:=[.D103]-[.D1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6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188888888888889" calcext:value-type="float">
            <text:p>0,00018888888888888900</text:p>
          </table:table-cell>
          <table:table-cell table:formula="of:=[.D104]-[.D103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6" office:value-type="float" office:value="1648" calcext:value-type="float">
            <text:p>164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190740740740741" calcext:value-type="float">
            <text:p>0,00019074074074074100</text:p>
          </table:table-cell>
          <table:table-cell table:formula="of:=[.D105]-[.D1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6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192592592592593" calcext:value-type="float">
            <text:p>0,00019259259259259300</text:p>
          </table:table-cell>
          <table:table-cell table:formula="of:=[.D106]-[.D1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6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194444444444444" calcext:value-type="float">
            <text:p>0,00019444444444444400</text:p>
          </table:table-cell>
          <table:table-cell table:formula="of:=[.D107]-[.D106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6" office:value-type="float" office:value="1696" calcext:value-type="float">
            <text:p>169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196296296296296" calcext:value-type="float">
            <text:p>0,00019629629629629600</text:p>
          </table:table-cell>
          <table:table-cell table:formula="of:=[.D108]-[.D1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6" office:value-type="float" office:value="1712" calcext:value-type="float">
            <text:p>171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198148148148148" calcext:value-type="float">
            <text:p>0,00019814814814814800</text:p>
          </table:table-cell>
          <table:table-cell table:formula="of:=[.D109]-[.D108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6" office:value-type="float" office:value="1728" calcext:value-type="float">
            <text:p>172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" calcext:value-type="float">
            <text:p>0,00020000000000000000</text:p>
          </table:table-cell>
          <table:table-cell table:formula="of:=[.D110]-[.D1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6" office:value-type="float" office:value="1744" calcext:value-type="float">
            <text:p>174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01851851851852" calcext:value-type="float">
            <text:p>0,00020185185185185200</text:p>
          </table:table-cell>
          <table:table-cell table:formula="of:=[.D111]-[.D1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6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03703703703704" calcext:value-type="float">
            <text:p>0,00020370370370370400</text:p>
          </table:table-cell>
          <table:table-cell table:formula="of:=[.D112]-[.D111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6" office:value-type="float" office:value="1776" calcext:value-type="float">
            <text:p>177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05555555555556" calcext:value-type="float">
            <text:p>0,00020555555555555600</text:p>
          </table:table-cell>
          <table:table-cell table:formula="of:=[.D113]-[.D1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6" office:value-type="float" office:value="1792" calcext:value-type="float">
            <text:p>179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07407407407407" calcext:value-type="float">
            <text:p>0,00020740740740740700</text:p>
          </table:table-cell>
          <table:table-cell table:formula="of:=[.D114]-[.D113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6" office:value-type="float" office:value="1808" calcext:value-type="float">
            <text:p>180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09259259259259" calcext:value-type="float">
            <text:p>0,00020925925925925900</text:p>
          </table:table-cell>
          <table:table-cell table:formula="of:=[.D115]-[.D1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6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11111111111111" calcext:value-type="float">
            <text:p>0,00021111111111111100</text:p>
          </table:table-cell>
          <table:table-cell table:formula="of:=[.D116]-[.D115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6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12962962962963" calcext:value-type="float">
            <text:p>0,00021296296296296300</text:p>
          </table:table-cell>
          <table:table-cell table:formula="of:=[.D117]-[.D1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6" office:value-type="float" office:value="1856" calcext:value-type="float">
            <text:p>185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14814814814815" calcext:value-type="float">
            <text:p>0,00021481481481481500</text:p>
          </table:table-cell>
          <table:table-cell table:formula="of:=[.D118]-[.D1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6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16666666666667" calcext:value-type="float">
            <text:p>0,00021666666666666700</text:p>
          </table:table-cell>
          <table:table-cell table:formula="of:=[.D119]-[.D118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6" office:value-type="float" office:value="1888" calcext:value-type="float">
            <text:p>188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18518518518519" calcext:value-type="float">
            <text:p>0,00021851851851851900</text:p>
          </table:table-cell>
          <table:table-cell table:formula="of:=[.D120]-[.D1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6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2037037037037" calcext:value-type="float">
            <text:p>0,00022037037037037000</text:p>
          </table:table-cell>
          <table:table-cell table:formula="of:=[.D121]-[.D120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6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22222222222222" calcext:value-type="float">
            <text:p>0,00022222222222222200</text:p>
          </table:table-cell>
          <table:table-cell table:formula="of:=[.D122]-[.D1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6" office:value-type="float" office:value="1936" calcext:value-type="float">
            <text:p>193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24074074074074" calcext:value-type="float">
            <text:p>0,00022407407407407400</text:p>
          </table:table-cell>
          <table:table-cell table:formula="of:=[.D123]-[.D1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6" office:value-type="float" office:value="1952" calcext:value-type="float">
            <text:p>195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25925925925926" calcext:value-type="float">
            <text:p>0,00022592592592592600</text:p>
          </table:table-cell>
          <table:table-cell table:formula="of:=[.D124]-[.D123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6" office:value-type="float" office:value="1968" calcext:value-type="float">
            <text:p>196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27777777777778" calcext:value-type="float">
            <text:p>0,00022777777777777800</text:p>
          </table:table-cell>
          <table:table-cell table:formula="of:=[.D125]-[.D1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6" office:value-type="float" office:value="1984" calcext:value-type="float">
            <text:p>198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2962962962963" calcext:value-type="float">
            <text:p>0,00022962962962963000</text:p>
          </table:table-cell>
          <table:table-cell table:formula="of:=[.D126]-[.D125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6" office:value-type="float" office:value="2000" calcext:value-type="float">
            <text:p>20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31481481481482" calcext:value-type="float">
            <text:p>0,00023148148148148200</text:p>
          </table:table-cell>
          <table:table-cell table:formula="of:=[.D127]-[.D1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6" office:value-type="float" office:value="2016" calcext:value-type="float">
            <text:p>201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33333333333333" calcext:value-type="float">
            <text:p>0,00023333333333333300</text:p>
          </table:table-cell>
          <table:table-cell table:formula="of:=[.D128]-[.D127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6" office:value-type="float" office:value="2032" calcext:value-type="float">
            <text:p>203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35185185185185" calcext:value-type="float">
            <text:p>0,00023518518518518500</text:p>
          </table:table-cell>
          <table:table-cell table:formula="of:=[.D129]-[.D1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6" office:value-type="float" office:value="2048" calcext:value-type="float">
            <text:p>204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37037037037037" calcext:value-type="float">
            <text:p>0,00023703703703703700</text:p>
          </table:table-cell>
          <table:table-cell table:formula="of:=[.D130]-[.D1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6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38888888888889" calcext:value-type="float">
            <text:p>0,00023888888888888900</text:p>
          </table:table-cell>
          <table:table-cell table:formula="of:=[.D131]-[.D130]" office:value-type="float" office:value="0.00000185185185185187" calcext:value-type="float">
            <text:p>0,000001851851851851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6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240740740740741" calcext:value-type="float">
            <text:p>0,00024074074074074100</text:p>
          </table:table-cell>
          <table:table-cell table:formula="of:=[.D132]-[.D1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6" office:value-type="float" office:value="2096" calcext:value-type="float">
            <text:p>209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242592592592593" calcext:value-type="float">
            <text:p>0,00024259259259259300</text:p>
          </table:table-cell>
          <table:table-cell table:formula="of:=[.D133]-[.D1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6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244444444444444" calcext:value-type="float">
            <text:p>0,00024444444444444400</text:p>
          </table:table-cell>
          <table:table-cell table:formula="of:=[.D134]-[.D1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6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46296296296296" calcext:value-type="float">
            <text:p>0,00024629629629629600</text:p>
          </table:table-cell>
          <table:table-cell table:formula="of:=[.D135]-[.D134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6" office:value-type="float" office:value="2144" calcext:value-type="float">
            <text:p>214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48148148148148" calcext:value-type="float">
            <text:p>0,00024814814814814800</text:p>
          </table:table-cell>
          <table:table-cell table:formula="of:=[.D136]-[.D1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6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5" calcext:value-type="float">
            <text:p>0,00025000000000000000</text:p>
          </table:table-cell>
          <table:table-cell table:formula="of:=[.D137]-[.D1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6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51851851851852" calcext:value-type="float">
            <text:p>0,00025185185185185200</text:p>
          </table:table-cell>
          <table:table-cell table:formula="of:=[.D138]-[.D1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6" office:value-type="float" office:value="2192" calcext:value-type="float">
            <text:p>219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253703703703704" calcext:value-type="float">
            <text:p>0,00025370370370370400</text:p>
          </table:table-cell>
          <table:table-cell table:formula="of:=[.D139]-[.D138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6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255555555555556" calcext:value-type="float">
            <text:p>0,00025555555555555600</text:p>
          </table:table-cell>
          <table:table-cell table:formula="of:=[.D140]-[.D1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6" office:value-type="float" office:value="2224" calcext:value-type="float">
            <text:p>222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257407407407407" calcext:value-type="float">
            <text:p>0,00025740740740740700</text:p>
          </table:table-cell>
          <table:table-cell table:formula="of:=[.D141]-[.D1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6" office:value-type="float" office:value="2240" calcext:value-type="float">
            <text:p>22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259259259259259" calcext:value-type="float">
            <text:p>0,00025925925925925900</text:p>
          </table:table-cell>
          <table:table-cell table:formula="of:=[.D142]-[.D1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6" office:value-type="float" office:value="2256" calcext:value-type="float">
            <text:p>225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261111111111111" calcext:value-type="float">
            <text:p>0,00026111111111111100</text:p>
          </table:table-cell>
          <table:table-cell table:formula="of:=[.D143]-[.D1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6" office:value-type="float" office:value="2272" calcext:value-type="float">
            <text:p>227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262962962962963" calcext:value-type="float">
            <text:p>0,00026296296296296300</text:p>
          </table:table-cell>
          <table:table-cell table:formula="of:=[.D144]-[.D143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6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264814814814815" calcext:value-type="float">
            <text:p>0,00026481481481481500</text:p>
          </table:table-cell>
          <table:table-cell table:formula="of:=[.D145]-[.D1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6" office:value-type="float" office:value="2304" calcext:value-type="float">
            <text:p>230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266666666666667" calcext:value-type="float">
            <text:p>0,00026666666666666700</text:p>
          </table:table-cell>
          <table:table-cell table:formula="of:=[.D146]-[.D1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6" office:value-type="float" office:value="2320" calcext:value-type="float">
            <text:p>232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268518518518519" calcext:value-type="float">
            <text:p>0,00026851851851851900</text:p>
          </table:table-cell>
          <table:table-cell table:formula="of:=[.D147]-[.D1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6" office:value-type="float" office:value="2336" calcext:value-type="float">
            <text:p>233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27037037037037" calcext:value-type="float">
            <text:p>0,00027037037037037000</text:p>
          </table:table-cell>
          <table:table-cell table:formula="of:=[.D148]-[.D1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6" office:value-type="float" office:value="2352" calcext:value-type="float">
            <text:p>235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272222222222222" calcext:value-type="float">
            <text:p>0,00027222222222222200</text:p>
          </table:table-cell>
          <table:table-cell table:formula="of:=[.D149]-[.D148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6" office:value-type="float" office:value="2368" calcext:value-type="float">
            <text:p>236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274074074074074" calcext:value-type="float">
            <text:p>0,00027407407407407400</text:p>
          </table:table-cell>
          <table:table-cell table:formula="of:=[.D150]-[.D1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6" office:value-type="float" office:value="2384" calcext:value-type="float">
            <text:p>238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275925925925926" calcext:value-type="float">
            <text:p>0,00027592592592592600</text:p>
          </table:table-cell>
          <table:table-cell table:formula="of:=[.D151]-[.D1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6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277777777777778" calcext:value-type="float">
            <text:p>0,00027777777777777800</text:p>
          </table:table-cell>
          <table:table-cell table:formula="of:=[.D152]-[.D1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6" office:value-type="float" office:value="2416" calcext:value-type="float">
            <text:p>241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27962962962963" calcext:value-type="float">
            <text:p>0,00027962962962963000</text:p>
          </table:table-cell>
          <table:table-cell table:formula="of:=[.D153]-[.D1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6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281481481481481" calcext:value-type="float">
            <text:p>0,00028148148148148100</text:p>
          </table:table-cell>
          <table:table-cell table:formula="of:=[.D154]-[.D153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6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283333333333333" calcext:value-type="float">
            <text:p>0,00028333333333333300</text:p>
          </table:table-cell>
          <table:table-cell table:formula="of:=[.D155]-[.D1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6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285185185185185" calcext:value-type="float">
            <text:p>0,00028518518518518500</text:p>
          </table:table-cell>
          <table:table-cell table:formula="of:=[.D156]-[.D1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6" office:value-type="float" office:value="2480" calcext:value-type="float">
            <text:p>248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287037037037037" calcext:value-type="float">
            <text:p>0,00028703703703703700</text:p>
          </table:table-cell>
          <table:table-cell table:formula="of:=[.D157]-[.D1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6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288888888888889" calcext:value-type="float">
            <text:p>0,00028888888888888900</text:p>
          </table:table-cell>
          <table:table-cell table:formula="of:=[.D158]-[.D1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6" office:value-type="float" office:value="2512" calcext:value-type="float">
            <text:p>251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290740740740741" calcext:value-type="float">
            <text:p>0,00029074074074074100</text:p>
          </table:table-cell>
          <table:table-cell table:formula="of:=[.D159]-[.D158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6" office:value-type="float" office:value="2528" calcext:value-type="float">
            <text:p>252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292592592592593" calcext:value-type="float">
            <text:p>0,00029259259259259300</text:p>
          </table:table-cell>
          <table:table-cell table:formula="of:=[.D160]-[.D1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6" office:value-type="float" office:value="2544" calcext:value-type="float">
            <text:p>254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294444444444444" calcext:value-type="float">
            <text:p>0,00029444444444444400</text:p>
          </table:table-cell>
          <table:table-cell table:formula="of:=[.D161]-[.D1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6" office:value-type="float" office:value="2560" calcext:value-type="float">
            <text:p>25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296296296296296" calcext:value-type="float">
            <text:p>0,00029629629629629600</text:p>
          </table:table-cell>
          <table:table-cell table:formula="of:=[.D162]-[.D1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6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298148148148148" calcext:value-type="float">
            <text:p>0,00029814814814814800</text:p>
          </table:table-cell>
          <table:table-cell table:formula="of:=[.D163]-[.D1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6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3" calcext:value-type="float">
            <text:p>0,00030000000000000000</text:p>
          </table:table-cell>
          <table:table-cell table:formula="of:=[.D164]-[.D163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6" office:value-type="float" office:value="2608" calcext:value-type="float">
            <text:p>260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301851851851852" calcext:value-type="float">
            <text:p>0,00030185185185185200</text:p>
          </table:table-cell>
          <table:table-cell table:formula="of:=[.D165]-[.D1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6" office:value-type="float" office:value="2624" calcext:value-type="float">
            <text:p>262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303703703703704" calcext:value-type="float">
            <text:p>0,00030370370370370400</text:p>
          </table:table-cell>
          <table:table-cell table:formula="of:=[.D166]-[.D1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6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305555555555556" calcext:value-type="float">
            <text:p>0,00030555555555555600</text:p>
          </table:table-cell>
          <table:table-cell table:formula="of:=[.D167]-[.D1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6" office:value-type="float" office:value="2656" calcext:value-type="float">
            <text:p>265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307407407407407" calcext:value-type="float">
            <text:p>0,00030740740740740700</text:p>
          </table:table-cell>
          <table:table-cell table:formula="of:=[.D168]-[.D167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6" office:value-type="float" office:value="2672" calcext:value-type="float">
            <text:p>267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309259259259259" calcext:value-type="float">
            <text:p>0,00030925925925925900</text:p>
          </table:table-cell>
          <table:table-cell table:formula="of:=[.D169]-[.D1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6" office:value-type="float" office:value="2688" calcext:value-type="float">
            <text:p>268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311111111111111" calcext:value-type="float">
            <text:p>0,00031111111111111100</text:p>
          </table:table-cell>
          <table:table-cell table:formula="of:=[.D170]-[.D1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6" office:value-type="float" office:value="2704" calcext:value-type="float">
            <text:p>270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312962962962963" calcext:value-type="float">
            <text:p>0,00031296296296296300</text:p>
          </table:table-cell>
          <table:table-cell table:formula="of:=[.D171]-[.D1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6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314814814814815" calcext:value-type="float">
            <text:p>0,00031481481481481500</text:p>
          </table:table-cell>
          <table:table-cell table:formula="of:=[.D172]-[.D1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6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316666666666667" calcext:value-type="float">
            <text:p>0,00031666666666666700</text:p>
          </table:table-cell>
          <table:table-cell table:formula="of:=[.D173]-[.D172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6" office:value-type="float" office:value="2752" calcext:value-type="float">
            <text:p>275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318518518518519" calcext:value-type="float">
            <text:p>0,00031851851851851900</text:p>
          </table:table-cell>
          <table:table-cell table:formula="of:=[.D174]-[.D1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6" office:value-type="float" office:value="2768" calcext:value-type="float">
            <text:p>276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32037037037037" calcext:value-type="float">
            <text:p>0,00032037037037037000</text:p>
          </table:table-cell>
          <table:table-cell table:formula="of:=[.D175]-[.D1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6" office:value-type="float" office:value="2784" calcext:value-type="float">
            <text:p>278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322222222222222" calcext:value-type="float">
            <text:p>0,00032222222222222200</text:p>
          </table:table-cell>
          <table:table-cell table:formula="of:=[.D176]-[.D1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6" office:value-type="float" office:value="2800" calcext:value-type="float">
            <text:p>28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324074074074074" calcext:value-type="float">
            <text:p>0,00032407407407407400</text:p>
          </table:table-cell>
          <table:table-cell table:formula="of:=[.D177]-[.D1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6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325925925925926" calcext:value-type="float">
            <text:p>0,00032592592592592600</text:p>
          </table:table-cell>
          <table:table-cell table:formula="of:=[.D178]-[.D177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6" office:value-type="float" office:value="2832" calcext:value-type="float">
            <text:p>283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327777777777778" calcext:value-type="float">
            <text:p>0,00032777777777777800</text:p>
          </table:table-cell>
          <table:table-cell table:formula="of:=[.D179]-[.D1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6" office:value-type="float" office:value="2848" calcext:value-type="float">
            <text:p>284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32962962962963" calcext:value-type="float">
            <text:p>0,00032962962962963000</text:p>
          </table:table-cell>
          <table:table-cell table:formula="of:=[.D180]-[.D1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6" office:value-type="float" office:value="2864" calcext:value-type="float">
            <text:p>286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331481481481482" calcext:value-type="float">
            <text:p>0,00033148148148148200</text:p>
          </table:table-cell>
          <table:table-cell table:formula="of:=[.D181]-[.D1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6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333333333333333" calcext:value-type="float">
            <text:p>0,00033333333333333300</text:p>
          </table:table-cell>
          <table:table-cell table:formula="of:=[.D182]-[.D1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6" office:value-type="float" office:value="2896" calcext:value-type="float">
            <text:p>289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335185185185185" calcext:value-type="float">
            <text:p>0,00033518518518518500</text:p>
          </table:table-cell>
          <table:table-cell table:formula="of:=[.D183]-[.D182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6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337037037037037" calcext:value-type="float">
            <text:p>0,00033703703703703700</text:p>
          </table:table-cell>
          <table:table-cell table:formula="of:=[.D184]-[.D1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6" office:value-type="float" office:value="2928" calcext:value-type="float">
            <text:p>292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338888888888889" calcext:value-type="float">
            <text:p>0,00033888888888888900</text:p>
          </table:table-cell>
          <table:table-cell table:formula="of:=[.D185]-[.D1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6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340740740740741" calcext:value-type="float">
            <text:p>0,00034074074074074100</text:p>
          </table:table-cell>
          <table:table-cell table:formula="of:=[.D186]-[.D1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6" office:value-type="float" office:value="2960" calcext:value-type="float">
            <text:p>296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342592592592593" calcext:value-type="float">
            <text:p>0,00034259259259259300</text:p>
          </table:table-cell>
          <table:table-cell table:formula="of:=[.D187]-[.D1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6" office:value-type="float" office:value="2976" calcext:value-type="float">
            <text:p>297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344444444444444" calcext:value-type="float">
            <text:p>0,00034444444444444400</text:p>
          </table:table-cell>
          <table:table-cell table:formula="of:=[.D188]-[.D187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6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346296296296296" calcext:value-type="float">
            <text:p>0,00034629629629629600</text:p>
          </table:table-cell>
          <table:table-cell table:formula="of:=[.D189]-[.D1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6" office:value-type="float" office:value="3008" calcext:value-type="float">
            <text:p>300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348148148148148" calcext:value-type="float">
            <text:p>0,00034814814814814800</text:p>
          </table:table-cell>
          <table:table-cell table:formula="of:=[.D190]-[.D1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6" office:value-type="float" office:value="3024" calcext:value-type="float">
            <text:p>302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35" calcext:value-type="float">
            <text:p>0,00035000000000000000</text:p>
          </table:table-cell>
          <table:table-cell table:formula="of:=[.D191]-[.D1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6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351851851851852" calcext:value-type="float">
            <text:p>0,00035185185185185200</text:p>
          </table:table-cell>
          <table:table-cell table:formula="of:=[.D192]-[.D1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6" office:value-type="float" office:value="3056" calcext:value-type="float">
            <text:p>305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353703703703704" calcext:value-type="float">
            <text:p>0,00035370370370370400</text:p>
          </table:table-cell>
          <table:table-cell table:formula="of:=[.D193]-[.D192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6" office:value-type="float" office:value="3072" calcext:value-type="float">
            <text:p>307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355555555555556" calcext:value-type="float">
            <text:p>0,00035555555555555600</text:p>
          </table:table-cell>
          <table:table-cell table:formula="of:=[.D194]-[.D1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6" office:value-type="float" office:value="3088" calcext:value-type="float">
            <text:p>308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357407407407407" calcext:value-type="float">
            <text:p>0,00035740740740740700</text:p>
          </table:table-cell>
          <table:table-cell table:formula="of:=[.D195]-[.D1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6" office:value-type="float" office:value="3104" calcext:value-type="float">
            <text:p>310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359259259259259" calcext:value-type="float">
            <text:p>0,00035925925925925900</text:p>
          </table:table-cell>
          <table:table-cell table:formula="of:=[.D196]-[.D1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6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361111111111111" calcext:value-type="float">
            <text:p>0,00036111111111111100</text:p>
          </table:table-cell>
          <table:table-cell table:formula="of:=[.D197]-[.D196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6" office:value-type="float" office:value="3136" calcext:value-type="float">
            <text:p>313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362962962962963" calcext:value-type="float">
            <text:p>0,00036296296296296300</text:p>
          </table:table-cell>
          <table:table-cell table:formula="of:=[.D198]-[.D1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6" office:value-type="float" office:value="3152" calcext:value-type="float">
            <text:p>315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364814814814815" calcext:value-type="float">
            <text:p>0,00036481481481481500</text:p>
          </table:table-cell>
          <table:table-cell table:formula="of:=[.D199]-[.D1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6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366666666666667" calcext:value-type="float">
            <text:p>0,00036666666666666700</text:p>
          </table:table-cell>
          <table:table-cell table:formula="of:=[.D200]-[.D1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6" office:value-type="float" office:value="3184" calcext:value-type="float">
            <text:p>318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368518518518519" calcext:value-type="float">
            <text:p>0,00036851851851851800</text:p>
          </table:table-cell>
          <table:table-cell table:formula="of:=[.D201]-[.D2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6" office:value-type="float" office:value="3200" calcext:value-type="float">
            <text:p>3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37037037037037" calcext:value-type="float">
            <text:p>0,00037037037037037000</text:p>
          </table:table-cell>
          <table:table-cell table:formula="of:=[.D202]-[.D201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6" office:value-type="float" office:value="3216" calcext:value-type="float">
            <text:p>321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372222222222222" calcext:value-type="float">
            <text:p>0,00037222222222222200</text:p>
          </table:table-cell>
          <table:table-cell table:formula="of:=[.D203]-[.D2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6" office:value-type="float" office:value="3232" calcext:value-type="float">
            <text:p>323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374074074074074" calcext:value-type="float">
            <text:p>0,00037407407407407400</text:p>
          </table:table-cell>
          <table:table-cell table:formula="of:=[.D204]-[.D2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6" office:value-type="float" office:value="3248" calcext:value-type="float">
            <text:p>324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375925925925926" calcext:value-type="float">
            <text:p>0,00037592592592592600</text:p>
          </table:table-cell>
          <table:table-cell table:formula="of:=[.D205]-[.D2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6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377777777777778" calcext:value-type="float">
            <text:p>0,00037777777777777800</text:p>
          </table:table-cell>
          <table:table-cell table:formula="of:=[.D206]-[.D2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6" office:value-type="float" office:value="3280" calcext:value-type="float">
            <text:p>328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37962962962963" calcext:value-type="float">
            <text:p>0,00037962962962963000</text:p>
          </table:table-cell>
          <table:table-cell table:formula="of:=[.D207]-[.D206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6" office:value-type="float" office:value="3296" calcext:value-type="float">
            <text:p>329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381481481481482" calcext:value-type="float">
            <text:p>0,00038148148148148200</text:p>
          </table:table-cell>
          <table:table-cell table:formula="of:=[.D208]-[.D2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6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383333333333333" calcext:value-type="float">
            <text:p>0,00038333333333333300</text:p>
          </table:table-cell>
          <table:table-cell table:formula="of:=[.D209]-[.D2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6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385185185185185" calcext:value-type="float">
            <text:p>0,00038518518518518500</text:p>
          </table:table-cell>
          <table:table-cell table:formula="of:=[.D210]-[.D2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6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387037037037037" calcext:value-type="float">
            <text:p>0,00038703703703703700</text:p>
          </table:table-cell>
          <table:table-cell table:formula="of:=[.D211]-[.D2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6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388888888888889" calcext:value-type="float">
            <text:p>0,00038888888888888900</text:p>
          </table:table-cell>
          <table:table-cell table:formula="of:=[.D212]-[.D211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6" office:value-type="float" office:value="3376" calcext:value-type="float">
            <text:p>337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390740740740741" calcext:value-type="float">
            <text:p>0,00039074074074074100</text:p>
          </table:table-cell>
          <table:table-cell table:formula="of:=[.D213]-[.D2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6" office:value-type="float" office:value="3392" calcext:value-type="float">
            <text:p>339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392592592592593" calcext:value-type="float">
            <text:p>0,00039259259259259300</text:p>
          </table:table-cell>
          <table:table-cell table:formula="of:=[.D214]-[.D2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6" office:value-type="float" office:value="3408" calcext:value-type="float">
            <text:p>340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394444444444444" calcext:value-type="float">
            <text:p>0,00039444444444444500</text:p>
          </table:table-cell>
          <table:table-cell table:formula="of:=[.D215]-[.D2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6" office:value-type="float" office:value="3424" calcext:value-type="float">
            <text:p>342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396296296296296" calcext:value-type="float">
            <text:p>0,00039629629629629600</text:p>
          </table:table-cell>
          <table:table-cell table:formula="of:=[.D216]-[.D2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6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398148148148148" calcext:value-type="float">
            <text:p>0,00039814814814814800</text:p>
          </table:table-cell>
          <table:table-cell table:formula="of:=[.D217]-[.D216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6" office:value-type="float" office:value="3456" calcext:value-type="float">
            <text:p>345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4" calcext:value-type="float">
            <text:p>0,00040000000000000000</text:p>
          </table:table-cell>
          <table:table-cell table:formula="of:=[.D218]-[.D2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6" office:value-type="float" office:value="3472" calcext:value-type="float">
            <text:p>347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401851851851852" calcext:value-type="float">
            <text:p>0,00040185185185185200</text:p>
          </table:table-cell>
          <table:table-cell table:formula="of:=[.D219]-[.D2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6" office:value-type="float" office:value="3488" calcext:value-type="float">
            <text:p>348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403703703703704" calcext:value-type="float">
            <text:p>0,00040370370370370400</text:p>
          </table:table-cell>
          <table:table-cell table:formula="of:=[.D220]-[.D2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6" office:value-type="float" office:value="3504" calcext:value-type="float">
            <text:p>350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405555555555556" calcext:value-type="float">
            <text:p>0,00040555555555555600</text:p>
          </table:table-cell>
          <table:table-cell table:formula="of:=[.D221]-[.D2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6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407407407407407" calcext:value-type="float">
            <text:p>0,00040740740740740700</text:p>
          </table:table-cell>
          <table:table-cell table:formula="of:=[.D222]-[.D221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6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409259259259259" calcext:value-type="float">
            <text:p>0,00040925925925925900</text:p>
          </table:table-cell>
          <table:table-cell table:formula="of:=[.D223]-[.D2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6" office:value-type="float" office:value="3552" calcext:value-type="float">
            <text:p>355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411111111111111" calcext:value-type="float">
            <text:p>0,00041111111111111100</text:p>
          </table:table-cell>
          <table:table-cell table:formula="of:=[.D224]-[.D2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6" office:value-type="float" office:value="3568" calcext:value-type="float">
            <text:p>356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412962962962963" calcext:value-type="float">
            <text:p>0,00041296296296296300</text:p>
          </table:table-cell>
          <table:table-cell table:formula="of:=[.D225]-[.D2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6" office:value-type="float" office:value="3584" calcext:value-type="float">
            <text:p>358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414814814814815" calcext:value-type="float">
            <text:p>0,00041481481481481500</text:p>
          </table:table-cell>
          <table:table-cell table:formula="of:=[.D226]-[.D225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6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416666666666667" calcext:value-type="float">
            <text:p>0,00041666666666666700</text:p>
          </table:table-cell>
          <table:table-cell table:formula="of:=[.D227]-[.D2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6" office:value-type="float" office:value="3616" calcext:value-type="float">
            <text:p>361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418518518518519" calcext:value-type="float">
            <text:p>0,00041851851851851900</text:p>
          </table:table-cell>
          <table:table-cell table:formula="of:=[.D228]-[.D2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6" office:value-type="float" office:value="3632" calcext:value-type="float">
            <text:p>363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42037037037037" calcext:value-type="float">
            <text:p>0,00042037037037037000</text:p>
          </table:table-cell>
          <table:table-cell table:formula="of:=[.D229]-[.D2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6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422222222222222" calcext:value-type="float">
            <text:p>0,00042222222222222200</text:p>
          </table:table-cell>
          <table:table-cell table:formula="of:=[.D230]-[.D2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6" office:value-type="float" office:value="3664" calcext:value-type="float">
            <text:p>366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424074074074074" calcext:value-type="float">
            <text:p>0,00042407407407407400</text:p>
          </table:table-cell>
          <table:table-cell table:formula="of:=[.D231]-[.D230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6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425925925925926" calcext:value-type="float">
            <text:p>0,00042592592592592600</text:p>
          </table:table-cell>
          <table:table-cell table:formula="of:=[.D232]-[.D2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6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427777777777778" calcext:value-type="float">
            <text:p>0,00042777777777777800</text:p>
          </table:table-cell>
          <table:table-cell table:formula="of:=[.D233]-[.D2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6" office:value-type="float" office:value="3712" calcext:value-type="float">
            <text:p>371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42962962962963" calcext:value-type="float">
            <text:p>0,00042962962962963000</text:p>
          </table:table-cell>
          <table:table-cell table:formula="of:=[.D234]-[.D2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6" office:value-type="float" office:value="3728" calcext:value-type="float">
            <text:p>372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431481481481481" calcext:value-type="float">
            <text:p>0,00043148148148148100</text:p>
          </table:table-cell>
          <table:table-cell table:formula="of:=[.D235]-[.D2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6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433333333333333" calcext:value-type="float">
            <text:p>0,00043333333333333300</text:p>
          </table:table-cell>
          <table:table-cell table:formula="of:=[.D236]-[.D235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6" office:value-type="float" office:value="3760" calcext:value-type="float">
            <text:p>376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435185185185185" calcext:value-type="float">
            <text:p>0,00043518518518518500</text:p>
          </table:table-cell>
          <table:table-cell table:formula="of:=[.D237]-[.D2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6" office:value-type="float" office:value="3776" calcext:value-type="float">
            <text:p>377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437037037037037" calcext:value-type="float">
            <text:p>0,00043703703703703700</text:p>
          </table:table-cell>
          <table:table-cell table:formula="of:=[.D238]-[.D2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6" office:value-type="float" office:value="3792" calcext:value-type="float">
            <text:p>379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438888888888889" calcext:value-type="float">
            <text:p>0,00043888888888888900</text:p>
          </table:table-cell>
          <table:table-cell table:formula="of:=[.D239]-[.D2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6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440740740740741" calcext:value-type="float">
            <text:p>0,00044074074074074100</text:p>
          </table:table-cell>
          <table:table-cell table:formula="of:=[.D240]-[.D2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6" office:value-type="float" office:value="3824" calcext:value-type="float">
            <text:p>382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442592592592593" calcext:value-type="float">
            <text:p>0,00044259259259259300</text:p>
          </table:table-cell>
          <table:table-cell table:formula="of:=[.D241]-[.D240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6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444444444444444" calcext:value-type="float">
            <text:p>0,00044444444444444400</text:p>
          </table:table-cell>
          <table:table-cell table:formula="of:=[.D242]-[.D2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6" office:value-type="float" office:value="3856" calcext:value-type="float">
            <text:p>385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446296296296296" calcext:value-type="float">
            <text:p>0,00044629629629629600</text:p>
          </table:table-cell>
          <table:table-cell table:formula="of:=[.D243]-[.D2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6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448148148148148" calcext:value-type="float">
            <text:p>0,00044814814814814800</text:p>
          </table:table-cell>
          <table:table-cell table:formula="of:=[.D244]-[.D2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6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45" calcext:value-type="float">
            <text:p>0,00045000000000000000</text:p>
          </table:table-cell>
          <table:table-cell table:formula="of:=[.D245]-[.D2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6" office:value-type="float" office:value="3904" calcext:value-type="float">
            <text:p>390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451851851851852" calcext:value-type="float">
            <text:p>0,00045185185185185200</text:p>
          </table:table-cell>
          <table:table-cell table:formula="of:=[.D246]-[.D245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6" office:value-type="float" office:value="3920" calcext:value-type="float">
            <text:p>392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453703703703704" calcext:value-type="float">
            <text:p>0,00045370370370370400</text:p>
          </table:table-cell>
          <table:table-cell table:formula="of:=[.D247]-[.D2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6" office:value-type="float" office:value="3936" calcext:value-type="float">
            <text:p>393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455555555555556" calcext:value-type="float">
            <text:p>0,00045555555555555600</text:p>
          </table:table-cell>
          <table:table-cell table:formula="of:=[.D248]-[.D2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6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457407407407407" calcext:value-type="float">
            <text:p>0,00045740740740740700</text:p>
          </table:table-cell>
          <table:table-cell table:formula="of:=[.D249]-[.D2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6" office:value-type="float" office:value="3968" calcext:value-type="float">
            <text:p>396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459259259259259" calcext:value-type="float">
            <text:p>0,00045925925925925900</text:p>
          </table:table-cell>
          <table:table-cell table:formula="of:=[.D250]-[.D2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6" office:value-type="float" office:value="3984" calcext:value-type="float">
            <text:p>398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461111111111111" calcext:value-type="float">
            <text:p>0,00046111111111111100</text:p>
          </table:table-cell>
          <table:table-cell table:formula="of:=[.D251]-[.D250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6" office:value-type="float" office:value="4000" calcext:value-type="float">
            <text:p>4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462962962962963" calcext:value-type="float">
            <text:p>0,00046296296296296300</text:p>
          </table:table-cell>
          <table:table-cell table:formula="of:=[.D252]-[.D2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6" office:value-type="float" office:value="4016" calcext:value-type="float">
            <text:p>401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464814814814815" calcext:value-type="float">
            <text:p>0,00046481481481481500</text:p>
          </table:table-cell>
          <table:table-cell table:formula="of:=[.D253]-[.D2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6" office:value-type="float" office:value="4032" calcext:value-type="float">
            <text:p>403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466666666666667" calcext:value-type="float">
            <text:p>0,00046666666666666700</text:p>
          </table:table-cell>
          <table:table-cell table:formula="of:=[.D254]-[.D2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6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468518518518519" calcext:value-type="float">
            <text:p>0,00046851851851851900</text:p>
          </table:table-cell>
          <table:table-cell table:formula="of:=[.D255]-[.D254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6" office:value-type="float" office:value="4064" calcext:value-type="float">
            <text:p>406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47037037037037" calcext:value-type="float">
            <text:p>0,00047037037037037000</text:p>
          </table:table-cell>
          <table:table-cell table:formula="of:=[.D256]-[.D2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6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472222222222222" calcext:value-type="float">
            <text:p>0,00047222222222222200</text:p>
          </table:table-cell>
          <table:table-cell table:formula="of:=[.D257]-[.D2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6" office:value-type="float" office:value="4096" calcext:value-type="float">
            <text:p>409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474074074074074" calcext:value-type="float">
            <text:p>0,00047407407407407400</text:p>
          </table:table-cell>
          <table:table-cell table:formula="of:=[.D258]-[.D2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6" office:value-type="float" office:value="4112" calcext:value-type="float">
            <text:p>411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475925925925926" calcext:value-type="float">
            <text:p>0,00047592592592592600</text:p>
          </table:table-cell>
          <table:table-cell table:formula="of:=[.D259]-[.D2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6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477777777777778" calcext:value-type="float">
            <text:p>0,00047777777777777800</text:p>
          </table:table-cell>
          <table:table-cell table:formula="of:=[.D260]-[.D259]" office:value-type="float" office:value="0.00000185185185185189" calcext:value-type="float">
            <text:p>0,0000018518518518519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6" office:value-type="float" office:value="4144" calcext:value-type="float">
            <text:p>414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47962962962963" calcext:value-type="float">
            <text:p>0,00047962962962963000</text:p>
          </table:table-cell>
          <table:table-cell table:formula="of:=[.D261]-[.D2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6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481481481481482" calcext:value-type="float">
            <text:p>0,00048148148148148200</text:p>
          </table:table-cell>
          <table:table-cell table:formula="of:=[.D262]-[.D2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6" office:value-type="float" office:value="4176" calcext:value-type="float">
            <text:p>417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483333333333333" calcext:value-type="float">
            <text:p>0,00048333333333333300</text:p>
          </table:table-cell>
          <table:table-cell table:formula="of:=[.D263]-[.D2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6" office:value-type="float" office:value="4192" calcext:value-type="float">
            <text:p>419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485185185185185" calcext:value-type="float">
            <text:p>0,00048518518518518500</text:p>
          </table:table-cell>
          <table:table-cell table:formula="of:=[.D264]-[.D2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6" office:value-type="float" office:value="4208" calcext:value-type="float">
            <text:p>420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487037037037037" calcext:value-type="float">
            <text:p>0,00048703703703703700</text:p>
          </table:table-cell>
          <table:table-cell table:formula="of:=[.D265]-[.D2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6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488888888888889" calcext:value-type="float">
            <text:p>0,00048888888888888900</text:p>
          </table:table-cell>
          <table:table-cell table:formula="of:=[.D266]-[.D2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6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490740740740741" calcext:value-type="float">
            <text:p>0,00049074074074074100</text:p>
          </table:table-cell>
          <table:table-cell table:formula="of:=[.D267]-[.D2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6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492592592592593" calcext:value-type="float">
            <text:p>0,00049259259259259300</text:p>
          </table:table-cell>
          <table:table-cell table:formula="of:=[.D268]-[.D267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6" office:value-type="float" office:value="4272" calcext:value-type="float">
            <text:p>427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494444444444445" calcext:value-type="float">
            <text:p>0,00049444444444444500</text:p>
          </table:table-cell>
          <table:table-cell table:formula="of:=[.D269]-[.D2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6" office:value-type="float" office:value="4288" calcext:value-type="float">
            <text:p>428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496296296296296" calcext:value-type="float">
            <text:p>0,00049629629629629600</text:p>
          </table:table-cell>
          <table:table-cell table:formula="of:=[.D270]-[.D2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6" office:value-type="float" office:value="4304" calcext:value-type="float">
            <text:p>430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498148148148148" calcext:value-type="float">
            <text:p>0,00049814814814814800</text:p>
          </table:table-cell>
          <table:table-cell table:formula="of:=[.D271]-[.D2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6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5" calcext:value-type="float">
            <text:p>0,00050000000000000000</text:p>
          </table:table-cell>
          <table:table-cell table:formula="of:=[.D272]-[.D2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6" office:value-type="float" office:value="4336" calcext:value-type="float">
            <text:p>433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501851851851852" calcext:value-type="float">
            <text:p>0,00050185185185185200</text:p>
          </table:table-cell>
          <table:table-cell table:formula="of:=[.D273]-[.D2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6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503703703703704" calcext:value-type="float">
            <text:p>0,00050370370370370400</text:p>
          </table:table-cell>
          <table:table-cell table:formula="of:=[.D274]-[.D2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6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505555555555556" calcext:value-type="float">
            <text:p>0,00050555555555555600</text:p>
          </table:table-cell>
          <table:table-cell table:formula="of:=[.D275]-[.D2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6" office:value-type="float" office:value="4384" calcext:value-type="float">
            <text:p>438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507407407407407" calcext:value-type="float">
            <text:p>0,00050740740740740700</text:p>
          </table:table-cell>
          <table:table-cell table:formula="of:=[.D276]-[.D2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6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509259259259259" calcext:value-type="float">
            <text:p>0,00050925925925925900</text:p>
          </table:table-cell>
          <table:table-cell table:formula="of:=[.D277]-[.D276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6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511111111111111" calcext:value-type="float">
            <text:p>0,00051111111111111100</text:p>
          </table:table-cell>
          <table:table-cell table:formula="of:=[.D278]-[.D2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6" office:value-type="float" office:value="4432" calcext:value-type="float">
            <text:p>443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512962962962963" calcext:value-type="float">
            <text:p>0,00051296296296296300</text:p>
          </table:table-cell>
          <table:table-cell table:formula="of:=[.D279]-[.D2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6" office:value-type="float" office:value="4448" calcext:value-type="float">
            <text:p>444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514814814814815" calcext:value-type="float">
            <text:p>0,00051481481481481500</text:p>
          </table:table-cell>
          <table:table-cell table:formula="of:=[.D280]-[.D2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6" office:value-type="float" office:value="4464" calcext:value-type="float">
            <text:p>446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516666666666667" calcext:value-type="float">
            <text:p>0,00051666666666666700</text:p>
          </table:table-cell>
          <table:table-cell table:formula="of:=[.D281]-[.D2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6" office:value-type="float" office:value="4480" calcext:value-type="float">
            <text:p>44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518518518518519" calcext:value-type="float">
            <text:p>0,00051851851851851900</text:p>
          </table:table-cell>
          <table:table-cell table:formula="of:=[.D282]-[.D2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6" office:value-type="float" office:value="4496" calcext:value-type="float">
            <text:p>4496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52037037037037" calcext:value-type="float">
            <text:p>0,00052037037037037000</text:p>
          </table:table-cell>
          <table:table-cell table:formula="of:=[.D283]-[.D2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6" office:value-type="float" office:value="4512" calcext:value-type="float">
            <text:p>451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522222222222222" calcext:value-type="float">
            <text:p>0,00052222222222222200</text:p>
          </table:table-cell>
          <table:table-cell table:formula="of:=[.D284]-[.D2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6" office:value-type="float" office:value="4528" calcext:value-type="float">
            <text:p>4528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524074074074074" calcext:value-type="float">
            <text:p>0,00052407407407407400</text:p>
          </table:table-cell>
          <table:table-cell table:formula="of:=[.D285]-[.D2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6" office:value-type="float" office:value="4544" calcext:value-type="float">
            <text:p>454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525925925925926" calcext:value-type="float">
            <text:p>0,00052592592592592600</text:p>
          </table:table-cell>
          <table:table-cell table:formula="of:=[.D286]-[.D2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6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527777777777778" calcext:value-type="float">
            <text:p>0,00052777777777777800</text:p>
          </table:table-cell>
          <table:table-cell table:formula="of:=[.D287]-[.D286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6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52962962962963" calcext:value-type="float">
            <text:p>0,00052962962962963000</text:p>
          </table:table-cell>
          <table:table-cell table:formula="of:=[.D288]-[.D2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6" office:value-type="float" office:value="4592" calcext:value-type="float">
            <text:p>4592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531481481481482" calcext:value-type="float">
            <text:p>0,00053148148148148200</text:p>
          </table:table-cell>
          <table:table-cell table:formula="of:=[.D289]-[.D2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6" office:value-type="float" office:value="4608" calcext:value-type="float">
            <text:p>460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533333333333333" calcext:value-type="float">
            <text:p>0,00053333333333333300</text:p>
          </table:table-cell>
          <table:table-cell table:formula="of:=[.D290]-[.D2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6" office:value-type="float" office:value="4624" calcext:value-type="float">
            <text:p>4624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535185185185185" calcext:value-type="float">
            <text:p>0,00053518518518518500</text:p>
          </table:table-cell>
          <table:table-cell table:formula="of:=[.D291]-[.D2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6" office:value-type="float" office:value="4640" calcext:value-type="float">
            <text:p>464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537037037037037" calcext:value-type="float">
            <text:p>0,00053703703703703700</text:p>
          </table:table-cell>
          <table:table-cell table:formula="of:=[.D292]-[.D2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6" office:value-type="float" office:value="4656" calcext:value-type="float">
            <text:p>4656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538888888888889" calcext:value-type="float">
            <text:p>0,00053888888888888900</text:p>
          </table:table-cell>
          <table:table-cell table:formula="of:=[.D293]-[.D2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6" office:value-type="float" office:value="4672" calcext:value-type="float">
            <text:p>467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540740740740741" calcext:value-type="float">
            <text:p>0,00054074074074074100</text:p>
          </table:table-cell>
          <table:table-cell table:formula="of:=[.D294]-[.D2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6" office:value-type="float" office:value="4688" calcext:value-type="float">
            <text:p>4688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542592592592593" calcext:value-type="float">
            <text:p>0,00054259259259259300</text:p>
          </table:table-cell>
          <table:table-cell table:formula="of:=[.D295]-[.D2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6" office:value-type="float" office:value="4704" calcext:value-type="float">
            <text:p>470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544444444444444" calcext:value-type="float">
            <text:p>0,00054444444444444400</text:p>
          </table:table-cell>
          <table:table-cell table:formula="of:=[.D296]-[.D2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6" office:value-type="float" office:value="4720" calcext:value-type="float">
            <text:p>472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546296296296296" calcext:value-type="float">
            <text:p>0,00054629629629629600</text:p>
          </table:table-cell>
          <table:table-cell table:formula="of:=[.D297]-[.D296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6" office:value-type="float" office:value="4736" calcext:value-type="float">
            <text:p>473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548148148148148" calcext:value-type="float">
            <text:p>0,00054814814814814800</text:p>
          </table:table-cell>
          <table:table-cell table:formula="of:=[.D298]-[.D2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6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55" calcext:value-type="float">
            <text:p>0,00055000000000000000</text:p>
          </table:table-cell>
          <table:table-cell table:formula="of:=[.D299]-[.D2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6" office:value-type="float" office:value="4768" calcext:value-type="float">
            <text:p>476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551851851851852" calcext:value-type="float">
            <text:p>0,00055185185185185200</text:p>
          </table:table-cell>
          <table:table-cell table:formula="of:=[.D300]-[.D2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6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553703703703704" calcext:value-type="float">
            <text:p>0,00055370370370370400</text:p>
          </table:table-cell>
          <table:table-cell table:formula="of:=[.D301]-[.D3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6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555555555555556" calcext:value-type="float">
            <text:p>0,00055555555555555600</text:p>
          </table:table-cell>
          <table:table-cell table:formula="of:=[.D302]-[.D3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6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557407407407407" calcext:value-type="float">
            <text:p>0,00055740740740740700</text:p>
          </table:table-cell>
          <table:table-cell table:formula="of:=[.D303]-[.D3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6" office:value-type="float" office:value="4832" calcext:value-type="float">
            <text:p>483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559259259259259" calcext:value-type="float">
            <text:p>0,00055925925925925900</text:p>
          </table:table-cell>
          <table:table-cell table:formula="of:=[.D304]-[.D3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6" office:value-type="float" office:value="4848" calcext:value-type="float">
            <text:p>4848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561111111111111" calcext:value-type="float">
            <text:p>0,00056111111111111100</text:p>
          </table:table-cell>
          <table:table-cell table:formula="of:=[.D305]-[.D3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6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562962962962963" calcext:value-type="float">
            <text:p>0,00056296296296296300</text:p>
          </table:table-cell>
          <table:table-cell table:formula="of:=[.D306]-[.D305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6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564814814814815" calcext:value-type="float">
            <text:p>0,00056481481481481500</text:p>
          </table:table-cell>
          <table:table-cell table:formula="of:=[.D307]-[.D3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6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566666666666667" calcext:value-type="float">
            <text:p>0,00056666666666666700</text:p>
          </table:table-cell>
          <table:table-cell table:formula="of:=[.D308]-[.D3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6" office:value-type="float" office:value="4912" calcext:value-type="float">
            <text:p>4912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568518518518519" calcext:value-type="float">
            <text:p>0,00056851851851851900</text:p>
          </table:table-cell>
          <table:table-cell table:formula="of:=[.D309]-[.D3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6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57037037037037" calcext:value-type="float">
            <text:p>0,00057037037037037000</text:p>
          </table:table-cell>
          <table:table-cell table:formula="of:=[.D310]-[.D3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6" office:value-type="float" office:value="4944" calcext:value-type="float">
            <text:p>4944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572222222222222" calcext:value-type="float">
            <text:p>0,00057222222222222200</text:p>
          </table:table-cell>
          <table:table-cell table:formula="of:=[.D311]-[.D3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6" office:value-type="float" office:value="4960" calcext:value-type="float">
            <text:p>496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574074074074074" calcext:value-type="float">
            <text:p>0,00057407407407407400</text:p>
          </table:table-cell>
          <table:table-cell table:formula="of:=[.D312]-[.D3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6" office:value-type="float" office:value="4976" calcext:value-type="float">
            <text:p>4976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575925925925926" calcext:value-type="float">
            <text:p>0,00057592592592592600</text:p>
          </table:table-cell>
          <table:table-cell table:formula="of:=[.D313]-[.D3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6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577777777777778" calcext:value-type="float">
            <text:p>0,00057777777777777800</text:p>
          </table:table-cell>
          <table:table-cell table:formula="of:=[.D314]-[.D3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6" office:value-type="float" office:value="5008" calcext:value-type="float">
            <text:p>5008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57962962962963" calcext:value-type="float">
            <text:p>0,00057962962962963000</text:p>
          </table:table-cell>
          <table:table-cell table:formula="of:=[.D315]-[.D3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6" office:value-type="float" office:value="5024" calcext:value-type="float">
            <text:p>502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581481481481481" calcext:value-type="float">
            <text:p>0,00058148148148148100</text:p>
          </table:table-cell>
          <table:table-cell table:formula="of:=[.D316]-[.D315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6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583333333333333" calcext:value-type="float">
            <text:p>0,00058333333333333300</text:p>
          </table:table-cell>
          <table:table-cell table:formula="of:=[.D317]-[.D3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6" office:value-type="float" office:value="5056" calcext:value-type="float">
            <text:p>505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585185185185185" calcext:value-type="float">
            <text:p>0,00058518518518518500</text:p>
          </table:table-cell>
          <table:table-cell table:formula="of:=[.D318]-[.D3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6" office:value-type="float" office:value="5072" calcext:value-type="float">
            <text:p>5072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587037037037037" calcext:value-type="float">
            <text:p>0,00058703703703703700</text:p>
          </table:table-cell>
          <table:table-cell table:formula="of:=[.D319]-[.D3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6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588888888888889" calcext:value-type="float">
            <text:p>0,00058888888888888900</text:p>
          </table:table-cell>
          <table:table-cell table:formula="of:=[.D320]-[.D3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6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590740740740741" calcext:value-type="float">
            <text:p>0,00059074074074074100</text:p>
          </table:table-cell>
          <table:table-cell table:formula="of:=[.D321]-[.D3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6" office:value-type="float" office:value="5120" calcext:value-type="float">
            <text:p>51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592592592592593" calcext:value-type="float">
            <text:p>0,00059259259259259300</text:p>
          </table:table-cell>
          <table:table-cell table:formula="of:=[.D322]-[.D3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6" office:value-type="float" office:value="5136" calcext:value-type="float">
            <text:p>5136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594444444444444" calcext:value-type="float">
            <text:p>0,00059444444444444400</text:p>
          </table:table-cell>
          <table:table-cell table:formula="of:=[.D323]-[.D3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6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596296296296296" calcext:value-type="float">
            <text:p>0,00059629629629629600</text:p>
          </table:table-cell>
          <table:table-cell table:formula="of:=[.D324]-[.D3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6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598148148148148" calcext:value-type="float">
            <text:p>0,00059814814814814800</text:p>
          </table:table-cell>
          <table:table-cell table:formula="of:=[.D325]-[.D3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6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6" calcext:value-type="float">
            <text:p>0,00060000000000000000</text:p>
          </table:table-cell>
          <table:table-cell table:formula="of:=[.D326]-[.D325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6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601851851851852" calcext:value-type="float">
            <text:p>0,00060185185185185200</text:p>
          </table:table-cell>
          <table:table-cell table:formula="of:=[.D327]-[.D3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6" office:value-type="float" office:value="5216" calcext:value-type="float">
            <text:p>521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603703703703704" calcext:value-type="float">
            <text:p>0,00060370370370370400</text:p>
          </table:table-cell>
          <table:table-cell table:formula="of:=[.D328]-[.D3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6" office:value-type="float" office:value="5232" calcext:value-type="float">
            <text:p>5232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605555555555556" calcext:value-type="float">
            <text:p>0,00060555555555555600</text:p>
          </table:table-cell>
          <table:table-cell table:formula="of:=[.D329]-[.D3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6" office:value-type="float" office:value="5248" calcext:value-type="float">
            <text:p>524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607407407407407" calcext:value-type="float">
            <text:p>0,00060740740740740700</text:p>
          </table:table-cell>
          <table:table-cell table:formula="of:=[.D330]-[.D3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6" office:value-type="float" office:value="5264" calcext:value-type="float">
            <text:p>5264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609259259259259" calcext:value-type="float">
            <text:p>0,00060925925925925900</text:p>
          </table:table-cell>
          <table:table-cell table:formula="of:=[.D331]-[.D3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6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611111111111111" calcext:value-type="float">
            <text:p>0,00061111111111111100</text:p>
          </table:table-cell>
          <table:table-cell table:formula="of:=[.D332]-[.D3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6" office:value-type="float" office:value="5296" calcext:value-type="float">
            <text:p>5296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612962962962963" calcext:value-type="float">
            <text:p>0,00061296296296296300</text:p>
          </table:table-cell>
          <table:table-cell table:formula="of:=[.D333]-[.D3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6" office:value-type="float" office:value="5312" calcext:value-type="float">
            <text:p>531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614814814814815" calcext:value-type="float">
            <text:p>0,00061481481481481500</text:p>
          </table:table-cell>
          <table:table-cell table:formula="of:=[.D334]-[.D3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6" office:value-type="float" office:value="5328" calcext:value-type="float">
            <text:p>5328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616666666666667" calcext:value-type="float">
            <text:p>0,00061666666666666700</text:p>
          </table:table-cell>
          <table:table-cell table:formula="of:=[.D335]-[.D334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6" office:value-type="float" office:value="5344" calcext:value-type="float">
            <text:p>534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618518518518519" calcext:value-type="float">
            <text:p>0,00061851851851851900</text:p>
          </table:table-cell>
          <table:table-cell table:formula="of:=[.D336]-[.D3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6" office:value-type="float" office:value="5360" calcext:value-type="float">
            <text:p>536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62037037037037" calcext:value-type="float">
            <text:p>0,00062037037037037000</text:p>
          </table:table-cell>
          <table:table-cell table:formula="of:=[.D337]-[.D3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6" office:value-type="float" office:value="5376" calcext:value-type="float">
            <text:p>537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622222222222222" calcext:value-type="float">
            <text:p>0,00062222222222222200</text:p>
          </table:table-cell>
          <table:table-cell table:formula="of:=[.D338]-[.D3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6" office:value-type="float" office:value="5392" calcext:value-type="float">
            <text:p>5392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624074074074074" calcext:value-type="float">
            <text:p>0,00062407407407407400</text:p>
          </table:table-cell>
          <table:table-cell table:formula="of:=[.D339]-[.D3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6" office:value-type="float" office:value="5408" calcext:value-type="float">
            <text:p>540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625925925925926" calcext:value-type="float">
            <text:p>0,00062592592592592600</text:p>
          </table:table-cell>
          <table:table-cell table:formula="of:=[.D340]-[.D3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6" office:value-type="float" office:value="5424" calcext:value-type="float">
            <text:p>5424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627777777777778" calcext:value-type="float">
            <text:p>0,00062777777777777800</text:p>
          </table:table-cell>
          <table:table-cell table:formula="of:=[.D341]-[.D3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6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62962962962963" calcext:value-type="float">
            <text:p>0,00062962962962963000</text:p>
          </table:table-cell>
          <table:table-cell table:formula="of:=[.D342]-[.D3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6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631481481481482" calcext:value-type="float">
            <text:p>0,00063148148148148200</text:p>
          </table:table-cell>
          <table:table-cell table:formula="of:=[.D343]-[.D3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6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633333333333333" calcext:value-type="float">
            <text:p>0,00063333333333333300</text:p>
          </table:table-cell>
          <table:table-cell table:formula="of:=[.D344]-[.D3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6" office:value-type="float" office:value="5488" calcext:value-type="float">
            <text:p>5488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635185185185185" calcext:value-type="float">
            <text:p>0,00063518518518518500</text:p>
          </table:table-cell>
          <table:table-cell table:formula="of:=[.D345]-[.D344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6" office:value-type="float" office:value="5504" calcext:value-type="float">
            <text:p>550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637037037037037" calcext:value-type="float">
            <text:p>0,00063703703703703700</text:p>
          </table:table-cell>
          <table:table-cell table:formula="of:=[.D346]-[.D3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6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638888888888889" calcext:value-type="float">
            <text:p>0,00063888888888888900</text:p>
          </table:table-cell>
          <table:table-cell table:formula="of:=[.D347]-[.D3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6" office:value-type="float" office:value="5536" calcext:value-type="float">
            <text:p>553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640740740740741" calcext:value-type="float">
            <text:p>0,00064074074074074100</text:p>
          </table:table-cell>
          <table:table-cell table:formula="of:=[.D348]-[.D3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6" office:value-type="float" office:value="5552" calcext:value-type="float">
            <text:p>5552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642592592592593" calcext:value-type="float">
            <text:p>0,00064259259259259300</text:p>
          </table:table-cell>
          <table:table-cell table:formula="of:=[.D349]-[.D3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6" office:value-type="float" office:value="5568" calcext:value-type="float">
            <text:p>556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644444444444444" calcext:value-type="float">
            <text:p>0,00064444444444444400</text:p>
          </table:table-cell>
          <table:table-cell table:formula="of:=[.D350]-[.D3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6" office:value-type="float" office:value="5584" calcext:value-type="float">
            <text:p>5584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646296296296296" calcext:value-type="float">
            <text:p>0,00064629629629629600</text:p>
          </table:table-cell>
          <table:table-cell table:formula="of:=[.D351]-[.D3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6" office:value-type="float" office:value="5600" calcext:value-type="float">
            <text:p>56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648148148148148" calcext:value-type="float">
            <text:p>0,00064814814814814800</text:p>
          </table:table-cell>
          <table:table-cell table:formula="of:=[.D352]-[.D3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6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65" calcext:value-type="float">
            <text:p>0,00065000000000000000</text:p>
          </table:table-cell>
          <table:table-cell table:formula="of:=[.D353]-[.D3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6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651851851851852" calcext:value-type="float">
            <text:p>0,00065185185185185200</text:p>
          </table:table-cell>
          <table:table-cell table:formula="of:=[.D354]-[.D3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6" office:value-type="float" office:value="5648" calcext:value-type="float">
            <text:p>5648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653703703703704" calcext:value-type="float">
            <text:p>0,00065370370370370400</text:p>
          </table:table-cell>
          <table:table-cell table:formula="of:=[.D355]-[.D354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6" office:value-type="float" office:value="5664" calcext:value-type="float">
            <text:p>566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655555555555556" calcext:value-type="float">
            <text:p>0,00065555555555555600</text:p>
          </table:table-cell>
          <table:table-cell table:formula="of:=[.D356]-[.D3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6" office:value-type="float" office:value="5680" calcext:value-type="float">
            <text:p>568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657407407407407" calcext:value-type="float">
            <text:p>0,00065740740740740700</text:p>
          </table:table-cell>
          <table:table-cell table:formula="of:=[.D357]-[.D3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6" office:value-type="float" office:value="5696" calcext:value-type="float">
            <text:p>569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659259259259259" calcext:value-type="float">
            <text:p>0,00065925925925925900</text:p>
          </table:table-cell>
          <table:table-cell table:formula="of:=[.D358]-[.D3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6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661111111111111" calcext:value-type="float">
            <text:p>0,00066111111111111100</text:p>
          </table:table-cell>
          <table:table-cell table:formula="of:=[.D359]-[.D3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6" office:value-type="float" office:value="5728" calcext:value-type="float">
            <text:p>572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662962962962963" calcext:value-type="float">
            <text:p>0,00066296296296296300</text:p>
          </table:table-cell>
          <table:table-cell table:formula="of:=[.D360]-[.D3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6" office:value-type="float" office:value="5744" calcext:value-type="float">
            <text:p>5744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664814814814815" calcext:value-type="float">
            <text:p>0,00066481481481481500</text:p>
          </table:table-cell>
          <table:table-cell table:formula="of:=[.D361]-[.D3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6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666666666666667" calcext:value-type="float">
            <text:p>0,00066666666666666700</text:p>
          </table:table-cell>
          <table:table-cell table:formula="of:=[.D362]-[.D3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6" office:value-type="float" office:value="5776" calcext:value-type="float">
            <text:p>5776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668518518518519" calcext:value-type="float">
            <text:p>0,00066851851851851900</text:p>
          </table:table-cell>
          <table:table-cell table:formula="of:=[.D363]-[.D3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6" office:value-type="float" office:value="5792" calcext:value-type="float">
            <text:p>579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67037037037037" calcext:value-type="float">
            <text:p>0,00067037037037037000</text:p>
          </table:table-cell>
          <table:table-cell table:formula="of:=[.D364]-[.D363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6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672222222222222" calcext:value-type="float">
            <text:p>0,00067222222222222200</text:p>
          </table:table-cell>
          <table:table-cell table:formula="of:=[.D365]-[.D3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6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674074074074074" calcext:value-type="float">
            <text:p>0,00067407407407407400</text:p>
          </table:table-cell>
          <table:table-cell table:formula="of:=[.D366]-[.D3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6" office:value-type="float" office:value="5840" calcext:value-type="float">
            <text:p>584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675925925925926" calcext:value-type="float">
            <text:p>0,00067592592592592600</text:p>
          </table:table-cell>
          <table:table-cell table:formula="of:=[.D367]-[.D3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6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677777777777778" calcext:value-type="float">
            <text:p>0,00067777777777777800</text:p>
          </table:table-cell>
          <table:table-cell table:formula="of:=[.D368]-[.D3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6" office:value-type="float" office:value="5872" calcext:value-type="float">
            <text:p>5872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67962962962963" calcext:value-type="float">
            <text:p>0,00067962962962963000</text:p>
          </table:table-cell>
          <table:table-cell table:formula="of:=[.D369]-[.D3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6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681481481481482" calcext:value-type="float">
            <text:p>0,00068148148148148200</text:p>
          </table:table-cell>
          <table:table-cell table:formula="of:=[.D370]-[.D3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6" office:value-type="float" office:value="5904" calcext:value-type="float">
            <text:p>5904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683333333333333" calcext:value-type="float">
            <text:p>0,00068333333333333300</text:p>
          </table:table-cell>
          <table:table-cell table:formula="of:=[.D371]-[.D3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6" office:value-type="float" office:value="5920" calcext:value-type="float">
            <text:p>592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685185185185185" calcext:value-type="float">
            <text:p>0,00068518518518518500</text:p>
          </table:table-cell>
          <table:table-cell table:formula="of:=[.D372]-[.D3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6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687037037037037" calcext:value-type="float">
            <text:p>0,00068703703703703700</text:p>
          </table:table-cell>
          <table:table-cell table:formula="of:=[.D373]-[.D3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6" office:value-type="float" office:value="5952" calcext:value-type="float">
            <text:p>595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688888888888889" calcext:value-type="float">
            <text:p>0,00068888888888888900</text:p>
          </table:table-cell>
          <table:table-cell table:formula="of:=[.D374]-[.D373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6" office:value-type="float" office:value="5968" calcext:value-type="float">
            <text:p>5968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690740740740741" calcext:value-type="float">
            <text:p>0,00069074074074074100</text:p>
          </table:table-cell>
          <table:table-cell table:formula="of:=[.D375]-[.D3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6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692592592592593" calcext:value-type="float">
            <text:p>0,00069259259259259300</text:p>
          </table:table-cell>
          <table:table-cell table:formula="of:=[.D376]-[.D3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6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694444444444445" calcext:value-type="float">
            <text:p>0,00069444444444444500</text:p>
          </table:table-cell>
          <table:table-cell table:formula="of:=[.D377]-[.D3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6" office:value-type="float" office:value="6016" calcext:value-type="float">
            <text:p>601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696296296296296" calcext:value-type="float">
            <text:p>0,00069629629629629600</text:p>
          </table:table-cell>
          <table:table-cell table:formula="of:=[.D378]-[.D3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6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698148148148148" calcext:value-type="float">
            <text:p>0,00069814814814814800</text:p>
          </table:table-cell>
          <table:table-cell table:formula="of:=[.D379]-[.D3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6" office:value-type="float" office:value="6048" calcext:value-type="float">
            <text:p>604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7" calcext:value-type="float">
            <text:p>0,00070000000000000000</text:p>
          </table:table-cell>
          <table:table-cell table:formula="of:=[.D380]-[.D3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6" office:value-type="float" office:value="6064" calcext:value-type="float">
            <text:p>6064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701851851851852" calcext:value-type="float">
            <text:p>0,00070185185185185200</text:p>
          </table:table-cell>
          <table:table-cell table:formula="of:=[.D381]-[.D3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6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703703703703704" calcext:value-type="float">
            <text:p>0,00070370370370370400</text:p>
          </table:table-cell>
          <table:table-cell table:formula="of:=[.D382]-[.D3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6" office:value-type="float" office:value="6096" calcext:value-type="float">
            <text:p>6096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705555555555556" calcext:value-type="float">
            <text:p>0,00070555555555555600</text:p>
          </table:table-cell>
          <table:table-cell table:formula="of:=[.D383]-[.D3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6" office:value-type="float" office:value="6112" calcext:value-type="float">
            <text:p>611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707407407407407" calcext:value-type="float">
            <text:p>0,00070740740740740700</text:p>
          </table:table-cell>
          <table:table-cell table:formula="of:=[.D384]-[.D383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6" office:value-type="float" office:value="6128" calcext:value-type="float">
            <text:p>6128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709259259259259" calcext:value-type="float">
            <text:p>0,00070925925925925900</text:p>
          </table:table-cell>
          <table:table-cell table:formula="of:=[.D385]-[.D3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6" office:value-type="float" office:value="6144" calcext:value-type="float">
            <text:p>614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711111111111111" calcext:value-type="float">
            <text:p>0,00071111111111111100</text:p>
          </table:table-cell>
          <table:table-cell table:formula="of:=[.D386]-[.D3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6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712962962962963" calcext:value-type="float">
            <text:p>0,00071296296296296300</text:p>
          </table:table-cell>
          <table:table-cell table:formula="of:=[.D387]-[.D3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6" office:value-type="float" office:value="6176" calcext:value-type="float">
            <text:p>617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714814814814815" calcext:value-type="float">
            <text:p>0,00071481481481481500</text:p>
          </table:table-cell>
          <table:table-cell table:formula="of:=[.D388]-[.D3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6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716666666666667" calcext:value-type="float">
            <text:p>0,00071666666666666700</text:p>
          </table:table-cell>
          <table:table-cell table:formula="of:=[.D389]-[.D3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6" office:value-type="float" office:value="6208" calcext:value-type="float">
            <text:p>620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718518518518519" calcext:value-type="float">
            <text:p>0,00071851851851851900</text:p>
          </table:table-cell>
          <table:table-cell table:formula="of:=[.D390]-[.D3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6" office:value-type="float" office:value="6224" calcext:value-type="float">
            <text:p>6224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72037037037037" calcext:value-type="float">
            <text:p>0,00072037037037037000</text:p>
          </table:table-cell>
          <table:table-cell table:formula="of:=[.D391]-[.D3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6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722222222222222" calcext:value-type="float">
            <text:p>0,00072222222222222200</text:p>
          </table:table-cell>
          <table:table-cell table:formula="of:=[.D392]-[.D3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6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724074074074074" calcext:value-type="float">
            <text:p>0,00072407407407407400</text:p>
          </table:table-cell>
          <table:table-cell table:formula="of:=[.D393]-[.D392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6" office:value-type="float" office:value="6272" calcext:value-type="float">
            <text:p>627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725925925925926" calcext:value-type="float">
            <text:p>0,00072592592592592600</text:p>
          </table:table-cell>
          <table:table-cell table:formula="of:=[.D394]-[.D3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6" office:value-type="float" office:value="6288" calcext:value-type="float">
            <text:p>6288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727777777777778" calcext:value-type="float">
            <text:p>0,00072777777777777800</text:p>
          </table:table-cell>
          <table:table-cell table:formula="of:=[.D395]-[.D3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6" office:value-type="float" office:value="6304" calcext:value-type="float">
            <text:p>6304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72962962962963" calcext:value-type="float">
            <text:p>0,00072962962962963000</text:p>
          </table:table-cell>
          <table:table-cell table:formula="of:=[.D396]-[.D3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6" office:value-type="float" office:value="6320" calcext:value-type="float">
            <text:p>632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731481481481482" calcext:value-type="float">
            <text:p>0,00073148148148148100</text:p>
          </table:table-cell>
          <table:table-cell table:formula="of:=[.D397]-[.D3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6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733333333333333" calcext:value-type="float">
            <text:p>0,00073333333333333300</text:p>
          </table:table-cell>
          <table:table-cell table:formula="of:=[.D398]-[.D3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6" office:value-type="float" office:value="6352" calcext:value-type="float">
            <text:p>6352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735185185185185" calcext:value-type="float">
            <text:p>0,00073518518518518500</text:p>
          </table:table-cell>
          <table:table-cell table:formula="of:=[.D399]-[.D3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6" office:value-type="float" office:value="6368" calcext:value-type="float">
            <text:p>6368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737037037037037" calcext:value-type="float">
            <text:p>0,00073703703703703700</text:p>
          </table:table-cell>
          <table:table-cell table:formula="of:=[.D400]-[.D3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6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738888888888889" calcext:value-type="float">
            <text:p>0,00073888888888888900</text:p>
          </table:table-cell>
          <table:table-cell table:formula="of:=[.D401]-[.D4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6" office:value-type="float" office:value="6400" calcext:value-type="float">
            <text:p>64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740740740740741" calcext:value-type="float">
            <text:p>0,00074074074074074100</text:p>
          </table:table-cell>
          <table:table-cell table:formula="of:=[.D402]-[.D4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6" office:value-type="float" office:value="6416" calcext:value-type="float">
            <text:p>6416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742592592592593" calcext:value-type="float">
            <text:p>0,00074259259259259200</text:p>
          </table:table-cell>
          <table:table-cell table:formula="of:=[.D403]-[.D402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6" office:value-type="float" office:value="6432" calcext:value-type="float">
            <text:p>6432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744444444444445" calcext:value-type="float">
            <text:p>0,00074444444444444500</text:p>
          </table:table-cell>
          <table:table-cell table:formula="of:=[.D404]-[.D4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6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746296296296296" calcext:value-type="float">
            <text:p>0,00074629629629629600</text:p>
          </table:table-cell>
          <table:table-cell table:formula="of:=[.D405]-[.D4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6" office:value-type="float" office:value="6464" calcext:value-type="float">
            <text:p>6464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748148148148148" calcext:value-type="float">
            <text:p>0,00074814814814814800</text:p>
          </table:table-cell>
          <table:table-cell table:formula="of:=[.D406]-[.D4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6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75" calcext:value-type="float">
            <text:p>0,00075000000000000000</text:p>
          </table:table-cell>
          <table:table-cell table:formula="of:=[.D407]-[.D4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6" office:value-type="float" office:value="6496" calcext:value-type="float">
            <text:p>6496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751851851851852" calcext:value-type="float">
            <text:p>0,00075185185185185200</text:p>
          </table:table-cell>
          <table:table-cell table:formula="of:=[.D408]-[.D4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6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753703703703704" calcext:value-type="float">
            <text:p>0,00075370370370370400</text:p>
          </table:table-cell>
          <table:table-cell table:formula="of:=[.D409]-[.D4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6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755555555555556" calcext:value-type="float">
            <text:p>0,00075555555555555600</text:p>
          </table:table-cell>
          <table:table-cell table:formula="of:=[.D410]-[.D4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6" office:value-type="float" office:value="6544" calcext:value-type="float">
            <text:p>6544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757407407407407" calcext:value-type="float">
            <text:p>0,00075740740740740700</text:p>
          </table:table-cell>
          <table:table-cell table:formula="of:=[.D411]-[.D4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6" office:value-type="float" office:value="6560" calcext:value-type="float">
            <text:p>656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759259259259259" calcext:value-type="float">
            <text:p>0,00075925925925925900</text:p>
          </table:table-cell>
          <table:table-cell table:formula="of:=[.D412]-[.D4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6" office:value-type="float" office:value="6576" calcext:value-type="float">
            <text:p>6576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761111111111111" calcext:value-type="float">
            <text:p>0,00076111111111111100</text:p>
          </table:table-cell>
          <table:table-cell table:formula="of:=[.D413]-[.D412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6" office:value-type="float" office:value="6592" calcext:value-type="float">
            <text:p>6592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762962962962963" calcext:value-type="float">
            <text:p>0,00076296296296296300</text:p>
          </table:table-cell>
          <table:table-cell table:formula="of:=[.D414]-[.D4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6" office:value-type="float" office:value="6608" calcext:value-type="float">
            <text:p>6608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764814814814815" calcext:value-type="float">
            <text:p>0,00076481481481481500</text:p>
          </table:table-cell>
          <table:table-cell table:formula="of:=[.D415]-[.D4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6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766666666666667" calcext:value-type="float">
            <text:p>0,00076666666666666700</text:p>
          </table:table-cell>
          <table:table-cell table:formula="of:=[.D416]-[.D4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6" office:value-type="float" office:value="6640" calcext:value-type="float">
            <text:p>664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768518518518519" calcext:value-type="float">
            <text:p>0,00076851851851851900</text:p>
          </table:table-cell>
          <table:table-cell table:formula="of:=[.D417]-[.D4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6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77037037037037" calcext:value-type="float">
            <text:p>0,00077037037037037000</text:p>
          </table:table-cell>
          <table:table-cell table:formula="of:=[.D418]-[.D4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6" office:value-type="float" office:value="6672" calcext:value-type="float">
            <text:p>6672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772222222222222" calcext:value-type="float">
            <text:p>0,00077222222222222200</text:p>
          </table:table-cell>
          <table:table-cell table:formula="of:=[.D419]-[.D4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6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774074074074074" calcext:value-type="float">
            <text:p>0,00077407407407407400</text:p>
          </table:table-cell>
          <table:table-cell table:formula="of:=[.D420]-[.D4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6" office:value-type="float" office:value="6704" calcext:value-type="float">
            <text:p>6704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775925925925926" calcext:value-type="float">
            <text:p>0,00077592592592592600</text:p>
          </table:table-cell>
          <table:table-cell table:formula="of:=[.D421]-[.D4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6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777777777777778" calcext:value-type="float">
            <text:p>0,00077777777777777800</text:p>
          </table:table-cell>
          <table:table-cell table:formula="of:=[.D422]-[.D421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6" office:value-type="float" office:value="6736" calcext:value-type="float">
            <text:p>6736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77962962962963" calcext:value-type="float">
            <text:p>0,00077962962962963000</text:p>
          </table:table-cell>
          <table:table-cell table:formula="of:=[.D423]-[.D4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6" office:value-type="float" office:value="6752" calcext:value-type="float">
            <text:p>6752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781481481481482" calcext:value-type="float">
            <text:p>0,00078148148148148200</text:p>
          </table:table-cell>
          <table:table-cell table:formula="of:=[.D424]-[.D4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6" office:value-type="float" office:value="6768" calcext:value-type="float">
            <text:p>6768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783333333333333" calcext:value-type="float">
            <text:p>0,00078333333333333400</text:p>
          </table:table-cell>
          <table:table-cell table:formula="of:=[.D425]-[.D4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6" office:value-type="float" office:value="6784" calcext:value-type="float">
            <text:p>6784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785185185185185" calcext:value-type="float">
            <text:p>0,00078518518518518500</text:p>
          </table:table-cell>
          <table:table-cell table:formula="of:=[.D426]-[.D4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6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787037037037037" calcext:value-type="float">
            <text:p>0,00078703703703703700</text:p>
          </table:table-cell>
          <table:table-cell table:formula="of:=[.D427]-[.D4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6" office:value-type="float" office:value="6816" calcext:value-type="float">
            <text:p>6816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788888888888889" calcext:value-type="float">
            <text:p>0,00078888888888888900</text:p>
          </table:table-cell>
          <table:table-cell table:formula="of:=[.D428]-[.D4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6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790740740740741" calcext:value-type="float">
            <text:p>0,00079074074074074100</text:p>
          </table:table-cell>
          <table:table-cell table:formula="of:=[.D429]-[.D4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6" office:value-type="float" office:value="6848" calcext:value-type="float">
            <text:p>6848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792592592592593" calcext:value-type="float">
            <text:p>0,00079259259259259300</text:p>
          </table:table-cell>
          <table:table-cell table:formula="of:=[.D430]-[.D4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6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794444444444444" calcext:value-type="float">
            <text:p>0,00079444444444444500</text:p>
          </table:table-cell>
          <table:table-cell table:formula="of:=[.D431]-[.D4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6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796296296296296" calcext:value-type="float">
            <text:p>0,00079629629629629600</text:p>
          </table:table-cell>
          <table:table-cell table:formula="of:=[.D432]-[.D431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6" office:value-type="float" office:value="6896" calcext:value-type="float">
            <text:p>6896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798148148148148" calcext:value-type="float">
            <text:p>0,00079814814814814800</text:p>
          </table:table-cell>
          <table:table-cell table:formula="of:=[.D433]-[.D4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6" office:value-type="float" office:value="6912" calcext:value-type="float">
            <text:p>6912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8" calcext:value-type="float">
            <text:p>0,00080000000000000000</text:p>
          </table:table-cell>
          <table:table-cell table:formula="of:=[.D434]-[.D4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6" office:value-type="float" office:value="6928" calcext:value-type="float">
            <text:p>6928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801851851851852" calcext:value-type="float">
            <text:p>0,00080185185185185200</text:p>
          </table:table-cell>
          <table:table-cell table:formula="of:=[.D435]-[.D4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6" office:value-type="float" office:value="6944" calcext:value-type="float">
            <text:p>6944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803703703703704" calcext:value-type="float">
            <text:p>0,00080370370370370400</text:p>
          </table:table-cell>
          <table:table-cell table:formula="of:=[.D436]-[.D4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6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805555555555556" calcext:value-type="float">
            <text:p>0,00080555555555555600</text:p>
          </table:table-cell>
          <table:table-cell table:formula="of:=[.D437]-[.D4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6" office:value-type="float" office:value="6976" calcext:value-type="float">
            <text:p>6976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807407407407407" calcext:value-type="float">
            <text:p>0,00080740740740740700</text:p>
          </table:table-cell>
          <table:table-cell table:formula="of:=[.D438]-[.D4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6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809259259259259" calcext:value-type="float">
            <text:p>0,00080925925925925900</text:p>
          </table:table-cell>
          <table:table-cell table:formula="of:=[.D439]-[.D4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6" office:value-type="float" office:value="7008" calcext:value-type="float">
            <text:p>7008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811111111111111" calcext:value-type="float">
            <text:p>0,00081111111111111100</text:p>
          </table:table-cell>
          <table:table-cell table:formula="of:=[.D440]-[.D4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6" office:value-type="float" office:value="7024" calcext:value-type="float">
            <text:p>7024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812962962962963" calcext:value-type="float">
            <text:p>0,00081296296296296300</text:p>
          </table:table-cell>
          <table:table-cell table:formula="of:=[.D441]-[.D4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6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814814814814815" calcext:value-type="float">
            <text:p>0,00081481481481481500</text:p>
          </table:table-cell>
          <table:table-cell table:formula="of:=[.D442]-[.D441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6" office:value-type="float" office:value="7056" calcext:value-type="float">
            <text:p>7056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816666666666667" calcext:value-type="float">
            <text:p>0,00081666666666666700</text:p>
          </table:table-cell>
          <table:table-cell table:formula="of:=[.D443]-[.D4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6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818518518518519" calcext:value-type="float">
            <text:p>0,00081851851851851900</text:p>
          </table:table-cell>
          <table:table-cell table:formula="of:=[.D444]-[.D4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6" office:value-type="float" office:value="7088" calcext:value-type="float">
            <text:p>7088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82037037037037" calcext:value-type="float">
            <text:p>0,00082037037037037000</text:p>
          </table:table-cell>
          <table:table-cell table:formula="of:=[.D445]-[.D4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6" office:value-type="float" office:value="7104" calcext:value-type="float">
            <text:p>7104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822222222222222" calcext:value-type="float">
            <text:p>0,00082222222222222200</text:p>
          </table:table-cell>
          <table:table-cell table:formula="of:=[.D446]-[.D4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6" office:value-type="float" office:value="7120" calcext:value-type="float">
            <text:p>712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824074074074074" calcext:value-type="float">
            <text:p>0,00082407407407407400</text:p>
          </table:table-cell>
          <table:table-cell table:formula="of:=[.D447]-[.D4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6" office:value-type="float" office:value="7136" calcext:value-type="float">
            <text:p>7136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825925925925926" calcext:value-type="float">
            <text:p>0,00082592592592592600</text:p>
          </table:table-cell>
          <table:table-cell table:formula="of:=[.D448]-[.D4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6" office:value-type="float" office:value="7152" calcext:value-type="float">
            <text:p>7152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827777777777778" calcext:value-type="float">
            <text:p>0,00082777777777777800</text:p>
          </table:table-cell>
          <table:table-cell table:formula="of:=[.D449]-[.D4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6" office:value-type="float" office:value="7168" calcext:value-type="float">
            <text:p>7168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82962962962963" calcext:value-type="float">
            <text:p>0,00082962962962963000</text:p>
          </table:table-cell>
          <table:table-cell table:formula="of:=[.D450]-[.D4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6" office:value-type="float" office:value="7184" calcext:value-type="float">
            <text:p>7184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831481481481481" calcext:value-type="float">
            <text:p>0,00083148148148148100</text:p>
          </table:table-cell>
          <table:table-cell table:formula="of:=[.D451]-[.D450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6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833333333333333" calcext:value-type="float">
            <text:p>0,00083333333333333300</text:p>
          </table:table-cell>
          <table:table-cell table:formula="of:=[.D452]-[.D4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6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835185185185185" calcext:value-type="float">
            <text:p>0,00083518518518518500</text:p>
          </table:table-cell>
          <table:table-cell table:formula="of:=[.D453]-[.D4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6" office:value-type="float" office:value="7232" calcext:value-type="float">
            <text:p>7232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837037037037037" calcext:value-type="float">
            <text:p>0,00083703703703703700</text:p>
          </table:table-cell>
          <table:table-cell table:formula="of:=[.D454]-[.D4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6" office:value-type="float" office:value="7248" calcext:value-type="float">
            <text:p>7248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838888888888889" calcext:value-type="float">
            <text:p>0,00083888888888888900</text:p>
          </table:table-cell>
          <table:table-cell table:formula="of:=[.D455]-[.D4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6" office:value-type="float" office:value="7264" calcext:value-type="float">
            <text:p>7264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840740740740741" calcext:value-type="float">
            <text:p>0,00084074074074074100</text:p>
          </table:table-cell>
          <table:table-cell table:formula="of:=[.D456]-[.D4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6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0842592592592593" calcext:value-type="float">
            <text:p>0,00084259259259259300</text:p>
          </table:table-cell>
          <table:table-cell table:formula="of:=[.D457]-[.D4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6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0844444444444444" calcext:value-type="float">
            <text:p>0,00084444444444444400</text:p>
          </table:table-cell>
          <table:table-cell table:formula="of:=[.D458]-[.D4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6" office:value-type="float" office:value="7312" calcext:value-type="float">
            <text:p>7312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0846296296296296" calcext:value-type="float">
            <text:p>0,00084629629629629600</text:p>
          </table:table-cell>
          <table:table-cell table:formula="of:=[.D459]-[.D4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6" office:value-type="float" office:value="7328" calcext:value-type="float">
            <text:p>7328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0848148148148148" calcext:value-type="float">
            <text:p>0,00084814814814814800</text:p>
          </table:table-cell>
          <table:table-cell table:formula="of:=[.D460]-[.D4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6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085" calcext:value-type="float">
            <text:p>0,00085000000000000000</text:p>
          </table:table-cell>
          <table:table-cell table:formula="of:=[.D461]-[.D460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6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0851851851851852" calcext:value-type="float">
            <text:p>0,00085185185185185200</text:p>
          </table:table-cell>
          <table:table-cell table:formula="of:=[.D462]-[.D4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6" office:value-type="float" office:value="7376" calcext:value-type="float">
            <text:p>7376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0853703703703704" calcext:value-type="float">
            <text:p>0,00085370370370370400</text:p>
          </table:table-cell>
          <table:table-cell table:formula="of:=[.D463]-[.D4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6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0855555555555556" calcext:value-type="float">
            <text:p>0,00085555555555555600</text:p>
          </table:table-cell>
          <table:table-cell table:formula="of:=[.D464]-[.D4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6" office:value-type="float" office:value="7408" calcext:value-type="float">
            <text:p>7408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0857407407407407" calcext:value-type="float">
            <text:p>0,00085740740740740700</text:p>
          </table:table-cell>
          <table:table-cell table:formula="of:=[.D465]-[.D4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6" office:value-type="float" office:value="7424" calcext:value-type="float">
            <text:p>7424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0859259259259259" calcext:value-type="float">
            <text:p>0,00085925925925925900</text:p>
          </table:table-cell>
          <table:table-cell table:formula="of:=[.D466]-[.D4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6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0861111111111111" calcext:value-type="float">
            <text:p>0,00086111111111111100</text:p>
          </table:table-cell>
          <table:table-cell table:formula="of:=[.D467]-[.D4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6" office:value-type="float" office:value="7456" calcext:value-type="float">
            <text:p>7456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0862962962962963" calcext:value-type="float">
            <text:p>0,00086296296296296300</text:p>
          </table:table-cell>
          <table:table-cell table:formula="of:=[.D468]-[.D4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6" office:value-type="float" office:value="7472" calcext:value-type="float">
            <text:p>7472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0864814814814815" calcext:value-type="float">
            <text:p>0,00086481481481481500</text:p>
          </table:table-cell>
          <table:table-cell table:formula="of:=[.D469]-[.D4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6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0866666666666667" calcext:value-type="float">
            <text:p>0,00086666666666666700</text:p>
          </table:table-cell>
          <table:table-cell table:formula="of:=[.D470]-[.D4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6" office:value-type="float" office:value="7504" calcext:value-type="float">
            <text:p>7504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0868518518518519" calcext:value-type="float">
            <text:p>0,00086851851851851800</text:p>
          </table:table-cell>
          <table:table-cell table:formula="of:=[.D471]-[.D470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6" office:value-type="float" office:value="7520" calcext:value-type="float">
            <text:p>752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087037037037037" calcext:value-type="float">
            <text:p>0,00087037037037037000</text:p>
          </table:table-cell>
          <table:table-cell table:formula="of:=[.D472]-[.D4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6" office:value-type="float" office:value="7536" calcext:value-type="float">
            <text:p>7536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0872222222222222" calcext:value-type="float">
            <text:p>0,00087222222222222200</text:p>
          </table:table-cell>
          <table:table-cell table:formula="of:=[.D473]-[.D4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6" office:value-type="float" office:value="7552" calcext:value-type="float">
            <text:p>7552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0874074074074074" calcext:value-type="float">
            <text:p>0,00087407407407407400</text:p>
          </table:table-cell>
          <table:table-cell table:formula="of:=[.D474]-[.D4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6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0875925925925926" calcext:value-type="float">
            <text:p>0,00087592592592592600</text:p>
          </table:table-cell>
          <table:table-cell table:formula="of:=[.D475]-[.D4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6" office:value-type="float" office:value="7584" calcext:value-type="float">
            <text:p>7584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0877777777777778" calcext:value-type="float">
            <text:p>0,00087777777777777800</text:p>
          </table:table-cell>
          <table:table-cell table:formula="of:=[.D476]-[.D4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6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087962962962963" calcext:value-type="float">
            <text:p>0,00087962962962963000</text:p>
          </table:table-cell>
          <table:table-cell table:formula="of:=[.D477]-[.D4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6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0881481481481482" calcext:value-type="float">
            <text:p>0,00088148148148148200</text:p>
          </table:table-cell>
          <table:table-cell table:formula="of:=[.D478]-[.D4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6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0883333333333333" calcext:value-type="float">
            <text:p>0,00088333333333333300</text:p>
          </table:table-cell>
          <table:table-cell table:formula="of:=[.D479]-[.D4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6" office:value-type="float" office:value="7648" calcext:value-type="float">
            <text:p>7648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0885185185185185" calcext:value-type="float">
            <text:p>0,00088518518518518500</text:p>
          </table:table-cell>
          <table:table-cell table:formula="of:=[.D480]-[.D479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6" office:value-type="float" office:value="7664" calcext:value-type="float">
            <text:p>7664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0887037037037037" calcext:value-type="float">
            <text:p>0,00088703703703703700</text:p>
          </table:table-cell>
          <table:table-cell table:formula="of:=[.D481]-[.D4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6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0888888888888889" calcext:value-type="float">
            <text:p>0,00088888888888888900</text:p>
          </table:table-cell>
          <table:table-cell table:formula="of:=[.D482]-[.D4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6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0890740740740741" calcext:value-type="float">
            <text:p>0,00089074074074074100</text:p>
          </table:table-cell>
          <table:table-cell table:formula="of:=[.D483]-[.D4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6" office:value-type="float" office:value="7712" calcext:value-type="float">
            <text:p>7712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0892592592592593" calcext:value-type="float">
            <text:p>0,00089259259259259300</text:p>
          </table:table-cell>
          <table:table-cell table:formula="of:=[.D484]-[.D4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6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0894444444444445" calcext:value-type="float">
            <text:p>0,00089444444444444500</text:p>
          </table:table-cell>
          <table:table-cell table:formula="of:=[.D485]-[.D4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6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0896296296296296" calcext:value-type="float">
            <text:p>0,00089629629629629600</text:p>
          </table:table-cell>
          <table:table-cell table:formula="of:=[.D486]-[.D4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6" office:value-type="float" office:value="7760" calcext:value-type="float">
            <text:p>776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0898148148148148" calcext:value-type="float">
            <text:p>0,00089814814814814800</text:p>
          </table:table-cell>
          <table:table-cell table:formula="of:=[.D487]-[.D4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6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09" calcext:value-type="float">
            <text:p>0,00090000000000000000</text:p>
          </table:table-cell>
          <table:table-cell table:formula="of:=[.D488]-[.D4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6" office:value-type="float" office:value="7792" calcext:value-type="float">
            <text:p>7792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0901851851851852" calcext:value-type="float">
            <text:p>0,00090185185185185200</text:p>
          </table:table-cell>
          <table:table-cell table:formula="of:=[.D489]-[.D4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6" office:value-type="float" office:value="7808" calcext:value-type="float">
            <text:p>7808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0903703703703704" calcext:value-type="float">
            <text:p>0,00090370370370370400</text:p>
          </table:table-cell>
          <table:table-cell table:formula="of:=[.D490]-[.D489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6" office:value-type="float" office:value="7824" calcext:value-type="float">
            <text:p>7824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0905555555555556" calcext:value-type="float">
            <text:p>0,00090555555555555600</text:p>
          </table:table-cell>
          <table:table-cell table:formula="of:=[.D491]-[.D4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6" office:value-type="float" office:value="7840" calcext:value-type="float">
            <text:p>784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0907407407407407" calcext:value-type="float">
            <text:p>0,00090740740740740800</text:p>
          </table:table-cell>
          <table:table-cell table:formula="of:=[.D492]-[.D4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6" office:value-type="float" office:value="7856" calcext:value-type="float">
            <text:p>7856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0909259259259259" calcext:value-type="float">
            <text:p>0,00090925925925925900</text:p>
          </table:table-cell>
          <table:table-cell table:formula="of:=[.D493]-[.D4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6" office:value-type="float" office:value="7872" calcext:value-type="float">
            <text:p>7872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0911111111111111" calcext:value-type="float">
            <text:p>0,00091111111111111100</text:p>
          </table:table-cell>
          <table:table-cell table:formula="of:=[.D494]-[.D4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6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0912962962962963" calcext:value-type="float">
            <text:p>0,00091296296296296300</text:p>
          </table:table-cell>
          <table:table-cell table:formula="of:=[.D495]-[.D4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6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0914814814814815" calcext:value-type="float">
            <text:p>0,00091481481481481500</text:p>
          </table:table-cell>
          <table:table-cell table:formula="of:=[.D496]-[.D4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6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0916666666666667" calcext:value-type="float">
            <text:p>0,00091666666666666700</text:p>
          </table:table-cell>
          <table:table-cell table:formula="of:=[.D497]-[.D4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6" office:value-type="float" office:value="7936" calcext:value-type="float">
            <text:p>7936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0918518518518519" calcext:value-type="float">
            <text:p>0,00091851851851851900</text:p>
          </table:table-cell>
          <table:table-cell table:formula="of:=[.D498]-[.D4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6" office:value-type="float" office:value="7952" calcext:value-type="float">
            <text:p>7952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092037037037037" calcext:value-type="float">
            <text:p>0,00092037037037037000</text:p>
          </table:table-cell>
          <table:table-cell table:formula="of:=[.D499]-[.D4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6" office:value-type="float" office:value="7968" calcext:value-type="float">
            <text:p>7968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0922222222222222" calcext:value-type="float">
            <text:p>0,00092222222222222200</text:p>
          </table:table-cell>
          <table:table-cell table:formula="of:=[.D500]-[.D499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6" office:value-type="float" office:value="7984" calcext:value-type="float">
            <text:p>7984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0924074074074074" calcext:value-type="float">
            <text:p>0,00092407407407407400</text:p>
          </table:table-cell>
          <table:table-cell table:formula="of:=[.D501]-[.D5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6" office:value-type="float" office:value="8000" calcext:value-type="float">
            <text:p>8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0925925925925926" calcext:value-type="float">
            <text:p>0,00092592592592592600</text:p>
          </table:table-cell>
          <table:table-cell table:formula="of:=[.D502]-[.D5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6" office:value-type="float" office:value="8016" calcext:value-type="float">
            <text:p>8016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0927777777777778" calcext:value-type="float">
            <text:p>0,00092777777777777800</text:p>
          </table:table-cell>
          <table:table-cell table:formula="of:=[.D503]-[.D5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6" office:value-type="float" office:value="8032" calcext:value-type="float">
            <text:p>8032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092962962962963" calcext:value-type="float">
            <text:p>0,00092962962962963000</text:p>
          </table:table-cell>
          <table:table-cell table:formula="of:=[.D504]-[.D5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6" office:value-type="float" office:value="8048" calcext:value-type="float">
            <text:p>8048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0931481481481482" calcext:value-type="float">
            <text:p>0,00093148148148148200</text:p>
          </table:table-cell>
          <table:table-cell table:formula="of:=[.D505]-[.D5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6" office:value-type="float" office:value="8064" calcext:value-type="float">
            <text:p>8064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0933333333333333" calcext:value-type="float">
            <text:p>0,00093333333333333300</text:p>
          </table:table-cell>
          <table:table-cell table:formula="of:=[.D506]-[.D5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6" office:value-type="float" office:value="8080" calcext:value-type="float">
            <text:p>808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0935185185185185" calcext:value-type="float">
            <text:p>0,00093518518518518500</text:p>
          </table:table-cell>
          <table:table-cell table:formula="of:=[.D507]-[.D5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6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0937037037037037" calcext:value-type="float">
            <text:p>0,00093703703703703700</text:p>
          </table:table-cell>
          <table:table-cell table:formula="of:=[.D508]-[.D5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6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0938888888888889" calcext:value-type="float">
            <text:p>0,00093888888888888900</text:p>
          </table:table-cell>
          <table:table-cell table:formula="of:=[.D509]-[.D508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6" office:value-type="float" office:value="8128" calcext:value-type="float">
            <text:p>8128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0940740740740741" calcext:value-type="float">
            <text:p>0,00094074074074074100</text:p>
          </table:table-cell>
          <table:table-cell table:formula="of:=[.D510]-[.D5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6" office:value-type="float" office:value="8144" calcext:value-type="float">
            <text:p>8144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0942592592592593" calcext:value-type="float">
            <text:p>0,00094259259259259300</text:p>
          </table:table-cell>
          <table:table-cell table:formula="of:=[.D511]-[.D5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6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0944444444444445" calcext:value-type="float">
            <text:p>0,00094444444444444500</text:p>
          </table:table-cell>
          <table:table-cell table:formula="of:=[.D512]-[.D5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6" office:value-type="float" office:value="8176" calcext:value-type="float">
            <text:p>8176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0946296296296296" calcext:value-type="float">
            <text:p>0,00094629629629629600</text:p>
          </table:table-cell>
          <table:table-cell table:formula="of:=[.D513]-[.D5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6" office:value-type="float" office:value="8192" calcext:value-type="float">
            <text:p>8192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0948148148148148" calcext:value-type="float">
            <text:p>0,00094814814814814800</text:p>
          </table:table-cell>
          <table:table-cell table:formula="of:=[.D514]-[.D5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6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095" calcext:value-type="float">
            <text:p>0,00095000000000000000</text:p>
          </table:table-cell>
          <table:table-cell table:formula="of:=[.D515]-[.D5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6" office:value-type="float" office:value="8224" calcext:value-type="float">
            <text:p>8224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0951851851851852" calcext:value-type="float">
            <text:p>0,00095185185185185200</text:p>
          </table:table-cell>
          <table:table-cell table:formula="of:=[.D516]-[.D5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6" office:value-type="float" office:value="8240" calcext:value-type="float">
            <text:p>824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0953703703703704" calcext:value-type="float">
            <text:p>0,00095370370370370400</text:p>
          </table:table-cell>
          <table:table-cell table:formula="of:=[.D517]-[.D5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6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0955555555555556" calcext:value-type="float">
            <text:p>0,00095555555555555600</text:p>
          </table:table-cell>
          <table:table-cell table:formula="of:=[.D518]-[.D5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6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0957407407407407" calcext:value-type="float">
            <text:p>0,00095740740740740700</text:p>
          </table:table-cell>
          <table:table-cell table:formula="of:=[.D519]-[.D518]" office:value-type="float" office:value="0.00000185185185185195" calcext:value-type="float">
            <text:p>0,0000018518518518519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6" office:value-type="float" office:value="8288" calcext:value-type="float">
            <text:p>8288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0959259259259259" calcext:value-type="float">
            <text:p>0,00095925925925925900</text:p>
          </table:table-cell>
          <table:table-cell table:formula="of:=[.D520]-[.D5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6" office:value-type="float" office:value="8304" calcext:value-type="float">
            <text:p>8304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0961111111111111" calcext:value-type="float">
            <text:p>0,00096111111111111100</text:p>
          </table:table-cell>
          <table:table-cell table:formula="of:=[.D521]-[.D5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6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0962962962962963" calcext:value-type="float">
            <text:p>0,00096296296296296300</text:p>
          </table:table-cell>
          <table:table-cell table:formula="of:=[.D522]-[.D5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6" office:value-type="float" office:value="8336" calcext:value-type="float">
            <text:p>8336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0964814814814815" calcext:value-type="float">
            <text:p>0,00096481481481481500</text:p>
          </table:table-cell>
          <table:table-cell table:formula="of:=[.D523]-[.D5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6" office:value-type="float" office:value="8352" calcext:value-type="float">
            <text:p>8352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0966666666666667" calcext:value-type="float">
            <text:p>0,00096666666666666700</text:p>
          </table:table-cell>
          <table:table-cell table:formula="of:=[.D524]-[.D5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6" office:value-type="float" office:value="8368" calcext:value-type="float">
            <text:p>8368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0968518518518519" calcext:value-type="float">
            <text:p>0,00096851851851851900</text:p>
          </table:table-cell>
          <table:table-cell table:formula="of:=[.D525]-[.D5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6" office:value-type="float" office:value="8384" calcext:value-type="float">
            <text:p>8384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097037037037037" calcext:value-type="float">
            <text:p>0,00097037037037037000</text:p>
          </table:table-cell>
          <table:table-cell table:formula="of:=[.D526]-[.D5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6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0972222222222222" calcext:value-type="float">
            <text:p>0,00097222222222222200</text:p>
          </table:table-cell>
          <table:table-cell table:formula="of:=[.D527]-[.D5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6" office:value-type="float" office:value="8416" calcext:value-type="float">
            <text:p>8416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0974074074074074" calcext:value-type="float">
            <text:p>0,00097407407407407400</text:p>
          </table:table-cell>
          <table:table-cell table:formula="of:=[.D528]-[.D5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6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0975925925925926" calcext:value-type="float">
            <text:p>0,00097592592592592600</text:p>
          </table:table-cell>
          <table:table-cell table:formula="of:=[.D529]-[.D5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6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0977777777777778" calcext:value-type="float">
            <text:p>0,00097777777777777800</text:p>
          </table:table-cell>
          <table:table-cell table:formula="of:=[.D530]-[.D5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6" office:value-type="float" office:value="8464" calcext:value-type="float">
            <text:p>8464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097962962962963" calcext:value-type="float">
            <text:p>0,00097962962962963000</text:p>
          </table:table-cell>
          <table:table-cell table:formula="of:=[.D531]-[.D5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6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0981481481481481" calcext:value-type="float">
            <text:p>0,00098148148148148100</text:p>
          </table:table-cell>
          <table:table-cell table:formula="of:=[.D532]-[.D5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6" office:value-type="float" office:value="8496" calcext:value-type="float">
            <text:p>8496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0983333333333333" calcext:value-type="float">
            <text:p>0,00098333333333333300</text:p>
          </table:table-cell>
          <table:table-cell table:formula="of:=[.D533]-[.D5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6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0985185185185185" calcext:value-type="float">
            <text:p>0,00098518518518518500</text:p>
          </table:table-cell>
          <table:table-cell table:formula="of:=[.D534]-[.D533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6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0987037037037037" calcext:value-type="float">
            <text:p>0,00098703703703703700</text:p>
          </table:table-cell>
          <table:table-cell table:formula="of:=[.D535]-[.D5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6" office:value-type="float" office:value="8544" calcext:value-type="float">
            <text:p>8544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0988888888888889" calcext:value-type="float">
            <text:p>0,00098888888888888900</text:p>
          </table:table-cell>
          <table:table-cell table:formula="of:=[.D536]-[.D5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6" office:value-type="float" office:value="8560" calcext:value-type="float">
            <text:p>856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0990740740740741" calcext:value-type="float">
            <text:p>0,00099074074074074100</text:p>
          </table:table-cell>
          <table:table-cell table:formula="of:=[.D537]-[.D5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6" office:value-type="float" office:value="8576" calcext:value-type="float">
            <text:p>8576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0992592592592593" calcext:value-type="float">
            <text:p>0,00099259259259259300</text:p>
          </table:table-cell>
          <table:table-cell table:formula="of:=[.D538]-[.D5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6" office:value-type="float" office:value="8592" calcext:value-type="float">
            <text:p>8592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0994444444444445" calcext:value-type="float">
            <text:p>0,00099444444444444500</text:p>
          </table:table-cell>
          <table:table-cell table:formula="of:=[.D539]-[.D5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6" office:value-type="float" office:value="8608" calcext:value-type="float">
            <text:p>8608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0996296296296296" calcext:value-type="float">
            <text:p>0,00099629629629629600</text:p>
          </table:table-cell>
          <table:table-cell table:formula="of:=[.D540]-[.D5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6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0998148148148148" calcext:value-type="float">
            <text:p>0,00099814814814814800</text:p>
          </table:table-cell>
          <table:table-cell table:formula="of:=[.D541]-[.D5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6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" calcext:value-type="float">
            <text:p>0,00100000000000000000</text:p>
          </table:table-cell>
          <table:table-cell table:formula="of:=[.D542]-[.D5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6" office:value-type="float" office:value="8656" calcext:value-type="float">
            <text:p>8656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00185185185185" calcext:value-type="float">
            <text:p>0,00100185185185185000</text:p>
          </table:table-cell>
          <table:table-cell table:formula="of:=[.D543]-[.D5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6" office:value-type="float" office:value="8672" calcext:value-type="float">
            <text:p>8672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0037037037037" calcext:value-type="float">
            <text:p>0,00100370370370370000</text:p>
          </table:table-cell>
          <table:table-cell table:formula="of:=[.D544]-[.D5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6" office:value-type="float" office:value="8688" calcext:value-type="float">
            <text:p>8688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00555555555556" calcext:value-type="float">
            <text:p>0,00100555555555556000</text:p>
          </table:table-cell>
          <table:table-cell table:formula="of:=[.D545]-[.D5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6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00740740740741" calcext:value-type="float">
            <text:p>0,00100740740740741000</text:p>
          </table:table-cell>
          <table:table-cell table:formula="of:=[.D546]-[.D5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6" office:value-type="float" office:value="8720" calcext:value-type="float">
            <text:p>872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00925925925926" calcext:value-type="float">
            <text:p>0,00100925925925926000</text:p>
          </table:table-cell>
          <table:table-cell table:formula="of:=[.D547]-[.D5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6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01111111111111" calcext:value-type="float">
            <text:p>0,00101111111111111000</text:p>
          </table:table-cell>
          <table:table-cell table:formula="of:=[.D548]-[.D5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6" office:value-type="float" office:value="8752" calcext:value-type="float">
            <text:p>8752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01296296296296" calcext:value-type="float">
            <text:p>0,00101296296296296000</text:p>
          </table:table-cell>
          <table:table-cell table:formula="of:=[.D549]-[.D5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6" office:value-type="float" office:value="8768" calcext:value-type="float">
            <text:p>8768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01481481481481" calcext:value-type="float">
            <text:p>0,00101481481481481000</text:p>
          </table:table-cell>
          <table:table-cell table:formula="of:=[.D550]-[.D5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6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01666666666667" calcext:value-type="float">
            <text:p>0,00101666666666667000</text:p>
          </table:table-cell>
          <table:table-cell table:formula="of:=[.D551]-[.D5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6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01851851851852" calcext:value-type="float">
            <text:p>0,00101851851851852000</text:p>
          </table:table-cell>
          <table:table-cell table:formula="of:=[.D552]-[.D5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6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02037037037037" calcext:value-type="float">
            <text:p>0,00102037037037037000</text:p>
          </table:table-cell>
          <table:table-cell table:formula="of:=[.D553]-[.D552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6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02222222222222" calcext:value-type="float">
            <text:p>0,00102222222222222000</text:p>
          </table:table-cell>
          <table:table-cell table:formula="of:=[.D554]-[.D5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6" office:value-type="float" office:value="8848" calcext:value-type="float">
            <text:p>8848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02407407407407" calcext:value-type="float">
            <text:p>0,00102407407407407000</text:p>
          </table:table-cell>
          <table:table-cell table:formula="of:=[.D555]-[.D5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6" office:value-type="float" office:value="8864" calcext:value-type="float">
            <text:p>8864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02592592592593" calcext:value-type="float">
            <text:p>0,00102592592592593000</text:p>
          </table:table-cell>
          <table:table-cell table:formula="of:=[.D556]-[.D5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6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02777777777778" calcext:value-type="float">
            <text:p>0,00102777777777778000</text:p>
          </table:table-cell>
          <table:table-cell table:formula="of:=[.D557]-[.D5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6" office:value-type="float" office:value="8896" calcext:value-type="float">
            <text:p>8896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02962962962963" calcext:value-type="float">
            <text:p>0,00102962962962963000</text:p>
          </table:table-cell>
          <table:table-cell table:formula="of:=[.D558]-[.D5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6" office:value-type="float" office:value="8912" calcext:value-type="float">
            <text:p>8912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03148148148148" calcext:value-type="float">
            <text:p>0,00103148148148148000</text:p>
          </table:table-cell>
          <table:table-cell table:formula="of:=[.D559]-[.D5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6" office:value-type="float" office:value="8928" calcext:value-type="float">
            <text:p>8928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03333333333333" calcext:value-type="float">
            <text:p>0,00103333333333333000</text:p>
          </table:table-cell>
          <table:table-cell table:formula="of:=[.D560]-[.D5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6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03518518518519" calcext:value-type="float">
            <text:p>0,00103518518518519000</text:p>
          </table:table-cell>
          <table:table-cell table:formula="of:=[.D561]-[.D5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6" office:value-type="float" office:value="8960" calcext:value-type="float">
            <text:p>896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03703703703704" calcext:value-type="float">
            <text:p>0,00103703703703704000</text:p>
          </table:table-cell>
          <table:table-cell table:formula="of:=[.D562]-[.D5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6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03888888888889" calcext:value-type="float">
            <text:p>0,00103888888888889000</text:p>
          </table:table-cell>
          <table:table-cell table:formula="of:=[.D563]-[.D5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6" office:value-type="float" office:value="8992" calcext:value-type="float">
            <text:p>8992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04074074074074" calcext:value-type="float">
            <text:p>0,00104074074074074000</text:p>
          </table:table-cell>
          <table:table-cell table:formula="of:=[.D564]-[.D5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6" office:value-type="float" office:value="9008" calcext:value-type="float">
            <text:p>9008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04259259259259" calcext:value-type="float">
            <text:p>0,00104259259259259000</text:p>
          </table:table-cell>
          <table:table-cell table:formula="of:=[.D565]-[.D5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6" office:value-type="float" office:value="9024" calcext:value-type="float">
            <text:p>9024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04444444444444" calcext:value-type="float">
            <text:p>0,00104444444444444000</text:p>
          </table:table-cell>
          <table:table-cell table:formula="of:=[.D566]-[.D5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6" office:value-type="float" office:value="9040" calcext:value-type="float">
            <text:p>904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0462962962963" calcext:value-type="float">
            <text:p>0,00104629629629630000</text:p>
          </table:table-cell>
          <table:table-cell table:formula="of:=[.D567]-[.D5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6" office:value-type="float" office:value="9056" calcext:value-type="float">
            <text:p>9056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04814814814815" calcext:value-type="float">
            <text:p>0,00104814814814815000</text:p>
          </table:table-cell>
          <table:table-cell table:formula="of:=[.D568]-[.D5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6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05" calcext:value-type="float">
            <text:p>0,00105000000000000000</text:p>
          </table:table-cell>
          <table:table-cell table:formula="of:=[.D569]-[.D5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6" office:value-type="float" office:value="9088" calcext:value-type="float">
            <text:p>9088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05185185185185" calcext:value-type="float">
            <text:p>0,00105185185185185000</text:p>
          </table:table-cell>
          <table:table-cell table:formula="of:=[.D570]-[.D5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6" office:value-type="float" office:value="9104" calcext:value-type="float">
            <text:p>9104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0537037037037" calcext:value-type="float">
            <text:p>0,00105370370370370000</text:p>
          </table:table-cell>
          <table:table-cell table:formula="of:=[.D571]-[.D5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6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05555555555556" calcext:value-type="float">
            <text:p>0,00105555555555556000</text:p>
          </table:table-cell>
          <table:table-cell table:formula="of:=[.D572]-[.D571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6" office:value-type="float" office:value="9136" calcext:value-type="float">
            <text:p>9136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05740740740741" calcext:value-type="float">
            <text:p>0,00105740740740741000</text:p>
          </table:table-cell>
          <table:table-cell table:formula="of:=[.D573]-[.D5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6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05925925925926" calcext:value-type="float">
            <text:p>0,00105925925925926000</text:p>
          </table:table-cell>
          <table:table-cell table:formula="of:=[.D574]-[.D5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6" office:value-type="float" office:value="9168" calcext:value-type="float">
            <text:p>9168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06111111111111" calcext:value-type="float">
            <text:p>0,00106111111111111000</text:p>
          </table:table-cell>
          <table:table-cell table:formula="of:=[.D575]-[.D5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6" office:value-type="float" office:value="9184" calcext:value-type="float">
            <text:p>9184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06296296296296" calcext:value-type="float">
            <text:p>0,00106296296296296000</text:p>
          </table:table-cell>
          <table:table-cell table:formula="of:=[.D576]-[.D5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6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06481481481481" calcext:value-type="float">
            <text:p>0,00106481481481481000</text:p>
          </table:table-cell>
          <table:table-cell table:formula="of:=[.D577]-[.D5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6" office:value-type="float" office:value="9216" calcext:value-type="float">
            <text:p>9216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06666666666667" calcext:value-type="float">
            <text:p>0,00106666666666667000</text:p>
          </table:table-cell>
          <table:table-cell table:formula="of:=[.D578]-[.D5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6" office:value-type="float" office:value="9232" calcext:value-type="float">
            <text:p>9232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06851851851852" calcext:value-type="float">
            <text:p>0,00106851851851852000</text:p>
          </table:table-cell>
          <table:table-cell table:formula="of:=[.D579]-[.D5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6" office:value-type="float" office:value="9248" calcext:value-type="float">
            <text:p>9248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07037037037037" calcext:value-type="float">
            <text:p>0,00107037037037037000</text:p>
          </table:table-cell>
          <table:table-cell table:formula="of:=[.D580]-[.D5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6" office:value-type="float" office:value="9264" calcext:value-type="float">
            <text:p>9264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07222222222222" calcext:value-type="float">
            <text:p>0,00107222222222222000</text:p>
          </table:table-cell>
          <table:table-cell table:formula="of:=[.D581]-[.D5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6" office:value-type="float" office:value="9280" calcext:value-type="float">
            <text:p>928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07407407407407" calcext:value-type="float">
            <text:p>0,00107407407407407000</text:p>
          </table:table-cell>
          <table:table-cell table:formula="of:=[.D582]-[.D5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6" office:value-type="float" office:value="9296" calcext:value-type="float">
            <text:p>9296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07592592592593" calcext:value-type="float">
            <text:p>0,00107592592592593000</text:p>
          </table:table-cell>
          <table:table-cell table:formula="of:=[.D583]-[.D5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6" office:value-type="float" office:value="9312" calcext:value-type="float">
            <text:p>9312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07777777777778" calcext:value-type="float">
            <text:p>0,00107777777777778000</text:p>
          </table:table-cell>
          <table:table-cell table:formula="of:=[.D584]-[.D5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6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07962962962963" calcext:value-type="float">
            <text:p>0,00107962962962963000</text:p>
          </table:table-cell>
          <table:table-cell table:formula="of:=[.D585]-[.D5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6" office:value-type="float" office:value="9344" calcext:value-type="float">
            <text:p>9344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08148148148148" calcext:value-type="float">
            <text:p>0,00108148148148148000</text:p>
          </table:table-cell>
          <table:table-cell table:formula="of:=[.D586]-[.D5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6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08333333333333" calcext:value-type="float">
            <text:p>0,00108333333333333000</text:p>
          </table:table-cell>
          <table:table-cell table:formula="of:=[.D587]-[.D5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6" office:value-type="float" office:value="9376" calcext:value-type="float">
            <text:p>9376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08518518518519" calcext:value-type="float">
            <text:p>0,00108518518518519000</text:p>
          </table:table-cell>
          <table:table-cell table:formula="of:=[.D588]-[.D5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6" office:value-type="float" office:value="9392" calcext:value-type="float">
            <text:p>9392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08703703703704" calcext:value-type="float">
            <text:p>0,00108703703703704000</text:p>
          </table:table-cell>
          <table:table-cell table:formula="of:=[.D589]-[.D5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6" office:value-type="float" office:value="9408" calcext:value-type="float">
            <text:p>9408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08888888888889" calcext:value-type="float">
            <text:p>0,00108888888888889000</text:p>
          </table:table-cell>
          <table:table-cell table:formula="of:=[.D590]-[.D5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6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09074074074074" calcext:value-type="float">
            <text:p>0,00109074074074074000</text:p>
          </table:table-cell>
          <table:table-cell table:formula="of:=[.D591]-[.D5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6" office:value-type="float" office:value="9440" calcext:value-type="float">
            <text:p>944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09259259259259" calcext:value-type="float">
            <text:p>0,00109259259259259000</text:p>
          </table:table-cell>
          <table:table-cell table:formula="of:=[.D592]-[.D591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6" office:value-type="float" office:value="9456" calcext:value-type="float">
            <text:p>9456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09444444444444" calcext:value-type="float">
            <text:p>0,00109444444444444000</text:p>
          </table:table-cell>
          <table:table-cell table:formula="of:=[.D593]-[.D5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6" office:value-type="float" office:value="9472" calcext:value-type="float">
            <text:p>9472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0962962962963" calcext:value-type="float">
            <text:p>0,00109629629629630000</text:p>
          </table:table-cell>
          <table:table-cell table:formula="of:=[.D594]-[.D5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6" office:value-type="float" office:value="9488" calcext:value-type="float">
            <text:p>9488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09814814814815" calcext:value-type="float">
            <text:p>0,00109814814814815000</text:p>
          </table:table-cell>
          <table:table-cell table:formula="of:=[.D595]-[.D5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6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1" calcext:value-type="float">
            <text:p>0,00110000000000000000</text:p>
          </table:table-cell>
          <table:table-cell table:formula="of:=[.D596]-[.D5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6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10185185185185" calcext:value-type="float">
            <text:p>0,00110185185185185000</text:p>
          </table:table-cell>
          <table:table-cell table:formula="of:=[.D597]-[.D5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6" office:value-type="float" office:value="9536" calcext:value-type="float">
            <text:p>9536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1037037037037" calcext:value-type="float">
            <text:p>0,00110370370370370000</text:p>
          </table:table-cell>
          <table:table-cell table:formula="of:=[.D598]-[.D5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6" office:value-type="float" office:value="9552" calcext:value-type="float">
            <text:p>9552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10555555555556" calcext:value-type="float">
            <text:p>0,00110555555555556000</text:p>
          </table:table-cell>
          <table:table-cell table:formula="of:=[.D599]-[.D5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6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10740740740741" calcext:value-type="float">
            <text:p>0,00110740740740741000</text:p>
          </table:table-cell>
          <table:table-cell table:formula="of:=[.D600]-[.D5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6" office:value-type="float" office:value="9584" calcext:value-type="float">
            <text:p>9584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10925925925926" calcext:value-type="float">
            <text:p>0,00110925925925926000</text:p>
          </table:table-cell>
          <table:table-cell table:formula="of:=[.D601]-[.D6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6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11111111111111" calcext:value-type="float">
            <text:p>0,00111111111111111000</text:p>
          </table:table-cell>
          <table:table-cell table:formula="of:=[.D602]-[.D6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6" office:value-type="float" office:value="9616" calcext:value-type="float">
            <text:p>9616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11296296296296" calcext:value-type="float">
            <text:p>0,00111296296296296000</text:p>
          </table:table-cell>
          <table:table-cell table:formula="of:=[.D603]-[.D6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6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11481481481481" calcext:value-type="float">
            <text:p>0,00111481481481481000</text:p>
          </table:table-cell>
          <table:table-cell table:formula="of:=[.D604]-[.D6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6" office:value-type="float" office:value="9648" calcext:value-type="float">
            <text:p>9648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11666666666667" calcext:value-type="float">
            <text:p>0,00111666666666667000</text:p>
          </table:table-cell>
          <table:table-cell table:formula="of:=[.D605]-[.D6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6" office:value-type="float" office:value="9664" calcext:value-type="float">
            <text:p>9664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11851851851852" calcext:value-type="float">
            <text:p>0,00111851851851852000</text:p>
          </table:table-cell>
          <table:table-cell table:formula="of:=[.D606]-[.D6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6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12037037037037" calcext:value-type="float">
            <text:p>0,00112037037037037000</text:p>
          </table:table-cell>
          <table:table-cell table:formula="of:=[.D607]-[.D6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6" office:value-type="float" office:value="9696" calcext:value-type="float">
            <text:p>9696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12222222222222" calcext:value-type="float">
            <text:p>0,00112222222222222000</text:p>
          </table:table-cell>
          <table:table-cell table:formula="of:=[.D608]-[.D6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6" office:value-type="float" office:value="9712" calcext:value-type="float">
            <text:p>9712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12407407407407" calcext:value-type="float">
            <text:p>0,00112407407407407000</text:p>
          </table:table-cell>
          <table:table-cell table:formula="of:=[.D609]-[.D6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6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12592592592593" calcext:value-type="float">
            <text:p>0,00112592592592593000</text:p>
          </table:table-cell>
          <table:table-cell table:formula="of:=[.D610]-[.D6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6" office:value-type="float" office:value="9744" calcext:value-type="float">
            <text:p>9744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12777777777778" calcext:value-type="float">
            <text:p>0,00112777777777778000</text:p>
          </table:table-cell>
          <table:table-cell table:formula="of:=[.D611]-[.D610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6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12962962962963" calcext:value-type="float">
            <text:p>0,00112962962962963000</text:p>
          </table:table-cell>
          <table:table-cell table:formula="of:=[.D612]-[.D6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6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13148148148148" calcext:value-type="float">
            <text:p>0,00113148148148148000</text:p>
          </table:table-cell>
          <table:table-cell table:formula="of:=[.D613]-[.D6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6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13333333333333" calcext:value-type="float">
            <text:p>0,00113333333333333000</text:p>
          </table:table-cell>
          <table:table-cell table:formula="of:=[.D614]-[.D6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6" office:value-type="float" office:value="9808" calcext:value-type="float">
            <text:p>9808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13518518518519" calcext:value-type="float">
            <text:p>0,00113518518518519000</text:p>
          </table:table-cell>
          <table:table-cell table:formula="of:=[.D615]-[.D6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6" office:value-type="float" office:value="9824" calcext:value-type="float">
            <text:p>9824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13703703703704" calcext:value-type="float">
            <text:p>0,00113703703703704000</text:p>
          </table:table-cell>
          <table:table-cell table:formula="of:=[.D616]-[.D6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6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13888888888889" calcext:value-type="float">
            <text:p>0,00113888888888889000</text:p>
          </table:table-cell>
          <table:table-cell table:formula="of:=[.D617]-[.D6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6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14074074074074" calcext:value-type="float">
            <text:p>0,00114074074074074000</text:p>
          </table:table-cell>
          <table:table-cell table:formula="of:=[.D618]-[.D6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6" office:value-type="float" office:value="9872" calcext:value-type="float">
            <text:p>9872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14259259259259" calcext:value-type="float">
            <text:p>0,00114259259259259000</text:p>
          </table:table-cell>
          <table:table-cell table:formula="of:=[.D619]-[.D6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6" office:value-type="float" office:value="9888" calcext:value-type="float">
            <text:p>9888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14444444444444" calcext:value-type="float">
            <text:p>0,00114444444444444000</text:p>
          </table:table-cell>
          <table:table-cell table:formula="of:=[.D620]-[.D6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6" office:value-type="float" office:value="9904" calcext:value-type="float">
            <text:p>9904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1462962962963" calcext:value-type="float">
            <text:p>0,00114629629629630000</text:p>
          </table:table-cell>
          <table:table-cell table:formula="of:=[.D621]-[.D6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6" office:value-type="float" office:value="9920" calcext:value-type="float">
            <text:p>992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14814814814815" calcext:value-type="float">
            <text:p>0,00114814814814815000</text:p>
          </table:table-cell>
          <table:table-cell table:formula="of:=[.D622]-[.D6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6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15" calcext:value-type="float">
            <text:p>0,00115000000000000000</text:p>
          </table:table-cell>
          <table:table-cell table:formula="of:=[.D623]-[.D6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6" office:value-type="float" office:value="9952" calcext:value-type="float">
            <text:p>9952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15185185185185" calcext:value-type="float">
            <text:p>0,00115185185185185000</text:p>
          </table:table-cell>
          <table:table-cell table:formula="of:=[.D624]-[.D6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6" office:value-type="float" office:value="9968" calcext:value-type="float">
            <text:p>9968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1537037037037" calcext:value-type="float">
            <text:p>0,00115370370370370000</text:p>
          </table:table-cell>
          <table:table-cell table:formula="of:=[.D625]-[.D6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6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15555555555556" calcext:value-type="float">
            <text:p>0,00115555555555556000</text:p>
          </table:table-cell>
          <table:table-cell table:formula="of:=[.D626]-[.D6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6" office:value-type="float" office:value="10000" calcext:value-type="float">
            <text:p>1000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15740740740741" calcext:value-type="float">
            <text:p>0,00115740740740741000</text:p>
          </table:table-cell>
          <table:table-cell table:formula="of:=[.D627]-[.D6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6" office:value-type="float" office:value="10016" calcext:value-type="float">
            <text:p>10016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15925925925926" calcext:value-type="float">
            <text:p>0,00115925925925926000</text:p>
          </table:table-cell>
          <table:table-cell table:formula="of:=[.D628]-[.D6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6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16111111111111" calcext:value-type="float">
            <text:p>0,00116111111111111000</text:p>
          </table:table-cell>
          <table:table-cell table:formula="of:=[.D629]-[.D6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6" office:value-type="float" office:value="10048" calcext:value-type="float">
            <text:p>10048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16296296296296" calcext:value-type="float">
            <text:p>0,00116296296296296000</text:p>
          </table:table-cell>
          <table:table-cell table:formula="of:=[.D630]-[.D629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6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16481481481482" calcext:value-type="float">
            <text:p>0,00116481481481482000</text:p>
          </table:table-cell>
          <table:table-cell table:formula="of:=[.D631]-[.D6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6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16666666666667" calcext:value-type="float">
            <text:p>0,00116666666666667000</text:p>
          </table:table-cell>
          <table:table-cell table:formula="of:=[.D632]-[.D6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6" office:value-type="float" office:value="10096" calcext:value-type="float">
            <text:p>10096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16851851851852" calcext:value-type="float">
            <text:p>0,00116851851851852000</text:p>
          </table:table-cell>
          <table:table-cell table:formula="of:=[.D633]-[.D6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6" office:value-type="float" office:value="10112" calcext:value-type="float">
            <text:p>10112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17037037037037" calcext:value-type="float">
            <text:p>0,00117037037037037000</text:p>
          </table:table-cell>
          <table:table-cell table:formula="of:=[.D634]-[.D6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6" office:value-type="float" office:value="10128" calcext:value-type="float">
            <text:p>10128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17222222222222" calcext:value-type="float">
            <text:p>0,00117222222222222000</text:p>
          </table:table-cell>
          <table:table-cell table:formula="of:=[.D635]-[.D6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6" office:value-type="float" office:value="10144" calcext:value-type="float">
            <text:p>10144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17407407407407" calcext:value-type="float">
            <text:p>0,00117407407407407000</text:p>
          </table:table-cell>
          <table:table-cell table:formula="of:=[.D636]-[.D6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6" office:value-type="float" office:value="10160" calcext:value-type="float">
            <text:p>1016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17592592592593" calcext:value-type="float">
            <text:p>0,00117592592592593000</text:p>
          </table:table-cell>
          <table:table-cell table:formula="of:=[.D637]-[.D6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6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17777777777778" calcext:value-type="float">
            <text:p>0,00117777777777778000</text:p>
          </table:table-cell>
          <table:table-cell table:formula="of:=[.D638]-[.D6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6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17962962962963" calcext:value-type="float">
            <text:p>0,00117962962962963000</text:p>
          </table:table-cell>
          <table:table-cell table:formula="of:=[.D639]-[.D6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6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18148148148148" calcext:value-type="float">
            <text:p>0,00118148148148148000</text:p>
          </table:table-cell>
          <table:table-cell table:formula="of:=[.D640]-[.D6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6" office:value-type="float" office:value="10224" calcext:value-type="float">
            <text:p>10224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18333333333333" calcext:value-type="float">
            <text:p>0,00118333333333333000</text:p>
          </table:table-cell>
          <table:table-cell table:formula="of:=[.D641]-[.D6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6" office:value-type="float" office:value="10240" calcext:value-type="float">
            <text:p>1024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18518518518519" calcext:value-type="float">
            <text:p>0,00118518518518519000</text:p>
          </table:table-cell>
          <table:table-cell table:formula="of:=[.D642]-[.D6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6" office:value-type="float" office:value="10256" calcext:value-type="float">
            <text:p>10256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18703703703704" calcext:value-type="float">
            <text:p>0,00118703703703704000</text:p>
          </table:table-cell>
          <table:table-cell table:formula="of:=[.D643]-[.D6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6" office:value-type="float" office:value="10272" calcext:value-type="float">
            <text:p>10272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18888888888889" calcext:value-type="float">
            <text:p>0,00118888888888889000</text:p>
          </table:table-cell>
          <table:table-cell table:formula="of:=[.D644]-[.D6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6" office:value-type="float" office:value="10288" calcext:value-type="float">
            <text:p>10288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19074074074074" calcext:value-type="float">
            <text:p>0,00119074074074074000</text:p>
          </table:table-cell>
          <table:table-cell table:formula="of:=[.D645]-[.D6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6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19259259259259" calcext:value-type="float">
            <text:p>0,00119259259259259000</text:p>
          </table:table-cell>
          <table:table-cell table:formula="of:=[.D646]-[.D6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6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19444444444444" calcext:value-type="float">
            <text:p>0,00119444444444444000</text:p>
          </table:table-cell>
          <table:table-cell table:formula="of:=[.D647]-[.D6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6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1962962962963" calcext:value-type="float">
            <text:p>0,00119629629629630000</text:p>
          </table:table-cell>
          <table:table-cell table:formula="of:=[.D648]-[.D6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6" office:value-type="float" office:value="10352" calcext:value-type="float">
            <text:p>10352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19814814814815" calcext:value-type="float">
            <text:p>0,00119814814814815000</text:p>
          </table:table-cell>
          <table:table-cell table:formula="of:=[.D649]-[.D6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6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2" calcext:value-type="float">
            <text:p>0,00120000000000000000</text:p>
          </table:table-cell>
          <table:table-cell table:formula="of:=[.D650]-[.D649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6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20185185185185" calcext:value-type="float">
            <text:p>0,00120185185185185000</text:p>
          </table:table-cell>
          <table:table-cell table:formula="of:=[.D651]-[.D6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6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2037037037037" calcext:value-type="float">
            <text:p>0,00120370370370370000</text:p>
          </table:table-cell>
          <table:table-cell table:formula="of:=[.D652]-[.D6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6" office:value-type="float" office:value="10416" calcext:value-type="float">
            <text:p>10416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20555555555556" calcext:value-type="float">
            <text:p>0,00120555555555556000</text:p>
          </table:table-cell>
          <table:table-cell table:formula="of:=[.D653]-[.D6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6" office:value-type="float" office:value="10432" calcext:value-type="float">
            <text:p>10432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20740740740741" calcext:value-type="float">
            <text:p>0,00120740740740741000</text:p>
          </table:table-cell>
          <table:table-cell table:formula="of:=[.D654]-[.D6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6" office:value-type="float" office:value="10448" calcext:value-type="float">
            <text:p>10448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20925925925926" calcext:value-type="float">
            <text:p>0,00120925925925926000</text:p>
          </table:table-cell>
          <table:table-cell table:formula="of:=[.D655]-[.D6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6" office:value-type="float" office:value="10464" calcext:value-type="float">
            <text:p>10464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21111111111111" calcext:value-type="float">
            <text:p>0,00121111111111111000</text:p>
          </table:table-cell>
          <table:table-cell table:formula="of:=[.D656]-[.D6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6" office:value-type="float" office:value="10480" calcext:value-type="float">
            <text:p>1048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21296296296296" calcext:value-type="float">
            <text:p>0,00121296296296296000</text:p>
          </table:table-cell>
          <table:table-cell table:formula="of:=[.D657]-[.D6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6" office:value-type="float" office:value="10496" calcext:value-type="float">
            <text:p>10496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21481481481481" calcext:value-type="float">
            <text:p>0,00121481481481481000</text:p>
          </table:table-cell>
          <table:table-cell table:formula="of:=[.D658]-[.D6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6" office:value-type="float" office:value="10512" calcext:value-type="float">
            <text:p>10512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21666666666667" calcext:value-type="float">
            <text:p>0,00121666666666667000</text:p>
          </table:table-cell>
          <table:table-cell table:formula="of:=[.D659]-[.D6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6" office:value-type="float" office:value="10528" calcext:value-type="float">
            <text:p>10528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21851851851852" calcext:value-type="float">
            <text:p>0,00121851851851852000</text:p>
          </table:table-cell>
          <table:table-cell table:formula="of:=[.D660]-[.D6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6" office:value-type="float" office:value="10544" calcext:value-type="float">
            <text:p>10544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22037037037037" calcext:value-type="float">
            <text:p>0,00122037037037037000</text:p>
          </table:table-cell>
          <table:table-cell table:formula="of:=[.D661]-[.D6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6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22222222222222" calcext:value-type="float">
            <text:p>0,00122222222222222000</text:p>
          </table:table-cell>
          <table:table-cell table:formula="of:=[.D662]-[.D6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6" office:value-type="float" office:value="10576" calcext:value-type="float">
            <text:p>10576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22407407407407" calcext:value-type="float">
            <text:p>0,00122407407407407000</text:p>
          </table:table-cell>
          <table:table-cell table:formula="of:=[.D663]-[.D6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6" office:value-type="float" office:value="10592" calcext:value-type="float">
            <text:p>10592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22592592592593" calcext:value-type="float">
            <text:p>0,00122592592592593000</text:p>
          </table:table-cell>
          <table:table-cell table:formula="of:=[.D664]-[.D6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6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22777777777778" calcext:value-type="float">
            <text:p>0,00122777777777778000</text:p>
          </table:table-cell>
          <table:table-cell table:formula="of:=[.D665]-[.D6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6" office:value-type="float" office:value="10624" calcext:value-type="float">
            <text:p>10624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22962962962963" calcext:value-type="float">
            <text:p>0,00122962962962963000</text:p>
          </table:table-cell>
          <table:table-cell table:formula="of:=[.D666]-[.D6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6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23148148148148" calcext:value-type="float">
            <text:p>0,00123148148148148000</text:p>
          </table:table-cell>
          <table:table-cell table:formula="of:=[.D667]-[.D6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6" office:value-type="float" office:value="10656" calcext:value-type="float">
            <text:p>10656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23333333333333" calcext:value-type="float">
            <text:p>0,00123333333333333000</text:p>
          </table:table-cell>
          <table:table-cell table:formula="of:=[.D668]-[.D6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6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23518518518519" calcext:value-type="float">
            <text:p>0,00123518518518519000</text:p>
          </table:table-cell>
          <table:table-cell table:formula="of:=[.D669]-[.D668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6" office:value-type="float" office:value="10688" calcext:value-type="float">
            <text:p>10688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23703703703704" calcext:value-type="float">
            <text:p>0,00123703703703704000</text:p>
          </table:table-cell>
          <table:table-cell table:formula="of:=[.D670]-[.D6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6" office:value-type="float" office:value="10704" calcext:value-type="float">
            <text:p>10704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23888888888889" calcext:value-type="float">
            <text:p>0,00123888888888889000</text:p>
          </table:table-cell>
          <table:table-cell table:formula="of:=[.D671]-[.D6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6" office:value-type="float" office:value="10720" calcext:value-type="float">
            <text:p>1072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24074074074074" calcext:value-type="float">
            <text:p>0,00124074074074074000</text:p>
          </table:table-cell>
          <table:table-cell table:formula="of:=[.D672]-[.D6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6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24259259259259" calcext:value-type="float">
            <text:p>0,00124259259259259000</text:p>
          </table:table-cell>
          <table:table-cell table:formula="of:=[.D673]-[.D6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6" office:value-type="float" office:value="10752" calcext:value-type="float">
            <text:p>10752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24444444444444" calcext:value-type="float">
            <text:p>0,00124444444444444000</text:p>
          </table:table-cell>
          <table:table-cell table:formula="of:=[.D674]-[.D6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6" office:value-type="float" office:value="10768" calcext:value-type="float">
            <text:p>10768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2462962962963" calcext:value-type="float">
            <text:p>0,00124629629629630000</text:p>
          </table:table-cell>
          <table:table-cell table:formula="of:=[.D675]-[.D6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6" office:value-type="float" office:value="10784" calcext:value-type="float">
            <text:p>10784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24814814814815" calcext:value-type="float">
            <text:p>0,00124814814814815000</text:p>
          </table:table-cell>
          <table:table-cell table:formula="of:=[.D676]-[.D6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6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25" calcext:value-type="float">
            <text:p>0,00125000000000000000</text:p>
          </table:table-cell>
          <table:table-cell table:formula="of:=[.D677]-[.D6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6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25185185185185" calcext:value-type="float">
            <text:p>0,00125185185185185000</text:p>
          </table:table-cell>
          <table:table-cell table:formula="of:=[.D678]-[.D6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6" office:value-type="float" office:value="10832" calcext:value-type="float">
            <text:p>10832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2537037037037" calcext:value-type="float">
            <text:p>0,00125370370370370000</text:p>
          </table:table-cell>
          <table:table-cell table:formula="of:=[.D679]-[.D6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6" office:value-type="float" office:value="10848" calcext:value-type="float">
            <text:p>10848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25555555555556" calcext:value-type="float">
            <text:p>0,00125555555555556000</text:p>
          </table:table-cell>
          <table:table-cell table:formula="of:=[.D680]-[.D6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6" office:value-type="float" office:value="10864" calcext:value-type="float">
            <text:p>10864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25740740740741" calcext:value-type="float">
            <text:p>0,00125740740740741000</text:p>
          </table:table-cell>
          <table:table-cell table:formula="of:=[.D681]-[.D6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6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25925925925926" calcext:value-type="float">
            <text:p>0,00125925925925926000</text:p>
          </table:table-cell>
          <table:table-cell table:formula="of:=[.D682]-[.D6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6" office:value-type="float" office:value="10896" calcext:value-type="float">
            <text:p>10896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26111111111111" calcext:value-type="float">
            <text:p>0,00126111111111111000</text:p>
          </table:table-cell>
          <table:table-cell table:formula="of:=[.D683]-[.D6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6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26296296296296" calcext:value-type="float">
            <text:p>0,00126296296296296000</text:p>
          </table:table-cell>
          <table:table-cell table:formula="of:=[.D684]-[.D6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6" office:value-type="float" office:value="10928" calcext:value-type="float">
            <text:p>10928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26481481481481" calcext:value-type="float">
            <text:p>0,00126481481481481000</text:p>
          </table:table-cell>
          <table:table-cell table:formula="of:=[.D685]-[.D6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6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26666666666667" calcext:value-type="float">
            <text:p>0,00126666666666667000</text:p>
          </table:table-cell>
          <table:table-cell table:formula="of:=[.D686]-[.D6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6" office:value-type="float" office:value="10960" calcext:value-type="float">
            <text:p>1096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26851851851852" calcext:value-type="float">
            <text:p>0,00126851851851852000</text:p>
          </table:table-cell>
          <table:table-cell table:formula="of:=[.D687]-[.D6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6" office:value-type="float" office:value="10976" calcext:value-type="float">
            <text:p>10976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27037037037037" calcext:value-type="float">
            <text:p>0,00127037037037037000</text:p>
          </table:table-cell>
          <table:table-cell table:formula="of:=[.D688]-[.D687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6" office:value-type="float" office:value="10992" calcext:value-type="float">
            <text:p>10992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27222222222222" calcext:value-type="float">
            <text:p>0,00127222222222222000</text:p>
          </table:table-cell>
          <table:table-cell table:formula="of:=[.D689]-[.D6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6" office:value-type="float" office:value="11008" calcext:value-type="float">
            <text:p>11008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27407407407407" calcext:value-type="float">
            <text:p>0,00127407407407407000</text:p>
          </table:table-cell>
          <table:table-cell table:formula="of:=[.D690]-[.D6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6" office:value-type="float" office:value="11024" calcext:value-type="float">
            <text:p>11024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27592592592593" calcext:value-type="float">
            <text:p>0,00127592592592593000</text:p>
          </table:table-cell>
          <table:table-cell table:formula="of:=[.D691]-[.D6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6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27777777777778" calcext:value-type="float">
            <text:p>0,00127777777777778000</text:p>
          </table:table-cell>
          <table:table-cell table:formula="of:=[.D692]-[.D6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6" office:value-type="float" office:value="11056" calcext:value-type="float">
            <text:p>11056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27962962962963" calcext:value-type="float">
            <text:p>0,00127962962962963000</text:p>
          </table:table-cell>
          <table:table-cell table:formula="of:=[.D693]-[.D6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6" office:value-type="float" office:value="11072" calcext:value-type="float">
            <text:p>11072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28148148148148" calcext:value-type="float">
            <text:p>0,00128148148148148000</text:p>
          </table:table-cell>
          <table:table-cell table:formula="of:=[.D694]-[.D6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6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28333333333333" calcext:value-type="float">
            <text:p>0,00128333333333333000</text:p>
          </table:table-cell>
          <table:table-cell table:formula="of:=[.D695]-[.D6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6" office:value-type="float" office:value="11104" calcext:value-type="float">
            <text:p>11104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28518518518519" calcext:value-type="float">
            <text:p>0,00128518518518519000</text:p>
          </table:table-cell>
          <table:table-cell table:formula="of:=[.D696]-[.D6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6" office:value-type="float" office:value="11120" calcext:value-type="float">
            <text:p>1112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28703703703704" calcext:value-type="float">
            <text:p>0,00128703703703704000</text:p>
          </table:table-cell>
          <table:table-cell table:formula="of:=[.D697]-[.D6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6" office:value-type="float" office:value="11136" calcext:value-type="float">
            <text:p>11136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28888888888889" calcext:value-type="float">
            <text:p>0,00128888888888889000</text:p>
          </table:table-cell>
          <table:table-cell table:formula="of:=[.D698]-[.D6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6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29074074074074" calcext:value-type="float">
            <text:p>0,00129074074074074000</text:p>
          </table:table-cell>
          <table:table-cell table:formula="of:=[.D699]-[.D6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6" office:value-type="float" office:value="11168" calcext:value-type="float">
            <text:p>11168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29259259259259" calcext:value-type="float">
            <text:p>0,00129259259259259000</text:p>
          </table:table-cell>
          <table:table-cell table:formula="of:=[.D700]-[.D6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6" office:value-type="float" office:value="11184" calcext:value-type="float">
            <text:p>11184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29444444444444" calcext:value-type="float">
            <text:p>0,00129444444444444000</text:p>
          </table:table-cell>
          <table:table-cell table:formula="of:=[.D701]-[.D7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6" office:value-type="float" office:value="11200" calcext:value-type="float">
            <text:p>112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2962962962963" calcext:value-type="float">
            <text:p>0,00129629629629630000</text:p>
          </table:table-cell>
          <table:table-cell table:formula="of:=[.D702]-[.D7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6" office:value-type="float" office:value="11216" calcext:value-type="float">
            <text:p>11216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29814814814815" calcext:value-type="float">
            <text:p>0,00129814814814815000</text:p>
          </table:table-cell>
          <table:table-cell table:formula="of:=[.D703]-[.D7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6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3" calcext:value-type="float">
            <text:p>0,00130000000000000000</text:p>
          </table:table-cell>
          <table:table-cell table:formula="of:=[.D704]-[.D7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6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30185185185185" calcext:value-type="float">
            <text:p>0,00130185185185185000</text:p>
          </table:table-cell>
          <table:table-cell table:formula="of:=[.D705]-[.D7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6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3037037037037" calcext:value-type="float">
            <text:p>0,00130370370370370000</text:p>
          </table:table-cell>
          <table:table-cell table:formula="of:=[.D706]-[.D7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6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30555555555556" calcext:value-type="float">
            <text:p>0,00130555555555556000</text:p>
          </table:table-cell>
          <table:table-cell table:formula="of:=[.D707]-[.D7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6" office:value-type="float" office:value="11296" calcext:value-type="float">
            <text:p>11296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30740740740741" calcext:value-type="float">
            <text:p>0,00130740740740741000</text:p>
          </table:table-cell>
          <table:table-cell table:formula="of:=[.D708]-[.D707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6" office:value-type="float" office:value="11312" calcext:value-type="float">
            <text:p>11312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30925925925926" calcext:value-type="float">
            <text:p>0,00130925925925926000</text:p>
          </table:table-cell>
          <table:table-cell table:formula="of:=[.D709]-[.D7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6" office:value-type="float" office:value="11328" calcext:value-type="float">
            <text:p>11328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31111111111111" calcext:value-type="float">
            <text:p>0,00131111111111111000</text:p>
          </table:table-cell>
          <table:table-cell table:formula="of:=[.D710]-[.D7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6" office:value-type="float" office:value="11344" calcext:value-type="float">
            <text:p>11344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31296296296296" calcext:value-type="float">
            <text:p>0,00131296296296296000</text:p>
          </table:table-cell>
          <table:table-cell table:formula="of:=[.D711]-[.D7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6" office:value-type="float" office:value="11360" calcext:value-type="float">
            <text:p>1136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31481481481481" calcext:value-type="float">
            <text:p>0,00131481481481481000</text:p>
          </table:table-cell>
          <table:table-cell table:formula="of:=[.D712]-[.D7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6" office:value-type="float" office:value="11376" calcext:value-type="float">
            <text:p>11376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31666666666667" calcext:value-type="float">
            <text:p>0,00131666666666667000</text:p>
          </table:table-cell>
          <table:table-cell table:formula="of:=[.D713]-[.D7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6" office:value-type="float" office:value="11392" calcext:value-type="float">
            <text:p>11392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31851851851852" calcext:value-type="float">
            <text:p>0,00131851851851852000</text:p>
          </table:table-cell>
          <table:table-cell table:formula="of:=[.D714]-[.D7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6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32037037037037" calcext:value-type="float">
            <text:p>0,00132037037037037000</text:p>
          </table:table-cell>
          <table:table-cell table:formula="of:=[.D715]-[.D7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6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32222222222222" calcext:value-type="float">
            <text:p>0,00132222222222222000</text:p>
          </table:table-cell>
          <table:table-cell table:formula="of:=[.D716]-[.D7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6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32407407407407" calcext:value-type="float">
            <text:p>0,00132407407407407000</text:p>
          </table:table-cell>
          <table:table-cell table:formula="of:=[.D717]-[.D7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6" office:value-type="float" office:value="11456" calcext:value-type="float">
            <text:p>11456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32592592592593" calcext:value-type="float">
            <text:p>0,00132592592592593000</text:p>
          </table:table-cell>
          <table:table-cell table:formula="of:=[.D718]-[.D7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6" office:value-type="float" office:value="11472" calcext:value-type="float">
            <text:p>11472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32777777777778" calcext:value-type="float">
            <text:p>0,00132777777777778000</text:p>
          </table:table-cell>
          <table:table-cell table:formula="of:=[.D719]-[.D7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6" office:value-type="float" office:value="11488" calcext:value-type="float">
            <text:p>11488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32962962962963" calcext:value-type="float">
            <text:p>0,00132962962962963000</text:p>
          </table:table-cell>
          <table:table-cell table:formula="of:=[.D720]-[.D7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6" office:value-type="float" office:value="11504" calcext:value-type="float">
            <text:p>11504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33148148148148" calcext:value-type="float">
            <text:p>0,00133148148148148000</text:p>
          </table:table-cell>
          <table:table-cell table:formula="of:=[.D721]-[.D7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6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33333333333333" calcext:value-type="float">
            <text:p>0,00133333333333333000</text:p>
          </table:table-cell>
          <table:table-cell table:formula="of:=[.D722]-[.D7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6" office:value-type="float" office:value="11536" calcext:value-type="float">
            <text:p>11536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33518518518519" calcext:value-type="float">
            <text:p>0,00133518518518519000</text:p>
          </table:table-cell>
          <table:table-cell table:formula="of:=[.D723]-[.D7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6" office:value-type="float" office:value="11552" calcext:value-type="float">
            <text:p>11552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33703703703704" calcext:value-type="float">
            <text:p>0,00133703703703704000</text:p>
          </table:table-cell>
          <table:table-cell table:formula="of:=[.D724]-[.D7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6" office:value-type="float" office:value="11568" calcext:value-type="float">
            <text:p>11568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33888888888889" calcext:value-type="float">
            <text:p>0,00133888888888889000</text:p>
          </table:table-cell>
          <table:table-cell table:formula="of:=[.D725]-[.D7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6" office:value-type="float" office:value="11584" calcext:value-type="float">
            <text:p>11584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34074074074074" calcext:value-type="float">
            <text:p>0,00134074074074074000</text:p>
          </table:table-cell>
          <table:table-cell table:formula="of:=[.D726]-[.D7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6" office:value-type="float" office:value="11600" calcext:value-type="float">
            <text:p>11600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34259259259259" calcext:value-type="float">
            <text:p>0,00134259259259259000</text:p>
          </table:table-cell>
          <table:table-cell table:formula="of:=[.D727]-[.D726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6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34444444444444" calcext:value-type="float">
            <text:p>0,00134444444444444000</text:p>
          </table:table-cell>
          <table:table-cell table:formula="of:=[.D728]-[.D7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6" office:value-type="float" office:value="11632" calcext:value-type="float">
            <text:p>11632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3462962962963" calcext:value-type="float">
            <text:p>0,00134629629629630000</text:p>
          </table:table-cell>
          <table:table-cell table:formula="of:=[.D729]-[.D7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6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34814814814815" calcext:value-type="float">
            <text:p>0,00134814814814815000</text:p>
          </table:table-cell>
          <table:table-cell table:formula="of:=[.D730]-[.D7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6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35" calcext:value-type="float">
            <text:p>0,00135000000000000000</text:p>
          </table:table-cell>
          <table:table-cell table:formula="of:=[.D731]-[.D7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6" office:value-type="float" office:value="11680" calcext:value-type="float">
            <text:p>1168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35185185185185" calcext:value-type="float">
            <text:p>0,00135185185185185000</text:p>
          </table:table-cell>
          <table:table-cell table:formula="of:=[.D732]-[.D7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6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3537037037037" calcext:value-type="float">
            <text:p>0,00135370370370370000</text:p>
          </table:table-cell>
          <table:table-cell table:formula="of:=[.D733]-[.D7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6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35555555555556" calcext:value-type="float">
            <text:p>0,00135555555555556000</text:p>
          </table:table-cell>
          <table:table-cell table:formula="of:=[.D734]-[.D7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6" office:value-type="float" office:value="11728" calcext:value-type="float">
            <text:p>11728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35740740740741" calcext:value-type="float">
            <text:p>0,00135740740740741000</text:p>
          </table:table-cell>
          <table:table-cell table:formula="of:=[.D735]-[.D7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6" office:value-type="float" office:value="11744" calcext:value-type="float">
            <text:p>11744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35925925925926" calcext:value-type="float">
            <text:p>0,00135925925925926000</text:p>
          </table:table-cell>
          <table:table-cell table:formula="of:=[.D736]-[.D7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6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36111111111111" calcext:value-type="float">
            <text:p>0,00136111111111111000</text:p>
          </table:table-cell>
          <table:table-cell table:formula="of:=[.D737]-[.D7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6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36296296296296" calcext:value-type="float">
            <text:p>0,00136296296296296000</text:p>
          </table:table-cell>
          <table:table-cell table:formula="of:=[.D738]-[.D7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6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36481481481481" calcext:value-type="float">
            <text:p>0,00136481481481481000</text:p>
          </table:table-cell>
          <table:table-cell table:formula="of:=[.D739]-[.D7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6" office:value-type="float" office:value="11808" calcext:value-type="float">
            <text:p>11808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36666666666667" calcext:value-type="float">
            <text:p>0,00136666666666667000</text:p>
          </table:table-cell>
          <table:table-cell table:formula="of:=[.D740]-[.D7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6" office:value-type="float" office:value="11824" calcext:value-type="float">
            <text:p>11824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36851851851852" calcext:value-type="float">
            <text:p>0,00136851851851852000</text:p>
          </table:table-cell>
          <table:table-cell table:formula="of:=[.D741]-[.D7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6" office:value-type="float" office:value="11840" calcext:value-type="float">
            <text:p>1184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37037037037037" calcext:value-type="float">
            <text:p>0,00137037037037037000</text:p>
          </table:table-cell>
          <table:table-cell table:formula="of:=[.D742]-[.D7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6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37222222222222" calcext:value-type="float">
            <text:p>0,00137222222222222000</text:p>
          </table:table-cell>
          <table:table-cell table:formula="of:=[.D743]-[.D7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6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37407407407407" calcext:value-type="float">
            <text:p>0,00137407407407407000</text:p>
          </table:table-cell>
          <table:table-cell table:formula="of:=[.D744]-[.D7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6" office:value-type="float" office:value="11888" calcext:value-type="float">
            <text:p>11888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37592592592593" calcext:value-type="float">
            <text:p>0,00137592592592593000</text:p>
          </table:table-cell>
          <table:table-cell table:formula="of:=[.D745]-[.D7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6" office:value-type="float" office:value="11904" calcext:value-type="float">
            <text:p>11904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37777777777778" calcext:value-type="float">
            <text:p>0,00137777777777778000</text:p>
          </table:table-cell>
          <table:table-cell table:formula="of:=[.D746]-[.D7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6" office:value-type="float" office:value="11920" calcext:value-type="float">
            <text:p>11920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37962962962963" calcext:value-type="float">
            <text:p>0,00137962962962963000</text:p>
          </table:table-cell>
          <table:table-cell table:formula="of:=[.D747]-[.D746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6" office:value-type="float" office:value="11936" calcext:value-type="float">
            <text:p>11936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38148148148148" calcext:value-type="float">
            <text:p>0,00138148148148148000</text:p>
          </table:table-cell>
          <table:table-cell table:formula="of:=[.D748]-[.D7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6" office:value-type="float" office:value="11952" calcext:value-type="float">
            <text:p>11952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38333333333333" calcext:value-type="float">
            <text:p>0,00138333333333333000</text:p>
          </table:table-cell>
          <table:table-cell table:formula="of:=[.D749]-[.D7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6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38518518518519" calcext:value-type="float">
            <text:p>0,00138518518518519000</text:p>
          </table:table-cell>
          <table:table-cell table:formula="of:=[.D750]-[.D7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6" office:value-type="float" office:value="11984" calcext:value-type="float">
            <text:p>11984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38703703703704" calcext:value-type="float">
            <text:p>0,00138703703703704000</text:p>
          </table:table-cell>
          <table:table-cell table:formula="of:=[.D751]-[.D7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6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38888888888889" calcext:value-type="float">
            <text:p>0,00138888888888889000</text:p>
          </table:table-cell>
          <table:table-cell table:formula="of:=[.D752]-[.D7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6" office:value-type="float" office:value="12016" calcext:value-type="float">
            <text:p>12016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39074074074074" calcext:value-type="float">
            <text:p>0,00139074074074074000</text:p>
          </table:table-cell>
          <table:table-cell table:formula="of:=[.D753]-[.D7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6" office:value-type="float" office:value="12032" calcext:value-type="float">
            <text:p>12032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39259259259259" calcext:value-type="float">
            <text:p>0,00139259259259259000</text:p>
          </table:table-cell>
          <table:table-cell table:formula="of:=[.D754]-[.D7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6" office:value-type="float" office:value="12048" calcext:value-type="float">
            <text:p>12048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39444444444444" calcext:value-type="float">
            <text:p>0,00139444444444444000</text:p>
          </table:table-cell>
          <table:table-cell table:formula="of:=[.D755]-[.D7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6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3962962962963" calcext:value-type="float">
            <text:p>0,00139629629629630000</text:p>
          </table:table-cell>
          <table:table-cell table:formula="of:=[.D756]-[.D7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6" office:value-type="float" office:value="12080" calcext:value-type="float">
            <text:p>12080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39814814814815" calcext:value-type="float">
            <text:p>0,00139814814814815000</text:p>
          </table:table-cell>
          <table:table-cell table:formula="of:=[.D757]-[.D7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6" office:value-type="float" office:value="12096" calcext:value-type="float">
            <text:p>12096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4" calcext:value-type="float">
            <text:p>0,00140000000000000000</text:p>
          </table:table-cell>
          <table:table-cell table:formula="of:=[.D758]-[.D7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6" office:value-type="float" office:value="12112" calcext:value-type="float">
            <text:p>12112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40185185185185" calcext:value-type="float">
            <text:p>0,00140185185185185000</text:p>
          </table:table-cell>
          <table:table-cell table:formula="of:=[.D759]-[.D7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6" office:value-type="float" office:value="12128" calcext:value-type="float">
            <text:p>12128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4037037037037" calcext:value-type="float">
            <text:p>0,00140370370370370000</text:p>
          </table:table-cell>
          <table:table-cell table:formula="of:=[.D760]-[.D7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6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40555555555556" calcext:value-type="float">
            <text:p>0,00140555555555556000</text:p>
          </table:table-cell>
          <table:table-cell table:formula="of:=[.D761]-[.D7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6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40740740740741" calcext:value-type="float">
            <text:p>0,00140740740740741000</text:p>
          </table:table-cell>
          <table:table-cell table:formula="of:=[.D762]-[.D7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6" office:value-type="float" office:value="12176" calcext:value-type="float">
            <text:p>12176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40925925925926" calcext:value-type="float">
            <text:p>0,00140925925925926000</text:p>
          </table:table-cell>
          <table:table-cell table:formula="of:=[.D763]-[.D7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6" office:value-type="float" office:value="12192" calcext:value-type="float">
            <text:p>12192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41111111111111" calcext:value-type="float">
            <text:p>0,00141111111111111000</text:p>
          </table:table-cell>
          <table:table-cell table:formula="of:=[.D764]-[.D7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6" office:value-type="float" office:value="12208" calcext:value-type="float">
            <text:p>12208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41296296296296" calcext:value-type="float">
            <text:p>0,00141296296296296000</text:p>
          </table:table-cell>
          <table:table-cell table:formula="of:=[.D765]-[.D7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6" office:value-type="float" office:value="12224" calcext:value-type="float">
            <text:p>12224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41481481481481" calcext:value-type="float">
            <text:p>0,00141481481481481000</text:p>
          </table:table-cell>
          <table:table-cell table:formula="of:=[.D766]-[.D765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6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41666666666667" calcext:value-type="float">
            <text:p>0,00141666666666667000</text:p>
          </table:table-cell>
          <table:table-cell table:formula="of:=[.D767]-[.D7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6" office:value-type="float" office:value="12256" calcext:value-type="float">
            <text:p>12256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41851851851852" calcext:value-type="float">
            <text:p>0,00141851851851852000</text:p>
          </table:table-cell>
          <table:table-cell table:formula="of:=[.D768]-[.D7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6" office:value-type="float" office:value="12272" calcext:value-type="float">
            <text:p>12272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42037037037037" calcext:value-type="float">
            <text:p>0,00142037037037037000</text:p>
          </table:table-cell>
          <table:table-cell table:formula="of:=[.D769]-[.D7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6" office:value-type="float" office:value="12288" calcext:value-type="float">
            <text:p>12288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42222222222222" calcext:value-type="float">
            <text:p>0,00142222222222222000</text:p>
          </table:table-cell>
          <table:table-cell table:formula="of:=[.D770]-[.D7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6" office:value-type="float" office:value="12304" calcext:value-type="float">
            <text:p>12304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42407407407407" calcext:value-type="float">
            <text:p>0,00142407407407407000</text:p>
          </table:table-cell>
          <table:table-cell table:formula="of:=[.D771]-[.D7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6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42592592592593" calcext:value-type="float">
            <text:p>0,00142592592592593000</text:p>
          </table:table-cell>
          <table:table-cell table:formula="of:=[.D772]-[.D7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6" office:value-type="float" office:value="12336" calcext:value-type="float">
            <text:p>12336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42777777777778" calcext:value-type="float">
            <text:p>0,00142777777777778000</text:p>
          </table:table-cell>
          <table:table-cell table:formula="of:=[.D773]-[.D7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6" office:value-type="float" office:value="12352" calcext:value-type="float">
            <text:p>12352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42962962962963" calcext:value-type="float">
            <text:p>0,00142962962962963000</text:p>
          </table:table-cell>
          <table:table-cell table:formula="of:=[.D774]-[.D7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6" office:value-type="float" office:value="12368" calcext:value-type="float">
            <text:p>12368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43148148148148" calcext:value-type="float">
            <text:p>0,00143148148148148000</text:p>
          </table:table-cell>
          <table:table-cell table:formula="of:=[.D775]-[.D7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6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43333333333333" calcext:value-type="float">
            <text:p>0,00143333333333333000</text:p>
          </table:table-cell>
          <table:table-cell table:formula="of:=[.D776]-[.D7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6" office:value-type="float" office:value="12400" calcext:value-type="float">
            <text:p>12400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43518518518519" calcext:value-type="float">
            <text:p>0,00143518518518519000</text:p>
          </table:table-cell>
          <table:table-cell table:formula="of:=[.D777]-[.D7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6" office:value-type="float" office:value="12416" calcext:value-type="float">
            <text:p>12416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43703703703704" calcext:value-type="float">
            <text:p>0,00143703703703704000</text:p>
          </table:table-cell>
          <table:table-cell table:formula="of:=[.D778]-[.D7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6" office:value-type="float" office:value="12432" calcext:value-type="float">
            <text:p>12432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43888888888889" calcext:value-type="float">
            <text:p>0,00143888888888889000</text:p>
          </table:table-cell>
          <table:table-cell table:formula="of:=[.D779]-[.D7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6" office:value-type="float" office:value="12448" calcext:value-type="float">
            <text:p>12448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44074074074074" calcext:value-type="float">
            <text:p>0,00144074074074074000</text:p>
          </table:table-cell>
          <table:table-cell table:formula="of:=[.D780]-[.D7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6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44259259259259" calcext:value-type="float">
            <text:p>0,00144259259259259000</text:p>
          </table:table-cell>
          <table:table-cell table:formula="of:=[.D781]-[.D7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6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44444444444444" calcext:value-type="float">
            <text:p>0,00144444444444444000</text:p>
          </table:table-cell>
          <table:table-cell table:formula="of:=[.D782]-[.D7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6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4462962962963" calcext:value-type="float">
            <text:p>0,00144629629629630000</text:p>
          </table:table-cell>
          <table:table-cell table:formula="of:=[.D783]-[.D7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6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44814814814815" calcext:value-type="float">
            <text:p>0,00144814814814815000</text:p>
          </table:table-cell>
          <table:table-cell table:formula="of:=[.D784]-[.D7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6" office:value-type="float" office:value="12528" calcext:value-type="float">
            <text:p>12528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45" calcext:value-type="float">
            <text:p>0,00145000000000000000</text:p>
          </table:table-cell>
          <table:table-cell table:formula="of:=[.D785]-[.D784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6" office:value-type="float" office:value="12544" calcext:value-type="float">
            <text:p>12544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45185185185185" calcext:value-type="float">
            <text:p>0,00145185185185185000</text:p>
          </table:table-cell>
          <table:table-cell table:formula="of:=[.D786]-[.D7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6" office:value-type="float" office:value="12560" calcext:value-type="float">
            <text:p>12560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4537037037037" calcext:value-type="float">
            <text:p>0,00145370370370370000</text:p>
          </table:table-cell>
          <table:table-cell table:formula="of:=[.D787]-[.D7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6" office:value-type="float" office:value="12576" calcext:value-type="float">
            <text:p>12576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45555555555556" calcext:value-type="float">
            <text:p>0,00145555555555556000</text:p>
          </table:table-cell>
          <table:table-cell table:formula="of:=[.D788]-[.D7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6" office:value-type="float" office:value="12592" calcext:value-type="float">
            <text:p>12592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45740740740741" calcext:value-type="float">
            <text:p>0,00145740740740741000</text:p>
          </table:table-cell>
          <table:table-cell table:formula="of:=[.D789]-[.D7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6" office:value-type="float" office:value="12608" calcext:value-type="float">
            <text:p>12608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45925925925926" calcext:value-type="float">
            <text:p>0,00145925925925926000</text:p>
          </table:table-cell>
          <table:table-cell table:formula="of:=[.D790]-[.D7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6" office:value-type="float" office:value="12624" calcext:value-type="float">
            <text:p>12624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46111111111111" calcext:value-type="float">
            <text:p>0,00146111111111111000</text:p>
          </table:table-cell>
          <table:table-cell table:formula="of:=[.D791]-[.D7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6" office:value-type="float" office:value="12640" calcext:value-type="float">
            <text:p>1264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46296296296296" calcext:value-type="float">
            <text:p>0,00146296296296296000</text:p>
          </table:table-cell>
          <table:table-cell table:formula="of:=[.D792]-[.D7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6" office:value-type="float" office:value="12656" calcext:value-type="float">
            <text:p>12656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46481481481481" calcext:value-type="float">
            <text:p>0,00146481481481481000</text:p>
          </table:table-cell>
          <table:table-cell table:formula="of:=[.D793]-[.D7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6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46666666666667" calcext:value-type="float">
            <text:p>0,00146666666666667000</text:p>
          </table:table-cell>
          <table:table-cell table:formula="of:=[.D794]-[.D7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6" office:value-type="float" office:value="12688" calcext:value-type="float">
            <text:p>12688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46851851851852" calcext:value-type="float">
            <text:p>0,00146851851851852000</text:p>
          </table:table-cell>
          <table:table-cell table:formula="of:=[.D795]-[.D7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6" office:value-type="float" office:value="12704" calcext:value-type="float">
            <text:p>12704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47037037037037" calcext:value-type="float">
            <text:p>0,00147037037037037000</text:p>
          </table:table-cell>
          <table:table-cell table:formula="of:=[.D796]-[.D7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6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47222222222222" calcext:value-type="float">
            <text:p>0,00147222222222222000</text:p>
          </table:table-cell>
          <table:table-cell table:formula="of:=[.D797]-[.D7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6" office:value-type="float" office:value="12736" calcext:value-type="float">
            <text:p>12736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47407407407407" calcext:value-type="float">
            <text:p>0,00147407407407407000</text:p>
          </table:table-cell>
          <table:table-cell table:formula="of:=[.D798]-[.D7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6" office:value-type="float" office:value="12752" calcext:value-type="float">
            <text:p>12752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47592592592593" calcext:value-type="float">
            <text:p>0,00147592592592593000</text:p>
          </table:table-cell>
          <table:table-cell table:formula="of:=[.D799]-[.D7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6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47777777777778" calcext:value-type="float">
            <text:p>0,00147777777777778000</text:p>
          </table:table-cell>
          <table:table-cell table:formula="of:=[.D800]-[.D7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6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47962962962963" calcext:value-type="float">
            <text:p>0,00147962962962963000</text:p>
          </table:table-cell>
          <table:table-cell table:formula="of:=[.D801]-[.D8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6" office:value-type="float" office:value="12800" calcext:value-type="float">
            <text:p>128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48148148148148" calcext:value-type="float">
            <text:p>0,00148148148148148000</text:p>
          </table:table-cell>
          <table:table-cell table:formula="of:=[.D802]-[.D8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6" office:value-type="float" office:value="12816" calcext:value-type="float">
            <text:p>12816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48333333333333" calcext:value-type="float">
            <text:p>0,00148333333333333000</text:p>
          </table:table-cell>
          <table:table-cell table:formula="of:=[.D803]-[.D8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6" office:value-type="float" office:value="12832" calcext:value-type="float">
            <text:p>12832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48518518518519" calcext:value-type="float">
            <text:p>0,00148518518518518000</text:p>
          </table:table-cell>
          <table:table-cell table:formula="of:=[.D804]-[.D8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6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48703703703704" calcext:value-type="float">
            <text:p>0,00148703703703704000</text:p>
          </table:table-cell>
          <table:table-cell table:formula="of:=[.D805]-[.D804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6" office:value-type="float" office:value="12864" calcext:value-type="float">
            <text:p>12864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48888888888889" calcext:value-type="float">
            <text:p>0,00148888888888889000</text:p>
          </table:table-cell>
          <table:table-cell table:formula="of:=[.D806]-[.D8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6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49074074074074" calcext:value-type="float">
            <text:p>0,00149074074074074000</text:p>
          </table:table-cell>
          <table:table-cell table:formula="of:=[.D807]-[.D8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6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49259259259259" calcext:value-type="float">
            <text:p>0,00149259259259259000</text:p>
          </table:table-cell>
          <table:table-cell table:formula="of:=[.D808]-[.D8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6" office:value-type="float" office:value="12912" calcext:value-type="float">
            <text:p>12912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49444444444444" calcext:value-type="float">
            <text:p>0,00149444444444444000</text:p>
          </table:table-cell>
          <table:table-cell table:formula="of:=[.D809]-[.D8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6" office:value-type="float" office:value="12928" calcext:value-type="float">
            <text:p>12928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4962962962963" calcext:value-type="float">
            <text:p>0,00149629629629630000</text:p>
          </table:table-cell>
          <table:table-cell table:formula="of:=[.D810]-[.D8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6" office:value-type="float" office:value="12944" calcext:value-type="float">
            <text:p>12944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49814814814815" calcext:value-type="float">
            <text:p>0,00149814814814815000</text:p>
          </table:table-cell>
          <table:table-cell table:formula="of:=[.D811]-[.D8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6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5" calcext:value-type="float">
            <text:p>0,00150000000000000000</text:p>
          </table:table-cell>
          <table:table-cell table:formula="of:=[.D812]-[.D8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6" office:value-type="float" office:value="12976" calcext:value-type="float">
            <text:p>12976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50185185185185" calcext:value-type="float">
            <text:p>0,00150185185185185000</text:p>
          </table:table-cell>
          <table:table-cell table:formula="of:=[.D813]-[.D8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6" office:value-type="float" office:value="12992" calcext:value-type="float">
            <text:p>12992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5037037037037" calcext:value-type="float">
            <text:p>0,00150370370370370000</text:p>
          </table:table-cell>
          <table:table-cell table:formula="of:=[.D814]-[.D8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6" office:value-type="float" office:value="13008" calcext:value-type="float">
            <text:p>13008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50555555555556" calcext:value-type="float">
            <text:p>0,00150555555555556000</text:p>
          </table:table-cell>
          <table:table-cell table:formula="of:=[.D815]-[.D8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6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50740740740741" calcext:value-type="float">
            <text:p>0,00150740740740741000</text:p>
          </table:table-cell>
          <table:table-cell table:formula="of:=[.D816]-[.D8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6" office:value-type="float" office:value="13040" calcext:value-type="float">
            <text:p>13040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50925925925926" calcext:value-type="float">
            <text:p>0,00150925925925926000</text:p>
          </table:table-cell>
          <table:table-cell table:formula="of:=[.D817]-[.D8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6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51111111111111" calcext:value-type="float">
            <text:p>0,00151111111111111000</text:p>
          </table:table-cell>
          <table:table-cell table:formula="of:=[.D818]-[.D8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6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51296296296296" calcext:value-type="float">
            <text:p>0,00151296296296296000</text:p>
          </table:table-cell>
          <table:table-cell table:formula="of:=[.D819]-[.D8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6" office:value-type="float" office:value="13088" calcext:value-type="float">
            <text:p>13088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51481481481481" calcext:value-type="float">
            <text:p>0,00151481481481481000</text:p>
          </table:table-cell>
          <table:table-cell table:formula="of:=[.D820]-[.D8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6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51666666666667" calcext:value-type="float">
            <text:p>0,00151666666666667000</text:p>
          </table:table-cell>
          <table:table-cell table:formula="of:=[.D821]-[.D8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6" office:value-type="float" office:value="13120" calcext:value-type="float">
            <text:p>1312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51851851851852" calcext:value-type="float">
            <text:p>0,00151851851851852000</text:p>
          </table:table-cell>
          <table:table-cell table:formula="of:=[.D822]-[.D8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6" office:value-type="float" office:value="13136" calcext:value-type="float">
            <text:p>13136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52037037037037" calcext:value-type="float">
            <text:p>0,00152037037037037000</text:p>
          </table:table-cell>
          <table:table-cell table:formula="of:=[.D823]-[.D8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6" office:value-type="float" office:value="13152" calcext:value-type="float">
            <text:p>13152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52222222222222" calcext:value-type="float">
            <text:p>0,00152222222222222000</text:p>
          </table:table-cell>
          <table:table-cell table:formula="of:=[.D824]-[.D823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6" office:value-type="float" office:value="13168" calcext:value-type="float">
            <text:p>13168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52407407407407" calcext:value-type="float">
            <text:p>0,00152407407407407000</text:p>
          </table:table-cell>
          <table:table-cell table:formula="of:=[.D825]-[.D8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6" office:value-type="float" office:value="13184" calcext:value-type="float">
            <text:p>13184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52592592592593" calcext:value-type="float">
            <text:p>0,00152592592592593000</text:p>
          </table:table-cell>
          <table:table-cell table:formula="of:=[.D826]-[.D8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6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52777777777778" calcext:value-type="float">
            <text:p>0,00152777777777778000</text:p>
          </table:table-cell>
          <table:table-cell table:formula="of:=[.D827]-[.D8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6" office:value-type="float" office:value="13216" calcext:value-type="float">
            <text:p>13216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52962962962963" calcext:value-type="float">
            <text:p>0,00152962962962963000</text:p>
          </table:table-cell>
          <table:table-cell table:formula="of:=[.D828]-[.D8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6" office:value-type="float" office:value="13232" calcext:value-type="float">
            <text:p>13232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53148148148148" calcext:value-type="float">
            <text:p>0,00153148148148148000</text:p>
          </table:table-cell>
          <table:table-cell table:formula="of:=[.D829]-[.D8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6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53333333333333" calcext:value-type="float">
            <text:p>0,00153333333333333000</text:p>
          </table:table-cell>
          <table:table-cell table:formula="of:=[.D830]-[.D8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6" office:value-type="float" office:value="13264" calcext:value-type="float">
            <text:p>13264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53518518518519" calcext:value-type="float">
            <text:p>0,00153518518518519000</text:p>
          </table:table-cell>
          <table:table-cell table:formula="of:=[.D831]-[.D8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6" office:value-type="float" office:value="13280" calcext:value-type="float">
            <text:p>1328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53703703703704" calcext:value-type="float">
            <text:p>0,00153703703703704000</text:p>
          </table:table-cell>
          <table:table-cell table:formula="of:=[.D832]-[.D8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6" office:value-type="float" office:value="13296" calcext:value-type="float">
            <text:p>13296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53888888888889" calcext:value-type="float">
            <text:p>0,00153888888888889000</text:p>
          </table:table-cell>
          <table:table-cell table:formula="of:=[.D833]-[.D8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6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54074074074074" calcext:value-type="float">
            <text:p>0,00154074074074074000</text:p>
          </table:table-cell>
          <table:table-cell table:formula="of:=[.D834]-[.D8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6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54259259259259" calcext:value-type="float">
            <text:p>0,00154259259259259000</text:p>
          </table:table-cell>
          <table:table-cell table:formula="of:=[.D835]-[.D8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6" office:value-type="float" office:value="13344" calcext:value-type="float">
            <text:p>13344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54444444444444" calcext:value-type="float">
            <text:p>0,00154444444444444000</text:p>
          </table:table-cell>
          <table:table-cell table:formula="of:=[.D836]-[.D8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6" office:value-type="float" office:value="13360" calcext:value-type="float">
            <text:p>13360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5462962962963" calcext:value-type="float">
            <text:p>0,00154629629629630000</text:p>
          </table:table-cell>
          <table:table-cell table:formula="of:=[.D837]-[.D8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6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54814814814815" calcext:value-type="float">
            <text:p>0,00154814814814815000</text:p>
          </table:table-cell>
          <table:table-cell table:formula="of:=[.D838]-[.D8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6" office:value-type="float" office:value="13392" calcext:value-type="float">
            <text:p>13392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55" calcext:value-type="float">
            <text:p>0,00155000000000000000</text:p>
          </table:table-cell>
          <table:table-cell table:formula="of:=[.D839]-[.D8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6" office:value-type="float" office:value="13408" calcext:value-type="float">
            <text:p>13408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55185185185185" calcext:value-type="float">
            <text:p>0,00155185185185185000</text:p>
          </table:table-cell>
          <table:table-cell table:formula="of:=[.D840]-[.D8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6" office:value-type="float" office:value="13424" calcext:value-type="float">
            <text:p>13424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5537037037037" calcext:value-type="float">
            <text:p>0,00155370370370370000</text:p>
          </table:table-cell>
          <table:table-cell table:formula="of:=[.D841]-[.D8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6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55555555555556" calcext:value-type="float">
            <text:p>0,00155555555555556000</text:p>
          </table:table-cell>
          <table:table-cell table:formula="of:=[.D842]-[.D8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6" office:value-type="float" office:value="13456" calcext:value-type="float">
            <text:p>13456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55740740740741" calcext:value-type="float">
            <text:p>0,00155740740740741000</text:p>
          </table:table-cell>
          <table:table-cell table:formula="of:=[.D843]-[.D842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6" office:value-type="float" office:value="13472" calcext:value-type="float">
            <text:p>13472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55925925925926" calcext:value-type="float">
            <text:p>0,00155925925925926000</text:p>
          </table:table-cell>
          <table:table-cell table:formula="of:=[.D844]-[.D8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6" office:value-type="float" office:value="13488" calcext:value-type="float">
            <text:p>13488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56111111111111" calcext:value-type="float">
            <text:p>0,00156111111111111000</text:p>
          </table:table-cell>
          <table:table-cell table:formula="of:=[.D845]-[.D8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6" office:value-type="float" office:value="13504" calcext:value-type="float">
            <text:p>13504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56296296296296" calcext:value-type="float">
            <text:p>0,00156296296296296000</text:p>
          </table:table-cell>
          <table:table-cell table:formula="of:=[.D846]-[.D8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6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56481481481481" calcext:value-type="float">
            <text:p>0,00156481481481482000</text:p>
          </table:table-cell>
          <table:table-cell table:formula="of:=[.D847]-[.D8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6" office:value-type="float" office:value="13536" calcext:value-type="float">
            <text:p>13536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56666666666667" calcext:value-type="float">
            <text:p>0,00156666666666667000</text:p>
          </table:table-cell>
          <table:table-cell table:formula="of:=[.D848]-[.D8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6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56851851851852" calcext:value-type="float">
            <text:p>0,00156851851851852000</text:p>
          </table:table-cell>
          <table:table-cell table:formula="of:=[.D849]-[.D8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6" office:value-type="float" office:value="13568" calcext:value-type="float">
            <text:p>13568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57037037037037" calcext:value-type="float">
            <text:p>0,00157037037037037000</text:p>
          </table:table-cell>
          <table:table-cell table:formula="of:=[.D850]-[.D8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6" office:value-type="float" office:value="13584" calcext:value-type="float">
            <text:p>13584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57222222222222" calcext:value-type="float">
            <text:p>0,00157222222222222000</text:p>
          </table:table-cell>
          <table:table-cell table:formula="of:=[.D851]-[.D8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6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57407407407407" calcext:value-type="float">
            <text:p>0,00157407407407407000</text:p>
          </table:table-cell>
          <table:table-cell table:formula="of:=[.D852]-[.D8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6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57592592592593" calcext:value-type="float">
            <text:p>0,00157592592592593000</text:p>
          </table:table-cell>
          <table:table-cell table:formula="of:=[.D853]-[.D8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6" office:value-type="float" office:value="13632" calcext:value-type="float">
            <text:p>13632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57777777777778" calcext:value-type="float">
            <text:p>0,00157777777777778000</text:p>
          </table:table-cell>
          <table:table-cell table:formula="of:=[.D854]-[.D8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6" office:value-type="float" office:value="13648" calcext:value-type="float">
            <text:p>13648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57962962962963" calcext:value-type="float">
            <text:p>0,00157962962962963000</text:p>
          </table:table-cell>
          <table:table-cell table:formula="of:=[.D855]-[.D8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6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58148148148148" calcext:value-type="float">
            <text:p>0,00158148148148148000</text:p>
          </table:table-cell>
          <table:table-cell table:formula="of:=[.D856]-[.D8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6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58333333333333" calcext:value-type="float">
            <text:p>0,00158333333333333000</text:p>
          </table:table-cell>
          <table:table-cell table:formula="of:=[.D857]-[.D8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6" office:value-type="float" office:value="13696" calcext:value-type="float">
            <text:p>13696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58518518518519" calcext:value-type="float">
            <text:p>0,00158518518518519000</text:p>
          </table:table-cell>
          <table:table-cell table:formula="of:=[.D858]-[.D8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6" office:value-type="float" office:value="13712" calcext:value-type="float">
            <text:p>13712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58703703703704" calcext:value-type="float">
            <text:p>0,00158703703703704000</text:p>
          </table:table-cell>
          <table:table-cell table:formula="of:=[.D859]-[.D8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6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58888888888889" calcext:value-type="float">
            <text:p>0,00158888888888889000</text:p>
          </table:table-cell>
          <table:table-cell table:formula="of:=[.D860]-[.D8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6" office:value-type="float" office:value="13744" calcext:value-type="float">
            <text:p>13744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59074074074074" calcext:value-type="float">
            <text:p>0,00159074074074074000</text:p>
          </table:table-cell>
          <table:table-cell table:formula="of:=[.D861]-[.D8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6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59259259259259" calcext:value-type="float">
            <text:p>0,00159259259259259000</text:p>
          </table:table-cell>
          <table:table-cell table:formula="of:=[.D862]-[.D8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6" office:value-type="float" office:value="13776" calcext:value-type="float">
            <text:p>13776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59444444444444" calcext:value-type="float">
            <text:p>0,00159444444444444000</text:p>
          </table:table-cell>
          <table:table-cell table:formula="of:=[.D863]-[.D862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6" office:value-type="float" office:value="13792" calcext:value-type="float">
            <text:p>13792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5962962962963" calcext:value-type="float">
            <text:p>0,00159629629629630000</text:p>
          </table:table-cell>
          <table:table-cell table:formula="of:=[.D864]-[.D8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6" office:value-type="float" office:value="13808" calcext:value-type="float">
            <text:p>13808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59814814814815" calcext:value-type="float">
            <text:p>0,00159814814814815000</text:p>
          </table:table-cell>
          <table:table-cell table:formula="of:=[.D865]-[.D8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6" office:value-type="float" office:value="13824" calcext:value-type="float">
            <text:p>13824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6" calcext:value-type="float">
            <text:p>0,00160000000000000000</text:p>
          </table:table-cell>
          <table:table-cell table:formula="of:=[.D866]-[.D8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6" office:value-type="float" office:value="13840" calcext:value-type="float">
            <text:p>13840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60185185185185" calcext:value-type="float">
            <text:p>0,00160185185185185000</text:p>
          </table:table-cell>
          <table:table-cell table:formula="of:=[.D867]-[.D8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6" office:value-type="float" office:value="13856" calcext:value-type="float">
            <text:p>13856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6037037037037" calcext:value-type="float">
            <text:p>0,00160370370370370000</text:p>
          </table:table-cell>
          <table:table-cell table:formula="of:=[.D868]-[.D8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6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60555555555556" calcext:value-type="float">
            <text:p>0,00160555555555556000</text:p>
          </table:table-cell>
          <table:table-cell table:formula="of:=[.D869]-[.D8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6" office:value-type="float" office:value="13888" calcext:value-type="float">
            <text:p>13888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60740740740741" calcext:value-type="float">
            <text:p>0,00160740740740741000</text:p>
          </table:table-cell>
          <table:table-cell table:formula="of:=[.D870]-[.D8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6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60925925925926" calcext:value-type="float">
            <text:p>0,00160925925925926000</text:p>
          </table:table-cell>
          <table:table-cell table:formula="of:=[.D871]-[.D8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6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61111111111111" calcext:value-type="float">
            <text:p>0,00161111111111111000</text:p>
          </table:table-cell>
          <table:table-cell table:formula="of:=[.D872]-[.D8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6" office:value-type="float" office:value="13936" calcext:value-type="float">
            <text:p>13936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61296296296296" calcext:value-type="float">
            <text:p>0,00161296296296296000</text:p>
          </table:table-cell>
          <table:table-cell table:formula="of:=[.D873]-[.D8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6" office:value-type="float" office:value="13952" calcext:value-type="float">
            <text:p>13952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61481481481481" calcext:value-type="float">
            <text:p>0,00161481481481481000</text:p>
          </table:table-cell>
          <table:table-cell table:formula="of:=[.D874]-[.D8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6" office:value-type="float" office:value="13968" calcext:value-type="float">
            <text:p>13968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61666666666667" calcext:value-type="float">
            <text:p>0,00161666666666667000</text:p>
          </table:table-cell>
          <table:table-cell table:formula="of:=[.D875]-[.D8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6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61851851851852" calcext:value-type="float">
            <text:p>0,00161851851851852000</text:p>
          </table:table-cell>
          <table:table-cell table:formula="of:=[.D876]-[.D8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6" office:value-type="float" office:value="14000" calcext:value-type="float">
            <text:p>14000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62037037037037" calcext:value-type="float">
            <text:p>0,00162037037037037000</text:p>
          </table:table-cell>
          <table:table-cell table:formula="of:=[.D877]-[.D8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6" office:value-type="float" office:value="14016" calcext:value-type="float">
            <text:p>14016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62222222222222" calcext:value-type="float">
            <text:p>0,00162222222222222000</text:p>
          </table:table-cell>
          <table:table-cell table:formula="of:=[.D878]-[.D8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6" office:value-type="float" office:value="14032" calcext:value-type="float">
            <text:p>14032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62407407407407" calcext:value-type="float">
            <text:p>0,00162407407407407000</text:p>
          </table:table-cell>
          <table:table-cell table:formula="of:=[.D879]-[.D8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6" office:value-type="float" office:value="14048" calcext:value-type="float">
            <text:p>14048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62592592592593" calcext:value-type="float">
            <text:p>0,00162592592592593000</text:p>
          </table:table-cell>
          <table:table-cell table:formula="of:=[.D880]-[.D8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6" office:value-type="float" office:value="14064" calcext:value-type="float">
            <text:p>14064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62777777777778" calcext:value-type="float">
            <text:p>0,00162777777777778000</text:p>
          </table:table-cell>
          <table:table-cell table:formula="of:=[.D881]-[.D8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6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62962962962963" calcext:value-type="float">
            <text:p>0,00162962962962963000</text:p>
          </table:table-cell>
          <table:table-cell table:formula="of:=[.D882]-[.D881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6" office:value-type="float" office:value="14096" calcext:value-type="float">
            <text:p>14096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63148148148148" calcext:value-type="float">
            <text:p>0,00163148148148148000</text:p>
          </table:table-cell>
          <table:table-cell table:formula="of:=[.D883]-[.D8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6" office:value-type="float" office:value="14112" calcext:value-type="float">
            <text:p>14112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63333333333333" calcext:value-type="float">
            <text:p>0,00163333333333333000</text:p>
          </table:table-cell>
          <table:table-cell table:formula="of:=[.D884]-[.D8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6" office:value-type="float" office:value="14128" calcext:value-type="float">
            <text:p>14128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63518518518519" calcext:value-type="float">
            <text:p>0,00163518518518519000</text:p>
          </table:table-cell>
          <table:table-cell table:formula="of:=[.D885]-[.D8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6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63703703703704" calcext:value-type="float">
            <text:p>0,00163703703703704000</text:p>
          </table:table-cell>
          <table:table-cell table:formula="of:=[.D886]-[.D8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6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63888888888889" calcext:value-type="float">
            <text:p>0,00163888888888889000</text:p>
          </table:table-cell>
          <table:table-cell table:formula="of:=[.D887]-[.D8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6" office:value-type="float" office:value="14176" calcext:value-type="float">
            <text:p>14176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64074074074074" calcext:value-type="float">
            <text:p>0,00164074074074074000</text:p>
          </table:table-cell>
          <table:table-cell table:formula="of:=[.D888]-[.D8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6" office:value-type="float" office:value="14192" calcext:value-type="float">
            <text:p>14192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64259259259259" calcext:value-type="float">
            <text:p>0,00164259259259259000</text:p>
          </table:table-cell>
          <table:table-cell table:formula="of:=[.D889]-[.D8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6" office:value-type="float" office:value="14208" calcext:value-type="float">
            <text:p>14208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64444444444444" calcext:value-type="float">
            <text:p>0,00164444444444444000</text:p>
          </table:table-cell>
          <table:table-cell table:formula="of:=[.D890]-[.D8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6" office:value-type="float" office:value="14224" calcext:value-type="float">
            <text:p>14224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6462962962963" calcext:value-type="float">
            <text:p>0,00164629629629630000</text:p>
          </table:table-cell>
          <table:table-cell table:formula="of:=[.D891]-[.D8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6" office:value-type="float" office:value="14240" calcext:value-type="float">
            <text:p>1424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64814814814815" calcext:value-type="float">
            <text:p>0,00164814814814815000</text:p>
          </table:table-cell>
          <table:table-cell table:formula="of:=[.D892]-[.D8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6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65" calcext:value-type="float">
            <text:p>0,00165000000000000000</text:p>
          </table:table-cell>
          <table:table-cell table:formula="of:=[.D893]-[.D8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6" office:value-type="float" office:value="14272" calcext:value-type="float">
            <text:p>14272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65185185185185" calcext:value-type="float">
            <text:p>0,00165185185185185000</text:p>
          </table:table-cell>
          <table:table-cell table:formula="of:=[.D894]-[.D8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6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6537037037037" calcext:value-type="float">
            <text:p>0,00165370370370370000</text:p>
          </table:table-cell>
          <table:table-cell table:formula="of:=[.D895]-[.D8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6" office:value-type="float" office:value="14304" calcext:value-type="float">
            <text:p>14304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65555555555556" calcext:value-type="float">
            <text:p>0,00165555555555556000</text:p>
          </table:table-cell>
          <table:table-cell table:formula="of:=[.D896]-[.D8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6" office:value-type="float" office:value="14320" calcext:value-type="float">
            <text:p>14320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65740740740741" calcext:value-type="float">
            <text:p>0,00165740740740741000</text:p>
          </table:table-cell>
          <table:table-cell table:formula="of:=[.D897]-[.D8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6" office:value-type="float" office:value="14336" calcext:value-type="float">
            <text:p>14336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65925925925926" calcext:value-type="float">
            <text:p>0,00165925925925926000</text:p>
          </table:table-cell>
          <table:table-cell table:formula="of:=[.D898]-[.D8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6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66111111111111" calcext:value-type="float">
            <text:p>0,00166111111111111000</text:p>
          </table:table-cell>
          <table:table-cell table:formula="of:=[.D899]-[.D8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6" office:value-type="float" office:value="14368" calcext:value-type="float">
            <text:p>14368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66296296296296" calcext:value-type="float">
            <text:p>0,00166296296296296000</text:p>
          </table:table-cell>
          <table:table-cell table:formula="of:=[.D900]-[.D8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6" office:value-type="float" office:value="14384" calcext:value-type="float">
            <text:p>14384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66481481481481" calcext:value-type="float">
            <text:p>0,00166481481481481000</text:p>
          </table:table-cell>
          <table:table-cell table:formula="of:=[.D901]-[.D900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6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66666666666667" calcext:value-type="float">
            <text:p>0,00166666666666667000</text:p>
          </table:table-cell>
          <table:table-cell table:formula="of:=[.D902]-[.D9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6" office:value-type="float" office:value="14416" calcext:value-type="float">
            <text:p>14416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66851851851852" calcext:value-type="float">
            <text:p>0,00166851851851852000</text:p>
          </table:table-cell>
          <table:table-cell table:formula="of:=[.D903]-[.D9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6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67037037037037" calcext:value-type="float">
            <text:p>0,00167037037037037000</text:p>
          </table:table-cell>
          <table:table-cell table:formula="of:=[.D904]-[.D9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6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67222222222222" calcext:value-type="float">
            <text:p>0,00167222222222222000</text:p>
          </table:table-cell>
          <table:table-cell table:formula="of:=[.D905]-[.D9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6" office:value-type="float" office:value="14464" calcext:value-type="float">
            <text:p>14464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67407407407407" calcext:value-type="float">
            <text:p>0,00167407407407407000</text:p>
          </table:table-cell>
          <table:table-cell table:formula="of:=[.D906]-[.D9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6" office:value-type="float" office:value="14480" calcext:value-type="float">
            <text:p>14480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67592592592593" calcext:value-type="float">
            <text:p>0,00167592592592593000</text:p>
          </table:table-cell>
          <table:table-cell table:formula="of:=[.D907]-[.D9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6" office:value-type="float" office:value="14496" calcext:value-type="float">
            <text:p>14496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67777777777778" calcext:value-type="float">
            <text:p>0,00167777777777778000</text:p>
          </table:table-cell>
          <table:table-cell table:formula="of:=[.D908]-[.D9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6" office:value-type="float" office:value="14512" calcext:value-type="float">
            <text:p>14512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67962962962963" calcext:value-type="float">
            <text:p>0,00167962962962963000</text:p>
          </table:table-cell>
          <table:table-cell table:formula="of:=[.D909]-[.D9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6" office:value-type="float" office:value="14528" calcext:value-type="float">
            <text:p>14528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68148148148148" calcext:value-type="float">
            <text:p>0,00168148148148148000</text:p>
          </table:table-cell>
          <table:table-cell table:formula="of:=[.D910]-[.D9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6" office:value-type="float" office:value="14544" calcext:value-type="float">
            <text:p>14544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68333333333333" calcext:value-type="float">
            <text:p>0,00168333333333333000</text:p>
          </table:table-cell>
          <table:table-cell table:formula="of:=[.D911]-[.D9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6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168518518518519" calcext:value-type="float">
            <text:p>0,00168518518518519000</text:p>
          </table:table-cell>
          <table:table-cell table:formula="of:=[.D912]-[.D9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6" office:value-type="float" office:value="14576" calcext:value-type="float">
            <text:p>14576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168703703703704" calcext:value-type="float">
            <text:p>0,00168703703703704000</text:p>
          </table:table-cell>
          <table:table-cell table:formula="of:=[.D913]-[.D9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6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168888888888889" calcext:value-type="float">
            <text:p>0,00168888888888889000</text:p>
          </table:table-cell>
          <table:table-cell table:formula="of:=[.D914]-[.D9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6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169074074074074" calcext:value-type="float">
            <text:p>0,00169074074074074000</text:p>
          </table:table-cell>
          <table:table-cell table:formula="of:=[.D915]-[.D9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6" office:value-type="float" office:value="14624" calcext:value-type="float">
            <text:p>14624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169259259259259" calcext:value-type="float">
            <text:p>0,00169259259259259000</text:p>
          </table:table-cell>
          <table:table-cell table:formula="of:=[.D916]-[.D9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6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169444444444444" calcext:value-type="float">
            <text:p>0,00169444444444444000</text:p>
          </table:table-cell>
          <table:table-cell table:formula="of:=[.D917]-[.D9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6" office:value-type="float" office:value="14656" calcext:value-type="float">
            <text:p>14656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16962962962963" calcext:value-type="float">
            <text:p>0,00169629629629630000</text:p>
          </table:table-cell>
          <table:table-cell table:formula="of:=[.D918]-[.D9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6" office:value-type="float" office:value="14672" calcext:value-type="float">
            <text:p>14672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169814814814815" calcext:value-type="float">
            <text:p>0,00169814814814815000</text:p>
          </table:table-cell>
          <table:table-cell table:formula="of:=[.D919]-[.D9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6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17" calcext:value-type="float">
            <text:p>0,00170000000000000000</text:p>
          </table:table-cell>
          <table:table-cell table:formula="of:=[.D920]-[.D9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6" office:value-type="float" office:value="14704" calcext:value-type="float">
            <text:p>14704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170185185185185" calcext:value-type="float">
            <text:p>0,00170185185185185000</text:p>
          </table:table-cell>
          <table:table-cell table:formula="of:=[.D921]-[.D920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6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17037037037037" calcext:value-type="float">
            <text:p>0,00170370370370370000</text:p>
          </table:table-cell>
          <table:table-cell table:formula="of:=[.D922]-[.D9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6" office:value-type="float" office:value="14736" calcext:value-type="float">
            <text:p>14736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170555555555556" calcext:value-type="float">
            <text:p>0,00170555555555556000</text:p>
          </table:table-cell>
          <table:table-cell table:formula="of:=[.D923]-[.D9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6" office:value-type="float" office:value="14752" calcext:value-type="float">
            <text:p>14752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170740740740741" calcext:value-type="float">
            <text:p>0,00170740740740741000</text:p>
          </table:table-cell>
          <table:table-cell table:formula="of:=[.D924]-[.D9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6" office:value-type="float" office:value="14768" calcext:value-type="float">
            <text:p>14768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170925925925926" calcext:value-type="float">
            <text:p>0,00170925925925926000</text:p>
          </table:table-cell>
          <table:table-cell table:formula="of:=[.D925]-[.D9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6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171111111111111" calcext:value-type="float">
            <text:p>0,00171111111111111000</text:p>
          </table:table-cell>
          <table:table-cell table:formula="of:=[.D926]-[.D9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6" office:value-type="float" office:value="14800" calcext:value-type="float">
            <text:p>14800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171296296296296" calcext:value-type="float">
            <text:p>0,00171296296296296000</text:p>
          </table:table-cell>
          <table:table-cell table:formula="of:=[.D927]-[.D9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6" office:value-type="float" office:value="14816" calcext:value-type="float">
            <text:p>14816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171481481481481" calcext:value-type="float">
            <text:p>0,00171481481481481000</text:p>
          </table:table-cell>
          <table:table-cell table:formula="of:=[.D928]-[.D9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6" office:value-type="float" office:value="14832" calcext:value-type="float">
            <text:p>14832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171666666666667" calcext:value-type="float">
            <text:p>0,00171666666666667000</text:p>
          </table:table-cell>
          <table:table-cell table:formula="of:=[.D929]-[.D9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6" office:value-type="float" office:value="14848" calcext:value-type="float">
            <text:p>14848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171851851851852" calcext:value-type="float">
            <text:p>0,00171851851851852000</text:p>
          </table:table-cell>
          <table:table-cell table:formula="of:=[.D930]-[.D9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6" office:value-type="float" office:value="14864" calcext:value-type="float">
            <text:p>14864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172037037037037" calcext:value-type="float">
            <text:p>0,00172037037037037000</text:p>
          </table:table-cell>
          <table:table-cell table:formula="of:=[.D931]-[.D9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6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172222222222222" calcext:value-type="float">
            <text:p>0,00172222222222222000</text:p>
          </table:table-cell>
          <table:table-cell table:formula="of:=[.D932]-[.D9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6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172407407407407" calcext:value-type="float">
            <text:p>0,00172407407407407000</text:p>
          </table:table-cell>
          <table:table-cell table:formula="of:=[.D933]-[.D9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6" office:value-type="float" office:value="14912" calcext:value-type="float">
            <text:p>14912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172592592592593" calcext:value-type="float">
            <text:p>0,00172592592592593000</text:p>
          </table:table-cell>
          <table:table-cell table:formula="of:=[.D934]-[.D9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6" office:value-type="float" office:value="14928" calcext:value-type="float">
            <text:p>14928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172777777777778" calcext:value-type="float">
            <text:p>0,00172777777777778000</text:p>
          </table:table-cell>
          <table:table-cell table:formula="of:=[.D935]-[.D9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6" office:value-type="float" office:value="14944" calcext:value-type="float">
            <text:p>14944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172962962962963" calcext:value-type="float">
            <text:p>0,00172962962962963000</text:p>
          </table:table-cell>
          <table:table-cell table:formula="of:=[.D936]-[.D9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6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173148148148148" calcext:value-type="float">
            <text:p>0,00173148148148148000</text:p>
          </table:table-cell>
          <table:table-cell table:formula="of:=[.D937]-[.D9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6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173333333333333" calcext:value-type="float">
            <text:p>0,00173333333333333000</text:p>
          </table:table-cell>
          <table:table-cell table:formula="of:=[.D938]-[.D9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6" office:value-type="float" office:value="14992" calcext:value-type="float">
            <text:p>14992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173518518518519" calcext:value-type="float">
            <text:p>0,00173518518518518000</text:p>
          </table:table-cell>
          <table:table-cell table:formula="of:=[.D939]-[.D9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6" office:value-type="float" office:value="15008" calcext:value-type="float">
            <text:p>15008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173703703703704" calcext:value-type="float">
            <text:p>0,00173703703703704000</text:p>
          </table:table-cell>
          <table:table-cell table:formula="of:=[.D940]-[.D939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6" office:value-type="float" office:value="15024" calcext:value-type="float">
            <text:p>15024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173888888888889" calcext:value-type="float">
            <text:p>0,00173888888888889000</text:p>
          </table:table-cell>
          <table:table-cell table:formula="of:=[.D941]-[.D9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6" office:value-type="float" office:value="15040" calcext:value-type="float">
            <text:p>1504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174074074074074" calcext:value-type="float">
            <text:p>0,00174074074074074000</text:p>
          </table:table-cell>
          <table:table-cell table:formula="of:=[.D942]-[.D9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6" office:value-type="float" office:value="15056" calcext:value-type="float">
            <text:p>15056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174259259259259" calcext:value-type="float">
            <text:p>0,00174259259259259000</text:p>
          </table:table-cell>
          <table:table-cell table:formula="of:=[.D943]-[.D9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6" office:value-type="float" office:value="15072" calcext:value-type="float">
            <text:p>15072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174444444444444" calcext:value-type="float">
            <text:p>0,00174444444444444000</text:p>
          </table:table-cell>
          <table:table-cell table:formula="of:=[.D944]-[.D9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6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17462962962963" calcext:value-type="float">
            <text:p>0,00174629629629630000</text:p>
          </table:table-cell>
          <table:table-cell table:formula="of:=[.D945]-[.D9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6" office:value-type="float" office:value="15104" calcext:value-type="float">
            <text:p>15104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174814814814815" calcext:value-type="float">
            <text:p>0,00174814814814815000</text:p>
          </table:table-cell>
          <table:table-cell table:formula="of:=[.D946]-[.D9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6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175" calcext:value-type="float">
            <text:p>0,00175000000000000000</text:p>
          </table:table-cell>
          <table:table-cell table:formula="of:=[.D947]-[.D9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6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175185185185185" calcext:value-type="float">
            <text:p>0,00175185185185185000</text:p>
          </table:table-cell>
          <table:table-cell table:formula="of:=[.D948]-[.D9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6" office:value-type="float" office:value="15152" calcext:value-type="float">
            <text:p>15152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17537037037037" calcext:value-type="float">
            <text:p>0,00175370370370370000</text:p>
          </table:table-cell>
          <table:table-cell table:formula="of:=[.D949]-[.D9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6" office:value-type="float" office:value="15168" calcext:value-type="float">
            <text:p>15168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175555555555556" calcext:value-type="float">
            <text:p>0,00175555555555556000</text:p>
          </table:table-cell>
          <table:table-cell table:formula="of:=[.D950]-[.D9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6" office:value-type="float" office:value="15184" calcext:value-type="float">
            <text:p>15184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175740740740741" calcext:value-type="float">
            <text:p>0,00175740740740741000</text:p>
          </table:table-cell>
          <table:table-cell table:formula="of:=[.D951]-[.D9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6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175925925925926" calcext:value-type="float">
            <text:p>0,00175925925925926000</text:p>
          </table:table-cell>
          <table:table-cell table:formula="of:=[.D952]-[.D9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6" office:value-type="float" office:value="15216" calcext:value-type="float">
            <text:p>15216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176111111111111" calcext:value-type="float">
            <text:p>0,00176111111111111000</text:p>
          </table:table-cell>
          <table:table-cell table:formula="of:=[.D953]-[.D9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6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176296296296296" calcext:value-type="float">
            <text:p>0,00176296296296296000</text:p>
          </table:table-cell>
          <table:table-cell table:formula="of:=[.D954]-[.D9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6" office:value-type="float" office:value="15248" calcext:value-type="float">
            <text:p>15248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176481481481481" calcext:value-type="float">
            <text:p>0,00176481481481481000</text:p>
          </table:table-cell>
          <table:table-cell table:formula="of:=[.D955]-[.D9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6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176666666666667" calcext:value-type="float">
            <text:p>0,00176666666666667000</text:p>
          </table:table-cell>
          <table:table-cell table:formula="of:=[.D956]-[.D9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6" office:value-type="float" office:value="15280" calcext:value-type="float">
            <text:p>15280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176851851851852" calcext:value-type="float">
            <text:p>0,00176851851851852000</text:p>
          </table:table-cell>
          <table:table-cell table:formula="of:=[.D957]-[.D9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6" office:value-type="float" office:value="15296" calcext:value-type="float">
            <text:p>15296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177037037037037" calcext:value-type="float">
            <text:p>0,00177037037037037000</text:p>
          </table:table-cell>
          <table:table-cell table:formula="of:=[.D958]-[.D9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6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177222222222222" calcext:value-type="float">
            <text:p>0,00177222222222222000</text:p>
          </table:table-cell>
          <table:table-cell table:formula="of:=[.D959]-[.D958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6" office:value-type="float" office:value="15328" calcext:value-type="float">
            <text:p>15328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177407407407407" calcext:value-type="float">
            <text:p>0,00177407407407407000</text:p>
          </table:table-cell>
          <table:table-cell table:formula="of:=[.D960]-[.D9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6" office:value-type="float" office:value="15344" calcext:value-type="float">
            <text:p>15344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177592592592593" calcext:value-type="float">
            <text:p>0,00177592592592593000</text:p>
          </table:table-cell>
          <table:table-cell table:formula="of:=[.D961]-[.D9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6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177777777777778" calcext:value-type="float">
            <text:p>0,00177777777777778000</text:p>
          </table:table-cell>
          <table:table-cell table:formula="of:=[.D962]-[.D9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6" office:value-type="float" office:value="15376" calcext:value-type="float">
            <text:p>15376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177962962962963" calcext:value-type="float">
            <text:p>0,00177962962962963000</text:p>
          </table:table-cell>
          <table:table-cell table:formula="of:=[.D963]-[.D9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6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178148148148148" calcext:value-type="float">
            <text:p>0,00178148148148148000</text:p>
          </table:table-cell>
          <table:table-cell table:formula="of:=[.D964]-[.D9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6" office:value-type="float" office:value="15408" calcext:value-type="float">
            <text:p>15408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178333333333333" calcext:value-type="float">
            <text:p>0,00178333333333333000</text:p>
          </table:table-cell>
          <table:table-cell table:formula="of:=[.D965]-[.D9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6" office:value-type="float" office:value="15424" calcext:value-type="float">
            <text:p>15424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178518518518519" calcext:value-type="float">
            <text:p>0,00178518518518519000</text:p>
          </table:table-cell>
          <table:table-cell table:formula="of:=[.D966]-[.D9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6" office:value-type="float" office:value="15440" calcext:value-type="float">
            <text:p>15440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178703703703704" calcext:value-type="float">
            <text:p>0,00178703703703704000</text:p>
          </table:table-cell>
          <table:table-cell table:formula="of:=[.D967]-[.D9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6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178888888888889" calcext:value-type="float">
            <text:p>0,00178888888888889000</text:p>
          </table:table-cell>
          <table:table-cell table:formula="of:=[.D968]-[.D9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6" office:value-type="float" office:value="15472" calcext:value-type="float">
            <text:p>15472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179074074074074" calcext:value-type="float">
            <text:p>0,00179074074074074000</text:p>
          </table:table-cell>
          <table:table-cell table:formula="of:=[.D969]-[.D9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6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179259259259259" calcext:value-type="float">
            <text:p>0,00179259259259259000</text:p>
          </table:table-cell>
          <table:table-cell table:formula="of:=[.D970]-[.D9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6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179444444444444" calcext:value-type="float">
            <text:p>0,00179444444444444000</text:p>
          </table:table-cell>
          <table:table-cell table:formula="of:=[.D971]-[.D9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6" office:value-type="float" office:value="15520" calcext:value-type="float">
            <text:p>1552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17962962962963" calcext:value-type="float">
            <text:p>0,00179629629629630000</text:p>
          </table:table-cell>
          <table:table-cell table:formula="of:=[.D972]-[.D9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6" office:value-type="float" office:value="15536" calcext:value-type="float">
            <text:p>15536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179814814814815" calcext:value-type="float">
            <text:p>0,00179814814814815000</text:p>
          </table:table-cell>
          <table:table-cell table:formula="of:=[.D973]-[.D9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6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18" calcext:value-type="float">
            <text:p>0,00180000000000000000</text:p>
          </table:table-cell>
          <table:table-cell table:formula="of:=[.D974]-[.D9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6" office:value-type="float" office:value="15568" calcext:value-type="float">
            <text:p>15568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180185185185185" calcext:value-type="float">
            <text:p>0,00180185185185185000</text:p>
          </table:table-cell>
          <table:table-cell table:formula="of:=[.D975]-[.D9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6" office:value-type="float" office:value="15584" calcext:value-type="float">
            <text:p>15584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18037037037037" calcext:value-type="float">
            <text:p>0,00180370370370370000</text:p>
          </table:table-cell>
          <table:table-cell table:formula="of:=[.D976]-[.D9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6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180555555555556" calcext:value-type="float">
            <text:p>0,00180555555555556000</text:p>
          </table:table-cell>
          <table:table-cell table:formula="of:=[.D977]-[.D9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6" office:value-type="float" office:value="15616" calcext:value-type="float">
            <text:p>15616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180740740740741" calcext:value-type="float">
            <text:p>0,00180740740740741000</text:p>
          </table:table-cell>
          <table:table-cell table:formula="of:=[.D978]-[.D9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6" office:value-type="float" office:value="15632" calcext:value-type="float">
            <text:p>15632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180925925925926" calcext:value-type="float">
            <text:p>0,00180925925925926000</text:p>
          </table:table-cell>
          <table:table-cell table:formula="of:=[.D979]-[.D978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6" office:value-type="float" office:value="15648" calcext:value-type="float">
            <text:p>15648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181111111111111" calcext:value-type="float">
            <text:p>0,00181111111111111000</text:p>
          </table:table-cell>
          <table:table-cell table:formula="of:=[.D980]-[.D9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6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181296296296296" calcext:value-type="float">
            <text:p>0,00181296296296296000</text:p>
          </table:table-cell>
          <table:table-cell table:formula="of:=[.D981]-[.D9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6" office:value-type="float" office:value="15680" calcext:value-type="float">
            <text:p>1568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181481481481482" calcext:value-type="float">
            <text:p>0,00181481481481482000</text:p>
          </table:table-cell>
          <table:table-cell table:formula="of:=[.D982]-[.D9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6" office:value-type="float" office:value="15696" calcext:value-type="float">
            <text:p>15696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181666666666667" calcext:value-type="float">
            <text:p>0,00181666666666667000</text:p>
          </table:table-cell>
          <table:table-cell table:formula="of:=[.D983]-[.D9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6" office:value-type="float" office:value="15712" calcext:value-type="float">
            <text:p>15712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181851851851852" calcext:value-type="float">
            <text:p>0,00181851851851852000</text:p>
          </table:table-cell>
          <table:table-cell table:formula="of:=[.D984]-[.D9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6" office:value-type="float" office:value="15728" calcext:value-type="float">
            <text:p>15728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182037037037037" calcext:value-type="float">
            <text:p>0,00182037037037037000</text:p>
          </table:table-cell>
          <table:table-cell table:formula="of:=[.D985]-[.D9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6" office:value-type="float" office:value="15744" calcext:value-type="float">
            <text:p>15744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182222222222222" calcext:value-type="float">
            <text:p>0,00182222222222222000</text:p>
          </table:table-cell>
          <table:table-cell table:formula="of:=[.D986]-[.D9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6" office:value-type="float" office:value="15760" calcext:value-type="float">
            <text:p>15760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182407407407407" calcext:value-type="float">
            <text:p>0,00182407407407407000</text:p>
          </table:table-cell>
          <table:table-cell table:formula="of:=[.D987]-[.D9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6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182592592592593" calcext:value-type="float">
            <text:p>0,00182592592592593000</text:p>
          </table:table-cell>
          <table:table-cell table:formula="of:=[.D988]-[.D9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6" office:value-type="float" office:value="15792" calcext:value-type="float">
            <text:p>15792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182777777777778" calcext:value-type="float">
            <text:p>0,00182777777777778000</text:p>
          </table:table-cell>
          <table:table-cell table:formula="of:=[.D989]-[.D9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6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182962962962963" calcext:value-type="float">
            <text:p>0,00182962962962963000</text:p>
          </table:table-cell>
          <table:table-cell table:formula="of:=[.D990]-[.D9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6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183148148148148" calcext:value-type="float">
            <text:p>0,00183148148148148000</text:p>
          </table:table-cell>
          <table:table-cell table:formula="of:=[.D991]-[.D9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6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183333333333333" calcext:value-type="float">
            <text:p>0,00183333333333333000</text:p>
          </table:table-cell>
          <table:table-cell table:formula="of:=[.D992]-[.D9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6" office:value-type="float" office:value="15856" calcext:value-type="float">
            <text:p>15856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183518518518519" calcext:value-type="float">
            <text:p>0,00183518518518519000</text:p>
          </table:table-cell>
          <table:table-cell table:formula="of:=[.D993]-[.D9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6" office:value-type="float" office:value="15872" calcext:value-type="float">
            <text:p>15872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183703703703704" calcext:value-type="float">
            <text:p>0,00183703703703704000</text:p>
          </table:table-cell>
          <table:table-cell table:formula="of:=[.D994]-[.D9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6" office:value-type="float" office:value="15888" calcext:value-type="float">
            <text:p>15888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183888888888889" calcext:value-type="float">
            <text:p>0,00183888888888889000</text:p>
          </table:table-cell>
          <table:table-cell table:formula="of:=[.D995]-[.D9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6" office:value-type="float" office:value="15904" calcext:value-type="float">
            <text:p>15904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184074074074074" calcext:value-type="float">
            <text:p>0,00184074074074074000</text:p>
          </table:table-cell>
          <table:table-cell table:formula="of:=[.D996]-[.D9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6" office:value-type="float" office:value="15920" calcext:value-type="float">
            <text:p>15920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184259259259259" calcext:value-type="float">
            <text:p>0,00184259259259259000</text:p>
          </table:table-cell>
          <table:table-cell table:formula="of:=[.D997]-[.D9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6" office:value-type="float" office:value="15936" calcext:value-type="float">
            <text:p>15936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184444444444444" calcext:value-type="float">
            <text:p>0,00184444444444444000</text:p>
          </table:table-cell>
          <table:table-cell table:formula="of:=[.D998]-[.D997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6" office:value-type="float" office:value="15952" calcext:value-type="float">
            <text:p>15952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18462962962963" calcext:value-type="float">
            <text:p>0,00184629629629630000</text:p>
          </table:table-cell>
          <table:table-cell table:formula="of:=[.D999]-[.D9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6" office:value-type="float" office:value="15968" calcext:value-type="float">
            <text:p>15968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184814814814815" calcext:value-type="float">
            <text:p>0,00184814814814815000</text:p>
          </table:table-cell>
          <table:table-cell table:formula="of:=[.D1000]-[.D9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6" office:value-type="float" office:value="15984" calcext:value-type="float">
            <text:p>15984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185" calcext:value-type="float">
            <text:p>0,00185000000000000000</text:p>
          </table:table-cell>
          <table:table-cell table:formula="of:=[.D1001]-[.D10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6" office:value-type="float" office:value="16000" calcext:value-type="float">
            <text:p>16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185185185185185" calcext:value-type="float">
            <text:p>0,00185185185185185000</text:p>
          </table:table-cell>
          <table:table-cell table:formula="of:=[.D1002]-[.D10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6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18537037037037" calcext:value-type="float">
            <text:p>0,00185370370370370000</text:p>
          </table:table-cell>
          <table:table-cell table:formula="of:=[.D1003]-[.D10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6" office:value-type="float" office:value="16032" calcext:value-type="float">
            <text:p>16032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185555555555556" calcext:value-type="float">
            <text:p>0,00185555555555556000</text:p>
          </table:table-cell>
          <table:table-cell table:formula="of:=[.D1004]-[.D10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6" office:value-type="float" office:value="16048" calcext:value-type="float">
            <text:p>16048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185740740740741" calcext:value-type="float">
            <text:p>0,00185740740740741000</text:p>
          </table:table-cell>
          <table:table-cell table:formula="of:=[.D1005]-[.D10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6" office:value-type="float" office:value="16064" calcext:value-type="float">
            <text:p>16064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185925925925926" calcext:value-type="float">
            <text:p>0,00185925925925926000</text:p>
          </table:table-cell>
          <table:table-cell table:formula="of:=[.D1006]-[.D10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6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186111111111111" calcext:value-type="float">
            <text:p>0,00186111111111111000</text:p>
          </table:table-cell>
          <table:table-cell table:formula="of:=[.D1007]-[.D10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6" office:value-type="float" office:value="16096" calcext:value-type="float">
            <text:p>16096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186296296296296" calcext:value-type="float">
            <text:p>0,00186296296296296000</text:p>
          </table:table-cell>
          <table:table-cell table:formula="of:=[.D1008]-[.D10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6" office:value-type="float" office:value="16112" calcext:value-type="float">
            <text:p>16112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186481481481481" calcext:value-type="float">
            <text:p>0,00186481481481481000</text:p>
          </table:table-cell>
          <table:table-cell table:formula="of:=[.D1009]-[.D10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6" office:value-type="float" office:value="16128" calcext:value-type="float">
            <text:p>16128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186666666666667" calcext:value-type="float">
            <text:p>0,00186666666666667000</text:p>
          </table:table-cell>
          <table:table-cell table:formula="of:=[.D1010]-[.D10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6" office:value-type="float" office:value="16144" calcext:value-type="float">
            <text:p>16144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186851851851852" calcext:value-type="float">
            <text:p>0,00186851851851852000</text:p>
          </table:table-cell>
          <table:table-cell table:formula="of:=[.D1011]-[.D10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6" office:value-type="float" office:value="16160" calcext:value-type="float">
            <text:p>1616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187037037037037" calcext:value-type="float">
            <text:p>0,00187037037037037000</text:p>
          </table:table-cell>
          <table:table-cell table:formula="of:=[.D1012]-[.D10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6" office:value-type="float" office:value="16176" calcext:value-type="float">
            <text:p>16176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187222222222222" calcext:value-type="float">
            <text:p>0,00187222222222222000</text:p>
          </table:table-cell>
          <table:table-cell table:formula="of:=[.D1013]-[.D10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6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187407407407407" calcext:value-type="float">
            <text:p>0,00187407407407407000</text:p>
          </table:table-cell>
          <table:table-cell table:formula="of:=[.D1014]-[.D10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6" office:value-type="float" office:value="16208" calcext:value-type="float">
            <text:p>16208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187592592592593" calcext:value-type="float">
            <text:p>0,00187592592592593000</text:p>
          </table:table-cell>
          <table:table-cell table:formula="of:=[.D1015]-[.D10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6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187777777777778" calcext:value-type="float">
            <text:p>0,00187777777777778000</text:p>
          </table:table-cell>
          <table:table-cell table:formula="of:=[.D1016]-[.D10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6" office:value-type="float" office:value="16240" calcext:value-type="float">
            <text:p>16240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187962962962963" calcext:value-type="float">
            <text:p>0,00187962962962963000</text:p>
          </table:table-cell>
          <table:table-cell table:formula="of:=[.D1017]-[.D1016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6" office:value-type="float" office:value="16256" calcext:value-type="float">
            <text:p>16256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188148148148148" calcext:value-type="float">
            <text:p>0,00188148148148148000</text:p>
          </table:table-cell>
          <table:table-cell table:formula="of:=[.D1018]-[.D10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6" office:value-type="float" office:value="16272" calcext:value-type="float">
            <text:p>16272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188333333333333" calcext:value-type="float">
            <text:p>0,00188333333333333000</text:p>
          </table:table-cell>
          <table:table-cell table:formula="of:=[.D1019]-[.D10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6" office:value-type="float" office:value="16288" calcext:value-type="float">
            <text:p>16288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188518518518519" calcext:value-type="float">
            <text:p>0,00188518518518519000</text:p>
          </table:table-cell>
          <table:table-cell table:formula="of:=[.D1020]-[.D10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6" office:value-type="float" office:value="16304" calcext:value-type="float">
            <text:p>16304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188703703703704" calcext:value-type="float">
            <text:p>0,00188703703703704000</text:p>
          </table:table-cell>
          <table:table-cell table:formula="of:=[.D1021]-[.D10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6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188888888888889" calcext:value-type="float">
            <text:p>0,00188888888888889000</text:p>
          </table:table-cell>
          <table:table-cell table:formula="of:=[.D1022]-[.D10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6" office:value-type="float" office:value="16336" calcext:value-type="float">
            <text:p>16336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189074074074074" calcext:value-type="float">
            <text:p>0,00189074074074074000</text:p>
          </table:table-cell>
          <table:table-cell table:formula="of:=[.D1023]-[.D10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6" office:value-type="float" office:value="16352" calcext:value-type="float">
            <text:p>16352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189259259259259" calcext:value-type="float">
            <text:p>0,00189259259259259000</text:p>
          </table:table-cell>
          <table:table-cell table:formula="of:=[.D1024]-[.D10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6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189444444444444" calcext:value-type="float">
            <text:p>0,00189444444444444000</text:p>
          </table:table-cell>
          <table:table-cell table:formula="of:=[.D1025]-[.D10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6" office:value-type="float" office:value="16384" calcext:value-type="float">
            <text:p>16384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18962962962963" calcext:value-type="float">
            <text:p>0,00189629629629630000</text:p>
          </table:table-cell>
          <table:table-cell table:formula="of:=[.D1026]-[.D10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6" office:value-type="float" office:value="16400" calcext:value-type="float">
            <text:p>16400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189814814814815" calcext:value-type="float">
            <text:p>0,00189814814814815000</text:p>
          </table:table-cell>
          <table:table-cell table:formula="of:=[.D1027]-[.D10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6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19" calcext:value-type="float">
            <text:p>0,00190000000000000000</text:p>
          </table:table-cell>
          <table:table-cell table:formula="of:=[.D1028]-[.D10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6" office:value-type="float" office:value="16432" calcext:value-type="float">
            <text:p>16432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190185185185185" calcext:value-type="float">
            <text:p>0,00190185185185185000</text:p>
          </table:table-cell>
          <table:table-cell table:formula="of:=[.D1029]-[.D10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6" office:value-type="float" office:value="16448" calcext:value-type="float">
            <text:p>16448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19037037037037" calcext:value-type="float">
            <text:p>0,00190370370370370000</text:p>
          </table:table-cell>
          <table:table-cell table:formula="of:=[.D1030]-[.D10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6" office:value-type="float" office:value="16464" calcext:value-type="float">
            <text:p>16464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190555555555556" calcext:value-type="float">
            <text:p>0,00190555555555556000</text:p>
          </table:table-cell>
          <table:table-cell table:formula="of:=[.D1031]-[.D10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6" office:value-type="float" office:value="16480" calcext:value-type="float">
            <text:p>1648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190740740740741" calcext:value-type="float">
            <text:p>0,00190740740740741000</text:p>
          </table:table-cell>
          <table:table-cell table:formula="of:=[.D1032]-[.D10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6" office:value-type="float" office:value="16496" calcext:value-type="float">
            <text:p>16496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190925925925926" calcext:value-type="float">
            <text:p>0,00190925925925926000</text:p>
          </table:table-cell>
          <table:table-cell table:formula="of:=[.D1033]-[.D10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6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191111111111111" calcext:value-type="float">
            <text:p>0,00191111111111111000</text:p>
          </table:table-cell>
          <table:table-cell table:formula="of:=[.D1034]-[.D10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6" office:value-type="float" office:value="16528" calcext:value-type="float">
            <text:p>16528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191296296296296" calcext:value-type="float">
            <text:p>0,00191296296296296000</text:p>
          </table:table-cell>
          <table:table-cell table:formula="of:=[.D1035]-[.D10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6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191481481481481" calcext:value-type="float">
            <text:p>0,00191481481481481000</text:p>
          </table:table-cell>
          <table:table-cell table:formula="of:=[.D1036]-[.D10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6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191666666666667" calcext:value-type="float">
            <text:p>0,00191666666666667000</text:p>
          </table:table-cell>
          <table:table-cell table:formula="of:=[.D1037]-[.D1036]" office:value-type="float" office:value="0.00000185185185185206" calcext:value-type="float">
            <text:p>0,0000018518518518520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6" office:value-type="float" office:value="16576" calcext:value-type="float">
            <text:p>16576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191851851851852" calcext:value-type="float">
            <text:p>0,00191851851851852000</text:p>
          </table:table-cell>
          <table:table-cell table:formula="of:=[.D1038]-[.D10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6" office:value-type="float" office:value="16592" calcext:value-type="float">
            <text:p>16592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192037037037037" calcext:value-type="float">
            <text:p>0,00192037037037037000</text:p>
          </table:table-cell>
          <table:table-cell table:formula="of:=[.D1039]-[.D10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6" office:value-type="float" office:value="16608" calcext:value-type="float">
            <text:p>16608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192222222222222" calcext:value-type="float">
            <text:p>0,00192222222222222000</text:p>
          </table:table-cell>
          <table:table-cell table:formula="of:=[.D1040]-[.D10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6" office:value-type="float" office:value="16624" calcext:value-type="float">
            <text:p>16624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192407407407407" calcext:value-type="float">
            <text:p>0,00192407407407407000</text:p>
          </table:table-cell>
          <table:table-cell table:formula="of:=[.D1041]-[.D10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6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192592592592593" calcext:value-type="float">
            <text:p>0,00192592592592593000</text:p>
          </table:table-cell>
          <table:table-cell table:formula="of:=[.D1042]-[.D10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6" office:value-type="float" office:value="16656" calcext:value-type="float">
            <text:p>16656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192777777777778" calcext:value-type="float">
            <text:p>0,00192777777777778000</text:p>
          </table:table-cell>
          <table:table-cell table:formula="of:=[.D1043]-[.D10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6" office:value-type="float" office:value="16672" calcext:value-type="float">
            <text:p>16672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192962962962963" calcext:value-type="float">
            <text:p>0,00192962962962963000</text:p>
          </table:table-cell>
          <table:table-cell table:formula="of:=[.D1044]-[.D10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6" office:value-type="float" office:value="16688" calcext:value-type="float">
            <text:p>16688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193148148148148" calcext:value-type="float">
            <text:p>0,00193148148148148000</text:p>
          </table:table-cell>
          <table:table-cell table:formula="of:=[.D1045]-[.D10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6" office:value-type="float" office:value="16704" calcext:value-type="float">
            <text:p>16704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193333333333333" calcext:value-type="float">
            <text:p>0,00193333333333333000</text:p>
          </table:table-cell>
          <table:table-cell table:formula="of:=[.D1046]-[.D10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6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193518518518519" calcext:value-type="float">
            <text:p>0,00193518518518519000</text:p>
          </table:table-cell>
          <table:table-cell table:formula="of:=[.D1047]-[.D10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6" office:value-type="float" office:value="16736" calcext:value-type="float">
            <text:p>16736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193703703703704" calcext:value-type="float">
            <text:p>0,00193703703703704000</text:p>
          </table:table-cell>
          <table:table-cell table:formula="of:=[.D1048]-[.D10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6" office:value-type="float" office:value="16752" calcext:value-type="float">
            <text:p>16752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193888888888889" calcext:value-type="float">
            <text:p>0,00193888888888889000</text:p>
          </table:table-cell>
          <table:table-cell table:formula="of:=[.D1049]-[.D10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6" office:value-type="float" office:value="16768" calcext:value-type="float">
            <text:p>16768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194074074074074" calcext:value-type="float">
            <text:p>0,00194074074074074000</text:p>
          </table:table-cell>
          <table:table-cell table:formula="of:=[.D1050]-[.D10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6" office:value-type="float" office:value="16784" calcext:value-type="float">
            <text:p>16784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194259259259259" calcext:value-type="float">
            <text:p>0,00194259259259259000</text:p>
          </table:table-cell>
          <table:table-cell table:formula="of:=[.D1051]-[.D10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6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194444444444444" calcext:value-type="float">
            <text:p>0,00194444444444444000</text:p>
          </table:table-cell>
          <table:table-cell table:formula="of:=[.D1052]-[.D10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6" office:value-type="float" office:value="16816" calcext:value-type="float">
            <text:p>16816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19462962962963" calcext:value-type="float">
            <text:p>0,00194629629629630000</text:p>
          </table:table-cell>
          <table:table-cell table:formula="of:=[.D1053]-[.D10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6" office:value-type="float" office:value="16832" calcext:value-type="float">
            <text:p>16832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194814814814815" calcext:value-type="float">
            <text:p>0,00194814814814815000</text:p>
          </table:table-cell>
          <table:table-cell table:formula="of:=[.D1054]-[.D10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6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195" calcext:value-type="float">
            <text:p>0,00195000000000000000</text:p>
          </table:table-cell>
          <table:table-cell table:formula="of:=[.D1055]-[.D10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6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195185185185185" calcext:value-type="float">
            <text:p>0,00195185185185185000</text:p>
          </table:table-cell>
          <table:table-cell table:formula="of:=[.D1056]-[.D10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6" office:value-type="float" office:value="16880" calcext:value-type="float">
            <text:p>16880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19537037037037" calcext:value-type="float">
            <text:p>0,00195370370370370000</text:p>
          </table:table-cell>
          <table:table-cell table:formula="of:=[.D1057]-[.D10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6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195555555555556" calcext:value-type="float">
            <text:p>0,00195555555555556000</text:p>
          </table:table-cell>
          <table:table-cell table:formula="of:=[.D1058]-[.D10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6" office:value-type="float" office:value="16912" calcext:value-type="float">
            <text:p>16912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195740740740741" calcext:value-type="float">
            <text:p>0,00195740740740741000</text:p>
          </table:table-cell>
          <table:table-cell table:formula="of:=[.D1059]-[.D10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6" office:value-type="float" office:value="16928" calcext:value-type="float">
            <text:p>16928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195925925925926" calcext:value-type="float">
            <text:p>0,00195925925925926000</text:p>
          </table:table-cell>
          <table:table-cell table:formula="of:=[.D1060]-[.D10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6" office:value-type="float" office:value="16944" calcext:value-type="float">
            <text:p>16944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196111111111111" calcext:value-type="float">
            <text:p>0,00196111111111111000</text:p>
          </table:table-cell>
          <table:table-cell table:formula="of:=[.D1061]-[.D10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6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196296296296296" calcext:value-type="float">
            <text:p>0,00196296296296296000</text:p>
          </table:table-cell>
          <table:table-cell table:formula="of:=[.D1062]-[.D10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6" office:value-type="float" office:value="16976" calcext:value-type="float">
            <text:p>16976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196481481481481" calcext:value-type="float">
            <text:p>0,00196481481481481000</text:p>
          </table:table-cell>
          <table:table-cell table:formula="of:=[.D1063]-[.D10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6" office:value-type="float" office:value="16992" calcext:value-type="float">
            <text:p>16992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196666666666667" calcext:value-type="float">
            <text:p>0,00196666666666667000</text:p>
          </table:table-cell>
          <table:table-cell table:formula="of:=[.D1064]-[.D10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6" office:value-type="float" office:value="17008" calcext:value-type="float">
            <text:p>17008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196851851851852" calcext:value-type="float">
            <text:p>0,00196851851851852000</text:p>
          </table:table-cell>
          <table:table-cell table:formula="of:=[.D1065]-[.D10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6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197037037037037" calcext:value-type="float">
            <text:p>0,00197037037037037000</text:p>
          </table:table-cell>
          <table:table-cell table:formula="of:=[.D1066]-[.D1065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6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197222222222222" calcext:value-type="float">
            <text:p>0,00197222222222222000</text:p>
          </table:table-cell>
          <table:table-cell table:formula="of:=[.D1067]-[.D10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6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197407407407407" calcext:value-type="float">
            <text:p>0,00197407407407407000</text:p>
          </table:table-cell>
          <table:table-cell table:formula="of:=[.D1068]-[.D10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6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197592592592593" calcext:value-type="float">
            <text:p>0,00197592592592593000</text:p>
          </table:table-cell>
          <table:table-cell table:formula="of:=[.D1069]-[.D10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6" office:value-type="float" office:value="17088" calcext:value-type="float">
            <text:p>17088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197777777777778" calcext:value-type="float">
            <text:p>0,00197777777777778000</text:p>
          </table:table-cell>
          <table:table-cell table:formula="of:=[.D1070]-[.D10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6" office:value-type="float" office:value="17104" calcext:value-type="float">
            <text:p>17104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197962962962963" calcext:value-type="float">
            <text:p>0,00197962962962963000</text:p>
          </table:table-cell>
          <table:table-cell table:formula="of:=[.D1071]-[.D10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6" office:value-type="float" office:value="17120" calcext:value-type="float">
            <text:p>1712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198148148148148" calcext:value-type="float">
            <text:p>0,00198148148148148000</text:p>
          </table:table-cell>
          <table:table-cell table:formula="of:=[.D1072]-[.D10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6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198333333333333" calcext:value-type="float">
            <text:p>0,00198333333333333000</text:p>
          </table:table-cell>
          <table:table-cell table:formula="of:=[.D1073]-[.D10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6" office:value-type="float" office:value="17152" calcext:value-type="float">
            <text:p>17152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198518518518519" calcext:value-type="float">
            <text:p>0,00198518518518519000</text:p>
          </table:table-cell>
          <table:table-cell table:formula="of:=[.D1074]-[.D10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6" office:value-type="float" office:value="17168" calcext:value-type="float">
            <text:p>17168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198703703703704" calcext:value-type="float">
            <text:p>0,00198703703703704000</text:p>
          </table:table-cell>
          <table:table-cell table:formula="of:=[.D1075]-[.D10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6" office:value-type="float" office:value="17184" calcext:value-type="float">
            <text:p>17184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198888888888889" calcext:value-type="float">
            <text:p>0,00198888888888889000</text:p>
          </table:table-cell>
          <table:table-cell table:formula="of:=[.D1076]-[.D10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6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199074074074074" calcext:value-type="float">
            <text:p>0,00199074074074074000</text:p>
          </table:table-cell>
          <table:table-cell table:formula="of:=[.D1077]-[.D10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6" office:value-type="float" office:value="17216" calcext:value-type="float">
            <text:p>17216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199259259259259" calcext:value-type="float">
            <text:p>0,00199259259259259000</text:p>
          </table:table-cell>
          <table:table-cell table:formula="of:=[.D1078]-[.D10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6" office:value-type="float" office:value="17232" calcext:value-type="float">
            <text:p>17232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199444444444444" calcext:value-type="float">
            <text:p>0,00199444444444444000</text:p>
          </table:table-cell>
          <table:table-cell table:formula="of:=[.D1079]-[.D10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6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19962962962963" calcext:value-type="float">
            <text:p>0,00199629629629630000</text:p>
          </table:table-cell>
          <table:table-cell table:formula="of:=[.D1080]-[.D10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6" office:value-type="float" office:value="17264" calcext:value-type="float">
            <text:p>17264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199814814814815" calcext:value-type="float">
            <text:p>0,00199814814814815000</text:p>
          </table:table-cell>
          <table:table-cell table:formula="of:=[.D1081]-[.D10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6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" calcext:value-type="float">
            <text:p>0,00200000000000000000</text:p>
          </table:table-cell>
          <table:table-cell table:formula="of:=[.D1082]-[.D10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6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00185185185185" calcext:value-type="float">
            <text:p>0,00200185185185185000</text:p>
          </table:table-cell>
          <table:table-cell table:formula="of:=[.D1083]-[.D10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6" office:value-type="float" office:value="17312" calcext:value-type="float">
            <text:p>17312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0037037037037" calcext:value-type="float">
            <text:p>0,00200370370370370000</text:p>
          </table:table-cell>
          <table:table-cell table:formula="of:=[.D1084]-[.D10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6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00555555555556" calcext:value-type="float">
            <text:p>0,00200555555555556000</text:p>
          </table:table-cell>
          <table:table-cell table:formula="of:=[.D1085]-[.D10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6" office:value-type="float" office:value="17344" calcext:value-type="float">
            <text:p>17344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00740740740741" calcext:value-type="float">
            <text:p>0,00200740740740741000</text:p>
          </table:table-cell>
          <table:table-cell table:formula="of:=[.D1086]-[.D10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6" office:value-type="float" office:value="17360" calcext:value-type="float">
            <text:p>17360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00925925925926" calcext:value-type="float">
            <text:p>0,00200925925925926000</text:p>
          </table:table-cell>
          <table:table-cell table:formula="of:=[.D1087]-[.D10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6" office:value-type="float" office:value="17376" calcext:value-type="float">
            <text:p>17376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01111111111111" calcext:value-type="float">
            <text:p>0,00201111111111111000</text:p>
          </table:table-cell>
          <table:table-cell table:formula="of:=[.D1088]-[.D10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6" office:value-type="float" office:value="17392" calcext:value-type="float">
            <text:p>17392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01296296296296" calcext:value-type="float">
            <text:p>0,00201296296296296000</text:p>
          </table:table-cell>
          <table:table-cell table:formula="of:=[.D1089]-[.D10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6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01481481481481" calcext:value-type="float">
            <text:p>0,00201481481481481000</text:p>
          </table:table-cell>
          <table:table-cell table:formula="of:=[.D1090]-[.D10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6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01666666666667" calcext:value-type="float">
            <text:p>0,00201666666666667000</text:p>
          </table:table-cell>
          <table:table-cell table:formula="of:=[.D1091]-[.D10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6" office:value-type="float" office:value="17440" calcext:value-type="float">
            <text:p>1744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01851851851852" calcext:value-type="float">
            <text:p>0,00201851851851852000</text:p>
          </table:table-cell>
          <table:table-cell table:formula="of:=[.D1092]-[.D10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6" office:value-type="float" office:value="17456" calcext:value-type="float">
            <text:p>17456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202037037037037" calcext:value-type="float">
            <text:p>0,00202037037037037000</text:p>
          </table:table-cell>
          <table:table-cell table:formula="of:=[.D1093]-[.D10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6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202222222222222" calcext:value-type="float">
            <text:p>0,00202222222222222000</text:p>
          </table:table-cell>
          <table:table-cell table:formula="of:=[.D1094]-[.D10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6" office:value-type="float" office:value="17488" calcext:value-type="float">
            <text:p>17488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202407407407407" calcext:value-type="float">
            <text:p>0,00202407407407407000</text:p>
          </table:table-cell>
          <table:table-cell table:formula="of:=[.D1095]-[.D10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6" office:value-type="float" office:value="17504" calcext:value-type="float">
            <text:p>17504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202592592592593" calcext:value-type="float">
            <text:p>0,00202592592592593000</text:p>
          </table:table-cell>
          <table:table-cell table:formula="of:=[.D1096]-[.D10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6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202777777777778" calcext:value-type="float">
            <text:p>0,00202777777777778000</text:p>
          </table:table-cell>
          <table:table-cell table:formula="of:=[.D1097]-[.D10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6" office:value-type="float" office:value="17536" calcext:value-type="float">
            <text:p>17536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202962962962963" calcext:value-type="float">
            <text:p>0,00202962962962963000</text:p>
          </table:table-cell>
          <table:table-cell table:formula="of:=[.D1098]-[.D10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6" office:value-type="float" office:value="17552" calcext:value-type="float">
            <text:p>17552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203148148148148" calcext:value-type="float">
            <text:p>0,00203148148148148000</text:p>
          </table:table-cell>
          <table:table-cell table:formula="of:=[.D1099]-[.D10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6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203333333333333" calcext:value-type="float">
            <text:p>0,00203333333333333000</text:p>
          </table:table-cell>
          <table:table-cell table:formula="of:=[.D1100]-[.D10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6" office:value-type="float" office:value="17584" calcext:value-type="float">
            <text:p>17584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203518518518519" calcext:value-type="float">
            <text:p>0,00203518518518519000</text:p>
          </table:table-cell>
          <table:table-cell table:formula="of:=[.D1101]-[.D11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6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203703703703704" calcext:value-type="float">
            <text:p>0,00203703703703704000</text:p>
          </table:table-cell>
          <table:table-cell table:formula="of:=[.D1102]-[.D11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6" office:value-type="float" office:value="17616" calcext:value-type="float">
            <text:p>17616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203888888888889" calcext:value-type="float">
            <text:p>0,00203888888888889000</text:p>
          </table:table-cell>
          <table:table-cell table:formula="of:=[.D1103]-[.D11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6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204074074074074" calcext:value-type="float">
            <text:p>0,00204074074074074000</text:p>
          </table:table-cell>
          <table:table-cell table:formula="of:=[.D1104]-[.D11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6" office:value-type="float" office:value="17648" calcext:value-type="float">
            <text:p>17648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204259259259259" calcext:value-type="float">
            <text:p>0,00204259259259259000</text:p>
          </table:table-cell>
          <table:table-cell table:formula="of:=[.D1105]-[.D1104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6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204444444444444" calcext:value-type="float">
            <text:p>0,00204444444444444000</text:p>
          </table:table-cell>
          <table:table-cell table:formula="of:=[.D1106]-[.D11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6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20462962962963" calcext:value-type="float">
            <text:p>0,00204629629629630000</text:p>
          </table:table-cell>
          <table:table-cell table:formula="of:=[.D1107]-[.D11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6" office:value-type="float" office:value="17696" calcext:value-type="float">
            <text:p>17696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204814814814815" calcext:value-type="float">
            <text:p>0,00204814814814815000</text:p>
          </table:table-cell>
          <table:table-cell table:formula="of:=[.D1108]-[.D11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6" office:value-type="float" office:value="17712" calcext:value-type="float">
            <text:p>17712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205" calcext:value-type="float">
            <text:p>0,00205000000000000000</text:p>
          </table:table-cell>
          <table:table-cell table:formula="of:=[.D1109]-[.D11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6" office:value-type="float" office:value="17728" calcext:value-type="float">
            <text:p>17728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205185185185185" calcext:value-type="float">
            <text:p>0,00205185185185185000</text:p>
          </table:table-cell>
          <table:table-cell table:formula="of:=[.D1110]-[.D11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6" office:value-type="float" office:value="17744" calcext:value-type="float">
            <text:p>17744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20537037037037" calcext:value-type="float">
            <text:p>0,00205370370370370000</text:p>
          </table:table-cell>
          <table:table-cell table:formula="of:=[.D1111]-[.D11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6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205555555555556" calcext:value-type="float">
            <text:p>0,00205555555555556000</text:p>
          </table:table-cell>
          <table:table-cell table:formula="of:=[.D1112]-[.D11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6" office:value-type="float" office:value="17776" calcext:value-type="float">
            <text:p>17776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205740740740741" calcext:value-type="float">
            <text:p>0,00205740740740741000</text:p>
          </table:table-cell>
          <table:table-cell table:formula="of:=[.D1113]-[.D11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6" office:value-type="float" office:value="17792" calcext:value-type="float">
            <text:p>17792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205925925925926" calcext:value-type="float">
            <text:p>0,00205925925925926000</text:p>
          </table:table-cell>
          <table:table-cell table:formula="of:=[.D1114]-[.D11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6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206111111111111" calcext:value-type="float">
            <text:p>0,00206111111111111000</text:p>
          </table:table-cell>
          <table:table-cell table:formula="of:=[.D1115]-[.D11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6" office:value-type="float" office:value="17824" calcext:value-type="float">
            <text:p>17824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206296296296296" calcext:value-type="float">
            <text:p>0,00206296296296296000</text:p>
          </table:table-cell>
          <table:table-cell table:formula="of:=[.D1116]-[.D11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6" office:value-type="float" office:value="17840" calcext:value-type="float">
            <text:p>17840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206481481481482" calcext:value-type="float">
            <text:p>0,00206481481481482000</text:p>
          </table:table-cell>
          <table:table-cell table:formula="of:=[.D1117]-[.D11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6" office:value-type="float" office:value="17856" calcext:value-type="float">
            <text:p>17856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206666666666667" calcext:value-type="float">
            <text:p>0,00206666666666667000</text:p>
          </table:table-cell>
          <table:table-cell table:formula="of:=[.D1118]-[.D11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6" office:value-type="float" office:value="17872" calcext:value-type="float">
            <text:p>17872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206851851851852" calcext:value-type="float">
            <text:p>0,00206851851851852000</text:p>
          </table:table-cell>
          <table:table-cell table:formula="of:=[.D1119]-[.D11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6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207037037037037" calcext:value-type="float">
            <text:p>0,00207037037037037000</text:p>
          </table:table-cell>
          <table:table-cell table:formula="of:=[.D1120]-[.D11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6" office:value-type="float" office:value="17904" calcext:value-type="float">
            <text:p>17904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207222222222222" calcext:value-type="float">
            <text:p>0,00207222222222222000</text:p>
          </table:table-cell>
          <table:table-cell table:formula="of:=[.D1121]-[.D11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6" office:value-type="float" office:value="17920" calcext:value-type="float">
            <text:p>1792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207407407407407" calcext:value-type="float">
            <text:p>0,00207407407407407000</text:p>
          </table:table-cell>
          <table:table-cell table:formula="of:=[.D1122]-[.D11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6" office:value-type="float" office:value="17936" calcext:value-type="float">
            <text:p>17936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207592592592593" calcext:value-type="float">
            <text:p>0,00207592592592593000</text:p>
          </table:table-cell>
          <table:table-cell table:formula="of:=[.D1123]-[.D11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6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207777777777778" calcext:value-type="float">
            <text:p>0,00207777777777778000</text:p>
          </table:table-cell>
          <table:table-cell table:formula="of:=[.D1124]-[.D11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6" office:value-type="float" office:value="17968" calcext:value-type="float">
            <text:p>17968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207962962962963" calcext:value-type="float">
            <text:p>0,00207962962962963000</text:p>
          </table:table-cell>
          <table:table-cell table:formula="of:=[.D1125]-[.D11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6" office:value-type="float" office:value="17984" calcext:value-type="float">
            <text:p>17984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208148148148148" calcext:value-type="float">
            <text:p>0,00208148148148148000</text:p>
          </table:table-cell>
          <table:table-cell table:formula="of:=[.D1126]-[.D11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6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208333333333333" calcext:value-type="float">
            <text:p>0,00208333333333333000</text:p>
          </table:table-cell>
          <table:table-cell table:formula="of:=[.D1127]-[.D11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6" office:value-type="float" office:value="18016" calcext:value-type="float">
            <text:p>18016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208518518518519" calcext:value-type="float">
            <text:p>0,00208518518518519000</text:p>
          </table:table-cell>
          <table:table-cell table:formula="of:=[.D1128]-[.D11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6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208703703703704" calcext:value-type="float">
            <text:p>0,00208703703703704000</text:p>
          </table:table-cell>
          <table:table-cell table:formula="of:=[.D1129]-[.D11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6" office:value-type="float" office:value="18048" calcext:value-type="float">
            <text:p>18048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208888888888889" calcext:value-type="float">
            <text:p>0,00208888888888889000</text:p>
          </table:table-cell>
          <table:table-cell table:formula="of:=[.D1130]-[.D11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6" office:value-type="float" office:value="18064" calcext:value-type="float">
            <text:p>18064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209074074074074" calcext:value-type="float">
            <text:p>0,00209074074074074000</text:p>
          </table:table-cell>
          <table:table-cell table:formula="of:=[.D1131]-[.D11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6" office:value-type="float" office:value="18080" calcext:value-type="float">
            <text:p>1808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209259259259259" calcext:value-type="float">
            <text:p>0,00209259259259259000</text:p>
          </table:table-cell>
          <table:table-cell table:formula="of:=[.D1132]-[.D11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6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209444444444444" calcext:value-type="float">
            <text:p>0,00209444444444444000</text:p>
          </table:table-cell>
          <table:table-cell table:formula="of:=[.D1133]-[.D11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6" office:value-type="float" office:value="18112" calcext:value-type="float">
            <text:p>18112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20962962962963" calcext:value-type="float">
            <text:p>0,00209629629629630000</text:p>
          </table:table-cell>
          <table:table-cell table:formula="of:=[.D1134]-[.D11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6" office:value-type="float" office:value="18128" calcext:value-type="float">
            <text:p>18128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209814814814815" calcext:value-type="float">
            <text:p>0,00209814814814815000</text:p>
          </table:table-cell>
          <table:table-cell table:formula="of:=[.D1135]-[.D11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6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21" calcext:value-type="float">
            <text:p>0,00210000000000000000</text:p>
          </table:table-cell>
          <table:table-cell table:formula="of:=[.D1136]-[.D11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6" office:value-type="float" office:value="18160" calcext:value-type="float">
            <text:p>18160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210185185185185" calcext:value-type="float">
            <text:p>0,00210185185185185000</text:p>
          </table:table-cell>
          <table:table-cell table:formula="of:=[.D1137]-[.D11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6" office:value-type="float" office:value="18176" calcext:value-type="float">
            <text:p>18176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21037037037037" calcext:value-type="float">
            <text:p>0,00210370370370370000</text:p>
          </table:table-cell>
          <table:table-cell table:formula="of:=[.D1138]-[.D11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6" office:value-type="float" office:value="18192" calcext:value-type="float">
            <text:p>18192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210555555555556" calcext:value-type="float">
            <text:p>0,00210555555555556000</text:p>
          </table:table-cell>
          <table:table-cell table:formula="of:=[.D1139]-[.D11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6" office:value-type="float" office:value="18208" calcext:value-type="float">
            <text:p>18208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210740740740741" calcext:value-type="float">
            <text:p>0,00210740740740741000</text:p>
          </table:table-cell>
          <table:table-cell table:formula="of:=[.D1140]-[.D11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6" office:value-type="float" office:value="18224" calcext:value-type="float">
            <text:p>18224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210925925925926" calcext:value-type="float">
            <text:p>0,00210925925925926000</text:p>
          </table:table-cell>
          <table:table-cell table:formula="of:=[.D1141]-[.D11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6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211111111111111" calcext:value-type="float">
            <text:p>0,00211111111111111000</text:p>
          </table:table-cell>
          <table:table-cell table:formula="of:=[.D1142]-[.D11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6" office:value-type="float" office:value="18256" calcext:value-type="float">
            <text:p>18256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211296296296296" calcext:value-type="float">
            <text:p>0,00211296296296296000</text:p>
          </table:table-cell>
          <table:table-cell table:formula="of:=[.D1143]-[.D1142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6" office:value-type="float" office:value="18272" calcext:value-type="float">
            <text:p>18272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211481481481482" calcext:value-type="float">
            <text:p>0,00211481481481482000</text:p>
          </table:table-cell>
          <table:table-cell table:formula="of:=[.D1144]-[.D11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6" office:value-type="float" office:value="18288" calcext:value-type="float">
            <text:p>18288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211666666666667" calcext:value-type="float">
            <text:p>0,00211666666666667000</text:p>
          </table:table-cell>
          <table:table-cell table:formula="of:=[.D1145]-[.D11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6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211851851851852" calcext:value-type="float">
            <text:p>0,00211851851851852000</text:p>
          </table:table-cell>
          <table:table-cell table:formula="of:=[.D1146]-[.D11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6" office:value-type="float" office:value="18320" calcext:value-type="float">
            <text:p>18320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212037037037037" calcext:value-type="float">
            <text:p>0,00212037037037037000</text:p>
          </table:table-cell>
          <table:table-cell table:formula="of:=[.D1147]-[.D11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6" office:value-type="float" office:value="18336" calcext:value-type="float">
            <text:p>18336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212222222222222" calcext:value-type="float">
            <text:p>0,00212222222222222000</text:p>
          </table:table-cell>
          <table:table-cell table:formula="of:=[.D1148]-[.D11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6" office:value-type="float" office:value="18352" calcext:value-type="float">
            <text:p>18352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212407407407407" calcext:value-type="float">
            <text:p>0,00212407407407407000</text:p>
          </table:table-cell>
          <table:table-cell table:formula="of:=[.D1149]-[.D11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6" office:value-type="float" office:value="18368" calcext:value-type="float">
            <text:p>18368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212592592592593" calcext:value-type="float">
            <text:p>0,00212592592592593000</text:p>
          </table:table-cell>
          <table:table-cell table:formula="of:=[.D1150]-[.D11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6" office:value-type="float" office:value="18384" calcext:value-type="float">
            <text:p>18384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212777777777778" calcext:value-type="float">
            <text:p>0,00212777777777778000</text:p>
          </table:table-cell>
          <table:table-cell table:formula="of:=[.D1151]-[.D11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6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212962962962963" calcext:value-type="float">
            <text:p>0,00212962962962963000</text:p>
          </table:table-cell>
          <table:table-cell table:formula="of:=[.D1152]-[.D11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6" office:value-type="float" office:value="18416" calcext:value-type="float">
            <text:p>18416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213148148148148" calcext:value-type="float">
            <text:p>0,00213148148148148000</text:p>
          </table:table-cell>
          <table:table-cell table:formula="of:=[.D1153]-[.D11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6" office:value-type="float" office:value="18432" calcext:value-type="float">
            <text:p>18432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213333333333333" calcext:value-type="float">
            <text:p>0,00213333333333333000</text:p>
          </table:table-cell>
          <table:table-cell table:formula="of:=[.D1154]-[.D11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6" office:value-type="float" office:value="18448" calcext:value-type="float">
            <text:p>18448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213518518518519" calcext:value-type="float">
            <text:p>0,00213518518518519000</text:p>
          </table:table-cell>
          <table:table-cell table:formula="of:=[.D1155]-[.D11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6" office:value-type="float" office:value="18464" calcext:value-type="float">
            <text:p>18464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213703703703704" calcext:value-type="float">
            <text:p>0,00213703703703704000</text:p>
          </table:table-cell>
          <table:table-cell table:formula="of:=[.D1156]-[.D11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6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213888888888889" calcext:value-type="float">
            <text:p>0,00213888888888889000</text:p>
          </table:table-cell>
          <table:table-cell table:formula="of:=[.D1157]-[.D11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6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214074074074074" calcext:value-type="float">
            <text:p>0,00214074074074074000</text:p>
          </table:table-cell>
          <table:table-cell table:formula="of:=[.D1158]-[.D11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6" office:value-type="float" office:value="18512" calcext:value-type="float">
            <text:p>18512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214259259259259" calcext:value-type="float">
            <text:p>0,00214259259259259000</text:p>
          </table:table-cell>
          <table:table-cell table:formula="of:=[.D1159]-[.D11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6" office:value-type="float" office:value="18528" calcext:value-type="float">
            <text:p>18528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214444444444444" calcext:value-type="float">
            <text:p>0,00214444444444444000</text:p>
          </table:table-cell>
          <table:table-cell table:formula="of:=[.D1160]-[.D11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6" office:value-type="float" office:value="18544" calcext:value-type="float">
            <text:p>18544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21462962962963" calcext:value-type="float">
            <text:p>0,00214629629629630000</text:p>
          </table:table-cell>
          <table:table-cell table:formula="of:=[.D1161]-[.D11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6" office:value-type="float" office:value="18560" calcext:value-type="float">
            <text:p>1856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214814814814815" calcext:value-type="float">
            <text:p>0,00214814814814815000</text:p>
          </table:table-cell>
          <table:table-cell table:formula="of:=[.D1162]-[.D11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6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215" calcext:value-type="float">
            <text:p>0,00215000000000000000</text:p>
          </table:table-cell>
          <table:table-cell table:formula="of:=[.D1163]-[.D11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6" office:value-type="float" office:value="18592" calcext:value-type="float">
            <text:p>18592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215185185185185" calcext:value-type="float">
            <text:p>0,00215185185185185000</text:p>
          </table:table-cell>
          <table:table-cell table:formula="of:=[.D1164]-[.D11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6" office:value-type="float" office:value="18608" calcext:value-type="float">
            <text:p>18608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21537037037037" calcext:value-type="float">
            <text:p>0,00215370370370370000</text:p>
          </table:table-cell>
          <table:table-cell table:formula="of:=[.D1165]-[.D11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6" office:value-type="float" office:value="18624" calcext:value-type="float">
            <text:p>18624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215555555555556" calcext:value-type="float">
            <text:p>0,00215555555555556000</text:p>
          </table:table-cell>
          <table:table-cell table:formula="of:=[.D1166]-[.D11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6" office:value-type="float" office:value="18640" calcext:value-type="float">
            <text:p>18640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215740740740741" calcext:value-type="float">
            <text:p>0,00215740740740741000</text:p>
          </table:table-cell>
          <table:table-cell table:formula="of:=[.D1167]-[.D11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6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215925925925926" calcext:value-type="float">
            <text:p>0,00215925925925926000</text:p>
          </table:table-cell>
          <table:table-cell table:formula="of:=[.D1168]-[.D11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6" office:value-type="float" office:value="18672" calcext:value-type="float">
            <text:p>18672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216111111111111" calcext:value-type="float">
            <text:p>0,00216111111111111000</text:p>
          </table:table-cell>
          <table:table-cell table:formula="of:=[.D1169]-[.D11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6" office:value-type="float" office:value="18688" calcext:value-type="float">
            <text:p>18688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216296296296296" calcext:value-type="float">
            <text:p>0,00216296296296296000</text:p>
          </table:table-cell>
          <table:table-cell table:formula="of:=[.D1170]-[.D11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6" office:value-type="float" office:value="18704" calcext:value-type="float">
            <text:p>18704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216481481481481" calcext:value-type="float">
            <text:p>0,00216481481481481000</text:p>
          </table:table-cell>
          <table:table-cell table:formula="of:=[.D1171]-[.D11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6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216666666666667" calcext:value-type="float">
            <text:p>0,00216666666666667000</text:p>
          </table:table-cell>
          <table:table-cell table:formula="of:=[.D1172]-[.D11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6" office:value-type="float" office:value="18736" calcext:value-type="float">
            <text:p>18736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216851851851852" calcext:value-type="float">
            <text:p>0,00216851851851852000</text:p>
          </table:table-cell>
          <table:table-cell table:formula="of:=[.D1173]-[.D11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6" office:value-type="float" office:value="18752" calcext:value-type="float">
            <text:p>18752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217037037037037" calcext:value-type="float">
            <text:p>0,00217037037037037000</text:p>
          </table:table-cell>
          <table:table-cell table:formula="of:=[.D1174]-[.D11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6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217222222222222" calcext:value-type="float">
            <text:p>0,00217222222222222000</text:p>
          </table:table-cell>
          <table:table-cell table:formula="of:=[.D1175]-[.D11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6" office:value-type="float" office:value="18784" calcext:value-type="float">
            <text:p>18784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217407407407407" calcext:value-type="float">
            <text:p>0,00217407407407407000</text:p>
          </table:table-cell>
          <table:table-cell table:formula="of:=[.D1176]-[.D11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6" office:value-type="float" office:value="18800" calcext:value-type="float">
            <text:p>18800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217592592592593" calcext:value-type="float">
            <text:p>0,00217592592592593000</text:p>
          </table:table-cell>
          <table:table-cell table:formula="of:=[.D1177]-[.D11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6" office:value-type="float" office:value="18816" calcext:value-type="float">
            <text:p>18816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217777777777778" calcext:value-type="float">
            <text:p>0,00217777777777778000</text:p>
          </table:table-cell>
          <table:table-cell table:formula="of:=[.D1178]-[.D11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6" office:value-type="float" office:value="18832" calcext:value-type="float">
            <text:p>18832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217962962962963" calcext:value-type="float">
            <text:p>0,00217962962962963000</text:p>
          </table:table-cell>
          <table:table-cell table:formula="of:=[.D1179]-[.D11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6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218148148148148" calcext:value-type="float">
            <text:p>0,00218148148148148000</text:p>
          </table:table-cell>
          <table:table-cell table:formula="of:=[.D1180]-[.D11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6" office:value-type="float" office:value="18864" calcext:value-type="float">
            <text:p>18864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218333333333333" calcext:value-type="float">
            <text:p>0,00218333333333333000</text:p>
          </table:table-cell>
          <table:table-cell table:formula="of:=[.D1181]-[.D11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6" office:value-type="float" office:value="18880" calcext:value-type="float">
            <text:p>1888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218518518518519" calcext:value-type="float">
            <text:p>0,00218518518518519000</text:p>
          </table:table-cell>
          <table:table-cell table:formula="of:=[.D1182]-[.D1181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6" office:value-type="float" office:value="18896" calcext:value-type="float">
            <text:p>18896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218703703703704" calcext:value-type="float">
            <text:p>0,00218703703703704000</text:p>
          </table:table-cell>
          <table:table-cell table:formula="of:=[.D1183]-[.D11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6" office:value-type="float" office:value="18912" calcext:value-type="float">
            <text:p>18912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218888888888889" calcext:value-type="float">
            <text:p>0,00218888888888889000</text:p>
          </table:table-cell>
          <table:table-cell table:formula="of:=[.D1184]-[.D11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6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219074074074074" calcext:value-type="float">
            <text:p>0,00219074074074074000</text:p>
          </table:table-cell>
          <table:table-cell table:formula="of:=[.D1185]-[.D11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6" office:value-type="float" office:value="18944" calcext:value-type="float">
            <text:p>18944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219259259259259" calcext:value-type="float">
            <text:p>0,00219259259259259000</text:p>
          </table:table-cell>
          <table:table-cell table:formula="of:=[.D1186]-[.D11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6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219444444444444" calcext:value-type="float">
            <text:p>0,00219444444444444000</text:p>
          </table:table-cell>
          <table:table-cell table:formula="of:=[.D1187]-[.D11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6" office:value-type="float" office:value="18976" calcext:value-type="float">
            <text:p>18976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21962962962963" calcext:value-type="float">
            <text:p>0,00219629629629630000</text:p>
          </table:table-cell>
          <table:table-cell table:formula="of:=[.D1188]-[.D11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6" office:value-type="float" office:value="18992" calcext:value-type="float">
            <text:p>18992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219814814814815" calcext:value-type="float">
            <text:p>0,00219814814814815000</text:p>
          </table:table-cell>
          <table:table-cell table:formula="of:=[.D1189]-[.D11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6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22" calcext:value-type="float">
            <text:p>0,00220000000000000000</text:p>
          </table:table-cell>
          <table:table-cell table:formula="of:=[.D1190]-[.D11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6" office:value-type="float" office:value="19024" calcext:value-type="float">
            <text:p>19024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220185185185185" calcext:value-type="float">
            <text:p>0,00220185185185185000</text:p>
          </table:table-cell>
          <table:table-cell table:formula="of:=[.D1191]-[.D11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6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22037037037037" calcext:value-type="float">
            <text:p>0,00220370370370370000</text:p>
          </table:table-cell>
          <table:table-cell table:formula="of:=[.D1192]-[.D11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6" office:value-type="float" office:value="19056" calcext:value-type="float">
            <text:p>19056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220555555555556" calcext:value-type="float">
            <text:p>0,00220555555555556000</text:p>
          </table:table-cell>
          <table:table-cell table:formula="of:=[.D1193]-[.D11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6" office:value-type="float" office:value="19072" calcext:value-type="float">
            <text:p>19072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220740740740741" calcext:value-type="float">
            <text:p>0,00220740740740741000</text:p>
          </table:table-cell>
          <table:table-cell table:formula="of:=[.D1194]-[.D11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6" office:value-type="float" office:value="19088" calcext:value-type="float">
            <text:p>19088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220925925925926" calcext:value-type="float">
            <text:p>0,00220925925925926000</text:p>
          </table:table-cell>
          <table:table-cell table:formula="of:=[.D1195]-[.D11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6" office:value-type="float" office:value="19104" calcext:value-type="float">
            <text:p>19104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221111111111111" calcext:value-type="float">
            <text:p>0,00221111111111111000</text:p>
          </table:table-cell>
          <table:table-cell table:formula="of:=[.D1196]-[.D11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6" office:value-type="float" office:value="19120" calcext:value-type="float">
            <text:p>19120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221296296296296" calcext:value-type="float">
            <text:p>0,00221296296296296000</text:p>
          </table:table-cell>
          <table:table-cell table:formula="of:=[.D1197]-[.D11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6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221481481481482" calcext:value-type="float">
            <text:p>0,00221481481481482000</text:p>
          </table:table-cell>
          <table:table-cell table:formula="of:=[.D1198]-[.D11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6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221666666666667" calcext:value-type="float">
            <text:p>0,00221666666666667000</text:p>
          </table:table-cell>
          <table:table-cell table:formula="of:=[.D1199]-[.D11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6" office:value-type="float" office:value="19168" calcext:value-type="float">
            <text:p>19168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221851851851852" calcext:value-type="float">
            <text:p>0,00221851851851852000</text:p>
          </table:table-cell>
          <table:table-cell table:formula="of:=[.D1200]-[.D11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6" office:value-type="float" office:value="19184" calcext:value-type="float">
            <text:p>19184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222037037037037" calcext:value-type="float">
            <text:p>0,00222037037037037000</text:p>
          </table:table-cell>
          <table:table-cell table:formula="of:=[.D1201]-[.D12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6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222222222222222" calcext:value-type="float">
            <text:p>0,00222222222222222000</text:p>
          </table:table-cell>
          <table:table-cell table:formula="of:=[.D1202]-[.D12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6" office:value-type="float" office:value="19216" calcext:value-type="float">
            <text:p>19216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222407407407407" calcext:value-type="float">
            <text:p>0,00222407407407407000</text:p>
          </table:table-cell>
          <table:table-cell table:formula="of:=[.D1203]-[.D12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6" office:value-type="float" office:value="19232" calcext:value-type="float">
            <text:p>19232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222592592592593" calcext:value-type="float">
            <text:p>0,00222592592592593000</text:p>
          </table:table-cell>
          <table:table-cell table:formula="of:=[.D1204]-[.D12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6" office:value-type="float" office:value="19248" calcext:value-type="float">
            <text:p>19248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222777777777778" calcext:value-type="float">
            <text:p>0,00222777777777778000</text:p>
          </table:table-cell>
          <table:table-cell table:formula="of:=[.D1205]-[.D12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6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222962962962963" calcext:value-type="float">
            <text:p>0,00222962962962963000</text:p>
          </table:table-cell>
          <table:table-cell table:formula="of:=[.D1206]-[.D12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6" office:value-type="float" office:value="19280" calcext:value-type="float">
            <text:p>19280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223148148148148" calcext:value-type="float">
            <text:p>0,00223148148148148000</text:p>
          </table:table-cell>
          <table:table-cell table:formula="of:=[.D1207]-[.D12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6" office:value-type="float" office:value="19296" calcext:value-type="float">
            <text:p>19296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223333333333333" calcext:value-type="float">
            <text:p>0,00223333333333333000</text:p>
          </table:table-cell>
          <table:table-cell table:formula="of:=[.D1208]-[.D12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6" office:value-type="float" office:value="19312" calcext:value-type="float">
            <text:p>19312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223518518518519" calcext:value-type="float">
            <text:p>0,00223518518518519000</text:p>
          </table:table-cell>
          <table:table-cell table:formula="of:=[.D1209]-[.D12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6" office:value-type="float" office:value="19328" calcext:value-type="float">
            <text:p>19328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223703703703704" calcext:value-type="float">
            <text:p>0,00223703703703704000</text:p>
          </table:table-cell>
          <table:table-cell table:formula="of:=[.D1210]-[.D12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6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223888888888889" calcext:value-type="float">
            <text:p>0,00223888888888889000</text:p>
          </table:table-cell>
          <table:table-cell table:formula="of:=[.D1211]-[.D12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6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224074074074074" calcext:value-type="float">
            <text:p>0,00224074074074074000</text:p>
          </table:table-cell>
          <table:table-cell table:formula="of:=[.D1212]-[.D12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6" office:value-type="float" office:value="19376" calcext:value-type="float">
            <text:p>19376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224259259259259" calcext:value-type="float">
            <text:p>0,00224259259259259000</text:p>
          </table:table-cell>
          <table:table-cell table:formula="of:=[.D1213]-[.D12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6" office:value-type="float" office:value="19392" calcext:value-type="float">
            <text:p>19392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224444444444444" calcext:value-type="float">
            <text:p>0,00224444444444444000</text:p>
          </table:table-cell>
          <table:table-cell table:formula="of:=[.D1214]-[.D12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6" office:value-type="float" office:value="19408" calcext:value-type="float">
            <text:p>19408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22462962962963" calcext:value-type="float">
            <text:p>0,00224629629629630000</text:p>
          </table:table-cell>
          <table:table-cell table:formula="of:=[.D1215]-[.D12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6" office:value-type="float" office:value="19424" calcext:value-type="float">
            <text:p>19424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224814814814815" calcext:value-type="float">
            <text:p>0,00224814814814815000</text:p>
          </table:table-cell>
          <table:table-cell table:formula="of:=[.D1216]-[.D12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6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225" calcext:value-type="float">
            <text:p>0,00225000000000000000</text:p>
          </table:table-cell>
          <table:table-cell table:formula="of:=[.D1217]-[.D12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6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225185185185185" calcext:value-type="float">
            <text:p>0,00225185185185185000</text:p>
          </table:table-cell>
          <table:table-cell table:formula="of:=[.D1218]-[.D12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6" office:value-type="float" office:value="19472" calcext:value-type="float">
            <text:p>19472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22537037037037" calcext:value-type="float">
            <text:p>0,00225370370370370000</text:p>
          </table:table-cell>
          <table:table-cell table:formula="of:=[.D1219]-[.D12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6" office:value-type="float" office:value="19488" calcext:value-type="float">
            <text:p>19488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225555555555556" calcext:value-type="float">
            <text:p>0,00225555555555556000</text:p>
          </table:table-cell>
          <table:table-cell table:formula="of:=[.D1220]-[.D12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6" office:value-type="float" office:value="19504" calcext:value-type="float">
            <text:p>19504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225740740740741" calcext:value-type="float">
            <text:p>0,00225740740740741000</text:p>
          </table:table-cell>
          <table:table-cell table:formula="of:=[.D1221]-[.D1220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6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225925925925926" calcext:value-type="float">
            <text:p>0,00225925925925926000</text:p>
          </table:table-cell>
          <table:table-cell table:formula="of:=[.D1222]-[.D12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6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226111111111111" calcext:value-type="float">
            <text:p>0,00226111111111111000</text:p>
          </table:table-cell>
          <table:table-cell table:formula="of:=[.D1223]-[.D12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6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226296296296296" calcext:value-type="float">
            <text:p>0,00226296296296296000</text:p>
          </table:table-cell>
          <table:table-cell table:formula="of:=[.D1224]-[.D12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6" office:value-type="float" office:value="19568" calcext:value-type="float">
            <text:p>19568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226481481481482" calcext:value-type="float">
            <text:p>0,00226481481481482000</text:p>
          </table:table-cell>
          <table:table-cell table:formula="of:=[.D1225]-[.D12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6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226666666666667" calcext:value-type="float">
            <text:p>0,00226666666666667000</text:p>
          </table:table-cell>
          <table:table-cell table:formula="of:=[.D1226]-[.D12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6" office:value-type="float" office:value="19600" calcext:value-type="float">
            <text:p>19600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226851851851852" calcext:value-type="float">
            <text:p>0,00226851851851852000</text:p>
          </table:table-cell>
          <table:table-cell table:formula="of:=[.D1227]-[.D12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6" office:value-type="float" office:value="19616" calcext:value-type="float">
            <text:p>19616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227037037037037" calcext:value-type="float">
            <text:p>0,00227037037037037000</text:p>
          </table:table-cell>
          <table:table-cell table:formula="of:=[.D1228]-[.D12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6" office:value-type="float" office:value="19632" calcext:value-type="float">
            <text:p>19632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227222222222222" calcext:value-type="float">
            <text:p>0,00227222222222222000</text:p>
          </table:table-cell>
          <table:table-cell table:formula="of:=[.D1229]-[.D12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6" office:value-type="float" office:value="19648" calcext:value-type="float">
            <text:p>19648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227407407407407" calcext:value-type="float">
            <text:p>0,00227407407407407000</text:p>
          </table:table-cell>
          <table:table-cell table:formula="of:=[.D1230]-[.D12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6" office:value-type="float" office:value="19664" calcext:value-type="float">
            <text:p>19664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227592592592593" calcext:value-type="float">
            <text:p>0,00227592592592593000</text:p>
          </table:table-cell>
          <table:table-cell table:formula="of:=[.D1231]-[.D12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6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227777777777778" calcext:value-type="float">
            <text:p>0,00227777777777778000</text:p>
          </table:table-cell>
          <table:table-cell table:formula="of:=[.D1232]-[.D12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6" office:value-type="float" office:value="19696" calcext:value-type="float">
            <text:p>19696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227962962962963" calcext:value-type="float">
            <text:p>0,00227962962962963000</text:p>
          </table:table-cell>
          <table:table-cell table:formula="of:=[.D1233]-[.D12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6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228148148148148" calcext:value-type="float">
            <text:p>0,00228148148148148000</text:p>
          </table:table-cell>
          <table:table-cell table:formula="of:=[.D1234]-[.D12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6" office:value-type="float" office:value="19728" calcext:value-type="float">
            <text:p>19728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228333333333333" calcext:value-type="float">
            <text:p>0,00228333333333333000</text:p>
          </table:table-cell>
          <table:table-cell table:formula="of:=[.D1235]-[.D12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6" office:value-type="float" office:value="19744" calcext:value-type="float">
            <text:p>19744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228518518518519" calcext:value-type="float">
            <text:p>0,00228518518518519000</text:p>
          </table:table-cell>
          <table:table-cell table:formula="of:=[.D1236]-[.D12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6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228703703703704" calcext:value-type="float">
            <text:p>0,00228703703703704000</text:p>
          </table:table-cell>
          <table:table-cell table:formula="of:=[.D1237]-[.D12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6" office:value-type="float" office:value="19776" calcext:value-type="float">
            <text:p>19776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228888888888889" calcext:value-type="float">
            <text:p>0,00228888888888889000</text:p>
          </table:table-cell>
          <table:table-cell table:formula="of:=[.D1238]-[.D12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6" office:value-type="float" office:value="19792" calcext:value-type="float">
            <text:p>19792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229074074074074" calcext:value-type="float">
            <text:p>0,00229074074074074000</text:p>
          </table:table-cell>
          <table:table-cell table:formula="of:=[.D1239]-[.D12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6" office:value-type="float" office:value="19808" calcext:value-type="float">
            <text:p>19808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229259259259259" calcext:value-type="float">
            <text:p>0,00229259259259259000</text:p>
          </table:table-cell>
          <table:table-cell table:formula="of:=[.D1240]-[.D12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6" office:value-type="float" office:value="19824" calcext:value-type="float">
            <text:p>19824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229444444444444" calcext:value-type="float">
            <text:p>0,00229444444444444000</text:p>
          </table:table-cell>
          <table:table-cell table:formula="of:=[.D1241]-[.D12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6" office:value-type="float" office:value="19840" calcext:value-type="float">
            <text:p>1984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22962962962963" calcext:value-type="float">
            <text:p>0,00229629629629630000</text:p>
          </table:table-cell>
          <table:table-cell table:formula="of:=[.D1242]-[.D12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6" office:value-type="float" office:value="19856" calcext:value-type="float">
            <text:p>19856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229814814814815" calcext:value-type="float">
            <text:p>0,00229814814814815000</text:p>
          </table:table-cell>
          <table:table-cell table:formula="of:=[.D1243]-[.D12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6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23" calcext:value-type="float">
            <text:p>0,00230000000000000000</text:p>
          </table:table-cell>
          <table:table-cell table:formula="of:=[.D1244]-[.D12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6" office:value-type="float" office:value="19888" calcext:value-type="float">
            <text:p>19888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230185185185185" calcext:value-type="float">
            <text:p>0,00230185185185185000</text:p>
          </table:table-cell>
          <table:table-cell table:formula="of:=[.D1245]-[.D12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6" office:value-type="float" office:value="19904" calcext:value-type="float">
            <text:p>19904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23037037037037" calcext:value-type="float">
            <text:p>0,00230370370370370000</text:p>
          </table:table-cell>
          <table:table-cell table:formula="of:=[.D1246]-[.D12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6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230555555555556" calcext:value-type="float">
            <text:p>0,00230555555555556000</text:p>
          </table:table-cell>
          <table:table-cell table:formula="of:=[.D1247]-[.D12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6" office:value-type="float" office:value="19936" calcext:value-type="float">
            <text:p>19936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230740740740741" calcext:value-type="float">
            <text:p>0,00230740740740741000</text:p>
          </table:table-cell>
          <table:table-cell table:formula="of:=[.D1248]-[.D12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6" office:value-type="float" office:value="19952" calcext:value-type="float">
            <text:p>19952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230925925925926" calcext:value-type="float">
            <text:p>0,00230925925925926000</text:p>
          </table:table-cell>
          <table:table-cell table:formula="of:=[.D1249]-[.D12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6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231111111111111" calcext:value-type="float">
            <text:p>0,00231111111111111000</text:p>
          </table:table-cell>
          <table:table-cell table:formula="of:=[.D1250]-[.D12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6" office:value-type="float" office:value="19984" calcext:value-type="float">
            <text:p>19984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231296296296296" calcext:value-type="float">
            <text:p>0,00231296296296296000</text:p>
          </table:table-cell>
          <table:table-cell table:formula="of:=[.D1251]-[.D12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6" office:value-type="float" office:value="20000" calcext:value-type="float">
            <text:p>2000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231481481481481" calcext:value-type="float">
            <text:p>0,00231481481481481000</text:p>
          </table:table-cell>
          <table:table-cell table:formula="of:=[.D1252]-[.D12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6" office:value-type="float" office:value="20016" calcext:value-type="float">
            <text:p>20016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231666666666667" calcext:value-type="float">
            <text:p>0,00231666666666667000</text:p>
          </table:table-cell>
          <table:table-cell table:formula="of:=[.D1253]-[.D12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6" office:value-type="float" office:value="20032" calcext:value-type="float">
            <text:p>20032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231851851851852" calcext:value-type="float">
            <text:p>0,00231851851851852000</text:p>
          </table:table-cell>
          <table:table-cell table:formula="of:=[.D1254]-[.D12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6" office:value-type="float" office:value="20048" calcext:value-type="float">
            <text:p>20048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232037037037037" calcext:value-type="float">
            <text:p>0,00232037037037037000</text:p>
          </table:table-cell>
          <table:table-cell table:formula="of:=[.D1255]-[.D12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6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232222222222222" calcext:value-type="float">
            <text:p>0,00232222222222222000</text:p>
          </table:table-cell>
          <table:table-cell table:formula="of:=[.D1256]-[.D12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6" office:value-type="float" office:value="20080" calcext:value-type="float">
            <text:p>20080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232407407407407" calcext:value-type="float">
            <text:p>0,00232407407407407000</text:p>
          </table:table-cell>
          <table:table-cell table:formula="of:=[.D1257]-[.D12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6" office:value-type="float" office:value="20096" calcext:value-type="float">
            <text:p>20096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232592592592593" calcext:value-type="float">
            <text:p>0,00232592592592593000</text:p>
          </table:table-cell>
          <table:table-cell table:formula="of:=[.D1258]-[.D12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6" office:value-type="float" office:value="20112" calcext:value-type="float">
            <text:p>20112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232777777777778" calcext:value-type="float">
            <text:p>0,00232777777777778000</text:p>
          </table:table-cell>
          <table:table-cell table:formula="of:=[.D1259]-[.D1258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6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232962962962963" calcext:value-type="float">
            <text:p>0,00232962962962963000</text:p>
          </table:table-cell>
          <table:table-cell table:formula="of:=[.D1260]-[.D12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6" office:value-type="float" office:value="20144" calcext:value-type="float">
            <text:p>20144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233148148148148" calcext:value-type="float">
            <text:p>0,00233148148148148000</text:p>
          </table:table-cell>
          <table:table-cell table:formula="of:=[.D1261]-[.D12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6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233333333333333" calcext:value-type="float">
            <text:p>0,00233333333333333000</text:p>
          </table:table-cell>
          <table:table-cell table:formula="of:=[.D1262]-[.D12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6" office:value-type="float" office:value="20176" calcext:value-type="float">
            <text:p>20176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233518518518519" calcext:value-type="float">
            <text:p>0,00233518518518519000</text:p>
          </table:table-cell>
          <table:table-cell table:formula="of:=[.D1263]-[.D12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6" office:value-type="float" office:value="20192" calcext:value-type="float">
            <text:p>20192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233703703703704" calcext:value-type="float">
            <text:p>0,00233703703703704000</text:p>
          </table:table-cell>
          <table:table-cell table:formula="of:=[.D1264]-[.D12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6" office:value-type="float" office:value="20208" calcext:value-type="float">
            <text:p>20208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233888888888889" calcext:value-type="float">
            <text:p>0,00233888888888889000</text:p>
          </table:table-cell>
          <table:table-cell table:formula="of:=[.D1265]-[.D12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16" office:value-type="float" office:value="20224" calcext:value-type="float">
            <text:p>20224</text:p>
          </table:table-cell>
          <table:table-cell office:value-type="float" office:value="8640000" calcext:value-type="float">
            <text:p>8640000</text:p>
          </table:table-cell>
          <table:table-cell table:formula="of:=[.B1265]/[.C1265]" office:value-type="float" office:value="0.00234074074074074" calcext:value-type="float">
            <text:p>0,00234074074074074000</text:p>
          </table:table-cell>
          <table:table-cell table:formula="of:=[.D1266]-[.D12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16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1266]/[.C1266]" office:value-type="float" office:value="0.00234259259259259" calcext:value-type="float">
            <text:p>0,00234259259259259000</text:p>
          </table:table-cell>
          <table:table-cell table:formula="of:=[.D1267]-[.D12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16" office:value-type="float" office:value="20256" calcext:value-type="float">
            <text:p>20256</text:p>
          </table:table-cell>
          <table:table-cell office:value-type="float" office:value="8640000" calcext:value-type="float">
            <text:p>8640000</text:p>
          </table:table-cell>
          <table:table-cell table:formula="of:=[.B1267]/[.C1267]" office:value-type="float" office:value="0.00234444444444444" calcext:value-type="float">
            <text:p>0,00234444444444444000</text:p>
          </table:table-cell>
          <table:table-cell table:formula="of:=[.D1268]-[.D12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16" office:value-type="float" office:value="20272" calcext:value-type="float">
            <text:p>20272</text:p>
          </table:table-cell>
          <table:table-cell office:value-type="float" office:value="8640000" calcext:value-type="float">
            <text:p>8640000</text:p>
          </table:table-cell>
          <table:table-cell table:formula="of:=[.B1268]/[.C1268]" office:value-type="float" office:value="0.0023462962962963" calcext:value-type="float">
            <text:p>0,00234629629629630000</text:p>
          </table:table-cell>
          <table:table-cell table:formula="of:=[.D1269]-[.D12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16" office:value-type="float" office:value="20288" calcext:value-type="float">
            <text:p>20288</text:p>
          </table:table-cell>
          <table:table-cell office:value-type="float" office:value="8640000" calcext:value-type="float">
            <text:p>8640000</text:p>
          </table:table-cell>
          <table:table-cell table:formula="of:=[.B1269]/[.C1269]" office:value-type="float" office:value="0.00234814814814815" calcext:value-type="float">
            <text:p>0,00234814814814815000</text:p>
          </table:table-cell>
          <table:table-cell table:formula="of:=[.D1270]-[.D12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16" office:value-type="float" office:value="20304" calcext:value-type="float">
            <text:p>20304</text:p>
          </table:table-cell>
          <table:table-cell office:value-type="float" office:value="8640000" calcext:value-type="float">
            <text:p>8640000</text:p>
          </table:table-cell>
          <table:table-cell table:formula="of:=[.B1270]/[.C1270]" office:value-type="float" office:value="0.00235" calcext:value-type="float">
            <text:p>0,00235000000000000000</text:p>
          </table:table-cell>
          <table:table-cell table:formula="of:=[.D1271]-[.D12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16" office:value-type="float" office:value="20320" calcext:value-type="float">
            <text:p>20320</text:p>
          </table:table-cell>
          <table:table-cell office:value-type="float" office:value="8640000" calcext:value-type="float">
            <text:p>8640000</text:p>
          </table:table-cell>
          <table:table-cell table:formula="of:=[.B1271]/[.C1271]" office:value-type="float" office:value="0.00235185185185185" calcext:value-type="float">
            <text:p>0,00235185185185185000</text:p>
          </table:table-cell>
          <table:table-cell table:formula="of:=[.D1272]-[.D12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16" office:value-type="float" office:value="20336" calcext:value-type="float">
            <text:p>20336</text:p>
          </table:table-cell>
          <table:table-cell office:value-type="float" office:value="8640000" calcext:value-type="float">
            <text:p>8640000</text:p>
          </table:table-cell>
          <table:table-cell table:formula="of:=[.B1272]/[.C1272]" office:value-type="float" office:value="0.0023537037037037" calcext:value-type="float">
            <text:p>0,00235370370370370000</text:p>
          </table:table-cell>
          <table:table-cell table:formula="of:=[.D1273]-[.D12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16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1273]/[.C1273]" office:value-type="float" office:value="0.00235555555555556" calcext:value-type="float">
            <text:p>0,00235555555555556000</text:p>
          </table:table-cell>
          <table:table-cell table:formula="of:=[.D1274]-[.D12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16" office:value-type="float" office:value="20368" calcext:value-type="float">
            <text:p>20368</text:p>
          </table:table-cell>
          <table:table-cell office:value-type="float" office:value="8640000" calcext:value-type="float">
            <text:p>8640000</text:p>
          </table:table-cell>
          <table:table-cell table:formula="of:=[.B1274]/[.C1274]" office:value-type="float" office:value="0.00235740740740741" calcext:value-type="float">
            <text:p>0,00235740740740741000</text:p>
          </table:table-cell>
          <table:table-cell table:formula="of:=[.D1275]-[.D12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16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1275]/[.C1275]" office:value-type="float" office:value="0.00235925925925926" calcext:value-type="float">
            <text:p>0,00235925925925926000</text:p>
          </table:table-cell>
          <table:table-cell table:formula="of:=[.D1276]-[.D12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16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1276]/[.C1276]" office:value-type="float" office:value="0.00236111111111111" calcext:value-type="float">
            <text:p>0,00236111111111111000</text:p>
          </table:table-cell>
          <table:table-cell table:formula="of:=[.D1277]-[.D12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16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1277]/[.C1277]" office:value-type="float" office:value="0.00236296296296296" calcext:value-type="float">
            <text:p>0,00236296296296296000</text:p>
          </table:table-cell>
          <table:table-cell table:formula="of:=[.D1278]-[.D12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16" office:value-type="float" office:value="20432" calcext:value-type="float">
            <text:p>20432</text:p>
          </table:table-cell>
          <table:table-cell office:value-type="float" office:value="8640000" calcext:value-type="float">
            <text:p>8640000</text:p>
          </table:table-cell>
          <table:table-cell table:formula="of:=[.B1278]/[.C1278]" office:value-type="float" office:value="0.00236481481481482" calcext:value-type="float">
            <text:p>0,00236481481481482000</text:p>
          </table:table-cell>
          <table:table-cell table:formula="of:=[.D1279]-[.D12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16" office:value-type="float" office:value="20448" calcext:value-type="float">
            <text:p>20448</text:p>
          </table:table-cell>
          <table:table-cell office:value-type="float" office:value="8640000" calcext:value-type="float">
            <text:p>8640000</text:p>
          </table:table-cell>
          <table:table-cell table:formula="of:=[.B1279]/[.C1279]" office:value-type="float" office:value="0.00236666666666667" calcext:value-type="float">
            <text:p>0,00236666666666667000</text:p>
          </table:table-cell>
          <table:table-cell table:formula="of:=[.D1280]-[.D12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16" office:value-type="float" office:value="20464" calcext:value-type="float">
            <text:p>20464</text:p>
          </table:table-cell>
          <table:table-cell office:value-type="float" office:value="8640000" calcext:value-type="float">
            <text:p>8640000</text:p>
          </table:table-cell>
          <table:table-cell table:formula="of:=[.B1280]/[.C1280]" office:value-type="float" office:value="0.00236851851851852" calcext:value-type="float">
            <text:p>0,00236851851851852000</text:p>
          </table:table-cell>
          <table:table-cell table:formula="of:=[.D1281]-[.D12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16" office:value-type="float" office:value="20480" calcext:value-type="float">
            <text:p>20480</text:p>
          </table:table-cell>
          <table:table-cell office:value-type="float" office:value="8640000" calcext:value-type="float">
            <text:p>8640000</text:p>
          </table:table-cell>
          <table:table-cell table:formula="of:=[.B1281]/[.C1281]" office:value-type="float" office:value="0.00237037037037037" calcext:value-type="float">
            <text:p>0,00237037037037037000</text:p>
          </table:table-cell>
          <table:table-cell table:formula="of:=[.D1282]-[.D12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16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1282]/[.C1282]" office:value-type="float" office:value="0.00237222222222222" calcext:value-type="float">
            <text:p>0,00237222222222222000</text:p>
          </table:table-cell>
          <table:table-cell table:formula="of:=[.D1283]-[.D12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16" office:value-type="float" office:value="20512" calcext:value-type="float">
            <text:p>20512</text:p>
          </table:table-cell>
          <table:table-cell office:value-type="float" office:value="8640000" calcext:value-type="float">
            <text:p>8640000</text:p>
          </table:table-cell>
          <table:table-cell table:formula="of:=[.B1283]/[.C1283]" office:value-type="float" office:value="0.00237407407407407" calcext:value-type="float">
            <text:p>0,00237407407407407000</text:p>
          </table:table-cell>
          <table:table-cell table:formula="of:=[.D1284]-[.D12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16" office:value-type="float" office:value="20528" calcext:value-type="float">
            <text:p>20528</text:p>
          </table:table-cell>
          <table:table-cell office:value-type="float" office:value="8640000" calcext:value-type="float">
            <text:p>8640000</text:p>
          </table:table-cell>
          <table:table-cell table:formula="of:=[.B1284]/[.C1284]" office:value-type="float" office:value="0.00237592592592593" calcext:value-type="float">
            <text:p>0,00237592592592593000</text:p>
          </table:table-cell>
          <table:table-cell table:formula="of:=[.D1285]-[.D12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16" office:value-type="float" office:value="20544" calcext:value-type="float">
            <text:p>20544</text:p>
          </table:table-cell>
          <table:table-cell office:value-type="float" office:value="8640000" calcext:value-type="float">
            <text:p>8640000</text:p>
          </table:table-cell>
          <table:table-cell table:formula="of:=[.B1285]/[.C1285]" office:value-type="float" office:value="0.00237777777777778" calcext:value-type="float">
            <text:p>0,00237777777777778000</text:p>
          </table:table-cell>
          <table:table-cell table:formula="of:=[.D1286]-[.D12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16" office:value-type="float" office:value="20560" calcext:value-type="float">
            <text:p>20560</text:p>
          </table:table-cell>
          <table:table-cell office:value-type="float" office:value="8640000" calcext:value-type="float">
            <text:p>8640000</text:p>
          </table:table-cell>
          <table:table-cell table:formula="of:=[.B1286]/[.C1286]" office:value-type="float" office:value="0.00237962962962963" calcext:value-type="float">
            <text:p>0,00237962962962963000</text:p>
          </table:table-cell>
          <table:table-cell table:formula="of:=[.D1287]-[.D12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16" office:value-type="float" office:value="20576" calcext:value-type="float">
            <text:p>20576</text:p>
          </table:table-cell>
          <table:table-cell office:value-type="float" office:value="8640000" calcext:value-type="float">
            <text:p>8640000</text:p>
          </table:table-cell>
          <table:table-cell table:formula="of:=[.B1287]/[.C1287]" office:value-type="float" office:value="0.00238148148148148" calcext:value-type="float">
            <text:p>0,00238148148148148000</text:p>
          </table:table-cell>
          <table:table-cell table:formula="of:=[.D1288]-[.D12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16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1288]/[.C1288]" office:value-type="float" office:value="0.00238333333333333" calcext:value-type="float">
            <text:p>0,00238333333333333000</text:p>
          </table:table-cell>
          <table:table-cell table:formula="of:=[.D1289]-[.D12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16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1289]/[.C1289]" office:value-type="float" office:value="0.00238518518518519" calcext:value-type="float">
            <text:p>0,00238518518518519000</text:p>
          </table:table-cell>
          <table:table-cell table:formula="of:=[.D1290]-[.D12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16" office:value-type="float" office:value="20624" calcext:value-type="float">
            <text:p>20624</text:p>
          </table:table-cell>
          <table:table-cell office:value-type="float" office:value="8640000" calcext:value-type="float">
            <text:p>8640000</text:p>
          </table:table-cell>
          <table:table-cell table:formula="of:=[.B1290]/[.C1290]" office:value-type="float" office:value="0.00238703703703704" calcext:value-type="float">
            <text:p>0,00238703703703704000</text:p>
          </table:table-cell>
          <table:table-cell table:formula="of:=[.D1291]-[.D12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16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1291]/[.C1291]" office:value-type="float" office:value="0.00238888888888889" calcext:value-type="float">
            <text:p>0,00238888888888889000</text:p>
          </table:table-cell>
          <table:table-cell table:formula="of:=[.D1292]-[.D12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16" office:value-type="float" office:value="20656" calcext:value-type="float">
            <text:p>20656</text:p>
          </table:table-cell>
          <table:table-cell office:value-type="float" office:value="8640000" calcext:value-type="float">
            <text:p>8640000</text:p>
          </table:table-cell>
          <table:table-cell table:formula="of:=[.B1292]/[.C1292]" office:value-type="float" office:value="0.00239074074074074" calcext:value-type="float">
            <text:p>0,00239074074074074000</text:p>
          </table:table-cell>
          <table:table-cell table:formula="of:=[.D1293]-[.D12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16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1293]/[.C1293]" office:value-type="float" office:value="0.00239259259259259" calcext:value-type="float">
            <text:p>0,00239259259259259000</text:p>
          </table:table-cell>
          <table:table-cell table:formula="of:=[.D1294]-[.D12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16" office:value-type="float" office:value="20688" calcext:value-type="float">
            <text:p>20688</text:p>
          </table:table-cell>
          <table:table-cell office:value-type="float" office:value="8640000" calcext:value-type="float">
            <text:p>8640000</text:p>
          </table:table-cell>
          <table:table-cell table:formula="of:=[.B1294]/[.C1294]" office:value-type="float" office:value="0.00239444444444444" calcext:value-type="float">
            <text:p>0,00239444444444444000</text:p>
          </table:table-cell>
          <table:table-cell table:formula="of:=[.D1295]-[.D12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16" office:value-type="float" office:value="20704" calcext:value-type="float">
            <text:p>20704</text:p>
          </table:table-cell>
          <table:table-cell office:value-type="float" office:value="8640000" calcext:value-type="float">
            <text:p>8640000</text:p>
          </table:table-cell>
          <table:table-cell table:formula="of:=[.B1295]/[.C1295]" office:value-type="float" office:value="0.0023962962962963" calcext:value-type="float">
            <text:p>0,00239629629629630000</text:p>
          </table:table-cell>
          <table:table-cell table:formula="of:=[.D1296]-[.D12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16" office:value-type="float" office:value="20720" calcext:value-type="float">
            <text:p>20720</text:p>
          </table:table-cell>
          <table:table-cell office:value-type="float" office:value="8640000" calcext:value-type="float">
            <text:p>8640000</text:p>
          </table:table-cell>
          <table:table-cell table:formula="of:=[.B1296]/[.C1296]" office:value-type="float" office:value="0.00239814814814815" calcext:value-type="float">
            <text:p>0,00239814814814815000</text:p>
          </table:table-cell>
          <table:table-cell table:formula="of:=[.D1297]-[.D12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16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1297]/[.C1297]" office:value-type="float" office:value="0.0024" calcext:value-type="float">
            <text:p>0,00240000000000000000</text:p>
          </table:table-cell>
          <table:table-cell table:formula="of:=[.D1298]-[.D1297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16" office:value-type="float" office:value="20752" calcext:value-type="float">
            <text:p>20752</text:p>
          </table:table-cell>
          <table:table-cell office:value-type="float" office:value="8640000" calcext:value-type="float">
            <text:p>8640000</text:p>
          </table:table-cell>
          <table:table-cell table:formula="of:=[.B1298]/[.C1298]" office:value-type="float" office:value="0.00240185185185185" calcext:value-type="float">
            <text:p>0,00240185185185185000</text:p>
          </table:table-cell>
          <table:table-cell table:formula="of:=[.D1299]-[.D12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16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1299]/[.C1299]" office:value-type="float" office:value="0.0024037037037037" calcext:value-type="float">
            <text:p>0,00240370370370370000</text:p>
          </table:table-cell>
          <table:table-cell table:formula="of:=[.D1300]-[.D12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16" office:value-type="float" office:value="20784" calcext:value-type="float">
            <text:p>20784</text:p>
          </table:table-cell>
          <table:table-cell office:value-type="float" office:value="8640000" calcext:value-type="float">
            <text:p>8640000</text:p>
          </table:table-cell>
          <table:table-cell table:formula="of:=[.B1300]/[.C1300]" office:value-type="float" office:value="0.00240555555555556" calcext:value-type="float">
            <text:p>0,00240555555555556000</text:p>
          </table:table-cell>
          <table:table-cell table:formula="of:=[.D1301]-[.D13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16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1301]/[.C1301]" office:value-type="float" office:value="0.00240740740740741" calcext:value-type="float">
            <text:p>0,00240740740740741000</text:p>
          </table:table-cell>
          <table:table-cell table:formula="of:=[.D1302]-[.D13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16" office:value-type="float" office:value="20816" calcext:value-type="float">
            <text:p>20816</text:p>
          </table:table-cell>
          <table:table-cell office:value-type="float" office:value="8640000" calcext:value-type="float">
            <text:p>8640000</text:p>
          </table:table-cell>
          <table:table-cell table:formula="of:=[.B1302]/[.C1302]" office:value-type="float" office:value="0.00240925925925926" calcext:value-type="float">
            <text:p>0,00240925925925926000</text:p>
          </table:table-cell>
          <table:table-cell table:formula="of:=[.D1303]-[.D13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16" office:value-type="float" office:value="20832" calcext:value-type="float">
            <text:p>20832</text:p>
          </table:table-cell>
          <table:table-cell office:value-type="float" office:value="8640000" calcext:value-type="float">
            <text:p>8640000</text:p>
          </table:table-cell>
          <table:table-cell table:formula="of:=[.B1303]/[.C1303]" office:value-type="float" office:value="0.00241111111111111" calcext:value-type="float">
            <text:p>0,00241111111111111000</text:p>
          </table:table-cell>
          <table:table-cell table:formula="of:=[.D1304]-[.D13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16" office:value-type="float" office:value="20848" calcext:value-type="float">
            <text:p>20848</text:p>
          </table:table-cell>
          <table:table-cell office:value-type="float" office:value="8640000" calcext:value-type="float">
            <text:p>8640000</text:p>
          </table:table-cell>
          <table:table-cell table:formula="of:=[.B1304]/[.C1304]" office:value-type="float" office:value="0.00241296296296296" calcext:value-type="float">
            <text:p>0,00241296296296296000</text:p>
          </table:table-cell>
          <table:table-cell table:formula="of:=[.D1305]-[.D13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16" office:value-type="float" office:value="20864" calcext:value-type="float">
            <text:p>20864</text:p>
          </table:table-cell>
          <table:table-cell office:value-type="float" office:value="8640000" calcext:value-type="float">
            <text:p>8640000</text:p>
          </table:table-cell>
          <table:table-cell table:formula="of:=[.B1305]/[.C1305]" office:value-type="float" office:value="0.00241481481481482" calcext:value-type="float">
            <text:p>0,00241481481481482000</text:p>
          </table:table-cell>
          <table:table-cell table:formula="of:=[.D1306]-[.D13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16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1306]/[.C1306]" office:value-type="float" office:value="0.00241666666666667" calcext:value-type="float">
            <text:p>0,00241666666666667000</text:p>
          </table:table-cell>
          <table:table-cell table:formula="of:=[.D1307]-[.D13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16" office:value-type="float" office:value="20896" calcext:value-type="float">
            <text:p>20896</text:p>
          </table:table-cell>
          <table:table-cell office:value-type="float" office:value="8640000" calcext:value-type="float">
            <text:p>8640000</text:p>
          </table:table-cell>
          <table:table-cell table:formula="of:=[.B1307]/[.C1307]" office:value-type="float" office:value="0.00241851851851852" calcext:value-type="float">
            <text:p>0,00241851851851852000</text:p>
          </table:table-cell>
          <table:table-cell table:formula="of:=[.D1308]-[.D13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16" office:value-type="float" office:value="20912" calcext:value-type="float">
            <text:p>20912</text:p>
          </table:table-cell>
          <table:table-cell office:value-type="float" office:value="8640000" calcext:value-type="float">
            <text:p>8640000</text:p>
          </table:table-cell>
          <table:table-cell table:formula="of:=[.B1308]/[.C1308]" office:value-type="float" office:value="0.00242037037037037" calcext:value-type="float">
            <text:p>0,00242037037037037000</text:p>
          </table:table-cell>
          <table:table-cell table:formula="of:=[.D1309]-[.D13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16" office:value-type="float" office:value="20928" calcext:value-type="float">
            <text:p>20928</text:p>
          </table:table-cell>
          <table:table-cell office:value-type="float" office:value="8640000" calcext:value-type="float">
            <text:p>8640000</text:p>
          </table:table-cell>
          <table:table-cell table:formula="of:=[.B1309]/[.C1309]" office:value-type="float" office:value="0.00242222222222222" calcext:value-type="float">
            <text:p>0,00242222222222222000</text:p>
          </table:table-cell>
          <table:table-cell table:formula="of:=[.D1310]-[.D13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16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1310]/[.C1310]" office:value-type="float" office:value="0.00242407407407407" calcext:value-type="float">
            <text:p>0,00242407407407407000</text:p>
          </table:table-cell>
          <table:table-cell table:formula="of:=[.D1311]-[.D13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16" office:value-type="float" office:value="20960" calcext:value-type="float">
            <text:p>20960</text:p>
          </table:table-cell>
          <table:table-cell office:value-type="float" office:value="8640000" calcext:value-type="float">
            <text:p>8640000</text:p>
          </table:table-cell>
          <table:table-cell table:formula="of:=[.B1311]/[.C1311]" office:value-type="float" office:value="0.00242592592592593" calcext:value-type="float">
            <text:p>0,00242592592592593000</text:p>
          </table:table-cell>
          <table:table-cell table:formula="of:=[.D1312]-[.D13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16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1312]/[.C1312]" office:value-type="float" office:value="0.00242777777777778" calcext:value-type="float">
            <text:p>0,00242777777777778000</text:p>
          </table:table-cell>
          <table:table-cell table:formula="of:=[.D1313]-[.D13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16" office:value-type="float" office:value="20992" calcext:value-type="float">
            <text:p>20992</text:p>
          </table:table-cell>
          <table:table-cell office:value-type="float" office:value="8640000" calcext:value-type="float">
            <text:p>8640000</text:p>
          </table:table-cell>
          <table:table-cell table:formula="of:=[.B1313]/[.C1313]" office:value-type="float" office:value="0.00242962962962963" calcext:value-type="float">
            <text:p>0,00242962962962963000</text:p>
          </table:table-cell>
          <table:table-cell table:formula="of:=[.D1314]-[.D131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16" office:value-type="float" office:value="21008" calcext:value-type="float">
            <text:p>21008</text:p>
          </table:table-cell>
          <table:table-cell office:value-type="float" office:value="8640000" calcext:value-type="float">
            <text:p>8640000</text:p>
          </table:table-cell>
          <table:table-cell table:formula="of:=[.B1314]/[.C1314]" office:value-type="float" office:value="0.00243148148148148" calcext:value-type="float">
            <text:p>0,00243148148148148000</text:p>
          </table:table-cell>
          <table:table-cell table:formula="of:=[.D1315]-[.D13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16" office:value-type="float" office:value="21024" calcext:value-type="float">
            <text:p>21024</text:p>
          </table:table-cell>
          <table:table-cell office:value-type="float" office:value="8640000" calcext:value-type="float">
            <text:p>8640000</text:p>
          </table:table-cell>
          <table:table-cell table:formula="of:=[.B1315]/[.C1315]" office:value-type="float" office:value="0.00243333333333333" calcext:value-type="float">
            <text:p>0,00243333333333333000</text:p>
          </table:table-cell>
          <table:table-cell table:formula="of:=[.D1316]-[.D13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16" office:value-type="float" office:value="21040" calcext:value-type="float">
            <text:p>21040</text:p>
          </table:table-cell>
          <table:table-cell office:value-type="float" office:value="8640000" calcext:value-type="float">
            <text:p>8640000</text:p>
          </table:table-cell>
          <table:table-cell table:formula="of:=[.B1316]/[.C1316]" office:value-type="float" office:value="0.00243518518518519" calcext:value-type="float">
            <text:p>0,00243518518518519000</text:p>
          </table:table-cell>
          <table:table-cell table:formula="of:=[.D1317]-[.D13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16" office:value-type="float" office:value="21056" calcext:value-type="float">
            <text:p>21056</text:p>
          </table:table-cell>
          <table:table-cell office:value-type="float" office:value="8640000" calcext:value-type="float">
            <text:p>8640000</text:p>
          </table:table-cell>
          <table:table-cell table:formula="of:=[.B1317]/[.C1317]" office:value-type="float" office:value="0.00243703703703704" calcext:value-type="float">
            <text:p>0,00243703703703704000</text:p>
          </table:table-cell>
          <table:table-cell table:formula="of:=[.D1318]-[.D13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16" office:value-type="float" office:value="21072" calcext:value-type="float">
            <text:p>21072</text:p>
          </table:table-cell>
          <table:table-cell office:value-type="float" office:value="8640000" calcext:value-type="float">
            <text:p>8640000</text:p>
          </table:table-cell>
          <table:table-cell table:formula="of:=[.B1318]/[.C1318]" office:value-type="float" office:value="0.00243888888888889" calcext:value-type="float">
            <text:p>0,00243888888888889000</text:p>
          </table:table-cell>
          <table:table-cell table:formula="of:=[.D1319]-[.D13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16" office:value-type="float" office:value="21088" calcext:value-type="float">
            <text:p>21088</text:p>
          </table:table-cell>
          <table:table-cell office:value-type="float" office:value="8640000" calcext:value-type="float">
            <text:p>8640000</text:p>
          </table:table-cell>
          <table:table-cell table:formula="of:=[.B1319]/[.C1319]" office:value-type="float" office:value="0.00244074074074074" calcext:value-type="float">
            <text:p>0,00244074074074074000</text:p>
          </table:table-cell>
          <table:table-cell table:formula="of:=[.D1320]-[.D13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16" office:value-type="float" office:value="21104" calcext:value-type="float">
            <text:p>21104</text:p>
          </table:table-cell>
          <table:table-cell office:value-type="float" office:value="8640000" calcext:value-type="float">
            <text:p>8640000</text:p>
          </table:table-cell>
          <table:table-cell table:formula="of:=[.B1320]/[.C1320]" office:value-type="float" office:value="0.00244259259259259" calcext:value-type="float">
            <text:p>0,00244259259259259000</text:p>
          </table:table-cell>
          <table:table-cell table:formula="of:=[.D1321]-[.D13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16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1321]/[.C1321]" office:value-type="float" office:value="0.00244444444444444" calcext:value-type="float">
            <text:p>0,00244444444444444000</text:p>
          </table:table-cell>
          <table:table-cell table:formula="of:=[.D1322]-[.D13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16" office:value-type="float" office:value="21136" calcext:value-type="float">
            <text:p>21136</text:p>
          </table:table-cell>
          <table:table-cell office:value-type="float" office:value="8640000" calcext:value-type="float">
            <text:p>8640000</text:p>
          </table:table-cell>
          <table:table-cell table:formula="of:=[.B1322]/[.C1322]" office:value-type="float" office:value="0.0024462962962963" calcext:value-type="float">
            <text:p>0,00244629629629630000</text:p>
          </table:table-cell>
          <table:table-cell table:formula="of:=[.D1323]-[.D13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16" office:value-type="float" office:value="21152" calcext:value-type="float">
            <text:p>21152</text:p>
          </table:table-cell>
          <table:table-cell office:value-type="float" office:value="8640000" calcext:value-type="float">
            <text:p>8640000</text:p>
          </table:table-cell>
          <table:table-cell table:formula="of:=[.B1323]/[.C1323]" office:value-type="float" office:value="0.00244814814814815" calcext:value-type="float">
            <text:p>0,00244814814814815000</text:p>
          </table:table-cell>
          <table:table-cell table:formula="of:=[.D1324]-[.D13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16" office:value-type="float" office:value="21168" calcext:value-type="float">
            <text:p>21168</text:p>
          </table:table-cell>
          <table:table-cell office:value-type="float" office:value="8640000" calcext:value-type="float">
            <text:p>8640000</text:p>
          </table:table-cell>
          <table:table-cell table:formula="of:=[.B1324]/[.C1324]" office:value-type="float" office:value="0.00245" calcext:value-type="float">
            <text:p>0,00245000000000000000</text:p>
          </table:table-cell>
          <table:table-cell table:formula="of:=[.D1325]-[.D13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16" office:value-type="float" office:value="21184" calcext:value-type="float">
            <text:p>21184</text:p>
          </table:table-cell>
          <table:table-cell office:value-type="float" office:value="8640000" calcext:value-type="float">
            <text:p>8640000</text:p>
          </table:table-cell>
          <table:table-cell table:formula="of:=[.B1325]/[.C1325]" office:value-type="float" office:value="0.00245185185185185" calcext:value-type="float">
            <text:p>0,00245185185185185000</text:p>
          </table:table-cell>
          <table:table-cell table:formula="of:=[.D1326]-[.D13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16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1326]/[.C1326]" office:value-type="float" office:value="0.0024537037037037" calcext:value-type="float">
            <text:p>0,00245370370370370000</text:p>
          </table:table-cell>
          <table:table-cell table:formula="of:=[.D1327]-[.D13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16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1327]/[.C1327]" office:value-type="float" office:value="0.00245555555555556" calcext:value-type="float">
            <text:p>0,00245555555555556000</text:p>
          </table:table-cell>
          <table:table-cell table:formula="of:=[.D1328]-[.D13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16" office:value-type="float" office:value="21232" calcext:value-type="float">
            <text:p>21232</text:p>
          </table:table-cell>
          <table:table-cell office:value-type="float" office:value="8640000" calcext:value-type="float">
            <text:p>8640000</text:p>
          </table:table-cell>
          <table:table-cell table:formula="of:=[.B1328]/[.C1328]" office:value-type="float" office:value="0.00245740740740741" calcext:value-type="float">
            <text:p>0,00245740740740741000</text:p>
          </table:table-cell>
          <table:table-cell table:formula="of:=[.D1329]-[.D13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16" office:value-type="float" office:value="21248" calcext:value-type="float">
            <text:p>21248</text:p>
          </table:table-cell>
          <table:table-cell office:value-type="float" office:value="8640000" calcext:value-type="float">
            <text:p>8640000</text:p>
          </table:table-cell>
          <table:table-cell table:formula="of:=[.B1329]/[.C1329]" office:value-type="float" office:value="0.00245925925925926" calcext:value-type="float">
            <text:p>0,00245925925925926000</text:p>
          </table:table-cell>
          <table:table-cell table:formula="of:=[.D1330]-[.D13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16" office:value-type="float" office:value="21264" calcext:value-type="float">
            <text:p>21264</text:p>
          </table:table-cell>
          <table:table-cell office:value-type="float" office:value="8640000" calcext:value-type="float">
            <text:p>8640000</text:p>
          </table:table-cell>
          <table:table-cell table:formula="of:=[.B1330]/[.C1330]" office:value-type="float" office:value="0.00246111111111111" calcext:value-type="float">
            <text:p>0,00246111111111111000</text:p>
          </table:table-cell>
          <table:table-cell table:formula="of:=[.D1331]-[.D13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16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1331]/[.C1331]" office:value-type="float" office:value="0.00246296296296296" calcext:value-type="float">
            <text:p>0,00246296296296296000</text:p>
          </table:table-cell>
          <table:table-cell table:formula="of:=[.D1332]-[.D13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16" office:value-type="float" office:value="21296" calcext:value-type="float">
            <text:p>21296</text:p>
          </table:table-cell>
          <table:table-cell office:value-type="float" office:value="8640000" calcext:value-type="float">
            <text:p>8640000</text:p>
          </table:table-cell>
          <table:table-cell table:formula="of:=[.B1332]/[.C1332]" office:value-type="float" office:value="0.00246481481481481" calcext:value-type="float">
            <text:p>0,00246481481481481000</text:p>
          </table:table-cell>
          <table:table-cell table:formula="of:=[.D1333]-[.D13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16" office:value-type="float" office:value="21312" calcext:value-type="float">
            <text:p>21312</text:p>
          </table:table-cell>
          <table:table-cell office:value-type="float" office:value="8640000" calcext:value-type="float">
            <text:p>8640000</text:p>
          </table:table-cell>
          <table:table-cell table:formula="of:=[.B1333]/[.C1333]" office:value-type="float" office:value="0.00246666666666667" calcext:value-type="float">
            <text:p>0,00246666666666667000</text:p>
          </table:table-cell>
          <table:table-cell table:formula="of:=[.D1334]-[.D13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16" office:value-type="float" office:value="21328" calcext:value-type="float">
            <text:p>21328</text:p>
          </table:table-cell>
          <table:table-cell office:value-type="float" office:value="8640000" calcext:value-type="float">
            <text:p>8640000</text:p>
          </table:table-cell>
          <table:table-cell table:formula="of:=[.B1334]/[.C1334]" office:value-type="float" office:value="0.00246851851851852" calcext:value-type="float">
            <text:p>0,00246851851851852000</text:p>
          </table:table-cell>
          <table:table-cell table:formula="of:=[.D1335]-[.D13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16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1335]/[.C1335]" office:value-type="float" office:value="0.00247037037037037" calcext:value-type="float">
            <text:p>0,00247037037037037000</text:p>
          </table:table-cell>
          <table:table-cell table:formula="of:=[.D1336]-[.D13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16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1336]/[.C1336]" office:value-type="float" office:value="0.00247222222222222" calcext:value-type="float">
            <text:p>0,00247222222222222000</text:p>
          </table:table-cell>
          <table:table-cell table:formula="of:=[.D1337]-[.D1336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16" office:value-type="float" office:value="21376" calcext:value-type="float">
            <text:p>21376</text:p>
          </table:table-cell>
          <table:table-cell office:value-type="float" office:value="8640000" calcext:value-type="float">
            <text:p>8640000</text:p>
          </table:table-cell>
          <table:table-cell table:formula="of:=[.B1337]/[.C1337]" office:value-type="float" office:value="0.00247407407407407" calcext:value-type="float">
            <text:p>0,00247407407407407000</text:p>
          </table:table-cell>
          <table:table-cell table:formula="of:=[.D1338]-[.D13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16" office:value-type="float" office:value="21392" calcext:value-type="float">
            <text:p>21392</text:p>
          </table:table-cell>
          <table:table-cell office:value-type="float" office:value="8640000" calcext:value-type="float">
            <text:p>8640000</text:p>
          </table:table-cell>
          <table:table-cell table:formula="of:=[.B1338]/[.C1338]" office:value-type="float" office:value="0.00247592592592593" calcext:value-type="float">
            <text:p>0,00247592592592593000</text:p>
          </table:table-cell>
          <table:table-cell table:formula="of:=[.D1339]-[.D13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16" office:value-type="float" office:value="21408" calcext:value-type="float">
            <text:p>21408</text:p>
          </table:table-cell>
          <table:table-cell office:value-type="float" office:value="8640000" calcext:value-type="float">
            <text:p>8640000</text:p>
          </table:table-cell>
          <table:table-cell table:formula="of:=[.B1339]/[.C1339]" office:value-type="float" office:value="0.00247777777777778" calcext:value-type="float">
            <text:p>0,00247777777777778000</text:p>
          </table:table-cell>
          <table:table-cell table:formula="of:=[.D1340]-[.D13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16" office:value-type="float" office:value="21424" calcext:value-type="float">
            <text:p>21424</text:p>
          </table:table-cell>
          <table:table-cell office:value-type="float" office:value="8640000" calcext:value-type="float">
            <text:p>8640000</text:p>
          </table:table-cell>
          <table:table-cell table:formula="of:=[.B1340]/[.C1340]" office:value-type="float" office:value="0.00247962962962963" calcext:value-type="float">
            <text:p>0,00247962962962963000</text:p>
          </table:table-cell>
          <table:table-cell table:formula="of:=[.D1341]-[.D13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16" office:value-type="float" office:value="21440" calcext:value-type="float">
            <text:p>21440</text:p>
          </table:table-cell>
          <table:table-cell office:value-type="float" office:value="8640000" calcext:value-type="float">
            <text:p>8640000</text:p>
          </table:table-cell>
          <table:table-cell table:formula="of:=[.B1341]/[.C1341]" office:value-type="float" office:value="0.00248148148148148" calcext:value-type="float">
            <text:p>0,00248148148148148000</text:p>
          </table:table-cell>
          <table:table-cell table:formula="of:=[.D1342]-[.D13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16" office:value-type="float" office:value="21456" calcext:value-type="float">
            <text:p>21456</text:p>
          </table:table-cell>
          <table:table-cell office:value-type="float" office:value="8640000" calcext:value-type="float">
            <text:p>8640000</text:p>
          </table:table-cell>
          <table:table-cell table:formula="of:=[.B1342]/[.C1342]" office:value-type="float" office:value="0.00248333333333333" calcext:value-type="float">
            <text:p>0,00248333333333333000</text:p>
          </table:table-cell>
          <table:table-cell table:formula="of:=[.D1343]-[.D13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16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1343]/[.C1343]" office:value-type="float" office:value="0.00248518518518519" calcext:value-type="float">
            <text:p>0,00248518518518519000</text:p>
          </table:table-cell>
          <table:table-cell table:formula="of:=[.D1344]-[.D13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16" office:value-type="float" office:value="21488" calcext:value-type="float">
            <text:p>21488</text:p>
          </table:table-cell>
          <table:table-cell office:value-type="float" office:value="8640000" calcext:value-type="float">
            <text:p>8640000</text:p>
          </table:table-cell>
          <table:table-cell table:formula="of:=[.B1344]/[.C1344]" office:value-type="float" office:value="0.00248703703703704" calcext:value-type="float">
            <text:p>0,00248703703703704000</text:p>
          </table:table-cell>
          <table:table-cell table:formula="of:=[.D1345]-[.D13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16" office:value-type="float" office:value="21504" calcext:value-type="float">
            <text:p>21504</text:p>
          </table:table-cell>
          <table:table-cell office:value-type="float" office:value="8640000" calcext:value-type="float">
            <text:p>8640000</text:p>
          </table:table-cell>
          <table:table-cell table:formula="of:=[.B1345]/[.C1345]" office:value-type="float" office:value="0.00248888888888889" calcext:value-type="float">
            <text:p>0,00248888888888889000</text:p>
          </table:table-cell>
          <table:table-cell table:formula="of:=[.D1346]-[.D13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16" office:value-type="float" office:value="21520" calcext:value-type="float">
            <text:p>21520</text:p>
          </table:table-cell>
          <table:table-cell office:value-type="float" office:value="8640000" calcext:value-type="float">
            <text:p>8640000</text:p>
          </table:table-cell>
          <table:table-cell table:formula="of:=[.B1346]/[.C1346]" office:value-type="float" office:value="0.00249074074074074" calcext:value-type="float">
            <text:p>0,00249074074074074000</text:p>
          </table:table-cell>
          <table:table-cell table:formula="of:=[.D1347]-[.D13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16" office:value-type="float" office:value="21536" calcext:value-type="float">
            <text:p>21536</text:p>
          </table:table-cell>
          <table:table-cell office:value-type="float" office:value="8640000" calcext:value-type="float">
            <text:p>8640000</text:p>
          </table:table-cell>
          <table:table-cell table:formula="of:=[.B1347]/[.C1347]" office:value-type="float" office:value="0.00249259259259259" calcext:value-type="float">
            <text:p>0,00249259259259259000</text:p>
          </table:table-cell>
          <table:table-cell table:formula="of:=[.D1348]-[.D13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16" office:value-type="float" office:value="21552" calcext:value-type="float">
            <text:p>21552</text:p>
          </table:table-cell>
          <table:table-cell office:value-type="float" office:value="8640000" calcext:value-type="float">
            <text:p>8640000</text:p>
          </table:table-cell>
          <table:table-cell table:formula="of:=[.B1348]/[.C1348]" office:value-type="float" office:value="0.00249444444444444" calcext:value-type="float">
            <text:p>0,00249444444444444000</text:p>
          </table:table-cell>
          <table:table-cell table:formula="of:=[.D1349]-[.D13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16" office:value-type="float" office:value="21568" calcext:value-type="float">
            <text:p>21568</text:p>
          </table:table-cell>
          <table:table-cell office:value-type="float" office:value="8640000" calcext:value-type="float">
            <text:p>8640000</text:p>
          </table:table-cell>
          <table:table-cell table:formula="of:=[.B1349]/[.C1349]" office:value-type="float" office:value="0.0024962962962963" calcext:value-type="float">
            <text:p>0,00249629629629630000</text:p>
          </table:table-cell>
          <table:table-cell table:formula="of:=[.D1350]-[.D13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16" office:value-type="float" office:value="21584" calcext:value-type="float">
            <text:p>21584</text:p>
          </table:table-cell>
          <table:table-cell office:value-type="float" office:value="8640000" calcext:value-type="float">
            <text:p>8640000</text:p>
          </table:table-cell>
          <table:table-cell table:formula="of:=[.B1350]/[.C1350]" office:value-type="float" office:value="0.00249814814814815" calcext:value-type="float">
            <text:p>0,00249814814814815000</text:p>
          </table:table-cell>
          <table:table-cell table:formula="of:=[.D1351]-[.D13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16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1351]/[.C1351]" office:value-type="float" office:value="0.0025" calcext:value-type="float">
            <text:p>0,00250000000000000000</text:p>
          </table:table-cell>
          <table:table-cell table:formula="of:=[.D1352]-[.D13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16" office:value-type="float" office:value="21616" calcext:value-type="float">
            <text:p>21616</text:p>
          </table:table-cell>
          <table:table-cell office:value-type="float" office:value="8640000" calcext:value-type="float">
            <text:p>8640000</text:p>
          </table:table-cell>
          <table:table-cell table:formula="of:=[.B1352]/[.C1352]" office:value-type="float" office:value="0.00250185185185185" calcext:value-type="float">
            <text:p>0,00250185185185185000</text:p>
          </table:table-cell>
          <table:table-cell table:formula="of:=[.D1353]-[.D135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16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1353]/[.C1353]" office:value-type="float" office:value="0.0025037037037037" calcext:value-type="float">
            <text:p>0,00250370370370370000</text:p>
          </table:table-cell>
          <table:table-cell table:formula="of:=[.D1354]-[.D13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16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1354]/[.C1354]" office:value-type="float" office:value="0.00250555555555556" calcext:value-type="float">
            <text:p>0,00250555555555556000</text:p>
          </table:table-cell>
          <table:table-cell table:formula="of:=[.D1355]-[.D13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16" office:value-type="float" office:value="21664" calcext:value-type="float">
            <text:p>21664</text:p>
          </table:table-cell>
          <table:table-cell office:value-type="float" office:value="8640000" calcext:value-type="float">
            <text:p>8640000</text:p>
          </table:table-cell>
          <table:table-cell table:formula="of:=[.B1355]/[.C1355]" office:value-type="float" office:value="0.00250740740740741" calcext:value-type="float">
            <text:p>0,00250740740740741000</text:p>
          </table:table-cell>
          <table:table-cell table:formula="of:=[.D1356]-[.D13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16" office:value-type="float" office:value="21680" calcext:value-type="float">
            <text:p>21680</text:p>
          </table:table-cell>
          <table:table-cell office:value-type="float" office:value="8640000" calcext:value-type="float">
            <text:p>8640000</text:p>
          </table:table-cell>
          <table:table-cell table:formula="of:=[.B1356]/[.C1356]" office:value-type="float" office:value="0.00250925925925926" calcext:value-type="float">
            <text:p>0,00250925925925926000</text:p>
          </table:table-cell>
          <table:table-cell table:formula="of:=[.D1357]-[.D13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16" office:value-type="float" office:value="21696" calcext:value-type="float">
            <text:p>21696</text:p>
          </table:table-cell>
          <table:table-cell office:value-type="float" office:value="8640000" calcext:value-type="float">
            <text:p>8640000</text:p>
          </table:table-cell>
          <table:table-cell table:formula="of:=[.B1357]/[.C1357]" office:value-type="float" office:value="0.00251111111111111" calcext:value-type="float">
            <text:p>0,00251111111111111000</text:p>
          </table:table-cell>
          <table:table-cell table:formula="of:=[.D1358]-[.D13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16" office:value-type="float" office:value="21712" calcext:value-type="float">
            <text:p>21712</text:p>
          </table:table-cell>
          <table:table-cell office:value-type="float" office:value="8640000" calcext:value-type="float">
            <text:p>8640000</text:p>
          </table:table-cell>
          <table:table-cell table:formula="of:=[.B1358]/[.C1358]" office:value-type="float" office:value="0.00251296296296296" calcext:value-type="float">
            <text:p>0,00251296296296296000</text:p>
          </table:table-cell>
          <table:table-cell table:formula="of:=[.D1359]-[.D13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16" office:value-type="float" office:value="21728" calcext:value-type="float">
            <text:p>21728</text:p>
          </table:table-cell>
          <table:table-cell office:value-type="float" office:value="8640000" calcext:value-type="float">
            <text:p>8640000</text:p>
          </table:table-cell>
          <table:table-cell table:formula="of:=[.B1359]/[.C1359]" office:value-type="float" office:value="0.00251481481481481" calcext:value-type="float">
            <text:p>0,00251481481481481000</text:p>
          </table:table-cell>
          <table:table-cell table:formula="of:=[.D1360]-[.D13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16" office:value-type="float" office:value="21744" calcext:value-type="float">
            <text:p>21744</text:p>
          </table:table-cell>
          <table:table-cell office:value-type="float" office:value="8640000" calcext:value-type="float">
            <text:p>8640000</text:p>
          </table:table-cell>
          <table:table-cell table:formula="of:=[.B1360]/[.C1360]" office:value-type="float" office:value="0.00251666666666667" calcext:value-type="float">
            <text:p>0,00251666666666667000</text:p>
          </table:table-cell>
          <table:table-cell table:formula="of:=[.D1361]-[.D13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16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1361]/[.C1361]" office:value-type="float" office:value="0.00251851851851852" calcext:value-type="float">
            <text:p>0,00251851851851852000</text:p>
          </table:table-cell>
          <table:table-cell table:formula="of:=[.D1362]-[.D13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16" office:value-type="float" office:value="21776" calcext:value-type="float">
            <text:p>21776</text:p>
          </table:table-cell>
          <table:table-cell office:value-type="float" office:value="8640000" calcext:value-type="float">
            <text:p>8640000</text:p>
          </table:table-cell>
          <table:table-cell table:formula="of:=[.B1362]/[.C1362]" office:value-type="float" office:value="0.00252037037037037" calcext:value-type="float">
            <text:p>0,00252037037037037000</text:p>
          </table:table-cell>
          <table:table-cell table:formula="of:=[.D1363]-[.D13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16" office:value-type="float" office:value="21792" calcext:value-type="float">
            <text:p>21792</text:p>
          </table:table-cell>
          <table:table-cell office:value-type="float" office:value="8640000" calcext:value-type="float">
            <text:p>8640000</text:p>
          </table:table-cell>
          <table:table-cell table:formula="of:=[.B1363]/[.C1363]" office:value-type="float" office:value="0.00252222222222222" calcext:value-type="float">
            <text:p>0,00252222222222222000</text:p>
          </table:table-cell>
          <table:table-cell table:formula="of:=[.D1364]-[.D13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16" office:value-type="float" office:value="21808" calcext:value-type="float">
            <text:p>21808</text:p>
          </table:table-cell>
          <table:table-cell office:value-type="float" office:value="8640000" calcext:value-type="float">
            <text:p>8640000</text:p>
          </table:table-cell>
          <table:table-cell table:formula="of:=[.B1364]/[.C1364]" office:value-type="float" office:value="0.00252407407407407" calcext:value-type="float">
            <text:p>0,00252407407407407000</text:p>
          </table:table-cell>
          <table:table-cell table:formula="of:=[.D1365]-[.D13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16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1365]/[.C1365]" office:value-type="float" office:value="0.00252592592592593" calcext:value-type="float">
            <text:p>0,00252592592592593000</text:p>
          </table:table-cell>
          <table:table-cell table:formula="of:=[.D1366]-[.D13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16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1366]/[.C1366]" office:value-type="float" office:value="0.00252777777777778" calcext:value-type="float">
            <text:p>0,00252777777777778000</text:p>
          </table:table-cell>
          <table:table-cell table:formula="of:=[.D1367]-[.D13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16" office:value-type="float" office:value="21856" calcext:value-type="float">
            <text:p>21856</text:p>
          </table:table-cell>
          <table:table-cell office:value-type="float" office:value="8640000" calcext:value-type="float">
            <text:p>8640000</text:p>
          </table:table-cell>
          <table:table-cell table:formula="of:=[.B1367]/[.C1367]" office:value-type="float" office:value="0.00252962962962963" calcext:value-type="float">
            <text:p>0,00252962962962963000</text:p>
          </table:table-cell>
          <table:table-cell table:formula="of:=[.D1368]-[.D13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16" office:value-type="float" office:value="21872" calcext:value-type="float">
            <text:p>21872</text:p>
          </table:table-cell>
          <table:table-cell office:value-type="float" office:value="8640000" calcext:value-type="float">
            <text:p>8640000</text:p>
          </table:table-cell>
          <table:table-cell table:formula="of:=[.B1368]/[.C1368]" office:value-type="float" office:value="0.00253148148148148" calcext:value-type="float">
            <text:p>0,00253148148148148000</text:p>
          </table:table-cell>
          <table:table-cell table:formula="of:=[.D1369]-[.D13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16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1369]/[.C1369]" office:value-type="float" office:value="0.00253333333333333" calcext:value-type="float">
            <text:p>0,00253333333333333000</text:p>
          </table:table-cell>
          <table:table-cell table:formula="of:=[.D1370]-[.D13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16" office:value-type="float" office:value="21904" calcext:value-type="float">
            <text:p>21904</text:p>
          </table:table-cell>
          <table:table-cell office:value-type="float" office:value="8640000" calcext:value-type="float">
            <text:p>8640000</text:p>
          </table:table-cell>
          <table:table-cell table:formula="of:=[.B1370]/[.C1370]" office:value-type="float" office:value="0.00253518518518519" calcext:value-type="float">
            <text:p>0,00253518518518519000</text:p>
          </table:table-cell>
          <table:table-cell table:formula="of:=[.D1371]-[.D13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16" office:value-type="float" office:value="21920" calcext:value-type="float">
            <text:p>21920</text:p>
          </table:table-cell>
          <table:table-cell office:value-type="float" office:value="8640000" calcext:value-type="float">
            <text:p>8640000</text:p>
          </table:table-cell>
          <table:table-cell table:formula="of:=[.B1371]/[.C1371]" office:value-type="float" office:value="0.00253703703703704" calcext:value-type="float">
            <text:p>0,00253703703703704000</text:p>
          </table:table-cell>
          <table:table-cell table:formula="of:=[.D1372]-[.D13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16" office:value-type="float" office:value="21936" calcext:value-type="float">
            <text:p>21936</text:p>
          </table:table-cell>
          <table:table-cell office:value-type="float" office:value="8640000" calcext:value-type="float">
            <text:p>8640000</text:p>
          </table:table-cell>
          <table:table-cell table:formula="of:=[.B1372]/[.C1372]" office:value-type="float" office:value="0.00253888888888889" calcext:value-type="float">
            <text:p>0,00253888888888889000</text:p>
          </table:table-cell>
          <table:table-cell table:formula="of:=[.D1373]-[.D13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16" office:value-type="float" office:value="21952" calcext:value-type="float">
            <text:p>21952</text:p>
          </table:table-cell>
          <table:table-cell office:value-type="float" office:value="8640000" calcext:value-type="float">
            <text:p>8640000</text:p>
          </table:table-cell>
          <table:table-cell table:formula="of:=[.B1373]/[.C1373]" office:value-type="float" office:value="0.00254074074074074" calcext:value-type="float">
            <text:p>0,00254074074074074000</text:p>
          </table:table-cell>
          <table:table-cell table:formula="of:=[.D1374]-[.D13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16" office:value-type="float" office:value="21968" calcext:value-type="float">
            <text:p>21968</text:p>
          </table:table-cell>
          <table:table-cell office:value-type="float" office:value="8640000" calcext:value-type="float">
            <text:p>8640000</text:p>
          </table:table-cell>
          <table:table-cell table:formula="of:=[.B1374]/[.C1374]" office:value-type="float" office:value="0.00254259259259259" calcext:value-type="float">
            <text:p>0,00254259259259259000</text:p>
          </table:table-cell>
          <table:table-cell table:formula="of:=[.D1375]-[.D1374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16" office:value-type="float" office:value="21984" calcext:value-type="float">
            <text:p>21984</text:p>
          </table:table-cell>
          <table:table-cell office:value-type="float" office:value="8640000" calcext:value-type="float">
            <text:p>8640000</text:p>
          </table:table-cell>
          <table:table-cell table:formula="of:=[.B1375]/[.C1375]" office:value-type="float" office:value="0.00254444444444444" calcext:value-type="float">
            <text:p>0,00254444444444444000</text:p>
          </table:table-cell>
          <table:table-cell table:formula="of:=[.D1376]-[.D13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16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1376]/[.C1376]" office:value-type="float" office:value="0.0025462962962963" calcext:value-type="float">
            <text:p>0,00254629629629630000</text:p>
          </table:table-cell>
          <table:table-cell table:formula="of:=[.D1377]-[.D13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16" office:value-type="float" office:value="22016" calcext:value-type="float">
            <text:p>22016</text:p>
          </table:table-cell>
          <table:table-cell office:value-type="float" office:value="8640000" calcext:value-type="float">
            <text:p>8640000</text:p>
          </table:table-cell>
          <table:table-cell table:formula="of:=[.B1377]/[.C1377]" office:value-type="float" office:value="0.00254814814814815" calcext:value-type="float">
            <text:p>0,00254814814814815000</text:p>
          </table:table-cell>
          <table:table-cell table:formula="of:=[.D1378]-[.D13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16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1378]/[.C1378]" office:value-type="float" office:value="0.00255" calcext:value-type="float">
            <text:p>0,00255000000000000000</text:p>
          </table:table-cell>
          <table:table-cell table:formula="of:=[.D1379]-[.D13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16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1379]/[.C1379]" office:value-type="float" office:value="0.00255185185185185" calcext:value-type="float">
            <text:p>0,00255185185185185000</text:p>
          </table:table-cell>
          <table:table-cell table:formula="of:=[.D1380]-[.D13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16" office:value-type="float" office:value="22064" calcext:value-type="float">
            <text:p>22064</text:p>
          </table:table-cell>
          <table:table-cell office:value-type="float" office:value="8640000" calcext:value-type="float">
            <text:p>8640000</text:p>
          </table:table-cell>
          <table:table-cell table:formula="of:=[.B1380]/[.C1380]" office:value-type="float" office:value="0.0025537037037037" calcext:value-type="float">
            <text:p>0,00255370370370370000</text:p>
          </table:table-cell>
          <table:table-cell table:formula="of:=[.D1381]-[.D13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16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1381]/[.C1381]" office:value-type="float" office:value="0.00255555555555556" calcext:value-type="float">
            <text:p>0,00255555555555556000</text:p>
          </table:table-cell>
          <table:table-cell table:formula="of:=[.D1382]-[.D13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16" office:value-type="float" office:value="22096" calcext:value-type="float">
            <text:p>22096</text:p>
          </table:table-cell>
          <table:table-cell office:value-type="float" office:value="8640000" calcext:value-type="float">
            <text:p>8640000</text:p>
          </table:table-cell>
          <table:table-cell table:formula="of:=[.B1382]/[.C1382]" office:value-type="float" office:value="0.00255740740740741" calcext:value-type="float">
            <text:p>0,00255740740740741000</text:p>
          </table:table-cell>
          <table:table-cell table:formula="of:=[.D1383]-[.D13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16" office:value-type="float" office:value="22112" calcext:value-type="float">
            <text:p>22112</text:p>
          </table:table-cell>
          <table:table-cell office:value-type="float" office:value="8640000" calcext:value-type="float">
            <text:p>8640000</text:p>
          </table:table-cell>
          <table:table-cell table:formula="of:=[.B1383]/[.C1383]" office:value-type="float" office:value="0.00255925925925926" calcext:value-type="float">
            <text:p>0,00255925925925926000</text:p>
          </table:table-cell>
          <table:table-cell table:formula="of:=[.D1384]-[.D13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16" office:value-type="float" office:value="22128" calcext:value-type="float">
            <text:p>22128</text:p>
          </table:table-cell>
          <table:table-cell office:value-type="float" office:value="8640000" calcext:value-type="float">
            <text:p>8640000</text:p>
          </table:table-cell>
          <table:table-cell table:formula="of:=[.B1384]/[.C1384]" office:value-type="float" office:value="0.00256111111111111" calcext:value-type="float">
            <text:p>0,00256111111111111000</text:p>
          </table:table-cell>
          <table:table-cell table:formula="of:=[.D1385]-[.D13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16" office:value-type="float" office:value="22144" calcext:value-type="float">
            <text:p>22144</text:p>
          </table:table-cell>
          <table:table-cell office:value-type="float" office:value="8640000" calcext:value-type="float">
            <text:p>8640000</text:p>
          </table:table-cell>
          <table:table-cell table:formula="of:=[.B1385]/[.C1385]" office:value-type="float" office:value="0.00256296296296296" calcext:value-type="float">
            <text:p>0,00256296296296296000</text:p>
          </table:table-cell>
          <table:table-cell table:formula="of:=[.D1386]-[.D13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16" office:value-type="float" office:value="22160" calcext:value-type="float">
            <text:p>22160</text:p>
          </table:table-cell>
          <table:table-cell office:value-type="float" office:value="8640000" calcext:value-type="float">
            <text:p>8640000</text:p>
          </table:table-cell>
          <table:table-cell table:formula="of:=[.B1386]/[.C1386]" office:value-type="float" office:value="0.00256481481481482" calcext:value-type="float">
            <text:p>0,00256481481481482000</text:p>
          </table:table-cell>
          <table:table-cell table:formula="of:=[.D1387]-[.D13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16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1387]/[.C1387]" office:value-type="float" office:value="0.00256666666666667" calcext:value-type="float">
            <text:p>0,00256666666666667000</text:p>
          </table:table-cell>
          <table:table-cell table:formula="of:=[.D1388]-[.D13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16" office:value-type="float" office:value="22192" calcext:value-type="float">
            <text:p>22192</text:p>
          </table:table-cell>
          <table:table-cell office:value-type="float" office:value="8640000" calcext:value-type="float">
            <text:p>8640000</text:p>
          </table:table-cell>
          <table:table-cell table:formula="of:=[.B1388]/[.C1388]" office:value-type="float" office:value="0.00256851851851852" calcext:value-type="float">
            <text:p>0,00256851851851852000</text:p>
          </table:table-cell>
          <table:table-cell table:formula="of:=[.D1389]-[.D13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16" office:value-type="float" office:value="22208" calcext:value-type="float">
            <text:p>22208</text:p>
          </table:table-cell>
          <table:table-cell office:value-type="float" office:value="8640000" calcext:value-type="float">
            <text:p>8640000</text:p>
          </table:table-cell>
          <table:table-cell table:formula="of:=[.B1389]/[.C1389]" office:value-type="float" office:value="0.00257037037037037" calcext:value-type="float">
            <text:p>0,00257037037037037000</text:p>
          </table:table-cell>
          <table:table-cell table:formula="of:=[.D1390]-[.D13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16" office:value-type="float" office:value="22224" calcext:value-type="float">
            <text:p>22224</text:p>
          </table:table-cell>
          <table:table-cell office:value-type="float" office:value="8640000" calcext:value-type="float">
            <text:p>8640000</text:p>
          </table:table-cell>
          <table:table-cell table:formula="of:=[.B1390]/[.C1390]" office:value-type="float" office:value="0.00257222222222222" calcext:value-type="float">
            <text:p>0,00257222222222222000</text:p>
          </table:table-cell>
          <table:table-cell table:formula="of:=[.D1391]-[.D13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16" office:value-type="float" office:value="22240" calcext:value-type="float">
            <text:p>22240</text:p>
          </table:table-cell>
          <table:table-cell office:value-type="float" office:value="8640000" calcext:value-type="float">
            <text:p>8640000</text:p>
          </table:table-cell>
          <table:table-cell table:formula="of:=[.B1391]/[.C1391]" office:value-type="float" office:value="0.00257407407407407" calcext:value-type="float">
            <text:p>0,00257407407407407000</text:p>
          </table:table-cell>
          <table:table-cell table:formula="of:=[.D1392]-[.D139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16" office:value-type="float" office:value="22256" calcext:value-type="float">
            <text:p>22256</text:p>
          </table:table-cell>
          <table:table-cell office:value-type="float" office:value="8640000" calcext:value-type="float">
            <text:p>8640000</text:p>
          </table:table-cell>
          <table:table-cell table:formula="of:=[.B1392]/[.C1392]" office:value-type="float" office:value="0.00257592592592593" calcext:value-type="float">
            <text:p>0,00257592592592593000</text:p>
          </table:table-cell>
          <table:table-cell table:formula="of:=[.D1393]-[.D13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16" office:value-type="float" office:value="22272" calcext:value-type="float">
            <text:p>22272</text:p>
          </table:table-cell>
          <table:table-cell office:value-type="float" office:value="8640000" calcext:value-type="float">
            <text:p>8640000</text:p>
          </table:table-cell>
          <table:table-cell table:formula="of:=[.B1393]/[.C1393]" office:value-type="float" office:value="0.00257777777777778" calcext:value-type="float">
            <text:p>0,00257777777777778000</text:p>
          </table:table-cell>
          <table:table-cell table:formula="of:=[.D1394]-[.D13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16" office:value-type="float" office:value="22288" calcext:value-type="float">
            <text:p>22288</text:p>
          </table:table-cell>
          <table:table-cell office:value-type="float" office:value="8640000" calcext:value-type="float">
            <text:p>8640000</text:p>
          </table:table-cell>
          <table:table-cell table:formula="of:=[.B1394]/[.C1394]" office:value-type="float" office:value="0.00257962962962963" calcext:value-type="float">
            <text:p>0,00257962962962963000</text:p>
          </table:table-cell>
          <table:table-cell table:formula="of:=[.D1395]-[.D13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16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1395]/[.C1395]" office:value-type="float" office:value="0.00258148148148148" calcext:value-type="float">
            <text:p>0,00258148148148148000</text:p>
          </table:table-cell>
          <table:table-cell table:formula="of:=[.D1396]-[.D13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16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1396]/[.C1396]" office:value-type="float" office:value="0.00258333333333333" calcext:value-type="float">
            <text:p>0,00258333333333333000</text:p>
          </table:table-cell>
          <table:table-cell table:formula="of:=[.D1397]-[.D13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16" office:value-type="float" office:value="22336" calcext:value-type="float">
            <text:p>22336</text:p>
          </table:table-cell>
          <table:table-cell office:value-type="float" office:value="8640000" calcext:value-type="float">
            <text:p>8640000</text:p>
          </table:table-cell>
          <table:table-cell table:formula="of:=[.B1397]/[.C1397]" office:value-type="float" office:value="0.00258518518518519" calcext:value-type="float">
            <text:p>0,00258518518518519000</text:p>
          </table:table-cell>
          <table:table-cell table:formula="of:=[.D1398]-[.D13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16" office:value-type="float" office:value="22352" calcext:value-type="float">
            <text:p>22352</text:p>
          </table:table-cell>
          <table:table-cell office:value-type="float" office:value="8640000" calcext:value-type="float">
            <text:p>8640000</text:p>
          </table:table-cell>
          <table:table-cell table:formula="of:=[.B1398]/[.C1398]" office:value-type="float" office:value="0.00258703703703704" calcext:value-type="float">
            <text:p>0,00258703703703704000</text:p>
          </table:table-cell>
          <table:table-cell table:formula="of:=[.D1399]-[.D13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16" office:value-type="float" office:value="22368" calcext:value-type="float">
            <text:p>22368</text:p>
          </table:table-cell>
          <table:table-cell office:value-type="float" office:value="8640000" calcext:value-type="float">
            <text:p>8640000</text:p>
          </table:table-cell>
          <table:table-cell table:formula="of:=[.B1399]/[.C1399]" office:value-type="float" office:value="0.00258888888888889" calcext:value-type="float">
            <text:p>0,00258888888888889000</text:p>
          </table:table-cell>
          <table:table-cell table:formula="of:=[.D1400]-[.D13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16" office:value-type="float" office:value="22384" calcext:value-type="float">
            <text:p>22384</text:p>
          </table:table-cell>
          <table:table-cell office:value-type="float" office:value="8640000" calcext:value-type="float">
            <text:p>8640000</text:p>
          </table:table-cell>
          <table:table-cell table:formula="of:=[.B1400]/[.C1400]" office:value-type="float" office:value="0.00259074074074074" calcext:value-type="float">
            <text:p>0,00259074074074074000</text:p>
          </table:table-cell>
          <table:table-cell table:formula="of:=[.D1401]-[.D14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16" office:value-type="float" office:value="22400" calcext:value-type="float">
            <text:p>22400</text:p>
          </table:table-cell>
          <table:table-cell office:value-type="float" office:value="8640000" calcext:value-type="float">
            <text:p>8640000</text:p>
          </table:table-cell>
          <table:table-cell table:formula="of:=[.B1401]/[.C1401]" office:value-type="float" office:value="0.00259259259259259" calcext:value-type="float">
            <text:p>0,00259259259259259000</text:p>
          </table:table-cell>
          <table:table-cell table:formula="of:=[.D1402]-[.D140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16" office:value-type="float" office:value="22416" calcext:value-type="float">
            <text:p>22416</text:p>
          </table:table-cell>
          <table:table-cell office:value-type="float" office:value="8640000" calcext:value-type="float">
            <text:p>8640000</text:p>
          </table:table-cell>
          <table:table-cell table:formula="of:=[.B1402]/[.C1402]" office:value-type="float" office:value="0.00259444444444444" calcext:value-type="float">
            <text:p>0,00259444444444444000</text:p>
          </table:table-cell>
          <table:table-cell table:formula="of:=[.D1403]-[.D140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16" office:value-type="float" office:value="22432" calcext:value-type="float">
            <text:p>22432</text:p>
          </table:table-cell>
          <table:table-cell office:value-type="float" office:value="8640000" calcext:value-type="float">
            <text:p>8640000</text:p>
          </table:table-cell>
          <table:table-cell table:formula="of:=[.B1403]/[.C1403]" office:value-type="float" office:value="0.0025962962962963" calcext:value-type="float">
            <text:p>0,00259629629629630000</text:p>
          </table:table-cell>
          <table:table-cell table:formula="of:=[.D1404]-[.D140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16" office:value-type="float" office:value="22448" calcext:value-type="float">
            <text:p>22448</text:p>
          </table:table-cell>
          <table:table-cell office:value-type="float" office:value="8640000" calcext:value-type="float">
            <text:p>8640000</text:p>
          </table:table-cell>
          <table:table-cell table:formula="of:=[.B1404]/[.C1404]" office:value-type="float" office:value="0.00259814814814815" calcext:value-type="float">
            <text:p>0,00259814814814815000</text:p>
          </table:table-cell>
          <table:table-cell table:formula="of:=[.D1405]-[.D140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16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1405]/[.C1405]" office:value-type="float" office:value="0.0026" calcext:value-type="float">
            <text:p>0,00260000000000000000</text:p>
          </table:table-cell>
          <table:table-cell table:formula="of:=[.D1406]-[.D140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16" office:value-type="float" office:value="22480" calcext:value-type="float">
            <text:p>22480</text:p>
          </table:table-cell>
          <table:table-cell office:value-type="float" office:value="8640000" calcext:value-type="float">
            <text:p>8640000</text:p>
          </table:table-cell>
          <table:table-cell table:formula="of:=[.B1406]/[.C1406]" office:value-type="float" office:value="0.00260185185185185" calcext:value-type="float">
            <text:p>0,00260185185185185000</text:p>
          </table:table-cell>
          <table:table-cell table:formula="of:=[.D1407]-[.D140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16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1407]/[.C1407]" office:value-type="float" office:value="0.0026037037037037" calcext:value-type="float">
            <text:p>0,00260370370370370000</text:p>
          </table:table-cell>
          <table:table-cell table:formula="of:=[.D1408]-[.D140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16" office:value-type="float" office:value="22512" calcext:value-type="float">
            <text:p>22512</text:p>
          </table:table-cell>
          <table:table-cell office:value-type="float" office:value="8640000" calcext:value-type="float">
            <text:p>8640000</text:p>
          </table:table-cell>
          <table:table-cell table:formula="of:=[.B1408]/[.C1408]" office:value-type="float" office:value="0.00260555555555556" calcext:value-type="float">
            <text:p>0,00260555555555556000</text:p>
          </table:table-cell>
          <table:table-cell table:formula="of:=[.D1409]-[.D140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16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1409]/[.C1409]" office:value-type="float" office:value="0.00260740740740741" calcext:value-type="float">
            <text:p>0,00260740740740741000</text:p>
          </table:table-cell>
          <table:table-cell table:formula="of:=[.D1410]-[.D140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16" office:value-type="float" office:value="22544" calcext:value-type="float">
            <text:p>22544</text:p>
          </table:table-cell>
          <table:table-cell office:value-type="float" office:value="8640000" calcext:value-type="float">
            <text:p>8640000</text:p>
          </table:table-cell>
          <table:table-cell table:formula="of:=[.B1410]/[.C1410]" office:value-type="float" office:value="0.00260925925925926" calcext:value-type="float">
            <text:p>0,00260925925925926000</text:p>
          </table:table-cell>
          <table:table-cell table:formula="of:=[.D1411]-[.D141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16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1411]/[.C1411]" office:value-type="float" office:value="0.00261111111111111" calcext:value-type="float">
            <text:p>0,00261111111111111000</text:p>
          </table:table-cell>
          <table:table-cell table:formula="of:=[.D1412]-[.D141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16" office:value-type="float" office:value="22576" calcext:value-type="float">
            <text:p>22576</text:p>
          </table:table-cell>
          <table:table-cell office:value-type="float" office:value="8640000" calcext:value-type="float">
            <text:p>8640000</text:p>
          </table:table-cell>
          <table:table-cell table:formula="of:=[.B1412]/[.C1412]" office:value-type="float" office:value="0.00261296296296296" calcext:value-type="float">
            <text:p>0,00261296296296296000</text:p>
          </table:table-cell>
          <table:table-cell table:formula="of:=[.D1413]-[.D141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16" office:value-type="float" office:value="22592" calcext:value-type="float">
            <text:p>22592</text:p>
          </table:table-cell>
          <table:table-cell office:value-type="float" office:value="8640000" calcext:value-type="float">
            <text:p>8640000</text:p>
          </table:table-cell>
          <table:table-cell table:formula="of:=[.B1413]/[.C1413]" office:value-type="float" office:value="0.00261481481481481" calcext:value-type="float">
            <text:p>0,00261481481481481000</text:p>
          </table:table-cell>
          <table:table-cell table:formula="of:=[.D1414]-[.D1413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16" office:value-type="float" office:value="22608" calcext:value-type="float">
            <text:p>22608</text:p>
          </table:table-cell>
          <table:table-cell office:value-type="float" office:value="8640000" calcext:value-type="float">
            <text:p>8640000</text:p>
          </table:table-cell>
          <table:table-cell table:formula="of:=[.B1414]/[.C1414]" office:value-type="float" office:value="0.00261666666666667" calcext:value-type="float">
            <text:p>0,00261666666666667000</text:p>
          </table:table-cell>
          <table:table-cell table:formula="of:=[.D1415]-[.D141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16" office:value-type="float" office:value="22624" calcext:value-type="float">
            <text:p>22624</text:p>
          </table:table-cell>
          <table:table-cell office:value-type="float" office:value="8640000" calcext:value-type="float">
            <text:p>8640000</text:p>
          </table:table-cell>
          <table:table-cell table:formula="of:=[.B1415]/[.C1415]" office:value-type="float" office:value="0.00261851851851852" calcext:value-type="float">
            <text:p>0,00261851851851852000</text:p>
          </table:table-cell>
          <table:table-cell table:formula="of:=[.D1416]-[.D141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16" office:value-type="float" office:value="22640" calcext:value-type="float">
            <text:p>22640</text:p>
          </table:table-cell>
          <table:table-cell office:value-type="float" office:value="8640000" calcext:value-type="float">
            <text:p>8640000</text:p>
          </table:table-cell>
          <table:table-cell table:formula="of:=[.B1416]/[.C1416]" office:value-type="float" office:value="0.00262037037037037" calcext:value-type="float">
            <text:p>0,00262037037037037000</text:p>
          </table:table-cell>
          <table:table-cell table:formula="of:=[.D1417]-[.D141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16" office:value-type="float" office:value="22656" calcext:value-type="float">
            <text:p>22656</text:p>
          </table:table-cell>
          <table:table-cell office:value-type="float" office:value="8640000" calcext:value-type="float">
            <text:p>8640000</text:p>
          </table:table-cell>
          <table:table-cell table:formula="of:=[.B1417]/[.C1417]" office:value-type="float" office:value="0.00262222222222222" calcext:value-type="float">
            <text:p>0,00262222222222222000</text:p>
          </table:table-cell>
          <table:table-cell table:formula="of:=[.D1418]-[.D141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16" office:value-type="float" office:value="22672" calcext:value-type="float">
            <text:p>22672</text:p>
          </table:table-cell>
          <table:table-cell office:value-type="float" office:value="8640000" calcext:value-type="float">
            <text:p>8640000</text:p>
          </table:table-cell>
          <table:table-cell table:formula="of:=[.B1418]/[.C1418]" office:value-type="float" office:value="0.00262407407407407" calcext:value-type="float">
            <text:p>0,00262407407407407000</text:p>
          </table:table-cell>
          <table:table-cell table:formula="of:=[.D1419]-[.D141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16" office:value-type="float" office:value="22688" calcext:value-type="float">
            <text:p>22688</text:p>
          </table:table-cell>
          <table:table-cell office:value-type="float" office:value="8640000" calcext:value-type="float">
            <text:p>8640000</text:p>
          </table:table-cell>
          <table:table-cell table:formula="of:=[.B1419]/[.C1419]" office:value-type="float" office:value="0.00262592592592593" calcext:value-type="float">
            <text:p>0,00262592592592593000</text:p>
          </table:table-cell>
          <table:table-cell table:formula="of:=[.D1420]-[.D141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16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1420]/[.C1420]" office:value-type="float" office:value="0.00262777777777778" calcext:value-type="float">
            <text:p>0,00262777777777778000</text:p>
          </table:table-cell>
          <table:table-cell table:formula="of:=[.D1421]-[.D142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16" office:value-type="float" office:value="22720" calcext:value-type="float">
            <text:p>22720</text:p>
          </table:table-cell>
          <table:table-cell office:value-type="float" office:value="8640000" calcext:value-type="float">
            <text:p>8640000</text:p>
          </table:table-cell>
          <table:table-cell table:formula="of:=[.B1421]/[.C1421]" office:value-type="float" office:value="0.00262962962962963" calcext:value-type="float">
            <text:p>0,00262962962962963000</text:p>
          </table:table-cell>
          <table:table-cell table:formula="of:=[.D1422]-[.D142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16" office:value-type="float" office:value="22736" calcext:value-type="float">
            <text:p>22736</text:p>
          </table:table-cell>
          <table:table-cell office:value-type="float" office:value="8640000" calcext:value-type="float">
            <text:p>8640000</text:p>
          </table:table-cell>
          <table:table-cell table:formula="of:=[.B1422]/[.C1422]" office:value-type="float" office:value="0.00263148148148148" calcext:value-type="float">
            <text:p>0,00263148148148148000</text:p>
          </table:table-cell>
          <table:table-cell table:formula="of:=[.D1423]-[.D142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16" office:value-type="float" office:value="22752" calcext:value-type="float">
            <text:p>22752</text:p>
          </table:table-cell>
          <table:table-cell office:value-type="float" office:value="8640000" calcext:value-type="float">
            <text:p>8640000</text:p>
          </table:table-cell>
          <table:table-cell table:formula="of:=[.B1423]/[.C1423]" office:value-type="float" office:value="0.00263333333333333" calcext:value-type="float">
            <text:p>0,00263333333333333000</text:p>
          </table:table-cell>
          <table:table-cell table:formula="of:=[.D1424]-[.D142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16" office:value-type="float" office:value="22768" calcext:value-type="float">
            <text:p>22768</text:p>
          </table:table-cell>
          <table:table-cell office:value-type="float" office:value="8640000" calcext:value-type="float">
            <text:p>8640000</text:p>
          </table:table-cell>
          <table:table-cell table:formula="of:=[.B1424]/[.C1424]" office:value-type="float" office:value="0.00263518518518519" calcext:value-type="float">
            <text:p>0,00263518518518519000</text:p>
          </table:table-cell>
          <table:table-cell table:formula="of:=[.D1425]-[.D142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16" office:value-type="float" office:value="22784" calcext:value-type="float">
            <text:p>22784</text:p>
          </table:table-cell>
          <table:table-cell office:value-type="float" office:value="8640000" calcext:value-type="float">
            <text:p>8640000</text:p>
          </table:table-cell>
          <table:table-cell table:formula="of:=[.B1425]/[.C1425]" office:value-type="float" office:value="0.00263703703703704" calcext:value-type="float">
            <text:p>0,00263703703703704000</text:p>
          </table:table-cell>
          <table:table-cell table:formula="of:=[.D1426]-[.D142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16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1426]/[.C1426]" office:value-type="float" office:value="0.00263888888888889" calcext:value-type="float">
            <text:p>0,00263888888888889000</text:p>
          </table:table-cell>
          <table:table-cell table:formula="of:=[.D1427]-[.D142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16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1427]/[.C1427]" office:value-type="float" office:value="0.00264074074074074" calcext:value-type="float">
            <text:p>0,00264074074074074000</text:p>
          </table:table-cell>
          <table:table-cell table:formula="of:=[.D1428]-[.D142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16" office:value-type="float" office:value="22832" calcext:value-type="float">
            <text:p>22832</text:p>
          </table:table-cell>
          <table:table-cell office:value-type="float" office:value="8640000" calcext:value-type="float">
            <text:p>8640000</text:p>
          </table:table-cell>
          <table:table-cell table:formula="of:=[.B1428]/[.C1428]" office:value-type="float" office:value="0.00264259259259259" calcext:value-type="float">
            <text:p>0,00264259259259259000</text:p>
          </table:table-cell>
          <table:table-cell table:formula="of:=[.D1429]-[.D142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16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1429]/[.C1429]" office:value-type="float" office:value="0.00264444444444444" calcext:value-type="float">
            <text:p>0,00264444444444444000</text:p>
          </table:table-cell>
          <table:table-cell table:formula="of:=[.D1430]-[.D142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16" office:value-type="float" office:value="22864" calcext:value-type="float">
            <text:p>22864</text:p>
          </table:table-cell>
          <table:table-cell office:value-type="float" office:value="8640000" calcext:value-type="float">
            <text:p>8640000</text:p>
          </table:table-cell>
          <table:table-cell table:formula="of:=[.B1430]/[.C1430]" office:value-type="float" office:value="0.0026462962962963" calcext:value-type="float">
            <text:p>0,00264629629629630000</text:p>
          </table:table-cell>
          <table:table-cell table:formula="of:=[.D1431]-[.D143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16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1431]/[.C1431]" office:value-type="float" office:value="0.00264814814814815" calcext:value-type="float">
            <text:p>0,00264814814814815000</text:p>
          </table:table-cell>
          <table:table-cell table:formula="of:=[.D1432]-[.D143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16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1432]/[.C1432]" office:value-type="float" office:value="0.00265" calcext:value-type="float">
            <text:p>0,00265000000000000000</text:p>
          </table:table-cell>
          <table:table-cell table:formula="of:=[.D1433]-[.D143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16" office:value-type="float" office:value="22912" calcext:value-type="float">
            <text:p>22912</text:p>
          </table:table-cell>
          <table:table-cell office:value-type="float" office:value="8640000" calcext:value-type="float">
            <text:p>8640000</text:p>
          </table:table-cell>
          <table:table-cell table:formula="of:=[.B1433]/[.C1433]" office:value-type="float" office:value="0.00265185185185185" calcext:value-type="float">
            <text:p>0,00265185185185185000</text:p>
          </table:table-cell>
          <table:table-cell table:formula="of:=[.D1434]-[.D143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16" office:value-type="float" office:value="22928" calcext:value-type="float">
            <text:p>22928</text:p>
          </table:table-cell>
          <table:table-cell office:value-type="float" office:value="8640000" calcext:value-type="float">
            <text:p>8640000</text:p>
          </table:table-cell>
          <table:table-cell table:formula="of:=[.B1434]/[.C1434]" office:value-type="float" office:value="0.0026537037037037" calcext:value-type="float">
            <text:p>0,00265370370370370000</text:p>
          </table:table-cell>
          <table:table-cell table:formula="of:=[.D1435]-[.D143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16" office:value-type="float" office:value="22944" calcext:value-type="float">
            <text:p>22944</text:p>
          </table:table-cell>
          <table:table-cell office:value-type="float" office:value="8640000" calcext:value-type="float">
            <text:p>8640000</text:p>
          </table:table-cell>
          <table:table-cell table:formula="of:=[.B1435]/[.C1435]" office:value-type="float" office:value="0.00265555555555556" calcext:value-type="float">
            <text:p>0,00265555555555556000</text:p>
          </table:table-cell>
          <table:table-cell table:formula="of:=[.D1436]-[.D143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16" office:value-type="float" office:value="22960" calcext:value-type="float">
            <text:p>22960</text:p>
          </table:table-cell>
          <table:table-cell office:value-type="float" office:value="8640000" calcext:value-type="float">
            <text:p>8640000</text:p>
          </table:table-cell>
          <table:table-cell table:formula="of:=[.B1436]/[.C1436]" office:value-type="float" office:value="0.00265740740740741" calcext:value-type="float">
            <text:p>0,00265740740740741000</text:p>
          </table:table-cell>
          <table:table-cell table:formula="of:=[.D1437]-[.D143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16" office:value-type="float" office:value="22976" calcext:value-type="float">
            <text:p>22976</text:p>
          </table:table-cell>
          <table:table-cell office:value-type="float" office:value="8640000" calcext:value-type="float">
            <text:p>8640000</text:p>
          </table:table-cell>
          <table:table-cell table:formula="of:=[.B1437]/[.C1437]" office:value-type="float" office:value="0.00265925925925926" calcext:value-type="float">
            <text:p>0,00265925925925926000</text:p>
          </table:table-cell>
          <table:table-cell table:formula="of:=[.D1438]-[.D143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16" office:value-type="float" office:value="22992" calcext:value-type="float">
            <text:p>22992</text:p>
          </table:table-cell>
          <table:table-cell office:value-type="float" office:value="8640000" calcext:value-type="float">
            <text:p>8640000</text:p>
          </table:table-cell>
          <table:table-cell table:formula="of:=[.B1438]/[.C1438]" office:value-type="float" office:value="0.00266111111111111" calcext:value-type="float">
            <text:p>0,00266111111111111000</text:p>
          </table:table-cell>
          <table:table-cell table:formula="of:=[.D1439]-[.D143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16" office:value-type="float" office:value="23008" calcext:value-type="float">
            <text:p>23008</text:p>
          </table:table-cell>
          <table:table-cell office:value-type="float" office:value="8640000" calcext:value-type="float">
            <text:p>8640000</text:p>
          </table:table-cell>
          <table:table-cell table:formula="of:=[.B1439]/[.C1439]" office:value-type="float" office:value="0.00266296296296296" calcext:value-type="float">
            <text:p>0,00266296296296296000</text:p>
          </table:table-cell>
          <table:table-cell table:formula="of:=[.D1440]-[.D143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16" office:value-type="float" office:value="23024" calcext:value-type="float">
            <text:p>23024</text:p>
          </table:table-cell>
          <table:table-cell office:value-type="float" office:value="8640000" calcext:value-type="float">
            <text:p>8640000</text:p>
          </table:table-cell>
          <table:table-cell table:formula="of:=[.B1440]/[.C1440]" office:value-type="float" office:value="0.00266481481481481" calcext:value-type="float">
            <text:p>0,00266481481481481000</text:p>
          </table:table-cell>
          <table:table-cell table:formula="of:=[.D1441]-[.D144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16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1441]/[.C1441]" office:value-type="float" office:value="0.00266666666666667" calcext:value-type="float">
            <text:p>0,00266666666666667000</text:p>
          </table:table-cell>
          <table:table-cell table:formula="of:=[.D1442]-[.D144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16" office:value-type="float" office:value="23056" calcext:value-type="float">
            <text:p>23056</text:p>
          </table:table-cell>
          <table:table-cell office:value-type="float" office:value="8640000" calcext:value-type="float">
            <text:p>8640000</text:p>
          </table:table-cell>
          <table:table-cell table:formula="of:=[.B1442]/[.C1442]" office:value-type="float" office:value="0.00266851851851852" calcext:value-type="float">
            <text:p>0,00266851851851852000</text:p>
          </table:table-cell>
          <table:table-cell table:formula="of:=[.D1443]-[.D144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16" office:value-type="float" office:value="23072" calcext:value-type="float">
            <text:p>23072</text:p>
          </table:table-cell>
          <table:table-cell office:value-type="float" office:value="8640000" calcext:value-type="float">
            <text:p>8640000</text:p>
          </table:table-cell>
          <table:table-cell table:formula="of:=[.B1443]/[.C1443]" office:value-type="float" office:value="0.00267037037037037" calcext:value-type="float">
            <text:p>0,00267037037037037000</text:p>
          </table:table-cell>
          <table:table-cell table:formula="of:=[.D1444]-[.D144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16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1444]/[.C1444]" office:value-type="float" office:value="0.00267222222222222" calcext:value-type="float">
            <text:p>0,00267222222222222000</text:p>
          </table:table-cell>
          <table:table-cell table:formula="of:=[.D1445]-[.D144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16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1445]/[.C1445]" office:value-type="float" office:value="0.00267407407407407" calcext:value-type="float">
            <text:p>0,00267407407407407000</text:p>
          </table:table-cell>
          <table:table-cell table:formula="of:=[.D1446]-[.D144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16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1446]/[.C1446]" office:value-type="float" office:value="0.00267592592592593" calcext:value-type="float">
            <text:p>0,00267592592592593000</text:p>
          </table:table-cell>
          <table:table-cell table:formula="of:=[.D1447]-[.D144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16" office:value-type="float" office:value="23136" calcext:value-type="float">
            <text:p>23136</text:p>
          </table:table-cell>
          <table:table-cell office:value-type="float" office:value="8640000" calcext:value-type="float">
            <text:p>8640000</text:p>
          </table:table-cell>
          <table:table-cell table:formula="of:=[.B1447]/[.C1447]" office:value-type="float" office:value="0.00267777777777778" calcext:value-type="float">
            <text:p>0,00267777777777778000</text:p>
          </table:table-cell>
          <table:table-cell table:formula="of:=[.D1448]-[.D144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16" office:value-type="float" office:value="23152" calcext:value-type="float">
            <text:p>23152</text:p>
          </table:table-cell>
          <table:table-cell office:value-type="float" office:value="8640000" calcext:value-type="float">
            <text:p>8640000</text:p>
          </table:table-cell>
          <table:table-cell table:formula="of:=[.B1448]/[.C1448]" office:value-type="float" office:value="0.00267962962962963" calcext:value-type="float">
            <text:p>0,00267962962962963000</text:p>
          </table:table-cell>
          <table:table-cell table:formula="of:=[.D1449]-[.D144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16" office:value-type="float" office:value="23168" calcext:value-type="float">
            <text:p>23168</text:p>
          </table:table-cell>
          <table:table-cell office:value-type="float" office:value="8640000" calcext:value-type="float">
            <text:p>8640000</text:p>
          </table:table-cell>
          <table:table-cell table:formula="of:=[.B1449]/[.C1449]" office:value-type="float" office:value="0.00268148148148148" calcext:value-type="float">
            <text:p>0,00268148148148148000</text:p>
          </table:table-cell>
          <table:table-cell table:formula="of:=[.D1450]-[.D144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16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1450]/[.C1450]" office:value-type="float" office:value="0.00268333333333333" calcext:value-type="float">
            <text:p>0,00268333333333333000</text:p>
          </table:table-cell>
          <table:table-cell table:formula="of:=[.D1451]-[.D145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16" office:value-type="float" office:value="23200" calcext:value-type="float">
            <text:p>23200</text:p>
          </table:table-cell>
          <table:table-cell office:value-type="float" office:value="8640000" calcext:value-type="float">
            <text:p>8640000</text:p>
          </table:table-cell>
          <table:table-cell table:formula="of:=[.B1451]/[.C1451]" office:value-type="float" office:value="0.00268518518518519" calcext:value-type="float">
            <text:p>0,00268518518518519000</text:p>
          </table:table-cell>
          <table:table-cell table:formula="of:=[.D1452]-[.D145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16" office:value-type="float" office:value="23216" calcext:value-type="float">
            <text:p>23216</text:p>
          </table:table-cell>
          <table:table-cell office:value-type="float" office:value="8640000" calcext:value-type="float">
            <text:p>8640000</text:p>
          </table:table-cell>
          <table:table-cell table:formula="of:=[.B1452]/[.C1452]" office:value-type="float" office:value="0.00268703703703704" calcext:value-type="float">
            <text:p>0,00268703703703704000</text:p>
          </table:table-cell>
          <table:table-cell table:formula="of:=[.D1453]-[.D1452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16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1453]/[.C1453]" office:value-type="float" office:value="0.00268888888888889" calcext:value-type="float">
            <text:p>0,00268888888888889000</text:p>
          </table:table-cell>
          <table:table-cell table:formula="of:=[.D1454]-[.D145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16" office:value-type="float" office:value="23248" calcext:value-type="float">
            <text:p>23248</text:p>
          </table:table-cell>
          <table:table-cell office:value-type="float" office:value="8640000" calcext:value-type="float">
            <text:p>8640000</text:p>
          </table:table-cell>
          <table:table-cell table:formula="of:=[.B1454]/[.C1454]" office:value-type="float" office:value="0.00269074074074074" calcext:value-type="float">
            <text:p>0,00269074074074074000</text:p>
          </table:table-cell>
          <table:table-cell table:formula="of:=[.D1455]-[.D145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16" office:value-type="float" office:value="23264" calcext:value-type="float">
            <text:p>23264</text:p>
          </table:table-cell>
          <table:table-cell office:value-type="float" office:value="8640000" calcext:value-type="float">
            <text:p>8640000</text:p>
          </table:table-cell>
          <table:table-cell table:formula="of:=[.B1455]/[.C1455]" office:value-type="float" office:value="0.00269259259259259" calcext:value-type="float">
            <text:p>0,00269259259259259000</text:p>
          </table:table-cell>
          <table:table-cell table:formula="of:=[.D1456]-[.D145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16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1456]/[.C1456]" office:value-type="float" office:value="0.00269444444444444" calcext:value-type="float">
            <text:p>0,00269444444444444000</text:p>
          </table:table-cell>
          <table:table-cell table:formula="of:=[.D1457]-[.D145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16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1457]/[.C1457]" office:value-type="float" office:value="0.0026962962962963" calcext:value-type="float">
            <text:p>0,00269629629629630000</text:p>
          </table:table-cell>
          <table:table-cell table:formula="of:=[.D1458]-[.D145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16" office:value-type="float" office:value="23312" calcext:value-type="float">
            <text:p>23312</text:p>
          </table:table-cell>
          <table:table-cell office:value-type="float" office:value="8640000" calcext:value-type="float">
            <text:p>8640000</text:p>
          </table:table-cell>
          <table:table-cell table:formula="of:=[.B1458]/[.C1458]" office:value-type="float" office:value="0.00269814814814815" calcext:value-type="float">
            <text:p>0,00269814814814815000</text:p>
          </table:table-cell>
          <table:table-cell table:formula="of:=[.D1459]-[.D145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16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1459]/[.C1459]" office:value-type="float" office:value="0.0027" calcext:value-type="float">
            <text:p>0,00270000000000000000</text:p>
          </table:table-cell>
          <table:table-cell table:formula="of:=[.D1460]-[.D145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16" office:value-type="float" office:value="23344" calcext:value-type="float">
            <text:p>23344</text:p>
          </table:table-cell>
          <table:table-cell office:value-type="float" office:value="8640000" calcext:value-type="float">
            <text:p>8640000</text:p>
          </table:table-cell>
          <table:table-cell table:formula="of:=[.B1460]/[.C1460]" office:value-type="float" office:value="0.00270185185185185" calcext:value-type="float">
            <text:p>0,00270185185185185000</text:p>
          </table:table-cell>
          <table:table-cell table:formula="of:=[.D1461]-[.D146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16" office:value-type="float" office:value="23360" calcext:value-type="float">
            <text:p>23360</text:p>
          </table:table-cell>
          <table:table-cell office:value-type="float" office:value="8640000" calcext:value-type="float">
            <text:p>8640000</text:p>
          </table:table-cell>
          <table:table-cell table:formula="of:=[.B1461]/[.C1461]" office:value-type="float" office:value="0.0027037037037037" calcext:value-type="float">
            <text:p>0,00270370370370370000</text:p>
          </table:table-cell>
          <table:table-cell table:formula="of:=[.D1462]-[.D146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16" office:value-type="float" office:value="23376" calcext:value-type="float">
            <text:p>23376</text:p>
          </table:table-cell>
          <table:table-cell office:value-type="float" office:value="8640000" calcext:value-type="float">
            <text:p>8640000</text:p>
          </table:table-cell>
          <table:table-cell table:formula="of:=[.B1462]/[.C1462]" office:value-type="float" office:value="0.00270555555555556" calcext:value-type="float">
            <text:p>0,00270555555555556000</text:p>
          </table:table-cell>
          <table:table-cell table:formula="of:=[.D1463]-[.D146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16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1463]/[.C1463]" office:value-type="float" office:value="0.00270740740740741" calcext:value-type="float">
            <text:p>0,00270740740740741000</text:p>
          </table:table-cell>
          <table:table-cell table:formula="of:=[.D1464]-[.D146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16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1464]/[.C1464]" office:value-type="float" office:value="0.00270925925925926" calcext:value-type="float">
            <text:p>0,00270925925925926000</text:p>
          </table:table-cell>
          <table:table-cell table:formula="of:=[.D1465]-[.D146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16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1465]/[.C1465]" office:value-type="float" office:value="0.00271111111111111" calcext:value-type="float">
            <text:p>0,00271111111111111000</text:p>
          </table:table-cell>
          <table:table-cell table:formula="of:=[.D1466]-[.D146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16" office:value-type="float" office:value="23440" calcext:value-type="float">
            <text:p>23440</text:p>
          </table:table-cell>
          <table:table-cell office:value-type="float" office:value="8640000" calcext:value-type="float">
            <text:p>8640000</text:p>
          </table:table-cell>
          <table:table-cell table:formula="of:=[.B1466]/[.C1466]" office:value-type="float" office:value="0.00271296296296296" calcext:value-type="float">
            <text:p>0,00271296296296296000</text:p>
          </table:table-cell>
          <table:table-cell table:formula="of:=[.D1467]-[.D146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16" office:value-type="float" office:value="23456" calcext:value-type="float">
            <text:p>23456</text:p>
          </table:table-cell>
          <table:table-cell office:value-type="float" office:value="8640000" calcext:value-type="float">
            <text:p>8640000</text:p>
          </table:table-cell>
          <table:table-cell table:formula="of:=[.B1467]/[.C1467]" office:value-type="float" office:value="0.00271481481481482" calcext:value-type="float">
            <text:p>0,00271481481481482000</text:p>
          </table:table-cell>
          <table:table-cell table:formula="of:=[.D1468]-[.D146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16" office:value-type="float" office:value="23472" calcext:value-type="float">
            <text:p>23472</text:p>
          </table:table-cell>
          <table:table-cell office:value-type="float" office:value="8640000" calcext:value-type="float">
            <text:p>8640000</text:p>
          </table:table-cell>
          <table:table-cell table:formula="of:=[.B1468]/[.C1468]" office:value-type="float" office:value="0.00271666666666667" calcext:value-type="float">
            <text:p>0,00271666666666667000</text:p>
          </table:table-cell>
          <table:table-cell table:formula="of:=[.D1469]-[.D146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16" office:value-type="float" office:value="23488" calcext:value-type="float">
            <text:p>23488</text:p>
          </table:table-cell>
          <table:table-cell office:value-type="float" office:value="8640000" calcext:value-type="float">
            <text:p>8640000</text:p>
          </table:table-cell>
          <table:table-cell table:formula="of:=[.B1469]/[.C1469]" office:value-type="float" office:value="0.00271851851851852" calcext:value-type="float">
            <text:p>0,00271851851851852000</text:p>
          </table:table-cell>
          <table:table-cell table:formula="of:=[.D1470]-[.D146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16" office:value-type="float" office:value="23504" calcext:value-type="float">
            <text:p>23504</text:p>
          </table:table-cell>
          <table:table-cell office:value-type="float" office:value="8640000" calcext:value-type="float">
            <text:p>8640000</text:p>
          </table:table-cell>
          <table:table-cell table:formula="of:=[.B1470]/[.C1470]" office:value-type="float" office:value="0.00272037037037037" calcext:value-type="float">
            <text:p>0,00272037037037037000</text:p>
          </table:table-cell>
          <table:table-cell table:formula="of:=[.D1471]-[.D147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16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1471]/[.C1471]" office:value-type="float" office:value="0.00272222222222222" calcext:value-type="float">
            <text:p>0,00272222222222222000</text:p>
          </table:table-cell>
          <table:table-cell table:formula="of:=[.D1472]-[.D147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16" office:value-type="float" office:value="23536" calcext:value-type="float">
            <text:p>23536</text:p>
          </table:table-cell>
          <table:table-cell office:value-type="float" office:value="8640000" calcext:value-type="float">
            <text:p>8640000</text:p>
          </table:table-cell>
          <table:table-cell table:formula="of:=[.B1472]/[.C1472]" office:value-type="float" office:value="0.00272407407407407" calcext:value-type="float">
            <text:p>0,00272407407407407000</text:p>
          </table:table-cell>
          <table:table-cell table:formula="of:=[.D1473]-[.D147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16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1473]/[.C1473]" office:value-type="float" office:value="0.00272592592592593" calcext:value-type="float">
            <text:p>0,00272592592592593000</text:p>
          </table:table-cell>
          <table:table-cell table:formula="of:=[.D1474]-[.D147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16" office:value-type="float" office:value="23568" calcext:value-type="float">
            <text:p>23568</text:p>
          </table:table-cell>
          <table:table-cell office:value-type="float" office:value="8640000" calcext:value-type="float">
            <text:p>8640000</text:p>
          </table:table-cell>
          <table:table-cell table:formula="of:=[.B1474]/[.C1474]" office:value-type="float" office:value="0.00272777777777778" calcext:value-type="float">
            <text:p>0,00272777777777778000</text:p>
          </table:table-cell>
          <table:table-cell table:formula="of:=[.D1475]-[.D147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16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1475]/[.C1475]" office:value-type="float" office:value="0.00272962962962963" calcext:value-type="float">
            <text:p>0,00272962962962963000</text:p>
          </table:table-cell>
          <table:table-cell table:formula="of:=[.D1476]-[.D147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16" office:value-type="float" office:value="23600" calcext:value-type="float">
            <text:p>23600</text:p>
          </table:table-cell>
          <table:table-cell office:value-type="float" office:value="8640000" calcext:value-type="float">
            <text:p>8640000</text:p>
          </table:table-cell>
          <table:table-cell table:formula="of:=[.B1476]/[.C1476]" office:value-type="float" office:value="0.00273148148148148" calcext:value-type="float">
            <text:p>0,00273148148148148000</text:p>
          </table:table-cell>
          <table:table-cell table:formula="of:=[.D1477]-[.D147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16" office:value-type="float" office:value="23616" calcext:value-type="float">
            <text:p>23616</text:p>
          </table:table-cell>
          <table:table-cell office:value-type="float" office:value="8640000" calcext:value-type="float">
            <text:p>8640000</text:p>
          </table:table-cell>
          <table:table-cell table:formula="of:=[.B1477]/[.C1477]" office:value-type="float" office:value="0.00273333333333333" calcext:value-type="float">
            <text:p>0,00273333333333333000</text:p>
          </table:table-cell>
          <table:table-cell table:formula="of:=[.D1478]-[.D147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16" office:value-type="float" office:value="23632" calcext:value-type="float">
            <text:p>23632</text:p>
          </table:table-cell>
          <table:table-cell office:value-type="float" office:value="8640000" calcext:value-type="float">
            <text:p>8640000</text:p>
          </table:table-cell>
          <table:table-cell table:formula="of:=[.B1478]/[.C1478]" office:value-type="float" office:value="0.00273518518518519" calcext:value-type="float">
            <text:p>0,00273518518518519000</text:p>
          </table:table-cell>
          <table:table-cell table:formula="of:=[.D1479]-[.D147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16" office:value-type="float" office:value="23648" calcext:value-type="float">
            <text:p>23648</text:p>
          </table:table-cell>
          <table:table-cell office:value-type="float" office:value="8640000" calcext:value-type="float">
            <text:p>8640000</text:p>
          </table:table-cell>
          <table:table-cell table:formula="of:=[.B1479]/[.C1479]" office:value-type="float" office:value="0.00273703703703704" calcext:value-type="float">
            <text:p>0,00273703703703704000</text:p>
          </table:table-cell>
          <table:table-cell table:formula="of:=[.D1480]-[.D147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16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1480]/[.C1480]" office:value-type="float" office:value="0.00273888888888889" calcext:value-type="float">
            <text:p>0,00273888888888889000</text:p>
          </table:table-cell>
          <table:table-cell table:formula="of:=[.D1481]-[.D148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16" office:value-type="float" office:value="23680" calcext:value-type="float">
            <text:p>23680</text:p>
          </table:table-cell>
          <table:table-cell office:value-type="float" office:value="8640000" calcext:value-type="float">
            <text:p>8640000</text:p>
          </table:table-cell>
          <table:table-cell table:formula="of:=[.B1481]/[.C1481]" office:value-type="float" office:value="0.00274074074074074" calcext:value-type="float">
            <text:p>0,00274074074074074000</text:p>
          </table:table-cell>
          <table:table-cell table:formula="of:=[.D1482]-[.D1481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16" office:value-type="float" office:value="23696" calcext:value-type="float">
            <text:p>23696</text:p>
          </table:table-cell>
          <table:table-cell office:value-type="float" office:value="8640000" calcext:value-type="float">
            <text:p>8640000</text:p>
          </table:table-cell>
          <table:table-cell table:formula="of:=[.B1482]/[.C1482]" office:value-type="float" office:value="0.00274259259259259" calcext:value-type="float">
            <text:p>0,00274259259259259000</text:p>
          </table:table-cell>
          <table:table-cell table:formula="of:=[.D1483]-[.D148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16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1483]/[.C1483]" office:value-type="float" office:value="0.00274444444444444" calcext:value-type="float">
            <text:p>0,00274444444444444000</text:p>
          </table:table-cell>
          <table:table-cell table:formula="of:=[.D1484]-[.D148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16" office:value-type="float" office:value="23728" calcext:value-type="float">
            <text:p>23728</text:p>
          </table:table-cell>
          <table:table-cell office:value-type="float" office:value="8640000" calcext:value-type="float">
            <text:p>8640000</text:p>
          </table:table-cell>
          <table:table-cell table:formula="of:=[.B1484]/[.C1484]" office:value-type="float" office:value="0.0027462962962963" calcext:value-type="float">
            <text:p>0,00274629629629630000</text:p>
          </table:table-cell>
          <table:table-cell table:formula="of:=[.D1485]-[.D148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16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1485]/[.C1485]" office:value-type="float" office:value="0.00274814814814815" calcext:value-type="float">
            <text:p>0,00274814814814815000</text:p>
          </table:table-cell>
          <table:table-cell table:formula="of:=[.D1486]-[.D148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16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1486]/[.C1486]" office:value-type="float" office:value="0.00275" calcext:value-type="float">
            <text:p>0,00275000000000000000</text:p>
          </table:table-cell>
          <table:table-cell table:formula="of:=[.D1487]-[.D148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16" office:value-type="float" office:value="23776" calcext:value-type="float">
            <text:p>23776</text:p>
          </table:table-cell>
          <table:table-cell office:value-type="float" office:value="8640000" calcext:value-type="float">
            <text:p>8640000</text:p>
          </table:table-cell>
          <table:table-cell table:formula="of:=[.B1487]/[.C1487]" office:value-type="float" office:value="0.00275185185185185" calcext:value-type="float">
            <text:p>0,00275185185185185000</text:p>
          </table:table-cell>
          <table:table-cell table:formula="of:=[.D1488]-[.D148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16" office:value-type="float" office:value="23792" calcext:value-type="float">
            <text:p>23792</text:p>
          </table:table-cell>
          <table:table-cell office:value-type="float" office:value="8640000" calcext:value-type="float">
            <text:p>8640000</text:p>
          </table:table-cell>
          <table:table-cell table:formula="of:=[.B1488]/[.C1488]" office:value-type="float" office:value="0.0027537037037037" calcext:value-type="float">
            <text:p>0,00275370370370370000</text:p>
          </table:table-cell>
          <table:table-cell table:formula="of:=[.D1489]-[.D148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16" office:value-type="float" office:value="23808" calcext:value-type="float">
            <text:p>23808</text:p>
          </table:table-cell>
          <table:table-cell office:value-type="float" office:value="8640000" calcext:value-type="float">
            <text:p>8640000</text:p>
          </table:table-cell>
          <table:table-cell table:formula="of:=[.B1489]/[.C1489]" office:value-type="float" office:value="0.00275555555555556" calcext:value-type="float">
            <text:p>0,00275555555555556000</text:p>
          </table:table-cell>
          <table:table-cell table:formula="of:=[.D1490]-[.D148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16" office:value-type="float" office:value="23824" calcext:value-type="float">
            <text:p>23824</text:p>
          </table:table-cell>
          <table:table-cell office:value-type="float" office:value="8640000" calcext:value-type="float">
            <text:p>8640000</text:p>
          </table:table-cell>
          <table:table-cell table:formula="of:=[.B1490]/[.C1490]" office:value-type="float" office:value="0.00275740740740741" calcext:value-type="float">
            <text:p>0,00275740740740741000</text:p>
          </table:table-cell>
          <table:table-cell table:formula="of:=[.D1491]-[.D149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16" office:value-type="float" office:value="23840" calcext:value-type="float">
            <text:p>23840</text:p>
          </table:table-cell>
          <table:table-cell office:value-type="float" office:value="8640000" calcext:value-type="float">
            <text:p>8640000</text:p>
          </table:table-cell>
          <table:table-cell table:formula="of:=[.B1491]/[.C1491]" office:value-type="float" office:value="0.00275925925925926" calcext:value-type="float">
            <text:p>0,00275925925925926000</text:p>
          </table:table-cell>
          <table:table-cell table:formula="of:=[.D1492]-[.D1491]" office:value-type="float" office:value="0.00000185185185185227" calcext:value-type="float">
            <text:p>0,0000018518518518522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16" office:value-type="float" office:value="23856" calcext:value-type="float">
            <text:p>23856</text:p>
          </table:table-cell>
          <table:table-cell office:value-type="float" office:value="8640000" calcext:value-type="float">
            <text:p>8640000</text:p>
          </table:table-cell>
          <table:table-cell table:formula="of:=[.B1492]/[.C1492]" office:value-type="float" office:value="0.00276111111111111" calcext:value-type="float">
            <text:p>0,00276111111111111000</text:p>
          </table:table-cell>
          <table:table-cell table:formula="of:=[.D1493]-[.D1492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16" office:value-type="float" office:value="23872" calcext:value-type="float">
            <text:p>23872</text:p>
          </table:table-cell>
          <table:table-cell office:value-type="float" office:value="8640000" calcext:value-type="float">
            <text:p>8640000</text:p>
          </table:table-cell>
          <table:table-cell table:formula="of:=[.B1493]/[.C1493]" office:value-type="float" office:value="0.00276296296296296" calcext:value-type="float">
            <text:p>0,00276296296296296000</text:p>
          </table:table-cell>
          <table:table-cell table:formula="of:=[.D1494]-[.D1493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16" office:value-type="float" office:value="23888" calcext:value-type="float">
            <text:p>23888</text:p>
          </table:table-cell>
          <table:table-cell office:value-type="float" office:value="8640000" calcext:value-type="float">
            <text:p>8640000</text:p>
          </table:table-cell>
          <table:table-cell table:formula="of:=[.B1494]/[.C1494]" office:value-type="float" office:value="0.00276481481481482" calcext:value-type="float">
            <text:p>0,00276481481481482000</text:p>
          </table:table-cell>
          <table:table-cell table:formula="of:=[.D1495]-[.D1494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16" office:value-type="float" office:value="23904" calcext:value-type="float">
            <text:p>23904</text:p>
          </table:table-cell>
          <table:table-cell office:value-type="float" office:value="8640000" calcext:value-type="float">
            <text:p>8640000</text:p>
          </table:table-cell>
          <table:table-cell table:formula="of:=[.B1495]/[.C1495]" office:value-type="float" office:value="0.00276666666666667" calcext:value-type="float">
            <text:p>0,00276666666666667000</text:p>
          </table:table-cell>
          <table:table-cell table:formula="of:=[.D1496]-[.D1495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16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1496]/[.C1496]" office:value-type="float" office:value="0.00276851851851852" calcext:value-type="float">
            <text:p>0,00276851851851852000</text:p>
          </table:table-cell>
          <table:table-cell table:formula="of:=[.D1497]-[.D1496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16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1497]/[.C1497]" office:value-type="float" office:value="0.00277037037037037" calcext:value-type="float">
            <text:p>0,00277037037037037000</text:p>
          </table:table-cell>
          <table:table-cell table:formula="of:=[.D1498]-[.D1497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16" office:value-type="float" office:value="23952" calcext:value-type="float">
            <text:p>23952</text:p>
          </table:table-cell>
          <table:table-cell office:value-type="float" office:value="8640000" calcext:value-type="float">
            <text:p>8640000</text:p>
          </table:table-cell>
          <table:table-cell table:formula="of:=[.B1498]/[.C1498]" office:value-type="float" office:value="0.00277222222222222" calcext:value-type="float">
            <text:p>0,00277222222222222000</text:p>
          </table:table-cell>
          <table:table-cell table:formula="of:=[.D1499]-[.D1498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16" office:value-type="float" office:value="23968" calcext:value-type="float">
            <text:p>23968</text:p>
          </table:table-cell>
          <table:table-cell office:value-type="float" office:value="8640000" calcext:value-type="float">
            <text:p>8640000</text:p>
          </table:table-cell>
          <table:table-cell table:formula="of:=[.B1499]/[.C1499]" office:value-type="float" office:value="0.00277407407407407" calcext:value-type="float">
            <text:p>0,00277407407407407000</text:p>
          </table:table-cell>
          <table:table-cell table:formula="of:=[.D1500]-[.D1499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16" office:value-type="float" office:value="23984" calcext:value-type="float">
            <text:p>23984</text:p>
          </table:table-cell>
          <table:table-cell office:value-type="float" office:value="8640000" calcext:value-type="float">
            <text:p>8640000</text:p>
          </table:table-cell>
          <table:table-cell table:formula="of:=[.B1500]/[.C1500]" office:value-type="float" office:value="0.00277592592592593" calcext:value-type="float">
            <text:p>0,00277592592592593000</text:p>
          </table:table-cell>
          <table:table-cell table:formula="of:=[.D1501]-[.D1500]" office:value-type="float" office:value="0.00000185185185185184" calcext:value-type="float">
            <text:p>0,000001851851851851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16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1501]/[.C1501]" office:value-type="float" office:value="0.00277777777777778" calcext:value-type="float">
            <text:p>0,00277777777777778000</text:p>
          </table:table-cell>
          <table:table-cell table:formula="of:=#REF!-[.D1501]" office:value-type="string" office:string-value="" calcext:value-type="error">
            <text:p>#REF!</text:p>
          </table:table-cell>
        </table:table-row>
        <table:table-row table:style-name="ro1" table:number-rows-repeated="10470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6:23.111956588</meta:creation-date>
    <dc:date>2026-05-17T15:36:29.268007810</dc:date>
    <meta:editing-duration>PT7S</meta:editing-duration>
    <meta:editing-cycles>1</meta:editing-cycles>
    <meta:document-statistic meta:table-count="1" meta:cell-count="7505" meta:object-count="0"/>
    <meta:generator>LibreOffice/24.2.7.2$Linux_X86_64 LibreOffice_project/420$Build-2</meta:generator>
  </office:meta>
</office:document-meta>
</file>