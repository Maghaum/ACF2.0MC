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4.9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98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98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113425925925926" calcext:value-type="float">
            <text:p>0,00001134259259259260</text:p>
          </table:table-cell>
          <table:table-cell table:formula="of:=[.D4]-[.D3]" office:value-type="float" office:value="0.0000113425925925926" calcext:value-type="float">
            <text:p>0,000011342592592592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98" office:value-type="float" office:value="196" calcext:value-type="float">
            <text:p>196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226851851851852" calcext:value-type="float">
            <text:p>0,00002268518518518520</text:p>
          </table:table-cell>
          <table:table-cell table:formula="of:=[.D5]-[.D4]" office:value-type="float" office:value="0.0000113425925925926" calcext:value-type="float">
            <text:p>0,000011342592592592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98" office:value-type="float" office:value="294" calcext:value-type="float">
            <text:p>294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340277777777778" calcext:value-type="float">
            <text:p>0,00003402777777777780</text:p>
          </table:table-cell>
          <table:table-cell table:formula="of:=[.D6]-[.D5]" office:value-type="float" office:value="0.0000113425925925926" calcext:value-type="float">
            <text:p>0,000011342592592592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98" office:value-type="float" office:value="392" calcext:value-type="float">
            <text:p>392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453703703703704" calcext:value-type="float">
            <text:p>0,00004537037037037040</text:p>
          </table:table-cell>
          <table:table-cell table:formula="of:=[.D7]-[.D6]" office:value-type="float" office:value="0.0000113425925925926" calcext:value-type="float">
            <text:p>0,000011342592592592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98" office:value-type="float" office:value="490" calcext:value-type="float">
            <text:p>490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56712962962963" calcext:value-type="float">
            <text:p>0,00005671296296296300</text:p>
          </table:table-cell>
          <table:table-cell table:formula="of:=[.D8]-[.D7]" office:value-type="float" office:value="0.0000113425925925926" calcext:value-type="float">
            <text:p>0,000011342592592592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98" office:value-type="float" office:value="588" calcext:value-type="float">
            <text:p>588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680555555555556" calcext:value-type="float">
            <text:p>0,00006805555555555560</text:p>
          </table:table-cell>
          <table:table-cell table:formula="of:=[.D9]-[.D8]" office:value-type="float" office:value="0.0000113425925925926" calcext:value-type="float">
            <text:p>0,000011342592592592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98" office:value-type="float" office:value="686" calcext:value-type="float">
            <text:p>686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793981481481481" calcext:value-type="float">
            <text:p>0,00007939814814814810</text:p>
          </table:table-cell>
          <table:table-cell table:formula="of:=[.D10]-[.D9]" office:value-type="float" office:value="0.0000113425925925926" calcext:value-type="float">
            <text:p>0,000011342592592592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98" office:value-type="float" office:value="784" calcext:value-type="float">
            <text:p>784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907407407407408" calcext:value-type="float">
            <text:p>0,00009074074074074070</text:p>
          </table:table-cell>
          <table:table-cell table:formula="of:=[.D11]-[.D10]" office:value-type="float" office:value="0.0000113425925925926" calcext:value-type="float">
            <text:p>0,000011342592592592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98" office:value-type="float" office:value="882" calcext:value-type="float">
            <text:p>882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102083333333333" calcext:value-type="float">
            <text:p>0,00010208333333333300</text:p>
          </table:table-cell>
          <table:table-cell table:formula="of:=[.D12]-[.D11]" office:value-type="float" office:value="0.0000113425925925926" calcext:value-type="float">
            <text:p>0,000011342592592592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98" office:value-type="float" office:value="980" calcext:value-type="float">
            <text:p>98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113425925925926" calcext:value-type="float">
            <text:p>0,00011342592592592600</text:p>
          </table:table-cell>
          <table:table-cell table:formula="of:=[.D13]-[.D12]" office:value-type="float" office:value="0.0000113425925925926" calcext:value-type="float">
            <text:p>0,000011342592592592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98" office:value-type="float" office:value="1078" calcext:value-type="float">
            <text:p>1078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124768518518519" calcext:value-type="float">
            <text:p>0,00012476851851851900</text:p>
          </table:table-cell>
          <table:table-cell table:formula="of:=[.D14]-[.D13]" office:value-type="float" office:value="0.0000113425925925926" calcext:value-type="float">
            <text:p>0,000011342592592592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98" office:value-type="float" office:value="1176" calcext:value-type="float">
            <text:p>1176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136111111111111" calcext:value-type="float">
            <text:p>0,00013611111111111100</text:p>
          </table:table-cell>
          <table:table-cell table:formula="of:=[.D15]-[.D14]" office:value-type="float" office:value="0.0000113425925925926" calcext:value-type="float">
            <text:p>0,000011342592592592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98" office:value-type="float" office:value="1274" calcext:value-type="float">
            <text:p>1274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147453703703704" calcext:value-type="float">
            <text:p>0,00014745370370370400</text:p>
          </table:table-cell>
          <table:table-cell table:formula="of:=[.D16]-[.D15]" office:value-type="float" office:value="0.0000113425925925926" calcext:value-type="float">
            <text:p>0,000011342592592592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98" office:value-type="float" office:value="1372" calcext:value-type="float">
            <text:p>1372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158796296296296" calcext:value-type="float">
            <text:p>0,00015879629629629600</text:p>
          </table:table-cell>
          <table:table-cell table:formula="of:=[.D17]-[.D16]" office:value-type="float" office:value="0.0000113425925925926" calcext:value-type="float">
            <text:p>0,000011342592592592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98" office:value-type="float" office:value="1470" calcext:value-type="float">
            <text:p>1470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170138888888889" calcext:value-type="float">
            <text:p>0,00017013888888888900</text:p>
          </table:table-cell>
          <table:table-cell table:formula="of:=[.D18]-[.D17]" office:value-type="float" office:value="0.0000113425925925926" calcext:value-type="float">
            <text:p>0,000011342592592592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98" office:value-type="float" office:value="1568" calcext:value-type="float">
            <text:p>1568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181481481481482" calcext:value-type="float">
            <text:p>0,00018148148148148100</text:p>
          </table:table-cell>
          <table:table-cell table:formula="of:=[.D19]-[.D18]" office:value-type="float" office:value="0.0000113425925925926" calcext:value-type="float">
            <text:p>0,0000113425925925926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98" office:value-type="float" office:value="1666" calcext:value-type="float">
            <text:p>1666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192824074074074" calcext:value-type="float">
            <text:p>0,00019282407407407400</text:p>
          </table:table-cell>
          <table:table-cell table:formula="of:=[.D20]-[.D19]" office:value-type="float" office:value="0.0000113425925925926" calcext:value-type="float">
            <text:p>0,0000113425925925926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98" office:value-type="float" office:value="1764" calcext:value-type="float">
            <text:p>1764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204166666666667" calcext:value-type="float">
            <text:p>0,00020416666666666700</text:p>
          </table:table-cell>
          <table:table-cell table:formula="of:=[.D21]-[.D20]" office:value-type="float" office:value="0.0000113425925925926" calcext:value-type="float">
            <text:p>0,0000113425925925926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98" office:value-type="float" office:value="1862" calcext:value-type="float">
            <text:p>1862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215509259259259" calcext:value-type="float">
            <text:p>0,00021550925925925900</text:p>
          </table:table-cell>
          <table:table-cell table:formula="of:=[.D22]-[.D21]" office:value-type="float" office:value="0.0000113425925925926" calcext:value-type="float">
            <text:p>0,000011342592592592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98" office:value-type="float" office:value="1960" calcext:value-type="float">
            <text:p>196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226851851851852" calcext:value-type="float">
            <text:p>0,00022685185185185200</text:p>
          </table:table-cell>
          <table:table-cell table:formula="of:=[.D23]-[.D22]" office:value-type="float" office:value="0.0000113425925925926" calcext:value-type="float">
            <text:p>0,0000113425925925926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98" office:value-type="float" office:value="2058" calcext:value-type="float">
            <text:p>2058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238194444444444" calcext:value-type="float">
            <text:p>0,00023819444444444400</text:p>
          </table:table-cell>
          <table:table-cell table:formula="of:=[.D24]-[.D23]" office:value-type="float" office:value="0.0000113425925925926" calcext:value-type="float">
            <text:p>0,0000113425925925926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98" office:value-type="float" office:value="2156" calcext:value-type="float">
            <text:p>2156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249537037037037" calcext:value-type="float">
            <text:p>0,00024953703703703700</text:p>
          </table:table-cell>
          <table:table-cell table:formula="of:=[.D25]-[.D24]" office:value-type="float" office:value="0.0000113425925925926" calcext:value-type="float">
            <text:p>0,0000113425925925926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98" office:value-type="float" office:value="2254" calcext:value-type="float">
            <text:p>2254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26087962962963" calcext:value-type="float">
            <text:p>0,00026087962962963000</text:p>
          </table:table-cell>
          <table:table-cell table:formula="of:=[.D26]-[.D25]" office:value-type="float" office:value="0.0000113425925925926" calcext:value-type="float">
            <text:p>0,0000113425925925926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98" office:value-type="float" office:value="2352" calcext:value-type="float">
            <text:p>2352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272222222222222" calcext:value-type="float">
            <text:p>0,00027222222222222200</text:p>
          </table:table-cell>
          <table:table-cell table:formula="of:=[.D27]-[.D26]" office:value-type="float" office:value="0.0000113425925925926" calcext:value-type="float">
            <text:p>0,000011342592592592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98" office:value-type="float" office:value="2450" calcext:value-type="float">
            <text:p>2450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283564814814815" calcext:value-type="float">
            <text:p>0,00028356481481481500</text:p>
          </table:table-cell>
          <table:table-cell table:formula="of:=[.D28]-[.D27]" office:value-type="float" office:value="0.0000113425925925926" calcext:value-type="float">
            <text:p>0,0000113425925925926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98" office:value-type="float" office:value="2548" calcext:value-type="float">
            <text:p>2548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294907407407407" calcext:value-type="float">
            <text:p>0,00029490740740740700</text:p>
          </table:table-cell>
          <table:table-cell table:formula="of:=[.D29]-[.D28]" office:value-type="float" office:value="0.0000113425925925926" calcext:value-type="float">
            <text:p>0,0000113425925925926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98" office:value-type="float" office:value="2646" calcext:value-type="float">
            <text:p>2646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30625" calcext:value-type="float">
            <text:p>0,00030625000000000000</text:p>
          </table:table-cell>
          <table:table-cell table:formula="of:=[.D30]-[.D29]" office:value-type="float" office:value="0.0000113425925925926" calcext:value-type="float">
            <text:p>0,0000113425925925926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98" office:value-type="float" office:value="2744" calcext:value-type="float">
            <text:p>2744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317592592592593" calcext:value-type="float">
            <text:p>0,00031759259259259300</text:p>
          </table:table-cell>
          <table:table-cell table:formula="of:=[.D31]-[.D30]" office:value-type="float" office:value="0.0000113425925925926" calcext:value-type="float">
            <text:p>0,0000113425925925926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98" office:value-type="float" office:value="2842" calcext:value-type="float">
            <text:p>2842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328935185185185" calcext:value-type="float">
            <text:p>0,00032893518518518500</text:p>
          </table:table-cell>
          <table:table-cell table:formula="of:=[.D32]-[.D31]" office:value-type="float" office:value="0.0000113425925925926" calcext:value-type="float">
            <text:p>0,000011342592592592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98" office:value-type="float" office:value="2940" calcext:value-type="float">
            <text:p>294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340277777777778" calcext:value-type="float">
            <text:p>0,00034027777777777800</text:p>
          </table:table-cell>
          <table:table-cell table:formula="of:=[.D33]-[.D32]" office:value-type="float" office:value="0.0000113425925925926" calcext:value-type="float">
            <text:p>0,0000113425925925926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98" office:value-type="float" office:value="3038" calcext:value-type="float">
            <text:p>3038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35162037037037" calcext:value-type="float">
            <text:p>0,00035162037037037000</text:p>
          </table:table-cell>
          <table:table-cell table:formula="of:=[.D34]-[.D33]" office:value-type="float" office:value="0.0000113425925925926" calcext:value-type="float">
            <text:p>0,0000113425925925926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98" office:value-type="float" office:value="3136" calcext:value-type="float">
            <text:p>3136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362962962962963" calcext:value-type="float">
            <text:p>0,00036296296296296300</text:p>
          </table:table-cell>
          <table:table-cell table:formula="of:=[.D35]-[.D34]" office:value-type="float" office:value="0.0000113425925925926" calcext:value-type="float">
            <text:p>0,0000113425925925926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98" office:value-type="float" office:value="3234" calcext:value-type="float">
            <text:p>3234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374305555555556" calcext:value-type="float">
            <text:p>0,00037430555555555600</text:p>
          </table:table-cell>
          <table:table-cell table:formula="of:=[.D36]-[.D35]" office:value-type="float" office:value="0.0000113425925925926" calcext:value-type="float">
            <text:p>0,0000113425925925926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98" office:value-type="float" office:value="3332" calcext:value-type="float">
            <text:p>3332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385648148148148" calcext:value-type="float">
            <text:p>0,00038564814814814800</text:p>
          </table:table-cell>
          <table:table-cell table:formula="of:=[.D37]-[.D36]" office:value-type="float" office:value="0.0000113425925925926" calcext:value-type="float">
            <text:p>0,000011342592592592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98" office:value-type="float" office:value="3430" calcext:value-type="float">
            <text:p>3430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396990740740741" calcext:value-type="float">
            <text:p>0,00039699074074074100</text:p>
          </table:table-cell>
          <table:table-cell table:formula="of:=[.D38]-[.D37]" office:value-type="float" office:value="0.0000113425925925926" calcext:value-type="float">
            <text:p>0,0000113425925925926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98" office:value-type="float" office:value="3528" calcext:value-type="float">
            <text:p>3528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408333333333333" calcext:value-type="float">
            <text:p>0,00040833333333333300</text:p>
          </table:table-cell>
          <table:table-cell table:formula="of:=[.D39]-[.D38]" office:value-type="float" office:value="0.0000113425925925926" calcext:value-type="float">
            <text:p>0,0000113425925925926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98" office:value-type="float" office:value="3626" calcext:value-type="float">
            <text:p>3626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419675925925926" calcext:value-type="float">
            <text:p>0,00041967592592592600</text:p>
          </table:table-cell>
          <table:table-cell table:formula="of:=[.D40]-[.D39]" office:value-type="float" office:value="0.0000113425925925926" calcext:value-type="float">
            <text:p>0,0000113425925925926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98" office:value-type="float" office:value="3724" calcext:value-type="float">
            <text:p>3724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431018518518519" calcext:value-type="float">
            <text:p>0,00043101851851851800</text:p>
          </table:table-cell>
          <table:table-cell table:formula="of:=[.D41]-[.D40]" office:value-type="float" office:value="0.0000113425925925926" calcext:value-type="float">
            <text:p>0,0000113425925925926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98" office:value-type="float" office:value="3822" calcext:value-type="float">
            <text:p>3822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442361111111111" calcext:value-type="float">
            <text:p>0,00044236111111111100</text:p>
          </table:table-cell>
          <table:table-cell table:formula="of:=[.D42]-[.D41]" office:value-type="float" office:value="0.0000113425925925926" calcext:value-type="float">
            <text:p>0,000011342592592592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98" office:value-type="float" office:value="3920" calcext:value-type="float">
            <text:p>392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453703703703704" calcext:value-type="float">
            <text:p>0,00045370370370370400</text:p>
          </table:table-cell>
          <table:table-cell table:formula="of:=[.D43]-[.D42]" office:value-type="float" office:value="0.0000113425925925926" calcext:value-type="float">
            <text:p>0,0000113425925925926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98" office:value-type="float" office:value="4018" calcext:value-type="float">
            <text:p>4018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465046296296296" calcext:value-type="float">
            <text:p>0,00046504629629629600</text:p>
          </table:table-cell>
          <table:table-cell table:formula="of:=[.D44]-[.D43]" office:value-type="float" office:value="0.0000113425925925926" calcext:value-type="float">
            <text:p>0,0000113425925925926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98" office:value-type="float" office:value="4116" calcext:value-type="float">
            <text:p>4116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476388888888889" calcext:value-type="float">
            <text:p>0,00047638888888888900</text:p>
          </table:table-cell>
          <table:table-cell table:formula="of:=[.D45]-[.D44]" office:value-type="float" office:value="0.0000113425925925926" calcext:value-type="float">
            <text:p>0,0000113425925925926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98" office:value-type="float" office:value="4214" calcext:value-type="float">
            <text:p>4214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487731481481481" calcext:value-type="float">
            <text:p>0,00048773148148148100</text:p>
          </table:table-cell>
          <table:table-cell table:formula="of:=[.D46]-[.D45]" office:value-type="float" office:value="0.0000113425925925925" calcext:value-type="float">
            <text:p>0,0000113425925925925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98" office:value-type="float" office:value="4312" calcext:value-type="float">
            <text:p>4312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499074074074074" calcext:value-type="float">
            <text:p>0,00049907407407407400</text:p>
          </table:table-cell>
          <table:table-cell table:formula="of:=[.D47]-[.D46]" office:value-type="float" office:value="0.0000113425925925926" calcext:value-type="float">
            <text:p>0,00001134259259259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98" office:value-type="float" office:value="4410" calcext:value-type="float">
            <text:p>4410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510416666666667" calcext:value-type="float">
            <text:p>0,00051041666666666700</text:p>
          </table:table-cell>
          <table:table-cell table:formula="of:=[.D48]-[.D47]" office:value-type="float" office:value="0.0000113425925925926" calcext:value-type="float">
            <text:p>0,0000113425925925926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98" office:value-type="float" office:value="4508" calcext:value-type="float">
            <text:p>4508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521759259259259" calcext:value-type="float">
            <text:p>0,00052175925925925900</text:p>
          </table:table-cell>
          <table:table-cell table:formula="of:=[.D49]-[.D48]" office:value-type="float" office:value="0.0000113425925925925" calcext:value-type="float">
            <text:p>0,0000113425925925925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98" office:value-type="float" office:value="4606" calcext:value-type="float">
            <text:p>4606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533101851851852" calcext:value-type="float">
            <text:p>0,00053310185185185200</text:p>
          </table:table-cell>
          <table:table-cell table:formula="of:=[.D50]-[.D49]" office:value-type="float" office:value="0.0000113425925925926" calcext:value-type="float">
            <text:p>0,0000113425925925926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98" office:value-type="float" office:value="4704" calcext:value-type="float">
            <text:p>4704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544444444444444" calcext:value-type="float">
            <text:p>0,00054444444444444400</text:p>
          </table:table-cell>
          <table:table-cell table:formula="of:=[.D51]-[.D50]" office:value-type="float" office:value="0.0000113425925925926" calcext:value-type="float">
            <text:p>0,0000113425925925926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98" office:value-type="float" office:value="4802" calcext:value-type="float">
            <text:p>4802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555787037037037" calcext:value-type="float">
            <text:p>0,00055578703703703700</text:p>
          </table:table-cell>
          <table:table-cell table:formula="of:=[.D52]-[.D51]" office:value-type="float" office:value="0.0000113425925925925" calcext:value-type="float">
            <text:p>0,000011342592592592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98" office:value-type="float" office:value="4900" calcext:value-type="float">
            <text:p>490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56712962962963" calcext:value-type="float">
            <text:p>0,00056712962962963000</text:p>
          </table:table-cell>
          <table:table-cell table:formula="of:=[.D53]-[.D52]" office:value-type="float" office:value="0.0000113425925925926" calcext:value-type="float">
            <text:p>0,0000113425925925926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98" office:value-type="float" office:value="4998" calcext:value-type="float">
            <text:p>4998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578472222222222" calcext:value-type="float">
            <text:p>0,00057847222222222200</text:p>
          </table:table-cell>
          <table:table-cell table:formula="of:=[.D54]-[.D53]" office:value-type="float" office:value="0.0000113425925925926" calcext:value-type="float">
            <text:p>0,0000113425925925926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98" office:value-type="float" office:value="5096" calcext:value-type="float">
            <text:p>5096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589814814814815" calcext:value-type="float">
            <text:p>0,00058981481481481500</text:p>
          </table:table-cell>
          <table:table-cell table:formula="of:=[.D55]-[.D54]" office:value-type="float" office:value="0.0000113425925925925" calcext:value-type="float">
            <text:p>0,0000113425925925925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98" office:value-type="float" office:value="5194" calcext:value-type="float">
            <text:p>5194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601157407407408" calcext:value-type="float">
            <text:p>0,00060115740740740800</text:p>
          </table:table-cell>
          <table:table-cell table:formula="of:=[.D56]-[.D55]" office:value-type="float" office:value="0.0000113425925925926" calcext:value-type="float">
            <text:p>0,0000113425925925926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98" office:value-type="float" office:value="5292" calcext:value-type="float">
            <text:p>5292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6125" calcext:value-type="float">
            <text:p>0,00061250000000000000</text:p>
          </table:table-cell>
          <table:table-cell table:formula="of:=[.D57]-[.D56]" office:value-type="float" office:value="0.0000113425925925925" calcext:value-type="float">
            <text:p>0,0000113425925925925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98" office:value-type="float" office:value="5390" calcext:value-type="float">
            <text:p>5390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623842592592593" calcext:value-type="float">
            <text:p>0,00062384259259259300</text:p>
          </table:table-cell>
          <table:table-cell table:formula="of:=[.D58]-[.D57]" office:value-type="float" office:value="0.0000113425925925926" calcext:value-type="float">
            <text:p>0,0000113425925925926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98" office:value-type="float" office:value="5488" calcext:value-type="float">
            <text:p>5488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635185185185185" calcext:value-type="float">
            <text:p>0,00063518518518518500</text:p>
          </table:table-cell>
          <table:table-cell table:formula="of:=[.D59]-[.D58]" office:value-type="float" office:value="0.0000113425925925926" calcext:value-type="float">
            <text:p>0,0000113425925925926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98" office:value-type="float" office:value="5586" calcext:value-type="float">
            <text:p>5586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646527777777778" calcext:value-type="float">
            <text:p>0,00064652777777777800</text:p>
          </table:table-cell>
          <table:table-cell table:formula="of:=[.D60]-[.D59]" office:value-type="float" office:value="0.0000113425925925925" calcext:value-type="float">
            <text:p>0,0000113425925925925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98" office:value-type="float" office:value="5684" calcext:value-type="float">
            <text:p>5684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65787037037037" calcext:value-type="float">
            <text:p>0,00065787037037037000</text:p>
          </table:table-cell>
          <table:table-cell table:formula="of:=[.D61]-[.D60]" office:value-type="float" office:value="0.0000113425925925926" calcext:value-type="float">
            <text:p>0,0000113425925925926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98" office:value-type="float" office:value="5782" calcext:value-type="float">
            <text:p>5782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669212962962963" calcext:value-type="float">
            <text:p>0,00066921296296296300</text:p>
          </table:table-cell>
          <table:table-cell table:formula="of:=[.D62]-[.D61]" office:value-type="float" office:value="0.0000113425925925926" calcext:value-type="float">
            <text:p>0,000011342592592592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98" office:value-type="float" office:value="5880" calcext:value-type="float">
            <text:p>588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680555555555556" calcext:value-type="float">
            <text:p>0,00068055555555555600</text:p>
          </table:table-cell>
          <table:table-cell table:formula="of:=[.D63]-[.D62]" office:value-type="float" office:value="0.0000113425925925925" calcext:value-type="float">
            <text:p>0,0000113425925925925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98" office:value-type="float" office:value="5978" calcext:value-type="float">
            <text:p>5978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691898148148148" calcext:value-type="float">
            <text:p>0,00069189814814814800</text:p>
          </table:table-cell>
          <table:table-cell table:formula="of:=[.D64]-[.D63]" office:value-type="float" office:value="0.0000113425925925926" calcext:value-type="float">
            <text:p>0,0000113425925925926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98" office:value-type="float" office:value="6076" calcext:value-type="float">
            <text:p>6076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703240740740741" calcext:value-type="float">
            <text:p>0,00070324074074074100</text:p>
          </table:table-cell>
          <table:table-cell table:formula="of:=[.D65]-[.D64]" office:value-type="float" office:value="0.0000113425925925926" calcext:value-type="float">
            <text:p>0,0000113425925925926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98" office:value-type="float" office:value="6174" calcext:value-type="float">
            <text:p>6174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714583333333333" calcext:value-type="float">
            <text:p>0,00071458333333333300</text:p>
          </table:table-cell>
          <table:table-cell table:formula="of:=[.D66]-[.D65]" office:value-type="float" office:value="0.0000113425925925925" calcext:value-type="float">
            <text:p>0,0000113425925925925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98" office:value-type="float" office:value="6272" calcext:value-type="float">
            <text:p>6272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725925925925926" calcext:value-type="float">
            <text:p>0,00072592592592592600</text:p>
          </table:table-cell>
          <table:table-cell table:formula="of:=[.D67]-[.D66]" office:value-type="float" office:value="0.0000113425925925926" calcext:value-type="float">
            <text:p>0,0000113425925925926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98" office:value-type="float" office:value="6370" calcext:value-type="float">
            <text:p>6370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737268518518519" calcext:value-type="float">
            <text:p>0,00073726851851851900</text:p>
          </table:table-cell>
          <table:table-cell table:formula="of:=[.D68]-[.D67]" office:value-type="float" office:value="0.0000113425925925925" calcext:value-type="float">
            <text:p>0,0000113425925925925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98" office:value-type="float" office:value="6468" calcext:value-type="float">
            <text:p>6468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748611111111111" calcext:value-type="float">
            <text:p>0,00074861111111111100</text:p>
          </table:table-cell>
          <table:table-cell table:formula="of:=[.D69]-[.D68]" office:value-type="float" office:value="0.0000113425925925926" calcext:value-type="float">
            <text:p>0,0000113425925925926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98" office:value-type="float" office:value="6566" calcext:value-type="float">
            <text:p>6566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759953703703704" calcext:value-type="float">
            <text:p>0,00075995370370370400</text:p>
          </table:table-cell>
          <table:table-cell table:formula="of:=[.D70]-[.D69]" office:value-type="float" office:value="0.0000113425925925926" calcext:value-type="float">
            <text:p>0,0000113425925925926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98" office:value-type="float" office:value="6664" calcext:value-type="float">
            <text:p>6664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771296296296296" calcext:value-type="float">
            <text:p>0,00077129629629629600</text:p>
          </table:table-cell>
          <table:table-cell table:formula="of:=[.D71]-[.D70]" office:value-type="float" office:value="0.0000113425925925925" calcext:value-type="float">
            <text:p>0,0000113425925925925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98" office:value-type="float" office:value="6762" calcext:value-type="float">
            <text:p>6762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782638888888889" calcext:value-type="float">
            <text:p>0,00078263888888888900</text:p>
          </table:table-cell>
          <table:table-cell table:formula="of:=[.D72]-[.D71]" office:value-type="float" office:value="0.0000113425925925926" calcext:value-type="float">
            <text:p>0,0000113425925925926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98" office:value-type="float" office:value="6860" calcext:value-type="float">
            <text:p>686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793981481481481" calcext:value-type="float">
            <text:p>0,00079398148148148100</text:p>
          </table:table-cell>
          <table:table-cell table:formula="of:=[.D73]-[.D72]" office:value-type="float" office:value="0.0000113425925925926" calcext:value-type="float">
            <text:p>0,0000113425925925926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98" office:value-type="float" office:value="6958" calcext:value-type="float">
            <text:p>6958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805324074074074" calcext:value-type="float">
            <text:p>0,00080532407407407400</text:p>
          </table:table-cell>
          <table:table-cell table:formula="of:=[.D74]-[.D73]" office:value-type="float" office:value="0.0000113425925925925" calcext:value-type="float">
            <text:p>0,0000113425925925925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98" office:value-type="float" office:value="7056" calcext:value-type="float">
            <text:p>7056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816666666666667" calcext:value-type="float">
            <text:p>0,00081666666666666700</text:p>
          </table:table-cell>
          <table:table-cell table:formula="of:=[.D75]-[.D74]" office:value-type="float" office:value="0.0000113425925925926" calcext:value-type="float">
            <text:p>0,0000113425925925926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98" office:value-type="float" office:value="7154" calcext:value-type="float">
            <text:p>7154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828009259259259" calcext:value-type="float">
            <text:p>0,00082800925925925900</text:p>
          </table:table-cell>
          <table:table-cell table:formula="of:=[.D76]-[.D75]" office:value-type="float" office:value="0.0000113425925925925" calcext:value-type="float">
            <text:p>0,0000113425925925925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98" office:value-type="float" office:value="7252" calcext:value-type="float">
            <text:p>7252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839351851851852" calcext:value-type="float">
            <text:p>0,00083935185185185200</text:p>
          </table:table-cell>
          <table:table-cell table:formula="of:=[.D77]-[.D76]" office:value-type="float" office:value="0.0000113425925925926" calcext:value-type="float">
            <text:p>0,0000113425925925926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98" office:value-type="float" office:value="7350" calcext:value-type="float">
            <text:p>7350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850694444444444" calcext:value-type="float">
            <text:p>0,00085069444444444400</text:p>
          </table:table-cell>
          <table:table-cell table:formula="of:=[.D78]-[.D77]" office:value-type="float" office:value="0.0000113425925925926" calcext:value-type="float">
            <text:p>0,0000113425925925926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98" office:value-type="float" office:value="7448" calcext:value-type="float">
            <text:p>7448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862037037037037" calcext:value-type="float">
            <text:p>0,00086203703703703700</text:p>
          </table:table-cell>
          <table:table-cell table:formula="of:=[.D79]-[.D78]" office:value-type="float" office:value="0.0000113425925925925" calcext:value-type="float">
            <text:p>0,0000113425925925925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98" office:value-type="float" office:value="7546" calcext:value-type="float">
            <text:p>7546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87337962962963" calcext:value-type="float">
            <text:p>0,00087337962962963000</text:p>
          </table:table-cell>
          <table:table-cell table:formula="of:=[.D80]-[.D79]" office:value-type="float" office:value="0.0000113425925925926" calcext:value-type="float">
            <text:p>0,0000113425925925926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98" office:value-type="float" office:value="7644" calcext:value-type="float">
            <text:p>7644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884722222222222" calcext:value-type="float">
            <text:p>0,00088472222222222200</text:p>
          </table:table-cell>
          <table:table-cell table:formula="of:=[.D81]-[.D80]" office:value-type="float" office:value="0.0000113425925925926" calcext:value-type="float">
            <text:p>0,0000113425925925926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98" office:value-type="float" office:value="7742" calcext:value-type="float">
            <text:p>7742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896064814814815" calcext:value-type="float">
            <text:p>0,00089606481481481500</text:p>
          </table:table-cell>
          <table:table-cell table:formula="of:=[.D82]-[.D81]" office:value-type="float" office:value="0.0000113425925925925" calcext:value-type="float">
            <text:p>0,0000113425925925925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98" office:value-type="float" office:value="7840" calcext:value-type="float">
            <text:p>784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907407407407407" calcext:value-type="float">
            <text:p>0,00090740740740740800</text:p>
          </table:table-cell>
          <table:table-cell table:formula="of:=[.D83]-[.D82]" office:value-type="float" office:value="0.0000113425925925926" calcext:value-type="float">
            <text:p>0,0000113425925925926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98" office:value-type="float" office:value="7938" calcext:value-type="float">
            <text:p>7938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91875" calcext:value-type="float">
            <text:p>0,00091875000000000000</text:p>
          </table:table-cell>
          <table:table-cell table:formula="of:=[.D84]-[.D83]" office:value-type="float" office:value="0.0000113425925925926" calcext:value-type="float">
            <text:p>0,0000113425925925926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98" office:value-type="float" office:value="8036" calcext:value-type="float">
            <text:p>8036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930092592592593" calcext:value-type="float">
            <text:p>0,00093009259259259300</text:p>
          </table:table-cell>
          <table:table-cell table:formula="of:=[.D85]-[.D84]" office:value-type="float" office:value="0.0000113425925925925" calcext:value-type="float">
            <text:p>0,0000113425925925925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98" office:value-type="float" office:value="8134" calcext:value-type="float">
            <text:p>8134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941435185185185" calcext:value-type="float">
            <text:p>0,00094143518518518500</text:p>
          </table:table-cell>
          <table:table-cell table:formula="of:=[.D86]-[.D85]" office:value-type="float" office:value="0.0000113425925925926" calcext:value-type="float">
            <text:p>0,0000113425925925926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98" office:value-type="float" office:value="8232" calcext:value-type="float">
            <text:p>8232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952777777777778" calcext:value-type="float">
            <text:p>0,00095277777777777800</text:p>
          </table:table-cell>
          <table:table-cell table:formula="of:=[.D87]-[.D86]" office:value-type="float" office:value="0.0000113425925925925" calcext:value-type="float">
            <text:p>0,0000113425925925925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98" office:value-type="float" office:value="8330" calcext:value-type="float">
            <text:p>8330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96412037037037" calcext:value-type="float">
            <text:p>0,00096412037037037000</text:p>
          </table:table-cell>
          <table:table-cell table:formula="of:=[.D88]-[.D87]" office:value-type="float" office:value="0.0000113425925925927" calcext:value-type="float">
            <text:p>0,0000113425925925927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98" office:value-type="float" office:value="8428" calcext:value-type="float">
            <text:p>8428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975462962962963" calcext:value-type="float">
            <text:p>0,00097546296296296300</text:p>
          </table:table-cell>
          <table:table-cell table:formula="of:=[.D89]-[.D88]" office:value-type="float" office:value="0.0000113425925925925" calcext:value-type="float">
            <text:p>0,0000113425925925925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98" office:value-type="float" office:value="8526" calcext:value-type="float">
            <text:p>8526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986805555555556" calcext:value-type="float">
            <text:p>0,00098680555555555600</text:p>
          </table:table-cell>
          <table:table-cell table:formula="of:=[.D90]-[.D89]" office:value-type="float" office:value="0.0000113425925925925" calcext:value-type="float">
            <text:p>0,0000113425925925925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98" office:value-type="float" office:value="8624" calcext:value-type="float">
            <text:p>8624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998148148148148" calcext:value-type="float">
            <text:p>0,00099814814814814800</text:p>
          </table:table-cell>
          <table:table-cell table:formula="of:=[.D91]-[.D90]" office:value-type="float" office:value="0.0000113425925925925" calcext:value-type="float">
            <text:p>0,0000113425925925925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98" office:value-type="float" office:value="8722" calcext:value-type="float">
            <text:p>8722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100949074074074" calcext:value-type="float">
            <text:p>0,00100949074074074000</text:p>
          </table:table-cell>
          <table:table-cell table:formula="of:=[.D92]-[.D91]" office:value-type="float" office:value="0.0000113425925925927" calcext:value-type="float">
            <text:p>0,0000113425925925927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98" office:value-type="float" office:value="8820" calcext:value-type="float">
            <text:p>882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102083333333333" calcext:value-type="float">
            <text:p>0,00102083333333333000</text:p>
          </table:table-cell>
          <table:table-cell table:formula="of:=[.D93]-[.D92]" office:value-type="float" office:value="0.0000113425925925925" calcext:value-type="float">
            <text:p>0,0000113425925925925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98" office:value-type="float" office:value="8918" calcext:value-type="float">
            <text:p>8918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103217592592593" calcext:value-type="float">
            <text:p>0,00103217592592593000</text:p>
          </table:table-cell>
          <table:table-cell table:formula="of:=[.D94]-[.D93]" office:value-type="float" office:value="0.0000113425925925925" calcext:value-type="float">
            <text:p>0,0000113425925925925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98" office:value-type="float" office:value="9016" calcext:value-type="float">
            <text:p>9016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104351851851852" calcext:value-type="float">
            <text:p>0,00104351851851852000</text:p>
          </table:table-cell>
          <table:table-cell table:formula="of:=[.D95]-[.D94]" office:value-type="float" office:value="0.0000113425925925927" calcext:value-type="float">
            <text:p>0,0000113425925925927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98" office:value-type="float" office:value="9114" calcext:value-type="float">
            <text:p>9114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105486111111111" calcext:value-type="float">
            <text:p>0,00105486111111111000</text:p>
          </table:table-cell>
          <table:table-cell table:formula="of:=[.D96]-[.D95]" office:value-type="float" office:value="0.0000113425925925925" calcext:value-type="float">
            <text:p>0,0000113425925925925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98" office:value-type="float" office:value="9212" calcext:value-type="float">
            <text:p>9212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10662037037037" calcext:value-type="float">
            <text:p>0,00106620370370370000</text:p>
          </table:table-cell>
          <table:table-cell table:formula="of:=[.D97]-[.D96]" office:value-type="float" office:value="0.0000113425925925925" calcext:value-type="float">
            <text:p>0,0000113425925925925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98" office:value-type="float" office:value="9310" calcext:value-type="float">
            <text:p>9310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10775462962963" calcext:value-type="float">
            <text:p>0,00107754629629630000</text:p>
          </table:table-cell>
          <table:table-cell table:formula="of:=[.D98]-[.D97]" office:value-type="float" office:value="0.0000113425925925927" calcext:value-type="float">
            <text:p>0,0000113425925925927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98" office:value-type="float" office:value="9408" calcext:value-type="float">
            <text:p>9408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108888888888889" calcext:value-type="float">
            <text:p>0,00108888888888889000</text:p>
          </table:table-cell>
          <table:table-cell table:formula="of:=[.D99]-[.D98]" office:value-type="float" office:value="0.0000113425925925925" calcext:value-type="float">
            <text:p>0,0000113425925925925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98" office:value-type="float" office:value="9506" calcext:value-type="float">
            <text:p>9506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110023148148148" calcext:value-type="float">
            <text:p>0,00110023148148148000</text:p>
          </table:table-cell>
          <table:table-cell table:formula="of:=[.D100]-[.D99]" office:value-type="float" office:value="0.0000113425925925925" calcext:value-type="float">
            <text:p>0,0000113425925925925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98" office:value-type="float" office:value="9604" calcext:value-type="float">
            <text:p>9604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111157407407407" calcext:value-type="float">
            <text:p>0,00111157407407407000</text:p>
          </table:table-cell>
          <table:table-cell table:formula="of:=[.D101]-[.D100]" office:value-type="float" office:value="0.0000113425925925927" calcext:value-type="float">
            <text:p>0,0000113425925925927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98" office:value-type="float" office:value="9702" calcext:value-type="float">
            <text:p>9702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112291666666667" calcext:value-type="float">
            <text:p>0,00112291666666667000</text:p>
          </table:table-cell>
          <table:table-cell table:formula="of:=[.D102]-[.D101]" office:value-type="float" office:value="0.0000113425925925925" calcext:value-type="float">
            <text:p>0,000011342592592592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98" office:value-type="float" office:value="9800" calcext:value-type="float">
            <text:p>98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113425925925926" calcext:value-type="float">
            <text:p>0,00113425925925926000</text:p>
          </table:table-cell>
          <table:table-cell table:formula="of:=[.D103]-[.D102]" office:value-type="float" office:value="0.0000113425925925925" calcext:value-type="float">
            <text:p>0,0000113425925925925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98" office:value-type="float" office:value="9898" calcext:value-type="float">
            <text:p>9898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114560185185185" calcext:value-type="float">
            <text:p>0,00114560185185185000</text:p>
          </table:table-cell>
          <table:table-cell table:formula="of:=[.D104]-[.D103]" office:value-type="float" office:value="0.0000113425925925927" calcext:value-type="float">
            <text:p>0,0000113425925925927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98" office:value-type="float" office:value="9996" calcext:value-type="float">
            <text:p>9996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115694444444444" calcext:value-type="float">
            <text:p>0,00115694444444444000</text:p>
          </table:table-cell>
          <table:table-cell table:formula="of:=[.D105]-[.D104]" office:value-type="float" office:value="0.0000113425925925925" calcext:value-type="float">
            <text:p>0,0000113425925925925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98" office:value-type="float" office:value="10094" calcext:value-type="float">
            <text:p>10094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116828703703704" calcext:value-type="float">
            <text:p>0,00116828703703704000</text:p>
          </table:table-cell>
          <table:table-cell table:formula="of:=[.D106]-[.D105]" office:value-type="float" office:value="0.0000113425925925925" calcext:value-type="float">
            <text:p>0,0000113425925925925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98" office:value-type="float" office:value="10192" calcext:value-type="float">
            <text:p>10192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117962962962963" calcext:value-type="float">
            <text:p>0,00117962962962963000</text:p>
          </table:table-cell>
          <table:table-cell table:formula="of:=[.D107]-[.D106]" office:value-type="float" office:value="0.0000113425925925927" calcext:value-type="float">
            <text:p>0,0000113425925925927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98" office:value-type="float" office:value="10290" calcext:value-type="float">
            <text:p>10290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119097222222222" calcext:value-type="float">
            <text:p>0,00119097222222222000</text:p>
          </table:table-cell>
          <table:table-cell table:formula="of:=[.D108]-[.D107]" office:value-type="float" office:value="0.0000113425925925925" calcext:value-type="float">
            <text:p>0,0000113425925925925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98" office:value-type="float" office:value="10388" calcext:value-type="float">
            <text:p>10388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120231481481482" calcext:value-type="float">
            <text:p>0,00120231481481482000</text:p>
          </table:table-cell>
          <table:table-cell table:formula="of:=[.D109]-[.D108]" office:value-type="float" office:value="0.0000113425925925925" calcext:value-type="float">
            <text:p>0,0000113425925925925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98" office:value-type="float" office:value="10486" calcext:value-type="float">
            <text:p>10486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121365740740741" calcext:value-type="float">
            <text:p>0,00121365740740741000</text:p>
          </table:table-cell>
          <table:table-cell table:formula="of:=[.D110]-[.D109]" office:value-type="float" office:value="0.0000113425925925925" calcext:value-type="float">
            <text:p>0,0000113425925925925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98" office:value-type="float" office:value="10584" calcext:value-type="float">
            <text:p>10584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1225" calcext:value-type="float">
            <text:p>0,00122500000000000000</text:p>
          </table:table-cell>
          <table:table-cell table:formula="of:=[.D111]-[.D110]" office:value-type="float" office:value="0.0000113425925925927" calcext:value-type="float">
            <text:p>0,0000113425925925927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98" office:value-type="float" office:value="10682" calcext:value-type="float">
            <text:p>10682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123634259259259" calcext:value-type="float">
            <text:p>0,00123634259259259000</text:p>
          </table:table-cell>
          <table:table-cell table:formula="of:=[.D112]-[.D111]" office:value-type="float" office:value="0.0000113425925925925" calcext:value-type="float">
            <text:p>0,0000113425925925925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98" office:value-type="float" office:value="10780" calcext:value-type="float">
            <text:p>1078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124768518518519" calcext:value-type="float">
            <text:p>0,00124768518518519000</text:p>
          </table:table-cell>
          <table:table-cell table:formula="of:=[.D113]-[.D112]" office:value-type="float" office:value="0.0000113425925925925" calcext:value-type="float">
            <text:p>0,0000113425925925925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98" office:value-type="float" office:value="10878" calcext:value-type="float">
            <text:p>10878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125902777777778" calcext:value-type="float">
            <text:p>0,00125902777777778000</text:p>
          </table:table-cell>
          <table:table-cell table:formula="of:=[.D114]-[.D113]" office:value-type="float" office:value="0.0000113425925925927" calcext:value-type="float">
            <text:p>0,0000113425925925927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98" office:value-type="float" office:value="10976" calcext:value-type="float">
            <text:p>10976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127037037037037" calcext:value-type="float">
            <text:p>0,00127037037037037000</text:p>
          </table:table-cell>
          <table:table-cell table:formula="of:=[.D115]-[.D114]" office:value-type="float" office:value="0.0000113425925925925" calcext:value-type="float">
            <text:p>0,0000113425925925925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98" office:value-type="float" office:value="11074" calcext:value-type="float">
            <text:p>11074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128171296296296" calcext:value-type="float">
            <text:p>0,00128171296296296000</text:p>
          </table:table-cell>
          <table:table-cell table:formula="of:=[.D116]-[.D115]" office:value-type="float" office:value="0.0000113425925925925" calcext:value-type="float">
            <text:p>0,0000113425925925925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98" office:value-type="float" office:value="11172" calcext:value-type="float">
            <text:p>11172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129305555555556" calcext:value-type="float">
            <text:p>0,00129305555555556000</text:p>
          </table:table-cell>
          <table:table-cell table:formula="of:=[.D117]-[.D116]" office:value-type="float" office:value="0.0000113425925925927" calcext:value-type="float">
            <text:p>0,0000113425925925927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98" office:value-type="float" office:value="11270" calcext:value-type="float">
            <text:p>11270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130439814814815" calcext:value-type="float">
            <text:p>0,00130439814814815000</text:p>
          </table:table-cell>
          <table:table-cell table:formula="of:=[.D118]-[.D117]" office:value-type="float" office:value="0.0000113425925925925" calcext:value-type="float">
            <text:p>0,0000113425925925925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98" office:value-type="float" office:value="11368" calcext:value-type="float">
            <text:p>11368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131574074074074" calcext:value-type="float">
            <text:p>0,00131574074074074000</text:p>
          </table:table-cell>
          <table:table-cell table:formula="of:=[.D119]-[.D118]" office:value-type="float" office:value="0.0000113425925925925" calcext:value-type="float">
            <text:p>0,0000113425925925925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98" office:value-type="float" office:value="11466" calcext:value-type="float">
            <text:p>11466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132708333333333" calcext:value-type="float">
            <text:p>0,00132708333333333000</text:p>
          </table:table-cell>
          <table:table-cell table:formula="of:=[.D120]-[.D119]" office:value-type="float" office:value="0.0000113425925925927" calcext:value-type="float">
            <text:p>0,0000113425925925927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98" office:value-type="float" office:value="11564" calcext:value-type="float">
            <text:p>11564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133842592592593" calcext:value-type="float">
            <text:p>0,00133842592592593000</text:p>
          </table:table-cell>
          <table:table-cell table:formula="of:=[.D121]-[.D120]" office:value-type="float" office:value="0.0000113425925925925" calcext:value-type="float">
            <text:p>0,0000113425925925925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98" office:value-type="float" office:value="11662" calcext:value-type="float">
            <text:p>11662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134976851851852" calcext:value-type="float">
            <text:p>0,00134976851851852000</text:p>
          </table:table-cell>
          <table:table-cell table:formula="of:=[.D122]-[.D121]" office:value-type="float" office:value="0.0000113425925925925" calcext:value-type="float">
            <text:p>0,0000113425925925925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98" office:value-type="float" office:value="11760" calcext:value-type="float">
            <text:p>1176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136111111111111" calcext:value-type="float">
            <text:p>0,00136111111111111000</text:p>
          </table:table-cell>
          <table:table-cell table:formula="of:=[.D123]-[.D122]" office:value-type="float" office:value="0.0000113425925925927" calcext:value-type="float">
            <text:p>0,0000113425925925927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98" office:value-type="float" office:value="11858" calcext:value-type="float">
            <text:p>11858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13724537037037" calcext:value-type="float">
            <text:p>0,00137245370370370000</text:p>
          </table:table-cell>
          <table:table-cell table:formula="of:=[.D124]-[.D123]" office:value-type="float" office:value="0.0000113425925925925" calcext:value-type="float">
            <text:p>0,0000113425925925925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98" office:value-type="float" office:value="11956" calcext:value-type="float">
            <text:p>11956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13837962962963" calcext:value-type="float">
            <text:p>0,00138379629629630000</text:p>
          </table:table-cell>
          <table:table-cell table:formula="of:=[.D125]-[.D124]" office:value-type="float" office:value="0.0000113425925925925" calcext:value-type="float">
            <text:p>0,0000113425925925925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98" office:value-type="float" office:value="12054" calcext:value-type="float">
            <text:p>12054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139513888888889" calcext:value-type="float">
            <text:p>0,00139513888888889000</text:p>
          </table:table-cell>
          <table:table-cell table:formula="of:=[.D126]-[.D125]" office:value-type="float" office:value="0.0000113425925925927" calcext:value-type="float">
            <text:p>0,0000113425925925927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98" office:value-type="float" office:value="12152" calcext:value-type="float">
            <text:p>12152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140648148148148" calcext:value-type="float">
            <text:p>0,00140648148148148000</text:p>
          </table:table-cell>
          <table:table-cell table:formula="of:=[.D127]-[.D126]" office:value-type="float" office:value="0.0000113425925925925" calcext:value-type="float">
            <text:p>0,0000113425925925925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98" office:value-type="float" office:value="12250" calcext:value-type="float">
            <text:p>12250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141782407407407" calcext:value-type="float">
            <text:p>0,00141782407407407000</text:p>
          </table:table-cell>
          <table:table-cell table:formula="of:=[.D128]-[.D127]" office:value-type="float" office:value="0.0000113425925925925" calcext:value-type="float">
            <text:p>0,0000113425925925925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98" office:value-type="float" office:value="12348" calcext:value-type="float">
            <text:p>12348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142916666666667" calcext:value-type="float">
            <text:p>0,00142916666666667000</text:p>
          </table:table-cell>
          <table:table-cell table:formula="of:=[.D129]-[.D128]" office:value-type="float" office:value="0.0000113425925925927" calcext:value-type="float">
            <text:p>0,0000113425925925927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98" office:value-type="float" office:value="12446" calcext:value-type="float">
            <text:p>12446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144050925925926" calcext:value-type="float">
            <text:p>0,00144050925925926000</text:p>
          </table:table-cell>
          <table:table-cell table:formula="of:=[.D130]-[.D129]" office:value-type="float" office:value="0.0000113425925925925" calcext:value-type="float">
            <text:p>0,0000113425925925925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98" office:value-type="float" office:value="12544" calcext:value-type="float">
            <text:p>12544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145185185185185" calcext:value-type="float">
            <text:p>0,00145185185185185000</text:p>
          </table:table-cell>
          <table:table-cell table:formula="of:=[.D131]-[.D130]" office:value-type="float" office:value="0.0000113425925925925" calcext:value-type="float">
            <text:p>0,0000113425925925925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98" office:value-type="float" office:value="12642" calcext:value-type="float">
            <text:p>12642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146319444444444" calcext:value-type="float">
            <text:p>0,00146319444444444000</text:p>
          </table:table-cell>
          <table:table-cell table:formula="of:=[.D132]-[.D131]" office:value-type="float" office:value="0.0000113425925925925" calcext:value-type="float">
            <text:p>0,0000113425925925925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98" office:value-type="float" office:value="12740" calcext:value-type="float">
            <text:p>1274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147453703703704" calcext:value-type="float">
            <text:p>0,00147453703703704000</text:p>
          </table:table-cell>
          <table:table-cell table:formula="of:=[.D133]-[.D132]" office:value-type="float" office:value="0.0000113425925925927" calcext:value-type="float">
            <text:p>0,0000113425925925927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98" office:value-type="float" office:value="12838" calcext:value-type="float">
            <text:p>12838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148587962962963" calcext:value-type="float">
            <text:p>0,00148587962962963000</text:p>
          </table:table-cell>
          <table:table-cell table:formula="of:=[.D134]-[.D133]" office:value-type="float" office:value="0.0000113425925925925" calcext:value-type="float">
            <text:p>0,0000113425925925925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98" office:value-type="float" office:value="12936" calcext:value-type="float">
            <text:p>12936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149722222222222" calcext:value-type="float">
            <text:p>0,00149722222222222000</text:p>
          </table:table-cell>
          <table:table-cell table:formula="of:=[.D135]-[.D134]" office:value-type="float" office:value="0.0000113425925925925" calcext:value-type="float">
            <text:p>0,0000113425925925925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98" office:value-type="float" office:value="13034" calcext:value-type="float">
            <text:p>13034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150856481481481" calcext:value-type="float">
            <text:p>0,00150856481481481000</text:p>
          </table:table-cell>
          <table:table-cell table:formula="of:=[.D136]-[.D135]" office:value-type="float" office:value="0.0000113425925925927" calcext:value-type="float">
            <text:p>0,0000113425925925927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98" office:value-type="float" office:value="13132" calcext:value-type="float">
            <text:p>13132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151990740740741" calcext:value-type="float">
            <text:p>0,00151990740740741000</text:p>
          </table:table-cell>
          <table:table-cell table:formula="of:=[.D137]-[.D136]" office:value-type="float" office:value="0.0000113425925925925" calcext:value-type="float">
            <text:p>0,0000113425925925925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98" office:value-type="float" office:value="13230" calcext:value-type="float">
            <text:p>13230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153125" calcext:value-type="float">
            <text:p>0,00153125000000000000</text:p>
          </table:table-cell>
          <table:table-cell table:formula="of:=[.D138]-[.D137]" office:value-type="float" office:value="0.0000113425925925925" calcext:value-type="float">
            <text:p>0,0000113425925925925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98" office:value-type="float" office:value="13328" calcext:value-type="float">
            <text:p>13328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154259259259259" calcext:value-type="float">
            <text:p>0,00154259259259259000</text:p>
          </table:table-cell>
          <table:table-cell table:formula="of:=[.D139]-[.D138]" office:value-type="float" office:value="0.0000113425925925927" calcext:value-type="float">
            <text:p>0,0000113425925925927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98" office:value-type="float" office:value="13426" calcext:value-type="float">
            <text:p>13426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155393518518519" calcext:value-type="float">
            <text:p>0,00155393518518518000</text:p>
          </table:table-cell>
          <table:table-cell table:formula="of:=[.D140]-[.D139]" office:value-type="float" office:value="0.0000113425925925925" calcext:value-type="float">
            <text:p>0,0000113425925925925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98" office:value-type="float" office:value="13524" calcext:value-type="float">
            <text:p>13524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156527777777778" calcext:value-type="float">
            <text:p>0,00156527777777778000</text:p>
          </table:table-cell>
          <table:table-cell table:formula="of:=[.D141]-[.D140]" office:value-type="float" office:value="0.0000113425925925925" calcext:value-type="float">
            <text:p>0,0000113425925925925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98" office:value-type="float" office:value="13622" calcext:value-type="float">
            <text:p>13622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157662037037037" calcext:value-type="float">
            <text:p>0,00157662037037037000</text:p>
          </table:table-cell>
          <table:table-cell table:formula="of:=[.D142]-[.D141]" office:value-type="float" office:value="0.0000113425925925927" calcext:value-type="float">
            <text:p>0,0000113425925925927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98" office:value-type="float" office:value="13720" calcext:value-type="float">
            <text:p>1372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158796296296296" calcext:value-type="float">
            <text:p>0,00158796296296296000</text:p>
          </table:table-cell>
          <table:table-cell table:formula="of:=[.D143]-[.D142]" office:value-type="float" office:value="0.0000113425925925925" calcext:value-type="float">
            <text:p>0,0000113425925925925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98" office:value-type="float" office:value="13818" calcext:value-type="float">
            <text:p>13818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159930555555556" calcext:value-type="float">
            <text:p>0,00159930555555556000</text:p>
          </table:table-cell>
          <table:table-cell table:formula="of:=[.D144]-[.D143]" office:value-type="float" office:value="0.0000113425925925925" calcext:value-type="float">
            <text:p>0,0000113425925925925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98" office:value-type="float" office:value="13916" calcext:value-type="float">
            <text:p>13916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161064814814815" calcext:value-type="float">
            <text:p>0,00161064814814815000</text:p>
          </table:table-cell>
          <table:table-cell table:formula="of:=[.D145]-[.D144]" office:value-type="float" office:value="0.0000113425925925927" calcext:value-type="float">
            <text:p>0,0000113425925925927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98" office:value-type="float" office:value="14014" calcext:value-type="float">
            <text:p>14014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162199074074074" calcext:value-type="float">
            <text:p>0,00162199074074074000</text:p>
          </table:table-cell>
          <table:table-cell table:formula="of:=[.D146]-[.D145]" office:value-type="float" office:value="0.0000113425925925925" calcext:value-type="float">
            <text:p>0,0000113425925925925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98" office:value-type="float" office:value="14112" calcext:value-type="float">
            <text:p>14112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163333333333333" calcext:value-type="float">
            <text:p>0,00163333333333333000</text:p>
          </table:table-cell>
          <table:table-cell table:formula="of:=[.D147]-[.D146]" office:value-type="float" office:value="0.0000113425925925925" calcext:value-type="float">
            <text:p>0,0000113425925925925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98" office:value-type="float" office:value="14210" calcext:value-type="float">
            <text:p>14210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164467592592593" calcext:value-type="float">
            <text:p>0,00164467592592593000</text:p>
          </table:table-cell>
          <table:table-cell table:formula="of:=[.D148]-[.D147]" office:value-type="float" office:value="0.0000113425925925927" calcext:value-type="float">
            <text:p>0,0000113425925925927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98" office:value-type="float" office:value="14308" calcext:value-type="float">
            <text:p>14308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165601851851852" calcext:value-type="float">
            <text:p>0,00165601851851852000</text:p>
          </table:table-cell>
          <table:table-cell table:formula="of:=[.D149]-[.D148]" office:value-type="float" office:value="0.0000113425925925925" calcext:value-type="float">
            <text:p>0,0000113425925925925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98" office:value-type="float" office:value="14406" calcext:value-type="float">
            <text:p>14406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166736111111111" calcext:value-type="float">
            <text:p>0,00166736111111111000</text:p>
          </table:table-cell>
          <table:table-cell table:formula="of:=[.D150]-[.D149]" office:value-type="float" office:value="0.0000113425925925925" calcext:value-type="float">
            <text:p>0,0000113425925925925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98" office:value-type="float" office:value="14504" calcext:value-type="float">
            <text:p>14504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16787037037037" calcext:value-type="float">
            <text:p>0,00167870370370370000</text:p>
          </table:table-cell>
          <table:table-cell table:formula="of:=[.D151]-[.D150]" office:value-type="float" office:value="0.0000113425925925925" calcext:value-type="float">
            <text:p>0,0000113425925925925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98" office:value-type="float" office:value="14602" calcext:value-type="float">
            <text:p>14602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16900462962963" calcext:value-type="float">
            <text:p>0,00169004629629630000</text:p>
          </table:table-cell>
          <table:table-cell table:formula="of:=[.D152]-[.D151]" office:value-type="float" office:value="0.0000113425925925927" calcext:value-type="float">
            <text:p>0,0000113425925925927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98" office:value-type="float" office:value="14700" calcext:value-type="float">
            <text:p>1470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170138888888889" calcext:value-type="float">
            <text:p>0,00170138888888889000</text:p>
          </table:table-cell>
          <table:table-cell table:formula="of:=[.D153]-[.D152]" office:value-type="float" office:value="0.0000113425925925925" calcext:value-type="float">
            <text:p>0,0000113425925925925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98" office:value-type="float" office:value="14798" calcext:value-type="float">
            <text:p>14798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171273148148148" calcext:value-type="float">
            <text:p>0,00171273148148148000</text:p>
          </table:table-cell>
          <table:table-cell table:formula="of:=[.D154]-[.D153]" office:value-type="float" office:value="0.0000113425925925925" calcext:value-type="float">
            <text:p>0,0000113425925925925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98" office:value-type="float" office:value="14896" calcext:value-type="float">
            <text:p>14896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172407407407407" calcext:value-type="float">
            <text:p>0,00172407407407407000</text:p>
          </table:table-cell>
          <table:table-cell table:formula="of:=[.D155]-[.D154]" office:value-type="float" office:value="0.0000113425925925927" calcext:value-type="float">
            <text:p>0,0000113425925925927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98" office:value-type="float" office:value="14994" calcext:value-type="float">
            <text:p>14994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173541666666667" calcext:value-type="float">
            <text:p>0,00173541666666667000</text:p>
          </table:table-cell>
          <table:table-cell table:formula="of:=[.D156]-[.D155]" office:value-type="float" office:value="0.0000113425925925925" calcext:value-type="float">
            <text:p>0,0000113425925925925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98" office:value-type="float" office:value="15092" calcext:value-type="float">
            <text:p>15092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174675925925926" calcext:value-type="float">
            <text:p>0,00174675925925926000</text:p>
          </table:table-cell>
          <table:table-cell table:formula="of:=[.D157]-[.D156]" office:value-type="float" office:value="0.0000113425925925925" calcext:value-type="float">
            <text:p>0,0000113425925925925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98" office:value-type="float" office:value="15190" calcext:value-type="float">
            <text:p>15190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175810185185185" calcext:value-type="float">
            <text:p>0,00175810185185185000</text:p>
          </table:table-cell>
          <table:table-cell table:formula="of:=[.D158]-[.D157]" office:value-type="float" office:value="0.0000113425925925927" calcext:value-type="float">
            <text:p>0,0000113425925925927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98" office:value-type="float" office:value="15288" calcext:value-type="float">
            <text:p>15288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176944444444444" calcext:value-type="float">
            <text:p>0,00176944444444444000</text:p>
          </table:table-cell>
          <table:table-cell table:formula="of:=[.D159]-[.D158]" office:value-type="float" office:value="0.0000113425925925925" calcext:value-type="float">
            <text:p>0,0000113425925925925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98" office:value-type="float" office:value="15386" calcext:value-type="float">
            <text:p>15386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178078703703704" calcext:value-type="float">
            <text:p>0,00178078703703704000</text:p>
          </table:table-cell>
          <table:table-cell table:formula="of:=[.D160]-[.D159]" office:value-type="float" office:value="0.0000113425925925925" calcext:value-type="float">
            <text:p>0,0000113425925925925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98" office:value-type="float" office:value="15484" calcext:value-type="float">
            <text:p>15484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179212962962963" calcext:value-type="float">
            <text:p>0,00179212962962963000</text:p>
          </table:table-cell>
          <table:table-cell table:formula="of:=[.D161]-[.D160]" office:value-type="float" office:value="0.0000113425925925927" calcext:value-type="float">
            <text:p>0,0000113425925925927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98" office:value-type="float" office:value="15582" calcext:value-type="float">
            <text:p>15582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180347222222222" calcext:value-type="float">
            <text:p>0,00180347222222222000</text:p>
          </table:table-cell>
          <table:table-cell table:formula="of:=[.D162]-[.D161]" office:value-type="float" office:value="0.0000113425925925925" calcext:value-type="float">
            <text:p>0,0000113425925925925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98" office:value-type="float" office:value="15680" calcext:value-type="float">
            <text:p>1568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181481481481482" calcext:value-type="float">
            <text:p>0,00181481481481482000</text:p>
          </table:table-cell>
          <table:table-cell table:formula="of:=[.D163]-[.D162]" office:value-type="float" office:value="0.0000113425925925925" calcext:value-type="float">
            <text:p>0,0000113425925925925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98" office:value-type="float" office:value="15778" calcext:value-type="float">
            <text:p>15778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182615740740741" calcext:value-type="float">
            <text:p>0,00182615740740741000</text:p>
          </table:table-cell>
          <table:table-cell table:formula="of:=[.D164]-[.D163]" office:value-type="float" office:value="0.0000113425925925927" calcext:value-type="float">
            <text:p>0,0000113425925925927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98" office:value-type="float" office:value="15876" calcext:value-type="float">
            <text:p>15876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18375" calcext:value-type="float">
            <text:p>0,00183750000000000000</text:p>
          </table:table-cell>
          <table:table-cell table:formula="of:=[.D165]-[.D164]" office:value-type="float" office:value="0.0000113425925925925" calcext:value-type="float">
            <text:p>0,0000113425925925925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98" office:value-type="float" office:value="15974" calcext:value-type="float">
            <text:p>15974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184884259259259" calcext:value-type="float">
            <text:p>0,00184884259259259000</text:p>
          </table:table-cell>
          <table:table-cell table:formula="of:=[.D166]-[.D165]" office:value-type="float" office:value="0.0000113425925925925" calcext:value-type="float">
            <text:p>0,0000113425925925925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98" office:value-type="float" office:value="16072" calcext:value-type="float">
            <text:p>16072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186018518518519" calcext:value-type="float">
            <text:p>0,00186018518518519000</text:p>
          </table:table-cell>
          <table:table-cell table:formula="of:=[.D167]-[.D166]" office:value-type="float" office:value="0.0000113425925925927" calcext:value-type="float">
            <text:p>0,0000113425925925927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98" office:value-type="float" office:value="16170" calcext:value-type="float">
            <text:p>16170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187152777777778" calcext:value-type="float">
            <text:p>0,00187152777777778000</text:p>
          </table:table-cell>
          <table:table-cell table:formula="of:=[.D168]-[.D167]" office:value-type="float" office:value="0.0000113425925925925" calcext:value-type="float">
            <text:p>0,0000113425925925925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98" office:value-type="float" office:value="16268" calcext:value-type="float">
            <text:p>16268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188287037037037" calcext:value-type="float">
            <text:p>0,00188287037037037000</text:p>
          </table:table-cell>
          <table:table-cell table:formula="of:=[.D169]-[.D168]" office:value-type="float" office:value="0.0000113425925925925" calcext:value-type="float">
            <text:p>0,0000113425925925925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98" office:value-type="float" office:value="16366" calcext:value-type="float">
            <text:p>16366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189421296296296" calcext:value-type="float">
            <text:p>0,00189421296296296000</text:p>
          </table:table-cell>
          <table:table-cell table:formula="of:=[.D170]-[.D169]" office:value-type="float" office:value="0.0000113425925925925" calcext:value-type="float">
            <text:p>0,0000113425925925925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98" office:value-type="float" office:value="16464" calcext:value-type="float">
            <text:p>16464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190555555555556" calcext:value-type="float">
            <text:p>0,00190555555555556000</text:p>
          </table:table-cell>
          <table:table-cell table:formula="of:=[.D171]-[.D170]" office:value-type="float" office:value="0.0000113425925925927" calcext:value-type="float">
            <text:p>0,0000113425925925927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98" office:value-type="float" office:value="16562" calcext:value-type="float">
            <text:p>16562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191689814814815" calcext:value-type="float">
            <text:p>0,00191689814814815000</text:p>
          </table:table-cell>
          <table:table-cell table:formula="of:=[.D172]-[.D171]" office:value-type="float" office:value="0.0000113425925925925" calcext:value-type="float">
            <text:p>0,0000113425925925925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98" office:value-type="float" office:value="16660" calcext:value-type="float">
            <text:p>1666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192824074074074" calcext:value-type="float">
            <text:p>0,00192824074074074000</text:p>
          </table:table-cell>
          <table:table-cell table:formula="of:=[.D173]-[.D172]" office:value-type="float" office:value="0.0000113425925925925" calcext:value-type="float">
            <text:p>0,0000113425925925925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98" office:value-type="float" office:value="16758" calcext:value-type="float">
            <text:p>16758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193958333333333" calcext:value-type="float">
            <text:p>0,00193958333333333000</text:p>
          </table:table-cell>
          <table:table-cell table:formula="of:=[.D174]-[.D173]" office:value-type="float" office:value="0.0000113425925925927" calcext:value-type="float">
            <text:p>0,0000113425925925927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98" office:value-type="float" office:value="16856" calcext:value-type="float">
            <text:p>16856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195092592592593" calcext:value-type="float">
            <text:p>0,00195092592592593000</text:p>
          </table:table-cell>
          <table:table-cell table:formula="of:=[.D175]-[.D174]" office:value-type="float" office:value="0.0000113425925925927" calcext:value-type="float">
            <text:p>0,0000113425925925927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98" office:value-type="float" office:value="16954" calcext:value-type="float">
            <text:p>16954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196226851851852" calcext:value-type="float">
            <text:p>0,00196226851851852000</text:p>
          </table:table-cell>
          <table:table-cell table:formula="of:=[.D176]-[.D175]" office:value-type="float" office:value="0.0000113425925925923" calcext:value-type="float">
            <text:p>0,0000113425925925923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98" office:value-type="float" office:value="17052" calcext:value-type="float">
            <text:p>17052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197361111111111" calcext:value-type="float">
            <text:p>0,00197361111111111000</text:p>
          </table:table-cell>
          <table:table-cell table:formula="of:=[.D177]-[.D176]" office:value-type="float" office:value="0.0000113425925925927" calcext:value-type="float">
            <text:p>0,0000113425925925927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98" office:value-type="float" office:value="17150" calcext:value-type="float">
            <text:p>17150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19849537037037" calcext:value-type="float">
            <text:p>0,00198495370370370000</text:p>
          </table:table-cell>
          <table:table-cell table:formula="of:=[.D178]-[.D177]" office:value-type="float" office:value="0.0000113425925925927" calcext:value-type="float">
            <text:p>0,0000113425925925927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98" office:value-type="float" office:value="17248" calcext:value-type="float">
            <text:p>17248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19962962962963" calcext:value-type="float">
            <text:p>0,00199629629629630000</text:p>
          </table:table-cell>
          <table:table-cell table:formula="of:=[.D179]-[.D178]" office:value-type="float" office:value="0.0000113425925925923" calcext:value-type="float">
            <text:p>0,0000113425925925923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98" office:value-type="float" office:value="17346" calcext:value-type="float">
            <text:p>17346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200763888888889" calcext:value-type="float">
            <text:p>0,00200763888888889000</text:p>
          </table:table-cell>
          <table:table-cell table:formula="of:=[.D180]-[.D179]" office:value-type="float" office:value="0.0000113425925925927" calcext:value-type="float">
            <text:p>0,0000113425925925927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98" office:value-type="float" office:value="17444" calcext:value-type="float">
            <text:p>17444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201898148148148" calcext:value-type="float">
            <text:p>0,00201898148148148000</text:p>
          </table:table-cell>
          <table:table-cell table:formula="of:=[.D181]-[.D180]" office:value-type="float" office:value="0.0000113425925925923" calcext:value-type="float">
            <text:p>0,0000113425925925923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98" office:value-type="float" office:value="17542" calcext:value-type="float">
            <text:p>17542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203032407407407" calcext:value-type="float">
            <text:p>0,00203032407407407000</text:p>
          </table:table-cell>
          <table:table-cell table:formula="of:=[.D182]-[.D181]" office:value-type="float" office:value="0.0000113425925925927" calcext:value-type="float">
            <text:p>0,0000113425925925927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98" office:value-type="float" office:value="17640" calcext:value-type="float">
            <text:p>1764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204166666666667" calcext:value-type="float">
            <text:p>0,00204166666666667000</text:p>
          </table:table-cell>
          <table:table-cell table:formula="of:=[.D183]-[.D182]" office:value-type="float" office:value="0.0000113425925925927" calcext:value-type="float">
            <text:p>0,0000113425925925927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98" office:value-type="float" office:value="17738" calcext:value-type="float">
            <text:p>17738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205300925925926" calcext:value-type="float">
            <text:p>0,00205300925925926000</text:p>
          </table:table-cell>
          <table:table-cell table:formula="of:=[.D184]-[.D183]" office:value-type="float" office:value="0.0000113425925925923" calcext:value-type="float">
            <text:p>0,0000113425925925923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98" office:value-type="float" office:value="17836" calcext:value-type="float">
            <text:p>17836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206435185185185" calcext:value-type="float">
            <text:p>0,00206435185185185000</text:p>
          </table:table-cell>
          <table:table-cell table:formula="of:=[.D185]-[.D184]" office:value-type="float" office:value="0.0000113425925925927" calcext:value-type="float">
            <text:p>0,0000113425925925927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98" office:value-type="float" office:value="17934" calcext:value-type="float">
            <text:p>17934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207569444444444" calcext:value-type="float">
            <text:p>0,00207569444444444000</text:p>
          </table:table-cell>
          <table:table-cell table:formula="of:=[.D186]-[.D185]" office:value-type="float" office:value="0.0000113425925925927" calcext:value-type="float">
            <text:p>0,0000113425925925927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98" office:value-type="float" office:value="18032" calcext:value-type="float">
            <text:p>18032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208703703703704" calcext:value-type="float">
            <text:p>0,00208703703703704000</text:p>
          </table:table-cell>
          <table:table-cell table:formula="of:=[.D187]-[.D186]" office:value-type="float" office:value="0.0000113425925925923" calcext:value-type="float">
            <text:p>0,0000113425925925923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98" office:value-type="float" office:value="18130" calcext:value-type="float">
            <text:p>18130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209837962962963" calcext:value-type="float">
            <text:p>0,00209837962962963000</text:p>
          </table:table-cell>
          <table:table-cell table:formula="of:=[.D188]-[.D187]" office:value-type="float" office:value="0.0000113425925925927" calcext:value-type="float">
            <text:p>0,0000113425925925927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98" office:value-type="float" office:value="18228" calcext:value-type="float">
            <text:p>18228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210972222222222" calcext:value-type="float">
            <text:p>0,00210972222222222000</text:p>
          </table:table-cell>
          <table:table-cell table:formula="of:=[.D189]-[.D188]" office:value-type="float" office:value="0.0000113425925925927" calcext:value-type="float">
            <text:p>0,0000113425925925927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98" office:value-type="float" office:value="18326" calcext:value-type="float">
            <text:p>18326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212106481481481" calcext:value-type="float">
            <text:p>0,00212106481481481000</text:p>
          </table:table-cell>
          <table:table-cell table:formula="of:=[.D190]-[.D189]" office:value-type="float" office:value="0.0000113425925925923" calcext:value-type="float">
            <text:p>0,0000113425925925923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98" office:value-type="float" office:value="18424" calcext:value-type="float">
            <text:p>18424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213240740740741" calcext:value-type="float">
            <text:p>0,00213240740740741000</text:p>
          </table:table-cell>
          <table:table-cell table:formula="of:=[.D191]-[.D190]" office:value-type="float" office:value="0.0000113425925925927" calcext:value-type="float">
            <text:p>0,0000113425925925927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98" office:value-type="float" office:value="18522" calcext:value-type="float">
            <text:p>18522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214375" calcext:value-type="float">
            <text:p>0,00214375000000000000</text:p>
          </table:table-cell>
          <table:table-cell table:formula="of:=[.D192]-[.D191]" office:value-type="float" office:value="0.0000113425925925927" calcext:value-type="float">
            <text:p>0,0000113425925925927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98" office:value-type="float" office:value="18620" calcext:value-type="float">
            <text:p>1862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215509259259259" calcext:value-type="float">
            <text:p>0,00215509259259259000</text:p>
          </table:table-cell>
          <table:table-cell table:formula="of:=[.D193]-[.D192]" office:value-type="float" office:value="0.0000113425925925923" calcext:value-type="float">
            <text:p>0,0000113425925925923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98" office:value-type="float" office:value="18718" calcext:value-type="float">
            <text:p>18718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216643518518519" calcext:value-type="float">
            <text:p>0,00216643518518519000</text:p>
          </table:table-cell>
          <table:table-cell table:formula="of:=[.D194]-[.D193]" office:value-type="float" office:value="0.0000113425925925927" calcext:value-type="float">
            <text:p>0,0000113425925925927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98" office:value-type="float" office:value="18816" calcext:value-type="float">
            <text:p>18816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217777777777778" calcext:value-type="float">
            <text:p>0,00217777777777778000</text:p>
          </table:table-cell>
          <table:table-cell table:formula="of:=[.D195]-[.D194]" office:value-type="float" office:value="0.0000113425925925927" calcext:value-type="float">
            <text:p>0,0000113425925925927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98" office:value-type="float" office:value="18914" calcext:value-type="float">
            <text:p>18914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218912037037037" calcext:value-type="float">
            <text:p>0,00218912037037037000</text:p>
          </table:table-cell>
          <table:table-cell table:formula="of:=[.D196]-[.D195]" office:value-type="float" office:value="0.0000113425925925923" calcext:value-type="float">
            <text:p>0,0000113425925925923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98" office:value-type="float" office:value="19012" calcext:value-type="float">
            <text:p>19012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220046296296296" calcext:value-type="float">
            <text:p>0,00220046296296296000</text:p>
          </table:table-cell>
          <table:table-cell table:formula="of:=[.D197]-[.D196]" office:value-type="float" office:value="0.0000113425925925927" calcext:value-type="float">
            <text:p>0,0000113425925925927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98" office:value-type="float" office:value="19110" calcext:value-type="float">
            <text:p>19110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221180555555556" calcext:value-type="float">
            <text:p>0,00221180555555556000</text:p>
          </table:table-cell>
          <table:table-cell table:formula="of:=[.D198]-[.D197]" office:value-type="float" office:value="0.0000113425925925927" calcext:value-type="float">
            <text:p>0,0000113425925925927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98" office:value-type="float" office:value="19208" calcext:value-type="float">
            <text:p>19208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222314814814815" calcext:value-type="float">
            <text:p>0,00222314814814815000</text:p>
          </table:table-cell>
          <table:table-cell table:formula="of:=[.D199]-[.D198]" office:value-type="float" office:value="0.0000113425925925923" calcext:value-type="float">
            <text:p>0,0000113425925925923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98" office:value-type="float" office:value="19306" calcext:value-type="float">
            <text:p>19306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223449074074074" calcext:value-type="float">
            <text:p>0,00223449074074074000</text:p>
          </table:table-cell>
          <table:table-cell table:formula="of:=[.D200]-[.D199]" office:value-type="float" office:value="0.0000113425925925927" calcext:value-type="float">
            <text:p>0,0000113425925925927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98" office:value-type="float" office:value="19404" calcext:value-type="float">
            <text:p>19404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224583333333333" calcext:value-type="float">
            <text:p>0,00224583333333333000</text:p>
          </table:table-cell>
          <table:table-cell table:formula="of:=[.D201]-[.D200]" office:value-type="float" office:value="0.0000113425925925927" calcext:value-type="float">
            <text:p>0,0000113425925925927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98" office:value-type="float" office:value="19502" calcext:value-type="float">
            <text:p>19502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225717592592593" calcext:value-type="float">
            <text:p>0,00225717592592593000</text:p>
          </table:table-cell>
          <table:table-cell table:formula="of:=[.D202]-[.D201]" office:value-type="float" office:value="0.0000113425925925923" calcext:value-type="float">
            <text:p>0,0000113425925925923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98" office:value-type="float" office:value="19600" calcext:value-type="float">
            <text:p>196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226851851851852" calcext:value-type="float">
            <text:p>0,00226851851851852000</text:p>
          </table:table-cell>
          <table:table-cell table:formula="of:=[.D203]-[.D202]" office:value-type="float" office:value="0.0000113425925925927" calcext:value-type="float">
            <text:p>0,0000113425925925927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98" office:value-type="float" office:value="19698" calcext:value-type="float">
            <text:p>19698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227986111111111" calcext:value-type="float">
            <text:p>0,00227986111111111000</text:p>
          </table:table-cell>
          <table:table-cell table:formula="of:=[.D204]-[.D203]" office:value-type="float" office:value="0.0000113425925925927" calcext:value-type="float">
            <text:p>0,0000113425925925927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98" office:value-type="float" office:value="19796" calcext:value-type="float">
            <text:p>19796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22912037037037" calcext:value-type="float">
            <text:p>0,00229120370370370000</text:p>
          </table:table-cell>
          <table:table-cell table:formula="of:=[.D205]-[.D204]" office:value-type="float" office:value="0.0000113425925925923" calcext:value-type="float">
            <text:p>0,0000113425925925923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98" office:value-type="float" office:value="19894" calcext:value-type="float">
            <text:p>19894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23025462962963" calcext:value-type="float">
            <text:p>0,00230254629629630000</text:p>
          </table:table-cell>
          <table:table-cell table:formula="of:=[.D206]-[.D205]" office:value-type="float" office:value="0.0000113425925925927" calcext:value-type="float">
            <text:p>0,0000113425925925927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98" office:value-type="float" office:value="19992" calcext:value-type="float">
            <text:p>19992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231388888888889" calcext:value-type="float">
            <text:p>0,00231388888888889000</text:p>
          </table:table-cell>
          <table:table-cell table:formula="of:=[.D207]-[.D206]" office:value-type="float" office:value="0.0000113425925925927" calcext:value-type="float">
            <text:p>0,0000113425925925927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98" office:value-type="float" office:value="20090" calcext:value-type="float">
            <text:p>20090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232523148148148" calcext:value-type="float">
            <text:p>0,00232523148148148000</text:p>
          </table:table-cell>
          <table:table-cell table:formula="of:=[.D208]-[.D207]" office:value-type="float" office:value="0.0000113425925925923" calcext:value-type="float">
            <text:p>0,0000113425925925923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98" office:value-type="float" office:value="20188" calcext:value-type="float">
            <text:p>20188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233657407407407" calcext:value-type="float">
            <text:p>0,00233657407407407000</text:p>
          </table:table-cell>
          <table:table-cell table:formula="of:=[.D209]-[.D208]" office:value-type="float" office:value="0.0000113425925925927" calcext:value-type="float">
            <text:p>0,0000113425925925927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98" office:value-type="float" office:value="20286" calcext:value-type="float">
            <text:p>20286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234791666666667" calcext:value-type="float">
            <text:p>0,00234791666666667000</text:p>
          </table:table-cell>
          <table:table-cell table:formula="of:=[.D210]-[.D209]" office:value-type="float" office:value="0.0000113425925925927" calcext:value-type="float">
            <text:p>0,0000113425925925927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98" office:value-type="float" office:value="20384" calcext:value-type="float">
            <text:p>20384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235925925925926" calcext:value-type="float">
            <text:p>0,00235925925925926000</text:p>
          </table:table-cell>
          <table:table-cell table:formula="of:=[.D211]-[.D210]" office:value-type="float" office:value="0.0000113425925925923" calcext:value-type="float">
            <text:p>0,0000113425925925923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98" office:value-type="float" office:value="20482" calcext:value-type="float">
            <text:p>20482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237060185185185" calcext:value-type="float">
            <text:p>0,00237060185185185000</text:p>
          </table:table-cell>
          <table:table-cell table:formula="of:=[.D212]-[.D211]" office:value-type="float" office:value="0.0000113425925925927" calcext:value-type="float">
            <text:p>0,0000113425925925927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98" office:value-type="float" office:value="20580" calcext:value-type="float">
            <text:p>2058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238194444444444" calcext:value-type="float">
            <text:p>0,00238194444444444000</text:p>
          </table:table-cell>
          <table:table-cell table:formula="of:=[.D213]-[.D212]" office:value-type="float" office:value="0.0000113425925925927" calcext:value-type="float">
            <text:p>0,0000113425925925927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98" office:value-type="float" office:value="20678" calcext:value-type="float">
            <text:p>20678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239328703703704" calcext:value-type="float">
            <text:p>0,00239328703703704000</text:p>
          </table:table-cell>
          <table:table-cell table:formula="of:=[.D214]-[.D213]" office:value-type="float" office:value="0.0000113425925925923" calcext:value-type="float">
            <text:p>0,0000113425925925923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98" office:value-type="float" office:value="20776" calcext:value-type="float">
            <text:p>20776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240462962962963" calcext:value-type="float">
            <text:p>0,00240462962962963000</text:p>
          </table:table-cell>
          <table:table-cell table:formula="of:=[.D215]-[.D214]" office:value-type="float" office:value="0.0000113425925925927" calcext:value-type="float">
            <text:p>0,0000113425925925927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98" office:value-type="float" office:value="20874" calcext:value-type="float">
            <text:p>20874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241597222222222" calcext:value-type="float">
            <text:p>0,00241597222222222000</text:p>
          </table:table-cell>
          <table:table-cell table:formula="of:=[.D216]-[.D215]" office:value-type="float" office:value="0.0000113425925925927" calcext:value-type="float">
            <text:p>0,0000113425925925927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98" office:value-type="float" office:value="20972" calcext:value-type="float">
            <text:p>20972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242731481481482" calcext:value-type="float">
            <text:p>0,00242731481481482000</text:p>
          </table:table-cell>
          <table:table-cell table:formula="of:=[.D217]-[.D216]" office:value-type="float" office:value="0.0000113425925925923" calcext:value-type="float">
            <text:p>0,0000113425925925923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98" office:value-type="float" office:value="21070" calcext:value-type="float">
            <text:p>21070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243865740740741" calcext:value-type="float">
            <text:p>0,00243865740740741000</text:p>
          </table:table-cell>
          <table:table-cell table:formula="of:=[.D218]-[.D217]" office:value-type="float" office:value="0.0000113425925925927" calcext:value-type="float">
            <text:p>0,0000113425925925927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98" office:value-type="float" office:value="21168" calcext:value-type="float">
            <text:p>21168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245" calcext:value-type="float">
            <text:p>0,00245000000000000000</text:p>
          </table:table-cell>
          <table:table-cell table:formula="of:=[.D219]-[.D218]" office:value-type="float" office:value="0.0000113425925925923" calcext:value-type="float">
            <text:p>0,0000113425925925923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98" office:value-type="float" office:value="21266" calcext:value-type="float">
            <text:p>21266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246134259259259" calcext:value-type="float">
            <text:p>0,00246134259259259000</text:p>
          </table:table-cell>
          <table:table-cell table:formula="of:=[.D220]-[.D219]" office:value-type="float" office:value="0.0000113425925925927" calcext:value-type="float">
            <text:p>0,0000113425925925927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98" office:value-type="float" office:value="21364" calcext:value-type="float">
            <text:p>21364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247268518518519" calcext:value-type="float">
            <text:p>0,00247268518518519000</text:p>
          </table:table-cell>
          <table:table-cell table:formula="of:=[.D221]-[.D220]" office:value-type="float" office:value="0.0000113425925925927" calcext:value-type="float">
            <text:p>0,0000113425925925927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98" office:value-type="float" office:value="21462" calcext:value-type="float">
            <text:p>21462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248402777777778" calcext:value-type="float">
            <text:p>0,00248402777777778000</text:p>
          </table:table-cell>
          <table:table-cell table:formula="of:=[.D222]-[.D221]" office:value-type="float" office:value="0.0000113425925925923" calcext:value-type="float">
            <text:p>0,0000113425925925923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98" office:value-type="float" office:value="21560" calcext:value-type="float">
            <text:p>2156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249537037037037" calcext:value-type="float">
            <text:p>0,00249537037037037000</text:p>
          </table:table-cell>
          <table:table-cell table:formula="of:=[.D223]-[.D222]" office:value-type="float" office:value="0.0000113425925925927" calcext:value-type="float">
            <text:p>0,0000113425925925927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98" office:value-type="float" office:value="21658" calcext:value-type="float">
            <text:p>21658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250671296296296" calcext:value-type="float">
            <text:p>0,00250671296296296000</text:p>
          </table:table-cell>
          <table:table-cell table:formula="of:=[.D224]-[.D223]" office:value-type="float" office:value="0.0000113425925925927" calcext:value-type="float">
            <text:p>0,0000113425925925927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98" office:value-type="float" office:value="21756" calcext:value-type="float">
            <text:p>21756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251805555555556" calcext:value-type="float">
            <text:p>0,00251805555555556000</text:p>
          </table:table-cell>
          <table:table-cell table:formula="of:=[.D225]-[.D224]" office:value-type="float" office:value="0.0000113425925925923" calcext:value-type="float">
            <text:p>0,0000113425925925923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98" office:value-type="float" office:value="21854" calcext:value-type="float">
            <text:p>21854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252939814814815" calcext:value-type="float">
            <text:p>0,00252939814814815000</text:p>
          </table:table-cell>
          <table:table-cell table:formula="of:=[.D226]-[.D225]" office:value-type="float" office:value="0.0000113425925925927" calcext:value-type="float">
            <text:p>0,0000113425925925927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98" office:value-type="float" office:value="21952" calcext:value-type="float">
            <text:p>21952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254074074074074" calcext:value-type="float">
            <text:p>0,00254074074074074000</text:p>
          </table:table-cell>
          <table:table-cell table:formula="of:=[.D227]-[.D226]" office:value-type="float" office:value="0.0000113425925925927" calcext:value-type="float">
            <text:p>0,0000113425925925927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98" office:value-type="float" office:value="22050" calcext:value-type="float">
            <text:p>22050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255208333333333" calcext:value-type="float">
            <text:p>0,00255208333333333000</text:p>
          </table:table-cell>
          <table:table-cell table:formula="of:=[.D228]-[.D227]" office:value-type="float" office:value="0.0000113425925925923" calcext:value-type="float">
            <text:p>0,0000113425925925923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98" office:value-type="float" office:value="22148" calcext:value-type="float">
            <text:p>22148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256342592592593" calcext:value-type="float">
            <text:p>0,00256342592592593000</text:p>
          </table:table-cell>
          <table:table-cell table:formula="of:=[.D229]-[.D228]" office:value-type="float" office:value="0.0000113425925925927" calcext:value-type="float">
            <text:p>0,0000113425925925927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98" office:value-type="float" office:value="22246" calcext:value-type="float">
            <text:p>22246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257476851851852" calcext:value-type="float">
            <text:p>0,00257476851851852000</text:p>
          </table:table-cell>
          <table:table-cell table:formula="of:=[.D230]-[.D229]" office:value-type="float" office:value="0.0000113425925925927" calcext:value-type="float">
            <text:p>0,0000113425925925927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98" office:value-type="float" office:value="22344" calcext:value-type="float">
            <text:p>22344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258611111111111" calcext:value-type="float">
            <text:p>0,00258611111111111000</text:p>
          </table:table-cell>
          <table:table-cell table:formula="of:=[.D231]-[.D230]" office:value-type="float" office:value="0.0000113425925925923" calcext:value-type="float">
            <text:p>0,0000113425925925923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98" office:value-type="float" office:value="22442" calcext:value-type="float">
            <text:p>22442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25974537037037" calcext:value-type="float">
            <text:p>0,00259745370370370000</text:p>
          </table:table-cell>
          <table:table-cell table:formula="of:=[.D232]-[.D231]" office:value-type="float" office:value="0.0000113425925925927" calcext:value-type="float">
            <text:p>0,0000113425925925927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98" office:value-type="float" office:value="22540" calcext:value-type="float">
            <text:p>2254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26087962962963" calcext:value-type="float">
            <text:p>0,00260879629629630000</text:p>
          </table:table-cell>
          <table:table-cell table:formula="of:=[.D233]-[.D232]" office:value-type="float" office:value="0.0000113425925925927" calcext:value-type="float">
            <text:p>0,0000113425925925927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98" office:value-type="float" office:value="22638" calcext:value-type="float">
            <text:p>22638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262013888888889" calcext:value-type="float">
            <text:p>0,00262013888888889000</text:p>
          </table:table-cell>
          <table:table-cell table:formula="of:=[.D234]-[.D233]" office:value-type="float" office:value="0.0000113425925925923" calcext:value-type="float">
            <text:p>0,0000113425925925923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98" office:value-type="float" office:value="22736" calcext:value-type="float">
            <text:p>22736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263148148148148" calcext:value-type="float">
            <text:p>0,00263148148148148000</text:p>
          </table:table-cell>
          <table:table-cell table:formula="of:=[.D235]-[.D234]" office:value-type="float" office:value="0.0000113425925925927" calcext:value-type="float">
            <text:p>0,0000113425925925927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98" office:value-type="float" office:value="22834" calcext:value-type="float">
            <text:p>22834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264282407407407" calcext:value-type="float">
            <text:p>0,00264282407407407000</text:p>
          </table:table-cell>
          <table:table-cell table:formula="of:=[.D236]-[.D235]" office:value-type="float" office:value="0.0000113425925925927" calcext:value-type="float">
            <text:p>0,0000113425925925927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98" office:value-type="float" office:value="22932" calcext:value-type="float">
            <text:p>22932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265416666666667" calcext:value-type="float">
            <text:p>0,00265416666666667000</text:p>
          </table:table-cell>
          <table:table-cell table:formula="of:=[.D237]-[.D236]" office:value-type="float" office:value="0.0000113425925925923" calcext:value-type="float">
            <text:p>0,0000113425925925923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98" office:value-type="float" office:value="23030" calcext:value-type="float">
            <text:p>23030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266550925925926" calcext:value-type="float">
            <text:p>0,00266550925925926000</text:p>
          </table:table-cell>
          <table:table-cell table:formula="of:=[.D238]-[.D237]" office:value-type="float" office:value="0.0000113425925925927" calcext:value-type="float">
            <text:p>0,0000113425925925927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98" office:value-type="float" office:value="23128" calcext:value-type="float">
            <text:p>23128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267685185185185" calcext:value-type="float">
            <text:p>0,00267685185185185000</text:p>
          </table:table-cell>
          <table:table-cell table:formula="of:=[.D239]-[.D238]" office:value-type="float" office:value="0.0000113425925925927" calcext:value-type="float">
            <text:p>0,0000113425925925927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98" office:value-type="float" office:value="23226" calcext:value-type="float">
            <text:p>23226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268819444444444" calcext:value-type="float">
            <text:p>0,00268819444444444000</text:p>
          </table:table-cell>
          <table:table-cell table:formula="of:=[.D240]-[.D239]" office:value-type="float" office:value="0.0000113425925925923" calcext:value-type="float">
            <text:p>0,0000113425925925923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98" office:value-type="float" office:value="23324" calcext:value-type="float">
            <text:p>23324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269953703703704" calcext:value-type="float">
            <text:p>0,00269953703703704000</text:p>
          </table:table-cell>
          <table:table-cell table:formula="of:=[.D241]-[.D240]" office:value-type="float" office:value="0.0000113425925925927" calcext:value-type="float">
            <text:p>0,0000113425925925927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98" office:value-type="float" office:value="23422" calcext:value-type="float">
            <text:p>23422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271087962962963" calcext:value-type="float">
            <text:p>0,00271087962962963000</text:p>
          </table:table-cell>
          <table:table-cell table:formula="of:=[.D242]-[.D241]" office:value-type="float" office:value="0.0000113425925925927" calcext:value-type="float">
            <text:p>0,0000113425925925927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98" office:value-type="float" office:value="23520" calcext:value-type="float">
            <text:p>2352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272222222222222" calcext:value-type="float">
            <text:p>0,00272222222222222000</text:p>
          </table:table-cell>
          <table:table-cell table:formula="of:=[.D243]-[.D242]" office:value-type="float" office:value="0.0000113425925925923" calcext:value-type="float">
            <text:p>0,0000113425925925923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98" office:value-type="float" office:value="23618" calcext:value-type="float">
            <text:p>23618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273356481481482" calcext:value-type="float">
            <text:p>0,00273356481481482000</text:p>
          </table:table-cell>
          <table:table-cell table:formula="of:=[.D244]-[.D243]" office:value-type="float" office:value="0.0000113425925925927" calcext:value-type="float">
            <text:p>0,0000113425925925927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98" office:value-type="float" office:value="23716" calcext:value-type="float">
            <text:p>23716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274490740740741" calcext:value-type="float">
            <text:p>0,00274490740740741000</text:p>
          </table:table-cell>
          <table:table-cell table:formula="of:=[.D245]-[.D244]" office:value-type="float" office:value="0.0000113425925925927" calcext:value-type="float">
            <text:p>0,0000113425925925927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98" office:value-type="float" office:value="23814" calcext:value-type="float">
            <text:p>23814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275625" calcext:value-type="float">
            <text:p>0,00275625000000000000</text:p>
          </table:table-cell>
          <table:table-cell table:formula="of:=[.D246]-[.D245]" office:value-type="float" office:value="-0.00276759259259259" calcext:value-type="float">
            <text:p>-0,0027675925925925900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98" office:value-type="float" office:value="23912" calcext:value-type="float">
            <text:p>23912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276759259259259" calcext:value-type="float">
            <text:p>0,00276759259259259000</text:p>
          </table:table-cell>
          <table:table-cell table:formula="of:=[.D247]-[.D246]" office:value-type="float" office:value="0" calcext:value-type="float">
            <text:p>0,00000000000000000000</text:p>
          </table:table-cell>
        </table:table-row>
        <table:table-row table:style-name="ro1" table:number-rows-repeated="104833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9:43:39.241914471</meta:creation-date>
    <dc:date>2026-05-17T19:43:54.271862963</dc:date>
    <meta:editing-duration>PT16S</meta:editing-duration>
    <meta:editing-cycles>1</meta:editing-cycles>
    <meta:document-statistic meta:table-count="1" meta:cell-count="1225" meta:object-count="0"/>
    <meta:generator>LibreOffice/24.2.7.2$Linux_X86_64 LibreOffice_project/420$Build-2</meta:generator>
  </office:meta>
</office:document-meta>
</file>