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4.9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29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29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335648148148148" calcext:value-type="float">
            <text:p>0,00000335648148148148</text:p>
          </table:table-cell>
          <table:table-cell table:formula="of:=[.D3]-[.D2]" office:value-type="float" office:value="0.00000335648148148148" calcext:value-type="float">
            <text:p>0,000003356481481481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29" office:value-type="float" office:value="58" calcext:value-type="float">
            <text:p>58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0671296296296296" calcext:value-type="float">
            <text:p>0,00000671296296296296</text:p>
          </table:table-cell>
          <table:table-cell table:formula="of:=[.D4]-[.D3]" office:value-type="float" office:value="0.00000335648148148148" calcext:value-type="float">
            <text:p>0,000003356481481481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29" office:value-type="float" office:value="87" calcext:value-type="float">
            <text:p>87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100694444444444" calcext:value-type="float">
            <text:p>0,00001006944444444450</text:p>
          </table:table-cell>
          <table:table-cell table:formula="of:=[.D5]-[.D4]" office:value-type="float" office:value="0.00000335648148148148" calcext:value-type="float">
            <text:p>0,000003356481481481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29" office:value-type="float" office:value="116" calcext:value-type="float">
            <text:p>116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134259259259259" calcext:value-type="float">
            <text:p>0,00001342592592592590</text:p>
          </table:table-cell>
          <table:table-cell table:formula="of:=[.D6]-[.D5]" office:value-type="float" office:value="0.00000335648148148148" calcext:value-type="float">
            <text:p>0,000003356481481481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29" office:value-type="float" office:value="145" calcext:value-type="float">
            <text:p>145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167824074074074" calcext:value-type="float">
            <text:p>0,00001678240740740740</text:p>
          </table:table-cell>
          <table:table-cell table:formula="of:=[.D7]-[.D6]" office:value-type="float" office:value="0.00000335648148148148" calcext:value-type="float">
            <text:p>0,000003356481481481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29" office:value-type="float" office:value="174" calcext:value-type="float">
            <text:p>174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201388888888889" calcext:value-type="float">
            <text:p>0,00002013888888888890</text:p>
          </table:table-cell>
          <table:table-cell table:formula="of:=[.D8]-[.D7]" office:value-type="float" office:value="0.00000335648148148148" calcext:value-type="float">
            <text:p>0,000003356481481481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29" office:value-type="float" office:value="203" calcext:value-type="float">
            <text:p>203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234953703703704" calcext:value-type="float">
            <text:p>0,00002349537037037040</text:p>
          </table:table-cell>
          <table:table-cell table:formula="of:=[.D9]-[.D8]" office:value-type="float" office:value="0.00000335648148148148" calcext:value-type="float">
            <text:p>0,000003356481481481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29" office:value-type="float" office:value="232" calcext:value-type="float">
            <text:p>232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268518518518519" calcext:value-type="float">
            <text:p>0,00002685185185185190</text:p>
          </table:table-cell>
          <table:table-cell table:formula="of:=[.D10]-[.D9]" office:value-type="float" office:value="0.00000335648148148148" calcext:value-type="float">
            <text:p>0,000003356481481481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29" office:value-type="float" office:value="261" calcext:value-type="float">
            <text:p>261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302083333333333" calcext:value-type="float">
            <text:p>0,00003020833333333330</text:p>
          </table:table-cell>
          <table:table-cell table:formula="of:=[.D11]-[.D10]" office:value-type="float" office:value="0.00000335648148148148" calcext:value-type="float">
            <text:p>0,000003356481481481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29" office:value-type="float" office:value="290" calcext:value-type="float">
            <text:p>29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335648148148148" calcext:value-type="float">
            <text:p>0,00003356481481481480</text:p>
          </table:table-cell>
          <table:table-cell table:formula="of:=[.D12]-[.D11]" office:value-type="float" office:value="0.00000335648148148148" calcext:value-type="float">
            <text:p>0,000003356481481481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29" office:value-type="float" office:value="319" calcext:value-type="float">
            <text:p>319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0369212962962963" calcext:value-type="float">
            <text:p>0,00003692129629629630</text:p>
          </table:table-cell>
          <table:table-cell table:formula="of:=[.D13]-[.D12]" office:value-type="float" office:value="0.00000335648148148148" calcext:value-type="float">
            <text:p>0,000003356481481481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29" office:value-type="float" office:value="348" calcext:value-type="float">
            <text:p>348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0402777777777778" calcext:value-type="float">
            <text:p>0,00004027777777777780</text:p>
          </table:table-cell>
          <table:table-cell table:formula="of:=[.D14]-[.D13]" office:value-type="float" office:value="0.00000335648148148148" calcext:value-type="float">
            <text:p>0,000003356481481481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29" office:value-type="float" office:value="377" calcext:value-type="float">
            <text:p>377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0436342592592593" calcext:value-type="float">
            <text:p>0,00004363425925925930</text:p>
          </table:table-cell>
          <table:table-cell table:formula="of:=[.D15]-[.D14]" office:value-type="float" office:value="0.00000335648148148148" calcext:value-type="float">
            <text:p>0,000003356481481481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29" office:value-type="float" office:value="406" calcext:value-type="float">
            <text:p>406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0469907407407407" calcext:value-type="float">
            <text:p>0,00004699074074074070</text:p>
          </table:table-cell>
          <table:table-cell table:formula="of:=[.D16]-[.D15]" office:value-type="float" office:value="0.00000335648148148148" calcext:value-type="float">
            <text:p>0,000003356481481481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29" office:value-type="float" office:value="435" calcext:value-type="float">
            <text:p>435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0503472222222222" calcext:value-type="float">
            <text:p>0,00005034722222222220</text:p>
          </table:table-cell>
          <table:table-cell table:formula="of:=[.D17]-[.D16]" office:value-type="float" office:value="0.00000335648148148148" calcext:value-type="float">
            <text:p>0,000003356481481481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29" office:value-type="float" office:value="464" calcext:value-type="float">
            <text:p>464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0537037037037037" calcext:value-type="float">
            <text:p>0,00005370370370370370</text:p>
          </table:table-cell>
          <table:table-cell table:formula="of:=[.D18]-[.D17]" office:value-type="float" office:value="0.00000335648148148148" calcext:value-type="float">
            <text:p>0,000003356481481481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29" office:value-type="float" office:value="493" calcext:value-type="float">
            <text:p>493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0570601851851852" calcext:value-type="float">
            <text:p>0,00005706018518518520</text:p>
          </table:table-cell>
          <table:table-cell table:formula="of:=[.D19]-[.D18]" office:value-type="float" office:value="0.00000335648148148148" calcext:value-type="float">
            <text:p>0,0000033564814814814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29" office:value-type="float" office:value="522" calcext:value-type="float">
            <text:p>522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0604166666666667" calcext:value-type="float">
            <text:p>0,00006041666666666670</text:p>
          </table:table-cell>
          <table:table-cell table:formula="of:=[.D20]-[.D19]" office:value-type="float" office:value="0.00000335648148148147" calcext:value-type="float">
            <text:p>0,000003356481481481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29" office:value-type="float" office:value="551" calcext:value-type="float">
            <text:p>551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0637731481481481" calcext:value-type="float">
            <text:p>0,00006377314814814810</text:p>
          </table:table-cell>
          <table:table-cell table:formula="of:=[.D21]-[.D20]" office:value-type="float" office:value="0.00000335648148148149" calcext:value-type="float">
            <text:p>0,000003356481481481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29" office:value-type="float" office:value="580" calcext:value-type="float">
            <text:p>58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0671296296296296" calcext:value-type="float">
            <text:p>0,00006712962962962960</text:p>
          </table:table-cell>
          <table:table-cell table:formula="of:=[.D22]-[.D21]" office:value-type="float" office:value="0.00000335648148148147" calcext:value-type="float">
            <text:p>0,0000033564814814814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29" office:value-type="float" office:value="609" calcext:value-type="float">
            <text:p>609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0704861111111111" calcext:value-type="float">
            <text:p>0,00007048611111111110</text:p>
          </table:table-cell>
          <table:table-cell table:formula="of:=[.D23]-[.D22]" office:value-type="float" office:value="0.00000335648148148149" calcext:value-type="float">
            <text:p>0,0000033564814814814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29" office:value-type="float" office:value="638" calcext:value-type="float">
            <text:p>638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0738425925925926" calcext:value-type="float">
            <text:p>0,00007384259259259260</text:p>
          </table:table-cell>
          <table:table-cell table:formula="of:=[.D24]-[.D23]" office:value-type="float" office:value="0.00000335648148148147" calcext:value-type="float">
            <text:p>0,0000033564814814814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29" office:value-type="float" office:value="667" calcext:value-type="float">
            <text:p>667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0771990740740741" calcext:value-type="float">
            <text:p>0,00007719907407407410</text:p>
          </table:table-cell>
          <table:table-cell table:formula="of:=[.D25]-[.D24]" office:value-type="float" office:value="0.00000335648148148149" calcext:value-type="float">
            <text:p>0,0000033564814814814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29" office:value-type="float" office:value="696" calcext:value-type="float">
            <text:p>696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0805555555555556" calcext:value-type="float">
            <text:p>0,00008055555555555560</text:p>
          </table:table-cell>
          <table:table-cell table:formula="of:=[.D26]-[.D25]" office:value-type="float" office:value="0.00000335648148148147" calcext:value-type="float">
            <text:p>0,000003356481481481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29" office:value-type="float" office:value="725" calcext:value-type="float">
            <text:p>725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083912037037037" calcext:value-type="float">
            <text:p>0,00008391203703703700</text:p>
          </table:table-cell>
          <table:table-cell table:formula="of:=[.D27]-[.D26]" office:value-type="float" office:value="0.00000335648148148149" calcext:value-type="float">
            <text:p>0,0000033564814814814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29" office:value-type="float" office:value="754" calcext:value-type="float">
            <text:p>754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0872685185185185" calcext:value-type="float">
            <text:p>0,00008726851851851850</text:p>
          </table:table-cell>
          <table:table-cell table:formula="of:=[.D28]-[.D27]" office:value-type="float" office:value="0.00000335648148148147" calcext:value-type="float">
            <text:p>0,0000033564814814814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29" office:value-type="float" office:value="783" calcext:value-type="float">
            <text:p>783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090625" calcext:value-type="float">
            <text:p>0,00009062500000000000</text:p>
          </table:table-cell>
          <table:table-cell table:formula="of:=[.D29]-[.D28]" office:value-type="float" office:value="0.00000335648148148149" calcext:value-type="float">
            <text:p>0,0000033564814814814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29" office:value-type="float" office:value="812" calcext:value-type="float">
            <text:p>812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0939814814814815" calcext:value-type="float">
            <text:p>0,00009398148148148150</text:p>
          </table:table-cell>
          <table:table-cell table:formula="of:=[.D30]-[.D29]" office:value-type="float" office:value="0.00000335648148148147" calcext:value-type="float">
            <text:p>0,000003356481481481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29" office:value-type="float" office:value="841" calcext:value-type="float">
            <text:p>841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097337962962963" calcext:value-type="float">
            <text:p>0,00009733796296296300</text:p>
          </table:table-cell>
          <table:table-cell table:formula="of:=[.D31]-[.D30]" office:value-type="float" office:value="0.00000335648148148149" calcext:value-type="float">
            <text:p>0,0000033564814814814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29" office:value-type="float" office:value="870" calcext:value-type="float">
            <text:p>87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100694444444444" calcext:value-type="float">
            <text:p>0,00010069444444444400</text:p>
          </table:table-cell>
          <table:table-cell table:formula="of:=[.D32]-[.D31]" office:value-type="float" office:value="0.00000335648148148147" calcext:value-type="float">
            <text:p>0,0000033564814814814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29" office:value-type="float" office:value="899" calcext:value-type="float">
            <text:p>899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104050925925926" calcext:value-type="float">
            <text:p>0,00010405092592592600</text:p>
          </table:table-cell>
          <table:table-cell table:formula="of:=[.D33]-[.D32]" office:value-type="float" office:value="0.00000335648148148149" calcext:value-type="float">
            <text:p>0,000003356481481481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29" office:value-type="float" office:value="928" calcext:value-type="float">
            <text:p>928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107407407407407" calcext:value-type="float">
            <text:p>0,00010740740740740700</text:p>
          </table:table-cell>
          <table:table-cell table:formula="of:=[.D34]-[.D33]" office:value-type="float" office:value="0.00000335648148148147" calcext:value-type="float">
            <text:p>0,0000033564814814814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29" office:value-type="float" office:value="957" calcext:value-type="float">
            <text:p>957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110763888888889" calcext:value-type="float">
            <text:p>0,00011076388888888900</text:p>
          </table:table-cell>
          <table:table-cell table:formula="of:=[.D35]-[.D34]" office:value-type="float" office:value="0.00000335648148148149" calcext:value-type="float">
            <text:p>0,0000033564814814814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29" office:value-type="float" office:value="986" calcext:value-type="float">
            <text:p>986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11412037037037" calcext:value-type="float">
            <text:p>0,00011412037037037000</text:p>
          </table:table-cell>
          <table:table-cell table:formula="of:=[.D36]-[.D35]" office:value-type="float" office:value="0.00000335648148148147" calcext:value-type="float">
            <text:p>0,0000033564814814814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29" office:value-type="float" office:value="1015" calcext:value-type="float">
            <text:p>1015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117476851851852" calcext:value-type="float">
            <text:p>0,00011747685185185200</text:p>
          </table:table-cell>
          <table:table-cell table:formula="of:=[.D37]-[.D36]" office:value-type="float" office:value="0.00000335648148148149" calcext:value-type="float">
            <text:p>0,0000033564814814814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29" office:value-type="float" office:value="1044" calcext:value-type="float">
            <text:p>1044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120833333333333" calcext:value-type="float">
            <text:p>0,00012083333333333300</text:p>
          </table:table-cell>
          <table:table-cell table:formula="of:=[.D38]-[.D37]" office:value-type="float" office:value="0.00000335648148148149" calcext:value-type="float">
            <text:p>0,000003356481481481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29" office:value-type="float" office:value="1073" calcext:value-type="float">
            <text:p>1073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124189814814815" calcext:value-type="float">
            <text:p>0,00012418981481481500</text:p>
          </table:table-cell>
          <table:table-cell table:formula="of:=[.D39]-[.D38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29" office:value-type="float" office:value="1102" calcext:value-type="float">
            <text:p>1102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127546296296296" calcext:value-type="float">
            <text:p>0,00012754629629629600</text:p>
          </table:table-cell>
          <table:table-cell table:formula="of:=[.D40]-[.D39]" office:value-type="float" office:value="0.00000335648148148149" calcext:value-type="float">
            <text:p>0,0000033564814814814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29" office:value-type="float" office:value="1131" calcext:value-type="float">
            <text:p>1131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130902777777778" calcext:value-type="float">
            <text:p>0,00013090277777777800</text:p>
          </table:table-cell>
          <table:table-cell table:formula="of:=[.D41]-[.D40]" office:value-type="float" office:value="0.00000335648148148149" calcext:value-type="float">
            <text:p>0,0000033564814814814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29" office:value-type="float" office:value="1160" calcext:value-type="float">
            <text:p>116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134259259259259" calcext:value-type="float">
            <text:p>0,00013425925925925900</text:p>
          </table:table-cell>
          <table:table-cell table:formula="of:=[.D42]-[.D41]" office:value-type="float" office:value="0.00000335648148148149" calcext:value-type="float">
            <text:p>0,0000033564814814814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29" office:value-type="float" office:value="1189" calcext:value-type="float">
            <text:p>1189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137615740740741" calcext:value-type="float">
            <text:p>0,00013761574074074100</text:p>
          </table:table-cell>
          <table:table-cell table:formula="of:=[.D43]-[.D42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29" office:value-type="float" office:value="1218" calcext:value-type="float">
            <text:p>1218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140972222222222" calcext:value-type="float">
            <text:p>0,00014097222222222200</text:p>
          </table:table-cell>
          <table:table-cell table:formula="of:=[.D44]-[.D43]" office:value-type="float" office:value="0.00000335648148148149" calcext:value-type="float">
            <text:p>0,0000033564814814814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29" office:value-type="float" office:value="1247" calcext:value-type="float">
            <text:p>1247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144328703703704" calcext:value-type="float">
            <text:p>0,00014432870370370400</text:p>
          </table:table-cell>
          <table:table-cell table:formula="of:=[.D45]-[.D44]" office:value-type="float" office:value="0.00000335648148148149" calcext:value-type="float">
            <text:p>0,0000033564814814814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29" office:value-type="float" office:value="1276" calcext:value-type="float">
            <text:p>1276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147685185185185" calcext:value-type="float">
            <text:p>0,00014768518518518500</text:p>
          </table:table-cell>
          <table:table-cell table:formula="of:=[.D46]-[.D45]" office:value-type="float" office:value="0.00000335648148148149" calcext:value-type="float">
            <text:p>0,0000033564814814814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29" office:value-type="float" office:value="1305" calcext:value-type="float">
            <text:p>1305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151041666666667" calcext:value-type="float">
            <text:p>0,00015104166666666700</text:p>
          </table:table-cell>
          <table:table-cell table:formula="of:=[.D47]-[.D46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29" office:value-type="float" office:value="1334" calcext:value-type="float">
            <text:p>1334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154398148148148" calcext:value-type="float">
            <text:p>0,00015439814814814800</text:p>
          </table:table-cell>
          <table:table-cell table:formula="of:=[.D48]-[.D47]" office:value-type="float" office:value="0.00000335648148148149" calcext:value-type="float">
            <text:p>0,0000033564814814814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29" office:value-type="float" office:value="1363" calcext:value-type="float">
            <text:p>1363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15775462962963" calcext:value-type="float">
            <text:p>0,00015775462962963000</text:p>
          </table:table-cell>
          <table:table-cell table:formula="of:=[.D49]-[.D48]" office:value-type="float" office:value="0.00000335648148148149" calcext:value-type="float">
            <text:p>0,0000033564814814814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29" office:value-type="float" office:value="1392" calcext:value-type="float">
            <text:p>1392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161111111111111" calcext:value-type="float">
            <text:p>0,00016111111111111100</text:p>
          </table:table-cell>
          <table:table-cell table:formula="of:=[.D50]-[.D49]" office:value-type="float" office:value="0.00000335648148148149" calcext:value-type="float">
            <text:p>0,0000033564814814814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29" office:value-type="float" office:value="1421" calcext:value-type="float">
            <text:p>1421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164467592592593" calcext:value-type="float">
            <text:p>0,00016446759259259300</text:p>
          </table:table-cell>
          <table:table-cell table:formula="of:=[.D51]-[.D50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29" office:value-type="float" office:value="1450" calcext:value-type="float">
            <text:p>145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167824074074074" calcext:value-type="float">
            <text:p>0,00016782407407407400</text:p>
          </table:table-cell>
          <table:table-cell table:formula="of:=[.D52]-[.D51]" office:value-type="float" office:value="0.00000335648148148149" calcext:value-type="float">
            <text:p>0,0000033564814814814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29" office:value-type="float" office:value="1479" calcext:value-type="float">
            <text:p>1479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171180555555556" calcext:value-type="float">
            <text:p>0,00017118055555555600</text:p>
          </table:table-cell>
          <table:table-cell table:formula="of:=[.D53]-[.D52]" office:value-type="float" office:value="0.00000335648148148149" calcext:value-type="float">
            <text:p>0,0000033564814814814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29" office:value-type="float" office:value="1508" calcext:value-type="float">
            <text:p>1508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174537037037037" calcext:value-type="float">
            <text:p>0,00017453703703703700</text:p>
          </table:table-cell>
          <table:table-cell table:formula="of:=[.D54]-[.D53]" office:value-type="float" office:value="0.00000335648148148149" calcext:value-type="float">
            <text:p>0,0000033564814814814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29" office:value-type="float" office:value="1537" calcext:value-type="float">
            <text:p>1537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177893518518519" calcext:value-type="float">
            <text:p>0,00017789351851851900</text:p>
          </table:table-cell>
          <table:table-cell table:formula="of:=[.D55]-[.D54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29" office:value-type="float" office:value="1566" calcext:value-type="float">
            <text:p>1566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18125" calcext:value-type="float">
            <text:p>0,00018125000000000000</text:p>
          </table:table-cell>
          <table:table-cell table:formula="of:=[.D56]-[.D55]" office:value-type="float" office:value="0.00000335648148148149" calcext:value-type="float">
            <text:p>0,0000033564814814814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29" office:value-type="float" office:value="1595" calcext:value-type="float">
            <text:p>1595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184606481481481" calcext:value-type="float">
            <text:p>0,00018460648148148100</text:p>
          </table:table-cell>
          <table:table-cell table:formula="of:=[.D57]-[.D56]" office:value-type="float" office:value="0.00000335648148148149" calcext:value-type="float">
            <text:p>0,0000033564814814814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29" office:value-type="float" office:value="1624" calcext:value-type="float">
            <text:p>1624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187962962962963" calcext:value-type="float">
            <text:p>0,00018796296296296300</text:p>
          </table:table-cell>
          <table:table-cell table:formula="of:=[.D58]-[.D57]" office:value-type="float" office:value="0.00000335648148148149" calcext:value-type="float">
            <text:p>0,0000033564814814814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29" office:value-type="float" office:value="1653" calcext:value-type="float">
            <text:p>1653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191319444444444" calcext:value-type="float">
            <text:p>0,00019131944444444400</text:p>
          </table:table-cell>
          <table:table-cell table:formula="of:=[.D59]-[.D58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29" office:value-type="float" office:value="1682" calcext:value-type="float">
            <text:p>1682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194675925925926" calcext:value-type="float">
            <text:p>0,00019467592592592600</text:p>
          </table:table-cell>
          <table:table-cell table:formula="of:=[.D60]-[.D59]" office:value-type="float" office:value="0.00000335648148148149" calcext:value-type="float">
            <text:p>0,0000033564814814814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29" office:value-type="float" office:value="1711" calcext:value-type="float">
            <text:p>1711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198032407407407" calcext:value-type="float">
            <text:p>0,00019803240740740700</text:p>
          </table:table-cell>
          <table:table-cell table:formula="of:=[.D61]-[.D60]" office:value-type="float" office:value="0.00000335648148148149" calcext:value-type="float">
            <text:p>0,0000033564814814814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29" office:value-type="float" office:value="1740" calcext:value-type="float">
            <text:p>174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201388888888889" calcext:value-type="float">
            <text:p>0,00020138888888888900</text:p>
          </table:table-cell>
          <table:table-cell table:formula="of:=[.D62]-[.D61]" office:value-type="float" office:value="0.00000335648148148149" calcext:value-type="float">
            <text:p>0,0000033564814814814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29" office:value-type="float" office:value="1769" calcext:value-type="float">
            <text:p>1769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20474537037037" calcext:value-type="float">
            <text:p>0,00020474537037037000</text:p>
          </table:table-cell>
          <table:table-cell table:formula="of:=[.D63]-[.D62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29" office:value-type="float" office:value="1798" calcext:value-type="float">
            <text:p>1798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208101851851852" calcext:value-type="float">
            <text:p>0,00020810185185185200</text:p>
          </table:table-cell>
          <table:table-cell table:formula="of:=[.D64]-[.D63]" office:value-type="float" office:value="0.00000335648148148149" calcext:value-type="float">
            <text:p>0,0000033564814814814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29" office:value-type="float" office:value="1827" calcext:value-type="float">
            <text:p>1827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211458333333333" calcext:value-type="float">
            <text:p>0,00021145833333333300</text:p>
          </table:table-cell>
          <table:table-cell table:formula="of:=[.D65]-[.D64]" office:value-type="float" office:value="0.00000335648148148149" calcext:value-type="float">
            <text:p>0,0000033564814814814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29" office:value-type="float" office:value="1856" calcext:value-type="float">
            <text:p>1856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214814814814815" calcext:value-type="float">
            <text:p>0,00021481481481481500</text:p>
          </table:table-cell>
          <table:table-cell table:formula="of:=[.D66]-[.D65]" office:value-type="float" office:value="0.00000335648148148149" calcext:value-type="float">
            <text:p>0,0000033564814814814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29" office:value-type="float" office:value="1885" calcext:value-type="float">
            <text:p>1885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218171296296296" calcext:value-type="float">
            <text:p>0,00021817129629629600</text:p>
          </table:table-cell>
          <table:table-cell table:formula="of:=[.D67]-[.D66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29" office:value-type="float" office:value="1914" calcext:value-type="float">
            <text:p>1914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221527777777778" calcext:value-type="float">
            <text:p>0,00022152777777777800</text:p>
          </table:table-cell>
          <table:table-cell table:formula="of:=[.D68]-[.D67]" office:value-type="float" office:value="0.00000335648148148149" calcext:value-type="float">
            <text:p>0,0000033564814814814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29" office:value-type="float" office:value="1943" calcext:value-type="float">
            <text:p>1943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224884259259259" calcext:value-type="float">
            <text:p>0,00022488425925925900</text:p>
          </table:table-cell>
          <table:table-cell table:formula="of:=[.D69]-[.D68]" office:value-type="float" office:value="0.00000335648148148149" calcext:value-type="float">
            <text:p>0,0000033564814814814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29" office:value-type="float" office:value="1972" calcext:value-type="float">
            <text:p>1972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228240740740741" calcext:value-type="float">
            <text:p>0,00022824074074074100</text:p>
          </table:table-cell>
          <table:table-cell table:formula="of:=[.D70]-[.D69]" office:value-type="float" office:value="0.00000335648148148149" calcext:value-type="float">
            <text:p>0,0000033564814814814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29" office:value-type="float" office:value="2001" calcext:value-type="float">
            <text:p>2001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231597222222222" calcext:value-type="float">
            <text:p>0,00023159722222222200</text:p>
          </table:table-cell>
          <table:table-cell table:formula="of:=[.D71]-[.D70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29" office:value-type="float" office:value="2030" calcext:value-type="float">
            <text:p>203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234953703703704" calcext:value-type="float">
            <text:p>0,00023495370370370400</text:p>
          </table:table-cell>
          <table:table-cell table:formula="of:=[.D72]-[.D71]" office:value-type="float" office:value="0.00000335648148148149" calcext:value-type="float">
            <text:p>0,0000033564814814814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29" office:value-type="float" office:value="2059" calcext:value-type="float">
            <text:p>2059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238310185185185" calcext:value-type="float">
            <text:p>0,00023831018518518500</text:p>
          </table:table-cell>
          <table:table-cell table:formula="of:=[.D73]-[.D72]" office:value-type="float" office:value="0.00000335648148148149" calcext:value-type="float">
            <text:p>0,0000033564814814814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29" office:value-type="float" office:value="2088" calcext:value-type="float">
            <text:p>2088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241666666666667" calcext:value-type="float">
            <text:p>0,00024166666666666700</text:p>
          </table:table-cell>
          <table:table-cell table:formula="of:=[.D74]-[.D73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29" office:value-type="float" office:value="2117" calcext:value-type="float">
            <text:p>2117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245023148148148" calcext:value-type="float">
            <text:p>0,00024502314814814800</text:p>
          </table:table-cell>
          <table:table-cell table:formula="of:=[.D75]-[.D74]" office:value-type="float" office:value="0.00000335648148148152" calcext:value-type="float">
            <text:p>0,0000033564814814815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29" office:value-type="float" office:value="2146" calcext:value-type="float">
            <text:p>2146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24837962962963" calcext:value-type="float">
            <text:p>0,00024837962962963000</text:p>
          </table:table-cell>
          <table:table-cell table:formula="of:=[.D76]-[.D75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29" office:value-type="float" office:value="2175" calcext:value-type="float">
            <text:p>2175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251736111111111" calcext:value-type="float">
            <text:p>0,00025173611111111100</text:p>
          </table:table-cell>
          <table:table-cell table:formula="of:=[.D77]-[.D76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29" office:value-type="float" office:value="2204" calcext:value-type="float">
            <text:p>2204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255092592592593" calcext:value-type="float">
            <text:p>0,00025509259259259300</text:p>
          </table:table-cell>
          <table:table-cell table:formula="of:=[.D78]-[.D77]" office:value-type="float" office:value="0.00000335648148148152" calcext:value-type="float">
            <text:p>0,0000033564814814815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29" office:value-type="float" office:value="2233" calcext:value-type="float">
            <text:p>2233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258449074074074" calcext:value-type="float">
            <text:p>0,00025844907407407400</text:p>
          </table:table-cell>
          <table:table-cell table:formula="of:=[.D79]-[.D78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29" office:value-type="float" office:value="2262" calcext:value-type="float">
            <text:p>2262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261805555555556" calcext:value-type="float">
            <text:p>0,00026180555555555600</text:p>
          </table:table-cell>
          <table:table-cell table:formula="of:=[.D80]-[.D79]" office:value-type="float" office:value="0.00000335648148148152" calcext:value-type="float">
            <text:p>0,0000033564814814815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29" office:value-type="float" office:value="2291" calcext:value-type="float">
            <text:p>2291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265162037037037" calcext:value-type="float">
            <text:p>0,00026516203703703700</text:p>
          </table:table-cell>
          <table:table-cell table:formula="of:=[.D81]-[.D80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29" office:value-type="float" office:value="2320" calcext:value-type="float">
            <text:p>232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268518518518519" calcext:value-type="float">
            <text:p>0,00026851851851851900</text:p>
          </table:table-cell>
          <table:table-cell table:formula="of:=[.D82]-[.D81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29" office:value-type="float" office:value="2349" calcext:value-type="float">
            <text:p>2349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271875" calcext:value-type="float">
            <text:p>0,00027187500000000000</text:p>
          </table:table-cell>
          <table:table-cell table:formula="of:=[.D83]-[.D82]" office:value-type="float" office:value="0.00000335648148148152" calcext:value-type="float">
            <text:p>0,0000033564814814815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29" office:value-type="float" office:value="2378" calcext:value-type="float">
            <text:p>2378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275231481481482" calcext:value-type="float">
            <text:p>0,00027523148148148200</text:p>
          </table:table-cell>
          <table:table-cell table:formula="of:=[.D84]-[.D83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29" office:value-type="float" office:value="2407" calcext:value-type="float">
            <text:p>2407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278587962962963" calcext:value-type="float">
            <text:p>0,00027858796296296300</text:p>
          </table:table-cell>
          <table:table-cell table:formula="of:=[.D85]-[.D84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29" office:value-type="float" office:value="2436" calcext:value-type="float">
            <text:p>2436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281944444444444" calcext:value-type="float">
            <text:p>0,00028194444444444400</text:p>
          </table:table-cell>
          <table:table-cell table:formula="of:=[.D86]-[.D85]" office:value-type="float" office:value="0.00000335648148148152" calcext:value-type="float">
            <text:p>0,0000033564814814815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29" office:value-type="float" office:value="2465" calcext:value-type="float">
            <text:p>2465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285300925925926" calcext:value-type="float">
            <text:p>0,00028530092592592600</text:p>
          </table:table-cell>
          <table:table-cell table:formula="of:=[.D87]-[.D86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29" office:value-type="float" office:value="2494" calcext:value-type="float">
            <text:p>2494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288657407407407" calcext:value-type="float">
            <text:p>0,00028865740740740700</text:p>
          </table:table-cell>
          <table:table-cell table:formula="of:=[.D88]-[.D87]" office:value-type="float" office:value="0.00000335648148148152" calcext:value-type="float">
            <text:p>0,0000033564814814815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29" office:value-type="float" office:value="2523" calcext:value-type="float">
            <text:p>2523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292013888888889" calcext:value-type="float">
            <text:p>0,00029201388888888900</text:p>
          </table:table-cell>
          <table:table-cell table:formula="of:=[.D89]-[.D88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29" office:value-type="float" office:value="2552" calcext:value-type="float">
            <text:p>2552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29537037037037" calcext:value-type="float">
            <text:p>0,00029537037037037000</text:p>
          </table:table-cell>
          <table:table-cell table:formula="of:=[.D90]-[.D89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29" office:value-type="float" office:value="2581" calcext:value-type="float">
            <text:p>2581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298726851851852" calcext:value-type="float">
            <text:p>0,00029872685185185200</text:p>
          </table:table-cell>
          <table:table-cell table:formula="of:=[.D91]-[.D90]" office:value-type="float" office:value="0.00000335648148148152" calcext:value-type="float">
            <text:p>0,0000033564814814815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29" office:value-type="float" office:value="2610" calcext:value-type="float">
            <text:p>261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302083333333333" calcext:value-type="float">
            <text:p>0,00030208333333333300</text:p>
          </table:table-cell>
          <table:table-cell table:formula="of:=[.D92]-[.D91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29" office:value-type="float" office:value="2639" calcext:value-type="float">
            <text:p>2639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305439814814815" calcext:value-type="float">
            <text:p>0,00030543981481481500</text:p>
          </table:table-cell>
          <table:table-cell table:formula="of:=[.D93]-[.D92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29" office:value-type="float" office:value="2668" calcext:value-type="float">
            <text:p>2668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308796296296296" calcext:value-type="float">
            <text:p>0,00030879629629629600</text:p>
          </table:table-cell>
          <table:table-cell table:formula="of:=[.D94]-[.D93]" office:value-type="float" office:value="0.00000335648148148152" calcext:value-type="float">
            <text:p>0,0000033564814814815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29" office:value-type="float" office:value="2697" calcext:value-type="float">
            <text:p>2697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312152777777778" calcext:value-type="float">
            <text:p>0,00031215277777777800</text:p>
          </table:table-cell>
          <table:table-cell table:formula="of:=[.D95]-[.D94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29" office:value-type="float" office:value="2726" calcext:value-type="float">
            <text:p>2726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315509259259259" calcext:value-type="float">
            <text:p>0,00031550925925925900</text:p>
          </table:table-cell>
          <table:table-cell table:formula="of:=[.D96]-[.D95]" office:value-type="float" office:value="0.00000335648148148152" calcext:value-type="float">
            <text:p>0,0000033564814814815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29" office:value-type="float" office:value="2755" calcext:value-type="float">
            <text:p>2755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318865740740741" calcext:value-type="float">
            <text:p>0,00031886574074074100</text:p>
          </table:table-cell>
          <table:table-cell table:formula="of:=[.D97]-[.D96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29" office:value-type="float" office:value="2784" calcext:value-type="float">
            <text:p>2784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322222222222222" calcext:value-type="float">
            <text:p>0,00032222222222222200</text:p>
          </table:table-cell>
          <table:table-cell table:formula="of:=[.D98]-[.D97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29" office:value-type="float" office:value="2813" calcext:value-type="float">
            <text:p>2813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325578703703704" calcext:value-type="float">
            <text:p>0,00032557870370370400</text:p>
          </table:table-cell>
          <table:table-cell table:formula="of:=[.D99]-[.D98]" office:value-type="float" office:value="0.00000335648148148152" calcext:value-type="float">
            <text:p>0,0000033564814814815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29" office:value-type="float" office:value="2842" calcext:value-type="float">
            <text:p>2842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328935185185185" calcext:value-type="float">
            <text:p>0,00032893518518518500</text:p>
          </table:table-cell>
          <table:table-cell table:formula="of:=[.D100]-[.D99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29" office:value-type="float" office:value="2871" calcext:value-type="float">
            <text:p>2871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332291666666667" calcext:value-type="float">
            <text:p>0,00033229166666666700</text:p>
          </table:table-cell>
          <table:table-cell table:formula="of:=[.D101]-[.D100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29" office:value-type="float" office:value="2900" calcext:value-type="float">
            <text:p>29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335648148148148" calcext:value-type="float">
            <text:p>0,00033564814814814800</text:p>
          </table:table-cell>
          <table:table-cell table:formula="of:=[.D102]-[.D101]" office:value-type="float" office:value="0.00000335648148148152" calcext:value-type="float">
            <text:p>0,0000033564814814815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29" office:value-type="float" office:value="2929" calcext:value-type="float">
            <text:p>2929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33900462962963" calcext:value-type="float">
            <text:p>0,00033900462962963000</text:p>
          </table:table-cell>
          <table:table-cell table:formula="of:=[.D103]-[.D102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29" office:value-type="float" office:value="2958" calcext:value-type="float">
            <text:p>2958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342361111111111" calcext:value-type="float">
            <text:p>0,00034236111111111100</text:p>
          </table:table-cell>
          <table:table-cell table:formula="of:=[.D104]-[.D103]" office:value-type="float" office:value="0.00000335648148148152" calcext:value-type="float">
            <text:p>0,0000033564814814815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29" office:value-type="float" office:value="2987" calcext:value-type="float">
            <text:p>2987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345717592592593" calcext:value-type="float">
            <text:p>0,00034571759259259300</text:p>
          </table:table-cell>
          <table:table-cell table:formula="of:=[.D105]-[.D104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29" office:value-type="float" office:value="3016" calcext:value-type="float">
            <text:p>3016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349074074074074" calcext:value-type="float">
            <text:p>0,00034907407407407400</text:p>
          </table:table-cell>
          <table:table-cell table:formula="of:=[.D106]-[.D105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29" office:value-type="float" office:value="3045" calcext:value-type="float">
            <text:p>3045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0352430555555556" calcext:value-type="float">
            <text:p>0,00035243055555555600</text:p>
          </table:table-cell>
          <table:table-cell table:formula="of:=[.D107]-[.D106]" office:value-type="float" office:value="0.00000335648148148152" calcext:value-type="float">
            <text:p>0,0000033564814814815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29" office:value-type="float" office:value="3074" calcext:value-type="float">
            <text:p>3074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0355787037037037" calcext:value-type="float">
            <text:p>0,00035578703703703700</text:p>
          </table:table-cell>
          <table:table-cell table:formula="of:=[.D108]-[.D107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29" office:value-type="float" office:value="3103" calcext:value-type="float">
            <text:p>3103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0359143518518519" calcext:value-type="float">
            <text:p>0,00035914351851851900</text:p>
          </table:table-cell>
          <table:table-cell table:formula="of:=[.D109]-[.D108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29" office:value-type="float" office:value="3132" calcext:value-type="float">
            <text:p>3132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03625" calcext:value-type="float">
            <text:p>0,00036250000000000000</text:p>
          </table:table-cell>
          <table:table-cell table:formula="of:=[.D110]-[.D109]" office:value-type="float" office:value="0.00000335648148148152" calcext:value-type="float">
            <text:p>0,0000033564814814815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29" office:value-type="float" office:value="3161" calcext:value-type="float">
            <text:p>3161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0365856481481482" calcext:value-type="float">
            <text:p>0,00036585648148148200</text:p>
          </table:table-cell>
          <table:table-cell table:formula="of:=[.D111]-[.D110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29" office:value-type="float" office:value="3190" calcext:value-type="float">
            <text:p>319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0369212962962963" calcext:value-type="float">
            <text:p>0,00036921296296296300</text:p>
          </table:table-cell>
          <table:table-cell table:formula="of:=[.D112]-[.D111]" office:value-type="float" office:value="0.00000335648148148152" calcext:value-type="float">
            <text:p>0,0000033564814814815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29" office:value-type="float" office:value="3219" calcext:value-type="float">
            <text:p>3219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0372569444444444" calcext:value-type="float">
            <text:p>0,00037256944444444400</text:p>
          </table:table-cell>
          <table:table-cell table:formula="of:=[.D113]-[.D112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29" office:value-type="float" office:value="3248" calcext:value-type="float">
            <text:p>3248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0375925925925926" calcext:value-type="float">
            <text:p>0,00037592592592592600</text:p>
          </table:table-cell>
          <table:table-cell table:formula="of:=[.D114]-[.D113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29" office:value-type="float" office:value="3277" calcext:value-type="float">
            <text:p>3277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0379282407407407" calcext:value-type="float">
            <text:p>0,00037928240740740700</text:p>
          </table:table-cell>
          <table:table-cell table:formula="of:=[.D115]-[.D114]" office:value-type="float" office:value="0.00000335648148148152" calcext:value-type="float">
            <text:p>0,0000033564814814815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29" office:value-type="float" office:value="3306" calcext:value-type="float">
            <text:p>3306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0382638888888889" calcext:value-type="float">
            <text:p>0,00038263888888888900</text:p>
          </table:table-cell>
          <table:table-cell table:formula="of:=[.D116]-[.D115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29" office:value-type="float" office:value="3335" calcext:value-type="float">
            <text:p>3335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038599537037037" calcext:value-type="float">
            <text:p>0,00038599537037037000</text:p>
          </table:table-cell>
          <table:table-cell table:formula="of:=[.D117]-[.D116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29" office:value-type="float" office:value="3364" calcext:value-type="float">
            <text:p>3364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0389351851851852" calcext:value-type="float">
            <text:p>0,00038935185185185200</text:p>
          </table:table-cell>
          <table:table-cell table:formula="of:=[.D118]-[.D117]" office:value-type="float" office:value="0.00000335648148148152" calcext:value-type="float">
            <text:p>0,0000033564814814815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29" office:value-type="float" office:value="3393" calcext:value-type="float">
            <text:p>3393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0392708333333333" calcext:value-type="float">
            <text:p>0,00039270833333333300</text:p>
          </table:table-cell>
          <table:table-cell table:formula="of:=[.D119]-[.D118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29" office:value-type="float" office:value="3422" calcext:value-type="float">
            <text:p>3422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0396064814814815" calcext:value-type="float">
            <text:p>0,00039606481481481500</text:p>
          </table:table-cell>
          <table:table-cell table:formula="of:=[.D120]-[.D119]" office:value-type="float" office:value="0.00000335648148148152" calcext:value-type="float">
            <text:p>0,0000033564814814815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29" office:value-type="float" office:value="3451" calcext:value-type="float">
            <text:p>3451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0399421296296296" calcext:value-type="float">
            <text:p>0,00039942129629629600</text:p>
          </table:table-cell>
          <table:table-cell table:formula="of:=[.D121]-[.D120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29" office:value-type="float" office:value="3480" calcext:value-type="float">
            <text:p>348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0402777777777778" calcext:value-type="float">
            <text:p>0,00040277777777777800</text:p>
          </table:table-cell>
          <table:table-cell table:formula="of:=[.D122]-[.D121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29" office:value-type="float" office:value="3509" calcext:value-type="float">
            <text:p>3509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0406134259259259" calcext:value-type="float">
            <text:p>0,00040613425925925900</text:p>
          </table:table-cell>
          <table:table-cell table:formula="of:=[.D123]-[.D122]" office:value-type="float" office:value="0.00000335648148148152" calcext:value-type="float">
            <text:p>0,0000033564814814815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29" office:value-type="float" office:value="3538" calcext:value-type="float">
            <text:p>3538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0409490740740741" calcext:value-type="float">
            <text:p>0,00040949074074074100</text:p>
          </table:table-cell>
          <table:table-cell table:formula="of:=[.D124]-[.D123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29" office:value-type="float" office:value="3567" calcext:value-type="float">
            <text:p>3567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0412847222222222" calcext:value-type="float">
            <text:p>0,00041284722222222200</text:p>
          </table:table-cell>
          <table:table-cell table:formula="of:=[.D125]-[.D124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29" office:value-type="float" office:value="3596" calcext:value-type="float">
            <text:p>3596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0416203703703704" calcext:value-type="float">
            <text:p>0,00041620370370370400</text:p>
          </table:table-cell>
          <table:table-cell table:formula="of:=[.D126]-[.D125]" office:value-type="float" office:value="0.00000335648148148152" calcext:value-type="float">
            <text:p>0,0000033564814814815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29" office:value-type="float" office:value="3625" calcext:value-type="float">
            <text:p>3625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0419560185185185" calcext:value-type="float">
            <text:p>0,00041956018518518500</text:p>
          </table:table-cell>
          <table:table-cell table:formula="of:=[.D127]-[.D126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29" office:value-type="float" office:value="3654" calcext:value-type="float">
            <text:p>3654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0422916666666667" calcext:value-type="float">
            <text:p>0,00042291666666666700</text:p>
          </table:table-cell>
          <table:table-cell table:formula="of:=[.D128]-[.D127]" office:value-type="float" office:value="0.00000335648148148152" calcext:value-type="float">
            <text:p>0,0000033564814814815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29" office:value-type="float" office:value="3683" calcext:value-type="float">
            <text:p>3683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0426273148148148" calcext:value-type="float">
            <text:p>0,00042627314814814800</text:p>
          </table:table-cell>
          <table:table-cell table:formula="of:=[.D129]-[.D128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29" office:value-type="float" office:value="3712" calcext:value-type="float">
            <text:p>3712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042962962962963" calcext:value-type="float">
            <text:p>0,00042962962962963000</text:p>
          </table:table-cell>
          <table:table-cell table:formula="of:=[.D130]-[.D129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29" office:value-type="float" office:value="3741" calcext:value-type="float">
            <text:p>3741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0432986111111111" calcext:value-type="float">
            <text:p>0,00043298611111111100</text:p>
          </table:table-cell>
          <table:table-cell table:formula="of:=[.D131]-[.D130]" office:value-type="float" office:value="0.00000335648148148152" calcext:value-type="float">
            <text:p>0,0000033564814814815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29" office:value-type="float" office:value="3770" calcext:value-type="float">
            <text:p>377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0436342592592593" calcext:value-type="float">
            <text:p>0,00043634259259259300</text:p>
          </table:table-cell>
          <table:table-cell table:formula="of:=[.D132]-[.D131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29" office:value-type="float" office:value="3799" calcext:value-type="float">
            <text:p>3799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0439699074074074" calcext:value-type="float">
            <text:p>0,00043969907407407400</text:p>
          </table:table-cell>
          <table:table-cell table:formula="of:=[.D133]-[.D132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29" office:value-type="float" office:value="3828" calcext:value-type="float">
            <text:p>3828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0443055555555556" calcext:value-type="float">
            <text:p>0,00044305555555555600</text:p>
          </table:table-cell>
          <table:table-cell table:formula="of:=[.D134]-[.D133]" office:value-type="float" office:value="0.00000335648148148152" calcext:value-type="float">
            <text:p>0,0000033564814814815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29" office:value-type="float" office:value="3857" calcext:value-type="float">
            <text:p>3857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0446412037037037" calcext:value-type="float">
            <text:p>0,00044641203703703700</text:p>
          </table:table-cell>
          <table:table-cell table:formula="of:=[.D135]-[.D134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29" office:value-type="float" office:value="3886" calcext:value-type="float">
            <text:p>3886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0449768518518519" calcext:value-type="float">
            <text:p>0,00044976851851851800</text:p>
          </table:table-cell>
          <table:table-cell table:formula="of:=[.D136]-[.D135]" office:value-type="float" office:value="0.00000335648148148152" calcext:value-type="float">
            <text:p>0,0000033564814814815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29" office:value-type="float" office:value="3915" calcext:value-type="float">
            <text:p>3915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0453125" calcext:value-type="float">
            <text:p>0,00045312500000000000</text:p>
          </table:table-cell>
          <table:table-cell table:formula="of:=[.D137]-[.D136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29" office:value-type="float" office:value="3944" calcext:value-type="float">
            <text:p>3944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0456481481481482" calcext:value-type="float">
            <text:p>0,00045648148148148200</text:p>
          </table:table-cell>
          <table:table-cell table:formula="of:=[.D138]-[.D137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29" office:value-type="float" office:value="3973" calcext:value-type="float">
            <text:p>3973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0459837962962963" calcext:value-type="float">
            <text:p>0,00045983796296296300</text:p>
          </table:table-cell>
          <table:table-cell table:formula="of:=[.D139]-[.D138]" office:value-type="float" office:value="0.00000335648148148152" calcext:value-type="float">
            <text:p>0,0000033564814814815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29" office:value-type="float" office:value="4002" calcext:value-type="float">
            <text:p>4002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0463194444444444" calcext:value-type="float">
            <text:p>0,00046319444444444400</text:p>
          </table:table-cell>
          <table:table-cell table:formula="of:=[.D140]-[.D139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29" office:value-type="float" office:value="4031" calcext:value-type="float">
            <text:p>4031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0466550925925926" calcext:value-type="float">
            <text:p>0,00046655092592592600</text:p>
          </table:table-cell>
          <table:table-cell table:formula="of:=[.D141]-[.D140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29" office:value-type="float" office:value="4060" calcext:value-type="float">
            <text:p>406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0469907407407407" calcext:value-type="float">
            <text:p>0,00046990740740740700</text:p>
          </table:table-cell>
          <table:table-cell table:formula="of:=[.D142]-[.D141]" office:value-type="float" office:value="0.00000335648148148152" calcext:value-type="float">
            <text:p>0,0000033564814814815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29" office:value-type="float" office:value="4089" calcext:value-type="float">
            <text:p>4089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0473263888888889" calcext:value-type="float">
            <text:p>0,00047326388888888900</text:p>
          </table:table-cell>
          <table:table-cell table:formula="of:=[.D143]-[.D142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29" office:value-type="float" office:value="4118" calcext:value-type="float">
            <text:p>4118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047662037037037" calcext:value-type="float">
            <text:p>0,00047662037037037000</text:p>
          </table:table-cell>
          <table:table-cell table:formula="of:=[.D144]-[.D143]" office:value-type="float" office:value="0.00000335648148148152" calcext:value-type="float">
            <text:p>0,0000033564814814815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29" office:value-type="float" office:value="4147" calcext:value-type="float">
            <text:p>4147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0479976851851852" calcext:value-type="float">
            <text:p>0,00047997685185185200</text:p>
          </table:table-cell>
          <table:table-cell table:formula="of:=[.D145]-[.D144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29" office:value-type="float" office:value="4176" calcext:value-type="float">
            <text:p>4176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0483333333333333" calcext:value-type="float">
            <text:p>0,00048333333333333300</text:p>
          </table:table-cell>
          <table:table-cell table:formula="of:=[.D146]-[.D145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29" office:value-type="float" office:value="4205" calcext:value-type="float">
            <text:p>4205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0486689814814815" calcext:value-type="float">
            <text:p>0,00048668981481481500</text:p>
          </table:table-cell>
          <table:table-cell table:formula="of:=[.D147]-[.D146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29" office:value-type="float" office:value="4234" calcext:value-type="float">
            <text:p>4234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0490046296296296" calcext:value-type="float">
            <text:p>0,00049004629629629600</text:p>
          </table:table-cell>
          <table:table-cell table:formula="of:=[.D148]-[.D147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29" office:value-type="float" office:value="4263" calcext:value-type="float">
            <text:p>4263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0493402777777778" calcext:value-type="float">
            <text:p>0,00049340277777777800</text:p>
          </table:table-cell>
          <table:table-cell table:formula="of:=[.D149]-[.D148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29" office:value-type="float" office:value="4292" calcext:value-type="float">
            <text:p>4292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0496759259259259" calcext:value-type="float">
            <text:p>0,00049675925925925900</text:p>
          </table:table-cell>
          <table:table-cell table:formula="of:=[.D150]-[.D149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29" office:value-type="float" office:value="4321" calcext:value-type="float">
            <text:p>4321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0500115740740741" calcext:value-type="float">
            <text:p>0,00050011574074074100</text:p>
          </table:table-cell>
          <table:table-cell table:formula="of:=[.D151]-[.D150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29" office:value-type="float" office:value="4350" calcext:value-type="float">
            <text:p>435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0503472222222222" calcext:value-type="float">
            <text:p>0,00050347222222222200</text:p>
          </table:table-cell>
          <table:table-cell table:formula="of:=[.D152]-[.D151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29" office:value-type="float" office:value="4379" calcext:value-type="float">
            <text:p>4379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0506828703703704" calcext:value-type="float">
            <text:p>0,00050682870370370400</text:p>
          </table:table-cell>
          <table:table-cell table:formula="of:=[.D153]-[.D152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29" office:value-type="float" office:value="4408" calcext:value-type="float">
            <text:p>4408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0510185185185185" calcext:value-type="float">
            <text:p>0,00051018518518518500</text:p>
          </table:table-cell>
          <table:table-cell table:formula="of:=[.D154]-[.D153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29" office:value-type="float" office:value="4437" calcext:value-type="float">
            <text:p>4437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0513541666666667" calcext:value-type="float">
            <text:p>0,00051354166666666700</text:p>
          </table:table-cell>
          <table:table-cell table:formula="of:=[.D155]-[.D154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29" office:value-type="float" office:value="4466" calcext:value-type="float">
            <text:p>4466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0516898148148148" calcext:value-type="float">
            <text:p>0,00051689814814814800</text:p>
          </table:table-cell>
          <table:table-cell table:formula="of:=[.D156]-[.D155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29" office:value-type="float" office:value="4495" calcext:value-type="float">
            <text:p>4495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052025462962963" calcext:value-type="float">
            <text:p>0,00052025462962963000</text:p>
          </table:table-cell>
          <table:table-cell table:formula="of:=[.D157]-[.D156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29" office:value-type="float" office:value="4524" calcext:value-type="float">
            <text:p>4524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0523611111111111" calcext:value-type="float">
            <text:p>0,00052361111111111100</text:p>
          </table:table-cell>
          <table:table-cell table:formula="of:=[.D158]-[.D157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29" office:value-type="float" office:value="4553" calcext:value-type="float">
            <text:p>4553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0526967592592593" calcext:value-type="float">
            <text:p>0,00052696759259259300</text:p>
          </table:table-cell>
          <table:table-cell table:formula="of:=[.D159]-[.D158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29" office:value-type="float" office:value="4582" calcext:value-type="float">
            <text:p>4582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0530324074074074" calcext:value-type="float">
            <text:p>0,00053032407407407400</text:p>
          </table:table-cell>
          <table:table-cell table:formula="of:=[.D160]-[.D159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29" office:value-type="float" office:value="4611" calcext:value-type="float">
            <text:p>4611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0533680555555556" calcext:value-type="float">
            <text:p>0,00053368055555555600</text:p>
          </table:table-cell>
          <table:table-cell table:formula="of:=[.D161]-[.D160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29" office:value-type="float" office:value="4640" calcext:value-type="float">
            <text:p>464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0537037037037037" calcext:value-type="float">
            <text:p>0,00053703703703703700</text:p>
          </table:table-cell>
          <table:table-cell table:formula="of:=[.D162]-[.D161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29" office:value-type="float" office:value="4669" calcext:value-type="float">
            <text:p>4669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0540393518518519" calcext:value-type="float">
            <text:p>0,00054039351851851900</text:p>
          </table:table-cell>
          <table:table-cell table:formula="of:=[.D163]-[.D162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29" office:value-type="float" office:value="4698" calcext:value-type="float">
            <text:p>4698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054375" calcext:value-type="float">
            <text:p>0,00054375000000000000</text:p>
          </table:table-cell>
          <table:table-cell table:formula="of:=[.D164]-[.D163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29" office:value-type="float" office:value="4727" calcext:value-type="float">
            <text:p>4727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0547106481481482" calcext:value-type="float">
            <text:p>0,00054710648148148200</text:p>
          </table:table-cell>
          <table:table-cell table:formula="of:=[.D165]-[.D164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29" office:value-type="float" office:value="4756" calcext:value-type="float">
            <text:p>4756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0550462962962963" calcext:value-type="float">
            <text:p>0,00055046296296296300</text:p>
          </table:table-cell>
          <table:table-cell table:formula="of:=[.D166]-[.D165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29" office:value-type="float" office:value="4785" calcext:value-type="float">
            <text:p>4785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0553819444444445" calcext:value-type="float">
            <text:p>0,00055381944444444500</text:p>
          </table:table-cell>
          <table:table-cell table:formula="of:=[.D167]-[.D166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29" office:value-type="float" office:value="4814" calcext:value-type="float">
            <text:p>4814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0557175925925926" calcext:value-type="float">
            <text:p>0,00055717592592592600</text:p>
          </table:table-cell>
          <table:table-cell table:formula="of:=[.D168]-[.D167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29" office:value-type="float" office:value="4843" calcext:value-type="float">
            <text:p>4843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0560532407407407" calcext:value-type="float">
            <text:p>0,00056053240740740700</text:p>
          </table:table-cell>
          <table:table-cell table:formula="of:=[.D169]-[.D168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29" office:value-type="float" office:value="4872" calcext:value-type="float">
            <text:p>4872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0563888888888889" calcext:value-type="float">
            <text:p>0,00056388888888888900</text:p>
          </table:table-cell>
          <table:table-cell table:formula="of:=[.D170]-[.D169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29" office:value-type="float" office:value="4901" calcext:value-type="float">
            <text:p>4901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056724537037037" calcext:value-type="float">
            <text:p>0,00056724537037037000</text:p>
          </table:table-cell>
          <table:table-cell table:formula="of:=[.D171]-[.D170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29" office:value-type="float" office:value="4930" calcext:value-type="float">
            <text:p>493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0570601851851852" calcext:value-type="float">
            <text:p>0,00057060185185185200</text:p>
          </table:table-cell>
          <table:table-cell table:formula="of:=[.D172]-[.D171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29" office:value-type="float" office:value="4959" calcext:value-type="float">
            <text:p>4959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0573958333333333" calcext:value-type="float">
            <text:p>0,00057395833333333300</text:p>
          </table:table-cell>
          <table:table-cell table:formula="of:=[.D173]-[.D172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29" office:value-type="float" office:value="4988" calcext:value-type="float">
            <text:p>4988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0577314814814815" calcext:value-type="float">
            <text:p>0,00057731481481481500</text:p>
          </table:table-cell>
          <table:table-cell table:formula="of:=[.D174]-[.D173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29" office:value-type="float" office:value="5017" calcext:value-type="float">
            <text:p>5017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0580671296296296" calcext:value-type="float">
            <text:p>0,00058067129629629600</text:p>
          </table:table-cell>
          <table:table-cell table:formula="of:=[.D175]-[.D174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29" office:value-type="float" office:value="5046" calcext:value-type="float">
            <text:p>5046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0584027777777778" calcext:value-type="float">
            <text:p>0,00058402777777777800</text:p>
          </table:table-cell>
          <table:table-cell table:formula="of:=[.D176]-[.D175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29" office:value-type="float" office:value="5075" calcext:value-type="float">
            <text:p>5075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0587384259259259" calcext:value-type="float">
            <text:p>0,00058738425925925900</text:p>
          </table:table-cell>
          <table:table-cell table:formula="of:=[.D177]-[.D176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29" office:value-type="float" office:value="5104" calcext:value-type="float">
            <text:p>5104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0590740740740741" calcext:value-type="float">
            <text:p>0,00059074074074074100</text:p>
          </table:table-cell>
          <table:table-cell table:formula="of:=[.D178]-[.D177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29" office:value-type="float" office:value="5133" calcext:value-type="float">
            <text:p>5133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0594097222222222" calcext:value-type="float">
            <text:p>0,00059409722222222200</text:p>
          </table:table-cell>
          <table:table-cell table:formula="of:=[.D179]-[.D178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29" office:value-type="float" office:value="5162" calcext:value-type="float">
            <text:p>5162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0597453703703704" calcext:value-type="float">
            <text:p>0,00059745370370370400</text:p>
          </table:table-cell>
          <table:table-cell table:formula="of:=[.D180]-[.D179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29" office:value-type="float" office:value="5191" calcext:value-type="float">
            <text:p>5191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0600810185185185" calcext:value-type="float">
            <text:p>0,00060081018518518500</text:p>
          </table:table-cell>
          <table:table-cell table:formula="of:=[.D181]-[.D180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29" office:value-type="float" office:value="5220" calcext:value-type="float">
            <text:p>522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0604166666666667" calcext:value-type="float">
            <text:p>0,00060416666666666700</text:p>
          </table:table-cell>
          <table:table-cell table:formula="of:=[.D182]-[.D181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29" office:value-type="float" office:value="5249" calcext:value-type="float">
            <text:p>5249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0607523148148148" calcext:value-type="float">
            <text:p>0,00060752314814814800</text:p>
          </table:table-cell>
          <table:table-cell table:formula="of:=[.D183]-[.D182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29" office:value-type="float" office:value="5278" calcext:value-type="float">
            <text:p>5278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061087962962963" calcext:value-type="float">
            <text:p>0,00061087962962963000</text:p>
          </table:table-cell>
          <table:table-cell table:formula="of:=[.D184]-[.D183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29" office:value-type="float" office:value="5307" calcext:value-type="float">
            <text:p>5307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0614236111111111" calcext:value-type="float">
            <text:p>0,00061423611111111100</text:p>
          </table:table-cell>
          <table:table-cell table:formula="of:=[.D185]-[.D184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29" office:value-type="float" office:value="5336" calcext:value-type="float">
            <text:p>5336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0617592592592593" calcext:value-type="float">
            <text:p>0,00061759259259259300</text:p>
          </table:table-cell>
          <table:table-cell table:formula="of:=[.D186]-[.D185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29" office:value-type="float" office:value="5365" calcext:value-type="float">
            <text:p>5365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0620949074074074" calcext:value-type="float">
            <text:p>0,00062094907407407400</text:p>
          </table:table-cell>
          <table:table-cell table:formula="of:=[.D187]-[.D186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29" office:value-type="float" office:value="5394" calcext:value-type="float">
            <text:p>5394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0624305555555556" calcext:value-type="float">
            <text:p>0,00062430555555555600</text:p>
          </table:table-cell>
          <table:table-cell table:formula="of:=[.D188]-[.D187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29" office:value-type="float" office:value="5423" calcext:value-type="float">
            <text:p>5423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0627662037037037" calcext:value-type="float">
            <text:p>0,00062766203703703700</text:p>
          </table:table-cell>
          <table:table-cell table:formula="of:=[.D189]-[.D188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29" office:value-type="float" office:value="5452" calcext:value-type="float">
            <text:p>5452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0631018518518519" calcext:value-type="float">
            <text:p>0,00063101851851851900</text:p>
          </table:table-cell>
          <table:table-cell table:formula="of:=[.D190]-[.D189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29" office:value-type="float" office:value="5481" calcext:value-type="float">
            <text:p>5481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0634375" calcext:value-type="float">
            <text:p>0,00063437500000000000</text:p>
          </table:table-cell>
          <table:table-cell table:formula="of:=[.D191]-[.D190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29" office:value-type="float" office:value="5510" calcext:value-type="float">
            <text:p>551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0637731481481482" calcext:value-type="float">
            <text:p>0,00063773148148148200</text:p>
          </table:table-cell>
          <table:table-cell table:formula="of:=[.D192]-[.D191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29" office:value-type="float" office:value="5539" calcext:value-type="float">
            <text:p>5539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0641087962962963" calcext:value-type="float">
            <text:p>0,00064108796296296300</text:p>
          </table:table-cell>
          <table:table-cell table:formula="of:=[.D193]-[.D192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29" office:value-type="float" office:value="5568" calcext:value-type="float">
            <text:p>5568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0644444444444444" calcext:value-type="float">
            <text:p>0,00064444444444444400</text:p>
          </table:table-cell>
          <table:table-cell table:formula="of:=[.D194]-[.D193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29" office:value-type="float" office:value="5597" calcext:value-type="float">
            <text:p>5597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0647800925925926" calcext:value-type="float">
            <text:p>0,00064780092592592600</text:p>
          </table:table-cell>
          <table:table-cell table:formula="of:=[.D195]-[.D194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29" office:value-type="float" office:value="5626" calcext:value-type="float">
            <text:p>5626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0651157407407407" calcext:value-type="float">
            <text:p>0,00065115740740740700</text:p>
          </table:table-cell>
          <table:table-cell table:formula="of:=[.D196]-[.D195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29" office:value-type="float" office:value="5655" calcext:value-type="float">
            <text:p>5655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0654513888888889" calcext:value-type="float">
            <text:p>0,00065451388888888900</text:p>
          </table:table-cell>
          <table:table-cell table:formula="of:=[.D197]-[.D196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29" office:value-type="float" office:value="5684" calcext:value-type="float">
            <text:p>5684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065787037037037" calcext:value-type="float">
            <text:p>0,00065787037037037000</text:p>
          </table:table-cell>
          <table:table-cell table:formula="of:=[.D198]-[.D197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29" office:value-type="float" office:value="5713" calcext:value-type="float">
            <text:p>5713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0661226851851852" calcext:value-type="float">
            <text:p>0,00066122685185185200</text:p>
          </table:table-cell>
          <table:table-cell table:formula="of:=[.D199]-[.D198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29" office:value-type="float" office:value="5742" calcext:value-type="float">
            <text:p>5742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0664583333333333" calcext:value-type="float">
            <text:p>0,00066458333333333300</text:p>
          </table:table-cell>
          <table:table-cell table:formula="of:=[.D200]-[.D199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29" office:value-type="float" office:value="5771" calcext:value-type="float">
            <text:p>5771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0667939814814815" calcext:value-type="float">
            <text:p>0,00066793981481481500</text:p>
          </table:table-cell>
          <table:table-cell table:formula="of:=[.D201]-[.D200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29" office:value-type="float" office:value="5800" calcext:value-type="float">
            <text:p>58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0671296296296296" calcext:value-type="float">
            <text:p>0,00067129629629629600</text:p>
          </table:table-cell>
          <table:table-cell table:formula="of:=[.D202]-[.D201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29" office:value-type="float" office:value="5829" calcext:value-type="float">
            <text:p>5829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0674652777777778" calcext:value-type="float">
            <text:p>0,00067465277777777800</text:p>
          </table:table-cell>
          <table:table-cell table:formula="of:=[.D203]-[.D202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29" office:value-type="float" office:value="5858" calcext:value-type="float">
            <text:p>5858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0678009259259259" calcext:value-type="float">
            <text:p>0,00067800925925925900</text:p>
          </table:table-cell>
          <table:table-cell table:formula="of:=[.D204]-[.D203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29" office:value-type="float" office:value="5887" calcext:value-type="float">
            <text:p>5887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0681365740740741" calcext:value-type="float">
            <text:p>0,00068136574074074100</text:p>
          </table:table-cell>
          <table:table-cell table:formula="of:=[.D205]-[.D204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29" office:value-type="float" office:value="5916" calcext:value-type="float">
            <text:p>5916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0684722222222222" calcext:value-type="float">
            <text:p>0,00068472222222222200</text:p>
          </table:table-cell>
          <table:table-cell table:formula="of:=[.D206]-[.D205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29" office:value-type="float" office:value="5945" calcext:value-type="float">
            <text:p>5945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0688078703703704" calcext:value-type="float">
            <text:p>0,00068807870370370400</text:p>
          </table:table-cell>
          <table:table-cell table:formula="of:=[.D207]-[.D206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29" office:value-type="float" office:value="5974" calcext:value-type="float">
            <text:p>5974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0691435185185185" calcext:value-type="float">
            <text:p>0,00069143518518518500</text:p>
          </table:table-cell>
          <table:table-cell table:formula="of:=[.D208]-[.D207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29" office:value-type="float" office:value="6003" calcext:value-type="float">
            <text:p>6003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0694791666666667" calcext:value-type="float">
            <text:p>0,00069479166666666700</text:p>
          </table:table-cell>
          <table:table-cell table:formula="of:=[.D209]-[.D208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29" office:value-type="float" office:value="6032" calcext:value-type="float">
            <text:p>6032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0698148148148148" calcext:value-type="float">
            <text:p>0,00069814814814814800</text:p>
          </table:table-cell>
          <table:table-cell table:formula="of:=[.D210]-[.D209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29" office:value-type="float" office:value="6061" calcext:value-type="float">
            <text:p>6061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070150462962963" calcext:value-type="float">
            <text:p>0,00070150462962963000</text:p>
          </table:table-cell>
          <table:table-cell table:formula="of:=[.D211]-[.D210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29" office:value-type="float" office:value="6090" calcext:value-type="float">
            <text:p>609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0704861111111111" calcext:value-type="float">
            <text:p>0,00070486111111111100</text:p>
          </table:table-cell>
          <table:table-cell table:formula="of:=[.D212]-[.D211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29" office:value-type="float" office:value="6119" calcext:value-type="float">
            <text:p>6119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0708217592592593" calcext:value-type="float">
            <text:p>0,00070821759259259300</text:p>
          </table:table-cell>
          <table:table-cell table:formula="of:=[.D213]-[.D212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29" office:value-type="float" office:value="6148" calcext:value-type="float">
            <text:p>6148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0711574074074074" calcext:value-type="float">
            <text:p>0,00071157407407407400</text:p>
          </table:table-cell>
          <table:table-cell table:formula="of:=[.D214]-[.D213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29" office:value-type="float" office:value="6177" calcext:value-type="float">
            <text:p>6177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0714930555555556" calcext:value-type="float">
            <text:p>0,00071493055555555600</text:p>
          </table:table-cell>
          <table:table-cell table:formula="of:=[.D215]-[.D214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29" office:value-type="float" office:value="6206" calcext:value-type="float">
            <text:p>6206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0718287037037037" calcext:value-type="float">
            <text:p>0,00071828703703703700</text:p>
          </table:table-cell>
          <table:table-cell table:formula="of:=[.D216]-[.D215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29" office:value-type="float" office:value="6235" calcext:value-type="float">
            <text:p>6235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0721643518518519" calcext:value-type="float">
            <text:p>0,00072164351851851900</text:p>
          </table:table-cell>
          <table:table-cell table:formula="of:=[.D217]-[.D216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29" office:value-type="float" office:value="6264" calcext:value-type="float">
            <text:p>6264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0725" calcext:value-type="float">
            <text:p>0,00072500000000000000</text:p>
          </table:table-cell>
          <table:table-cell table:formula="of:=[.D218]-[.D217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29" office:value-type="float" office:value="6293" calcext:value-type="float">
            <text:p>6293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0728356481481482" calcext:value-type="float">
            <text:p>0,00072835648148148100</text:p>
          </table:table-cell>
          <table:table-cell table:formula="of:=[.D219]-[.D218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29" office:value-type="float" office:value="6322" calcext:value-type="float">
            <text:p>6322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0731712962962963" calcext:value-type="float">
            <text:p>0,00073171296296296300</text:p>
          </table:table-cell>
          <table:table-cell table:formula="of:=[.D220]-[.D219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29" office:value-type="float" office:value="6351" calcext:value-type="float">
            <text:p>6351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0735069444444444" calcext:value-type="float">
            <text:p>0,00073506944444444400</text:p>
          </table:table-cell>
          <table:table-cell table:formula="of:=[.D221]-[.D220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29" office:value-type="float" office:value="6380" calcext:value-type="float">
            <text:p>638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0738425925925926" calcext:value-type="float">
            <text:p>0,00073842592592592600</text:p>
          </table:table-cell>
          <table:table-cell table:formula="of:=[.D222]-[.D221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29" office:value-type="float" office:value="6409" calcext:value-type="float">
            <text:p>6409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0741782407407407" calcext:value-type="float">
            <text:p>0,00074178240740740700</text:p>
          </table:table-cell>
          <table:table-cell table:formula="of:=[.D223]-[.D222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29" office:value-type="float" office:value="6438" calcext:value-type="float">
            <text:p>6438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0745138888888889" calcext:value-type="float">
            <text:p>0,00074513888888888900</text:p>
          </table:table-cell>
          <table:table-cell table:formula="of:=[.D224]-[.D223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29" office:value-type="float" office:value="6467" calcext:value-type="float">
            <text:p>6467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074849537037037" calcext:value-type="float">
            <text:p>0,00074849537037037000</text:p>
          </table:table-cell>
          <table:table-cell table:formula="of:=[.D225]-[.D224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29" office:value-type="float" office:value="6496" calcext:value-type="float">
            <text:p>6496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0751851851851852" calcext:value-type="float">
            <text:p>0,00075185185185185200</text:p>
          </table:table-cell>
          <table:table-cell table:formula="of:=[.D226]-[.D225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29" office:value-type="float" office:value="6525" calcext:value-type="float">
            <text:p>6525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0755208333333333" calcext:value-type="float">
            <text:p>0,00075520833333333300</text:p>
          </table:table-cell>
          <table:table-cell table:formula="of:=[.D227]-[.D226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29" office:value-type="float" office:value="6554" calcext:value-type="float">
            <text:p>6554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0758564814814815" calcext:value-type="float">
            <text:p>0,00075856481481481500</text:p>
          </table:table-cell>
          <table:table-cell table:formula="of:=[.D228]-[.D227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29" office:value-type="float" office:value="6583" calcext:value-type="float">
            <text:p>6583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0761921296296296" calcext:value-type="float">
            <text:p>0,00076192129629629600</text:p>
          </table:table-cell>
          <table:table-cell table:formula="of:=[.D229]-[.D228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29" office:value-type="float" office:value="6612" calcext:value-type="float">
            <text:p>6612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0765277777777778" calcext:value-type="float">
            <text:p>0,00076527777777777800</text:p>
          </table:table-cell>
          <table:table-cell table:formula="of:=[.D230]-[.D229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29" office:value-type="float" office:value="6641" calcext:value-type="float">
            <text:p>6641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0768634259259259" calcext:value-type="float">
            <text:p>0,00076863425925925900</text:p>
          </table:table-cell>
          <table:table-cell table:formula="of:=[.D231]-[.D230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29" office:value-type="float" office:value="6670" calcext:value-type="float">
            <text:p>667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0771990740740741" calcext:value-type="float">
            <text:p>0,00077199074074074100</text:p>
          </table:table-cell>
          <table:table-cell table:formula="of:=[.D232]-[.D231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29" office:value-type="float" office:value="6699" calcext:value-type="float">
            <text:p>6699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0775347222222222" calcext:value-type="float">
            <text:p>0,00077534722222222200</text:p>
          </table:table-cell>
          <table:table-cell table:formula="of:=[.D233]-[.D232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29" office:value-type="float" office:value="6728" calcext:value-type="float">
            <text:p>6728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0778703703703704" calcext:value-type="float">
            <text:p>0,00077870370370370400</text:p>
          </table:table-cell>
          <table:table-cell table:formula="of:=[.D234]-[.D233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29" office:value-type="float" office:value="6757" calcext:value-type="float">
            <text:p>6757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0782060185185185" calcext:value-type="float">
            <text:p>0,00078206018518518500</text:p>
          </table:table-cell>
          <table:table-cell table:formula="of:=[.D235]-[.D234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29" office:value-type="float" office:value="6786" calcext:value-type="float">
            <text:p>6786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0785416666666667" calcext:value-type="float">
            <text:p>0,00078541666666666700</text:p>
          </table:table-cell>
          <table:table-cell table:formula="of:=[.D236]-[.D235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29" office:value-type="float" office:value="6815" calcext:value-type="float">
            <text:p>6815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0788773148148148" calcext:value-type="float">
            <text:p>0,00078877314814814800</text:p>
          </table:table-cell>
          <table:table-cell table:formula="of:=[.D237]-[.D236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29" office:value-type="float" office:value="6844" calcext:value-type="float">
            <text:p>6844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079212962962963" calcext:value-type="float">
            <text:p>0,00079212962962963000</text:p>
          </table:table-cell>
          <table:table-cell table:formula="of:=[.D238]-[.D237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29" office:value-type="float" office:value="6873" calcext:value-type="float">
            <text:p>6873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0795486111111111" calcext:value-type="float">
            <text:p>0,00079548611111111100</text:p>
          </table:table-cell>
          <table:table-cell table:formula="of:=[.D239]-[.D238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29" office:value-type="float" office:value="6902" calcext:value-type="float">
            <text:p>6902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0798842592592593" calcext:value-type="float">
            <text:p>0,00079884259259259300</text:p>
          </table:table-cell>
          <table:table-cell table:formula="of:=[.D240]-[.D239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29" office:value-type="float" office:value="6931" calcext:value-type="float">
            <text:p>6931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0802199074074074" calcext:value-type="float">
            <text:p>0,00080219907407407400</text:p>
          </table:table-cell>
          <table:table-cell table:formula="of:=[.D241]-[.D240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29" office:value-type="float" office:value="6960" calcext:value-type="float">
            <text:p>696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0805555555555556" calcext:value-type="float">
            <text:p>0,00080555555555555600</text:p>
          </table:table-cell>
          <table:table-cell table:formula="of:=[.D242]-[.D241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29" office:value-type="float" office:value="6989" calcext:value-type="float">
            <text:p>6989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0808912037037037" calcext:value-type="float">
            <text:p>0,00080891203703703700</text:p>
          </table:table-cell>
          <table:table-cell table:formula="of:=[.D243]-[.D242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29" office:value-type="float" office:value="7018" calcext:value-type="float">
            <text:p>7018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0812268518518519" calcext:value-type="float">
            <text:p>0,00081226851851851900</text:p>
          </table:table-cell>
          <table:table-cell table:formula="of:=[.D244]-[.D243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29" office:value-type="float" office:value="7047" calcext:value-type="float">
            <text:p>7047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0815625" calcext:value-type="float">
            <text:p>0,00081562500000000000</text:p>
          </table:table-cell>
          <table:table-cell table:formula="of:=[.D245]-[.D244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29" office:value-type="float" office:value="7076" calcext:value-type="float">
            <text:p>7076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0818981481481482" calcext:value-type="float">
            <text:p>0,00081898148148148100</text:p>
          </table:table-cell>
          <table:table-cell table:formula="of:=[.D246]-[.D245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29" office:value-type="float" office:value="7105" calcext:value-type="float">
            <text:p>7105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0822337962962963" calcext:value-type="float">
            <text:p>0,00082233796296296300</text:p>
          </table:table-cell>
          <table:table-cell table:formula="of:=[.D247]-[.D246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29" office:value-type="float" office:value="7134" calcext:value-type="float">
            <text:p>7134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0825694444444444" calcext:value-type="float">
            <text:p>0,00082569444444444400</text:p>
          </table:table-cell>
          <table:table-cell table:formula="of:=[.D248]-[.D247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29" office:value-type="float" office:value="7163" calcext:value-type="float">
            <text:p>7163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0829050925925926" calcext:value-type="float">
            <text:p>0,00082905092592592600</text:p>
          </table:table-cell>
          <table:table-cell table:formula="of:=[.D249]-[.D248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29" office:value-type="float" office:value="7192" calcext:value-type="float">
            <text:p>7192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0832407407407407" calcext:value-type="float">
            <text:p>0,00083240740740740700</text:p>
          </table:table-cell>
          <table:table-cell table:formula="of:=[.D250]-[.D249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29" office:value-type="float" office:value="7221" calcext:value-type="float">
            <text:p>7221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0835763888888889" calcext:value-type="float">
            <text:p>0,00083576388888888900</text:p>
          </table:table-cell>
          <table:table-cell table:formula="of:=[.D251]-[.D250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29" office:value-type="float" office:value="7250" calcext:value-type="float">
            <text:p>725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083912037037037" calcext:value-type="float">
            <text:p>0,00083912037037037000</text:p>
          </table:table-cell>
          <table:table-cell table:formula="of:=[.D252]-[.D251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29" office:value-type="float" office:value="7279" calcext:value-type="float">
            <text:p>7279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0842476851851852" calcext:value-type="float">
            <text:p>0,00084247685185185200</text:p>
          </table:table-cell>
          <table:table-cell table:formula="of:=[.D253]-[.D252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29" office:value-type="float" office:value="7308" calcext:value-type="float">
            <text:p>7308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0845833333333333" calcext:value-type="float">
            <text:p>0,00084583333333333300</text:p>
          </table:table-cell>
          <table:table-cell table:formula="of:=[.D254]-[.D253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29" office:value-type="float" office:value="7337" calcext:value-type="float">
            <text:p>7337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0849189814814815" calcext:value-type="float">
            <text:p>0,00084918981481481500</text:p>
          </table:table-cell>
          <table:table-cell table:formula="of:=[.D255]-[.D254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29" office:value-type="float" office:value="7366" calcext:value-type="float">
            <text:p>7366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0852546296296296" calcext:value-type="float">
            <text:p>0,00085254629629629600</text:p>
          </table:table-cell>
          <table:table-cell table:formula="of:=[.D256]-[.D255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29" office:value-type="float" office:value="7395" calcext:value-type="float">
            <text:p>7395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0855902777777778" calcext:value-type="float">
            <text:p>0,00085590277777777800</text:p>
          </table:table-cell>
          <table:table-cell table:formula="of:=[.D257]-[.D256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29" office:value-type="float" office:value="7424" calcext:value-type="float">
            <text:p>7424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0859259259259259" calcext:value-type="float">
            <text:p>0,00085925925925925900</text:p>
          </table:table-cell>
          <table:table-cell table:formula="of:=[.D258]-[.D257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29" office:value-type="float" office:value="7453" calcext:value-type="float">
            <text:p>7453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0862615740740741" calcext:value-type="float">
            <text:p>0,00086261574074074100</text:p>
          </table:table-cell>
          <table:table-cell table:formula="of:=[.D259]-[.D258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29" office:value-type="float" office:value="7482" calcext:value-type="float">
            <text:p>7482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0865972222222222" calcext:value-type="float">
            <text:p>0,00086597222222222200</text:p>
          </table:table-cell>
          <table:table-cell table:formula="of:=[.D260]-[.D259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29" office:value-type="float" office:value="7511" calcext:value-type="float">
            <text:p>7511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0869328703703704" calcext:value-type="float">
            <text:p>0,00086932870370370400</text:p>
          </table:table-cell>
          <table:table-cell table:formula="of:=[.D261]-[.D260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29" office:value-type="float" office:value="7540" calcext:value-type="float">
            <text:p>754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0872685185185185" calcext:value-type="float">
            <text:p>0,00087268518518518500</text:p>
          </table:table-cell>
          <table:table-cell table:formula="of:=[.D262]-[.D261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29" office:value-type="float" office:value="7569" calcext:value-type="float">
            <text:p>7569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0876041666666667" calcext:value-type="float">
            <text:p>0,00087604166666666700</text:p>
          </table:table-cell>
          <table:table-cell table:formula="of:=[.D263]-[.D262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29" office:value-type="float" office:value="7598" calcext:value-type="float">
            <text:p>7598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0879398148148148" calcext:value-type="float">
            <text:p>0,00087939814814814800</text:p>
          </table:table-cell>
          <table:table-cell table:formula="of:=[.D264]-[.D263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29" office:value-type="float" office:value="7627" calcext:value-type="float">
            <text:p>7627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088275462962963" calcext:value-type="float">
            <text:p>0,00088275462962963000</text:p>
          </table:table-cell>
          <table:table-cell table:formula="of:=[.D265]-[.D264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29" office:value-type="float" office:value="7656" calcext:value-type="float">
            <text:p>7656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0886111111111111" calcext:value-type="float">
            <text:p>0,00088611111111111100</text:p>
          </table:table-cell>
          <table:table-cell table:formula="of:=[.D266]-[.D265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29" office:value-type="float" office:value="7685" calcext:value-type="float">
            <text:p>7685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0889467592592593" calcext:value-type="float">
            <text:p>0,00088946759259259300</text:p>
          </table:table-cell>
          <table:table-cell table:formula="of:=[.D267]-[.D266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29" office:value-type="float" office:value="7714" calcext:value-type="float">
            <text:p>7714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0892824074074074" calcext:value-type="float">
            <text:p>0,00089282407407407400</text:p>
          </table:table-cell>
          <table:table-cell table:formula="of:=[.D268]-[.D267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29" office:value-type="float" office:value="7743" calcext:value-type="float">
            <text:p>7743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0896180555555556" calcext:value-type="float">
            <text:p>0,00089618055555555600</text:p>
          </table:table-cell>
          <table:table-cell table:formula="of:=[.D269]-[.D268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29" office:value-type="float" office:value="7772" calcext:value-type="float">
            <text:p>7772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0899537037037037" calcext:value-type="float">
            <text:p>0,00089953703703703700</text:p>
          </table:table-cell>
          <table:table-cell table:formula="of:=[.D270]-[.D269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29" office:value-type="float" office:value="7801" calcext:value-type="float">
            <text:p>7801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0902893518518519" calcext:value-type="float">
            <text:p>0,00090289351851851800</text:p>
          </table:table-cell>
          <table:table-cell table:formula="of:=[.D271]-[.D270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29" office:value-type="float" office:value="7830" calcext:value-type="float">
            <text:p>783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090625" calcext:value-type="float">
            <text:p>0,00090625000000000000</text:p>
          </table:table-cell>
          <table:table-cell table:formula="of:=[.D272]-[.D271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29" office:value-type="float" office:value="7859" calcext:value-type="float">
            <text:p>7859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0909606481481482" calcext:value-type="float">
            <text:p>0,00090960648148148100</text:p>
          </table:table-cell>
          <table:table-cell table:formula="of:=[.D273]-[.D272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29" office:value-type="float" office:value="7888" calcext:value-type="float">
            <text:p>7888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0912962962962963" calcext:value-type="float">
            <text:p>0,00091296296296296300</text:p>
          </table:table-cell>
          <table:table-cell table:formula="of:=[.D274]-[.D273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29" office:value-type="float" office:value="7917" calcext:value-type="float">
            <text:p>7917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0916319444444444" calcext:value-type="float">
            <text:p>0,00091631944444444400</text:p>
          </table:table-cell>
          <table:table-cell table:formula="of:=[.D275]-[.D274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29" office:value-type="float" office:value="7946" calcext:value-type="float">
            <text:p>7946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0919675925925926" calcext:value-type="float">
            <text:p>0,00091967592592592600</text:p>
          </table:table-cell>
          <table:table-cell table:formula="of:=[.D276]-[.D275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29" office:value-type="float" office:value="7975" calcext:value-type="float">
            <text:p>7975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0923032407407408" calcext:value-type="float">
            <text:p>0,00092303240740740800</text:p>
          </table:table-cell>
          <table:table-cell table:formula="of:=[.D277]-[.D276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29" office:value-type="float" office:value="8004" calcext:value-type="float">
            <text:p>8004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0926388888888889" calcext:value-type="float">
            <text:p>0,00092638888888888900</text:p>
          </table:table-cell>
          <table:table-cell table:formula="of:=[.D278]-[.D277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29" office:value-type="float" office:value="8033" calcext:value-type="float">
            <text:p>8033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092974537037037" calcext:value-type="float">
            <text:p>0,00092974537037037000</text:p>
          </table:table-cell>
          <table:table-cell table:formula="of:=[.D279]-[.D278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29" office:value-type="float" office:value="8062" calcext:value-type="float">
            <text:p>8062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0933101851851852" calcext:value-type="float">
            <text:p>0,00093310185185185200</text:p>
          </table:table-cell>
          <table:table-cell table:formula="of:=[.D280]-[.D279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29" office:value-type="float" office:value="8091" calcext:value-type="float">
            <text:p>8091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0936458333333333" calcext:value-type="float">
            <text:p>0,00093645833333333300</text:p>
          </table:table-cell>
          <table:table-cell table:formula="of:=[.D281]-[.D280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29" office:value-type="float" office:value="8120" calcext:value-type="float">
            <text:p>812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0939814814814815" calcext:value-type="float">
            <text:p>0,00093981481481481500</text:p>
          </table:table-cell>
          <table:table-cell table:formula="of:=[.D282]-[.D281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29" office:value-type="float" office:value="8149" calcext:value-type="float">
            <text:p>8149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0943171296296296" calcext:value-type="float">
            <text:p>0,00094317129629629600</text:p>
          </table:table-cell>
          <table:table-cell table:formula="of:=[.D283]-[.D282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29" office:value-type="float" office:value="8178" calcext:value-type="float">
            <text:p>8178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0946527777777778" calcext:value-type="float">
            <text:p>0,00094652777777777800</text:p>
          </table:table-cell>
          <table:table-cell table:formula="of:=[.D284]-[.D283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29" office:value-type="float" office:value="8207" calcext:value-type="float">
            <text:p>8207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0949884259259259" calcext:value-type="float">
            <text:p>0,00094988425925925900</text:p>
          </table:table-cell>
          <table:table-cell table:formula="of:=[.D285]-[.D284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29" office:value-type="float" office:value="8236" calcext:value-type="float">
            <text:p>8236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0953240740740741" calcext:value-type="float">
            <text:p>0,00095324074074074100</text:p>
          </table:table-cell>
          <table:table-cell table:formula="of:=[.D286]-[.D285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29" office:value-type="float" office:value="8265" calcext:value-type="float">
            <text:p>8265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0956597222222222" calcext:value-type="float">
            <text:p>0,00095659722222222200</text:p>
          </table:table-cell>
          <table:table-cell table:formula="of:=[.D287]-[.D286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29" office:value-type="float" office:value="8294" calcext:value-type="float">
            <text:p>8294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0959953703703704" calcext:value-type="float">
            <text:p>0,00095995370370370400</text:p>
          </table:table-cell>
          <table:table-cell table:formula="of:=[.D288]-[.D287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29" office:value-type="float" office:value="8323" calcext:value-type="float">
            <text:p>8323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0963310185185185" calcext:value-type="float">
            <text:p>0,00096331018518518500</text:p>
          </table:table-cell>
          <table:table-cell table:formula="of:=[.D289]-[.D288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29" office:value-type="float" office:value="8352" calcext:value-type="float">
            <text:p>8352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0966666666666667" calcext:value-type="float">
            <text:p>0,00096666666666666700</text:p>
          </table:table-cell>
          <table:table-cell table:formula="of:=[.D290]-[.D289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29" office:value-type="float" office:value="8381" calcext:value-type="float">
            <text:p>8381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0970023148148148" calcext:value-type="float">
            <text:p>0,00097002314814814800</text:p>
          </table:table-cell>
          <table:table-cell table:formula="of:=[.D291]-[.D290]" office:value-type="float" office:value="0.00000335648148148146" calcext:value-type="float">
            <text:p>0,0000033564814814814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29" office:value-type="float" office:value="8410" calcext:value-type="float">
            <text:p>8410</text:p>
          </table:table-cell>
          <table:table-cell office:value-type="float" office:value="8640000" calcext:value-type="float">
            <text:p>8640000</text:p>
          </table:table-cell>
          <table:table-cell table:formula="of:=[.B291]/[.C291]" office:value-type="float" office:value="0.00097337962962963" calcext:value-type="float">
            <text:p>0,00097337962962963000</text:p>
          </table:table-cell>
          <table:table-cell table:formula="of:=[.D292]-[.D291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29" office:value-type="float" office:value="8439" calcext:value-type="float">
            <text:p>8439</text:p>
          </table:table-cell>
          <table:table-cell office:value-type="float" office:value="8640000" calcext:value-type="float">
            <text:p>8640000</text:p>
          </table:table-cell>
          <table:table-cell table:formula="of:=[.B292]/[.C292]" office:value-type="float" office:value="0.000976736111111111" calcext:value-type="float">
            <text:p>0,00097673611111111100</text:p>
          </table:table-cell>
          <table:table-cell table:formula="of:=[.D293]-[.D292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29" office:value-type="float" office:value="8468" calcext:value-type="float">
            <text:p>8468</text:p>
          </table:table-cell>
          <table:table-cell office:value-type="float" office:value="8640000" calcext:value-type="float">
            <text:p>8640000</text:p>
          </table:table-cell>
          <table:table-cell table:formula="of:=[.B293]/[.C293]" office:value-type="float" office:value="0.000980092592592593" calcext:value-type="float">
            <text:p>0,00098009259259259300</text:p>
          </table:table-cell>
          <table:table-cell table:formula="of:=[.D294]-[.D293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+29" office:value-type="float" office:value="8497" calcext:value-type="float">
            <text:p>8497</text:p>
          </table:table-cell>
          <table:table-cell office:value-type="float" office:value="8640000" calcext:value-type="float">
            <text:p>8640000</text:p>
          </table:table-cell>
          <table:table-cell table:formula="of:=[.B294]/[.C294]" office:value-type="float" office:value="0.000983449074074074" calcext:value-type="float">
            <text:p>0,00098344907407407400</text:p>
          </table:table-cell>
          <table:table-cell table:formula="of:=[.D295]-[.D294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29" office:value-type="float" office:value="8526" calcext:value-type="float">
            <text:p>8526</text:p>
          </table:table-cell>
          <table:table-cell office:value-type="float" office:value="8640000" calcext:value-type="float">
            <text:p>8640000</text:p>
          </table:table-cell>
          <table:table-cell table:formula="of:=[.B295]/[.C295]" office:value-type="float" office:value="0.000986805555555556" calcext:value-type="float">
            <text:p>0,00098680555555555600</text:p>
          </table:table-cell>
          <table:table-cell table:formula="of:=[.D296]-[.D295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+29" office:value-type="float" office:value="8555" calcext:value-type="float">
            <text:p>8555</text:p>
          </table:table-cell>
          <table:table-cell office:value-type="float" office:value="8640000" calcext:value-type="float">
            <text:p>8640000</text:p>
          </table:table-cell>
          <table:table-cell table:formula="of:=[.B296]/[.C296]" office:value-type="float" office:value="0.000990162037037037" calcext:value-type="float">
            <text:p>0,00099016203703703700</text:p>
          </table:table-cell>
          <table:table-cell table:formula="of:=[.D297]-[.D296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29" office:value-type="float" office:value="8584" calcext:value-type="float">
            <text:p>8584</text:p>
          </table:table-cell>
          <table:table-cell office:value-type="float" office:value="8640000" calcext:value-type="float">
            <text:p>8640000</text:p>
          </table:table-cell>
          <table:table-cell table:formula="of:=[.B297]/[.C297]" office:value-type="float" office:value="0.000993518518518519" calcext:value-type="float">
            <text:p>0,00099351851851851900</text:p>
          </table:table-cell>
          <table:table-cell table:formula="of:=[.D298]-[.D297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+29" office:value-type="float" office:value="8613" calcext:value-type="float">
            <text:p>8613</text:p>
          </table:table-cell>
          <table:table-cell office:value-type="float" office:value="8640000" calcext:value-type="float">
            <text:p>8640000</text:p>
          </table:table-cell>
          <table:table-cell table:formula="of:=[.B298]/[.C298]" office:value-type="float" office:value="0.000996875" calcext:value-type="float">
            <text:p>0,00099687500000000000</text:p>
          </table:table-cell>
          <table:table-cell table:formula="of:=[.D299]-[.D298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+29" office:value-type="float" office:value="8642" calcext:value-type="float">
            <text:p>8642</text:p>
          </table:table-cell>
          <table:table-cell office:value-type="float" office:value="8640000" calcext:value-type="float">
            <text:p>8640000</text:p>
          </table:table-cell>
          <table:table-cell table:formula="of:=[.B299]/[.C299]" office:value-type="float" office:value="0.00100023148148148" calcext:value-type="float">
            <text:p>0,00100023148148148000</text:p>
          </table:table-cell>
          <table:table-cell table:formula="of:=[.D300]-[.D299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+29" office:value-type="float" office:value="8671" calcext:value-type="float">
            <text:p>8671</text:p>
          </table:table-cell>
          <table:table-cell office:value-type="float" office:value="8640000" calcext:value-type="float">
            <text:p>8640000</text:p>
          </table:table-cell>
          <table:table-cell table:formula="of:=[.B300]/[.C300]" office:value-type="float" office:value="0.00100358796296296" calcext:value-type="float">
            <text:p>0,00100358796296296000</text:p>
          </table:table-cell>
          <table:table-cell table:formula="of:=[.D301]-[.D300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+29" office:value-type="float" office:value="8700" calcext:value-type="float">
            <text:p>8700</text:p>
          </table:table-cell>
          <table:table-cell office:value-type="float" office:value="8640000" calcext:value-type="float">
            <text:p>8640000</text:p>
          </table:table-cell>
          <table:table-cell table:formula="of:=[.B301]/[.C301]" office:value-type="float" office:value="0.00100694444444444" calcext:value-type="float">
            <text:p>0,00100694444444444000</text:p>
          </table:table-cell>
          <table:table-cell table:formula="of:=[.D302]-[.D301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+29" office:value-type="float" office:value="8729" calcext:value-type="float">
            <text:p>8729</text:p>
          </table:table-cell>
          <table:table-cell office:value-type="float" office:value="8640000" calcext:value-type="float">
            <text:p>8640000</text:p>
          </table:table-cell>
          <table:table-cell table:formula="of:=[.B302]/[.C302]" office:value-type="float" office:value="0.00101030092592593" calcext:value-type="float">
            <text:p>0,00101030092592593000</text:p>
          </table:table-cell>
          <table:table-cell table:formula="of:=[.D303]-[.D302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+29" office:value-type="float" office:value="8758" calcext:value-type="float">
            <text:p>8758</text:p>
          </table:table-cell>
          <table:table-cell office:value-type="float" office:value="8640000" calcext:value-type="float">
            <text:p>8640000</text:p>
          </table:table-cell>
          <table:table-cell table:formula="of:=[.B303]/[.C303]" office:value-type="float" office:value="0.00101365740740741" calcext:value-type="float">
            <text:p>0,00101365740740741000</text:p>
          </table:table-cell>
          <table:table-cell table:formula="of:=[.D304]-[.D303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+29" office:value-type="float" office:value="8787" calcext:value-type="float">
            <text:p>8787</text:p>
          </table:table-cell>
          <table:table-cell office:value-type="float" office:value="8640000" calcext:value-type="float">
            <text:p>8640000</text:p>
          </table:table-cell>
          <table:table-cell table:formula="of:=[.B304]/[.C304]" office:value-type="float" office:value="0.00101701388888889" calcext:value-type="float">
            <text:p>0,00101701388888889000</text:p>
          </table:table-cell>
          <table:table-cell table:formula="of:=[.D305]-[.D304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+29" office:value-type="float" office:value="8816" calcext:value-type="float">
            <text:p>8816</text:p>
          </table:table-cell>
          <table:table-cell office:value-type="float" office:value="8640000" calcext:value-type="float">
            <text:p>8640000</text:p>
          </table:table-cell>
          <table:table-cell table:formula="of:=[.B305]/[.C305]" office:value-type="float" office:value="0.00102037037037037" calcext:value-type="float">
            <text:p>0,00102037037037037000</text:p>
          </table:table-cell>
          <table:table-cell table:formula="of:=[.D306]-[.D305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+29" office:value-type="float" office:value="8845" calcext:value-type="float">
            <text:p>8845</text:p>
          </table:table-cell>
          <table:table-cell office:value-type="float" office:value="8640000" calcext:value-type="float">
            <text:p>8640000</text:p>
          </table:table-cell>
          <table:table-cell table:formula="of:=[.B306]/[.C306]" office:value-type="float" office:value="0.00102372685185185" calcext:value-type="float">
            <text:p>0,00102372685185185000</text:p>
          </table:table-cell>
          <table:table-cell table:formula="of:=[.D307]-[.D306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+29" office:value-type="float" office:value="8874" calcext:value-type="float">
            <text:p>8874</text:p>
          </table:table-cell>
          <table:table-cell office:value-type="float" office:value="8640000" calcext:value-type="float">
            <text:p>8640000</text:p>
          </table:table-cell>
          <table:table-cell table:formula="of:=[.B307]/[.C307]" office:value-type="float" office:value="0.00102708333333333" calcext:value-type="float">
            <text:p>0,00102708333333333000</text:p>
          </table:table-cell>
          <table:table-cell table:formula="of:=[.D308]-[.D307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+29" office:value-type="float" office:value="8903" calcext:value-type="float">
            <text:p>8903</text:p>
          </table:table-cell>
          <table:table-cell office:value-type="float" office:value="8640000" calcext:value-type="float">
            <text:p>8640000</text:p>
          </table:table-cell>
          <table:table-cell table:formula="of:=[.B308]/[.C308]" office:value-type="float" office:value="0.00103043981481481" calcext:value-type="float">
            <text:p>0,00103043981481481000</text:p>
          </table:table-cell>
          <table:table-cell table:formula="of:=[.D309]-[.D308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8]+29" office:value-type="float" office:value="8932" calcext:value-type="float">
            <text:p>8932</text:p>
          </table:table-cell>
          <table:table-cell office:value-type="float" office:value="8640000" calcext:value-type="float">
            <text:p>8640000</text:p>
          </table:table-cell>
          <table:table-cell table:formula="of:=[.B309]/[.C309]" office:value-type="float" office:value="0.0010337962962963" calcext:value-type="float">
            <text:p>0,00103379629629630000</text:p>
          </table:table-cell>
          <table:table-cell table:formula="of:=[.D310]-[.D309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09]+29" office:value-type="float" office:value="8961" calcext:value-type="float">
            <text:p>8961</text:p>
          </table:table-cell>
          <table:table-cell office:value-type="float" office:value="8640000" calcext:value-type="float">
            <text:p>8640000</text:p>
          </table:table-cell>
          <table:table-cell table:formula="of:=[.B310]/[.C310]" office:value-type="float" office:value="0.00103715277777778" calcext:value-type="float">
            <text:p>0,00103715277777778000</text:p>
          </table:table-cell>
          <table:table-cell table:formula="of:=[.D311]-[.D310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+29" office:value-type="float" office:value="8990" calcext:value-type="float">
            <text:p>8990</text:p>
          </table:table-cell>
          <table:table-cell office:value-type="float" office:value="8640000" calcext:value-type="float">
            <text:p>8640000</text:p>
          </table:table-cell>
          <table:table-cell table:formula="of:=[.B311]/[.C311]" office:value-type="float" office:value="0.00104050925925926" calcext:value-type="float">
            <text:p>0,00104050925925926000</text:p>
          </table:table-cell>
          <table:table-cell table:formula="of:=[.D312]-[.D311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+29" office:value-type="float" office:value="9019" calcext:value-type="float">
            <text:p>9019</text:p>
          </table:table-cell>
          <table:table-cell office:value-type="float" office:value="8640000" calcext:value-type="float">
            <text:p>8640000</text:p>
          </table:table-cell>
          <table:table-cell table:formula="of:=[.B312]/[.C312]" office:value-type="float" office:value="0.00104386574074074" calcext:value-type="float">
            <text:p>0,00104386574074074000</text:p>
          </table:table-cell>
          <table:table-cell table:formula="of:=[.D313]-[.D312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2]+29" office:value-type="float" office:value="9048" calcext:value-type="float">
            <text:p>9048</text:p>
          </table:table-cell>
          <table:table-cell office:value-type="float" office:value="8640000" calcext:value-type="float">
            <text:p>8640000</text:p>
          </table:table-cell>
          <table:table-cell table:formula="of:=[.B313]/[.C313]" office:value-type="float" office:value="0.00104722222222222" calcext:value-type="float">
            <text:p>0,00104722222222222000</text:p>
          </table:table-cell>
          <table:table-cell table:formula="of:=[.D314]-[.D313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3]+29" office:value-type="float" office:value="9077" calcext:value-type="float">
            <text:p>9077</text:p>
          </table:table-cell>
          <table:table-cell office:value-type="float" office:value="8640000" calcext:value-type="float">
            <text:p>8640000</text:p>
          </table:table-cell>
          <table:table-cell table:formula="of:=[.B314]/[.C314]" office:value-type="float" office:value="0.0010505787037037" calcext:value-type="float">
            <text:p>0,00105057870370370000</text:p>
          </table:table-cell>
          <table:table-cell table:formula="of:=[.D315]-[.D314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4]+29" office:value-type="float" office:value="9106" calcext:value-type="float">
            <text:p>9106</text:p>
          </table:table-cell>
          <table:table-cell office:value-type="float" office:value="8640000" calcext:value-type="float">
            <text:p>8640000</text:p>
          </table:table-cell>
          <table:table-cell table:formula="of:=[.B315]/[.C315]" office:value-type="float" office:value="0.00105393518518519" calcext:value-type="float">
            <text:p>0,00105393518518519000</text:p>
          </table:table-cell>
          <table:table-cell table:formula="of:=[.D316]-[.D315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5]+29" office:value-type="float" office:value="9135" calcext:value-type="float">
            <text:p>9135</text:p>
          </table:table-cell>
          <table:table-cell office:value-type="float" office:value="8640000" calcext:value-type="float">
            <text:p>8640000</text:p>
          </table:table-cell>
          <table:table-cell table:formula="of:=[.B316]/[.C316]" office:value-type="float" office:value="0.00105729166666667" calcext:value-type="float">
            <text:p>0,00105729166666667000</text:p>
          </table:table-cell>
          <table:table-cell table:formula="of:=[.D317]-[.D316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6]+29" office:value-type="float" office:value="9164" calcext:value-type="float">
            <text:p>9164</text:p>
          </table:table-cell>
          <table:table-cell office:value-type="float" office:value="8640000" calcext:value-type="float">
            <text:p>8640000</text:p>
          </table:table-cell>
          <table:table-cell table:formula="of:=[.B317]/[.C317]" office:value-type="float" office:value="0.00106064814814815" calcext:value-type="float">
            <text:p>0,00106064814814815000</text:p>
          </table:table-cell>
          <table:table-cell table:formula="of:=[.D318]-[.D317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7]+29" office:value-type="float" office:value="9193" calcext:value-type="float">
            <text:p>9193</text:p>
          </table:table-cell>
          <table:table-cell office:value-type="float" office:value="8640000" calcext:value-type="float">
            <text:p>8640000</text:p>
          </table:table-cell>
          <table:table-cell table:formula="of:=[.B318]/[.C318]" office:value-type="float" office:value="0.00106400462962963" calcext:value-type="float">
            <text:p>0,00106400462962963000</text:p>
          </table:table-cell>
          <table:table-cell table:formula="of:=[.D319]-[.D318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8]+29" office:value-type="float" office:value="9222" calcext:value-type="float">
            <text:p>9222</text:p>
          </table:table-cell>
          <table:table-cell office:value-type="float" office:value="8640000" calcext:value-type="float">
            <text:p>8640000</text:p>
          </table:table-cell>
          <table:table-cell table:formula="of:=[.B319]/[.C319]" office:value-type="float" office:value="0.00106736111111111" calcext:value-type="float">
            <text:p>0,00106736111111111000</text:p>
          </table:table-cell>
          <table:table-cell table:formula="of:=[.D320]-[.D319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19]+29" office:value-type="float" office:value="9251" calcext:value-type="float">
            <text:p>9251</text:p>
          </table:table-cell>
          <table:table-cell office:value-type="float" office:value="8640000" calcext:value-type="float">
            <text:p>8640000</text:p>
          </table:table-cell>
          <table:table-cell table:formula="of:=[.B320]/[.C320]" office:value-type="float" office:value="0.00107071759259259" calcext:value-type="float">
            <text:p>0,00107071759259259000</text:p>
          </table:table-cell>
          <table:table-cell table:formula="of:=[.D321]-[.D320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0]+29" office:value-type="float" office:value="9280" calcext:value-type="float">
            <text:p>9280</text:p>
          </table:table-cell>
          <table:table-cell office:value-type="float" office:value="8640000" calcext:value-type="float">
            <text:p>8640000</text:p>
          </table:table-cell>
          <table:table-cell table:formula="of:=[.B321]/[.C321]" office:value-type="float" office:value="0.00107407407407407" calcext:value-type="float">
            <text:p>0,00107407407407407000</text:p>
          </table:table-cell>
          <table:table-cell table:formula="of:=[.D322]-[.D321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1]+29" office:value-type="float" office:value="9309" calcext:value-type="float">
            <text:p>9309</text:p>
          </table:table-cell>
          <table:table-cell office:value-type="float" office:value="8640000" calcext:value-type="float">
            <text:p>8640000</text:p>
          </table:table-cell>
          <table:table-cell table:formula="of:=[.B322]/[.C322]" office:value-type="float" office:value="0.00107743055555556" calcext:value-type="float">
            <text:p>0,00107743055555556000</text:p>
          </table:table-cell>
          <table:table-cell table:formula="of:=[.D323]-[.D322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2]+29" office:value-type="float" office:value="9338" calcext:value-type="float">
            <text:p>9338</text:p>
          </table:table-cell>
          <table:table-cell office:value-type="float" office:value="8640000" calcext:value-type="float">
            <text:p>8640000</text:p>
          </table:table-cell>
          <table:table-cell table:formula="of:=[.B323]/[.C323]" office:value-type="float" office:value="0.00108078703703704" calcext:value-type="float">
            <text:p>0,00108078703703704000</text:p>
          </table:table-cell>
          <table:table-cell table:formula="of:=[.D324]-[.D323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3]+29" office:value-type="float" office:value="9367" calcext:value-type="float">
            <text:p>9367</text:p>
          </table:table-cell>
          <table:table-cell office:value-type="float" office:value="8640000" calcext:value-type="float">
            <text:p>8640000</text:p>
          </table:table-cell>
          <table:table-cell table:formula="of:=[.B324]/[.C324]" office:value-type="float" office:value="0.00108414351851852" calcext:value-type="float">
            <text:p>0,00108414351851852000</text:p>
          </table:table-cell>
          <table:table-cell table:formula="of:=[.D325]-[.D324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4]+29" office:value-type="float" office:value="9396" calcext:value-type="float">
            <text:p>9396</text:p>
          </table:table-cell>
          <table:table-cell office:value-type="float" office:value="8640000" calcext:value-type="float">
            <text:p>8640000</text:p>
          </table:table-cell>
          <table:table-cell table:formula="of:=[.B325]/[.C325]" office:value-type="float" office:value="0.0010875" calcext:value-type="float">
            <text:p>0,00108750000000000000</text:p>
          </table:table-cell>
          <table:table-cell table:formula="of:=[.D326]-[.D325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5]+29" office:value-type="float" office:value="9425" calcext:value-type="float">
            <text:p>9425</text:p>
          </table:table-cell>
          <table:table-cell office:value-type="float" office:value="8640000" calcext:value-type="float">
            <text:p>8640000</text:p>
          </table:table-cell>
          <table:table-cell table:formula="of:=[.B326]/[.C326]" office:value-type="float" office:value="0.00109085648148148" calcext:value-type="float">
            <text:p>0,00109085648148148000</text:p>
          </table:table-cell>
          <table:table-cell table:formula="of:=[.D327]-[.D326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6]+29" office:value-type="float" office:value="9454" calcext:value-type="float">
            <text:p>9454</text:p>
          </table:table-cell>
          <table:table-cell office:value-type="float" office:value="8640000" calcext:value-type="float">
            <text:p>8640000</text:p>
          </table:table-cell>
          <table:table-cell table:formula="of:=[.B327]/[.C327]" office:value-type="float" office:value="0.00109421296296296" calcext:value-type="float">
            <text:p>0,00109421296296296000</text:p>
          </table:table-cell>
          <table:table-cell table:formula="of:=[.D328]-[.D327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7]+29" office:value-type="float" office:value="9483" calcext:value-type="float">
            <text:p>9483</text:p>
          </table:table-cell>
          <table:table-cell office:value-type="float" office:value="8640000" calcext:value-type="float">
            <text:p>8640000</text:p>
          </table:table-cell>
          <table:table-cell table:formula="of:=[.B328]/[.C328]" office:value-type="float" office:value="0.00109756944444444" calcext:value-type="float">
            <text:p>0,00109756944444444000</text:p>
          </table:table-cell>
          <table:table-cell table:formula="of:=[.D329]-[.D328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8]+29" office:value-type="float" office:value="9512" calcext:value-type="float">
            <text:p>9512</text:p>
          </table:table-cell>
          <table:table-cell office:value-type="float" office:value="8640000" calcext:value-type="float">
            <text:p>8640000</text:p>
          </table:table-cell>
          <table:table-cell table:formula="of:=[.B329]/[.C329]" office:value-type="float" office:value="0.00110092592592593" calcext:value-type="float">
            <text:p>0,00110092592592593000</text:p>
          </table:table-cell>
          <table:table-cell table:formula="of:=[.D330]-[.D329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29]+29" office:value-type="float" office:value="9541" calcext:value-type="float">
            <text:p>9541</text:p>
          </table:table-cell>
          <table:table-cell office:value-type="float" office:value="8640000" calcext:value-type="float">
            <text:p>8640000</text:p>
          </table:table-cell>
          <table:table-cell table:formula="of:=[.B330]/[.C330]" office:value-type="float" office:value="0.00110428240740741" calcext:value-type="float">
            <text:p>0,00110428240740741000</text:p>
          </table:table-cell>
          <table:table-cell table:formula="of:=[.D331]-[.D330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0]+29" office:value-type="float" office:value="9570" calcext:value-type="float">
            <text:p>9570</text:p>
          </table:table-cell>
          <table:table-cell office:value-type="float" office:value="8640000" calcext:value-type="float">
            <text:p>8640000</text:p>
          </table:table-cell>
          <table:table-cell table:formula="of:=[.B331]/[.C331]" office:value-type="float" office:value="0.00110763888888889" calcext:value-type="float">
            <text:p>0,00110763888888889000</text:p>
          </table:table-cell>
          <table:table-cell table:formula="of:=[.D332]-[.D331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1]+29" office:value-type="float" office:value="9599" calcext:value-type="float">
            <text:p>9599</text:p>
          </table:table-cell>
          <table:table-cell office:value-type="float" office:value="8640000" calcext:value-type="float">
            <text:p>8640000</text:p>
          </table:table-cell>
          <table:table-cell table:formula="of:=[.B332]/[.C332]" office:value-type="float" office:value="0.00111099537037037" calcext:value-type="float">
            <text:p>0,00111099537037037000</text:p>
          </table:table-cell>
          <table:table-cell table:formula="of:=[.D333]-[.D332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2]+29" office:value-type="float" office:value="9628" calcext:value-type="float">
            <text:p>9628</text:p>
          </table:table-cell>
          <table:table-cell office:value-type="float" office:value="8640000" calcext:value-type="float">
            <text:p>8640000</text:p>
          </table:table-cell>
          <table:table-cell table:formula="of:=[.B333]/[.C333]" office:value-type="float" office:value="0.00111435185185185" calcext:value-type="float">
            <text:p>0,00111435185185185000</text:p>
          </table:table-cell>
          <table:table-cell table:formula="of:=[.D334]-[.D333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3]+29" office:value-type="float" office:value="9657" calcext:value-type="float">
            <text:p>9657</text:p>
          </table:table-cell>
          <table:table-cell office:value-type="float" office:value="8640000" calcext:value-type="float">
            <text:p>8640000</text:p>
          </table:table-cell>
          <table:table-cell table:formula="of:=[.B334]/[.C334]" office:value-type="float" office:value="0.00111770833333333" calcext:value-type="float">
            <text:p>0,00111770833333333000</text:p>
          </table:table-cell>
          <table:table-cell table:formula="of:=[.D335]-[.D334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4]+29" office:value-type="float" office:value="9686" calcext:value-type="float">
            <text:p>9686</text:p>
          </table:table-cell>
          <table:table-cell office:value-type="float" office:value="8640000" calcext:value-type="float">
            <text:p>8640000</text:p>
          </table:table-cell>
          <table:table-cell table:formula="of:=[.B335]/[.C335]" office:value-type="float" office:value="0.00112106481481481" calcext:value-type="float">
            <text:p>0,00112106481481481000</text:p>
          </table:table-cell>
          <table:table-cell table:formula="of:=[.D336]-[.D335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5]+29" office:value-type="float" office:value="9715" calcext:value-type="float">
            <text:p>9715</text:p>
          </table:table-cell>
          <table:table-cell office:value-type="float" office:value="8640000" calcext:value-type="float">
            <text:p>8640000</text:p>
          </table:table-cell>
          <table:table-cell table:formula="of:=[.B336]/[.C336]" office:value-type="float" office:value="0.0011244212962963" calcext:value-type="float">
            <text:p>0,00112442129629630000</text:p>
          </table:table-cell>
          <table:table-cell table:formula="of:=[.D337]-[.D336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6]+29" office:value-type="float" office:value="9744" calcext:value-type="float">
            <text:p>9744</text:p>
          </table:table-cell>
          <table:table-cell office:value-type="float" office:value="8640000" calcext:value-type="float">
            <text:p>8640000</text:p>
          </table:table-cell>
          <table:table-cell table:formula="of:=[.B337]/[.C337]" office:value-type="float" office:value="0.00112777777777778" calcext:value-type="float">
            <text:p>0,00112777777777778000</text:p>
          </table:table-cell>
          <table:table-cell table:formula="of:=[.D338]-[.D337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7]+29" office:value-type="float" office:value="9773" calcext:value-type="float">
            <text:p>9773</text:p>
          </table:table-cell>
          <table:table-cell office:value-type="float" office:value="8640000" calcext:value-type="float">
            <text:p>8640000</text:p>
          </table:table-cell>
          <table:table-cell table:formula="of:=[.B338]/[.C338]" office:value-type="float" office:value="0.00113113425925926" calcext:value-type="float">
            <text:p>0,00113113425925926000</text:p>
          </table:table-cell>
          <table:table-cell table:formula="of:=[.D339]-[.D338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8]+29" office:value-type="float" office:value="9802" calcext:value-type="float">
            <text:p>9802</text:p>
          </table:table-cell>
          <table:table-cell office:value-type="float" office:value="8640000" calcext:value-type="float">
            <text:p>8640000</text:p>
          </table:table-cell>
          <table:table-cell table:formula="of:=[.B339]/[.C339]" office:value-type="float" office:value="0.00113449074074074" calcext:value-type="float">
            <text:p>0,00113449074074074000</text:p>
          </table:table-cell>
          <table:table-cell table:formula="of:=[.D340]-[.D339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39]+29" office:value-type="float" office:value="9831" calcext:value-type="float">
            <text:p>9831</text:p>
          </table:table-cell>
          <table:table-cell office:value-type="float" office:value="8640000" calcext:value-type="float">
            <text:p>8640000</text:p>
          </table:table-cell>
          <table:table-cell table:formula="of:=[.B340]/[.C340]" office:value-type="float" office:value="0.00113784722222222" calcext:value-type="float">
            <text:p>0,00113784722222222000</text:p>
          </table:table-cell>
          <table:table-cell table:formula="of:=[.D341]-[.D340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0]+29" office:value-type="float" office:value="9860" calcext:value-type="float">
            <text:p>9860</text:p>
          </table:table-cell>
          <table:table-cell office:value-type="float" office:value="8640000" calcext:value-type="float">
            <text:p>8640000</text:p>
          </table:table-cell>
          <table:table-cell table:formula="of:=[.B341]/[.C341]" office:value-type="float" office:value="0.0011412037037037" calcext:value-type="float">
            <text:p>0,00114120370370370000</text:p>
          </table:table-cell>
          <table:table-cell table:formula="of:=[.D342]-[.D341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1]+29" office:value-type="float" office:value="9889" calcext:value-type="float">
            <text:p>9889</text:p>
          </table:table-cell>
          <table:table-cell office:value-type="float" office:value="8640000" calcext:value-type="float">
            <text:p>8640000</text:p>
          </table:table-cell>
          <table:table-cell table:formula="of:=[.B342]/[.C342]" office:value-type="float" office:value="0.00114456018518519" calcext:value-type="float">
            <text:p>0,00114456018518519000</text:p>
          </table:table-cell>
          <table:table-cell table:formula="of:=[.D343]-[.D342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2]+29" office:value-type="float" office:value="9918" calcext:value-type="float">
            <text:p>9918</text:p>
          </table:table-cell>
          <table:table-cell office:value-type="float" office:value="8640000" calcext:value-type="float">
            <text:p>8640000</text:p>
          </table:table-cell>
          <table:table-cell table:formula="of:=[.B343]/[.C343]" office:value-type="float" office:value="0.00114791666666667" calcext:value-type="float">
            <text:p>0,00114791666666667000</text:p>
          </table:table-cell>
          <table:table-cell table:formula="of:=[.D344]-[.D343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3]+29" office:value-type="float" office:value="9947" calcext:value-type="float">
            <text:p>9947</text:p>
          </table:table-cell>
          <table:table-cell office:value-type="float" office:value="8640000" calcext:value-type="float">
            <text:p>8640000</text:p>
          </table:table-cell>
          <table:table-cell table:formula="of:=[.B344]/[.C344]" office:value-type="float" office:value="0.00115127314814815" calcext:value-type="float">
            <text:p>0,00115127314814815000</text:p>
          </table:table-cell>
          <table:table-cell table:formula="of:=[.D345]-[.D344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4]+29" office:value-type="float" office:value="9976" calcext:value-type="float">
            <text:p>9976</text:p>
          </table:table-cell>
          <table:table-cell office:value-type="float" office:value="8640000" calcext:value-type="float">
            <text:p>8640000</text:p>
          </table:table-cell>
          <table:table-cell table:formula="of:=[.B345]/[.C345]" office:value-type="float" office:value="0.00115462962962963" calcext:value-type="float">
            <text:p>0,00115462962962963000</text:p>
          </table:table-cell>
          <table:table-cell table:formula="of:=[.D346]-[.D345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5]+29" office:value-type="float" office:value="10005" calcext:value-type="float">
            <text:p>10005</text:p>
          </table:table-cell>
          <table:table-cell office:value-type="float" office:value="8640000" calcext:value-type="float">
            <text:p>8640000</text:p>
          </table:table-cell>
          <table:table-cell table:formula="of:=[.B346]/[.C346]" office:value-type="float" office:value="0.00115798611111111" calcext:value-type="float">
            <text:p>0,00115798611111111000</text:p>
          </table:table-cell>
          <table:table-cell table:formula="of:=[.D347]-[.D346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6]+29" office:value-type="float" office:value="10034" calcext:value-type="float">
            <text:p>10034</text:p>
          </table:table-cell>
          <table:table-cell office:value-type="float" office:value="8640000" calcext:value-type="float">
            <text:p>8640000</text:p>
          </table:table-cell>
          <table:table-cell table:formula="of:=[.B347]/[.C347]" office:value-type="float" office:value="0.00116134259259259" calcext:value-type="float">
            <text:p>0,00116134259259259000</text:p>
          </table:table-cell>
          <table:table-cell table:formula="of:=[.D348]-[.D347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47]+29" office:value-type="float" office:value="10063" calcext:value-type="float">
            <text:p>10063</text:p>
          </table:table-cell>
          <table:table-cell office:value-type="float" office:value="8640000" calcext:value-type="float">
            <text:p>8640000</text:p>
          </table:table-cell>
          <table:table-cell table:formula="of:=[.B348]/[.C348]" office:value-type="float" office:value="0.00116469907407407" calcext:value-type="float">
            <text:p>0,00116469907407407000</text:p>
          </table:table-cell>
          <table:table-cell table:formula="of:=[.D349]-[.D348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48]+29" office:value-type="float" office:value="10092" calcext:value-type="float">
            <text:p>10092</text:p>
          </table:table-cell>
          <table:table-cell office:value-type="float" office:value="8640000" calcext:value-type="float">
            <text:p>8640000</text:p>
          </table:table-cell>
          <table:table-cell table:formula="of:=[.B349]/[.C349]" office:value-type="float" office:value="0.00116805555555556" calcext:value-type="float">
            <text:p>0,00116805555555556000</text:p>
          </table:table-cell>
          <table:table-cell table:formula="of:=[.D350]-[.D349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349]+29" office:value-type="float" office:value="10121" calcext:value-type="float">
            <text:p>10121</text:p>
          </table:table-cell>
          <table:table-cell office:value-type="float" office:value="8640000" calcext:value-type="float">
            <text:p>8640000</text:p>
          </table:table-cell>
          <table:table-cell table:formula="of:=[.B350]/[.C350]" office:value-type="float" office:value="0.00117141203703704" calcext:value-type="float">
            <text:p>0,00117141203703704000</text:p>
          </table:table-cell>
          <table:table-cell table:formula="of:=[.D351]-[.D350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350]+29" office:value-type="float" office:value="10150" calcext:value-type="float">
            <text:p>10150</text:p>
          </table:table-cell>
          <table:table-cell office:value-type="float" office:value="8640000" calcext:value-type="float">
            <text:p>8640000</text:p>
          </table:table-cell>
          <table:table-cell table:formula="of:=[.B351]/[.C351]" office:value-type="float" office:value="0.00117476851851852" calcext:value-type="float">
            <text:p>0,00117476851851852000</text:p>
          </table:table-cell>
          <table:table-cell table:formula="of:=[.D352]-[.D351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351]+29" office:value-type="float" office:value="10179" calcext:value-type="float">
            <text:p>10179</text:p>
          </table:table-cell>
          <table:table-cell office:value-type="float" office:value="8640000" calcext:value-type="float">
            <text:p>8640000</text:p>
          </table:table-cell>
          <table:table-cell table:formula="of:=[.B352]/[.C352]" office:value-type="float" office:value="0.001178125" calcext:value-type="float">
            <text:p>0,00117812500000000000</text:p>
          </table:table-cell>
          <table:table-cell table:formula="of:=[.D353]-[.D352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2]+29" office:value-type="float" office:value="10208" calcext:value-type="float">
            <text:p>10208</text:p>
          </table:table-cell>
          <table:table-cell office:value-type="float" office:value="8640000" calcext:value-type="float">
            <text:p>8640000</text:p>
          </table:table-cell>
          <table:table-cell table:formula="of:=[.B353]/[.C353]" office:value-type="float" office:value="0.00118148148148148" calcext:value-type="float">
            <text:p>0,00118148148148148000</text:p>
          </table:table-cell>
          <table:table-cell table:formula="of:=[.D354]-[.D353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353]+29" office:value-type="float" office:value="10237" calcext:value-type="float">
            <text:p>10237</text:p>
          </table:table-cell>
          <table:table-cell office:value-type="float" office:value="8640000" calcext:value-type="float">
            <text:p>8640000</text:p>
          </table:table-cell>
          <table:table-cell table:formula="of:=[.B354]/[.C354]" office:value-type="float" office:value="0.00118483796296296" calcext:value-type="float">
            <text:p>0,00118483796296296000</text:p>
          </table:table-cell>
          <table:table-cell table:formula="of:=[.D355]-[.D354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354]+29" office:value-type="float" office:value="10266" calcext:value-type="float">
            <text:p>10266</text:p>
          </table:table-cell>
          <table:table-cell office:value-type="float" office:value="8640000" calcext:value-type="float">
            <text:p>8640000</text:p>
          </table:table-cell>
          <table:table-cell table:formula="of:=[.B355]/[.C355]" office:value-type="float" office:value="0.00118819444444444" calcext:value-type="float">
            <text:p>0,00118819444444444000</text:p>
          </table:table-cell>
          <table:table-cell table:formula="of:=[.D356]-[.D355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355]+29" office:value-type="float" office:value="10295" calcext:value-type="float">
            <text:p>10295</text:p>
          </table:table-cell>
          <table:table-cell office:value-type="float" office:value="8640000" calcext:value-type="float">
            <text:p>8640000</text:p>
          </table:table-cell>
          <table:table-cell table:formula="of:=[.B356]/[.C356]" office:value-type="float" office:value="0.00119155092592593" calcext:value-type="float">
            <text:p>0,00119155092592593000</text:p>
          </table:table-cell>
          <table:table-cell table:formula="of:=[.D357]-[.D356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356]+29" office:value-type="float" office:value="10324" calcext:value-type="float">
            <text:p>10324</text:p>
          </table:table-cell>
          <table:table-cell office:value-type="float" office:value="8640000" calcext:value-type="float">
            <text:p>8640000</text:p>
          </table:table-cell>
          <table:table-cell table:formula="of:=[.B357]/[.C357]" office:value-type="float" office:value="0.00119490740740741" calcext:value-type="float">
            <text:p>0,00119490740740741000</text:p>
          </table:table-cell>
          <table:table-cell table:formula="of:=[.D358]-[.D357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357]+29" office:value-type="float" office:value="10353" calcext:value-type="float">
            <text:p>10353</text:p>
          </table:table-cell>
          <table:table-cell office:value-type="float" office:value="8640000" calcext:value-type="float">
            <text:p>8640000</text:p>
          </table:table-cell>
          <table:table-cell table:formula="of:=[.B358]/[.C358]" office:value-type="float" office:value="0.00119826388888889" calcext:value-type="float">
            <text:p>0,00119826388888889000</text:p>
          </table:table-cell>
          <table:table-cell table:formula="of:=[.D359]-[.D358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358]+29" office:value-type="float" office:value="10382" calcext:value-type="float">
            <text:p>10382</text:p>
          </table:table-cell>
          <table:table-cell office:value-type="float" office:value="8640000" calcext:value-type="float">
            <text:p>8640000</text:p>
          </table:table-cell>
          <table:table-cell table:formula="of:=[.B359]/[.C359]" office:value-type="float" office:value="0.00120162037037037" calcext:value-type="float">
            <text:p>0,00120162037037037000</text:p>
          </table:table-cell>
          <table:table-cell table:formula="of:=[.D360]-[.D359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359]+29" office:value-type="float" office:value="10411" calcext:value-type="float">
            <text:p>10411</text:p>
          </table:table-cell>
          <table:table-cell office:value-type="float" office:value="8640000" calcext:value-type="float">
            <text:p>8640000</text:p>
          </table:table-cell>
          <table:table-cell table:formula="of:=[.B360]/[.C360]" office:value-type="float" office:value="0.00120497685185185" calcext:value-type="float">
            <text:p>0,00120497685185185000</text:p>
          </table:table-cell>
          <table:table-cell table:formula="of:=[.D361]-[.D360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360]+29" office:value-type="float" office:value="10440" calcext:value-type="float">
            <text:p>10440</text:p>
          </table:table-cell>
          <table:table-cell office:value-type="float" office:value="8640000" calcext:value-type="float">
            <text:p>8640000</text:p>
          </table:table-cell>
          <table:table-cell table:formula="of:=[.B361]/[.C361]" office:value-type="float" office:value="0.00120833333333333" calcext:value-type="float">
            <text:p>0,00120833333333333000</text:p>
          </table:table-cell>
          <table:table-cell table:formula="of:=[.D362]-[.D361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361]+29" office:value-type="float" office:value="10469" calcext:value-type="float">
            <text:p>10469</text:p>
          </table:table-cell>
          <table:table-cell office:value-type="float" office:value="8640000" calcext:value-type="float">
            <text:p>8640000</text:p>
          </table:table-cell>
          <table:table-cell table:formula="of:=[.B362]/[.C362]" office:value-type="float" office:value="0.00121168981481481" calcext:value-type="float">
            <text:p>0,00121168981481481000</text:p>
          </table:table-cell>
          <table:table-cell table:formula="of:=[.D363]-[.D362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362]+29" office:value-type="float" office:value="10498" calcext:value-type="float">
            <text:p>10498</text:p>
          </table:table-cell>
          <table:table-cell office:value-type="float" office:value="8640000" calcext:value-type="float">
            <text:p>8640000</text:p>
          </table:table-cell>
          <table:table-cell table:formula="of:=[.B363]/[.C363]" office:value-type="float" office:value="0.0012150462962963" calcext:value-type="float">
            <text:p>0,00121504629629630000</text:p>
          </table:table-cell>
          <table:table-cell table:formula="of:=[.D364]-[.D363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363]+29" office:value-type="float" office:value="10527" calcext:value-type="float">
            <text:p>10527</text:p>
          </table:table-cell>
          <table:table-cell office:value-type="float" office:value="8640000" calcext:value-type="float">
            <text:p>8640000</text:p>
          </table:table-cell>
          <table:table-cell table:formula="of:=[.B364]/[.C364]" office:value-type="float" office:value="0.00121840277777778" calcext:value-type="float">
            <text:p>0,00121840277777778000</text:p>
          </table:table-cell>
          <table:table-cell table:formula="of:=[.D365]-[.D364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364]+29" office:value-type="float" office:value="10556" calcext:value-type="float">
            <text:p>10556</text:p>
          </table:table-cell>
          <table:table-cell office:value-type="float" office:value="8640000" calcext:value-type="float">
            <text:p>8640000</text:p>
          </table:table-cell>
          <table:table-cell table:formula="of:=[.B365]/[.C365]" office:value-type="float" office:value="0.00122175925925926" calcext:value-type="float">
            <text:p>0,00122175925925926000</text:p>
          </table:table-cell>
          <table:table-cell table:formula="of:=[.D366]-[.D365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B365]+29" office:value-type="float" office:value="10585" calcext:value-type="float">
            <text:p>10585</text:p>
          </table:table-cell>
          <table:table-cell office:value-type="float" office:value="8640000" calcext:value-type="float">
            <text:p>8640000</text:p>
          </table:table-cell>
          <table:table-cell table:formula="of:=[.B366]/[.C366]" office:value-type="float" office:value="0.00122511574074074" calcext:value-type="float">
            <text:p>0,00122511574074074000</text:p>
          </table:table-cell>
          <table:table-cell table:formula="of:=[.D367]-[.D366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B366]+29" office:value-type="float" office:value="10614" calcext:value-type="float">
            <text:p>10614</text:p>
          </table:table-cell>
          <table:table-cell office:value-type="float" office:value="8640000" calcext:value-type="float">
            <text:p>8640000</text:p>
          </table:table-cell>
          <table:table-cell table:formula="of:=[.B367]/[.C367]" office:value-type="float" office:value="0.00122847222222222" calcext:value-type="float">
            <text:p>0,00122847222222222000</text:p>
          </table:table-cell>
          <table:table-cell table:formula="of:=[.D368]-[.D367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367]+29" office:value-type="float" office:value="10643" calcext:value-type="float">
            <text:p>10643</text:p>
          </table:table-cell>
          <table:table-cell office:value-type="float" office:value="8640000" calcext:value-type="float">
            <text:p>8640000</text:p>
          </table:table-cell>
          <table:table-cell table:formula="of:=[.B368]/[.C368]" office:value-type="float" office:value="0.0012318287037037" calcext:value-type="float">
            <text:p>0,00123182870370370000</text:p>
          </table:table-cell>
          <table:table-cell table:formula="of:=[.D369]-[.D368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B368]+29" office:value-type="float" office:value="10672" calcext:value-type="float">
            <text:p>10672</text:p>
          </table:table-cell>
          <table:table-cell office:value-type="float" office:value="8640000" calcext:value-type="float">
            <text:p>8640000</text:p>
          </table:table-cell>
          <table:table-cell table:formula="of:=[.B369]/[.C369]" office:value-type="float" office:value="0.00123518518518519" calcext:value-type="float">
            <text:p>0,00123518518518519000</text:p>
          </table:table-cell>
          <table:table-cell table:formula="of:=[.D370]-[.D369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B369]+29" office:value-type="float" office:value="10701" calcext:value-type="float">
            <text:p>10701</text:p>
          </table:table-cell>
          <table:table-cell office:value-type="float" office:value="8640000" calcext:value-type="float">
            <text:p>8640000</text:p>
          </table:table-cell>
          <table:table-cell table:formula="of:=[.B370]/[.C370]" office:value-type="float" office:value="0.00123854166666667" calcext:value-type="float">
            <text:p>0,00123854166666667000</text:p>
          </table:table-cell>
          <table:table-cell table:formula="of:=[.D371]-[.D370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B370]+29" office:value-type="float" office:value="10730" calcext:value-type="float">
            <text:p>10730</text:p>
          </table:table-cell>
          <table:table-cell office:value-type="float" office:value="8640000" calcext:value-type="float">
            <text:p>8640000</text:p>
          </table:table-cell>
          <table:table-cell table:formula="of:=[.B371]/[.C371]" office:value-type="float" office:value="0.00124189814814815" calcext:value-type="float">
            <text:p>0,00124189814814815000</text:p>
          </table:table-cell>
          <table:table-cell table:formula="of:=[.D372]-[.D371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B371]+29" office:value-type="float" office:value="10759" calcext:value-type="float">
            <text:p>10759</text:p>
          </table:table-cell>
          <table:table-cell office:value-type="float" office:value="8640000" calcext:value-type="float">
            <text:p>8640000</text:p>
          </table:table-cell>
          <table:table-cell table:formula="of:=[.B372]/[.C372]" office:value-type="float" office:value="0.00124525462962963" calcext:value-type="float">
            <text:p>0,00124525462962963000</text:p>
          </table:table-cell>
          <table:table-cell table:formula="of:=[.D373]-[.D372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B372]+29" office:value-type="float" office:value="10788" calcext:value-type="float">
            <text:p>10788</text:p>
          </table:table-cell>
          <table:table-cell office:value-type="float" office:value="8640000" calcext:value-type="float">
            <text:p>8640000</text:p>
          </table:table-cell>
          <table:table-cell table:formula="of:=[.B373]/[.C373]" office:value-type="float" office:value="0.00124861111111111" calcext:value-type="float">
            <text:p>0,00124861111111111000</text:p>
          </table:table-cell>
          <table:table-cell table:formula="of:=[.D374]-[.D373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B373]+29" office:value-type="float" office:value="10817" calcext:value-type="float">
            <text:p>10817</text:p>
          </table:table-cell>
          <table:table-cell office:value-type="float" office:value="8640000" calcext:value-type="float">
            <text:p>8640000</text:p>
          </table:table-cell>
          <table:table-cell table:formula="of:=[.B374]/[.C374]" office:value-type="float" office:value="0.00125196759259259" calcext:value-type="float">
            <text:p>0,00125196759259259000</text:p>
          </table:table-cell>
          <table:table-cell table:formula="of:=[.D375]-[.D374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B374]+29" office:value-type="float" office:value="10846" calcext:value-type="float">
            <text:p>10846</text:p>
          </table:table-cell>
          <table:table-cell office:value-type="float" office:value="8640000" calcext:value-type="float">
            <text:p>8640000</text:p>
          </table:table-cell>
          <table:table-cell table:formula="of:=[.B375]/[.C375]" office:value-type="float" office:value="0.00125532407407407" calcext:value-type="float">
            <text:p>0,00125532407407407000</text:p>
          </table:table-cell>
          <table:table-cell table:formula="of:=[.D376]-[.D375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B375]+29" office:value-type="float" office:value="10875" calcext:value-type="float">
            <text:p>10875</text:p>
          </table:table-cell>
          <table:table-cell office:value-type="float" office:value="8640000" calcext:value-type="float">
            <text:p>8640000</text:p>
          </table:table-cell>
          <table:table-cell table:formula="of:=[.B376]/[.C376]" office:value-type="float" office:value="0.00125868055555556" calcext:value-type="float">
            <text:p>0,00125868055555556000</text:p>
          </table:table-cell>
          <table:table-cell table:formula="of:=[.D377]-[.D376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B376]+29" office:value-type="float" office:value="10904" calcext:value-type="float">
            <text:p>10904</text:p>
          </table:table-cell>
          <table:table-cell office:value-type="float" office:value="8640000" calcext:value-type="float">
            <text:p>8640000</text:p>
          </table:table-cell>
          <table:table-cell table:formula="of:=[.B377]/[.C377]" office:value-type="float" office:value="0.00126203703703704" calcext:value-type="float">
            <text:p>0,00126203703703704000</text:p>
          </table:table-cell>
          <table:table-cell table:formula="of:=[.D378]-[.D377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B377]+29" office:value-type="float" office:value="10933" calcext:value-type="float">
            <text:p>10933</text:p>
          </table:table-cell>
          <table:table-cell office:value-type="float" office:value="8640000" calcext:value-type="float">
            <text:p>8640000</text:p>
          </table:table-cell>
          <table:table-cell table:formula="of:=[.B378]/[.C378]" office:value-type="float" office:value="0.00126539351851852" calcext:value-type="float">
            <text:p>0,00126539351851852000</text:p>
          </table:table-cell>
          <table:table-cell table:formula="of:=[.D379]-[.D378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B378]+29" office:value-type="float" office:value="10962" calcext:value-type="float">
            <text:p>10962</text:p>
          </table:table-cell>
          <table:table-cell office:value-type="float" office:value="8640000" calcext:value-type="float">
            <text:p>8640000</text:p>
          </table:table-cell>
          <table:table-cell table:formula="of:=[.B379]/[.C379]" office:value-type="float" office:value="0.00126875" calcext:value-type="float">
            <text:p>0,00126875000000000000</text:p>
          </table:table-cell>
          <table:table-cell table:formula="of:=[.D380]-[.D379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B379]+29" office:value-type="float" office:value="10991" calcext:value-type="float">
            <text:p>10991</text:p>
          </table:table-cell>
          <table:table-cell office:value-type="float" office:value="8640000" calcext:value-type="float">
            <text:p>8640000</text:p>
          </table:table-cell>
          <table:table-cell table:formula="of:=[.B380]/[.C380]" office:value-type="float" office:value="0.00127210648148148" calcext:value-type="float">
            <text:p>0,00127210648148148000</text:p>
          </table:table-cell>
          <table:table-cell table:formula="of:=[.D381]-[.D380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B380]+29" office:value-type="float" office:value="11020" calcext:value-type="float">
            <text:p>11020</text:p>
          </table:table-cell>
          <table:table-cell office:value-type="float" office:value="8640000" calcext:value-type="float">
            <text:p>8640000</text:p>
          </table:table-cell>
          <table:table-cell table:formula="of:=[.B381]/[.C381]" office:value-type="float" office:value="0.00127546296296296" calcext:value-type="float">
            <text:p>0,00127546296296296000</text:p>
          </table:table-cell>
          <table:table-cell table:formula="of:=[.D382]-[.D381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B381]+29" office:value-type="float" office:value="11049" calcext:value-type="float">
            <text:p>11049</text:p>
          </table:table-cell>
          <table:table-cell office:value-type="float" office:value="8640000" calcext:value-type="float">
            <text:p>8640000</text:p>
          </table:table-cell>
          <table:table-cell table:formula="of:=[.B382]/[.C382]" office:value-type="float" office:value="0.00127881944444444" calcext:value-type="float">
            <text:p>0,00127881944444444000</text:p>
          </table:table-cell>
          <table:table-cell table:formula="of:=[.D383]-[.D382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B382]+29" office:value-type="float" office:value="11078" calcext:value-type="float">
            <text:p>11078</text:p>
          </table:table-cell>
          <table:table-cell office:value-type="float" office:value="8640000" calcext:value-type="float">
            <text:p>8640000</text:p>
          </table:table-cell>
          <table:table-cell table:formula="of:=[.B383]/[.C383]" office:value-type="float" office:value="0.00128217592592593" calcext:value-type="float">
            <text:p>0,00128217592592593000</text:p>
          </table:table-cell>
          <table:table-cell table:formula="of:=[.D384]-[.D383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B383]+29" office:value-type="float" office:value="11107" calcext:value-type="float">
            <text:p>11107</text:p>
          </table:table-cell>
          <table:table-cell office:value-type="float" office:value="8640000" calcext:value-type="float">
            <text:p>8640000</text:p>
          </table:table-cell>
          <table:table-cell table:formula="of:=[.B384]/[.C384]" office:value-type="float" office:value="0.00128553240740741" calcext:value-type="float">
            <text:p>0,00128553240740741000</text:p>
          </table:table-cell>
          <table:table-cell table:formula="of:=[.D385]-[.D384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B384]+29" office:value-type="float" office:value="11136" calcext:value-type="float">
            <text:p>11136</text:p>
          </table:table-cell>
          <table:table-cell office:value-type="float" office:value="8640000" calcext:value-type="float">
            <text:p>8640000</text:p>
          </table:table-cell>
          <table:table-cell table:formula="of:=[.B385]/[.C385]" office:value-type="float" office:value="0.00128888888888889" calcext:value-type="float">
            <text:p>0,00128888888888889000</text:p>
          </table:table-cell>
          <table:table-cell table:formula="of:=[.D386]-[.D385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B385]+29" office:value-type="float" office:value="11165" calcext:value-type="float">
            <text:p>11165</text:p>
          </table:table-cell>
          <table:table-cell office:value-type="float" office:value="8640000" calcext:value-type="float">
            <text:p>8640000</text:p>
          </table:table-cell>
          <table:table-cell table:formula="of:=[.B386]/[.C386]" office:value-type="float" office:value="0.00129224537037037" calcext:value-type="float">
            <text:p>0,00129224537037037000</text:p>
          </table:table-cell>
          <table:table-cell table:formula="of:=[.D387]-[.D386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B386]+29" office:value-type="float" office:value="11194" calcext:value-type="float">
            <text:p>11194</text:p>
          </table:table-cell>
          <table:table-cell office:value-type="float" office:value="8640000" calcext:value-type="float">
            <text:p>8640000</text:p>
          </table:table-cell>
          <table:table-cell table:formula="of:=[.B387]/[.C387]" office:value-type="float" office:value="0.00129560185185185" calcext:value-type="float">
            <text:p>0,00129560185185185000</text:p>
          </table:table-cell>
          <table:table-cell table:formula="of:=[.D388]-[.D387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B387]+29" office:value-type="float" office:value="11223" calcext:value-type="float">
            <text:p>11223</text:p>
          </table:table-cell>
          <table:table-cell office:value-type="float" office:value="8640000" calcext:value-type="float">
            <text:p>8640000</text:p>
          </table:table-cell>
          <table:table-cell table:formula="of:=[.B388]/[.C388]" office:value-type="float" office:value="0.00129895833333333" calcext:value-type="float">
            <text:p>0,00129895833333333000</text:p>
          </table:table-cell>
          <table:table-cell table:formula="of:=[.D389]-[.D388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B388]+29" office:value-type="float" office:value="11252" calcext:value-type="float">
            <text:p>11252</text:p>
          </table:table-cell>
          <table:table-cell office:value-type="float" office:value="8640000" calcext:value-type="float">
            <text:p>8640000</text:p>
          </table:table-cell>
          <table:table-cell table:formula="of:=[.B389]/[.C389]" office:value-type="float" office:value="0.00130231481481481" calcext:value-type="float">
            <text:p>0,00130231481481481000</text:p>
          </table:table-cell>
          <table:table-cell table:formula="of:=[.D390]-[.D389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B389]+29" office:value-type="float" office:value="11281" calcext:value-type="float">
            <text:p>11281</text:p>
          </table:table-cell>
          <table:table-cell office:value-type="float" office:value="8640000" calcext:value-type="float">
            <text:p>8640000</text:p>
          </table:table-cell>
          <table:table-cell table:formula="of:=[.B390]/[.C390]" office:value-type="float" office:value="0.0013056712962963" calcext:value-type="float">
            <text:p>0,00130567129629630000</text:p>
          </table:table-cell>
          <table:table-cell table:formula="of:=[.D391]-[.D390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B390]+29" office:value-type="float" office:value="11310" calcext:value-type="float">
            <text:p>11310</text:p>
          </table:table-cell>
          <table:table-cell office:value-type="float" office:value="8640000" calcext:value-type="float">
            <text:p>8640000</text:p>
          </table:table-cell>
          <table:table-cell table:formula="of:=[.B391]/[.C391]" office:value-type="float" office:value="0.00130902777777778" calcext:value-type="float">
            <text:p>0,00130902777777778000</text:p>
          </table:table-cell>
          <table:table-cell table:formula="of:=[.D392]-[.D391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B391]+29" office:value-type="float" office:value="11339" calcext:value-type="float">
            <text:p>11339</text:p>
          </table:table-cell>
          <table:table-cell office:value-type="float" office:value="8640000" calcext:value-type="float">
            <text:p>8640000</text:p>
          </table:table-cell>
          <table:table-cell table:formula="of:=[.B392]/[.C392]" office:value-type="float" office:value="0.00131238425925926" calcext:value-type="float">
            <text:p>0,00131238425925926000</text:p>
          </table:table-cell>
          <table:table-cell table:formula="of:=[.D393]-[.D392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B392]+29" office:value-type="float" office:value="11368" calcext:value-type="float">
            <text:p>11368</text:p>
          </table:table-cell>
          <table:table-cell office:value-type="float" office:value="8640000" calcext:value-type="float">
            <text:p>8640000</text:p>
          </table:table-cell>
          <table:table-cell table:formula="of:=[.B393]/[.C393]" office:value-type="float" office:value="0.00131574074074074" calcext:value-type="float">
            <text:p>0,00131574074074074000</text:p>
          </table:table-cell>
          <table:table-cell table:formula="of:=[.D394]-[.D393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B393]+29" office:value-type="float" office:value="11397" calcext:value-type="float">
            <text:p>11397</text:p>
          </table:table-cell>
          <table:table-cell office:value-type="float" office:value="8640000" calcext:value-type="float">
            <text:p>8640000</text:p>
          </table:table-cell>
          <table:table-cell table:formula="of:=[.B394]/[.C394]" office:value-type="float" office:value="0.00131909722222222" calcext:value-type="float">
            <text:p>0,00131909722222222000</text:p>
          </table:table-cell>
          <table:table-cell table:formula="of:=[.D395]-[.D394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B394]+29" office:value-type="float" office:value="11426" calcext:value-type="float">
            <text:p>11426</text:p>
          </table:table-cell>
          <table:table-cell office:value-type="float" office:value="8640000" calcext:value-type="float">
            <text:p>8640000</text:p>
          </table:table-cell>
          <table:table-cell table:formula="of:=[.B395]/[.C395]" office:value-type="float" office:value="0.0013224537037037" calcext:value-type="float">
            <text:p>0,00132245370370370000</text:p>
          </table:table-cell>
          <table:table-cell table:formula="of:=[.D396]-[.D395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B395]+29" office:value-type="float" office:value="11455" calcext:value-type="float">
            <text:p>11455</text:p>
          </table:table-cell>
          <table:table-cell office:value-type="float" office:value="8640000" calcext:value-type="float">
            <text:p>8640000</text:p>
          </table:table-cell>
          <table:table-cell table:formula="of:=[.B396]/[.C396]" office:value-type="float" office:value="0.00132581018518519" calcext:value-type="float">
            <text:p>0,00132581018518519000</text:p>
          </table:table-cell>
          <table:table-cell table:formula="of:=[.D397]-[.D396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B396]+29" office:value-type="float" office:value="11484" calcext:value-type="float">
            <text:p>11484</text:p>
          </table:table-cell>
          <table:table-cell office:value-type="float" office:value="8640000" calcext:value-type="float">
            <text:p>8640000</text:p>
          </table:table-cell>
          <table:table-cell table:formula="of:=[.B397]/[.C397]" office:value-type="float" office:value="0.00132916666666667" calcext:value-type="float">
            <text:p>0,00132916666666667000</text:p>
          </table:table-cell>
          <table:table-cell table:formula="of:=[.D398]-[.D397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B397]+29" office:value-type="float" office:value="11513" calcext:value-type="float">
            <text:p>11513</text:p>
          </table:table-cell>
          <table:table-cell office:value-type="float" office:value="8640000" calcext:value-type="float">
            <text:p>8640000</text:p>
          </table:table-cell>
          <table:table-cell table:formula="of:=[.B398]/[.C398]" office:value-type="float" office:value="0.00133252314814815" calcext:value-type="float">
            <text:p>0,00133252314814815000</text:p>
          </table:table-cell>
          <table:table-cell table:formula="of:=[.D399]-[.D398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B398]+29" office:value-type="float" office:value="11542" calcext:value-type="float">
            <text:p>11542</text:p>
          </table:table-cell>
          <table:table-cell office:value-type="float" office:value="8640000" calcext:value-type="float">
            <text:p>8640000</text:p>
          </table:table-cell>
          <table:table-cell table:formula="of:=[.B399]/[.C399]" office:value-type="float" office:value="0.00133587962962963" calcext:value-type="float">
            <text:p>0,00133587962962963000</text:p>
          </table:table-cell>
          <table:table-cell table:formula="of:=[.D400]-[.D399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B399]+29" office:value-type="float" office:value="11571" calcext:value-type="float">
            <text:p>11571</text:p>
          </table:table-cell>
          <table:table-cell office:value-type="float" office:value="8640000" calcext:value-type="float">
            <text:p>8640000</text:p>
          </table:table-cell>
          <table:table-cell table:formula="of:=[.B400]/[.C400]" office:value-type="float" office:value="0.00133923611111111" calcext:value-type="float">
            <text:p>0,00133923611111111000</text:p>
          </table:table-cell>
          <table:table-cell table:formula="of:=[.D401]-[.D400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B400]+29" office:value-type="float" office:value="11600" calcext:value-type="float">
            <text:p>11600</text:p>
          </table:table-cell>
          <table:table-cell office:value-type="float" office:value="8640000" calcext:value-type="float">
            <text:p>8640000</text:p>
          </table:table-cell>
          <table:table-cell table:formula="of:=[.B401]/[.C401]" office:value-type="float" office:value="0.00134259259259259" calcext:value-type="float">
            <text:p>0,00134259259259259000</text:p>
          </table:table-cell>
          <table:table-cell table:formula="of:=[.D402]-[.D401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B401]+29" office:value-type="float" office:value="11629" calcext:value-type="float">
            <text:p>11629</text:p>
          </table:table-cell>
          <table:table-cell office:value-type="float" office:value="8640000" calcext:value-type="float">
            <text:p>8640000</text:p>
          </table:table-cell>
          <table:table-cell table:formula="of:=[.B402]/[.C402]" office:value-type="float" office:value="0.00134594907407407" calcext:value-type="float">
            <text:p>0,00134594907407407000</text:p>
          </table:table-cell>
          <table:table-cell table:formula="of:=[.D403]-[.D402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B402]+29" office:value-type="float" office:value="11658" calcext:value-type="float">
            <text:p>11658</text:p>
          </table:table-cell>
          <table:table-cell office:value-type="float" office:value="8640000" calcext:value-type="float">
            <text:p>8640000</text:p>
          </table:table-cell>
          <table:table-cell table:formula="of:=[.B403]/[.C403]" office:value-type="float" office:value="0.00134930555555556" calcext:value-type="float">
            <text:p>0,00134930555555556000</text:p>
          </table:table-cell>
          <table:table-cell table:formula="of:=[.D404]-[.D403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B403]+29" office:value-type="float" office:value="11687" calcext:value-type="float">
            <text:p>11687</text:p>
          </table:table-cell>
          <table:table-cell office:value-type="float" office:value="8640000" calcext:value-type="float">
            <text:p>8640000</text:p>
          </table:table-cell>
          <table:table-cell table:formula="of:=[.B404]/[.C404]" office:value-type="float" office:value="0.00135266203703704" calcext:value-type="float">
            <text:p>0,00135266203703704000</text:p>
          </table:table-cell>
          <table:table-cell table:formula="of:=[.D405]-[.D404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B404]+29" office:value-type="float" office:value="11716" calcext:value-type="float">
            <text:p>11716</text:p>
          </table:table-cell>
          <table:table-cell office:value-type="float" office:value="8640000" calcext:value-type="float">
            <text:p>8640000</text:p>
          </table:table-cell>
          <table:table-cell table:formula="of:=[.B405]/[.C405]" office:value-type="float" office:value="0.00135601851851852" calcext:value-type="float">
            <text:p>0,00135601851851852000</text:p>
          </table:table-cell>
          <table:table-cell table:formula="of:=[.D406]-[.D405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B405]+29" office:value-type="float" office:value="11745" calcext:value-type="float">
            <text:p>11745</text:p>
          </table:table-cell>
          <table:table-cell office:value-type="float" office:value="8640000" calcext:value-type="float">
            <text:p>8640000</text:p>
          </table:table-cell>
          <table:table-cell table:formula="of:=[.B406]/[.C406]" office:value-type="float" office:value="0.001359375" calcext:value-type="float">
            <text:p>0,00135937500000000000</text:p>
          </table:table-cell>
          <table:table-cell table:formula="of:=[.D407]-[.D406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B406]+29" office:value-type="float" office:value="11774" calcext:value-type="float">
            <text:p>11774</text:p>
          </table:table-cell>
          <table:table-cell office:value-type="float" office:value="8640000" calcext:value-type="float">
            <text:p>8640000</text:p>
          </table:table-cell>
          <table:table-cell table:formula="of:=[.B407]/[.C407]" office:value-type="float" office:value="0.00136273148148148" calcext:value-type="float">
            <text:p>0,00136273148148148000</text:p>
          </table:table-cell>
          <table:table-cell table:formula="of:=[.D408]-[.D407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B407]+29" office:value-type="float" office:value="11803" calcext:value-type="float">
            <text:p>11803</text:p>
          </table:table-cell>
          <table:table-cell office:value-type="float" office:value="8640000" calcext:value-type="float">
            <text:p>8640000</text:p>
          </table:table-cell>
          <table:table-cell table:formula="of:=[.B408]/[.C408]" office:value-type="float" office:value="0.00136608796296296" calcext:value-type="float">
            <text:p>0,00136608796296296000</text:p>
          </table:table-cell>
          <table:table-cell table:formula="of:=[.D409]-[.D408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B408]+29" office:value-type="float" office:value="11832" calcext:value-type="float">
            <text:p>11832</text:p>
          </table:table-cell>
          <table:table-cell office:value-type="float" office:value="8640000" calcext:value-type="float">
            <text:p>8640000</text:p>
          </table:table-cell>
          <table:table-cell table:formula="of:=[.B409]/[.C409]" office:value-type="float" office:value="0.00136944444444444" calcext:value-type="float">
            <text:p>0,00136944444444444000</text:p>
          </table:table-cell>
          <table:table-cell table:formula="of:=[.D410]-[.D409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B409]+29" office:value-type="float" office:value="11861" calcext:value-type="float">
            <text:p>11861</text:p>
          </table:table-cell>
          <table:table-cell office:value-type="float" office:value="8640000" calcext:value-type="float">
            <text:p>8640000</text:p>
          </table:table-cell>
          <table:table-cell table:formula="of:=[.B410]/[.C410]" office:value-type="float" office:value="0.00137280092592593" calcext:value-type="float">
            <text:p>0,00137280092592593000</text:p>
          </table:table-cell>
          <table:table-cell table:formula="of:=[.D411]-[.D410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B410]+29" office:value-type="float" office:value="11890" calcext:value-type="float">
            <text:p>11890</text:p>
          </table:table-cell>
          <table:table-cell office:value-type="float" office:value="8640000" calcext:value-type="float">
            <text:p>8640000</text:p>
          </table:table-cell>
          <table:table-cell table:formula="of:=[.B411]/[.C411]" office:value-type="float" office:value="0.00137615740740741" calcext:value-type="float">
            <text:p>0,00137615740740741000</text:p>
          </table:table-cell>
          <table:table-cell table:formula="of:=[.D412]-[.D411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B411]+29" office:value-type="float" office:value="11919" calcext:value-type="float">
            <text:p>11919</text:p>
          </table:table-cell>
          <table:table-cell office:value-type="float" office:value="8640000" calcext:value-type="float">
            <text:p>8640000</text:p>
          </table:table-cell>
          <table:table-cell table:formula="of:=[.B412]/[.C412]" office:value-type="float" office:value="0.00137951388888889" calcext:value-type="float">
            <text:p>0,00137951388888889000</text:p>
          </table:table-cell>
          <table:table-cell table:formula="of:=[.D413]-[.D412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B412]+29" office:value-type="float" office:value="11948" calcext:value-type="float">
            <text:p>11948</text:p>
          </table:table-cell>
          <table:table-cell office:value-type="float" office:value="8640000" calcext:value-type="float">
            <text:p>8640000</text:p>
          </table:table-cell>
          <table:table-cell table:formula="of:=[.B413]/[.C413]" office:value-type="float" office:value="0.00138287037037037" calcext:value-type="float">
            <text:p>0,00138287037037037000</text:p>
          </table:table-cell>
          <table:table-cell table:formula="of:=[.D414]-[.D413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B413]+29" office:value-type="float" office:value="11977" calcext:value-type="float">
            <text:p>11977</text:p>
          </table:table-cell>
          <table:table-cell office:value-type="float" office:value="8640000" calcext:value-type="float">
            <text:p>8640000</text:p>
          </table:table-cell>
          <table:table-cell table:formula="of:=[.B414]/[.C414]" office:value-type="float" office:value="0.00138622685185185" calcext:value-type="float">
            <text:p>0,00138622685185185000</text:p>
          </table:table-cell>
          <table:table-cell table:formula="of:=[.D415]-[.D414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B414]+29" office:value-type="float" office:value="12006" calcext:value-type="float">
            <text:p>12006</text:p>
          </table:table-cell>
          <table:table-cell office:value-type="float" office:value="8640000" calcext:value-type="float">
            <text:p>8640000</text:p>
          </table:table-cell>
          <table:table-cell table:formula="of:=[.B415]/[.C415]" office:value-type="float" office:value="0.00138958333333333" calcext:value-type="float">
            <text:p>0,00138958333333333000</text:p>
          </table:table-cell>
          <table:table-cell table:formula="of:=[.D416]-[.D415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B415]+29" office:value-type="float" office:value="12035" calcext:value-type="float">
            <text:p>12035</text:p>
          </table:table-cell>
          <table:table-cell office:value-type="float" office:value="8640000" calcext:value-type="float">
            <text:p>8640000</text:p>
          </table:table-cell>
          <table:table-cell table:formula="of:=[.B416]/[.C416]" office:value-type="float" office:value="0.00139293981481481" calcext:value-type="float">
            <text:p>0,00139293981481481000</text:p>
          </table:table-cell>
          <table:table-cell table:formula="of:=[.D417]-[.D416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B416]+29" office:value-type="float" office:value="12064" calcext:value-type="float">
            <text:p>12064</text:p>
          </table:table-cell>
          <table:table-cell office:value-type="float" office:value="8640000" calcext:value-type="float">
            <text:p>8640000</text:p>
          </table:table-cell>
          <table:table-cell table:formula="of:=[.B417]/[.C417]" office:value-type="float" office:value="0.0013962962962963" calcext:value-type="float">
            <text:p>0,00139629629629630000</text:p>
          </table:table-cell>
          <table:table-cell table:formula="of:=[.D418]-[.D417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B417]+29" office:value-type="float" office:value="12093" calcext:value-type="float">
            <text:p>12093</text:p>
          </table:table-cell>
          <table:table-cell office:value-type="float" office:value="8640000" calcext:value-type="float">
            <text:p>8640000</text:p>
          </table:table-cell>
          <table:table-cell table:formula="of:=[.B418]/[.C418]" office:value-type="float" office:value="0.00139965277777778" calcext:value-type="float">
            <text:p>0,00139965277777778000</text:p>
          </table:table-cell>
          <table:table-cell table:formula="of:=[.D419]-[.D418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B418]+29" office:value-type="float" office:value="12122" calcext:value-type="float">
            <text:p>12122</text:p>
          </table:table-cell>
          <table:table-cell office:value-type="float" office:value="8640000" calcext:value-type="float">
            <text:p>8640000</text:p>
          </table:table-cell>
          <table:table-cell table:formula="of:=[.B419]/[.C419]" office:value-type="float" office:value="0.00140300925925926" calcext:value-type="float">
            <text:p>0,00140300925925926000</text:p>
          </table:table-cell>
          <table:table-cell table:formula="of:=[.D420]-[.D419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B419]+29" office:value-type="float" office:value="12151" calcext:value-type="float">
            <text:p>12151</text:p>
          </table:table-cell>
          <table:table-cell office:value-type="float" office:value="8640000" calcext:value-type="float">
            <text:p>8640000</text:p>
          </table:table-cell>
          <table:table-cell table:formula="of:=[.B420]/[.C420]" office:value-type="float" office:value="0.00140636574074074" calcext:value-type="float">
            <text:p>0,00140636574074074000</text:p>
          </table:table-cell>
          <table:table-cell table:formula="of:=[.D421]-[.D420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B420]+29" office:value-type="float" office:value="12180" calcext:value-type="float">
            <text:p>12180</text:p>
          </table:table-cell>
          <table:table-cell office:value-type="float" office:value="8640000" calcext:value-type="float">
            <text:p>8640000</text:p>
          </table:table-cell>
          <table:table-cell table:formula="of:=[.B421]/[.C421]" office:value-type="float" office:value="0.00140972222222222" calcext:value-type="float">
            <text:p>0,00140972222222222000</text:p>
          </table:table-cell>
          <table:table-cell table:formula="of:=[.D422]-[.D421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B421]+29" office:value-type="float" office:value="12209" calcext:value-type="float">
            <text:p>12209</text:p>
          </table:table-cell>
          <table:table-cell office:value-type="float" office:value="8640000" calcext:value-type="float">
            <text:p>8640000</text:p>
          </table:table-cell>
          <table:table-cell table:formula="of:=[.B422]/[.C422]" office:value-type="float" office:value="0.0014130787037037" calcext:value-type="float">
            <text:p>0,00141307870370370000</text:p>
          </table:table-cell>
          <table:table-cell table:formula="of:=[.D423]-[.D422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B422]+29" office:value-type="float" office:value="12238" calcext:value-type="float">
            <text:p>12238</text:p>
          </table:table-cell>
          <table:table-cell office:value-type="float" office:value="8640000" calcext:value-type="float">
            <text:p>8640000</text:p>
          </table:table-cell>
          <table:table-cell table:formula="of:=[.B423]/[.C423]" office:value-type="float" office:value="0.00141643518518519" calcext:value-type="float">
            <text:p>0,00141643518518519000</text:p>
          </table:table-cell>
          <table:table-cell table:formula="of:=[.D424]-[.D423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B423]+29" office:value-type="float" office:value="12267" calcext:value-type="float">
            <text:p>12267</text:p>
          </table:table-cell>
          <table:table-cell office:value-type="float" office:value="8640000" calcext:value-type="float">
            <text:p>8640000</text:p>
          </table:table-cell>
          <table:table-cell table:formula="of:=[.B424]/[.C424]" office:value-type="float" office:value="0.00141979166666667" calcext:value-type="float">
            <text:p>0,00141979166666667000</text:p>
          </table:table-cell>
          <table:table-cell table:formula="of:=[.D425]-[.D424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B424]+29" office:value-type="float" office:value="12296" calcext:value-type="float">
            <text:p>12296</text:p>
          </table:table-cell>
          <table:table-cell office:value-type="float" office:value="8640000" calcext:value-type="float">
            <text:p>8640000</text:p>
          </table:table-cell>
          <table:table-cell table:formula="of:=[.B425]/[.C425]" office:value-type="float" office:value="0.00142314814814815" calcext:value-type="float">
            <text:p>0,00142314814814815000</text:p>
          </table:table-cell>
          <table:table-cell table:formula="of:=[.D426]-[.D425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B425]+29" office:value-type="float" office:value="12325" calcext:value-type="float">
            <text:p>12325</text:p>
          </table:table-cell>
          <table:table-cell office:value-type="float" office:value="8640000" calcext:value-type="float">
            <text:p>8640000</text:p>
          </table:table-cell>
          <table:table-cell table:formula="of:=[.B426]/[.C426]" office:value-type="float" office:value="0.00142650462962963" calcext:value-type="float">
            <text:p>0,00142650462962963000</text:p>
          </table:table-cell>
          <table:table-cell table:formula="of:=[.D427]-[.D426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B426]+29" office:value-type="float" office:value="12354" calcext:value-type="float">
            <text:p>12354</text:p>
          </table:table-cell>
          <table:table-cell office:value-type="float" office:value="8640000" calcext:value-type="float">
            <text:p>8640000</text:p>
          </table:table-cell>
          <table:table-cell table:formula="of:=[.B427]/[.C427]" office:value-type="float" office:value="0.00142986111111111" calcext:value-type="float">
            <text:p>0,00142986111111111000</text:p>
          </table:table-cell>
          <table:table-cell table:formula="of:=[.D428]-[.D427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B427]+29" office:value-type="float" office:value="12383" calcext:value-type="float">
            <text:p>12383</text:p>
          </table:table-cell>
          <table:table-cell office:value-type="float" office:value="8640000" calcext:value-type="float">
            <text:p>8640000</text:p>
          </table:table-cell>
          <table:table-cell table:formula="of:=[.B428]/[.C428]" office:value-type="float" office:value="0.00143321759259259" calcext:value-type="float">
            <text:p>0,00143321759259259000</text:p>
          </table:table-cell>
          <table:table-cell table:formula="of:=[.D429]-[.D428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B428]+29" office:value-type="float" office:value="12412" calcext:value-type="float">
            <text:p>12412</text:p>
          </table:table-cell>
          <table:table-cell office:value-type="float" office:value="8640000" calcext:value-type="float">
            <text:p>8640000</text:p>
          </table:table-cell>
          <table:table-cell table:formula="of:=[.B429]/[.C429]" office:value-type="float" office:value="0.00143657407407407" calcext:value-type="float">
            <text:p>0,00143657407407407000</text:p>
          </table:table-cell>
          <table:table-cell table:formula="of:=[.D430]-[.D429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B429]+29" office:value-type="float" office:value="12441" calcext:value-type="float">
            <text:p>12441</text:p>
          </table:table-cell>
          <table:table-cell office:value-type="float" office:value="8640000" calcext:value-type="float">
            <text:p>8640000</text:p>
          </table:table-cell>
          <table:table-cell table:formula="of:=[.B430]/[.C430]" office:value-type="float" office:value="0.00143993055555556" calcext:value-type="float">
            <text:p>0,00143993055555556000</text:p>
          </table:table-cell>
          <table:table-cell table:formula="of:=[.D431]-[.D430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B430]+29" office:value-type="float" office:value="12470" calcext:value-type="float">
            <text:p>12470</text:p>
          </table:table-cell>
          <table:table-cell office:value-type="float" office:value="8640000" calcext:value-type="float">
            <text:p>8640000</text:p>
          </table:table-cell>
          <table:table-cell table:formula="of:=[.B431]/[.C431]" office:value-type="float" office:value="0.00144328703703704" calcext:value-type="float">
            <text:p>0,00144328703703704000</text:p>
          </table:table-cell>
          <table:table-cell table:formula="of:=[.D432]-[.D431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B431]+29" office:value-type="float" office:value="12499" calcext:value-type="float">
            <text:p>12499</text:p>
          </table:table-cell>
          <table:table-cell office:value-type="float" office:value="8640000" calcext:value-type="float">
            <text:p>8640000</text:p>
          </table:table-cell>
          <table:table-cell table:formula="of:=[.B432]/[.C432]" office:value-type="float" office:value="0.00144664351851852" calcext:value-type="float">
            <text:p>0,00144664351851852000</text:p>
          </table:table-cell>
          <table:table-cell table:formula="of:=[.D433]-[.D432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B432]+29" office:value-type="float" office:value="12528" calcext:value-type="float">
            <text:p>12528</text:p>
          </table:table-cell>
          <table:table-cell office:value-type="float" office:value="8640000" calcext:value-type="float">
            <text:p>8640000</text:p>
          </table:table-cell>
          <table:table-cell table:formula="of:=[.B433]/[.C433]" office:value-type="float" office:value="0.00145" calcext:value-type="float">
            <text:p>0,00145000000000000000</text:p>
          </table:table-cell>
          <table:table-cell table:formula="of:=[.D434]-[.D433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B433]+29" office:value-type="float" office:value="12557" calcext:value-type="float">
            <text:p>12557</text:p>
          </table:table-cell>
          <table:table-cell office:value-type="float" office:value="8640000" calcext:value-type="float">
            <text:p>8640000</text:p>
          </table:table-cell>
          <table:table-cell table:formula="of:=[.B434]/[.C434]" office:value-type="float" office:value="0.00145335648148148" calcext:value-type="float">
            <text:p>0,00145335648148148000</text:p>
          </table:table-cell>
          <table:table-cell table:formula="of:=[.D435]-[.D434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B434]+29" office:value-type="float" office:value="12586" calcext:value-type="float">
            <text:p>12586</text:p>
          </table:table-cell>
          <table:table-cell office:value-type="float" office:value="8640000" calcext:value-type="float">
            <text:p>8640000</text:p>
          </table:table-cell>
          <table:table-cell table:formula="of:=[.B435]/[.C435]" office:value-type="float" office:value="0.00145671296296296" calcext:value-type="float">
            <text:p>0,00145671296296296000</text:p>
          </table:table-cell>
          <table:table-cell table:formula="of:=[.D436]-[.D435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B435]+29" office:value-type="float" office:value="12615" calcext:value-type="float">
            <text:p>12615</text:p>
          </table:table-cell>
          <table:table-cell office:value-type="float" office:value="8640000" calcext:value-type="float">
            <text:p>8640000</text:p>
          </table:table-cell>
          <table:table-cell table:formula="of:=[.B436]/[.C436]" office:value-type="float" office:value="0.00146006944444444" calcext:value-type="float">
            <text:p>0,00146006944444444000</text:p>
          </table:table-cell>
          <table:table-cell table:formula="of:=[.D437]-[.D436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B436]+29" office:value-type="float" office:value="12644" calcext:value-type="float">
            <text:p>12644</text:p>
          </table:table-cell>
          <table:table-cell office:value-type="float" office:value="8640000" calcext:value-type="float">
            <text:p>8640000</text:p>
          </table:table-cell>
          <table:table-cell table:formula="of:=[.B437]/[.C437]" office:value-type="float" office:value="0.00146342592592593" calcext:value-type="float">
            <text:p>0,00146342592592593000</text:p>
          </table:table-cell>
          <table:table-cell table:formula="of:=[.D438]-[.D437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B437]+29" office:value-type="float" office:value="12673" calcext:value-type="float">
            <text:p>12673</text:p>
          </table:table-cell>
          <table:table-cell office:value-type="float" office:value="8640000" calcext:value-type="float">
            <text:p>8640000</text:p>
          </table:table-cell>
          <table:table-cell table:formula="of:=[.B438]/[.C438]" office:value-type="float" office:value="0.00146678240740741" calcext:value-type="float">
            <text:p>0,00146678240740741000</text:p>
          </table:table-cell>
          <table:table-cell table:formula="of:=[.D439]-[.D438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B438]+29" office:value-type="float" office:value="12702" calcext:value-type="float">
            <text:p>12702</text:p>
          </table:table-cell>
          <table:table-cell office:value-type="float" office:value="8640000" calcext:value-type="float">
            <text:p>8640000</text:p>
          </table:table-cell>
          <table:table-cell table:formula="of:=[.B439]/[.C439]" office:value-type="float" office:value="0.00147013888888889" calcext:value-type="float">
            <text:p>0,00147013888888889000</text:p>
          </table:table-cell>
          <table:table-cell table:formula="of:=[.D440]-[.D439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B439]+29" office:value-type="float" office:value="12731" calcext:value-type="float">
            <text:p>12731</text:p>
          </table:table-cell>
          <table:table-cell office:value-type="float" office:value="8640000" calcext:value-type="float">
            <text:p>8640000</text:p>
          </table:table-cell>
          <table:table-cell table:formula="of:=[.B440]/[.C440]" office:value-type="float" office:value="0.00147349537037037" calcext:value-type="float">
            <text:p>0,00147349537037037000</text:p>
          </table:table-cell>
          <table:table-cell table:formula="of:=[.D441]-[.D440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B440]+29" office:value-type="float" office:value="12760" calcext:value-type="float">
            <text:p>12760</text:p>
          </table:table-cell>
          <table:table-cell office:value-type="float" office:value="8640000" calcext:value-type="float">
            <text:p>8640000</text:p>
          </table:table-cell>
          <table:table-cell table:formula="of:=[.B441]/[.C441]" office:value-type="float" office:value="0.00147685185185185" calcext:value-type="float">
            <text:p>0,00147685185185185000</text:p>
          </table:table-cell>
          <table:table-cell table:formula="of:=[.D442]-[.D441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B441]+29" office:value-type="float" office:value="12789" calcext:value-type="float">
            <text:p>12789</text:p>
          </table:table-cell>
          <table:table-cell office:value-type="float" office:value="8640000" calcext:value-type="float">
            <text:p>8640000</text:p>
          </table:table-cell>
          <table:table-cell table:formula="of:=[.B442]/[.C442]" office:value-type="float" office:value="0.00148020833333333" calcext:value-type="float">
            <text:p>0,00148020833333333000</text:p>
          </table:table-cell>
          <table:table-cell table:formula="of:=[.D443]-[.D442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B442]+29" office:value-type="float" office:value="12818" calcext:value-type="float">
            <text:p>12818</text:p>
          </table:table-cell>
          <table:table-cell office:value-type="float" office:value="8640000" calcext:value-type="float">
            <text:p>8640000</text:p>
          </table:table-cell>
          <table:table-cell table:formula="of:=[.B443]/[.C443]" office:value-type="float" office:value="0.00148356481481481" calcext:value-type="float">
            <text:p>0,00148356481481481000</text:p>
          </table:table-cell>
          <table:table-cell table:formula="of:=[.D444]-[.D443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B443]+29" office:value-type="float" office:value="12847" calcext:value-type="float">
            <text:p>12847</text:p>
          </table:table-cell>
          <table:table-cell office:value-type="float" office:value="8640000" calcext:value-type="float">
            <text:p>8640000</text:p>
          </table:table-cell>
          <table:table-cell table:formula="of:=[.B444]/[.C444]" office:value-type="float" office:value="0.0014869212962963" calcext:value-type="float">
            <text:p>0,00148692129629630000</text:p>
          </table:table-cell>
          <table:table-cell table:formula="of:=[.D445]-[.D444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B444]+29" office:value-type="float" office:value="12876" calcext:value-type="float">
            <text:p>12876</text:p>
          </table:table-cell>
          <table:table-cell office:value-type="float" office:value="8640000" calcext:value-type="float">
            <text:p>8640000</text:p>
          </table:table-cell>
          <table:table-cell table:formula="of:=[.B445]/[.C445]" office:value-type="float" office:value="0.00149027777777778" calcext:value-type="float">
            <text:p>0,00149027777777778000</text:p>
          </table:table-cell>
          <table:table-cell table:formula="of:=[.D446]-[.D445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B445]+29" office:value-type="float" office:value="12905" calcext:value-type="float">
            <text:p>12905</text:p>
          </table:table-cell>
          <table:table-cell office:value-type="float" office:value="8640000" calcext:value-type="float">
            <text:p>8640000</text:p>
          </table:table-cell>
          <table:table-cell table:formula="of:=[.B446]/[.C446]" office:value-type="float" office:value="0.00149363425925926" calcext:value-type="float">
            <text:p>0,00149363425925926000</text:p>
          </table:table-cell>
          <table:table-cell table:formula="of:=[.D447]-[.D446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B446]+29" office:value-type="float" office:value="12934" calcext:value-type="float">
            <text:p>12934</text:p>
          </table:table-cell>
          <table:table-cell office:value-type="float" office:value="8640000" calcext:value-type="float">
            <text:p>8640000</text:p>
          </table:table-cell>
          <table:table-cell table:formula="of:=[.B447]/[.C447]" office:value-type="float" office:value="0.00149699074074074" calcext:value-type="float">
            <text:p>0,00149699074074074000</text:p>
          </table:table-cell>
          <table:table-cell table:formula="of:=[.D448]-[.D447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B447]+29" office:value-type="float" office:value="12963" calcext:value-type="float">
            <text:p>12963</text:p>
          </table:table-cell>
          <table:table-cell office:value-type="float" office:value="8640000" calcext:value-type="float">
            <text:p>8640000</text:p>
          </table:table-cell>
          <table:table-cell table:formula="of:=[.B448]/[.C448]" office:value-type="float" office:value="0.00150034722222222" calcext:value-type="float">
            <text:p>0,00150034722222222000</text:p>
          </table:table-cell>
          <table:table-cell table:formula="of:=[.D449]-[.D448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B448]+29" office:value-type="float" office:value="12992" calcext:value-type="float">
            <text:p>12992</text:p>
          </table:table-cell>
          <table:table-cell office:value-type="float" office:value="8640000" calcext:value-type="float">
            <text:p>8640000</text:p>
          </table:table-cell>
          <table:table-cell table:formula="of:=[.B449]/[.C449]" office:value-type="float" office:value="0.0015037037037037" calcext:value-type="float">
            <text:p>0,00150370370370370000</text:p>
          </table:table-cell>
          <table:table-cell table:formula="of:=[.D450]-[.D449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B449]+29" office:value-type="float" office:value="13021" calcext:value-type="float">
            <text:p>13021</text:p>
          </table:table-cell>
          <table:table-cell office:value-type="float" office:value="8640000" calcext:value-type="float">
            <text:p>8640000</text:p>
          </table:table-cell>
          <table:table-cell table:formula="of:=[.B450]/[.C450]" office:value-type="float" office:value="0.00150706018518519" calcext:value-type="float">
            <text:p>0,00150706018518519000</text:p>
          </table:table-cell>
          <table:table-cell table:formula="of:=[.D451]-[.D450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B450]+29" office:value-type="float" office:value="13050" calcext:value-type="float">
            <text:p>13050</text:p>
          </table:table-cell>
          <table:table-cell office:value-type="float" office:value="8640000" calcext:value-type="float">
            <text:p>8640000</text:p>
          </table:table-cell>
          <table:table-cell table:formula="of:=[.B451]/[.C451]" office:value-type="float" office:value="0.00151041666666667" calcext:value-type="float">
            <text:p>0,00151041666666667000</text:p>
          </table:table-cell>
          <table:table-cell table:formula="of:=[.D452]-[.D451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B451]+29" office:value-type="float" office:value="13079" calcext:value-type="float">
            <text:p>13079</text:p>
          </table:table-cell>
          <table:table-cell office:value-type="float" office:value="8640000" calcext:value-type="float">
            <text:p>8640000</text:p>
          </table:table-cell>
          <table:table-cell table:formula="of:=[.B452]/[.C452]" office:value-type="float" office:value="0.00151377314814815" calcext:value-type="float">
            <text:p>0,00151377314814815000</text:p>
          </table:table-cell>
          <table:table-cell table:formula="of:=[.D453]-[.D452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B452]+29" office:value-type="float" office:value="13108" calcext:value-type="float">
            <text:p>13108</text:p>
          </table:table-cell>
          <table:table-cell office:value-type="float" office:value="8640000" calcext:value-type="float">
            <text:p>8640000</text:p>
          </table:table-cell>
          <table:table-cell table:formula="of:=[.B453]/[.C453]" office:value-type="float" office:value="0.00151712962962963" calcext:value-type="float">
            <text:p>0,00151712962962963000</text:p>
          </table:table-cell>
          <table:table-cell table:formula="of:=[.D454]-[.D453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B453]+29" office:value-type="float" office:value="13137" calcext:value-type="float">
            <text:p>13137</text:p>
          </table:table-cell>
          <table:table-cell office:value-type="float" office:value="8640000" calcext:value-type="float">
            <text:p>8640000</text:p>
          </table:table-cell>
          <table:table-cell table:formula="of:=[.B454]/[.C454]" office:value-type="float" office:value="0.00152048611111111" calcext:value-type="float">
            <text:p>0,00152048611111111000</text:p>
          </table:table-cell>
          <table:table-cell table:formula="of:=[.D455]-[.D454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B454]+29" office:value-type="float" office:value="13166" calcext:value-type="float">
            <text:p>13166</text:p>
          </table:table-cell>
          <table:table-cell office:value-type="float" office:value="8640000" calcext:value-type="float">
            <text:p>8640000</text:p>
          </table:table-cell>
          <table:table-cell table:formula="of:=[.B455]/[.C455]" office:value-type="float" office:value="0.00152384259259259" calcext:value-type="float">
            <text:p>0,00152384259259259000</text:p>
          </table:table-cell>
          <table:table-cell table:formula="of:=[.D456]-[.D455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B455]+29" office:value-type="float" office:value="13195" calcext:value-type="float">
            <text:p>13195</text:p>
          </table:table-cell>
          <table:table-cell office:value-type="float" office:value="8640000" calcext:value-type="float">
            <text:p>8640000</text:p>
          </table:table-cell>
          <table:table-cell table:formula="of:=[.B456]/[.C456]" office:value-type="float" office:value="0.00152719907407407" calcext:value-type="float">
            <text:p>0,00152719907407407000</text:p>
          </table:table-cell>
          <table:table-cell table:formula="of:=[.D457]-[.D456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B456]+29" office:value-type="float" office:value="13224" calcext:value-type="float">
            <text:p>13224</text:p>
          </table:table-cell>
          <table:table-cell office:value-type="float" office:value="8640000" calcext:value-type="float">
            <text:p>8640000</text:p>
          </table:table-cell>
          <table:table-cell table:formula="of:=[.B457]/[.C457]" office:value-type="float" office:value="0.00153055555555556" calcext:value-type="float">
            <text:p>0,00153055555555556000</text:p>
          </table:table-cell>
          <table:table-cell table:formula="of:=[.D458]-[.D457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B457]+29" office:value-type="float" office:value="13253" calcext:value-type="float">
            <text:p>13253</text:p>
          </table:table-cell>
          <table:table-cell office:value-type="float" office:value="8640000" calcext:value-type="float">
            <text:p>8640000</text:p>
          </table:table-cell>
          <table:table-cell table:formula="of:=[.B458]/[.C458]" office:value-type="float" office:value="0.00153391203703704" calcext:value-type="float">
            <text:p>0,00153391203703704000</text:p>
          </table:table-cell>
          <table:table-cell table:formula="of:=[.D459]-[.D458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B458]+29" office:value-type="float" office:value="13282" calcext:value-type="float">
            <text:p>13282</text:p>
          </table:table-cell>
          <table:table-cell office:value-type="float" office:value="8640000" calcext:value-type="float">
            <text:p>8640000</text:p>
          </table:table-cell>
          <table:table-cell table:formula="of:=[.B459]/[.C459]" office:value-type="float" office:value="0.00153726851851852" calcext:value-type="float">
            <text:p>0,00153726851851852000</text:p>
          </table:table-cell>
          <table:table-cell table:formula="of:=[.D460]-[.D459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B459]+29" office:value-type="float" office:value="13311" calcext:value-type="float">
            <text:p>13311</text:p>
          </table:table-cell>
          <table:table-cell office:value-type="float" office:value="8640000" calcext:value-type="float">
            <text:p>8640000</text:p>
          </table:table-cell>
          <table:table-cell table:formula="of:=[.B460]/[.C460]" office:value-type="float" office:value="0.001540625" calcext:value-type="float">
            <text:p>0,00154062500000000000</text:p>
          </table:table-cell>
          <table:table-cell table:formula="of:=[.D461]-[.D460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B460]+29" office:value-type="float" office:value="13340" calcext:value-type="float">
            <text:p>13340</text:p>
          </table:table-cell>
          <table:table-cell office:value-type="float" office:value="8640000" calcext:value-type="float">
            <text:p>8640000</text:p>
          </table:table-cell>
          <table:table-cell table:formula="of:=[.B461]/[.C461]" office:value-type="float" office:value="0.00154398148148148" calcext:value-type="float">
            <text:p>0,00154398148148148000</text:p>
          </table:table-cell>
          <table:table-cell table:formula="of:=[.D462]-[.D461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B461]+29" office:value-type="float" office:value="13369" calcext:value-type="float">
            <text:p>13369</text:p>
          </table:table-cell>
          <table:table-cell office:value-type="float" office:value="8640000" calcext:value-type="float">
            <text:p>8640000</text:p>
          </table:table-cell>
          <table:table-cell table:formula="of:=[.B462]/[.C462]" office:value-type="float" office:value="0.00154733796296296" calcext:value-type="float">
            <text:p>0,00154733796296296000</text:p>
          </table:table-cell>
          <table:table-cell table:formula="of:=[.D463]-[.D462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B462]+29" office:value-type="float" office:value="13398" calcext:value-type="float">
            <text:p>13398</text:p>
          </table:table-cell>
          <table:table-cell office:value-type="float" office:value="8640000" calcext:value-type="float">
            <text:p>8640000</text:p>
          </table:table-cell>
          <table:table-cell table:formula="of:=[.B463]/[.C463]" office:value-type="float" office:value="0.00155069444444444" calcext:value-type="float">
            <text:p>0,00155069444444444000</text:p>
          </table:table-cell>
          <table:table-cell table:formula="of:=[.D464]-[.D463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B463]+29" office:value-type="float" office:value="13427" calcext:value-type="float">
            <text:p>13427</text:p>
          </table:table-cell>
          <table:table-cell office:value-type="float" office:value="8640000" calcext:value-type="float">
            <text:p>8640000</text:p>
          </table:table-cell>
          <table:table-cell table:formula="of:=[.B464]/[.C464]" office:value-type="float" office:value="0.00155405092592593" calcext:value-type="float">
            <text:p>0,00155405092592593000</text:p>
          </table:table-cell>
          <table:table-cell table:formula="of:=[.D465]-[.D464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B464]+29" office:value-type="float" office:value="13456" calcext:value-type="float">
            <text:p>13456</text:p>
          </table:table-cell>
          <table:table-cell office:value-type="float" office:value="8640000" calcext:value-type="float">
            <text:p>8640000</text:p>
          </table:table-cell>
          <table:table-cell table:formula="of:=[.B465]/[.C465]" office:value-type="float" office:value="0.00155740740740741" calcext:value-type="float">
            <text:p>0,00155740740740741000</text:p>
          </table:table-cell>
          <table:table-cell table:formula="of:=[.D466]-[.D465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B465]+29" office:value-type="float" office:value="13485" calcext:value-type="float">
            <text:p>13485</text:p>
          </table:table-cell>
          <table:table-cell office:value-type="float" office:value="8640000" calcext:value-type="float">
            <text:p>8640000</text:p>
          </table:table-cell>
          <table:table-cell table:formula="of:=[.B466]/[.C466]" office:value-type="float" office:value="0.00156076388888889" calcext:value-type="float">
            <text:p>0,00156076388888889000</text:p>
          </table:table-cell>
          <table:table-cell table:formula="of:=[.D467]-[.D466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B466]+29" office:value-type="float" office:value="13514" calcext:value-type="float">
            <text:p>13514</text:p>
          </table:table-cell>
          <table:table-cell office:value-type="float" office:value="8640000" calcext:value-type="float">
            <text:p>8640000</text:p>
          </table:table-cell>
          <table:table-cell table:formula="of:=[.B467]/[.C467]" office:value-type="float" office:value="0.00156412037037037" calcext:value-type="float">
            <text:p>0,00156412037037037000</text:p>
          </table:table-cell>
          <table:table-cell table:formula="of:=[.D468]-[.D467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B467]+29" office:value-type="float" office:value="13543" calcext:value-type="float">
            <text:p>13543</text:p>
          </table:table-cell>
          <table:table-cell office:value-type="float" office:value="8640000" calcext:value-type="float">
            <text:p>8640000</text:p>
          </table:table-cell>
          <table:table-cell table:formula="of:=[.B468]/[.C468]" office:value-type="float" office:value="0.00156747685185185" calcext:value-type="float">
            <text:p>0,00156747685185185000</text:p>
          </table:table-cell>
          <table:table-cell table:formula="of:=[.D469]-[.D468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B468]+29" office:value-type="float" office:value="13572" calcext:value-type="float">
            <text:p>13572</text:p>
          </table:table-cell>
          <table:table-cell office:value-type="float" office:value="8640000" calcext:value-type="float">
            <text:p>8640000</text:p>
          </table:table-cell>
          <table:table-cell table:formula="of:=[.B469]/[.C469]" office:value-type="float" office:value="0.00157083333333333" calcext:value-type="float">
            <text:p>0,00157083333333333000</text:p>
          </table:table-cell>
          <table:table-cell table:formula="of:=[.D470]-[.D469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B469]+29" office:value-type="float" office:value="13601" calcext:value-type="float">
            <text:p>13601</text:p>
          </table:table-cell>
          <table:table-cell office:value-type="float" office:value="8640000" calcext:value-type="float">
            <text:p>8640000</text:p>
          </table:table-cell>
          <table:table-cell table:formula="of:=[.B470]/[.C470]" office:value-type="float" office:value="0.00157418981481481" calcext:value-type="float">
            <text:p>0,00157418981481481000</text:p>
          </table:table-cell>
          <table:table-cell table:formula="of:=[.D471]-[.D470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B470]+29" office:value-type="float" office:value="13630" calcext:value-type="float">
            <text:p>13630</text:p>
          </table:table-cell>
          <table:table-cell office:value-type="float" office:value="8640000" calcext:value-type="float">
            <text:p>8640000</text:p>
          </table:table-cell>
          <table:table-cell table:formula="of:=[.B471]/[.C471]" office:value-type="float" office:value="0.0015775462962963" calcext:value-type="float">
            <text:p>0,00157754629629630000</text:p>
          </table:table-cell>
          <table:table-cell table:formula="of:=[.D472]-[.D471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B471]+29" office:value-type="float" office:value="13659" calcext:value-type="float">
            <text:p>13659</text:p>
          </table:table-cell>
          <table:table-cell office:value-type="float" office:value="8640000" calcext:value-type="float">
            <text:p>8640000</text:p>
          </table:table-cell>
          <table:table-cell table:formula="of:=[.B472]/[.C472]" office:value-type="float" office:value="0.00158090277777778" calcext:value-type="float">
            <text:p>0,00158090277777778000</text:p>
          </table:table-cell>
          <table:table-cell table:formula="of:=[.D473]-[.D472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B472]+29" office:value-type="float" office:value="13688" calcext:value-type="float">
            <text:p>13688</text:p>
          </table:table-cell>
          <table:table-cell office:value-type="float" office:value="8640000" calcext:value-type="float">
            <text:p>8640000</text:p>
          </table:table-cell>
          <table:table-cell table:formula="of:=[.B473]/[.C473]" office:value-type="float" office:value="0.00158425925925926" calcext:value-type="float">
            <text:p>0,00158425925925926000</text:p>
          </table:table-cell>
          <table:table-cell table:formula="of:=[.D474]-[.D473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B473]+29" office:value-type="float" office:value="13717" calcext:value-type="float">
            <text:p>13717</text:p>
          </table:table-cell>
          <table:table-cell office:value-type="float" office:value="8640000" calcext:value-type="float">
            <text:p>8640000</text:p>
          </table:table-cell>
          <table:table-cell table:formula="of:=[.B474]/[.C474]" office:value-type="float" office:value="0.00158761574074074" calcext:value-type="float">
            <text:p>0,00158761574074074000</text:p>
          </table:table-cell>
          <table:table-cell table:formula="of:=[.D475]-[.D474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B474]+29" office:value-type="float" office:value="13746" calcext:value-type="float">
            <text:p>13746</text:p>
          </table:table-cell>
          <table:table-cell office:value-type="float" office:value="8640000" calcext:value-type="float">
            <text:p>8640000</text:p>
          </table:table-cell>
          <table:table-cell table:formula="of:=[.B475]/[.C475]" office:value-type="float" office:value="0.00159097222222222" calcext:value-type="float">
            <text:p>0,00159097222222222000</text:p>
          </table:table-cell>
          <table:table-cell table:formula="of:=[.D476]-[.D475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B475]+29" office:value-type="float" office:value="13775" calcext:value-type="float">
            <text:p>13775</text:p>
          </table:table-cell>
          <table:table-cell office:value-type="float" office:value="8640000" calcext:value-type="float">
            <text:p>8640000</text:p>
          </table:table-cell>
          <table:table-cell table:formula="of:=[.B476]/[.C476]" office:value-type="float" office:value="0.0015943287037037" calcext:value-type="float">
            <text:p>0,00159432870370370000</text:p>
          </table:table-cell>
          <table:table-cell table:formula="of:=[.D477]-[.D476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B476]+29" office:value-type="float" office:value="13804" calcext:value-type="float">
            <text:p>13804</text:p>
          </table:table-cell>
          <table:table-cell office:value-type="float" office:value="8640000" calcext:value-type="float">
            <text:p>8640000</text:p>
          </table:table-cell>
          <table:table-cell table:formula="of:=[.B477]/[.C477]" office:value-type="float" office:value="0.00159768518518519" calcext:value-type="float">
            <text:p>0,00159768518518519000</text:p>
          </table:table-cell>
          <table:table-cell table:formula="of:=[.D478]-[.D477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B477]+29" office:value-type="float" office:value="13833" calcext:value-type="float">
            <text:p>13833</text:p>
          </table:table-cell>
          <table:table-cell office:value-type="float" office:value="8640000" calcext:value-type="float">
            <text:p>8640000</text:p>
          </table:table-cell>
          <table:table-cell table:formula="of:=[.B478]/[.C478]" office:value-type="float" office:value="0.00160104166666667" calcext:value-type="float">
            <text:p>0,00160104166666667000</text:p>
          </table:table-cell>
          <table:table-cell table:formula="of:=[.D479]-[.D478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B478]+29" office:value-type="float" office:value="13862" calcext:value-type="float">
            <text:p>13862</text:p>
          </table:table-cell>
          <table:table-cell office:value-type="float" office:value="8640000" calcext:value-type="float">
            <text:p>8640000</text:p>
          </table:table-cell>
          <table:table-cell table:formula="of:=[.B479]/[.C479]" office:value-type="float" office:value="0.00160439814814815" calcext:value-type="float">
            <text:p>0,00160439814814815000</text:p>
          </table:table-cell>
          <table:table-cell table:formula="of:=[.D480]-[.D479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B479]+29" office:value-type="float" office:value="13891" calcext:value-type="float">
            <text:p>13891</text:p>
          </table:table-cell>
          <table:table-cell office:value-type="float" office:value="8640000" calcext:value-type="float">
            <text:p>8640000</text:p>
          </table:table-cell>
          <table:table-cell table:formula="of:=[.B480]/[.C480]" office:value-type="float" office:value="0.00160775462962963" calcext:value-type="float">
            <text:p>0,00160775462962963000</text:p>
          </table:table-cell>
          <table:table-cell table:formula="of:=[.D481]-[.D480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B480]+29" office:value-type="float" office:value="13920" calcext:value-type="float">
            <text:p>13920</text:p>
          </table:table-cell>
          <table:table-cell office:value-type="float" office:value="8640000" calcext:value-type="float">
            <text:p>8640000</text:p>
          </table:table-cell>
          <table:table-cell table:formula="of:=[.B481]/[.C481]" office:value-type="float" office:value="0.00161111111111111" calcext:value-type="float">
            <text:p>0,00161111111111111000</text:p>
          </table:table-cell>
          <table:table-cell table:formula="of:=[.D482]-[.D481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B481]+29" office:value-type="float" office:value="13949" calcext:value-type="float">
            <text:p>13949</text:p>
          </table:table-cell>
          <table:table-cell office:value-type="float" office:value="8640000" calcext:value-type="float">
            <text:p>8640000</text:p>
          </table:table-cell>
          <table:table-cell table:formula="of:=[.B482]/[.C482]" office:value-type="float" office:value="0.00161446759259259" calcext:value-type="float">
            <text:p>0,00161446759259259000</text:p>
          </table:table-cell>
          <table:table-cell table:formula="of:=[.D483]-[.D482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B482]+29" office:value-type="float" office:value="13978" calcext:value-type="float">
            <text:p>13978</text:p>
          </table:table-cell>
          <table:table-cell office:value-type="float" office:value="8640000" calcext:value-type="float">
            <text:p>8640000</text:p>
          </table:table-cell>
          <table:table-cell table:formula="of:=[.B483]/[.C483]" office:value-type="float" office:value="0.00161782407407407" calcext:value-type="float">
            <text:p>0,00161782407407407000</text:p>
          </table:table-cell>
          <table:table-cell table:formula="of:=[.D484]-[.D483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B483]+29" office:value-type="float" office:value="14007" calcext:value-type="float">
            <text:p>14007</text:p>
          </table:table-cell>
          <table:table-cell office:value-type="float" office:value="8640000" calcext:value-type="float">
            <text:p>8640000</text:p>
          </table:table-cell>
          <table:table-cell table:formula="of:=[.B484]/[.C484]" office:value-type="float" office:value="0.00162118055555556" calcext:value-type="float">
            <text:p>0,00162118055555556000</text:p>
          </table:table-cell>
          <table:table-cell table:formula="of:=[.D485]-[.D484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B484]+29" office:value-type="float" office:value="14036" calcext:value-type="float">
            <text:p>14036</text:p>
          </table:table-cell>
          <table:table-cell office:value-type="float" office:value="8640000" calcext:value-type="float">
            <text:p>8640000</text:p>
          </table:table-cell>
          <table:table-cell table:formula="of:=[.B485]/[.C485]" office:value-type="float" office:value="0.00162453703703704" calcext:value-type="float">
            <text:p>0,00162453703703704000</text:p>
          </table:table-cell>
          <table:table-cell table:formula="of:=[.D486]-[.D485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B485]+29" office:value-type="float" office:value="14065" calcext:value-type="float">
            <text:p>14065</text:p>
          </table:table-cell>
          <table:table-cell office:value-type="float" office:value="8640000" calcext:value-type="float">
            <text:p>8640000</text:p>
          </table:table-cell>
          <table:table-cell table:formula="of:=[.B486]/[.C486]" office:value-type="float" office:value="0.00162789351851852" calcext:value-type="float">
            <text:p>0,00162789351851852000</text:p>
          </table:table-cell>
          <table:table-cell table:formula="of:=[.D487]-[.D486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B486]+29" office:value-type="float" office:value="14094" calcext:value-type="float">
            <text:p>14094</text:p>
          </table:table-cell>
          <table:table-cell office:value-type="float" office:value="8640000" calcext:value-type="float">
            <text:p>8640000</text:p>
          </table:table-cell>
          <table:table-cell table:formula="of:=[.B487]/[.C487]" office:value-type="float" office:value="0.00163125" calcext:value-type="float">
            <text:p>0,00163125000000000000</text:p>
          </table:table-cell>
          <table:table-cell table:formula="of:=[.D488]-[.D487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B487]+29" office:value-type="float" office:value="14123" calcext:value-type="float">
            <text:p>14123</text:p>
          </table:table-cell>
          <table:table-cell office:value-type="float" office:value="8640000" calcext:value-type="float">
            <text:p>8640000</text:p>
          </table:table-cell>
          <table:table-cell table:formula="of:=[.B488]/[.C488]" office:value-type="float" office:value="0.00163460648148148" calcext:value-type="float">
            <text:p>0,00163460648148148000</text:p>
          </table:table-cell>
          <table:table-cell table:formula="of:=[.D489]-[.D488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B488]+29" office:value-type="float" office:value="14152" calcext:value-type="float">
            <text:p>14152</text:p>
          </table:table-cell>
          <table:table-cell office:value-type="float" office:value="8640000" calcext:value-type="float">
            <text:p>8640000</text:p>
          </table:table-cell>
          <table:table-cell table:formula="of:=[.B489]/[.C489]" office:value-type="float" office:value="0.00163796296296296" calcext:value-type="float">
            <text:p>0,00163796296296296000</text:p>
          </table:table-cell>
          <table:table-cell table:formula="of:=[.D490]-[.D489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B489]+29" office:value-type="float" office:value="14181" calcext:value-type="float">
            <text:p>14181</text:p>
          </table:table-cell>
          <table:table-cell office:value-type="float" office:value="8640000" calcext:value-type="float">
            <text:p>8640000</text:p>
          </table:table-cell>
          <table:table-cell table:formula="of:=[.B490]/[.C490]" office:value-type="float" office:value="0.00164131944444444" calcext:value-type="float">
            <text:p>0,00164131944444444000</text:p>
          </table:table-cell>
          <table:table-cell table:formula="of:=[.D491]-[.D490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B490]+29" office:value-type="float" office:value="14210" calcext:value-type="float">
            <text:p>14210</text:p>
          </table:table-cell>
          <table:table-cell office:value-type="float" office:value="8640000" calcext:value-type="float">
            <text:p>8640000</text:p>
          </table:table-cell>
          <table:table-cell table:formula="of:=[.B491]/[.C491]" office:value-type="float" office:value="0.00164467592592593" calcext:value-type="float">
            <text:p>0,00164467592592593000</text:p>
          </table:table-cell>
          <table:table-cell table:formula="of:=[.D492]-[.D491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B491]+29" office:value-type="float" office:value="14239" calcext:value-type="float">
            <text:p>14239</text:p>
          </table:table-cell>
          <table:table-cell office:value-type="float" office:value="8640000" calcext:value-type="float">
            <text:p>8640000</text:p>
          </table:table-cell>
          <table:table-cell table:formula="of:=[.B492]/[.C492]" office:value-type="float" office:value="0.00164803240740741" calcext:value-type="float">
            <text:p>0,00164803240740741000</text:p>
          </table:table-cell>
          <table:table-cell table:formula="of:=[.D493]-[.D492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B492]+29" office:value-type="float" office:value="14268" calcext:value-type="float">
            <text:p>14268</text:p>
          </table:table-cell>
          <table:table-cell office:value-type="float" office:value="8640000" calcext:value-type="float">
            <text:p>8640000</text:p>
          </table:table-cell>
          <table:table-cell table:formula="of:=[.B493]/[.C493]" office:value-type="float" office:value="0.00165138888888889" calcext:value-type="float">
            <text:p>0,00165138888888889000</text:p>
          </table:table-cell>
          <table:table-cell table:formula="of:=[.D494]-[.D493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B493]+29" office:value-type="float" office:value="14297" calcext:value-type="float">
            <text:p>14297</text:p>
          </table:table-cell>
          <table:table-cell office:value-type="float" office:value="8640000" calcext:value-type="float">
            <text:p>8640000</text:p>
          </table:table-cell>
          <table:table-cell table:formula="of:=[.B494]/[.C494]" office:value-type="float" office:value="0.00165474537037037" calcext:value-type="float">
            <text:p>0,00165474537037037000</text:p>
          </table:table-cell>
          <table:table-cell table:formula="of:=[.D495]-[.D494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B494]+29" office:value-type="float" office:value="14326" calcext:value-type="float">
            <text:p>14326</text:p>
          </table:table-cell>
          <table:table-cell office:value-type="float" office:value="8640000" calcext:value-type="float">
            <text:p>8640000</text:p>
          </table:table-cell>
          <table:table-cell table:formula="of:=[.B495]/[.C495]" office:value-type="float" office:value="0.00165810185185185" calcext:value-type="float">
            <text:p>0,00165810185185185000</text:p>
          </table:table-cell>
          <table:table-cell table:formula="of:=[.D496]-[.D495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B495]+29" office:value-type="float" office:value="14355" calcext:value-type="float">
            <text:p>14355</text:p>
          </table:table-cell>
          <table:table-cell office:value-type="float" office:value="8640000" calcext:value-type="float">
            <text:p>8640000</text:p>
          </table:table-cell>
          <table:table-cell table:formula="of:=[.B496]/[.C496]" office:value-type="float" office:value="0.00166145833333333" calcext:value-type="float">
            <text:p>0,00166145833333333000</text:p>
          </table:table-cell>
          <table:table-cell table:formula="of:=[.D497]-[.D496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B496]+29" office:value-type="float" office:value="14384" calcext:value-type="float">
            <text:p>14384</text:p>
          </table:table-cell>
          <table:table-cell office:value-type="float" office:value="8640000" calcext:value-type="float">
            <text:p>8640000</text:p>
          </table:table-cell>
          <table:table-cell table:formula="of:=[.B497]/[.C497]" office:value-type="float" office:value="0.00166481481481481" calcext:value-type="float">
            <text:p>0,00166481481481481000</text:p>
          </table:table-cell>
          <table:table-cell table:formula="of:=[.D498]-[.D497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B497]+29" office:value-type="float" office:value="14413" calcext:value-type="float">
            <text:p>14413</text:p>
          </table:table-cell>
          <table:table-cell office:value-type="float" office:value="8640000" calcext:value-type="float">
            <text:p>8640000</text:p>
          </table:table-cell>
          <table:table-cell table:formula="of:=[.B498]/[.C498]" office:value-type="float" office:value="0.0016681712962963" calcext:value-type="float">
            <text:p>0,00166817129629630000</text:p>
          </table:table-cell>
          <table:table-cell table:formula="of:=[.D499]-[.D498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B498]+29" office:value-type="float" office:value="14442" calcext:value-type="float">
            <text:p>14442</text:p>
          </table:table-cell>
          <table:table-cell office:value-type="float" office:value="8640000" calcext:value-type="float">
            <text:p>8640000</text:p>
          </table:table-cell>
          <table:table-cell table:formula="of:=[.B499]/[.C499]" office:value-type="float" office:value="0.00167152777777778" calcext:value-type="float">
            <text:p>0,00167152777777778000</text:p>
          </table:table-cell>
          <table:table-cell table:formula="of:=[.D500]-[.D499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B499]+29" office:value-type="float" office:value="14471" calcext:value-type="float">
            <text:p>14471</text:p>
          </table:table-cell>
          <table:table-cell office:value-type="float" office:value="8640000" calcext:value-type="float">
            <text:p>8640000</text:p>
          </table:table-cell>
          <table:table-cell table:formula="of:=[.B500]/[.C500]" office:value-type="float" office:value="0.00167488425925926" calcext:value-type="float">
            <text:p>0,00167488425925926000</text:p>
          </table:table-cell>
          <table:table-cell table:formula="of:=[.D501]-[.D500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500]+29" office:value-type="float" office:value="14500" calcext:value-type="float">
            <text:p>14500</text:p>
          </table:table-cell>
          <table:table-cell office:value-type="float" office:value="8640000" calcext:value-type="float">
            <text:p>8640000</text:p>
          </table:table-cell>
          <table:table-cell table:formula="of:=[.B501]/[.C501]" office:value-type="float" office:value="0.00167824074074074" calcext:value-type="float">
            <text:p>0,00167824074074074000</text:p>
          </table:table-cell>
          <table:table-cell table:formula="of:=[.D502]-[.D501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B501]+29" office:value-type="float" office:value="14529" calcext:value-type="float">
            <text:p>14529</text:p>
          </table:table-cell>
          <table:table-cell office:value-type="float" office:value="8640000" calcext:value-type="float">
            <text:p>8640000</text:p>
          </table:table-cell>
          <table:table-cell table:formula="of:=[.B502]/[.C502]" office:value-type="float" office:value="0.00168159722222222" calcext:value-type="float">
            <text:p>0,00168159722222222000</text:p>
          </table:table-cell>
          <table:table-cell table:formula="of:=[.D503]-[.D502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B502]+29" office:value-type="float" office:value="14558" calcext:value-type="float">
            <text:p>14558</text:p>
          </table:table-cell>
          <table:table-cell office:value-type="float" office:value="8640000" calcext:value-type="float">
            <text:p>8640000</text:p>
          </table:table-cell>
          <table:table-cell table:formula="of:=[.B503]/[.C503]" office:value-type="float" office:value="0.0016849537037037" calcext:value-type="float">
            <text:p>0,00168495370370370000</text:p>
          </table:table-cell>
          <table:table-cell table:formula="of:=[.D504]-[.D503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B503]+29" office:value-type="float" office:value="14587" calcext:value-type="float">
            <text:p>14587</text:p>
          </table:table-cell>
          <table:table-cell office:value-type="float" office:value="8640000" calcext:value-type="float">
            <text:p>8640000</text:p>
          </table:table-cell>
          <table:table-cell table:formula="of:=[.B504]/[.C504]" office:value-type="float" office:value="0.00168831018518519" calcext:value-type="float">
            <text:p>0,00168831018518519000</text:p>
          </table:table-cell>
          <table:table-cell table:formula="of:=[.D505]-[.D504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B504]+29" office:value-type="float" office:value="14616" calcext:value-type="float">
            <text:p>14616</text:p>
          </table:table-cell>
          <table:table-cell office:value-type="float" office:value="8640000" calcext:value-type="float">
            <text:p>8640000</text:p>
          </table:table-cell>
          <table:table-cell table:formula="of:=[.B505]/[.C505]" office:value-type="float" office:value="0.00169166666666667" calcext:value-type="float">
            <text:p>0,00169166666666667000</text:p>
          </table:table-cell>
          <table:table-cell table:formula="of:=[.D506]-[.D505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B505]+29" office:value-type="float" office:value="14645" calcext:value-type="float">
            <text:p>14645</text:p>
          </table:table-cell>
          <table:table-cell office:value-type="float" office:value="8640000" calcext:value-type="float">
            <text:p>8640000</text:p>
          </table:table-cell>
          <table:table-cell table:formula="of:=[.B506]/[.C506]" office:value-type="float" office:value="0.00169502314814815" calcext:value-type="float">
            <text:p>0,00169502314814815000</text:p>
          </table:table-cell>
          <table:table-cell table:formula="of:=[.D507]-[.D506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B506]+29" office:value-type="float" office:value="14674" calcext:value-type="float">
            <text:p>14674</text:p>
          </table:table-cell>
          <table:table-cell office:value-type="float" office:value="8640000" calcext:value-type="float">
            <text:p>8640000</text:p>
          </table:table-cell>
          <table:table-cell table:formula="of:=[.B507]/[.C507]" office:value-type="float" office:value="0.00169837962962963" calcext:value-type="float">
            <text:p>0,00169837962962963000</text:p>
          </table:table-cell>
          <table:table-cell table:formula="of:=[.D508]-[.D507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B507]+29" office:value-type="float" office:value="14703" calcext:value-type="float">
            <text:p>14703</text:p>
          </table:table-cell>
          <table:table-cell office:value-type="float" office:value="8640000" calcext:value-type="float">
            <text:p>8640000</text:p>
          </table:table-cell>
          <table:table-cell table:formula="of:=[.B508]/[.C508]" office:value-type="float" office:value="0.00170173611111111" calcext:value-type="float">
            <text:p>0,00170173611111111000</text:p>
          </table:table-cell>
          <table:table-cell table:formula="of:=[.D509]-[.D508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B508]+29" office:value-type="float" office:value="14732" calcext:value-type="float">
            <text:p>14732</text:p>
          </table:table-cell>
          <table:table-cell office:value-type="float" office:value="8640000" calcext:value-type="float">
            <text:p>8640000</text:p>
          </table:table-cell>
          <table:table-cell table:formula="of:=[.B509]/[.C509]" office:value-type="float" office:value="0.00170509259259259" calcext:value-type="float">
            <text:p>0,00170509259259259000</text:p>
          </table:table-cell>
          <table:table-cell table:formula="of:=[.D510]-[.D509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B509]+29" office:value-type="float" office:value="14761" calcext:value-type="float">
            <text:p>14761</text:p>
          </table:table-cell>
          <table:table-cell office:value-type="float" office:value="8640000" calcext:value-type="float">
            <text:p>8640000</text:p>
          </table:table-cell>
          <table:table-cell table:formula="of:=[.B510]/[.C510]" office:value-type="float" office:value="0.00170844907407407" calcext:value-type="float">
            <text:p>0,00170844907407407000</text:p>
          </table:table-cell>
          <table:table-cell table:formula="of:=[.D511]-[.D510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B510]+29" office:value-type="float" office:value="14790" calcext:value-type="float">
            <text:p>14790</text:p>
          </table:table-cell>
          <table:table-cell office:value-type="float" office:value="8640000" calcext:value-type="float">
            <text:p>8640000</text:p>
          </table:table-cell>
          <table:table-cell table:formula="of:=[.B511]/[.C511]" office:value-type="float" office:value="0.00171180555555556" calcext:value-type="float">
            <text:p>0,00171180555555556000</text:p>
          </table:table-cell>
          <table:table-cell table:formula="of:=[.D512]-[.D511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B511]+29" office:value-type="float" office:value="14819" calcext:value-type="float">
            <text:p>14819</text:p>
          </table:table-cell>
          <table:table-cell office:value-type="float" office:value="8640000" calcext:value-type="float">
            <text:p>8640000</text:p>
          </table:table-cell>
          <table:table-cell table:formula="of:=[.B512]/[.C512]" office:value-type="float" office:value="0.00171516203703704" calcext:value-type="float">
            <text:p>0,00171516203703704000</text:p>
          </table:table-cell>
          <table:table-cell table:formula="of:=[.D513]-[.D512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B512]+29" office:value-type="float" office:value="14848" calcext:value-type="float">
            <text:p>14848</text:p>
          </table:table-cell>
          <table:table-cell office:value-type="float" office:value="8640000" calcext:value-type="float">
            <text:p>8640000</text:p>
          </table:table-cell>
          <table:table-cell table:formula="of:=[.B513]/[.C513]" office:value-type="float" office:value="0.00171851851851852" calcext:value-type="float">
            <text:p>0,00171851851851852000</text:p>
          </table:table-cell>
          <table:table-cell table:formula="of:=[.D514]-[.D513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B513]+29" office:value-type="float" office:value="14877" calcext:value-type="float">
            <text:p>14877</text:p>
          </table:table-cell>
          <table:table-cell office:value-type="float" office:value="8640000" calcext:value-type="float">
            <text:p>8640000</text:p>
          </table:table-cell>
          <table:table-cell table:formula="of:=[.B514]/[.C514]" office:value-type="float" office:value="0.001721875" calcext:value-type="float">
            <text:p>0,00172187500000000000</text:p>
          </table:table-cell>
          <table:table-cell table:formula="of:=[.D515]-[.D514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B514]+29" office:value-type="float" office:value="14906" calcext:value-type="float">
            <text:p>14906</text:p>
          </table:table-cell>
          <table:table-cell office:value-type="float" office:value="8640000" calcext:value-type="float">
            <text:p>8640000</text:p>
          </table:table-cell>
          <table:table-cell table:formula="of:=[.B515]/[.C515]" office:value-type="float" office:value="0.00172523148148148" calcext:value-type="float">
            <text:p>0,00172523148148148000</text:p>
          </table:table-cell>
          <table:table-cell table:formula="of:=[.D516]-[.D515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B515]+29" office:value-type="float" office:value="14935" calcext:value-type="float">
            <text:p>14935</text:p>
          </table:table-cell>
          <table:table-cell office:value-type="float" office:value="8640000" calcext:value-type="float">
            <text:p>8640000</text:p>
          </table:table-cell>
          <table:table-cell table:formula="of:=[.B516]/[.C516]" office:value-type="float" office:value="0.00172858796296296" calcext:value-type="float">
            <text:p>0,00172858796296296000</text:p>
          </table:table-cell>
          <table:table-cell table:formula="of:=[.D517]-[.D516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B516]+29" office:value-type="float" office:value="14964" calcext:value-type="float">
            <text:p>14964</text:p>
          </table:table-cell>
          <table:table-cell office:value-type="float" office:value="8640000" calcext:value-type="float">
            <text:p>8640000</text:p>
          </table:table-cell>
          <table:table-cell table:formula="of:=[.B517]/[.C517]" office:value-type="float" office:value="0.00173194444444444" calcext:value-type="float">
            <text:p>0,00173194444444444000</text:p>
          </table:table-cell>
          <table:table-cell table:formula="of:=[.D518]-[.D517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B517]+29" office:value-type="float" office:value="14993" calcext:value-type="float">
            <text:p>14993</text:p>
          </table:table-cell>
          <table:table-cell office:value-type="float" office:value="8640000" calcext:value-type="float">
            <text:p>8640000</text:p>
          </table:table-cell>
          <table:table-cell table:formula="of:=[.B518]/[.C518]" office:value-type="float" office:value="0.00173530092592593" calcext:value-type="float">
            <text:p>0,00173530092592593000</text:p>
          </table:table-cell>
          <table:table-cell table:formula="of:=[.D519]-[.D518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B518]+29" office:value-type="float" office:value="15022" calcext:value-type="float">
            <text:p>15022</text:p>
          </table:table-cell>
          <table:table-cell office:value-type="float" office:value="8640000" calcext:value-type="float">
            <text:p>8640000</text:p>
          </table:table-cell>
          <table:table-cell table:formula="of:=[.B519]/[.C519]" office:value-type="float" office:value="0.00173865740740741" calcext:value-type="float">
            <text:p>0,00173865740740741000</text:p>
          </table:table-cell>
          <table:table-cell table:formula="of:=[.D520]-[.D519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B519]+29" office:value-type="float" office:value="15051" calcext:value-type="float">
            <text:p>15051</text:p>
          </table:table-cell>
          <table:table-cell office:value-type="float" office:value="8640000" calcext:value-type="float">
            <text:p>8640000</text:p>
          </table:table-cell>
          <table:table-cell table:formula="of:=[.B520]/[.C520]" office:value-type="float" office:value="0.00174201388888889" calcext:value-type="float">
            <text:p>0,00174201388888889000</text:p>
          </table:table-cell>
          <table:table-cell table:formula="of:=[.D521]-[.D520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B520]+29" office:value-type="float" office:value="15080" calcext:value-type="float">
            <text:p>15080</text:p>
          </table:table-cell>
          <table:table-cell office:value-type="float" office:value="8640000" calcext:value-type="float">
            <text:p>8640000</text:p>
          </table:table-cell>
          <table:table-cell table:formula="of:=[.B521]/[.C521]" office:value-type="float" office:value="0.00174537037037037" calcext:value-type="float">
            <text:p>0,00174537037037037000</text:p>
          </table:table-cell>
          <table:table-cell table:formula="of:=[.D522]-[.D521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B521]+29" office:value-type="float" office:value="15109" calcext:value-type="float">
            <text:p>15109</text:p>
          </table:table-cell>
          <table:table-cell office:value-type="float" office:value="8640000" calcext:value-type="float">
            <text:p>8640000</text:p>
          </table:table-cell>
          <table:table-cell table:formula="of:=[.B522]/[.C522]" office:value-type="float" office:value="0.00174872685185185" calcext:value-type="float">
            <text:p>0,00174872685185185000</text:p>
          </table:table-cell>
          <table:table-cell table:formula="of:=[.D523]-[.D522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B522]+29" office:value-type="float" office:value="15138" calcext:value-type="float">
            <text:p>15138</text:p>
          </table:table-cell>
          <table:table-cell office:value-type="float" office:value="8640000" calcext:value-type="float">
            <text:p>8640000</text:p>
          </table:table-cell>
          <table:table-cell table:formula="of:=[.B523]/[.C523]" office:value-type="float" office:value="0.00175208333333333" calcext:value-type="float">
            <text:p>0,00175208333333333000</text:p>
          </table:table-cell>
          <table:table-cell table:formula="of:=[.D524]-[.D523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B523]+29" office:value-type="float" office:value="15167" calcext:value-type="float">
            <text:p>15167</text:p>
          </table:table-cell>
          <table:table-cell office:value-type="float" office:value="8640000" calcext:value-type="float">
            <text:p>8640000</text:p>
          </table:table-cell>
          <table:table-cell table:formula="of:=[.B524]/[.C524]" office:value-type="float" office:value="0.00175543981481481" calcext:value-type="float">
            <text:p>0,00175543981481481000</text:p>
          </table:table-cell>
          <table:table-cell table:formula="of:=[.D525]-[.D524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B524]+29" office:value-type="float" office:value="15196" calcext:value-type="float">
            <text:p>15196</text:p>
          </table:table-cell>
          <table:table-cell office:value-type="float" office:value="8640000" calcext:value-type="float">
            <text:p>8640000</text:p>
          </table:table-cell>
          <table:table-cell table:formula="of:=[.B525]/[.C525]" office:value-type="float" office:value="0.0017587962962963" calcext:value-type="float">
            <text:p>0,00175879629629630000</text:p>
          </table:table-cell>
          <table:table-cell table:formula="of:=[.D526]-[.D525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B525]+29" office:value-type="float" office:value="15225" calcext:value-type="float">
            <text:p>15225</text:p>
          </table:table-cell>
          <table:table-cell office:value-type="float" office:value="8640000" calcext:value-type="float">
            <text:p>8640000</text:p>
          </table:table-cell>
          <table:table-cell table:formula="of:=[.B526]/[.C526]" office:value-type="float" office:value="0.00176215277777778" calcext:value-type="float">
            <text:p>0,00176215277777778000</text:p>
          </table:table-cell>
          <table:table-cell table:formula="of:=[.D527]-[.D526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B526]+29" office:value-type="float" office:value="15254" calcext:value-type="float">
            <text:p>15254</text:p>
          </table:table-cell>
          <table:table-cell office:value-type="float" office:value="8640000" calcext:value-type="float">
            <text:p>8640000</text:p>
          </table:table-cell>
          <table:table-cell table:formula="of:=[.B527]/[.C527]" office:value-type="float" office:value="0.00176550925925926" calcext:value-type="float">
            <text:p>0,00176550925925926000</text:p>
          </table:table-cell>
          <table:table-cell table:formula="of:=[.D528]-[.D527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B527]+29" office:value-type="float" office:value="15283" calcext:value-type="float">
            <text:p>15283</text:p>
          </table:table-cell>
          <table:table-cell office:value-type="float" office:value="8640000" calcext:value-type="float">
            <text:p>8640000</text:p>
          </table:table-cell>
          <table:table-cell table:formula="of:=[.B528]/[.C528]" office:value-type="float" office:value="0.00176886574074074" calcext:value-type="float">
            <text:p>0,00176886574074074000</text:p>
          </table:table-cell>
          <table:table-cell table:formula="of:=[.D529]-[.D528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B528]+29" office:value-type="float" office:value="15312" calcext:value-type="float">
            <text:p>15312</text:p>
          </table:table-cell>
          <table:table-cell office:value-type="float" office:value="8640000" calcext:value-type="float">
            <text:p>8640000</text:p>
          </table:table-cell>
          <table:table-cell table:formula="of:=[.B529]/[.C529]" office:value-type="float" office:value="0.00177222222222222" calcext:value-type="float">
            <text:p>0,00177222222222222000</text:p>
          </table:table-cell>
          <table:table-cell table:formula="of:=[.D530]-[.D529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B529]+29" office:value-type="float" office:value="15341" calcext:value-type="float">
            <text:p>15341</text:p>
          </table:table-cell>
          <table:table-cell office:value-type="float" office:value="8640000" calcext:value-type="float">
            <text:p>8640000</text:p>
          </table:table-cell>
          <table:table-cell table:formula="of:=[.B530]/[.C530]" office:value-type="float" office:value="0.0017755787037037" calcext:value-type="float">
            <text:p>0,00177557870370370000</text:p>
          </table:table-cell>
          <table:table-cell table:formula="of:=[.D531]-[.D530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B530]+29" office:value-type="float" office:value="15370" calcext:value-type="float">
            <text:p>15370</text:p>
          </table:table-cell>
          <table:table-cell office:value-type="float" office:value="8640000" calcext:value-type="float">
            <text:p>8640000</text:p>
          </table:table-cell>
          <table:table-cell table:formula="of:=[.B531]/[.C531]" office:value-type="float" office:value="0.00177893518518519" calcext:value-type="float">
            <text:p>0,00177893518518519000</text:p>
          </table:table-cell>
          <table:table-cell table:formula="of:=[.D532]-[.D531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B531]+29" office:value-type="float" office:value="15399" calcext:value-type="float">
            <text:p>15399</text:p>
          </table:table-cell>
          <table:table-cell office:value-type="float" office:value="8640000" calcext:value-type="float">
            <text:p>8640000</text:p>
          </table:table-cell>
          <table:table-cell table:formula="of:=[.B532]/[.C532]" office:value-type="float" office:value="0.00178229166666667" calcext:value-type="float">
            <text:p>0,00178229166666667000</text:p>
          </table:table-cell>
          <table:table-cell table:formula="of:=[.D533]-[.D532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B532]+29" office:value-type="float" office:value="15428" calcext:value-type="float">
            <text:p>15428</text:p>
          </table:table-cell>
          <table:table-cell office:value-type="float" office:value="8640000" calcext:value-type="float">
            <text:p>8640000</text:p>
          </table:table-cell>
          <table:table-cell table:formula="of:=[.B533]/[.C533]" office:value-type="float" office:value="0.00178564814814815" calcext:value-type="float">
            <text:p>0,00178564814814815000</text:p>
          </table:table-cell>
          <table:table-cell table:formula="of:=[.D534]-[.D533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B533]+29" office:value-type="float" office:value="15457" calcext:value-type="float">
            <text:p>15457</text:p>
          </table:table-cell>
          <table:table-cell office:value-type="float" office:value="8640000" calcext:value-type="float">
            <text:p>8640000</text:p>
          </table:table-cell>
          <table:table-cell table:formula="of:=[.B534]/[.C534]" office:value-type="float" office:value="0.00178900462962963" calcext:value-type="float">
            <text:p>0,00178900462962963000</text:p>
          </table:table-cell>
          <table:table-cell table:formula="of:=[.D535]-[.D534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B534]+29" office:value-type="float" office:value="15486" calcext:value-type="float">
            <text:p>15486</text:p>
          </table:table-cell>
          <table:table-cell office:value-type="float" office:value="8640000" calcext:value-type="float">
            <text:p>8640000</text:p>
          </table:table-cell>
          <table:table-cell table:formula="of:=[.B535]/[.C535]" office:value-type="float" office:value="0.00179236111111111" calcext:value-type="float">
            <text:p>0,00179236111111111000</text:p>
          </table:table-cell>
          <table:table-cell table:formula="of:=[.D536]-[.D535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B535]+29" office:value-type="float" office:value="15515" calcext:value-type="float">
            <text:p>15515</text:p>
          </table:table-cell>
          <table:table-cell office:value-type="float" office:value="8640000" calcext:value-type="float">
            <text:p>8640000</text:p>
          </table:table-cell>
          <table:table-cell table:formula="of:=[.B536]/[.C536]" office:value-type="float" office:value="0.00179571759259259" calcext:value-type="float">
            <text:p>0,00179571759259259000</text:p>
          </table:table-cell>
          <table:table-cell table:formula="of:=[.D537]-[.D536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B536]+29" office:value-type="float" office:value="15544" calcext:value-type="float">
            <text:p>15544</text:p>
          </table:table-cell>
          <table:table-cell office:value-type="float" office:value="8640000" calcext:value-type="float">
            <text:p>8640000</text:p>
          </table:table-cell>
          <table:table-cell table:formula="of:=[.B537]/[.C537]" office:value-type="float" office:value="0.00179907407407407" calcext:value-type="float">
            <text:p>0,00179907407407407000</text:p>
          </table:table-cell>
          <table:table-cell table:formula="of:=[.D538]-[.D537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B537]+29" office:value-type="float" office:value="15573" calcext:value-type="float">
            <text:p>15573</text:p>
          </table:table-cell>
          <table:table-cell office:value-type="float" office:value="8640000" calcext:value-type="float">
            <text:p>8640000</text:p>
          </table:table-cell>
          <table:table-cell table:formula="of:=[.B538]/[.C538]" office:value-type="float" office:value="0.00180243055555556" calcext:value-type="float">
            <text:p>0,00180243055555556000</text:p>
          </table:table-cell>
          <table:table-cell table:formula="of:=[.D539]-[.D538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B538]+29" office:value-type="float" office:value="15602" calcext:value-type="float">
            <text:p>15602</text:p>
          </table:table-cell>
          <table:table-cell office:value-type="float" office:value="8640000" calcext:value-type="float">
            <text:p>8640000</text:p>
          </table:table-cell>
          <table:table-cell table:formula="of:=[.B539]/[.C539]" office:value-type="float" office:value="0.00180578703703704" calcext:value-type="float">
            <text:p>0,00180578703703704000</text:p>
          </table:table-cell>
          <table:table-cell table:formula="of:=[.D540]-[.D539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B539]+29" office:value-type="float" office:value="15631" calcext:value-type="float">
            <text:p>15631</text:p>
          </table:table-cell>
          <table:table-cell office:value-type="float" office:value="8640000" calcext:value-type="float">
            <text:p>8640000</text:p>
          </table:table-cell>
          <table:table-cell table:formula="of:=[.B540]/[.C540]" office:value-type="float" office:value="0.00180914351851852" calcext:value-type="float">
            <text:p>0,00180914351851852000</text:p>
          </table:table-cell>
          <table:table-cell table:formula="of:=[.D541]-[.D540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B540]+29" office:value-type="float" office:value="15660" calcext:value-type="float">
            <text:p>15660</text:p>
          </table:table-cell>
          <table:table-cell office:value-type="float" office:value="8640000" calcext:value-type="float">
            <text:p>8640000</text:p>
          </table:table-cell>
          <table:table-cell table:formula="of:=[.B541]/[.C541]" office:value-type="float" office:value="0.0018125" calcext:value-type="float">
            <text:p>0,00181250000000000000</text:p>
          </table:table-cell>
          <table:table-cell table:formula="of:=[.D542]-[.D541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B541]+29" office:value-type="float" office:value="15689" calcext:value-type="float">
            <text:p>15689</text:p>
          </table:table-cell>
          <table:table-cell office:value-type="float" office:value="8640000" calcext:value-type="float">
            <text:p>8640000</text:p>
          </table:table-cell>
          <table:table-cell table:formula="of:=[.B542]/[.C542]" office:value-type="float" office:value="0.00181585648148148" calcext:value-type="float">
            <text:p>0,00181585648148148000</text:p>
          </table:table-cell>
          <table:table-cell table:formula="of:=[.D543]-[.D542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B542]+29" office:value-type="float" office:value="15718" calcext:value-type="float">
            <text:p>15718</text:p>
          </table:table-cell>
          <table:table-cell office:value-type="float" office:value="8640000" calcext:value-type="float">
            <text:p>8640000</text:p>
          </table:table-cell>
          <table:table-cell table:formula="of:=[.B543]/[.C543]" office:value-type="float" office:value="0.00181921296296296" calcext:value-type="float">
            <text:p>0,00181921296296296000</text:p>
          </table:table-cell>
          <table:table-cell table:formula="of:=[.D544]-[.D543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B543]+29" office:value-type="float" office:value="15747" calcext:value-type="float">
            <text:p>15747</text:p>
          </table:table-cell>
          <table:table-cell office:value-type="float" office:value="8640000" calcext:value-type="float">
            <text:p>8640000</text:p>
          </table:table-cell>
          <table:table-cell table:formula="of:=[.B544]/[.C544]" office:value-type="float" office:value="0.00182256944444444" calcext:value-type="float">
            <text:p>0,00182256944444444000</text:p>
          </table:table-cell>
          <table:table-cell table:formula="of:=[.D545]-[.D544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B544]+29" office:value-type="float" office:value="15776" calcext:value-type="float">
            <text:p>15776</text:p>
          </table:table-cell>
          <table:table-cell office:value-type="float" office:value="8640000" calcext:value-type="float">
            <text:p>8640000</text:p>
          </table:table-cell>
          <table:table-cell table:formula="of:=[.B545]/[.C545]" office:value-type="float" office:value="0.00182592592592593" calcext:value-type="float">
            <text:p>0,00182592592592593000</text:p>
          </table:table-cell>
          <table:table-cell table:formula="of:=[.D546]-[.D545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B545]+29" office:value-type="float" office:value="15805" calcext:value-type="float">
            <text:p>15805</text:p>
          </table:table-cell>
          <table:table-cell office:value-type="float" office:value="8640000" calcext:value-type="float">
            <text:p>8640000</text:p>
          </table:table-cell>
          <table:table-cell table:formula="of:=[.B546]/[.C546]" office:value-type="float" office:value="0.00182928240740741" calcext:value-type="float">
            <text:p>0,00182928240740741000</text:p>
          </table:table-cell>
          <table:table-cell table:formula="of:=[.D547]-[.D546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B546]+29" office:value-type="float" office:value="15834" calcext:value-type="float">
            <text:p>15834</text:p>
          </table:table-cell>
          <table:table-cell office:value-type="float" office:value="8640000" calcext:value-type="float">
            <text:p>8640000</text:p>
          </table:table-cell>
          <table:table-cell table:formula="of:=[.B547]/[.C547]" office:value-type="float" office:value="0.00183263888888889" calcext:value-type="float">
            <text:p>0,00183263888888889000</text:p>
          </table:table-cell>
          <table:table-cell table:formula="of:=[.D548]-[.D547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B547]+29" office:value-type="float" office:value="15863" calcext:value-type="float">
            <text:p>15863</text:p>
          </table:table-cell>
          <table:table-cell office:value-type="float" office:value="8640000" calcext:value-type="float">
            <text:p>8640000</text:p>
          </table:table-cell>
          <table:table-cell table:formula="of:=[.B548]/[.C548]" office:value-type="float" office:value="0.00183599537037037" calcext:value-type="float">
            <text:p>0,00183599537037037000</text:p>
          </table:table-cell>
          <table:table-cell table:formula="of:=[.D549]-[.D548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B548]+29" office:value-type="float" office:value="15892" calcext:value-type="float">
            <text:p>15892</text:p>
          </table:table-cell>
          <table:table-cell office:value-type="float" office:value="8640000" calcext:value-type="float">
            <text:p>8640000</text:p>
          </table:table-cell>
          <table:table-cell table:formula="of:=[.B549]/[.C549]" office:value-type="float" office:value="0.00183935185185185" calcext:value-type="float">
            <text:p>0,00183935185185185000</text:p>
          </table:table-cell>
          <table:table-cell table:formula="of:=[.D550]-[.D549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B549]+29" office:value-type="float" office:value="15921" calcext:value-type="float">
            <text:p>15921</text:p>
          </table:table-cell>
          <table:table-cell office:value-type="float" office:value="8640000" calcext:value-type="float">
            <text:p>8640000</text:p>
          </table:table-cell>
          <table:table-cell table:formula="of:=[.B550]/[.C550]" office:value-type="float" office:value="0.00184270833333333" calcext:value-type="float">
            <text:p>0,00184270833333333000</text:p>
          </table:table-cell>
          <table:table-cell table:formula="of:=[.D551]-[.D550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B550]+29" office:value-type="float" office:value="15950" calcext:value-type="float">
            <text:p>15950</text:p>
          </table:table-cell>
          <table:table-cell office:value-type="float" office:value="8640000" calcext:value-type="float">
            <text:p>8640000</text:p>
          </table:table-cell>
          <table:table-cell table:formula="of:=[.B551]/[.C551]" office:value-type="float" office:value="0.00184606481481482" calcext:value-type="float">
            <text:p>0,00184606481481482000</text:p>
          </table:table-cell>
          <table:table-cell table:formula="of:=[.D552]-[.D551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B551]+29" office:value-type="float" office:value="15979" calcext:value-type="float">
            <text:p>15979</text:p>
          </table:table-cell>
          <table:table-cell office:value-type="float" office:value="8640000" calcext:value-type="float">
            <text:p>8640000</text:p>
          </table:table-cell>
          <table:table-cell table:formula="of:=[.B552]/[.C552]" office:value-type="float" office:value="0.0018494212962963" calcext:value-type="float">
            <text:p>0,00184942129629630000</text:p>
          </table:table-cell>
          <table:table-cell table:formula="of:=[.D553]-[.D552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B552]+29" office:value-type="float" office:value="16008" calcext:value-type="float">
            <text:p>16008</text:p>
          </table:table-cell>
          <table:table-cell office:value-type="float" office:value="8640000" calcext:value-type="float">
            <text:p>8640000</text:p>
          </table:table-cell>
          <table:table-cell table:formula="of:=[.B553]/[.C553]" office:value-type="float" office:value="0.00185277777777778" calcext:value-type="float">
            <text:p>0,00185277777777778000</text:p>
          </table:table-cell>
          <table:table-cell table:formula="of:=[.D554]-[.D553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B553]+29" office:value-type="float" office:value="16037" calcext:value-type="float">
            <text:p>16037</text:p>
          </table:table-cell>
          <table:table-cell office:value-type="float" office:value="8640000" calcext:value-type="float">
            <text:p>8640000</text:p>
          </table:table-cell>
          <table:table-cell table:formula="of:=[.B554]/[.C554]" office:value-type="float" office:value="0.00185613425925926" calcext:value-type="float">
            <text:p>0,00185613425925926000</text:p>
          </table:table-cell>
          <table:table-cell table:formula="of:=[.D555]-[.D554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B554]+29" office:value-type="float" office:value="16066" calcext:value-type="float">
            <text:p>16066</text:p>
          </table:table-cell>
          <table:table-cell office:value-type="float" office:value="8640000" calcext:value-type="float">
            <text:p>8640000</text:p>
          </table:table-cell>
          <table:table-cell table:formula="of:=[.B555]/[.C555]" office:value-type="float" office:value="0.00185949074074074" calcext:value-type="float">
            <text:p>0,00185949074074074000</text:p>
          </table:table-cell>
          <table:table-cell table:formula="of:=[.D556]-[.D555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B555]+29" office:value-type="float" office:value="16095" calcext:value-type="float">
            <text:p>16095</text:p>
          </table:table-cell>
          <table:table-cell office:value-type="float" office:value="8640000" calcext:value-type="float">
            <text:p>8640000</text:p>
          </table:table-cell>
          <table:table-cell table:formula="of:=[.B556]/[.C556]" office:value-type="float" office:value="0.00186284722222222" calcext:value-type="float">
            <text:p>0,00186284722222222000</text:p>
          </table:table-cell>
          <table:table-cell table:formula="of:=[.D557]-[.D556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B556]+29" office:value-type="float" office:value="16124" calcext:value-type="float">
            <text:p>16124</text:p>
          </table:table-cell>
          <table:table-cell office:value-type="float" office:value="8640000" calcext:value-type="float">
            <text:p>8640000</text:p>
          </table:table-cell>
          <table:table-cell table:formula="of:=[.B557]/[.C557]" office:value-type="float" office:value="0.0018662037037037" calcext:value-type="float">
            <text:p>0,00186620370370370000</text:p>
          </table:table-cell>
          <table:table-cell table:formula="of:=[.D558]-[.D557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B557]+29" office:value-type="float" office:value="16153" calcext:value-type="float">
            <text:p>16153</text:p>
          </table:table-cell>
          <table:table-cell office:value-type="float" office:value="8640000" calcext:value-type="float">
            <text:p>8640000</text:p>
          </table:table-cell>
          <table:table-cell table:formula="of:=[.B558]/[.C558]" office:value-type="float" office:value="0.00186956018518519" calcext:value-type="float">
            <text:p>0,00186956018518519000</text:p>
          </table:table-cell>
          <table:table-cell table:formula="of:=[.D559]-[.D558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B558]+29" office:value-type="float" office:value="16182" calcext:value-type="float">
            <text:p>16182</text:p>
          </table:table-cell>
          <table:table-cell office:value-type="float" office:value="8640000" calcext:value-type="float">
            <text:p>8640000</text:p>
          </table:table-cell>
          <table:table-cell table:formula="of:=[.B559]/[.C559]" office:value-type="float" office:value="0.00187291666666667" calcext:value-type="float">
            <text:p>0,00187291666666667000</text:p>
          </table:table-cell>
          <table:table-cell table:formula="of:=[.D560]-[.D559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B559]+29" office:value-type="float" office:value="16211" calcext:value-type="float">
            <text:p>16211</text:p>
          </table:table-cell>
          <table:table-cell office:value-type="float" office:value="8640000" calcext:value-type="float">
            <text:p>8640000</text:p>
          </table:table-cell>
          <table:table-cell table:formula="of:=[.B560]/[.C560]" office:value-type="float" office:value="0.00187627314814815" calcext:value-type="float">
            <text:p>0,00187627314814815000</text:p>
          </table:table-cell>
          <table:table-cell table:formula="of:=[.D561]-[.D560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B560]+29" office:value-type="float" office:value="16240" calcext:value-type="float">
            <text:p>16240</text:p>
          </table:table-cell>
          <table:table-cell office:value-type="float" office:value="8640000" calcext:value-type="float">
            <text:p>8640000</text:p>
          </table:table-cell>
          <table:table-cell table:formula="of:=[.B561]/[.C561]" office:value-type="float" office:value="0.00187962962962963" calcext:value-type="float">
            <text:p>0,00187962962962963000</text:p>
          </table:table-cell>
          <table:table-cell table:formula="of:=[.D562]-[.D561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B561]+29" office:value-type="float" office:value="16269" calcext:value-type="float">
            <text:p>16269</text:p>
          </table:table-cell>
          <table:table-cell office:value-type="float" office:value="8640000" calcext:value-type="float">
            <text:p>8640000</text:p>
          </table:table-cell>
          <table:table-cell table:formula="of:=[.B562]/[.C562]" office:value-type="float" office:value="0.00188298611111111" calcext:value-type="float">
            <text:p>0,00188298611111111000</text:p>
          </table:table-cell>
          <table:table-cell table:formula="of:=[.D563]-[.D562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B562]+29" office:value-type="float" office:value="16298" calcext:value-type="float">
            <text:p>16298</text:p>
          </table:table-cell>
          <table:table-cell office:value-type="float" office:value="8640000" calcext:value-type="float">
            <text:p>8640000</text:p>
          </table:table-cell>
          <table:table-cell table:formula="of:=[.B563]/[.C563]" office:value-type="float" office:value="0.00188634259259259" calcext:value-type="float">
            <text:p>0,00188634259259259000</text:p>
          </table:table-cell>
          <table:table-cell table:formula="of:=[.D564]-[.D563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B563]+29" office:value-type="float" office:value="16327" calcext:value-type="float">
            <text:p>16327</text:p>
          </table:table-cell>
          <table:table-cell office:value-type="float" office:value="8640000" calcext:value-type="float">
            <text:p>8640000</text:p>
          </table:table-cell>
          <table:table-cell table:formula="of:=[.B564]/[.C564]" office:value-type="float" office:value="0.00188969907407407" calcext:value-type="float">
            <text:p>0,00188969907407407000</text:p>
          </table:table-cell>
          <table:table-cell table:formula="of:=[.D565]-[.D564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B564]+29" office:value-type="float" office:value="16356" calcext:value-type="float">
            <text:p>16356</text:p>
          </table:table-cell>
          <table:table-cell office:value-type="float" office:value="8640000" calcext:value-type="float">
            <text:p>8640000</text:p>
          </table:table-cell>
          <table:table-cell table:formula="of:=[.B565]/[.C565]" office:value-type="float" office:value="0.00189305555555556" calcext:value-type="float">
            <text:p>0,00189305555555556000</text:p>
          </table:table-cell>
          <table:table-cell table:formula="of:=[.D566]-[.D565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B565]+29" office:value-type="float" office:value="16385" calcext:value-type="float">
            <text:p>16385</text:p>
          </table:table-cell>
          <table:table-cell office:value-type="float" office:value="8640000" calcext:value-type="float">
            <text:p>8640000</text:p>
          </table:table-cell>
          <table:table-cell table:formula="of:=[.B566]/[.C566]" office:value-type="float" office:value="0.00189641203703704" calcext:value-type="float">
            <text:p>0,00189641203703704000</text:p>
          </table:table-cell>
          <table:table-cell table:formula="of:=[.D567]-[.D566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B566]+29" office:value-type="float" office:value="16414" calcext:value-type="float">
            <text:p>16414</text:p>
          </table:table-cell>
          <table:table-cell office:value-type="float" office:value="8640000" calcext:value-type="float">
            <text:p>8640000</text:p>
          </table:table-cell>
          <table:table-cell table:formula="of:=[.B567]/[.C567]" office:value-type="float" office:value="0.00189976851851852" calcext:value-type="float">
            <text:p>0,00189976851851852000</text:p>
          </table:table-cell>
          <table:table-cell table:formula="of:=[.D568]-[.D567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B567]+29" office:value-type="float" office:value="16443" calcext:value-type="float">
            <text:p>16443</text:p>
          </table:table-cell>
          <table:table-cell office:value-type="float" office:value="8640000" calcext:value-type="float">
            <text:p>8640000</text:p>
          </table:table-cell>
          <table:table-cell table:formula="of:=[.B568]/[.C568]" office:value-type="float" office:value="0.001903125" calcext:value-type="float">
            <text:p>0,00190312500000000000</text:p>
          </table:table-cell>
          <table:table-cell table:formula="of:=[.D569]-[.D568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B568]+29" office:value-type="float" office:value="16472" calcext:value-type="float">
            <text:p>16472</text:p>
          </table:table-cell>
          <table:table-cell office:value-type="float" office:value="8640000" calcext:value-type="float">
            <text:p>8640000</text:p>
          </table:table-cell>
          <table:table-cell table:formula="of:=[.B569]/[.C569]" office:value-type="float" office:value="0.00190648148148148" calcext:value-type="float">
            <text:p>0,00190648148148148000</text:p>
          </table:table-cell>
          <table:table-cell table:formula="of:=[.D570]-[.D569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B569]+29" office:value-type="float" office:value="16501" calcext:value-type="float">
            <text:p>16501</text:p>
          </table:table-cell>
          <table:table-cell office:value-type="float" office:value="8640000" calcext:value-type="float">
            <text:p>8640000</text:p>
          </table:table-cell>
          <table:table-cell table:formula="of:=[.B570]/[.C570]" office:value-type="float" office:value="0.00190983796296296" calcext:value-type="float">
            <text:p>0,00190983796296296000</text:p>
          </table:table-cell>
          <table:table-cell table:formula="of:=[.D571]-[.D570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B570]+29" office:value-type="float" office:value="16530" calcext:value-type="float">
            <text:p>16530</text:p>
          </table:table-cell>
          <table:table-cell office:value-type="float" office:value="8640000" calcext:value-type="float">
            <text:p>8640000</text:p>
          </table:table-cell>
          <table:table-cell table:formula="of:=[.B571]/[.C571]" office:value-type="float" office:value="0.00191319444444444" calcext:value-type="float">
            <text:p>0,00191319444444444000</text:p>
          </table:table-cell>
          <table:table-cell table:formula="of:=[.D572]-[.D571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B571]+29" office:value-type="float" office:value="16559" calcext:value-type="float">
            <text:p>16559</text:p>
          </table:table-cell>
          <table:table-cell office:value-type="float" office:value="8640000" calcext:value-type="float">
            <text:p>8640000</text:p>
          </table:table-cell>
          <table:table-cell table:formula="of:=[.B572]/[.C572]" office:value-type="float" office:value="0.00191655092592593" calcext:value-type="float">
            <text:p>0,00191655092592593000</text:p>
          </table:table-cell>
          <table:table-cell table:formula="of:=[.D573]-[.D572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B572]+29" office:value-type="float" office:value="16588" calcext:value-type="float">
            <text:p>16588</text:p>
          </table:table-cell>
          <table:table-cell office:value-type="float" office:value="8640000" calcext:value-type="float">
            <text:p>8640000</text:p>
          </table:table-cell>
          <table:table-cell table:formula="of:=[.B573]/[.C573]" office:value-type="float" office:value="0.00191990740740741" calcext:value-type="float">
            <text:p>0,00191990740740741000</text:p>
          </table:table-cell>
          <table:table-cell table:formula="of:=[.D574]-[.D573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B573]+29" office:value-type="float" office:value="16617" calcext:value-type="float">
            <text:p>16617</text:p>
          </table:table-cell>
          <table:table-cell office:value-type="float" office:value="8640000" calcext:value-type="float">
            <text:p>8640000</text:p>
          </table:table-cell>
          <table:table-cell table:formula="of:=[.B574]/[.C574]" office:value-type="float" office:value="0.00192326388888889" calcext:value-type="float">
            <text:p>0,00192326388888889000</text:p>
          </table:table-cell>
          <table:table-cell table:formula="of:=[.D575]-[.D574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B574]+29" office:value-type="float" office:value="16646" calcext:value-type="float">
            <text:p>16646</text:p>
          </table:table-cell>
          <table:table-cell office:value-type="float" office:value="8640000" calcext:value-type="float">
            <text:p>8640000</text:p>
          </table:table-cell>
          <table:table-cell table:formula="of:=[.B575]/[.C575]" office:value-type="float" office:value="0.00192662037037037" calcext:value-type="float">
            <text:p>0,00192662037037037000</text:p>
          </table:table-cell>
          <table:table-cell table:formula="of:=[.D576]-[.D575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B575]+29" office:value-type="float" office:value="16675" calcext:value-type="float">
            <text:p>16675</text:p>
          </table:table-cell>
          <table:table-cell office:value-type="float" office:value="8640000" calcext:value-type="float">
            <text:p>8640000</text:p>
          </table:table-cell>
          <table:table-cell table:formula="of:=[.B576]/[.C576]" office:value-type="float" office:value="0.00192997685185185" calcext:value-type="float">
            <text:p>0,00192997685185185000</text:p>
          </table:table-cell>
          <table:table-cell table:formula="of:=[.D577]-[.D576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B576]+29" office:value-type="float" office:value="16704" calcext:value-type="float">
            <text:p>16704</text:p>
          </table:table-cell>
          <table:table-cell office:value-type="float" office:value="8640000" calcext:value-type="float">
            <text:p>8640000</text:p>
          </table:table-cell>
          <table:table-cell table:formula="of:=[.B577]/[.C577]" office:value-type="float" office:value="0.00193333333333333" calcext:value-type="float">
            <text:p>0,00193333333333333000</text:p>
          </table:table-cell>
          <table:table-cell table:formula="of:=[.D578]-[.D577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B577]+29" office:value-type="float" office:value="16733" calcext:value-type="float">
            <text:p>16733</text:p>
          </table:table-cell>
          <table:table-cell office:value-type="float" office:value="8640000" calcext:value-type="float">
            <text:p>8640000</text:p>
          </table:table-cell>
          <table:table-cell table:formula="of:=[.B578]/[.C578]" office:value-type="float" office:value="0.00193668981481482" calcext:value-type="float">
            <text:p>0,00193668981481482000</text:p>
          </table:table-cell>
          <table:table-cell table:formula="of:=[.D579]-[.D578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B578]+29" office:value-type="float" office:value="16762" calcext:value-type="float">
            <text:p>16762</text:p>
          </table:table-cell>
          <table:table-cell office:value-type="float" office:value="8640000" calcext:value-type="float">
            <text:p>8640000</text:p>
          </table:table-cell>
          <table:table-cell table:formula="of:=[.B579]/[.C579]" office:value-type="float" office:value="0.0019400462962963" calcext:value-type="float">
            <text:p>0,00194004629629630000</text:p>
          </table:table-cell>
          <table:table-cell table:formula="of:=[.D580]-[.D579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B579]+29" office:value-type="float" office:value="16791" calcext:value-type="float">
            <text:p>16791</text:p>
          </table:table-cell>
          <table:table-cell office:value-type="float" office:value="8640000" calcext:value-type="float">
            <text:p>8640000</text:p>
          </table:table-cell>
          <table:table-cell table:formula="of:=[.B580]/[.C580]" office:value-type="float" office:value="0.00194340277777778" calcext:value-type="float">
            <text:p>0,00194340277777778000</text:p>
          </table:table-cell>
          <table:table-cell table:formula="of:=[.D581]-[.D580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B580]+29" office:value-type="float" office:value="16820" calcext:value-type="float">
            <text:p>16820</text:p>
          </table:table-cell>
          <table:table-cell office:value-type="float" office:value="8640000" calcext:value-type="float">
            <text:p>8640000</text:p>
          </table:table-cell>
          <table:table-cell table:formula="of:=[.B581]/[.C581]" office:value-type="float" office:value="0.00194675925925926" calcext:value-type="float">
            <text:p>0,00194675925925926000</text:p>
          </table:table-cell>
          <table:table-cell table:formula="of:=[.D582]-[.D581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B581]+29" office:value-type="float" office:value="16849" calcext:value-type="float">
            <text:p>16849</text:p>
          </table:table-cell>
          <table:table-cell office:value-type="float" office:value="8640000" calcext:value-type="float">
            <text:p>8640000</text:p>
          </table:table-cell>
          <table:table-cell table:formula="of:=[.B582]/[.C582]" office:value-type="float" office:value="0.00195011574074074" calcext:value-type="float">
            <text:p>0,00195011574074074000</text:p>
          </table:table-cell>
          <table:table-cell table:formula="of:=[.D583]-[.D582]" office:value-type="float" office:value="0.00000335648148148157" calcext:value-type="float">
            <text:p>0,00000335648148148157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B582]+29" office:value-type="float" office:value="16878" calcext:value-type="float">
            <text:p>16878</text:p>
          </table:table-cell>
          <table:table-cell office:value-type="float" office:value="8640000" calcext:value-type="float">
            <text:p>8640000</text:p>
          </table:table-cell>
          <table:table-cell table:formula="of:=[.B583]/[.C583]" office:value-type="float" office:value="0.00195347222222222" calcext:value-type="float">
            <text:p>0,00195347222222222000</text:p>
          </table:table-cell>
          <table:table-cell table:formula="of:=[.D584]-[.D583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B583]+29" office:value-type="float" office:value="16907" calcext:value-type="float">
            <text:p>16907</text:p>
          </table:table-cell>
          <table:table-cell office:value-type="float" office:value="8640000" calcext:value-type="float">
            <text:p>8640000</text:p>
          </table:table-cell>
          <table:table-cell table:formula="of:=[.B584]/[.C584]" office:value-type="float" office:value="0.0019568287037037" calcext:value-type="float">
            <text:p>0,00195682870370370000</text:p>
          </table:table-cell>
          <table:table-cell table:formula="of:=[.D585]-[.D584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B584]+29" office:value-type="float" office:value="16936" calcext:value-type="float">
            <text:p>16936</text:p>
          </table:table-cell>
          <table:table-cell office:value-type="float" office:value="8640000" calcext:value-type="float">
            <text:p>8640000</text:p>
          </table:table-cell>
          <table:table-cell table:formula="of:=[.B585]/[.C585]" office:value-type="float" office:value="0.00196018518518519" calcext:value-type="float">
            <text:p>0,00196018518518519000</text:p>
          </table:table-cell>
          <table:table-cell table:formula="of:=[.D586]-[.D585]" office:value-type="float" office:value="0.00000335648148148179" calcext:value-type="float">
            <text:p>0,00000335648148148179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B585]+29" office:value-type="float" office:value="16965" calcext:value-type="float">
            <text:p>16965</text:p>
          </table:table-cell>
          <table:table-cell office:value-type="float" office:value="8640000" calcext:value-type="float">
            <text:p>8640000</text:p>
          </table:table-cell>
          <table:table-cell table:formula="of:=[.B586]/[.C586]" office:value-type="float" office:value="0.00196354166666667" calcext:value-type="float">
            <text:p>0,00196354166666667000</text:p>
          </table:table-cell>
          <table:table-cell table:formula="of:=[.D587]-[.D586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B586]+29" office:value-type="float" office:value="16994" calcext:value-type="float">
            <text:p>16994</text:p>
          </table:table-cell>
          <table:table-cell office:value-type="float" office:value="8640000" calcext:value-type="float">
            <text:p>8640000</text:p>
          </table:table-cell>
          <table:table-cell table:formula="of:=[.B587]/[.C587]" office:value-type="float" office:value="0.00196689814814815" calcext:value-type="float">
            <text:p>0,00196689814814815000</text:p>
          </table:table-cell>
          <table:table-cell table:formula="of:=[.D588]-[.D587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B587]+29" office:value-type="float" office:value="17023" calcext:value-type="float">
            <text:p>17023</text:p>
          </table:table-cell>
          <table:table-cell office:value-type="float" office:value="8640000" calcext:value-type="float">
            <text:p>8640000</text:p>
          </table:table-cell>
          <table:table-cell table:formula="of:=[.B588]/[.C588]" office:value-type="float" office:value="0.00197025462962963" calcext:value-type="float">
            <text:p>0,00197025462962963000</text:p>
          </table:table-cell>
          <table:table-cell table:formula="of:=[.D589]-[.D588]" office:value-type="float" office:value="0.00000335648148148179" calcext:value-type="float">
            <text:p>0,00000335648148148179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B588]+29" office:value-type="float" office:value="17052" calcext:value-type="float">
            <text:p>17052</text:p>
          </table:table-cell>
          <table:table-cell office:value-type="float" office:value="8640000" calcext:value-type="float">
            <text:p>8640000</text:p>
          </table:table-cell>
          <table:table-cell table:formula="of:=[.B589]/[.C589]" office:value-type="float" office:value="0.00197361111111111" calcext:value-type="float">
            <text:p>0,00197361111111111000</text:p>
          </table:table-cell>
          <table:table-cell table:formula="of:=[.D590]-[.D589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B589]+29" office:value-type="float" office:value="17081" calcext:value-type="float">
            <text:p>17081</text:p>
          </table:table-cell>
          <table:table-cell office:value-type="float" office:value="8640000" calcext:value-type="float">
            <text:p>8640000</text:p>
          </table:table-cell>
          <table:table-cell table:formula="of:=[.B590]/[.C590]" office:value-type="float" office:value="0.00197696759259259" calcext:value-type="float">
            <text:p>0,00197696759259259000</text:p>
          </table:table-cell>
          <table:table-cell table:formula="of:=[.D591]-[.D590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B590]+29" office:value-type="float" office:value="17110" calcext:value-type="float">
            <text:p>17110</text:p>
          </table:table-cell>
          <table:table-cell office:value-type="float" office:value="8640000" calcext:value-type="float">
            <text:p>8640000</text:p>
          </table:table-cell>
          <table:table-cell table:formula="of:=[.B591]/[.C591]" office:value-type="float" office:value="0.00198032407407407" calcext:value-type="float">
            <text:p>0,00198032407407407000</text:p>
          </table:table-cell>
          <table:table-cell table:formula="of:=[.D592]-[.D591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B591]+29" office:value-type="float" office:value="17139" calcext:value-type="float">
            <text:p>17139</text:p>
          </table:table-cell>
          <table:table-cell office:value-type="float" office:value="8640000" calcext:value-type="float">
            <text:p>8640000</text:p>
          </table:table-cell>
          <table:table-cell table:formula="of:=[.B592]/[.C592]" office:value-type="float" office:value="0.00198368055555556" calcext:value-type="float">
            <text:p>0,00198368055555556000</text:p>
          </table:table-cell>
          <table:table-cell table:formula="of:=[.D593]-[.D592]" office:value-type="float" office:value="0.00000335648148148179" calcext:value-type="float">
            <text:p>0,00000335648148148179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B592]+29" office:value-type="float" office:value="17168" calcext:value-type="float">
            <text:p>17168</text:p>
          </table:table-cell>
          <table:table-cell office:value-type="float" office:value="8640000" calcext:value-type="float">
            <text:p>8640000</text:p>
          </table:table-cell>
          <table:table-cell table:formula="of:=[.B593]/[.C593]" office:value-type="float" office:value="0.00198703703703704" calcext:value-type="float">
            <text:p>0,00198703703703704000</text:p>
          </table:table-cell>
          <table:table-cell table:formula="of:=[.D594]-[.D593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B593]+29" office:value-type="float" office:value="17197" calcext:value-type="float">
            <text:p>17197</text:p>
          </table:table-cell>
          <table:table-cell office:value-type="float" office:value="8640000" calcext:value-type="float">
            <text:p>8640000</text:p>
          </table:table-cell>
          <table:table-cell table:formula="of:=[.B594]/[.C594]" office:value-type="float" office:value="0.00199039351851852" calcext:value-type="float">
            <text:p>0,00199039351851852000</text:p>
          </table:table-cell>
          <table:table-cell table:formula="of:=[.D595]-[.D594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B594]+29" office:value-type="float" office:value="17226" calcext:value-type="float">
            <text:p>17226</text:p>
          </table:table-cell>
          <table:table-cell office:value-type="float" office:value="8640000" calcext:value-type="float">
            <text:p>8640000</text:p>
          </table:table-cell>
          <table:table-cell table:formula="of:=[.B595]/[.C595]" office:value-type="float" office:value="0.00199375" calcext:value-type="float">
            <text:p>0,00199375000000000000</text:p>
          </table:table-cell>
          <table:table-cell table:formula="of:=[.D596]-[.D595]" office:value-type="float" office:value="0.00000335648148148179" calcext:value-type="float">
            <text:p>0,00000335648148148179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B595]+29" office:value-type="float" office:value="17255" calcext:value-type="float">
            <text:p>17255</text:p>
          </table:table-cell>
          <table:table-cell office:value-type="float" office:value="8640000" calcext:value-type="float">
            <text:p>8640000</text:p>
          </table:table-cell>
          <table:table-cell table:formula="of:=[.B596]/[.C596]" office:value-type="float" office:value="0.00199710648148148" calcext:value-type="float">
            <text:p>0,00199710648148148000</text:p>
          </table:table-cell>
          <table:table-cell table:formula="of:=[.D597]-[.D596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B596]+29" office:value-type="float" office:value="17284" calcext:value-type="float">
            <text:p>17284</text:p>
          </table:table-cell>
          <table:table-cell office:value-type="float" office:value="8640000" calcext:value-type="float">
            <text:p>8640000</text:p>
          </table:table-cell>
          <table:table-cell table:formula="of:=[.B597]/[.C597]" office:value-type="float" office:value="0.00200046296296296" calcext:value-type="float">
            <text:p>0,00200046296296296000</text:p>
          </table:table-cell>
          <table:table-cell table:formula="of:=[.D598]-[.D597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B597]+29" office:value-type="float" office:value="17313" calcext:value-type="float">
            <text:p>17313</text:p>
          </table:table-cell>
          <table:table-cell office:value-type="float" office:value="8640000" calcext:value-type="float">
            <text:p>8640000</text:p>
          </table:table-cell>
          <table:table-cell table:formula="of:=[.B598]/[.C598]" office:value-type="float" office:value="0.00200381944444444" calcext:value-type="float">
            <text:p>0,00200381944444444000</text:p>
          </table:table-cell>
          <table:table-cell table:formula="of:=[.D599]-[.D598]" office:value-type="float" office:value="0.00000335648148148179" calcext:value-type="float">
            <text:p>0,00000335648148148179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B598]+29" office:value-type="float" office:value="17342" calcext:value-type="float">
            <text:p>17342</text:p>
          </table:table-cell>
          <table:table-cell office:value-type="float" office:value="8640000" calcext:value-type="float">
            <text:p>8640000</text:p>
          </table:table-cell>
          <table:table-cell table:formula="of:=[.B599]/[.C599]" office:value-type="float" office:value="0.00200717592592593" calcext:value-type="float">
            <text:p>0,00200717592592593000</text:p>
          </table:table-cell>
          <table:table-cell table:formula="of:=[.D600]-[.D599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B599]+29" office:value-type="float" office:value="17371" calcext:value-type="float">
            <text:p>17371</text:p>
          </table:table-cell>
          <table:table-cell office:value-type="float" office:value="8640000" calcext:value-type="float">
            <text:p>8640000</text:p>
          </table:table-cell>
          <table:table-cell table:formula="of:=[.B600]/[.C600]" office:value-type="float" office:value="0.00201053240740741" calcext:value-type="float">
            <text:p>0,00201053240740741000</text:p>
          </table:table-cell>
          <table:table-cell table:formula="of:=[.D601]-[.D600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B600]+29" office:value-type="float" office:value="17400" calcext:value-type="float">
            <text:p>17400</text:p>
          </table:table-cell>
          <table:table-cell office:value-type="float" office:value="8640000" calcext:value-type="float">
            <text:p>8640000</text:p>
          </table:table-cell>
          <table:table-cell table:formula="of:=[.B601]/[.C601]" office:value-type="float" office:value="0.00201388888888889" calcext:value-type="float">
            <text:p>0,00201388888888889000</text:p>
          </table:table-cell>
          <table:table-cell table:formula="of:=[.D602]-[.D601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B601]+29" office:value-type="float" office:value="17429" calcext:value-type="float">
            <text:p>17429</text:p>
          </table:table-cell>
          <table:table-cell office:value-type="float" office:value="8640000" calcext:value-type="float">
            <text:p>8640000</text:p>
          </table:table-cell>
          <table:table-cell table:formula="of:=[.B602]/[.C602]" office:value-type="float" office:value="0.00201724537037037" calcext:value-type="float">
            <text:p>0,00201724537037037000</text:p>
          </table:table-cell>
          <table:table-cell table:formula="of:=[.D603]-[.D602]" office:value-type="float" office:value="0.00000335648148148179" calcext:value-type="float">
            <text:p>0,00000335648148148179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B602]+29" office:value-type="float" office:value="17458" calcext:value-type="float">
            <text:p>17458</text:p>
          </table:table-cell>
          <table:table-cell office:value-type="float" office:value="8640000" calcext:value-type="float">
            <text:p>8640000</text:p>
          </table:table-cell>
          <table:table-cell table:formula="of:=[.B603]/[.C603]" office:value-type="float" office:value="0.00202060185185185" calcext:value-type="float">
            <text:p>0,00202060185185185000</text:p>
          </table:table-cell>
          <table:table-cell table:formula="of:=[.D604]-[.D603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B603]+29" office:value-type="float" office:value="17487" calcext:value-type="float">
            <text:p>17487</text:p>
          </table:table-cell>
          <table:table-cell office:value-type="float" office:value="8640000" calcext:value-type="float">
            <text:p>8640000</text:p>
          </table:table-cell>
          <table:table-cell table:formula="of:=[.B604]/[.C604]" office:value-type="float" office:value="0.00202395833333333" calcext:value-type="float">
            <text:p>0,00202395833333333000</text:p>
          </table:table-cell>
          <table:table-cell table:formula="of:=[.D605]-[.D604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B604]+29" office:value-type="float" office:value="17516" calcext:value-type="float">
            <text:p>17516</text:p>
          </table:table-cell>
          <table:table-cell office:value-type="float" office:value="8640000" calcext:value-type="float">
            <text:p>8640000</text:p>
          </table:table-cell>
          <table:table-cell table:formula="of:=[.B605]/[.C605]" office:value-type="float" office:value="0.00202731481481481" calcext:value-type="float">
            <text:p>0,00202731481481481000</text:p>
          </table:table-cell>
          <table:table-cell table:formula="of:=[.D606]-[.D605]" office:value-type="float" office:value="0.00000335648148148179" calcext:value-type="float">
            <text:p>0,00000335648148148179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B605]+29" office:value-type="float" office:value="17545" calcext:value-type="float">
            <text:p>17545</text:p>
          </table:table-cell>
          <table:table-cell office:value-type="float" office:value="8640000" calcext:value-type="float">
            <text:p>8640000</text:p>
          </table:table-cell>
          <table:table-cell table:formula="of:=[.B606]/[.C606]" office:value-type="float" office:value="0.0020306712962963" calcext:value-type="float">
            <text:p>0,00203067129629630000</text:p>
          </table:table-cell>
          <table:table-cell table:formula="of:=[.D607]-[.D606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B606]+29" office:value-type="float" office:value="17574" calcext:value-type="float">
            <text:p>17574</text:p>
          </table:table-cell>
          <table:table-cell office:value-type="float" office:value="8640000" calcext:value-type="float">
            <text:p>8640000</text:p>
          </table:table-cell>
          <table:table-cell table:formula="of:=[.B607]/[.C607]" office:value-type="float" office:value="0.00203402777777778" calcext:value-type="float">
            <text:p>0,00203402777777778000</text:p>
          </table:table-cell>
          <table:table-cell table:formula="of:=[.D608]-[.D607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B607]+29" office:value-type="float" office:value="17603" calcext:value-type="float">
            <text:p>17603</text:p>
          </table:table-cell>
          <table:table-cell office:value-type="float" office:value="8640000" calcext:value-type="float">
            <text:p>8640000</text:p>
          </table:table-cell>
          <table:table-cell table:formula="of:=[.B608]/[.C608]" office:value-type="float" office:value="0.00203738425925926" calcext:value-type="float">
            <text:p>0,00203738425925926000</text:p>
          </table:table-cell>
          <table:table-cell table:formula="of:=[.D609]-[.D608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B608]+29" office:value-type="float" office:value="17632" calcext:value-type="float">
            <text:p>17632</text:p>
          </table:table-cell>
          <table:table-cell office:value-type="float" office:value="8640000" calcext:value-type="float">
            <text:p>8640000</text:p>
          </table:table-cell>
          <table:table-cell table:formula="of:=[.B609]/[.C609]" office:value-type="float" office:value="0.00204074074074074" calcext:value-type="float">
            <text:p>0,00204074074074074000</text:p>
          </table:table-cell>
          <table:table-cell table:formula="of:=[.D610]-[.D609]" office:value-type="float" office:value="0.00000335648148148179" calcext:value-type="float">
            <text:p>0,00000335648148148179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B609]+29" office:value-type="float" office:value="17661" calcext:value-type="float">
            <text:p>17661</text:p>
          </table:table-cell>
          <table:table-cell office:value-type="float" office:value="8640000" calcext:value-type="float">
            <text:p>8640000</text:p>
          </table:table-cell>
          <table:table-cell table:formula="of:=[.B610]/[.C610]" office:value-type="float" office:value="0.00204409722222222" calcext:value-type="float">
            <text:p>0,00204409722222222000</text:p>
          </table:table-cell>
          <table:table-cell table:formula="of:=[.D611]-[.D610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B610]+29" office:value-type="float" office:value="17690" calcext:value-type="float">
            <text:p>17690</text:p>
          </table:table-cell>
          <table:table-cell office:value-type="float" office:value="8640000" calcext:value-type="float">
            <text:p>8640000</text:p>
          </table:table-cell>
          <table:table-cell table:formula="of:=[.B611]/[.C611]" office:value-type="float" office:value="0.0020474537037037" calcext:value-type="float">
            <text:p>0,00204745370370370000</text:p>
          </table:table-cell>
          <table:table-cell table:formula="of:=[.D612]-[.D611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B611]+29" office:value-type="float" office:value="17719" calcext:value-type="float">
            <text:p>17719</text:p>
          </table:table-cell>
          <table:table-cell office:value-type="float" office:value="8640000" calcext:value-type="float">
            <text:p>8640000</text:p>
          </table:table-cell>
          <table:table-cell table:formula="of:=[.B612]/[.C612]" office:value-type="float" office:value="0.00205081018518519" calcext:value-type="float">
            <text:p>0,00205081018518519000</text:p>
          </table:table-cell>
          <table:table-cell table:formula="of:=[.D613]-[.D612]" office:value-type="float" office:value="0.00000335648148148179" calcext:value-type="float">
            <text:p>0,00000335648148148179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B612]+29" office:value-type="float" office:value="17748" calcext:value-type="float">
            <text:p>17748</text:p>
          </table:table-cell>
          <table:table-cell office:value-type="float" office:value="8640000" calcext:value-type="float">
            <text:p>8640000</text:p>
          </table:table-cell>
          <table:table-cell table:formula="of:=[.B613]/[.C613]" office:value-type="float" office:value="0.00205416666666667" calcext:value-type="float">
            <text:p>0,00205416666666667000</text:p>
          </table:table-cell>
          <table:table-cell table:formula="of:=[.D614]-[.D613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B613]+29" office:value-type="float" office:value="17777" calcext:value-type="float">
            <text:p>17777</text:p>
          </table:table-cell>
          <table:table-cell office:value-type="float" office:value="8640000" calcext:value-type="float">
            <text:p>8640000</text:p>
          </table:table-cell>
          <table:table-cell table:formula="of:=[.B614]/[.C614]" office:value-type="float" office:value="0.00205752314814815" calcext:value-type="float">
            <text:p>0,00205752314814815000</text:p>
          </table:table-cell>
          <table:table-cell table:formula="of:=[.D615]-[.D614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B614]+29" office:value-type="float" office:value="17806" calcext:value-type="float">
            <text:p>17806</text:p>
          </table:table-cell>
          <table:table-cell office:value-type="float" office:value="8640000" calcext:value-type="float">
            <text:p>8640000</text:p>
          </table:table-cell>
          <table:table-cell table:formula="of:=[.B615]/[.C615]" office:value-type="float" office:value="0.00206087962962963" calcext:value-type="float">
            <text:p>0,00206087962962963000</text:p>
          </table:table-cell>
          <table:table-cell table:formula="of:=[.D616]-[.D615]" office:value-type="float" office:value="0.00000335648148148179" calcext:value-type="float">
            <text:p>0,00000335648148148179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B615]+29" office:value-type="float" office:value="17835" calcext:value-type="float">
            <text:p>17835</text:p>
          </table:table-cell>
          <table:table-cell office:value-type="float" office:value="8640000" calcext:value-type="float">
            <text:p>8640000</text:p>
          </table:table-cell>
          <table:table-cell table:formula="of:=[.B616]/[.C616]" office:value-type="float" office:value="0.00206423611111111" calcext:value-type="float">
            <text:p>0,00206423611111111000</text:p>
          </table:table-cell>
          <table:table-cell table:formula="of:=[.D617]-[.D616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B616]+29" office:value-type="float" office:value="17864" calcext:value-type="float">
            <text:p>17864</text:p>
          </table:table-cell>
          <table:table-cell office:value-type="float" office:value="8640000" calcext:value-type="float">
            <text:p>8640000</text:p>
          </table:table-cell>
          <table:table-cell table:formula="of:=[.B617]/[.C617]" office:value-type="float" office:value="0.00206759259259259" calcext:value-type="float">
            <text:p>0,00206759259259259000</text:p>
          </table:table-cell>
          <table:table-cell table:formula="of:=[.D618]-[.D617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B617]+29" office:value-type="float" office:value="17893" calcext:value-type="float">
            <text:p>17893</text:p>
          </table:table-cell>
          <table:table-cell office:value-type="float" office:value="8640000" calcext:value-type="float">
            <text:p>8640000</text:p>
          </table:table-cell>
          <table:table-cell table:formula="of:=[.B618]/[.C618]" office:value-type="float" office:value="0.00207094907407407" calcext:value-type="float">
            <text:p>0,00207094907407407000</text:p>
          </table:table-cell>
          <table:table-cell table:formula="of:=[.D619]-[.D618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B618]+29" office:value-type="float" office:value="17922" calcext:value-type="float">
            <text:p>17922</text:p>
          </table:table-cell>
          <table:table-cell office:value-type="float" office:value="8640000" calcext:value-type="float">
            <text:p>8640000</text:p>
          </table:table-cell>
          <table:table-cell table:formula="of:=[.B619]/[.C619]" office:value-type="float" office:value="0.00207430555555556" calcext:value-type="float">
            <text:p>0,00207430555555556000</text:p>
          </table:table-cell>
          <table:table-cell table:formula="of:=[.D620]-[.D619]" office:value-type="float" office:value="0.00000335648148148179" calcext:value-type="float">
            <text:p>0,00000335648148148179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B619]+29" office:value-type="float" office:value="17951" calcext:value-type="float">
            <text:p>17951</text:p>
          </table:table-cell>
          <table:table-cell office:value-type="float" office:value="8640000" calcext:value-type="float">
            <text:p>8640000</text:p>
          </table:table-cell>
          <table:table-cell table:formula="of:=[.B620]/[.C620]" office:value-type="float" office:value="0.00207766203703704" calcext:value-type="float">
            <text:p>0,00207766203703704000</text:p>
          </table:table-cell>
          <table:table-cell table:formula="of:=[.D621]-[.D620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B620]+29" office:value-type="float" office:value="17980" calcext:value-type="float">
            <text:p>17980</text:p>
          </table:table-cell>
          <table:table-cell office:value-type="float" office:value="8640000" calcext:value-type="float">
            <text:p>8640000</text:p>
          </table:table-cell>
          <table:table-cell table:formula="of:=[.B621]/[.C621]" office:value-type="float" office:value="0.00208101851851852" calcext:value-type="float">
            <text:p>0,00208101851851852000</text:p>
          </table:table-cell>
          <table:table-cell table:formula="of:=[.D622]-[.D621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B621]+29" office:value-type="float" office:value="18009" calcext:value-type="float">
            <text:p>18009</text:p>
          </table:table-cell>
          <table:table-cell office:value-type="float" office:value="8640000" calcext:value-type="float">
            <text:p>8640000</text:p>
          </table:table-cell>
          <table:table-cell table:formula="of:=[.B622]/[.C622]" office:value-type="float" office:value="0.002084375" calcext:value-type="float">
            <text:p>0,00208437500000000000</text:p>
          </table:table-cell>
          <table:table-cell table:formula="of:=[.D623]-[.D622]" office:value-type="float" office:value="0.00000335648148148179" calcext:value-type="float">
            <text:p>0,00000335648148148179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B622]+29" office:value-type="float" office:value="18038" calcext:value-type="float">
            <text:p>18038</text:p>
          </table:table-cell>
          <table:table-cell office:value-type="float" office:value="8640000" calcext:value-type="float">
            <text:p>8640000</text:p>
          </table:table-cell>
          <table:table-cell table:formula="of:=[.B623]/[.C623]" office:value-type="float" office:value="0.00208773148148148" calcext:value-type="float">
            <text:p>0,00208773148148148000</text:p>
          </table:table-cell>
          <table:table-cell table:formula="of:=[.D624]-[.D623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B623]+29" office:value-type="float" office:value="18067" calcext:value-type="float">
            <text:p>18067</text:p>
          </table:table-cell>
          <table:table-cell office:value-type="float" office:value="8640000" calcext:value-type="float">
            <text:p>8640000</text:p>
          </table:table-cell>
          <table:table-cell table:formula="of:=[.B624]/[.C624]" office:value-type="float" office:value="0.00209108796296296" calcext:value-type="float">
            <text:p>0,00209108796296296000</text:p>
          </table:table-cell>
          <table:table-cell table:formula="of:=[.D625]-[.D624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B624]+29" office:value-type="float" office:value="18096" calcext:value-type="float">
            <text:p>18096</text:p>
          </table:table-cell>
          <table:table-cell office:value-type="float" office:value="8640000" calcext:value-type="float">
            <text:p>8640000</text:p>
          </table:table-cell>
          <table:table-cell table:formula="of:=[.B625]/[.C625]" office:value-type="float" office:value="0.00209444444444444" calcext:value-type="float">
            <text:p>0,00209444444444444000</text:p>
          </table:table-cell>
          <table:table-cell table:formula="of:=[.D626]-[.D625]" office:value-type="float" office:value="0.00000335648148148179" calcext:value-type="float">
            <text:p>0,0000033564814814817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B625]+29" office:value-type="float" office:value="18125" calcext:value-type="float">
            <text:p>18125</text:p>
          </table:table-cell>
          <table:table-cell office:value-type="float" office:value="8640000" calcext:value-type="float">
            <text:p>8640000</text:p>
          </table:table-cell>
          <table:table-cell table:formula="of:=[.B626]/[.C626]" office:value-type="float" office:value="0.00209780092592593" calcext:value-type="float">
            <text:p>0,00209780092592593000</text:p>
          </table:table-cell>
          <table:table-cell table:formula="of:=[.D627]-[.D626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B626]+29" office:value-type="float" office:value="18154" calcext:value-type="float">
            <text:p>18154</text:p>
          </table:table-cell>
          <table:table-cell office:value-type="float" office:value="8640000" calcext:value-type="float">
            <text:p>8640000</text:p>
          </table:table-cell>
          <table:table-cell table:formula="of:=[.B627]/[.C627]" office:value-type="float" office:value="0.00210115740740741" calcext:value-type="float">
            <text:p>0,00210115740740741000</text:p>
          </table:table-cell>
          <table:table-cell table:formula="of:=[.D628]-[.D627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B627]+29" office:value-type="float" office:value="18183" calcext:value-type="float">
            <text:p>18183</text:p>
          </table:table-cell>
          <table:table-cell office:value-type="float" office:value="8640000" calcext:value-type="float">
            <text:p>8640000</text:p>
          </table:table-cell>
          <table:table-cell table:formula="of:=[.B628]/[.C628]" office:value-type="float" office:value="0.00210451388888889" calcext:value-type="float">
            <text:p>0,00210451388888889000</text:p>
          </table:table-cell>
          <table:table-cell table:formula="of:=[.D629]-[.D628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B628]+29" office:value-type="float" office:value="18212" calcext:value-type="float">
            <text:p>18212</text:p>
          </table:table-cell>
          <table:table-cell office:value-type="float" office:value="8640000" calcext:value-type="float">
            <text:p>8640000</text:p>
          </table:table-cell>
          <table:table-cell table:formula="of:=[.B629]/[.C629]" office:value-type="float" office:value="0.00210787037037037" calcext:value-type="float">
            <text:p>0,00210787037037037000</text:p>
          </table:table-cell>
          <table:table-cell table:formula="of:=[.D630]-[.D629]" office:value-type="float" office:value="0.00000335648148148179" calcext:value-type="float">
            <text:p>0,00000335648148148179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B629]+29" office:value-type="float" office:value="18241" calcext:value-type="float">
            <text:p>18241</text:p>
          </table:table-cell>
          <table:table-cell office:value-type="float" office:value="8640000" calcext:value-type="float">
            <text:p>8640000</text:p>
          </table:table-cell>
          <table:table-cell table:formula="of:=[.B630]/[.C630]" office:value-type="float" office:value="0.00211122685185185" calcext:value-type="float">
            <text:p>0,00211122685185185000</text:p>
          </table:table-cell>
          <table:table-cell table:formula="of:=[.D631]-[.D630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B630]+29" office:value-type="float" office:value="18270" calcext:value-type="float">
            <text:p>18270</text:p>
          </table:table-cell>
          <table:table-cell office:value-type="float" office:value="8640000" calcext:value-type="float">
            <text:p>8640000</text:p>
          </table:table-cell>
          <table:table-cell table:formula="of:=[.B631]/[.C631]" office:value-type="float" office:value="0.00211458333333333" calcext:value-type="float">
            <text:p>0,00211458333333333000</text:p>
          </table:table-cell>
          <table:table-cell table:formula="of:=[.D632]-[.D631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B631]+29" office:value-type="float" office:value="18299" calcext:value-type="float">
            <text:p>18299</text:p>
          </table:table-cell>
          <table:table-cell office:value-type="float" office:value="8640000" calcext:value-type="float">
            <text:p>8640000</text:p>
          </table:table-cell>
          <table:table-cell table:formula="of:=[.B632]/[.C632]" office:value-type="float" office:value="0.00211793981481481" calcext:value-type="float">
            <text:p>0,00211793981481481000</text:p>
          </table:table-cell>
          <table:table-cell table:formula="of:=[.D633]-[.D632]" office:value-type="float" office:value="0.00000335648148148179" calcext:value-type="float">
            <text:p>0,00000335648148148179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B632]+29" office:value-type="float" office:value="18328" calcext:value-type="float">
            <text:p>18328</text:p>
          </table:table-cell>
          <table:table-cell office:value-type="float" office:value="8640000" calcext:value-type="float">
            <text:p>8640000</text:p>
          </table:table-cell>
          <table:table-cell table:formula="of:=[.B633]/[.C633]" office:value-type="float" office:value="0.0021212962962963" calcext:value-type="float">
            <text:p>0,00212129629629630000</text:p>
          </table:table-cell>
          <table:table-cell table:formula="of:=[.D634]-[.D633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B633]+29" office:value-type="float" office:value="18357" calcext:value-type="float">
            <text:p>18357</text:p>
          </table:table-cell>
          <table:table-cell office:value-type="float" office:value="8640000" calcext:value-type="float">
            <text:p>8640000</text:p>
          </table:table-cell>
          <table:table-cell table:formula="of:=[.B634]/[.C634]" office:value-type="float" office:value="0.00212465277777778" calcext:value-type="float">
            <text:p>0,00212465277777778000</text:p>
          </table:table-cell>
          <table:table-cell table:formula="of:=[.D635]-[.D634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B634]+29" office:value-type="float" office:value="18386" calcext:value-type="float">
            <text:p>18386</text:p>
          </table:table-cell>
          <table:table-cell office:value-type="float" office:value="8640000" calcext:value-type="float">
            <text:p>8640000</text:p>
          </table:table-cell>
          <table:table-cell table:formula="of:=[.B635]/[.C635]" office:value-type="float" office:value="0.00212800925925926" calcext:value-type="float">
            <text:p>0,00212800925925926000</text:p>
          </table:table-cell>
          <table:table-cell table:formula="of:=[.D636]-[.D635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B635]+29" office:value-type="float" office:value="18415" calcext:value-type="float">
            <text:p>18415</text:p>
          </table:table-cell>
          <table:table-cell office:value-type="float" office:value="8640000" calcext:value-type="float">
            <text:p>8640000</text:p>
          </table:table-cell>
          <table:table-cell table:formula="of:=[.B636]/[.C636]" office:value-type="float" office:value="0.00213136574074074" calcext:value-type="float">
            <text:p>0,00213136574074074000</text:p>
          </table:table-cell>
          <table:table-cell table:formula="of:=[.D637]-[.D636]" office:value-type="float" office:value="0.00000335648148148179" calcext:value-type="float">
            <text:p>0,00000335648148148179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B636]+29" office:value-type="float" office:value="18444" calcext:value-type="float">
            <text:p>18444</text:p>
          </table:table-cell>
          <table:table-cell office:value-type="float" office:value="8640000" calcext:value-type="float">
            <text:p>8640000</text:p>
          </table:table-cell>
          <table:table-cell table:formula="of:=[.B637]/[.C637]" office:value-type="float" office:value="0.00213472222222222" calcext:value-type="float">
            <text:p>0,00213472222222222000</text:p>
          </table:table-cell>
          <table:table-cell table:formula="of:=[.D638]-[.D637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B637]+29" office:value-type="float" office:value="18473" calcext:value-type="float">
            <text:p>18473</text:p>
          </table:table-cell>
          <table:table-cell office:value-type="float" office:value="8640000" calcext:value-type="float">
            <text:p>8640000</text:p>
          </table:table-cell>
          <table:table-cell table:formula="of:=[.B638]/[.C638]" office:value-type="float" office:value="0.0021380787037037" calcext:value-type="float">
            <text:p>0,00213807870370370000</text:p>
          </table:table-cell>
          <table:table-cell table:formula="of:=[.D639]-[.D638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B638]+29" office:value-type="float" office:value="18502" calcext:value-type="float">
            <text:p>18502</text:p>
          </table:table-cell>
          <table:table-cell office:value-type="float" office:value="8640000" calcext:value-type="float">
            <text:p>8640000</text:p>
          </table:table-cell>
          <table:table-cell table:formula="of:=[.B639]/[.C639]" office:value-type="float" office:value="0.00214143518518519" calcext:value-type="float">
            <text:p>0,00214143518518519000</text:p>
          </table:table-cell>
          <table:table-cell table:formula="of:=[.D640]-[.D639]" office:value-type="float" office:value="0.00000335648148148179" calcext:value-type="float">
            <text:p>0,00000335648148148179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B639]+29" office:value-type="float" office:value="18531" calcext:value-type="float">
            <text:p>18531</text:p>
          </table:table-cell>
          <table:table-cell office:value-type="float" office:value="8640000" calcext:value-type="float">
            <text:p>8640000</text:p>
          </table:table-cell>
          <table:table-cell table:formula="of:=[.B640]/[.C640]" office:value-type="float" office:value="0.00214479166666667" calcext:value-type="float">
            <text:p>0,00214479166666667000</text:p>
          </table:table-cell>
          <table:table-cell table:formula="of:=[.D641]-[.D640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B640]+29" office:value-type="float" office:value="18560" calcext:value-type="float">
            <text:p>18560</text:p>
          </table:table-cell>
          <table:table-cell office:value-type="float" office:value="8640000" calcext:value-type="float">
            <text:p>8640000</text:p>
          </table:table-cell>
          <table:table-cell table:formula="of:=[.B641]/[.C641]" office:value-type="float" office:value="0.00214814814814815" calcext:value-type="float">
            <text:p>0,00214814814814815000</text:p>
          </table:table-cell>
          <table:table-cell table:formula="of:=[.D642]-[.D641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B641]+29" office:value-type="float" office:value="18589" calcext:value-type="float">
            <text:p>18589</text:p>
          </table:table-cell>
          <table:table-cell office:value-type="float" office:value="8640000" calcext:value-type="float">
            <text:p>8640000</text:p>
          </table:table-cell>
          <table:table-cell table:formula="of:=[.B642]/[.C642]" office:value-type="float" office:value="0.00215150462962963" calcext:value-type="float">
            <text:p>0,00215150462962963000</text:p>
          </table:table-cell>
          <table:table-cell table:formula="of:=[.D643]-[.D642]" office:value-type="float" office:value="0.00000335648148148179" calcext:value-type="float">
            <text:p>0,00000335648148148179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B642]+29" office:value-type="float" office:value="18618" calcext:value-type="float">
            <text:p>18618</text:p>
          </table:table-cell>
          <table:table-cell office:value-type="float" office:value="8640000" calcext:value-type="float">
            <text:p>8640000</text:p>
          </table:table-cell>
          <table:table-cell table:formula="of:=[.B643]/[.C643]" office:value-type="float" office:value="0.00215486111111111" calcext:value-type="float">
            <text:p>0,00215486111111111000</text:p>
          </table:table-cell>
          <table:table-cell table:formula="of:=[.D644]-[.D643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B643]+29" office:value-type="float" office:value="18647" calcext:value-type="float">
            <text:p>18647</text:p>
          </table:table-cell>
          <table:table-cell office:value-type="float" office:value="8640000" calcext:value-type="float">
            <text:p>8640000</text:p>
          </table:table-cell>
          <table:table-cell table:formula="of:=[.B644]/[.C644]" office:value-type="float" office:value="0.00215821759259259" calcext:value-type="float">
            <text:p>0,00215821759259259000</text:p>
          </table:table-cell>
          <table:table-cell table:formula="of:=[.D645]-[.D644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B644]+29" office:value-type="float" office:value="18676" calcext:value-type="float">
            <text:p>18676</text:p>
          </table:table-cell>
          <table:table-cell office:value-type="float" office:value="8640000" calcext:value-type="float">
            <text:p>8640000</text:p>
          </table:table-cell>
          <table:table-cell table:formula="of:=[.B645]/[.C645]" office:value-type="float" office:value="0.00216157407407407" calcext:value-type="float">
            <text:p>0,00216157407407407000</text:p>
          </table:table-cell>
          <table:table-cell table:formula="of:=[.D646]-[.D645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B645]+29" office:value-type="float" office:value="18705" calcext:value-type="float">
            <text:p>18705</text:p>
          </table:table-cell>
          <table:table-cell office:value-type="float" office:value="8640000" calcext:value-type="float">
            <text:p>8640000</text:p>
          </table:table-cell>
          <table:table-cell table:formula="of:=[.B646]/[.C646]" office:value-type="float" office:value="0.00216493055555556" calcext:value-type="float">
            <text:p>0,00216493055555556000</text:p>
          </table:table-cell>
          <table:table-cell table:formula="of:=[.D647]-[.D646]" office:value-type="float" office:value="0.00000335648148148179" calcext:value-type="float">
            <text:p>0,00000335648148148179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B646]+29" office:value-type="float" office:value="18734" calcext:value-type="float">
            <text:p>18734</text:p>
          </table:table-cell>
          <table:table-cell office:value-type="float" office:value="8640000" calcext:value-type="float">
            <text:p>8640000</text:p>
          </table:table-cell>
          <table:table-cell table:formula="of:=[.B647]/[.C647]" office:value-type="float" office:value="0.00216828703703704" calcext:value-type="float">
            <text:p>0,00216828703703704000</text:p>
          </table:table-cell>
          <table:table-cell table:formula="of:=[.D648]-[.D647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B647]+29" office:value-type="float" office:value="18763" calcext:value-type="float">
            <text:p>18763</text:p>
          </table:table-cell>
          <table:table-cell office:value-type="float" office:value="8640000" calcext:value-type="float">
            <text:p>8640000</text:p>
          </table:table-cell>
          <table:table-cell table:formula="of:=[.B648]/[.C648]" office:value-type="float" office:value="0.00217164351851852" calcext:value-type="float">
            <text:p>0,00217164351851852000</text:p>
          </table:table-cell>
          <table:table-cell table:formula="of:=[.D649]-[.D648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B648]+29" office:value-type="float" office:value="18792" calcext:value-type="float">
            <text:p>18792</text:p>
          </table:table-cell>
          <table:table-cell office:value-type="float" office:value="8640000" calcext:value-type="float">
            <text:p>8640000</text:p>
          </table:table-cell>
          <table:table-cell table:formula="of:=[.B649]/[.C649]" office:value-type="float" office:value="0.002175" calcext:value-type="float">
            <text:p>0,00217500000000000000</text:p>
          </table:table-cell>
          <table:table-cell table:formula="of:=[.D650]-[.D649]" office:value-type="float" office:value="0.00000335648148148179" calcext:value-type="float">
            <text:p>0,00000335648148148179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B649]+29" office:value-type="float" office:value="18821" calcext:value-type="float">
            <text:p>18821</text:p>
          </table:table-cell>
          <table:table-cell office:value-type="float" office:value="8640000" calcext:value-type="float">
            <text:p>8640000</text:p>
          </table:table-cell>
          <table:table-cell table:formula="of:=[.B650]/[.C650]" office:value-type="float" office:value="0.00217835648148148" calcext:value-type="float">
            <text:p>0,00217835648148148000</text:p>
          </table:table-cell>
          <table:table-cell table:formula="of:=[.D651]-[.D650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B650]+29" office:value-type="float" office:value="18850" calcext:value-type="float">
            <text:p>18850</text:p>
          </table:table-cell>
          <table:table-cell office:value-type="float" office:value="8640000" calcext:value-type="float">
            <text:p>8640000</text:p>
          </table:table-cell>
          <table:table-cell table:formula="of:=[.B651]/[.C651]" office:value-type="float" office:value="0.00218171296296296" calcext:value-type="float">
            <text:p>0,00218171296296296000</text:p>
          </table:table-cell>
          <table:table-cell table:formula="of:=[.D652]-[.D651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B651]+29" office:value-type="float" office:value="18879" calcext:value-type="float">
            <text:p>18879</text:p>
          </table:table-cell>
          <table:table-cell office:value-type="float" office:value="8640000" calcext:value-type="float">
            <text:p>8640000</text:p>
          </table:table-cell>
          <table:table-cell table:formula="of:=[.B652]/[.C652]" office:value-type="float" office:value="0.00218506944444444" calcext:value-type="float">
            <text:p>0,00218506944444444000</text:p>
          </table:table-cell>
          <table:table-cell table:formula="of:=[.D653]-[.D652]" office:value-type="float" office:value="0.00000335648148148179" calcext:value-type="float">
            <text:p>0,00000335648148148179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B652]+29" office:value-type="float" office:value="18908" calcext:value-type="float">
            <text:p>18908</text:p>
          </table:table-cell>
          <table:table-cell office:value-type="float" office:value="8640000" calcext:value-type="float">
            <text:p>8640000</text:p>
          </table:table-cell>
          <table:table-cell table:formula="of:=[.B653]/[.C653]" office:value-type="float" office:value="0.00218842592592593" calcext:value-type="float">
            <text:p>0,00218842592592593000</text:p>
          </table:table-cell>
          <table:table-cell table:formula="of:=[.D654]-[.D653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B653]+29" office:value-type="float" office:value="18937" calcext:value-type="float">
            <text:p>18937</text:p>
          </table:table-cell>
          <table:table-cell office:value-type="float" office:value="8640000" calcext:value-type="float">
            <text:p>8640000</text:p>
          </table:table-cell>
          <table:table-cell table:formula="of:=[.B654]/[.C654]" office:value-type="float" office:value="0.00219178240740741" calcext:value-type="float">
            <text:p>0,00219178240740741000</text:p>
          </table:table-cell>
          <table:table-cell table:formula="of:=[.D655]-[.D654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B654]+29" office:value-type="float" office:value="18966" calcext:value-type="float">
            <text:p>18966</text:p>
          </table:table-cell>
          <table:table-cell office:value-type="float" office:value="8640000" calcext:value-type="float">
            <text:p>8640000</text:p>
          </table:table-cell>
          <table:table-cell table:formula="of:=[.B655]/[.C655]" office:value-type="float" office:value="0.00219513888888889" calcext:value-type="float">
            <text:p>0,00219513888888889000</text:p>
          </table:table-cell>
          <table:table-cell table:formula="of:=[.D656]-[.D655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B655]+29" office:value-type="float" office:value="18995" calcext:value-type="float">
            <text:p>18995</text:p>
          </table:table-cell>
          <table:table-cell office:value-type="float" office:value="8640000" calcext:value-type="float">
            <text:p>8640000</text:p>
          </table:table-cell>
          <table:table-cell table:formula="of:=[.B656]/[.C656]" office:value-type="float" office:value="0.00219849537037037" calcext:value-type="float">
            <text:p>0,00219849537037037000</text:p>
          </table:table-cell>
          <table:table-cell table:formula="of:=[.D657]-[.D656]" office:value-type="float" office:value="0.00000335648148148179" calcext:value-type="float">
            <text:p>0,00000335648148148179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B656]+29" office:value-type="float" office:value="19024" calcext:value-type="float">
            <text:p>19024</text:p>
          </table:table-cell>
          <table:table-cell office:value-type="float" office:value="8640000" calcext:value-type="float">
            <text:p>8640000</text:p>
          </table:table-cell>
          <table:table-cell table:formula="of:=[.B657]/[.C657]" office:value-type="float" office:value="0.00220185185185185" calcext:value-type="float">
            <text:p>0,00220185185185185000</text:p>
          </table:table-cell>
          <table:table-cell table:formula="of:=[.D658]-[.D657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B657]+29" office:value-type="float" office:value="19053" calcext:value-type="float">
            <text:p>19053</text:p>
          </table:table-cell>
          <table:table-cell office:value-type="float" office:value="8640000" calcext:value-type="float">
            <text:p>8640000</text:p>
          </table:table-cell>
          <table:table-cell table:formula="of:=[.B658]/[.C658]" office:value-type="float" office:value="0.00220520833333333" calcext:value-type="float">
            <text:p>0,00220520833333333000</text:p>
          </table:table-cell>
          <table:table-cell table:formula="of:=[.D659]-[.D658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B658]+29" office:value-type="float" office:value="19082" calcext:value-type="float">
            <text:p>19082</text:p>
          </table:table-cell>
          <table:table-cell office:value-type="float" office:value="8640000" calcext:value-type="float">
            <text:p>8640000</text:p>
          </table:table-cell>
          <table:table-cell table:formula="of:=[.B659]/[.C659]" office:value-type="float" office:value="0.00220856481481481" calcext:value-type="float">
            <text:p>0,00220856481481481000</text:p>
          </table:table-cell>
          <table:table-cell table:formula="of:=[.D660]-[.D659]" office:value-type="float" office:value="0.00000335648148148179" calcext:value-type="float">
            <text:p>0,00000335648148148179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B659]+29" office:value-type="float" office:value="19111" calcext:value-type="float">
            <text:p>19111</text:p>
          </table:table-cell>
          <table:table-cell office:value-type="float" office:value="8640000" calcext:value-type="float">
            <text:p>8640000</text:p>
          </table:table-cell>
          <table:table-cell table:formula="of:=[.B660]/[.C660]" office:value-type="float" office:value="0.0022119212962963" calcext:value-type="float">
            <text:p>0,00221192129629630000</text:p>
          </table:table-cell>
          <table:table-cell table:formula="of:=[.D661]-[.D660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B660]+29" office:value-type="float" office:value="19140" calcext:value-type="float">
            <text:p>19140</text:p>
          </table:table-cell>
          <table:table-cell office:value-type="float" office:value="8640000" calcext:value-type="float">
            <text:p>8640000</text:p>
          </table:table-cell>
          <table:table-cell table:formula="of:=[.B661]/[.C661]" office:value-type="float" office:value="0.00221527777777778" calcext:value-type="float">
            <text:p>0,00221527777777778000</text:p>
          </table:table-cell>
          <table:table-cell table:formula="of:=[.D662]-[.D661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B661]+29" office:value-type="float" office:value="19169" calcext:value-type="float">
            <text:p>19169</text:p>
          </table:table-cell>
          <table:table-cell office:value-type="float" office:value="8640000" calcext:value-type="float">
            <text:p>8640000</text:p>
          </table:table-cell>
          <table:table-cell table:formula="of:=[.B662]/[.C662]" office:value-type="float" office:value="0.00221863425925926" calcext:value-type="float">
            <text:p>0,00221863425925926000</text:p>
          </table:table-cell>
          <table:table-cell table:formula="of:=[.D663]-[.D662]" office:value-type="float" office:value="0.00000335648148148179" calcext:value-type="float">
            <text:p>0,00000335648148148179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B662]+29" office:value-type="float" office:value="19198" calcext:value-type="float">
            <text:p>19198</text:p>
          </table:table-cell>
          <table:table-cell office:value-type="float" office:value="8640000" calcext:value-type="float">
            <text:p>8640000</text:p>
          </table:table-cell>
          <table:table-cell table:formula="of:=[.B663]/[.C663]" office:value-type="float" office:value="0.00222199074074074" calcext:value-type="float">
            <text:p>0,00222199074074074000</text:p>
          </table:table-cell>
          <table:table-cell table:formula="of:=[.D664]-[.D663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B663]+29" office:value-type="float" office:value="19227" calcext:value-type="float">
            <text:p>19227</text:p>
          </table:table-cell>
          <table:table-cell office:value-type="float" office:value="8640000" calcext:value-type="float">
            <text:p>8640000</text:p>
          </table:table-cell>
          <table:table-cell table:formula="of:=[.B664]/[.C664]" office:value-type="float" office:value="0.00222534722222222" calcext:value-type="float">
            <text:p>0,00222534722222222000</text:p>
          </table:table-cell>
          <table:table-cell table:formula="of:=[.D665]-[.D664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B664]+29" office:value-type="float" office:value="19256" calcext:value-type="float">
            <text:p>19256</text:p>
          </table:table-cell>
          <table:table-cell office:value-type="float" office:value="8640000" calcext:value-type="float">
            <text:p>8640000</text:p>
          </table:table-cell>
          <table:table-cell table:formula="of:=[.B665]/[.C665]" office:value-type="float" office:value="0.0022287037037037" calcext:value-type="float">
            <text:p>0,00222870370370370000</text:p>
          </table:table-cell>
          <table:table-cell table:formula="of:=[.D666]-[.D665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B665]+29" office:value-type="float" office:value="19285" calcext:value-type="float">
            <text:p>19285</text:p>
          </table:table-cell>
          <table:table-cell office:value-type="float" office:value="8640000" calcext:value-type="float">
            <text:p>8640000</text:p>
          </table:table-cell>
          <table:table-cell table:formula="of:=[.B666]/[.C666]" office:value-type="float" office:value="0.00223206018518519" calcext:value-type="float">
            <text:p>0,00223206018518519000</text:p>
          </table:table-cell>
          <table:table-cell table:formula="of:=[.D667]-[.D666]" office:value-type="float" office:value="0.00000335648148148179" calcext:value-type="float">
            <text:p>0,00000335648148148179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B666]+29" office:value-type="float" office:value="19314" calcext:value-type="float">
            <text:p>19314</text:p>
          </table:table-cell>
          <table:table-cell office:value-type="float" office:value="8640000" calcext:value-type="float">
            <text:p>8640000</text:p>
          </table:table-cell>
          <table:table-cell table:formula="of:=[.B667]/[.C667]" office:value-type="float" office:value="0.00223541666666667" calcext:value-type="float">
            <text:p>0,00223541666666667000</text:p>
          </table:table-cell>
          <table:table-cell table:formula="of:=[.D668]-[.D667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B667]+29" office:value-type="float" office:value="19343" calcext:value-type="float">
            <text:p>19343</text:p>
          </table:table-cell>
          <table:table-cell office:value-type="float" office:value="8640000" calcext:value-type="float">
            <text:p>8640000</text:p>
          </table:table-cell>
          <table:table-cell table:formula="of:=[.B668]/[.C668]" office:value-type="float" office:value="0.00223877314814815" calcext:value-type="float">
            <text:p>0,00223877314814815000</text:p>
          </table:table-cell>
          <table:table-cell table:formula="of:=[.D669]-[.D668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B668]+29" office:value-type="float" office:value="19372" calcext:value-type="float">
            <text:p>19372</text:p>
          </table:table-cell>
          <table:table-cell office:value-type="float" office:value="8640000" calcext:value-type="float">
            <text:p>8640000</text:p>
          </table:table-cell>
          <table:table-cell table:formula="of:=[.B669]/[.C669]" office:value-type="float" office:value="0.00224212962962963" calcext:value-type="float">
            <text:p>0,00224212962962963000</text:p>
          </table:table-cell>
          <table:table-cell table:formula="of:=[.D670]-[.D669]" office:value-type="float" office:value="0.00000335648148148179" calcext:value-type="float">
            <text:p>0,00000335648148148179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B669]+29" office:value-type="float" office:value="19401" calcext:value-type="float">
            <text:p>19401</text:p>
          </table:table-cell>
          <table:table-cell office:value-type="float" office:value="8640000" calcext:value-type="float">
            <text:p>8640000</text:p>
          </table:table-cell>
          <table:table-cell table:formula="of:=[.B670]/[.C670]" office:value-type="float" office:value="0.00224548611111111" calcext:value-type="float">
            <text:p>0,00224548611111111000</text:p>
          </table:table-cell>
          <table:table-cell table:formula="of:=[.D671]-[.D670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B670]+29" office:value-type="float" office:value="19430" calcext:value-type="float">
            <text:p>19430</text:p>
          </table:table-cell>
          <table:table-cell office:value-type="float" office:value="8640000" calcext:value-type="float">
            <text:p>8640000</text:p>
          </table:table-cell>
          <table:table-cell table:formula="of:=[.B671]/[.C671]" office:value-type="float" office:value="0.00224884259259259" calcext:value-type="float">
            <text:p>0,00224884259259259000</text:p>
          </table:table-cell>
          <table:table-cell table:formula="of:=[.D672]-[.D671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B671]+29" office:value-type="float" office:value="19459" calcext:value-type="float">
            <text:p>19459</text:p>
          </table:table-cell>
          <table:table-cell office:value-type="float" office:value="8640000" calcext:value-type="float">
            <text:p>8640000</text:p>
          </table:table-cell>
          <table:table-cell table:formula="of:=[.B672]/[.C672]" office:value-type="float" office:value="0.00225219907407407" calcext:value-type="float">
            <text:p>0,00225219907407407000</text:p>
          </table:table-cell>
          <table:table-cell table:formula="of:=[.D673]-[.D672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B672]+29" office:value-type="float" office:value="19488" calcext:value-type="float">
            <text:p>19488</text:p>
          </table:table-cell>
          <table:table-cell office:value-type="float" office:value="8640000" calcext:value-type="float">
            <text:p>8640000</text:p>
          </table:table-cell>
          <table:table-cell table:formula="of:=[.B673]/[.C673]" office:value-type="float" office:value="0.00225555555555556" calcext:value-type="float">
            <text:p>0,00225555555555556000</text:p>
          </table:table-cell>
          <table:table-cell table:formula="of:=[.D674]-[.D673]" office:value-type="float" office:value="0.00000335648148148179" calcext:value-type="float">
            <text:p>0,00000335648148148179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B673]+29" office:value-type="float" office:value="19517" calcext:value-type="float">
            <text:p>19517</text:p>
          </table:table-cell>
          <table:table-cell office:value-type="float" office:value="8640000" calcext:value-type="float">
            <text:p>8640000</text:p>
          </table:table-cell>
          <table:table-cell table:formula="of:=[.B674]/[.C674]" office:value-type="float" office:value="0.00225891203703704" calcext:value-type="float">
            <text:p>0,00225891203703704000</text:p>
          </table:table-cell>
          <table:table-cell table:formula="of:=[.D675]-[.D674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B674]+29" office:value-type="float" office:value="19546" calcext:value-type="float">
            <text:p>19546</text:p>
          </table:table-cell>
          <table:table-cell office:value-type="float" office:value="8640000" calcext:value-type="float">
            <text:p>8640000</text:p>
          </table:table-cell>
          <table:table-cell table:formula="of:=[.B675]/[.C675]" office:value-type="float" office:value="0.00226226851851852" calcext:value-type="float">
            <text:p>0,00226226851851852000</text:p>
          </table:table-cell>
          <table:table-cell table:formula="of:=[.D676]-[.D675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B675]+29" office:value-type="float" office:value="19575" calcext:value-type="float">
            <text:p>19575</text:p>
          </table:table-cell>
          <table:table-cell office:value-type="float" office:value="8640000" calcext:value-type="float">
            <text:p>8640000</text:p>
          </table:table-cell>
          <table:table-cell table:formula="of:=[.B676]/[.C676]" office:value-type="float" office:value="0.002265625" calcext:value-type="float">
            <text:p>0,00226562500000000000</text:p>
          </table:table-cell>
          <table:table-cell table:formula="of:=[.D677]-[.D676]" office:value-type="float" office:value="0.00000335648148148179" calcext:value-type="float">
            <text:p>0,00000335648148148179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B676]+29" office:value-type="float" office:value="19604" calcext:value-type="float">
            <text:p>19604</text:p>
          </table:table-cell>
          <table:table-cell office:value-type="float" office:value="8640000" calcext:value-type="float">
            <text:p>8640000</text:p>
          </table:table-cell>
          <table:table-cell table:formula="of:=[.B677]/[.C677]" office:value-type="float" office:value="0.00226898148148148" calcext:value-type="float">
            <text:p>0,00226898148148148000</text:p>
          </table:table-cell>
          <table:table-cell table:formula="of:=[.D678]-[.D677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B677]+29" office:value-type="float" office:value="19633" calcext:value-type="float">
            <text:p>19633</text:p>
          </table:table-cell>
          <table:table-cell office:value-type="float" office:value="8640000" calcext:value-type="float">
            <text:p>8640000</text:p>
          </table:table-cell>
          <table:table-cell table:formula="of:=[.B678]/[.C678]" office:value-type="float" office:value="0.00227233796296296" calcext:value-type="float">
            <text:p>0,00227233796296296000</text:p>
          </table:table-cell>
          <table:table-cell table:formula="of:=[.D679]-[.D678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B678]+29" office:value-type="float" office:value="19662" calcext:value-type="float">
            <text:p>19662</text:p>
          </table:table-cell>
          <table:table-cell office:value-type="float" office:value="8640000" calcext:value-type="float">
            <text:p>8640000</text:p>
          </table:table-cell>
          <table:table-cell table:formula="of:=[.B679]/[.C679]" office:value-type="float" office:value="0.00227569444444444" calcext:value-type="float">
            <text:p>0,00227569444444444000</text:p>
          </table:table-cell>
          <table:table-cell table:formula="of:=[.D680]-[.D679]" office:value-type="float" office:value="0.00000335648148148179" calcext:value-type="float">
            <text:p>0,00000335648148148179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B679]+29" office:value-type="float" office:value="19691" calcext:value-type="float">
            <text:p>19691</text:p>
          </table:table-cell>
          <table:table-cell office:value-type="float" office:value="8640000" calcext:value-type="float">
            <text:p>8640000</text:p>
          </table:table-cell>
          <table:table-cell table:formula="of:=[.B680]/[.C680]" office:value-type="float" office:value="0.00227905092592593" calcext:value-type="float">
            <text:p>0,00227905092592593000</text:p>
          </table:table-cell>
          <table:table-cell table:formula="of:=[.D681]-[.D680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B680]+29" office:value-type="float" office:value="19720" calcext:value-type="float">
            <text:p>19720</text:p>
          </table:table-cell>
          <table:table-cell office:value-type="float" office:value="8640000" calcext:value-type="float">
            <text:p>8640000</text:p>
          </table:table-cell>
          <table:table-cell table:formula="of:=[.B681]/[.C681]" office:value-type="float" office:value="0.00228240740740741" calcext:value-type="float">
            <text:p>0,00228240740740741000</text:p>
          </table:table-cell>
          <table:table-cell table:formula="of:=[.D682]-[.D681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B681]+29" office:value-type="float" office:value="19749" calcext:value-type="float">
            <text:p>19749</text:p>
          </table:table-cell>
          <table:table-cell office:value-type="float" office:value="8640000" calcext:value-type="float">
            <text:p>8640000</text:p>
          </table:table-cell>
          <table:table-cell table:formula="of:=[.B682]/[.C682]" office:value-type="float" office:value="0.00228576388888889" calcext:value-type="float">
            <text:p>0,00228576388888889000</text:p>
          </table:table-cell>
          <table:table-cell table:formula="of:=[.D683]-[.D682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B682]+29" office:value-type="float" office:value="19778" calcext:value-type="float">
            <text:p>19778</text:p>
          </table:table-cell>
          <table:table-cell office:value-type="float" office:value="8640000" calcext:value-type="float">
            <text:p>8640000</text:p>
          </table:table-cell>
          <table:table-cell table:formula="of:=[.B683]/[.C683]" office:value-type="float" office:value="0.00228912037037037" calcext:value-type="float">
            <text:p>0,00228912037037037000</text:p>
          </table:table-cell>
          <table:table-cell table:formula="of:=[.D684]-[.D683]" office:value-type="float" office:value="0.00000335648148148179" calcext:value-type="float">
            <text:p>0,00000335648148148179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B683]+29" office:value-type="float" office:value="19807" calcext:value-type="float">
            <text:p>19807</text:p>
          </table:table-cell>
          <table:table-cell office:value-type="float" office:value="8640000" calcext:value-type="float">
            <text:p>8640000</text:p>
          </table:table-cell>
          <table:table-cell table:formula="of:=[.B684]/[.C684]" office:value-type="float" office:value="0.00229247685185185" calcext:value-type="float">
            <text:p>0,00229247685185185000</text:p>
          </table:table-cell>
          <table:table-cell table:formula="of:=[.D685]-[.D684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B684]+29" office:value-type="float" office:value="19836" calcext:value-type="float">
            <text:p>19836</text:p>
          </table:table-cell>
          <table:table-cell office:value-type="float" office:value="8640000" calcext:value-type="float">
            <text:p>8640000</text:p>
          </table:table-cell>
          <table:table-cell table:formula="of:=[.B685]/[.C685]" office:value-type="float" office:value="0.00229583333333333" calcext:value-type="float">
            <text:p>0,00229583333333333000</text:p>
          </table:table-cell>
          <table:table-cell table:formula="of:=[.D686]-[.D685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B685]+29" office:value-type="float" office:value="19865" calcext:value-type="float">
            <text:p>19865</text:p>
          </table:table-cell>
          <table:table-cell office:value-type="float" office:value="8640000" calcext:value-type="float">
            <text:p>8640000</text:p>
          </table:table-cell>
          <table:table-cell table:formula="of:=[.B686]/[.C686]" office:value-type="float" office:value="0.00229918981481481" calcext:value-type="float">
            <text:p>0,00229918981481481000</text:p>
          </table:table-cell>
          <table:table-cell table:formula="of:=[.D687]-[.D686]" office:value-type="float" office:value="0.00000335648148148179" calcext:value-type="float">
            <text:p>0,00000335648148148179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B686]+29" office:value-type="float" office:value="19894" calcext:value-type="float">
            <text:p>19894</text:p>
          </table:table-cell>
          <table:table-cell office:value-type="float" office:value="8640000" calcext:value-type="float">
            <text:p>8640000</text:p>
          </table:table-cell>
          <table:table-cell table:formula="of:=[.B687]/[.C687]" office:value-type="float" office:value="0.0023025462962963" calcext:value-type="float">
            <text:p>0,00230254629629630000</text:p>
          </table:table-cell>
          <table:table-cell table:formula="of:=[.D688]-[.D687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B687]+29" office:value-type="float" office:value="19923" calcext:value-type="float">
            <text:p>19923</text:p>
          </table:table-cell>
          <table:table-cell office:value-type="float" office:value="8640000" calcext:value-type="float">
            <text:p>8640000</text:p>
          </table:table-cell>
          <table:table-cell table:formula="of:=[.B688]/[.C688]" office:value-type="float" office:value="0.00230590277777778" calcext:value-type="float">
            <text:p>0,00230590277777778000</text:p>
          </table:table-cell>
          <table:table-cell table:formula="of:=[.D689]-[.D688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B688]+29" office:value-type="float" office:value="19952" calcext:value-type="float">
            <text:p>19952</text:p>
          </table:table-cell>
          <table:table-cell office:value-type="float" office:value="8640000" calcext:value-type="float">
            <text:p>8640000</text:p>
          </table:table-cell>
          <table:table-cell table:formula="of:=[.B689]/[.C689]" office:value-type="float" office:value="0.00230925925925926" calcext:value-type="float">
            <text:p>0,00230925925925926000</text:p>
          </table:table-cell>
          <table:table-cell table:formula="of:=[.D690]-[.D689]" office:value-type="float" office:value="0.00000335648148148179" calcext:value-type="float">
            <text:p>0,00000335648148148179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B689]+29" office:value-type="float" office:value="19981" calcext:value-type="float">
            <text:p>19981</text:p>
          </table:table-cell>
          <table:table-cell office:value-type="float" office:value="8640000" calcext:value-type="float">
            <text:p>8640000</text:p>
          </table:table-cell>
          <table:table-cell table:formula="of:=[.B690]/[.C690]" office:value-type="float" office:value="0.00231261574074074" calcext:value-type="float">
            <text:p>0,00231261574074074000</text:p>
          </table:table-cell>
          <table:table-cell table:formula="of:=[.D691]-[.D690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B690]+29" office:value-type="float" office:value="20010" calcext:value-type="float">
            <text:p>20010</text:p>
          </table:table-cell>
          <table:table-cell office:value-type="float" office:value="8640000" calcext:value-type="float">
            <text:p>8640000</text:p>
          </table:table-cell>
          <table:table-cell table:formula="of:=[.B691]/[.C691]" office:value-type="float" office:value="0.00231597222222222" calcext:value-type="float">
            <text:p>0,00231597222222222000</text:p>
          </table:table-cell>
          <table:table-cell table:formula="of:=[.D692]-[.D691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B691]+29" office:value-type="float" office:value="20039" calcext:value-type="float">
            <text:p>20039</text:p>
          </table:table-cell>
          <table:table-cell office:value-type="float" office:value="8640000" calcext:value-type="float">
            <text:p>8640000</text:p>
          </table:table-cell>
          <table:table-cell table:formula="of:=[.B692]/[.C692]" office:value-type="float" office:value="0.0023193287037037" calcext:value-type="float">
            <text:p>0,00231932870370370000</text:p>
          </table:table-cell>
          <table:table-cell table:formula="of:=[.D693]-[.D692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B692]+29" office:value-type="float" office:value="20068" calcext:value-type="float">
            <text:p>20068</text:p>
          </table:table-cell>
          <table:table-cell office:value-type="float" office:value="8640000" calcext:value-type="float">
            <text:p>8640000</text:p>
          </table:table-cell>
          <table:table-cell table:formula="of:=[.B693]/[.C693]" office:value-type="float" office:value="0.00232268518518519" calcext:value-type="float">
            <text:p>0,00232268518518519000</text:p>
          </table:table-cell>
          <table:table-cell table:formula="of:=[.D694]-[.D693]" office:value-type="float" office:value="0.00000335648148148179" calcext:value-type="float">
            <text:p>0,00000335648148148179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B693]+29" office:value-type="float" office:value="20097" calcext:value-type="float">
            <text:p>20097</text:p>
          </table:table-cell>
          <table:table-cell office:value-type="float" office:value="8640000" calcext:value-type="float">
            <text:p>8640000</text:p>
          </table:table-cell>
          <table:table-cell table:formula="of:=[.B694]/[.C694]" office:value-type="float" office:value="0.00232604166666667" calcext:value-type="float">
            <text:p>0,00232604166666667000</text:p>
          </table:table-cell>
          <table:table-cell table:formula="of:=[.D695]-[.D694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B694]+29" office:value-type="float" office:value="20126" calcext:value-type="float">
            <text:p>20126</text:p>
          </table:table-cell>
          <table:table-cell office:value-type="float" office:value="8640000" calcext:value-type="float">
            <text:p>8640000</text:p>
          </table:table-cell>
          <table:table-cell table:formula="of:=[.B695]/[.C695]" office:value-type="float" office:value="0.00232939814814815" calcext:value-type="float">
            <text:p>0,00232939814814815000</text:p>
          </table:table-cell>
          <table:table-cell table:formula="of:=[.D696]-[.D695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B695]+29" office:value-type="float" office:value="20155" calcext:value-type="float">
            <text:p>20155</text:p>
          </table:table-cell>
          <table:table-cell office:value-type="float" office:value="8640000" calcext:value-type="float">
            <text:p>8640000</text:p>
          </table:table-cell>
          <table:table-cell table:formula="of:=[.B696]/[.C696]" office:value-type="float" office:value="0.00233275462962963" calcext:value-type="float">
            <text:p>0,00233275462962963000</text:p>
          </table:table-cell>
          <table:table-cell table:formula="of:=[.D697]-[.D696]" office:value-type="float" office:value="0.00000335648148148179" calcext:value-type="float">
            <text:p>0,00000335648148148179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B696]+29" office:value-type="float" office:value="20184" calcext:value-type="float">
            <text:p>20184</text:p>
          </table:table-cell>
          <table:table-cell office:value-type="float" office:value="8640000" calcext:value-type="float">
            <text:p>8640000</text:p>
          </table:table-cell>
          <table:table-cell table:formula="of:=[.B697]/[.C697]" office:value-type="float" office:value="0.00233611111111111" calcext:value-type="float">
            <text:p>0,00233611111111111000</text:p>
          </table:table-cell>
          <table:table-cell table:formula="of:=[.D698]-[.D697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B697]+29" office:value-type="float" office:value="20213" calcext:value-type="float">
            <text:p>20213</text:p>
          </table:table-cell>
          <table:table-cell office:value-type="float" office:value="8640000" calcext:value-type="float">
            <text:p>8640000</text:p>
          </table:table-cell>
          <table:table-cell table:formula="of:=[.B698]/[.C698]" office:value-type="float" office:value="0.00233946759259259" calcext:value-type="float">
            <text:p>0,00233946759259259000</text:p>
          </table:table-cell>
          <table:table-cell table:formula="of:=[.D699]-[.D698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B698]+29" office:value-type="float" office:value="20242" calcext:value-type="float">
            <text:p>20242</text:p>
          </table:table-cell>
          <table:table-cell office:value-type="float" office:value="8640000" calcext:value-type="float">
            <text:p>8640000</text:p>
          </table:table-cell>
          <table:table-cell table:formula="of:=[.B699]/[.C699]" office:value-type="float" office:value="0.00234282407407407" calcext:value-type="float">
            <text:p>0,00234282407407407000</text:p>
          </table:table-cell>
          <table:table-cell table:formula="of:=[.D700]-[.D699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B699]+29" office:value-type="float" office:value="20271" calcext:value-type="float">
            <text:p>20271</text:p>
          </table:table-cell>
          <table:table-cell office:value-type="float" office:value="8640000" calcext:value-type="float">
            <text:p>8640000</text:p>
          </table:table-cell>
          <table:table-cell table:formula="of:=[.B700]/[.C700]" office:value-type="float" office:value="0.00234618055555556" calcext:value-type="float">
            <text:p>0,00234618055555556000</text:p>
          </table:table-cell>
          <table:table-cell table:formula="of:=[.D701]-[.D700]" office:value-type="float" office:value="0.00000335648148148179" calcext:value-type="float">
            <text:p>0,0000033564814814817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B700]+29" office:value-type="float" office:value="20300" calcext:value-type="float">
            <text:p>20300</text:p>
          </table:table-cell>
          <table:table-cell office:value-type="float" office:value="8640000" calcext:value-type="float">
            <text:p>8640000</text:p>
          </table:table-cell>
          <table:table-cell table:formula="of:=[.B701]/[.C701]" office:value-type="float" office:value="0.00234953703703704" calcext:value-type="float">
            <text:p>0,00234953703703704000</text:p>
          </table:table-cell>
          <table:table-cell table:formula="of:=[.D702]-[.D701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B701]+29" office:value-type="float" office:value="20329" calcext:value-type="float">
            <text:p>20329</text:p>
          </table:table-cell>
          <table:table-cell office:value-type="float" office:value="8640000" calcext:value-type="float">
            <text:p>8640000</text:p>
          </table:table-cell>
          <table:table-cell table:formula="of:=[.B702]/[.C702]" office:value-type="float" office:value="0.00235289351851852" calcext:value-type="float">
            <text:p>0,00235289351851852000</text:p>
          </table:table-cell>
          <table:table-cell table:formula="of:=[.D703]-[.D702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B702]+29" office:value-type="float" office:value="20358" calcext:value-type="float">
            <text:p>20358</text:p>
          </table:table-cell>
          <table:table-cell office:value-type="float" office:value="8640000" calcext:value-type="float">
            <text:p>8640000</text:p>
          </table:table-cell>
          <table:table-cell table:formula="of:=[.B703]/[.C703]" office:value-type="float" office:value="0.00235625" calcext:value-type="float">
            <text:p>0,00235625000000000000</text:p>
          </table:table-cell>
          <table:table-cell table:formula="of:=[.D704]-[.D703]" office:value-type="float" office:value="0.00000335648148148179" calcext:value-type="float">
            <text:p>0,00000335648148148179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B703]+29" office:value-type="float" office:value="20387" calcext:value-type="float">
            <text:p>20387</text:p>
          </table:table-cell>
          <table:table-cell office:value-type="float" office:value="8640000" calcext:value-type="float">
            <text:p>8640000</text:p>
          </table:table-cell>
          <table:table-cell table:formula="of:=[.B704]/[.C704]" office:value-type="float" office:value="0.00235960648148148" calcext:value-type="float">
            <text:p>0,00235960648148148000</text:p>
          </table:table-cell>
          <table:table-cell table:formula="of:=[.D705]-[.D704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B704]+29" office:value-type="float" office:value="20416" calcext:value-type="float">
            <text:p>20416</text:p>
          </table:table-cell>
          <table:table-cell office:value-type="float" office:value="8640000" calcext:value-type="float">
            <text:p>8640000</text:p>
          </table:table-cell>
          <table:table-cell table:formula="of:=[.B705]/[.C705]" office:value-type="float" office:value="0.00236296296296296" calcext:value-type="float">
            <text:p>0,00236296296296296000</text:p>
          </table:table-cell>
          <table:table-cell table:formula="of:=[.D706]-[.D705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B705]+29" office:value-type="float" office:value="20445" calcext:value-type="float">
            <text:p>20445</text:p>
          </table:table-cell>
          <table:table-cell office:value-type="float" office:value="8640000" calcext:value-type="float">
            <text:p>8640000</text:p>
          </table:table-cell>
          <table:table-cell table:formula="of:=[.B706]/[.C706]" office:value-type="float" office:value="0.00236631944444444" calcext:value-type="float">
            <text:p>0,00236631944444444000</text:p>
          </table:table-cell>
          <table:table-cell table:formula="of:=[.D707]-[.D706]" office:value-type="float" office:value="0.00000335648148148179" calcext:value-type="float">
            <text:p>0,00000335648148148179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B706]+29" office:value-type="float" office:value="20474" calcext:value-type="float">
            <text:p>20474</text:p>
          </table:table-cell>
          <table:table-cell office:value-type="float" office:value="8640000" calcext:value-type="float">
            <text:p>8640000</text:p>
          </table:table-cell>
          <table:table-cell table:formula="of:=[.B707]/[.C707]" office:value-type="float" office:value="0.00236967592592593" calcext:value-type="float">
            <text:p>0,00236967592592593000</text:p>
          </table:table-cell>
          <table:table-cell table:formula="of:=[.D708]-[.D707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B707]+29" office:value-type="float" office:value="20503" calcext:value-type="float">
            <text:p>20503</text:p>
          </table:table-cell>
          <table:table-cell office:value-type="float" office:value="8640000" calcext:value-type="float">
            <text:p>8640000</text:p>
          </table:table-cell>
          <table:table-cell table:formula="of:=[.B708]/[.C708]" office:value-type="float" office:value="0.00237303240740741" calcext:value-type="float">
            <text:p>0,00237303240740741000</text:p>
          </table:table-cell>
          <table:table-cell table:formula="of:=[.D709]-[.D708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B708]+29" office:value-type="float" office:value="20532" calcext:value-type="float">
            <text:p>20532</text:p>
          </table:table-cell>
          <table:table-cell office:value-type="float" office:value="8640000" calcext:value-type="float">
            <text:p>8640000</text:p>
          </table:table-cell>
          <table:table-cell table:formula="of:=[.B709]/[.C709]" office:value-type="float" office:value="0.00237638888888889" calcext:value-type="float">
            <text:p>0,00237638888888889000</text:p>
          </table:table-cell>
          <table:table-cell table:formula="of:=[.D710]-[.D709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B709]+29" office:value-type="float" office:value="20561" calcext:value-type="float">
            <text:p>20561</text:p>
          </table:table-cell>
          <table:table-cell office:value-type="float" office:value="8640000" calcext:value-type="float">
            <text:p>8640000</text:p>
          </table:table-cell>
          <table:table-cell table:formula="of:=[.B710]/[.C710]" office:value-type="float" office:value="0.00237974537037037" calcext:value-type="float">
            <text:p>0,00237974537037037000</text:p>
          </table:table-cell>
          <table:table-cell table:formula="of:=[.D711]-[.D710]" office:value-type="float" office:value="0.00000335648148148179" calcext:value-type="float">
            <text:p>0,00000335648148148179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B710]+29" office:value-type="float" office:value="20590" calcext:value-type="float">
            <text:p>20590</text:p>
          </table:table-cell>
          <table:table-cell office:value-type="float" office:value="8640000" calcext:value-type="float">
            <text:p>8640000</text:p>
          </table:table-cell>
          <table:table-cell table:formula="of:=[.B711]/[.C711]" office:value-type="float" office:value="0.00238310185185185" calcext:value-type="float">
            <text:p>0,00238310185185185000</text:p>
          </table:table-cell>
          <table:table-cell table:formula="of:=[.D712]-[.D711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B711]+29" office:value-type="float" office:value="20619" calcext:value-type="float">
            <text:p>20619</text:p>
          </table:table-cell>
          <table:table-cell office:value-type="float" office:value="8640000" calcext:value-type="float">
            <text:p>8640000</text:p>
          </table:table-cell>
          <table:table-cell table:formula="of:=[.B712]/[.C712]" office:value-type="float" office:value="0.00238645833333333" calcext:value-type="float">
            <text:p>0,00238645833333333000</text:p>
          </table:table-cell>
          <table:table-cell table:formula="of:=[.D713]-[.D712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B712]+29" office:value-type="float" office:value="20648" calcext:value-type="float">
            <text:p>20648</text:p>
          </table:table-cell>
          <table:table-cell office:value-type="float" office:value="8640000" calcext:value-type="float">
            <text:p>8640000</text:p>
          </table:table-cell>
          <table:table-cell table:formula="of:=[.B713]/[.C713]" office:value-type="float" office:value="0.00238981481481481" calcext:value-type="float">
            <text:p>0,00238981481481481000</text:p>
          </table:table-cell>
          <table:table-cell table:formula="of:=[.D714]-[.D713]" office:value-type="float" office:value="0.00000335648148148179" calcext:value-type="float">
            <text:p>0,00000335648148148179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B713]+29" office:value-type="float" office:value="20677" calcext:value-type="float">
            <text:p>20677</text:p>
          </table:table-cell>
          <table:table-cell office:value-type="float" office:value="8640000" calcext:value-type="float">
            <text:p>8640000</text:p>
          </table:table-cell>
          <table:table-cell table:formula="of:=[.B714]/[.C714]" office:value-type="float" office:value="0.0023931712962963" calcext:value-type="float">
            <text:p>0,00239317129629630000</text:p>
          </table:table-cell>
          <table:table-cell table:formula="of:=[.D715]-[.D714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B714]+29" office:value-type="float" office:value="20706" calcext:value-type="float">
            <text:p>20706</text:p>
          </table:table-cell>
          <table:table-cell office:value-type="float" office:value="8640000" calcext:value-type="float">
            <text:p>8640000</text:p>
          </table:table-cell>
          <table:table-cell table:formula="of:=[.B715]/[.C715]" office:value-type="float" office:value="0.00239652777777778" calcext:value-type="float">
            <text:p>0,00239652777777778000</text:p>
          </table:table-cell>
          <table:table-cell table:formula="of:=[.D716]-[.D715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B715]+29" office:value-type="float" office:value="20735" calcext:value-type="float">
            <text:p>20735</text:p>
          </table:table-cell>
          <table:table-cell office:value-type="float" office:value="8640000" calcext:value-type="float">
            <text:p>8640000</text:p>
          </table:table-cell>
          <table:table-cell table:formula="of:=[.B716]/[.C716]" office:value-type="float" office:value="0.00239988425925926" calcext:value-type="float">
            <text:p>0,00239988425925926000</text:p>
          </table:table-cell>
          <table:table-cell table:formula="of:=[.D717]-[.D716]" office:value-type="float" office:value="0.00000335648148148179" calcext:value-type="float">
            <text:p>0,00000335648148148179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B716]+29" office:value-type="float" office:value="20764" calcext:value-type="float">
            <text:p>20764</text:p>
          </table:table-cell>
          <table:table-cell office:value-type="float" office:value="8640000" calcext:value-type="float">
            <text:p>8640000</text:p>
          </table:table-cell>
          <table:table-cell table:formula="of:=[.B717]/[.C717]" office:value-type="float" office:value="0.00240324074074074" calcext:value-type="float">
            <text:p>0,00240324074074074000</text:p>
          </table:table-cell>
          <table:table-cell table:formula="of:=[.D718]-[.D717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B717]+29" office:value-type="float" office:value="20793" calcext:value-type="float">
            <text:p>20793</text:p>
          </table:table-cell>
          <table:table-cell office:value-type="float" office:value="8640000" calcext:value-type="float">
            <text:p>8640000</text:p>
          </table:table-cell>
          <table:table-cell table:formula="of:=[.B718]/[.C718]" office:value-type="float" office:value="0.00240659722222222" calcext:value-type="float">
            <text:p>0,00240659722222222000</text:p>
          </table:table-cell>
          <table:table-cell table:formula="of:=[.D719]-[.D718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B718]+29" office:value-type="float" office:value="20822" calcext:value-type="float">
            <text:p>20822</text:p>
          </table:table-cell>
          <table:table-cell office:value-type="float" office:value="8640000" calcext:value-type="float">
            <text:p>8640000</text:p>
          </table:table-cell>
          <table:table-cell table:formula="of:=[.B719]/[.C719]" office:value-type="float" office:value="0.0024099537037037" calcext:value-type="float">
            <text:p>0,00240995370370370000</text:p>
          </table:table-cell>
          <table:table-cell table:formula="of:=[.D720]-[.D719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B719]+29" office:value-type="float" office:value="20851" calcext:value-type="float">
            <text:p>20851</text:p>
          </table:table-cell>
          <table:table-cell office:value-type="float" office:value="8640000" calcext:value-type="float">
            <text:p>8640000</text:p>
          </table:table-cell>
          <table:table-cell table:formula="of:=[.B720]/[.C720]" office:value-type="float" office:value="0.00241331018518519" calcext:value-type="float">
            <text:p>0,00241331018518519000</text:p>
          </table:table-cell>
          <table:table-cell table:formula="of:=[.D721]-[.D720]" office:value-type="float" office:value="0.00000335648148148179" calcext:value-type="float">
            <text:p>0,00000335648148148179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B720]+29" office:value-type="float" office:value="20880" calcext:value-type="float">
            <text:p>20880</text:p>
          </table:table-cell>
          <table:table-cell office:value-type="float" office:value="8640000" calcext:value-type="float">
            <text:p>8640000</text:p>
          </table:table-cell>
          <table:table-cell table:formula="of:=[.B721]/[.C721]" office:value-type="float" office:value="0.00241666666666667" calcext:value-type="float">
            <text:p>0,00241666666666667000</text:p>
          </table:table-cell>
          <table:table-cell table:formula="of:=[.D722]-[.D721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B721]+29" office:value-type="float" office:value="20909" calcext:value-type="float">
            <text:p>20909</text:p>
          </table:table-cell>
          <table:table-cell office:value-type="float" office:value="8640000" calcext:value-type="float">
            <text:p>8640000</text:p>
          </table:table-cell>
          <table:table-cell table:formula="of:=[.B722]/[.C722]" office:value-type="float" office:value="0.00242002314814815" calcext:value-type="float">
            <text:p>0,00242002314814815000</text:p>
          </table:table-cell>
          <table:table-cell table:formula="of:=[.D723]-[.D722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B722]+29" office:value-type="float" office:value="20938" calcext:value-type="float">
            <text:p>20938</text:p>
          </table:table-cell>
          <table:table-cell office:value-type="float" office:value="8640000" calcext:value-type="float">
            <text:p>8640000</text:p>
          </table:table-cell>
          <table:table-cell table:formula="of:=[.B723]/[.C723]" office:value-type="float" office:value="0.00242337962962963" calcext:value-type="float">
            <text:p>0,00242337962962963000</text:p>
          </table:table-cell>
          <table:table-cell table:formula="of:=[.D724]-[.D723]" office:value-type="float" office:value="0.00000335648148148179" calcext:value-type="float">
            <text:p>0,00000335648148148179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B723]+29" office:value-type="float" office:value="20967" calcext:value-type="float">
            <text:p>20967</text:p>
          </table:table-cell>
          <table:table-cell office:value-type="float" office:value="8640000" calcext:value-type="float">
            <text:p>8640000</text:p>
          </table:table-cell>
          <table:table-cell table:formula="of:=[.B724]/[.C724]" office:value-type="float" office:value="0.00242673611111111" calcext:value-type="float">
            <text:p>0,00242673611111111000</text:p>
          </table:table-cell>
          <table:table-cell table:formula="of:=[.D725]-[.D724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B724]+29" office:value-type="float" office:value="20996" calcext:value-type="float">
            <text:p>20996</text:p>
          </table:table-cell>
          <table:table-cell office:value-type="float" office:value="8640000" calcext:value-type="float">
            <text:p>8640000</text:p>
          </table:table-cell>
          <table:table-cell table:formula="of:=[.B725]/[.C725]" office:value-type="float" office:value="0.00243009259259259" calcext:value-type="float">
            <text:p>0,00243009259259259000</text:p>
          </table:table-cell>
          <table:table-cell table:formula="of:=[.D726]-[.D725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B725]+29" office:value-type="float" office:value="21025" calcext:value-type="float">
            <text:p>21025</text:p>
          </table:table-cell>
          <table:table-cell office:value-type="float" office:value="8640000" calcext:value-type="float">
            <text:p>8640000</text:p>
          </table:table-cell>
          <table:table-cell table:formula="of:=[.B726]/[.C726]" office:value-type="float" office:value="0.00243344907407407" calcext:value-type="float">
            <text:p>0,00243344907407407000</text:p>
          </table:table-cell>
          <table:table-cell table:formula="of:=[.D727]-[.D726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B726]+29" office:value-type="float" office:value="21054" calcext:value-type="float">
            <text:p>21054</text:p>
          </table:table-cell>
          <table:table-cell office:value-type="float" office:value="8640000" calcext:value-type="float">
            <text:p>8640000</text:p>
          </table:table-cell>
          <table:table-cell table:formula="of:=[.B727]/[.C727]" office:value-type="float" office:value="0.00243680555555556" calcext:value-type="float">
            <text:p>0,00243680555555556000</text:p>
          </table:table-cell>
          <table:table-cell table:formula="of:=[.D728]-[.D727]" office:value-type="float" office:value="0.00000335648148148179" calcext:value-type="float">
            <text:p>0,00000335648148148179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B727]+29" office:value-type="float" office:value="21083" calcext:value-type="float">
            <text:p>21083</text:p>
          </table:table-cell>
          <table:table-cell office:value-type="float" office:value="8640000" calcext:value-type="float">
            <text:p>8640000</text:p>
          </table:table-cell>
          <table:table-cell table:formula="of:=[.B728]/[.C728]" office:value-type="float" office:value="0.00244016203703704" calcext:value-type="float">
            <text:p>0,00244016203703704000</text:p>
          </table:table-cell>
          <table:table-cell table:formula="of:=[.D729]-[.D728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B728]+29" office:value-type="float" office:value="21112" calcext:value-type="float">
            <text:p>21112</text:p>
          </table:table-cell>
          <table:table-cell office:value-type="float" office:value="8640000" calcext:value-type="float">
            <text:p>8640000</text:p>
          </table:table-cell>
          <table:table-cell table:formula="of:=[.B729]/[.C729]" office:value-type="float" office:value="0.00244351851851852" calcext:value-type="float">
            <text:p>0,00244351851851852000</text:p>
          </table:table-cell>
          <table:table-cell table:formula="of:=[.D730]-[.D729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B729]+29" office:value-type="float" office:value="21141" calcext:value-type="float">
            <text:p>21141</text:p>
          </table:table-cell>
          <table:table-cell office:value-type="float" office:value="8640000" calcext:value-type="float">
            <text:p>8640000</text:p>
          </table:table-cell>
          <table:table-cell table:formula="of:=[.B730]/[.C730]" office:value-type="float" office:value="0.002446875" calcext:value-type="float">
            <text:p>0,00244687500000000000</text:p>
          </table:table-cell>
          <table:table-cell table:formula="of:=[.D731]-[.D730]" office:value-type="float" office:value="0.00000335648148148179" calcext:value-type="float">
            <text:p>0,00000335648148148179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B730]+29" office:value-type="float" office:value="21170" calcext:value-type="float">
            <text:p>21170</text:p>
          </table:table-cell>
          <table:table-cell office:value-type="float" office:value="8640000" calcext:value-type="float">
            <text:p>8640000</text:p>
          </table:table-cell>
          <table:table-cell table:formula="of:=[.B731]/[.C731]" office:value-type="float" office:value="0.00245023148148148" calcext:value-type="float">
            <text:p>0,00245023148148148000</text:p>
          </table:table-cell>
          <table:table-cell table:formula="of:=[.D732]-[.D731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B731]+29" office:value-type="float" office:value="21199" calcext:value-type="float">
            <text:p>21199</text:p>
          </table:table-cell>
          <table:table-cell office:value-type="float" office:value="8640000" calcext:value-type="float">
            <text:p>8640000</text:p>
          </table:table-cell>
          <table:table-cell table:formula="of:=[.B732]/[.C732]" office:value-type="float" office:value="0.00245358796296296" calcext:value-type="float">
            <text:p>0,00245358796296296000</text:p>
          </table:table-cell>
          <table:table-cell table:formula="of:=[.D733]-[.D732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B732]+29" office:value-type="float" office:value="21228" calcext:value-type="float">
            <text:p>21228</text:p>
          </table:table-cell>
          <table:table-cell office:value-type="float" office:value="8640000" calcext:value-type="float">
            <text:p>8640000</text:p>
          </table:table-cell>
          <table:table-cell table:formula="of:=[.B733]/[.C733]" office:value-type="float" office:value="0.00245694444444444" calcext:value-type="float">
            <text:p>0,00245694444444444000</text:p>
          </table:table-cell>
          <table:table-cell table:formula="of:=[.D734]-[.D733]" office:value-type="float" office:value="0.00000335648148148179" calcext:value-type="float">
            <text:p>0,00000335648148148179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B733]+29" office:value-type="float" office:value="21257" calcext:value-type="float">
            <text:p>21257</text:p>
          </table:table-cell>
          <table:table-cell office:value-type="float" office:value="8640000" calcext:value-type="float">
            <text:p>8640000</text:p>
          </table:table-cell>
          <table:table-cell table:formula="of:=[.B734]/[.C734]" office:value-type="float" office:value="0.00246030092592593" calcext:value-type="float">
            <text:p>0,00246030092592593000</text:p>
          </table:table-cell>
          <table:table-cell table:formula="of:=[.D735]-[.D734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B734]+29" office:value-type="float" office:value="21286" calcext:value-type="float">
            <text:p>21286</text:p>
          </table:table-cell>
          <table:table-cell office:value-type="float" office:value="8640000" calcext:value-type="float">
            <text:p>8640000</text:p>
          </table:table-cell>
          <table:table-cell table:formula="of:=[.B735]/[.C735]" office:value-type="float" office:value="0.00246365740740741" calcext:value-type="float">
            <text:p>0,00246365740740741000</text:p>
          </table:table-cell>
          <table:table-cell table:formula="of:=[.D736]-[.D735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B735]+29" office:value-type="float" office:value="21315" calcext:value-type="float">
            <text:p>21315</text:p>
          </table:table-cell>
          <table:table-cell office:value-type="float" office:value="8640000" calcext:value-type="float">
            <text:p>8640000</text:p>
          </table:table-cell>
          <table:table-cell table:formula="of:=[.B736]/[.C736]" office:value-type="float" office:value="0.00246701388888889" calcext:value-type="float">
            <text:p>0,00246701388888889000</text:p>
          </table:table-cell>
          <table:table-cell table:formula="of:=[.D737]-[.D736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B736]+29" office:value-type="float" office:value="21344" calcext:value-type="float">
            <text:p>21344</text:p>
          </table:table-cell>
          <table:table-cell office:value-type="float" office:value="8640000" calcext:value-type="float">
            <text:p>8640000</text:p>
          </table:table-cell>
          <table:table-cell table:formula="of:=[.B737]/[.C737]" office:value-type="float" office:value="0.00247037037037037" calcext:value-type="float">
            <text:p>0,00247037037037037000</text:p>
          </table:table-cell>
          <table:table-cell table:formula="of:=[.D738]-[.D737]" office:value-type="float" office:value="0.00000335648148148179" calcext:value-type="float">
            <text:p>0,00000335648148148179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B737]+29" office:value-type="float" office:value="21373" calcext:value-type="float">
            <text:p>21373</text:p>
          </table:table-cell>
          <table:table-cell office:value-type="float" office:value="8640000" calcext:value-type="float">
            <text:p>8640000</text:p>
          </table:table-cell>
          <table:table-cell table:formula="of:=[.B738]/[.C738]" office:value-type="float" office:value="0.00247372685185185" calcext:value-type="float">
            <text:p>0,00247372685185185000</text:p>
          </table:table-cell>
          <table:table-cell table:formula="of:=[.D739]-[.D738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B738]+29" office:value-type="float" office:value="21402" calcext:value-type="float">
            <text:p>21402</text:p>
          </table:table-cell>
          <table:table-cell office:value-type="float" office:value="8640000" calcext:value-type="float">
            <text:p>8640000</text:p>
          </table:table-cell>
          <table:table-cell table:formula="of:=[.B739]/[.C739]" office:value-type="float" office:value="0.00247708333333333" calcext:value-type="float">
            <text:p>0,00247708333333333000</text:p>
          </table:table-cell>
          <table:table-cell table:formula="of:=[.D740]-[.D739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B739]+29" office:value-type="float" office:value="21431" calcext:value-type="float">
            <text:p>21431</text:p>
          </table:table-cell>
          <table:table-cell office:value-type="float" office:value="8640000" calcext:value-type="float">
            <text:p>8640000</text:p>
          </table:table-cell>
          <table:table-cell table:formula="of:=[.B740]/[.C740]" office:value-type="float" office:value="0.00248043981481481" calcext:value-type="float">
            <text:p>0,00248043981481481000</text:p>
          </table:table-cell>
          <table:table-cell table:formula="of:=[.D741]-[.D740]" office:value-type="float" office:value="0.00000335648148148179" calcext:value-type="float">
            <text:p>0,00000335648148148179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B740]+29" office:value-type="float" office:value="21460" calcext:value-type="float">
            <text:p>21460</text:p>
          </table:table-cell>
          <table:table-cell office:value-type="float" office:value="8640000" calcext:value-type="float">
            <text:p>8640000</text:p>
          </table:table-cell>
          <table:table-cell table:formula="of:=[.B741]/[.C741]" office:value-type="float" office:value="0.0024837962962963" calcext:value-type="float">
            <text:p>0,00248379629629630000</text:p>
          </table:table-cell>
          <table:table-cell table:formula="of:=[.D742]-[.D741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B741]+29" office:value-type="float" office:value="21489" calcext:value-type="float">
            <text:p>21489</text:p>
          </table:table-cell>
          <table:table-cell office:value-type="float" office:value="8640000" calcext:value-type="float">
            <text:p>8640000</text:p>
          </table:table-cell>
          <table:table-cell table:formula="of:=[.B742]/[.C742]" office:value-type="float" office:value="0.00248715277777778" calcext:value-type="float">
            <text:p>0,00248715277777778000</text:p>
          </table:table-cell>
          <table:table-cell table:formula="of:=[.D743]-[.D742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B742]+29" office:value-type="float" office:value="21518" calcext:value-type="float">
            <text:p>21518</text:p>
          </table:table-cell>
          <table:table-cell office:value-type="float" office:value="8640000" calcext:value-type="float">
            <text:p>8640000</text:p>
          </table:table-cell>
          <table:table-cell table:formula="of:=[.B743]/[.C743]" office:value-type="float" office:value="0.00249050925925926" calcext:value-type="float">
            <text:p>0,00249050925925926000</text:p>
          </table:table-cell>
          <table:table-cell table:formula="of:=[.D744]-[.D743]" office:value-type="float" office:value="0.00000335648148148179" calcext:value-type="float">
            <text:p>0,00000335648148148179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B743]+29" office:value-type="float" office:value="21547" calcext:value-type="float">
            <text:p>21547</text:p>
          </table:table-cell>
          <table:table-cell office:value-type="float" office:value="8640000" calcext:value-type="float">
            <text:p>8640000</text:p>
          </table:table-cell>
          <table:table-cell table:formula="of:=[.B744]/[.C744]" office:value-type="float" office:value="0.00249386574074074" calcext:value-type="float">
            <text:p>0,00249386574074074000</text:p>
          </table:table-cell>
          <table:table-cell table:formula="of:=[.D745]-[.D744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B744]+29" office:value-type="float" office:value="21576" calcext:value-type="float">
            <text:p>21576</text:p>
          </table:table-cell>
          <table:table-cell office:value-type="float" office:value="8640000" calcext:value-type="float">
            <text:p>8640000</text:p>
          </table:table-cell>
          <table:table-cell table:formula="of:=[.B745]/[.C745]" office:value-type="float" office:value="0.00249722222222222" calcext:value-type="float">
            <text:p>0,00249722222222222000</text:p>
          </table:table-cell>
          <table:table-cell table:formula="of:=[.D746]-[.D745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B745]+29" office:value-type="float" office:value="21605" calcext:value-type="float">
            <text:p>21605</text:p>
          </table:table-cell>
          <table:table-cell office:value-type="float" office:value="8640000" calcext:value-type="float">
            <text:p>8640000</text:p>
          </table:table-cell>
          <table:table-cell table:formula="of:=[.B746]/[.C746]" office:value-type="float" office:value="0.0025005787037037" calcext:value-type="float">
            <text:p>0,00250057870370370000</text:p>
          </table:table-cell>
          <table:table-cell table:formula="of:=[.D747]-[.D746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B746]+29" office:value-type="float" office:value="21634" calcext:value-type="float">
            <text:p>21634</text:p>
          </table:table-cell>
          <table:table-cell office:value-type="float" office:value="8640000" calcext:value-type="float">
            <text:p>8640000</text:p>
          </table:table-cell>
          <table:table-cell table:formula="of:=[.B747]/[.C747]" office:value-type="float" office:value="0.00250393518518519" calcext:value-type="float">
            <text:p>0,00250393518518519000</text:p>
          </table:table-cell>
          <table:table-cell table:formula="of:=[.D748]-[.D747]" office:value-type="float" office:value="0.00000335648148148179" calcext:value-type="float">
            <text:p>0,00000335648148148179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B747]+29" office:value-type="float" office:value="21663" calcext:value-type="float">
            <text:p>21663</text:p>
          </table:table-cell>
          <table:table-cell office:value-type="float" office:value="8640000" calcext:value-type="float">
            <text:p>8640000</text:p>
          </table:table-cell>
          <table:table-cell table:formula="of:=[.B748]/[.C748]" office:value-type="float" office:value="0.00250729166666667" calcext:value-type="float">
            <text:p>0,00250729166666667000</text:p>
          </table:table-cell>
          <table:table-cell table:formula="of:=[.D749]-[.D748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B748]+29" office:value-type="float" office:value="21692" calcext:value-type="float">
            <text:p>21692</text:p>
          </table:table-cell>
          <table:table-cell office:value-type="float" office:value="8640000" calcext:value-type="float">
            <text:p>8640000</text:p>
          </table:table-cell>
          <table:table-cell table:formula="of:=[.B749]/[.C749]" office:value-type="float" office:value="0.00251064814814815" calcext:value-type="float">
            <text:p>0,00251064814814815000</text:p>
          </table:table-cell>
          <table:table-cell table:formula="of:=[.D750]-[.D749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B749]+29" office:value-type="float" office:value="21721" calcext:value-type="float">
            <text:p>21721</text:p>
          </table:table-cell>
          <table:table-cell office:value-type="float" office:value="8640000" calcext:value-type="float">
            <text:p>8640000</text:p>
          </table:table-cell>
          <table:table-cell table:formula="of:=[.B750]/[.C750]" office:value-type="float" office:value="0.00251400462962963" calcext:value-type="float">
            <text:p>0,00251400462962963000</text:p>
          </table:table-cell>
          <table:table-cell table:formula="of:=[.D751]-[.D750]" office:value-type="float" office:value="0.00000335648148148179" calcext:value-type="float">
            <text:p>0,0000033564814814817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B750]+29" office:value-type="float" office:value="21750" calcext:value-type="float">
            <text:p>21750</text:p>
          </table:table-cell>
          <table:table-cell office:value-type="float" office:value="8640000" calcext:value-type="float">
            <text:p>8640000</text:p>
          </table:table-cell>
          <table:table-cell table:formula="of:=[.B751]/[.C751]" office:value-type="float" office:value="0.00251736111111111" calcext:value-type="float">
            <text:p>0,00251736111111111000</text:p>
          </table:table-cell>
          <table:table-cell table:formula="of:=[.D752]-[.D751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B751]+29" office:value-type="float" office:value="21779" calcext:value-type="float">
            <text:p>21779</text:p>
          </table:table-cell>
          <table:table-cell office:value-type="float" office:value="8640000" calcext:value-type="float">
            <text:p>8640000</text:p>
          </table:table-cell>
          <table:table-cell table:formula="of:=[.B752]/[.C752]" office:value-type="float" office:value="0.00252071759259259" calcext:value-type="float">
            <text:p>0,00252071759259259000</text:p>
          </table:table-cell>
          <table:table-cell table:formula="of:=[.D753]-[.D752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B752]+29" office:value-type="float" office:value="21808" calcext:value-type="float">
            <text:p>21808</text:p>
          </table:table-cell>
          <table:table-cell office:value-type="float" office:value="8640000" calcext:value-type="float">
            <text:p>8640000</text:p>
          </table:table-cell>
          <table:table-cell table:formula="of:=[.B753]/[.C753]" office:value-type="float" office:value="0.00252407407407407" calcext:value-type="float">
            <text:p>0,00252407407407407000</text:p>
          </table:table-cell>
          <table:table-cell table:formula="of:=[.D754]-[.D753]" office:value-type="float" office:value="0.00000335648148148179" calcext:value-type="float">
            <text:p>0,00000335648148148179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B753]+29" office:value-type="float" office:value="21837" calcext:value-type="float">
            <text:p>21837</text:p>
          </table:table-cell>
          <table:table-cell office:value-type="float" office:value="8640000" calcext:value-type="float">
            <text:p>8640000</text:p>
          </table:table-cell>
          <table:table-cell table:formula="of:=[.B754]/[.C754]" office:value-type="float" office:value="0.00252743055555556" calcext:value-type="float">
            <text:p>0,00252743055555556000</text:p>
          </table:table-cell>
          <table:table-cell table:formula="of:=[.D755]-[.D754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B754]+29" office:value-type="float" office:value="21866" calcext:value-type="float">
            <text:p>21866</text:p>
          </table:table-cell>
          <table:table-cell office:value-type="float" office:value="8640000" calcext:value-type="float">
            <text:p>8640000</text:p>
          </table:table-cell>
          <table:table-cell table:formula="of:=[.B755]/[.C755]" office:value-type="float" office:value="0.00253078703703704" calcext:value-type="float">
            <text:p>0,00253078703703704000</text:p>
          </table:table-cell>
          <table:table-cell table:formula="of:=[.D756]-[.D755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B755]+29" office:value-type="float" office:value="21895" calcext:value-type="float">
            <text:p>21895</text:p>
          </table:table-cell>
          <table:table-cell office:value-type="float" office:value="8640000" calcext:value-type="float">
            <text:p>8640000</text:p>
          </table:table-cell>
          <table:table-cell table:formula="of:=[.B756]/[.C756]" office:value-type="float" office:value="0.00253414351851852" calcext:value-type="float">
            <text:p>0,00253414351851852000</text:p>
          </table:table-cell>
          <table:table-cell table:formula="of:=[.D757]-[.D756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B756]+29" office:value-type="float" office:value="21924" calcext:value-type="float">
            <text:p>21924</text:p>
          </table:table-cell>
          <table:table-cell office:value-type="float" office:value="8640000" calcext:value-type="float">
            <text:p>8640000</text:p>
          </table:table-cell>
          <table:table-cell table:formula="of:=[.B757]/[.C757]" office:value-type="float" office:value="0.0025375" calcext:value-type="float">
            <text:p>0,00253750000000000000</text:p>
          </table:table-cell>
          <table:table-cell table:formula="of:=[.D758]-[.D757]" office:value-type="float" office:value="0.00000335648148148179" calcext:value-type="float">
            <text:p>0,00000335648148148179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B757]+29" office:value-type="float" office:value="21953" calcext:value-type="float">
            <text:p>21953</text:p>
          </table:table-cell>
          <table:table-cell office:value-type="float" office:value="8640000" calcext:value-type="float">
            <text:p>8640000</text:p>
          </table:table-cell>
          <table:table-cell table:formula="of:=[.B758]/[.C758]" office:value-type="float" office:value="0.00254085648148148" calcext:value-type="float">
            <text:p>0,00254085648148148000</text:p>
          </table:table-cell>
          <table:table-cell table:formula="of:=[.D759]-[.D758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B758]+29" office:value-type="float" office:value="21982" calcext:value-type="float">
            <text:p>21982</text:p>
          </table:table-cell>
          <table:table-cell office:value-type="float" office:value="8640000" calcext:value-type="float">
            <text:p>8640000</text:p>
          </table:table-cell>
          <table:table-cell table:formula="of:=[.B759]/[.C759]" office:value-type="float" office:value="0.00254421296296296" calcext:value-type="float">
            <text:p>0,00254421296296296000</text:p>
          </table:table-cell>
          <table:table-cell table:formula="of:=[.D760]-[.D759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B759]+29" office:value-type="float" office:value="22011" calcext:value-type="float">
            <text:p>22011</text:p>
          </table:table-cell>
          <table:table-cell office:value-type="float" office:value="8640000" calcext:value-type="float">
            <text:p>8640000</text:p>
          </table:table-cell>
          <table:table-cell table:formula="of:=[.B760]/[.C760]" office:value-type="float" office:value="0.00254756944444444" calcext:value-type="float">
            <text:p>0,00254756944444444000</text:p>
          </table:table-cell>
          <table:table-cell table:formula="of:=[.D761]-[.D760]" office:value-type="float" office:value="0.00000335648148148179" calcext:value-type="float">
            <text:p>0,00000335648148148179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B760]+29" office:value-type="float" office:value="22040" calcext:value-type="float">
            <text:p>22040</text:p>
          </table:table-cell>
          <table:table-cell office:value-type="float" office:value="8640000" calcext:value-type="float">
            <text:p>8640000</text:p>
          </table:table-cell>
          <table:table-cell table:formula="of:=[.B761]/[.C761]" office:value-type="float" office:value="0.00255092592592593" calcext:value-type="float">
            <text:p>0,00255092592592593000</text:p>
          </table:table-cell>
          <table:table-cell table:formula="of:=[.D762]-[.D761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B761]+29" office:value-type="float" office:value="22069" calcext:value-type="float">
            <text:p>22069</text:p>
          </table:table-cell>
          <table:table-cell office:value-type="float" office:value="8640000" calcext:value-type="float">
            <text:p>8640000</text:p>
          </table:table-cell>
          <table:table-cell table:formula="of:=[.B762]/[.C762]" office:value-type="float" office:value="0.00255428240740741" calcext:value-type="float">
            <text:p>0,00255428240740741000</text:p>
          </table:table-cell>
          <table:table-cell table:formula="of:=[.D763]-[.D762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B762]+29" office:value-type="float" office:value="22098" calcext:value-type="float">
            <text:p>22098</text:p>
          </table:table-cell>
          <table:table-cell office:value-type="float" office:value="8640000" calcext:value-type="float">
            <text:p>8640000</text:p>
          </table:table-cell>
          <table:table-cell table:formula="of:=[.B763]/[.C763]" office:value-type="float" office:value="0.00255763888888889" calcext:value-type="float">
            <text:p>0,00255763888888889000</text:p>
          </table:table-cell>
          <table:table-cell table:formula="of:=[.D764]-[.D763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B763]+29" office:value-type="float" office:value="22127" calcext:value-type="float">
            <text:p>22127</text:p>
          </table:table-cell>
          <table:table-cell office:value-type="float" office:value="8640000" calcext:value-type="float">
            <text:p>8640000</text:p>
          </table:table-cell>
          <table:table-cell table:formula="of:=[.B764]/[.C764]" office:value-type="float" office:value="0.00256099537037037" calcext:value-type="float">
            <text:p>0,00256099537037037000</text:p>
          </table:table-cell>
          <table:table-cell table:formula="of:=[.D765]-[.D764]" office:value-type="float" office:value="0.00000335648148148179" calcext:value-type="float">
            <text:p>0,00000335648148148179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B764]+29" office:value-type="float" office:value="22156" calcext:value-type="float">
            <text:p>22156</text:p>
          </table:table-cell>
          <table:table-cell office:value-type="float" office:value="8640000" calcext:value-type="float">
            <text:p>8640000</text:p>
          </table:table-cell>
          <table:table-cell table:formula="of:=[.B765]/[.C765]" office:value-type="float" office:value="0.00256435185185185" calcext:value-type="float">
            <text:p>0,00256435185185185000</text:p>
          </table:table-cell>
          <table:table-cell table:formula="of:=[.D766]-[.D765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B765]+29" office:value-type="float" office:value="22185" calcext:value-type="float">
            <text:p>22185</text:p>
          </table:table-cell>
          <table:table-cell office:value-type="float" office:value="8640000" calcext:value-type="float">
            <text:p>8640000</text:p>
          </table:table-cell>
          <table:table-cell table:formula="of:=[.B766]/[.C766]" office:value-type="float" office:value="0.00256770833333333" calcext:value-type="float">
            <text:p>0,00256770833333333000</text:p>
          </table:table-cell>
          <table:table-cell table:formula="of:=[.D767]-[.D766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B766]+29" office:value-type="float" office:value="22214" calcext:value-type="float">
            <text:p>22214</text:p>
          </table:table-cell>
          <table:table-cell office:value-type="float" office:value="8640000" calcext:value-type="float">
            <text:p>8640000</text:p>
          </table:table-cell>
          <table:table-cell table:formula="of:=[.B767]/[.C767]" office:value-type="float" office:value="0.00257106481481481" calcext:value-type="float">
            <text:p>0,00257106481481481000</text:p>
          </table:table-cell>
          <table:table-cell table:formula="of:=[.D768]-[.D767]" office:value-type="float" office:value="0.00000335648148148179" calcext:value-type="float">
            <text:p>0,00000335648148148179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B767]+29" office:value-type="float" office:value="22243" calcext:value-type="float">
            <text:p>22243</text:p>
          </table:table-cell>
          <table:table-cell office:value-type="float" office:value="8640000" calcext:value-type="float">
            <text:p>8640000</text:p>
          </table:table-cell>
          <table:table-cell table:formula="of:=[.B768]/[.C768]" office:value-type="float" office:value="0.0025744212962963" calcext:value-type="float">
            <text:p>0,00257442129629630000</text:p>
          </table:table-cell>
          <table:table-cell table:formula="of:=[.D769]-[.D768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B768]+29" office:value-type="float" office:value="22272" calcext:value-type="float">
            <text:p>22272</text:p>
          </table:table-cell>
          <table:table-cell office:value-type="float" office:value="8640000" calcext:value-type="float">
            <text:p>8640000</text:p>
          </table:table-cell>
          <table:table-cell table:formula="of:=[.B769]/[.C769]" office:value-type="float" office:value="0.00257777777777778" calcext:value-type="float">
            <text:p>0,00257777777777778000</text:p>
          </table:table-cell>
          <table:table-cell table:formula="of:=[.D770]-[.D769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B769]+29" office:value-type="float" office:value="22301" calcext:value-type="float">
            <text:p>22301</text:p>
          </table:table-cell>
          <table:table-cell office:value-type="float" office:value="8640000" calcext:value-type="float">
            <text:p>8640000</text:p>
          </table:table-cell>
          <table:table-cell table:formula="of:=[.B770]/[.C770]" office:value-type="float" office:value="0.00258113425925926" calcext:value-type="float">
            <text:p>0,00258113425925926000</text:p>
          </table:table-cell>
          <table:table-cell table:formula="of:=[.D771]-[.D770]" office:value-type="float" office:value="0.00000335648148148179" calcext:value-type="float">
            <text:p>0,00000335648148148179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B770]+29" office:value-type="float" office:value="22330" calcext:value-type="float">
            <text:p>22330</text:p>
          </table:table-cell>
          <table:table-cell office:value-type="float" office:value="8640000" calcext:value-type="float">
            <text:p>8640000</text:p>
          </table:table-cell>
          <table:table-cell table:formula="of:=[.B771]/[.C771]" office:value-type="float" office:value="0.00258449074074074" calcext:value-type="float">
            <text:p>0,00258449074074074000</text:p>
          </table:table-cell>
          <table:table-cell table:formula="of:=[.D772]-[.D771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B771]+29" office:value-type="float" office:value="22359" calcext:value-type="float">
            <text:p>22359</text:p>
          </table:table-cell>
          <table:table-cell office:value-type="float" office:value="8640000" calcext:value-type="float">
            <text:p>8640000</text:p>
          </table:table-cell>
          <table:table-cell table:formula="of:=[.B772]/[.C772]" office:value-type="float" office:value="0.00258784722222222" calcext:value-type="float">
            <text:p>0,00258784722222222000</text:p>
          </table:table-cell>
          <table:table-cell table:formula="of:=[.D773]-[.D772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B772]+29" office:value-type="float" office:value="22388" calcext:value-type="float">
            <text:p>22388</text:p>
          </table:table-cell>
          <table:table-cell office:value-type="float" office:value="8640000" calcext:value-type="float">
            <text:p>8640000</text:p>
          </table:table-cell>
          <table:table-cell table:formula="of:=[.B773]/[.C773]" office:value-type="float" office:value="0.0025912037037037" calcext:value-type="float">
            <text:p>0,00259120370370370000</text:p>
          </table:table-cell>
          <table:table-cell table:formula="of:=[.D774]-[.D773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B773]+29" office:value-type="float" office:value="22417" calcext:value-type="float">
            <text:p>22417</text:p>
          </table:table-cell>
          <table:table-cell office:value-type="float" office:value="8640000" calcext:value-type="float">
            <text:p>8640000</text:p>
          </table:table-cell>
          <table:table-cell table:formula="of:=[.B774]/[.C774]" office:value-type="float" office:value="0.00259456018518519" calcext:value-type="float">
            <text:p>0,00259456018518519000</text:p>
          </table:table-cell>
          <table:table-cell table:formula="of:=[.D775]-[.D774]" office:value-type="float" office:value="0.00000335648148148179" calcext:value-type="float">
            <text:p>0,00000335648148148179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B774]+29" office:value-type="float" office:value="22446" calcext:value-type="float">
            <text:p>22446</text:p>
          </table:table-cell>
          <table:table-cell office:value-type="float" office:value="8640000" calcext:value-type="float">
            <text:p>8640000</text:p>
          </table:table-cell>
          <table:table-cell table:formula="of:=[.B775]/[.C775]" office:value-type="float" office:value="0.00259791666666667" calcext:value-type="float">
            <text:p>0,00259791666666667000</text:p>
          </table:table-cell>
          <table:table-cell table:formula="of:=[.D776]-[.D775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B775]+29" office:value-type="float" office:value="22475" calcext:value-type="float">
            <text:p>22475</text:p>
          </table:table-cell>
          <table:table-cell office:value-type="float" office:value="8640000" calcext:value-type="float">
            <text:p>8640000</text:p>
          </table:table-cell>
          <table:table-cell table:formula="of:=[.B776]/[.C776]" office:value-type="float" office:value="0.00260127314814815" calcext:value-type="float">
            <text:p>0,00260127314814815000</text:p>
          </table:table-cell>
          <table:table-cell table:formula="of:=[.D777]-[.D776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B776]+29" office:value-type="float" office:value="22504" calcext:value-type="float">
            <text:p>22504</text:p>
          </table:table-cell>
          <table:table-cell office:value-type="float" office:value="8640000" calcext:value-type="float">
            <text:p>8640000</text:p>
          </table:table-cell>
          <table:table-cell table:formula="of:=[.B777]/[.C777]" office:value-type="float" office:value="0.00260462962962963" calcext:value-type="float">
            <text:p>0,00260462962962963000</text:p>
          </table:table-cell>
          <table:table-cell table:formula="of:=[.D778]-[.D777]" office:value-type="float" office:value="0.00000335648148148179" calcext:value-type="float">
            <text:p>0,00000335648148148179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B777]+29" office:value-type="float" office:value="22533" calcext:value-type="float">
            <text:p>22533</text:p>
          </table:table-cell>
          <table:table-cell office:value-type="float" office:value="8640000" calcext:value-type="float">
            <text:p>8640000</text:p>
          </table:table-cell>
          <table:table-cell table:formula="of:=[.B778]/[.C778]" office:value-type="float" office:value="0.00260798611111111" calcext:value-type="float">
            <text:p>0,00260798611111111000</text:p>
          </table:table-cell>
          <table:table-cell table:formula="of:=[.D779]-[.D778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B778]+29" office:value-type="float" office:value="22562" calcext:value-type="float">
            <text:p>22562</text:p>
          </table:table-cell>
          <table:table-cell office:value-type="float" office:value="8640000" calcext:value-type="float">
            <text:p>8640000</text:p>
          </table:table-cell>
          <table:table-cell table:formula="of:=[.B779]/[.C779]" office:value-type="float" office:value="0.00261134259259259" calcext:value-type="float">
            <text:p>0,00261134259259259000</text:p>
          </table:table-cell>
          <table:table-cell table:formula="of:=[.D780]-[.D779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B779]+29" office:value-type="float" office:value="22591" calcext:value-type="float">
            <text:p>22591</text:p>
          </table:table-cell>
          <table:table-cell office:value-type="float" office:value="8640000" calcext:value-type="float">
            <text:p>8640000</text:p>
          </table:table-cell>
          <table:table-cell table:formula="of:=[.B780]/[.C780]" office:value-type="float" office:value="0.00261469907407407" calcext:value-type="float">
            <text:p>0,00261469907407407000</text:p>
          </table:table-cell>
          <table:table-cell table:formula="of:=[.D781]-[.D780]" office:value-type="float" office:value="0.00000335648148148179" calcext:value-type="float">
            <text:p>0,00000335648148148179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B780]+29" office:value-type="float" office:value="22620" calcext:value-type="float">
            <text:p>22620</text:p>
          </table:table-cell>
          <table:table-cell office:value-type="float" office:value="8640000" calcext:value-type="float">
            <text:p>8640000</text:p>
          </table:table-cell>
          <table:table-cell table:formula="of:=[.B781]/[.C781]" office:value-type="float" office:value="0.00261805555555556" calcext:value-type="float">
            <text:p>0,00261805555555556000</text:p>
          </table:table-cell>
          <table:table-cell table:formula="of:=[.D782]-[.D781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B781]+29" office:value-type="float" office:value="22649" calcext:value-type="float">
            <text:p>22649</text:p>
          </table:table-cell>
          <table:table-cell office:value-type="float" office:value="8640000" calcext:value-type="float">
            <text:p>8640000</text:p>
          </table:table-cell>
          <table:table-cell table:formula="of:=[.B782]/[.C782]" office:value-type="float" office:value="0.00262141203703704" calcext:value-type="float">
            <text:p>0,00262141203703704000</text:p>
          </table:table-cell>
          <table:table-cell table:formula="of:=[.D783]-[.D782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B782]+29" office:value-type="float" office:value="22678" calcext:value-type="float">
            <text:p>22678</text:p>
          </table:table-cell>
          <table:table-cell office:value-type="float" office:value="8640000" calcext:value-type="float">
            <text:p>8640000</text:p>
          </table:table-cell>
          <table:table-cell table:formula="of:=[.B783]/[.C783]" office:value-type="float" office:value="0.00262476851851852" calcext:value-type="float">
            <text:p>0,00262476851851852000</text:p>
          </table:table-cell>
          <table:table-cell table:formula="of:=[.D784]-[.D783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B783]+29" office:value-type="float" office:value="22707" calcext:value-type="float">
            <text:p>22707</text:p>
          </table:table-cell>
          <table:table-cell office:value-type="float" office:value="8640000" calcext:value-type="float">
            <text:p>8640000</text:p>
          </table:table-cell>
          <table:table-cell table:formula="of:=[.B784]/[.C784]" office:value-type="float" office:value="0.002628125" calcext:value-type="float">
            <text:p>0,00262812500000000000</text:p>
          </table:table-cell>
          <table:table-cell table:formula="of:=[.D785]-[.D784]" office:value-type="float" office:value="0.00000335648148148179" calcext:value-type="float">
            <text:p>0,00000335648148148179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B784]+29" office:value-type="float" office:value="22736" calcext:value-type="float">
            <text:p>22736</text:p>
          </table:table-cell>
          <table:table-cell office:value-type="float" office:value="8640000" calcext:value-type="float">
            <text:p>8640000</text:p>
          </table:table-cell>
          <table:table-cell table:formula="of:=[.B785]/[.C785]" office:value-type="float" office:value="0.00263148148148148" calcext:value-type="float">
            <text:p>0,00263148148148148000</text:p>
          </table:table-cell>
          <table:table-cell table:formula="of:=[.D786]-[.D785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B785]+29" office:value-type="float" office:value="22765" calcext:value-type="float">
            <text:p>22765</text:p>
          </table:table-cell>
          <table:table-cell office:value-type="float" office:value="8640000" calcext:value-type="float">
            <text:p>8640000</text:p>
          </table:table-cell>
          <table:table-cell table:formula="of:=[.B786]/[.C786]" office:value-type="float" office:value="0.00263483796296296" calcext:value-type="float">
            <text:p>0,00263483796296296000</text:p>
          </table:table-cell>
          <table:table-cell table:formula="of:=[.D787]-[.D786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B786]+29" office:value-type="float" office:value="22794" calcext:value-type="float">
            <text:p>22794</text:p>
          </table:table-cell>
          <table:table-cell office:value-type="float" office:value="8640000" calcext:value-type="float">
            <text:p>8640000</text:p>
          </table:table-cell>
          <table:table-cell table:formula="of:=[.B787]/[.C787]" office:value-type="float" office:value="0.00263819444444444" calcext:value-type="float">
            <text:p>0,00263819444444444000</text:p>
          </table:table-cell>
          <table:table-cell table:formula="of:=[.D788]-[.D787]" office:value-type="float" office:value="0.00000335648148148179" calcext:value-type="float">
            <text:p>0,00000335648148148179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B787]+29" office:value-type="float" office:value="22823" calcext:value-type="float">
            <text:p>22823</text:p>
          </table:table-cell>
          <table:table-cell office:value-type="float" office:value="8640000" calcext:value-type="float">
            <text:p>8640000</text:p>
          </table:table-cell>
          <table:table-cell table:formula="of:=[.B788]/[.C788]" office:value-type="float" office:value="0.00264155092592593" calcext:value-type="float">
            <text:p>0,00264155092592593000</text:p>
          </table:table-cell>
          <table:table-cell table:formula="of:=[.D789]-[.D788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B788]+29" office:value-type="float" office:value="22852" calcext:value-type="float">
            <text:p>22852</text:p>
          </table:table-cell>
          <table:table-cell office:value-type="float" office:value="8640000" calcext:value-type="float">
            <text:p>8640000</text:p>
          </table:table-cell>
          <table:table-cell table:formula="of:=[.B789]/[.C789]" office:value-type="float" office:value="0.00264490740740741" calcext:value-type="float">
            <text:p>0,00264490740740741000</text:p>
          </table:table-cell>
          <table:table-cell table:formula="of:=[.D790]-[.D789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B789]+29" office:value-type="float" office:value="22881" calcext:value-type="float">
            <text:p>22881</text:p>
          </table:table-cell>
          <table:table-cell office:value-type="float" office:value="8640000" calcext:value-type="float">
            <text:p>8640000</text:p>
          </table:table-cell>
          <table:table-cell table:formula="of:=[.B790]/[.C790]" office:value-type="float" office:value="0.00264826388888889" calcext:value-type="float">
            <text:p>0,00264826388888889000</text:p>
          </table:table-cell>
          <table:table-cell table:formula="of:=[.D791]-[.D790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B790]+29" office:value-type="float" office:value="22910" calcext:value-type="float">
            <text:p>22910</text:p>
          </table:table-cell>
          <table:table-cell office:value-type="float" office:value="8640000" calcext:value-type="float">
            <text:p>8640000</text:p>
          </table:table-cell>
          <table:table-cell table:formula="of:=[.B791]/[.C791]" office:value-type="float" office:value="0.00265162037037037" calcext:value-type="float">
            <text:p>0,00265162037037037000</text:p>
          </table:table-cell>
          <table:table-cell table:formula="of:=[.D792]-[.D791]" office:value-type="float" office:value="0.00000335648148148179" calcext:value-type="float">
            <text:p>0,00000335648148148179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B791]+29" office:value-type="float" office:value="22939" calcext:value-type="float">
            <text:p>22939</text:p>
          </table:table-cell>
          <table:table-cell office:value-type="float" office:value="8640000" calcext:value-type="float">
            <text:p>8640000</text:p>
          </table:table-cell>
          <table:table-cell table:formula="of:=[.B792]/[.C792]" office:value-type="float" office:value="0.00265497685185185" calcext:value-type="float">
            <text:p>0,00265497685185185000</text:p>
          </table:table-cell>
          <table:table-cell table:formula="of:=[.D793]-[.D792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B792]+29" office:value-type="float" office:value="22968" calcext:value-type="float">
            <text:p>22968</text:p>
          </table:table-cell>
          <table:table-cell office:value-type="float" office:value="8640000" calcext:value-type="float">
            <text:p>8640000</text:p>
          </table:table-cell>
          <table:table-cell table:formula="of:=[.B793]/[.C793]" office:value-type="float" office:value="0.00265833333333333" calcext:value-type="float">
            <text:p>0,00265833333333333000</text:p>
          </table:table-cell>
          <table:table-cell table:formula="of:=[.D794]-[.D793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B793]+29" office:value-type="float" office:value="22997" calcext:value-type="float">
            <text:p>22997</text:p>
          </table:table-cell>
          <table:table-cell office:value-type="float" office:value="8640000" calcext:value-type="float">
            <text:p>8640000</text:p>
          </table:table-cell>
          <table:table-cell table:formula="of:=[.B794]/[.C794]" office:value-type="float" office:value="0.00266168981481481" calcext:value-type="float">
            <text:p>0,00266168981481481000</text:p>
          </table:table-cell>
          <table:table-cell table:formula="of:=[.D795]-[.D794]" office:value-type="float" office:value="0.00000335648148148179" calcext:value-type="float">
            <text:p>0,00000335648148148179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B794]+29" office:value-type="float" office:value="23026" calcext:value-type="float">
            <text:p>23026</text:p>
          </table:table-cell>
          <table:table-cell office:value-type="float" office:value="8640000" calcext:value-type="float">
            <text:p>8640000</text:p>
          </table:table-cell>
          <table:table-cell table:formula="of:=[.B795]/[.C795]" office:value-type="float" office:value="0.0026650462962963" calcext:value-type="float">
            <text:p>0,00266504629629630000</text:p>
          </table:table-cell>
          <table:table-cell table:formula="of:=[.D796]-[.D795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B795]+29" office:value-type="float" office:value="23055" calcext:value-type="float">
            <text:p>23055</text:p>
          </table:table-cell>
          <table:table-cell office:value-type="float" office:value="8640000" calcext:value-type="float">
            <text:p>8640000</text:p>
          </table:table-cell>
          <table:table-cell table:formula="of:=[.B796]/[.C796]" office:value-type="float" office:value="0.00266840277777778" calcext:value-type="float">
            <text:p>0,00266840277777778000</text:p>
          </table:table-cell>
          <table:table-cell table:formula="of:=[.D797]-[.D796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B796]+29" office:value-type="float" office:value="23084" calcext:value-type="float">
            <text:p>23084</text:p>
          </table:table-cell>
          <table:table-cell office:value-type="float" office:value="8640000" calcext:value-type="float">
            <text:p>8640000</text:p>
          </table:table-cell>
          <table:table-cell table:formula="of:=[.B797]/[.C797]" office:value-type="float" office:value="0.00267175925925926" calcext:value-type="float">
            <text:p>0,00267175925925926000</text:p>
          </table:table-cell>
          <table:table-cell table:formula="of:=[.D798]-[.D797]" office:value-type="float" office:value="0.00000335648148148179" calcext:value-type="float">
            <text:p>0,00000335648148148179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B797]+29" office:value-type="float" office:value="23113" calcext:value-type="float">
            <text:p>23113</text:p>
          </table:table-cell>
          <table:table-cell office:value-type="float" office:value="8640000" calcext:value-type="float">
            <text:p>8640000</text:p>
          </table:table-cell>
          <table:table-cell table:formula="of:=[.B798]/[.C798]" office:value-type="float" office:value="0.00267511574074074" calcext:value-type="float">
            <text:p>0,00267511574074074000</text:p>
          </table:table-cell>
          <table:table-cell table:formula="of:=[.D799]-[.D798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B798]+29" office:value-type="float" office:value="23142" calcext:value-type="float">
            <text:p>23142</text:p>
          </table:table-cell>
          <table:table-cell office:value-type="float" office:value="8640000" calcext:value-type="float">
            <text:p>8640000</text:p>
          </table:table-cell>
          <table:table-cell table:formula="of:=[.B799]/[.C799]" office:value-type="float" office:value="0.00267847222222222" calcext:value-type="float">
            <text:p>0,00267847222222222000</text:p>
          </table:table-cell>
          <table:table-cell table:formula="of:=[.D800]-[.D799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B799]+29" office:value-type="float" office:value="23171" calcext:value-type="float">
            <text:p>23171</text:p>
          </table:table-cell>
          <table:table-cell office:value-type="float" office:value="8640000" calcext:value-type="float">
            <text:p>8640000</text:p>
          </table:table-cell>
          <table:table-cell table:formula="of:=[.B800]/[.C800]" office:value-type="float" office:value="0.0026818287037037" calcext:value-type="float">
            <text:p>0,00268182870370370000</text:p>
          </table:table-cell>
          <table:table-cell table:formula="of:=[.D801]-[.D800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B800]+29" office:value-type="float" office:value="23200" calcext:value-type="float">
            <text:p>23200</text:p>
          </table:table-cell>
          <table:table-cell office:value-type="float" office:value="8640000" calcext:value-type="float">
            <text:p>8640000</text:p>
          </table:table-cell>
          <table:table-cell table:formula="of:=[.B801]/[.C801]" office:value-type="float" office:value="0.00268518518518519" calcext:value-type="float">
            <text:p>0,00268518518518519000</text:p>
          </table:table-cell>
          <table:table-cell table:formula="of:=[.D802]-[.D801]" office:value-type="float" office:value="0.00000335648148148179" calcext:value-type="float">
            <text:p>0,00000335648148148179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B801]+29" office:value-type="float" office:value="23229" calcext:value-type="float">
            <text:p>23229</text:p>
          </table:table-cell>
          <table:table-cell office:value-type="float" office:value="8640000" calcext:value-type="float">
            <text:p>8640000</text:p>
          </table:table-cell>
          <table:table-cell table:formula="of:=[.B802]/[.C802]" office:value-type="float" office:value="0.00268854166666667" calcext:value-type="float">
            <text:p>0,00268854166666667000</text:p>
          </table:table-cell>
          <table:table-cell table:formula="of:=[.D803]-[.D802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B802]+29" office:value-type="float" office:value="23258" calcext:value-type="float">
            <text:p>23258</text:p>
          </table:table-cell>
          <table:table-cell office:value-type="float" office:value="8640000" calcext:value-type="float">
            <text:p>8640000</text:p>
          </table:table-cell>
          <table:table-cell table:formula="of:=[.B803]/[.C803]" office:value-type="float" office:value="0.00269189814814815" calcext:value-type="float">
            <text:p>0,00269189814814815000</text:p>
          </table:table-cell>
          <table:table-cell table:formula="of:=[.D804]-[.D803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B803]+29" office:value-type="float" office:value="23287" calcext:value-type="float">
            <text:p>23287</text:p>
          </table:table-cell>
          <table:table-cell office:value-type="float" office:value="8640000" calcext:value-type="float">
            <text:p>8640000</text:p>
          </table:table-cell>
          <table:table-cell table:formula="of:=[.B804]/[.C804]" office:value-type="float" office:value="0.00269525462962963" calcext:value-type="float">
            <text:p>0,00269525462962963000</text:p>
          </table:table-cell>
          <table:table-cell table:formula="of:=[.D805]-[.D804]" office:value-type="float" office:value="0.00000335648148148179" calcext:value-type="float">
            <text:p>0,00000335648148148179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B804]+29" office:value-type="float" office:value="23316" calcext:value-type="float">
            <text:p>23316</text:p>
          </table:table-cell>
          <table:table-cell office:value-type="float" office:value="8640000" calcext:value-type="float">
            <text:p>8640000</text:p>
          </table:table-cell>
          <table:table-cell table:formula="of:=[.B805]/[.C805]" office:value-type="float" office:value="0.00269861111111111" calcext:value-type="float">
            <text:p>0,00269861111111111000</text:p>
          </table:table-cell>
          <table:table-cell table:formula="of:=[.D806]-[.D805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B805]+29" office:value-type="float" office:value="23345" calcext:value-type="float">
            <text:p>23345</text:p>
          </table:table-cell>
          <table:table-cell office:value-type="float" office:value="8640000" calcext:value-type="float">
            <text:p>8640000</text:p>
          </table:table-cell>
          <table:table-cell table:formula="of:=[.B806]/[.C806]" office:value-type="float" office:value="0.00270196759259259" calcext:value-type="float">
            <text:p>0,00270196759259259000</text:p>
          </table:table-cell>
          <table:table-cell table:formula="of:=[.D807]-[.D806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B806]+29" office:value-type="float" office:value="23374" calcext:value-type="float">
            <text:p>23374</text:p>
          </table:table-cell>
          <table:table-cell office:value-type="float" office:value="8640000" calcext:value-type="float">
            <text:p>8640000</text:p>
          </table:table-cell>
          <table:table-cell table:formula="of:=[.B807]/[.C807]" office:value-type="float" office:value="0.00270532407407407" calcext:value-type="float">
            <text:p>0,00270532407407407000</text:p>
          </table:table-cell>
          <table:table-cell table:formula="of:=[.D808]-[.D807]" office:value-type="float" office:value="0.00000335648148148179" calcext:value-type="float">
            <text:p>0,00000335648148148179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B807]+29" office:value-type="float" office:value="23403" calcext:value-type="float">
            <text:p>23403</text:p>
          </table:table-cell>
          <table:table-cell office:value-type="float" office:value="8640000" calcext:value-type="float">
            <text:p>8640000</text:p>
          </table:table-cell>
          <table:table-cell table:formula="of:=[.B808]/[.C808]" office:value-type="float" office:value="0.00270868055555556" calcext:value-type="float">
            <text:p>0,00270868055555556000</text:p>
          </table:table-cell>
          <table:table-cell table:formula="of:=[.D809]-[.D808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B808]+29" office:value-type="float" office:value="23432" calcext:value-type="float">
            <text:p>23432</text:p>
          </table:table-cell>
          <table:table-cell office:value-type="float" office:value="8640000" calcext:value-type="float">
            <text:p>8640000</text:p>
          </table:table-cell>
          <table:table-cell table:formula="of:=[.B809]/[.C809]" office:value-type="float" office:value="0.00271203703703704" calcext:value-type="float">
            <text:p>0,00271203703703704000</text:p>
          </table:table-cell>
          <table:table-cell table:formula="of:=[.D810]-[.D809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B809]+29" office:value-type="float" office:value="23461" calcext:value-type="float">
            <text:p>23461</text:p>
          </table:table-cell>
          <table:table-cell office:value-type="float" office:value="8640000" calcext:value-type="float">
            <text:p>8640000</text:p>
          </table:table-cell>
          <table:table-cell table:formula="of:=[.B810]/[.C810]" office:value-type="float" office:value="0.00271539351851852" calcext:value-type="float">
            <text:p>0,00271539351851852000</text:p>
          </table:table-cell>
          <table:table-cell table:formula="of:=[.D811]-[.D810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B810]+29" office:value-type="float" office:value="23490" calcext:value-type="float">
            <text:p>23490</text:p>
          </table:table-cell>
          <table:table-cell office:value-type="float" office:value="8640000" calcext:value-type="float">
            <text:p>8640000</text:p>
          </table:table-cell>
          <table:table-cell table:formula="of:=[.B811]/[.C811]" office:value-type="float" office:value="0.00271875" calcext:value-type="float">
            <text:p>0,00271875000000000000</text:p>
          </table:table-cell>
          <table:table-cell table:formula="of:=[.D812]-[.D811]" office:value-type="float" office:value="0.00000335648148148179" calcext:value-type="float">
            <text:p>0,00000335648148148179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B811]+29" office:value-type="float" office:value="23519" calcext:value-type="float">
            <text:p>23519</text:p>
          </table:table-cell>
          <table:table-cell office:value-type="float" office:value="8640000" calcext:value-type="float">
            <text:p>8640000</text:p>
          </table:table-cell>
          <table:table-cell table:formula="of:=[.B812]/[.C812]" office:value-type="float" office:value="0.00272210648148148" calcext:value-type="float">
            <text:p>0,00272210648148148000</text:p>
          </table:table-cell>
          <table:table-cell table:formula="of:=[.D813]-[.D812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B812]+29" office:value-type="float" office:value="23548" calcext:value-type="float">
            <text:p>23548</text:p>
          </table:table-cell>
          <table:table-cell office:value-type="float" office:value="8640000" calcext:value-type="float">
            <text:p>8640000</text:p>
          </table:table-cell>
          <table:table-cell table:formula="of:=[.B813]/[.C813]" office:value-type="float" office:value="0.00272546296296296" calcext:value-type="float">
            <text:p>0,00272546296296296000</text:p>
          </table:table-cell>
          <table:table-cell table:formula="of:=[.D814]-[.D813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B813]+29" office:value-type="float" office:value="23577" calcext:value-type="float">
            <text:p>23577</text:p>
          </table:table-cell>
          <table:table-cell office:value-type="float" office:value="8640000" calcext:value-type="float">
            <text:p>8640000</text:p>
          </table:table-cell>
          <table:table-cell table:formula="of:=[.B814]/[.C814]" office:value-type="float" office:value="0.00272881944444444" calcext:value-type="float">
            <text:p>0,00272881944444444000</text:p>
          </table:table-cell>
          <table:table-cell table:formula="of:=[.D815]-[.D814]" office:value-type="float" office:value="0.00000335648148148179" calcext:value-type="float">
            <text:p>0,00000335648148148179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B814]+29" office:value-type="float" office:value="23606" calcext:value-type="float">
            <text:p>23606</text:p>
          </table:table-cell>
          <table:table-cell office:value-type="float" office:value="8640000" calcext:value-type="float">
            <text:p>8640000</text:p>
          </table:table-cell>
          <table:table-cell table:formula="of:=[.B815]/[.C815]" office:value-type="float" office:value="0.00273217592592593" calcext:value-type="float">
            <text:p>0,00273217592592593000</text:p>
          </table:table-cell>
          <table:table-cell table:formula="of:=[.D816]-[.D815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B815]+29" office:value-type="float" office:value="23635" calcext:value-type="float">
            <text:p>23635</text:p>
          </table:table-cell>
          <table:table-cell office:value-type="float" office:value="8640000" calcext:value-type="float">
            <text:p>8640000</text:p>
          </table:table-cell>
          <table:table-cell table:formula="of:=[.B816]/[.C816]" office:value-type="float" office:value="0.00273553240740741" calcext:value-type="float">
            <text:p>0,00273553240740741000</text:p>
          </table:table-cell>
          <table:table-cell table:formula="of:=[.D817]-[.D816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B816]+29" office:value-type="float" office:value="23664" calcext:value-type="float">
            <text:p>23664</text:p>
          </table:table-cell>
          <table:table-cell office:value-type="float" office:value="8640000" calcext:value-type="float">
            <text:p>8640000</text:p>
          </table:table-cell>
          <table:table-cell table:formula="of:=[.B817]/[.C817]" office:value-type="float" office:value="0.00273888888888889" calcext:value-type="float">
            <text:p>0,00273888888888889000</text:p>
          </table:table-cell>
          <table:table-cell table:formula="of:=[.D818]-[.D817]" office:value-type="float" office:value="0.00000335648148148179" calcext:value-type="float">
            <text:p>0,00000335648148148179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B817]+29" office:value-type="float" office:value="23693" calcext:value-type="float">
            <text:p>23693</text:p>
          </table:table-cell>
          <table:table-cell office:value-type="float" office:value="8640000" calcext:value-type="float">
            <text:p>8640000</text:p>
          </table:table-cell>
          <table:table-cell table:formula="of:=[.B818]/[.C818]" office:value-type="float" office:value="0.00274224537037037" calcext:value-type="float">
            <text:p>0,00274224537037037000</text:p>
          </table:table-cell>
          <table:table-cell table:formula="of:=[.D819]-[.D818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B818]+29" office:value-type="float" office:value="23722" calcext:value-type="float">
            <text:p>23722</text:p>
          </table:table-cell>
          <table:table-cell office:value-type="float" office:value="8640000" calcext:value-type="float">
            <text:p>8640000</text:p>
          </table:table-cell>
          <table:table-cell table:formula="of:=[.B819]/[.C819]" office:value-type="float" office:value="0.00274560185185185" calcext:value-type="float">
            <text:p>0,00274560185185185000</text:p>
          </table:table-cell>
          <table:table-cell table:formula="of:=[.D820]-[.D819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B819]+29" office:value-type="float" office:value="23751" calcext:value-type="float">
            <text:p>23751</text:p>
          </table:table-cell>
          <table:table-cell office:value-type="float" office:value="8640000" calcext:value-type="float">
            <text:p>8640000</text:p>
          </table:table-cell>
          <table:table-cell table:formula="of:=[.B820]/[.C820]" office:value-type="float" office:value="0.00274895833333333" calcext:value-type="float">
            <text:p>0,00274895833333333000</text:p>
          </table:table-cell>
          <table:table-cell table:formula="of:=[.D821]-[.D820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B820]+29" office:value-type="float" office:value="23780" calcext:value-type="float">
            <text:p>23780</text:p>
          </table:table-cell>
          <table:table-cell office:value-type="float" office:value="8640000" calcext:value-type="float">
            <text:p>8640000</text:p>
          </table:table-cell>
          <table:table-cell table:formula="of:=[.B821]/[.C821]" office:value-type="float" office:value="0.00275231481481481" calcext:value-type="float">
            <text:p>0,00275231481481481000</text:p>
          </table:table-cell>
          <table:table-cell table:formula="of:=[.D822]-[.D821]" office:value-type="float" office:value="0.00000335648148148179" calcext:value-type="float">
            <text:p>0,00000335648148148179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B821]+29" office:value-type="float" office:value="23809" calcext:value-type="float">
            <text:p>23809</text:p>
          </table:table-cell>
          <table:table-cell office:value-type="float" office:value="8640000" calcext:value-type="float">
            <text:p>8640000</text:p>
          </table:table-cell>
          <table:table-cell table:formula="of:=[.B822]/[.C822]" office:value-type="float" office:value="0.0027556712962963" calcext:value-type="float">
            <text:p>0,00275567129629630000</text:p>
          </table:table-cell>
          <table:table-cell table:formula="of:=[.D823]-[.D822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B822]+29" office:value-type="float" office:value="23838" calcext:value-type="float">
            <text:p>23838</text:p>
          </table:table-cell>
          <table:table-cell office:value-type="float" office:value="8640000" calcext:value-type="float">
            <text:p>8640000</text:p>
          </table:table-cell>
          <table:table-cell table:formula="of:=[.B823]/[.C823]" office:value-type="float" office:value="0.00275902777777778" calcext:value-type="float">
            <text:p>0,00275902777777778000</text:p>
          </table:table-cell>
          <table:table-cell table:formula="of:=[.D824]-[.D823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B823]+29" office:value-type="float" office:value="23867" calcext:value-type="float">
            <text:p>23867</text:p>
          </table:table-cell>
          <table:table-cell office:value-type="float" office:value="8640000" calcext:value-type="float">
            <text:p>8640000</text:p>
          </table:table-cell>
          <table:table-cell table:formula="of:=[.B824]/[.C824]" office:value-type="float" office:value="0.00276238425925926" calcext:value-type="float">
            <text:p>0,00276238425925926000</text:p>
          </table:table-cell>
          <table:table-cell table:formula="of:=[.D825]-[.D824]" office:value-type="float" office:value="0.00000335648148148179" calcext:value-type="float">
            <text:p>0,00000335648148148179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B824]+29" office:value-type="float" office:value="23896" calcext:value-type="float">
            <text:p>23896</text:p>
          </table:table-cell>
          <table:table-cell office:value-type="float" office:value="8640000" calcext:value-type="float">
            <text:p>8640000</text:p>
          </table:table-cell>
          <table:table-cell table:formula="of:=[.B825]/[.C825]" office:value-type="float" office:value="0.00276574074074074" calcext:value-type="float">
            <text:p>0,00276574074074074000</text:p>
          </table:table-cell>
          <table:table-cell table:formula="of:=[.D826]-[.D825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B825]+29" office:value-type="float" office:value="23925" calcext:value-type="float">
            <text:p>23925</text:p>
          </table:table-cell>
          <table:table-cell office:value-type="float" office:value="8640000" calcext:value-type="float">
            <text:p>8640000</text:p>
          </table:table-cell>
          <table:table-cell table:formula="of:=[.B826]/[.C826]" office:value-type="float" office:value="0.00276909722222222" calcext:value-type="float">
            <text:p>0,00276909722222222000</text:p>
          </table:table-cell>
          <table:table-cell table:formula="of:=[.D827]-[.D826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B826]+29" office:value-type="float" office:value="23954" calcext:value-type="float">
            <text:p>23954</text:p>
          </table:table-cell>
          <table:table-cell office:value-type="float" office:value="8640000" calcext:value-type="float">
            <text:p>8640000</text:p>
          </table:table-cell>
          <table:table-cell table:formula="of:=[.B827]/[.C827]" office:value-type="float" office:value="0.0027724537037037" calcext:value-type="float">
            <text:p>0,00277245370370370000</text:p>
          </table:table-cell>
          <table:table-cell table:formula="of:=[.D828]-[.D827]" office:value-type="float" office:value="0.00000335648148148135" calcext:value-type="float">
            <text:p>0,00000335648148148135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B827]+29" office:value-type="float" office:value="23983" calcext:value-type="float">
            <text:p>23983</text:p>
          </table:table-cell>
          <table:table-cell office:value-type="float" office:value="8640000" calcext:value-type="float">
            <text:p>8640000</text:p>
          </table:table-cell>
          <table:table-cell table:formula="of:=[.B828]/[.C828]" office:value-type="float" office:value="0.00277581018518519" calcext:value-type="float">
            <text:p>0,00277581018518519000</text:p>
          </table:table-cell>
          <table:table-cell table:formula="of:=#REF!-[.D828]" office:value-type="string" office:string-value="" calcext:value-type="error">
            <text:p>#REF!</text:p>
          </table:table-cell>
        </table:table-row>
        <table:table-row table:style-name="ro1" table:number-rows-repeated="104774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5:55:28.956238262</meta:creation-date>
    <dc:date>2026-05-17T15:55:34.613697417</dc:date>
    <meta:editing-duration>PT7S</meta:editing-duration>
    <meta:editing-cycles>1</meta:editing-cycles>
    <meta:document-statistic meta:table-count="1" meta:cell-count="4140" meta:object-count="0"/>
    <meta:generator>LibreOffice/24.2.7.2$Linux_X86_64 LibreOffice_project/420$Build-2</meta:generator>
  </office:meta>
</office:document-meta>
</file>