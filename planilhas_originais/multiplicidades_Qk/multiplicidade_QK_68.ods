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87037037037037" calcext:value-type="float">
            <text:p>0,00000787037037037037</text:p>
          </table:table-cell>
          <table:table-cell table:formula="of:=[.D3]-[.D2]" office:value-type="float" office:value="0.00000787037037037037" calcext:value-type="float">
            <text:p>0,00000787037037037037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8" office:value-type="float" office:value="136" calcext:value-type="float">
            <text:p>13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57407407407407" calcext:value-type="float">
            <text:p>0,00001574074074074070</text:p>
          </table:table-cell>
          <table:table-cell table:formula="of:=[.D4]-[.D3]" office:value-type="float" office:value="0.00000787037037037037" calcext:value-type="float">
            <text:p>0,00000787037037037037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8" office:value-type="float" office:value="204" calcext:value-type="float">
            <text:p>20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36111111111111" calcext:value-type="float">
            <text:p>0,00002361111111111110</text:p>
          </table:table-cell>
          <table:table-cell table:formula="of:=[.D5]-[.D4]" office:value-type="float" office:value="0.00000787037037037037" calcext:value-type="float">
            <text:p>0,00000787037037037037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8" office:value-type="float" office:value="272" calcext:value-type="float">
            <text:p>27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14814814814815" calcext:value-type="float">
            <text:p>0,00003148148148148150</text:p>
          </table:table-cell>
          <table:table-cell table:formula="of:=[.D6]-[.D5]" office:value-type="float" office:value="0.00000787037037037037" calcext:value-type="float">
            <text:p>0,00000787037037037037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8" office:value-type="float" office:value="340" calcext:value-type="float">
            <text:p>34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93518518518519" calcext:value-type="float">
            <text:p>0,00003935185185185190</text:p>
          </table:table-cell>
          <table:table-cell table:formula="of:=[.D7]-[.D6]" office:value-type="float" office:value="0.00000787037037037037" calcext:value-type="float">
            <text:p>0,00000787037037037037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8" office:value-type="float" office:value="408" calcext:value-type="float">
            <text:p>40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72222222222222" calcext:value-type="float">
            <text:p>0,00004722222222222220</text:p>
          </table:table-cell>
          <table:table-cell table:formula="of:=[.D8]-[.D7]" office:value-type="float" office:value="0.00000787037037037037" calcext:value-type="float">
            <text:p>0,00000787037037037037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8" office:value-type="float" office:value="476" calcext:value-type="float">
            <text:p>47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50925925925926" calcext:value-type="float">
            <text:p>0,00005509259259259260</text:p>
          </table:table-cell>
          <table:table-cell table:formula="of:=[.D9]-[.D8]" office:value-type="float" office:value="0.00000787037037037037" calcext:value-type="float">
            <text:p>0,00000787037037037037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8" office:value-type="float" office:value="544" calcext:value-type="float">
            <text:p>54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2962962962963" calcext:value-type="float">
            <text:p>0,00006296296296296300</text:p>
          </table:table-cell>
          <table:table-cell table:formula="of:=[.D10]-[.D9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8" office:value-type="float" office:value="612" calcext:value-type="float">
            <text:p>61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08333333333333" calcext:value-type="float">
            <text:p>0,00007083333333333330</text:p>
          </table:table-cell>
          <table:table-cell table:formula="of:=[.D11]-[.D10]" office:value-type="float" office:value="0.00000787037037037036" calcext:value-type="float">
            <text:p>0,0000078703703703703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8" office:value-type="float" office:value="680" calcext:value-type="float">
            <text:p>6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87037037037037" calcext:value-type="float">
            <text:p>0,00007870370370370370</text:p>
          </table:table-cell>
          <table:table-cell table:formula="of:=[.D12]-[.D11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8" office:value-type="float" office:value="748" calcext:value-type="float">
            <text:p>74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865740740740741" calcext:value-type="float">
            <text:p>0,00008657407407407410</text:p>
          </table:table-cell>
          <table:table-cell table:formula="of:=[.D13]-[.D12]" office:value-type="float" office:value="0.00000787037037037036" calcext:value-type="float">
            <text:p>0,0000078703703703703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8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944444444444444" calcext:value-type="float">
            <text:p>0,00009444444444444440</text:p>
          </table:table-cell>
          <table:table-cell table:formula="of:=[.D14]-[.D13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8" office:value-type="float" office:value="884" calcext:value-type="float">
            <text:p>88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02314814814815" calcext:value-type="float">
            <text:p>0,00010231481481481500</text:p>
          </table:table-cell>
          <table:table-cell table:formula="of:=[.D15]-[.D14]" office:value-type="float" office:value="0.00000787037037037036" calcext:value-type="float">
            <text:p>0,0000078703703703703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8" office:value-type="float" office:value="952" calcext:value-type="float">
            <text:p>95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10185185185185" calcext:value-type="float">
            <text:p>0,00011018518518518500</text:p>
          </table:table-cell>
          <table:table-cell table:formula="of:=[.D16]-[.D15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8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18055555555556" calcext:value-type="float">
            <text:p>0,00011805555555555600</text:p>
          </table:table-cell>
          <table:table-cell table:formula="of:=[.D17]-[.D16]" office:value-type="float" office:value="0.00000787037037037036" calcext:value-type="float">
            <text:p>0,0000078703703703703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8" office:value-type="float" office:value="1088" calcext:value-type="float">
            <text:p>108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25925925925926" calcext:value-type="float">
            <text:p>0,00012592592592592600</text:p>
          </table:table-cell>
          <table:table-cell table:formula="of:=[.D18]-[.D17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8" office:value-type="float" office:value="1156" calcext:value-type="float">
            <text:p>115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33796296296296" calcext:value-type="float">
            <text:p>0,00013379629629629600</text:p>
          </table:table-cell>
          <table:table-cell table:formula="of:=[.D19]-[.D18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8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41666666666667" calcext:value-type="float">
            <text:p>0,00014166666666666700</text:p>
          </table:table-cell>
          <table:table-cell table:formula="of:=[.D20]-[.D19]" office:value-type="float" office:value="0.00000787037037037035" calcext:value-type="float">
            <text:p>0,00000787037037037035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8" office:value-type="float" office:value="1292" calcext:value-type="float">
            <text:p>129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49537037037037" calcext:value-type="float">
            <text:p>0,00014953703703703700</text:p>
          </table:table-cell>
          <table:table-cell table:formula="of:=[.D21]-[.D20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8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57407407407407" calcext:value-type="float">
            <text:p>0,00015740740740740700</text:p>
          </table:table-cell>
          <table:table-cell table:formula="of:=[.D22]-[.D21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8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65277777777778" calcext:value-type="float">
            <text:p>0,00016527777777777800</text:p>
          </table:table-cell>
          <table:table-cell table:formula="of:=[.D23]-[.D22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8" office:value-type="float" office:value="1496" calcext:value-type="float">
            <text:p>149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73148148148148" calcext:value-type="float">
            <text:p>0,00017314814814814800</text:p>
          </table:table-cell>
          <table:table-cell table:formula="of:=[.D24]-[.D23]" office:value-type="float" office:value="0.00000787037037037035" calcext:value-type="float">
            <text:p>0,00000787037037037035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8" office:value-type="float" office:value="1564" calcext:value-type="float">
            <text:p>156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81018518518519" calcext:value-type="float">
            <text:p>0,00018101851851851900</text:p>
          </table:table-cell>
          <table:table-cell table:formula="of:=[.D25]-[.D24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8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88888888888889" calcext:value-type="float">
            <text:p>0,00018888888888888900</text:p>
          </table:table-cell>
          <table:table-cell table:formula="of:=[.D26]-[.D25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8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96759259259259" calcext:value-type="float">
            <text:p>0,00019675925925925900</text:p>
          </table:table-cell>
          <table:table-cell table:formula="of:=[.D27]-[.D26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8" office:value-type="float" office:value="1768" calcext:value-type="float">
            <text:p>176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0462962962963" calcext:value-type="float">
            <text:p>0,00020462962962963000</text:p>
          </table:table-cell>
          <table:table-cell table:formula="of:=[.D28]-[.D27]" office:value-type="float" office:value="0.00000787037037037035" calcext:value-type="float">
            <text:p>0,00000787037037037035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8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125" calcext:value-type="float">
            <text:p>0,00021250000000000000</text:p>
          </table:table-cell>
          <table:table-cell table:formula="of:=[.D29]-[.D28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8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2037037037037" calcext:value-type="float">
            <text:p>0,00022037037037037000</text:p>
          </table:table-cell>
          <table:table-cell table:formula="of:=[.D30]-[.D29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8" office:value-type="float" office:value="1972" calcext:value-type="float">
            <text:p>197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28240740740741" calcext:value-type="float">
            <text:p>0,00022824074074074100</text:p>
          </table:table-cell>
          <table:table-cell table:formula="of:=[.D31]-[.D30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8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36111111111111" calcext:value-type="float">
            <text:p>0,00023611111111111100</text:p>
          </table:table-cell>
          <table:table-cell table:formula="of:=[.D32]-[.D31]" office:value-type="float" office:value="0.00000787037037037035" calcext:value-type="float">
            <text:p>0,00000787037037037035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8" office:value-type="float" office:value="2108" calcext:value-type="float">
            <text:p>210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43981481481481" calcext:value-type="float">
            <text:p>0,00024398148148148100</text:p>
          </table:table-cell>
          <table:table-cell table:formula="of:=[.D33]-[.D32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8" office:value-type="float" office:value="2176" calcext:value-type="float">
            <text:p>217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51851851851852" calcext:value-type="float">
            <text:p>0,00025185185185185200</text:p>
          </table:table-cell>
          <table:table-cell table:formula="of:=[.D34]-[.D33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8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59722222222222" calcext:value-type="float">
            <text:p>0,00025972222222222200</text:p>
          </table:table-cell>
          <table:table-cell table:formula="of:=[.D35]-[.D34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8" office:value-type="float" office:value="2312" calcext:value-type="float">
            <text:p>231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67592592592593" calcext:value-type="float">
            <text:p>0,00026759259259259300</text:p>
          </table:table-cell>
          <table:table-cell table:formula="of:=[.D36]-[.D35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8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75462962962963" calcext:value-type="float">
            <text:p>0,00027546296296296300</text:p>
          </table:table-cell>
          <table:table-cell table:formula="of:=[.D37]-[.D36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8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83333333333333" calcext:value-type="float">
            <text:p>0,00028333333333333300</text:p>
          </table:table-cell>
          <table:table-cell table:formula="of:=[.D38]-[.D37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8" office:value-type="float" office:value="2516" calcext:value-type="float">
            <text:p>251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91203703703704" calcext:value-type="float">
            <text:p>0,00029120370370370400</text:p>
          </table:table-cell>
          <table:table-cell table:formula="of:=[.D39]-[.D3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8" office:value-type="float" office:value="2584" calcext:value-type="float">
            <text:p>258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99074074074074" calcext:value-type="float">
            <text:p>0,00029907407407407400</text:p>
          </table:table-cell>
          <table:table-cell table:formula="of:=[.D40]-[.D39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8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06944444444444" calcext:value-type="float">
            <text:p>0,00030694444444444400</text:p>
          </table:table-cell>
          <table:table-cell table:formula="of:=[.D41]-[.D40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8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14814814814815" calcext:value-type="float">
            <text:p>0,00031481481481481500</text:p>
          </table:table-cell>
          <table:table-cell table:formula="of:=[.D42]-[.D41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8" office:value-type="float" office:value="2788" calcext:value-type="float">
            <text:p>278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22685185185185" calcext:value-type="float">
            <text:p>0,00032268518518518500</text:p>
          </table:table-cell>
          <table:table-cell table:formula="of:=[.D43]-[.D42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8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30555555555556" calcext:value-type="float">
            <text:p>0,00033055555555555600</text:p>
          </table:table-cell>
          <table:table-cell table:formula="of:=[.D44]-[.D43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8" office:value-type="float" office:value="2924" calcext:value-type="float">
            <text:p>292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38425925925926" calcext:value-type="float">
            <text:p>0,00033842592592592600</text:p>
          </table:table-cell>
          <table:table-cell table:formula="of:=[.D45]-[.D44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8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46296296296296" calcext:value-type="float">
            <text:p>0,00034629629629629600</text:p>
          </table:table-cell>
          <table:table-cell table:formula="of:=[.D46]-[.D45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8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54166666666667" calcext:value-type="float">
            <text:p>0,00035416666666666700</text:p>
          </table:table-cell>
          <table:table-cell table:formula="of:=[.D47]-[.D4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8" office:value-type="float" office:value="3128" calcext:value-type="float">
            <text:p>312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62037037037037" calcext:value-type="float">
            <text:p>0,00036203703703703700</text:p>
          </table:table-cell>
          <table:table-cell table:formula="of:=[.D48]-[.D47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8" office:value-type="float" office:value="3196" calcext:value-type="float">
            <text:p>319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69907407407407" calcext:value-type="float">
            <text:p>0,00036990740740740700</text:p>
          </table:table-cell>
          <table:table-cell table:formula="of:=[.D49]-[.D48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8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77777777777778" calcext:value-type="float">
            <text:p>0,00037777777777777800</text:p>
          </table:table-cell>
          <table:table-cell table:formula="of:=[.D50]-[.D49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8" office:value-type="float" office:value="3332" calcext:value-type="float">
            <text:p>333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85648148148148" calcext:value-type="float">
            <text:p>0,00038564814814814800</text:p>
          </table:table-cell>
          <table:table-cell table:formula="of:=[.D51]-[.D50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8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93518518518519" calcext:value-type="float">
            <text:p>0,00039351851851851900</text:p>
          </table:table-cell>
          <table:table-cell table:formula="of:=[.D52]-[.D51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8" office:value-type="float" office:value="3468" calcext:value-type="float">
            <text:p>346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01388888888889" calcext:value-type="float">
            <text:p>0,00040138888888888900</text:p>
          </table:table-cell>
          <table:table-cell table:formula="of:=[.D53]-[.D52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8" office:value-type="float" office:value="3536" calcext:value-type="float">
            <text:p>353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09259259259259" calcext:value-type="float">
            <text:p>0,00040925925925925900</text:p>
          </table:table-cell>
          <table:table-cell table:formula="of:=[.D54]-[.D53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8" office:value-type="float" office:value="3604" calcext:value-type="float">
            <text:p>360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1712962962963" calcext:value-type="float">
            <text:p>0,00041712962962963000</text:p>
          </table:table-cell>
          <table:table-cell table:formula="of:=[.D55]-[.D5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8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25" calcext:value-type="float">
            <text:p>0,00042500000000000000</text:p>
          </table:table-cell>
          <table:table-cell table:formula="of:=[.D56]-[.D55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8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3287037037037" calcext:value-type="float">
            <text:p>0,00043287037037037000</text:p>
          </table:table-cell>
          <table:table-cell table:formula="of:=[.D57]-[.D56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8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40740740740741" calcext:value-type="float">
            <text:p>0,00044074074074074100</text:p>
          </table:table-cell>
          <table:table-cell table:formula="of:=[.D58]-[.D57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8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48611111111111" calcext:value-type="float">
            <text:p>0,00044861111111111100</text:p>
          </table:table-cell>
          <table:table-cell table:formula="of:=[.D59]-[.D58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8" office:value-type="float" office:value="3944" calcext:value-type="float">
            <text:p>394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56481481481482" calcext:value-type="float">
            <text:p>0,00045648148148148200</text:p>
          </table:table-cell>
          <table:table-cell table:formula="of:=[.D60]-[.D59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8" office:value-type="float" office:value="4012" calcext:value-type="float">
            <text:p>401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64351851851852" calcext:value-type="float">
            <text:p>0,00046435185185185200</text:p>
          </table:table-cell>
          <table:table-cell table:formula="of:=[.D61]-[.D60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8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72222222222222" calcext:value-type="float">
            <text:p>0,00047222222222222200</text:p>
          </table:table-cell>
          <table:table-cell table:formula="of:=[.D62]-[.D61]" office:value-type="float" office:value="0.00000787037037037038" calcext:value-type="float">
            <text:p>0,00000787037037037038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8" office:value-type="float" office:value="4148" calcext:value-type="float">
            <text:p>414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80092592592593" calcext:value-type="float">
            <text:p>0,00048009259259259300</text:p>
          </table:table-cell>
          <table:table-cell table:formula="of:=[.D63]-[.D6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8" office:value-type="float" office:value="4216" calcext:value-type="float">
            <text:p>421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87962962962963" calcext:value-type="float">
            <text:p>0,00048796296296296300</text:p>
          </table:table-cell>
          <table:table-cell table:formula="of:=[.D64]-[.D63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8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95833333333333" calcext:value-type="float">
            <text:p>0,00049583333333333300</text:p>
          </table:table-cell>
          <table:table-cell table:formula="of:=[.D65]-[.D6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8" office:value-type="float" office:value="4352" calcext:value-type="float">
            <text:p>435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03703703703704" calcext:value-type="float">
            <text:p>0,00050370370370370400</text:p>
          </table:table-cell>
          <table:table-cell table:formula="of:=[.D66]-[.D65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8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11574074074074" calcext:value-type="float">
            <text:p>0,00051157407407407400</text:p>
          </table:table-cell>
          <table:table-cell table:formula="of:=[.D67]-[.D6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8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19444444444444" calcext:value-type="float">
            <text:p>0,00051944444444444400</text:p>
          </table:table-cell>
          <table:table-cell table:formula="of:=[.D68]-[.D6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8" office:value-type="float" office:value="4556" calcext:value-type="float">
            <text:p>455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27314814814815" calcext:value-type="float">
            <text:p>0,00052731481481481500</text:p>
          </table:table-cell>
          <table:table-cell table:formula="of:=[.D69]-[.D68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8" office:value-type="float" office:value="4624" calcext:value-type="float">
            <text:p>462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35185185185185" calcext:value-type="float">
            <text:p>0,00053518518518518500</text:p>
          </table:table-cell>
          <table:table-cell table:formula="of:=[.D70]-[.D6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8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43055555555556" calcext:value-type="float">
            <text:p>0,00054305555555555600</text:p>
          </table:table-cell>
          <table:table-cell table:formula="of:=[.D71]-[.D70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8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50925925925926" calcext:value-type="float">
            <text:p>0,00055092592592592600</text:p>
          </table:table-cell>
          <table:table-cell table:formula="of:=[.D72]-[.D7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8" office:value-type="float" office:value="4828" calcext:value-type="float">
            <text:p>482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58796296296296" calcext:value-type="float">
            <text:p>0,00055879629629629600</text:p>
          </table:table-cell>
          <table:table-cell table:formula="of:=[.D73]-[.D72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8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66666666666667" calcext:value-type="float">
            <text:p>0,00056666666666666700</text:p>
          </table:table-cell>
          <table:table-cell table:formula="of:=[.D74]-[.D7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8" office:value-type="float" office:value="4964" calcext:value-type="float">
            <text:p>496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74537037037037" calcext:value-type="float">
            <text:p>0,00057453703703703700</text:p>
          </table:table-cell>
          <table:table-cell table:formula="of:=[.D75]-[.D74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8" office:value-type="float" office:value="5032" calcext:value-type="float">
            <text:p>503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82407407407408" calcext:value-type="float">
            <text:p>0,00058240740740740800</text:p>
          </table:table-cell>
          <table:table-cell table:formula="of:=[.D76]-[.D7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8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90277777777778" calcext:value-type="float">
            <text:p>0,00059027777777777800</text:p>
          </table:table-cell>
          <table:table-cell table:formula="of:=[.D77]-[.D7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8" office:value-type="float" office:value="5168" calcext:value-type="float">
            <text:p>516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98148148148148" calcext:value-type="float">
            <text:p>0,00059814814814814800</text:p>
          </table:table-cell>
          <table:table-cell table:formula="of:=[.D78]-[.D77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8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06018518518519" calcext:value-type="float">
            <text:p>0,00060601851851851900</text:p>
          </table:table-cell>
          <table:table-cell table:formula="of:=[.D79]-[.D7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8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13888888888889" calcext:value-type="float">
            <text:p>0,00061388888888888900</text:p>
          </table:table-cell>
          <table:table-cell table:formula="of:=[.D80]-[.D79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8" office:value-type="float" office:value="5372" calcext:value-type="float">
            <text:p>537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21759259259259" calcext:value-type="float">
            <text:p>0,00062175925925925900</text:p>
          </table:table-cell>
          <table:table-cell table:formula="of:=[.D81]-[.D8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8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2962962962963" calcext:value-type="float">
            <text:p>0,00062962962962963000</text:p>
          </table:table-cell>
          <table:table-cell table:formula="of:=[.D82]-[.D81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8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375" calcext:value-type="float">
            <text:p>0,00063750000000000000</text:p>
          </table:table-cell>
          <table:table-cell table:formula="of:=[.D83]-[.D8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8" office:value-type="float" office:value="5576" calcext:value-type="float">
            <text:p>557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4537037037037" calcext:value-type="float">
            <text:p>0,00064537037037037000</text:p>
          </table:table-cell>
          <table:table-cell table:formula="of:=[.D84]-[.D8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8" office:value-type="float" office:value="5644" calcext:value-type="float">
            <text:p>564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53240740740741" calcext:value-type="float">
            <text:p>0,00065324074074074100</text:p>
          </table:table-cell>
          <table:table-cell table:formula="of:=[.D85]-[.D84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8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61111111111111" calcext:value-type="float">
            <text:p>0,00066111111111111100</text:p>
          </table:table-cell>
          <table:table-cell table:formula="of:=[.D86]-[.D8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8" office:value-type="float" office:value="5780" calcext:value-type="float">
            <text:p>578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68981481481481" calcext:value-type="float">
            <text:p>0,00066898148148148100</text:p>
          </table:table-cell>
          <table:table-cell table:formula="of:=[.D87]-[.D86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8" office:value-type="float" office:value="5848" calcext:value-type="float">
            <text:p>584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76851851851852" calcext:value-type="float">
            <text:p>0,00067685185185185200</text:p>
          </table:table-cell>
          <table:table-cell table:formula="of:=[.D88]-[.D8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8" office:value-type="float" office:value="5916" calcext:value-type="float">
            <text:p>591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84722222222222" calcext:value-type="float">
            <text:p>0,00068472222222222200</text:p>
          </table:table-cell>
          <table:table-cell table:formula="of:=[.D89]-[.D88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8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92592592592593" calcext:value-type="float">
            <text:p>0,00069259259259259300</text:p>
          </table:table-cell>
          <table:table-cell table:formula="of:=[.D90]-[.D8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8" office:value-type="float" office:value="6052" calcext:value-type="float">
            <text:p>605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00462962962963" calcext:value-type="float">
            <text:p>0,00070046296296296300</text:p>
          </table:table-cell>
          <table:table-cell table:formula="of:=[.D91]-[.D90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8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08333333333333" calcext:value-type="float">
            <text:p>0,00070833333333333300</text:p>
          </table:table-cell>
          <table:table-cell table:formula="of:=[.D92]-[.D9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8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16203703703704" calcext:value-type="float">
            <text:p>0,00071620370370370400</text:p>
          </table:table-cell>
          <table:table-cell table:formula="of:=[.D93]-[.D9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8" office:value-type="float" office:value="6256" calcext:value-type="float">
            <text:p>625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24074074074074" calcext:value-type="float">
            <text:p>0,00072407407407407400</text:p>
          </table:table-cell>
          <table:table-cell table:formula="of:=[.D94]-[.D93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8" office:value-type="float" office:value="6324" calcext:value-type="float">
            <text:p>632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31944444444445" calcext:value-type="float">
            <text:p>0,00073194444444444500</text:p>
          </table:table-cell>
          <table:table-cell table:formula="of:=[.D95]-[.D9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8" office:value-type="float" office:value="6392" calcext:value-type="float">
            <text:p>639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39814814814815" calcext:value-type="float">
            <text:p>0,00073981481481481500</text:p>
          </table:table-cell>
          <table:table-cell table:formula="of:=[.D96]-[.D95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8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47685185185185" calcext:value-type="float">
            <text:p>0,00074768518518518500</text:p>
          </table:table-cell>
          <table:table-cell table:formula="of:=[.D97]-[.D9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8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55555555555556" calcext:value-type="float">
            <text:p>0,00075555555555555600</text:p>
          </table:table-cell>
          <table:table-cell table:formula="of:=[.D98]-[.D97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8" office:value-type="float" office:value="6596" calcext:value-type="float">
            <text:p>659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63425925925926" calcext:value-type="float">
            <text:p>0,00076342592592592600</text:p>
          </table:table-cell>
          <table:table-cell table:formula="of:=[.D99]-[.D9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8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71296296296296" calcext:value-type="float">
            <text:p>0,00077129629629629600</text:p>
          </table:table-cell>
          <table:table-cell table:formula="of:=[.D100]-[.D9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8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779166666666667" calcext:value-type="float">
            <text:p>0,00077916666666666700</text:p>
          </table:table-cell>
          <table:table-cell table:formula="of:=[.D101]-[.D100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8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87037037037037" calcext:value-type="float">
            <text:p>0,00078703703703703700</text:p>
          </table:table-cell>
          <table:table-cell table:formula="of:=[.D102]-[.D10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8" office:value-type="float" office:value="6868" calcext:value-type="float">
            <text:p>686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94907407407407" calcext:value-type="float">
            <text:p>0,00079490740740740700</text:p>
          </table:table-cell>
          <table:table-cell table:formula="of:=[.D103]-[.D102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8" office:value-type="float" office:value="6936" calcext:value-type="float">
            <text:p>693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02777777777778" calcext:value-type="float">
            <text:p>0,00080277777777777800</text:p>
          </table:table-cell>
          <table:table-cell table:formula="of:=[.D104]-[.D10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8" office:value-type="float" office:value="7004" calcext:value-type="float">
            <text:p>700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810648148148148" calcext:value-type="float">
            <text:p>0,00081064814814814800</text:p>
          </table:table-cell>
          <table:table-cell table:formula="of:=[.D105]-[.D104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8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818518518518519" calcext:value-type="float">
            <text:p>0,00081851851851851900</text:p>
          </table:table-cell>
          <table:table-cell table:formula="of:=[.D106]-[.D10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8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26388888888889" calcext:value-type="float">
            <text:p>0,00082638888888888900</text:p>
          </table:table-cell>
          <table:table-cell table:formula="of:=[.D107]-[.D106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8" office:value-type="float" office:value="7208" calcext:value-type="float">
            <text:p>720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834259259259259" calcext:value-type="float">
            <text:p>0,00083425925925925900</text:p>
          </table:table-cell>
          <table:table-cell table:formula="of:=[.D108]-[.D10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8" office:value-type="float" office:value="7276" calcext:value-type="float">
            <text:p>727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84212962962963" calcext:value-type="float">
            <text:p>0,00084212962962963000</text:p>
          </table:table-cell>
          <table:table-cell table:formula="of:=[.D109]-[.D10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8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85" calcext:value-type="float">
            <text:p>0,00085000000000000000</text:p>
          </table:table-cell>
          <table:table-cell table:formula="of:=[.D110]-[.D109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8" office:value-type="float" office:value="7412" calcext:value-type="float">
            <text:p>741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85787037037037" calcext:value-type="float">
            <text:p>0,00085787037037037000</text:p>
          </table:table-cell>
          <table:table-cell table:formula="of:=[.D111]-[.D11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8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865740740740741" calcext:value-type="float">
            <text:p>0,00086574074074074100</text:p>
          </table:table-cell>
          <table:table-cell table:formula="of:=[.D112]-[.D111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8" office:value-type="float" office:value="7548" calcext:value-type="float">
            <text:p>754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873611111111111" calcext:value-type="float">
            <text:p>0,00087361111111111100</text:p>
          </table:table-cell>
          <table:table-cell table:formula="of:=[.D113]-[.D11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8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881481481481482" calcext:value-type="float">
            <text:p>0,00088148148148148200</text:p>
          </table:table-cell>
          <table:table-cell table:formula="of:=[.D114]-[.D113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8" office:value-type="float" office:value="7684" calcext:value-type="float">
            <text:p>768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889351851851852" calcext:value-type="float">
            <text:p>0,00088935185185185200</text:p>
          </table:table-cell>
          <table:table-cell table:formula="of:=[.D115]-[.D11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8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897222222222222" calcext:value-type="float">
            <text:p>0,00089722222222222200</text:p>
          </table:table-cell>
          <table:table-cell table:formula="of:=[.D116]-[.D115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8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905092592592593" calcext:value-type="float">
            <text:p>0,00090509259259259300</text:p>
          </table:table-cell>
          <table:table-cell table:formula="of:=[.D117]-[.D11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8" office:value-type="float" office:value="7888" calcext:value-type="float">
            <text:p>788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912962962962963" calcext:value-type="float">
            <text:p>0,00091296296296296300</text:p>
          </table:table-cell>
          <table:table-cell table:formula="of:=[.D118]-[.D11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8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920833333333333" calcext:value-type="float">
            <text:p>0,00092083333333333300</text:p>
          </table:table-cell>
          <table:table-cell table:formula="of:=[.D119]-[.D118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8" office:value-type="float" office:value="8024" calcext:value-type="float">
            <text:p>802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928703703703704" calcext:value-type="float">
            <text:p>0,00092870370370370400</text:p>
          </table:table-cell>
          <table:table-cell table:formula="of:=[.D120]-[.D11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8" office:value-type="float" office:value="8092" calcext:value-type="float">
            <text:p>809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936574074074074" calcext:value-type="float">
            <text:p>0,00093657407407407400</text:p>
          </table:table-cell>
          <table:table-cell table:formula="of:=[.D121]-[.D120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8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944444444444445" calcext:value-type="float">
            <text:p>0,00094444444444444500</text:p>
          </table:table-cell>
          <table:table-cell table:formula="of:=[.D122]-[.D12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8" office:value-type="float" office:value="8228" calcext:value-type="float">
            <text:p>822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952314814814815" calcext:value-type="float">
            <text:p>0,00095231481481481500</text:p>
          </table:table-cell>
          <table:table-cell table:formula="of:=[.D123]-[.D122]" office:value-type="float" office:value="0.00000787037037037043" calcext:value-type="float">
            <text:p>0,00000787037037037043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8" office:value-type="float" office:value="8296" calcext:value-type="float">
            <text:p>829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960185185185185" calcext:value-type="float">
            <text:p>0,00096018518518518500</text:p>
          </table:table-cell>
          <table:table-cell table:formula="of:=[.D124]-[.D12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8" office:value-type="float" office:value="8364" calcext:value-type="float">
            <text:p>836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968055555555556" calcext:value-type="float">
            <text:p>0,00096805555555555600</text:p>
          </table:table-cell>
          <table:table-cell table:formula="of:=[.D125]-[.D12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8" office:value-type="float" office:value="8432" calcext:value-type="float">
            <text:p>843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975925925925926" calcext:value-type="float">
            <text:p>0,00097592592592592600</text:p>
          </table:table-cell>
          <table:table-cell table:formula="of:=[.D126]-[.D12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8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983796296296296" calcext:value-type="float">
            <text:p>0,00098379629629629600</text:p>
          </table:table-cell>
          <table:table-cell table:formula="of:=[.D127]-[.D126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8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991666666666667" calcext:value-type="float">
            <text:p>0,00099166666666666700</text:p>
          </table:table-cell>
          <table:table-cell table:formula="of:=[.D128]-[.D12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8" office:value-type="float" office:value="8636" calcext:value-type="float">
            <text:p>863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999537037037037" calcext:value-type="float">
            <text:p>0,00099953703703703700</text:p>
          </table:table-cell>
          <table:table-cell table:formula="of:=[.D129]-[.D12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8" office:value-type="float" office:value="8704" calcext:value-type="float">
            <text:p>870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00740740740741" calcext:value-type="float">
            <text:p>0,00100740740740741000</text:p>
          </table:table-cell>
          <table:table-cell table:formula="of:=[.D130]-[.D12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8" office:value-type="float" office:value="8772" calcext:value-type="float">
            <text:p>877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01527777777778" calcext:value-type="float">
            <text:p>0,00101527777777778000</text:p>
          </table:table-cell>
          <table:table-cell table:formula="of:=[.D131]-[.D130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8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02314814814815" calcext:value-type="float">
            <text:p>0,00102314814814815000</text:p>
          </table:table-cell>
          <table:table-cell table:formula="of:=[.D132]-[.D13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8" office:value-type="float" office:value="8908" calcext:value-type="float">
            <text:p>890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03101851851852" calcext:value-type="float">
            <text:p>0,00103101851851852000</text:p>
          </table:table-cell>
          <table:table-cell table:formula="of:=[.D133]-[.D13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8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03888888888889" calcext:value-type="float">
            <text:p>0,00103888888888889000</text:p>
          </table:table-cell>
          <table:table-cell table:formula="of:=[.D134]-[.D13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8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04675925925926" calcext:value-type="float">
            <text:p>0,00104675925925926000</text:p>
          </table:table-cell>
          <table:table-cell table:formula="of:=[.D135]-[.D13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8" office:value-type="float" office:value="9112" calcext:value-type="float">
            <text:p>911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05462962962963" calcext:value-type="float">
            <text:p>0,00105462962962963000</text:p>
          </table:table-cell>
          <table:table-cell table:formula="of:=[.D136]-[.D135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8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0625" calcext:value-type="float">
            <text:p>0,00106250000000000000</text:p>
          </table:table-cell>
          <table:table-cell table:formula="of:=[.D137]-[.D13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8" office:value-type="float" office:value="9248" calcext:value-type="float">
            <text:p>924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07037037037037" calcext:value-type="float">
            <text:p>0,00107037037037037000</text:p>
          </table:table-cell>
          <table:table-cell table:formula="of:=[.D138]-[.D13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8" office:value-type="float" office:value="9316" calcext:value-type="float">
            <text:p>931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07824074074074" calcext:value-type="float">
            <text:p>0,00107824074074074000</text:p>
          </table:table-cell>
          <table:table-cell table:formula="of:=[.D139]-[.D13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8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08611111111111" calcext:value-type="float">
            <text:p>0,00108611111111111000</text:p>
          </table:table-cell>
          <table:table-cell table:formula="of:=[.D140]-[.D139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8" office:value-type="float" office:value="9452" calcext:value-type="float">
            <text:p>945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09398148148148" calcext:value-type="float">
            <text:p>0,00109398148148148000</text:p>
          </table:table-cell>
          <table:table-cell table:formula="of:=[.D141]-[.D14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8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10185185185185" calcext:value-type="float">
            <text:p>0,00110185185185185000</text:p>
          </table:table-cell>
          <table:table-cell table:formula="of:=[.D142]-[.D14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8" office:value-type="float" office:value="9588" calcext:value-type="float">
            <text:p>958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10972222222222" calcext:value-type="float">
            <text:p>0,00110972222222222000</text:p>
          </table:table-cell>
          <table:table-cell table:formula="of:=[.D143]-[.D14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8" office:value-type="float" office:value="9656" calcext:value-type="float">
            <text:p>965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11759259259259" calcext:value-type="float">
            <text:p>0,00111759259259259000</text:p>
          </table:table-cell>
          <table:table-cell table:formula="of:=[.D144]-[.D14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8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12546296296296" calcext:value-type="float">
            <text:p>0,00112546296296296000</text:p>
          </table:table-cell>
          <table:table-cell table:formula="of:=[.D145]-[.D144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8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13333333333333" calcext:value-type="float">
            <text:p>0,00113333333333333000</text:p>
          </table:table-cell>
          <table:table-cell table:formula="of:=[.D146]-[.D14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8" office:value-type="float" office:value="9860" calcext:value-type="float">
            <text:p>986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1412037037037" calcext:value-type="float">
            <text:p>0,00114120370370370000</text:p>
          </table:table-cell>
          <table:table-cell table:formula="of:=[.D147]-[.D14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8" office:value-type="float" office:value="9928" calcext:value-type="float">
            <text:p>992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14907407407407" calcext:value-type="float">
            <text:p>0,00114907407407407000</text:p>
          </table:table-cell>
          <table:table-cell table:formula="of:=[.D148]-[.D14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8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15694444444444" calcext:value-type="float">
            <text:p>0,00115694444444444000</text:p>
          </table:table-cell>
          <table:table-cell table:formula="of:=[.D149]-[.D148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8" office:value-type="float" office:value="10064" calcext:value-type="float">
            <text:p>1006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16481481481482" calcext:value-type="float">
            <text:p>0,00116481481481482000</text:p>
          </table:table-cell>
          <table:table-cell table:formula="of:=[.D150]-[.D14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8" office:value-type="float" office:value="10132" calcext:value-type="float">
            <text:p>1013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17268518518519" calcext:value-type="float">
            <text:p>0,00117268518518519000</text:p>
          </table:table-cell>
          <table:table-cell table:formula="of:=[.D151]-[.D15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8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18055555555556" calcext:value-type="float">
            <text:p>0,00118055555555556000</text:p>
          </table:table-cell>
          <table:table-cell table:formula="of:=[.D152]-[.D15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8" office:value-type="float" office:value="10268" calcext:value-type="float">
            <text:p>1026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18842592592593" calcext:value-type="float">
            <text:p>0,00118842592592593000</text:p>
          </table:table-cell>
          <table:table-cell table:formula="of:=[.D153]-[.D15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8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1962962962963" calcext:value-type="float">
            <text:p>0,00119629629629630000</text:p>
          </table:table-cell>
          <table:table-cell table:formula="of:=[.D154]-[.D153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8" office:value-type="float" office:value="10404" calcext:value-type="float">
            <text:p>1040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20416666666667" calcext:value-type="float">
            <text:p>0,00120416666666667000</text:p>
          </table:table-cell>
          <table:table-cell table:formula="of:=[.D155]-[.D15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8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21203703703704" calcext:value-type="float">
            <text:p>0,00121203703703704000</text:p>
          </table:table-cell>
          <table:table-cell table:formula="of:=[.D156]-[.D15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8" office:value-type="float" office:value="10540" calcext:value-type="float">
            <text:p>1054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21990740740741" calcext:value-type="float">
            <text:p>0,00121990740740741000</text:p>
          </table:table-cell>
          <table:table-cell table:formula="of:=[.D157]-[.D15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8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22777777777778" calcext:value-type="float">
            <text:p>0,00122777777777778000</text:p>
          </table:table-cell>
          <table:table-cell table:formula="of:=[.D158]-[.D15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8" office:value-type="float" office:value="10676" calcext:value-type="float">
            <text:p>1067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23564814814815" calcext:value-type="float">
            <text:p>0,00123564814814815000</text:p>
          </table:table-cell>
          <table:table-cell table:formula="of:=[.D159]-[.D158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8" office:value-type="float" office:value="10744" calcext:value-type="float">
            <text:p>1074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24351851851852" calcext:value-type="float">
            <text:p>0,00124351851851852000</text:p>
          </table:table-cell>
          <table:table-cell table:formula="of:=[.D160]-[.D15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8" office:value-type="float" office:value="10812" calcext:value-type="float">
            <text:p>1081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25138888888889" calcext:value-type="float">
            <text:p>0,00125138888888889000</text:p>
          </table:table-cell>
          <table:table-cell table:formula="of:=[.D161]-[.D16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8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25925925925926" calcext:value-type="float">
            <text:p>0,00125925925925926000</text:p>
          </table:table-cell>
          <table:table-cell table:formula="of:=[.D162]-[.D16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8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26712962962963" calcext:value-type="float">
            <text:p>0,00126712962962963000</text:p>
          </table:table-cell>
          <table:table-cell table:formula="of:=[.D163]-[.D162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8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275" calcext:value-type="float">
            <text:p>0,00127500000000000000</text:p>
          </table:table-cell>
          <table:table-cell table:formula="of:=[.D164]-[.D16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8" office:value-type="float" office:value="11084" calcext:value-type="float">
            <text:p>1108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28287037037037" calcext:value-type="float">
            <text:p>0,00128287037037037000</text:p>
          </table:table-cell>
          <table:table-cell table:formula="of:=[.D165]-[.D16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8" office:value-type="float" office:value="11152" calcext:value-type="float">
            <text:p>1115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29074074074074" calcext:value-type="float">
            <text:p>0,00129074074074074000</text:p>
          </table:table-cell>
          <table:table-cell table:formula="of:=[.D166]-[.D16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8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29861111111111" calcext:value-type="float">
            <text:p>0,00129861111111111000</text:p>
          </table:table-cell>
          <table:table-cell table:formula="of:=[.D167]-[.D16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8" office:value-type="float" office:value="11288" calcext:value-type="float">
            <text:p>1128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30648148148148" calcext:value-type="float">
            <text:p>0,00130648148148148000</text:p>
          </table:table-cell>
          <table:table-cell table:formula="of:=[.D168]-[.D167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8" office:value-type="float" office:value="11356" calcext:value-type="float">
            <text:p>1135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31435185185185" calcext:value-type="float">
            <text:p>0,00131435185185185000</text:p>
          </table:table-cell>
          <table:table-cell table:formula="of:=[.D169]-[.D16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8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32222222222222" calcext:value-type="float">
            <text:p>0,00132222222222222000</text:p>
          </table:table-cell>
          <table:table-cell table:formula="of:=[.D170]-[.D16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8" office:value-type="float" office:value="11492" calcext:value-type="float">
            <text:p>1149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33009259259259" calcext:value-type="float">
            <text:p>0,00133009259259259000</text:p>
          </table:table-cell>
          <table:table-cell table:formula="of:=[.D171]-[.D17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8" office:value-type="float" office:value="11560" calcext:value-type="float">
            <text:p>115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33796296296296" calcext:value-type="float">
            <text:p>0,00133796296296296000</text:p>
          </table:table-cell>
          <table:table-cell table:formula="of:=[.D172]-[.D171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8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34583333333333" calcext:value-type="float">
            <text:p>0,00134583333333333000</text:p>
          </table:table-cell>
          <table:table-cell table:formula="of:=[.D173]-[.D17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8" office:value-type="float" office:value="11696" calcext:value-type="float">
            <text:p>1169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3537037037037" calcext:value-type="float">
            <text:p>0,00135370370370370000</text:p>
          </table:table-cell>
          <table:table-cell table:formula="of:=[.D174]-[.D17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8" office:value-type="float" office:value="11764" calcext:value-type="float">
            <text:p>1176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36157407407407" calcext:value-type="float">
            <text:p>0,00136157407407407000</text:p>
          </table:table-cell>
          <table:table-cell table:formula="of:=[.D175]-[.D17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8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36944444444444" calcext:value-type="float">
            <text:p>0,00136944444444444000</text:p>
          </table:table-cell>
          <table:table-cell table:formula="of:=[.D176]-[.D17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8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37731481481481" calcext:value-type="float">
            <text:p>0,00137731481481481000</text:p>
          </table:table-cell>
          <table:table-cell table:formula="of:=[.D177]-[.D176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8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38518518518519" calcext:value-type="float">
            <text:p>0,00138518518518519000</text:p>
          </table:table-cell>
          <table:table-cell table:formula="of:=[.D178]-[.D17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8" office:value-type="float" office:value="12036" calcext:value-type="float">
            <text:p>1203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39305555555556" calcext:value-type="float">
            <text:p>0,00139305555555556000</text:p>
          </table:table-cell>
          <table:table-cell table:formula="of:=[.D179]-[.D17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8" office:value-type="float" office:value="12104" calcext:value-type="float">
            <text:p>1210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40092592592593" calcext:value-type="float">
            <text:p>0,00140092592592593000</text:p>
          </table:table-cell>
          <table:table-cell table:formula="of:=[.D180]-[.D17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8" office:value-type="float" office:value="12172" calcext:value-type="float">
            <text:p>1217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4087962962963" calcext:value-type="float">
            <text:p>0,00140879629629630000</text:p>
          </table:table-cell>
          <table:table-cell table:formula="of:=[.D181]-[.D180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8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41666666666667" calcext:value-type="float">
            <text:p>0,00141666666666667000</text:p>
          </table:table-cell>
          <table:table-cell table:formula="of:=[.D182]-[.D18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8" office:value-type="float" office:value="12308" calcext:value-type="float">
            <text:p>1230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42453703703704" calcext:value-type="float">
            <text:p>0,00142453703703704000</text:p>
          </table:table-cell>
          <table:table-cell table:formula="of:=[.D183]-[.D18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8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43240740740741" calcext:value-type="float">
            <text:p>0,00143240740740741000</text:p>
          </table:table-cell>
          <table:table-cell table:formula="of:=[.D184]-[.D18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8" office:value-type="float" office:value="12444" calcext:value-type="float">
            <text:p>1244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44027777777778" calcext:value-type="float">
            <text:p>0,00144027777777778000</text:p>
          </table:table-cell>
          <table:table-cell table:formula="of:=[.D185]-[.D18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8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44814814814815" calcext:value-type="float">
            <text:p>0,00144814814814815000</text:p>
          </table:table-cell>
          <table:table-cell table:formula="of:=[.D186]-[.D185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8" office:value-type="float" office:value="12580" calcext:value-type="float">
            <text:p>1258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45601851851852" calcext:value-type="float">
            <text:p>0,00145601851851852000</text:p>
          </table:table-cell>
          <table:table-cell table:formula="of:=[.D187]-[.D18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8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46388888888889" calcext:value-type="float">
            <text:p>0,00146388888888889000</text:p>
          </table:table-cell>
          <table:table-cell table:formula="of:=[.D188]-[.D18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8" office:value-type="float" office:value="12716" calcext:value-type="float">
            <text:p>1271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47175925925926" calcext:value-type="float">
            <text:p>0,00147175925925926000</text:p>
          </table:table-cell>
          <table:table-cell table:formula="of:=[.D189]-[.D18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8" office:value-type="float" office:value="12784" calcext:value-type="float">
            <text:p>1278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47962962962963" calcext:value-type="float">
            <text:p>0,00147962962962963000</text:p>
          </table:table-cell>
          <table:table-cell table:formula="of:=[.D190]-[.D189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8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4875" calcext:value-type="float">
            <text:p>0,00148750000000000000</text:p>
          </table:table-cell>
          <table:table-cell table:formula="of:=[.D191]-[.D19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8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49537037037037" calcext:value-type="float">
            <text:p>0,00149537037037037000</text:p>
          </table:table-cell>
          <table:table-cell table:formula="of:=[.D192]-[.D19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8" office:value-type="float" office:value="12988" calcext:value-type="float">
            <text:p>1298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50324074074074" calcext:value-type="float">
            <text:p>0,00150324074074074000</text:p>
          </table:table-cell>
          <table:table-cell table:formula="of:=[.D193]-[.D19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8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51111111111111" calcext:value-type="float">
            <text:p>0,00151111111111111000</text:p>
          </table:table-cell>
          <table:table-cell table:formula="of:=[.D194]-[.D19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8" office:value-type="float" office:value="13124" calcext:value-type="float">
            <text:p>1312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51898148148148" calcext:value-type="float">
            <text:p>0,00151898148148148000</text:p>
          </table:table-cell>
          <table:table-cell table:formula="of:=[.D195]-[.D194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8" office:value-type="float" office:value="13192" calcext:value-type="float">
            <text:p>1319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52685185185185" calcext:value-type="float">
            <text:p>0,00152685185185185000</text:p>
          </table:table-cell>
          <table:table-cell table:formula="of:=[.D196]-[.D19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8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53472222222222" calcext:value-type="float">
            <text:p>0,00153472222222222000</text:p>
          </table:table-cell>
          <table:table-cell table:formula="of:=[.D197]-[.D19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8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54259259259259" calcext:value-type="float">
            <text:p>0,00154259259259259000</text:p>
          </table:table-cell>
          <table:table-cell table:formula="of:=[.D198]-[.D19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8" office:value-type="float" office:value="13396" calcext:value-type="float">
            <text:p>1339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55046296296296" calcext:value-type="float">
            <text:p>0,00155046296296296000</text:p>
          </table:table-cell>
          <table:table-cell table:formula="of:=[.D199]-[.D19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8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55833333333333" calcext:value-type="float">
            <text:p>0,00155833333333333000</text:p>
          </table:table-cell>
          <table:table-cell table:formula="of:=[.D200]-[.D199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8" office:value-type="float" office:value="13532" calcext:value-type="float">
            <text:p>1353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5662037037037" calcext:value-type="float">
            <text:p>0,00156620370370370000</text:p>
          </table:table-cell>
          <table:table-cell table:formula="of:=[.D201]-[.D20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8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57407407407407" calcext:value-type="float">
            <text:p>0,00157407407407407000</text:p>
          </table:table-cell>
          <table:table-cell table:formula="of:=[.D202]-[.D20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8" office:value-type="float" office:value="13668" calcext:value-type="float">
            <text:p>1366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58194444444444" calcext:value-type="float">
            <text:p>0,00158194444444444000</text:p>
          </table:table-cell>
          <table:table-cell table:formula="of:=[.D203]-[.D20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8" office:value-type="float" office:value="13736" calcext:value-type="float">
            <text:p>1373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58981481481481" calcext:value-type="float">
            <text:p>0,00158981481481481000</text:p>
          </table:table-cell>
          <table:table-cell table:formula="of:=[.D204]-[.D203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8" office:value-type="float" office:value="13804" calcext:value-type="float">
            <text:p>1380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59768518518519" calcext:value-type="float">
            <text:p>0,00159768518518519000</text:p>
          </table:table-cell>
          <table:table-cell table:formula="of:=[.D205]-[.D20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8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60555555555556" calcext:value-type="float">
            <text:p>0,00160555555555556000</text:p>
          </table:table-cell>
          <table:table-cell table:formula="of:=[.D206]-[.D20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8" office:value-type="float" office:value="13940" calcext:value-type="float">
            <text:p>1394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61342592592593" calcext:value-type="float">
            <text:p>0,00161342592592593000</text:p>
          </table:table-cell>
          <table:table-cell table:formula="of:=[.D207]-[.D20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8" office:value-type="float" office:value="14008" calcext:value-type="float">
            <text:p>1400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6212962962963" calcext:value-type="float">
            <text:p>0,00162129629629630000</text:p>
          </table:table-cell>
          <table:table-cell table:formula="of:=[.D208]-[.D20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8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62916666666667" calcext:value-type="float">
            <text:p>0,00162916666666667000</text:p>
          </table:table-cell>
          <table:table-cell table:formula="of:=[.D209]-[.D208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8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63703703703704" calcext:value-type="float">
            <text:p>0,00163703703703704000</text:p>
          </table:table-cell>
          <table:table-cell table:formula="of:=[.D210]-[.D20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8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64490740740741" calcext:value-type="float">
            <text:p>0,00164490740740741000</text:p>
          </table:table-cell>
          <table:table-cell table:formula="of:=[.D211]-[.D21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8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65277777777778" calcext:value-type="float">
            <text:p>0,00165277777777778000</text:p>
          </table:table-cell>
          <table:table-cell table:formula="of:=[.D212]-[.D21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8" office:value-type="float" office:value="14348" calcext:value-type="float">
            <text:p>1434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66064814814815" calcext:value-type="float">
            <text:p>0,00166064814814815000</text:p>
          </table:table-cell>
          <table:table-cell table:formula="of:=[.D213]-[.D212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8" office:value-type="float" office:value="14416" calcext:value-type="float">
            <text:p>1441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66851851851852" calcext:value-type="float">
            <text:p>0,00166851851851852000</text:p>
          </table:table-cell>
          <table:table-cell table:formula="of:=[.D214]-[.D21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8" office:value-type="float" office:value="14484" calcext:value-type="float">
            <text:p>1448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67638888888889" calcext:value-type="float">
            <text:p>0,00167638888888889000</text:p>
          </table:table-cell>
          <table:table-cell table:formula="of:=[.D215]-[.D21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8" office:value-type="float" office:value="14552" calcext:value-type="float">
            <text:p>1455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68425925925926" calcext:value-type="float">
            <text:p>0,00168425925925926000</text:p>
          </table:table-cell>
          <table:table-cell table:formula="of:=[.D216]-[.D21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8" office:value-type="float" office:value="14620" calcext:value-type="float">
            <text:p>1462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69212962962963" calcext:value-type="float">
            <text:p>0,00169212962962963000</text:p>
          </table:table-cell>
          <table:table-cell table:formula="of:=[.D217]-[.D21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8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7" calcext:value-type="float">
            <text:p>0,00170000000000000000</text:p>
          </table:table-cell>
          <table:table-cell table:formula="of:=[.D218]-[.D217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8" office:value-type="float" office:value="14756" calcext:value-type="float">
            <text:p>1475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70787037037037" calcext:value-type="float">
            <text:p>0,00170787037037037000</text:p>
          </table:table-cell>
          <table:table-cell table:formula="of:=[.D219]-[.D21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8" office:value-type="float" office:value="14824" calcext:value-type="float">
            <text:p>1482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71574074074074" calcext:value-type="float">
            <text:p>0,00171574074074074000</text:p>
          </table:table-cell>
          <table:table-cell table:formula="of:=[.D220]-[.D21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8" office:value-type="float" office:value="14892" calcext:value-type="float">
            <text:p>1489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72361111111111" calcext:value-type="float">
            <text:p>0,00172361111111111000</text:p>
          </table:table-cell>
          <table:table-cell table:formula="of:=[.D221]-[.D22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8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73148148148148" calcext:value-type="float">
            <text:p>0,00173148148148148000</text:p>
          </table:table-cell>
          <table:table-cell table:formula="of:=[.D222]-[.D221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8" office:value-type="float" office:value="15028" calcext:value-type="float">
            <text:p>1502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73935185185185" calcext:value-type="float">
            <text:p>0,00173935185185185000</text:p>
          </table:table-cell>
          <table:table-cell table:formula="of:=[.D223]-[.D22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8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74722222222222" calcext:value-type="float">
            <text:p>0,00174722222222222000</text:p>
          </table:table-cell>
          <table:table-cell table:formula="of:=[.D224]-[.D22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8" office:value-type="float" office:value="15164" calcext:value-type="float">
            <text:p>1516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75509259259259" calcext:value-type="float">
            <text:p>0,00175509259259259000</text:p>
          </table:table-cell>
          <table:table-cell table:formula="of:=[.D225]-[.D22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8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76296296296296" calcext:value-type="float">
            <text:p>0,00176296296296296000</text:p>
          </table:table-cell>
          <table:table-cell table:formula="of:=[.D226]-[.D22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8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77083333333333" calcext:value-type="float">
            <text:p>0,00177083333333333000</text:p>
          </table:table-cell>
          <table:table-cell table:formula="of:=[.D227]-[.D226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8" office:value-type="float" office:value="15368" calcext:value-type="float">
            <text:p>1536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7787037037037" calcext:value-type="float">
            <text:p>0,00177870370370370000</text:p>
          </table:table-cell>
          <table:table-cell table:formula="of:=[.D228]-[.D22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8" office:value-type="float" office:value="15436" calcext:value-type="float">
            <text:p>1543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78657407407407" calcext:value-type="float">
            <text:p>0,00178657407407407000</text:p>
          </table:table-cell>
          <table:table-cell table:formula="of:=[.D229]-[.D22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8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79444444444444" calcext:value-type="float">
            <text:p>0,00179444444444444000</text:p>
          </table:table-cell>
          <table:table-cell table:formula="of:=[.D230]-[.D22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8" office:value-type="float" office:value="15572" calcext:value-type="float">
            <text:p>1557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80231481481481" calcext:value-type="float">
            <text:p>0,00180231481481481000</text:p>
          </table:table-cell>
          <table:table-cell table:formula="of:=[.D231]-[.D230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8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81018518518519" calcext:value-type="float">
            <text:p>0,00181018518518519000</text:p>
          </table:table-cell>
          <table:table-cell table:formula="of:=[.D232]-[.D23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8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81805555555556" calcext:value-type="float">
            <text:p>0,00181805555555556000</text:p>
          </table:table-cell>
          <table:table-cell table:formula="of:=[.D233]-[.D23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8" office:value-type="float" office:value="15776" calcext:value-type="float">
            <text:p>1577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82592592592593" calcext:value-type="float">
            <text:p>0,00182592592592593000</text:p>
          </table:table-cell>
          <table:table-cell table:formula="of:=[.D234]-[.D23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8" office:value-type="float" office:value="15844" calcext:value-type="float">
            <text:p>1584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8337962962963" calcext:value-type="float">
            <text:p>0,00183379629629630000</text:p>
          </table:table-cell>
          <table:table-cell table:formula="of:=[.D235]-[.D23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8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84166666666667" calcext:value-type="float">
            <text:p>0,00184166666666667000</text:p>
          </table:table-cell>
          <table:table-cell table:formula="of:=[.D236]-[.D235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8" office:value-type="float" office:value="15980" calcext:value-type="float">
            <text:p>1598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84953703703704" calcext:value-type="float">
            <text:p>0,00184953703703704000</text:p>
          </table:table-cell>
          <table:table-cell table:formula="of:=[.D237]-[.D23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8" office:value-type="float" office:value="16048" calcext:value-type="float">
            <text:p>1604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85740740740741" calcext:value-type="float">
            <text:p>0,00185740740740741000</text:p>
          </table:table-cell>
          <table:table-cell table:formula="of:=[.D238]-[.D23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8" office:value-type="float" office:value="16116" calcext:value-type="float">
            <text:p>1611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86527777777778" calcext:value-type="float">
            <text:p>0,00186527777777778000</text:p>
          </table:table-cell>
          <table:table-cell table:formula="of:=[.D239]-[.D23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8" office:value-type="float" office:value="16184" calcext:value-type="float">
            <text:p>1618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87314814814815" calcext:value-type="float">
            <text:p>0,00187314814814815000</text:p>
          </table:table-cell>
          <table:table-cell table:formula="of:=[.D240]-[.D23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8" office:value-type="float" office:value="16252" calcext:value-type="float">
            <text:p>1625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88101851851852" calcext:value-type="float">
            <text:p>0,00188101851851852000</text:p>
          </table:table-cell>
          <table:table-cell table:formula="of:=[.D241]-[.D240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8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88888888888889" calcext:value-type="float">
            <text:p>0,00188888888888889000</text:p>
          </table:table-cell>
          <table:table-cell table:formula="of:=[.D242]-[.D24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8" office:value-type="float" office:value="16388" calcext:value-type="float">
            <text:p>1638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89675925925926" calcext:value-type="float">
            <text:p>0,00189675925925926000</text:p>
          </table:table-cell>
          <table:table-cell table:formula="of:=[.D243]-[.D24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8" office:value-type="float" office:value="16456" calcext:value-type="float">
            <text:p>1645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90462962962963" calcext:value-type="float">
            <text:p>0,00190462962962963000</text:p>
          </table:table-cell>
          <table:table-cell table:formula="of:=[.D244]-[.D24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8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9125" calcext:value-type="float">
            <text:p>0,00191250000000000000</text:p>
          </table:table-cell>
          <table:table-cell table:formula="of:=[.D245]-[.D244]" office:value-type="float" office:value="0.00000787037037037054" calcext:value-type="float">
            <text:p>0,00000787037037037054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8" office:value-type="float" office:value="16592" calcext:value-type="float">
            <text:p>1659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92037037037037" calcext:value-type="float">
            <text:p>0,00192037037037037000</text:p>
          </table:table-cell>
          <table:table-cell table:formula="of:=[.D246]-[.D24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8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92824074074074" calcext:value-type="float">
            <text:p>0,00192824074074074000</text:p>
          </table:table-cell>
          <table:table-cell table:formula="of:=[.D247]-[.D24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8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93611111111111" calcext:value-type="float">
            <text:p>0,00193611111111111000</text:p>
          </table:table-cell>
          <table:table-cell table:formula="of:=[.D248]-[.D24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8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94398148148148" calcext:value-type="float">
            <text:p>0,00194398148148148000</text:p>
          </table:table-cell>
          <table:table-cell table:formula="of:=[.D249]-[.D24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8" office:value-type="float" office:value="16864" calcext:value-type="float">
            <text:p>1686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95185185185185" calcext:value-type="float">
            <text:p>0,00195185185185185000</text:p>
          </table:table-cell>
          <table:table-cell table:formula="of:=[.D250]-[.D24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8" office:value-type="float" office:value="16932" calcext:value-type="float">
            <text:p>1693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95972222222222" calcext:value-type="float">
            <text:p>0,00195972222222222000</text:p>
          </table:table-cell>
          <table:table-cell table:formula="of:=[.D251]-[.D25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8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96759259259259" calcext:value-type="float">
            <text:p>0,00196759259259259000</text:p>
          </table:table-cell>
          <table:table-cell table:formula="of:=[.D252]-[.D251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8" office:value-type="float" office:value="17068" calcext:value-type="float">
            <text:p>1706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97546296296296" calcext:value-type="float">
            <text:p>0,00197546296296296000</text:p>
          </table:table-cell>
          <table:table-cell table:formula="of:=[.D253]-[.D25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8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98333333333333" calcext:value-type="float">
            <text:p>0,00198333333333333000</text:p>
          </table:table-cell>
          <table:table-cell table:formula="of:=[.D254]-[.D25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8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9912037037037" calcext:value-type="float">
            <text:p>0,00199120370370370000</text:p>
          </table:table-cell>
          <table:table-cell table:formula="of:=[.D255]-[.D25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8" office:value-type="float" office:value="17272" calcext:value-type="float">
            <text:p>1727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99907407407407" calcext:value-type="float">
            <text:p>0,00199907407407407000</text:p>
          </table:table-cell>
          <table:table-cell table:formula="of:=[.D256]-[.D25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8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00694444444444" calcext:value-type="float">
            <text:p>0,00200694444444444000</text:p>
          </table:table-cell>
          <table:table-cell table:formula="of:=[.D257]-[.D25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8" office:value-type="float" office:value="17408" calcext:value-type="float">
            <text:p>1740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01481481481481" calcext:value-type="float">
            <text:p>0,00201481481481481000</text:p>
          </table:table-cell>
          <table:table-cell table:formula="of:=[.D258]-[.D25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8" office:value-type="float" office:value="17476" calcext:value-type="float">
            <text:p>1747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02268518518519" calcext:value-type="float">
            <text:p>0,00202268518518519000</text:p>
          </table:table-cell>
          <table:table-cell table:formula="of:=[.D259]-[.D25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8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03055555555556" calcext:value-type="float">
            <text:p>0,00203055555555556000</text:p>
          </table:table-cell>
          <table:table-cell table:formula="of:=[.D260]-[.D25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8" office:value-type="float" office:value="17612" calcext:value-type="float">
            <text:p>1761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03842592592593" calcext:value-type="float">
            <text:p>0,00203842592592593000</text:p>
          </table:table-cell>
          <table:table-cell table:formula="of:=[.D261]-[.D260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8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0462962962963" calcext:value-type="float">
            <text:p>0,00204629629629630000</text:p>
          </table:table-cell>
          <table:table-cell table:formula="of:=[.D262]-[.D26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8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05416666666667" calcext:value-type="float">
            <text:p>0,00205416666666667000</text:p>
          </table:table-cell>
          <table:table-cell table:formula="of:=[.D263]-[.D26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8" office:value-type="float" office:value="17816" calcext:value-type="float">
            <text:p>1781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06203703703704" calcext:value-type="float">
            <text:p>0,00206203703703704000</text:p>
          </table:table-cell>
          <table:table-cell table:formula="of:=[.D264]-[.D26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8" office:value-type="float" office:value="17884" calcext:value-type="float">
            <text:p>1788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06990740740741" calcext:value-type="float">
            <text:p>0,00206990740740741000</text:p>
          </table:table-cell>
          <table:table-cell table:formula="of:=[.D265]-[.D26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8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07777777777778" calcext:value-type="float">
            <text:p>0,00207777777777778000</text:p>
          </table:table-cell>
          <table:table-cell table:formula="of:=[.D266]-[.D26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8" office:value-type="float" office:value="18020" calcext:value-type="float">
            <text:p>1802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08564814814815" calcext:value-type="float">
            <text:p>0,00208564814814815000</text:p>
          </table:table-cell>
          <table:table-cell table:formula="of:=[.D267]-[.D26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8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09351851851852" calcext:value-type="float">
            <text:p>0,00209351851851852000</text:p>
          </table:table-cell>
          <table:table-cell table:formula="of:=[.D268]-[.D26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8" office:value-type="float" office:value="18156" calcext:value-type="float">
            <text:p>1815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10138888888889" calcext:value-type="float">
            <text:p>0,00210138888888889000</text:p>
          </table:table-cell>
          <table:table-cell table:formula="of:=[.D269]-[.D26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8" office:value-type="float" office:value="18224" calcext:value-type="float">
            <text:p>1822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10925925925926" calcext:value-type="float">
            <text:p>0,00210925925925926000</text:p>
          </table:table-cell>
          <table:table-cell table:formula="of:=[.D270]-[.D269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8" office:value-type="float" office:value="18292" calcext:value-type="float">
            <text:p>1829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11712962962963" calcext:value-type="float">
            <text:p>0,00211712962962963000</text:p>
          </table:table-cell>
          <table:table-cell table:formula="of:=[.D271]-[.D27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8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125" calcext:value-type="float">
            <text:p>0,00212500000000000000</text:p>
          </table:table-cell>
          <table:table-cell table:formula="of:=[.D272]-[.D27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8" office:value-type="float" office:value="18428" calcext:value-type="float">
            <text:p>1842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13287037037037" calcext:value-type="float">
            <text:p>0,00213287037037037000</text:p>
          </table:table-cell>
          <table:table-cell table:formula="of:=[.D273]-[.D27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8" office:value-type="float" office:value="18496" calcext:value-type="float">
            <text:p>1849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14074074074074" calcext:value-type="float">
            <text:p>0,00214074074074074000</text:p>
          </table:table-cell>
          <table:table-cell table:formula="of:=[.D274]-[.D27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8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14861111111111" calcext:value-type="float">
            <text:p>0,00214861111111111000</text:p>
          </table:table-cell>
          <table:table-cell table:formula="of:=[.D275]-[.D27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8" office:value-type="float" office:value="18632" calcext:value-type="float">
            <text:p>1863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15648148148148" calcext:value-type="float">
            <text:p>0,00215648148148148000</text:p>
          </table:table-cell>
          <table:table-cell table:formula="of:=[.D276]-[.D27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8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16435185185185" calcext:value-type="float">
            <text:p>0,00216435185185185000</text:p>
          </table:table-cell>
          <table:table-cell table:formula="of:=[.D277]-[.D27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8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17222222222222" calcext:value-type="float">
            <text:p>0,00217222222222222000</text:p>
          </table:table-cell>
          <table:table-cell table:formula="of:=[.D278]-[.D27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8" office:value-type="float" office:value="18836" calcext:value-type="float">
            <text:p>18836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18009259259259" calcext:value-type="float">
            <text:p>0,00218009259259259000</text:p>
          </table:table-cell>
          <table:table-cell table:formula="of:=[.D279]-[.D278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8" office:value-type="float" office:value="18904" calcext:value-type="float">
            <text:p>1890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18796296296296" calcext:value-type="float">
            <text:p>0,00218796296296296000</text:p>
          </table:table-cell>
          <table:table-cell table:formula="of:=[.D280]-[.D27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8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19583333333333" calcext:value-type="float">
            <text:p>0,00219583333333333000</text:p>
          </table:table-cell>
          <table:table-cell table:formula="of:=[.D281]-[.D28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8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2037037037037" calcext:value-type="float">
            <text:p>0,00220370370370370000</text:p>
          </table:table-cell>
          <table:table-cell table:formula="of:=[.D282]-[.D28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8" office:value-type="float" office:value="19108" calcext:value-type="float">
            <text:p>19108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21157407407407" calcext:value-type="float">
            <text:p>0,00221157407407407000</text:p>
          </table:table-cell>
          <table:table-cell table:formula="of:=[.D283]-[.D28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8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21944444444444" calcext:value-type="float">
            <text:p>0,00221944444444444000</text:p>
          </table:table-cell>
          <table:table-cell table:formula="of:=[.D284]-[.D28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8" office:value-type="float" office:value="19244" calcext:value-type="float">
            <text:p>19244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22731481481481" calcext:value-type="float">
            <text:p>0,00222731481481481000</text:p>
          </table:table-cell>
          <table:table-cell table:formula="of:=[.D285]-[.D28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8" office:value-type="float" office:value="19312" calcext:value-type="float">
            <text:p>1931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23518518518519" calcext:value-type="float">
            <text:p>0,00223518518518519000</text:p>
          </table:table-cell>
          <table:table-cell table:formula="of:=[.D286]-[.D28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8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24305555555556" calcext:value-type="float">
            <text:p>0,00224305555555556000</text:p>
          </table:table-cell>
          <table:table-cell table:formula="of:=[.D287]-[.D28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8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25092592592593" calcext:value-type="float">
            <text:p>0,00225092592592593000</text:p>
          </table:table-cell>
          <table:table-cell table:formula="of:=[.D288]-[.D287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8" office:value-type="float" office:value="19516" calcext:value-type="float">
            <text:p>19516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2587962962963" calcext:value-type="float">
            <text:p>0,00225879629629630000</text:p>
          </table:table-cell>
          <table:table-cell table:formula="of:=[.D289]-[.D28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8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26666666666667" calcext:value-type="float">
            <text:p>0,00226666666666667000</text:p>
          </table:table-cell>
          <table:table-cell table:formula="of:=[.D290]-[.D28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8" office:value-type="float" office:value="19652" calcext:value-type="float">
            <text:p>19652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27453703703704" calcext:value-type="float">
            <text:p>0,00227453703703704000</text:p>
          </table:table-cell>
          <table:table-cell table:formula="of:=[.D291]-[.D29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8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28240740740741" calcext:value-type="float">
            <text:p>0,00228240740740741000</text:p>
          </table:table-cell>
          <table:table-cell table:formula="of:=[.D292]-[.D29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8" office:value-type="float" office:value="19788" calcext:value-type="float">
            <text:p>19788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29027777777778" calcext:value-type="float">
            <text:p>0,00229027777777778000</text:p>
          </table:table-cell>
          <table:table-cell table:formula="of:=[.D293]-[.D29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8" office:value-type="float" office:value="19856" calcext:value-type="float">
            <text:p>1985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29814814814815" calcext:value-type="float">
            <text:p>0,00229814814814815000</text:p>
          </table:table-cell>
          <table:table-cell table:formula="of:=[.D294]-[.D29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8" office:value-type="float" office:value="19924" calcext:value-type="float">
            <text:p>19924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30601851851852" calcext:value-type="float">
            <text:p>0,00230601851851852000</text:p>
          </table:table-cell>
          <table:table-cell table:formula="of:=[.D295]-[.D29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8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31388888888889" calcext:value-type="float">
            <text:p>0,00231388888888889000</text:p>
          </table:table-cell>
          <table:table-cell table:formula="of:=[.D296]-[.D29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8" office:value-type="float" office:value="20060" calcext:value-type="float">
            <text:p>2006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32175925925926" calcext:value-type="float">
            <text:p>0,00232175925925926000</text:p>
          </table:table-cell>
          <table:table-cell table:formula="of:=[.D297]-[.D296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8" office:value-type="float" office:value="20128" calcext:value-type="float">
            <text:p>2012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32962962962963" calcext:value-type="float">
            <text:p>0,00232962962962963000</text:p>
          </table:table-cell>
          <table:table-cell table:formula="of:=[.D298]-[.D29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8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3375" calcext:value-type="float">
            <text:p>0,00233750000000000000</text:p>
          </table:table-cell>
          <table:table-cell table:formula="of:=[.D299]-[.D29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8" office:value-type="float" office:value="20264" calcext:value-type="float">
            <text:p>2026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34537037037037" calcext:value-type="float">
            <text:p>0,00234537037037037000</text:p>
          </table:table-cell>
          <table:table-cell table:formula="of:=[.D300]-[.D29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8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35324074074074" calcext:value-type="float">
            <text:p>0,00235324074074074000</text:p>
          </table:table-cell>
          <table:table-cell table:formula="of:=[.D301]-[.D30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8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36111111111111" calcext:value-type="float">
            <text:p>0,00236111111111111000</text:p>
          </table:table-cell>
          <table:table-cell table:formula="of:=[.D302]-[.D30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8" office:value-type="float" office:value="20468" calcext:value-type="float">
            <text:p>20468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36898148148148" calcext:value-type="float">
            <text:p>0,00236898148148148000</text:p>
          </table:table-cell>
          <table:table-cell table:formula="of:=[.D303]-[.D30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8" office:value-type="float" office:value="20536" calcext:value-type="float">
            <text:p>2053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37685185185185" calcext:value-type="float">
            <text:p>0,00237685185185185000</text:p>
          </table:table-cell>
          <table:table-cell table:formula="of:=[.D304]-[.D30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8" office:value-type="float" office:value="20604" calcext:value-type="float">
            <text:p>20604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38472222222222" calcext:value-type="float">
            <text:p>0,00238472222222222000</text:p>
          </table:table-cell>
          <table:table-cell table:formula="of:=[.D305]-[.D30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8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39259259259259" calcext:value-type="float">
            <text:p>0,00239259259259259000</text:p>
          </table:table-cell>
          <table:table-cell table:formula="of:=[.D306]-[.D30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8" office:value-type="float" office:value="20740" calcext:value-type="float">
            <text:p>2074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40046296296296" calcext:value-type="float">
            <text:p>0,00240046296296296000</text:p>
          </table:table-cell>
          <table:table-cell table:formula="of:=[.D307]-[.D306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8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40833333333333" calcext:value-type="float">
            <text:p>0,00240833333333333000</text:p>
          </table:table-cell>
          <table:table-cell table:formula="of:=[.D308]-[.D30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8" office:value-type="float" office:value="20876" calcext:value-type="float">
            <text:p>20876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4162037037037" calcext:value-type="float">
            <text:p>0,00241620370370370000</text:p>
          </table:table-cell>
          <table:table-cell table:formula="of:=[.D309]-[.D30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8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42407407407407" calcext:value-type="float">
            <text:p>0,00242407407407407000</text:p>
          </table:table-cell>
          <table:table-cell table:formula="of:=[.D310]-[.D30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8" office:value-type="float" office:value="21012" calcext:value-type="float">
            <text:p>21012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43194444444444" calcext:value-type="float">
            <text:p>0,00243194444444444000</text:p>
          </table:table-cell>
          <table:table-cell table:formula="of:=[.D311]-[.D31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8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43981481481482" calcext:value-type="float">
            <text:p>0,00243981481481482000</text:p>
          </table:table-cell>
          <table:table-cell table:formula="of:=[.D312]-[.D31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8" office:value-type="float" office:value="21148" calcext:value-type="float">
            <text:p>21148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44768518518519" calcext:value-type="float">
            <text:p>0,00244768518518519000</text:p>
          </table:table-cell>
          <table:table-cell table:formula="of:=[.D313]-[.D31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8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45555555555556" calcext:value-type="float">
            <text:p>0,00245555555555556000</text:p>
          </table:table-cell>
          <table:table-cell table:formula="of:=[.D314]-[.D31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8" office:value-type="float" office:value="21284" calcext:value-type="float">
            <text:p>21284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46342592592593" calcext:value-type="float">
            <text:p>0,00246342592592593000</text:p>
          </table:table-cell>
          <table:table-cell table:formula="of:=[.D315]-[.D31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8" office:value-type="float" office:value="21352" calcext:value-type="float">
            <text:p>2135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4712962962963" calcext:value-type="float">
            <text:p>0,00247129629629630000</text:p>
          </table:table-cell>
          <table:table-cell table:formula="of:=[.D316]-[.D315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8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47916666666667" calcext:value-type="float">
            <text:p>0,00247916666666667000</text:p>
          </table:table-cell>
          <table:table-cell table:formula="of:=[.D317]-[.D31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8" office:value-type="float" office:value="21488" calcext:value-type="float">
            <text:p>2148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48703703703704" calcext:value-type="float">
            <text:p>0,00248703703703704000</text:p>
          </table:table-cell>
          <table:table-cell table:formula="of:=[.D318]-[.D31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8" office:value-type="float" office:value="21556" calcext:value-type="float">
            <text:p>21556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49490740740741" calcext:value-type="float">
            <text:p>0,00249490740740741000</text:p>
          </table:table-cell>
          <table:table-cell table:formula="of:=[.D319]-[.D31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8" office:value-type="float" office:value="21624" calcext:value-type="float">
            <text:p>2162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50277777777778" calcext:value-type="float">
            <text:p>0,00250277777777778000</text:p>
          </table:table-cell>
          <table:table-cell table:formula="of:=[.D320]-[.D31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8" office:value-type="float" office:value="21692" calcext:value-type="float">
            <text:p>21692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51064814814815" calcext:value-type="float">
            <text:p>0,00251064814814815000</text:p>
          </table:table-cell>
          <table:table-cell table:formula="of:=[.D321]-[.D32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8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51851851851852" calcext:value-type="float">
            <text:p>0,00251851851851852000</text:p>
          </table:table-cell>
          <table:table-cell table:formula="of:=[.D322]-[.D32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8" office:value-type="float" office:value="21828" calcext:value-type="float">
            <text:p>21828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52638888888889" calcext:value-type="float">
            <text:p>0,00252638888888889000</text:p>
          </table:table-cell>
          <table:table-cell table:formula="of:=[.D323]-[.D32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8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53425925925926" calcext:value-type="float">
            <text:p>0,00253425925925926000</text:p>
          </table:table-cell>
          <table:table-cell table:formula="of:=[.D324]-[.D32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8" office:value-type="float" office:value="21964" calcext:value-type="float">
            <text:p>21964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54212962962963" calcext:value-type="float">
            <text:p>0,00254212962962963000</text:p>
          </table:table-cell>
          <table:table-cell table:formula="of:=[.D325]-[.D324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8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55" calcext:value-type="float">
            <text:p>0,00255000000000000000</text:p>
          </table:table-cell>
          <table:table-cell table:formula="of:=[.D326]-[.D32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8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55787037037037" calcext:value-type="float">
            <text:p>0,00255787037037037000</text:p>
          </table:table-cell>
          <table:table-cell table:formula="of:=[.D327]-[.D32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8" office:value-type="float" office:value="22168" calcext:value-type="float">
            <text:p>2216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56574074074074" calcext:value-type="float">
            <text:p>0,00256574074074074000</text:p>
          </table:table-cell>
          <table:table-cell table:formula="of:=[.D328]-[.D32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8" office:value-type="float" office:value="22236" calcext:value-type="float">
            <text:p>22236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57361111111111" calcext:value-type="float">
            <text:p>0,00257361111111111000</text:p>
          </table:table-cell>
          <table:table-cell table:formula="of:=[.D329]-[.D32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8" office:value-type="float" office:value="22304" calcext:value-type="float">
            <text:p>2230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58148148148148" calcext:value-type="float">
            <text:p>0,00258148148148148000</text:p>
          </table:table-cell>
          <table:table-cell table:formula="of:=[.D330]-[.D32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8" office:value-type="float" office:value="22372" calcext:value-type="float">
            <text:p>22372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58935185185185" calcext:value-type="float">
            <text:p>0,00258935185185185000</text:p>
          </table:table-cell>
          <table:table-cell table:formula="of:=[.D331]-[.D33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8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59722222222222" calcext:value-type="float">
            <text:p>0,00259722222222222000</text:p>
          </table:table-cell>
          <table:table-cell table:formula="of:=[.D332]-[.D33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8" office:value-type="float" office:value="22508" calcext:value-type="float">
            <text:p>22508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60509259259259" calcext:value-type="float">
            <text:p>0,00260509259259259000</text:p>
          </table:table-cell>
          <table:table-cell table:formula="of:=[.D333]-[.D33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8" office:value-type="float" office:value="22576" calcext:value-type="float">
            <text:p>2257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61296296296296" calcext:value-type="float">
            <text:p>0,00261296296296296000</text:p>
          </table:table-cell>
          <table:table-cell table:formula="of:=[.D334]-[.D333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8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62083333333333" calcext:value-type="float">
            <text:p>0,00262083333333333000</text:p>
          </table:table-cell>
          <table:table-cell table:formula="of:=[.D335]-[.D33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8" office:value-type="float" office:value="22712" calcext:value-type="float">
            <text:p>2271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6287037037037" calcext:value-type="float">
            <text:p>0,00262870370370370000</text:p>
          </table:table-cell>
          <table:table-cell table:formula="of:=[.D336]-[.D33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8" office:value-type="float" office:value="22780" calcext:value-type="float">
            <text:p>2278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63657407407407" calcext:value-type="float">
            <text:p>0,00263657407407407000</text:p>
          </table:table-cell>
          <table:table-cell table:formula="of:=[.D337]-[.D33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8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64444444444444" calcext:value-type="float">
            <text:p>0,00264444444444444000</text:p>
          </table:table-cell>
          <table:table-cell table:formula="of:=[.D338]-[.D33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8" office:value-type="float" office:value="22916" calcext:value-type="float">
            <text:p>22916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65231481481482" calcext:value-type="float">
            <text:p>0,00265231481481482000</text:p>
          </table:table-cell>
          <table:table-cell table:formula="of:=[.D339]-[.D33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8" office:value-type="float" office:value="22984" calcext:value-type="float">
            <text:p>2298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66018518518519" calcext:value-type="float">
            <text:p>0,00266018518518519000</text:p>
          </table:table-cell>
          <table:table-cell table:formula="of:=[.D340]-[.D33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8" office:value-type="float" office:value="23052" calcext:value-type="float">
            <text:p>23052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66805555555556" calcext:value-type="float">
            <text:p>0,00266805555555556000</text:p>
          </table:table-cell>
          <table:table-cell table:formula="of:=[.D341]-[.D34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8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67592592592593" calcext:value-type="float">
            <text:p>0,00267592592592593000</text:p>
          </table:table-cell>
          <table:table-cell table:formula="of:=[.D342]-[.D341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8" office:value-type="float" office:value="23188" calcext:value-type="float">
            <text:p>23188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6837962962963" calcext:value-type="float">
            <text:p>0,00268379629629630000</text:p>
          </table:table-cell>
          <table:table-cell table:formula="of:=[.D343]-[.D342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8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69166666666667" calcext:value-type="float">
            <text:p>0,00269166666666667000</text:p>
          </table:table-cell>
          <table:table-cell table:formula="of:=[.D344]-[.D343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8" office:value-type="float" office:value="23324" calcext:value-type="float">
            <text:p>23324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69953703703704" calcext:value-type="float">
            <text:p>0,00269953703703704000</text:p>
          </table:table-cell>
          <table:table-cell table:formula="of:=[.D345]-[.D344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8" office:value-type="float" office:value="23392" calcext:value-type="float">
            <text:p>2339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70740740740741" calcext:value-type="float">
            <text:p>0,00270740740740741000</text:p>
          </table:table-cell>
          <table:table-cell table:formula="of:=[.D346]-[.D345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8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71527777777778" calcext:value-type="float">
            <text:p>0,00271527777777778000</text:p>
          </table:table-cell>
          <table:table-cell table:formula="of:=[.D347]-[.D346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8" office:value-type="float" office:value="23528" calcext:value-type="float">
            <text:p>2352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72314814814815" calcext:value-type="float">
            <text:p>0,00272314814814815000</text:p>
          </table:table-cell>
          <table:table-cell table:formula="of:=[.D348]-[.D347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8" office:value-type="float" office:value="23596" calcext:value-type="float">
            <text:p>23596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73101851851852" calcext:value-type="float">
            <text:p>0,00273101851851852000</text:p>
          </table:table-cell>
          <table:table-cell table:formula="of:=[.D349]-[.D348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8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73888888888889" calcext:value-type="float">
            <text:p>0,00273888888888889000</text:p>
          </table:table-cell>
          <table:table-cell table:formula="of:=[.D350]-[.D349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8" office:value-type="float" office:value="23732" calcext:value-type="float">
            <text:p>23732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74675925925926" calcext:value-type="float">
            <text:p>0,00274675925925926000</text:p>
          </table:table-cell>
          <table:table-cell table:formula="of:=[.D351]-[.D350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8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75462962962963" calcext:value-type="float">
            <text:p>0,00275462962962963000</text:p>
          </table:table-cell>
          <table:table-cell table:formula="of:=[.D352]-[.D351]" office:value-type="float" office:value="0.00000787037037037076" calcext:value-type="float">
            <text:p>0,00000787037037037076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8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7625" calcext:value-type="float">
            <text:p>0,00276250000000000000</text:p>
          </table:table-cell>
          <table:table-cell table:formula="of:=[.D353]-[.D352]" office:value-type="float" office:value="0.00000787037037037032" calcext:value-type="float">
            <text:p>0,00000787037037037032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8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77037037037037" calcext:value-type="float">
            <text:p>0,00277037037037037000</text:p>
          </table:table-cell>
          <table:table-cell table:formula="of:=#REF!-[.D353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31:48.997115768</meta:creation-date>
    <dc:date>2026-05-17T18:31:58.033600323</dc:date>
    <meta:editing-duration>PT10S</meta:editing-duration>
    <meta:editing-cycles>1</meta:editing-cycles>
    <meta:document-statistic meta:table-count="1" meta:cell-count="1765" meta:object-count="0"/>
    <meta:generator>LibreOffice/24.2.7.2$Linux_X86_64 LibreOffice_project/420$Build-2</meta:generator>
  </office:meta>
</office:document-meta>
</file>