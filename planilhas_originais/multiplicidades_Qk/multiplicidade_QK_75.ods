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4.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7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16379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75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868055555555556" calcext:value-type="float">
            <text:p>0,00000868055555555556</text:p>
          </table:table-cell>
          <table:table-cell table:formula="of:=[.D3]-[.D2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75" office:value-type="float" office:value="150" calcext:value-type="float">
            <text:p>150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73611111111111" calcext:value-type="float">
            <text:p>0,00001736111111111110</text:p>
          </table:table-cell>
          <table:table-cell table:formula="of:=[.D4]-[.D3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75" office:value-type="float" office:value="225" calcext:value-type="float">
            <text:p>225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260416666666667" calcext:value-type="float">
            <text:p>0,00002604166666666670</text:p>
          </table:table-cell>
          <table:table-cell table:formula="of:=[.D5]-[.D4]" office:value-type="float" office:value="0.00000868055555555555" calcext:value-type="float">
            <text:p>0,00000868055555555555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75" office:value-type="float" office:value="300" calcext:value-type="float">
            <text:p>300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347222222222222" calcext:value-type="float">
            <text:p>0,00003472222222222220</text:p>
          </table:table-cell>
          <table:table-cell table:formula="of:=[.D6]-[.D5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75" office:value-type="float" office:value="375" calcext:value-type="float">
            <text:p>37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434027777777778" calcext:value-type="float">
            <text:p>0,00004340277777777780</text:p>
          </table:table-cell>
          <table:table-cell table:formula="of:=[.D7]-[.D6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75" office:value-type="float" office:value="450" calcext:value-type="float">
            <text:p>450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520833333333333" calcext:value-type="float">
            <text:p>0,00005208333333333330</text:p>
          </table:table-cell>
          <table:table-cell table:formula="of:=[.D8]-[.D7]" office:value-type="float" office:value="0.00000868055555555555" calcext:value-type="float">
            <text:p>0,00000868055555555555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75" office:value-type="float" office:value="525" calcext:value-type="float">
            <text:p>525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607638888888889" calcext:value-type="float">
            <text:p>0,00006076388888888890</text:p>
          </table:table-cell>
          <table:table-cell table:formula="of:=[.D9]-[.D8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75" office:value-type="float" office:value="600" calcext:value-type="float">
            <text:p>600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694444444444444" calcext:value-type="float">
            <text:p>0,00006944444444444440</text:p>
          </table:table-cell>
          <table:table-cell table:formula="of:=[.D10]-[.D9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75" office:value-type="float" office:value="675" calcext:value-type="float">
            <text:p>675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78125" calcext:value-type="float">
            <text:p>0,00007812500000000000</text:p>
          </table:table-cell>
          <table:table-cell table:formula="of:=[.D11]-[.D10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75" office:value-type="float" office:value="750" calcext:value-type="float">
            <text:p>75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868055555555556" calcext:value-type="float">
            <text:p>0,00008680555555555560</text:p>
          </table:table-cell>
          <table:table-cell table:formula="of:=[.D12]-[.D11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75" office:value-type="float" office:value="825" calcext:value-type="float">
            <text:p>825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954861111111111" calcext:value-type="float">
            <text:p>0,00009548611111111110</text:p>
          </table:table-cell>
          <table:table-cell table:formula="of:=[.D13]-[.D12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75" office:value-type="float" office:value="900" calcext:value-type="float">
            <text:p>900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104166666666667" calcext:value-type="float">
            <text:p>0,00010416666666666700</text:p>
          </table:table-cell>
          <table:table-cell table:formula="of:=[.D14]-[.D13]" office:value-type="float" office:value="0.00000868055555555554" calcext:value-type="float">
            <text:p>0,00000868055555555554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75" office:value-type="float" office:value="975" calcext:value-type="float">
            <text:p>975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12847222222222" calcext:value-type="float">
            <text:p>0,00011284722222222200</text:p>
          </table:table-cell>
          <table:table-cell table:formula="of:=[.D15]-[.D14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75" office:value-type="float" office:value="1050" calcext:value-type="float">
            <text:p>1050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21527777777778" calcext:value-type="float">
            <text:p>0,00012152777777777800</text:p>
          </table:table-cell>
          <table:table-cell table:formula="of:=[.D16]-[.D15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75" office:value-type="float" office:value="1125" calcext:value-type="float">
            <text:p>112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30208333333333" calcext:value-type="float">
            <text:p>0,00013020833333333300</text:p>
          </table:table-cell>
          <table:table-cell table:formula="of:=[.D17]-[.D16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75" office:value-type="float" office:value="1200" calcext:value-type="float">
            <text:p>1200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38888888888889" calcext:value-type="float">
            <text:p>0,00013888888888888900</text:p>
          </table:table-cell>
          <table:table-cell table:formula="of:=[.D18]-[.D17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75" office:value-type="float" office:value="1275" calcext:value-type="float">
            <text:p>1275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47569444444444" calcext:value-type="float">
            <text:p>0,00014756944444444400</text:p>
          </table:table-cell>
          <table:table-cell table:formula="of:=[.D19]-[.D18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75" office:value-type="float" office:value="1350" calcext:value-type="float">
            <text:p>1350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5625" calcext:value-type="float">
            <text:p>0,00015625000000000000</text:p>
          </table:table-cell>
          <table:table-cell table:formula="of:=[.D20]-[.D19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75" office:value-type="float" office:value="1425" calcext:value-type="float">
            <text:p>1425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64930555555556" calcext:value-type="float">
            <text:p>0,00016493055555555600</text:p>
          </table:table-cell>
          <table:table-cell table:formula="of:=[.D21]-[.D20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75" office:value-type="float" office:value="1500" calcext:value-type="float">
            <text:p>150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73611111111111" calcext:value-type="float">
            <text:p>0,00017361111111111100</text:p>
          </table:table-cell>
          <table:table-cell table:formula="of:=[.D22]-[.D21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75" office:value-type="float" office:value="1575" calcext:value-type="float">
            <text:p>1575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82291666666667" calcext:value-type="float">
            <text:p>0,00018229166666666700</text:p>
          </table:table-cell>
          <table:table-cell table:formula="of:=[.D23]-[.D22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75" office:value-type="float" office:value="1650" calcext:value-type="float">
            <text:p>1650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90972222222222" calcext:value-type="float">
            <text:p>0,00019097222222222200</text:p>
          </table:table-cell>
          <table:table-cell table:formula="of:=[.D24]-[.D23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75" office:value-type="float" office:value="1725" calcext:value-type="float">
            <text:p>1725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99652777777778" calcext:value-type="float">
            <text:p>0,00019965277777777800</text:p>
          </table:table-cell>
          <table:table-cell table:formula="of:=[.D25]-[.D24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75" office:value-type="float" office:value="1800" calcext:value-type="float">
            <text:p>1800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208333333333333" calcext:value-type="float">
            <text:p>0,00020833333333333300</text:p>
          </table:table-cell>
          <table:table-cell table:formula="of:=[.D26]-[.D25]" office:value-type="float" office:value="0.00000868055555555553" calcext:value-type="float">
            <text:p>0,00000868055555555553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75" office:value-type="float" office:value="1875" calcext:value-type="float">
            <text:p>187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217013888888889" calcext:value-type="float">
            <text:p>0,00021701388888888900</text:p>
          </table:table-cell>
          <table:table-cell table:formula="of:=[.D27]-[.D26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75" office:value-type="float" office:value="1950" calcext:value-type="float">
            <text:p>1950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225694444444444" calcext:value-type="float">
            <text:p>0,00022569444444444400</text:p>
          </table:table-cell>
          <table:table-cell table:formula="of:=[.D28]-[.D27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75" office:value-type="float" office:value="2025" calcext:value-type="float">
            <text:p>2025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234375" calcext:value-type="float">
            <text:p>0,00023437500000000000</text:p>
          </table:table-cell>
          <table:table-cell table:formula="of:=[.D29]-[.D28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75" office:value-type="float" office:value="2100" calcext:value-type="float">
            <text:p>2100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243055555555556" calcext:value-type="float">
            <text:p>0,00024305555555555600</text:p>
          </table:table-cell>
          <table:table-cell table:formula="of:=[.D30]-[.D29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75" office:value-type="float" office:value="2175" calcext:value-type="float">
            <text:p>2175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251736111111111" calcext:value-type="float">
            <text:p>0,00025173611111111100</text:p>
          </table:table-cell>
          <table:table-cell table:formula="of:=[.D31]-[.D30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75" office:value-type="float" office:value="2250" calcext:value-type="float">
            <text:p>225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260416666666667" calcext:value-type="float">
            <text:p>0,00026041666666666700</text:p>
          </table:table-cell>
          <table:table-cell table:formula="of:=[.D32]-[.D31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75" office:value-type="float" office:value="2325" calcext:value-type="float">
            <text:p>2325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269097222222222" calcext:value-type="float">
            <text:p>0,00026909722222222200</text:p>
          </table:table-cell>
          <table:table-cell table:formula="of:=[.D33]-[.D32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75" office:value-type="float" office:value="2400" calcext:value-type="float">
            <text:p>2400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277777777777778" calcext:value-type="float">
            <text:p>0,00027777777777777800</text:p>
          </table:table-cell>
          <table:table-cell table:formula="of:=[.D34]-[.D33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75" office:value-type="float" office:value="2475" calcext:value-type="float">
            <text:p>2475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286458333333333" calcext:value-type="float">
            <text:p>0,00028645833333333300</text:p>
          </table:table-cell>
          <table:table-cell table:formula="of:=[.D35]-[.D34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75" office:value-type="float" office:value="2550" calcext:value-type="float">
            <text:p>2550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295138888888889" calcext:value-type="float">
            <text:p>0,00029513888888888900</text:p>
          </table:table-cell>
          <table:table-cell table:formula="of:=[.D36]-[.D35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75" office:value-type="float" office:value="2625" calcext:value-type="float">
            <text:p>262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303819444444444" calcext:value-type="float">
            <text:p>0,00030381944444444400</text:p>
          </table:table-cell>
          <table:table-cell table:formula="of:=[.D37]-[.D36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75" office:value-type="float" office:value="2700" calcext:value-type="float">
            <text:p>2700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3125" calcext:value-type="float">
            <text:p>0,00031250000000000000</text:p>
          </table:table-cell>
          <table:table-cell table:formula="of:=[.D38]-[.D37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75" office:value-type="float" office:value="2775" calcext:value-type="float">
            <text:p>2775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321180555555556" calcext:value-type="float">
            <text:p>0,00032118055555555600</text:p>
          </table:table-cell>
          <table:table-cell table:formula="of:=[.D39]-[.D38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75" office:value-type="float" office:value="2850" calcext:value-type="float">
            <text:p>2850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329861111111111" calcext:value-type="float">
            <text:p>0,00032986111111111100</text:p>
          </table:table-cell>
          <table:table-cell table:formula="of:=[.D40]-[.D39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75" office:value-type="float" office:value="2925" calcext:value-type="float">
            <text:p>2925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338541666666667" calcext:value-type="float">
            <text:p>0,00033854166666666700</text:p>
          </table:table-cell>
          <table:table-cell table:formula="of:=[.D41]-[.D40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75" office:value-type="float" office:value="3000" calcext:value-type="float">
            <text:p>300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347222222222222" calcext:value-type="float">
            <text:p>0,00034722222222222200</text:p>
          </table:table-cell>
          <table:table-cell table:formula="of:=[.D42]-[.D41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75" office:value-type="float" office:value="3075" calcext:value-type="float">
            <text:p>3075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355902777777778" calcext:value-type="float">
            <text:p>0,00035590277777777800</text:p>
          </table:table-cell>
          <table:table-cell table:formula="of:=[.D43]-[.D42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75" office:value-type="float" office:value="3150" calcext:value-type="float">
            <text:p>3150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364583333333333" calcext:value-type="float">
            <text:p>0,00036458333333333300</text:p>
          </table:table-cell>
          <table:table-cell table:formula="of:=[.D44]-[.D43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75" office:value-type="float" office:value="3225" calcext:value-type="float">
            <text:p>3225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373263888888889" calcext:value-type="float">
            <text:p>0,00037326388888888900</text:p>
          </table:table-cell>
          <table:table-cell table:formula="of:=[.D45]-[.D44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75" office:value-type="float" office:value="3300" calcext:value-type="float">
            <text:p>3300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381944444444444" calcext:value-type="float">
            <text:p>0,00038194444444444400</text:p>
          </table:table-cell>
          <table:table-cell table:formula="of:=[.D46]-[.D45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75" office:value-type="float" office:value="3375" calcext:value-type="float">
            <text:p>337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390625" calcext:value-type="float">
            <text:p>0,00039062500000000000</text:p>
          </table:table-cell>
          <table:table-cell table:formula="of:=[.D47]-[.D46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75" office:value-type="float" office:value="3450" calcext:value-type="float">
            <text:p>3450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399305555555556" calcext:value-type="float">
            <text:p>0,00039930555555555600</text:p>
          </table:table-cell>
          <table:table-cell table:formula="of:=[.D48]-[.D47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75" office:value-type="float" office:value="3525" calcext:value-type="float">
            <text:p>3525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407986111111111" calcext:value-type="float">
            <text:p>0,00040798611111111100</text:p>
          </table:table-cell>
          <table:table-cell table:formula="of:=[.D49]-[.D48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75" office:value-type="float" office:value="3600" calcext:value-type="float">
            <text:p>3600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416666666666667" calcext:value-type="float">
            <text:p>0,00041666666666666700</text:p>
          </table:table-cell>
          <table:table-cell table:formula="of:=[.D50]-[.D49]" office:value-type="float" office:value="0.0000086805555555555" calcext:value-type="float">
            <text:p>0,00000868055555555550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75" office:value-type="float" office:value="3675" calcext:value-type="float">
            <text:p>3675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425347222222222" calcext:value-type="float">
            <text:p>0,00042534722222222200</text:p>
          </table:table-cell>
          <table:table-cell table:formula="of:=[.D51]-[.D50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75" office:value-type="float" office:value="3750" calcext:value-type="float">
            <text:p>37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434027777777778" calcext:value-type="float">
            <text:p>0,00043402777777777800</text:p>
          </table:table-cell>
          <table:table-cell table:formula="of:=[.D52]-[.D51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75" office:value-type="float" office:value="3825" calcext:value-type="float">
            <text:p>3825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442708333333333" calcext:value-type="float">
            <text:p>0,00044270833333333300</text:p>
          </table:table-cell>
          <table:table-cell table:formula="of:=[.D53]-[.D52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75" office:value-type="float" office:value="3900" calcext:value-type="float">
            <text:p>3900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451388888888889" calcext:value-type="float">
            <text:p>0,00045138888888888900</text:p>
          </table:table-cell>
          <table:table-cell table:formula="of:=[.D54]-[.D53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75" office:value-type="float" office:value="3975" calcext:value-type="float">
            <text:p>3975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460069444444444" calcext:value-type="float">
            <text:p>0,00046006944444444400</text:p>
          </table:table-cell>
          <table:table-cell table:formula="of:=[.D55]-[.D54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75" office:value-type="float" office:value="4050" calcext:value-type="float">
            <text:p>4050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46875" calcext:value-type="float">
            <text:p>0,00046875000000000000</text:p>
          </table:table-cell>
          <table:table-cell table:formula="of:=[.D56]-[.D55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75" office:value-type="float" office:value="4125" calcext:value-type="float">
            <text:p>412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477430555555556" calcext:value-type="float">
            <text:p>0,00047743055555555600</text:p>
          </table:table-cell>
          <table:table-cell table:formula="of:=[.D57]-[.D56]" office:value-type="float" office:value="0.00000868055555555556" calcext:value-type="float">
            <text:p>0,00000868055555555556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75" office:value-type="float" office:value="4200" calcext:value-type="float">
            <text:p>4200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486111111111111" calcext:value-type="float">
            <text:p>0,00048611111111111100</text:p>
          </table:table-cell>
          <table:table-cell table:formula="of:=[.D58]-[.D57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75" office:value-type="float" office:value="4275" calcext:value-type="float">
            <text:p>4275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494791666666667" calcext:value-type="float">
            <text:p>0,00049479166666666700</text:p>
          </table:table-cell>
          <table:table-cell table:formula="of:=[.D59]-[.D58]" office:value-type="float" office:value="0.0000086805555555555" calcext:value-type="float">
            <text:p>0,00000868055555555550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75" office:value-type="float" office:value="4350" calcext:value-type="float">
            <text:p>4350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503472222222222" calcext:value-type="float">
            <text:p>0,00050347222222222200</text:p>
          </table:table-cell>
          <table:table-cell table:formula="of:=[.D60]-[.D59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75" office:value-type="float" office:value="4425" calcext:value-type="float">
            <text:p>4425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512152777777778" calcext:value-type="float">
            <text:p>0,00051215277777777800</text:p>
          </table:table-cell>
          <table:table-cell table:formula="of:=[.D61]-[.D60]" office:value-type="float" office:value="0.0000086805555555555" calcext:value-type="float">
            <text:p>0,00000868055555555550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75" office:value-type="float" office:value="4500" calcext:value-type="float">
            <text:p>450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520833333333333" calcext:value-type="float">
            <text:p>0,00052083333333333300</text:p>
          </table:table-cell>
          <table:table-cell table:formula="of:=[.D62]-[.D61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75" office:value-type="float" office:value="4575" calcext:value-type="float">
            <text:p>4575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529513888888889" calcext:value-type="float">
            <text:p>0,00052951388888888900</text:p>
          </table:table-cell>
          <table:table-cell table:formula="of:=[.D63]-[.D62]" office:value-type="float" office:value="0.0000086805555555555" calcext:value-type="float">
            <text:p>0,00000868055555555550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75" office:value-type="float" office:value="4650" calcext:value-type="float">
            <text:p>4650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538194444444444" calcext:value-type="float">
            <text:p>0,00053819444444444400</text:p>
          </table:table-cell>
          <table:table-cell table:formula="of:=[.D64]-[.D63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75" office:value-type="float" office:value="4725" calcext:value-type="float">
            <text:p>4725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546875" calcext:value-type="float">
            <text:p>0,00054687500000000000</text:p>
          </table:table-cell>
          <table:table-cell table:formula="of:=[.D65]-[.D64]" office:value-type="float" office:value="0.0000086805555555555" calcext:value-type="float">
            <text:p>0,00000868055555555550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75" office:value-type="float" office:value="4800" calcext:value-type="float">
            <text:p>4800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555555555555556" calcext:value-type="float">
            <text:p>0,00055555555555555600</text:p>
          </table:table-cell>
          <table:table-cell table:formula="of:=[.D66]-[.D65]" office:value-type="float" office:value="0.0000086805555555555" calcext:value-type="float">
            <text:p>0,00000868055555555550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75" office:value-type="float" office:value="4875" calcext:value-type="float">
            <text:p>487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564236111111111" calcext:value-type="float">
            <text:p>0,00056423611111111100</text:p>
          </table:table-cell>
          <table:table-cell table:formula="of:=[.D67]-[.D66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75" office:value-type="float" office:value="4950" calcext:value-type="float">
            <text:p>4950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572916666666667" calcext:value-type="float">
            <text:p>0,00057291666666666700</text:p>
          </table:table-cell>
          <table:table-cell table:formula="of:=[.D68]-[.D67]" office:value-type="float" office:value="0.0000086805555555555" calcext:value-type="float">
            <text:p>0,00000868055555555550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75" office:value-type="float" office:value="5025" calcext:value-type="float">
            <text:p>5025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581597222222222" calcext:value-type="float">
            <text:p>0,00058159722222222200</text:p>
          </table:table-cell>
          <table:table-cell table:formula="of:=[.D69]-[.D68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75" office:value-type="float" office:value="5100" calcext:value-type="float">
            <text:p>5100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590277777777778" calcext:value-type="float">
            <text:p>0,00059027777777777800</text:p>
          </table:table-cell>
          <table:table-cell table:formula="of:=[.D70]-[.D69]" office:value-type="float" office:value="0.0000086805555555555" calcext:value-type="float">
            <text:p>0,00000868055555555550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75" office:value-type="float" office:value="5175" calcext:value-type="float">
            <text:p>5175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598958333333333" calcext:value-type="float">
            <text:p>0,00059895833333333300</text:p>
          </table:table-cell>
          <table:table-cell table:formula="of:=[.D71]-[.D70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75" office:value-type="float" office:value="5250" calcext:value-type="float">
            <text:p>525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607638888888889" calcext:value-type="float">
            <text:p>0,00060763888888888900</text:p>
          </table:table-cell>
          <table:table-cell table:formula="of:=[.D72]-[.D71]" office:value-type="float" office:value="0.0000086805555555555" calcext:value-type="float">
            <text:p>0,00000868055555555550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75" office:value-type="float" office:value="5325" calcext:value-type="float">
            <text:p>5325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616319444444444" calcext:value-type="float">
            <text:p>0,00061631944444444400</text:p>
          </table:table-cell>
          <table:table-cell table:formula="of:=[.D73]-[.D72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75" office:value-type="float" office:value="5400" calcext:value-type="float">
            <text:p>5400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625" calcext:value-type="float">
            <text:p>0,00062500000000000000</text:p>
          </table:table-cell>
          <table:table-cell table:formula="of:=[.D74]-[.D73]" office:value-type="float" office:value="0.0000086805555555555" calcext:value-type="float">
            <text:p>0,00000868055555555550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75" office:value-type="float" office:value="5475" calcext:value-type="float">
            <text:p>5475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633680555555556" calcext:value-type="float">
            <text:p>0,00063368055555555600</text:p>
          </table:table-cell>
          <table:table-cell table:formula="of:=[.D75]-[.D74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75" office:value-type="float" office:value="5550" calcext:value-type="float">
            <text:p>5550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642361111111111" calcext:value-type="float">
            <text:p>0,00064236111111111100</text:p>
          </table:table-cell>
          <table:table-cell table:formula="of:=[.D76]-[.D75]" office:value-type="float" office:value="0.0000086805555555555" calcext:value-type="float">
            <text:p>0,00000868055555555550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75" office:value-type="float" office:value="5625" calcext:value-type="float">
            <text:p>562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651041666666667" calcext:value-type="float">
            <text:p>0,00065104166666666700</text:p>
          </table:table-cell>
          <table:table-cell table:formula="of:=[.D77]-[.D76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75" office:value-type="float" office:value="5700" calcext:value-type="float">
            <text:p>5700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659722222222222" calcext:value-type="float">
            <text:p>0,00065972222222222200</text:p>
          </table:table-cell>
          <table:table-cell table:formula="of:=[.D78]-[.D77]" office:value-type="float" office:value="0.0000086805555555555" calcext:value-type="float">
            <text:p>0,00000868055555555550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75" office:value-type="float" office:value="5775" calcext:value-type="float">
            <text:p>5775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668402777777778" calcext:value-type="float">
            <text:p>0,00066840277777777800</text:p>
          </table:table-cell>
          <table:table-cell table:formula="of:=[.D79]-[.D78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75" office:value-type="float" office:value="5850" calcext:value-type="float">
            <text:p>5850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677083333333333" calcext:value-type="float">
            <text:p>0,00067708333333333300</text:p>
          </table:table-cell>
          <table:table-cell table:formula="of:=[.D80]-[.D79]" office:value-type="float" office:value="0.0000086805555555555" calcext:value-type="float">
            <text:p>0,00000868055555555550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75" office:value-type="float" office:value="5925" calcext:value-type="float">
            <text:p>5925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685763888888889" calcext:value-type="float">
            <text:p>0,00068576388888888900</text:p>
          </table:table-cell>
          <table:table-cell table:formula="of:=[.D81]-[.D80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75" office:value-type="float" office:value="6000" calcext:value-type="float">
            <text:p>600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694444444444445" calcext:value-type="float">
            <text:p>0,00069444444444444500</text:p>
          </table:table-cell>
          <table:table-cell table:formula="of:=[.D82]-[.D81]" office:value-type="float" office:value="0.0000086805555555555" calcext:value-type="float">
            <text:p>0,00000868055555555550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75" office:value-type="float" office:value="6075" calcext:value-type="float">
            <text:p>6075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703125" calcext:value-type="float">
            <text:p>0,00070312500000000000</text:p>
          </table:table-cell>
          <table:table-cell table:formula="of:=[.D83]-[.D82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75" office:value-type="float" office:value="6150" calcext:value-type="float">
            <text:p>6150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711805555555556" calcext:value-type="float">
            <text:p>0,00071180555555555600</text:p>
          </table:table-cell>
          <table:table-cell table:formula="of:=[.D84]-[.D83]" office:value-type="float" office:value="0.0000086805555555555" calcext:value-type="float">
            <text:p>0,00000868055555555550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75" office:value-type="float" office:value="6225" calcext:value-type="float">
            <text:p>6225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720486111111111" calcext:value-type="float">
            <text:p>0,00072048611111111100</text:p>
          </table:table-cell>
          <table:table-cell table:formula="of:=[.D85]-[.D84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75" office:value-type="float" office:value="6300" calcext:value-type="float">
            <text:p>6300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729166666666667" calcext:value-type="float">
            <text:p>0,00072916666666666700</text:p>
          </table:table-cell>
          <table:table-cell table:formula="of:=[.D86]-[.D85]" office:value-type="float" office:value="0.0000086805555555555" calcext:value-type="float">
            <text:p>0,00000868055555555550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75" office:value-type="float" office:value="6375" calcext:value-type="float">
            <text:p>637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737847222222222" calcext:value-type="float">
            <text:p>0,00073784722222222200</text:p>
          </table:table-cell>
          <table:table-cell table:formula="of:=[.D87]-[.D86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75" office:value-type="float" office:value="6450" calcext:value-type="float">
            <text:p>6450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746527777777778" calcext:value-type="float">
            <text:p>0,00074652777777777800</text:p>
          </table:table-cell>
          <table:table-cell table:formula="of:=[.D88]-[.D87]" office:value-type="float" office:value="0.0000086805555555555" calcext:value-type="float">
            <text:p>0,00000868055555555550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75" office:value-type="float" office:value="6525" calcext:value-type="float">
            <text:p>6525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755208333333333" calcext:value-type="float">
            <text:p>0,00075520833333333300</text:p>
          </table:table-cell>
          <table:table-cell table:formula="of:=[.D89]-[.D88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75" office:value-type="float" office:value="6600" calcext:value-type="float">
            <text:p>6600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763888888888889" calcext:value-type="float">
            <text:p>0,00076388888888888900</text:p>
          </table:table-cell>
          <table:table-cell table:formula="of:=[.D90]-[.D89]" office:value-type="float" office:value="0.0000086805555555555" calcext:value-type="float">
            <text:p>0,00000868055555555550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75" office:value-type="float" office:value="6675" calcext:value-type="float">
            <text:p>6675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772569444444444" calcext:value-type="float">
            <text:p>0,00077256944444444400</text:p>
          </table:table-cell>
          <table:table-cell table:formula="of:=[.D91]-[.D90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75" office:value-type="float" office:value="6750" calcext:value-type="float">
            <text:p>675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78125" calcext:value-type="float">
            <text:p>0,00078125000000000000</text:p>
          </table:table-cell>
          <table:table-cell table:formula="of:=[.D92]-[.D91]" office:value-type="float" office:value="0.0000086805555555555" calcext:value-type="float">
            <text:p>0,00000868055555555550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75" office:value-type="float" office:value="6825" calcext:value-type="float">
            <text:p>6825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789930555555556" calcext:value-type="float">
            <text:p>0,00078993055555555600</text:p>
          </table:table-cell>
          <table:table-cell table:formula="of:=[.D93]-[.D92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75" office:value-type="float" office:value="6900" calcext:value-type="float">
            <text:p>6900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798611111111111" calcext:value-type="float">
            <text:p>0,00079861111111111100</text:p>
          </table:table-cell>
          <table:table-cell table:formula="of:=[.D94]-[.D93]" office:value-type="float" office:value="0.0000086805555555555" calcext:value-type="float">
            <text:p>0,00000868055555555550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75" office:value-type="float" office:value="6975" calcext:value-type="float">
            <text:p>6975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807291666666667" calcext:value-type="float">
            <text:p>0,00080729166666666700</text:p>
          </table:table-cell>
          <table:table-cell table:formula="of:=[.D95]-[.D94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75" office:value-type="float" office:value="7050" calcext:value-type="float">
            <text:p>7050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815972222222222" calcext:value-type="float">
            <text:p>0,00081597222222222200</text:p>
          </table:table-cell>
          <table:table-cell table:formula="of:=[.D96]-[.D95]" office:value-type="float" office:value="0.0000086805555555555" calcext:value-type="float">
            <text:p>0,00000868055555555550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75" office:value-type="float" office:value="7125" calcext:value-type="float">
            <text:p>712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824652777777778" calcext:value-type="float">
            <text:p>0,00082465277777777800</text:p>
          </table:table-cell>
          <table:table-cell table:formula="of:=[.D97]-[.D96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75" office:value-type="float" office:value="7200" calcext:value-type="float">
            <text:p>7200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833333333333333" calcext:value-type="float">
            <text:p>0,00083333333333333300</text:p>
          </table:table-cell>
          <table:table-cell table:formula="of:=[.D98]-[.D97]" office:value-type="float" office:value="0.0000086805555555555" calcext:value-type="float">
            <text:p>0,00000868055555555550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75" office:value-type="float" office:value="7275" calcext:value-type="float">
            <text:p>7275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842013888888889" calcext:value-type="float">
            <text:p>0,00084201388888888900</text:p>
          </table:table-cell>
          <table:table-cell table:formula="of:=[.D99]-[.D98]" office:value-type="float" office:value="0.0000086805555555555" calcext:value-type="float">
            <text:p>0,00000868055555555550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75" office:value-type="float" office:value="7350" calcext:value-type="float">
            <text:p>7350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850694444444444" calcext:value-type="float">
            <text:p>0,00085069444444444400</text:p>
          </table:table-cell>
          <table:table-cell table:formula="of:=[.D100]-[.D99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75" office:value-type="float" office:value="7425" calcext:value-type="float">
            <text:p>7425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859375" calcext:value-type="float">
            <text:p>0,00085937500000000000</text:p>
          </table:table-cell>
          <table:table-cell table:formula="of:=[.D101]-[.D100]" office:value-type="float" office:value="0.0000086805555555555" calcext:value-type="float">
            <text:p>0,00000868055555555550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75" office:value-type="float" office:value="7500" calcext:value-type="float">
            <text:p>75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868055555555556" calcext:value-type="float">
            <text:p>0,00086805555555555600</text:p>
          </table:table-cell>
          <table:table-cell table:formula="of:=[.D102]-[.D101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75" office:value-type="float" office:value="7575" calcext:value-type="float">
            <text:p>7575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876736111111111" calcext:value-type="float">
            <text:p>0,00087673611111111100</text:p>
          </table:table-cell>
          <table:table-cell table:formula="of:=[.D103]-[.D102]" office:value-type="float" office:value="0.0000086805555555555" calcext:value-type="float">
            <text:p>0,00000868055555555550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75" office:value-type="float" office:value="7650" calcext:value-type="float">
            <text:p>7650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885416666666667" calcext:value-type="float">
            <text:p>0,00088541666666666700</text:p>
          </table:table-cell>
          <table:table-cell table:formula="of:=[.D104]-[.D103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75" office:value-type="float" office:value="7725" calcext:value-type="float">
            <text:p>7725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894097222222222" calcext:value-type="float">
            <text:p>0,00089409722222222200</text:p>
          </table:table-cell>
          <table:table-cell table:formula="of:=[.D105]-[.D104]" office:value-type="float" office:value="0.0000086805555555555" calcext:value-type="float">
            <text:p>0,00000868055555555550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75" office:value-type="float" office:value="7800" calcext:value-type="float">
            <text:p>7800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902777777777778" calcext:value-type="float">
            <text:p>0,00090277777777777800</text:p>
          </table:table-cell>
          <table:table-cell table:formula="of:=[.D106]-[.D105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75" office:value-type="float" office:value="7875" calcext:value-type="float">
            <text:p>787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911458333333333" calcext:value-type="float">
            <text:p>0,00091145833333333300</text:p>
          </table:table-cell>
          <table:table-cell table:formula="of:=[.D107]-[.D106]" office:value-type="float" office:value="0.0000086805555555555" calcext:value-type="float">
            <text:p>0,00000868055555555550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75" office:value-type="float" office:value="7950" calcext:value-type="float">
            <text:p>7950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920138888888889" calcext:value-type="float">
            <text:p>0,00092013888888888900</text:p>
          </table:table-cell>
          <table:table-cell table:formula="of:=[.D108]-[.D107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75" office:value-type="float" office:value="8025" calcext:value-type="float">
            <text:p>8025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928819444444445" calcext:value-type="float">
            <text:p>0,00092881944444444500</text:p>
          </table:table-cell>
          <table:table-cell table:formula="of:=[.D109]-[.D108]" office:value-type="float" office:value="0.0000086805555555555" calcext:value-type="float">
            <text:p>0,00000868055555555550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75" office:value-type="float" office:value="8100" calcext:value-type="float">
            <text:p>8100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9375" calcext:value-type="float">
            <text:p>0,00093750000000000000</text:p>
          </table:table-cell>
          <table:table-cell table:formula="of:=[.D110]-[.D109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75" office:value-type="float" office:value="8175" calcext:value-type="float">
            <text:p>8175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946180555555556" calcext:value-type="float">
            <text:p>0,00094618055555555600</text:p>
          </table:table-cell>
          <table:table-cell table:formula="of:=[.D111]-[.D110]" office:value-type="float" office:value="0.0000086805555555555" calcext:value-type="float">
            <text:p>0,00000868055555555550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75" office:value-type="float" office:value="8250" calcext:value-type="float">
            <text:p>825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954861111111111" calcext:value-type="float">
            <text:p>0,00095486111111111100</text:p>
          </table:table-cell>
          <table:table-cell table:formula="of:=[.D112]-[.D111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75" office:value-type="float" office:value="8325" calcext:value-type="float">
            <text:p>8325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963541666666667" calcext:value-type="float">
            <text:p>0,00096354166666666700</text:p>
          </table:table-cell>
          <table:table-cell table:formula="of:=[.D113]-[.D112]" office:value-type="float" office:value="0.0000086805555555555" calcext:value-type="float">
            <text:p>0,00000868055555555550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75" office:value-type="float" office:value="8400" calcext:value-type="float">
            <text:p>8400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972222222222222" calcext:value-type="float">
            <text:p>0,00097222222222222200</text:p>
          </table:table-cell>
          <table:table-cell table:formula="of:=[.D114]-[.D113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75" office:value-type="float" office:value="8475" calcext:value-type="float">
            <text:p>8475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980902777777778" calcext:value-type="float">
            <text:p>0,00098090277777777800</text:p>
          </table:table-cell>
          <table:table-cell table:formula="of:=[.D115]-[.D114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75" office:value-type="float" office:value="8550" calcext:value-type="float">
            <text:p>8550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989583333333333" calcext:value-type="float">
            <text:p>0,00098958333333333300</text:p>
          </table:table-cell>
          <table:table-cell table:formula="of:=[.D116]-[.D115]" office:value-type="float" office:value="0.0000086805555555554" calcext:value-type="float">
            <text:p>0,00000868055555555540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75" office:value-type="float" office:value="8625" calcext:value-type="float">
            <text:p>862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998263888888889" calcext:value-type="float">
            <text:p>0,00099826388888888900</text:p>
          </table:table-cell>
          <table:table-cell table:formula="of:=[.D117]-[.D116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75" office:value-type="float" office:value="8700" calcext:value-type="float">
            <text:p>8700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100694444444444" calcext:value-type="float">
            <text:p>0,00100694444444444000</text:p>
          </table:table-cell>
          <table:table-cell table:formula="of:=[.D118]-[.D117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75" office:value-type="float" office:value="8775" calcext:value-type="float">
            <text:p>8775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1015625" calcext:value-type="float">
            <text:p>0,00101562500000000000</text:p>
          </table:table-cell>
          <table:table-cell table:formula="of:=[.D119]-[.D118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75" office:value-type="float" office:value="8850" calcext:value-type="float">
            <text:p>8850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102430555555556" calcext:value-type="float">
            <text:p>0,00102430555555556000</text:p>
          </table:table-cell>
          <table:table-cell table:formula="of:=[.D120]-[.D119]" office:value-type="float" office:value="0.0000086805555555554" calcext:value-type="float">
            <text:p>0,00000868055555555540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75" office:value-type="float" office:value="8925" calcext:value-type="float">
            <text:p>8925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103298611111111" calcext:value-type="float">
            <text:p>0,00103298611111111000</text:p>
          </table:table-cell>
          <table:table-cell table:formula="of:=[.D121]-[.D120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75" office:value-type="float" office:value="9000" calcext:value-type="float">
            <text:p>900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104166666666667" calcext:value-type="float">
            <text:p>0,00104166666666667000</text:p>
          </table:table-cell>
          <table:table-cell table:formula="of:=[.D122]-[.D121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75" office:value-type="float" office:value="9075" calcext:value-type="float">
            <text:p>9075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105034722222222" calcext:value-type="float">
            <text:p>0,00105034722222222000</text:p>
          </table:table-cell>
          <table:table-cell table:formula="of:=[.D123]-[.D122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75" office:value-type="float" office:value="9150" calcext:value-type="float">
            <text:p>9150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105902777777778" calcext:value-type="float">
            <text:p>0,00105902777777778000</text:p>
          </table:table-cell>
          <table:table-cell table:formula="of:=[.D124]-[.D123]" office:value-type="float" office:value="0.0000086805555555554" calcext:value-type="float">
            <text:p>0,00000868055555555540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75" office:value-type="float" office:value="9225" calcext:value-type="float">
            <text:p>9225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106770833333333" calcext:value-type="float">
            <text:p>0,00106770833333333000</text:p>
          </table:table-cell>
          <table:table-cell table:formula="of:=[.D125]-[.D124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75" office:value-type="float" office:value="9300" calcext:value-type="float">
            <text:p>9300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107638888888889" calcext:value-type="float">
            <text:p>0,00107638888888889000</text:p>
          </table:table-cell>
          <table:table-cell table:formula="of:=[.D126]-[.D125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75" office:value-type="float" office:value="9375" calcext:value-type="float">
            <text:p>937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108506944444444" calcext:value-type="float">
            <text:p>0,00108506944444444000</text:p>
          </table:table-cell>
          <table:table-cell table:formula="of:=[.D127]-[.D126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75" office:value-type="float" office:value="9450" calcext:value-type="float">
            <text:p>9450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109375" calcext:value-type="float">
            <text:p>0,00109375000000000000</text:p>
          </table:table-cell>
          <table:table-cell table:formula="of:=[.D128]-[.D127]" office:value-type="float" office:value="0.0000086805555555554" calcext:value-type="float">
            <text:p>0,00000868055555555540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75" office:value-type="float" office:value="9525" calcext:value-type="float">
            <text:p>9525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110243055555556" calcext:value-type="float">
            <text:p>0,00110243055555556000</text:p>
          </table:table-cell>
          <table:table-cell table:formula="of:=[.D129]-[.D128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75" office:value-type="float" office:value="9600" calcext:value-type="float">
            <text:p>9600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111111111111111" calcext:value-type="float">
            <text:p>0,00111111111111111000</text:p>
          </table:table-cell>
          <table:table-cell table:formula="of:=[.D130]-[.D129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75" office:value-type="float" office:value="9675" calcext:value-type="float">
            <text:p>9675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11979166666667" calcext:value-type="float">
            <text:p>0,00111979166666667000</text:p>
          </table:table-cell>
          <table:table-cell table:formula="of:=[.D131]-[.D130]" office:value-type="float" office:value="0.0000086805555555554" calcext:value-type="float">
            <text:p>0,00000868055555555540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75" office:value-type="float" office:value="9750" calcext:value-type="float">
            <text:p>975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12847222222222" calcext:value-type="float">
            <text:p>0,00112847222222222000</text:p>
          </table:table-cell>
          <table:table-cell table:formula="of:=[.D132]-[.D131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75" office:value-type="float" office:value="9825" calcext:value-type="float">
            <text:p>9825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13715277777778" calcext:value-type="float">
            <text:p>0,00113715277777778000</text:p>
          </table:table-cell>
          <table:table-cell table:formula="of:=[.D133]-[.D132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75" office:value-type="float" office:value="9900" calcext:value-type="float">
            <text:p>9900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14583333333333" calcext:value-type="float">
            <text:p>0,00114583333333333000</text:p>
          </table:table-cell>
          <table:table-cell table:formula="of:=[.D134]-[.D133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75" office:value-type="float" office:value="9975" calcext:value-type="float">
            <text:p>9975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15451388888889" calcext:value-type="float">
            <text:p>0,00115451388888889000</text:p>
          </table:table-cell>
          <table:table-cell table:formula="of:=[.D135]-[.D134]" office:value-type="float" office:value="0.0000086805555555554" calcext:value-type="float">
            <text:p>0,00000868055555555540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75" office:value-type="float" office:value="10050" calcext:value-type="float">
            <text:p>10050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16319444444444" calcext:value-type="float">
            <text:p>0,00116319444444444000</text:p>
          </table:table-cell>
          <table:table-cell table:formula="of:=[.D136]-[.D135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75" office:value-type="float" office:value="10125" calcext:value-type="float">
            <text:p>1012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171875" calcext:value-type="float">
            <text:p>0,00117187500000000000</text:p>
          </table:table-cell>
          <table:table-cell table:formula="of:=[.D137]-[.D136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75" office:value-type="float" office:value="10200" calcext:value-type="float">
            <text:p>10200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18055555555556" calcext:value-type="float">
            <text:p>0,00118055555555556000</text:p>
          </table:table-cell>
          <table:table-cell table:formula="of:=[.D138]-[.D137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75" office:value-type="float" office:value="10275" calcext:value-type="float">
            <text:p>10275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18923611111111" calcext:value-type="float">
            <text:p>0,00118923611111111000</text:p>
          </table:table-cell>
          <table:table-cell table:formula="of:=[.D139]-[.D138]" office:value-type="float" office:value="0.0000086805555555554" calcext:value-type="float">
            <text:p>0,00000868055555555540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75" office:value-type="float" office:value="10350" calcext:value-type="float">
            <text:p>10350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19791666666667" calcext:value-type="float">
            <text:p>0,00119791666666667000</text:p>
          </table:table-cell>
          <table:table-cell table:formula="of:=[.D140]-[.D139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75" office:value-type="float" office:value="10425" calcext:value-type="float">
            <text:p>10425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20659722222222" calcext:value-type="float">
            <text:p>0,00120659722222222000</text:p>
          </table:table-cell>
          <table:table-cell table:formula="of:=[.D141]-[.D140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75" office:value-type="float" office:value="10500" calcext:value-type="float">
            <text:p>1050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21527777777778" calcext:value-type="float">
            <text:p>0,00121527777777778000</text:p>
          </table:table-cell>
          <table:table-cell table:formula="of:=[.D142]-[.D141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75" office:value-type="float" office:value="10575" calcext:value-type="float">
            <text:p>10575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22395833333333" calcext:value-type="float">
            <text:p>0,00122395833333333000</text:p>
          </table:table-cell>
          <table:table-cell table:formula="of:=[.D143]-[.D142]" office:value-type="float" office:value="0.0000086805555555554" calcext:value-type="float">
            <text:p>0,00000868055555555540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75" office:value-type="float" office:value="10650" calcext:value-type="float">
            <text:p>10650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23263888888889" calcext:value-type="float">
            <text:p>0,00123263888888889000</text:p>
          </table:table-cell>
          <table:table-cell table:formula="of:=[.D144]-[.D143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75" office:value-type="float" office:value="10725" calcext:value-type="float">
            <text:p>10725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24131944444444" calcext:value-type="float">
            <text:p>0,00124131944444444000</text:p>
          </table:table-cell>
          <table:table-cell table:formula="of:=[.D145]-[.D144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75" office:value-type="float" office:value="10800" calcext:value-type="float">
            <text:p>10800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25" calcext:value-type="float">
            <text:p>0,00125000000000000000</text:p>
          </table:table-cell>
          <table:table-cell table:formula="of:=[.D146]-[.D145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75" office:value-type="float" office:value="10875" calcext:value-type="float">
            <text:p>1087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25868055555556" calcext:value-type="float">
            <text:p>0,00125868055555556000</text:p>
          </table:table-cell>
          <table:table-cell table:formula="of:=[.D147]-[.D146]" office:value-type="float" office:value="0.0000086805555555554" calcext:value-type="float">
            <text:p>0,00000868055555555540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75" office:value-type="float" office:value="10950" calcext:value-type="float">
            <text:p>10950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26736111111111" calcext:value-type="float">
            <text:p>0,00126736111111111000</text:p>
          </table:table-cell>
          <table:table-cell table:formula="of:=[.D148]-[.D147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75" office:value-type="float" office:value="11025" calcext:value-type="float">
            <text:p>11025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27604166666667" calcext:value-type="float">
            <text:p>0,00127604166666667000</text:p>
          </table:table-cell>
          <table:table-cell table:formula="of:=[.D149]-[.D148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75" office:value-type="float" office:value="11100" calcext:value-type="float">
            <text:p>11100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28472222222222" calcext:value-type="float">
            <text:p>0,00128472222222222000</text:p>
          </table:table-cell>
          <table:table-cell table:formula="of:=[.D150]-[.D149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75" office:value-type="float" office:value="11175" calcext:value-type="float">
            <text:p>11175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29340277777778" calcext:value-type="float">
            <text:p>0,00129340277777778000</text:p>
          </table:table-cell>
          <table:table-cell table:formula="of:=[.D151]-[.D150]" office:value-type="float" office:value="0.0000086805555555554" calcext:value-type="float">
            <text:p>0,00000868055555555540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75" office:value-type="float" office:value="11250" calcext:value-type="float">
            <text:p>112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30208333333333" calcext:value-type="float">
            <text:p>0,00130208333333333000</text:p>
          </table:table-cell>
          <table:table-cell table:formula="of:=[.D152]-[.D151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75" office:value-type="float" office:value="11325" calcext:value-type="float">
            <text:p>11325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31076388888889" calcext:value-type="float">
            <text:p>0,00131076388888889000</text:p>
          </table:table-cell>
          <table:table-cell table:formula="of:=[.D153]-[.D152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75" office:value-type="float" office:value="11400" calcext:value-type="float">
            <text:p>11400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31944444444444" calcext:value-type="float">
            <text:p>0,00131944444444444000</text:p>
          </table:table-cell>
          <table:table-cell table:formula="of:=[.D154]-[.D153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75" office:value-type="float" office:value="11475" calcext:value-type="float">
            <text:p>11475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328125" calcext:value-type="float">
            <text:p>0,00132812500000000000</text:p>
          </table:table-cell>
          <table:table-cell table:formula="of:=[.D155]-[.D154]" office:value-type="float" office:value="0.0000086805555555554" calcext:value-type="float">
            <text:p>0,00000868055555555540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75" office:value-type="float" office:value="11550" calcext:value-type="float">
            <text:p>11550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33680555555556" calcext:value-type="float">
            <text:p>0,00133680555555556000</text:p>
          </table:table-cell>
          <table:table-cell table:formula="of:=[.D156]-[.D155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75" office:value-type="float" office:value="11625" calcext:value-type="float">
            <text:p>1162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34548611111111" calcext:value-type="float">
            <text:p>0,00134548611111111000</text:p>
          </table:table-cell>
          <table:table-cell table:formula="of:=[.D157]-[.D156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75" office:value-type="float" office:value="11700" calcext:value-type="float">
            <text:p>11700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35416666666667" calcext:value-type="float">
            <text:p>0,00135416666666667000</text:p>
          </table:table-cell>
          <table:table-cell table:formula="of:=[.D158]-[.D157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75" office:value-type="float" office:value="11775" calcext:value-type="float">
            <text:p>11775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36284722222222" calcext:value-type="float">
            <text:p>0,00136284722222222000</text:p>
          </table:table-cell>
          <table:table-cell table:formula="of:=[.D159]-[.D158]" office:value-type="float" office:value="0.0000086805555555554" calcext:value-type="float">
            <text:p>0,00000868055555555540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75" office:value-type="float" office:value="11850" calcext:value-type="float">
            <text:p>11850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37152777777778" calcext:value-type="float">
            <text:p>0,00137152777777778000</text:p>
          </table:table-cell>
          <table:table-cell table:formula="of:=[.D160]-[.D159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75" office:value-type="float" office:value="11925" calcext:value-type="float">
            <text:p>11925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38020833333333" calcext:value-type="float">
            <text:p>0,00138020833333333000</text:p>
          </table:table-cell>
          <table:table-cell table:formula="of:=[.D161]-[.D160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75" office:value-type="float" office:value="12000" calcext:value-type="float">
            <text:p>1200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38888888888889" calcext:value-type="float">
            <text:p>0,00138888888888889000</text:p>
          </table:table-cell>
          <table:table-cell table:formula="of:=[.D162]-[.D161]" office:value-type="float" office:value="0.0000086805555555554" calcext:value-type="float">
            <text:p>0,00000868055555555540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75" office:value-type="float" office:value="12075" calcext:value-type="float">
            <text:p>12075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39756944444444" calcext:value-type="float">
            <text:p>0,00139756944444444000</text:p>
          </table:table-cell>
          <table:table-cell table:formula="of:=[.D163]-[.D162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75" office:value-type="float" office:value="12150" calcext:value-type="float">
            <text:p>12150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40625" calcext:value-type="float">
            <text:p>0,00140625000000000000</text:p>
          </table:table-cell>
          <table:table-cell table:formula="of:=[.D164]-[.D163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75" office:value-type="float" office:value="12225" calcext:value-type="float">
            <text:p>12225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41493055555556" calcext:value-type="float">
            <text:p>0,00141493055555556000</text:p>
          </table:table-cell>
          <table:table-cell table:formula="of:=[.D165]-[.D164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75" office:value-type="float" office:value="12300" calcext:value-type="float">
            <text:p>12300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42361111111111" calcext:value-type="float">
            <text:p>0,00142361111111111000</text:p>
          </table:table-cell>
          <table:table-cell table:formula="of:=[.D166]-[.D165]" office:value-type="float" office:value="0.0000086805555555554" calcext:value-type="float">
            <text:p>0,00000868055555555540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75" office:value-type="float" office:value="12375" calcext:value-type="float">
            <text:p>1237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43229166666667" calcext:value-type="float">
            <text:p>0,00143229166666667000</text:p>
          </table:table-cell>
          <table:table-cell table:formula="of:=[.D167]-[.D166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75" office:value-type="float" office:value="12450" calcext:value-type="float">
            <text:p>12450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44097222222222" calcext:value-type="float">
            <text:p>0,00144097222222222000</text:p>
          </table:table-cell>
          <table:table-cell table:formula="of:=[.D168]-[.D167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75" office:value-type="float" office:value="12525" calcext:value-type="float">
            <text:p>12525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44965277777778" calcext:value-type="float">
            <text:p>0,00144965277777778000</text:p>
          </table:table-cell>
          <table:table-cell table:formula="of:=[.D169]-[.D168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75" office:value-type="float" office:value="12600" calcext:value-type="float">
            <text:p>12600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45833333333333" calcext:value-type="float">
            <text:p>0,00145833333333333000</text:p>
          </table:table-cell>
          <table:table-cell table:formula="of:=[.D170]-[.D169]" office:value-type="float" office:value="0.0000086805555555554" calcext:value-type="float">
            <text:p>0,00000868055555555540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75" office:value-type="float" office:value="12675" calcext:value-type="float">
            <text:p>12675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46701388888889" calcext:value-type="float">
            <text:p>0,00146701388888889000</text:p>
          </table:table-cell>
          <table:table-cell table:formula="of:=[.D171]-[.D170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75" office:value-type="float" office:value="12750" calcext:value-type="float">
            <text:p>1275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47569444444444" calcext:value-type="float">
            <text:p>0,00147569444444444000</text:p>
          </table:table-cell>
          <table:table-cell table:formula="of:=[.D172]-[.D171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75" office:value-type="float" office:value="12825" calcext:value-type="float">
            <text:p>12825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484375" calcext:value-type="float">
            <text:p>0,00148437500000000000</text:p>
          </table:table-cell>
          <table:table-cell table:formula="of:=[.D173]-[.D172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75" office:value-type="float" office:value="12900" calcext:value-type="float">
            <text:p>12900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49305555555556" calcext:value-type="float">
            <text:p>0,00149305555555556000</text:p>
          </table:table-cell>
          <table:table-cell table:formula="of:=[.D174]-[.D173]" office:value-type="float" office:value="0.0000086805555555554" calcext:value-type="float">
            <text:p>0,00000868055555555540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75" office:value-type="float" office:value="12975" calcext:value-type="float">
            <text:p>12975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50173611111111" calcext:value-type="float">
            <text:p>0,00150173611111111000</text:p>
          </table:table-cell>
          <table:table-cell table:formula="of:=[.D175]-[.D174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75" office:value-type="float" office:value="13050" calcext:value-type="float">
            <text:p>13050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51041666666667" calcext:value-type="float">
            <text:p>0,00151041666666667000</text:p>
          </table:table-cell>
          <table:table-cell table:formula="of:=[.D176]-[.D175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75" office:value-type="float" office:value="13125" calcext:value-type="float">
            <text:p>1312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51909722222222" calcext:value-type="float">
            <text:p>0,00151909722222222000</text:p>
          </table:table-cell>
          <table:table-cell table:formula="of:=[.D177]-[.D176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75" office:value-type="float" office:value="13200" calcext:value-type="float">
            <text:p>13200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52777777777778" calcext:value-type="float">
            <text:p>0,00152777777777778000</text:p>
          </table:table-cell>
          <table:table-cell table:formula="of:=[.D178]-[.D177]" office:value-type="float" office:value="0.0000086805555555554" calcext:value-type="float">
            <text:p>0,00000868055555555540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75" office:value-type="float" office:value="13275" calcext:value-type="float">
            <text:p>13275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53645833333333" calcext:value-type="float">
            <text:p>0,00153645833333333000</text:p>
          </table:table-cell>
          <table:table-cell table:formula="of:=[.D179]-[.D178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75" office:value-type="float" office:value="13350" calcext:value-type="float">
            <text:p>13350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54513888888889" calcext:value-type="float">
            <text:p>0,00154513888888889000</text:p>
          </table:table-cell>
          <table:table-cell table:formula="of:=[.D180]-[.D179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75" office:value-type="float" office:value="13425" calcext:value-type="float">
            <text:p>13425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55381944444444" calcext:value-type="float">
            <text:p>0,00155381944444444000</text:p>
          </table:table-cell>
          <table:table-cell table:formula="of:=[.D181]-[.D180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75" office:value-type="float" office:value="13500" calcext:value-type="float">
            <text:p>1350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5625" calcext:value-type="float">
            <text:p>0,00156250000000000000</text:p>
          </table:table-cell>
          <table:table-cell table:formula="of:=[.D182]-[.D181]" office:value-type="float" office:value="0.0000086805555555554" calcext:value-type="float">
            <text:p>0,00000868055555555540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75" office:value-type="float" office:value="13575" calcext:value-type="float">
            <text:p>13575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57118055555556" calcext:value-type="float">
            <text:p>0,00157118055555556000</text:p>
          </table:table-cell>
          <table:table-cell table:formula="of:=[.D183]-[.D182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75" office:value-type="float" office:value="13650" calcext:value-type="float">
            <text:p>13650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57986111111111" calcext:value-type="float">
            <text:p>0,00157986111111111000</text:p>
          </table:table-cell>
          <table:table-cell table:formula="of:=[.D184]-[.D183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75" office:value-type="float" office:value="13725" calcext:value-type="float">
            <text:p>13725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58854166666667" calcext:value-type="float">
            <text:p>0,00158854166666667000</text:p>
          </table:table-cell>
          <table:table-cell table:formula="of:=[.D185]-[.D184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75" office:value-type="float" office:value="13800" calcext:value-type="float">
            <text:p>13800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59722222222222" calcext:value-type="float">
            <text:p>0,00159722222222222000</text:p>
          </table:table-cell>
          <table:table-cell table:formula="of:=[.D186]-[.D185]" office:value-type="float" office:value="0.0000086805555555554" calcext:value-type="float">
            <text:p>0,00000868055555555540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75" office:value-type="float" office:value="13875" calcext:value-type="float">
            <text:p>1387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60590277777778" calcext:value-type="float">
            <text:p>0,00160590277777778000</text:p>
          </table:table-cell>
          <table:table-cell table:formula="of:=[.D187]-[.D186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75" office:value-type="float" office:value="13950" calcext:value-type="float">
            <text:p>13950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61458333333333" calcext:value-type="float">
            <text:p>0,00161458333333333000</text:p>
          </table:table-cell>
          <table:table-cell table:formula="of:=[.D188]-[.D187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75" office:value-type="float" office:value="14025" calcext:value-type="float">
            <text:p>14025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62326388888889" calcext:value-type="float">
            <text:p>0,00162326388888889000</text:p>
          </table:table-cell>
          <table:table-cell table:formula="of:=[.D189]-[.D188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75" office:value-type="float" office:value="14100" calcext:value-type="float">
            <text:p>14100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63194444444444" calcext:value-type="float">
            <text:p>0,00163194444444444000</text:p>
          </table:table-cell>
          <table:table-cell table:formula="of:=[.D190]-[.D189]" office:value-type="float" office:value="0.0000086805555555554" calcext:value-type="float">
            <text:p>0,00000868055555555540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75" office:value-type="float" office:value="14175" calcext:value-type="float">
            <text:p>14175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640625" calcext:value-type="float">
            <text:p>0,00164062500000000000</text:p>
          </table:table-cell>
          <table:table-cell table:formula="of:=[.D191]-[.D190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75" office:value-type="float" office:value="14250" calcext:value-type="float">
            <text:p>1425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64930555555556" calcext:value-type="float">
            <text:p>0,00164930555555556000</text:p>
          </table:table-cell>
          <table:table-cell table:formula="of:=[.D192]-[.D191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75" office:value-type="float" office:value="14325" calcext:value-type="float">
            <text:p>14325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65798611111111" calcext:value-type="float">
            <text:p>0,00165798611111111000</text:p>
          </table:table-cell>
          <table:table-cell table:formula="of:=[.D193]-[.D192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75" office:value-type="float" office:value="14400" calcext:value-type="float">
            <text:p>14400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66666666666667" calcext:value-type="float">
            <text:p>0,00166666666666667000</text:p>
          </table:table-cell>
          <table:table-cell table:formula="of:=[.D194]-[.D193]" office:value-type="float" office:value="0.0000086805555555554" calcext:value-type="float">
            <text:p>0,00000868055555555540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75" office:value-type="float" office:value="14475" calcext:value-type="float">
            <text:p>14475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67534722222222" calcext:value-type="float">
            <text:p>0,00167534722222222000</text:p>
          </table:table-cell>
          <table:table-cell table:formula="of:=[.D195]-[.D194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75" office:value-type="float" office:value="14550" calcext:value-type="float">
            <text:p>14550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68402777777778" calcext:value-type="float">
            <text:p>0,00168402777777778000</text:p>
          </table:table-cell>
          <table:table-cell table:formula="of:=[.D196]-[.D195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75" office:value-type="float" office:value="14625" calcext:value-type="float">
            <text:p>1462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69270833333333" calcext:value-type="float">
            <text:p>0,00169270833333333000</text:p>
          </table:table-cell>
          <table:table-cell table:formula="of:=[.D197]-[.D196]" office:value-type="float" office:value="0.0000086805555555554" calcext:value-type="float">
            <text:p>0,00000868055555555540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75" office:value-type="float" office:value="14700" calcext:value-type="float">
            <text:p>14700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70138888888889" calcext:value-type="float">
            <text:p>0,00170138888888889000</text:p>
          </table:table-cell>
          <table:table-cell table:formula="of:=[.D198]-[.D197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75" office:value-type="float" office:value="14775" calcext:value-type="float">
            <text:p>14775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71006944444444" calcext:value-type="float">
            <text:p>0,00171006944444444000</text:p>
          </table:table-cell>
          <table:table-cell table:formula="of:=[.D199]-[.D198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75" office:value-type="float" office:value="14850" calcext:value-type="float">
            <text:p>14850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71875" calcext:value-type="float">
            <text:p>0,00171875000000000000</text:p>
          </table:table-cell>
          <table:table-cell table:formula="of:=[.D200]-[.D199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75" office:value-type="float" office:value="14925" calcext:value-type="float">
            <text:p>14925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72743055555556" calcext:value-type="float">
            <text:p>0,00172743055555556000</text:p>
          </table:table-cell>
          <table:table-cell table:formula="of:=[.D201]-[.D200]" office:value-type="float" office:value="0.0000086805555555554" calcext:value-type="float">
            <text:p>0,00000868055555555540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75" office:value-type="float" office:value="15000" calcext:value-type="float">
            <text:p>150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73611111111111" calcext:value-type="float">
            <text:p>0,00173611111111111000</text:p>
          </table:table-cell>
          <table:table-cell table:formula="of:=[.D202]-[.D201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75" office:value-type="float" office:value="15075" calcext:value-type="float">
            <text:p>15075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74479166666667" calcext:value-type="float">
            <text:p>0,00174479166666667000</text:p>
          </table:table-cell>
          <table:table-cell table:formula="of:=[.D203]-[.D202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75" office:value-type="float" office:value="15150" calcext:value-type="float">
            <text:p>15150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75347222222222" calcext:value-type="float">
            <text:p>0,00175347222222222000</text:p>
          </table:table-cell>
          <table:table-cell table:formula="of:=[.D204]-[.D203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75" office:value-type="float" office:value="15225" calcext:value-type="float">
            <text:p>15225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76215277777778" calcext:value-type="float">
            <text:p>0,00176215277777778000</text:p>
          </table:table-cell>
          <table:table-cell table:formula="of:=[.D205]-[.D204]" office:value-type="float" office:value="0.0000086805555555554" calcext:value-type="float">
            <text:p>0,00000868055555555540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75" office:value-type="float" office:value="15300" calcext:value-type="float">
            <text:p>15300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77083333333333" calcext:value-type="float">
            <text:p>0,00177083333333333000</text:p>
          </table:table-cell>
          <table:table-cell table:formula="of:=[.D206]-[.D205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75" office:value-type="float" office:value="15375" calcext:value-type="float">
            <text:p>1537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77951388888889" calcext:value-type="float">
            <text:p>0,00177951388888889000</text:p>
          </table:table-cell>
          <table:table-cell table:formula="of:=[.D207]-[.D206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75" office:value-type="float" office:value="15450" calcext:value-type="float">
            <text:p>15450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78819444444444" calcext:value-type="float">
            <text:p>0,00178819444444444000</text:p>
          </table:table-cell>
          <table:table-cell table:formula="of:=[.D208]-[.D207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75" office:value-type="float" office:value="15525" calcext:value-type="float">
            <text:p>15525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796875" calcext:value-type="float">
            <text:p>0,00179687500000000000</text:p>
          </table:table-cell>
          <table:table-cell table:formula="of:=[.D209]-[.D208]" office:value-type="float" office:value="0.0000086805555555554" calcext:value-type="float">
            <text:p>0,00000868055555555540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75" office:value-type="float" office:value="15600" calcext:value-type="float">
            <text:p>15600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80555555555556" calcext:value-type="float">
            <text:p>0,00180555555555556000</text:p>
          </table:table-cell>
          <table:table-cell table:formula="of:=[.D210]-[.D209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75" office:value-type="float" office:value="15675" calcext:value-type="float">
            <text:p>15675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81423611111111" calcext:value-type="float">
            <text:p>0,00181423611111111000</text:p>
          </table:table-cell>
          <table:table-cell table:formula="of:=[.D211]-[.D210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75" office:value-type="float" office:value="15750" calcext:value-type="float">
            <text:p>1575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82291666666667" calcext:value-type="float">
            <text:p>0,00182291666666667000</text:p>
          </table:table-cell>
          <table:table-cell table:formula="of:=[.D212]-[.D211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75" office:value-type="float" office:value="15825" calcext:value-type="float">
            <text:p>15825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83159722222222" calcext:value-type="float">
            <text:p>0,00183159722222222000</text:p>
          </table:table-cell>
          <table:table-cell table:formula="of:=[.D213]-[.D212]" office:value-type="float" office:value="0.0000086805555555554" calcext:value-type="float">
            <text:p>0,00000868055555555540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75" office:value-type="float" office:value="15900" calcext:value-type="float">
            <text:p>15900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84027777777778" calcext:value-type="float">
            <text:p>0,00184027777777778000</text:p>
          </table:table-cell>
          <table:table-cell table:formula="of:=[.D214]-[.D213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75" office:value-type="float" office:value="15975" calcext:value-type="float">
            <text:p>15975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84895833333333" calcext:value-type="float">
            <text:p>0,00184895833333333000</text:p>
          </table:table-cell>
          <table:table-cell table:formula="of:=[.D215]-[.D214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75" office:value-type="float" office:value="16050" calcext:value-type="float">
            <text:p>16050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85763888888889" calcext:value-type="float">
            <text:p>0,00185763888888889000</text:p>
          </table:table-cell>
          <table:table-cell table:formula="of:=[.D216]-[.D215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75" office:value-type="float" office:value="16125" calcext:value-type="float">
            <text:p>1612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86631944444444" calcext:value-type="float">
            <text:p>0,00186631944444444000</text:p>
          </table:table-cell>
          <table:table-cell table:formula="of:=[.D217]-[.D216]" office:value-type="float" office:value="0.0000086805555555554" calcext:value-type="float">
            <text:p>0,00000868055555555540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75" office:value-type="float" office:value="16200" calcext:value-type="float">
            <text:p>16200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875" calcext:value-type="float">
            <text:p>0,00187500000000000000</text:p>
          </table:table-cell>
          <table:table-cell table:formula="of:=[.D218]-[.D217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75" office:value-type="float" office:value="16275" calcext:value-type="float">
            <text:p>16275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88368055555556" calcext:value-type="float">
            <text:p>0,00188368055555556000</text:p>
          </table:table-cell>
          <table:table-cell table:formula="of:=[.D219]-[.D218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75" office:value-type="float" office:value="16350" calcext:value-type="float">
            <text:p>16350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89236111111111" calcext:value-type="float">
            <text:p>0,00189236111111111000</text:p>
          </table:table-cell>
          <table:table-cell table:formula="of:=[.D220]-[.D219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75" office:value-type="float" office:value="16425" calcext:value-type="float">
            <text:p>16425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90104166666667" calcext:value-type="float">
            <text:p>0,00190104166666667000</text:p>
          </table:table-cell>
          <table:table-cell table:formula="of:=[.D221]-[.D220]" office:value-type="float" office:value="0.0000086805555555554" calcext:value-type="float">
            <text:p>0,00000868055555555540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75" office:value-type="float" office:value="16500" calcext:value-type="float">
            <text:p>1650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90972222222222" calcext:value-type="float">
            <text:p>0,00190972222222222000</text:p>
          </table:table-cell>
          <table:table-cell table:formula="of:=[.D222]-[.D221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75" office:value-type="float" office:value="16575" calcext:value-type="float">
            <text:p>16575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91840277777778" calcext:value-type="float">
            <text:p>0,00191840277777778000</text:p>
          </table:table-cell>
          <table:table-cell table:formula="of:=[.D223]-[.D222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75" office:value-type="float" office:value="16650" calcext:value-type="float">
            <text:p>16650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92708333333333" calcext:value-type="float">
            <text:p>0,00192708333333333000</text:p>
          </table:table-cell>
          <table:table-cell table:formula="of:=[.D224]-[.D223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75" office:value-type="float" office:value="16725" calcext:value-type="float">
            <text:p>16725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93576388888889" calcext:value-type="float">
            <text:p>0,00193576388888889000</text:p>
          </table:table-cell>
          <table:table-cell table:formula="of:=[.D225]-[.D224]" office:value-type="float" office:value="0.0000086805555555554" calcext:value-type="float">
            <text:p>0,00000868055555555540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75" office:value-type="float" office:value="16800" calcext:value-type="float">
            <text:p>16800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94444444444444" calcext:value-type="float">
            <text:p>0,00194444444444444000</text:p>
          </table:table-cell>
          <table:table-cell table:formula="of:=[.D226]-[.D225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75" office:value-type="float" office:value="16875" calcext:value-type="float">
            <text:p>1687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953125" calcext:value-type="float">
            <text:p>0,00195312500000000000</text:p>
          </table:table-cell>
          <table:table-cell table:formula="of:=[.D227]-[.D226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75" office:value-type="float" office:value="16950" calcext:value-type="float">
            <text:p>16950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96180555555556" calcext:value-type="float">
            <text:p>0,00196180555555556000</text:p>
          </table:table-cell>
          <table:table-cell table:formula="of:=[.D228]-[.D227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75" office:value-type="float" office:value="17025" calcext:value-type="float">
            <text:p>17025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97048611111111" calcext:value-type="float">
            <text:p>0,00197048611111111000</text:p>
          </table:table-cell>
          <table:table-cell table:formula="of:=[.D229]-[.D228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75" office:value-type="float" office:value="17100" calcext:value-type="float">
            <text:p>17100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97916666666667" calcext:value-type="float">
            <text:p>0,00197916666666667000</text:p>
          </table:table-cell>
          <table:table-cell table:formula="of:=[.D230]-[.D229]" office:value-type="float" office:value="0.00000868055555555518" calcext:value-type="float">
            <text:p>0,00000868055555555518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75" office:value-type="float" office:value="17175" calcext:value-type="float">
            <text:p>17175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98784722222222" calcext:value-type="float">
            <text:p>0,00198784722222222000</text:p>
          </table:table-cell>
          <table:table-cell table:formula="of:=[.D231]-[.D230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75" office:value-type="float" office:value="17250" calcext:value-type="float">
            <text:p>1725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99652777777778" calcext:value-type="float">
            <text:p>0,00199652777777778000</text:p>
          </table:table-cell>
          <table:table-cell table:formula="of:=[.D232]-[.D231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75" office:value-type="float" office:value="17325" calcext:value-type="float">
            <text:p>17325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200520833333333" calcext:value-type="float">
            <text:p>0,00200520833333333000</text:p>
          </table:table-cell>
          <table:table-cell table:formula="of:=[.D233]-[.D232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75" office:value-type="float" office:value="17400" calcext:value-type="float">
            <text:p>17400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201388888888889" calcext:value-type="float">
            <text:p>0,00201388888888889000</text:p>
          </table:table-cell>
          <table:table-cell table:formula="of:=[.D234]-[.D233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75" office:value-type="float" office:value="17475" calcext:value-type="float">
            <text:p>17475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202256944444444" calcext:value-type="float">
            <text:p>0,00202256944444444000</text:p>
          </table:table-cell>
          <table:table-cell table:formula="of:=[.D235]-[.D234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75" office:value-type="float" office:value="17550" calcext:value-type="float">
            <text:p>17550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203125" calcext:value-type="float">
            <text:p>0,00203125000000000000</text:p>
          </table:table-cell>
          <table:table-cell table:formula="of:=[.D236]-[.D235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75" office:value-type="float" office:value="17625" calcext:value-type="float">
            <text:p>1762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203993055555556" calcext:value-type="float">
            <text:p>0,00203993055555556000</text:p>
          </table:table-cell>
          <table:table-cell table:formula="of:=[.D237]-[.D236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75" office:value-type="float" office:value="17700" calcext:value-type="float">
            <text:p>17700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204861111111111" calcext:value-type="float">
            <text:p>0,00204861111111111000</text:p>
          </table:table-cell>
          <table:table-cell table:formula="of:=[.D238]-[.D237]" office:value-type="float" office:value="0.00000868055555555518" calcext:value-type="float">
            <text:p>0,00000868055555555518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75" office:value-type="float" office:value="17775" calcext:value-type="float">
            <text:p>17775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205729166666667" calcext:value-type="float">
            <text:p>0,00205729166666667000</text:p>
          </table:table-cell>
          <table:table-cell table:formula="of:=[.D239]-[.D238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75" office:value-type="float" office:value="17850" calcext:value-type="float">
            <text:p>17850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206597222222222" calcext:value-type="float">
            <text:p>0,00206597222222222000</text:p>
          </table:table-cell>
          <table:table-cell table:formula="of:=[.D240]-[.D239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75" office:value-type="float" office:value="17925" calcext:value-type="float">
            <text:p>17925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207465277777778" calcext:value-type="float">
            <text:p>0,00207465277777778000</text:p>
          </table:table-cell>
          <table:table-cell table:formula="of:=[.D241]-[.D240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75" office:value-type="float" office:value="18000" calcext:value-type="float">
            <text:p>1800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208333333333333" calcext:value-type="float">
            <text:p>0,00208333333333333000</text:p>
          </table:table-cell>
          <table:table-cell table:formula="of:=[.D242]-[.D241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75" office:value-type="float" office:value="18075" calcext:value-type="float">
            <text:p>18075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209201388888889" calcext:value-type="float">
            <text:p>0,00209201388888889000</text:p>
          </table:table-cell>
          <table:table-cell table:formula="of:=[.D243]-[.D242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75" office:value-type="float" office:value="18150" calcext:value-type="float">
            <text:p>18150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210069444444444" calcext:value-type="float">
            <text:p>0,00210069444444444000</text:p>
          </table:table-cell>
          <table:table-cell table:formula="of:=[.D244]-[.D243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75" office:value-type="float" office:value="18225" calcext:value-type="float">
            <text:p>18225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2109375" calcext:value-type="float">
            <text:p>0,00210937500000000000</text:p>
          </table:table-cell>
          <table:table-cell table:formula="of:=[.D245]-[.D244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75" office:value-type="float" office:value="18300" calcext:value-type="float">
            <text:p>18300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211805555555556" calcext:value-type="float">
            <text:p>0,00211805555555556000</text:p>
          </table:table-cell>
          <table:table-cell table:formula="of:=[.D246]-[.D245]" office:value-type="float" office:value="0.00000868055555555518" calcext:value-type="float">
            <text:p>0,00000868055555555518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75" office:value-type="float" office:value="18375" calcext:value-type="float">
            <text:p>1837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212673611111111" calcext:value-type="float">
            <text:p>0,00212673611111111000</text:p>
          </table:table-cell>
          <table:table-cell table:formula="of:=[.D247]-[.D246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75" office:value-type="float" office:value="18450" calcext:value-type="float">
            <text:p>18450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213541666666667" calcext:value-type="float">
            <text:p>0,00213541666666667000</text:p>
          </table:table-cell>
          <table:table-cell table:formula="of:=[.D248]-[.D247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75" office:value-type="float" office:value="18525" calcext:value-type="float">
            <text:p>18525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214409722222222" calcext:value-type="float">
            <text:p>0,00214409722222222000</text:p>
          </table:table-cell>
          <table:table-cell table:formula="of:=[.D249]-[.D248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75" office:value-type="float" office:value="18600" calcext:value-type="float">
            <text:p>18600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215277777777778" calcext:value-type="float">
            <text:p>0,00215277777777778000</text:p>
          </table:table-cell>
          <table:table-cell table:formula="of:=[.D250]-[.D249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75" office:value-type="float" office:value="18675" calcext:value-type="float">
            <text:p>18675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216145833333333" calcext:value-type="float">
            <text:p>0,00216145833333333000</text:p>
          </table:table-cell>
          <table:table-cell table:formula="of:=[.D251]-[.D250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75" office:value-type="float" office:value="18750" calcext:value-type="float">
            <text:p>187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217013888888889" calcext:value-type="float">
            <text:p>0,00217013888888889000</text:p>
          </table:table-cell>
          <table:table-cell table:formula="of:=[.D252]-[.D251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75" office:value-type="float" office:value="18825" calcext:value-type="float">
            <text:p>18825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217881944444444" calcext:value-type="float">
            <text:p>0,00217881944444444000</text:p>
          </table:table-cell>
          <table:table-cell table:formula="of:=[.D253]-[.D252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75" office:value-type="float" office:value="18900" calcext:value-type="float">
            <text:p>18900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21875" calcext:value-type="float">
            <text:p>0,00218750000000000000</text:p>
          </table:table-cell>
          <table:table-cell table:formula="of:=[.D254]-[.D253]" office:value-type="float" office:value="0.00000868055555555518" calcext:value-type="float">
            <text:p>0,00000868055555555518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75" office:value-type="float" office:value="18975" calcext:value-type="float">
            <text:p>18975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219618055555556" calcext:value-type="float">
            <text:p>0,00219618055555556000</text:p>
          </table:table-cell>
          <table:table-cell table:formula="of:=[.D255]-[.D254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75" office:value-type="float" office:value="19050" calcext:value-type="float">
            <text:p>19050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220486111111111" calcext:value-type="float">
            <text:p>0,00220486111111111000</text:p>
          </table:table-cell>
          <table:table-cell table:formula="of:=[.D256]-[.D255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75" office:value-type="float" office:value="19125" calcext:value-type="float">
            <text:p>1912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221354166666667" calcext:value-type="float">
            <text:p>0,00221354166666667000</text:p>
          </table:table-cell>
          <table:table-cell table:formula="of:=[.D257]-[.D256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75" office:value-type="float" office:value="19200" calcext:value-type="float">
            <text:p>19200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222222222222222" calcext:value-type="float">
            <text:p>0,00222222222222222000</text:p>
          </table:table-cell>
          <table:table-cell table:formula="of:=[.D258]-[.D257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75" office:value-type="float" office:value="19275" calcext:value-type="float">
            <text:p>19275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223090277777778" calcext:value-type="float">
            <text:p>0,00223090277777778000</text:p>
          </table:table-cell>
          <table:table-cell table:formula="of:=[.D259]-[.D258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75" office:value-type="float" office:value="19350" calcext:value-type="float">
            <text:p>19350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223958333333333" calcext:value-type="float">
            <text:p>0,00223958333333333000</text:p>
          </table:table-cell>
          <table:table-cell table:formula="of:=[.D260]-[.D259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75" office:value-type="float" office:value="19425" calcext:value-type="float">
            <text:p>19425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224826388888889" calcext:value-type="float">
            <text:p>0,00224826388888889000</text:p>
          </table:table-cell>
          <table:table-cell table:formula="of:=[.D261]-[.D260]" office:value-type="float" office:value="0.00000868055555555518" calcext:value-type="float">
            <text:p>0,00000868055555555518</text:p>
          </table:table-cell>
          <table:table-cell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75" office:value-type="float" office:value="19500" calcext:value-type="float">
            <text:p>1950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225694444444444" calcext:value-type="float">
            <text:p>0,00225694444444444000</text:p>
          </table:table-cell>
          <table:table-cell table:formula="of:=[.D262]-[.D261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75" office:value-type="float" office:value="19575" calcext:value-type="float">
            <text:p>19575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2265625" calcext:value-type="float">
            <text:p>0,00226562500000000000</text:p>
          </table:table-cell>
          <table:table-cell table:formula="of:=[.D263]-[.D262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75" office:value-type="float" office:value="19650" calcext:value-type="float">
            <text:p>19650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227430555555556" calcext:value-type="float">
            <text:p>0,00227430555555556000</text:p>
          </table:table-cell>
          <table:table-cell table:formula="of:=[.D264]-[.D263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75" office:value-type="float" office:value="19725" calcext:value-type="float">
            <text:p>19725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228298611111111" calcext:value-type="float">
            <text:p>0,00228298611111111000</text:p>
          </table:table-cell>
          <table:table-cell table:formula="of:=[.D265]-[.D264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75" office:value-type="float" office:value="19800" calcext:value-type="float">
            <text:p>19800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229166666666667" calcext:value-type="float">
            <text:p>0,00229166666666667000</text:p>
          </table:table-cell>
          <table:table-cell table:formula="of:=[.D266]-[.D265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75" office:value-type="float" office:value="19875" calcext:value-type="float">
            <text:p>1987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230034722222222" calcext:value-type="float">
            <text:p>0,00230034722222222000</text:p>
          </table:table-cell>
          <table:table-cell table:formula="of:=[.D267]-[.D266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75" office:value-type="float" office:value="19950" calcext:value-type="float">
            <text:p>19950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230902777777778" calcext:value-type="float">
            <text:p>0,00230902777777778000</text:p>
          </table:table-cell>
          <table:table-cell table:formula="of:=[.D268]-[.D267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75" office:value-type="float" office:value="20025" calcext:value-type="float">
            <text:p>20025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231770833333333" calcext:value-type="float">
            <text:p>0,00231770833333333000</text:p>
          </table:table-cell>
          <table:table-cell table:formula="of:=[.D269]-[.D268]" office:value-type="float" office:value="0.00000868055555555518" calcext:value-type="float">
            <text:p>0,00000868055555555518</text:p>
          </table:table-cell>
          <table:table-cell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75" office:value-type="float" office:value="20100" calcext:value-type="float">
            <text:p>20100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232638888888889" calcext:value-type="float">
            <text:p>0,00232638888888889000</text:p>
          </table:table-cell>
          <table:table-cell table:formula="of:=[.D270]-[.D269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75" office:value-type="float" office:value="20175" calcext:value-type="float">
            <text:p>20175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233506944444444" calcext:value-type="float">
            <text:p>0,00233506944444444000</text:p>
          </table:table-cell>
          <table:table-cell table:formula="of:=[.D271]-[.D270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75" office:value-type="float" office:value="20250" calcext:value-type="float">
            <text:p>2025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234375" calcext:value-type="float">
            <text:p>0,00234375000000000000</text:p>
          </table:table-cell>
          <table:table-cell table:formula="of:=[.D272]-[.D271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75" office:value-type="float" office:value="20325" calcext:value-type="float">
            <text:p>20325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235243055555556" calcext:value-type="float">
            <text:p>0,00235243055555556000</text:p>
          </table:table-cell>
          <table:table-cell table:formula="of:=[.D273]-[.D272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75" office:value-type="float" office:value="20400" calcext:value-type="float">
            <text:p>20400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236111111111111" calcext:value-type="float">
            <text:p>0,00236111111111111000</text:p>
          </table:table-cell>
          <table:table-cell table:formula="of:=[.D274]-[.D273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75" office:value-type="float" office:value="20475" calcext:value-type="float">
            <text:p>20475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236979166666667" calcext:value-type="float">
            <text:p>0,00236979166666667000</text:p>
          </table:table-cell>
          <table:table-cell table:formula="of:=[.D275]-[.D274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75" office:value-type="float" office:value="20550" calcext:value-type="float">
            <text:p>20550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237847222222222" calcext:value-type="float">
            <text:p>0,00237847222222222000</text:p>
          </table:table-cell>
          <table:table-cell table:formula="of:=[.D276]-[.D275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75" office:value-type="float" office:value="20625" calcext:value-type="float">
            <text:p>2062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238715277777778" calcext:value-type="float">
            <text:p>0,00238715277777778000</text:p>
          </table:table-cell>
          <table:table-cell table:formula="of:=[.D277]-[.D276]" office:value-type="float" office:value="0.00000868055555555518" calcext:value-type="float">
            <text:p>0,00000868055555555518</text:p>
          </table:table-cell>
          <table:table-cell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75" office:value-type="float" office:value="20700" calcext:value-type="float">
            <text:p>20700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239583333333333" calcext:value-type="float">
            <text:p>0,00239583333333333000</text:p>
          </table:table-cell>
          <table:table-cell table:formula="of:=[.D278]-[.D277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75" office:value-type="float" office:value="20775" calcext:value-type="float">
            <text:p>20775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240451388888889" calcext:value-type="float">
            <text:p>0,00240451388888889000</text:p>
          </table:table-cell>
          <table:table-cell table:formula="of:=[.D279]-[.D278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75" office:value-type="float" office:value="20850" calcext:value-type="float">
            <text:p>20850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241319444444444" calcext:value-type="float">
            <text:p>0,00241319444444444000</text:p>
          </table:table-cell>
          <table:table-cell table:formula="of:=[.D280]-[.D279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75" office:value-type="float" office:value="20925" calcext:value-type="float">
            <text:p>20925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2421875" calcext:value-type="float">
            <text:p>0,00242187500000000000</text:p>
          </table:table-cell>
          <table:table-cell table:formula="of:=[.D281]-[.D280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75" office:value-type="float" office:value="21000" calcext:value-type="float">
            <text:p>2100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243055555555556" calcext:value-type="float">
            <text:p>0,00243055555555556000</text:p>
          </table:table-cell>
          <table:table-cell table:formula="of:=[.D282]-[.D281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75" office:value-type="float" office:value="21075" calcext:value-type="float">
            <text:p>21075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243923611111111" calcext:value-type="float">
            <text:p>0,00243923611111111000</text:p>
          </table:table-cell>
          <table:table-cell table:formula="of:=[.D283]-[.D282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75" office:value-type="float" office:value="21150" calcext:value-type="float">
            <text:p>21150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244791666666667" calcext:value-type="float">
            <text:p>0,00244791666666667000</text:p>
          </table:table-cell>
          <table:table-cell table:formula="of:=[.D284]-[.D283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75" office:value-type="float" office:value="21225" calcext:value-type="float">
            <text:p>21225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245659722222222" calcext:value-type="float">
            <text:p>0,00245659722222222000</text:p>
          </table:table-cell>
          <table:table-cell table:formula="of:=[.D285]-[.D284]" office:value-type="float" office:value="0.00000868055555555518" calcext:value-type="float">
            <text:p>0,00000868055555555518</text:p>
          </table:table-cell>
          <table:table-cell table:number-columns-repeated="1637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75" office:value-type="float" office:value="21300" calcext:value-type="float">
            <text:p>21300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246527777777778" calcext:value-type="float">
            <text:p>0,00246527777777778000</text:p>
          </table:table-cell>
          <table:table-cell table:formula="of:=[.D286]-[.D285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75" office:value-type="float" office:value="21375" calcext:value-type="float">
            <text:p>2137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247395833333333" calcext:value-type="float">
            <text:p>0,00247395833333333000</text:p>
          </table:table-cell>
          <table:table-cell table:formula="of:=[.D287]-[.D286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75" office:value-type="float" office:value="21450" calcext:value-type="float">
            <text:p>21450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248263888888889" calcext:value-type="float">
            <text:p>0,00248263888888889000</text:p>
          </table:table-cell>
          <table:table-cell table:formula="of:=[.D288]-[.D287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75" office:value-type="float" office:value="21525" calcext:value-type="float">
            <text:p>21525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249131944444444" calcext:value-type="float">
            <text:p>0,00249131944444444000</text:p>
          </table:table-cell>
          <table:table-cell table:formula="of:=[.D289]-[.D288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75" office:value-type="float" office:value="21600" calcext:value-type="float">
            <text:p>21600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25" calcext:value-type="float">
            <text:p>0,00250000000000000000</text:p>
          </table:table-cell>
          <table:table-cell table:formula="of:=[.D290]-[.D289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75" office:value-type="float" office:value="21675" calcext:value-type="float">
            <text:p>21675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250868055555556" calcext:value-type="float">
            <text:p>0,00250868055555556000</text:p>
          </table:table-cell>
          <table:table-cell table:formula="of:=[.D291]-[.D290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75" office:value-type="float" office:value="21750" calcext:value-type="float">
            <text:p>2175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251736111111111" calcext:value-type="float">
            <text:p>0,00251736111111111000</text:p>
          </table:table-cell>
          <table:table-cell table:formula="of:=[.D292]-[.D291]" office:value-type="float" office:value="0.00000868055555555518" calcext:value-type="float">
            <text:p>0,00000868055555555518</text:p>
          </table:table-cell>
          <table:table-cell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75" office:value-type="float" office:value="21825" calcext:value-type="float">
            <text:p>21825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252604166666667" calcext:value-type="float">
            <text:p>0,00252604166666667000</text:p>
          </table:table-cell>
          <table:table-cell table:formula="of:=[.D293]-[.D292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75" office:value-type="float" office:value="21900" calcext:value-type="float">
            <text:p>21900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253472222222222" calcext:value-type="float">
            <text:p>0,00253472222222222000</text:p>
          </table:table-cell>
          <table:table-cell table:formula="of:=[.D294]-[.D293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75" office:value-type="float" office:value="21975" calcext:value-type="float">
            <text:p>21975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254340277777778" calcext:value-type="float">
            <text:p>0,00254340277777778000</text:p>
          </table:table-cell>
          <table:table-cell table:formula="of:=[.D295]-[.D294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75" office:value-type="float" office:value="22050" calcext:value-type="float">
            <text:p>22050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255208333333333" calcext:value-type="float">
            <text:p>0,00255208333333333000</text:p>
          </table:table-cell>
          <table:table-cell table:formula="of:=[.D296]-[.D295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75" office:value-type="float" office:value="22125" calcext:value-type="float">
            <text:p>2212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256076388888889" calcext:value-type="float">
            <text:p>0,00256076388888889000</text:p>
          </table:table-cell>
          <table:table-cell table:formula="of:=[.D297]-[.D296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75" office:value-type="float" office:value="22200" calcext:value-type="float">
            <text:p>22200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256944444444444" calcext:value-type="float">
            <text:p>0,00256944444444444000</text:p>
          </table:table-cell>
          <table:table-cell table:formula="of:=[.D298]-[.D297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75" office:value-type="float" office:value="22275" calcext:value-type="float">
            <text:p>22275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2578125" calcext:value-type="float">
            <text:p>0,00257812500000000000</text:p>
          </table:table-cell>
          <table:table-cell table:formula="of:=[.D299]-[.D298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75" office:value-type="float" office:value="22350" calcext:value-type="float">
            <text:p>22350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258680555555556" calcext:value-type="float">
            <text:p>0,00258680555555556000</text:p>
          </table:table-cell>
          <table:table-cell table:formula="of:=[.D300]-[.D299]" office:value-type="float" office:value="0.00000868055555555518" calcext:value-type="float">
            <text:p>0,00000868055555555518</text:p>
          </table:table-cell>
          <table:table-cell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75" office:value-type="float" office:value="22425" calcext:value-type="float">
            <text:p>22425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259548611111111" calcext:value-type="float">
            <text:p>0,00259548611111111000</text:p>
          </table:table-cell>
          <table:table-cell table:formula="of:=[.D301]-[.D300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75" office:value-type="float" office:value="22500" calcext:value-type="float">
            <text:p>225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260416666666667" calcext:value-type="float">
            <text:p>0,00260416666666667000</text:p>
          </table:table-cell>
          <table:table-cell table:formula="of:=[.D302]-[.D301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75" office:value-type="float" office:value="22575" calcext:value-type="float">
            <text:p>22575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261284722222222" calcext:value-type="float">
            <text:p>0,00261284722222222000</text:p>
          </table:table-cell>
          <table:table-cell table:formula="of:=[.D303]-[.D302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75" office:value-type="float" office:value="22650" calcext:value-type="float">
            <text:p>22650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262152777777778" calcext:value-type="float">
            <text:p>0,00262152777777778000</text:p>
          </table:table-cell>
          <table:table-cell table:formula="of:=[.D304]-[.D303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75" office:value-type="float" office:value="22725" calcext:value-type="float">
            <text:p>22725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263020833333333" calcext:value-type="float">
            <text:p>0,00263020833333333000</text:p>
          </table:table-cell>
          <table:table-cell table:formula="of:=[.D305]-[.D304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75" office:value-type="float" office:value="22800" calcext:value-type="float">
            <text:p>22800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263888888888889" calcext:value-type="float">
            <text:p>0,00263888888888889000</text:p>
          </table:table-cell>
          <table:table-cell table:formula="of:=[.D306]-[.D305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75" office:value-type="float" office:value="22875" calcext:value-type="float">
            <text:p>2287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264756944444444" calcext:value-type="float">
            <text:p>0,00264756944444444000</text:p>
          </table:table-cell>
          <table:table-cell table:formula="of:=[.D307]-[.D306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75" office:value-type="float" office:value="22950" calcext:value-type="float">
            <text:p>22950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265625" calcext:value-type="float">
            <text:p>0,00265625000000000000</text:p>
          </table:table-cell>
          <table:table-cell table:formula="of:=[.D308]-[.D307]" office:value-type="float" office:value="0.00000868055555555518" calcext:value-type="float">
            <text:p>0,00000868055555555518</text:p>
          </table:table-cell>
          <table:table-cell table:number-columns-repeated="1637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75" office:value-type="float" office:value="23025" calcext:value-type="float">
            <text:p>23025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266493055555556" calcext:value-type="float">
            <text:p>0,00266493055555556000</text:p>
          </table:table-cell>
          <table:table-cell table:formula="of:=[.D309]-[.D308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75" office:value-type="float" office:value="23100" calcext:value-type="float">
            <text:p>23100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267361111111111" calcext:value-type="float">
            <text:p>0,00267361111111111000</text:p>
          </table:table-cell>
          <table:table-cell table:formula="of:=[.D310]-[.D309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75" office:value-type="float" office:value="23175" calcext:value-type="float">
            <text:p>23175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268229166666667" calcext:value-type="float">
            <text:p>0,00268229166666667000</text:p>
          </table:table-cell>
          <table:table-cell table:formula="of:=[.D311]-[.D310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75" office:value-type="float" office:value="23250" calcext:value-type="float">
            <text:p>2325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269097222222222" calcext:value-type="float">
            <text:p>0,00269097222222222000</text:p>
          </table:table-cell>
          <table:table-cell table:formula="of:=[.D312]-[.D311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75" office:value-type="float" office:value="23325" calcext:value-type="float">
            <text:p>23325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269965277777778" calcext:value-type="float">
            <text:p>0,00269965277777778000</text:p>
          </table:table-cell>
          <table:table-cell table:formula="of:=[.D313]-[.D312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75" office:value-type="float" office:value="23400" calcext:value-type="float">
            <text:p>23400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270833333333333" calcext:value-type="float">
            <text:p>0,00270833333333333000</text:p>
          </table:table-cell>
          <table:table-cell table:formula="of:=[.D314]-[.D313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75" office:value-type="float" office:value="23475" calcext:value-type="float">
            <text:p>23475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271701388888889" calcext:value-type="float">
            <text:p>0,00271701388888889000</text:p>
          </table:table-cell>
          <table:table-cell table:formula="of:=[.D315]-[.D314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75" office:value-type="float" office:value="23550" calcext:value-type="float">
            <text:p>23550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272569444444444" calcext:value-type="float">
            <text:p>0,00272569444444444000</text:p>
          </table:table-cell>
          <table:table-cell table:formula="of:=[.D316]-[.D315]" office:value-type="float" office:value="0.00000868055555555518" calcext:value-type="float">
            <text:p>0,00000868055555555518</text:p>
          </table:table-cell>
          <table:table-cell table:number-columns-repeated="1637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75" office:value-type="float" office:value="23625" calcext:value-type="float">
            <text:p>2362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2734375" calcext:value-type="float">
            <text:p>0,00273437500000000000</text:p>
          </table:table-cell>
          <table:table-cell table:formula="of:=[.D317]-[.D316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75" office:value-type="float" office:value="23700" calcext:value-type="float">
            <text:p>23700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274305555555556" calcext:value-type="float">
            <text:p>0,00274305555555556000</text:p>
          </table:table-cell>
          <table:table-cell table:formula="of:=[.D318]-[.D317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75" office:value-type="float" office:value="23775" calcext:value-type="float">
            <text:p>23775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275173611111111" calcext:value-type="float">
            <text:p>0,00275173611111111000</text:p>
          </table:table-cell>
          <table:table-cell table:formula="of:=[.D319]-[.D318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75" office:value-type="float" office:value="23850" calcext:value-type="float">
            <text:p>23850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276041666666667" calcext:value-type="float">
            <text:p>0,00276041666666667000</text:p>
          </table:table-cell>
          <table:table-cell table:formula="of:=[.D320]-[.D319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75" office:value-type="float" office:value="23925" calcext:value-type="float">
            <text:p>23925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276909722222222" calcext:value-type="float">
            <text:p>0,00276909722222222000</text:p>
          </table:table-cell>
          <table:table-cell table:formula="of:=[.D321]-[.D320]" office:value-type="float" office:value="0.00000868055555555561" calcext:value-type="float">
            <text:p>0,00000868055555555561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75" office:value-type="float" office:value="24000" calcext:value-type="float">
            <text:p>2400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277777777777778" calcext:value-type="float">
            <text:p>0,00277777777777778000</text:p>
          </table:table-cell>
          <table:table-cell table:formula="of:=#REF!-[.D321]" office:value-type="string" office:string-value="" calcext:value-type="error">
            <text:p>#REF!</text:p>
          </table:table-cell>
          <table:table-cell table:number-columns-repeated="16379"/>
        </table:table-row>
        <table:table-row table:style-name="ro1" table:number-rows-repeated="10482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8:50:37.833978875</meta:creation-date>
    <dc:date>2026-05-17T18:51:36.328628332</dc:date>
    <meta:editing-duration>PT59S</meta:editing-duration>
    <meta:editing-cycles>1</meta:editing-cycles>
    <meta:generator>LibreOffice/24.2.7.2$Linux_X86_64 LibreOffice_project/420$Build-2</meta:generator>
    <meta:document-statistic meta:table-count="1" meta:cell-count="1605" meta:object-count="0"/>
  </office:meta>
</office:document-meta>
</file>