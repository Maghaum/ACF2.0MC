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5.0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8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column table:style-name="co2" table:number-columns-repeated="5" table:default-cell-style-name="ce2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81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9375" calcext:value-type="float">
            <text:p>0,00000937500000000000</text:p>
          </table:table-cell>
          <table:table-cell table:formula="of:=[.D3]-[.D2]" office:value-type="float" office:value="0.000009375" calcext:value-type="float">
            <text:p>0,000009375000000000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81" office:value-type="float" office:value="162" calcext:value-type="float">
            <text:p>162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1875" calcext:value-type="float">
            <text:p>0,00001875000000000000</text:p>
          </table:table-cell>
          <table:table-cell table:formula="of:=[.D4]-[.D3]" office:value-type="float" office:value="0.000009375" calcext:value-type="float">
            <text:p>0,0000093750000000000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81" office:value-type="float" office:value="243" calcext:value-type="float">
            <text:p>243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28125" calcext:value-type="float">
            <text:p>0,00002812500000000000</text:p>
          </table:table-cell>
          <table:table-cell table:formula="of:=[.D5]-[.D4]" office:value-type="float" office:value="0.000009375" calcext:value-type="float">
            <text:p>0,0000093750000000000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81" office:value-type="float" office:value="324" calcext:value-type="float">
            <text:p>324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375" calcext:value-type="float">
            <text:p>0,00003750000000000000</text:p>
          </table:table-cell>
          <table:table-cell table:formula="of:=[.D6]-[.D5]" office:value-type="float" office:value="0.000009375" calcext:value-type="float">
            <text:p>0,0000093750000000000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81" office:value-type="float" office:value="405" calcext:value-type="float">
            <text:p>405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46875" calcext:value-type="float">
            <text:p>0,00004687500000000000</text:p>
          </table:table-cell>
          <table:table-cell table:formula="of:=[.D7]-[.D6]" office:value-type="float" office:value="0.000009375" calcext:value-type="float">
            <text:p>0,0000093750000000000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81" office:value-type="float" office:value="486" calcext:value-type="float">
            <text:p>486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5625" calcext:value-type="float">
            <text:p>0,00005625000000000000</text:p>
          </table:table-cell>
          <table:table-cell table:formula="of:=[.D8]-[.D7]" office:value-type="float" office:value="0.000009375" calcext:value-type="float">
            <text:p>0,0000093750000000000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81" office:value-type="float" office:value="567" calcext:value-type="float">
            <text:p>567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65625" calcext:value-type="float">
            <text:p>0,00006562500000000000</text:p>
          </table:table-cell>
          <table:table-cell table:formula="of:=[.D9]-[.D8]" office:value-type="float" office:value="0.000009375" calcext:value-type="float">
            <text:p>0,0000093750000000000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81" office:value-type="float" office:value="648" calcext:value-type="float">
            <text:p>648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75" calcext:value-type="float">
            <text:p>0,00007500000000000000</text:p>
          </table:table-cell>
          <table:table-cell table:formula="of:=[.D10]-[.D9]" office:value-type="float" office:value="0.00000937500000000001" calcext:value-type="float">
            <text:p>0,0000093750000000000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81" office:value-type="float" office:value="729" calcext:value-type="float">
            <text:p>729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84375" calcext:value-type="float">
            <text:p>0,00008437500000000000</text:p>
          </table:table-cell>
          <table:table-cell table:formula="of:=[.D11]-[.D10]" office:value-type="float" office:value="0.000009375" calcext:value-type="float">
            <text:p>0,0000093750000000000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81" office:value-type="float" office:value="810" calcext:value-type="float">
            <text:p>81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9375" calcext:value-type="float">
            <text:p>0,00009375000000000000</text:p>
          </table:table-cell>
          <table:table-cell table:formula="of:=[.D12]-[.D11]" office:value-type="float" office:value="0.000009375" calcext:value-type="float">
            <text:p>0,0000093750000000000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81" office:value-type="float" office:value="891" calcext:value-type="float">
            <text:p>891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103125" calcext:value-type="float">
            <text:p>0,00010312500000000000</text:p>
          </table:table-cell>
          <table:table-cell table:formula="of:=[.D13]-[.D12]" office:value-type="float" office:value="0.000009375" calcext:value-type="float">
            <text:p>0,0000093750000000000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81" office:value-type="float" office:value="972" calcext:value-type="float">
            <text:p>972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1125" calcext:value-type="float">
            <text:p>0,00011250000000000000</text:p>
          </table:table-cell>
          <table:table-cell table:formula="of:=[.D14]-[.D13]" office:value-type="float" office:value="0.000009375" calcext:value-type="float">
            <text:p>0,0000093750000000000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81" office:value-type="float" office:value="1053" calcext:value-type="float">
            <text:p>1053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121875" calcext:value-type="float">
            <text:p>0,00012187500000000000</text:p>
          </table:table-cell>
          <table:table-cell table:formula="of:=[.D15]-[.D14]" office:value-type="float" office:value="0.000009375" calcext:value-type="float">
            <text:p>0,0000093750000000000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81" office:value-type="float" office:value="1134" calcext:value-type="float">
            <text:p>1134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13125" calcext:value-type="float">
            <text:p>0,00013125000000000000</text:p>
          </table:table-cell>
          <table:table-cell table:formula="of:=[.D16]-[.D15]" office:value-type="float" office:value="0.000009375" calcext:value-type="float">
            <text:p>0,0000093750000000000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81" office:value-type="float" office:value="1215" calcext:value-type="float">
            <text:p>1215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140625" calcext:value-type="float">
            <text:p>0,00014062500000000000</text:p>
          </table:table-cell>
          <table:table-cell table:formula="of:=[.D17]-[.D16]" office:value-type="float" office:value="0.000009375" calcext:value-type="float">
            <text:p>0,0000093750000000000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81" office:value-type="float" office:value="1296" calcext:value-type="float">
            <text:p>1296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15" calcext:value-type="float">
            <text:p>0,00015000000000000000</text:p>
          </table:table-cell>
          <table:table-cell table:formula="of:=[.D18]-[.D17]" office:value-type="float" office:value="0.00000937500000000003" calcext:value-type="float">
            <text:p>0,00000937500000000003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81" office:value-type="float" office:value="1377" calcext:value-type="float">
            <text:p>1377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159375" calcext:value-type="float">
            <text:p>0,00015937500000000000</text:p>
          </table:table-cell>
          <table:table-cell table:formula="of:=[.D19]-[.D18]" office:value-type="float" office:value="0.000009375" calcext:value-type="float">
            <text:p>0,0000093750000000000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81" office:value-type="float" office:value="1458" calcext:value-type="float">
            <text:p>1458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16875" calcext:value-type="float">
            <text:p>0,00016875000000000000</text:p>
          </table:table-cell>
          <table:table-cell table:formula="of:=[.D20]-[.D19]" office:value-type="float" office:value="0.000009375" calcext:value-type="float">
            <text:p>0,0000093750000000000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81" office:value-type="float" office:value="1539" calcext:value-type="float">
            <text:p>1539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178125" calcext:value-type="float">
            <text:p>0,00017812500000000000</text:p>
          </table:table-cell>
          <table:table-cell table:formula="of:=[.D21]-[.D20]" office:value-type="float" office:value="0.000009375" calcext:value-type="float">
            <text:p>0,0000093750000000000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81" office:value-type="float" office:value="1620" calcext:value-type="float">
            <text:p>162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1875" calcext:value-type="float">
            <text:p>0,00018750000000000000</text:p>
          </table:table-cell>
          <table:table-cell table:formula="of:=[.D22]-[.D21]" office:value-type="float" office:value="0.000009375" calcext:value-type="float">
            <text:p>0,0000093750000000000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81" office:value-type="float" office:value="1701" calcext:value-type="float">
            <text:p>1701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196875" calcext:value-type="float">
            <text:p>0,00019687500000000000</text:p>
          </table:table-cell>
          <table:table-cell table:formula="of:=[.D23]-[.D22]" office:value-type="float" office:value="0.000009375" calcext:value-type="float">
            <text:p>0,00000937500000000000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81" office:value-type="float" office:value="1782" calcext:value-type="float">
            <text:p>1782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20625" calcext:value-type="float">
            <text:p>0,00020625000000000000</text:p>
          </table:table-cell>
          <table:table-cell table:formula="of:=[.D24]-[.D23]" office:value-type="float" office:value="0.000009375" calcext:value-type="float">
            <text:p>0,0000093750000000000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81" office:value-type="float" office:value="1863" calcext:value-type="float">
            <text:p>1863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215625" calcext:value-type="float">
            <text:p>0,00021562500000000000</text:p>
          </table:table-cell>
          <table:table-cell table:formula="of:=[.D25]-[.D24]" office:value-type="float" office:value="0.000009375" calcext:value-type="float">
            <text:p>0,0000093750000000000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81" office:value-type="float" office:value="1944" calcext:value-type="float">
            <text:p>1944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225" calcext:value-type="float">
            <text:p>0,00022500000000000000</text:p>
          </table:table-cell>
          <table:table-cell table:formula="of:=[.D26]-[.D25]" office:value-type="float" office:value="0.000009375" calcext:value-type="float">
            <text:p>0,0000093750000000000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81" office:value-type="float" office:value="2025" calcext:value-type="float">
            <text:p>2025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234375" calcext:value-type="float">
            <text:p>0,00023437500000000000</text:p>
          </table:table-cell>
          <table:table-cell table:formula="of:=[.D27]-[.D26]" office:value-type="float" office:value="0.000009375" calcext:value-type="float">
            <text:p>0,00000937500000000000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81" office:value-type="float" office:value="2106" calcext:value-type="float">
            <text:p>2106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24375" calcext:value-type="float">
            <text:p>0,00024375000000000000</text:p>
          </table:table-cell>
          <table:table-cell table:formula="of:=[.D28]-[.D27]" office:value-type="float" office:value="0.000009375" calcext:value-type="float">
            <text:p>0,0000093750000000000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81" office:value-type="float" office:value="2187" calcext:value-type="float">
            <text:p>2187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253125" calcext:value-type="float">
            <text:p>0,00025312500000000000</text:p>
          </table:table-cell>
          <table:table-cell table:formula="of:=[.D29]-[.D28]" office:value-type="float" office:value="0.000009375" calcext:value-type="float">
            <text:p>0,00000937500000000000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81" office:value-type="float" office:value="2268" calcext:value-type="float">
            <text:p>2268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2625" calcext:value-type="float">
            <text:p>0,00026250000000000000</text:p>
          </table:table-cell>
          <table:table-cell table:formula="of:=[.D30]-[.D29]" office:value-type="float" office:value="0.000009375" calcext:value-type="float">
            <text:p>0,0000093750000000000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81" office:value-type="float" office:value="2349" calcext:value-type="float">
            <text:p>2349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271875" calcext:value-type="float">
            <text:p>0,00027187500000000000</text:p>
          </table:table-cell>
          <table:table-cell table:formula="of:=[.D31]-[.D30]" office:value-type="float" office:value="0.000009375" calcext:value-type="float">
            <text:p>0,0000093750000000000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81" office:value-type="float" office:value="2430" calcext:value-type="float">
            <text:p>243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28125" calcext:value-type="float">
            <text:p>0,00028125000000000000</text:p>
          </table:table-cell>
          <table:table-cell table:formula="of:=[.D32]-[.D31]" office:value-type="float" office:value="0.000009375" calcext:value-type="float">
            <text:p>0,0000093750000000000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81" office:value-type="float" office:value="2511" calcext:value-type="float">
            <text:p>2511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290625" calcext:value-type="float">
            <text:p>0,00029062500000000000</text:p>
          </table:table-cell>
          <table:table-cell table:formula="of:=[.D33]-[.D32]" office:value-type="float" office:value="0.000009375" calcext:value-type="float">
            <text:p>0,0000093750000000000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81" office:value-type="float" office:value="2592" calcext:value-type="float">
            <text:p>2592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3" calcext:value-type="float">
            <text:p>0,00030000000000000000</text:p>
          </table:table-cell>
          <table:table-cell table:formula="of:=[.D34]-[.D33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81" office:value-type="float" office:value="2673" calcext:value-type="float">
            <text:p>2673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309375" calcext:value-type="float">
            <text:p>0,00030937500000000000</text:p>
          </table:table-cell>
          <table:table-cell table:formula="of:=[.D35]-[.D34]" office:value-type="float" office:value="0.000009375" calcext:value-type="float">
            <text:p>0,0000093750000000000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81" office:value-type="float" office:value="2754" calcext:value-type="float">
            <text:p>2754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31875" calcext:value-type="float">
            <text:p>0,00031875000000000000</text:p>
          </table:table-cell>
          <table:table-cell table:formula="of:=[.D36]-[.D35]" office:value-type="float" office:value="0.000009375" calcext:value-type="float">
            <text:p>0,0000093750000000000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81" office:value-type="float" office:value="2835" calcext:value-type="float">
            <text:p>2835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328125" calcext:value-type="float">
            <text:p>0,00032812500000000000</text:p>
          </table:table-cell>
          <table:table-cell table:formula="of:=[.D37]-[.D36]" office:value-type="float" office:value="0.000009375" calcext:value-type="float">
            <text:p>0,00000937500000000000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81" office:value-type="float" office:value="2916" calcext:value-type="float">
            <text:p>2916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3375" calcext:value-type="float">
            <text:p>0,00033750000000000000</text:p>
          </table:table-cell>
          <table:table-cell table:formula="of:=[.D38]-[.D37]" office:value-type="float" office:value="0.000009375" calcext:value-type="float">
            <text:p>0,0000093750000000000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81" office:value-type="float" office:value="2997" calcext:value-type="float">
            <text:p>2997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346875" calcext:value-type="float">
            <text:p>0,00034687500000000000</text:p>
          </table:table-cell>
          <table:table-cell table:formula="of:=[.D39]-[.D38]" office:value-type="float" office:value="0.000009375" calcext:value-type="float">
            <text:p>0,00000937500000000000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81" office:value-type="float" office:value="3078" calcext:value-type="float">
            <text:p>3078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35625" calcext:value-type="float">
            <text:p>0,00035625000000000000</text:p>
          </table:table-cell>
          <table:table-cell table:formula="of:=[.D40]-[.D39]" office:value-type="float" office:value="0.000009375" calcext:value-type="float">
            <text:p>0,0000093750000000000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81" office:value-type="float" office:value="3159" calcext:value-type="float">
            <text:p>3159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365625" calcext:value-type="float">
            <text:p>0,00036562500000000000</text:p>
          </table:table-cell>
          <table:table-cell table:formula="of:=[.D41]-[.D40]" office:value-type="float" office:value="0.000009375" calcext:value-type="float">
            <text:p>0,0000093750000000000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81" office:value-type="float" office:value="3240" calcext:value-type="float">
            <text:p>324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375" calcext:value-type="float">
            <text:p>0,00037500000000000000</text:p>
          </table:table-cell>
          <table:table-cell table:formula="of:=[.D42]-[.D41]" office:value-type="float" office:value="0.000009375" calcext:value-type="float">
            <text:p>0,0000093750000000000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81" office:value-type="float" office:value="3321" calcext:value-type="float">
            <text:p>3321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384375" calcext:value-type="float">
            <text:p>0,00038437500000000000</text:p>
          </table:table-cell>
          <table:table-cell table:formula="of:=[.D43]-[.D42]" office:value-type="float" office:value="0.000009375" calcext:value-type="float">
            <text:p>0,0000093750000000000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81" office:value-type="float" office:value="3402" calcext:value-type="float">
            <text:p>3402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39375" calcext:value-type="float">
            <text:p>0,00039375000000000000</text:p>
          </table:table-cell>
          <table:table-cell table:formula="of:=[.D44]-[.D43]" office:value-type="float" office:value="0.000009375" calcext:value-type="float">
            <text:p>0,00000937500000000000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81" office:value-type="float" office:value="3483" calcext:value-type="float">
            <text:p>3483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403125" calcext:value-type="float">
            <text:p>0,00040312500000000000</text:p>
          </table:table-cell>
          <table:table-cell table:formula="of:=[.D45]-[.D44]" office:value-type="float" office:value="0.000009375" calcext:value-type="float">
            <text:p>0,00000937500000000000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81" office:value-type="float" office:value="3564" calcext:value-type="float">
            <text:p>3564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4125" calcext:value-type="float">
            <text:p>0,00041250000000000000</text:p>
          </table:table-cell>
          <table:table-cell table:formula="of:=[.D46]-[.D45]" office:value-type="float" office:value="0.000009375" calcext:value-type="float">
            <text:p>0,00000937500000000000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81" office:value-type="float" office:value="3645" calcext:value-type="float">
            <text:p>3645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421875" calcext:value-type="float">
            <text:p>0,00042187500000000000</text:p>
          </table:table-cell>
          <table:table-cell table:formula="of:=[.D47]-[.D46]" office:value-type="float" office:value="0.000009375" calcext:value-type="float">
            <text:p>0,0000093750000000000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81" office:value-type="float" office:value="3726" calcext:value-type="float">
            <text:p>3726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43125" calcext:value-type="float">
            <text:p>0,00043125000000000000</text:p>
          </table:table-cell>
          <table:table-cell table:formula="of:=[.D48]-[.D47]" office:value-type="float" office:value="0.000009375" calcext:value-type="float">
            <text:p>0,0000093750000000000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81" office:value-type="float" office:value="3807" calcext:value-type="float">
            <text:p>3807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440625" calcext:value-type="float">
            <text:p>0,00044062500000000000</text:p>
          </table:table-cell>
          <table:table-cell table:formula="of:=[.D49]-[.D48]" office:value-type="float" office:value="0.000009375" calcext:value-type="float">
            <text:p>0,0000093750000000000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81" office:value-type="float" office:value="3888" calcext:value-type="float">
            <text:p>3888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45" calcext:value-type="float">
            <text:p>0,00045000000000000000</text:p>
          </table:table-cell>
          <table:table-cell table:formula="of:=[.D50]-[.D49]" office:value-type="float" office:value="0.000009375" calcext:value-type="float">
            <text:p>0,0000093750000000000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81" office:value-type="float" office:value="3969" calcext:value-type="float">
            <text:p>3969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459375" calcext:value-type="float">
            <text:p>0,00045937500000000000</text:p>
          </table:table-cell>
          <table:table-cell table:formula="of:=[.D51]-[.D50]" office:value-type="float" office:value="0.000009375" calcext:value-type="float">
            <text:p>0,0000093750000000000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81" office:value-type="float" office:value="4050" calcext:value-type="float">
            <text:p>405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46875" calcext:value-type="float">
            <text:p>0,00046875000000000000</text:p>
          </table:table-cell>
          <table:table-cell table:formula="of:=[.D52]-[.D51]" office:value-type="float" office:value="0.000009375" calcext:value-type="float">
            <text:p>0,00000937500000000000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81" office:value-type="float" office:value="4131" calcext:value-type="float">
            <text:p>4131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478125" calcext:value-type="float">
            <text:p>0,00047812500000000000</text:p>
          </table:table-cell>
          <table:table-cell table:formula="of:=[.D53]-[.D52]" office:value-type="float" office:value="0.000009375" calcext:value-type="float">
            <text:p>0,00000937500000000000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81" office:value-type="float" office:value="4212" calcext:value-type="float">
            <text:p>4212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4875" calcext:value-type="float">
            <text:p>0,00048750000000000000</text:p>
          </table:table-cell>
          <table:table-cell table:formula="of:=[.D54]-[.D53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81" office:value-type="float" office:value="4293" calcext:value-type="float">
            <text:p>4293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496875" calcext:value-type="float">
            <text:p>0,00049687500000000000</text:p>
          </table:table-cell>
          <table:table-cell table:formula="of:=[.D55]-[.D54]" office:value-type="float" office:value="0.00000937499999999994" calcext:value-type="float">
            <text:p>0,00000937499999999994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81" office:value-type="float" office:value="4374" calcext:value-type="float">
            <text:p>4374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50625" calcext:value-type="float">
            <text:p>0,00050625000000000000</text:p>
          </table:table-cell>
          <table:table-cell table:formula="of:=[.D56]-[.D55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81" office:value-type="float" office:value="4455" calcext:value-type="float">
            <text:p>4455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515625" calcext:value-type="float">
            <text:p>0,00051562500000000000</text:p>
          </table:table-cell>
          <table:table-cell table:formula="of:=[.D57]-[.D56]" office:value-type="float" office:value="0.00000937499999999994" calcext:value-type="float">
            <text:p>0,00000937499999999994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81" office:value-type="float" office:value="4536" calcext:value-type="float">
            <text:p>4536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525" calcext:value-type="float">
            <text:p>0,00052500000000000000</text:p>
          </table:table-cell>
          <table:table-cell table:formula="of:=[.D58]-[.D57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81" office:value-type="float" office:value="4617" calcext:value-type="float">
            <text:p>4617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534375" calcext:value-type="float">
            <text:p>0,00053437500000000000</text:p>
          </table:table-cell>
          <table:table-cell table:formula="of:=[.D59]-[.D58]" office:value-type="float" office:value="0.00000937499999999994" calcext:value-type="float">
            <text:p>0,00000937499999999994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81" office:value-type="float" office:value="4698" calcext:value-type="float">
            <text:p>4698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54375" calcext:value-type="float">
            <text:p>0,00054375000000000000</text:p>
          </table:table-cell>
          <table:table-cell table:formula="of:=[.D60]-[.D59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81" office:value-type="float" office:value="4779" calcext:value-type="float">
            <text:p>4779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553125" calcext:value-type="float">
            <text:p>0,00055312500000000000</text:p>
          </table:table-cell>
          <table:table-cell table:formula="of:=[.D61]-[.D60]" office:value-type="float" office:value="0.00000937499999999994" calcext:value-type="float">
            <text:p>0,00000937499999999994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81" office:value-type="float" office:value="4860" calcext:value-type="float">
            <text:p>486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5625" calcext:value-type="float">
            <text:p>0,00056250000000000000</text:p>
          </table:table-cell>
          <table:table-cell table:formula="of:=[.D62]-[.D61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81" office:value-type="float" office:value="4941" calcext:value-type="float">
            <text:p>4941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571875" calcext:value-type="float">
            <text:p>0,00057187500000000000</text:p>
          </table:table-cell>
          <table:table-cell table:formula="of:=[.D63]-[.D62]" office:value-type="float" office:value="0.00000937499999999994" calcext:value-type="float">
            <text:p>0,00000937499999999994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81" office:value-type="float" office:value="5022" calcext:value-type="float">
            <text:p>5022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58125" calcext:value-type="float">
            <text:p>0,00058125000000000000</text:p>
          </table:table-cell>
          <table:table-cell table:formula="of:=[.D64]-[.D63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81" office:value-type="float" office:value="5103" calcext:value-type="float">
            <text:p>5103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590625" calcext:value-type="float">
            <text:p>0,00059062500000000000</text:p>
          </table:table-cell>
          <table:table-cell table:formula="of:=[.D65]-[.D64]" office:value-type="float" office:value="0.00000937499999999994" calcext:value-type="float">
            <text:p>0,0000093749999999999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81" office:value-type="float" office:value="5184" calcext:value-type="float">
            <text:p>5184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6" calcext:value-type="float">
            <text:p>0,00060000000000000000</text:p>
          </table:table-cell>
          <table:table-cell table:formula="of:=[.D66]-[.D65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81" office:value-type="float" office:value="5265" calcext:value-type="float">
            <text:p>5265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609375" calcext:value-type="float">
            <text:p>0,00060937500000000000</text:p>
          </table:table-cell>
          <table:table-cell table:formula="of:=[.D67]-[.D66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81" office:value-type="float" office:value="5346" calcext:value-type="float">
            <text:p>5346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61875" calcext:value-type="float">
            <text:p>0,00061875000000000000</text:p>
          </table:table-cell>
          <table:table-cell table:formula="of:=[.D68]-[.D67]" office:value-type="float" office:value="0.00000937499999999994" calcext:value-type="float">
            <text:p>0,00000937499999999994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81" office:value-type="float" office:value="5427" calcext:value-type="float">
            <text:p>5427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628125" calcext:value-type="float">
            <text:p>0,00062812500000000000</text:p>
          </table:table-cell>
          <table:table-cell table:formula="of:=[.D69]-[.D68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81" office:value-type="float" office:value="5508" calcext:value-type="float">
            <text:p>5508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6375" calcext:value-type="float">
            <text:p>0,00063750000000000000</text:p>
          </table:table-cell>
          <table:table-cell table:formula="of:=[.D70]-[.D69]" office:value-type="float" office:value="0.00000937499999999994" calcext:value-type="float">
            <text:p>0,00000937499999999994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81" office:value-type="float" office:value="5589" calcext:value-type="float">
            <text:p>5589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646875" calcext:value-type="float">
            <text:p>0,00064687500000000000</text:p>
          </table:table-cell>
          <table:table-cell table:formula="of:=[.D71]-[.D70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81" office:value-type="float" office:value="5670" calcext:value-type="float">
            <text:p>567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65625" calcext:value-type="float">
            <text:p>0,00065625000000000000</text:p>
          </table:table-cell>
          <table:table-cell table:formula="of:=[.D72]-[.D71]" office:value-type="float" office:value="0.00000937499999999994" calcext:value-type="float">
            <text:p>0,00000937499999999994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81" office:value-type="float" office:value="5751" calcext:value-type="float">
            <text:p>5751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665625" calcext:value-type="float">
            <text:p>0,00066562500000000000</text:p>
          </table:table-cell>
          <table:table-cell table:formula="of:=[.D73]-[.D72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81" office:value-type="float" office:value="5832" calcext:value-type="float">
            <text:p>5832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675" calcext:value-type="float">
            <text:p>0,00067500000000000000</text:p>
          </table:table-cell>
          <table:table-cell table:formula="of:=[.D74]-[.D73]" office:value-type="float" office:value="0.00000937499999999994" calcext:value-type="float">
            <text:p>0,00000937499999999994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81" office:value-type="float" office:value="5913" calcext:value-type="float">
            <text:p>5913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684375" calcext:value-type="float">
            <text:p>0,00068437500000000000</text:p>
          </table:table-cell>
          <table:table-cell table:formula="of:=[.D75]-[.D74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81" office:value-type="float" office:value="5994" calcext:value-type="float">
            <text:p>5994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69375" calcext:value-type="float">
            <text:p>0,00069375000000000000</text:p>
          </table:table-cell>
          <table:table-cell table:formula="of:=[.D76]-[.D75]" office:value-type="float" office:value="0.00000937499999999994" calcext:value-type="float">
            <text:p>0,00000937499999999994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81" office:value-type="float" office:value="6075" calcext:value-type="float">
            <text:p>6075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703125" calcext:value-type="float">
            <text:p>0,00070312500000000000</text:p>
          </table:table-cell>
          <table:table-cell table:formula="of:=[.D77]-[.D76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81" office:value-type="float" office:value="6156" calcext:value-type="float">
            <text:p>6156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7125" calcext:value-type="float">
            <text:p>0,00071250000000000000</text:p>
          </table:table-cell>
          <table:table-cell table:formula="of:=[.D78]-[.D77]" office:value-type="float" office:value="0.00000937499999999994" calcext:value-type="float">
            <text:p>0,00000937499999999994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81" office:value-type="float" office:value="6237" calcext:value-type="float">
            <text:p>6237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721875" calcext:value-type="float">
            <text:p>0,00072187500000000000</text:p>
          </table:table-cell>
          <table:table-cell table:formula="of:=[.D79]-[.D78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81" office:value-type="float" office:value="6318" calcext:value-type="float">
            <text:p>6318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73125" calcext:value-type="float">
            <text:p>0,00073125000000000000</text:p>
          </table:table-cell>
          <table:table-cell table:formula="of:=[.D80]-[.D79]" office:value-type="float" office:value="0.00000937499999999994" calcext:value-type="float">
            <text:p>0,00000937499999999994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81" office:value-type="float" office:value="6399" calcext:value-type="float">
            <text:p>6399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740625" calcext:value-type="float">
            <text:p>0,00074062500000000000</text:p>
          </table:table-cell>
          <table:table-cell table:formula="of:=[.D81]-[.D80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81" office:value-type="float" office:value="6480" calcext:value-type="float">
            <text:p>648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75" calcext:value-type="float">
            <text:p>0,00075000000000000000</text:p>
          </table:table-cell>
          <table:table-cell table:formula="of:=[.D82]-[.D81]" office:value-type="float" office:value="0.00000937499999999994" calcext:value-type="float">
            <text:p>0,00000937499999999994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81" office:value-type="float" office:value="6561" calcext:value-type="float">
            <text:p>6561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759375" calcext:value-type="float">
            <text:p>0,00075937500000000000</text:p>
          </table:table-cell>
          <table:table-cell table:formula="of:=[.D83]-[.D82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81" office:value-type="float" office:value="6642" calcext:value-type="float">
            <text:p>6642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76875" calcext:value-type="float">
            <text:p>0,00076875000000000000</text:p>
          </table:table-cell>
          <table:table-cell table:formula="of:=[.D84]-[.D83]" office:value-type="float" office:value="0.00000937499999999994" calcext:value-type="float">
            <text:p>0,00000937499999999994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81" office:value-type="float" office:value="6723" calcext:value-type="float">
            <text:p>6723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778125" calcext:value-type="float">
            <text:p>0,00077812500000000000</text:p>
          </table:table-cell>
          <table:table-cell table:formula="of:=[.D85]-[.D84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81" office:value-type="float" office:value="6804" calcext:value-type="float">
            <text:p>6804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7875" calcext:value-type="float">
            <text:p>0,00078750000000000000</text:p>
          </table:table-cell>
          <table:table-cell table:formula="of:=[.D86]-[.D85]" office:value-type="float" office:value="0.00000937499999999994" calcext:value-type="float">
            <text:p>0,00000937499999999994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81" office:value-type="float" office:value="6885" calcext:value-type="float">
            <text:p>6885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796875" calcext:value-type="float">
            <text:p>0,00079687500000000000</text:p>
          </table:table-cell>
          <table:table-cell table:formula="of:=[.D87]-[.D86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81" office:value-type="float" office:value="6966" calcext:value-type="float">
            <text:p>6966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80625" calcext:value-type="float">
            <text:p>0,00080625000000000000</text:p>
          </table:table-cell>
          <table:table-cell table:formula="of:=[.D88]-[.D87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81" office:value-type="float" office:value="7047" calcext:value-type="float">
            <text:p>7047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815625" calcext:value-type="float">
            <text:p>0,00081562500000000000</text:p>
          </table:table-cell>
          <table:table-cell table:formula="of:=[.D89]-[.D88]" office:value-type="float" office:value="0.00000937499999999994" calcext:value-type="float">
            <text:p>0,00000937499999999994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81" office:value-type="float" office:value="7128" calcext:value-type="float">
            <text:p>7128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825" calcext:value-type="float">
            <text:p>0,00082500000000000000</text:p>
          </table:table-cell>
          <table:table-cell table:formula="of:=[.D90]-[.D89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81" office:value-type="float" office:value="7209" calcext:value-type="float">
            <text:p>7209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834375" calcext:value-type="float">
            <text:p>0,00083437500000000000</text:p>
          </table:table-cell>
          <table:table-cell table:formula="of:=[.D91]-[.D90]" office:value-type="float" office:value="0.00000937499999999994" calcext:value-type="float">
            <text:p>0,00000937499999999994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81" office:value-type="float" office:value="7290" calcext:value-type="float">
            <text:p>729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84375" calcext:value-type="float">
            <text:p>0,00084375000000000000</text:p>
          </table:table-cell>
          <table:table-cell table:formula="of:=[.D92]-[.D91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81" office:value-type="float" office:value="7371" calcext:value-type="float">
            <text:p>7371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853125" calcext:value-type="float">
            <text:p>0,00085312500000000000</text:p>
          </table:table-cell>
          <table:table-cell table:formula="of:=[.D93]-[.D92]" office:value-type="float" office:value="0.00000937499999999994" calcext:value-type="float">
            <text:p>0,00000937499999999994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81" office:value-type="float" office:value="7452" calcext:value-type="float">
            <text:p>7452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8625" calcext:value-type="float">
            <text:p>0,00086250000000000000</text:p>
          </table:table-cell>
          <table:table-cell table:formula="of:=[.D94]-[.D93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81" office:value-type="float" office:value="7533" calcext:value-type="float">
            <text:p>7533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871875" calcext:value-type="float">
            <text:p>0,00087187500000000000</text:p>
          </table:table-cell>
          <table:table-cell table:formula="of:=[.D95]-[.D94]" office:value-type="float" office:value="0.00000937499999999994" calcext:value-type="float">
            <text:p>0,00000937499999999994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81" office:value-type="float" office:value="7614" calcext:value-type="float">
            <text:p>7614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88125" calcext:value-type="float">
            <text:p>0,00088125000000000000</text:p>
          </table:table-cell>
          <table:table-cell table:formula="of:=[.D96]-[.D95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81" office:value-type="float" office:value="7695" calcext:value-type="float">
            <text:p>7695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890625" calcext:value-type="float">
            <text:p>0,00089062500000000000</text:p>
          </table:table-cell>
          <table:table-cell table:formula="of:=[.D97]-[.D96]" office:value-type="float" office:value="0.00000937499999999994" calcext:value-type="float">
            <text:p>0,00000937499999999994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81" office:value-type="float" office:value="7776" calcext:value-type="float">
            <text:p>7776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9" calcext:value-type="float">
            <text:p>0,00090000000000000000</text:p>
          </table:table-cell>
          <table:table-cell table:formula="of:=[.D98]-[.D97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81" office:value-type="float" office:value="7857" calcext:value-type="float">
            <text:p>7857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909375" calcext:value-type="float">
            <text:p>0,00090937500000000000</text:p>
          </table:table-cell>
          <table:table-cell table:formula="of:=[.D99]-[.D98]" office:value-type="float" office:value="0.00000937499999999994" calcext:value-type="float">
            <text:p>0,00000937499999999994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81" office:value-type="float" office:value="7938" calcext:value-type="float">
            <text:p>7938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91875" calcext:value-type="float">
            <text:p>0,00091875000000000000</text:p>
          </table:table-cell>
          <table:table-cell table:formula="of:=[.D100]-[.D99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81" office:value-type="float" office:value="8019" calcext:value-type="float">
            <text:p>8019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928125" calcext:value-type="float">
            <text:p>0,00092812500000000000</text:p>
          </table:table-cell>
          <table:table-cell table:formula="of:=[.D101]-[.D100]" office:value-type="float" office:value="0.00000937499999999994" calcext:value-type="float">
            <text:p>0,00000937499999999994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81" office:value-type="float" office:value="8100" calcext:value-type="float">
            <text:p>81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9375" calcext:value-type="float">
            <text:p>0,00093750000000000000</text:p>
          </table:table-cell>
          <table:table-cell table:formula="of:=[.D102]-[.D101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81" office:value-type="float" office:value="8181" calcext:value-type="float">
            <text:p>8181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946875" calcext:value-type="float">
            <text:p>0,00094687500000000000</text:p>
          </table:table-cell>
          <table:table-cell table:formula="of:=[.D103]-[.D102]" office:value-type="float" office:value="0.00000937499999999994" calcext:value-type="float">
            <text:p>0,00000937499999999994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81" office:value-type="float" office:value="8262" calcext:value-type="float">
            <text:p>8262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95625" calcext:value-type="float">
            <text:p>0,00095625000000000000</text:p>
          </table:table-cell>
          <table:table-cell table:formula="of:=[.D104]-[.D103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81" office:value-type="float" office:value="8343" calcext:value-type="float">
            <text:p>8343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965625" calcext:value-type="float">
            <text:p>0,00096562500000000000</text:p>
          </table:table-cell>
          <table:table-cell table:formula="of:=[.D105]-[.D104]" office:value-type="float" office:value="0.00000937499999999994" calcext:value-type="float">
            <text:p>0,00000937499999999994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81" office:value-type="float" office:value="8424" calcext:value-type="float">
            <text:p>8424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975" calcext:value-type="float">
            <text:p>0,00097500000000000000</text:p>
          </table:table-cell>
          <table:table-cell table:formula="of:=[.D106]-[.D105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81" office:value-type="float" office:value="8505" calcext:value-type="float">
            <text:p>8505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984375" calcext:value-type="float">
            <text:p>0,00098437500000000000</text:p>
          </table:table-cell>
          <table:table-cell table:formula="of:=[.D107]-[.D106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81" office:value-type="float" office:value="8586" calcext:value-type="float">
            <text:p>8586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99375" calcext:value-type="float">
            <text:p>0,00099375000000000000</text:p>
          </table:table-cell>
          <table:table-cell table:formula="of:=[.D108]-[.D107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81" office:value-type="float" office:value="8667" calcext:value-type="float">
            <text:p>8667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1003125" calcext:value-type="float">
            <text:p>0,00100312500000000000</text:p>
          </table:table-cell>
          <table:table-cell table:formula="of:=[.D109]-[.D108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81" office:value-type="float" office:value="8748" calcext:value-type="float">
            <text:p>8748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10125" calcext:value-type="float">
            <text:p>0,00101250000000000000</text:p>
          </table:table-cell>
          <table:table-cell table:formula="of:=[.D110]-[.D109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81" office:value-type="float" office:value="8829" calcext:value-type="float">
            <text:p>8829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1021875" calcext:value-type="float">
            <text:p>0,00102187500000000000</text:p>
          </table:table-cell>
          <table:table-cell table:formula="of:=[.D111]-[.D110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81" office:value-type="float" office:value="8910" calcext:value-type="float">
            <text:p>891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103125" calcext:value-type="float">
            <text:p>0,00103125000000000000</text:p>
          </table:table-cell>
          <table:table-cell table:formula="of:=[.D112]-[.D111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81" office:value-type="float" office:value="8991" calcext:value-type="float">
            <text:p>8991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1040625" calcext:value-type="float">
            <text:p>0,00104062500000000000</text:p>
          </table:table-cell>
          <table:table-cell table:formula="of:=[.D113]-[.D112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81" office:value-type="float" office:value="9072" calcext:value-type="float">
            <text:p>9072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105" calcext:value-type="float">
            <text:p>0,00105000000000000000</text:p>
          </table:table-cell>
          <table:table-cell table:formula="of:=[.D114]-[.D113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81" office:value-type="float" office:value="9153" calcext:value-type="float">
            <text:p>9153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1059375" calcext:value-type="float">
            <text:p>0,00105937500000000000</text:p>
          </table:table-cell>
          <table:table-cell table:formula="of:=[.D115]-[.D114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81" office:value-type="float" office:value="9234" calcext:value-type="float">
            <text:p>9234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106875" calcext:value-type="float">
            <text:p>0,00106875000000000000</text:p>
          </table:table-cell>
          <table:table-cell table:formula="of:=[.D116]-[.D115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81" office:value-type="float" office:value="9315" calcext:value-type="float">
            <text:p>9315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1078125" calcext:value-type="float">
            <text:p>0,00107812500000000000</text:p>
          </table:table-cell>
          <table:table-cell table:formula="of:=[.D117]-[.D116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81" office:value-type="float" office:value="9396" calcext:value-type="float">
            <text:p>9396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10875" calcext:value-type="float">
            <text:p>0,00108750000000000000</text:p>
          </table:table-cell>
          <table:table-cell table:formula="of:=[.D118]-[.D117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81" office:value-type="float" office:value="9477" calcext:value-type="float">
            <text:p>9477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1096875" calcext:value-type="float">
            <text:p>0,00109687500000000000</text:p>
          </table:table-cell>
          <table:table-cell table:formula="of:=[.D119]-[.D118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81" office:value-type="float" office:value="9558" calcext:value-type="float">
            <text:p>9558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110625" calcext:value-type="float">
            <text:p>0,00110625000000000000</text:p>
          </table:table-cell>
          <table:table-cell table:formula="of:=[.D120]-[.D119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81" office:value-type="float" office:value="9639" calcext:value-type="float">
            <text:p>9639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1115625" calcext:value-type="float">
            <text:p>0,00111562500000000000</text:p>
          </table:table-cell>
          <table:table-cell table:formula="of:=[.D121]-[.D120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81" office:value-type="float" office:value="9720" calcext:value-type="float">
            <text:p>972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1125" calcext:value-type="float">
            <text:p>0,00112500000000000000</text:p>
          </table:table-cell>
          <table:table-cell table:formula="of:=[.D122]-[.D121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81" office:value-type="float" office:value="9801" calcext:value-type="float">
            <text:p>9801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1134375" calcext:value-type="float">
            <text:p>0,00113437500000000000</text:p>
          </table:table-cell>
          <table:table-cell table:formula="of:=[.D123]-[.D122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81" office:value-type="float" office:value="9882" calcext:value-type="float">
            <text:p>9882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114375" calcext:value-type="float">
            <text:p>0,00114375000000000000</text:p>
          </table:table-cell>
          <table:table-cell table:formula="of:=[.D124]-[.D123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81" office:value-type="float" office:value="9963" calcext:value-type="float">
            <text:p>9963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1153125" calcext:value-type="float">
            <text:p>0,00115312500000000000</text:p>
          </table:table-cell>
          <table:table-cell table:formula="of:=[.D125]-[.D124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81" office:value-type="float" office:value="10044" calcext:value-type="float">
            <text:p>10044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11625" calcext:value-type="float">
            <text:p>0,00116250000000000000</text:p>
          </table:table-cell>
          <table:table-cell table:formula="of:=[.D126]-[.D125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81" office:value-type="float" office:value="10125" calcext:value-type="float">
            <text:p>10125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1171875" calcext:value-type="float">
            <text:p>0,00117187500000000000</text:p>
          </table:table-cell>
          <table:table-cell table:formula="of:=[.D127]-[.D126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81" office:value-type="float" office:value="10206" calcext:value-type="float">
            <text:p>10206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118125" calcext:value-type="float">
            <text:p>0,00118125000000000000</text:p>
          </table:table-cell>
          <table:table-cell table:formula="of:=[.D128]-[.D127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81" office:value-type="float" office:value="10287" calcext:value-type="float">
            <text:p>10287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1190625" calcext:value-type="float">
            <text:p>0,00119062500000000000</text:p>
          </table:table-cell>
          <table:table-cell table:formula="of:=[.D129]-[.D128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81" office:value-type="float" office:value="10368" calcext:value-type="float">
            <text:p>10368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12" calcext:value-type="float">
            <text:p>0,00120000000000000000</text:p>
          </table:table-cell>
          <table:table-cell table:formula="of:=[.D130]-[.D129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81" office:value-type="float" office:value="10449" calcext:value-type="float">
            <text:p>10449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1209375" calcext:value-type="float">
            <text:p>0,00120937500000000000</text:p>
          </table:table-cell>
          <table:table-cell table:formula="of:=[.D131]-[.D130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81" office:value-type="float" office:value="10530" calcext:value-type="float">
            <text:p>1053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121875" calcext:value-type="float">
            <text:p>0,00121875000000000000</text:p>
          </table:table-cell>
          <table:table-cell table:formula="of:=[.D132]-[.D131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81" office:value-type="float" office:value="10611" calcext:value-type="float">
            <text:p>10611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1228125" calcext:value-type="float">
            <text:p>0,00122812500000000000</text:p>
          </table:table-cell>
          <table:table-cell table:formula="of:=[.D133]-[.D132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81" office:value-type="float" office:value="10692" calcext:value-type="float">
            <text:p>10692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12375" calcext:value-type="float">
            <text:p>0,00123750000000000000</text:p>
          </table:table-cell>
          <table:table-cell table:formula="of:=[.D134]-[.D133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81" office:value-type="float" office:value="10773" calcext:value-type="float">
            <text:p>10773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1246875" calcext:value-type="float">
            <text:p>0,00124687500000000000</text:p>
          </table:table-cell>
          <table:table-cell table:formula="of:=[.D135]-[.D134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81" office:value-type="float" office:value="10854" calcext:value-type="float">
            <text:p>10854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125625" calcext:value-type="float">
            <text:p>0,00125625000000000000</text:p>
          </table:table-cell>
          <table:table-cell table:formula="of:=[.D136]-[.D135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81" office:value-type="float" office:value="10935" calcext:value-type="float">
            <text:p>10935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1265625" calcext:value-type="float">
            <text:p>0,00126562500000000000</text:p>
          </table:table-cell>
          <table:table-cell table:formula="of:=[.D137]-[.D136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81" office:value-type="float" office:value="11016" calcext:value-type="float">
            <text:p>11016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1275" calcext:value-type="float">
            <text:p>0,00127500000000000000</text:p>
          </table:table-cell>
          <table:table-cell table:formula="of:=[.D138]-[.D137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81" office:value-type="float" office:value="11097" calcext:value-type="float">
            <text:p>11097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1284375" calcext:value-type="float">
            <text:p>0,00128437500000000000</text:p>
          </table:table-cell>
          <table:table-cell table:formula="of:=[.D139]-[.D138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81" office:value-type="float" office:value="11178" calcext:value-type="float">
            <text:p>11178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129375" calcext:value-type="float">
            <text:p>0,00129375000000000000</text:p>
          </table:table-cell>
          <table:table-cell table:formula="of:=[.D140]-[.D139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81" office:value-type="float" office:value="11259" calcext:value-type="float">
            <text:p>11259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1303125" calcext:value-type="float">
            <text:p>0,00130312500000000000</text:p>
          </table:table-cell>
          <table:table-cell table:formula="of:=[.D141]-[.D140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81" office:value-type="float" office:value="11340" calcext:value-type="float">
            <text:p>1134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13125" calcext:value-type="float">
            <text:p>0,00131250000000000000</text:p>
          </table:table-cell>
          <table:table-cell table:formula="of:=[.D142]-[.D141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81" office:value-type="float" office:value="11421" calcext:value-type="float">
            <text:p>11421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1321875" calcext:value-type="float">
            <text:p>0,00132187500000000000</text:p>
          </table:table-cell>
          <table:table-cell table:formula="of:=[.D143]-[.D142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81" office:value-type="float" office:value="11502" calcext:value-type="float">
            <text:p>11502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133125" calcext:value-type="float">
            <text:p>0,00133125000000000000</text:p>
          </table:table-cell>
          <table:table-cell table:formula="of:=[.D144]-[.D143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81" office:value-type="float" office:value="11583" calcext:value-type="float">
            <text:p>11583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1340625" calcext:value-type="float">
            <text:p>0,00134062500000000000</text:p>
          </table:table-cell>
          <table:table-cell table:formula="of:=[.D145]-[.D144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81" office:value-type="float" office:value="11664" calcext:value-type="float">
            <text:p>11664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135" calcext:value-type="float">
            <text:p>0,00135000000000000000</text:p>
          </table:table-cell>
          <table:table-cell table:formula="of:=[.D146]-[.D145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81" office:value-type="float" office:value="11745" calcext:value-type="float">
            <text:p>11745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1359375" calcext:value-type="float">
            <text:p>0,00135937500000000000</text:p>
          </table:table-cell>
          <table:table-cell table:formula="of:=[.D147]-[.D146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81" office:value-type="float" office:value="11826" calcext:value-type="float">
            <text:p>11826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136875" calcext:value-type="float">
            <text:p>0,00136875000000000000</text:p>
          </table:table-cell>
          <table:table-cell table:formula="of:=[.D148]-[.D147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81" office:value-type="float" office:value="11907" calcext:value-type="float">
            <text:p>11907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1378125" calcext:value-type="float">
            <text:p>0,00137812500000000000</text:p>
          </table:table-cell>
          <table:table-cell table:formula="of:=[.D149]-[.D148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81" office:value-type="float" office:value="11988" calcext:value-type="float">
            <text:p>11988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13875" calcext:value-type="float">
            <text:p>0,00138750000000000000</text:p>
          </table:table-cell>
          <table:table-cell table:formula="of:=[.D150]-[.D149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81" office:value-type="float" office:value="12069" calcext:value-type="float">
            <text:p>12069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1396875" calcext:value-type="float">
            <text:p>0,00139687500000000000</text:p>
          </table:table-cell>
          <table:table-cell table:formula="of:=[.D151]-[.D150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81" office:value-type="float" office:value="12150" calcext:value-type="float">
            <text:p>1215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140625" calcext:value-type="float">
            <text:p>0,00140625000000000000</text:p>
          </table:table-cell>
          <table:table-cell table:formula="of:=[.D152]-[.D151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81" office:value-type="float" office:value="12231" calcext:value-type="float">
            <text:p>12231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1415625" calcext:value-type="float">
            <text:p>0,00141562500000000000</text:p>
          </table:table-cell>
          <table:table-cell table:formula="of:=[.D153]-[.D152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81" office:value-type="float" office:value="12312" calcext:value-type="float">
            <text:p>12312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1425" calcext:value-type="float">
            <text:p>0,00142500000000000000</text:p>
          </table:table-cell>
          <table:table-cell table:formula="of:=[.D154]-[.D153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81" office:value-type="float" office:value="12393" calcext:value-type="float">
            <text:p>12393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1434375" calcext:value-type="float">
            <text:p>0,00143437500000000000</text:p>
          </table:table-cell>
          <table:table-cell table:formula="of:=[.D155]-[.D154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81" office:value-type="float" office:value="12474" calcext:value-type="float">
            <text:p>12474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144375" calcext:value-type="float">
            <text:p>0,00144375000000000000</text:p>
          </table:table-cell>
          <table:table-cell table:formula="of:=[.D156]-[.D155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81" office:value-type="float" office:value="12555" calcext:value-type="float">
            <text:p>12555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1453125" calcext:value-type="float">
            <text:p>0,00145312500000000000</text:p>
          </table:table-cell>
          <table:table-cell table:formula="of:=[.D157]-[.D156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81" office:value-type="float" office:value="12636" calcext:value-type="float">
            <text:p>12636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14625" calcext:value-type="float">
            <text:p>0,00146250000000000000</text:p>
          </table:table-cell>
          <table:table-cell table:formula="of:=[.D158]-[.D157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81" office:value-type="float" office:value="12717" calcext:value-type="float">
            <text:p>12717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1471875" calcext:value-type="float">
            <text:p>0,00147187500000000000</text:p>
          </table:table-cell>
          <table:table-cell table:formula="of:=[.D159]-[.D158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81" office:value-type="float" office:value="12798" calcext:value-type="float">
            <text:p>12798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148125" calcext:value-type="float">
            <text:p>0,00148125000000000000</text:p>
          </table:table-cell>
          <table:table-cell table:formula="of:=[.D160]-[.D159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81" office:value-type="float" office:value="12879" calcext:value-type="float">
            <text:p>12879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1490625" calcext:value-type="float">
            <text:p>0,00149062500000000000</text:p>
          </table:table-cell>
          <table:table-cell table:formula="of:=[.D161]-[.D160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81" office:value-type="float" office:value="12960" calcext:value-type="float">
            <text:p>1296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15" calcext:value-type="float">
            <text:p>0,00150000000000000000</text:p>
          </table:table-cell>
          <table:table-cell table:formula="of:=[.D162]-[.D161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81" office:value-type="float" office:value="13041" calcext:value-type="float">
            <text:p>13041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1509375" calcext:value-type="float">
            <text:p>0,00150937500000000000</text:p>
          </table:table-cell>
          <table:table-cell table:formula="of:=[.D163]-[.D162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81" office:value-type="float" office:value="13122" calcext:value-type="float">
            <text:p>13122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151875" calcext:value-type="float">
            <text:p>0,00151875000000000000</text:p>
          </table:table-cell>
          <table:table-cell table:formula="of:=[.D164]-[.D163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81" office:value-type="float" office:value="13203" calcext:value-type="float">
            <text:p>13203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1528125" calcext:value-type="float">
            <text:p>0,00152812500000000000</text:p>
          </table:table-cell>
          <table:table-cell table:formula="of:=[.D165]-[.D164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81" office:value-type="float" office:value="13284" calcext:value-type="float">
            <text:p>13284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15375" calcext:value-type="float">
            <text:p>0,00153750000000000000</text:p>
          </table:table-cell>
          <table:table-cell table:formula="of:=[.D166]-[.D165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81" office:value-type="float" office:value="13365" calcext:value-type="float">
            <text:p>13365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1546875" calcext:value-type="float">
            <text:p>0,00154687500000000000</text:p>
          </table:table-cell>
          <table:table-cell table:formula="of:=[.D167]-[.D166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81" office:value-type="float" office:value="13446" calcext:value-type="float">
            <text:p>13446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155625" calcext:value-type="float">
            <text:p>0,00155625000000000000</text:p>
          </table:table-cell>
          <table:table-cell table:formula="of:=[.D168]-[.D167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81" office:value-type="float" office:value="13527" calcext:value-type="float">
            <text:p>13527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1565625" calcext:value-type="float">
            <text:p>0,00156562500000000000</text:p>
          </table:table-cell>
          <table:table-cell table:formula="of:=[.D169]-[.D168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81" office:value-type="float" office:value="13608" calcext:value-type="float">
            <text:p>13608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1575" calcext:value-type="float">
            <text:p>0,00157500000000000000</text:p>
          </table:table-cell>
          <table:table-cell table:formula="of:=[.D170]-[.D169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81" office:value-type="float" office:value="13689" calcext:value-type="float">
            <text:p>13689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1584375" calcext:value-type="float">
            <text:p>0,00158437500000000000</text:p>
          </table:table-cell>
          <table:table-cell table:formula="of:=[.D171]-[.D170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81" office:value-type="float" office:value="13770" calcext:value-type="float">
            <text:p>1377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159375" calcext:value-type="float">
            <text:p>0,00159375000000000000</text:p>
          </table:table-cell>
          <table:table-cell table:formula="of:=[.D172]-[.D171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81" office:value-type="float" office:value="13851" calcext:value-type="float">
            <text:p>13851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1603125" calcext:value-type="float">
            <text:p>0,00160312500000000000</text:p>
          </table:table-cell>
          <table:table-cell table:formula="of:=[.D173]-[.D172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81" office:value-type="float" office:value="13932" calcext:value-type="float">
            <text:p>13932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16125" calcext:value-type="float">
            <text:p>0,00161250000000000000</text:p>
          </table:table-cell>
          <table:table-cell table:formula="of:=[.D174]-[.D173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81" office:value-type="float" office:value="14013" calcext:value-type="float">
            <text:p>14013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1621875" calcext:value-type="float">
            <text:p>0,00162187500000000000</text:p>
          </table:table-cell>
          <table:table-cell table:formula="of:=[.D175]-[.D174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81" office:value-type="float" office:value="14094" calcext:value-type="float">
            <text:p>14094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163125" calcext:value-type="float">
            <text:p>0,00163125000000000000</text:p>
          </table:table-cell>
          <table:table-cell table:formula="of:=[.D176]-[.D175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81" office:value-type="float" office:value="14175" calcext:value-type="float">
            <text:p>14175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1640625" calcext:value-type="float">
            <text:p>0,00164062500000000000</text:p>
          </table:table-cell>
          <table:table-cell table:formula="of:=[.D177]-[.D176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81" office:value-type="float" office:value="14256" calcext:value-type="float">
            <text:p>14256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165" calcext:value-type="float">
            <text:p>0,00165000000000000000</text:p>
          </table:table-cell>
          <table:table-cell table:formula="of:=[.D178]-[.D177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81" office:value-type="float" office:value="14337" calcext:value-type="float">
            <text:p>14337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1659375" calcext:value-type="float">
            <text:p>0,00165937500000000000</text:p>
          </table:table-cell>
          <table:table-cell table:formula="of:=[.D179]-[.D178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81" office:value-type="float" office:value="14418" calcext:value-type="float">
            <text:p>14418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166875" calcext:value-type="float">
            <text:p>0,00166875000000000000</text:p>
          </table:table-cell>
          <table:table-cell table:formula="of:=[.D180]-[.D179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81" office:value-type="float" office:value="14499" calcext:value-type="float">
            <text:p>14499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1678125" calcext:value-type="float">
            <text:p>0,00167812500000000000</text:p>
          </table:table-cell>
          <table:table-cell table:formula="of:=[.D181]-[.D180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81" office:value-type="float" office:value="14580" calcext:value-type="float">
            <text:p>1458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16875" calcext:value-type="float">
            <text:p>0,00168750000000000000</text:p>
          </table:table-cell>
          <table:table-cell table:formula="of:=[.D182]-[.D181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81" office:value-type="float" office:value="14661" calcext:value-type="float">
            <text:p>14661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1696875" calcext:value-type="float">
            <text:p>0,00169687500000000000</text:p>
          </table:table-cell>
          <table:table-cell table:formula="of:=[.D183]-[.D182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81" office:value-type="float" office:value="14742" calcext:value-type="float">
            <text:p>14742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170625" calcext:value-type="float">
            <text:p>0,00170625000000000000</text:p>
          </table:table-cell>
          <table:table-cell table:formula="of:=[.D184]-[.D183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81" office:value-type="float" office:value="14823" calcext:value-type="float">
            <text:p>14823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1715625" calcext:value-type="float">
            <text:p>0,00171562500000000000</text:p>
          </table:table-cell>
          <table:table-cell table:formula="of:=[.D185]-[.D184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81" office:value-type="float" office:value="14904" calcext:value-type="float">
            <text:p>14904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1725" calcext:value-type="float">
            <text:p>0,00172500000000000000</text:p>
          </table:table-cell>
          <table:table-cell table:formula="of:=[.D186]-[.D185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81" office:value-type="float" office:value="14985" calcext:value-type="float">
            <text:p>14985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1734375" calcext:value-type="float">
            <text:p>0,00173437500000000000</text:p>
          </table:table-cell>
          <table:table-cell table:formula="of:=[.D187]-[.D186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81" office:value-type="float" office:value="15066" calcext:value-type="float">
            <text:p>15066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174375" calcext:value-type="float">
            <text:p>0,00174375000000000000</text:p>
          </table:table-cell>
          <table:table-cell table:formula="of:=[.D188]-[.D187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81" office:value-type="float" office:value="15147" calcext:value-type="float">
            <text:p>15147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1753125" calcext:value-type="float">
            <text:p>0,00175312500000000000</text:p>
          </table:table-cell>
          <table:table-cell table:formula="of:=[.D189]-[.D188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81" office:value-type="float" office:value="15228" calcext:value-type="float">
            <text:p>15228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17625" calcext:value-type="float">
            <text:p>0,00176250000000000000</text:p>
          </table:table-cell>
          <table:table-cell table:formula="of:=[.D190]-[.D189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81" office:value-type="float" office:value="15309" calcext:value-type="float">
            <text:p>15309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1771875" calcext:value-type="float">
            <text:p>0,00177187500000000000</text:p>
          </table:table-cell>
          <table:table-cell table:formula="of:=[.D191]-[.D190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81" office:value-type="float" office:value="15390" calcext:value-type="float">
            <text:p>1539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178125" calcext:value-type="float">
            <text:p>0,00178125000000000000</text:p>
          </table:table-cell>
          <table:table-cell table:formula="of:=[.D192]-[.D191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81" office:value-type="float" office:value="15471" calcext:value-type="float">
            <text:p>15471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1790625" calcext:value-type="float">
            <text:p>0,00179062500000000000</text:p>
          </table:table-cell>
          <table:table-cell table:formula="of:=[.D193]-[.D192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81" office:value-type="float" office:value="15552" calcext:value-type="float">
            <text:p>15552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18" calcext:value-type="float">
            <text:p>0,00180000000000000000</text:p>
          </table:table-cell>
          <table:table-cell table:formula="of:=[.D194]-[.D193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81" office:value-type="float" office:value="15633" calcext:value-type="float">
            <text:p>15633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1809375" calcext:value-type="float">
            <text:p>0,00180937500000000000</text:p>
          </table:table-cell>
          <table:table-cell table:formula="of:=[.D195]-[.D194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81" office:value-type="float" office:value="15714" calcext:value-type="float">
            <text:p>15714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181875" calcext:value-type="float">
            <text:p>0,00181875000000000000</text:p>
          </table:table-cell>
          <table:table-cell table:formula="of:=[.D196]-[.D195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81" office:value-type="float" office:value="15795" calcext:value-type="float">
            <text:p>15795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1828125" calcext:value-type="float">
            <text:p>0,00182812500000000000</text:p>
          </table:table-cell>
          <table:table-cell table:formula="of:=[.D197]-[.D196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81" office:value-type="float" office:value="15876" calcext:value-type="float">
            <text:p>15876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18375" calcext:value-type="float">
            <text:p>0,00183750000000000000</text:p>
          </table:table-cell>
          <table:table-cell table:formula="of:=[.D198]-[.D197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81" office:value-type="float" office:value="15957" calcext:value-type="float">
            <text:p>15957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1846875" calcext:value-type="float">
            <text:p>0,00184687500000000000</text:p>
          </table:table-cell>
          <table:table-cell table:formula="of:=[.D199]-[.D198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81" office:value-type="float" office:value="16038" calcext:value-type="float">
            <text:p>16038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185625" calcext:value-type="float">
            <text:p>0,00185625000000000000</text:p>
          </table:table-cell>
          <table:table-cell table:formula="of:=[.D200]-[.D199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81" office:value-type="float" office:value="16119" calcext:value-type="float">
            <text:p>16119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1865625" calcext:value-type="float">
            <text:p>0,00186562500000000000</text:p>
          </table:table-cell>
          <table:table-cell table:formula="of:=[.D201]-[.D200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81" office:value-type="float" office:value="16200" calcext:value-type="float">
            <text:p>162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1875" calcext:value-type="float">
            <text:p>0,00187500000000000000</text:p>
          </table:table-cell>
          <table:table-cell table:formula="of:=[.D202]-[.D201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81" office:value-type="float" office:value="16281" calcext:value-type="float">
            <text:p>16281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1884375" calcext:value-type="float">
            <text:p>0,00188437500000000000</text:p>
          </table:table-cell>
          <table:table-cell table:formula="of:=[.D203]-[.D202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81" office:value-type="float" office:value="16362" calcext:value-type="float">
            <text:p>16362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189375" calcext:value-type="float">
            <text:p>0,00189375000000000000</text:p>
          </table:table-cell>
          <table:table-cell table:formula="of:=[.D204]-[.D203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81" office:value-type="float" office:value="16443" calcext:value-type="float">
            <text:p>16443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1903125" calcext:value-type="float">
            <text:p>0,00190312500000000000</text:p>
          </table:table-cell>
          <table:table-cell table:formula="of:=[.D205]-[.D204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81" office:value-type="float" office:value="16524" calcext:value-type="float">
            <text:p>16524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19125" calcext:value-type="float">
            <text:p>0,00191250000000000000</text:p>
          </table:table-cell>
          <table:table-cell table:formula="of:=[.D206]-[.D205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81" office:value-type="float" office:value="16605" calcext:value-type="float">
            <text:p>16605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1921875" calcext:value-type="float">
            <text:p>0,00192187500000000000</text:p>
          </table:table-cell>
          <table:table-cell table:formula="of:=[.D207]-[.D206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81" office:value-type="float" office:value="16686" calcext:value-type="float">
            <text:p>16686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193125" calcext:value-type="float">
            <text:p>0,00193125000000000000</text:p>
          </table:table-cell>
          <table:table-cell table:formula="of:=[.D208]-[.D207]" office:value-type="float" office:value="0.00000937500000000005" calcext:value-type="float">
            <text:p>0,00000937500000000005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81" office:value-type="float" office:value="16767" calcext:value-type="float">
            <text:p>16767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1940625" calcext:value-type="float">
            <text:p>0,00194062500000000000</text:p>
          </table:table-cell>
          <table:table-cell table:formula="of:=[.D209]-[.D208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81" office:value-type="float" office:value="16848" calcext:value-type="float">
            <text:p>16848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195" calcext:value-type="float">
            <text:p>0,00195000000000000000</text:p>
          </table:table-cell>
          <table:table-cell table:formula="of:=[.D210]-[.D209]" office:value-type="float" office:value="0.00000937500000000027" calcext:value-type="float">
            <text:p>0,00000937500000000027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81" office:value-type="float" office:value="16929" calcext:value-type="float">
            <text:p>16929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1959375" calcext:value-type="float">
            <text:p>0,00195937500000000000</text:p>
          </table:table-cell>
          <table:table-cell table:formula="of:=[.D211]-[.D210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81" office:value-type="float" office:value="17010" calcext:value-type="float">
            <text:p>1701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196875" calcext:value-type="float">
            <text:p>0,00196875000000000000</text:p>
          </table:table-cell>
          <table:table-cell table:formula="of:=[.D212]-[.D211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81" office:value-type="float" office:value="17091" calcext:value-type="float">
            <text:p>17091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1978125" calcext:value-type="float">
            <text:p>0,00197812500000000000</text:p>
          </table:table-cell>
          <table:table-cell table:formula="of:=[.D213]-[.D212]" office:value-type="float" office:value="0.00000937500000000027" calcext:value-type="float">
            <text:p>0,00000937500000000027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81" office:value-type="float" office:value="17172" calcext:value-type="float">
            <text:p>17172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19875" calcext:value-type="float">
            <text:p>0,00198750000000000000</text:p>
          </table:table-cell>
          <table:table-cell table:formula="of:=[.D214]-[.D213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81" office:value-type="float" office:value="17253" calcext:value-type="float">
            <text:p>17253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1996875" calcext:value-type="float">
            <text:p>0,00199687500000000000</text:p>
          </table:table-cell>
          <table:table-cell table:formula="of:=[.D215]-[.D214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81" office:value-type="float" office:value="17334" calcext:value-type="float">
            <text:p>17334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200625" calcext:value-type="float">
            <text:p>0,00200625000000000000</text:p>
          </table:table-cell>
          <table:table-cell table:formula="of:=[.D216]-[.D215]" office:value-type="float" office:value="0.00000937500000000027" calcext:value-type="float">
            <text:p>0,00000937500000000027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81" office:value-type="float" office:value="17415" calcext:value-type="float">
            <text:p>17415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2015625" calcext:value-type="float">
            <text:p>0,00201562500000000000</text:p>
          </table:table-cell>
          <table:table-cell table:formula="of:=[.D217]-[.D216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81" office:value-type="float" office:value="17496" calcext:value-type="float">
            <text:p>17496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2025" calcext:value-type="float">
            <text:p>0,00202500000000000000</text:p>
          </table:table-cell>
          <table:table-cell table:formula="of:=[.D218]-[.D217]" office:value-type="float" office:value="0.00000937500000000027" calcext:value-type="float">
            <text:p>0,00000937500000000027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81" office:value-type="float" office:value="17577" calcext:value-type="float">
            <text:p>17577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2034375" calcext:value-type="float">
            <text:p>0,00203437500000000000</text:p>
          </table:table-cell>
          <table:table-cell table:formula="of:=[.D219]-[.D218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81" office:value-type="float" office:value="17658" calcext:value-type="float">
            <text:p>17658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204375" calcext:value-type="float">
            <text:p>0,00204375000000000000</text:p>
          </table:table-cell>
          <table:table-cell table:formula="of:=[.D220]-[.D219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81" office:value-type="float" office:value="17739" calcext:value-type="float">
            <text:p>17739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2053125" calcext:value-type="float">
            <text:p>0,00205312500000000000</text:p>
          </table:table-cell>
          <table:table-cell table:formula="of:=[.D221]-[.D220]" office:value-type="float" office:value="0.00000937500000000027" calcext:value-type="float">
            <text:p>0,00000937500000000027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81" office:value-type="float" office:value="17820" calcext:value-type="float">
            <text:p>1782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20625" calcext:value-type="float">
            <text:p>0,00206250000000000000</text:p>
          </table:table-cell>
          <table:table-cell table:formula="of:=[.D222]-[.D221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81" office:value-type="float" office:value="17901" calcext:value-type="float">
            <text:p>17901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2071875" calcext:value-type="float">
            <text:p>0,00207187500000000000</text:p>
          </table:table-cell>
          <table:table-cell table:formula="of:=[.D223]-[.D222]" office:value-type="float" office:value="0.00000937500000000027" calcext:value-type="float">
            <text:p>0,00000937500000000027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81" office:value-type="float" office:value="17982" calcext:value-type="float">
            <text:p>17982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208125" calcext:value-type="float">
            <text:p>0,00208125000000000000</text:p>
          </table:table-cell>
          <table:table-cell table:formula="of:=[.D224]-[.D223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81" office:value-type="float" office:value="18063" calcext:value-type="float">
            <text:p>18063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2090625" calcext:value-type="float">
            <text:p>0,00209062500000000000</text:p>
          </table:table-cell>
          <table:table-cell table:formula="of:=[.D225]-[.D224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81" office:value-type="float" office:value="18144" calcext:value-type="float">
            <text:p>18144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21" calcext:value-type="float">
            <text:p>0,00210000000000000000</text:p>
          </table:table-cell>
          <table:table-cell table:formula="of:=[.D226]-[.D225]" office:value-type="float" office:value="0.00000937500000000027" calcext:value-type="float">
            <text:p>0,00000937500000000027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81" office:value-type="float" office:value="18225" calcext:value-type="float">
            <text:p>18225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2109375" calcext:value-type="float">
            <text:p>0,00210937500000000000</text:p>
          </table:table-cell>
          <table:table-cell table:formula="of:=[.D227]-[.D226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81" office:value-type="float" office:value="18306" calcext:value-type="float">
            <text:p>18306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211875" calcext:value-type="float">
            <text:p>0,00211875000000000000</text:p>
          </table:table-cell>
          <table:table-cell table:formula="of:=[.D228]-[.D227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81" office:value-type="float" office:value="18387" calcext:value-type="float">
            <text:p>18387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2128125" calcext:value-type="float">
            <text:p>0,00212812500000000000</text:p>
          </table:table-cell>
          <table:table-cell table:formula="of:=[.D229]-[.D228]" office:value-type="float" office:value="0.00000937500000000027" calcext:value-type="float">
            <text:p>0,00000937500000000027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81" office:value-type="float" office:value="18468" calcext:value-type="float">
            <text:p>18468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21375" calcext:value-type="float">
            <text:p>0,00213750000000000000</text:p>
          </table:table-cell>
          <table:table-cell table:formula="of:=[.D230]-[.D229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81" office:value-type="float" office:value="18549" calcext:value-type="float">
            <text:p>18549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2146875" calcext:value-type="float">
            <text:p>0,00214687500000000000</text:p>
          </table:table-cell>
          <table:table-cell table:formula="of:=[.D231]-[.D230]" office:value-type="float" office:value="0.00000937500000000027" calcext:value-type="float">
            <text:p>0,00000937500000000027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81" office:value-type="float" office:value="18630" calcext:value-type="float">
            <text:p>1863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215625" calcext:value-type="float">
            <text:p>0,00215625000000000000</text:p>
          </table:table-cell>
          <table:table-cell table:formula="of:=[.D232]-[.D231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81" office:value-type="float" office:value="18711" calcext:value-type="float">
            <text:p>18711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2165625" calcext:value-type="float">
            <text:p>0,00216562500000000000</text:p>
          </table:table-cell>
          <table:table-cell table:formula="of:=[.D233]-[.D232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81" office:value-type="float" office:value="18792" calcext:value-type="float">
            <text:p>18792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2175" calcext:value-type="float">
            <text:p>0,00217500000000000000</text:p>
          </table:table-cell>
          <table:table-cell table:formula="of:=[.D234]-[.D233]" office:value-type="float" office:value="0.00000937500000000027" calcext:value-type="float">
            <text:p>0,00000937500000000027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81" office:value-type="float" office:value="18873" calcext:value-type="float">
            <text:p>18873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2184375" calcext:value-type="float">
            <text:p>0,00218437500000000000</text:p>
          </table:table-cell>
          <table:table-cell table:formula="of:=[.D235]-[.D234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81" office:value-type="float" office:value="18954" calcext:value-type="float">
            <text:p>18954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219375" calcext:value-type="float">
            <text:p>0,00219375000000000000</text:p>
          </table:table-cell>
          <table:table-cell table:formula="of:=[.D236]-[.D235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81" office:value-type="float" office:value="19035" calcext:value-type="float">
            <text:p>19035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2203125" calcext:value-type="float">
            <text:p>0,00220312500000000000</text:p>
          </table:table-cell>
          <table:table-cell table:formula="of:=[.D237]-[.D236]" office:value-type="float" office:value="0.00000937500000000027" calcext:value-type="float">
            <text:p>0,00000937500000000027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81" office:value-type="float" office:value="19116" calcext:value-type="float">
            <text:p>19116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22125" calcext:value-type="float">
            <text:p>0,00221250000000000000</text:p>
          </table:table-cell>
          <table:table-cell table:formula="of:=[.D238]-[.D237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81" office:value-type="float" office:value="19197" calcext:value-type="float">
            <text:p>19197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2221875" calcext:value-type="float">
            <text:p>0,00222187500000000000</text:p>
          </table:table-cell>
          <table:table-cell table:formula="of:=[.D239]-[.D238]" office:value-type="float" office:value="0.00000937500000000027" calcext:value-type="float">
            <text:p>0,00000937500000000027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81" office:value-type="float" office:value="19278" calcext:value-type="float">
            <text:p>19278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223125" calcext:value-type="float">
            <text:p>0,00223125000000000000</text:p>
          </table:table-cell>
          <table:table-cell table:formula="of:=[.D240]-[.D239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81" office:value-type="float" office:value="19359" calcext:value-type="float">
            <text:p>19359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2240625" calcext:value-type="float">
            <text:p>0,00224062500000000000</text:p>
          </table:table-cell>
          <table:table-cell table:formula="of:=[.D241]-[.D240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81" office:value-type="float" office:value="19440" calcext:value-type="float">
            <text:p>1944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225" calcext:value-type="float">
            <text:p>0,00225000000000000000</text:p>
          </table:table-cell>
          <table:table-cell table:formula="of:=[.D242]-[.D241]" office:value-type="float" office:value="0.00000937500000000027" calcext:value-type="float">
            <text:p>0,00000937500000000027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81" office:value-type="float" office:value="19521" calcext:value-type="float">
            <text:p>19521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2259375" calcext:value-type="float">
            <text:p>0,00225937500000000000</text:p>
          </table:table-cell>
          <table:table-cell table:formula="of:=[.D243]-[.D242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81" office:value-type="float" office:value="19602" calcext:value-type="float">
            <text:p>19602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226875" calcext:value-type="float">
            <text:p>0,00226875000000000000</text:p>
          </table:table-cell>
          <table:table-cell table:formula="of:=[.D244]-[.D243]" office:value-type="float" office:value="0.00000937500000000027" calcext:value-type="float">
            <text:p>0,00000937500000000027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81" office:value-type="float" office:value="19683" calcext:value-type="float">
            <text:p>19683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2278125" calcext:value-type="float">
            <text:p>0,00227812500000000000</text:p>
          </table:table-cell>
          <table:table-cell table:formula="of:=[.D245]-[.D244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81" office:value-type="float" office:value="19764" calcext:value-type="float">
            <text:p>19764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22875" calcext:value-type="float">
            <text:p>0,00228750000000000000</text:p>
          </table:table-cell>
          <table:table-cell table:formula="of:=[.D246]-[.D245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81" office:value-type="float" office:value="19845" calcext:value-type="float">
            <text:p>19845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2296875" calcext:value-type="float">
            <text:p>0,00229687500000000000</text:p>
          </table:table-cell>
          <table:table-cell table:formula="of:=[.D247]-[.D246]" office:value-type="float" office:value="0.00000937500000000027" calcext:value-type="float">
            <text:p>0,00000937500000000027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81" office:value-type="float" office:value="19926" calcext:value-type="float">
            <text:p>19926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230625" calcext:value-type="float">
            <text:p>0,00230625000000000000</text:p>
          </table:table-cell>
          <table:table-cell table:formula="of:=[.D248]-[.D247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81" office:value-type="float" office:value="20007" calcext:value-type="float">
            <text:p>20007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2315625" calcext:value-type="float">
            <text:p>0,00231562500000000000</text:p>
          </table:table-cell>
          <table:table-cell table:formula="of:=[.D249]-[.D248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81" office:value-type="float" office:value="20088" calcext:value-type="float">
            <text:p>20088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2325" calcext:value-type="float">
            <text:p>0,00232500000000000000</text:p>
          </table:table-cell>
          <table:table-cell table:formula="of:=[.D250]-[.D249]" office:value-type="float" office:value="0.00000937500000000027" calcext:value-type="float">
            <text:p>0,00000937500000000027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81" office:value-type="float" office:value="20169" calcext:value-type="float">
            <text:p>20169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2334375" calcext:value-type="float">
            <text:p>0,00233437500000000000</text:p>
          </table:table-cell>
          <table:table-cell table:formula="of:=[.D251]-[.D250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81" office:value-type="float" office:value="20250" calcext:value-type="float">
            <text:p>2025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234375" calcext:value-type="float">
            <text:p>0,00234375000000000000</text:p>
          </table:table-cell>
          <table:table-cell table:formula="of:=[.D252]-[.D251]" office:value-type="float" office:value="0.00000937500000000027" calcext:value-type="float">
            <text:p>0,00000937500000000027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81" office:value-type="float" office:value="20331" calcext:value-type="float">
            <text:p>20331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2353125" calcext:value-type="float">
            <text:p>0,00235312500000000000</text:p>
          </table:table-cell>
          <table:table-cell table:formula="of:=[.D253]-[.D252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81" office:value-type="float" office:value="20412" calcext:value-type="float">
            <text:p>20412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23625" calcext:value-type="float">
            <text:p>0,00236250000000000000</text:p>
          </table:table-cell>
          <table:table-cell table:formula="of:=[.D254]-[.D253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81" office:value-type="float" office:value="20493" calcext:value-type="float">
            <text:p>20493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2371875" calcext:value-type="float">
            <text:p>0,00237187500000000000</text:p>
          </table:table-cell>
          <table:table-cell table:formula="of:=[.D255]-[.D254]" office:value-type="float" office:value="0.00000937500000000027" calcext:value-type="float">
            <text:p>0,00000937500000000027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81" office:value-type="float" office:value="20574" calcext:value-type="float">
            <text:p>20574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238125" calcext:value-type="float">
            <text:p>0,00238125000000000000</text:p>
          </table:table-cell>
          <table:table-cell table:formula="of:=[.D256]-[.D255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81" office:value-type="float" office:value="20655" calcext:value-type="float">
            <text:p>20655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2390625" calcext:value-type="float">
            <text:p>0,00239062500000000000</text:p>
          </table:table-cell>
          <table:table-cell table:formula="of:=[.D257]-[.D256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81" office:value-type="float" office:value="20736" calcext:value-type="float">
            <text:p>20736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24" calcext:value-type="float">
            <text:p>0,00240000000000000000</text:p>
          </table:table-cell>
          <table:table-cell table:formula="of:=[.D258]-[.D257]" office:value-type="float" office:value="0.00000937500000000027" calcext:value-type="float">
            <text:p>0,00000937500000000027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81" office:value-type="float" office:value="20817" calcext:value-type="float">
            <text:p>20817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2409375" calcext:value-type="float">
            <text:p>0,00240937500000000000</text:p>
          </table:table-cell>
          <table:table-cell table:formula="of:=[.D259]-[.D258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81" office:value-type="float" office:value="20898" calcext:value-type="float">
            <text:p>20898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241875" calcext:value-type="float">
            <text:p>0,00241875000000000000</text:p>
          </table:table-cell>
          <table:table-cell table:formula="of:=[.D260]-[.D259]" office:value-type="float" office:value="0.00000937500000000027" calcext:value-type="float">
            <text:p>0,00000937500000000027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81" office:value-type="float" office:value="20979" calcext:value-type="float">
            <text:p>20979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2428125" calcext:value-type="float">
            <text:p>0,00242812500000000000</text:p>
          </table:table-cell>
          <table:table-cell table:formula="of:=[.D261]-[.D260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81" office:value-type="float" office:value="21060" calcext:value-type="float">
            <text:p>2106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24375" calcext:value-type="float">
            <text:p>0,00243750000000000000</text:p>
          </table:table-cell>
          <table:table-cell table:formula="of:=[.D262]-[.D261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81" office:value-type="float" office:value="21141" calcext:value-type="float">
            <text:p>21141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2446875" calcext:value-type="float">
            <text:p>0,00244687500000000000</text:p>
          </table:table-cell>
          <table:table-cell table:formula="of:=[.D263]-[.D262]" office:value-type="float" office:value="0.00000937500000000027" calcext:value-type="float">
            <text:p>0,00000937500000000027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81" office:value-type="float" office:value="21222" calcext:value-type="float">
            <text:p>21222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245625" calcext:value-type="float">
            <text:p>0,00245625000000000000</text:p>
          </table:table-cell>
          <table:table-cell table:formula="of:=[.D264]-[.D263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81" office:value-type="float" office:value="21303" calcext:value-type="float">
            <text:p>21303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2465625" calcext:value-type="float">
            <text:p>0,00246562500000000000</text:p>
          </table:table-cell>
          <table:table-cell table:formula="of:=[.D265]-[.D264]" office:value-type="float" office:value="0.00000937500000000027" calcext:value-type="float">
            <text:p>0,00000937500000000027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81" office:value-type="float" office:value="21384" calcext:value-type="float">
            <text:p>21384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2475" calcext:value-type="float">
            <text:p>0,00247500000000000000</text:p>
          </table:table-cell>
          <table:table-cell table:formula="of:=[.D266]-[.D265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81" office:value-type="float" office:value="21465" calcext:value-type="float">
            <text:p>21465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2484375" calcext:value-type="float">
            <text:p>0,00248437500000000000</text:p>
          </table:table-cell>
          <table:table-cell table:formula="of:=[.D267]-[.D266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81" office:value-type="float" office:value="21546" calcext:value-type="float">
            <text:p>21546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249375" calcext:value-type="float">
            <text:p>0,00249375000000000000</text:p>
          </table:table-cell>
          <table:table-cell table:formula="of:=[.D268]-[.D267]" office:value-type="float" office:value="0.00000937500000000027" calcext:value-type="float">
            <text:p>0,00000937500000000027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81" office:value-type="float" office:value="21627" calcext:value-type="float">
            <text:p>21627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2503125" calcext:value-type="float">
            <text:p>0,00250312500000000000</text:p>
          </table:table-cell>
          <table:table-cell table:formula="of:=[.D269]-[.D268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81" office:value-type="float" office:value="21708" calcext:value-type="float">
            <text:p>21708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25125" calcext:value-type="float">
            <text:p>0,00251250000000000000</text:p>
          </table:table-cell>
          <table:table-cell table:formula="of:=[.D270]-[.D269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81" office:value-type="float" office:value="21789" calcext:value-type="float">
            <text:p>21789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2521875" calcext:value-type="float">
            <text:p>0,00252187500000000000</text:p>
          </table:table-cell>
          <table:table-cell table:formula="of:=[.D271]-[.D270]" office:value-type="float" office:value="0.00000937500000000027" calcext:value-type="float">
            <text:p>0,00000937500000000027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81" office:value-type="float" office:value="21870" calcext:value-type="float">
            <text:p>2187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253125" calcext:value-type="float">
            <text:p>0,00253125000000000000</text:p>
          </table:table-cell>
          <table:table-cell table:formula="of:=[.D272]-[.D271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81" office:value-type="float" office:value="21951" calcext:value-type="float">
            <text:p>21951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2540625" calcext:value-type="float">
            <text:p>0,00254062500000000000</text:p>
          </table:table-cell>
          <table:table-cell table:formula="of:=[.D273]-[.D272]" office:value-type="float" office:value="0.00000937500000000027" calcext:value-type="float">
            <text:p>0,00000937500000000027</text:p>
          </table:table-cell>
          <table:table-cell table:number-columns-repeated="5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81" office:value-type="float" office:value="22032" calcext:value-type="float">
            <text:p>22032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255" calcext:value-type="float">
            <text:p>0,00255000000000000000</text:p>
          </table:table-cell>
          <table:table-cell table:formula="of:=[.D274]-[.D273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81" office:value-type="float" office:value="22113" calcext:value-type="float">
            <text:p>22113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2559375" calcext:value-type="float">
            <text:p>0,00255937500000000000</text:p>
          </table:table-cell>
          <table:table-cell table:formula="of:=[.D275]-[.D274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81" office:value-type="float" office:value="22194" calcext:value-type="float">
            <text:p>22194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256875" calcext:value-type="float">
            <text:p>0,00256875000000000000</text:p>
          </table:table-cell>
          <table:table-cell table:formula="of:=[.D276]-[.D275]" office:value-type="float" office:value="0.00000937500000000027" calcext:value-type="float">
            <text:p>0,00000937500000000027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81" office:value-type="float" office:value="22275" calcext:value-type="float">
            <text:p>22275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2578125" calcext:value-type="float">
            <text:p>0,00257812500000000000</text:p>
          </table:table-cell>
          <table:table-cell table:formula="of:=[.D277]-[.D276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81" office:value-type="float" office:value="22356" calcext:value-type="float">
            <text:p>22356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25875" calcext:value-type="float">
            <text:p>0,00258750000000000000</text:p>
          </table:table-cell>
          <table:table-cell table:formula="of:=[.D278]-[.D277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81" office:value-type="float" office:value="22437" calcext:value-type="float">
            <text:p>22437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2596875" calcext:value-type="float">
            <text:p>0,00259687500000000000</text:p>
          </table:table-cell>
          <table:table-cell table:formula="of:=[.D279]-[.D278]" office:value-type="float" office:value="0.00000937500000000027" calcext:value-type="float">
            <text:p>0,00000937500000000027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81" office:value-type="float" office:value="22518" calcext:value-type="float">
            <text:p>22518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260625" calcext:value-type="float">
            <text:p>0,00260625000000000000</text:p>
          </table:table-cell>
          <table:table-cell table:formula="of:=[.D280]-[.D279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81" office:value-type="float" office:value="22599" calcext:value-type="float">
            <text:p>22599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2615625" calcext:value-type="float">
            <text:p>0,00261562500000000000</text:p>
          </table:table-cell>
          <table:table-cell table:formula="of:=[.D281]-[.D280]" office:value-type="float" office:value="0.00000937500000000027" calcext:value-type="float">
            <text:p>0,00000937500000000027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81" office:value-type="float" office:value="22680" calcext:value-type="float">
            <text:p>2268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2625" calcext:value-type="float">
            <text:p>0,00262500000000000000</text:p>
          </table:table-cell>
          <table:table-cell table:formula="of:=[.D282]-[.D281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81" office:value-type="float" office:value="22761" calcext:value-type="float">
            <text:p>22761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2634375" calcext:value-type="float">
            <text:p>0,00263437500000000000</text:p>
          </table:table-cell>
          <table:table-cell table:formula="of:=[.D283]-[.D282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81" office:value-type="float" office:value="22842" calcext:value-type="float">
            <text:p>22842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264375" calcext:value-type="float">
            <text:p>0,00264375000000000000</text:p>
          </table:table-cell>
          <table:table-cell table:formula="of:=[.D284]-[.D283]" office:value-type="float" office:value="0.00000937500000000027" calcext:value-type="float">
            <text:p>0,00000937500000000027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81" office:value-type="float" office:value="22923" calcext:value-type="float">
            <text:p>22923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2653125" calcext:value-type="float">
            <text:p>0,00265312500000000000</text:p>
          </table:table-cell>
          <table:table-cell table:formula="of:=[.D285]-[.D284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81" office:value-type="float" office:value="23004" calcext:value-type="float">
            <text:p>23004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26625" calcext:value-type="float">
            <text:p>0,00266250000000000000</text:p>
          </table:table-cell>
          <table:table-cell table:formula="of:=[.D286]-[.D285]" office:value-type="float" office:value="0.00000937500000000027" calcext:value-type="float">
            <text:p>0,00000937500000000027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81" office:value-type="float" office:value="23085" calcext:value-type="float">
            <text:p>23085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2671875" calcext:value-type="float">
            <text:p>0,00267187500000000000</text:p>
          </table:table-cell>
          <table:table-cell table:formula="of:=[.D287]-[.D286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81" office:value-type="float" office:value="23166" calcext:value-type="float">
            <text:p>23166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268125" calcext:value-type="float">
            <text:p>0,00268125000000000000</text:p>
          </table:table-cell>
          <table:table-cell table:formula="of:=[.D288]-[.D287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81" office:value-type="float" office:value="23247" calcext:value-type="float">
            <text:p>23247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2690625" calcext:value-type="float">
            <text:p>0,00269062500000000000</text:p>
          </table:table-cell>
          <table:table-cell table:formula="of:=[.D289]-[.D288]" office:value-type="float" office:value="0.00000937500000000027" calcext:value-type="float">
            <text:p>0,00000937500000000027</text:p>
          </table:table-cell>
          <table:table-cell table:number-columns-repeated="5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81" office:value-type="float" office:value="23328" calcext:value-type="float">
            <text:p>23328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27" calcext:value-type="float">
            <text:p>0,00270000000000000000</text:p>
          </table:table-cell>
          <table:table-cell table:formula="of:=[.D290]-[.D289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81" office:value-type="float" office:value="23409" calcext:value-type="float">
            <text:p>23409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2709375" calcext:value-type="float">
            <text:p>0,00270937500000000000</text:p>
          </table:table-cell>
          <table:table-cell table:formula="of:=[.D291]-[.D290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81" office:value-type="float" office:value="23490" calcext:value-type="float">
            <text:p>2349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271875" calcext:value-type="float">
            <text:p>0,00271875000000000000</text:p>
          </table:table-cell>
          <table:table-cell table:formula="of:=[.D292]-[.D291]" office:value-type="float" office:value="0.00000937500000000027" calcext:value-type="float">
            <text:p>0,00000937500000000027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81" office:value-type="float" office:value="23571" calcext:value-type="float">
            <text:p>23571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2728125" calcext:value-type="float">
            <text:p>0,00272812500000000000</text:p>
          </table:table-cell>
          <table:table-cell table:formula="of:=[.D293]-[.D292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81" office:value-type="float" office:value="23652" calcext:value-type="float">
            <text:p>23652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27375" calcext:value-type="float">
            <text:p>0,00273750000000000000</text:p>
          </table:table-cell>
          <table:table-cell table:formula="of:=[.D294]-[.D293]" office:value-type="float" office:value="0.00000937500000000027" calcext:value-type="float">
            <text:p>0,00000937500000000027</text:p>
          </table:table-cell>
          <table:table-cell table:number-columns-repeated="5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81" office:value-type="float" office:value="23733" calcext:value-type="float">
            <text:p>23733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2746875" calcext:value-type="float">
            <text:p>0,00274687500000000000</text:p>
          </table:table-cell>
          <table:table-cell table:formula="of:=[.D295]-[.D294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81" office:value-type="float" office:value="23814" calcext:value-type="float">
            <text:p>23814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275625" calcext:value-type="float">
            <text:p>0,00275625000000000000</text:p>
          </table:table-cell>
          <table:table-cell table:formula="of:=[.D296]-[.D295]" office:value-type="float" office:value="0.00000937499999999984" calcext:value-type="float">
            <text:p>0,00000937499999999984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81" office:value-type="float" office:value="23895" calcext:value-type="float">
            <text:p>23895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2765625" calcext:value-type="float">
            <text:p>0,00276562500000000000</text:p>
          </table:table-cell>
          <table:table-cell table:formula="of:=[.D297]-[.D296]" office:value-type="float" office:value="0.00000937500000000027" calcext:value-type="float">
            <text:p>0,00000937500000000027</text:p>
          </table:table-cell>
          <table:table-cell table:number-columns-repeated="5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81" office:value-type="float" office:value="23976" calcext:value-type="float">
            <text:p>23976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2775" calcext:value-type="float">
            <text:p>0,00277500000000000000</text:p>
          </table:table-cell>
          <table:table-cell table:formula="of:=#REF!-[.D297]" office:value-type="string" office:string-value="" calcext:value-type="error">
            <text:p>#REF!</text:p>
          </table:table-cell>
          <table:table-cell table:number-columns-repeated="5"/>
        </table:table-row>
        <table:table-row table:style-name="ro1" table:number-rows-repeated="104827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9:02:55.597149910</meta:creation-date>
    <dc:date>2026-05-17T19:03:25.864449170</dc:date>
    <meta:editing-duration>PT31S</meta:editing-duration>
    <meta:editing-cycles>2</meta:editing-cycles>
    <meta:generator>LibreOffice/24.2.7.2$Linux_X86_64 LibreOffice_project/420$Build-2</meta:generator>
    <meta:document-statistic meta:table-count="1" meta:cell-count="1485" meta:object-count="0"/>
  </office:meta>
</office:document-meta>
</file>