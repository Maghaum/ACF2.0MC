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8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7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column table:style-name="co2" table:number-columns-repeated="16379" table:default-cell-style-name="ce2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70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810185185185185" calcext:value-type="float">
            <text:p>0,00000810185185185185</text:p>
          </table:table-cell>
          <table:table-cell table:formula="of:=[.D3]-[.D2]" office:value-type="float" office:value="0.00000810185185185185" calcext:value-type="float">
            <text:p>0,00000810185185185185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70" office:value-type="float" office:value="140" calcext:value-type="float">
            <text:p>140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162037037037037" calcext:value-type="float">
            <text:p>0,00001620370370370370</text:p>
          </table:table-cell>
          <table:table-cell table:formula="of:=[.D4]-[.D3]" office:value-type="float" office:value="0.00000810185185185185" calcext:value-type="float">
            <text:p>0,00000810185185185185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70" office:value-type="float" office:value="210" calcext:value-type="float">
            <text:p>210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243055555555556" calcext:value-type="float">
            <text:p>0,00002430555555555560</text:p>
          </table:table-cell>
          <table:table-cell table:formula="of:=[.D5]-[.D4]" office:value-type="float" office:value="0.00000810185185185185" calcext:value-type="float">
            <text:p>0,00000810185185185185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70" office:value-type="float" office:value="280" calcext:value-type="float">
            <text:p>280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324074074074074" calcext:value-type="float">
            <text:p>0,00003240740740740740</text:p>
          </table:table-cell>
          <table:table-cell table:formula="of:=[.D6]-[.D5]" office:value-type="float" office:value="0.00000810185185185185" calcext:value-type="float">
            <text:p>0,00000810185185185185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70" office:value-type="float" office:value="350" calcext:value-type="float">
            <text:p>350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405092592592593" calcext:value-type="float">
            <text:p>0,00004050925925925930</text:p>
          </table:table-cell>
          <table:table-cell table:formula="of:=[.D7]-[.D6]" office:value-type="float" office:value="0.00000810185185185185" calcext:value-type="float">
            <text:p>0,00000810185185185185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70" office:value-type="float" office:value="420" calcext:value-type="float">
            <text:p>420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486111111111111" calcext:value-type="float">
            <text:p>0,00004861111111111110</text:p>
          </table:table-cell>
          <table:table-cell table:formula="of:=[.D8]-[.D7]" office:value-type="float" office:value="0.00000810185185185186" calcext:value-type="float">
            <text:p>0,00000810185185185186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70" office:value-type="float" office:value="490" calcext:value-type="float">
            <text:p>490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56712962962963" calcext:value-type="float">
            <text:p>0,00005671296296296300</text:p>
          </table:table-cell>
          <table:table-cell table:formula="of:=[.D9]-[.D8]" office:value-type="float" office:value="0.00000810185185185185" calcext:value-type="float">
            <text:p>0,00000810185185185185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70" office:value-type="float" office:value="560" calcext:value-type="float">
            <text:p>560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648148148148148" calcext:value-type="float">
            <text:p>0,00006481481481481480</text:p>
          </table:table-cell>
          <table:table-cell table:formula="of:=[.D10]-[.D9]" office:value-type="float" office:value="0.00000810185185185186" calcext:value-type="float">
            <text:p>0,00000810185185185186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70" office:value-type="float" office:value="630" calcext:value-type="float">
            <text:p>630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729166666666667" calcext:value-type="float">
            <text:p>0,00007291666666666670</text:p>
          </table:table-cell>
          <table:table-cell table:formula="of:=[.D11]-[.D10]" office:value-type="float" office:value="0.00000810185185185184" calcext:value-type="float">
            <text:p>0,00000810185185185184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70" office:value-type="float" office:value="700" calcext:value-type="float">
            <text:p>70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810185185185185" calcext:value-type="float">
            <text:p>0,00008101851851851850</text:p>
          </table:table-cell>
          <table:table-cell table:formula="of:=[.D12]-[.D11]" office:value-type="float" office:value="0.00000810185185185186" calcext:value-type="float">
            <text:p>0,00000810185185185186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70" office:value-type="float" office:value="770" calcext:value-type="float">
            <text:p>770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891203703703704" calcext:value-type="float">
            <text:p>0,00008912037037037040</text:p>
          </table:table-cell>
          <table:table-cell table:formula="of:=[.D13]-[.D12]" office:value-type="float" office:value="0.00000810185185185184" calcext:value-type="float">
            <text:p>0,00000810185185185184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70" office:value-type="float" office:value="840" calcext:value-type="float">
            <text:p>840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972222222222222" calcext:value-type="float">
            <text:p>0,00009722222222222220</text:p>
          </table:table-cell>
          <table:table-cell table:formula="of:=[.D14]-[.D13]" office:value-type="float" office:value="0.00000810185185185186" calcext:value-type="float">
            <text:p>0,00000810185185185186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70" office:value-type="float" office:value="910" calcext:value-type="float">
            <text:p>910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105324074074074" calcext:value-type="float">
            <text:p>0,00010532407407407400</text:p>
          </table:table-cell>
          <table:table-cell table:formula="of:=[.D15]-[.D14]" office:value-type="float" office:value="0.00000810185185185186" calcext:value-type="float">
            <text:p>0,00000810185185185186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70" office:value-type="float" office:value="980" calcext:value-type="float">
            <text:p>980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113425925925926" calcext:value-type="float">
            <text:p>0,00011342592592592600</text:p>
          </table:table-cell>
          <table:table-cell table:formula="of:=[.D16]-[.D15]" office:value-type="float" office:value="0.00000810185185185184" calcext:value-type="float">
            <text:p>0,00000810185185185184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70" office:value-type="float" office:value="1050" calcext:value-type="float">
            <text:p>1050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121527777777778" calcext:value-type="float">
            <text:p>0,00012152777777777800</text:p>
          </table:table-cell>
          <table:table-cell table:formula="of:=[.D17]-[.D16]" office:value-type="float" office:value="0.00000810185185185186" calcext:value-type="float">
            <text:p>0,00000810185185185186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70" office:value-type="float" office:value="1120" calcext:value-type="float">
            <text:p>1120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12962962962963" calcext:value-type="float">
            <text:p>0,00012962962962963000</text:p>
          </table:table-cell>
          <table:table-cell table:formula="of:=[.D18]-[.D17]" office:value-type="float" office:value="0.00000810185185185186" calcext:value-type="float">
            <text:p>0,00000810185185185186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70" office:value-type="float" office:value="1190" calcext:value-type="float">
            <text:p>1190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137731481481482" calcext:value-type="float">
            <text:p>0,00013773148148148200</text:p>
          </table:table-cell>
          <table:table-cell table:formula="of:=[.D19]-[.D18]" office:value-type="float" office:value="0.00000810185185185186" calcext:value-type="float">
            <text:p>0,00000810185185185186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70" office:value-type="float" office:value="1260" calcext:value-type="float">
            <text:p>1260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145833333333333" calcext:value-type="float">
            <text:p>0,00014583333333333300</text:p>
          </table:table-cell>
          <table:table-cell table:formula="of:=[.D20]-[.D19]" office:value-type="float" office:value="0.00000810185185185183" calcext:value-type="float">
            <text:p>0,00000810185185185183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70" office:value-type="float" office:value="1330" calcext:value-type="float">
            <text:p>1330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153935185185185" calcext:value-type="float">
            <text:p>0,00015393518518518500</text:p>
          </table:table-cell>
          <table:table-cell table:formula="of:=[.D21]-[.D20]" office:value-type="float" office:value="0.00000810185185185186" calcext:value-type="float">
            <text:p>0,00000810185185185186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70" office:value-type="float" office:value="1400" calcext:value-type="float">
            <text:p>140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162037037037037" calcext:value-type="float">
            <text:p>0,00016203703703703700</text:p>
          </table:table-cell>
          <table:table-cell table:formula="of:=[.D22]-[.D21]" office:value-type="float" office:value="0.00000810185185185186" calcext:value-type="float">
            <text:p>0,00000810185185185186</text:p>
          </table:table-cell>
          <table:table-cell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70" office:value-type="float" office:value="1470" calcext:value-type="float">
            <text:p>1470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170138888888889" calcext:value-type="float">
            <text:p>0,00017013888888888900</text:p>
          </table:table-cell>
          <table:table-cell table:formula="of:=[.D23]-[.D22]" office:value-type="float" office:value="0.00000810185185185186" calcext:value-type="float">
            <text:p>0,00000810185185185186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70" office:value-type="float" office:value="1540" calcext:value-type="float">
            <text:p>1540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178240740740741" calcext:value-type="float">
            <text:p>0,00017824074074074100</text:p>
          </table:table-cell>
          <table:table-cell table:formula="of:=[.D24]-[.D23]" office:value-type="float" office:value="0.00000810185185185186" calcext:value-type="float">
            <text:p>0,00000810185185185186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70" office:value-type="float" office:value="1610" calcext:value-type="float">
            <text:p>1610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186342592592593" calcext:value-type="float">
            <text:p>0,00018634259259259300</text:p>
          </table:table-cell>
          <table:table-cell table:formula="of:=[.D25]-[.D24]" office:value-type="float" office:value="0.00000810185185185183" calcext:value-type="float">
            <text:p>0,00000810185185185183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70" office:value-type="float" office:value="1680" calcext:value-type="float">
            <text:p>1680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194444444444444" calcext:value-type="float">
            <text:p>0,00019444444444444400</text:p>
          </table:table-cell>
          <table:table-cell table:formula="of:=[.D26]-[.D25]" office:value-type="float" office:value="0.00000810185185185186" calcext:value-type="float">
            <text:p>0,00000810185185185186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70" office:value-type="float" office:value="1750" calcext:value-type="float">
            <text:p>1750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202546296296296" calcext:value-type="float">
            <text:p>0,00020254629629629600</text:p>
          </table:table-cell>
          <table:table-cell table:formula="of:=[.D27]-[.D26]" office:value-type="float" office:value="0.00000810185185185186" calcext:value-type="float">
            <text:p>0,00000810185185185186</text:p>
          </table:table-cell>
          <table:table-cell table:number-columns-repeated="1637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70" office:value-type="float" office:value="1820" calcext:value-type="float">
            <text:p>1820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210648148148148" calcext:value-type="float">
            <text:p>0,00021064814814814800</text:p>
          </table:table-cell>
          <table:table-cell table:formula="of:=[.D28]-[.D27]" office:value-type="float" office:value="0.00000810185185185186" calcext:value-type="float">
            <text:p>0,00000810185185185186</text:p>
          </table:table-cell>
          <table:table-cell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70" office:value-type="float" office:value="1890" calcext:value-type="float">
            <text:p>1890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21875" calcext:value-type="float">
            <text:p>0,00021875000000000000</text:p>
          </table:table-cell>
          <table:table-cell table:formula="of:=[.D29]-[.D28]" office:value-type="float" office:value="0.00000810185185185186" calcext:value-type="float">
            <text:p>0,00000810185185185186</text:p>
          </table:table-cell>
          <table:table-cell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70" office:value-type="float" office:value="1960" calcext:value-type="float">
            <text:p>1960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226851851851852" calcext:value-type="float">
            <text:p>0,00022685185185185200</text:p>
          </table:table-cell>
          <table:table-cell table:formula="of:=[.D30]-[.D29]" office:value-type="float" office:value="0.00000810185185185183" calcext:value-type="float">
            <text:p>0,00000810185185185183</text:p>
          </table:table-cell>
          <table:table-cell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70" office:value-type="float" office:value="2030" calcext:value-type="float">
            <text:p>2030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234953703703704" calcext:value-type="float">
            <text:p>0,00023495370370370400</text:p>
          </table:table-cell>
          <table:table-cell table:formula="of:=[.D31]-[.D30]" office:value-type="float" office:value="0.00000810185185185186" calcext:value-type="float">
            <text:p>0,00000810185185185186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70" office:value-type="float" office:value="2100" calcext:value-type="float">
            <text:p>210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243055555555556" calcext:value-type="float">
            <text:p>0,00024305555555555600</text:p>
          </table:table-cell>
          <table:table-cell table:formula="of:=[.D32]-[.D31]" office:value-type="float" office:value="0.00000810185185185186" calcext:value-type="float">
            <text:p>0,00000810185185185186</text:p>
          </table:table-cell>
          <table:table-cell table:number-columns-repeated="1637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70" office:value-type="float" office:value="2170" calcext:value-type="float">
            <text:p>2170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251157407407407" calcext:value-type="float">
            <text:p>0,00025115740740740700</text:p>
          </table:table-cell>
          <table:table-cell table:formula="of:=[.D33]-[.D32]" office:value-type="float" office:value="0.00000810185185185186" calcext:value-type="float">
            <text:p>0,00000810185185185186</text:p>
          </table:table-cell>
          <table:table-cell table:number-columns-repeated="1637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70" office:value-type="float" office:value="2240" calcext:value-type="float">
            <text:p>2240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259259259259259" calcext:value-type="float">
            <text:p>0,00025925925925925900</text:p>
          </table:table-cell>
          <table:table-cell table:formula="of:=[.D34]-[.D33]" office:value-type="float" office:value="0.00000810185185185186" calcext:value-type="float">
            <text:p>0,00000810185185185186</text:p>
          </table:table-cell>
          <table:table-cell table:number-columns-repeated="1637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70" office:value-type="float" office:value="2310" calcext:value-type="float">
            <text:p>2310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267361111111111" calcext:value-type="float">
            <text:p>0,00026736111111111100</text:p>
          </table:table-cell>
          <table:table-cell table:formula="of:=[.D35]-[.D34]" office:value-type="float" office:value="0.00000810185185185186" calcext:value-type="float">
            <text:p>0,00000810185185185186</text:p>
          </table:table-cell>
          <table:table-cell table:number-columns-repeated="1637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70" office:value-type="float" office:value="2380" calcext:value-type="float">
            <text:p>2380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275462962962963" calcext:value-type="float">
            <text:p>0,00027546296296296300</text:p>
          </table:table-cell>
          <table:table-cell table:formula="of:=[.D36]-[.D35]" office:value-type="float" office:value="0.00000810185185185186" calcext:value-type="float">
            <text:p>0,00000810185185185186</text:p>
          </table:table-cell>
          <table:table-cell table:number-columns-repeated="1637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70" office:value-type="float" office:value="2450" calcext:value-type="float">
            <text:p>2450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283564814814815" calcext:value-type="float">
            <text:p>0,00028356481481481500</text:p>
          </table:table-cell>
          <table:table-cell table:formula="of:=[.D37]-[.D36]" office:value-type="float" office:value="0.00000810185185185186" calcext:value-type="float">
            <text:p>0,00000810185185185186</text:p>
          </table:table-cell>
          <table:table-cell table:number-columns-repeated="1637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70" office:value-type="float" office:value="2520" calcext:value-type="float">
            <text:p>2520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291666666666667" calcext:value-type="float">
            <text:p>0,00029166666666666700</text:p>
          </table:table-cell>
          <table:table-cell table:formula="of:=[.D38]-[.D37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70" office:value-type="float" office:value="2590" calcext:value-type="float">
            <text:p>2590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299768518518519" calcext:value-type="float">
            <text:p>0,00029976851851851900</text:p>
          </table:table-cell>
          <table:table-cell table:formula="of:=[.D39]-[.D38]" office:value-type="float" office:value="0.00000810185185185186" calcext:value-type="float">
            <text:p>0,00000810185185185186</text:p>
          </table:table-cell>
          <table:table-cell table:number-columns-repeated="1637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70" office:value-type="float" office:value="2660" calcext:value-type="float">
            <text:p>2660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30787037037037" calcext:value-type="float">
            <text:p>0,00030787037037037000</text:p>
          </table:table-cell>
          <table:table-cell table:formula="of:=[.D40]-[.D39]" office:value-type="float" office:value="0.00000810185185185186" calcext:value-type="float">
            <text:p>0,00000810185185185186</text:p>
          </table:table-cell>
          <table:table-cell table:number-columns-repeated="1637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70" office:value-type="float" office:value="2730" calcext:value-type="float">
            <text:p>2730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315972222222222" calcext:value-type="float">
            <text:p>0,00031597222222222200</text:p>
          </table:table-cell>
          <table:table-cell table:formula="of:=[.D41]-[.D40]" office:value-type="float" office:value="0.00000810185185185186" calcext:value-type="float">
            <text:p>0,00000810185185185186</text:p>
          </table:table-cell>
          <table:table-cell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70" office:value-type="float" office:value="2800" calcext:value-type="float">
            <text:p>280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324074074074074" calcext:value-type="float">
            <text:p>0,00032407407407407400</text:p>
          </table:table-cell>
          <table:table-cell table:formula="of:=[.D42]-[.D41]" office:value-type="float" office:value="0.00000810185185185186" calcext:value-type="float">
            <text:p>0,00000810185185185186</text:p>
          </table:table-cell>
          <table:table-cell table:number-columns-repeated="1637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70" office:value-type="float" office:value="2870" calcext:value-type="float">
            <text:p>2870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332175925925926" calcext:value-type="float">
            <text:p>0,00033217592592592600</text:p>
          </table:table-cell>
          <table:table-cell table:formula="of:=[.D43]-[.D42]" office:value-type="float" office:value="0.00000810185185185186" calcext:value-type="float">
            <text:p>0,00000810185185185186</text:p>
          </table:table-cell>
          <table:table-cell table:number-columns-repeated="1637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70" office:value-type="float" office:value="2940" calcext:value-type="float">
            <text:p>2940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340277777777778" calcext:value-type="float">
            <text:p>0,00034027777777777800</text:p>
          </table:table-cell>
          <table:table-cell table:formula="of:=[.D44]-[.D43]" office:value-type="float" office:value="0.00000810185185185186" calcext:value-type="float">
            <text:p>0,00000810185185185186</text:p>
          </table:table-cell>
          <table:table-cell table:number-columns-repeated="1637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70" office:value-type="float" office:value="3010" calcext:value-type="float">
            <text:p>3010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34837962962963" calcext:value-type="float">
            <text:p>0,00034837962962963000</text:p>
          </table:table-cell>
          <table:table-cell table:formula="of:=[.D45]-[.D44]" office:value-type="float" office:value="0.00000810185185185186" calcext:value-type="float">
            <text:p>0,00000810185185185186</text:p>
          </table:table-cell>
          <table:table-cell table:number-columns-repeated="1637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70" office:value-type="float" office:value="3080" calcext:value-type="float">
            <text:p>3080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356481481481482" calcext:value-type="float">
            <text:p>0,00035648148148148200</text:p>
          </table:table-cell>
          <table:table-cell table:formula="of:=[.D46]-[.D45]" office:value-type="float" office:value="0.00000810185185185186" calcext:value-type="float">
            <text:p>0,00000810185185185186</text:p>
          </table:table-cell>
          <table:table-cell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70" office:value-type="float" office:value="3150" calcext:value-type="float">
            <text:p>3150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364583333333333" calcext:value-type="float">
            <text:p>0,00036458333333333300</text:p>
          </table:table-cell>
          <table:table-cell table:formula="of:=[.D47]-[.D46]" office:value-type="float" office:value="0.00000810185185185186" calcext:value-type="float">
            <text:p>0,00000810185185185186</text:p>
          </table:table-cell>
          <table:table-cell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70" office:value-type="float" office:value="3220" calcext:value-type="float">
            <text:p>3220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372685185185185" calcext:value-type="float">
            <text:p>0,00037268518518518500</text:p>
          </table:table-cell>
          <table:table-cell table:formula="of:=[.D48]-[.D47]" office:value-type="float" office:value="0.00000810185185185186" calcext:value-type="float">
            <text:p>0,00000810185185185186</text:p>
          </table:table-cell>
          <table:table-cell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70" office:value-type="float" office:value="3290" calcext:value-type="float">
            <text:p>3290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380787037037037" calcext:value-type="float">
            <text:p>0,00038078703703703700</text:p>
          </table:table-cell>
          <table:table-cell table:formula="of:=[.D49]-[.D48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70" office:value-type="float" office:value="3360" calcext:value-type="float">
            <text:p>3360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388888888888889" calcext:value-type="float">
            <text:p>0,00038888888888888900</text:p>
          </table:table-cell>
          <table:table-cell table:formula="of:=[.D50]-[.D49]" office:value-type="float" office:value="0.00000810185185185186" calcext:value-type="float">
            <text:p>0,00000810185185185186</text:p>
          </table:table-cell>
          <table:table-cell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70" office:value-type="float" office:value="3430" calcext:value-type="float">
            <text:p>3430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396990740740741" calcext:value-type="float">
            <text:p>0,00039699074074074100</text:p>
          </table:table-cell>
          <table:table-cell table:formula="of:=[.D51]-[.D50]" office:value-type="float" office:value="0.00000810185185185186" calcext:value-type="float">
            <text:p>0,00000810185185185186</text:p>
          </table:table-cell>
          <table:table-cell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70" office:value-type="float" office:value="3500" calcext:value-type="float">
            <text:p>350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405092592592593" calcext:value-type="float">
            <text:p>0,00040509259259259300</text:p>
          </table:table-cell>
          <table:table-cell table:formula="of:=[.D52]-[.D51]" office:value-type="float" office:value="0.00000810185185185186" calcext:value-type="float">
            <text:p>0,00000810185185185186</text:p>
          </table:table-cell>
          <table:table-cell table:number-columns-repeated="1637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70" office:value-type="float" office:value="3570" calcext:value-type="float">
            <text:p>3570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413194444444444" calcext:value-type="float">
            <text:p>0,00041319444444444400</text:p>
          </table:table-cell>
          <table:table-cell table:formula="of:=[.D53]-[.D52]" office:value-type="float" office:value="0.00000810185185185186" calcext:value-type="float">
            <text:p>0,00000810185185185186</text:p>
          </table:table-cell>
          <table:table-cell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70" office:value-type="float" office:value="3640" calcext:value-type="float">
            <text:p>3640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421296296296296" calcext:value-type="float">
            <text:p>0,00042129629629629600</text:p>
          </table:table-cell>
          <table:table-cell table:formula="of:=[.D54]-[.D53]" office:value-type="float" office:value="0.00000810185185185186" calcext:value-type="float">
            <text:p>0,00000810185185185186</text:p>
          </table:table-cell>
          <table:table-cell table:number-columns-repeated="1637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70" office:value-type="float" office:value="3710" calcext:value-type="float">
            <text:p>3710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429398148148148" calcext:value-type="float">
            <text:p>0,00042939814814814800</text:p>
          </table:table-cell>
          <table:table-cell table:formula="of:=[.D55]-[.D54]" office:value-type="float" office:value="0.00000810185185185186" calcext:value-type="float">
            <text:p>0,00000810185185185186</text:p>
          </table:table-cell>
          <table:table-cell table:number-columns-repeated="1637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70" office:value-type="float" office:value="3780" calcext:value-type="float">
            <text:p>3780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4375" calcext:value-type="float">
            <text:p>0,00043750000000000000</text:p>
          </table:table-cell>
          <table:table-cell table:formula="of:=[.D56]-[.D55]" office:value-type="float" office:value="0.00000810185185185186" calcext:value-type="float">
            <text:p>0,00000810185185185186</text:p>
          </table:table-cell>
          <table:table-cell table:number-columns-repeated="1637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70" office:value-type="float" office:value="3850" calcext:value-type="float">
            <text:p>3850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445601851851852" calcext:value-type="float">
            <text:p>0,00044560185185185200</text:p>
          </table:table-cell>
          <table:table-cell table:formula="of:=[.D57]-[.D56]" office:value-type="float" office:value="0.00000810185185185186" calcext:value-type="float">
            <text:p>0,00000810185185185186</text:p>
          </table:table-cell>
          <table:table-cell table:number-columns-repeated="1637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70" office:value-type="float" office:value="3920" calcext:value-type="float">
            <text:p>3920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453703703703704" calcext:value-type="float">
            <text:p>0,00045370370370370400</text:p>
          </table:table-cell>
          <table:table-cell table:formula="of:=[.D58]-[.D57]" office:value-type="float" office:value="0.00000810185185185186" calcext:value-type="float">
            <text:p>0,00000810185185185186</text:p>
          </table:table-cell>
          <table:table-cell table:number-columns-repeated="1637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70" office:value-type="float" office:value="3990" calcext:value-type="float">
            <text:p>3990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461805555555556" calcext:value-type="float">
            <text:p>0,00046180555555555600</text:p>
          </table:table-cell>
          <table:table-cell table:formula="of:=[.D59]-[.D58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70" office:value-type="float" office:value="4060" calcext:value-type="float">
            <text:p>4060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469907407407407" calcext:value-type="float">
            <text:p>0,00046990740740740700</text:p>
          </table:table-cell>
          <table:table-cell table:formula="of:=[.D60]-[.D59]" office:value-type="float" office:value="0.00000810185185185186" calcext:value-type="float">
            <text:p>0,00000810185185185186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70" office:value-type="float" office:value="4130" calcext:value-type="float">
            <text:p>4130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478009259259259" calcext:value-type="float">
            <text:p>0,00047800925925925900</text:p>
          </table:table-cell>
          <table:table-cell table:formula="of:=[.D61]-[.D60]" office:value-type="float" office:value="0.00000810185185185186" calcext:value-type="float">
            <text:p>0,00000810185185185186</text:p>
          </table:table-cell>
          <table:table-cell table:number-columns-repeated="1637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70" office:value-type="float" office:value="4200" calcext:value-type="float">
            <text:p>420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486111111111111" calcext:value-type="float">
            <text:p>0,00048611111111111100</text:p>
          </table:table-cell>
          <table:table-cell table:formula="of:=[.D62]-[.D61]" office:value-type="float" office:value="0.00000810185185185191" calcext:value-type="float">
            <text:p>0,00000810185185185191</text:p>
          </table:table-cell>
          <table:table-cell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70" office:value-type="float" office:value="4270" calcext:value-type="float">
            <text:p>4270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494212962962963" calcext:value-type="float">
            <text:p>0,00049421296296296300</text:p>
          </table:table-cell>
          <table:table-cell table:formula="of:=[.D63]-[.D62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70" office:value-type="float" office:value="4340" calcext:value-type="float">
            <text:p>4340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502314814814815" calcext:value-type="float">
            <text:p>0,00050231481481481500</text:p>
          </table:table-cell>
          <table:table-cell table:formula="of:=[.D64]-[.D63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70" office:value-type="float" office:value="4410" calcext:value-type="float">
            <text:p>4410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510416666666667" calcext:value-type="float">
            <text:p>0,00051041666666666700</text:p>
          </table:table-cell>
          <table:table-cell table:formula="of:=[.D65]-[.D64]" office:value-type="float" office:value="0.00000810185185185191" calcext:value-type="float">
            <text:p>0,00000810185185185191</text:p>
          </table:table-cell>
          <table:table-cell table:number-columns-repeated="1637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70" office:value-type="float" office:value="4480" calcext:value-type="float">
            <text:p>4480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518518518518519" calcext:value-type="float">
            <text:p>0,00051851851851851900</text:p>
          </table:table-cell>
          <table:table-cell table:formula="of:=[.D66]-[.D65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70" office:value-type="float" office:value="4550" calcext:value-type="float">
            <text:p>4550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52662037037037" calcext:value-type="float">
            <text:p>0,00052662037037037000</text:p>
          </table:table-cell>
          <table:table-cell table:formula="of:=[.D67]-[.D66]" office:value-type="float" office:value="0.00000810185185185191" calcext:value-type="float">
            <text:p>0,00000810185185185191</text:p>
          </table:table-cell>
          <table:table-cell table:number-columns-repeated="1637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70" office:value-type="float" office:value="4620" calcext:value-type="float">
            <text:p>4620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534722222222222" calcext:value-type="float">
            <text:p>0,00053472222222222200</text:p>
          </table:table-cell>
          <table:table-cell table:formula="of:=[.D68]-[.D67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70" office:value-type="float" office:value="4690" calcext:value-type="float">
            <text:p>4690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542824074074074" calcext:value-type="float">
            <text:p>0,00054282407407407400</text:p>
          </table:table-cell>
          <table:table-cell table:formula="of:=[.D69]-[.D68]" office:value-type="float" office:value="0.00000810185185185191" calcext:value-type="float">
            <text:p>0,00000810185185185191</text:p>
          </table:table-cell>
          <table:table-cell table:number-columns-repeated="1637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70" office:value-type="float" office:value="4760" calcext:value-type="float">
            <text:p>4760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550925925925926" calcext:value-type="float">
            <text:p>0,00055092592592592600</text:p>
          </table:table-cell>
          <table:table-cell table:formula="of:=[.D70]-[.D69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70" office:value-type="float" office:value="4830" calcext:value-type="float">
            <text:p>4830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559027777777778" calcext:value-type="float">
            <text:p>0,00055902777777777800</text:p>
          </table:table-cell>
          <table:table-cell table:formula="of:=[.D71]-[.D70]" office:value-type="float" office:value="0.00000810185185185191" calcext:value-type="float">
            <text:p>0,00000810185185185191</text:p>
          </table:table-cell>
          <table:table-cell table:number-columns-repeated="1637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70" office:value-type="float" office:value="4900" calcext:value-type="float">
            <text:p>490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56712962962963" calcext:value-type="float">
            <text:p>0,00056712962962963000</text:p>
          </table:table-cell>
          <table:table-cell table:formula="of:=[.D72]-[.D71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70" office:value-type="float" office:value="4970" calcext:value-type="float">
            <text:p>4970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575231481481482" calcext:value-type="float">
            <text:p>0,00057523148148148200</text:p>
          </table:table-cell>
          <table:table-cell table:formula="of:=[.D73]-[.D72]" office:value-type="float" office:value="0.00000810185185185191" calcext:value-type="float">
            <text:p>0,00000810185185185191</text:p>
          </table:table-cell>
          <table:table-cell table:number-columns-repeated="1637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70" office:value-type="float" office:value="5040" calcext:value-type="float">
            <text:p>5040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583333333333333" calcext:value-type="float">
            <text:p>0,00058333333333333300</text:p>
          </table:table-cell>
          <table:table-cell table:formula="of:=[.D74]-[.D73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70" office:value-type="float" office:value="5110" calcext:value-type="float">
            <text:p>5110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591435185185185" calcext:value-type="float">
            <text:p>0,00059143518518518500</text:p>
          </table:table-cell>
          <table:table-cell table:formula="of:=[.D75]-[.D74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70" office:value-type="float" office:value="5180" calcext:value-type="float">
            <text:p>5180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599537037037037" calcext:value-type="float">
            <text:p>0,00059953703703703700</text:p>
          </table:table-cell>
          <table:table-cell table:formula="of:=[.D76]-[.D75]" office:value-type="float" office:value="0.00000810185185185191" calcext:value-type="float">
            <text:p>0,00000810185185185191</text:p>
          </table:table-cell>
          <table:table-cell table:number-columns-repeated="1637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70" office:value-type="float" office:value="5250" calcext:value-type="float">
            <text:p>5250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607638888888889" calcext:value-type="float">
            <text:p>0,00060763888888888900</text:p>
          </table:table-cell>
          <table:table-cell table:formula="of:=[.D77]-[.D76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70" office:value-type="float" office:value="5320" calcext:value-type="float">
            <text:p>5320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615740740740741" calcext:value-type="float">
            <text:p>0,00061574074074074100</text:p>
          </table:table-cell>
          <table:table-cell table:formula="of:=[.D78]-[.D77]" office:value-type="float" office:value="0.00000810185185185191" calcext:value-type="float">
            <text:p>0,00000810185185185191</text:p>
          </table:table-cell>
          <table:table-cell table:number-columns-repeated="1637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70" office:value-type="float" office:value="5390" calcext:value-type="float">
            <text:p>5390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623842592592593" calcext:value-type="float">
            <text:p>0,00062384259259259300</text:p>
          </table:table-cell>
          <table:table-cell table:formula="of:=[.D79]-[.D78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70" office:value-type="float" office:value="5460" calcext:value-type="float">
            <text:p>5460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631944444444444" calcext:value-type="float">
            <text:p>0,00063194444444444400</text:p>
          </table:table-cell>
          <table:table-cell table:formula="of:=[.D80]-[.D79]" office:value-type="float" office:value="0.00000810185185185191" calcext:value-type="float">
            <text:p>0,00000810185185185191</text:p>
          </table:table-cell>
          <table:table-cell table:number-columns-repeated="1637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70" office:value-type="float" office:value="5530" calcext:value-type="float">
            <text:p>5530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640046296296296" calcext:value-type="float">
            <text:p>0,00064004629629629600</text:p>
          </table:table-cell>
          <table:table-cell table:formula="of:=[.D81]-[.D80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70" office:value-type="float" office:value="5600" calcext:value-type="float">
            <text:p>560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648148148148148" calcext:value-type="float">
            <text:p>0,00064814814814814800</text:p>
          </table:table-cell>
          <table:table-cell table:formula="of:=[.D82]-[.D81]" office:value-type="float" office:value="0.00000810185185185191" calcext:value-type="float">
            <text:p>0,00000810185185185191</text:p>
          </table:table-cell>
          <table:table-cell table:number-columns-repeated="1637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70" office:value-type="float" office:value="5670" calcext:value-type="float">
            <text:p>5670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65625" calcext:value-type="float">
            <text:p>0,00065625000000000000</text:p>
          </table:table-cell>
          <table:table-cell table:formula="of:=[.D83]-[.D82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70" office:value-type="float" office:value="5740" calcext:value-type="float">
            <text:p>5740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664351851851852" calcext:value-type="float">
            <text:p>0,00066435185185185200</text:p>
          </table:table-cell>
          <table:table-cell table:formula="of:=[.D84]-[.D83]" office:value-type="float" office:value="0.00000810185185185191" calcext:value-type="float">
            <text:p>0,00000810185185185191</text:p>
          </table:table-cell>
          <table:table-cell table:number-columns-repeated="1637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70" office:value-type="float" office:value="5810" calcext:value-type="float">
            <text:p>5810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672453703703704" calcext:value-type="float">
            <text:p>0,00067245370370370400</text:p>
          </table:table-cell>
          <table:table-cell table:formula="of:=[.D85]-[.D84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70" office:value-type="float" office:value="5880" calcext:value-type="float">
            <text:p>5880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680555555555556" calcext:value-type="float">
            <text:p>0,00068055555555555600</text:p>
          </table:table-cell>
          <table:table-cell table:formula="of:=[.D86]-[.D85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70" office:value-type="float" office:value="5950" calcext:value-type="float">
            <text:p>5950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688657407407407" calcext:value-type="float">
            <text:p>0,00068865740740740700</text:p>
          </table:table-cell>
          <table:table-cell table:formula="of:=[.D87]-[.D86]" office:value-type="float" office:value="0.00000810185185185191" calcext:value-type="float">
            <text:p>0,00000810185185185191</text:p>
          </table:table-cell>
          <table:table-cell table:number-columns-repeated="1637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70" office:value-type="float" office:value="6020" calcext:value-type="float">
            <text:p>6020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696759259259259" calcext:value-type="float">
            <text:p>0,00069675925925925900</text:p>
          </table:table-cell>
          <table:table-cell table:formula="of:=[.D88]-[.D87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70" office:value-type="float" office:value="6090" calcext:value-type="float">
            <text:p>6090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704861111111111" calcext:value-type="float">
            <text:p>0,00070486111111111100</text:p>
          </table:table-cell>
          <table:table-cell table:formula="of:=[.D89]-[.D88]" office:value-type="float" office:value="0.00000810185185185191" calcext:value-type="float">
            <text:p>0,00000810185185185191</text:p>
          </table:table-cell>
          <table:table-cell table:number-columns-repeated="1637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70" office:value-type="float" office:value="6160" calcext:value-type="float">
            <text:p>6160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712962962962963" calcext:value-type="float">
            <text:p>0,00071296296296296300</text:p>
          </table:table-cell>
          <table:table-cell table:formula="of:=[.D90]-[.D89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70" office:value-type="float" office:value="6230" calcext:value-type="float">
            <text:p>6230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721064814814815" calcext:value-type="float">
            <text:p>0,00072106481481481500</text:p>
          </table:table-cell>
          <table:table-cell table:formula="of:=[.D91]-[.D90]" office:value-type="float" office:value="0.00000810185185185191" calcext:value-type="float">
            <text:p>0,00000810185185185191</text:p>
          </table:table-cell>
          <table:table-cell table:number-columns-repeated="1637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70" office:value-type="float" office:value="6300" calcext:value-type="float">
            <text:p>630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729166666666667" calcext:value-type="float">
            <text:p>0,00072916666666666700</text:p>
          </table:table-cell>
          <table:table-cell table:formula="of:=[.D92]-[.D91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70" office:value-type="float" office:value="6370" calcext:value-type="float">
            <text:p>6370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737268518518519" calcext:value-type="float">
            <text:p>0,00073726851851851900</text:p>
          </table:table-cell>
          <table:table-cell table:formula="of:=[.D93]-[.D92]" office:value-type="float" office:value="0.00000810185185185191" calcext:value-type="float">
            <text:p>0,00000810185185185191</text:p>
          </table:table-cell>
          <table:table-cell table:number-columns-repeated="1637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70" office:value-type="float" office:value="6440" calcext:value-type="float">
            <text:p>6440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74537037037037" calcext:value-type="float">
            <text:p>0,00074537037037037000</text:p>
          </table:table-cell>
          <table:table-cell table:formula="of:=[.D94]-[.D93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70" office:value-type="float" office:value="6510" calcext:value-type="float">
            <text:p>6510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753472222222222" calcext:value-type="float">
            <text:p>0,00075347222222222200</text:p>
          </table:table-cell>
          <table:table-cell table:formula="of:=[.D95]-[.D94]" office:value-type="float" office:value="0.00000810185185185191" calcext:value-type="float">
            <text:p>0,00000810185185185191</text:p>
          </table:table-cell>
          <table:table-cell table:number-columns-repeated="1637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70" office:value-type="float" office:value="6580" calcext:value-type="float">
            <text:p>6580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761574074074074" calcext:value-type="float">
            <text:p>0,00076157407407407400</text:p>
          </table:table-cell>
          <table:table-cell table:formula="of:=[.D96]-[.D95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70" office:value-type="float" office:value="6650" calcext:value-type="float">
            <text:p>6650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769675925925926" calcext:value-type="float">
            <text:p>0,00076967592592592600</text:p>
          </table:table-cell>
          <table:table-cell table:formula="of:=[.D97]-[.D96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70" office:value-type="float" office:value="6720" calcext:value-type="float">
            <text:p>6720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777777777777778" calcext:value-type="float">
            <text:p>0,00077777777777777800</text:p>
          </table:table-cell>
          <table:table-cell table:formula="of:=[.D98]-[.D97]" office:value-type="float" office:value="0.00000810185185185191" calcext:value-type="float">
            <text:p>0,00000810185185185191</text:p>
          </table:table-cell>
          <table:table-cell table:number-columns-repeated="1637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70" office:value-type="float" office:value="6790" calcext:value-type="float">
            <text:p>6790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78587962962963" calcext:value-type="float">
            <text:p>0,00078587962962963000</text:p>
          </table:table-cell>
          <table:table-cell table:formula="of:=[.D99]-[.D98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70" office:value-type="float" office:value="6860" calcext:value-type="float">
            <text:p>6860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793981481481481" calcext:value-type="float">
            <text:p>0,00079398148148148100</text:p>
          </table:table-cell>
          <table:table-cell table:formula="of:=[.D100]-[.D99]" office:value-type="float" office:value="0.00000810185185185191" calcext:value-type="float">
            <text:p>0,00000810185185185191</text:p>
          </table:table-cell>
          <table:table-cell table:number-columns-repeated="1637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70" office:value-type="float" office:value="6930" calcext:value-type="float">
            <text:p>6930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802083333333333" calcext:value-type="float">
            <text:p>0,00080208333333333300</text:p>
          </table:table-cell>
          <table:table-cell table:formula="of:=[.D101]-[.D100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70" office:value-type="float" office:value="7000" calcext:value-type="float">
            <text:p>70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810185185185185" calcext:value-type="float">
            <text:p>0,00081018518518518500</text:p>
          </table:table-cell>
          <table:table-cell table:formula="of:=[.D102]-[.D101]" office:value-type="float" office:value="0.00000810185185185191" calcext:value-type="float">
            <text:p>0,00000810185185185191</text:p>
          </table:table-cell>
          <table:table-cell table:number-columns-repeated="1637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70" office:value-type="float" office:value="7070" calcext:value-type="float">
            <text:p>7070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818287037037037" calcext:value-type="float">
            <text:p>0,00081828703703703700</text:p>
          </table:table-cell>
          <table:table-cell table:formula="of:=[.D103]-[.D102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70" office:value-type="float" office:value="7140" calcext:value-type="float">
            <text:p>7140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826388888888889" calcext:value-type="float">
            <text:p>0,00082638888888888900</text:p>
          </table:table-cell>
          <table:table-cell table:formula="of:=[.D104]-[.D103]" office:value-type="float" office:value="0.00000810185185185191" calcext:value-type="float">
            <text:p>0,00000810185185185191</text:p>
          </table:table-cell>
          <table:table-cell table:number-columns-repeated="1637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70" office:value-type="float" office:value="7210" calcext:value-type="float">
            <text:p>7210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834490740740741" calcext:value-type="float">
            <text:p>0,00083449074074074100</text:p>
          </table:table-cell>
          <table:table-cell table:formula="of:=[.D105]-[.D104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70" office:value-type="float" office:value="7280" calcext:value-type="float">
            <text:p>7280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842592592592593" calcext:value-type="float">
            <text:p>0,00084259259259259300</text:p>
          </table:table-cell>
          <table:table-cell table:formula="of:=[.D106]-[.D105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70" office:value-type="float" office:value="7350" calcext:value-type="float">
            <text:p>7350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850694444444444" calcext:value-type="float">
            <text:p>0,00085069444444444400</text:p>
          </table:table-cell>
          <table:table-cell table:formula="of:=[.D107]-[.D106]" office:value-type="float" office:value="0.00000810185185185191" calcext:value-type="float">
            <text:p>0,00000810185185185191</text:p>
          </table:table-cell>
          <table:table-cell table:number-columns-repeated="1637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70" office:value-type="float" office:value="7420" calcext:value-type="float">
            <text:p>7420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858796296296296" calcext:value-type="float">
            <text:p>0,00085879629629629600</text:p>
          </table:table-cell>
          <table:table-cell table:formula="of:=[.D108]-[.D107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70" office:value-type="float" office:value="7490" calcext:value-type="float">
            <text:p>7490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866898148148148" calcext:value-type="float">
            <text:p>0,00086689814814814800</text:p>
          </table:table-cell>
          <table:table-cell table:formula="of:=[.D109]-[.D108]" office:value-type="float" office:value="0.00000810185185185191" calcext:value-type="float">
            <text:p>0,00000810185185185191</text:p>
          </table:table-cell>
          <table:table-cell table:number-columns-repeated="1637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70" office:value-type="float" office:value="7560" calcext:value-type="float">
            <text:p>7560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875" calcext:value-type="float">
            <text:p>0,00087500000000000000</text:p>
          </table:table-cell>
          <table:table-cell table:formula="of:=[.D110]-[.D109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70" office:value-type="float" office:value="7630" calcext:value-type="float">
            <text:p>7630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883101851851852" calcext:value-type="float">
            <text:p>0,00088310185185185200</text:p>
          </table:table-cell>
          <table:table-cell table:formula="of:=[.D111]-[.D110]" office:value-type="float" office:value="0.00000810185185185191" calcext:value-type="float">
            <text:p>0,00000810185185185191</text:p>
          </table:table-cell>
          <table:table-cell table:number-columns-repeated="1637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70" office:value-type="float" office:value="7700" calcext:value-type="float">
            <text:p>770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891203703703704" calcext:value-type="float">
            <text:p>0,00089120370370370400</text:p>
          </table:table-cell>
          <table:table-cell table:formula="of:=[.D112]-[.D111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70" office:value-type="float" office:value="7770" calcext:value-type="float">
            <text:p>7770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899305555555556" calcext:value-type="float">
            <text:p>0,00089930555555555600</text:p>
          </table:table-cell>
          <table:table-cell table:formula="of:=[.D113]-[.D112]" office:value-type="float" office:value="0.00000810185185185191" calcext:value-type="float">
            <text:p>0,00000810185185185191</text:p>
          </table:table-cell>
          <table:table-cell table:number-columns-repeated="1637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70" office:value-type="float" office:value="7840" calcext:value-type="float">
            <text:p>7840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907407407407407" calcext:value-type="float">
            <text:p>0,00090740740740740800</text:p>
          </table:table-cell>
          <table:table-cell table:formula="of:=[.D114]-[.D113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70" office:value-type="float" office:value="7910" calcext:value-type="float">
            <text:p>7910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915509259259259" calcext:value-type="float">
            <text:p>0,00091550925925925900</text:p>
          </table:table-cell>
          <table:table-cell table:formula="of:=[.D115]-[.D114]" office:value-type="float" office:value="0.00000810185185185191" calcext:value-type="float">
            <text:p>0,00000810185185185191</text:p>
          </table:table-cell>
          <table:table-cell table:number-columns-repeated="1637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70" office:value-type="float" office:value="7980" calcext:value-type="float">
            <text:p>7980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923611111111111" calcext:value-type="float">
            <text:p>0,00092361111111111100</text:p>
          </table:table-cell>
          <table:table-cell table:formula="of:=[.D116]-[.D115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70" office:value-type="float" office:value="8050" calcext:value-type="float">
            <text:p>8050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931712962962963" calcext:value-type="float">
            <text:p>0,00093171296296296300</text:p>
          </table:table-cell>
          <table:table-cell table:formula="of:=[.D117]-[.D116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70" office:value-type="float" office:value="8120" calcext:value-type="float">
            <text:p>8120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939814814814815" calcext:value-type="float">
            <text:p>0,00093981481481481500</text:p>
          </table:table-cell>
          <table:table-cell table:formula="of:=[.D118]-[.D117]" office:value-type="float" office:value="0.00000810185185185191" calcext:value-type="float">
            <text:p>0,00000810185185185191</text:p>
          </table:table-cell>
          <table:table-cell table:number-columns-repeated="1637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70" office:value-type="float" office:value="8190" calcext:value-type="float">
            <text:p>8190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947916666666667" calcext:value-type="float">
            <text:p>0,00094791666666666700</text:p>
          </table:table-cell>
          <table:table-cell table:formula="of:=[.D119]-[.D118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70" office:value-type="float" office:value="8260" calcext:value-type="float">
            <text:p>8260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956018518518519" calcext:value-type="float">
            <text:p>0,00095601851851851900</text:p>
          </table:table-cell>
          <table:table-cell table:formula="of:=[.D120]-[.D119]" office:value-type="float" office:value="0.00000810185185185191" calcext:value-type="float">
            <text:p>0,00000810185185185191</text:p>
          </table:table-cell>
          <table:table-cell table:number-columns-repeated="1637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70" office:value-type="float" office:value="8330" calcext:value-type="float">
            <text:p>8330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96412037037037" calcext:value-type="float">
            <text:p>0,00096412037037037000</text:p>
          </table:table-cell>
          <table:table-cell table:formula="of:=[.D121]-[.D120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70" office:value-type="float" office:value="8400" calcext:value-type="float">
            <text:p>840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972222222222222" calcext:value-type="float">
            <text:p>0,00097222222222222200</text:p>
          </table:table-cell>
          <table:table-cell table:formula="of:=[.D122]-[.D121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70" office:value-type="float" office:value="8470" calcext:value-type="float">
            <text:p>8470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980324074074074" calcext:value-type="float">
            <text:p>0,00098032407407407400</text:p>
          </table:table-cell>
          <table:table-cell table:formula="of:=[.D123]-[.D122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70" office:value-type="float" office:value="8540" calcext:value-type="float">
            <text:p>8540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988425925925926" calcext:value-type="float">
            <text:p>0,00098842592592592600</text:p>
          </table:table-cell>
          <table:table-cell table:formula="of:=[.D124]-[.D123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70" office:value-type="float" office:value="8610" calcext:value-type="float">
            <text:p>8610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996527777777778" calcext:value-type="float">
            <text:p>0,00099652777777777800</text:p>
          </table:table-cell>
          <table:table-cell table:formula="of:=[.D125]-[.D124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70" office:value-type="float" office:value="8680" calcext:value-type="float">
            <text:p>8680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100462962962963" calcext:value-type="float">
            <text:p>0,00100462962962963000</text:p>
          </table:table-cell>
          <table:table-cell table:formula="of:=[.D126]-[.D125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70" office:value-type="float" office:value="8750" calcext:value-type="float">
            <text:p>8750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101273148148148" calcext:value-type="float">
            <text:p>0,00101273148148148000</text:p>
          </table:table-cell>
          <table:table-cell table:formula="of:=[.D127]-[.D126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70" office:value-type="float" office:value="8820" calcext:value-type="float">
            <text:p>8820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102083333333333" calcext:value-type="float">
            <text:p>0,00102083333333333000</text:p>
          </table:table-cell>
          <table:table-cell table:formula="of:=[.D128]-[.D127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70" office:value-type="float" office:value="8890" calcext:value-type="float">
            <text:p>8890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102893518518519" calcext:value-type="float">
            <text:p>0,00102893518518519000</text:p>
          </table:table-cell>
          <table:table-cell table:formula="of:=[.D129]-[.D128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70" office:value-type="float" office:value="8960" calcext:value-type="float">
            <text:p>8960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103703703703704" calcext:value-type="float">
            <text:p>0,00103703703703704000</text:p>
          </table:table-cell>
          <table:table-cell table:formula="of:=[.D130]-[.D129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70" office:value-type="float" office:value="9030" calcext:value-type="float">
            <text:p>9030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104513888888889" calcext:value-type="float">
            <text:p>0,00104513888888889000</text:p>
          </table:table-cell>
          <table:table-cell table:formula="of:=[.D131]-[.D130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70" office:value-type="float" office:value="9100" calcext:value-type="float">
            <text:p>910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105324074074074" calcext:value-type="float">
            <text:p>0,00105324074074074000</text:p>
          </table:table-cell>
          <table:table-cell table:formula="of:=[.D132]-[.D131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70" office:value-type="float" office:value="9170" calcext:value-type="float">
            <text:p>9170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106134259259259" calcext:value-type="float">
            <text:p>0,00106134259259259000</text:p>
          </table:table-cell>
          <table:table-cell table:formula="of:=[.D133]-[.D132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70" office:value-type="float" office:value="9240" calcext:value-type="float">
            <text:p>9240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106944444444444" calcext:value-type="float">
            <text:p>0,00106944444444444000</text:p>
          </table:table-cell>
          <table:table-cell table:formula="of:=[.D134]-[.D133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70" office:value-type="float" office:value="9310" calcext:value-type="float">
            <text:p>9310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10775462962963" calcext:value-type="float">
            <text:p>0,00107754629629630000</text:p>
          </table:table-cell>
          <table:table-cell table:formula="of:=[.D135]-[.D134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70" office:value-type="float" office:value="9380" calcext:value-type="float">
            <text:p>9380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108564814814815" calcext:value-type="float">
            <text:p>0,00108564814814815000</text:p>
          </table:table-cell>
          <table:table-cell table:formula="of:=[.D136]-[.D135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70" office:value-type="float" office:value="9450" calcext:value-type="float">
            <text:p>9450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109375" calcext:value-type="float">
            <text:p>0,00109375000000000000</text:p>
          </table:table-cell>
          <table:table-cell table:formula="of:=[.D137]-[.D136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70" office:value-type="float" office:value="9520" calcext:value-type="float">
            <text:p>9520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110185185185185" calcext:value-type="float">
            <text:p>0,00110185185185185000</text:p>
          </table:table-cell>
          <table:table-cell table:formula="of:=[.D138]-[.D137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70" office:value-type="float" office:value="9590" calcext:value-type="float">
            <text:p>9590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11099537037037" calcext:value-type="float">
            <text:p>0,00110995370370370000</text:p>
          </table:table-cell>
          <table:table-cell table:formula="of:=[.D139]-[.D138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70" office:value-type="float" office:value="9660" calcext:value-type="float">
            <text:p>9660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111805555555556" calcext:value-type="float">
            <text:p>0,00111805555555556000</text:p>
          </table:table-cell>
          <table:table-cell table:formula="of:=[.D140]-[.D139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70" office:value-type="float" office:value="9730" calcext:value-type="float">
            <text:p>9730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112615740740741" calcext:value-type="float">
            <text:p>0,00112615740740741000</text:p>
          </table:table-cell>
          <table:table-cell table:formula="of:=[.D141]-[.D140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70" office:value-type="float" office:value="9800" calcext:value-type="float">
            <text:p>980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113425925925926" calcext:value-type="float">
            <text:p>0,00113425925925926000</text:p>
          </table:table-cell>
          <table:table-cell table:formula="of:=[.D142]-[.D141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70" office:value-type="float" office:value="9870" calcext:value-type="float">
            <text:p>9870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114236111111111" calcext:value-type="float">
            <text:p>0,00114236111111111000</text:p>
          </table:table-cell>
          <table:table-cell table:formula="of:=[.D143]-[.D142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70" office:value-type="float" office:value="9940" calcext:value-type="float">
            <text:p>9940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115046296296296" calcext:value-type="float">
            <text:p>0,00115046296296296000</text:p>
          </table:table-cell>
          <table:table-cell table:formula="of:=[.D144]-[.D143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70" office:value-type="float" office:value="10010" calcext:value-type="float">
            <text:p>10010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115856481481481" calcext:value-type="float">
            <text:p>0,00115856481481481000</text:p>
          </table:table-cell>
          <table:table-cell table:formula="of:=[.D145]-[.D144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70" office:value-type="float" office:value="10080" calcext:value-type="float">
            <text:p>10080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116666666666667" calcext:value-type="float">
            <text:p>0,00116666666666667000</text:p>
          </table:table-cell>
          <table:table-cell table:formula="of:=[.D146]-[.D145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70" office:value-type="float" office:value="10150" calcext:value-type="float">
            <text:p>10150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117476851851852" calcext:value-type="float">
            <text:p>0,00117476851851852000</text:p>
          </table:table-cell>
          <table:table-cell table:formula="of:=[.D147]-[.D146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70" office:value-type="float" office:value="10220" calcext:value-type="float">
            <text:p>10220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118287037037037" calcext:value-type="float">
            <text:p>0,00118287037037037000</text:p>
          </table:table-cell>
          <table:table-cell table:formula="of:=[.D148]-[.D147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70" office:value-type="float" office:value="10290" calcext:value-type="float">
            <text:p>10290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119097222222222" calcext:value-type="float">
            <text:p>0,00119097222222222000</text:p>
          </table:table-cell>
          <table:table-cell table:formula="of:=[.D149]-[.D148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70" office:value-type="float" office:value="10360" calcext:value-type="float">
            <text:p>10360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119907407407407" calcext:value-type="float">
            <text:p>0,00119907407407407000</text:p>
          </table:table-cell>
          <table:table-cell table:formula="of:=[.D150]-[.D149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70" office:value-type="float" office:value="10430" calcext:value-type="float">
            <text:p>10430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120717592592593" calcext:value-type="float">
            <text:p>0,00120717592592593000</text:p>
          </table:table-cell>
          <table:table-cell table:formula="of:=[.D151]-[.D150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70" office:value-type="float" office:value="10500" calcext:value-type="float">
            <text:p>1050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121527777777778" calcext:value-type="float">
            <text:p>0,00121527777777778000</text:p>
          </table:table-cell>
          <table:table-cell table:formula="of:=[.D152]-[.D151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70" office:value-type="float" office:value="10570" calcext:value-type="float">
            <text:p>10570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122337962962963" calcext:value-type="float">
            <text:p>0,00122337962962963000</text:p>
          </table:table-cell>
          <table:table-cell table:formula="of:=[.D153]-[.D152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70" office:value-type="float" office:value="10640" calcext:value-type="float">
            <text:p>10640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123148148148148" calcext:value-type="float">
            <text:p>0,00123148148148148000</text:p>
          </table:table-cell>
          <table:table-cell table:formula="of:=[.D154]-[.D153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70" office:value-type="float" office:value="10710" calcext:value-type="float">
            <text:p>10710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123958333333333" calcext:value-type="float">
            <text:p>0,00123958333333333000</text:p>
          </table:table-cell>
          <table:table-cell table:formula="of:=[.D155]-[.D154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70" office:value-type="float" office:value="10780" calcext:value-type="float">
            <text:p>10780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124768518518519" calcext:value-type="float">
            <text:p>0,00124768518518519000</text:p>
          </table:table-cell>
          <table:table-cell table:formula="of:=[.D156]-[.D155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70" office:value-type="float" office:value="10850" calcext:value-type="float">
            <text:p>10850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125578703703704" calcext:value-type="float">
            <text:p>0,00125578703703704000</text:p>
          </table:table-cell>
          <table:table-cell table:formula="of:=[.D157]-[.D156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70" office:value-type="float" office:value="10920" calcext:value-type="float">
            <text:p>10920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126388888888889" calcext:value-type="float">
            <text:p>0,00126388888888889000</text:p>
          </table:table-cell>
          <table:table-cell table:formula="of:=[.D158]-[.D157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70" office:value-type="float" office:value="10990" calcext:value-type="float">
            <text:p>10990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127199074074074" calcext:value-type="float">
            <text:p>0,00127199074074074000</text:p>
          </table:table-cell>
          <table:table-cell table:formula="of:=[.D159]-[.D158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70" office:value-type="float" office:value="11060" calcext:value-type="float">
            <text:p>11060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128009259259259" calcext:value-type="float">
            <text:p>0,00128009259259259000</text:p>
          </table:table-cell>
          <table:table-cell table:formula="of:=[.D160]-[.D159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70" office:value-type="float" office:value="11130" calcext:value-type="float">
            <text:p>11130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128819444444444" calcext:value-type="float">
            <text:p>0,00128819444444444000</text:p>
          </table:table-cell>
          <table:table-cell table:formula="of:=[.D161]-[.D160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70" office:value-type="float" office:value="11200" calcext:value-type="float">
            <text:p>1120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12962962962963" calcext:value-type="float">
            <text:p>0,00129629629629630000</text:p>
          </table:table-cell>
          <table:table-cell table:formula="of:=[.D162]-[.D161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70" office:value-type="float" office:value="11270" calcext:value-type="float">
            <text:p>11270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130439814814815" calcext:value-type="float">
            <text:p>0,00130439814814815000</text:p>
          </table:table-cell>
          <table:table-cell table:formula="of:=[.D163]-[.D162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70" office:value-type="float" office:value="11340" calcext:value-type="float">
            <text:p>11340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13125" calcext:value-type="float">
            <text:p>0,00131250000000000000</text:p>
          </table:table-cell>
          <table:table-cell table:formula="of:=[.D164]-[.D163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70" office:value-type="float" office:value="11410" calcext:value-type="float">
            <text:p>11410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132060185185185" calcext:value-type="float">
            <text:p>0,00132060185185185000</text:p>
          </table:table-cell>
          <table:table-cell table:formula="of:=[.D165]-[.D164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70" office:value-type="float" office:value="11480" calcext:value-type="float">
            <text:p>11480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13287037037037" calcext:value-type="float">
            <text:p>0,00132870370370370000</text:p>
          </table:table-cell>
          <table:table-cell table:formula="of:=[.D166]-[.D165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70" office:value-type="float" office:value="11550" calcext:value-type="float">
            <text:p>11550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133680555555556" calcext:value-type="float">
            <text:p>0,00133680555555556000</text:p>
          </table:table-cell>
          <table:table-cell table:formula="of:=[.D167]-[.D166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70" office:value-type="float" office:value="11620" calcext:value-type="float">
            <text:p>11620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134490740740741" calcext:value-type="float">
            <text:p>0,00134490740740741000</text:p>
          </table:table-cell>
          <table:table-cell table:formula="of:=[.D168]-[.D167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70" office:value-type="float" office:value="11690" calcext:value-type="float">
            <text:p>11690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135300925925926" calcext:value-type="float">
            <text:p>0,00135300925925926000</text:p>
          </table:table-cell>
          <table:table-cell table:formula="of:=[.D169]-[.D168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70" office:value-type="float" office:value="11760" calcext:value-type="float">
            <text:p>11760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136111111111111" calcext:value-type="float">
            <text:p>0,00136111111111111000</text:p>
          </table:table-cell>
          <table:table-cell table:formula="of:=[.D170]-[.D169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70" office:value-type="float" office:value="11830" calcext:value-type="float">
            <text:p>11830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136921296296296" calcext:value-type="float">
            <text:p>0,00136921296296296000</text:p>
          </table:table-cell>
          <table:table-cell table:formula="of:=[.D171]-[.D170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70" office:value-type="float" office:value="11900" calcext:value-type="float">
            <text:p>1190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137731481481481" calcext:value-type="float">
            <text:p>0,00137731481481481000</text:p>
          </table:table-cell>
          <table:table-cell table:formula="of:=[.D172]-[.D171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70" office:value-type="float" office:value="11970" calcext:value-type="float">
            <text:p>11970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138541666666667" calcext:value-type="float">
            <text:p>0,00138541666666667000</text:p>
          </table:table-cell>
          <table:table-cell table:formula="of:=[.D173]-[.D172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70" office:value-type="float" office:value="12040" calcext:value-type="float">
            <text:p>12040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139351851851852" calcext:value-type="float">
            <text:p>0,00139351851851852000</text:p>
          </table:table-cell>
          <table:table-cell table:formula="of:=[.D174]-[.D173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70" office:value-type="float" office:value="12110" calcext:value-type="float">
            <text:p>12110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140162037037037" calcext:value-type="float">
            <text:p>0,00140162037037037000</text:p>
          </table:table-cell>
          <table:table-cell table:formula="of:=[.D175]-[.D174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70" office:value-type="float" office:value="12180" calcext:value-type="float">
            <text:p>12180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140972222222222" calcext:value-type="float">
            <text:p>0,00140972222222222000</text:p>
          </table:table-cell>
          <table:table-cell table:formula="of:=[.D176]-[.D175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70" office:value-type="float" office:value="12250" calcext:value-type="float">
            <text:p>12250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141782407407407" calcext:value-type="float">
            <text:p>0,00141782407407407000</text:p>
          </table:table-cell>
          <table:table-cell table:formula="of:=[.D177]-[.D176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70" office:value-type="float" office:value="12320" calcext:value-type="float">
            <text:p>12320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142592592592593" calcext:value-type="float">
            <text:p>0,00142592592592593000</text:p>
          </table:table-cell>
          <table:table-cell table:formula="of:=[.D178]-[.D177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70" office:value-type="float" office:value="12390" calcext:value-type="float">
            <text:p>12390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143402777777778" calcext:value-type="float">
            <text:p>0,00143402777777778000</text:p>
          </table:table-cell>
          <table:table-cell table:formula="of:=[.D179]-[.D178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70" office:value-type="float" office:value="12460" calcext:value-type="float">
            <text:p>12460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144212962962963" calcext:value-type="float">
            <text:p>0,00144212962962963000</text:p>
          </table:table-cell>
          <table:table-cell table:formula="of:=[.D180]-[.D179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70" office:value-type="float" office:value="12530" calcext:value-type="float">
            <text:p>12530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145023148148148" calcext:value-type="float">
            <text:p>0,00145023148148148000</text:p>
          </table:table-cell>
          <table:table-cell table:formula="of:=[.D181]-[.D180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70" office:value-type="float" office:value="12600" calcext:value-type="float">
            <text:p>1260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145833333333333" calcext:value-type="float">
            <text:p>0,00145833333333333000</text:p>
          </table:table-cell>
          <table:table-cell table:formula="of:=[.D182]-[.D181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70" office:value-type="float" office:value="12670" calcext:value-type="float">
            <text:p>12670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146643518518519" calcext:value-type="float">
            <text:p>0,00146643518518519000</text:p>
          </table:table-cell>
          <table:table-cell table:formula="of:=[.D183]-[.D182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70" office:value-type="float" office:value="12740" calcext:value-type="float">
            <text:p>12740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147453703703704" calcext:value-type="float">
            <text:p>0,00147453703703704000</text:p>
          </table:table-cell>
          <table:table-cell table:formula="of:=[.D184]-[.D183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70" office:value-type="float" office:value="12810" calcext:value-type="float">
            <text:p>12810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148263888888889" calcext:value-type="float">
            <text:p>0,00148263888888889000</text:p>
          </table:table-cell>
          <table:table-cell table:formula="of:=[.D185]-[.D184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70" office:value-type="float" office:value="12880" calcext:value-type="float">
            <text:p>12880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149074074074074" calcext:value-type="float">
            <text:p>0,00149074074074074000</text:p>
          </table:table-cell>
          <table:table-cell table:formula="of:=[.D186]-[.D185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70" office:value-type="float" office:value="12950" calcext:value-type="float">
            <text:p>12950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149884259259259" calcext:value-type="float">
            <text:p>0,00149884259259259000</text:p>
          </table:table-cell>
          <table:table-cell table:formula="of:=[.D187]-[.D186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70" office:value-type="float" office:value="13020" calcext:value-type="float">
            <text:p>13020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150694444444444" calcext:value-type="float">
            <text:p>0,00150694444444444000</text:p>
          </table:table-cell>
          <table:table-cell table:formula="of:=[.D188]-[.D187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70" office:value-type="float" office:value="13090" calcext:value-type="float">
            <text:p>13090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15150462962963" calcext:value-type="float">
            <text:p>0,00151504629629630000</text:p>
          </table:table-cell>
          <table:table-cell table:formula="of:=[.D189]-[.D188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70" office:value-type="float" office:value="13160" calcext:value-type="float">
            <text:p>13160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152314814814815" calcext:value-type="float">
            <text:p>0,00152314814814815000</text:p>
          </table:table-cell>
          <table:table-cell table:formula="of:=[.D190]-[.D189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70" office:value-type="float" office:value="13230" calcext:value-type="float">
            <text:p>13230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153125" calcext:value-type="float">
            <text:p>0,00153125000000000000</text:p>
          </table:table-cell>
          <table:table-cell table:formula="of:=[.D191]-[.D190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70" office:value-type="float" office:value="13300" calcext:value-type="float">
            <text:p>1330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153935185185185" calcext:value-type="float">
            <text:p>0,00153935185185185000</text:p>
          </table:table-cell>
          <table:table-cell table:formula="of:=[.D192]-[.D191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70" office:value-type="float" office:value="13370" calcext:value-type="float">
            <text:p>13370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15474537037037" calcext:value-type="float">
            <text:p>0,00154745370370370000</text:p>
          </table:table-cell>
          <table:table-cell table:formula="of:=[.D193]-[.D192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70" office:value-type="float" office:value="13440" calcext:value-type="float">
            <text:p>13440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155555555555556" calcext:value-type="float">
            <text:p>0,00155555555555556000</text:p>
          </table:table-cell>
          <table:table-cell table:formula="of:=[.D194]-[.D193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70" office:value-type="float" office:value="13510" calcext:value-type="float">
            <text:p>13510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156365740740741" calcext:value-type="float">
            <text:p>0,00156365740740741000</text:p>
          </table:table-cell>
          <table:table-cell table:formula="of:=[.D195]-[.D194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70" office:value-type="float" office:value="13580" calcext:value-type="float">
            <text:p>13580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157175925925926" calcext:value-type="float">
            <text:p>0,00157175925925926000</text:p>
          </table:table-cell>
          <table:table-cell table:formula="of:=[.D196]-[.D195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70" office:value-type="float" office:value="13650" calcext:value-type="float">
            <text:p>13650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157986111111111" calcext:value-type="float">
            <text:p>0,00157986111111111000</text:p>
          </table:table-cell>
          <table:table-cell table:formula="of:=[.D197]-[.D196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70" office:value-type="float" office:value="13720" calcext:value-type="float">
            <text:p>13720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158796296296296" calcext:value-type="float">
            <text:p>0,00158796296296296000</text:p>
          </table:table-cell>
          <table:table-cell table:formula="of:=[.D198]-[.D197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70" office:value-type="float" office:value="13790" calcext:value-type="float">
            <text:p>13790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159606481481482" calcext:value-type="float">
            <text:p>0,00159606481481482000</text:p>
          </table:table-cell>
          <table:table-cell table:formula="of:=[.D199]-[.D198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70" office:value-type="float" office:value="13860" calcext:value-type="float">
            <text:p>13860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160416666666667" calcext:value-type="float">
            <text:p>0,00160416666666667000</text:p>
          </table:table-cell>
          <table:table-cell table:formula="of:=[.D200]-[.D199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70" office:value-type="float" office:value="13930" calcext:value-type="float">
            <text:p>13930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161226851851852" calcext:value-type="float">
            <text:p>0,00161226851851852000</text:p>
          </table:table-cell>
          <table:table-cell table:formula="of:=[.D201]-[.D200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70" office:value-type="float" office:value="14000" calcext:value-type="float">
            <text:p>140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162037037037037" calcext:value-type="float">
            <text:p>0,00162037037037037000</text:p>
          </table:table-cell>
          <table:table-cell table:formula="of:=[.D202]-[.D201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70" office:value-type="float" office:value="14070" calcext:value-type="float">
            <text:p>14070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162847222222222" calcext:value-type="float">
            <text:p>0,00162847222222222000</text:p>
          </table:table-cell>
          <table:table-cell table:formula="of:=[.D203]-[.D202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70" office:value-type="float" office:value="14140" calcext:value-type="float">
            <text:p>14140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163657407407407" calcext:value-type="float">
            <text:p>0,00163657407407407000</text:p>
          </table:table-cell>
          <table:table-cell table:formula="of:=[.D204]-[.D203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70" office:value-type="float" office:value="14210" calcext:value-type="float">
            <text:p>14210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164467592592593" calcext:value-type="float">
            <text:p>0,00164467592592593000</text:p>
          </table:table-cell>
          <table:table-cell table:formula="of:=[.D205]-[.D204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70" office:value-type="float" office:value="14280" calcext:value-type="float">
            <text:p>14280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165277777777778" calcext:value-type="float">
            <text:p>0,00165277777777778000</text:p>
          </table:table-cell>
          <table:table-cell table:formula="of:=[.D206]-[.D205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70" office:value-type="float" office:value="14350" calcext:value-type="float">
            <text:p>14350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166087962962963" calcext:value-type="float">
            <text:p>0,00166087962962963000</text:p>
          </table:table-cell>
          <table:table-cell table:formula="of:=[.D207]-[.D206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70" office:value-type="float" office:value="14420" calcext:value-type="float">
            <text:p>14420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166898148148148" calcext:value-type="float">
            <text:p>0,00166898148148148000</text:p>
          </table:table-cell>
          <table:table-cell table:formula="of:=[.D208]-[.D207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70" office:value-type="float" office:value="14490" calcext:value-type="float">
            <text:p>14490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167708333333333" calcext:value-type="float">
            <text:p>0,00167708333333333000</text:p>
          </table:table-cell>
          <table:table-cell table:formula="of:=[.D209]-[.D208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70" office:value-type="float" office:value="14560" calcext:value-type="float">
            <text:p>14560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168518518518519" calcext:value-type="float">
            <text:p>0,00168518518518519000</text:p>
          </table:table-cell>
          <table:table-cell table:formula="of:=[.D210]-[.D209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70" office:value-type="float" office:value="14630" calcext:value-type="float">
            <text:p>14630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169328703703704" calcext:value-type="float">
            <text:p>0,00169328703703704000</text:p>
          </table:table-cell>
          <table:table-cell table:formula="of:=[.D211]-[.D210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70" office:value-type="float" office:value="14700" calcext:value-type="float">
            <text:p>1470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170138888888889" calcext:value-type="float">
            <text:p>0,00170138888888889000</text:p>
          </table:table-cell>
          <table:table-cell table:formula="of:=[.D212]-[.D211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70" office:value-type="float" office:value="14770" calcext:value-type="float">
            <text:p>14770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170949074074074" calcext:value-type="float">
            <text:p>0,00170949074074074000</text:p>
          </table:table-cell>
          <table:table-cell table:formula="of:=[.D213]-[.D212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70" office:value-type="float" office:value="14840" calcext:value-type="float">
            <text:p>14840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171759259259259" calcext:value-type="float">
            <text:p>0,00171759259259259000</text:p>
          </table:table-cell>
          <table:table-cell table:formula="of:=[.D214]-[.D213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70" office:value-type="float" office:value="14910" calcext:value-type="float">
            <text:p>14910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172569444444444" calcext:value-type="float">
            <text:p>0,00172569444444444000</text:p>
          </table:table-cell>
          <table:table-cell table:formula="of:=[.D215]-[.D214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70" office:value-type="float" office:value="14980" calcext:value-type="float">
            <text:p>14980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17337962962963" calcext:value-type="float">
            <text:p>0,00173379629629630000</text:p>
          </table:table-cell>
          <table:table-cell table:formula="of:=[.D216]-[.D215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70" office:value-type="float" office:value="15050" calcext:value-type="float">
            <text:p>15050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174189814814815" calcext:value-type="float">
            <text:p>0,00174189814814815000</text:p>
          </table:table-cell>
          <table:table-cell table:formula="of:=[.D217]-[.D216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70" office:value-type="float" office:value="15120" calcext:value-type="float">
            <text:p>15120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175" calcext:value-type="float">
            <text:p>0,00175000000000000000</text:p>
          </table:table-cell>
          <table:table-cell table:formula="of:=[.D218]-[.D217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70" office:value-type="float" office:value="15190" calcext:value-type="float">
            <text:p>15190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175810185185185" calcext:value-type="float">
            <text:p>0,00175810185185185000</text:p>
          </table:table-cell>
          <table:table-cell table:formula="of:=[.D219]-[.D218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70" office:value-type="float" office:value="15260" calcext:value-type="float">
            <text:p>15260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17662037037037" calcext:value-type="float">
            <text:p>0,00176620370370370000</text:p>
          </table:table-cell>
          <table:table-cell table:formula="of:=[.D220]-[.D219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70" office:value-type="float" office:value="15330" calcext:value-type="float">
            <text:p>15330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177430555555556" calcext:value-type="float">
            <text:p>0,00177430555555556000</text:p>
          </table:table-cell>
          <table:table-cell table:formula="of:=[.D221]-[.D220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70" office:value-type="float" office:value="15400" calcext:value-type="float">
            <text:p>1540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178240740740741" calcext:value-type="float">
            <text:p>0,00178240740740741000</text:p>
          </table:table-cell>
          <table:table-cell table:formula="of:=[.D222]-[.D221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70" office:value-type="float" office:value="15470" calcext:value-type="float">
            <text:p>15470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179050925925926" calcext:value-type="float">
            <text:p>0,00179050925925926000</text:p>
          </table:table-cell>
          <table:table-cell table:formula="of:=[.D223]-[.D222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70" office:value-type="float" office:value="15540" calcext:value-type="float">
            <text:p>15540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179861111111111" calcext:value-type="float">
            <text:p>0,00179861111111111000</text:p>
          </table:table-cell>
          <table:table-cell table:formula="of:=[.D224]-[.D223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70" office:value-type="float" office:value="15610" calcext:value-type="float">
            <text:p>15610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180671296296296" calcext:value-type="float">
            <text:p>0,00180671296296296000</text:p>
          </table:table-cell>
          <table:table-cell table:formula="of:=[.D225]-[.D224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70" office:value-type="float" office:value="15680" calcext:value-type="float">
            <text:p>15680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181481481481482" calcext:value-type="float">
            <text:p>0,00181481481481482000</text:p>
          </table:table-cell>
          <table:table-cell table:formula="of:=[.D226]-[.D225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70" office:value-type="float" office:value="15750" calcext:value-type="float">
            <text:p>15750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182291666666667" calcext:value-type="float">
            <text:p>0,00182291666666667000</text:p>
          </table:table-cell>
          <table:table-cell table:formula="of:=[.D227]-[.D226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70" office:value-type="float" office:value="15820" calcext:value-type="float">
            <text:p>15820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183101851851852" calcext:value-type="float">
            <text:p>0,00183101851851852000</text:p>
          </table:table-cell>
          <table:table-cell table:formula="of:=[.D228]-[.D227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70" office:value-type="float" office:value="15890" calcext:value-type="float">
            <text:p>15890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183912037037037" calcext:value-type="float">
            <text:p>0,00183912037037037000</text:p>
          </table:table-cell>
          <table:table-cell table:formula="of:=[.D229]-[.D228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70" office:value-type="float" office:value="15960" calcext:value-type="float">
            <text:p>15960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184722222222222" calcext:value-type="float">
            <text:p>0,00184722222222222000</text:p>
          </table:table-cell>
          <table:table-cell table:formula="of:=[.D230]-[.D229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70" office:value-type="float" office:value="16030" calcext:value-type="float">
            <text:p>16030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185532407407407" calcext:value-type="float">
            <text:p>0,00185532407407407000</text:p>
          </table:table-cell>
          <table:table-cell table:formula="of:=[.D231]-[.D230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70" office:value-type="float" office:value="16100" calcext:value-type="float">
            <text:p>1610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186342592592593" calcext:value-type="float">
            <text:p>0,00186342592592593000</text:p>
          </table:table-cell>
          <table:table-cell table:formula="of:=[.D232]-[.D231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70" office:value-type="float" office:value="16170" calcext:value-type="float">
            <text:p>16170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187152777777778" calcext:value-type="float">
            <text:p>0,00187152777777778000</text:p>
          </table:table-cell>
          <table:table-cell table:formula="of:=[.D233]-[.D232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70" office:value-type="float" office:value="16240" calcext:value-type="float">
            <text:p>16240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187962962962963" calcext:value-type="float">
            <text:p>0,00187962962962963000</text:p>
          </table:table-cell>
          <table:table-cell table:formula="of:=[.D234]-[.D233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70" office:value-type="float" office:value="16310" calcext:value-type="float">
            <text:p>16310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188773148148148" calcext:value-type="float">
            <text:p>0,00188773148148148000</text:p>
          </table:table-cell>
          <table:table-cell table:formula="of:=[.D235]-[.D234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70" office:value-type="float" office:value="16380" calcext:value-type="float">
            <text:p>16380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189583333333333" calcext:value-type="float">
            <text:p>0,00189583333333333000</text:p>
          </table:table-cell>
          <table:table-cell table:formula="of:=[.D236]-[.D235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70" office:value-type="float" office:value="16450" calcext:value-type="float">
            <text:p>16450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190393518518519" calcext:value-type="float">
            <text:p>0,00190393518518519000</text:p>
          </table:table-cell>
          <table:table-cell table:formula="of:=[.D237]-[.D236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70" office:value-type="float" office:value="16520" calcext:value-type="float">
            <text:p>16520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191203703703704" calcext:value-type="float">
            <text:p>0,00191203703703704000</text:p>
          </table:table-cell>
          <table:table-cell table:formula="of:=[.D238]-[.D237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70" office:value-type="float" office:value="16590" calcext:value-type="float">
            <text:p>16590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192013888888889" calcext:value-type="float">
            <text:p>0,00192013888888889000</text:p>
          </table:table-cell>
          <table:table-cell table:formula="of:=[.D239]-[.D238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70" office:value-type="float" office:value="16660" calcext:value-type="float">
            <text:p>16660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192824074074074" calcext:value-type="float">
            <text:p>0,00192824074074074000</text:p>
          </table:table-cell>
          <table:table-cell table:formula="of:=[.D240]-[.D239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70" office:value-type="float" office:value="16730" calcext:value-type="float">
            <text:p>16730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193634259259259" calcext:value-type="float">
            <text:p>0,00193634259259259000</text:p>
          </table:table-cell>
          <table:table-cell table:formula="of:=[.D241]-[.D240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70" office:value-type="float" office:value="16800" calcext:value-type="float">
            <text:p>1680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194444444444444" calcext:value-type="float">
            <text:p>0,00194444444444444000</text:p>
          </table:table-cell>
          <table:table-cell table:formula="of:=[.D242]-[.D241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70" office:value-type="float" office:value="16870" calcext:value-type="float">
            <text:p>16870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19525462962963" calcext:value-type="float">
            <text:p>0,00195254629629630000</text:p>
          </table:table-cell>
          <table:table-cell table:formula="of:=[.D243]-[.D242]" office:value-type="float" office:value="0.0000081018518518518" calcext:value-type="float">
            <text:p>0,00000810185185185180</text:p>
          </table:table-cell>
          <table:table-cell table:number-columns-repeated="16379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70" office:value-type="float" office:value="16940" calcext:value-type="float">
            <text:p>16940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196064814814815" calcext:value-type="float">
            <text:p>0,00196064814814815000</text:p>
          </table:table-cell>
          <table:table-cell table:formula="of:=[.D244]-[.D243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70" office:value-type="float" office:value="17010" calcext:value-type="float">
            <text:p>17010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196875" calcext:value-type="float">
            <text:p>0,00196875000000000000</text:p>
          </table:table-cell>
          <table:table-cell table:formula="of:=[.D245]-[.D244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70" office:value-type="float" office:value="17080" calcext:value-type="float">
            <text:p>17080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197685185185185" calcext:value-type="float">
            <text:p>0,00197685185185185000</text:p>
          </table:table-cell>
          <table:table-cell table:formula="of:=[.D246]-[.D245]" office:value-type="float" office:value="0.00000810185185185159" calcext:value-type="float">
            <text:p>0,00000810185185185159</text:p>
          </table:table-cell>
          <table:table-cell table:number-columns-repeated="1637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70" office:value-type="float" office:value="17150" calcext:value-type="float">
            <text:p>17150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19849537037037" calcext:value-type="float">
            <text:p>0,00198495370370370000</text:p>
          </table:table-cell>
          <table:table-cell table:formula="of:=[.D247]-[.D246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70" office:value-type="float" office:value="17220" calcext:value-type="float">
            <text:p>17220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199305555555556" calcext:value-type="float">
            <text:p>0,00199305555555556000</text:p>
          </table:table-cell>
          <table:table-cell table:formula="of:=[.D248]-[.D247]" office:value-type="float" office:value="0.00000810185185185159" calcext:value-type="float">
            <text:p>0,00000810185185185159</text:p>
          </table:table-cell>
          <table:table-cell table:number-columns-repeated="16379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70" office:value-type="float" office:value="17290" calcext:value-type="float">
            <text:p>17290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200115740740741" calcext:value-type="float">
            <text:p>0,00200115740740741000</text:p>
          </table:table-cell>
          <table:table-cell table:formula="of:=[.D249]-[.D248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70" office:value-type="float" office:value="17360" calcext:value-type="float">
            <text:p>17360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200925925925926" calcext:value-type="float">
            <text:p>0,00200925925925926000</text:p>
          </table:table-cell>
          <table:table-cell table:formula="of:=[.D250]-[.D249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70" office:value-type="float" office:value="17430" calcext:value-type="float">
            <text:p>17430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201736111111111" calcext:value-type="float">
            <text:p>0,00201736111111111000</text:p>
          </table:table-cell>
          <table:table-cell table:formula="of:=[.D251]-[.D250]" office:value-type="float" office:value="0.00000810185185185159" calcext:value-type="float">
            <text:p>0,00000810185185185159</text:p>
          </table:table-cell>
          <table:table-cell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70" office:value-type="float" office:value="17500" calcext:value-type="float">
            <text:p>1750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202546296296296" calcext:value-type="float">
            <text:p>0,00202546296296296000</text:p>
          </table:table-cell>
          <table:table-cell table:formula="of:=[.D252]-[.D251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70" office:value-type="float" office:value="17570" calcext:value-type="float">
            <text:p>17570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203356481481482" calcext:value-type="float">
            <text:p>0,00203356481481482000</text:p>
          </table:table-cell>
          <table:table-cell table:formula="of:=[.D253]-[.D252]" office:value-type="float" office:value="0.00000810185185185159" calcext:value-type="float">
            <text:p>0,00000810185185185159</text:p>
          </table:table-cell>
          <table:table-cell table:number-columns-repeated="16379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70" office:value-type="float" office:value="17640" calcext:value-type="float">
            <text:p>17640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204166666666667" calcext:value-type="float">
            <text:p>0,00204166666666667000</text:p>
          </table:table-cell>
          <table:table-cell table:formula="of:=[.D254]-[.D253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70" office:value-type="float" office:value="17710" calcext:value-type="float">
            <text:p>17710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204976851851852" calcext:value-type="float">
            <text:p>0,00204976851851852000</text:p>
          </table:table-cell>
          <table:table-cell table:formula="of:=[.D255]-[.D254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70" office:value-type="float" office:value="17780" calcext:value-type="float">
            <text:p>17780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205787037037037" calcext:value-type="float">
            <text:p>0,00205787037037037000</text:p>
          </table:table-cell>
          <table:table-cell table:formula="of:=[.D256]-[.D255]" office:value-type="float" office:value="0.00000810185185185159" calcext:value-type="float">
            <text:p>0,00000810185185185159</text:p>
          </table:table-cell>
          <table:table-cell table:number-columns-repeated="16379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70" office:value-type="float" office:value="17850" calcext:value-type="float">
            <text:p>17850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206597222222222" calcext:value-type="float">
            <text:p>0,00206597222222222000</text:p>
          </table:table-cell>
          <table:table-cell table:formula="of:=[.D257]-[.D256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70" office:value-type="float" office:value="17920" calcext:value-type="float">
            <text:p>17920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207407407407407" calcext:value-type="float">
            <text:p>0,00207407407407407000</text:p>
          </table:table-cell>
          <table:table-cell table:formula="of:=[.D258]-[.D257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70" office:value-type="float" office:value="17990" calcext:value-type="float">
            <text:p>17990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208217592592593" calcext:value-type="float">
            <text:p>0,00208217592592593000</text:p>
          </table:table-cell>
          <table:table-cell table:formula="of:=[.D259]-[.D258]" office:value-type="float" office:value="0.00000810185185185159" calcext:value-type="float">
            <text:p>0,00000810185185185159</text:p>
          </table:table-cell>
          <table:table-cell table:number-columns-repeated="16379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70" office:value-type="float" office:value="18060" calcext:value-type="float">
            <text:p>18060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209027777777778" calcext:value-type="float">
            <text:p>0,00209027777777778000</text:p>
          </table:table-cell>
          <table:table-cell table:formula="of:=[.D260]-[.D259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70" office:value-type="float" office:value="18130" calcext:value-type="float">
            <text:p>18130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209837962962963" calcext:value-type="float">
            <text:p>0,00209837962962963000</text:p>
          </table:table-cell>
          <table:table-cell table:formula="of:=[.D261]-[.D260]" office:value-type="float" office:value="0.00000810185185185159" calcext:value-type="float">
            <text:p>0,00000810185185185159</text:p>
          </table:table-cell>
          <table:table-cell table:number-columns-repeated="16379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70" office:value-type="float" office:value="18200" calcext:value-type="float">
            <text:p>1820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210648148148148" calcext:value-type="float">
            <text:p>0,00210648148148148000</text:p>
          </table:table-cell>
          <table:table-cell table:formula="of:=[.D262]-[.D261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70" office:value-type="float" office:value="18270" calcext:value-type="float">
            <text:p>18270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211458333333333" calcext:value-type="float">
            <text:p>0,00211458333333333000</text:p>
          </table:table-cell>
          <table:table-cell table:formula="of:=[.D263]-[.D262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70" office:value-type="float" office:value="18340" calcext:value-type="float">
            <text:p>18340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212268518518519" calcext:value-type="float">
            <text:p>0,00212268518518519000</text:p>
          </table:table-cell>
          <table:table-cell table:formula="of:=[.D264]-[.D263]" office:value-type="float" office:value="0.00000810185185185159" calcext:value-type="float">
            <text:p>0,00000810185185185159</text:p>
          </table:table-cell>
          <table:table-cell table:number-columns-repeated="16379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70" office:value-type="float" office:value="18410" calcext:value-type="float">
            <text:p>18410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213078703703704" calcext:value-type="float">
            <text:p>0,00213078703703704000</text:p>
          </table:table-cell>
          <table:table-cell table:formula="of:=[.D265]-[.D264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70" office:value-type="float" office:value="18480" calcext:value-type="float">
            <text:p>18480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213888888888889" calcext:value-type="float">
            <text:p>0,00213888888888889000</text:p>
          </table:table-cell>
          <table:table-cell table:formula="of:=[.D266]-[.D265]" office:value-type="float" office:value="0.00000810185185185159" calcext:value-type="float">
            <text:p>0,00000810185185185159</text:p>
          </table:table-cell>
          <table:table-cell table:number-columns-repeated="16379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70" office:value-type="float" office:value="18550" calcext:value-type="float">
            <text:p>18550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214699074074074" calcext:value-type="float">
            <text:p>0,00214699074074074000</text:p>
          </table:table-cell>
          <table:table-cell table:formula="of:=[.D267]-[.D266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70" office:value-type="float" office:value="18620" calcext:value-type="float">
            <text:p>18620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215509259259259" calcext:value-type="float">
            <text:p>0,00215509259259259000</text:p>
          </table:table-cell>
          <table:table-cell table:formula="of:=[.D268]-[.D267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70" office:value-type="float" office:value="18690" calcext:value-type="float">
            <text:p>18690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216319444444444" calcext:value-type="float">
            <text:p>0,00216319444444444000</text:p>
          </table:table-cell>
          <table:table-cell table:formula="of:=[.D269]-[.D268]" office:value-type="float" office:value="0.00000810185185185159" calcext:value-type="float">
            <text:p>0,00000810185185185159</text:p>
          </table:table-cell>
          <table:table-cell table:number-columns-repeated="16379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70" office:value-type="float" office:value="18760" calcext:value-type="float">
            <text:p>18760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21712962962963" calcext:value-type="float">
            <text:p>0,00217129629629630000</text:p>
          </table:table-cell>
          <table:table-cell table:formula="of:=[.D270]-[.D269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70" office:value-type="float" office:value="18830" calcext:value-type="float">
            <text:p>18830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217939814814815" calcext:value-type="float">
            <text:p>0,00217939814814815000</text:p>
          </table:table-cell>
          <table:table-cell table:formula="of:=[.D271]-[.D270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70" office:value-type="float" office:value="18900" calcext:value-type="float">
            <text:p>1890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21875" calcext:value-type="float">
            <text:p>0,00218750000000000000</text:p>
          </table:table-cell>
          <table:table-cell table:formula="of:=[.D272]-[.D271]" office:value-type="float" office:value="0.00000810185185185159" calcext:value-type="float">
            <text:p>0,00000810185185185159</text:p>
          </table:table-cell>
          <table:table-cell table:number-columns-repeated="16379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70" office:value-type="float" office:value="18970" calcext:value-type="float">
            <text:p>18970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219560185185185" calcext:value-type="float">
            <text:p>0,00219560185185185000</text:p>
          </table:table-cell>
          <table:table-cell table:formula="of:=[.D273]-[.D272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70" office:value-type="float" office:value="19040" calcext:value-type="float">
            <text:p>19040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22037037037037" calcext:value-type="float">
            <text:p>0,00220370370370370000</text:p>
          </table:table-cell>
          <table:table-cell table:formula="of:=[.D274]-[.D273]" office:value-type="float" office:value="0.00000810185185185159" calcext:value-type="float">
            <text:p>0,00000810185185185159</text:p>
          </table:table-cell>
          <table:table-cell table:number-columns-repeated="16379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70" office:value-type="float" office:value="19110" calcext:value-type="float">
            <text:p>19110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221180555555556" calcext:value-type="float">
            <text:p>0,00221180555555556000</text:p>
          </table:table-cell>
          <table:table-cell table:formula="of:=[.D275]-[.D274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70" office:value-type="float" office:value="19180" calcext:value-type="float">
            <text:p>19180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221990740740741" calcext:value-type="float">
            <text:p>0,00221990740740741000</text:p>
          </table:table-cell>
          <table:table-cell table:formula="of:=[.D276]-[.D275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70" office:value-type="float" office:value="19250" calcext:value-type="float">
            <text:p>19250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222800925925926" calcext:value-type="float">
            <text:p>0,00222800925925926000</text:p>
          </table:table-cell>
          <table:table-cell table:formula="of:=[.D277]-[.D276]" office:value-type="float" office:value="0.00000810185185185159" calcext:value-type="float">
            <text:p>0,00000810185185185159</text:p>
          </table:table-cell>
          <table:table-cell table:number-columns-repeated="16379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70" office:value-type="float" office:value="19320" calcext:value-type="float">
            <text:p>19320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223611111111111" calcext:value-type="float">
            <text:p>0,00223611111111111000</text:p>
          </table:table-cell>
          <table:table-cell table:formula="of:=[.D278]-[.D277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70" office:value-type="float" office:value="19390" calcext:value-type="float">
            <text:p>19390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224421296296296" calcext:value-type="float">
            <text:p>0,00224421296296296000</text:p>
          </table:table-cell>
          <table:table-cell table:formula="of:=[.D279]-[.D278]" office:value-type="float" office:value="0.00000810185185185159" calcext:value-type="float">
            <text:p>0,00000810185185185159</text:p>
          </table:table-cell>
          <table:table-cell table:number-columns-repeated="16379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70" office:value-type="float" office:value="19460" calcext:value-type="float">
            <text:p>19460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225231481481481" calcext:value-type="float">
            <text:p>0,00225231481481481000</text:p>
          </table:table-cell>
          <table:table-cell table:formula="of:=[.D280]-[.D279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70" office:value-type="float" office:value="19530" calcext:value-type="float">
            <text:p>19530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226041666666667" calcext:value-type="float">
            <text:p>0,00226041666666667000</text:p>
          </table:table-cell>
          <table:table-cell table:formula="of:=[.D281]-[.D280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70" office:value-type="float" office:value="19600" calcext:value-type="float">
            <text:p>1960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226851851851852" calcext:value-type="float">
            <text:p>0,00226851851851852000</text:p>
          </table:table-cell>
          <table:table-cell table:formula="of:=[.D282]-[.D281]" office:value-type="float" office:value="0.00000810185185185159" calcext:value-type="float">
            <text:p>0,00000810185185185159</text:p>
          </table:table-cell>
          <table:table-cell table:number-columns-repeated="16379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70" office:value-type="float" office:value="19670" calcext:value-type="float">
            <text:p>19670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227662037037037" calcext:value-type="float">
            <text:p>0,00227662037037037000</text:p>
          </table:table-cell>
          <table:table-cell table:formula="of:=[.D283]-[.D282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70" office:value-type="float" office:value="19740" calcext:value-type="float">
            <text:p>19740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228472222222222" calcext:value-type="float">
            <text:p>0,00228472222222222000</text:p>
          </table:table-cell>
          <table:table-cell table:formula="of:=[.D284]-[.D283]" office:value-type="float" office:value="0.00000810185185185159" calcext:value-type="float">
            <text:p>0,00000810185185185159</text:p>
          </table:table-cell>
          <table:table-cell table:number-columns-repeated="16379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70" office:value-type="float" office:value="19810" calcext:value-type="float">
            <text:p>19810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229282407407407" calcext:value-type="float">
            <text:p>0,00229282407407407000</text:p>
          </table:table-cell>
          <table:table-cell table:formula="of:=[.D285]-[.D284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70" office:value-type="float" office:value="19880" calcext:value-type="float">
            <text:p>19880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230092592592593" calcext:value-type="float">
            <text:p>0,00230092592592593000</text:p>
          </table:table-cell>
          <table:table-cell table:formula="of:=[.D286]-[.D285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70" office:value-type="float" office:value="19950" calcext:value-type="float">
            <text:p>19950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230902777777778" calcext:value-type="float">
            <text:p>0,00230902777777778000</text:p>
          </table:table-cell>
          <table:table-cell table:formula="of:=[.D287]-[.D286]" office:value-type="float" office:value="0.00000810185185185159" calcext:value-type="float">
            <text:p>0,00000810185185185159</text:p>
          </table:table-cell>
          <table:table-cell table:number-columns-repeated="16379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70" office:value-type="float" office:value="20020" calcext:value-type="float">
            <text:p>20020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231712962962963" calcext:value-type="float">
            <text:p>0,00231712962962963000</text:p>
          </table:table-cell>
          <table:table-cell table:formula="of:=[.D288]-[.D287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70" office:value-type="float" office:value="20090" calcext:value-type="float">
            <text:p>20090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232523148148148" calcext:value-type="float">
            <text:p>0,00232523148148148000</text:p>
          </table:table-cell>
          <table:table-cell table:formula="of:=[.D289]-[.D288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70" office:value-type="float" office:value="20160" calcext:value-type="float">
            <text:p>20160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233333333333333" calcext:value-type="float">
            <text:p>0,00233333333333333000</text:p>
          </table:table-cell>
          <table:table-cell table:formula="of:=[.D290]-[.D289]" office:value-type="float" office:value="0.00000810185185185159" calcext:value-type="float">
            <text:p>0,00000810185185185159</text:p>
          </table:table-cell>
          <table:table-cell table:number-columns-repeated="16379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70" office:value-type="float" office:value="20230" calcext:value-type="float">
            <text:p>20230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234143518518519" calcext:value-type="float">
            <text:p>0,00234143518518519000</text:p>
          </table:table-cell>
          <table:table-cell table:formula="of:=[.D291]-[.D290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70" office:value-type="float" office:value="20300" calcext:value-type="float">
            <text:p>2030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234953703703704" calcext:value-type="float">
            <text:p>0,00234953703703704000</text:p>
          </table:table-cell>
          <table:table-cell table:formula="of:=[.D292]-[.D291]" office:value-type="float" office:value="0.00000810185185185159" calcext:value-type="float">
            <text:p>0,00000810185185185159</text:p>
          </table:table-cell>
          <table:table-cell table:number-columns-repeated="16379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70" office:value-type="float" office:value="20370" calcext:value-type="float">
            <text:p>20370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235763888888889" calcext:value-type="float">
            <text:p>0,00235763888888889000</text:p>
          </table:table-cell>
          <table:table-cell table:formula="of:=[.D293]-[.D292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70" office:value-type="float" office:value="20440" calcext:value-type="float">
            <text:p>20440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236574074074074" calcext:value-type="float">
            <text:p>0,00236574074074074000</text:p>
          </table:table-cell>
          <table:table-cell table:formula="of:=[.D294]-[.D293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70" office:value-type="float" office:value="20510" calcext:value-type="float">
            <text:p>20510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237384259259259" calcext:value-type="float">
            <text:p>0,00237384259259259000</text:p>
          </table:table-cell>
          <table:table-cell table:formula="of:=[.D295]-[.D294]" office:value-type="float" office:value="0.00000810185185185159" calcext:value-type="float">
            <text:p>0,00000810185185185159</text:p>
          </table:table-cell>
          <table:table-cell table:number-columns-repeated="16379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70" office:value-type="float" office:value="20580" calcext:value-type="float">
            <text:p>20580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238194444444444" calcext:value-type="float">
            <text:p>0,00238194444444444000</text:p>
          </table:table-cell>
          <table:table-cell table:formula="of:=[.D296]-[.D295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70" office:value-type="float" office:value="20650" calcext:value-type="float">
            <text:p>20650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23900462962963" calcext:value-type="float">
            <text:p>0,00239004629629630000</text:p>
          </table:table-cell>
          <table:table-cell table:formula="of:=[.D297]-[.D296]" office:value-type="float" office:value="0.00000810185185185159" calcext:value-type="float">
            <text:p>0,00000810185185185159</text:p>
          </table:table-cell>
          <table:table-cell table:number-columns-repeated="16379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70" office:value-type="float" office:value="20720" calcext:value-type="float">
            <text:p>20720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239814814814815" calcext:value-type="float">
            <text:p>0,00239814814814815000</text:p>
          </table:table-cell>
          <table:table-cell table:formula="of:=[.D298]-[.D297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70" office:value-type="float" office:value="20790" calcext:value-type="float">
            <text:p>20790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240625" calcext:value-type="float">
            <text:p>0,00240625000000000000</text:p>
          </table:table-cell>
          <table:table-cell table:formula="of:=[.D299]-[.D298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70" office:value-type="float" office:value="20860" calcext:value-type="float">
            <text:p>20860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241435185185185" calcext:value-type="float">
            <text:p>0,00241435185185185000</text:p>
          </table:table-cell>
          <table:table-cell table:formula="of:=[.D300]-[.D299]" office:value-type="float" office:value="0.00000810185185185159" calcext:value-type="float">
            <text:p>0,00000810185185185159</text:p>
          </table:table-cell>
          <table:table-cell table:number-columns-repeated="16379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70" office:value-type="float" office:value="20930" calcext:value-type="float">
            <text:p>20930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24224537037037" calcext:value-type="float">
            <text:p>0,00242245370370370000</text:p>
          </table:table-cell>
          <table:table-cell table:formula="of:=[.D301]-[.D300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70" office:value-type="float" office:value="21000" calcext:value-type="float">
            <text:p>210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243055555555556" calcext:value-type="float">
            <text:p>0,00243055555555556000</text:p>
          </table:table-cell>
          <table:table-cell table:formula="of:=[.D302]-[.D301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70" office:value-type="float" office:value="21070" calcext:value-type="float">
            <text:p>21070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243865740740741" calcext:value-type="float">
            <text:p>0,00243865740740741000</text:p>
          </table:table-cell>
          <table:table-cell table:formula="of:=[.D303]-[.D302]" office:value-type="float" office:value="0.00000810185185185159" calcext:value-type="float">
            <text:p>0,00000810185185185159</text:p>
          </table:table-cell>
          <table:table-cell table:number-columns-repeated="16379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70" office:value-type="float" office:value="21140" calcext:value-type="float">
            <text:p>21140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244675925925926" calcext:value-type="float">
            <text:p>0,00244675925925926000</text:p>
          </table:table-cell>
          <table:table-cell table:formula="of:=[.D304]-[.D303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70" office:value-type="float" office:value="21210" calcext:value-type="float">
            <text:p>21210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245486111111111" calcext:value-type="float">
            <text:p>0,00245486111111111000</text:p>
          </table:table-cell>
          <table:table-cell table:formula="of:=[.D305]-[.D304]" office:value-type="float" office:value="0.00000810185185185159" calcext:value-type="float">
            <text:p>0,00000810185185185159</text:p>
          </table:table-cell>
          <table:table-cell table:number-columns-repeated="16379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70" office:value-type="float" office:value="21280" calcext:value-type="float">
            <text:p>21280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246296296296296" calcext:value-type="float">
            <text:p>0,00246296296296296000</text:p>
          </table:table-cell>
          <table:table-cell table:formula="of:=[.D306]-[.D305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70" office:value-type="float" office:value="21350" calcext:value-type="float">
            <text:p>21350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247106481481482" calcext:value-type="float">
            <text:p>0,00247106481481482000</text:p>
          </table:table-cell>
          <table:table-cell table:formula="of:=[.D307]-[.D306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70" office:value-type="float" office:value="21420" calcext:value-type="float">
            <text:p>21420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247916666666667" calcext:value-type="float">
            <text:p>0,00247916666666667000</text:p>
          </table:table-cell>
          <table:table-cell table:formula="of:=[.D308]-[.D307]" office:value-type="float" office:value="0.00000810185185185159" calcext:value-type="float">
            <text:p>0,00000810185185185159</text:p>
          </table:table-cell>
          <table:table-cell table:number-columns-repeated="16379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70" office:value-type="float" office:value="21490" calcext:value-type="float">
            <text:p>21490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248726851851852" calcext:value-type="float">
            <text:p>0,00248726851851852000</text:p>
          </table:table-cell>
          <table:table-cell table:formula="of:=[.D309]-[.D308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70" office:value-type="float" office:value="21560" calcext:value-type="float">
            <text:p>21560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249537037037037" calcext:value-type="float">
            <text:p>0,00249537037037037000</text:p>
          </table:table-cell>
          <table:table-cell table:formula="of:=[.D310]-[.D309]" office:value-type="float" office:value="0.00000810185185185159" calcext:value-type="float">
            <text:p>0,00000810185185185159</text:p>
          </table:table-cell>
          <table:table-cell table:number-columns-repeated="16379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70" office:value-type="float" office:value="21630" calcext:value-type="float">
            <text:p>21630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250347222222222" calcext:value-type="float">
            <text:p>0,00250347222222222000</text:p>
          </table:table-cell>
          <table:table-cell table:formula="of:=[.D311]-[.D310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70" office:value-type="float" office:value="21700" calcext:value-type="float">
            <text:p>2170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251157407407407" calcext:value-type="float">
            <text:p>0,00251157407407407000</text:p>
          </table:table-cell>
          <table:table-cell table:formula="of:=[.D312]-[.D311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70" office:value-type="float" office:value="21770" calcext:value-type="float">
            <text:p>21770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251967592592593" calcext:value-type="float">
            <text:p>0,00251967592592593000</text:p>
          </table:table-cell>
          <table:table-cell table:formula="of:=[.D313]-[.D312]" office:value-type="float" office:value="0.00000810185185185159" calcext:value-type="float">
            <text:p>0,00000810185185185159</text:p>
          </table:table-cell>
          <table:table-cell table:number-columns-repeated="16379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70" office:value-type="float" office:value="21840" calcext:value-type="float">
            <text:p>21840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252777777777778" calcext:value-type="float">
            <text:p>0,00252777777777778000</text:p>
          </table:table-cell>
          <table:table-cell table:formula="of:=[.D314]-[.D313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70" office:value-type="float" office:value="21910" calcext:value-type="float">
            <text:p>21910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253587962962963" calcext:value-type="float">
            <text:p>0,00253587962962963000</text:p>
          </table:table-cell>
          <table:table-cell table:formula="of:=[.D315]-[.D314]" office:value-type="float" office:value="0.00000810185185185159" calcext:value-type="float">
            <text:p>0,00000810185185185159</text:p>
          </table:table-cell>
          <table:table-cell table:number-columns-repeated="16379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70" office:value-type="float" office:value="21980" calcext:value-type="float">
            <text:p>21980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254398148148148" calcext:value-type="float">
            <text:p>0,00254398148148148000</text:p>
          </table:table-cell>
          <table:table-cell table:formula="of:=[.D316]-[.D315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70" office:value-type="float" office:value="22050" calcext:value-type="float">
            <text:p>22050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255208333333333" calcext:value-type="float">
            <text:p>0,00255208333333333000</text:p>
          </table:table-cell>
          <table:table-cell table:formula="of:=[.D317]-[.D316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70" office:value-type="float" office:value="22120" calcext:value-type="float">
            <text:p>22120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256018518518519" calcext:value-type="float">
            <text:p>0,00256018518518519000</text:p>
          </table:table-cell>
          <table:table-cell table:formula="of:=[.D318]-[.D317]" office:value-type="float" office:value="0.00000810185185185159" calcext:value-type="float">
            <text:p>0,00000810185185185159</text:p>
          </table:table-cell>
          <table:table-cell table:number-columns-repeated="16379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70" office:value-type="float" office:value="22190" calcext:value-type="float">
            <text:p>22190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256828703703704" calcext:value-type="float">
            <text:p>0,00256828703703704000</text:p>
          </table:table-cell>
          <table:table-cell table:formula="of:=[.D319]-[.D318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70" office:value-type="float" office:value="22260" calcext:value-type="float">
            <text:p>22260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257638888888889" calcext:value-type="float">
            <text:p>0,00257638888888889000</text:p>
          </table:table-cell>
          <table:table-cell table:formula="of:=[.D320]-[.D319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70" office:value-type="float" office:value="22330" calcext:value-type="float">
            <text:p>22330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258449074074074" calcext:value-type="float">
            <text:p>0,00258449074074074000</text:p>
          </table:table-cell>
          <table:table-cell table:formula="of:=[.D321]-[.D320]" office:value-type="float" office:value="0.00000810185185185159" calcext:value-type="float">
            <text:p>0,00000810185185185159</text:p>
          </table:table-cell>
          <table:table-cell table:number-columns-repeated="16379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70" office:value-type="float" office:value="22400" calcext:value-type="float">
            <text:p>2240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259259259259259" calcext:value-type="float">
            <text:p>0,00259259259259259000</text:p>
          </table:table-cell>
          <table:table-cell table:formula="of:=[.D322]-[.D321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70" office:value-type="float" office:value="22470" calcext:value-type="float">
            <text:p>22470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260069444444444" calcext:value-type="float">
            <text:p>0,00260069444444444000</text:p>
          </table:table-cell>
          <table:table-cell table:formula="of:=[.D323]-[.D322]" office:value-type="float" office:value="0.00000810185185185159" calcext:value-type="float">
            <text:p>0,00000810185185185159</text:p>
          </table:table-cell>
          <table:table-cell table:number-columns-repeated="16379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70" office:value-type="float" office:value="22540" calcext:value-type="float">
            <text:p>22540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26087962962963" calcext:value-type="float">
            <text:p>0,00260879629629630000</text:p>
          </table:table-cell>
          <table:table-cell table:formula="of:=[.D324]-[.D323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70" office:value-type="float" office:value="22610" calcext:value-type="float">
            <text:p>22610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261689814814815" calcext:value-type="float">
            <text:p>0,00261689814814815000</text:p>
          </table:table-cell>
          <table:table-cell table:formula="of:=[.D325]-[.D324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70" office:value-type="float" office:value="22680" calcext:value-type="float">
            <text:p>22680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2625" calcext:value-type="float">
            <text:p>0,00262500000000000000</text:p>
          </table:table-cell>
          <table:table-cell table:formula="of:=[.D326]-[.D325]" office:value-type="float" office:value="0.00000810185185185159" calcext:value-type="float">
            <text:p>0,00000810185185185159</text:p>
          </table:table-cell>
          <table:table-cell table:number-columns-repeated="16379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70" office:value-type="float" office:value="22750" calcext:value-type="float">
            <text:p>22750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263310185185185" calcext:value-type="float">
            <text:p>0,00263310185185185000</text:p>
          </table:table-cell>
          <table:table-cell table:formula="of:=[.D327]-[.D326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70" office:value-type="float" office:value="22820" calcext:value-type="float">
            <text:p>22820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26412037037037" calcext:value-type="float">
            <text:p>0,00264120370370370000</text:p>
          </table:table-cell>
          <table:table-cell table:formula="of:=[.D328]-[.D327]" office:value-type="float" office:value="0.00000810185185185159" calcext:value-type="float">
            <text:p>0,00000810185185185159</text:p>
          </table:table-cell>
          <table:table-cell table:number-columns-repeated="16379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70" office:value-type="float" office:value="22890" calcext:value-type="float">
            <text:p>22890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264930555555556" calcext:value-type="float">
            <text:p>0,00264930555555556000</text:p>
          </table:table-cell>
          <table:table-cell table:formula="of:=[.D329]-[.D328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70" office:value-type="float" office:value="22960" calcext:value-type="float">
            <text:p>22960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265740740740741" calcext:value-type="float">
            <text:p>0,00265740740740741000</text:p>
          </table:table-cell>
          <table:table-cell table:formula="of:=[.D330]-[.D329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70" office:value-type="float" office:value="23030" calcext:value-type="float">
            <text:p>23030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266550925925926" calcext:value-type="float">
            <text:p>0,00266550925925926000</text:p>
          </table:table-cell>
          <table:table-cell table:formula="of:=[.D331]-[.D330]" office:value-type="float" office:value="0.00000810185185185159" calcext:value-type="float">
            <text:p>0,00000810185185185159</text:p>
          </table:table-cell>
          <table:table-cell table:number-columns-repeated="16379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70" office:value-type="float" office:value="23100" calcext:value-type="float">
            <text:p>2310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267361111111111" calcext:value-type="float">
            <text:p>0,00267361111111111000</text:p>
          </table:table-cell>
          <table:table-cell table:formula="of:=[.D332]-[.D331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70" office:value-type="float" office:value="23170" calcext:value-type="float">
            <text:p>23170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268171296296296" calcext:value-type="float">
            <text:p>0,00268171296296296000</text:p>
          </table:table-cell>
          <table:table-cell table:formula="of:=[.D333]-[.D332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70" office:value-type="float" office:value="23240" calcext:value-type="float">
            <text:p>23240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268981481481482" calcext:value-type="float">
            <text:p>0,00268981481481482000</text:p>
          </table:table-cell>
          <table:table-cell table:formula="of:=[.D334]-[.D333]" office:value-type="float" office:value="0.00000810185185185159" calcext:value-type="float">
            <text:p>0,00000810185185185159</text:p>
          </table:table-cell>
          <table:table-cell table:number-columns-repeated="16379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70" office:value-type="float" office:value="23310" calcext:value-type="float">
            <text:p>23310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269791666666667" calcext:value-type="float">
            <text:p>0,00269791666666667000</text:p>
          </table:table-cell>
          <table:table-cell table:formula="of:=[.D335]-[.D334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70" office:value-type="float" office:value="23380" calcext:value-type="float">
            <text:p>23380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270601851851852" calcext:value-type="float">
            <text:p>0,00270601851851852000</text:p>
          </table:table-cell>
          <table:table-cell table:formula="of:=[.D336]-[.D335]" office:value-type="float" office:value="0.00000810185185185159" calcext:value-type="float">
            <text:p>0,00000810185185185159</text:p>
          </table:table-cell>
          <table:table-cell table:number-columns-repeated="16379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70" office:value-type="float" office:value="23450" calcext:value-type="float">
            <text:p>23450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271412037037037" calcext:value-type="float">
            <text:p>0,00271412037037037000</text:p>
          </table:table-cell>
          <table:table-cell table:formula="of:=[.D337]-[.D336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70" office:value-type="float" office:value="23520" calcext:value-type="float">
            <text:p>23520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272222222222222" calcext:value-type="float">
            <text:p>0,00272222222222222000</text:p>
          </table:table-cell>
          <table:table-cell table:formula="of:=[.D338]-[.D337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70" office:value-type="float" office:value="23590" calcext:value-type="float">
            <text:p>23590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273032407407407" calcext:value-type="float">
            <text:p>0,00273032407407407000</text:p>
          </table:table-cell>
          <table:table-cell table:formula="of:=[.D339]-[.D338]" office:value-type="float" office:value="0.00000810185185185159" calcext:value-type="float">
            <text:p>0,00000810185185185159</text:p>
          </table:table-cell>
          <table:table-cell table:number-columns-repeated="16379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70" office:value-type="float" office:value="23660" calcext:value-type="float">
            <text:p>23660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273842592592593" calcext:value-type="float">
            <text:p>0,00273842592592593000</text:p>
          </table:table-cell>
          <table:table-cell table:formula="of:=[.D340]-[.D339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70" office:value-type="float" office:value="23730" calcext:value-type="float">
            <text:p>23730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274652777777778" calcext:value-type="float">
            <text:p>0,00274652777777778000</text:p>
          </table:table-cell>
          <table:table-cell table:formula="of:=[.D341]-[.D340]" office:value-type="float" office:value="0.00000810185185185159" calcext:value-type="float">
            <text:p>0,00000810185185185159</text:p>
          </table:table-cell>
          <table:table-cell table:number-columns-repeated="16379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70" office:value-type="float" office:value="23800" calcext:value-type="float">
            <text:p>2380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275462962962963" calcext:value-type="float">
            <text:p>0,00275462962962963000</text:p>
          </table:table-cell>
          <table:table-cell table:formula="of:=[.D342]-[.D341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70" office:value-type="float" office:value="23870" calcext:value-type="float">
            <text:p>23870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276273148148148" calcext:value-type="float">
            <text:p>0,00276273148148148000</text:p>
          </table:table-cell>
          <table:table-cell table:formula="of:=[.D343]-[.D342]" office:value-type="float" office:value="0.00000810185185185202" calcext:value-type="float">
            <text:p>0,00000810185185185202</text:p>
          </table:table-cell>
          <table:table-cell table:number-columns-repeated="16379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70" office:value-type="float" office:value="23940" calcext:value-type="float">
            <text:p>23940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277083333333333" calcext:value-type="float">
            <text:p>0,00277083333333333000</text:p>
          </table:table-cell>
          <table:table-cell table:formula="of:=#REF!-[.D343]" office:value-type="string" office:string-value="" calcext:value-type="error">
            <text:p>#REF!</text:p>
          </table:table-cell>
          <table:table-cell table:number-columns-repeated="16379"/>
        </table:table-row>
        <table:table-row table:style-name="ro1" table:number-rows-repeated="104823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8:34:46.157381826</meta:creation-date>
    <dc:date>2026-05-17T18:34:54.108812940</dc:date>
    <meta:editing-duration>PT9S</meta:editing-duration>
    <meta:editing-cycles>1</meta:editing-cycles>
    <meta:document-statistic meta:table-count="1" meta:cell-count="1715" meta:object-count="0"/>
    <meta:generator>LibreOffice/24.2.7.2$Linux_X86_64 LibreOffice_project/420$Build-2</meta:generator>
  </office:meta>
</office:document-meta>
</file>