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47cm"/>
    </style:style>
    <style:style style:name="co4" style:family="table-column">
      <style:table-column-properties fo:break-before="auto" style:column-width="5.0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9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column table:style-name="co2" table:number-columns-repeated="5" table:default-cell-style-name="ce2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90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104166666666667" calcext:value-type="float">
            <text:p>0,00001041666666666670</text:p>
          </table:table-cell>
          <table:table-cell table:formula="of:=[.D3]-[.D2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90" office:value-type="float" office:value="180" calcext:value-type="float">
            <text:p>180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208333333333333" calcext:value-type="float">
            <text:p>0,00002083333333333330</text:p>
          </table:table-cell>
          <table:table-cell table:formula="of:=[.D4]-[.D3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90" office:value-type="float" office:value="270" calcext:value-type="float">
            <text:p>270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3125" calcext:value-type="float">
            <text:p>0,00003125000000000000</text:p>
          </table:table-cell>
          <table:table-cell table:formula="of:=[.D5]-[.D4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90" office:value-type="float" office:value="360" calcext:value-type="float">
            <text:p>360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416666666666667" calcext:value-type="float">
            <text:p>0,00004166666666666670</text:p>
          </table:table-cell>
          <table:table-cell table:formula="of:=[.D6]-[.D5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90" office:value-type="float" office:value="450" calcext:value-type="float">
            <text:p>450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520833333333333" calcext:value-type="float">
            <text:p>0,00005208333333333330</text:p>
          </table:table-cell>
          <table:table-cell table:formula="of:=[.D7]-[.D6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90" office:value-type="float" office:value="540" calcext:value-type="float">
            <text:p>540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625" calcext:value-type="float">
            <text:p>0,00006250000000000000</text:p>
          </table:table-cell>
          <table:table-cell table:formula="of:=[.D8]-[.D7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90" office:value-type="float" office:value="630" calcext:value-type="float">
            <text:p>630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729166666666667" calcext:value-type="float">
            <text:p>0,00007291666666666670</text:p>
          </table:table-cell>
          <table:table-cell table:formula="of:=[.D9]-[.D8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90" office:value-type="float" office:value="720" calcext:value-type="float">
            <text:p>720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833333333333333" calcext:value-type="float">
            <text:p>0,00008333333333333330</text:p>
          </table:table-cell>
          <table:table-cell table:formula="of:=[.D10]-[.D9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90" office:value-type="float" office:value="810" calcext:value-type="float">
            <text:p>810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9375" calcext:value-type="float">
            <text:p>0,00009375000000000000</text:p>
          </table:table-cell>
          <table:table-cell table:formula="of:=[.D11]-[.D10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90" office:value-type="float" office:value="900" calcext:value-type="float">
            <text:p>90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104166666666667" calcext:value-type="float">
            <text:p>0,00010416666666666700</text:p>
          </table:table-cell>
          <table:table-cell table:formula="of:=[.D12]-[.D11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90" office:value-type="float" office:value="990" calcext:value-type="float">
            <text:p>990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114583333333333" calcext:value-type="float">
            <text:p>0,00011458333333333300</text:p>
          </table:table-cell>
          <table:table-cell table:formula="of:=[.D13]-[.D12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90" office:value-type="float" office:value="1080" calcext:value-type="float">
            <text:p>1080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125" calcext:value-type="float">
            <text:p>0,00012500000000000000</text:p>
          </table:table-cell>
          <table:table-cell table:formula="of:=[.D14]-[.D13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90" office:value-type="float" office:value="1170" calcext:value-type="float">
            <text:p>1170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135416666666667" calcext:value-type="float">
            <text:p>0,00013541666666666700</text:p>
          </table:table-cell>
          <table:table-cell table:formula="of:=[.D15]-[.D14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90" office:value-type="float" office:value="1260" calcext:value-type="float">
            <text:p>1260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145833333333333" calcext:value-type="float">
            <text:p>0,00014583333333333300</text:p>
          </table:table-cell>
          <table:table-cell table:formula="of:=[.D16]-[.D15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90" office:value-type="float" office:value="1350" calcext:value-type="float">
            <text:p>1350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15625" calcext:value-type="float">
            <text:p>0,00015625000000000000</text:p>
          </table:table-cell>
          <table:table-cell table:formula="of:=[.D17]-[.D16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90" office:value-type="float" office:value="1440" calcext:value-type="float">
            <text:p>1440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166666666666667" calcext:value-type="float">
            <text:p>0,00016666666666666700</text:p>
          </table:table-cell>
          <table:table-cell table:formula="of:=[.D18]-[.D17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90" office:value-type="float" office:value="1530" calcext:value-type="float">
            <text:p>1530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177083333333333" calcext:value-type="float">
            <text:p>0,00017708333333333300</text:p>
          </table:table-cell>
          <table:table-cell table:formula="of:=[.D19]-[.D18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90" office:value-type="float" office:value="1620" calcext:value-type="float">
            <text:p>1620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1875" calcext:value-type="float">
            <text:p>0,00018750000000000000</text:p>
          </table:table-cell>
          <table:table-cell table:formula="of:=[.D20]-[.D19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90" office:value-type="float" office:value="1710" calcext:value-type="float">
            <text:p>1710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197916666666667" calcext:value-type="float">
            <text:p>0,00019791666666666700</text:p>
          </table:table-cell>
          <table:table-cell table:formula="of:=[.D21]-[.D20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90" office:value-type="float" office:value="1800" calcext:value-type="float">
            <text:p>180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208333333333333" calcext:value-type="float">
            <text:p>0,00020833333333333300</text:p>
          </table:table-cell>
          <table:table-cell table:formula="of:=[.D22]-[.D21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90" office:value-type="float" office:value="1890" calcext:value-type="float">
            <text:p>1890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21875" calcext:value-type="float">
            <text:p>0,00021875000000000000</text:p>
          </table:table-cell>
          <table:table-cell table:formula="of:=[.D23]-[.D22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90" office:value-type="float" office:value="1980" calcext:value-type="float">
            <text:p>1980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229166666666667" calcext:value-type="float">
            <text:p>0,00022916666666666700</text:p>
          </table:table-cell>
          <table:table-cell table:formula="of:=[.D24]-[.D23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90" office:value-type="float" office:value="2070" calcext:value-type="float">
            <text:p>2070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239583333333333" calcext:value-type="float">
            <text:p>0,00023958333333333300</text:p>
          </table:table-cell>
          <table:table-cell table:formula="of:=[.D25]-[.D24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90" office:value-type="float" office:value="2160" calcext:value-type="float">
            <text:p>2160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25" calcext:value-type="float">
            <text:p>0,00025000000000000000</text:p>
          </table:table-cell>
          <table:table-cell table:formula="of:=[.D26]-[.D25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90" office:value-type="float" office:value="2250" calcext:value-type="float">
            <text:p>2250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260416666666667" calcext:value-type="float">
            <text:p>0,00026041666666666700</text:p>
          </table:table-cell>
          <table:table-cell table:formula="of:=[.D27]-[.D26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90" office:value-type="float" office:value="2340" calcext:value-type="float">
            <text:p>2340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270833333333333" calcext:value-type="float">
            <text:p>0,00027083333333333300</text:p>
          </table:table-cell>
          <table:table-cell table:formula="of:=[.D28]-[.D27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90" office:value-type="float" office:value="2430" calcext:value-type="float">
            <text:p>2430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28125" calcext:value-type="float">
            <text:p>0,00028125000000000000</text:p>
          </table:table-cell>
          <table:table-cell table:formula="of:=[.D29]-[.D28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90" office:value-type="float" office:value="2520" calcext:value-type="float">
            <text:p>2520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291666666666667" calcext:value-type="float">
            <text:p>0,00029166666666666700</text:p>
          </table:table-cell>
          <table:table-cell table:formula="of:=[.D30]-[.D29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90" office:value-type="float" office:value="2610" calcext:value-type="float">
            <text:p>2610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302083333333333" calcext:value-type="float">
            <text:p>0,00030208333333333300</text:p>
          </table:table-cell>
          <table:table-cell table:formula="of:=[.D31]-[.D30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90" office:value-type="float" office:value="2700" calcext:value-type="float">
            <text:p>270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3125" calcext:value-type="float">
            <text:p>0,00031250000000000000</text:p>
          </table:table-cell>
          <table:table-cell table:formula="of:=[.D32]-[.D31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90" office:value-type="float" office:value="2790" calcext:value-type="float">
            <text:p>2790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322916666666667" calcext:value-type="float">
            <text:p>0,00032291666666666700</text:p>
          </table:table-cell>
          <table:table-cell table:formula="of:=[.D33]-[.D32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90" office:value-type="float" office:value="2880" calcext:value-type="float">
            <text:p>2880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333333333333333" calcext:value-type="float">
            <text:p>0,00033333333333333300</text:p>
          </table:table-cell>
          <table:table-cell table:formula="of:=[.D34]-[.D33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90" office:value-type="float" office:value="2970" calcext:value-type="float">
            <text:p>2970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34375" calcext:value-type="float">
            <text:p>0,00034375000000000000</text:p>
          </table:table-cell>
          <table:table-cell table:formula="of:=[.D35]-[.D34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90" office:value-type="float" office:value="3060" calcext:value-type="float">
            <text:p>3060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354166666666667" calcext:value-type="float">
            <text:p>0,00035416666666666700</text:p>
          </table:table-cell>
          <table:table-cell table:formula="of:=[.D36]-[.D35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90" office:value-type="float" office:value="3150" calcext:value-type="float">
            <text:p>3150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364583333333333" calcext:value-type="float">
            <text:p>0,00036458333333333300</text:p>
          </table:table-cell>
          <table:table-cell table:formula="of:=[.D37]-[.D36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90" office:value-type="float" office:value="3240" calcext:value-type="float">
            <text:p>3240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375" calcext:value-type="float">
            <text:p>0,00037500000000000000</text:p>
          </table:table-cell>
          <table:table-cell table:formula="of:=[.D38]-[.D37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90" office:value-type="float" office:value="3330" calcext:value-type="float">
            <text:p>3330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385416666666667" calcext:value-type="float">
            <text:p>0,00038541666666666700</text:p>
          </table:table-cell>
          <table:table-cell table:formula="of:=[.D39]-[.D38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90" office:value-type="float" office:value="3420" calcext:value-type="float">
            <text:p>3420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395833333333333" calcext:value-type="float">
            <text:p>0,00039583333333333300</text:p>
          </table:table-cell>
          <table:table-cell table:formula="of:=[.D40]-[.D39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90" office:value-type="float" office:value="3510" calcext:value-type="float">
            <text:p>3510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40625" calcext:value-type="float">
            <text:p>0,00040625000000000000</text:p>
          </table:table-cell>
          <table:table-cell table:formula="of:=[.D41]-[.D40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90" office:value-type="float" office:value="3600" calcext:value-type="float">
            <text:p>360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416666666666667" calcext:value-type="float">
            <text:p>0,00041666666666666700</text:p>
          </table:table-cell>
          <table:table-cell table:formula="of:=[.D42]-[.D41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90" office:value-type="float" office:value="3690" calcext:value-type="float">
            <text:p>3690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427083333333333" calcext:value-type="float">
            <text:p>0,00042708333333333300</text:p>
          </table:table-cell>
          <table:table-cell table:formula="of:=[.D43]-[.D42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90" office:value-type="float" office:value="3780" calcext:value-type="float">
            <text:p>3780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4375" calcext:value-type="float">
            <text:p>0,00043750000000000000</text:p>
          </table:table-cell>
          <table:table-cell table:formula="of:=[.D44]-[.D43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90" office:value-type="float" office:value="3870" calcext:value-type="float">
            <text:p>3870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447916666666667" calcext:value-type="float">
            <text:p>0,00044791666666666700</text:p>
          </table:table-cell>
          <table:table-cell table:formula="of:=[.D45]-[.D44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90" office:value-type="float" office:value="3960" calcext:value-type="float">
            <text:p>3960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458333333333333" calcext:value-type="float">
            <text:p>0,00045833333333333300</text:p>
          </table:table-cell>
          <table:table-cell table:formula="of:=[.D46]-[.D45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90" office:value-type="float" office:value="4050" calcext:value-type="float">
            <text:p>4050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46875" calcext:value-type="float">
            <text:p>0,00046875000000000000</text:p>
          </table:table-cell>
          <table:table-cell table:formula="of:=[.D47]-[.D46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90" office:value-type="float" office:value="4140" calcext:value-type="float">
            <text:p>4140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479166666666667" calcext:value-type="float">
            <text:p>0,00047916666666666700</text:p>
          </table:table-cell>
          <table:table-cell table:formula="of:=[.D48]-[.D47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90" office:value-type="float" office:value="4230" calcext:value-type="float">
            <text:p>4230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489583333333333" calcext:value-type="float">
            <text:p>0,00048958333333333300</text:p>
          </table:table-cell>
          <table:table-cell table:formula="of:=[.D49]-[.D48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90" office:value-type="float" office:value="4320" calcext:value-type="float">
            <text:p>4320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5" calcext:value-type="float">
            <text:p>0,00050000000000000000</text:p>
          </table:table-cell>
          <table:table-cell table:formula="of:=[.D50]-[.D49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90" office:value-type="float" office:value="4410" calcext:value-type="float">
            <text:p>4410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510416666666667" calcext:value-type="float">
            <text:p>0,00051041666666666700</text:p>
          </table:table-cell>
          <table:table-cell table:formula="of:=[.D51]-[.D50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90" office:value-type="float" office:value="4500" calcext:value-type="float">
            <text:p>450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520833333333333" calcext:value-type="float">
            <text:p>0,00052083333333333300</text:p>
          </table:table-cell>
          <table:table-cell table:formula="of:=[.D52]-[.D51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90" office:value-type="float" office:value="4590" calcext:value-type="float">
            <text:p>4590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53125" calcext:value-type="float">
            <text:p>0,00053125000000000000</text:p>
          </table:table-cell>
          <table:table-cell table:formula="of:=[.D53]-[.D52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90" office:value-type="float" office:value="4680" calcext:value-type="float">
            <text:p>4680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541666666666667" calcext:value-type="float">
            <text:p>0,00054166666666666700</text:p>
          </table:table-cell>
          <table:table-cell table:formula="of:=[.D54]-[.D53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90" office:value-type="float" office:value="4770" calcext:value-type="float">
            <text:p>4770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552083333333333" calcext:value-type="float">
            <text:p>0,00055208333333333300</text:p>
          </table:table-cell>
          <table:table-cell table:formula="of:=[.D55]-[.D54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90" office:value-type="float" office:value="4860" calcext:value-type="float">
            <text:p>4860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5625" calcext:value-type="float">
            <text:p>0,00056250000000000000</text:p>
          </table:table-cell>
          <table:table-cell table:formula="of:=[.D56]-[.D55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90" office:value-type="float" office:value="4950" calcext:value-type="float">
            <text:p>4950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572916666666667" calcext:value-type="float">
            <text:p>0,00057291666666666700</text:p>
          </table:table-cell>
          <table:table-cell table:formula="of:=[.D57]-[.D56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90" office:value-type="float" office:value="5040" calcext:value-type="float">
            <text:p>5040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583333333333333" calcext:value-type="float">
            <text:p>0,00058333333333333300</text:p>
          </table:table-cell>
          <table:table-cell table:formula="of:=[.D58]-[.D57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90" office:value-type="float" office:value="5130" calcext:value-type="float">
            <text:p>5130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59375" calcext:value-type="float">
            <text:p>0,00059375000000000000</text:p>
          </table:table-cell>
          <table:table-cell table:formula="of:=[.D59]-[.D58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90" office:value-type="float" office:value="5220" calcext:value-type="float">
            <text:p>5220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604166666666667" calcext:value-type="float">
            <text:p>0,00060416666666666700</text:p>
          </table:table-cell>
          <table:table-cell table:formula="of:=[.D60]-[.D59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90" office:value-type="float" office:value="5310" calcext:value-type="float">
            <text:p>5310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614583333333333" calcext:value-type="float">
            <text:p>0,00061458333333333300</text:p>
          </table:table-cell>
          <table:table-cell table:formula="of:=[.D61]-[.D60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90" office:value-type="float" office:value="5400" calcext:value-type="float">
            <text:p>540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625" calcext:value-type="float">
            <text:p>0,00062500000000000000</text:p>
          </table:table-cell>
          <table:table-cell table:formula="of:=[.D62]-[.D61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90" office:value-type="float" office:value="5490" calcext:value-type="float">
            <text:p>5490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635416666666667" calcext:value-type="float">
            <text:p>0,00063541666666666700</text:p>
          </table:table-cell>
          <table:table-cell table:formula="of:=[.D63]-[.D62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90" office:value-type="float" office:value="5580" calcext:value-type="float">
            <text:p>5580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645833333333333" calcext:value-type="float">
            <text:p>0,00064583333333333300</text:p>
          </table:table-cell>
          <table:table-cell table:formula="of:=[.D64]-[.D63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90" office:value-type="float" office:value="5670" calcext:value-type="float">
            <text:p>5670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65625" calcext:value-type="float">
            <text:p>0,00065625000000000000</text:p>
          </table:table-cell>
          <table:table-cell table:formula="of:=[.D65]-[.D64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90" office:value-type="float" office:value="5760" calcext:value-type="float">
            <text:p>5760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666666666666667" calcext:value-type="float">
            <text:p>0,00066666666666666700</text:p>
          </table:table-cell>
          <table:table-cell table:formula="of:=[.D66]-[.D65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90" office:value-type="float" office:value="5850" calcext:value-type="float">
            <text:p>5850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677083333333333" calcext:value-type="float">
            <text:p>0,00067708333333333300</text:p>
          </table:table-cell>
          <table:table-cell table:formula="of:=[.D67]-[.D66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90" office:value-type="float" office:value="5940" calcext:value-type="float">
            <text:p>5940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6875" calcext:value-type="float">
            <text:p>0,00068750000000000000</text:p>
          </table:table-cell>
          <table:table-cell table:formula="of:=[.D68]-[.D67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90" office:value-type="float" office:value="6030" calcext:value-type="float">
            <text:p>6030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697916666666667" calcext:value-type="float">
            <text:p>0,00069791666666666700</text:p>
          </table:table-cell>
          <table:table-cell table:formula="of:=[.D69]-[.D68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90" office:value-type="float" office:value="6120" calcext:value-type="float">
            <text:p>6120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708333333333333" calcext:value-type="float">
            <text:p>0,00070833333333333300</text:p>
          </table:table-cell>
          <table:table-cell table:formula="of:=[.D70]-[.D69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90" office:value-type="float" office:value="6210" calcext:value-type="float">
            <text:p>6210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71875" calcext:value-type="float">
            <text:p>0,00071875000000000000</text:p>
          </table:table-cell>
          <table:table-cell table:formula="of:=[.D71]-[.D70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90" office:value-type="float" office:value="6300" calcext:value-type="float">
            <text:p>630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729166666666667" calcext:value-type="float">
            <text:p>0,00072916666666666700</text:p>
          </table:table-cell>
          <table:table-cell table:formula="of:=[.D72]-[.D71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90" office:value-type="float" office:value="6390" calcext:value-type="float">
            <text:p>6390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739583333333333" calcext:value-type="float">
            <text:p>0,00073958333333333300</text:p>
          </table:table-cell>
          <table:table-cell table:formula="of:=[.D73]-[.D72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90" office:value-type="float" office:value="6480" calcext:value-type="float">
            <text:p>6480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75" calcext:value-type="float">
            <text:p>0,00075000000000000000</text:p>
          </table:table-cell>
          <table:table-cell table:formula="of:=[.D74]-[.D73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90" office:value-type="float" office:value="6570" calcext:value-type="float">
            <text:p>6570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760416666666667" calcext:value-type="float">
            <text:p>0,00076041666666666700</text:p>
          </table:table-cell>
          <table:table-cell table:formula="of:=[.D75]-[.D74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90" office:value-type="float" office:value="6660" calcext:value-type="float">
            <text:p>6660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770833333333333" calcext:value-type="float">
            <text:p>0,00077083333333333300</text:p>
          </table:table-cell>
          <table:table-cell table:formula="of:=[.D76]-[.D75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90" office:value-type="float" office:value="6750" calcext:value-type="float">
            <text:p>6750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78125" calcext:value-type="float">
            <text:p>0,00078125000000000000</text:p>
          </table:table-cell>
          <table:table-cell table:formula="of:=[.D77]-[.D76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90" office:value-type="float" office:value="6840" calcext:value-type="float">
            <text:p>6840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791666666666667" calcext:value-type="float">
            <text:p>0,00079166666666666700</text:p>
          </table:table-cell>
          <table:table-cell table:formula="of:=[.D78]-[.D77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90" office:value-type="float" office:value="6930" calcext:value-type="float">
            <text:p>6930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802083333333333" calcext:value-type="float">
            <text:p>0,00080208333333333300</text:p>
          </table:table-cell>
          <table:table-cell table:formula="of:=[.D79]-[.D78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90" office:value-type="float" office:value="7020" calcext:value-type="float">
            <text:p>7020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8125" calcext:value-type="float">
            <text:p>0,00081250000000000000</text:p>
          </table:table-cell>
          <table:table-cell table:formula="of:=[.D80]-[.D79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90" office:value-type="float" office:value="7110" calcext:value-type="float">
            <text:p>7110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822916666666667" calcext:value-type="float">
            <text:p>0,00082291666666666700</text:p>
          </table:table-cell>
          <table:table-cell table:formula="of:=[.D81]-[.D80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90" office:value-type="float" office:value="7200" calcext:value-type="float">
            <text:p>720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833333333333333" calcext:value-type="float">
            <text:p>0,00083333333333333300</text:p>
          </table:table-cell>
          <table:table-cell table:formula="of:=[.D82]-[.D81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90" office:value-type="float" office:value="7290" calcext:value-type="float">
            <text:p>7290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84375" calcext:value-type="float">
            <text:p>0,00084375000000000000</text:p>
          </table:table-cell>
          <table:table-cell table:formula="of:=[.D83]-[.D82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90" office:value-type="float" office:value="7380" calcext:value-type="float">
            <text:p>7380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854166666666667" calcext:value-type="float">
            <text:p>0,00085416666666666700</text:p>
          </table:table-cell>
          <table:table-cell table:formula="of:=[.D84]-[.D83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90" office:value-type="float" office:value="7470" calcext:value-type="float">
            <text:p>7470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864583333333333" calcext:value-type="float">
            <text:p>0,00086458333333333300</text:p>
          </table:table-cell>
          <table:table-cell table:formula="of:=[.D85]-[.D84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90" office:value-type="float" office:value="7560" calcext:value-type="float">
            <text:p>7560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875" calcext:value-type="float">
            <text:p>0,00087500000000000000</text:p>
          </table:table-cell>
          <table:table-cell table:formula="of:=[.D86]-[.D85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90" office:value-type="float" office:value="7650" calcext:value-type="float">
            <text:p>7650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885416666666667" calcext:value-type="float">
            <text:p>0,00088541666666666700</text:p>
          </table:table-cell>
          <table:table-cell table:formula="of:=[.D87]-[.D86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90" office:value-type="float" office:value="7740" calcext:value-type="float">
            <text:p>7740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895833333333333" calcext:value-type="float">
            <text:p>0,00089583333333333300</text:p>
          </table:table-cell>
          <table:table-cell table:formula="of:=[.D88]-[.D87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90" office:value-type="float" office:value="7830" calcext:value-type="float">
            <text:p>7830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90625" calcext:value-type="float">
            <text:p>0,00090625000000000000</text:p>
          </table:table-cell>
          <table:table-cell table:formula="of:=[.D89]-[.D88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90" office:value-type="float" office:value="7920" calcext:value-type="float">
            <text:p>7920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916666666666667" calcext:value-type="float">
            <text:p>0,00091666666666666700</text:p>
          </table:table-cell>
          <table:table-cell table:formula="of:=[.D90]-[.D89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90" office:value-type="float" office:value="8010" calcext:value-type="float">
            <text:p>8010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927083333333333" calcext:value-type="float">
            <text:p>0,00092708333333333400</text:p>
          </table:table-cell>
          <table:table-cell table:formula="of:=[.D91]-[.D90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90" office:value-type="float" office:value="8100" calcext:value-type="float">
            <text:p>810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9375" calcext:value-type="float">
            <text:p>0,00093750000000000000</text:p>
          </table:table-cell>
          <table:table-cell table:formula="of:=[.D92]-[.D91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90" office:value-type="float" office:value="8190" calcext:value-type="float">
            <text:p>8190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947916666666667" calcext:value-type="float">
            <text:p>0,00094791666666666700</text:p>
          </table:table-cell>
          <table:table-cell table:formula="of:=[.D93]-[.D92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90" office:value-type="float" office:value="8280" calcext:value-type="float">
            <text:p>8280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958333333333333" calcext:value-type="float">
            <text:p>0,00095833333333333300</text:p>
          </table:table-cell>
          <table:table-cell table:formula="of:=[.D94]-[.D93]" office:value-type="float" office:value="0.0000104166666666667" calcext:value-type="float">
            <text:p>0,00001041666666666670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90" office:value-type="float" office:value="8370" calcext:value-type="float">
            <text:p>8370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96875" calcext:value-type="float">
            <text:p>0,00096875000000000000</text:p>
          </table:table-cell>
          <table:table-cell table:formula="of:=[.D95]-[.D94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90" office:value-type="float" office:value="8460" calcext:value-type="float">
            <text:p>8460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979166666666667" calcext:value-type="float">
            <text:p>0,00097916666666666700</text:p>
          </table:table-cell>
          <table:table-cell table:formula="of:=[.D96]-[.D95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90" office:value-type="float" office:value="8550" calcext:value-type="float">
            <text:p>8550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989583333333333" calcext:value-type="float">
            <text:p>0,00098958333333333300</text:p>
          </table:table-cell>
          <table:table-cell table:formula="of:=[.D97]-[.D96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90" office:value-type="float" office:value="8640" calcext:value-type="float">
            <text:p>8640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1" calcext:value-type="float">
            <text:p>0,00100000000000000000</text:p>
          </table:table-cell>
          <table:table-cell table:formula="of:=[.D98]-[.D97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90" office:value-type="float" office:value="8730" calcext:value-type="float">
            <text:p>8730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101041666666667" calcext:value-type="float">
            <text:p>0,00101041666666667000</text:p>
          </table:table-cell>
          <table:table-cell table:formula="of:=[.D99]-[.D98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90" office:value-type="float" office:value="8820" calcext:value-type="float">
            <text:p>8820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102083333333333" calcext:value-type="float">
            <text:p>0,00102083333333333000</text:p>
          </table:table-cell>
          <table:table-cell table:formula="of:=[.D100]-[.D99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90" office:value-type="float" office:value="8910" calcext:value-type="float">
            <text:p>8910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103125" calcext:value-type="float">
            <text:p>0,00103125000000000000</text:p>
          </table:table-cell>
          <table:table-cell table:formula="of:=[.D101]-[.D100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90" office:value-type="float" office:value="9000" calcext:value-type="float">
            <text:p>90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104166666666667" calcext:value-type="float">
            <text:p>0,00104166666666667000</text:p>
          </table:table-cell>
          <table:table-cell table:formula="of:=[.D102]-[.D101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90" office:value-type="float" office:value="9090" calcext:value-type="float">
            <text:p>9090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105208333333333" calcext:value-type="float">
            <text:p>0,00105208333333333000</text:p>
          </table:table-cell>
          <table:table-cell table:formula="of:=[.D103]-[.D102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90" office:value-type="float" office:value="9180" calcext:value-type="float">
            <text:p>9180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10625" calcext:value-type="float">
            <text:p>0,00106250000000000000</text:p>
          </table:table-cell>
          <table:table-cell table:formula="of:=[.D104]-[.D103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90" office:value-type="float" office:value="9270" calcext:value-type="float">
            <text:p>9270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107291666666667" calcext:value-type="float">
            <text:p>0,00107291666666667000</text:p>
          </table:table-cell>
          <table:table-cell table:formula="of:=[.D105]-[.D104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90" office:value-type="float" office:value="9360" calcext:value-type="float">
            <text:p>9360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108333333333333" calcext:value-type="float">
            <text:p>0,00108333333333333000</text:p>
          </table:table-cell>
          <table:table-cell table:formula="of:=[.D106]-[.D105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90" office:value-type="float" office:value="9450" calcext:value-type="float">
            <text:p>9450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109375" calcext:value-type="float">
            <text:p>0,00109375000000000000</text:p>
          </table:table-cell>
          <table:table-cell table:formula="of:=[.D107]-[.D106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90" office:value-type="float" office:value="9540" calcext:value-type="float">
            <text:p>9540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110416666666667" calcext:value-type="float">
            <text:p>0,00110416666666667000</text:p>
          </table:table-cell>
          <table:table-cell table:formula="of:=[.D108]-[.D107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90" office:value-type="float" office:value="9630" calcext:value-type="float">
            <text:p>9630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111458333333333" calcext:value-type="float">
            <text:p>0,00111458333333333000</text:p>
          </table:table-cell>
          <table:table-cell table:formula="of:=[.D109]-[.D108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90" office:value-type="float" office:value="9720" calcext:value-type="float">
            <text:p>9720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1125" calcext:value-type="float">
            <text:p>0,00112500000000000000</text:p>
          </table:table-cell>
          <table:table-cell table:formula="of:=[.D110]-[.D109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90" office:value-type="float" office:value="9810" calcext:value-type="float">
            <text:p>9810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113541666666667" calcext:value-type="float">
            <text:p>0,00113541666666667000</text:p>
          </table:table-cell>
          <table:table-cell table:formula="of:=[.D111]-[.D110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90" office:value-type="float" office:value="9900" calcext:value-type="float">
            <text:p>990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114583333333333" calcext:value-type="float">
            <text:p>0,00114583333333333000</text:p>
          </table:table-cell>
          <table:table-cell table:formula="of:=[.D112]-[.D111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90" office:value-type="float" office:value="9990" calcext:value-type="float">
            <text:p>9990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115625" calcext:value-type="float">
            <text:p>0,00115625000000000000</text:p>
          </table:table-cell>
          <table:table-cell table:formula="of:=[.D113]-[.D112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90" office:value-type="float" office:value="10080" calcext:value-type="float">
            <text:p>10080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116666666666667" calcext:value-type="float">
            <text:p>0,00116666666666667000</text:p>
          </table:table-cell>
          <table:table-cell table:formula="of:=[.D114]-[.D113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90" office:value-type="float" office:value="10170" calcext:value-type="float">
            <text:p>10170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117708333333333" calcext:value-type="float">
            <text:p>0,00117708333333333000</text:p>
          </table:table-cell>
          <table:table-cell table:formula="of:=[.D115]-[.D114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90" office:value-type="float" office:value="10260" calcext:value-type="float">
            <text:p>10260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11875" calcext:value-type="float">
            <text:p>0,00118750000000000000</text:p>
          </table:table-cell>
          <table:table-cell table:formula="of:=[.D116]-[.D115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90" office:value-type="float" office:value="10350" calcext:value-type="float">
            <text:p>10350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119791666666667" calcext:value-type="float">
            <text:p>0,00119791666666667000</text:p>
          </table:table-cell>
          <table:table-cell table:formula="of:=[.D117]-[.D116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90" office:value-type="float" office:value="10440" calcext:value-type="float">
            <text:p>10440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120833333333333" calcext:value-type="float">
            <text:p>0,00120833333333333000</text:p>
          </table:table-cell>
          <table:table-cell table:formula="of:=[.D118]-[.D117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90" office:value-type="float" office:value="10530" calcext:value-type="float">
            <text:p>10530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121875" calcext:value-type="float">
            <text:p>0,00121875000000000000</text:p>
          </table:table-cell>
          <table:table-cell table:formula="of:=[.D119]-[.D118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90" office:value-type="float" office:value="10620" calcext:value-type="float">
            <text:p>10620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122916666666667" calcext:value-type="float">
            <text:p>0,00122916666666667000</text:p>
          </table:table-cell>
          <table:table-cell table:formula="of:=[.D120]-[.D119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90" office:value-type="float" office:value="10710" calcext:value-type="float">
            <text:p>10710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123958333333333" calcext:value-type="float">
            <text:p>0,00123958333333333000</text:p>
          </table:table-cell>
          <table:table-cell table:formula="of:=[.D121]-[.D120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90" office:value-type="float" office:value="10800" calcext:value-type="float">
            <text:p>1080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125" calcext:value-type="float">
            <text:p>0,00125000000000000000</text:p>
          </table:table-cell>
          <table:table-cell table:formula="of:=[.D122]-[.D121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90" office:value-type="float" office:value="10890" calcext:value-type="float">
            <text:p>10890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126041666666667" calcext:value-type="float">
            <text:p>0,00126041666666667000</text:p>
          </table:table-cell>
          <table:table-cell table:formula="of:=[.D123]-[.D122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90" office:value-type="float" office:value="10980" calcext:value-type="float">
            <text:p>10980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127083333333333" calcext:value-type="float">
            <text:p>0,00127083333333333000</text:p>
          </table:table-cell>
          <table:table-cell table:formula="of:=[.D124]-[.D123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90" office:value-type="float" office:value="11070" calcext:value-type="float">
            <text:p>11070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128125" calcext:value-type="float">
            <text:p>0,00128125000000000000</text:p>
          </table:table-cell>
          <table:table-cell table:formula="of:=[.D125]-[.D124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90" office:value-type="float" office:value="11160" calcext:value-type="float">
            <text:p>11160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129166666666667" calcext:value-type="float">
            <text:p>0,00129166666666667000</text:p>
          </table:table-cell>
          <table:table-cell table:formula="of:=[.D126]-[.D125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90" office:value-type="float" office:value="11250" calcext:value-type="float">
            <text:p>11250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130208333333333" calcext:value-type="float">
            <text:p>0,00130208333333333000</text:p>
          </table:table-cell>
          <table:table-cell table:formula="of:=[.D127]-[.D126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90" office:value-type="float" office:value="11340" calcext:value-type="float">
            <text:p>11340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13125" calcext:value-type="float">
            <text:p>0,00131250000000000000</text:p>
          </table:table-cell>
          <table:table-cell table:formula="of:=[.D128]-[.D127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90" office:value-type="float" office:value="11430" calcext:value-type="float">
            <text:p>11430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132291666666667" calcext:value-type="float">
            <text:p>0,00132291666666667000</text:p>
          </table:table-cell>
          <table:table-cell table:formula="of:=[.D129]-[.D128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90" office:value-type="float" office:value="11520" calcext:value-type="float">
            <text:p>11520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133333333333333" calcext:value-type="float">
            <text:p>0,00133333333333333000</text:p>
          </table:table-cell>
          <table:table-cell table:formula="of:=[.D130]-[.D129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90" office:value-type="float" office:value="11610" calcext:value-type="float">
            <text:p>11610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134375" calcext:value-type="float">
            <text:p>0,00134375000000000000</text:p>
          </table:table-cell>
          <table:table-cell table:formula="of:=[.D131]-[.D130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90" office:value-type="float" office:value="11700" calcext:value-type="float">
            <text:p>1170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135416666666667" calcext:value-type="float">
            <text:p>0,00135416666666667000</text:p>
          </table:table-cell>
          <table:table-cell table:formula="of:=[.D132]-[.D131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90" office:value-type="float" office:value="11790" calcext:value-type="float">
            <text:p>11790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136458333333333" calcext:value-type="float">
            <text:p>0,00136458333333333000</text:p>
          </table:table-cell>
          <table:table-cell table:formula="of:=[.D133]-[.D132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90" office:value-type="float" office:value="11880" calcext:value-type="float">
            <text:p>11880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1375" calcext:value-type="float">
            <text:p>0,00137500000000000000</text:p>
          </table:table-cell>
          <table:table-cell table:formula="of:=[.D134]-[.D133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90" office:value-type="float" office:value="11970" calcext:value-type="float">
            <text:p>11970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138541666666667" calcext:value-type="float">
            <text:p>0,00138541666666667000</text:p>
          </table:table-cell>
          <table:table-cell table:formula="of:=[.D135]-[.D134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90" office:value-type="float" office:value="12060" calcext:value-type="float">
            <text:p>12060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139583333333333" calcext:value-type="float">
            <text:p>0,00139583333333333000</text:p>
          </table:table-cell>
          <table:table-cell table:formula="of:=[.D136]-[.D135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90" office:value-type="float" office:value="12150" calcext:value-type="float">
            <text:p>12150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140625" calcext:value-type="float">
            <text:p>0,00140625000000000000</text:p>
          </table:table-cell>
          <table:table-cell table:formula="of:=[.D137]-[.D136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90" office:value-type="float" office:value="12240" calcext:value-type="float">
            <text:p>12240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141666666666667" calcext:value-type="float">
            <text:p>0,00141666666666667000</text:p>
          </table:table-cell>
          <table:table-cell table:formula="of:=[.D138]-[.D137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90" office:value-type="float" office:value="12330" calcext:value-type="float">
            <text:p>12330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142708333333333" calcext:value-type="float">
            <text:p>0,00142708333333333000</text:p>
          </table:table-cell>
          <table:table-cell table:formula="of:=[.D139]-[.D138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90" office:value-type="float" office:value="12420" calcext:value-type="float">
            <text:p>12420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14375" calcext:value-type="float">
            <text:p>0,00143750000000000000</text:p>
          </table:table-cell>
          <table:table-cell table:formula="of:=[.D140]-[.D139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90" office:value-type="float" office:value="12510" calcext:value-type="float">
            <text:p>12510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144791666666667" calcext:value-type="float">
            <text:p>0,00144791666666667000</text:p>
          </table:table-cell>
          <table:table-cell table:formula="of:=[.D141]-[.D140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90" office:value-type="float" office:value="12600" calcext:value-type="float">
            <text:p>1260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145833333333333" calcext:value-type="float">
            <text:p>0,00145833333333333000</text:p>
          </table:table-cell>
          <table:table-cell table:formula="of:=[.D142]-[.D141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90" office:value-type="float" office:value="12690" calcext:value-type="float">
            <text:p>12690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146875" calcext:value-type="float">
            <text:p>0,00146875000000000000</text:p>
          </table:table-cell>
          <table:table-cell table:formula="of:=[.D143]-[.D142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90" office:value-type="float" office:value="12780" calcext:value-type="float">
            <text:p>12780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147916666666667" calcext:value-type="float">
            <text:p>0,00147916666666667000</text:p>
          </table:table-cell>
          <table:table-cell table:formula="of:=[.D144]-[.D143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90" office:value-type="float" office:value="12870" calcext:value-type="float">
            <text:p>12870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148958333333333" calcext:value-type="float">
            <text:p>0,00148958333333333000</text:p>
          </table:table-cell>
          <table:table-cell table:formula="of:=[.D145]-[.D144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90" office:value-type="float" office:value="12960" calcext:value-type="float">
            <text:p>12960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15" calcext:value-type="float">
            <text:p>0,00150000000000000000</text:p>
          </table:table-cell>
          <table:table-cell table:formula="of:=[.D146]-[.D145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90" office:value-type="float" office:value="13050" calcext:value-type="float">
            <text:p>13050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151041666666667" calcext:value-type="float">
            <text:p>0,00151041666666667000</text:p>
          </table:table-cell>
          <table:table-cell table:formula="of:=[.D147]-[.D146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90" office:value-type="float" office:value="13140" calcext:value-type="float">
            <text:p>13140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152083333333333" calcext:value-type="float">
            <text:p>0,00152083333333333000</text:p>
          </table:table-cell>
          <table:table-cell table:formula="of:=[.D148]-[.D147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90" office:value-type="float" office:value="13230" calcext:value-type="float">
            <text:p>13230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153125" calcext:value-type="float">
            <text:p>0,00153125000000000000</text:p>
          </table:table-cell>
          <table:table-cell table:formula="of:=[.D149]-[.D148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90" office:value-type="float" office:value="13320" calcext:value-type="float">
            <text:p>13320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154166666666667" calcext:value-type="float">
            <text:p>0,00154166666666667000</text:p>
          </table:table-cell>
          <table:table-cell table:formula="of:=[.D150]-[.D149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90" office:value-type="float" office:value="13410" calcext:value-type="float">
            <text:p>13410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155208333333333" calcext:value-type="float">
            <text:p>0,00155208333333333000</text:p>
          </table:table-cell>
          <table:table-cell table:formula="of:=[.D151]-[.D150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90" office:value-type="float" office:value="13500" calcext:value-type="float">
            <text:p>1350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15625" calcext:value-type="float">
            <text:p>0,00156250000000000000</text:p>
          </table:table-cell>
          <table:table-cell table:formula="of:=[.D152]-[.D151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90" office:value-type="float" office:value="13590" calcext:value-type="float">
            <text:p>13590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157291666666667" calcext:value-type="float">
            <text:p>0,00157291666666667000</text:p>
          </table:table-cell>
          <table:table-cell table:formula="of:=[.D153]-[.D152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90" office:value-type="float" office:value="13680" calcext:value-type="float">
            <text:p>13680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158333333333333" calcext:value-type="float">
            <text:p>0,00158333333333333000</text:p>
          </table:table-cell>
          <table:table-cell table:formula="of:=[.D154]-[.D153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90" office:value-type="float" office:value="13770" calcext:value-type="float">
            <text:p>13770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159375" calcext:value-type="float">
            <text:p>0,00159375000000000000</text:p>
          </table:table-cell>
          <table:table-cell table:formula="of:=[.D155]-[.D154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90" office:value-type="float" office:value="13860" calcext:value-type="float">
            <text:p>13860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160416666666667" calcext:value-type="float">
            <text:p>0,00160416666666667000</text:p>
          </table:table-cell>
          <table:table-cell table:formula="of:=[.D156]-[.D155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90" office:value-type="float" office:value="13950" calcext:value-type="float">
            <text:p>13950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161458333333333" calcext:value-type="float">
            <text:p>0,00161458333333333000</text:p>
          </table:table-cell>
          <table:table-cell table:formula="of:=[.D157]-[.D156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90" office:value-type="float" office:value="14040" calcext:value-type="float">
            <text:p>14040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1625" calcext:value-type="float">
            <text:p>0,00162500000000000000</text:p>
          </table:table-cell>
          <table:table-cell table:formula="of:=[.D158]-[.D157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90" office:value-type="float" office:value="14130" calcext:value-type="float">
            <text:p>14130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163541666666667" calcext:value-type="float">
            <text:p>0,00163541666666667000</text:p>
          </table:table-cell>
          <table:table-cell table:formula="of:=[.D159]-[.D158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90" office:value-type="float" office:value="14220" calcext:value-type="float">
            <text:p>14220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164583333333333" calcext:value-type="float">
            <text:p>0,00164583333333333000</text:p>
          </table:table-cell>
          <table:table-cell table:formula="of:=[.D160]-[.D159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90" office:value-type="float" office:value="14310" calcext:value-type="float">
            <text:p>14310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165625" calcext:value-type="float">
            <text:p>0,00165625000000000000</text:p>
          </table:table-cell>
          <table:table-cell table:formula="of:=[.D161]-[.D160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90" office:value-type="float" office:value="14400" calcext:value-type="float">
            <text:p>1440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166666666666667" calcext:value-type="float">
            <text:p>0,00166666666666667000</text:p>
          </table:table-cell>
          <table:table-cell table:formula="of:=[.D162]-[.D161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90" office:value-type="float" office:value="14490" calcext:value-type="float">
            <text:p>14490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167708333333333" calcext:value-type="float">
            <text:p>0,00167708333333333000</text:p>
          </table:table-cell>
          <table:table-cell table:formula="of:=[.D163]-[.D162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90" office:value-type="float" office:value="14580" calcext:value-type="float">
            <text:p>14580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16875" calcext:value-type="float">
            <text:p>0,00168750000000000000</text:p>
          </table:table-cell>
          <table:table-cell table:formula="of:=[.D164]-[.D163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90" office:value-type="float" office:value="14670" calcext:value-type="float">
            <text:p>14670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169791666666667" calcext:value-type="float">
            <text:p>0,00169791666666667000</text:p>
          </table:table-cell>
          <table:table-cell table:formula="of:=[.D165]-[.D164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90" office:value-type="float" office:value="14760" calcext:value-type="float">
            <text:p>14760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170833333333333" calcext:value-type="float">
            <text:p>0,00170833333333333000</text:p>
          </table:table-cell>
          <table:table-cell table:formula="of:=[.D166]-[.D165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90" office:value-type="float" office:value="14850" calcext:value-type="float">
            <text:p>14850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171875" calcext:value-type="float">
            <text:p>0,00171875000000000000</text:p>
          </table:table-cell>
          <table:table-cell table:formula="of:=[.D167]-[.D166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90" office:value-type="float" office:value="14940" calcext:value-type="float">
            <text:p>14940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172916666666667" calcext:value-type="float">
            <text:p>0,00172916666666667000</text:p>
          </table:table-cell>
          <table:table-cell table:formula="of:=[.D168]-[.D167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90" office:value-type="float" office:value="15030" calcext:value-type="float">
            <text:p>15030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173958333333333" calcext:value-type="float">
            <text:p>0,00173958333333333000</text:p>
          </table:table-cell>
          <table:table-cell table:formula="of:=[.D169]-[.D168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90" office:value-type="float" office:value="15120" calcext:value-type="float">
            <text:p>15120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175" calcext:value-type="float">
            <text:p>0,00175000000000000000</text:p>
          </table:table-cell>
          <table:table-cell table:formula="of:=[.D170]-[.D169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90" office:value-type="float" office:value="15210" calcext:value-type="float">
            <text:p>15210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176041666666667" calcext:value-type="float">
            <text:p>0,00176041666666667000</text:p>
          </table:table-cell>
          <table:table-cell table:formula="of:=[.D171]-[.D170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90" office:value-type="float" office:value="15300" calcext:value-type="float">
            <text:p>1530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177083333333333" calcext:value-type="float">
            <text:p>0,00177083333333333000</text:p>
          </table:table-cell>
          <table:table-cell table:formula="of:=[.D172]-[.D171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90" office:value-type="float" office:value="15390" calcext:value-type="float">
            <text:p>15390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178125" calcext:value-type="float">
            <text:p>0,00178125000000000000</text:p>
          </table:table-cell>
          <table:table-cell table:formula="of:=[.D173]-[.D172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90" office:value-type="float" office:value="15480" calcext:value-type="float">
            <text:p>15480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179166666666667" calcext:value-type="float">
            <text:p>0,00179166666666667000</text:p>
          </table:table-cell>
          <table:table-cell table:formula="of:=[.D174]-[.D173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90" office:value-type="float" office:value="15570" calcext:value-type="float">
            <text:p>15570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180208333333333" calcext:value-type="float">
            <text:p>0,00180208333333333000</text:p>
          </table:table-cell>
          <table:table-cell table:formula="of:=[.D175]-[.D174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90" office:value-type="float" office:value="15660" calcext:value-type="float">
            <text:p>15660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18125" calcext:value-type="float">
            <text:p>0,00181250000000000000</text:p>
          </table:table-cell>
          <table:table-cell table:formula="of:=[.D176]-[.D175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90" office:value-type="float" office:value="15750" calcext:value-type="float">
            <text:p>15750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182291666666667" calcext:value-type="float">
            <text:p>0,00182291666666667000</text:p>
          </table:table-cell>
          <table:table-cell table:formula="of:=[.D177]-[.D176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90" office:value-type="float" office:value="15840" calcext:value-type="float">
            <text:p>15840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183333333333333" calcext:value-type="float">
            <text:p>0,00183333333333333000</text:p>
          </table:table-cell>
          <table:table-cell table:formula="of:=[.D178]-[.D177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90" office:value-type="float" office:value="15930" calcext:value-type="float">
            <text:p>15930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184375" calcext:value-type="float">
            <text:p>0,00184375000000000000</text:p>
          </table:table-cell>
          <table:table-cell table:formula="of:=[.D179]-[.D178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90" office:value-type="float" office:value="16020" calcext:value-type="float">
            <text:p>16020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185416666666667" calcext:value-type="float">
            <text:p>0,00185416666666667000</text:p>
          </table:table-cell>
          <table:table-cell table:formula="of:=[.D180]-[.D179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90" office:value-type="float" office:value="16110" calcext:value-type="float">
            <text:p>16110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186458333333333" calcext:value-type="float">
            <text:p>0,00186458333333333000</text:p>
          </table:table-cell>
          <table:table-cell table:formula="of:=[.D181]-[.D180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90" office:value-type="float" office:value="16200" calcext:value-type="float">
            <text:p>1620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1875" calcext:value-type="float">
            <text:p>0,00187500000000000000</text:p>
          </table:table-cell>
          <table:table-cell table:formula="of:=[.D182]-[.D181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90" office:value-type="float" office:value="16290" calcext:value-type="float">
            <text:p>16290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188541666666667" calcext:value-type="float">
            <text:p>0,00188541666666667000</text:p>
          </table:table-cell>
          <table:table-cell table:formula="of:=[.D183]-[.D182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90" office:value-type="float" office:value="16380" calcext:value-type="float">
            <text:p>16380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189583333333333" calcext:value-type="float">
            <text:p>0,00189583333333333000</text:p>
          </table:table-cell>
          <table:table-cell table:formula="of:=[.D184]-[.D183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90" office:value-type="float" office:value="16470" calcext:value-type="float">
            <text:p>16470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190625" calcext:value-type="float">
            <text:p>0,00190625000000000000</text:p>
          </table:table-cell>
          <table:table-cell table:formula="of:=[.D185]-[.D184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90" office:value-type="float" office:value="16560" calcext:value-type="float">
            <text:p>16560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191666666666667" calcext:value-type="float">
            <text:p>0,00191666666666667000</text:p>
          </table:table-cell>
          <table:table-cell table:formula="of:=[.D186]-[.D185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90" office:value-type="float" office:value="16650" calcext:value-type="float">
            <text:p>16650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192708333333333" calcext:value-type="float">
            <text:p>0,00192708333333333000</text:p>
          </table:table-cell>
          <table:table-cell table:formula="of:=[.D187]-[.D186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90" office:value-type="float" office:value="16740" calcext:value-type="float">
            <text:p>16740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19375" calcext:value-type="float">
            <text:p>0,00193750000000000000</text:p>
          </table:table-cell>
          <table:table-cell table:formula="of:=[.D188]-[.D187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90" office:value-type="float" office:value="16830" calcext:value-type="float">
            <text:p>16830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194791666666667" calcext:value-type="float">
            <text:p>0,00194791666666667000</text:p>
          </table:table-cell>
          <table:table-cell table:formula="of:=[.D189]-[.D188]" office:value-type="float" office:value="0.0000104166666666666" calcext:value-type="float">
            <text:p>0,00001041666666666660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90" office:value-type="float" office:value="16920" calcext:value-type="float">
            <text:p>16920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195833333333333" calcext:value-type="float">
            <text:p>0,00195833333333333000</text:p>
          </table:table-cell>
          <table:table-cell table:formula="of:=[.D190]-[.D189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90" office:value-type="float" office:value="17010" calcext:value-type="float">
            <text:p>17010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196875" calcext:value-type="float">
            <text:p>0,00196875000000000000</text:p>
          </table:table-cell>
          <table:table-cell table:formula="of:=[.D191]-[.D190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90" office:value-type="float" office:value="17100" calcext:value-type="float">
            <text:p>1710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197916666666667" calcext:value-type="float">
            <text:p>0,00197916666666667000</text:p>
          </table:table-cell>
          <table:table-cell table:formula="of:=[.D192]-[.D191]" office:value-type="float" office:value="0.0000104166666666664" calcext:value-type="float">
            <text:p>0,00001041666666666640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90" office:value-type="float" office:value="17190" calcext:value-type="float">
            <text:p>17190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198958333333333" calcext:value-type="float">
            <text:p>0,00198958333333333000</text:p>
          </table:table-cell>
          <table:table-cell table:formula="of:=[.D193]-[.D192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90" office:value-type="float" office:value="17280" calcext:value-type="float">
            <text:p>17280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2" calcext:value-type="float">
            <text:p>0,00200000000000000000</text:p>
          </table:table-cell>
          <table:table-cell table:formula="of:=[.D194]-[.D193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90" office:value-type="float" office:value="17370" calcext:value-type="float">
            <text:p>17370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201041666666667" calcext:value-type="float">
            <text:p>0,00201041666666667000</text:p>
          </table:table-cell>
          <table:table-cell table:formula="of:=[.D195]-[.D194]" office:value-type="float" office:value="0.0000104166666666664" calcext:value-type="float">
            <text:p>0,00001041666666666640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90" office:value-type="float" office:value="17460" calcext:value-type="float">
            <text:p>17460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202083333333333" calcext:value-type="float">
            <text:p>0,00202083333333333000</text:p>
          </table:table-cell>
          <table:table-cell table:formula="of:=[.D196]-[.D195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90" office:value-type="float" office:value="17550" calcext:value-type="float">
            <text:p>17550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203125" calcext:value-type="float">
            <text:p>0,00203125000000000000</text:p>
          </table:table-cell>
          <table:table-cell table:formula="of:=[.D197]-[.D196]" office:value-type="float" office:value="0.0000104166666666664" calcext:value-type="float">
            <text:p>0,00001041666666666640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90" office:value-type="float" office:value="17640" calcext:value-type="float">
            <text:p>17640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204166666666667" calcext:value-type="float">
            <text:p>0,00204166666666667000</text:p>
          </table:table-cell>
          <table:table-cell table:formula="of:=[.D198]-[.D197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90" office:value-type="float" office:value="17730" calcext:value-type="float">
            <text:p>17730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205208333333333" calcext:value-type="float">
            <text:p>0,00205208333333333000</text:p>
          </table:table-cell>
          <table:table-cell table:formula="of:=[.D199]-[.D198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90" office:value-type="float" office:value="17820" calcext:value-type="float">
            <text:p>17820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20625" calcext:value-type="float">
            <text:p>0,00206250000000000000</text:p>
          </table:table-cell>
          <table:table-cell table:formula="of:=[.D200]-[.D199]" office:value-type="float" office:value="0.0000104166666666664" calcext:value-type="float">
            <text:p>0,00001041666666666640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90" office:value-type="float" office:value="17910" calcext:value-type="float">
            <text:p>17910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207291666666667" calcext:value-type="float">
            <text:p>0,00207291666666667000</text:p>
          </table:table-cell>
          <table:table-cell table:formula="of:=[.D201]-[.D200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90" office:value-type="float" office:value="18000" calcext:value-type="float">
            <text:p>180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208333333333333" calcext:value-type="float">
            <text:p>0,00208333333333333000</text:p>
          </table:table-cell>
          <table:table-cell table:formula="of:=[.D202]-[.D201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90" office:value-type="float" office:value="18090" calcext:value-type="float">
            <text:p>18090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209375" calcext:value-type="float">
            <text:p>0,00209375000000000000</text:p>
          </table:table-cell>
          <table:table-cell table:formula="of:=[.D203]-[.D202]" office:value-type="float" office:value="0.0000104166666666664" calcext:value-type="float">
            <text:p>0,00001041666666666640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90" office:value-type="float" office:value="18180" calcext:value-type="float">
            <text:p>18180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210416666666667" calcext:value-type="float">
            <text:p>0,00210416666666667000</text:p>
          </table:table-cell>
          <table:table-cell table:formula="of:=[.D204]-[.D203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90" office:value-type="float" office:value="18270" calcext:value-type="float">
            <text:p>18270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211458333333333" calcext:value-type="float">
            <text:p>0,00211458333333333000</text:p>
          </table:table-cell>
          <table:table-cell table:formula="of:=[.D205]-[.D204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90" office:value-type="float" office:value="18360" calcext:value-type="float">
            <text:p>18360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2125" calcext:value-type="float">
            <text:p>0,00212500000000000000</text:p>
          </table:table-cell>
          <table:table-cell table:formula="of:=[.D206]-[.D205]" office:value-type="float" office:value="0.0000104166666666664" calcext:value-type="float">
            <text:p>0,00001041666666666640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90" office:value-type="float" office:value="18450" calcext:value-type="float">
            <text:p>18450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213541666666667" calcext:value-type="float">
            <text:p>0,00213541666666667000</text:p>
          </table:table-cell>
          <table:table-cell table:formula="of:=[.D207]-[.D206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90" office:value-type="float" office:value="18540" calcext:value-type="float">
            <text:p>18540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214583333333333" calcext:value-type="float">
            <text:p>0,00214583333333333000</text:p>
          </table:table-cell>
          <table:table-cell table:formula="of:=[.D208]-[.D207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90" office:value-type="float" office:value="18630" calcext:value-type="float">
            <text:p>18630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215625" calcext:value-type="float">
            <text:p>0,00215625000000000000</text:p>
          </table:table-cell>
          <table:table-cell table:formula="of:=[.D209]-[.D208]" office:value-type="float" office:value="0.0000104166666666664" calcext:value-type="float">
            <text:p>0,00001041666666666640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90" office:value-type="float" office:value="18720" calcext:value-type="float">
            <text:p>18720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216666666666667" calcext:value-type="float">
            <text:p>0,00216666666666667000</text:p>
          </table:table-cell>
          <table:table-cell table:formula="of:=[.D210]-[.D209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90" office:value-type="float" office:value="18810" calcext:value-type="float">
            <text:p>18810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217708333333333" calcext:value-type="float">
            <text:p>0,00217708333333333000</text:p>
          </table:table-cell>
          <table:table-cell table:formula="of:=[.D211]-[.D210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90" office:value-type="float" office:value="18900" calcext:value-type="float">
            <text:p>1890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21875" calcext:value-type="float">
            <text:p>0,00218750000000000000</text:p>
          </table:table-cell>
          <table:table-cell table:formula="of:=[.D212]-[.D211]" office:value-type="float" office:value="0.0000104166666666664" calcext:value-type="float">
            <text:p>0,00001041666666666640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90" office:value-type="float" office:value="18990" calcext:value-type="float">
            <text:p>18990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219791666666667" calcext:value-type="float">
            <text:p>0,00219791666666667000</text:p>
          </table:table-cell>
          <table:table-cell table:formula="of:=[.D213]-[.D212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90" office:value-type="float" office:value="19080" calcext:value-type="float">
            <text:p>19080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220833333333333" calcext:value-type="float">
            <text:p>0,00220833333333333000</text:p>
          </table:table-cell>
          <table:table-cell table:formula="of:=[.D214]-[.D213]" office:value-type="float" office:value="0.0000104166666666664" calcext:value-type="float">
            <text:p>0,00001041666666666640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90" office:value-type="float" office:value="19170" calcext:value-type="float">
            <text:p>19170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221875" calcext:value-type="float">
            <text:p>0,00221875000000000000</text:p>
          </table:table-cell>
          <table:table-cell table:formula="of:=[.D215]-[.D214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90" office:value-type="float" office:value="19260" calcext:value-type="float">
            <text:p>19260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222916666666667" calcext:value-type="float">
            <text:p>0,00222916666666667000</text:p>
          </table:table-cell>
          <table:table-cell table:formula="of:=[.D216]-[.D215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90" office:value-type="float" office:value="19350" calcext:value-type="float">
            <text:p>19350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223958333333333" calcext:value-type="float">
            <text:p>0,00223958333333333000</text:p>
          </table:table-cell>
          <table:table-cell table:formula="of:=[.D217]-[.D216]" office:value-type="float" office:value="0.0000104166666666664" calcext:value-type="float">
            <text:p>0,00001041666666666640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90" office:value-type="float" office:value="19440" calcext:value-type="float">
            <text:p>19440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225" calcext:value-type="float">
            <text:p>0,00225000000000000000</text:p>
          </table:table-cell>
          <table:table-cell table:formula="of:=[.D218]-[.D217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90" office:value-type="float" office:value="19530" calcext:value-type="float">
            <text:p>19530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226041666666667" calcext:value-type="float">
            <text:p>0,00226041666666667000</text:p>
          </table:table-cell>
          <table:table-cell table:formula="of:=[.D219]-[.D218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90" office:value-type="float" office:value="19620" calcext:value-type="float">
            <text:p>19620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227083333333333" calcext:value-type="float">
            <text:p>0,00227083333333333000</text:p>
          </table:table-cell>
          <table:table-cell table:formula="of:=[.D220]-[.D219]" office:value-type="float" office:value="0.0000104166666666664" calcext:value-type="float">
            <text:p>0,00001041666666666640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90" office:value-type="float" office:value="19710" calcext:value-type="float">
            <text:p>19710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228125" calcext:value-type="float">
            <text:p>0,00228125000000000000</text:p>
          </table:table-cell>
          <table:table-cell table:formula="of:=[.D221]-[.D220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90" office:value-type="float" office:value="19800" calcext:value-type="float">
            <text:p>1980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229166666666667" calcext:value-type="float">
            <text:p>0,00229166666666667000</text:p>
          </table:table-cell>
          <table:table-cell table:formula="of:=[.D222]-[.D221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90" office:value-type="float" office:value="19890" calcext:value-type="float">
            <text:p>19890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230208333333333" calcext:value-type="float">
            <text:p>0,00230208333333333000</text:p>
          </table:table-cell>
          <table:table-cell table:formula="of:=[.D223]-[.D222]" office:value-type="float" office:value="0.0000104166666666664" calcext:value-type="float">
            <text:p>0,00001041666666666640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90" office:value-type="float" office:value="19980" calcext:value-type="float">
            <text:p>19980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23125" calcext:value-type="float">
            <text:p>0,00231250000000000000</text:p>
          </table:table-cell>
          <table:table-cell table:formula="of:=[.D224]-[.D223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90" office:value-type="float" office:value="20070" calcext:value-type="float">
            <text:p>20070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232291666666667" calcext:value-type="float">
            <text:p>0,00232291666666667000</text:p>
          </table:table-cell>
          <table:table-cell table:formula="of:=[.D225]-[.D224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90" office:value-type="float" office:value="20160" calcext:value-type="float">
            <text:p>20160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233333333333333" calcext:value-type="float">
            <text:p>0,00233333333333333000</text:p>
          </table:table-cell>
          <table:table-cell table:formula="of:=[.D226]-[.D225]" office:value-type="float" office:value="0.0000104166666666664" calcext:value-type="float">
            <text:p>0,00001041666666666640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90" office:value-type="float" office:value="20250" calcext:value-type="float">
            <text:p>20250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234375" calcext:value-type="float">
            <text:p>0,00234375000000000000</text:p>
          </table:table-cell>
          <table:table-cell table:formula="of:=[.D227]-[.D226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90" office:value-type="float" office:value="20340" calcext:value-type="float">
            <text:p>20340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235416666666667" calcext:value-type="float">
            <text:p>0,00235416666666667000</text:p>
          </table:table-cell>
          <table:table-cell table:formula="of:=[.D228]-[.D227]" office:value-type="float" office:value="0.0000104166666666664" calcext:value-type="float">
            <text:p>0,00001041666666666640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90" office:value-type="float" office:value="20430" calcext:value-type="float">
            <text:p>20430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236458333333333" calcext:value-type="float">
            <text:p>0,00236458333333333000</text:p>
          </table:table-cell>
          <table:table-cell table:formula="of:=[.D229]-[.D228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90" office:value-type="float" office:value="20520" calcext:value-type="float">
            <text:p>20520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2375" calcext:value-type="float">
            <text:p>0,00237500000000000000</text:p>
          </table:table-cell>
          <table:table-cell table:formula="of:=[.D230]-[.D229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90" office:value-type="float" office:value="20610" calcext:value-type="float">
            <text:p>20610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238541666666667" calcext:value-type="float">
            <text:p>0,00238541666666667000</text:p>
          </table:table-cell>
          <table:table-cell table:formula="of:=[.D231]-[.D230]" office:value-type="float" office:value="0.0000104166666666664" calcext:value-type="float">
            <text:p>0,00001041666666666640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90" office:value-type="float" office:value="20700" calcext:value-type="float">
            <text:p>2070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239583333333333" calcext:value-type="float">
            <text:p>0,00239583333333333000</text:p>
          </table:table-cell>
          <table:table-cell table:formula="of:=[.D232]-[.D231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90" office:value-type="float" office:value="20790" calcext:value-type="float">
            <text:p>20790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240625" calcext:value-type="float">
            <text:p>0,00240625000000000000</text:p>
          </table:table-cell>
          <table:table-cell table:formula="of:=[.D233]-[.D232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90" office:value-type="float" office:value="20880" calcext:value-type="float">
            <text:p>20880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241666666666667" calcext:value-type="float">
            <text:p>0,00241666666666667000</text:p>
          </table:table-cell>
          <table:table-cell table:formula="of:=[.D234]-[.D233]" office:value-type="float" office:value="0.0000104166666666664" calcext:value-type="float">
            <text:p>0,00001041666666666640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90" office:value-type="float" office:value="20970" calcext:value-type="float">
            <text:p>20970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242708333333333" calcext:value-type="float">
            <text:p>0,00242708333333333000</text:p>
          </table:table-cell>
          <table:table-cell table:formula="of:=[.D235]-[.D234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90" office:value-type="float" office:value="21060" calcext:value-type="float">
            <text:p>21060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24375" calcext:value-type="float">
            <text:p>0,00243750000000000000</text:p>
          </table:table-cell>
          <table:table-cell table:formula="of:=[.D236]-[.D235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90" office:value-type="float" office:value="21150" calcext:value-type="float">
            <text:p>21150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244791666666667" calcext:value-type="float">
            <text:p>0,00244791666666667000</text:p>
          </table:table-cell>
          <table:table-cell table:formula="of:=[.D237]-[.D236]" office:value-type="float" office:value="0.0000104166666666664" calcext:value-type="float">
            <text:p>0,00001041666666666640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90" office:value-type="float" office:value="21240" calcext:value-type="float">
            <text:p>21240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245833333333333" calcext:value-type="float">
            <text:p>0,00245833333333333000</text:p>
          </table:table-cell>
          <table:table-cell table:formula="of:=[.D238]-[.D237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90" office:value-type="float" office:value="21330" calcext:value-type="float">
            <text:p>21330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246875" calcext:value-type="float">
            <text:p>0,00246875000000000000</text:p>
          </table:table-cell>
          <table:table-cell table:formula="of:=[.D239]-[.D238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90" office:value-type="float" office:value="21420" calcext:value-type="float">
            <text:p>21420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247916666666667" calcext:value-type="float">
            <text:p>0,00247916666666667000</text:p>
          </table:table-cell>
          <table:table-cell table:formula="of:=[.D240]-[.D239]" office:value-type="float" office:value="0.0000104166666666664" calcext:value-type="float">
            <text:p>0,00001041666666666640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90" office:value-type="float" office:value="21510" calcext:value-type="float">
            <text:p>21510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248958333333333" calcext:value-type="float">
            <text:p>0,00248958333333333000</text:p>
          </table:table-cell>
          <table:table-cell table:formula="of:=[.D241]-[.D240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90" office:value-type="float" office:value="21600" calcext:value-type="float">
            <text:p>2160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25" calcext:value-type="float">
            <text:p>0,00250000000000000000</text:p>
          </table:table-cell>
          <table:table-cell table:formula="of:=[.D242]-[.D241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90" office:value-type="float" office:value="21690" calcext:value-type="float">
            <text:p>21690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251041666666667" calcext:value-type="float">
            <text:p>0,00251041666666667000</text:p>
          </table:table-cell>
          <table:table-cell table:formula="of:=[.D243]-[.D242]" office:value-type="float" office:value="0.0000104166666666664" calcext:value-type="float">
            <text:p>0,00001041666666666640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90" office:value-type="float" office:value="21780" calcext:value-type="float">
            <text:p>21780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252083333333333" calcext:value-type="float">
            <text:p>0,00252083333333333000</text:p>
          </table:table-cell>
          <table:table-cell table:formula="of:=[.D244]-[.D243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90" office:value-type="float" office:value="21870" calcext:value-type="float">
            <text:p>21870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253125" calcext:value-type="float">
            <text:p>0,00253125000000000000</text:p>
          </table:table-cell>
          <table:table-cell table:formula="of:=[.D245]-[.D244]" office:value-type="float" office:value="0.0000104166666666664" calcext:value-type="float">
            <text:p>0,00001041666666666640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90" office:value-type="float" office:value="21960" calcext:value-type="float">
            <text:p>21960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254166666666667" calcext:value-type="float">
            <text:p>0,00254166666666667000</text:p>
          </table:table-cell>
          <table:table-cell table:formula="of:=[.D246]-[.D245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90" office:value-type="float" office:value="22050" calcext:value-type="float">
            <text:p>22050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255208333333333" calcext:value-type="float">
            <text:p>0,00255208333333333000</text:p>
          </table:table-cell>
          <table:table-cell table:formula="of:=[.D247]-[.D246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90" office:value-type="float" office:value="22140" calcext:value-type="float">
            <text:p>22140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25625" calcext:value-type="float">
            <text:p>0,00256250000000000000</text:p>
          </table:table-cell>
          <table:table-cell table:formula="of:=[.D248]-[.D247]" office:value-type="float" office:value="0.0000104166666666664" calcext:value-type="float">
            <text:p>0,00001041666666666640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90" office:value-type="float" office:value="22230" calcext:value-type="float">
            <text:p>22230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257291666666667" calcext:value-type="float">
            <text:p>0,00257291666666667000</text:p>
          </table:table-cell>
          <table:table-cell table:formula="of:=[.D249]-[.D248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90" office:value-type="float" office:value="22320" calcext:value-type="float">
            <text:p>22320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258333333333333" calcext:value-type="float">
            <text:p>0,00258333333333333000</text:p>
          </table:table-cell>
          <table:table-cell table:formula="of:=[.D250]-[.D249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90" office:value-type="float" office:value="22410" calcext:value-type="float">
            <text:p>22410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259375" calcext:value-type="float">
            <text:p>0,00259375000000000000</text:p>
          </table:table-cell>
          <table:table-cell table:formula="of:=[.D251]-[.D250]" office:value-type="float" office:value="0.0000104166666666664" calcext:value-type="float">
            <text:p>0,00001041666666666640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90" office:value-type="float" office:value="22500" calcext:value-type="float">
            <text:p>2250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260416666666667" calcext:value-type="float">
            <text:p>0,00260416666666667000</text:p>
          </table:table-cell>
          <table:table-cell table:formula="of:=[.D252]-[.D251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90" office:value-type="float" office:value="22590" calcext:value-type="float">
            <text:p>22590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261458333333333" calcext:value-type="float">
            <text:p>0,00261458333333333000</text:p>
          </table:table-cell>
          <table:table-cell table:formula="of:=[.D253]-[.D252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90" office:value-type="float" office:value="22680" calcext:value-type="float">
            <text:p>22680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2625" calcext:value-type="float">
            <text:p>0,00262500000000000000</text:p>
          </table:table-cell>
          <table:table-cell table:formula="of:=[.D254]-[.D253]" office:value-type="float" office:value="0.0000104166666666664" calcext:value-type="float">
            <text:p>0,00001041666666666640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90" office:value-type="float" office:value="22770" calcext:value-type="float">
            <text:p>22770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263541666666667" calcext:value-type="float">
            <text:p>0,00263541666666667000</text:p>
          </table:table-cell>
          <table:table-cell table:formula="of:=[.D255]-[.D254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90" office:value-type="float" office:value="22860" calcext:value-type="float">
            <text:p>22860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264583333333333" calcext:value-type="float">
            <text:p>0,00264583333333333000</text:p>
          </table:table-cell>
          <table:table-cell table:formula="of:=[.D256]-[.D255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90" office:value-type="float" office:value="22950" calcext:value-type="float">
            <text:p>22950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265625" calcext:value-type="float">
            <text:p>0,00265625000000000000</text:p>
          </table:table-cell>
          <table:table-cell table:formula="of:=[.D257]-[.D256]" office:value-type="float" office:value="0.0000104166666666664" calcext:value-type="float">
            <text:p>0,00001041666666666640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90" office:value-type="float" office:value="23040" calcext:value-type="float">
            <text:p>23040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266666666666667" calcext:value-type="float">
            <text:p>0,00266666666666667000</text:p>
          </table:table-cell>
          <table:table-cell table:formula="of:=[.D258]-[.D257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90" office:value-type="float" office:value="23130" calcext:value-type="float">
            <text:p>23130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267708333333333" calcext:value-type="float">
            <text:p>0,00267708333333333000</text:p>
          </table:table-cell>
          <table:table-cell table:formula="of:=[.D259]-[.D258]" office:value-type="float" office:value="0.0000104166666666664" calcext:value-type="float">
            <text:p>0,00001041666666666640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90" office:value-type="float" office:value="23220" calcext:value-type="float">
            <text:p>23220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26875" calcext:value-type="float">
            <text:p>0,00268750000000000000</text:p>
          </table:table-cell>
          <table:table-cell table:formula="of:=[.D260]-[.D259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90" office:value-type="float" office:value="23310" calcext:value-type="float">
            <text:p>23310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269791666666667" calcext:value-type="float">
            <text:p>0,00269791666666667000</text:p>
          </table:table-cell>
          <table:table-cell table:formula="of:=[.D261]-[.D260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90" office:value-type="float" office:value="23400" calcext:value-type="float">
            <text:p>2340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270833333333333" calcext:value-type="float">
            <text:p>0,00270833333333333000</text:p>
          </table:table-cell>
          <table:table-cell table:formula="of:=[.D262]-[.D261]" office:value-type="float" office:value="0.0000104166666666664" calcext:value-type="float">
            <text:p>0,00001041666666666640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90" office:value-type="float" office:value="23490" calcext:value-type="float">
            <text:p>23490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271875" calcext:value-type="float">
            <text:p>0,00271875000000000000</text:p>
          </table:table-cell>
          <table:table-cell table:formula="of:=[.D263]-[.D262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90" office:value-type="float" office:value="23580" calcext:value-type="float">
            <text:p>23580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272916666666667" calcext:value-type="float">
            <text:p>0,00272916666666667000</text:p>
          </table:table-cell>
          <table:table-cell table:formula="of:=[.D264]-[.D263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90" office:value-type="float" office:value="23670" calcext:value-type="float">
            <text:p>23670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273958333333333" calcext:value-type="float">
            <text:p>0,00273958333333333000</text:p>
          </table:table-cell>
          <table:table-cell table:formula="of:=[.D265]-[.D264]" office:value-type="float" office:value="0.0000104166666666664" calcext:value-type="float">
            <text:p>0,00001041666666666640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90" office:value-type="float" office:value="23760" calcext:value-type="float">
            <text:p>23760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275" calcext:value-type="float">
            <text:p>0,00275000000000000000</text:p>
          </table:table-cell>
          <table:table-cell table:formula="of:=[.D266]-[.D265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90" office:value-type="float" office:value="23850" calcext:value-type="float">
            <text:p>23850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276041666666667" calcext:value-type="float">
            <text:p>0,00276041666666667000</text:p>
          </table:table-cell>
          <table:table-cell table:formula="of:=[.D267]-[.D266]" office:value-type="float" office:value="0.0000104166666666668" calcext:value-type="float">
            <text:p>0,00001041666666666680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90" office:value-type="float" office:value="23940" calcext:value-type="float">
            <text:p>23940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277083333333333" calcext:value-type="float">
            <text:p>0,00277083333333333000</text:p>
          </table:table-cell>
          <table:table-cell table:formula="of:=#REF!-[.D267]" office:value-type="string" office:string-value="" calcext:value-type="error">
            <text:p>#REF!</text:p>
          </table:table-cell>
          <table:table-cell table:number-columns-repeated="5"/>
        </table:table-row>
        <table:table-row table:style-name="ro1" table:number-rows-repeated="104830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9:23:44.283767827</meta:creation-date>
    <dc:date>2026-05-17T19:23:54.101819329</dc:date>
    <meta:editing-duration>PT11S</meta:editing-duration>
    <meta:editing-cycles>1</meta:editing-cycles>
    <meta:document-statistic meta:table-count="1" meta:cell-count="1335" meta:object-count="0"/>
    <meta:generator>LibreOffice/24.2.7.2$Linux_X86_64 LibreOffice_project/420$Build-2</meta:generator>
  </office:meta>
</office:document-meta>
</file>