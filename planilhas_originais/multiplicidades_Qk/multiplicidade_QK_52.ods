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2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01851851851852" calcext:value-type="float">
            <text:p>0,00000601851851851852</text:p>
          </table:table-cell>
          <table:table-cell table:formula="of:=[.D3]-[.D2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2" office:value-type="float" office:value="104" calcext:value-type="float">
            <text:p>10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2037037037037" calcext:value-type="float">
            <text:p>0,00001203703703703700</text:p>
          </table:table-cell>
          <table:table-cell table:formula="of:=[.D4]-[.D3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2" office:value-type="float" office:value="156" calcext:value-type="float">
            <text:p>156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80555555555556" calcext:value-type="float">
            <text:p>0,00001805555555555560</text:p>
          </table:table-cell>
          <table:table-cell table:formula="of:=[.D5]-[.D4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2" office:value-type="float" office:value="208" calcext:value-type="float">
            <text:p>20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40740740740741" calcext:value-type="float">
            <text:p>0,00002407407407407410</text:p>
          </table:table-cell>
          <table:table-cell table:formula="of:=[.D6]-[.D5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2" office:value-type="float" office:value="260" calcext:value-type="float">
            <text:p>26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00925925925926" calcext:value-type="float">
            <text:p>0,00003009259259259260</text:p>
          </table:table-cell>
          <table:table-cell table:formula="of:=[.D7]-[.D6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2" office:value-type="float" office:value="312" calcext:value-type="float">
            <text:p>31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61111111111111" calcext:value-type="float">
            <text:p>0,00003611111111111110</text:p>
          </table:table-cell>
          <table:table-cell table:formula="of:=[.D8]-[.D7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2" office:value-type="float" office:value="364" calcext:value-type="float">
            <text:p>364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21296296296296" calcext:value-type="float">
            <text:p>0,00004212962962962960</text:p>
          </table:table-cell>
          <table:table-cell table:formula="of:=[.D9]-[.D8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2" office:value-type="float" office:value="416" calcext:value-type="float">
            <text:p>41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481481481481482" calcext:value-type="float">
            <text:p>0,00004814814814814820</text:p>
          </table:table-cell>
          <table:table-cell table:formula="of:=[.D10]-[.D9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2" office:value-type="float" office:value="468" calcext:value-type="float">
            <text:p>468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41666666666667" calcext:value-type="float">
            <text:p>0,00005416666666666670</text:p>
          </table:table-cell>
          <table:table-cell table:formula="of:=[.D11]-[.D10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2" office:value-type="float" office:value="520" calcext:value-type="float">
            <text:p>52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01851851851852" calcext:value-type="float">
            <text:p>0,00006018518518518520</text:p>
          </table:table-cell>
          <table:table-cell table:formula="of:=[.D12]-[.D11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2" office:value-type="float" office:value="572" calcext:value-type="float">
            <text:p>572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662037037037037" calcext:value-type="float">
            <text:p>0,00006620370370370370</text:p>
          </table:table-cell>
          <table:table-cell table:formula="of:=[.D13]-[.D12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2" office:value-type="float" office:value="624" calcext:value-type="float">
            <text:p>62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722222222222222" calcext:value-type="float">
            <text:p>0,00007222222222222220</text:p>
          </table:table-cell>
          <table:table-cell table:formula="of:=[.D14]-[.D13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2" office:value-type="float" office:value="676" calcext:value-type="float">
            <text:p>676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782407407407407" calcext:value-type="float">
            <text:p>0,00007824074074074070</text:p>
          </table:table-cell>
          <table:table-cell table:formula="of:=[.D15]-[.D14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2" office:value-type="float" office:value="728" calcext:value-type="float">
            <text:p>72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842592592592593" calcext:value-type="float">
            <text:p>0,00008425925925925930</text:p>
          </table:table-cell>
          <table:table-cell table:formula="of:=[.D16]-[.D15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2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902777777777778" calcext:value-type="float">
            <text:p>0,00009027777777777780</text:p>
          </table:table-cell>
          <table:table-cell table:formula="of:=[.D17]-[.D16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2" office:value-type="float" office:value="832" calcext:value-type="float">
            <text:p>83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0962962962962963" calcext:value-type="float">
            <text:p>0,00009629629629629630</text:p>
          </table:table-cell>
          <table:table-cell table:formula="of:=[.D18]-[.D17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2" office:value-type="float" office:value="884" calcext:value-type="float">
            <text:p>884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02314814814815" calcext:value-type="float">
            <text:p>0,00010231481481481500</text:p>
          </table:table-cell>
          <table:table-cell table:formula="of:=[.D19]-[.D18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2" office:value-type="float" office:value="936" calcext:value-type="float">
            <text:p>93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08333333333333" calcext:value-type="float">
            <text:p>0,00010833333333333300</text:p>
          </table:table-cell>
          <table:table-cell table:formula="of:=[.D20]-[.D19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2" office:value-type="float" office:value="988" calcext:value-type="float">
            <text:p>988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14351851851852" calcext:value-type="float">
            <text:p>0,00011435185185185200</text:p>
          </table:table-cell>
          <table:table-cell table:formula="of:=[.D21]-[.D20]" office:value-type="float" office:value="0.00000601851851851852" calcext:value-type="float">
            <text:p>0,00000601851851851852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2" office:value-type="float" office:value="1040" calcext:value-type="float">
            <text:p>10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2037037037037" calcext:value-type="float">
            <text:p>0,00012037037037037000</text:p>
          </table:table-cell>
          <table:table-cell table:formula="of:=[.D22]-[.D21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2" office:value-type="float" office:value="1092" calcext:value-type="float">
            <text:p>1092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26388888888889" calcext:value-type="float">
            <text:p>0,00012638888888888900</text:p>
          </table:table-cell>
          <table:table-cell table:formula="of:=[.D23]-[.D22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2" office:value-type="float" office:value="1144" calcext:value-type="float">
            <text:p>114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32407407407407" calcext:value-type="float">
            <text:p>0,00013240740740740700</text:p>
          </table:table-cell>
          <table:table-cell table:formula="of:=[.D24]-[.D23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2" office:value-type="float" office:value="1196" calcext:value-type="float">
            <text:p>1196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38425925925926" calcext:value-type="float">
            <text:p>0,00013842592592592600</text:p>
          </table:table-cell>
          <table:table-cell table:formula="of:=[.D25]-[.D24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2" office:value-type="float" office:value="1248" calcext:value-type="float">
            <text:p>124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44444444444444" calcext:value-type="float">
            <text:p>0,00014444444444444400</text:p>
          </table:table-cell>
          <table:table-cell table:formula="of:=[.D26]-[.D25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2" office:value-type="float" office:value="1300" calcext:value-type="float">
            <text:p>13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50462962962963" calcext:value-type="float">
            <text:p>0,00015046296296296300</text:p>
          </table:table-cell>
          <table:table-cell table:formula="of:=[.D27]-[.D26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2" office:value-type="float" office:value="1352" calcext:value-type="float">
            <text:p>135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56481481481481" calcext:value-type="float">
            <text:p>0,00015648148148148100</text:p>
          </table:table-cell>
          <table:table-cell table:formula="of:=[.D28]-[.D27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2" office:value-type="float" office:value="1404" calcext:value-type="float">
            <text:p>1404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625" calcext:value-type="float">
            <text:p>0,00016250000000000000</text:p>
          </table:table-cell>
          <table:table-cell table:formula="of:=[.D29]-[.D28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2" office:value-type="float" office:value="1456" calcext:value-type="float">
            <text:p>145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68518518518519" calcext:value-type="float">
            <text:p>0,00016851851851851900</text:p>
          </table:table-cell>
          <table:table-cell table:formula="of:=[.D30]-[.D29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2" office:value-type="float" office:value="1508" calcext:value-type="float">
            <text:p>1508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74537037037037" calcext:value-type="float">
            <text:p>0,00017453703703703700</text:p>
          </table:table-cell>
          <table:table-cell table:formula="of:=[.D31]-[.D30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2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80555555555556" calcext:value-type="float">
            <text:p>0,00018055555555555600</text:p>
          </table:table-cell>
          <table:table-cell table:formula="of:=[.D32]-[.D31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2" office:value-type="float" office:value="1612" calcext:value-type="float">
            <text:p>1612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186574074074074" calcext:value-type="float">
            <text:p>0,00018657407407407400</text:p>
          </table:table-cell>
          <table:table-cell table:formula="of:=[.D33]-[.D32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2" office:value-type="float" office:value="1664" calcext:value-type="float">
            <text:p>166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192592592592593" calcext:value-type="float">
            <text:p>0,00019259259259259300</text:p>
          </table:table-cell>
          <table:table-cell table:formula="of:=[.D34]-[.D33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2" office:value-type="float" office:value="1716" calcext:value-type="float">
            <text:p>1716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198611111111111" calcext:value-type="float">
            <text:p>0,00019861111111111100</text:p>
          </table:table-cell>
          <table:table-cell table:formula="of:=[.D35]-[.D34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2" office:value-type="float" office:value="1768" calcext:value-type="float">
            <text:p>176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0462962962963" calcext:value-type="float">
            <text:p>0,00020462962962963000</text:p>
          </table:table-cell>
          <table:table-cell table:formula="of:=[.D36]-[.D35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2" office:value-type="float" office:value="1820" calcext:value-type="float">
            <text:p>182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10648148148148" calcext:value-type="float">
            <text:p>0,00021064814814814800</text:p>
          </table:table-cell>
          <table:table-cell table:formula="of:=[.D37]-[.D36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2" office:value-type="float" office:value="1872" calcext:value-type="float">
            <text:p>187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16666666666667" calcext:value-type="float">
            <text:p>0,00021666666666666700</text:p>
          </table:table-cell>
          <table:table-cell table:formula="of:=[.D38]-[.D37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2" office:value-type="float" office:value="1924" calcext:value-type="float">
            <text:p>1924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22685185185185" calcext:value-type="float">
            <text:p>0,00022268518518518500</text:p>
          </table:table-cell>
          <table:table-cell table:formula="of:=[.D39]-[.D38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2" office:value-type="float" office:value="1976" calcext:value-type="float">
            <text:p>197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28703703703704" calcext:value-type="float">
            <text:p>0,00022870370370370400</text:p>
          </table:table-cell>
          <table:table-cell table:formula="of:=[.D40]-[.D39]" office:value-type="float" office:value="0.00000601851851851851" calcext:value-type="float">
            <text:p>0,00000601851851851851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2" office:value-type="float" office:value="2028" calcext:value-type="float">
            <text:p>2028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34722222222222" calcext:value-type="float">
            <text:p>0,00023472222222222200</text:p>
          </table:table-cell>
          <table:table-cell table:formula="of:=[.D41]-[.D40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2" office:value-type="float" office:value="2080" calcext:value-type="float">
            <text:p>20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40740740740741" calcext:value-type="float">
            <text:p>0,00024074074074074100</text:p>
          </table:table-cell>
          <table:table-cell table:formula="of:=[.D42]-[.D41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2" office:value-type="float" office:value="2132" calcext:value-type="float">
            <text:p>2132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46759259259259" calcext:value-type="float">
            <text:p>0,00024675925925925900</text:p>
          </table:table-cell>
          <table:table-cell table:formula="of:=[.D43]-[.D4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2" office:value-type="float" office:value="2184" calcext:value-type="float">
            <text:p>218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52777777777778" calcext:value-type="float">
            <text:p>0,00025277777777777800</text:p>
          </table:table-cell>
          <table:table-cell table:formula="of:=[.D44]-[.D43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2" office:value-type="float" office:value="2236" calcext:value-type="float">
            <text:p>2236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58796296296296" calcext:value-type="float">
            <text:p>0,00025879629629629600</text:p>
          </table:table-cell>
          <table:table-cell table:formula="of:=[.D45]-[.D44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2" office:value-type="float" office:value="2288" calcext:value-type="float">
            <text:p>228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64814814814815" calcext:value-type="float">
            <text:p>0,00026481481481481500</text:p>
          </table:table-cell>
          <table:table-cell table:formula="of:=[.D46]-[.D4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2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70833333333333" calcext:value-type="float">
            <text:p>0,00027083333333333300</text:p>
          </table:table-cell>
          <table:table-cell table:formula="of:=[.D47]-[.D46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2" office:value-type="float" office:value="2392" calcext:value-type="float">
            <text:p>239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276851851851852" calcext:value-type="float">
            <text:p>0,00027685185185185200</text:p>
          </table:table-cell>
          <table:table-cell table:formula="of:=[.D48]-[.D47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2" office:value-type="float" office:value="2444" calcext:value-type="float">
            <text:p>2444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28287037037037" calcext:value-type="float">
            <text:p>0,00028287037037037000</text:p>
          </table:table-cell>
          <table:table-cell table:formula="of:=[.D49]-[.D4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2" office:value-type="float" office:value="2496" calcext:value-type="float">
            <text:p>249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288888888888889" calcext:value-type="float">
            <text:p>0,00028888888888888900</text:p>
          </table:table-cell>
          <table:table-cell table:formula="of:=[.D50]-[.D49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2" office:value-type="float" office:value="2548" calcext:value-type="float">
            <text:p>2548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294907407407407" calcext:value-type="float">
            <text:p>0,00029490740740740700</text:p>
          </table:table-cell>
          <table:table-cell table:formula="of:=[.D51]-[.D50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2" office:value-type="float" office:value="2600" calcext:value-type="float">
            <text:p>26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00925925925926" calcext:value-type="float">
            <text:p>0,00030092592592592600</text:p>
          </table:table-cell>
          <table:table-cell table:formula="of:=[.D52]-[.D5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2" office:value-type="float" office:value="2652" calcext:value-type="float">
            <text:p>2652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06944444444444" calcext:value-type="float">
            <text:p>0,00030694444444444400</text:p>
          </table:table-cell>
          <table:table-cell table:formula="of:=[.D53]-[.D52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2" office:value-type="float" office:value="2704" calcext:value-type="float">
            <text:p>270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12962962962963" calcext:value-type="float">
            <text:p>0,00031296296296296300</text:p>
          </table:table-cell>
          <table:table-cell table:formula="of:=[.D54]-[.D53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2" office:value-type="float" office:value="2756" calcext:value-type="float">
            <text:p>2756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18981481481482" calcext:value-type="float">
            <text:p>0,00031898148148148200</text:p>
          </table:table-cell>
          <table:table-cell table:formula="of:=[.D55]-[.D5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2" office:value-type="float" office:value="2808" calcext:value-type="float">
            <text:p>280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25" calcext:value-type="float">
            <text:p>0,00032500000000000000</text:p>
          </table:table-cell>
          <table:table-cell table:formula="of:=[.D56]-[.D55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2" office:value-type="float" office:value="2860" calcext:value-type="float">
            <text:p>286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31018518518519" calcext:value-type="float">
            <text:p>0,00033101851851851900</text:p>
          </table:table-cell>
          <table:table-cell table:formula="of:=[.D57]-[.D56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2" office:value-type="float" office:value="2912" calcext:value-type="float">
            <text:p>291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37037037037037" calcext:value-type="float">
            <text:p>0,00033703703703703700</text:p>
          </table:table-cell>
          <table:table-cell table:formula="of:=[.D58]-[.D5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2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43055555555556" calcext:value-type="float">
            <text:p>0,00034305555555555600</text:p>
          </table:table-cell>
          <table:table-cell table:formula="of:=[.D59]-[.D58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2" office:value-type="float" office:value="3016" calcext:value-type="float">
            <text:p>301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49074074074074" calcext:value-type="float">
            <text:p>0,00034907407407407400</text:p>
          </table:table-cell>
          <table:table-cell table:formula="of:=[.D60]-[.D59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2" office:value-type="float" office:value="3068" calcext:value-type="float">
            <text:p>3068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55092592592593" calcext:value-type="float">
            <text:p>0,00035509259259259300</text:p>
          </table:table-cell>
          <table:table-cell table:formula="of:=[.D61]-[.D6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2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61111111111111" calcext:value-type="float">
            <text:p>0,00036111111111111100</text:p>
          </table:table-cell>
          <table:table-cell table:formula="of:=[.D62]-[.D61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2" office:value-type="float" office:value="3172" calcext:value-type="float">
            <text:p>3172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36712962962963" calcext:value-type="float">
            <text:p>0,00036712962962963000</text:p>
          </table:table-cell>
          <table:table-cell table:formula="of:=[.D63]-[.D62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2" office:value-type="float" office:value="3224" calcext:value-type="float">
            <text:p>322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373148148148148" calcext:value-type="float">
            <text:p>0,00037314814814814800</text:p>
          </table:table-cell>
          <table:table-cell table:formula="of:=[.D64]-[.D6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2" office:value-type="float" office:value="3276" calcext:value-type="float">
            <text:p>3276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379166666666667" calcext:value-type="float">
            <text:p>0,00037916666666666700</text:p>
          </table:table-cell>
          <table:table-cell table:formula="of:=[.D65]-[.D64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2" office:value-type="float" office:value="3328" calcext:value-type="float">
            <text:p>332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385185185185185" calcext:value-type="float">
            <text:p>0,00038518518518518500</text:p>
          </table:table-cell>
          <table:table-cell table:formula="of:=[.D66]-[.D65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2" office:value-type="float" office:value="3380" calcext:value-type="float">
            <text:p>338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391203703703704" calcext:value-type="float">
            <text:p>0,00039120370370370400</text:p>
          </table:table-cell>
          <table:table-cell table:formula="of:=[.D67]-[.D6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2" office:value-type="float" office:value="3432" calcext:value-type="float">
            <text:p>343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397222222222222" calcext:value-type="float">
            <text:p>0,00039722222222222200</text:p>
          </table:table-cell>
          <table:table-cell table:formula="of:=[.D68]-[.D67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2" office:value-type="float" office:value="3484" calcext:value-type="float">
            <text:p>3484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03240740740741" calcext:value-type="float">
            <text:p>0,00040324074074074100</text:p>
          </table:table-cell>
          <table:table-cell table:formula="of:=[.D69]-[.D68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2" office:value-type="float" office:value="3536" calcext:value-type="float">
            <text:p>353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09259259259259" calcext:value-type="float">
            <text:p>0,00040925925925925900</text:p>
          </table:table-cell>
          <table:table-cell table:formula="of:=[.D70]-[.D6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2" office:value-type="float" office:value="3588" calcext:value-type="float">
            <text:p>3588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15277777777778" calcext:value-type="float">
            <text:p>0,00041527777777777800</text:p>
          </table:table-cell>
          <table:table-cell table:formula="of:=[.D71]-[.D70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2" office:value-type="float" office:value="3640" calcext:value-type="float">
            <text:p>364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21296296296296" calcext:value-type="float">
            <text:p>0,00042129629629629600</text:p>
          </table:table-cell>
          <table:table-cell table:formula="of:=[.D72]-[.D71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2" office:value-type="float" office:value="3692" calcext:value-type="float">
            <text:p>3692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27314814814815" calcext:value-type="float">
            <text:p>0,00042731481481481500</text:p>
          </table:table-cell>
          <table:table-cell table:formula="of:=[.D73]-[.D7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2" office:value-type="float" office:value="3744" calcext:value-type="float">
            <text:p>374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33333333333333" calcext:value-type="float">
            <text:p>0,00043333333333333300</text:p>
          </table:table-cell>
          <table:table-cell table:formula="of:=[.D74]-[.D73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2" office:value-type="float" office:value="3796" calcext:value-type="float">
            <text:p>3796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39351851851852" calcext:value-type="float">
            <text:p>0,00043935185185185200</text:p>
          </table:table-cell>
          <table:table-cell table:formula="of:=[.D75]-[.D74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2" office:value-type="float" office:value="3848" calcext:value-type="float">
            <text:p>384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4537037037037" calcext:value-type="float">
            <text:p>0,00044537037037037000</text:p>
          </table:table-cell>
          <table:table-cell table:formula="of:=[.D76]-[.D7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2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51388888888889" calcext:value-type="float">
            <text:p>0,00045138888888888900</text:p>
          </table:table-cell>
          <table:table-cell table:formula="of:=[.D77]-[.D76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2" office:value-type="float" office:value="3952" calcext:value-type="float">
            <text:p>395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457407407407407" calcext:value-type="float">
            <text:p>0,00045740740740740700</text:p>
          </table:table-cell>
          <table:table-cell table:formula="of:=[.D78]-[.D77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2" office:value-type="float" office:value="4004" calcext:value-type="float">
            <text:p>4004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463425925925926" calcext:value-type="float">
            <text:p>0,00046342592592592600</text:p>
          </table:table-cell>
          <table:table-cell table:formula="of:=[.D79]-[.D7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2" office:value-type="float" office:value="4056" calcext:value-type="float">
            <text:p>405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469444444444444" calcext:value-type="float">
            <text:p>0,00046944444444444400</text:p>
          </table:table-cell>
          <table:table-cell table:formula="of:=[.D80]-[.D79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2" office:value-type="float" office:value="4108" calcext:value-type="float">
            <text:p>4108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475462962962963" calcext:value-type="float">
            <text:p>0,00047546296296296300</text:p>
          </table:table-cell>
          <table:table-cell table:formula="of:=[.D81]-[.D80]" office:value-type="float" office:value="0.00000601851851851854" calcext:value-type="float">
            <text:p>0,00000601851851851854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2" office:value-type="float" office:value="4160" calcext:value-type="float">
            <text:p>41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481481481481482" calcext:value-type="float">
            <text:p>0,00048148148148148200</text:p>
          </table:table-cell>
          <table:table-cell table:formula="of:=[.D82]-[.D8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2" office:value-type="float" office:value="4212" calcext:value-type="float">
            <text:p>4212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4875" calcext:value-type="float">
            <text:p>0,00048750000000000000</text:p>
          </table:table-cell>
          <table:table-cell table:formula="of:=[.D83]-[.D82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2" office:value-type="float" office:value="4264" calcext:value-type="float">
            <text:p>426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493518518518519" calcext:value-type="float">
            <text:p>0,00049351851851851900</text:p>
          </table:table-cell>
          <table:table-cell table:formula="of:=[.D84]-[.D8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2" office:value-type="float" office:value="4316" calcext:value-type="float">
            <text:p>4316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499537037037037" calcext:value-type="float">
            <text:p>0,00049953703703703700</text:p>
          </table:table-cell>
          <table:table-cell table:formula="of:=[.D85]-[.D8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2" office:value-type="float" office:value="4368" calcext:value-type="float">
            <text:p>436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05555555555556" calcext:value-type="float">
            <text:p>0,00050555555555555600</text:p>
          </table:table-cell>
          <table:table-cell table:formula="of:=[.D86]-[.D85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2" office:value-type="float" office:value="4420" calcext:value-type="float">
            <text:p>442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11574074074074" calcext:value-type="float">
            <text:p>0,00051157407407407400</text:p>
          </table:table-cell>
          <table:table-cell table:formula="of:=[.D87]-[.D8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2" office:value-type="float" office:value="4472" calcext:value-type="float">
            <text:p>447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17592592592593" calcext:value-type="float">
            <text:p>0,00051759259259259300</text:p>
          </table:table-cell>
          <table:table-cell table:formula="of:=[.D88]-[.D8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2" office:value-type="float" office:value="4524" calcext:value-type="float">
            <text:p>4524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23611111111111" calcext:value-type="float">
            <text:p>0,00052361111111111100</text:p>
          </table:table-cell>
          <table:table-cell table:formula="of:=[.D89]-[.D88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2" office:value-type="float" office:value="4576" calcext:value-type="float">
            <text:p>457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2962962962963" calcext:value-type="float">
            <text:p>0,00052962962962963000</text:p>
          </table:table-cell>
          <table:table-cell table:formula="of:=[.D90]-[.D8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2" office:value-type="float" office:value="4628" calcext:value-type="float">
            <text:p>4628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35648148148148" calcext:value-type="float">
            <text:p>0,00053564814814814800</text:p>
          </table:table-cell>
          <table:table-cell table:formula="of:=[.D91]-[.D9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2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41666666666667" calcext:value-type="float">
            <text:p>0,00054166666666666700</text:p>
          </table:table-cell>
          <table:table-cell table:formula="of:=[.D92]-[.D91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2" office:value-type="float" office:value="4732" calcext:value-type="float">
            <text:p>4732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547685185185185" calcext:value-type="float">
            <text:p>0,00054768518518518500</text:p>
          </table:table-cell>
          <table:table-cell table:formula="of:=[.D93]-[.D9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2" office:value-type="float" office:value="4784" calcext:value-type="float">
            <text:p>478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553703703703704" calcext:value-type="float">
            <text:p>0,00055370370370370400</text:p>
          </table:table-cell>
          <table:table-cell table:formula="of:=[.D94]-[.D9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2" office:value-type="float" office:value="4836" calcext:value-type="float">
            <text:p>4836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559722222222222" calcext:value-type="float">
            <text:p>0,00055972222222222200</text:p>
          </table:table-cell>
          <table:table-cell table:formula="of:=[.D95]-[.D94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2" office:value-type="float" office:value="4888" calcext:value-type="float">
            <text:p>488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565740740740741" calcext:value-type="float">
            <text:p>0,00056574074074074100</text:p>
          </table:table-cell>
          <table:table-cell table:formula="of:=[.D96]-[.D9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2" office:value-type="float" office:value="4940" calcext:value-type="float">
            <text:p>494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571759259259259" calcext:value-type="float">
            <text:p>0,00057175925925925900</text:p>
          </table:table-cell>
          <table:table-cell table:formula="of:=[.D97]-[.D9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2" office:value-type="float" office:value="4992" calcext:value-type="float">
            <text:p>499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577777777777778" calcext:value-type="float">
            <text:p>0,00057777777777777800</text:p>
          </table:table-cell>
          <table:table-cell table:formula="of:=[.D98]-[.D97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2" office:value-type="float" office:value="5044" calcext:value-type="float">
            <text:p>5044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583796296296296" calcext:value-type="float">
            <text:p>0,00058379629629629600</text:p>
          </table:table-cell>
          <table:table-cell table:formula="of:=[.D99]-[.D9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2" office:value-type="float" office:value="5096" calcext:value-type="float">
            <text:p>509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589814814814815" calcext:value-type="float">
            <text:p>0,00058981481481481500</text:p>
          </table:table-cell>
          <table:table-cell table:formula="of:=[.D100]-[.D9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2" office:value-type="float" office:value="5148" calcext:value-type="float">
            <text:p>5148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595833333333333" calcext:value-type="float">
            <text:p>0,00059583333333333300</text:p>
          </table:table-cell>
          <table:table-cell table:formula="of:=[.D101]-[.D100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2" office:value-type="float" office:value="5200" calcext:value-type="float">
            <text:p>52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01851851851852" calcext:value-type="float">
            <text:p>0,00060185185185185200</text:p>
          </table:table-cell>
          <table:table-cell table:formula="of:=[.D102]-[.D10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2" office:value-type="float" office:value="5252" calcext:value-type="float">
            <text:p>5252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60787037037037" calcext:value-type="float">
            <text:p>0,00060787037037037000</text:p>
          </table:table-cell>
          <table:table-cell table:formula="of:=[.D103]-[.D10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2" office:value-type="float" office:value="5304" calcext:value-type="float">
            <text:p>530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13888888888889" calcext:value-type="float">
            <text:p>0,00061388888888888900</text:p>
          </table:table-cell>
          <table:table-cell table:formula="of:=[.D104]-[.D103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2" office:value-type="float" office:value="5356" calcext:value-type="float">
            <text:p>5356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619907407407408" calcext:value-type="float">
            <text:p>0,00061990740740740800</text:p>
          </table:table-cell>
          <table:table-cell table:formula="of:=[.D105]-[.D10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2" office:value-type="float" office:value="5408" calcext:value-type="float">
            <text:p>540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25925925925926" calcext:value-type="float">
            <text:p>0,00062592592592592600</text:p>
          </table:table-cell>
          <table:table-cell table:formula="of:=[.D106]-[.D10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2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631944444444444" calcext:value-type="float">
            <text:p>0,00063194444444444400</text:p>
          </table:table-cell>
          <table:table-cell table:formula="of:=[.D107]-[.D106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2" office:value-type="float" office:value="5512" calcext:value-type="float">
            <text:p>551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37962962962963" calcext:value-type="float">
            <text:p>0,00063796296296296300</text:p>
          </table:table-cell>
          <table:table-cell table:formula="of:=[.D108]-[.D10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2" office:value-type="float" office:value="5564" calcext:value-type="float">
            <text:p>5564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643981481481482" calcext:value-type="float">
            <text:p>0,00064398148148148200</text:p>
          </table:table-cell>
          <table:table-cell table:formula="of:=[.D109]-[.D10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2" office:value-type="float" office:value="5616" calcext:value-type="float">
            <text:p>561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65" calcext:value-type="float">
            <text:p>0,00065000000000000000</text:p>
          </table:table-cell>
          <table:table-cell table:formula="of:=[.D110]-[.D109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2" office:value-type="float" office:value="5668" calcext:value-type="float">
            <text:p>5668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656018518518519" calcext:value-type="float">
            <text:p>0,00065601851851851900</text:p>
          </table:table-cell>
          <table:table-cell table:formula="of:=[.D111]-[.D11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2" office:value-type="float" office:value="5720" calcext:value-type="float">
            <text:p>572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662037037037037" calcext:value-type="float">
            <text:p>0,00066203703703703700</text:p>
          </table:table-cell>
          <table:table-cell table:formula="of:=[.D112]-[.D11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2" office:value-type="float" office:value="5772" calcext:value-type="float">
            <text:p>5772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668055555555556" calcext:value-type="float">
            <text:p>0,00066805555555555600</text:p>
          </table:table-cell>
          <table:table-cell table:formula="of:=[.D113]-[.D112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2" office:value-type="float" office:value="5824" calcext:value-type="float">
            <text:p>582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674074074074074" calcext:value-type="float">
            <text:p>0,00067407407407407400</text:p>
          </table:table-cell>
          <table:table-cell table:formula="of:=[.D114]-[.D11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2" office:value-type="float" office:value="5876" calcext:value-type="float">
            <text:p>5876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680092592592593" calcext:value-type="float">
            <text:p>0,00068009259259259300</text:p>
          </table:table-cell>
          <table:table-cell table:formula="of:=[.D115]-[.D11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2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686111111111111" calcext:value-type="float">
            <text:p>0,00068611111111111100</text:p>
          </table:table-cell>
          <table:table-cell table:formula="of:=[.D116]-[.D115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2" office:value-type="float" office:value="5980" calcext:value-type="float">
            <text:p>598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69212962962963" calcext:value-type="float">
            <text:p>0,00069212962962963000</text:p>
          </table:table-cell>
          <table:table-cell table:formula="of:=[.D117]-[.D11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2" office:value-type="float" office:value="6032" calcext:value-type="float">
            <text:p>603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698148148148148" calcext:value-type="float">
            <text:p>0,00069814814814814800</text:p>
          </table:table-cell>
          <table:table-cell table:formula="of:=[.D118]-[.D11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2" office:value-type="float" office:value="6084" calcext:value-type="float">
            <text:p>6084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704166666666667" calcext:value-type="float">
            <text:p>0,00070416666666666700</text:p>
          </table:table-cell>
          <table:table-cell table:formula="of:=[.D119]-[.D118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2" office:value-type="float" office:value="6136" calcext:value-type="float">
            <text:p>613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710185185185185" calcext:value-type="float">
            <text:p>0,00071018518518518500</text:p>
          </table:table-cell>
          <table:table-cell table:formula="of:=[.D120]-[.D11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2" office:value-type="float" office:value="6188" calcext:value-type="float">
            <text:p>6188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716203703703704" calcext:value-type="float">
            <text:p>0,00071620370370370400</text:p>
          </table:table-cell>
          <table:table-cell table:formula="of:=[.D121]-[.D12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2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722222222222222" calcext:value-type="float">
            <text:p>0,00072222222222222200</text:p>
          </table:table-cell>
          <table:table-cell table:formula="of:=[.D122]-[.D121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2" office:value-type="float" office:value="6292" calcext:value-type="float">
            <text:p>6292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728240740740741" calcext:value-type="float">
            <text:p>0,00072824074074074100</text:p>
          </table:table-cell>
          <table:table-cell table:formula="of:=[.D123]-[.D12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2" office:value-type="float" office:value="6344" calcext:value-type="float">
            <text:p>634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734259259259259" calcext:value-type="float">
            <text:p>0,00073425925925925900</text:p>
          </table:table-cell>
          <table:table-cell table:formula="of:=[.D124]-[.D12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2" office:value-type="float" office:value="6396" calcext:value-type="float">
            <text:p>6396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740277777777778" calcext:value-type="float">
            <text:p>0,00074027777777777800</text:p>
          </table:table-cell>
          <table:table-cell table:formula="of:=[.D125]-[.D124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2" office:value-type="float" office:value="6448" calcext:value-type="float">
            <text:p>644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746296296296296" calcext:value-type="float">
            <text:p>0,00074629629629629600</text:p>
          </table:table-cell>
          <table:table-cell table:formula="of:=[.D126]-[.D12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2" office:value-type="float" office:value="6500" calcext:value-type="float">
            <text:p>6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752314814814815" calcext:value-type="float">
            <text:p>0,00075231481481481500</text:p>
          </table:table-cell>
          <table:table-cell table:formula="of:=[.D127]-[.D12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2" office:value-type="float" office:value="6552" calcext:value-type="float">
            <text:p>655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758333333333333" calcext:value-type="float">
            <text:p>0,00075833333333333300</text:p>
          </table:table-cell>
          <table:table-cell table:formula="of:=[.D128]-[.D127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2" office:value-type="float" office:value="6604" calcext:value-type="float">
            <text:p>6604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764351851851852" calcext:value-type="float">
            <text:p>0,00076435185185185200</text:p>
          </table:table-cell>
          <table:table-cell table:formula="of:=[.D129]-[.D12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2" office:value-type="float" office:value="6656" calcext:value-type="float">
            <text:p>665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77037037037037" calcext:value-type="float">
            <text:p>0,00077037037037037000</text:p>
          </table:table-cell>
          <table:table-cell table:formula="of:=[.D130]-[.D12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2" office:value-type="float" office:value="6708" calcext:value-type="float">
            <text:p>6708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776388888888889" calcext:value-type="float">
            <text:p>0,00077638888888888900</text:p>
          </table:table-cell>
          <table:table-cell table:formula="of:=[.D131]-[.D130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2" office:value-type="float" office:value="6760" calcext:value-type="float">
            <text:p>676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782407407407407" calcext:value-type="float">
            <text:p>0,00078240740740740800</text:p>
          </table:table-cell>
          <table:table-cell table:formula="of:=[.D132]-[.D13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2" office:value-type="float" office:value="6812" calcext:value-type="float">
            <text:p>6812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788425925925926" calcext:value-type="float">
            <text:p>0,00078842592592592600</text:p>
          </table:table-cell>
          <table:table-cell table:formula="of:=[.D133]-[.D13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2" office:value-type="float" office:value="6864" calcext:value-type="float">
            <text:p>686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794444444444444" calcext:value-type="float">
            <text:p>0,00079444444444444500</text:p>
          </table:table-cell>
          <table:table-cell table:formula="of:=[.D134]-[.D133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2" office:value-type="float" office:value="6916" calcext:value-type="float">
            <text:p>6916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800462962962963" calcext:value-type="float">
            <text:p>0,00080046296296296300</text:p>
          </table:table-cell>
          <table:table-cell table:formula="of:=[.D135]-[.D13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2" office:value-type="float" office:value="6968" calcext:value-type="float">
            <text:p>696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806481481481482" calcext:value-type="float">
            <text:p>0,00080648148148148200</text:p>
          </table:table-cell>
          <table:table-cell table:formula="of:=[.D136]-[.D13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2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8125" calcext:value-type="float">
            <text:p>0,00081250000000000000</text:p>
          </table:table-cell>
          <table:table-cell table:formula="of:=[.D137]-[.D136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2" office:value-type="float" office:value="7072" calcext:value-type="float">
            <text:p>707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818518518518519" calcext:value-type="float">
            <text:p>0,00081851851851851900</text:p>
          </table:table-cell>
          <table:table-cell table:formula="of:=[.D138]-[.D13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2" office:value-type="float" office:value="7124" calcext:value-type="float">
            <text:p>7124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824537037037037" calcext:value-type="float">
            <text:p>0,00082453703703703700</text:p>
          </table:table-cell>
          <table:table-cell table:formula="of:=[.D139]-[.D13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2" office:value-type="float" office:value="7176" calcext:value-type="float">
            <text:p>717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830555555555556" calcext:value-type="float">
            <text:p>0,00083055555555555600</text:p>
          </table:table-cell>
          <table:table-cell table:formula="of:=[.D140]-[.D139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2" office:value-type="float" office:value="7228" calcext:value-type="float">
            <text:p>7228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836574074074074" calcext:value-type="float">
            <text:p>0,00083657407407407400</text:p>
          </table:table-cell>
          <table:table-cell table:formula="of:=[.D141]-[.D14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2" office:value-type="float" office:value="7280" calcext:value-type="float">
            <text:p>72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842592592592593" calcext:value-type="float">
            <text:p>0,00084259259259259300</text:p>
          </table:table-cell>
          <table:table-cell table:formula="of:=[.D142]-[.D14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2" office:value-type="float" office:value="7332" calcext:value-type="float">
            <text:p>7332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848611111111111" calcext:value-type="float">
            <text:p>0,00084861111111111100</text:p>
          </table:table-cell>
          <table:table-cell table:formula="of:=[.D143]-[.D142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2" office:value-type="float" office:value="7384" calcext:value-type="float">
            <text:p>738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85462962962963" calcext:value-type="float">
            <text:p>0,00085462962962963000</text:p>
          </table:table-cell>
          <table:table-cell table:formula="of:=[.D144]-[.D14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2" office:value-type="float" office:value="7436" calcext:value-type="float">
            <text:p>7436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860648148148148" calcext:value-type="float">
            <text:p>0,00086064814814814800</text:p>
          </table:table-cell>
          <table:table-cell table:formula="of:=[.D145]-[.D14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2" office:value-type="float" office:value="7488" calcext:value-type="float">
            <text:p>748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866666666666667" calcext:value-type="float">
            <text:p>0,00086666666666666700</text:p>
          </table:table-cell>
          <table:table-cell table:formula="of:=[.D146]-[.D145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2" office:value-type="float" office:value="7540" calcext:value-type="float">
            <text:p>754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872685185185185" calcext:value-type="float">
            <text:p>0,00087268518518518500</text:p>
          </table:table-cell>
          <table:table-cell table:formula="of:=[.D147]-[.D14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2" office:value-type="float" office:value="7592" calcext:value-type="float">
            <text:p>759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878703703703704" calcext:value-type="float">
            <text:p>0,00087870370370370400</text:p>
          </table:table-cell>
          <table:table-cell table:formula="of:=[.D148]-[.D14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2" office:value-type="float" office:value="7644" calcext:value-type="float">
            <text:p>7644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884722222222222" calcext:value-type="float">
            <text:p>0,00088472222222222200</text:p>
          </table:table-cell>
          <table:table-cell table:formula="of:=[.D149]-[.D148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2" office:value-type="float" office:value="7696" calcext:value-type="float">
            <text:p>769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890740740740741" calcext:value-type="float">
            <text:p>0,00089074074074074100</text:p>
          </table:table-cell>
          <table:table-cell table:formula="of:=[.D150]-[.D14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2" office:value-type="float" office:value="7748" calcext:value-type="float">
            <text:p>7748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896759259259259" calcext:value-type="float">
            <text:p>0,00089675925925925900</text:p>
          </table:table-cell>
          <table:table-cell table:formula="of:=[.D151]-[.D15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2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902777777777778" calcext:value-type="float">
            <text:p>0,00090277777777777800</text:p>
          </table:table-cell>
          <table:table-cell table:formula="of:=[.D152]-[.D151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2" office:value-type="float" office:value="7852" calcext:value-type="float">
            <text:p>7852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908796296296296" calcext:value-type="float">
            <text:p>0,00090879629629629600</text:p>
          </table:table-cell>
          <table:table-cell table:formula="of:=[.D153]-[.D15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2" office:value-type="float" office:value="7904" calcext:value-type="float">
            <text:p>790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0914814814814815" calcext:value-type="float">
            <text:p>0,00091481481481481500</text:p>
          </table:table-cell>
          <table:table-cell table:formula="of:=[.D154]-[.D15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2" office:value-type="float" office:value="7956" calcext:value-type="float">
            <text:p>7956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0920833333333333" calcext:value-type="float">
            <text:p>0,00092083333333333300</text:p>
          </table:table-cell>
          <table:table-cell table:formula="of:=[.D155]-[.D154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2" office:value-type="float" office:value="8008" calcext:value-type="float">
            <text:p>800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0926851851851852" calcext:value-type="float">
            <text:p>0,00092685185185185200</text:p>
          </table:table-cell>
          <table:table-cell table:formula="of:=[.D156]-[.D15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2" office:value-type="float" office:value="8060" calcext:value-type="float">
            <text:p>806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093287037037037" calcext:value-type="float">
            <text:p>0,00093287037037037000</text:p>
          </table:table-cell>
          <table:table-cell table:formula="of:=[.D157]-[.D15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2" office:value-type="float" office:value="8112" calcext:value-type="float">
            <text:p>811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0938888888888889" calcext:value-type="float">
            <text:p>0,00093888888888888900</text:p>
          </table:table-cell>
          <table:table-cell table:formula="of:=[.D158]-[.D157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2" office:value-type="float" office:value="8164" calcext:value-type="float">
            <text:p>8164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0944907407407407" calcext:value-type="float">
            <text:p>0,00094490740740740700</text:p>
          </table:table-cell>
          <table:table-cell table:formula="of:=[.D159]-[.D15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2" office:value-type="float" office:value="8216" calcext:value-type="float">
            <text:p>821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0950925925925926" calcext:value-type="float">
            <text:p>0,00095092592592592600</text:p>
          </table:table-cell>
          <table:table-cell table:formula="of:=[.D160]-[.D15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2" office:value-type="float" office:value="8268" calcext:value-type="float">
            <text:p>8268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0956944444444444" calcext:value-type="float">
            <text:p>0,00095694444444444500</text:p>
          </table:table-cell>
          <table:table-cell table:formula="of:=[.D161]-[.D160]" office:value-type="float" office:value="0.00000601851851851859" calcext:value-type="float">
            <text:p>0,00000601851851851859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2" office:value-type="float" office:value="8320" calcext:value-type="float">
            <text:p>83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0962962962962963" calcext:value-type="float">
            <text:p>0,00096296296296296300</text:p>
          </table:table-cell>
          <table:table-cell table:formula="of:=[.D162]-[.D16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2" office:value-type="float" office:value="8372" calcext:value-type="float">
            <text:p>8372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0968981481481482" calcext:value-type="float">
            <text:p>0,00096898148148148200</text:p>
          </table:table-cell>
          <table:table-cell table:formula="of:=[.D163]-[.D16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2" office:value-type="float" office:value="8424" calcext:value-type="float">
            <text:p>842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0975" calcext:value-type="float">
            <text:p>0,00097500000000000000</text:p>
          </table:table-cell>
          <table:table-cell table:formula="of:=[.D164]-[.D16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2" office:value-type="float" office:value="8476" calcext:value-type="float">
            <text:p>8476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0981018518518518" calcext:value-type="float">
            <text:p>0,00098101851851851800</text:p>
          </table:table-cell>
          <table:table-cell table:formula="of:=[.D165]-[.D164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2" office:value-type="float" office:value="8528" calcext:value-type="float">
            <text:p>852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0987037037037037" calcext:value-type="float">
            <text:p>0,00098703703703703700</text:p>
          </table:table-cell>
          <table:table-cell table:formula="of:=[.D166]-[.D16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2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0993055555555556" calcext:value-type="float">
            <text:p>0,00099305555555555600</text:p>
          </table:table-cell>
          <table:table-cell table:formula="of:=[.D167]-[.D16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2" office:value-type="float" office:value="8632" calcext:value-type="float">
            <text:p>863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0999074074074074" calcext:value-type="float">
            <text:p>0,00099907407407407400</text:p>
          </table:table-cell>
          <table:table-cell table:formula="of:=[.D168]-[.D16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2" office:value-type="float" office:value="8684" calcext:value-type="float">
            <text:p>8684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00509259259259" calcext:value-type="float">
            <text:p>0,00100509259259259000</text:p>
          </table:table-cell>
          <table:table-cell table:formula="of:=[.D169]-[.D16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2" office:value-type="float" office:value="8736" calcext:value-type="float">
            <text:p>873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01111111111111" calcext:value-type="float">
            <text:p>0,00101111111111111000</text:p>
          </table:table-cell>
          <table:table-cell table:formula="of:=[.D170]-[.D16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2" office:value-type="float" office:value="8788" calcext:value-type="float">
            <text:p>8788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01712962962963" calcext:value-type="float">
            <text:p>0,00101712962962963000</text:p>
          </table:table-cell>
          <table:table-cell table:formula="of:=[.D171]-[.D170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2" office:value-type="float" office:value="8840" calcext:value-type="float">
            <text:p>884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02314814814815" calcext:value-type="float">
            <text:p>0,00102314814814815000</text:p>
          </table:table-cell>
          <table:table-cell table:formula="of:=[.D172]-[.D17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2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02916666666667" calcext:value-type="float">
            <text:p>0,00102916666666667000</text:p>
          </table:table-cell>
          <table:table-cell table:formula="of:=[.D173]-[.D17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2" office:value-type="float" office:value="8944" calcext:value-type="float">
            <text:p>894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03518518518519" calcext:value-type="float">
            <text:p>0,00103518518518519000</text:p>
          </table:table-cell>
          <table:table-cell table:formula="of:=[.D174]-[.D17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2" office:value-type="float" office:value="8996" calcext:value-type="float">
            <text:p>8996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0412037037037" calcext:value-type="float">
            <text:p>0,00104120370370370000</text:p>
          </table:table-cell>
          <table:table-cell table:formula="of:=[.D175]-[.D17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2" office:value-type="float" office:value="9048" calcext:value-type="float">
            <text:p>904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04722222222222" calcext:value-type="float">
            <text:p>0,00104722222222222000</text:p>
          </table:table-cell>
          <table:table-cell table:formula="of:=[.D176]-[.D17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2" office:value-type="float" office:value="9100" calcext:value-type="float">
            <text:p>91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05324074074074" calcext:value-type="float">
            <text:p>0,00105324074074074000</text:p>
          </table:table-cell>
          <table:table-cell table:formula="of:=[.D177]-[.D176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2" office:value-type="float" office:value="9152" calcext:value-type="float">
            <text:p>915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05925925925926" calcext:value-type="float">
            <text:p>0,00105925925925926000</text:p>
          </table:table-cell>
          <table:table-cell table:formula="of:=[.D178]-[.D17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2" office:value-type="float" office:value="9204" calcext:value-type="float">
            <text:p>9204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06527777777778" calcext:value-type="float">
            <text:p>0,00106527777777778000</text:p>
          </table:table-cell>
          <table:table-cell table:formula="of:=[.D179]-[.D17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2" office:value-type="float" office:value="9256" calcext:value-type="float">
            <text:p>925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0712962962963" calcext:value-type="float">
            <text:p>0,00107129629629630000</text:p>
          </table:table-cell>
          <table:table-cell table:formula="of:=[.D180]-[.D17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2" office:value-type="float" office:value="9308" calcext:value-type="float">
            <text:p>9308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07731481481481" calcext:value-type="float">
            <text:p>0,00107731481481481000</text:p>
          </table:table-cell>
          <table:table-cell table:formula="of:=[.D181]-[.D18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2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08333333333333" calcext:value-type="float">
            <text:p>0,00108333333333333000</text:p>
          </table:table-cell>
          <table:table-cell table:formula="of:=[.D182]-[.D18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2" office:value-type="float" office:value="9412" calcext:value-type="float">
            <text:p>9412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08935185185185" calcext:value-type="float">
            <text:p>0,00108935185185185000</text:p>
          </table:table-cell>
          <table:table-cell table:formula="of:=[.D183]-[.D182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2" office:value-type="float" office:value="9464" calcext:value-type="float">
            <text:p>946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09537037037037" calcext:value-type="float">
            <text:p>0,00109537037037037000</text:p>
          </table:table-cell>
          <table:table-cell table:formula="of:=[.D184]-[.D18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2" office:value-type="float" office:value="9516" calcext:value-type="float">
            <text:p>9516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10138888888889" calcext:value-type="float">
            <text:p>0,00110138888888889000</text:p>
          </table:table-cell>
          <table:table-cell table:formula="of:=[.D185]-[.D18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2" office:value-type="float" office:value="9568" calcext:value-type="float">
            <text:p>956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10740740740741" calcext:value-type="float">
            <text:p>0,00110740740740741000</text:p>
          </table:table-cell>
          <table:table-cell table:formula="of:=[.D186]-[.D18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2" office:value-type="float" office:value="9620" calcext:value-type="float">
            <text:p>962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11342592592593" calcext:value-type="float">
            <text:p>0,00111342592592593000</text:p>
          </table:table-cell>
          <table:table-cell table:formula="of:=[.D187]-[.D18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2" office:value-type="float" office:value="9672" calcext:value-type="float">
            <text:p>967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11944444444444" calcext:value-type="float">
            <text:p>0,00111944444444444000</text:p>
          </table:table-cell>
          <table:table-cell table:formula="of:=[.D188]-[.D18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2" office:value-type="float" office:value="9724" calcext:value-type="float">
            <text:p>9724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12546296296296" calcext:value-type="float">
            <text:p>0,00112546296296296000</text:p>
          </table:table-cell>
          <table:table-cell table:formula="of:=[.D189]-[.D188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2" office:value-type="float" office:value="9776" calcext:value-type="float">
            <text:p>977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13148148148148" calcext:value-type="float">
            <text:p>0,00113148148148148000</text:p>
          </table:table-cell>
          <table:table-cell table:formula="of:=[.D190]-[.D18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2" office:value-type="float" office:value="9828" calcext:value-type="float">
            <text:p>9828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1375" calcext:value-type="float">
            <text:p>0,00113750000000000000</text:p>
          </table:table-cell>
          <table:table-cell table:formula="of:=[.D191]-[.D19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2" office:value-type="float" office:value="9880" calcext:value-type="float">
            <text:p>988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14351851851852" calcext:value-type="float">
            <text:p>0,00114351851851852000</text:p>
          </table:table-cell>
          <table:table-cell table:formula="of:=[.D192]-[.D19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2" office:value-type="float" office:value="9932" calcext:value-type="float">
            <text:p>9932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14953703703704" calcext:value-type="float">
            <text:p>0,00114953703703704000</text:p>
          </table:table-cell>
          <table:table-cell table:formula="of:=[.D193]-[.D19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2" office:value-type="float" office:value="9984" calcext:value-type="float">
            <text:p>998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15555555555556" calcext:value-type="float">
            <text:p>0,00115555555555556000</text:p>
          </table:table-cell>
          <table:table-cell table:formula="of:=[.D194]-[.D19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2" office:value-type="float" office:value="10036" calcext:value-type="float">
            <text:p>10036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16157407407407" calcext:value-type="float">
            <text:p>0,00116157407407407000</text:p>
          </table:table-cell>
          <table:table-cell table:formula="of:=[.D195]-[.D194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2" office:value-type="float" office:value="10088" calcext:value-type="float">
            <text:p>1008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16759259259259" calcext:value-type="float">
            <text:p>0,00116759259259259000</text:p>
          </table:table-cell>
          <table:table-cell table:formula="of:=[.D196]-[.D19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2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17361111111111" calcext:value-type="float">
            <text:p>0,00117361111111111000</text:p>
          </table:table-cell>
          <table:table-cell table:formula="of:=[.D197]-[.D19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2" office:value-type="float" office:value="10192" calcext:value-type="float">
            <text:p>1019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17962962962963" calcext:value-type="float">
            <text:p>0,00117962962962963000</text:p>
          </table:table-cell>
          <table:table-cell table:formula="of:=[.D198]-[.D19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2" office:value-type="float" office:value="10244" calcext:value-type="float">
            <text:p>10244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18564814814815" calcext:value-type="float">
            <text:p>0,00118564814814815000</text:p>
          </table:table-cell>
          <table:table-cell table:formula="of:=[.D199]-[.D19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2" office:value-type="float" office:value="10296" calcext:value-type="float">
            <text:p>1029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19166666666667" calcext:value-type="float">
            <text:p>0,00119166666666667000</text:p>
          </table:table-cell>
          <table:table-cell table:formula="of:=[.D200]-[.D19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2" office:value-type="float" office:value="10348" calcext:value-type="float">
            <text:p>10348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19768518518519" calcext:value-type="float">
            <text:p>0,00119768518518519000</text:p>
          </table:table-cell>
          <table:table-cell table:formula="of:=[.D201]-[.D200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2" office:value-type="float" office:value="10400" calcext:value-type="float">
            <text:p>10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2037037037037" calcext:value-type="float">
            <text:p>0,00120370370370370000</text:p>
          </table:table-cell>
          <table:table-cell table:formula="of:=[.D202]-[.D20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2" office:value-type="float" office:value="10452" calcext:value-type="float">
            <text:p>10452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20972222222222" calcext:value-type="float">
            <text:p>0,00120972222222222000</text:p>
          </table:table-cell>
          <table:table-cell table:formula="of:=[.D203]-[.D20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2" office:value-type="float" office:value="10504" calcext:value-type="float">
            <text:p>1050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21574074074074" calcext:value-type="float">
            <text:p>0,00121574074074074000</text:p>
          </table:table-cell>
          <table:table-cell table:formula="of:=[.D204]-[.D20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2" office:value-type="float" office:value="10556" calcext:value-type="float">
            <text:p>10556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22175925925926" calcext:value-type="float">
            <text:p>0,00122175925925926000</text:p>
          </table:table-cell>
          <table:table-cell table:formula="of:=[.D205]-[.D20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2" office:value-type="float" office:value="10608" calcext:value-type="float">
            <text:p>1060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22777777777778" calcext:value-type="float">
            <text:p>0,00122777777777778000</text:p>
          </table:table-cell>
          <table:table-cell table:formula="of:=[.D206]-[.D20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2" office:value-type="float" office:value="10660" calcext:value-type="float">
            <text:p>1066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2337962962963" calcext:value-type="float">
            <text:p>0,00123379629629630000</text:p>
          </table:table-cell>
          <table:table-cell table:formula="of:=[.D207]-[.D206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2" office:value-type="float" office:value="10712" calcext:value-type="float">
            <text:p>1071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23981481481482" calcext:value-type="float">
            <text:p>0,00123981481481482000</text:p>
          </table:table-cell>
          <table:table-cell table:formula="of:=[.D208]-[.D20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2" office:value-type="float" office:value="10764" calcext:value-type="float">
            <text:p>10764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24583333333333" calcext:value-type="float">
            <text:p>0,00124583333333333000</text:p>
          </table:table-cell>
          <table:table-cell table:formula="of:=[.D209]-[.D20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2" office:value-type="float" office:value="10816" calcext:value-type="float">
            <text:p>1081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25185185185185" calcext:value-type="float">
            <text:p>0,00125185185185185000</text:p>
          </table:table-cell>
          <table:table-cell table:formula="of:=[.D210]-[.D20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2" office:value-type="float" office:value="10868" calcext:value-type="float">
            <text:p>10868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25787037037037" calcext:value-type="float">
            <text:p>0,00125787037037037000</text:p>
          </table:table-cell>
          <table:table-cell table:formula="of:=[.D211]-[.D21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2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26388888888889" calcext:value-type="float">
            <text:p>0,00126388888888889000</text:p>
          </table:table-cell>
          <table:table-cell table:formula="of:=[.D212]-[.D21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2" office:value-type="float" office:value="10972" calcext:value-type="float">
            <text:p>10972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26990740740741" calcext:value-type="float">
            <text:p>0,00126990740740741000</text:p>
          </table:table-cell>
          <table:table-cell table:formula="of:=[.D213]-[.D212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2" office:value-type="float" office:value="11024" calcext:value-type="float">
            <text:p>1102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27592592592593" calcext:value-type="float">
            <text:p>0,00127592592592593000</text:p>
          </table:table-cell>
          <table:table-cell table:formula="of:=[.D214]-[.D21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2" office:value-type="float" office:value="11076" calcext:value-type="float">
            <text:p>11076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28194444444444" calcext:value-type="float">
            <text:p>0,00128194444444444000</text:p>
          </table:table-cell>
          <table:table-cell table:formula="of:=[.D215]-[.D21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2" office:value-type="float" office:value="11128" calcext:value-type="float">
            <text:p>1112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28796296296296" calcext:value-type="float">
            <text:p>0,00128796296296296000</text:p>
          </table:table-cell>
          <table:table-cell table:formula="of:=[.D216]-[.D21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2" office:value-type="float" office:value="11180" calcext:value-type="float">
            <text:p>1118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29398148148148" calcext:value-type="float">
            <text:p>0,00129398148148148000</text:p>
          </table:table-cell>
          <table:table-cell table:formula="of:=[.D217]-[.D21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2" office:value-type="float" office:value="11232" calcext:value-type="float">
            <text:p>1123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3" calcext:value-type="float">
            <text:p>0,00130000000000000000</text:p>
          </table:table-cell>
          <table:table-cell table:formula="of:=[.D218]-[.D21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2" office:value-type="float" office:value="11284" calcext:value-type="float">
            <text:p>11284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30601851851852" calcext:value-type="float">
            <text:p>0,00130601851851852000</text:p>
          </table:table-cell>
          <table:table-cell table:formula="of:=[.D219]-[.D218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2" office:value-type="float" office:value="11336" calcext:value-type="float">
            <text:p>1133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31203703703704" calcext:value-type="float">
            <text:p>0,00131203703703704000</text:p>
          </table:table-cell>
          <table:table-cell table:formula="of:=[.D220]-[.D21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2" office:value-type="float" office:value="11388" calcext:value-type="float">
            <text:p>11388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31805555555556" calcext:value-type="float">
            <text:p>0,00131805555555556000</text:p>
          </table:table-cell>
          <table:table-cell table:formula="of:=[.D221]-[.D22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2" office:value-type="float" office:value="11440" calcext:value-type="float">
            <text:p>114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32407407407407" calcext:value-type="float">
            <text:p>0,00132407407407407000</text:p>
          </table:table-cell>
          <table:table-cell table:formula="of:=[.D222]-[.D22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2" office:value-type="float" office:value="11492" calcext:value-type="float">
            <text:p>11492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33009259259259" calcext:value-type="float">
            <text:p>0,00133009259259259000</text:p>
          </table:table-cell>
          <table:table-cell table:formula="of:=[.D223]-[.D22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2" office:value-type="float" office:value="11544" calcext:value-type="float">
            <text:p>1154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33611111111111" calcext:value-type="float">
            <text:p>0,00133611111111111000</text:p>
          </table:table-cell>
          <table:table-cell table:formula="of:=[.D224]-[.D22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2" office:value-type="float" office:value="11596" calcext:value-type="float">
            <text:p>11596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34212962962963" calcext:value-type="float">
            <text:p>0,00134212962962963000</text:p>
          </table:table-cell>
          <table:table-cell table:formula="of:=[.D225]-[.D224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2" office:value-type="float" office:value="11648" calcext:value-type="float">
            <text:p>1164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34814814814815" calcext:value-type="float">
            <text:p>0,00134814814814815000</text:p>
          </table:table-cell>
          <table:table-cell table:formula="of:=[.D226]-[.D22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2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35416666666667" calcext:value-type="float">
            <text:p>0,00135416666666667000</text:p>
          </table:table-cell>
          <table:table-cell table:formula="of:=[.D227]-[.D22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2" office:value-type="float" office:value="11752" calcext:value-type="float">
            <text:p>1175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36018518518519" calcext:value-type="float">
            <text:p>0,00136018518518519000</text:p>
          </table:table-cell>
          <table:table-cell table:formula="of:=[.D228]-[.D22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2" office:value-type="float" office:value="11804" calcext:value-type="float">
            <text:p>11804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3662037037037" calcext:value-type="float">
            <text:p>0,00136620370370370000</text:p>
          </table:table-cell>
          <table:table-cell table:formula="of:=[.D229]-[.D22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2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37222222222222" calcext:value-type="float">
            <text:p>0,00137222222222222000</text:p>
          </table:table-cell>
          <table:table-cell table:formula="of:=[.D230]-[.D22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2" office:value-type="float" office:value="11908" calcext:value-type="float">
            <text:p>11908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37824074074074" calcext:value-type="float">
            <text:p>0,00137824074074074000</text:p>
          </table:table-cell>
          <table:table-cell table:formula="of:=[.D231]-[.D230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2" office:value-type="float" office:value="11960" calcext:value-type="float">
            <text:p>1196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38425925925926" calcext:value-type="float">
            <text:p>0,00138425925925926000</text:p>
          </table:table-cell>
          <table:table-cell table:formula="of:=[.D232]-[.D23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2" office:value-type="float" office:value="12012" calcext:value-type="float">
            <text:p>12012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39027777777778" calcext:value-type="float">
            <text:p>0,00139027777777778000</text:p>
          </table:table-cell>
          <table:table-cell table:formula="of:=[.D233]-[.D23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2" office:value-type="float" office:value="12064" calcext:value-type="float">
            <text:p>1206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3962962962963" calcext:value-type="float">
            <text:p>0,00139629629629630000</text:p>
          </table:table-cell>
          <table:table-cell table:formula="of:=[.D234]-[.D23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2" office:value-type="float" office:value="12116" calcext:value-type="float">
            <text:p>12116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40231481481481" calcext:value-type="float">
            <text:p>0,00140231481481481000</text:p>
          </table:table-cell>
          <table:table-cell table:formula="of:=[.D235]-[.D23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2" office:value-type="float" office:value="12168" calcext:value-type="float">
            <text:p>1216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40833333333333" calcext:value-type="float">
            <text:p>0,00140833333333333000</text:p>
          </table:table-cell>
          <table:table-cell table:formula="of:=[.D236]-[.D23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2" office:value-type="float" office:value="12220" calcext:value-type="float">
            <text:p>1222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41435185185185" calcext:value-type="float">
            <text:p>0,00141435185185185000</text:p>
          </table:table-cell>
          <table:table-cell table:formula="of:=[.D237]-[.D236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2" office:value-type="float" office:value="12272" calcext:value-type="float">
            <text:p>1227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42037037037037" calcext:value-type="float">
            <text:p>0,00142037037037037000</text:p>
          </table:table-cell>
          <table:table-cell table:formula="of:=[.D238]-[.D23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2" office:value-type="float" office:value="12324" calcext:value-type="float">
            <text:p>12324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42638888888889" calcext:value-type="float">
            <text:p>0,00142638888888889000</text:p>
          </table:table-cell>
          <table:table-cell table:formula="of:=[.D239]-[.D23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2" office:value-type="float" office:value="12376" calcext:value-type="float">
            <text:p>1237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43240740740741" calcext:value-type="float">
            <text:p>0,00143240740740741000</text:p>
          </table:table-cell>
          <table:table-cell table:formula="of:=[.D240]-[.D23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2" office:value-type="float" office:value="12428" calcext:value-type="float">
            <text:p>12428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43842592592593" calcext:value-type="float">
            <text:p>0,00143842592592593000</text:p>
          </table:table-cell>
          <table:table-cell table:formula="of:=[.D241]-[.D24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2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44444444444444" calcext:value-type="float">
            <text:p>0,00144444444444444000</text:p>
          </table:table-cell>
          <table:table-cell table:formula="of:=[.D242]-[.D24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2" office:value-type="float" office:value="12532" calcext:value-type="float">
            <text:p>12532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45046296296296" calcext:value-type="float">
            <text:p>0,00145046296296296000</text:p>
          </table:table-cell>
          <table:table-cell table:formula="of:=[.D243]-[.D242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2" office:value-type="float" office:value="12584" calcext:value-type="float">
            <text:p>1258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45648148148148" calcext:value-type="float">
            <text:p>0,00145648148148148000</text:p>
          </table:table-cell>
          <table:table-cell table:formula="of:=[.D244]-[.D24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2" office:value-type="float" office:value="12636" calcext:value-type="float">
            <text:p>12636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4625" calcext:value-type="float">
            <text:p>0,00146250000000000000</text:p>
          </table:table-cell>
          <table:table-cell table:formula="of:=[.D245]-[.D24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2" office:value-type="float" office:value="12688" calcext:value-type="float">
            <text:p>1268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46851851851852" calcext:value-type="float">
            <text:p>0,00146851851851852000</text:p>
          </table:table-cell>
          <table:table-cell table:formula="of:=[.D246]-[.D24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2" office:value-type="float" office:value="12740" calcext:value-type="float">
            <text:p>1274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47453703703704" calcext:value-type="float">
            <text:p>0,00147453703703704000</text:p>
          </table:table-cell>
          <table:table-cell table:formula="of:=[.D247]-[.D24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2" office:value-type="float" office:value="12792" calcext:value-type="float">
            <text:p>1279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48055555555556" calcext:value-type="float">
            <text:p>0,00148055555555556000</text:p>
          </table:table-cell>
          <table:table-cell table:formula="of:=[.D248]-[.D24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2" office:value-type="float" office:value="12844" calcext:value-type="float">
            <text:p>12844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48657407407407" calcext:value-type="float">
            <text:p>0,00148657407407407000</text:p>
          </table:table-cell>
          <table:table-cell table:formula="of:=[.D249]-[.D248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2" office:value-type="float" office:value="12896" calcext:value-type="float">
            <text:p>1289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49259259259259" calcext:value-type="float">
            <text:p>0,00149259259259259000</text:p>
          </table:table-cell>
          <table:table-cell table:formula="of:=[.D250]-[.D24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2" office:value-type="float" office:value="12948" calcext:value-type="float">
            <text:p>12948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49861111111111" calcext:value-type="float">
            <text:p>0,00149861111111111000</text:p>
          </table:table-cell>
          <table:table-cell table:formula="of:=[.D251]-[.D25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2" office:value-type="float" office:value="13000" calcext:value-type="float">
            <text:p>13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50462962962963" calcext:value-type="float">
            <text:p>0,00150462962962963000</text:p>
          </table:table-cell>
          <table:table-cell table:formula="of:=[.D252]-[.D25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2" office:value-type="float" office:value="13052" calcext:value-type="float">
            <text:p>13052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51064814814815" calcext:value-type="float">
            <text:p>0,00151064814814815000</text:p>
          </table:table-cell>
          <table:table-cell table:formula="of:=[.D253]-[.D25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2" office:value-type="float" office:value="13104" calcext:value-type="float">
            <text:p>1310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51666666666667" calcext:value-type="float">
            <text:p>0,00151666666666667000</text:p>
          </table:table-cell>
          <table:table-cell table:formula="of:=[.D254]-[.D25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2" office:value-type="float" office:value="13156" calcext:value-type="float">
            <text:p>13156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52268518518519" calcext:value-type="float">
            <text:p>0,00152268518518518000</text:p>
          </table:table-cell>
          <table:table-cell table:formula="of:=[.D255]-[.D254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2" office:value-type="float" office:value="13208" calcext:value-type="float">
            <text:p>1320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5287037037037" calcext:value-type="float">
            <text:p>0,00152870370370370000</text:p>
          </table:table-cell>
          <table:table-cell table:formula="of:=[.D256]-[.D25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2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53472222222222" calcext:value-type="float">
            <text:p>0,00153472222222222000</text:p>
          </table:table-cell>
          <table:table-cell table:formula="of:=[.D257]-[.D25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2" office:value-type="float" office:value="13312" calcext:value-type="float">
            <text:p>1331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54074074074074" calcext:value-type="float">
            <text:p>0,00154074074074074000</text:p>
          </table:table-cell>
          <table:table-cell table:formula="of:=[.D258]-[.D25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2" office:value-type="float" office:value="13364" calcext:value-type="float">
            <text:p>13364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54675925925926" calcext:value-type="float">
            <text:p>0,00154675925925926000</text:p>
          </table:table-cell>
          <table:table-cell table:formula="of:=[.D259]-[.D25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2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55277777777778" calcext:value-type="float">
            <text:p>0,00155277777777778000</text:p>
          </table:table-cell>
          <table:table-cell table:formula="of:=[.D260]-[.D25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2" office:value-type="float" office:value="13468" calcext:value-type="float">
            <text:p>13468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5587962962963" calcext:value-type="float">
            <text:p>0,00155879629629630000</text:p>
          </table:table-cell>
          <table:table-cell table:formula="of:=[.D261]-[.D260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2" office:value-type="float" office:value="13520" calcext:value-type="float">
            <text:p>135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56481481481481" calcext:value-type="float">
            <text:p>0,00156481481481482000</text:p>
          </table:table-cell>
          <table:table-cell table:formula="of:=[.D262]-[.D26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2" office:value-type="float" office:value="13572" calcext:value-type="float">
            <text:p>13572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57083333333333" calcext:value-type="float">
            <text:p>0,00157083333333333000</text:p>
          </table:table-cell>
          <table:table-cell table:formula="of:=[.D263]-[.D26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2" office:value-type="float" office:value="13624" calcext:value-type="float">
            <text:p>1362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57685185185185" calcext:value-type="float">
            <text:p>0,00157685185185185000</text:p>
          </table:table-cell>
          <table:table-cell table:formula="of:=[.D264]-[.D26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2" office:value-type="float" office:value="13676" calcext:value-type="float">
            <text:p>13676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58287037037037" calcext:value-type="float">
            <text:p>0,00158287037037037000</text:p>
          </table:table-cell>
          <table:table-cell table:formula="of:=[.D265]-[.D26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2" office:value-type="float" office:value="13728" calcext:value-type="float">
            <text:p>1372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58888888888889" calcext:value-type="float">
            <text:p>0,00158888888888889000</text:p>
          </table:table-cell>
          <table:table-cell table:formula="of:=[.D266]-[.D265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2" office:value-type="float" office:value="13780" calcext:value-type="float">
            <text:p>1378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59490740740741" calcext:value-type="float">
            <text:p>0,00159490740740741000</text:p>
          </table:table-cell>
          <table:table-cell table:formula="of:=[.D267]-[.D26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2" office:value-type="float" office:value="13832" calcext:value-type="float">
            <text:p>1383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60092592592593" calcext:value-type="float">
            <text:p>0,00160092592592593000</text:p>
          </table:table-cell>
          <table:table-cell table:formula="of:=[.D268]-[.D26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2" office:value-type="float" office:value="13884" calcext:value-type="float">
            <text:p>13884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60694444444444" calcext:value-type="float">
            <text:p>0,00160694444444444000</text:p>
          </table:table-cell>
          <table:table-cell table:formula="of:=[.D269]-[.D26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2" office:value-type="float" office:value="13936" calcext:value-type="float">
            <text:p>1393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61296296296296" calcext:value-type="float">
            <text:p>0,00161296296296296000</text:p>
          </table:table-cell>
          <table:table-cell table:formula="of:=[.D270]-[.D26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2" office:value-type="float" office:value="13988" calcext:value-type="float">
            <text:p>13988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61898148148148" calcext:value-type="float">
            <text:p>0,00161898148148148000</text:p>
          </table:table-cell>
          <table:table-cell table:formula="of:=[.D271]-[.D27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2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625" calcext:value-type="float">
            <text:p>0,00162500000000000000</text:p>
          </table:table-cell>
          <table:table-cell table:formula="of:=[.D272]-[.D271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2" office:value-type="float" office:value="14092" calcext:value-type="float">
            <text:p>14092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63101851851852" calcext:value-type="float">
            <text:p>0,00163101851851852000</text:p>
          </table:table-cell>
          <table:table-cell table:formula="of:=[.D273]-[.D27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2" office:value-type="float" office:value="14144" calcext:value-type="float">
            <text:p>1414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63703703703704" calcext:value-type="float">
            <text:p>0,00163703703703704000</text:p>
          </table:table-cell>
          <table:table-cell table:formula="of:=[.D274]-[.D27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2" office:value-type="float" office:value="14196" calcext:value-type="float">
            <text:p>14196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64305555555556" calcext:value-type="float">
            <text:p>0,00164305555555556000</text:p>
          </table:table-cell>
          <table:table-cell table:formula="of:=[.D275]-[.D27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2" office:value-type="float" office:value="14248" calcext:value-type="float">
            <text:p>1424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64907407407407" calcext:value-type="float">
            <text:p>0,00164907407407407000</text:p>
          </table:table-cell>
          <table:table-cell table:formula="of:=[.D276]-[.D27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2" office:value-type="float" office:value="14300" calcext:value-type="float">
            <text:p>143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65509259259259" calcext:value-type="float">
            <text:p>0,00165509259259259000</text:p>
          </table:table-cell>
          <table:table-cell table:formula="of:=[.D277]-[.D27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2" office:value-type="float" office:value="14352" calcext:value-type="float">
            <text:p>1435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66111111111111" calcext:value-type="float">
            <text:p>0,00166111111111111000</text:p>
          </table:table-cell>
          <table:table-cell table:formula="of:=[.D278]-[.D277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2" office:value-type="float" office:value="14404" calcext:value-type="float">
            <text:p>14404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66712962962963" calcext:value-type="float">
            <text:p>0,00166712962962963000</text:p>
          </table:table-cell>
          <table:table-cell table:formula="of:=[.D279]-[.D27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2" office:value-type="float" office:value="14456" calcext:value-type="float">
            <text:p>1445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67314814814815" calcext:value-type="float">
            <text:p>0,00167314814814815000</text:p>
          </table:table-cell>
          <table:table-cell table:formula="of:=[.D280]-[.D27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2" office:value-type="float" office:value="14508" calcext:value-type="float">
            <text:p>14508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67916666666667" calcext:value-type="float">
            <text:p>0,00167916666666667000</text:p>
          </table:table-cell>
          <table:table-cell table:formula="of:=[.D281]-[.D28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2" office:value-type="float" office:value="14560" calcext:value-type="float">
            <text:p>145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68518518518519" calcext:value-type="float">
            <text:p>0,00168518518518519000</text:p>
          </table:table-cell>
          <table:table-cell table:formula="of:=[.D282]-[.D28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2" office:value-type="float" office:value="14612" calcext:value-type="float">
            <text:p>14612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6912037037037" calcext:value-type="float">
            <text:p>0,00169120370370370000</text:p>
          </table:table-cell>
          <table:table-cell table:formula="of:=[.D283]-[.D28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2" office:value-type="float" office:value="14664" calcext:value-type="float">
            <text:p>1466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69722222222222" calcext:value-type="float">
            <text:p>0,00169722222222222000</text:p>
          </table:table-cell>
          <table:table-cell table:formula="of:=[.D284]-[.D283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2" office:value-type="float" office:value="14716" calcext:value-type="float">
            <text:p>14716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70324074074074" calcext:value-type="float">
            <text:p>0,00170324074074074000</text:p>
          </table:table-cell>
          <table:table-cell table:formula="of:=[.D285]-[.D28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2" office:value-type="float" office:value="14768" calcext:value-type="float">
            <text:p>1476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70925925925926" calcext:value-type="float">
            <text:p>0,00170925925925926000</text:p>
          </table:table-cell>
          <table:table-cell table:formula="of:=[.D286]-[.D28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2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71527777777778" calcext:value-type="float">
            <text:p>0,00171527777777778000</text:p>
          </table:table-cell>
          <table:table-cell table:formula="of:=[.D287]-[.D28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2" office:value-type="float" office:value="14872" calcext:value-type="float">
            <text:p>1487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7212962962963" calcext:value-type="float">
            <text:p>0,00172129629629630000</text:p>
          </table:table-cell>
          <table:table-cell table:formula="of:=[.D288]-[.D28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2" office:value-type="float" office:value="14924" calcext:value-type="float">
            <text:p>14924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72731481481481" calcext:value-type="float">
            <text:p>0,00172731481481481000</text:p>
          </table:table-cell>
          <table:table-cell table:formula="of:=[.D289]-[.D28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2" office:value-type="float" office:value="14976" calcext:value-type="float">
            <text:p>1497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73333333333333" calcext:value-type="float">
            <text:p>0,00173333333333333000</text:p>
          </table:table-cell>
          <table:table-cell table:formula="of:=[.D290]-[.D289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2" office:value-type="float" office:value="15028" calcext:value-type="float">
            <text:p>15028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73935185185185" calcext:value-type="float">
            <text:p>0,00173935185185185000</text:p>
          </table:table-cell>
          <table:table-cell table:formula="of:=[.D291]-[.D29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2" office:value-type="float" office:value="15080" calcext:value-type="float">
            <text:p>1508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74537037037037" calcext:value-type="float">
            <text:p>0,00174537037037037000</text:p>
          </table:table-cell>
          <table:table-cell table:formula="of:=[.D292]-[.D29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2" office:value-type="float" office:value="15132" calcext:value-type="float">
            <text:p>15132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75138888888889" calcext:value-type="float">
            <text:p>0,00175138888888889000</text:p>
          </table:table-cell>
          <table:table-cell table:formula="of:=[.D293]-[.D29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2" office:value-type="float" office:value="15184" calcext:value-type="float">
            <text:p>1518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75740740740741" calcext:value-type="float">
            <text:p>0,00175740740740741000</text:p>
          </table:table-cell>
          <table:table-cell table:formula="of:=[.D294]-[.D29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2" office:value-type="float" office:value="15236" calcext:value-type="float">
            <text:p>15236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76342592592593" calcext:value-type="float">
            <text:p>0,00176342592592593000</text:p>
          </table:table-cell>
          <table:table-cell table:formula="of:=[.D295]-[.D29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2" office:value-type="float" office:value="15288" calcext:value-type="float">
            <text:p>1528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76944444444444" calcext:value-type="float">
            <text:p>0,00176944444444444000</text:p>
          </table:table-cell>
          <table:table-cell table:formula="of:=[.D296]-[.D295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2" office:value-type="float" office:value="15340" calcext:value-type="float">
            <text:p>1534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77546296296296" calcext:value-type="float">
            <text:p>0,00177546296296296000</text:p>
          </table:table-cell>
          <table:table-cell table:formula="of:=[.D297]-[.D29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2" office:value-type="float" office:value="15392" calcext:value-type="float">
            <text:p>1539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78148148148148" calcext:value-type="float">
            <text:p>0,00178148148148148000</text:p>
          </table:table-cell>
          <table:table-cell table:formula="of:=[.D298]-[.D29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2" office:value-type="float" office:value="15444" calcext:value-type="float">
            <text:p>15444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7875" calcext:value-type="float">
            <text:p>0,00178750000000000000</text:p>
          </table:table-cell>
          <table:table-cell table:formula="of:=[.D299]-[.D29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2" office:value-type="float" office:value="15496" calcext:value-type="float">
            <text:p>1549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79351851851852" calcext:value-type="float">
            <text:p>0,00179351851851852000</text:p>
          </table:table-cell>
          <table:table-cell table:formula="of:=[.D300]-[.D29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2" office:value-type="float" office:value="15548" calcext:value-type="float">
            <text:p>15548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79953703703704" calcext:value-type="float">
            <text:p>0,00179953703703704000</text:p>
          </table:table-cell>
          <table:table-cell table:formula="of:=[.D301]-[.D30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2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80555555555556" calcext:value-type="float">
            <text:p>0,00180555555555556000</text:p>
          </table:table-cell>
          <table:table-cell table:formula="of:=[.D302]-[.D301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2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81157407407407" calcext:value-type="float">
            <text:p>0,00181157407407407000</text:p>
          </table:table-cell>
          <table:table-cell table:formula="of:=[.D303]-[.D30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2" office:value-type="float" office:value="15704" calcext:value-type="float">
            <text:p>1570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81759259259259" calcext:value-type="float">
            <text:p>0,00181759259259259000</text:p>
          </table:table-cell>
          <table:table-cell table:formula="of:=[.D304]-[.D30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2" office:value-type="float" office:value="15756" calcext:value-type="float">
            <text:p>15756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82361111111111" calcext:value-type="float">
            <text:p>0,00182361111111111000</text:p>
          </table:table-cell>
          <table:table-cell table:formula="of:=[.D305]-[.D30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2" office:value-type="float" office:value="15808" calcext:value-type="float">
            <text:p>1580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182962962962963" calcext:value-type="float">
            <text:p>0,00182962962962963000</text:p>
          </table:table-cell>
          <table:table-cell table:formula="of:=[.D306]-[.D30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2" office:value-type="float" office:value="15860" calcext:value-type="float">
            <text:p>1586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183564814814815" calcext:value-type="float">
            <text:p>0,00183564814814815000</text:p>
          </table:table-cell>
          <table:table-cell table:formula="of:=[.D307]-[.D30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2" office:value-type="float" office:value="15912" calcext:value-type="float">
            <text:p>1591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184166666666667" calcext:value-type="float">
            <text:p>0,00184166666666667000</text:p>
          </table:table-cell>
          <table:table-cell table:formula="of:=[.D308]-[.D307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2" office:value-type="float" office:value="15964" calcext:value-type="float">
            <text:p>15964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184768518518519" calcext:value-type="float">
            <text:p>0,00184768518518519000</text:p>
          </table:table-cell>
          <table:table-cell table:formula="of:=[.D309]-[.D30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2" office:value-type="float" office:value="16016" calcext:value-type="float">
            <text:p>1601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18537037037037" calcext:value-type="float">
            <text:p>0,00185370370370370000</text:p>
          </table:table-cell>
          <table:table-cell table:formula="of:=[.D310]-[.D30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2" office:value-type="float" office:value="16068" calcext:value-type="float">
            <text:p>16068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185972222222222" calcext:value-type="float">
            <text:p>0,00185972222222222000</text:p>
          </table:table-cell>
          <table:table-cell table:formula="of:=[.D311]-[.D31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2" office:value-type="float" office:value="16120" calcext:value-type="float">
            <text:p>1612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186574074074074" calcext:value-type="float">
            <text:p>0,00186574074074074000</text:p>
          </table:table-cell>
          <table:table-cell table:formula="of:=[.D312]-[.D31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2" office:value-type="float" office:value="16172" calcext:value-type="float">
            <text:p>16172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187175925925926" calcext:value-type="float">
            <text:p>0,00187175925925926000</text:p>
          </table:table-cell>
          <table:table-cell table:formula="of:=[.D313]-[.D31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2" office:value-type="float" office:value="16224" calcext:value-type="float">
            <text:p>1622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187777777777778" calcext:value-type="float">
            <text:p>0,00187777777777778000</text:p>
          </table:table-cell>
          <table:table-cell table:formula="of:=[.D314]-[.D313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2" office:value-type="float" office:value="16276" calcext:value-type="float">
            <text:p>16276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18837962962963" calcext:value-type="float">
            <text:p>0,00188379629629630000</text:p>
          </table:table-cell>
          <table:table-cell table:formula="of:=[.D315]-[.D31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2" office:value-type="float" office:value="16328" calcext:value-type="float">
            <text:p>1632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188981481481481" calcext:value-type="float">
            <text:p>0,00188981481481481000</text:p>
          </table:table-cell>
          <table:table-cell table:formula="of:=[.D316]-[.D31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2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189583333333333" calcext:value-type="float">
            <text:p>0,00189583333333333000</text:p>
          </table:table-cell>
          <table:table-cell table:formula="of:=[.D317]-[.D31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2" office:value-type="float" office:value="16432" calcext:value-type="float">
            <text:p>1643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190185185185185" calcext:value-type="float">
            <text:p>0,00190185185185185000</text:p>
          </table:table-cell>
          <table:table-cell table:formula="of:=[.D318]-[.D31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2" office:value-type="float" office:value="16484" calcext:value-type="float">
            <text:p>16484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190787037037037" calcext:value-type="float">
            <text:p>0,00190787037037037000</text:p>
          </table:table-cell>
          <table:table-cell table:formula="of:=[.D319]-[.D31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2" office:value-type="float" office:value="16536" calcext:value-type="float">
            <text:p>1653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191388888888889" calcext:value-type="float">
            <text:p>0,00191388888888889000</text:p>
          </table:table-cell>
          <table:table-cell table:formula="of:=[.D320]-[.D319]" office:value-type="float" office:value="0.0000060185185185187" calcext:value-type="float">
            <text:p>0,00000601851851851870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2" office:value-type="float" office:value="16588" calcext:value-type="float">
            <text:p>16588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191990740740741" calcext:value-type="float">
            <text:p>0,00191990740740741000</text:p>
          </table:table-cell>
          <table:table-cell table:formula="of:=[.D321]-[.D32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2" office:value-type="float" office:value="16640" calcext:value-type="float">
            <text:p>166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192592592592593" calcext:value-type="float">
            <text:p>0,00192592592592593000</text:p>
          </table:table-cell>
          <table:table-cell table:formula="of:=[.D322]-[.D32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2" office:value-type="float" office:value="16692" calcext:value-type="float">
            <text:p>16692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193194444444444" calcext:value-type="float">
            <text:p>0,00193194444444444000</text:p>
          </table:table-cell>
          <table:table-cell table:formula="of:=[.D323]-[.D32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2" office:value-type="float" office:value="16744" calcext:value-type="float">
            <text:p>1674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193796296296296" calcext:value-type="float">
            <text:p>0,00193796296296296000</text:p>
          </table:table-cell>
          <table:table-cell table:formula="of:=[.D324]-[.D32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2" office:value-type="float" office:value="16796" calcext:value-type="float">
            <text:p>16796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194398148148148" calcext:value-type="float">
            <text:p>0,00194398148148148000</text:p>
          </table:table-cell>
          <table:table-cell table:formula="of:=[.D325]-[.D32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2" office:value-type="float" office:value="16848" calcext:value-type="float">
            <text:p>1684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195" calcext:value-type="float">
            <text:p>0,00195000000000000000</text:p>
          </table:table-cell>
          <table:table-cell table:formula="of:=[.D326]-[.D32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2" office:value-type="float" office:value="16900" calcext:value-type="float">
            <text:p>169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195601851851852" calcext:value-type="float">
            <text:p>0,00195601851851852000</text:p>
          </table:table-cell>
          <table:table-cell table:formula="of:=[.D327]-[.D32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2" office:value-type="float" office:value="16952" calcext:value-type="float">
            <text:p>1695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196203703703704" calcext:value-type="float">
            <text:p>0,00196203703703704000</text:p>
          </table:table-cell>
          <table:table-cell table:formula="of:=[.D328]-[.D32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2" office:value-type="float" office:value="17004" calcext:value-type="float">
            <text:p>17004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196805555555556" calcext:value-type="float">
            <text:p>0,00196805555555556000</text:p>
          </table:table-cell>
          <table:table-cell table:formula="of:=[.D329]-[.D328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2" office:value-type="float" office:value="17056" calcext:value-type="float">
            <text:p>1705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197407407407407" calcext:value-type="float">
            <text:p>0,00197407407407407000</text:p>
          </table:table-cell>
          <table:table-cell table:formula="of:=[.D330]-[.D32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2" office:value-type="float" office:value="17108" calcext:value-type="float">
            <text:p>17108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198009259259259" calcext:value-type="float">
            <text:p>0,00198009259259259000</text:p>
          </table:table-cell>
          <table:table-cell table:formula="of:=[.D331]-[.D33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2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198611111111111" calcext:value-type="float">
            <text:p>0,00198611111111111000</text:p>
          </table:table-cell>
          <table:table-cell table:formula="of:=[.D332]-[.D33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2" office:value-type="float" office:value="17212" calcext:value-type="float">
            <text:p>17212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199212962962963" calcext:value-type="float">
            <text:p>0,00199212962962963000</text:p>
          </table:table-cell>
          <table:table-cell table:formula="of:=[.D333]-[.D33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2" office:value-type="float" office:value="17264" calcext:value-type="float">
            <text:p>1726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199814814814815" calcext:value-type="float">
            <text:p>0,00199814814814815000</text:p>
          </table:table-cell>
          <table:table-cell table:formula="of:=[.D334]-[.D33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2" office:value-type="float" office:value="17316" calcext:value-type="float">
            <text:p>17316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00416666666667" calcext:value-type="float">
            <text:p>0,00200416666666667000</text:p>
          </table:table-cell>
          <table:table-cell table:formula="of:=[.D335]-[.D33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2" office:value-type="float" office:value="17368" calcext:value-type="float">
            <text:p>1736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01018518518519" calcext:value-type="float">
            <text:p>0,00201018518518519000</text:p>
          </table:table-cell>
          <table:table-cell table:formula="of:=[.D336]-[.D33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2" office:value-type="float" office:value="17420" calcext:value-type="float">
            <text:p>1742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0162037037037" calcext:value-type="float">
            <text:p>0,00201620370370370000</text:p>
          </table:table-cell>
          <table:table-cell table:formula="of:=[.D337]-[.D33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2" office:value-type="float" office:value="17472" calcext:value-type="float">
            <text:p>1747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02222222222222" calcext:value-type="float">
            <text:p>0,00202222222222222000</text:p>
          </table:table-cell>
          <table:table-cell table:formula="of:=[.D338]-[.D33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2" office:value-type="float" office:value="17524" calcext:value-type="float">
            <text:p>17524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02824074074074" calcext:value-type="float">
            <text:p>0,00202824074074074000</text:p>
          </table:table-cell>
          <table:table-cell table:formula="of:=[.D339]-[.D33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2" office:value-type="float" office:value="17576" calcext:value-type="float">
            <text:p>1757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03425925925926" calcext:value-type="float">
            <text:p>0,00203425925925926000</text:p>
          </table:table-cell>
          <table:table-cell table:formula="of:=[.D340]-[.D33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2" office:value-type="float" office:value="17628" calcext:value-type="float">
            <text:p>17628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04027777777778" calcext:value-type="float">
            <text:p>0,00204027777777778000</text:p>
          </table:table-cell>
          <table:table-cell table:formula="of:=[.D341]-[.D340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2" office:value-type="float" office:value="17680" calcext:value-type="float">
            <text:p>176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0462962962963" calcext:value-type="float">
            <text:p>0,00204629629629630000</text:p>
          </table:table-cell>
          <table:table-cell table:formula="of:=[.D342]-[.D34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2" office:value-type="float" office:value="17732" calcext:value-type="float">
            <text:p>17732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05231481481482" calcext:value-type="float">
            <text:p>0,00205231481481482000</text:p>
          </table:table-cell>
          <table:table-cell table:formula="of:=[.D343]-[.D34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2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05833333333333" calcext:value-type="float">
            <text:p>0,00205833333333333000</text:p>
          </table:table-cell>
          <table:table-cell table:formula="of:=[.D344]-[.D34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2" office:value-type="float" office:value="17836" calcext:value-type="float">
            <text:p>17836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06435185185185" calcext:value-type="float">
            <text:p>0,00206435185185185000</text:p>
          </table:table-cell>
          <table:table-cell table:formula="of:=[.D345]-[.D34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2" office:value-type="float" office:value="17888" calcext:value-type="float">
            <text:p>1788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07037037037037" calcext:value-type="float">
            <text:p>0,00207037037037037000</text:p>
          </table:table-cell>
          <table:table-cell table:formula="of:=[.D346]-[.D34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2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07638888888889" calcext:value-type="float">
            <text:p>0,00207638888888889000</text:p>
          </table:table-cell>
          <table:table-cell table:formula="of:=[.D347]-[.D34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2" office:value-type="float" office:value="17992" calcext:value-type="float">
            <text:p>1799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08240740740741" calcext:value-type="float">
            <text:p>0,00208240740740741000</text:p>
          </table:table-cell>
          <table:table-cell table:formula="of:=[.D348]-[.D34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2" office:value-type="float" office:value="18044" calcext:value-type="float">
            <text:p>18044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08842592592593" calcext:value-type="float">
            <text:p>0,00208842592592593000</text:p>
          </table:table-cell>
          <table:table-cell table:formula="of:=[.D349]-[.D34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2" office:value-type="float" office:value="18096" calcext:value-type="float">
            <text:p>1809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09444444444444" calcext:value-type="float">
            <text:p>0,00209444444444444000</text:p>
          </table:table-cell>
          <table:table-cell table:formula="of:=[.D350]-[.D34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2" office:value-type="float" office:value="18148" calcext:value-type="float">
            <text:p>18148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10046296296296" calcext:value-type="float">
            <text:p>0,00210046296296296000</text:p>
          </table:table-cell>
          <table:table-cell table:formula="of:=[.D351]-[.D35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2" office:value-type="float" office:value="18200" calcext:value-type="float">
            <text:p>182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10648148148148" calcext:value-type="float">
            <text:p>0,00210648148148148000</text:p>
          </table:table-cell>
          <table:table-cell table:formula="of:=[.D352]-[.D35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2" office:value-type="float" office:value="18252" calcext:value-type="float">
            <text:p>18252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1125" calcext:value-type="float">
            <text:p>0,00211250000000000000</text:p>
          </table:table-cell>
          <table:table-cell table:formula="of:=[.D353]-[.D352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2" office:value-type="float" office:value="18304" calcext:value-type="float">
            <text:p>1830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11851851851852" calcext:value-type="float">
            <text:p>0,00211851851851852000</text:p>
          </table:table-cell>
          <table:table-cell table:formula="of:=[.D354]-[.D35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2" office:value-type="float" office:value="18356" calcext:value-type="float">
            <text:p>18356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12453703703704" calcext:value-type="float">
            <text:p>0,00212453703703704000</text:p>
          </table:table-cell>
          <table:table-cell table:formula="of:=[.D355]-[.D35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2" office:value-type="float" office:value="18408" calcext:value-type="float">
            <text:p>1840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13055555555556" calcext:value-type="float">
            <text:p>0,00213055555555556000</text:p>
          </table:table-cell>
          <table:table-cell table:formula="of:=[.D356]-[.D35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2" office:value-type="float" office:value="18460" calcext:value-type="float">
            <text:p>1846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13657407407407" calcext:value-type="float">
            <text:p>0,00213657407407407000</text:p>
          </table:table-cell>
          <table:table-cell table:formula="of:=[.D357]-[.D35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2" office:value-type="float" office:value="18512" calcext:value-type="float">
            <text:p>1851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14259259259259" calcext:value-type="float">
            <text:p>0,00214259259259259000</text:p>
          </table:table-cell>
          <table:table-cell table:formula="of:=[.D358]-[.D35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2" office:value-type="float" office:value="18564" calcext:value-type="float">
            <text:p>18564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14861111111111" calcext:value-type="float">
            <text:p>0,00214861111111111000</text:p>
          </table:table-cell>
          <table:table-cell table:formula="of:=[.D359]-[.D35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2" office:value-type="float" office:value="18616" calcext:value-type="float">
            <text:p>1861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15462962962963" calcext:value-type="float">
            <text:p>0,00215462962962963000</text:p>
          </table:table-cell>
          <table:table-cell table:formula="of:=[.D360]-[.D35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2" office:value-type="float" office:value="18668" calcext:value-type="float">
            <text:p>18668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16064814814815" calcext:value-type="float">
            <text:p>0,00216064814814815000</text:p>
          </table:table-cell>
          <table:table-cell table:formula="of:=[.D361]-[.D36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2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16666666666667" calcext:value-type="float">
            <text:p>0,00216666666666667000</text:p>
          </table:table-cell>
          <table:table-cell table:formula="of:=[.D362]-[.D36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2" office:value-type="float" office:value="18772" calcext:value-type="float">
            <text:p>18772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17268518518519" calcext:value-type="float">
            <text:p>0,00217268518518519000</text:p>
          </table:table-cell>
          <table:table-cell table:formula="of:=[.D363]-[.D36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2" office:value-type="float" office:value="18824" calcext:value-type="float">
            <text:p>1882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1787037037037" calcext:value-type="float">
            <text:p>0,00217870370370370000</text:p>
          </table:table-cell>
          <table:table-cell table:formula="of:=[.D364]-[.D36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2" office:value-type="float" office:value="18876" calcext:value-type="float">
            <text:p>18876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18472222222222" calcext:value-type="float">
            <text:p>0,00218472222222222000</text:p>
          </table:table-cell>
          <table:table-cell table:formula="of:=[.D365]-[.D364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2" office:value-type="float" office:value="18928" calcext:value-type="float">
            <text:p>1892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19074074074074" calcext:value-type="float">
            <text:p>0,00219074074074074000</text:p>
          </table:table-cell>
          <table:table-cell table:formula="of:=[.D366]-[.D36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2" office:value-type="float" office:value="18980" calcext:value-type="float">
            <text:p>1898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19675925925926" calcext:value-type="float">
            <text:p>0,00219675925925926000</text:p>
          </table:table-cell>
          <table:table-cell table:formula="of:=[.D367]-[.D36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2" office:value-type="float" office:value="19032" calcext:value-type="float">
            <text:p>1903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20277777777778" calcext:value-type="float">
            <text:p>0,00220277777777778000</text:p>
          </table:table-cell>
          <table:table-cell table:formula="of:=[.D368]-[.D36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2" office:value-type="float" office:value="19084" calcext:value-type="float">
            <text:p>19084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2087962962963" calcext:value-type="float">
            <text:p>0,00220879629629630000</text:p>
          </table:table-cell>
          <table:table-cell table:formula="of:=[.D369]-[.D36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2" office:value-type="float" office:value="19136" calcext:value-type="float">
            <text:p>1913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21481481481482" calcext:value-type="float">
            <text:p>0,00221481481481482000</text:p>
          </table:table-cell>
          <table:table-cell table:formula="of:=[.D370]-[.D36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2" office:value-type="float" office:value="19188" calcext:value-type="float">
            <text:p>19188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22083333333333" calcext:value-type="float">
            <text:p>0,00222083333333333000</text:p>
          </table:table-cell>
          <table:table-cell table:formula="of:=[.D371]-[.D37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2" office:value-type="float" office:value="19240" calcext:value-type="float">
            <text:p>1924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22685185185185" calcext:value-type="float">
            <text:p>0,00222685185185185000</text:p>
          </table:table-cell>
          <table:table-cell table:formula="of:=[.D372]-[.D37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2" office:value-type="float" office:value="19292" calcext:value-type="float">
            <text:p>19292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23287037037037" calcext:value-type="float">
            <text:p>0,00223287037037037000</text:p>
          </table:table-cell>
          <table:table-cell table:formula="of:=[.D373]-[.D37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2" office:value-type="float" office:value="19344" calcext:value-type="float">
            <text:p>1934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23888888888889" calcext:value-type="float">
            <text:p>0,00223888888888889000</text:p>
          </table:table-cell>
          <table:table-cell table:formula="of:=[.D374]-[.D37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2" office:value-type="float" office:value="19396" calcext:value-type="float">
            <text:p>19396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24490740740741" calcext:value-type="float">
            <text:p>0,00224490740740741000</text:p>
          </table:table-cell>
          <table:table-cell table:formula="of:=[.D375]-[.D37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2" office:value-type="float" office:value="19448" calcext:value-type="float">
            <text:p>1944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25092592592593" calcext:value-type="float">
            <text:p>0,00225092592592593000</text:p>
          </table:table-cell>
          <table:table-cell table:formula="of:=[.D376]-[.D37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2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25694444444444" calcext:value-type="float">
            <text:p>0,00225694444444444000</text:p>
          </table:table-cell>
          <table:table-cell table:formula="of:=[.D377]-[.D376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2" office:value-type="float" office:value="19552" calcext:value-type="float">
            <text:p>1955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26296296296296" calcext:value-type="float">
            <text:p>0,00226296296296296000</text:p>
          </table:table-cell>
          <table:table-cell table:formula="of:=[.D378]-[.D37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2" office:value-type="float" office:value="19604" calcext:value-type="float">
            <text:p>19604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26898148148148" calcext:value-type="float">
            <text:p>0,00226898148148148000</text:p>
          </table:table-cell>
          <table:table-cell table:formula="of:=[.D379]-[.D37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2" office:value-type="float" office:value="19656" calcext:value-type="float">
            <text:p>1965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275" calcext:value-type="float">
            <text:p>0,00227500000000000000</text:p>
          </table:table-cell>
          <table:table-cell table:formula="of:=[.D380]-[.D37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2" office:value-type="float" office:value="19708" calcext:value-type="float">
            <text:p>19708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28101851851852" calcext:value-type="float">
            <text:p>0,00228101851851852000</text:p>
          </table:table-cell>
          <table:table-cell table:formula="of:=[.D381]-[.D38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2" office:value-type="float" office:value="19760" calcext:value-type="float">
            <text:p>197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28703703703704" calcext:value-type="float">
            <text:p>0,00228703703703704000</text:p>
          </table:table-cell>
          <table:table-cell table:formula="of:=[.D382]-[.D38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2" office:value-type="float" office:value="19812" calcext:value-type="float">
            <text:p>19812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29305555555556" calcext:value-type="float">
            <text:p>0,00229305555555556000</text:p>
          </table:table-cell>
          <table:table-cell table:formula="of:=[.D383]-[.D38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2" office:value-type="float" office:value="19864" calcext:value-type="float">
            <text:p>1986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29907407407407" calcext:value-type="float">
            <text:p>0,00229907407407407000</text:p>
          </table:table-cell>
          <table:table-cell table:formula="of:=[.D384]-[.D38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2" office:value-type="float" office:value="19916" calcext:value-type="float">
            <text:p>19916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30509259259259" calcext:value-type="float">
            <text:p>0,00230509259259259000</text:p>
          </table:table-cell>
          <table:table-cell table:formula="of:=[.D385]-[.D38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2" office:value-type="float" office:value="19968" calcext:value-type="float">
            <text:p>1996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31111111111111" calcext:value-type="float">
            <text:p>0,00231111111111111000</text:p>
          </table:table-cell>
          <table:table-cell table:formula="of:=[.D386]-[.D38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2" office:value-type="float" office:value="20020" calcext:value-type="float">
            <text:p>2002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31712962962963" calcext:value-type="float">
            <text:p>0,00231712962962963000</text:p>
          </table:table-cell>
          <table:table-cell table:formula="of:=[.D387]-[.D38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2" office:value-type="float" office:value="20072" calcext:value-type="float">
            <text:p>2007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32314814814815" calcext:value-type="float">
            <text:p>0,00232314814814815000</text:p>
          </table:table-cell>
          <table:table-cell table:formula="of:=[.D388]-[.D38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2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32916666666667" calcext:value-type="float">
            <text:p>0,00232916666666667000</text:p>
          </table:table-cell>
          <table:table-cell table:formula="of:=[.D389]-[.D388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2" office:value-type="float" office:value="20176" calcext:value-type="float">
            <text:p>2017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33518518518519" calcext:value-type="float">
            <text:p>0,00233518518518519000</text:p>
          </table:table-cell>
          <table:table-cell table:formula="of:=[.D390]-[.D38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2" office:value-type="float" office:value="20228" calcext:value-type="float">
            <text:p>20228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3412037037037" calcext:value-type="float">
            <text:p>0,00234120370370370000</text:p>
          </table:table-cell>
          <table:table-cell table:formula="of:=[.D391]-[.D39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2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34722222222222" calcext:value-type="float">
            <text:p>0,00234722222222222000</text:p>
          </table:table-cell>
          <table:table-cell table:formula="of:=[.D392]-[.D39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2" office:value-type="float" office:value="20332" calcext:value-type="float">
            <text:p>20332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35324074074074" calcext:value-type="float">
            <text:p>0,00235324074074074000</text:p>
          </table:table-cell>
          <table:table-cell table:formula="of:=[.D393]-[.D39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2" office:value-type="float" office:value="20384" calcext:value-type="float">
            <text:p>2038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35925925925926" calcext:value-type="float">
            <text:p>0,00235925925925926000</text:p>
          </table:table-cell>
          <table:table-cell table:formula="of:=[.D394]-[.D39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2" office:value-type="float" office:value="20436" calcext:value-type="float">
            <text:p>20436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36527777777778" calcext:value-type="float">
            <text:p>0,00236527777777778000</text:p>
          </table:table-cell>
          <table:table-cell table:formula="of:=[.D395]-[.D39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2" office:value-type="float" office:value="20488" calcext:value-type="float">
            <text:p>2048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3712962962963" calcext:value-type="float">
            <text:p>0,00237129629629630000</text:p>
          </table:table-cell>
          <table:table-cell table:formula="of:=[.D396]-[.D39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2" office:value-type="float" office:value="20540" calcext:value-type="float">
            <text:p>2054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37731481481481" calcext:value-type="float">
            <text:p>0,00237731481481481000</text:p>
          </table:table-cell>
          <table:table-cell table:formula="of:=[.D397]-[.D39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2" office:value-type="float" office:value="20592" calcext:value-type="float">
            <text:p>2059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38333333333333" calcext:value-type="float">
            <text:p>0,00238333333333333000</text:p>
          </table:table-cell>
          <table:table-cell table:formula="of:=[.D398]-[.D39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2" office:value-type="float" office:value="20644" calcext:value-type="float">
            <text:p>20644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38935185185185" calcext:value-type="float">
            <text:p>0,00238935185185185000</text:p>
          </table:table-cell>
          <table:table-cell table:formula="of:=[.D399]-[.D39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2" office:value-type="float" office:value="20696" calcext:value-type="float">
            <text:p>2069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39537037037037" calcext:value-type="float">
            <text:p>0,00239537037037037000</text:p>
          </table:table-cell>
          <table:table-cell table:formula="of:=[.D400]-[.D399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2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40138888888889" calcext:value-type="float">
            <text:p>0,00240138888888889000</text:p>
          </table:table-cell>
          <table:table-cell table:formula="of:=[.D401]-[.D40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2" office:value-type="float" office:value="20800" calcext:value-type="float">
            <text:p>20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40740740740741" calcext:value-type="float">
            <text:p>0,00240740740740741000</text:p>
          </table:table-cell>
          <table:table-cell table:formula="of:=[.D402]-[.D40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2" office:value-type="float" office:value="20852" calcext:value-type="float">
            <text:p>20852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41342592592593" calcext:value-type="float">
            <text:p>0,00241342592592593000</text:p>
          </table:table-cell>
          <table:table-cell table:formula="of:=[.D403]-[.D40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2" office:value-type="float" office:value="20904" calcext:value-type="float">
            <text:p>2090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41944444444444" calcext:value-type="float">
            <text:p>0,00241944444444444000</text:p>
          </table:table-cell>
          <table:table-cell table:formula="of:=[.D404]-[.D40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2" office:value-type="float" office:value="20956" calcext:value-type="float">
            <text:p>20956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42546296296296" calcext:value-type="float">
            <text:p>0,00242546296296296000</text:p>
          </table:table-cell>
          <table:table-cell table:formula="of:=[.D405]-[.D40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2" office:value-type="float" office:value="21008" calcext:value-type="float">
            <text:p>2100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43148148148148" calcext:value-type="float">
            <text:p>0,00243148148148148000</text:p>
          </table:table-cell>
          <table:table-cell table:formula="of:=[.D406]-[.D40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2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4375" calcext:value-type="float">
            <text:p>0,00243750000000000000</text:p>
          </table:table-cell>
          <table:table-cell table:formula="of:=[.D407]-[.D40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2" office:value-type="float" office:value="21112" calcext:value-type="float">
            <text:p>2111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44351851851852" calcext:value-type="float">
            <text:p>0,00244351851851852000</text:p>
          </table:table-cell>
          <table:table-cell table:formula="of:=[.D408]-[.D40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2" office:value-type="float" office:value="21164" calcext:value-type="float">
            <text:p>21164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44953703703704" calcext:value-type="float">
            <text:p>0,00244953703703704000</text:p>
          </table:table-cell>
          <table:table-cell table:formula="of:=[.D409]-[.D40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2" office:value-type="float" office:value="21216" calcext:value-type="float">
            <text:p>2121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45555555555556" calcext:value-type="float">
            <text:p>0,00245555555555556000</text:p>
          </table:table-cell>
          <table:table-cell table:formula="of:=[.D410]-[.D40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2" office:value-type="float" office:value="21268" calcext:value-type="float">
            <text:p>21268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46157407407407" calcext:value-type="float">
            <text:p>0,00246157407407407000</text:p>
          </table:table-cell>
          <table:table-cell table:formula="of:=[.D411]-[.D41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2" office:value-type="float" office:value="21320" calcext:value-type="float">
            <text:p>2132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46759259259259" calcext:value-type="float">
            <text:p>0,00246759259259259000</text:p>
          </table:table-cell>
          <table:table-cell table:formula="of:=[.D412]-[.D411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2" office:value-type="float" office:value="21372" calcext:value-type="float">
            <text:p>21372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47361111111111" calcext:value-type="float">
            <text:p>0,00247361111111111000</text:p>
          </table:table-cell>
          <table:table-cell table:formula="of:=[.D413]-[.D41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2" office:value-type="float" office:value="21424" calcext:value-type="float">
            <text:p>2142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47962962962963" calcext:value-type="float">
            <text:p>0,00247962962962963000</text:p>
          </table:table-cell>
          <table:table-cell table:formula="of:=[.D414]-[.D41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2" office:value-type="float" office:value="21476" calcext:value-type="float">
            <text:p>21476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48564814814815" calcext:value-type="float">
            <text:p>0,00248564814814815000</text:p>
          </table:table-cell>
          <table:table-cell table:formula="of:=[.D415]-[.D41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52" office:value-type="float" office:value="21528" calcext:value-type="float">
            <text:p>2152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49166666666667" calcext:value-type="float">
            <text:p>0,00249166666666667000</text:p>
          </table:table-cell>
          <table:table-cell table:formula="of:=[.D416]-[.D41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52" office:value-type="float" office:value="21580" calcext:value-type="float">
            <text:p>21580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49768518518519" calcext:value-type="float">
            <text:p>0,00249768518518519000</text:p>
          </table:table-cell>
          <table:table-cell table:formula="of:=[.D417]-[.D41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52" office:value-type="float" office:value="21632" calcext:value-type="float">
            <text:p>2163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5037037037037" calcext:value-type="float">
            <text:p>0,00250370370370370000</text:p>
          </table:table-cell>
          <table:table-cell table:formula="of:=[.D418]-[.D41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52" office:value-type="float" office:value="21684" calcext:value-type="float">
            <text:p>21684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50972222222222" calcext:value-type="float">
            <text:p>0,00250972222222222000</text:p>
          </table:table-cell>
          <table:table-cell table:formula="of:=[.D419]-[.D41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52" office:value-type="float" office:value="21736" calcext:value-type="float">
            <text:p>2173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51574074074074" calcext:value-type="float">
            <text:p>0,00251574074074074000</text:p>
          </table:table-cell>
          <table:table-cell table:formula="of:=[.D420]-[.D41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52" office:value-type="float" office:value="21788" calcext:value-type="float">
            <text:p>21788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52175925925926" calcext:value-type="float">
            <text:p>0,00252175925925926000</text:p>
          </table:table-cell>
          <table:table-cell table:formula="of:=[.D421]-[.D42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52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52777777777778" calcext:value-type="float">
            <text:p>0,00252777777777778000</text:p>
          </table:table-cell>
          <table:table-cell table:formula="of:=[.D422]-[.D42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52" office:value-type="float" office:value="21892" calcext:value-type="float">
            <text:p>21892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5337962962963" calcext:value-type="float">
            <text:p>0,00253379629629630000</text:p>
          </table:table-cell>
          <table:table-cell table:formula="of:=[.D423]-[.D42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52" office:value-type="float" office:value="21944" calcext:value-type="float">
            <text:p>21944</text:p>
          </table:table-cell>
          <table:table-cell office:value-type="float" office:value="8640000" calcext:value-type="float">
            <text:p>8640000</text:p>
          </table:table-cell>
          <table:table-cell table:formula="of:=[.B423]/[.C423]" office:value-type="float" office:value="0.00253981481481481" calcext:value-type="float">
            <text:p>0,00253981481481481000</text:p>
          </table:table-cell>
          <table:table-cell table:formula="of:=[.D424]-[.D423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52" office:value-type="float" office:value="21996" calcext:value-type="float">
            <text:p>21996</text:p>
          </table:table-cell>
          <table:table-cell office:value-type="float" office:value="8640000" calcext:value-type="float">
            <text:p>8640000</text:p>
          </table:table-cell>
          <table:table-cell table:formula="of:=[.B424]/[.C424]" office:value-type="float" office:value="0.00254583333333333" calcext:value-type="float">
            <text:p>0,00254583333333333000</text:p>
          </table:table-cell>
          <table:table-cell table:formula="of:=[.D425]-[.D42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52" office:value-type="float" office:value="22048" calcext:value-type="float">
            <text:p>22048</text:p>
          </table:table-cell>
          <table:table-cell office:value-type="float" office:value="8640000" calcext:value-type="float">
            <text:p>8640000</text:p>
          </table:table-cell>
          <table:table-cell table:formula="of:=[.B425]/[.C425]" office:value-type="float" office:value="0.00255185185185185" calcext:value-type="float">
            <text:p>0,00255185185185185000</text:p>
          </table:table-cell>
          <table:table-cell table:formula="of:=[.D426]-[.D42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52" office:value-type="float" office:value="22100" calcext:value-type="float">
            <text:p>22100</text:p>
          </table:table-cell>
          <table:table-cell office:value-type="float" office:value="8640000" calcext:value-type="float">
            <text:p>8640000</text:p>
          </table:table-cell>
          <table:table-cell table:formula="of:=[.B426]/[.C426]" office:value-type="float" office:value="0.00255787037037037" calcext:value-type="float">
            <text:p>0,00255787037037037000</text:p>
          </table:table-cell>
          <table:table-cell table:formula="of:=[.D427]-[.D42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52" office:value-type="float" office:value="22152" calcext:value-type="float">
            <text:p>22152</text:p>
          </table:table-cell>
          <table:table-cell office:value-type="float" office:value="8640000" calcext:value-type="float">
            <text:p>8640000</text:p>
          </table:table-cell>
          <table:table-cell table:formula="of:=[.B427]/[.C427]" office:value-type="float" office:value="0.00256388888888889" calcext:value-type="float">
            <text:p>0,00256388888888889000</text:p>
          </table:table-cell>
          <table:table-cell table:formula="of:=[.D428]-[.D42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52" office:value-type="float" office:value="22204" calcext:value-type="float">
            <text:p>22204</text:p>
          </table:table-cell>
          <table:table-cell office:value-type="float" office:value="8640000" calcext:value-type="float">
            <text:p>8640000</text:p>
          </table:table-cell>
          <table:table-cell table:formula="of:=[.B428]/[.C428]" office:value-type="float" office:value="0.00256990740740741" calcext:value-type="float">
            <text:p>0,00256990740740741000</text:p>
          </table:table-cell>
          <table:table-cell table:formula="of:=[.D429]-[.D42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52" office:value-type="float" office:value="22256" calcext:value-type="float">
            <text:p>22256</text:p>
          </table:table-cell>
          <table:table-cell office:value-type="float" office:value="8640000" calcext:value-type="float">
            <text:p>8640000</text:p>
          </table:table-cell>
          <table:table-cell table:formula="of:=[.B429]/[.C429]" office:value-type="float" office:value="0.00257592592592593" calcext:value-type="float">
            <text:p>0,00257592592592593000</text:p>
          </table:table-cell>
          <table:table-cell table:formula="of:=[.D430]-[.D42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52" office:value-type="float" office:value="22308" calcext:value-type="float">
            <text:p>22308</text:p>
          </table:table-cell>
          <table:table-cell office:value-type="float" office:value="8640000" calcext:value-type="float">
            <text:p>8640000</text:p>
          </table:table-cell>
          <table:table-cell table:formula="of:=[.B430]/[.C430]" office:value-type="float" office:value="0.00258194444444444" calcext:value-type="float">
            <text:p>0,00258194444444444000</text:p>
          </table:table-cell>
          <table:table-cell table:formula="of:=[.D431]-[.D43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52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431]/[.C431]" office:value-type="float" office:value="0.00258796296296296" calcext:value-type="float">
            <text:p>0,00258796296296296000</text:p>
          </table:table-cell>
          <table:table-cell table:formula="of:=[.D432]-[.D43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52" office:value-type="float" office:value="22412" calcext:value-type="float">
            <text:p>22412</text:p>
          </table:table-cell>
          <table:table-cell office:value-type="float" office:value="8640000" calcext:value-type="float">
            <text:p>8640000</text:p>
          </table:table-cell>
          <table:table-cell table:formula="of:=[.B432]/[.C432]" office:value-type="float" office:value="0.00259398148148148" calcext:value-type="float">
            <text:p>0,00259398148148148000</text:p>
          </table:table-cell>
          <table:table-cell table:formula="of:=[.D433]-[.D43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52" office:value-type="float" office:value="22464" calcext:value-type="float">
            <text:p>22464</text:p>
          </table:table-cell>
          <table:table-cell office:value-type="float" office:value="8640000" calcext:value-type="float">
            <text:p>8640000</text:p>
          </table:table-cell>
          <table:table-cell table:formula="of:=[.B433]/[.C433]" office:value-type="float" office:value="0.0026" calcext:value-type="float">
            <text:p>0,00260000000000000000</text:p>
          </table:table-cell>
          <table:table-cell table:formula="of:=[.D434]-[.D43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52" office:value-type="float" office:value="22516" calcext:value-type="float">
            <text:p>22516</text:p>
          </table:table-cell>
          <table:table-cell office:value-type="float" office:value="8640000" calcext:value-type="float">
            <text:p>8640000</text:p>
          </table:table-cell>
          <table:table-cell table:formula="of:=[.B434]/[.C434]" office:value-type="float" office:value="0.00260601851851852" calcext:value-type="float">
            <text:p>0,00260601851851852000</text:p>
          </table:table-cell>
          <table:table-cell table:formula="of:=[.D435]-[.D43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52" office:value-type="float" office:value="22568" calcext:value-type="float">
            <text:p>22568</text:p>
          </table:table-cell>
          <table:table-cell office:value-type="float" office:value="8640000" calcext:value-type="float">
            <text:p>8640000</text:p>
          </table:table-cell>
          <table:table-cell table:formula="of:=[.B435]/[.C435]" office:value-type="float" office:value="0.00261203703703704" calcext:value-type="float">
            <text:p>0,00261203703703704000</text:p>
          </table:table-cell>
          <table:table-cell table:formula="of:=[.D436]-[.D435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52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436]/[.C436]" office:value-type="float" office:value="0.00261805555555556" calcext:value-type="float">
            <text:p>0,00261805555555556000</text:p>
          </table:table-cell>
          <table:table-cell table:formula="of:=[.D437]-[.D43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52" office:value-type="float" office:value="22672" calcext:value-type="float">
            <text:p>22672</text:p>
          </table:table-cell>
          <table:table-cell office:value-type="float" office:value="8640000" calcext:value-type="float">
            <text:p>8640000</text:p>
          </table:table-cell>
          <table:table-cell table:formula="of:=[.B437]/[.C437]" office:value-type="float" office:value="0.00262407407407407" calcext:value-type="float">
            <text:p>0,00262407407407407000</text:p>
          </table:table-cell>
          <table:table-cell table:formula="of:=[.D438]-[.D43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52" office:value-type="float" office:value="22724" calcext:value-type="float">
            <text:p>22724</text:p>
          </table:table-cell>
          <table:table-cell office:value-type="float" office:value="8640000" calcext:value-type="float">
            <text:p>8640000</text:p>
          </table:table-cell>
          <table:table-cell table:formula="of:=[.B438]/[.C438]" office:value-type="float" office:value="0.00263009259259259" calcext:value-type="float">
            <text:p>0,00263009259259259000</text:p>
          </table:table-cell>
          <table:table-cell table:formula="of:=[.D439]-[.D43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52" office:value-type="float" office:value="22776" calcext:value-type="float">
            <text:p>22776</text:p>
          </table:table-cell>
          <table:table-cell office:value-type="float" office:value="8640000" calcext:value-type="float">
            <text:p>8640000</text:p>
          </table:table-cell>
          <table:table-cell table:formula="of:=[.B439]/[.C439]" office:value-type="float" office:value="0.00263611111111111" calcext:value-type="float">
            <text:p>0,00263611111111111000</text:p>
          </table:table-cell>
          <table:table-cell table:formula="of:=[.D440]-[.D43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52" office:value-type="float" office:value="22828" calcext:value-type="float">
            <text:p>22828</text:p>
          </table:table-cell>
          <table:table-cell office:value-type="float" office:value="8640000" calcext:value-type="float">
            <text:p>8640000</text:p>
          </table:table-cell>
          <table:table-cell table:formula="of:=[.B440]/[.C440]" office:value-type="float" office:value="0.00264212962962963" calcext:value-type="float">
            <text:p>0,00264212962962963000</text:p>
          </table:table-cell>
          <table:table-cell table:formula="of:=[.D441]-[.D44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52" office:value-type="float" office:value="22880" calcext:value-type="float">
            <text:p>22880</text:p>
          </table:table-cell>
          <table:table-cell office:value-type="float" office:value="8640000" calcext:value-type="float">
            <text:p>8640000</text:p>
          </table:table-cell>
          <table:table-cell table:formula="of:=[.B441]/[.C441]" office:value-type="float" office:value="0.00264814814814815" calcext:value-type="float">
            <text:p>0,00264814814814815000</text:p>
          </table:table-cell>
          <table:table-cell table:formula="of:=[.D442]-[.D44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52" office:value-type="float" office:value="22932" calcext:value-type="float">
            <text:p>22932</text:p>
          </table:table-cell>
          <table:table-cell office:value-type="float" office:value="8640000" calcext:value-type="float">
            <text:p>8640000</text:p>
          </table:table-cell>
          <table:table-cell table:formula="of:=[.B442]/[.C442]" office:value-type="float" office:value="0.00265416666666667" calcext:value-type="float">
            <text:p>0,00265416666666667000</text:p>
          </table:table-cell>
          <table:table-cell table:formula="of:=[.D443]-[.D44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52" office:value-type="float" office:value="22984" calcext:value-type="float">
            <text:p>22984</text:p>
          </table:table-cell>
          <table:table-cell office:value-type="float" office:value="8640000" calcext:value-type="float">
            <text:p>8640000</text:p>
          </table:table-cell>
          <table:table-cell table:formula="of:=[.B443]/[.C443]" office:value-type="float" office:value="0.00266018518518519" calcext:value-type="float">
            <text:p>0,00266018518518519000</text:p>
          </table:table-cell>
          <table:table-cell table:formula="of:=[.D444]-[.D44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52" office:value-type="float" office:value="23036" calcext:value-type="float">
            <text:p>23036</text:p>
          </table:table-cell>
          <table:table-cell office:value-type="float" office:value="8640000" calcext:value-type="float">
            <text:p>8640000</text:p>
          </table:table-cell>
          <table:table-cell table:formula="of:=[.B444]/[.C444]" office:value-type="float" office:value="0.0026662037037037" calcext:value-type="float">
            <text:p>0,00266620370370370000</text:p>
          </table:table-cell>
          <table:table-cell table:formula="of:=[.D445]-[.D44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52" office:value-type="float" office:value="23088" calcext:value-type="float">
            <text:p>23088</text:p>
          </table:table-cell>
          <table:table-cell office:value-type="float" office:value="8640000" calcext:value-type="float">
            <text:p>8640000</text:p>
          </table:table-cell>
          <table:table-cell table:formula="of:=[.B445]/[.C445]" office:value-type="float" office:value="0.00267222222222222" calcext:value-type="float">
            <text:p>0,00267222222222222000</text:p>
          </table:table-cell>
          <table:table-cell table:formula="of:=[.D446]-[.D44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52" office:value-type="float" office:value="23140" calcext:value-type="float">
            <text:p>23140</text:p>
          </table:table-cell>
          <table:table-cell office:value-type="float" office:value="8640000" calcext:value-type="float">
            <text:p>8640000</text:p>
          </table:table-cell>
          <table:table-cell table:formula="of:=[.B446]/[.C446]" office:value-type="float" office:value="0.00267824074074074" calcext:value-type="float">
            <text:p>0,00267824074074074000</text:p>
          </table:table-cell>
          <table:table-cell table:formula="of:=[.D447]-[.D44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52" office:value-type="float" office:value="23192" calcext:value-type="float">
            <text:p>23192</text:p>
          </table:table-cell>
          <table:table-cell office:value-type="float" office:value="8640000" calcext:value-type="float">
            <text:p>8640000</text:p>
          </table:table-cell>
          <table:table-cell table:formula="of:=[.B447]/[.C447]" office:value-type="float" office:value="0.00268425925925926" calcext:value-type="float">
            <text:p>0,00268425925925926000</text:p>
          </table:table-cell>
          <table:table-cell table:formula="of:=[.D448]-[.D447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52" office:value-type="float" office:value="23244" calcext:value-type="float">
            <text:p>23244</text:p>
          </table:table-cell>
          <table:table-cell office:value-type="float" office:value="8640000" calcext:value-type="float">
            <text:p>8640000</text:p>
          </table:table-cell>
          <table:table-cell table:formula="of:=[.B448]/[.C448]" office:value-type="float" office:value="0.00269027777777778" calcext:value-type="float">
            <text:p>0,00269027777777778000</text:p>
          </table:table-cell>
          <table:table-cell table:formula="of:=[.D449]-[.D44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52" office:value-type="float" office:value="23296" calcext:value-type="float">
            <text:p>23296</text:p>
          </table:table-cell>
          <table:table-cell office:value-type="float" office:value="8640000" calcext:value-type="float">
            <text:p>8640000</text:p>
          </table:table-cell>
          <table:table-cell table:formula="of:=[.B449]/[.C449]" office:value-type="float" office:value="0.0026962962962963" calcext:value-type="float">
            <text:p>0,00269629629629630000</text:p>
          </table:table-cell>
          <table:table-cell table:formula="of:=[.D450]-[.D449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52" office:value-type="float" office:value="23348" calcext:value-type="float">
            <text:p>23348</text:p>
          </table:table-cell>
          <table:table-cell office:value-type="float" office:value="8640000" calcext:value-type="float">
            <text:p>8640000</text:p>
          </table:table-cell>
          <table:table-cell table:formula="of:=[.B450]/[.C450]" office:value-type="float" office:value="0.00270231481481482" calcext:value-type="float">
            <text:p>0,00270231481481482000</text:p>
          </table:table-cell>
          <table:table-cell table:formula="of:=[.D451]-[.D45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52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451]/[.C451]" office:value-type="float" office:value="0.00270833333333333" calcext:value-type="float">
            <text:p>0,00270833333333333000</text:p>
          </table:table-cell>
          <table:table-cell table:formula="of:=[.D452]-[.D45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52" office:value-type="float" office:value="23452" calcext:value-type="float">
            <text:p>23452</text:p>
          </table:table-cell>
          <table:table-cell office:value-type="float" office:value="8640000" calcext:value-type="float">
            <text:p>8640000</text:p>
          </table:table-cell>
          <table:table-cell table:formula="of:=[.B452]/[.C452]" office:value-type="float" office:value="0.00271435185185185" calcext:value-type="float">
            <text:p>0,00271435185185185000</text:p>
          </table:table-cell>
          <table:table-cell table:formula="of:=[.D453]-[.D452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52" office:value-type="float" office:value="23504" calcext:value-type="float">
            <text:p>23504</text:p>
          </table:table-cell>
          <table:table-cell office:value-type="float" office:value="8640000" calcext:value-type="float">
            <text:p>8640000</text:p>
          </table:table-cell>
          <table:table-cell table:formula="of:=[.B453]/[.C453]" office:value-type="float" office:value="0.00272037037037037" calcext:value-type="float">
            <text:p>0,00272037037037037000</text:p>
          </table:table-cell>
          <table:table-cell table:formula="of:=[.D454]-[.D453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52" office:value-type="float" office:value="23556" calcext:value-type="float">
            <text:p>23556</text:p>
          </table:table-cell>
          <table:table-cell office:value-type="float" office:value="8640000" calcext:value-type="float">
            <text:p>8640000</text:p>
          </table:table-cell>
          <table:table-cell table:formula="of:=[.B454]/[.C454]" office:value-type="float" office:value="0.00272638888888889" calcext:value-type="float">
            <text:p>0,00272638888888889000</text:p>
          </table:table-cell>
          <table:table-cell table:formula="of:=[.D455]-[.D454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52" office:value-type="float" office:value="23608" calcext:value-type="float">
            <text:p>23608</text:p>
          </table:table-cell>
          <table:table-cell office:value-type="float" office:value="8640000" calcext:value-type="float">
            <text:p>8640000</text:p>
          </table:table-cell>
          <table:table-cell table:formula="of:=[.B455]/[.C455]" office:value-type="float" office:value="0.00273240740740741" calcext:value-type="float">
            <text:p>0,00273240740740741000</text:p>
          </table:table-cell>
          <table:table-cell table:formula="of:=[.D456]-[.D455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52" office:value-type="float" office:value="23660" calcext:value-type="float">
            <text:p>23660</text:p>
          </table:table-cell>
          <table:table-cell office:value-type="float" office:value="8640000" calcext:value-type="float">
            <text:p>8640000</text:p>
          </table:table-cell>
          <table:table-cell table:formula="of:=[.B456]/[.C456]" office:value-type="float" office:value="0.00273842592592593" calcext:value-type="float">
            <text:p>0,00273842592592593000</text:p>
          </table:table-cell>
          <table:table-cell table:formula="of:=[.D457]-[.D456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52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457]/[.C457]" office:value-type="float" office:value="0.00274444444444444" calcext:value-type="float">
            <text:p>0,00274444444444444000</text:p>
          </table:table-cell>
          <table:table-cell table:formula="of:=[.D458]-[.D457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52" office:value-type="float" office:value="23764" calcext:value-type="float">
            <text:p>23764</text:p>
          </table:table-cell>
          <table:table-cell office:value-type="float" office:value="8640000" calcext:value-type="float">
            <text:p>8640000</text:p>
          </table:table-cell>
          <table:table-cell table:formula="of:=[.B458]/[.C458]" office:value-type="float" office:value="0.00275046296296296" calcext:value-type="float">
            <text:p>0,00275046296296296000</text:p>
          </table:table-cell>
          <table:table-cell table:formula="of:=[.D459]-[.D458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52" office:value-type="float" office:value="23816" calcext:value-type="float">
            <text:p>23816</text:p>
          </table:table-cell>
          <table:table-cell office:value-type="float" office:value="8640000" calcext:value-type="float">
            <text:p>8640000</text:p>
          </table:table-cell>
          <table:table-cell table:formula="of:=[.B459]/[.C459]" office:value-type="float" office:value="0.00275648148148148" calcext:value-type="float">
            <text:p>0,00275648148148148000</text:p>
          </table:table-cell>
          <table:table-cell table:formula="of:=[.D460]-[.D459]" office:value-type="float" office:value="0.00000601851851851892" calcext:value-type="float">
            <text:p>0,00000601851851851892</text:p>
          </table:table-cell>
          <table:table-cell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52" office:value-type="float" office:value="23868" calcext:value-type="float">
            <text:p>23868</text:p>
          </table:table-cell>
          <table:table-cell office:value-type="float" office:value="8640000" calcext:value-type="float">
            <text:p>8640000</text:p>
          </table:table-cell>
          <table:table-cell table:formula="of:=[.B460]/[.C460]" office:value-type="float" office:value="0.0027625" calcext:value-type="float">
            <text:p>0,00276250000000000000</text:p>
          </table:table-cell>
          <table:table-cell table:formula="of:=[.D461]-[.D460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52" office:value-type="float" office:value="23920" calcext:value-type="float">
            <text:p>23920</text:p>
          </table:table-cell>
          <table:table-cell office:value-type="float" office:value="8640000" calcext:value-type="float">
            <text:p>8640000</text:p>
          </table:table-cell>
          <table:table-cell table:formula="of:=[.B461]/[.C461]" office:value-type="float" office:value="0.00276851851851852" calcext:value-type="float">
            <text:p>0,00276851851851852000</text:p>
          </table:table-cell>
          <table:table-cell table:formula="of:=[.D462]-[.D461]" office:value-type="float" office:value="0.00000601851851851848" calcext:value-type="float">
            <text:p>0,00000601851851851848</text:p>
          </table:table-cell>
          <table:table-cell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52" office:value-type="float" office:value="23972" calcext:value-type="float">
            <text:p>23972</text:p>
          </table:table-cell>
          <table:table-cell office:value-type="float" office:value="8640000" calcext:value-type="float">
            <text:p>8640000</text:p>
          </table:table-cell>
          <table:table-cell table:formula="of:=[.B462]/[.C462]" office:value-type="float" office:value="0.00277453703703704" calcext:value-type="float">
            <text:p>0,00277453703703704000</text:p>
          </table:table-cell>
          <table:table-cell table:formula="of:=#REF!-[.D462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06:48.764346736</meta:creation-date>
    <dc:date>2026-05-17T18:07:02.352143159</dc:date>
    <meta:editing-duration>PT15S</meta:editing-duration>
    <meta:editing-cycles>1</meta:editing-cycles>
    <meta:generator>LibreOffice/24.2.7.2$Linux_X86_64 LibreOffice_project/420$Build-2</meta:generator>
    <meta:document-statistic meta:table-count="1" meta:cell-count="2310" meta:object-count="0"/>
  </office:meta>
</office:document-meta>
</file>