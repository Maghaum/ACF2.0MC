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35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5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5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50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4" office:value-type="string" calcext:value-type="string">
            <text:p>B / C</text:p>
          </table:table-cell>
          <table:table-cell table:style-name="ce4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578703703703704" calcext:value-type="float">
            <text:p>0,00000578703703703704</text:p>
          </table:table-cell>
          <table:table-cell table:formula="of:=[.D3]-[.D2]" office:value-type="float" office:value="0.00000578703703703704" calcext:value-type="float">
            <text:p>0,000005787037037037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50" office:value-type="float" office:value="100" calcext:value-type="float">
            <text:p>100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15740740740741" calcext:value-type="float">
            <text:p>0,00001157407407407410</text:p>
          </table:table-cell>
          <table:table-cell table:formula="of:=[.D4]-[.D3]" office:value-type="float" office:value="0.00000578703703703704" calcext:value-type="float">
            <text:p>0,00000578703703703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50" office:value-type="float" office:value="150" calcext:value-type="float">
            <text:p>150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73611111111111" calcext:value-type="float">
            <text:p>0,00001736111111111110</text:p>
          </table:table-cell>
          <table:table-cell table:formula="of:=[.D5]-[.D4]" office:value-type="float" office:value="0.00000578703703703704" calcext:value-type="float">
            <text:p>0,00000578703703703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50" office:value-type="float" office:value="200" calcext:value-type="float">
            <text:p>200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31481481481481" calcext:value-type="float">
            <text:p>0,00002314814814814820</text:p>
          </table:table-cell>
          <table:table-cell table:formula="of:=[.D6]-[.D5]" office:value-type="float" office:value="0.00000578703703703704" calcext:value-type="float">
            <text:p>0,00000578703703703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50" office:value-type="float" office:value="250" calcext:value-type="float">
            <text:p>25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289351851851852" calcext:value-type="float">
            <text:p>0,00002893518518518520</text:p>
          </table:table-cell>
          <table:table-cell table:formula="of:=[.D7]-[.D6]" office:value-type="float" office:value="0.00000578703703703704" calcext:value-type="float">
            <text:p>0,000005787037037037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50" office:value-type="float" office:value="300" calcext:value-type="float">
            <text:p>300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347222222222222" calcext:value-type="float">
            <text:p>0,00003472222222222220</text:p>
          </table:table-cell>
          <table:table-cell table:formula="of:=[.D8]-[.D7]" office:value-type="float" office:value="0.00000578703703703704" calcext:value-type="float">
            <text:p>0,000005787037037037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50" office:value-type="float" office:value="350" calcext:value-type="float">
            <text:p>350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405092592592593" calcext:value-type="float">
            <text:p>0,00004050925925925930</text:p>
          </table:table-cell>
          <table:table-cell table:formula="of:=[.D9]-[.D8]" office:value-type="float" office:value="0.00000578703703703704" calcext:value-type="float">
            <text:p>0,000005787037037037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50" office:value-type="float" office:value="400" calcext:value-type="float">
            <text:p>400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462962962962963" calcext:value-type="float">
            <text:p>0,00004629629629629630</text:p>
          </table:table-cell>
          <table:table-cell table:formula="of:=[.D10]-[.D9]" office:value-type="float" office:value="0.00000578703703703704" calcext:value-type="float">
            <text:p>0,000005787037037037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50" office:value-type="float" office:value="450" calcext:value-type="float">
            <text:p>450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520833333333333" calcext:value-type="float">
            <text:p>0,00005208333333333330</text:p>
          </table:table-cell>
          <table:table-cell table:formula="of:=[.D11]-[.D10]" office:value-type="float" office:value="0.00000578703703703704" calcext:value-type="float">
            <text:p>0,000005787037037037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50" office:value-type="float" office:value="500" calcext:value-type="float">
            <text:p>50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578703703703704" calcext:value-type="float">
            <text:p>0,00005787037037037040</text:p>
          </table:table-cell>
          <table:table-cell table:formula="of:=[.D12]-[.D11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50" office:value-type="float" office:value="550" calcext:value-type="float">
            <text:p>550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636574074074074" calcext:value-type="float">
            <text:p>0,00006365740740740740</text:p>
          </table:table-cell>
          <table:table-cell table:formula="of:=[.D13]-[.D12]" office:value-type="float" office:value="0.00000578703703703704" calcext:value-type="float">
            <text:p>0,000005787037037037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50" office:value-type="float" office:value="600" calcext:value-type="float">
            <text:p>600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694444444444444" calcext:value-type="float">
            <text:p>0,00006944444444444440</text:p>
          </table:table-cell>
          <table:table-cell table:formula="of:=[.D14]-[.D13]" office:value-type="float" office:value="0.00000578703703703704" calcext:value-type="float">
            <text:p>0,000005787037037037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50" office:value-type="float" office:value="650" calcext:value-type="float">
            <text:p>650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752314814814815" calcext:value-type="float">
            <text:p>0,00007523148148148150</text:p>
          </table:table-cell>
          <table:table-cell table:formula="of:=[.D15]-[.D14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50" office:value-type="float" office:value="700" calcext:value-type="float">
            <text:p>700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810185185185185" calcext:value-type="float">
            <text:p>0,00008101851851851850</text:p>
          </table:table-cell>
          <table:table-cell table:formula="of:=[.D16]-[.D15]" office:value-type="float" office:value="0.00000578703703703704" calcext:value-type="float">
            <text:p>0,00000578703703703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50" office:value-type="float" office:value="750" calcext:value-type="float">
            <text:p>75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868055555555556" calcext:value-type="float">
            <text:p>0,00008680555555555560</text:p>
          </table:table-cell>
          <table:table-cell table:formula="of:=[.D17]-[.D16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50" office:value-type="float" office:value="800" calcext:value-type="float">
            <text:p>800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925925925925926" calcext:value-type="float">
            <text:p>0,00009259259259259260</text:p>
          </table:table-cell>
          <table:table-cell table:formula="of:=[.D18]-[.D17]" office:value-type="float" office:value="0.00000578703703703704" calcext:value-type="float">
            <text:p>0,000005787037037037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50" office:value-type="float" office:value="850" calcext:value-type="float">
            <text:p>850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983796296296296" calcext:value-type="float">
            <text:p>0,00009837962962962960</text:p>
          </table:table-cell>
          <table:table-cell table:formula="of:=[.D19]-[.D18]" office:value-type="float" office:value="0.00000578703703703704" calcext:value-type="float">
            <text:p>0,000005787037037037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50" office:value-type="float" office:value="900" calcext:value-type="float">
            <text:p>900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04166666666667" calcext:value-type="float">
            <text:p>0,00010416666666666700</text:p>
          </table:table-cell>
          <table:table-cell table:formula="of:=[.D20]-[.D19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50" office:value-type="float" office:value="950" calcext:value-type="float">
            <text:p>950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09953703703704" calcext:value-type="float">
            <text:p>0,00010995370370370400</text:p>
          </table:table-cell>
          <table:table-cell table:formula="of:=[.D21]-[.D20]" office:value-type="float" office:value="0.00000578703703703704" calcext:value-type="float">
            <text:p>0,000005787037037037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50" office:value-type="float" office:value="1000" calcext:value-type="float">
            <text:p>100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15740740740741" calcext:value-type="float">
            <text:p>0,00011574074074074100</text:p>
          </table:table-cell>
          <table:table-cell table:formula="of:=[.D22]-[.D21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50" office:value-type="float" office:value="1050" calcext:value-type="float">
            <text:p>1050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21527777777778" calcext:value-type="float">
            <text:p>0,00012152777777777800</text:p>
          </table:table-cell>
          <table:table-cell table:formula="of:=[.D23]-[.D22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50" office:value-type="float" office:value="1100" calcext:value-type="float">
            <text:p>1100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27314814814815" calcext:value-type="float">
            <text:p>0,00012731481481481500</text:p>
          </table:table-cell>
          <table:table-cell table:formula="of:=[.D24]-[.D23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50" office:value-type="float" office:value="1150" calcext:value-type="float">
            <text:p>1150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33101851851852" calcext:value-type="float">
            <text:p>0,00013310185185185200</text:p>
          </table:table-cell>
          <table:table-cell table:formula="of:=[.D25]-[.D24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50" office:value-type="float" office:value="1200" calcext:value-type="float">
            <text:p>1200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38888888888889" calcext:value-type="float">
            <text:p>0,00013888888888888900</text:p>
          </table:table-cell>
          <table:table-cell table:formula="of:=[.D26]-[.D25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50" office:value-type="float" office:value="1250" calcext:value-type="float">
            <text:p>12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44675925925926" calcext:value-type="float">
            <text:p>0,00014467592592592600</text:p>
          </table:table-cell>
          <table:table-cell table:formula="of:=[.D27]-[.D26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50" office:value-type="float" office:value="1300" calcext:value-type="float">
            <text:p>1300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50462962962963" calcext:value-type="float">
            <text:p>0,00015046296296296300</text:p>
          </table:table-cell>
          <table:table-cell table:formula="of:=[.D28]-[.D27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50" office:value-type="float" office:value="1350" calcext:value-type="float">
            <text:p>1350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5625" calcext:value-type="float">
            <text:p>0,00015625000000000000</text:p>
          </table:table-cell>
          <table:table-cell table:formula="of:=[.D29]-[.D28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50" office:value-type="float" office:value="1400" calcext:value-type="float">
            <text:p>1400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62037037037037" calcext:value-type="float">
            <text:p>0,00016203703703703700</text:p>
          </table:table-cell>
          <table:table-cell table:formula="of:=[.D30]-[.D29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50" office:value-type="float" office:value="1450" calcext:value-type="float">
            <text:p>1450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67824074074074" calcext:value-type="float">
            <text:p>0,00016782407407407400</text:p>
          </table:table-cell>
          <table:table-cell table:formula="of:=[.D31]-[.D30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50" office:value-type="float" office:value="1500" calcext:value-type="float">
            <text:p>150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73611111111111" calcext:value-type="float">
            <text:p>0,00017361111111111100</text:p>
          </table:table-cell>
          <table:table-cell table:formula="of:=[.D32]-[.D31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50" office:value-type="float" office:value="1550" calcext:value-type="float">
            <text:p>1550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79398148148148" calcext:value-type="float">
            <text:p>0,00017939814814814800</text:p>
          </table:table-cell>
          <table:table-cell table:formula="of:=[.D33]-[.D32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50" office:value-type="float" office:value="1600" calcext:value-type="float">
            <text:p>1600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85185185185185" calcext:value-type="float">
            <text:p>0,00018518518518518500</text:p>
          </table:table-cell>
          <table:table-cell table:formula="of:=[.D34]-[.D33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50" office:value-type="float" office:value="1650" calcext:value-type="float">
            <text:p>1650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90972222222222" calcext:value-type="float">
            <text:p>0,00019097222222222200</text:p>
          </table:table-cell>
          <table:table-cell table:formula="of:=[.D35]-[.D34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50" office:value-type="float" office:value="1700" calcext:value-type="float">
            <text:p>1700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96759259259259" calcext:value-type="float">
            <text:p>0,00019675925925925900</text:p>
          </table:table-cell>
          <table:table-cell table:formula="of:=[.D36]-[.D35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50" office:value-type="float" office:value="1750" calcext:value-type="float">
            <text:p>175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02546296296296" calcext:value-type="float">
            <text:p>0,00020254629629629600</text:p>
          </table:table-cell>
          <table:table-cell table:formula="of:=[.D37]-[.D36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50" office:value-type="float" office:value="1800" calcext:value-type="float">
            <text:p>1800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08333333333333" calcext:value-type="float">
            <text:p>0,00020833333333333300</text:p>
          </table:table-cell>
          <table:table-cell table:formula="of:=[.D38]-[.D37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50" office:value-type="float" office:value="1850" calcext:value-type="float">
            <text:p>1850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1412037037037" calcext:value-type="float">
            <text:p>0,00021412037037037000</text:p>
          </table:table-cell>
          <table:table-cell table:formula="of:=[.D39]-[.D38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50" office:value-type="float" office:value="1900" calcext:value-type="float">
            <text:p>1900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19907407407407" calcext:value-type="float">
            <text:p>0,00021990740740740700</text:p>
          </table:table-cell>
          <table:table-cell table:formula="of:=[.D40]-[.D39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50" office:value-type="float" office:value="1950" calcext:value-type="float">
            <text:p>1950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25694444444444" calcext:value-type="float">
            <text:p>0,00022569444444444400</text:p>
          </table:table-cell>
          <table:table-cell table:formula="of:=[.D41]-[.D40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50" office:value-type="float" office:value="2000" calcext:value-type="float">
            <text:p>200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31481481481482" calcext:value-type="float">
            <text:p>0,00023148148148148200</text:p>
          </table:table-cell>
          <table:table-cell table:formula="of:=[.D42]-[.D41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50" office:value-type="float" office:value="2050" calcext:value-type="float">
            <text:p>2050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37268518518519" calcext:value-type="float">
            <text:p>0,00023726851851851900</text:p>
          </table:table-cell>
          <table:table-cell table:formula="of:=[.D43]-[.D42]" office:value-type="float" office:value="0.00000578703703703703" calcext:value-type="float">
            <text:p>0,000005787037037037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50" office:value-type="float" office:value="2100" calcext:value-type="float">
            <text:p>2100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43055555555556" calcext:value-type="float">
            <text:p>0,00024305555555555600</text:p>
          </table:table-cell>
          <table:table-cell table:formula="of:=[.D44]-[.D43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50" office:value-type="float" office:value="2150" calcext:value-type="float">
            <text:p>2150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48842592592593" calcext:value-type="float">
            <text:p>0,00024884259259259300</text:p>
          </table:table-cell>
          <table:table-cell table:formula="of:=[.D45]-[.D4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50" office:value-type="float" office:value="2200" calcext:value-type="float">
            <text:p>2200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25462962962963" calcext:value-type="float">
            <text:p>0,00025462962962963000</text:p>
          </table:table-cell>
          <table:table-cell table:formula="of:=[.D46]-[.D45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50" office:value-type="float" office:value="2250" calcext:value-type="float">
            <text:p>225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260416666666667" calcext:value-type="float">
            <text:p>0,00026041666666666700</text:p>
          </table:table-cell>
          <table:table-cell table:formula="of:=[.D47]-[.D46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50" office:value-type="float" office:value="2300" calcext:value-type="float">
            <text:p>2300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266203703703704" calcext:value-type="float">
            <text:p>0,00026620370370370400</text:p>
          </table:table-cell>
          <table:table-cell table:formula="of:=[.D48]-[.D4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50" office:value-type="float" office:value="2350" calcext:value-type="float">
            <text:p>2350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271990740740741" calcext:value-type="float">
            <text:p>0,00027199074074074100</text:p>
          </table:table-cell>
          <table:table-cell table:formula="of:=[.D49]-[.D48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50" office:value-type="float" office:value="2400" calcext:value-type="float">
            <text:p>2400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277777777777778" calcext:value-type="float">
            <text:p>0,00027777777777777800</text:p>
          </table:table-cell>
          <table:table-cell table:formula="of:=[.D50]-[.D49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50" office:value-type="float" office:value="2450" calcext:value-type="float">
            <text:p>2450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283564814814815" calcext:value-type="float">
            <text:p>0,00028356481481481500</text:p>
          </table:table-cell>
          <table:table-cell table:formula="of:=[.D51]-[.D5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50" office:value-type="float" office:value="2500" calcext:value-type="float">
            <text:p>25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289351851851852" calcext:value-type="float">
            <text:p>0,00028935185185185200</text:p>
          </table:table-cell>
          <table:table-cell table:formula="of:=[.D52]-[.D51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50" office:value-type="float" office:value="2550" calcext:value-type="float">
            <text:p>2550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295138888888889" calcext:value-type="float">
            <text:p>0,00029513888888888900</text:p>
          </table:table-cell>
          <table:table-cell table:formula="of:=[.D53]-[.D52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50" office:value-type="float" office:value="2600" calcext:value-type="float">
            <text:p>2600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300925925925926" calcext:value-type="float">
            <text:p>0,00030092592592592600</text:p>
          </table:table-cell>
          <table:table-cell table:formula="of:=[.D54]-[.D5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50" office:value-type="float" office:value="2650" calcext:value-type="float">
            <text:p>2650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306712962962963" calcext:value-type="float">
            <text:p>0,00030671296296296300</text:p>
          </table:table-cell>
          <table:table-cell table:formula="of:=[.D55]-[.D54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50" office:value-type="float" office:value="2700" calcext:value-type="float">
            <text:p>2700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3125" calcext:value-type="float">
            <text:p>0,00031250000000000000</text:p>
          </table:table-cell>
          <table:table-cell table:formula="of:=[.D56]-[.D55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50" office:value-type="float" office:value="2750" calcext:value-type="float">
            <text:p>275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318287037037037" calcext:value-type="float">
            <text:p>0,00031828703703703700</text:p>
          </table:table-cell>
          <table:table-cell table:formula="of:=[.D57]-[.D5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50" office:value-type="float" office:value="2800" calcext:value-type="float">
            <text:p>2800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324074074074074" calcext:value-type="float">
            <text:p>0,00032407407407407400</text:p>
          </table:table-cell>
          <table:table-cell table:formula="of:=[.D58]-[.D57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50" office:value-type="float" office:value="2850" calcext:value-type="float">
            <text:p>2850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329861111111111" calcext:value-type="float">
            <text:p>0,00032986111111111100</text:p>
          </table:table-cell>
          <table:table-cell table:formula="of:=[.D59]-[.D5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50" office:value-type="float" office:value="2900" calcext:value-type="float">
            <text:p>2900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335648148148148" calcext:value-type="float">
            <text:p>0,00033564814814814800</text:p>
          </table:table-cell>
          <table:table-cell table:formula="of:=[.D60]-[.D59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50" office:value-type="float" office:value="2950" calcext:value-type="float">
            <text:p>2950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341435185185185" calcext:value-type="float">
            <text:p>0,00034143518518518500</text:p>
          </table:table-cell>
          <table:table-cell table:formula="of:=[.D61]-[.D60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50" office:value-type="float" office:value="3000" calcext:value-type="float">
            <text:p>300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347222222222222" calcext:value-type="float">
            <text:p>0,00034722222222222200</text:p>
          </table:table-cell>
          <table:table-cell table:formula="of:=[.D62]-[.D6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50" office:value-type="float" office:value="3050" calcext:value-type="float">
            <text:p>3050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353009259259259" calcext:value-type="float">
            <text:p>0,00035300925925925900</text:p>
          </table:table-cell>
          <table:table-cell table:formula="of:=[.D63]-[.D62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50" office:value-type="float" office:value="3100" calcext:value-type="float">
            <text:p>3100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358796296296296" calcext:value-type="float">
            <text:p>0,00035879629629629600</text:p>
          </table:table-cell>
          <table:table-cell table:formula="of:=[.D64]-[.D63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50" office:value-type="float" office:value="3150" calcext:value-type="float">
            <text:p>3150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364583333333333" calcext:value-type="float">
            <text:p>0,00036458333333333300</text:p>
          </table:table-cell>
          <table:table-cell table:formula="of:=[.D65]-[.D6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50" office:value-type="float" office:value="3200" calcext:value-type="float">
            <text:p>3200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37037037037037" calcext:value-type="float">
            <text:p>0,00037037037037037000</text:p>
          </table:table-cell>
          <table:table-cell table:formula="of:=[.D66]-[.D65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50" office:value-type="float" office:value="3250" calcext:value-type="float">
            <text:p>325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376157407407407" calcext:value-type="float">
            <text:p>0,00037615740740740700</text:p>
          </table:table-cell>
          <table:table-cell table:formula="of:=[.D67]-[.D66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50" office:value-type="float" office:value="3300" calcext:value-type="float">
            <text:p>3300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381944444444444" calcext:value-type="float">
            <text:p>0,00038194444444444400</text:p>
          </table:table-cell>
          <table:table-cell table:formula="of:=[.D68]-[.D6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50" office:value-type="float" office:value="3350" calcext:value-type="float">
            <text:p>3350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387731481481481" calcext:value-type="float">
            <text:p>0,00038773148148148100</text:p>
          </table:table-cell>
          <table:table-cell table:formula="of:=[.D69]-[.D68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50" office:value-type="float" office:value="3400" calcext:value-type="float">
            <text:p>3400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393518518518519" calcext:value-type="float">
            <text:p>0,00039351851851851900</text:p>
          </table:table-cell>
          <table:table-cell table:formula="of:=[.D70]-[.D69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50" office:value-type="float" office:value="3450" calcext:value-type="float">
            <text:p>3450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399305555555556" calcext:value-type="float">
            <text:p>0,00039930555555555600</text:p>
          </table:table-cell>
          <table:table-cell table:formula="of:=[.D71]-[.D7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50" office:value-type="float" office:value="3500" calcext:value-type="float">
            <text:p>350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405092592592593" calcext:value-type="float">
            <text:p>0,00040509259259259300</text:p>
          </table:table-cell>
          <table:table-cell table:formula="of:=[.D72]-[.D71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50" office:value-type="float" office:value="3550" calcext:value-type="float">
            <text:p>3550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41087962962963" calcext:value-type="float">
            <text:p>0,00041087962962963000</text:p>
          </table:table-cell>
          <table:table-cell table:formula="of:=[.D73]-[.D72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50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416666666666667" calcext:value-type="float">
            <text:p>0,00041666666666666700</text:p>
          </table:table-cell>
          <table:table-cell table:formula="of:=[.D74]-[.D7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50" office:value-type="float" office:value="3650" calcext:value-type="float">
            <text:p>3650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422453703703704" calcext:value-type="float">
            <text:p>0,00042245370370370400</text:p>
          </table:table-cell>
          <table:table-cell table:formula="of:=[.D75]-[.D74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50" office:value-type="float" office:value="3700" calcext:value-type="float">
            <text:p>3700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428240740740741" calcext:value-type="float">
            <text:p>0,00042824074074074100</text:p>
          </table:table-cell>
          <table:table-cell table:formula="of:=[.D76]-[.D7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50" office:value-type="float" office:value="3750" calcext:value-type="float">
            <text:p>37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434027777777778" calcext:value-type="float">
            <text:p>0,00043402777777777800</text:p>
          </table:table-cell>
          <table:table-cell table:formula="of:=[.D77]-[.D76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50" office:value-type="float" office:value="3800" calcext:value-type="float">
            <text:p>3800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439814814814815" calcext:value-type="float">
            <text:p>0,00043981481481481500</text:p>
          </table:table-cell>
          <table:table-cell table:formula="of:=[.D78]-[.D77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50" office:value-type="float" office:value="3850" calcext:value-type="float">
            <text:p>3850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445601851851852" calcext:value-type="float">
            <text:p>0,00044560185185185200</text:p>
          </table:table-cell>
          <table:table-cell table:formula="of:=[.D79]-[.D7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50" office:value-type="float" office:value="3900" calcext:value-type="float">
            <text:p>3900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451388888888889" calcext:value-type="float">
            <text:p>0,00045138888888888900</text:p>
          </table:table-cell>
          <table:table-cell table:formula="of:=[.D80]-[.D79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50" office:value-type="float" office:value="3950" calcext:value-type="float">
            <text:p>3950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457175925925926" calcext:value-type="float">
            <text:p>0,00045717592592592600</text:p>
          </table:table-cell>
          <table:table-cell table:formula="of:=[.D81]-[.D80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50" office:value-type="float" office:value="4000" calcext:value-type="float">
            <text:p>400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462962962962963" calcext:value-type="float">
            <text:p>0,00046296296296296300</text:p>
          </table:table-cell>
          <table:table-cell table:formula="of:=[.D82]-[.D8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50" office:value-type="float" office:value="4050" calcext:value-type="float">
            <text:p>4050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46875" calcext:value-type="float">
            <text:p>0,00046875000000000000</text:p>
          </table:table-cell>
          <table:table-cell table:formula="of:=[.D83]-[.D82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50" office:value-type="float" office:value="4100" calcext:value-type="float">
            <text:p>4100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474537037037037" calcext:value-type="float">
            <text:p>0,00047453703703703700</text:p>
          </table:table-cell>
          <table:table-cell table:formula="of:=[.D84]-[.D83]" office:value-type="float" office:value="0.00000578703703703706" calcext:value-type="float">
            <text:p>0,000005787037037037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50" office:value-type="float" office:value="4150" calcext:value-type="float">
            <text:p>4150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480324074074074" calcext:value-type="float">
            <text:p>0,00048032407407407400</text:p>
          </table:table-cell>
          <table:table-cell table:formula="of:=[.D85]-[.D8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50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486111111111111" calcext:value-type="float">
            <text:p>0,00048611111111111100</text:p>
          </table:table-cell>
          <table:table-cell table:formula="of:=[.D86]-[.D8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50" office:value-type="float" office:value="4250" calcext:value-type="float">
            <text:p>425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491898148148148" calcext:value-type="float">
            <text:p>0,00049189814814814800</text:p>
          </table:table-cell>
          <table:table-cell table:formula="of:=[.D87]-[.D86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50" office:value-type="float" office:value="4300" calcext:value-type="float">
            <text:p>4300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497685185185185" calcext:value-type="float">
            <text:p>0,00049768518518518500</text:p>
          </table:table-cell>
          <table:table-cell table:formula="of:=[.D88]-[.D8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50" office:value-type="float" office:value="4350" calcext:value-type="float">
            <text:p>4350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503472222222222" calcext:value-type="float">
            <text:p>0,00050347222222222200</text:p>
          </table:table-cell>
          <table:table-cell table:formula="of:=[.D89]-[.D8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50" office:value-type="float" office:value="4400" calcext:value-type="float">
            <text:p>4400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509259259259259" calcext:value-type="float">
            <text:p>0,00050925925925925900</text:p>
          </table:table-cell>
          <table:table-cell table:formula="of:=[.D90]-[.D89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50" office:value-type="float" office:value="4450" calcext:value-type="float">
            <text:p>4450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515046296296296" calcext:value-type="float">
            <text:p>0,00051504629629629600</text:p>
          </table:table-cell>
          <table:table-cell table:formula="of:=[.D91]-[.D9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50" office:value-type="float" office:value="4500" calcext:value-type="float">
            <text:p>450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520833333333333" calcext:value-type="float">
            <text:p>0,00052083333333333300</text:p>
          </table:table-cell>
          <table:table-cell table:formula="of:=[.D92]-[.D9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50" office:value-type="float" office:value="4550" calcext:value-type="float">
            <text:p>4550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52662037037037" calcext:value-type="float">
            <text:p>0,00052662037037037000</text:p>
          </table:table-cell>
          <table:table-cell table:formula="of:=[.D93]-[.D92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50" office:value-type="float" office:value="4600" calcext:value-type="float">
            <text:p>4600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532407407407407" calcext:value-type="float">
            <text:p>0,00053240740740740700</text:p>
          </table:table-cell>
          <table:table-cell table:formula="of:=[.D94]-[.D9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50" office:value-type="float" office:value="4650" calcext:value-type="float">
            <text:p>4650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538194444444444" calcext:value-type="float">
            <text:p>0,00053819444444444400</text:p>
          </table:table-cell>
          <table:table-cell table:formula="of:=[.D95]-[.D9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50" office:value-type="float" office:value="4700" calcext:value-type="float">
            <text:p>4700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543981481481481" calcext:value-type="float">
            <text:p>0,00054398148148148100</text:p>
          </table:table-cell>
          <table:table-cell table:formula="of:=[.D96]-[.D95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50" office:value-type="float" office:value="4750" calcext:value-type="float">
            <text:p>475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549768518518519" calcext:value-type="float">
            <text:p>0,00054976851851851900</text:p>
          </table:table-cell>
          <table:table-cell table:formula="of:=[.D97]-[.D9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50" office:value-type="float" office:value="4800" calcext:value-type="float">
            <text:p>4800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555555555555556" calcext:value-type="float">
            <text:p>0,00055555555555555600</text:p>
          </table:table-cell>
          <table:table-cell table:formula="of:=[.D98]-[.D9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50" office:value-type="float" office:value="4850" calcext:value-type="float">
            <text:p>4850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561342592592593" calcext:value-type="float">
            <text:p>0,00056134259259259300</text:p>
          </table:table-cell>
          <table:table-cell table:formula="of:=[.D99]-[.D98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50" office:value-type="float" office:value="4900" calcext:value-type="float">
            <text:p>4900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56712962962963" calcext:value-type="float">
            <text:p>0,00056712962962963000</text:p>
          </table:table-cell>
          <table:table-cell table:formula="of:=[.D100]-[.D9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50" office:value-type="float" office:value="4950" calcext:value-type="float">
            <text:p>4950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572916666666667" calcext:value-type="float">
            <text:p>0,00057291666666666700</text:p>
          </table:table-cell>
          <table:table-cell table:formula="of:=[.D101]-[.D10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50" office:value-type="float" office:value="5000" calcext:value-type="float">
            <text:p>50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578703703703704" calcext:value-type="float">
            <text:p>0,00057870370370370400</text:p>
          </table:table-cell>
          <table:table-cell table:formula="of:=[.D102]-[.D101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50" office:value-type="float" office:value="5050" calcext:value-type="float">
            <text:p>5050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584490740740741" calcext:value-type="float">
            <text:p>0,00058449074074074100</text:p>
          </table:table-cell>
          <table:table-cell table:formula="of:=[.D103]-[.D10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50" office:value-type="float" office:value="5100" calcext:value-type="float">
            <text:p>5100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590277777777778" calcext:value-type="float">
            <text:p>0,00059027777777777800</text:p>
          </table:table-cell>
          <table:table-cell table:formula="of:=[.D104]-[.D10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50" office:value-type="float" office:value="5150" calcext:value-type="float">
            <text:p>5150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596064814814815" calcext:value-type="float">
            <text:p>0,00059606481481481500</text:p>
          </table:table-cell>
          <table:table-cell table:formula="of:=[.D105]-[.D104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50" office:value-type="float" office:value="5200" calcext:value-type="float">
            <text:p>5200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601851851851852" calcext:value-type="float">
            <text:p>0,00060185185185185200</text:p>
          </table:table-cell>
          <table:table-cell table:formula="of:=[.D106]-[.D10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50" office:value-type="float" office:value="5250" calcext:value-type="float">
            <text:p>525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607638888888889" calcext:value-type="float">
            <text:p>0,00060763888888888900</text:p>
          </table:table-cell>
          <table:table-cell table:formula="of:=[.D107]-[.D10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50" office:value-type="float" office:value="5300" calcext:value-type="float">
            <text:p>5300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613425925925926" calcext:value-type="float">
            <text:p>0,00061342592592592600</text:p>
          </table:table-cell>
          <table:table-cell table:formula="of:=[.D108]-[.D107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50" office:value-type="float" office:value="5350" calcext:value-type="float">
            <text:p>5350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619212962962963" calcext:value-type="float">
            <text:p>0,00061921296296296300</text:p>
          </table:table-cell>
          <table:table-cell table:formula="of:=[.D109]-[.D10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50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625" calcext:value-type="float">
            <text:p>0,00062500000000000000</text:p>
          </table:table-cell>
          <table:table-cell table:formula="of:=[.D110]-[.D10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50" office:value-type="float" office:value="5450" calcext:value-type="float">
            <text:p>5450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630787037037037" calcext:value-type="float">
            <text:p>0,00063078703703703700</text:p>
          </table:table-cell>
          <table:table-cell table:formula="of:=[.D111]-[.D110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50" office:value-type="float" office:value="5500" calcext:value-type="float">
            <text:p>550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636574074074074" calcext:value-type="float">
            <text:p>0,00063657407407407400</text:p>
          </table:table-cell>
          <table:table-cell table:formula="of:=[.D112]-[.D11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50" office:value-type="float" office:value="5550" calcext:value-type="float">
            <text:p>5550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642361111111111" calcext:value-type="float">
            <text:p>0,00064236111111111100</text:p>
          </table:table-cell>
          <table:table-cell table:formula="of:=[.D113]-[.D11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50" office:value-type="float" office:value="5600" calcext:value-type="float">
            <text:p>5600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648148148148148" calcext:value-type="float">
            <text:p>0,00064814814814814800</text:p>
          </table:table-cell>
          <table:table-cell table:formula="of:=[.D114]-[.D11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50" office:value-type="float" office:value="5650" calcext:value-type="float">
            <text:p>5650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653935185185185" calcext:value-type="float">
            <text:p>0,00065393518518518500</text:p>
          </table:table-cell>
          <table:table-cell table:formula="of:=[.D115]-[.D114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50" office:value-type="float" office:value="5700" calcext:value-type="float">
            <text:p>5700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659722222222222" calcext:value-type="float">
            <text:p>0,00065972222222222200</text:p>
          </table:table-cell>
          <table:table-cell table:formula="of:=[.D116]-[.D11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50" office:value-type="float" office:value="5750" calcext:value-type="float">
            <text:p>575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665509259259259" calcext:value-type="float">
            <text:p>0,00066550925925925900</text:p>
          </table:table-cell>
          <table:table-cell table:formula="of:=[.D117]-[.D11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50" office:value-type="float" office:value="5800" calcext:value-type="float">
            <text:p>5800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671296296296296" calcext:value-type="float">
            <text:p>0,00067129629629629600</text:p>
          </table:table-cell>
          <table:table-cell table:formula="of:=[.D118]-[.D117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50" office:value-type="float" office:value="5850" calcext:value-type="float">
            <text:p>5850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677083333333333" calcext:value-type="float">
            <text:p>0,00067708333333333300</text:p>
          </table:table-cell>
          <table:table-cell table:formula="of:=[.D119]-[.D11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50" office:value-type="float" office:value="5900" calcext:value-type="float">
            <text:p>5900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68287037037037" calcext:value-type="float">
            <text:p>0,00068287037037037000</text:p>
          </table:table-cell>
          <table:table-cell table:formula="of:=[.D120]-[.D11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50" office:value-type="float" office:value="5950" calcext:value-type="float">
            <text:p>5950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688657407407407" calcext:value-type="float">
            <text:p>0,00068865740740740700</text:p>
          </table:table-cell>
          <table:table-cell table:formula="of:=[.D121]-[.D120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50" office:value-type="float" office:value="6000" calcext:value-type="float">
            <text:p>600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694444444444445" calcext:value-type="float">
            <text:p>0,00069444444444444500</text:p>
          </table:table-cell>
          <table:table-cell table:formula="of:=[.D122]-[.D12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50" office:value-type="float" office:value="6050" calcext:value-type="float">
            <text:p>6050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700231481481482" calcext:value-type="float">
            <text:p>0,00070023148148148200</text:p>
          </table:table-cell>
          <table:table-cell table:formula="of:=[.D123]-[.D12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50" office:value-type="float" office:value="6100" calcext:value-type="float">
            <text:p>6100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706018518518519" calcext:value-type="float">
            <text:p>0,00070601851851851900</text:p>
          </table:table-cell>
          <table:table-cell table:formula="of:=[.D124]-[.D123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50" office:value-type="float" office:value="6150" calcext:value-type="float">
            <text:p>6150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711805555555556" calcext:value-type="float">
            <text:p>0,00071180555555555600</text:p>
          </table:table-cell>
          <table:table-cell table:formula="of:=[.D125]-[.D12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50" office:value-type="float" office:value="6200" calcext:value-type="float">
            <text:p>6200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717592592592593" calcext:value-type="float">
            <text:p>0,00071759259259259300</text:p>
          </table:table-cell>
          <table:table-cell table:formula="of:=[.D126]-[.D12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50" office:value-type="float" office:value="6250" calcext:value-type="float">
            <text:p>62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72337962962963" calcext:value-type="float">
            <text:p>0,00072337962962963000</text:p>
          </table:table-cell>
          <table:table-cell table:formula="of:=[.D127]-[.D126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50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729166666666667" calcext:value-type="float">
            <text:p>0,00072916666666666700</text:p>
          </table:table-cell>
          <table:table-cell table:formula="of:=[.D128]-[.D12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50" office:value-type="float" office:value="6350" calcext:value-type="float">
            <text:p>6350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734953703703704" calcext:value-type="float">
            <text:p>0,00073495370370370400</text:p>
          </table:table-cell>
          <table:table-cell table:formula="of:=[.D129]-[.D12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50" office:value-type="float" office:value="6400" calcext:value-type="float">
            <text:p>6400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740740740740741" calcext:value-type="float">
            <text:p>0,00074074074074074100</text:p>
          </table:table-cell>
          <table:table-cell table:formula="of:=[.D130]-[.D129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50" office:value-type="float" office:value="6450" calcext:value-type="float">
            <text:p>6450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746527777777778" calcext:value-type="float">
            <text:p>0,00074652777777777800</text:p>
          </table:table-cell>
          <table:table-cell table:formula="of:=[.D131]-[.D13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50" office:value-type="float" office:value="6500" calcext:value-type="float">
            <text:p>650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752314814814815" calcext:value-type="float">
            <text:p>0,00075231481481481500</text:p>
          </table:table-cell>
          <table:table-cell table:formula="of:=[.D132]-[.D13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50" office:value-type="float" office:value="6550" calcext:value-type="float">
            <text:p>6550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758101851851852" calcext:value-type="float">
            <text:p>0,00075810185185185200</text:p>
          </table:table-cell>
          <table:table-cell table:formula="of:=[.D133]-[.D132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50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763888888888889" calcext:value-type="float">
            <text:p>0,00076388888888888900</text:p>
          </table:table-cell>
          <table:table-cell table:formula="of:=[.D134]-[.D13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50" office:value-type="float" office:value="6650" calcext:value-type="float">
            <text:p>6650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769675925925926" calcext:value-type="float">
            <text:p>0,00076967592592592600</text:p>
          </table:table-cell>
          <table:table-cell table:formula="of:=[.D135]-[.D13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50" office:value-type="float" office:value="6700" calcext:value-type="float">
            <text:p>6700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775462962962963" calcext:value-type="float">
            <text:p>0,00077546296296296300</text:p>
          </table:table-cell>
          <table:table-cell table:formula="of:=[.D136]-[.D135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50" office:value-type="float" office:value="6750" calcext:value-type="float">
            <text:p>675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78125" calcext:value-type="float">
            <text:p>0,00078125000000000000</text:p>
          </table:table-cell>
          <table:table-cell table:formula="of:=[.D137]-[.D13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50" office:value-type="float" office:value="6800" calcext:value-type="float">
            <text:p>6800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787037037037037" calcext:value-type="float">
            <text:p>0,00078703703703703700</text:p>
          </table:table-cell>
          <table:table-cell table:formula="of:=[.D138]-[.D13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50" office:value-type="float" office:value="6850" calcext:value-type="float">
            <text:p>6850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792824074074074" calcext:value-type="float">
            <text:p>0,00079282407407407400</text:p>
          </table:table-cell>
          <table:table-cell table:formula="of:=[.D139]-[.D138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50" office:value-type="float" office:value="6900" calcext:value-type="float">
            <text:p>6900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798611111111111" calcext:value-type="float">
            <text:p>0,00079861111111111100</text:p>
          </table:table-cell>
          <table:table-cell table:formula="of:=[.D140]-[.D13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50" office:value-type="float" office:value="6950" calcext:value-type="float">
            <text:p>6950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804398148148148" calcext:value-type="float">
            <text:p>0,00080439814814814800</text:p>
          </table:table-cell>
          <table:table-cell table:formula="of:=[.D141]-[.D14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50" office:value-type="float" office:value="7000" calcext:value-type="float">
            <text:p>700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810185185185185" calcext:value-type="float">
            <text:p>0,00081018518518518500</text:p>
          </table:table-cell>
          <table:table-cell table:formula="of:=[.D142]-[.D141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50" office:value-type="float" office:value="7050" calcext:value-type="float">
            <text:p>7050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815972222222222" calcext:value-type="float">
            <text:p>0,00081597222222222200</text:p>
          </table:table-cell>
          <table:table-cell table:formula="of:=[.D143]-[.D14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50" office:value-type="float" office:value="7100" calcext:value-type="float">
            <text:p>7100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821759259259259" calcext:value-type="float">
            <text:p>0,00082175925925925900</text:p>
          </table:table-cell>
          <table:table-cell table:formula="of:=[.D144]-[.D14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50" office:value-type="float" office:value="7150" calcext:value-type="float">
            <text:p>7150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827546296296296" calcext:value-type="float">
            <text:p>0,00082754629629629600</text:p>
          </table:table-cell>
          <table:table-cell table:formula="of:=[.D145]-[.D144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50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833333333333333" calcext:value-type="float">
            <text:p>0,00083333333333333300</text:p>
          </table:table-cell>
          <table:table-cell table:formula="of:=[.D146]-[.D14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50" office:value-type="float" office:value="7250" calcext:value-type="float">
            <text:p>725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83912037037037" calcext:value-type="float">
            <text:p>0,00083912037037037000</text:p>
          </table:table-cell>
          <table:table-cell table:formula="of:=[.D147]-[.D14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50" office:value-type="float" office:value="7300" calcext:value-type="float">
            <text:p>7300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844907407407407" calcext:value-type="float">
            <text:p>0,00084490740740740700</text:p>
          </table:table-cell>
          <table:table-cell table:formula="of:=[.D148]-[.D14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50" office:value-type="float" office:value="7350" calcext:value-type="float">
            <text:p>7350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850694444444444" calcext:value-type="float">
            <text:p>0,00085069444444444400</text:p>
          </table:table-cell>
          <table:table-cell table:formula="of:=[.D149]-[.D148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50" office:value-type="float" office:value="7400" calcext:value-type="float">
            <text:p>7400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856481481481482" calcext:value-type="float">
            <text:p>0,00085648148148148100</text:p>
          </table:table-cell>
          <table:table-cell table:formula="of:=[.D150]-[.D14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50" office:value-type="float" office:value="7450" calcext:value-type="float">
            <text:p>7450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862268518518519" calcext:value-type="float">
            <text:p>0,00086226851851851900</text:p>
          </table:table-cell>
          <table:table-cell table:formula="of:=[.D151]-[.D15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50" office:value-type="float" office:value="7500" calcext:value-type="float">
            <text:p>75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868055555555556" calcext:value-type="float">
            <text:p>0,00086805555555555600</text:p>
          </table:table-cell>
          <table:table-cell table:formula="of:=[.D152]-[.D151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50" office:value-type="float" office:value="7550" calcext:value-type="float">
            <text:p>7550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873842592592593" calcext:value-type="float">
            <text:p>0,00087384259259259300</text:p>
          </table:table-cell>
          <table:table-cell table:formula="of:=[.D153]-[.D15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50" office:value-type="float" office:value="7600" calcext:value-type="float">
            <text:p>7600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87962962962963" calcext:value-type="float">
            <text:p>0,00087962962962963000</text:p>
          </table:table-cell>
          <table:table-cell table:formula="of:=[.D154]-[.D15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50" office:value-type="float" office:value="7650" calcext:value-type="float">
            <text:p>7650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885416666666667" calcext:value-type="float">
            <text:p>0,00088541666666666700</text:p>
          </table:table-cell>
          <table:table-cell table:formula="of:=[.D155]-[.D154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50" office:value-type="float" office:value="7700" calcext:value-type="float">
            <text:p>7700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891203703703704" calcext:value-type="float">
            <text:p>0,00089120370370370400</text:p>
          </table:table-cell>
          <table:table-cell table:formula="of:=[.D156]-[.D15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50" office:value-type="float" office:value="7750" calcext:value-type="float">
            <text:p>775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896990740740741" calcext:value-type="float">
            <text:p>0,00089699074074074100</text:p>
          </table:table-cell>
          <table:table-cell table:formula="of:=[.D157]-[.D15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50" office:value-type="float" office:value="7800" calcext:value-type="float">
            <text:p>7800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902777777777778" calcext:value-type="float">
            <text:p>0,00090277777777777800</text:p>
          </table:table-cell>
          <table:table-cell table:formula="of:=[.D158]-[.D157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50" office:value-type="float" office:value="7850" calcext:value-type="float">
            <text:p>7850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908564814814815" calcext:value-type="float">
            <text:p>0,00090856481481481500</text:p>
          </table:table-cell>
          <table:table-cell table:formula="of:=[.D159]-[.D15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50" office:value-type="float" office:value="7900" calcext:value-type="float">
            <text:p>7900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914351851851852" calcext:value-type="float">
            <text:p>0,00091435185185185200</text:p>
          </table:table-cell>
          <table:table-cell table:formula="of:=[.D160]-[.D15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50" office:value-type="float" office:value="7950" calcext:value-type="float">
            <text:p>7950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920138888888889" calcext:value-type="float">
            <text:p>0,00092013888888888900</text:p>
          </table:table-cell>
          <table:table-cell table:formula="of:=[.D161]-[.D160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50" office:value-type="float" office:value="8000" calcext:value-type="float">
            <text:p>800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925925925925926" calcext:value-type="float">
            <text:p>0,00092592592592592600</text:p>
          </table:table-cell>
          <table:table-cell table:formula="of:=[.D162]-[.D16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50" office:value-type="float" office:value="8050" calcext:value-type="float">
            <text:p>8050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931712962962963" calcext:value-type="float">
            <text:p>0,00093171296296296300</text:p>
          </table:table-cell>
          <table:table-cell table:formula="of:=[.D163]-[.D16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50" office:value-type="float" office:value="8100" calcext:value-type="float">
            <text:p>8100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9375" calcext:value-type="float">
            <text:p>0,00093750000000000000</text:p>
          </table:table-cell>
          <table:table-cell table:formula="of:=[.D164]-[.D163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50" office:value-type="float" office:value="8150" calcext:value-type="float">
            <text:p>8150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943287037037037" calcext:value-type="float">
            <text:p>0,00094328703703703700</text:p>
          </table:table-cell>
          <table:table-cell table:formula="of:=[.D165]-[.D16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50" office:value-type="float" office:value="8200" calcext:value-type="float">
            <text:p>8200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949074074074074" calcext:value-type="float">
            <text:p>0,00094907407407407400</text:p>
          </table:table-cell>
          <table:table-cell table:formula="of:=[.D166]-[.D16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50" office:value-type="float" office:value="8250" calcext:value-type="float">
            <text:p>825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954861111111111" calcext:value-type="float">
            <text:p>0,00095486111111111100</text:p>
          </table:table-cell>
          <table:table-cell table:formula="of:=[.D167]-[.D166]" office:value-type="float" office:value="0.00000578703703703711" calcext:value-type="float">
            <text:p>0,0000057870370370371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50" office:value-type="float" office:value="8300" calcext:value-type="float">
            <text:p>8300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960648148148148" calcext:value-type="float">
            <text:p>0,00096064814814814800</text:p>
          </table:table-cell>
          <table:table-cell table:formula="of:=[.D168]-[.D16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50" office:value-type="float" office:value="8350" calcext:value-type="float">
            <text:p>8350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966435185185185" calcext:value-type="float">
            <text:p>0,00096643518518518500</text:p>
          </table:table-cell>
          <table:table-cell table:formula="of:=[.D169]-[.D16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50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972222222222222" calcext:value-type="float">
            <text:p>0,00097222222222222200</text:p>
          </table:table-cell>
          <table:table-cell table:formula="of:=[.D170]-[.D16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50" office:value-type="float" office:value="8450" calcext:value-type="float">
            <text:p>8450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978009259259259" calcext:value-type="float">
            <text:p>0,00097800925925925900</text:p>
          </table:table-cell>
          <table:table-cell table:formula="of:=[.D171]-[.D17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50" office:value-type="float" office:value="8500" calcext:value-type="float">
            <text:p>850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983796296296296" calcext:value-type="float">
            <text:p>0,00098379629629629600</text:p>
          </table:table-cell>
          <table:table-cell table:formula="of:=[.D172]-[.D171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50" office:value-type="float" office:value="8550" calcext:value-type="float">
            <text:p>8550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989583333333333" calcext:value-type="float">
            <text:p>0,00098958333333333300</text:p>
          </table:table-cell>
          <table:table-cell table:formula="of:=[.D173]-[.D17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50" office:value-type="float" office:value="8600" calcext:value-type="float">
            <text:p>8600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99537037037037" calcext:value-type="float">
            <text:p>0,00099537037037037000</text:p>
          </table:table-cell>
          <table:table-cell table:formula="of:=[.D174]-[.D17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50" office:value-type="float" office:value="8650" calcext:value-type="float">
            <text:p>8650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00115740740741" calcext:value-type="float">
            <text:p>0,00100115740740741000</text:p>
          </table:table-cell>
          <table:table-cell table:formula="of:=[.D175]-[.D17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50" office:value-type="float" office:value="8700" calcext:value-type="float">
            <text:p>8700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00694444444444" calcext:value-type="float">
            <text:p>0,00100694444444444000</text:p>
          </table:table-cell>
          <table:table-cell table:formula="of:=[.D176]-[.D17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50" office:value-type="float" office:value="8750" calcext:value-type="float">
            <text:p>87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01273148148148" calcext:value-type="float">
            <text:p>0,00101273148148148000</text:p>
          </table:table-cell>
          <table:table-cell table:formula="of:=[.D177]-[.D17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50" office:value-type="float" office:value="8800" calcext:value-type="float">
            <text:p>8800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01851851851852" calcext:value-type="float">
            <text:p>0,00101851851851852000</text:p>
          </table:table-cell>
          <table:table-cell table:formula="of:=[.D178]-[.D177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50" office:value-type="float" office:value="8850" calcext:value-type="float">
            <text:p>8850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02430555555556" calcext:value-type="float">
            <text:p>0,00102430555555556000</text:p>
          </table:table-cell>
          <table:table-cell table:formula="of:=[.D179]-[.D17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50" office:value-type="float" office:value="8900" calcext:value-type="float">
            <text:p>8900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03009259259259" calcext:value-type="float">
            <text:p>0,00103009259259259000</text:p>
          </table:table-cell>
          <table:table-cell table:formula="of:=[.D180]-[.D17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50" office:value-type="float" office:value="8950" calcext:value-type="float">
            <text:p>8950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03587962962963" calcext:value-type="float">
            <text:p>0,00103587962962963000</text:p>
          </table:table-cell>
          <table:table-cell table:formula="of:=[.D181]-[.D18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50" office:value-type="float" office:value="9000" calcext:value-type="float">
            <text:p>900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04166666666667" calcext:value-type="float">
            <text:p>0,00104166666666667000</text:p>
          </table:table-cell>
          <table:table-cell table:formula="of:=[.D182]-[.D18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50" office:value-type="float" office:value="9050" calcext:value-type="float">
            <text:p>9050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0474537037037" calcext:value-type="float">
            <text:p>0,00104745370370370000</text:p>
          </table:table-cell>
          <table:table-cell table:formula="of:=[.D183]-[.D18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50" office:value-type="float" office:value="9100" calcext:value-type="float">
            <text:p>9100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05324074074074" calcext:value-type="float">
            <text:p>0,00105324074074074000</text:p>
          </table:table-cell>
          <table:table-cell table:formula="of:=[.D184]-[.D183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50" office:value-type="float" office:value="9150" calcext:value-type="float">
            <text:p>9150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05902777777778" calcext:value-type="float">
            <text:p>0,00105902777777778000</text:p>
          </table:table-cell>
          <table:table-cell table:formula="of:=[.D185]-[.D18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50" office:value-type="float" office:value="9200" calcext:value-type="float">
            <text:p>9200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06481481481481" calcext:value-type="float">
            <text:p>0,00106481481481481000</text:p>
          </table:table-cell>
          <table:table-cell table:formula="of:=[.D186]-[.D18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50" office:value-type="float" office:value="9250" calcext:value-type="float">
            <text:p>925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07060185185185" calcext:value-type="float">
            <text:p>0,00107060185185185000</text:p>
          </table:table-cell>
          <table:table-cell table:formula="of:=[.D187]-[.D18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50" office:value-type="float" office:value="9300" calcext:value-type="float">
            <text:p>9300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07638888888889" calcext:value-type="float">
            <text:p>0,00107638888888889000</text:p>
          </table:table-cell>
          <table:table-cell table:formula="of:=[.D188]-[.D18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50" office:value-type="float" office:value="9350" calcext:value-type="float">
            <text:p>9350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08217592592593" calcext:value-type="float">
            <text:p>0,00108217592592593000</text:p>
          </table:table-cell>
          <table:table-cell table:formula="of:=[.D189]-[.D18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50" office:value-type="float" office:value="9400" calcext:value-type="float">
            <text:p>9400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08796296296296" calcext:value-type="float">
            <text:p>0,00108796296296296000</text:p>
          </table:table-cell>
          <table:table-cell table:formula="of:=[.D190]-[.D189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50" office:value-type="float" office:value="9450" calcext:value-type="float">
            <text:p>9450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09375" calcext:value-type="float">
            <text:p>0,00109375000000000000</text:p>
          </table:table-cell>
          <table:table-cell table:formula="of:=[.D191]-[.D19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50" office:value-type="float" office:value="9500" calcext:value-type="float">
            <text:p>950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09953703703704" calcext:value-type="float">
            <text:p>0,00109953703703704000</text:p>
          </table:table-cell>
          <table:table-cell table:formula="of:=[.D192]-[.D19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50" office:value-type="float" office:value="9550" calcext:value-type="float">
            <text:p>9550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10532407407407" calcext:value-type="float">
            <text:p>0,00110532407407407000</text:p>
          </table:table-cell>
          <table:table-cell table:formula="of:=[.D193]-[.D19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50" office:value-type="float" office:value="9600" calcext:value-type="float">
            <text:p>9600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11111111111111" calcext:value-type="float">
            <text:p>0,00111111111111111000</text:p>
          </table:table-cell>
          <table:table-cell table:formula="of:=[.D194]-[.D19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50" office:value-type="float" office:value="9650" calcext:value-type="float">
            <text:p>9650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11689814814815" calcext:value-type="float">
            <text:p>0,00111689814814815000</text:p>
          </table:table-cell>
          <table:table-cell table:formula="of:=[.D195]-[.D19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50" office:value-type="float" office:value="9700" calcext:value-type="float">
            <text:p>9700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12268518518519" calcext:value-type="float">
            <text:p>0,00112268518518519000</text:p>
          </table:table-cell>
          <table:table-cell table:formula="of:=[.D196]-[.D19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50" office:value-type="float" office:value="9750" calcext:value-type="float">
            <text:p>975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12847222222222" calcext:value-type="float">
            <text:p>0,00112847222222222000</text:p>
          </table:table-cell>
          <table:table-cell table:formula="of:=[.D197]-[.D196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50" office:value-type="float" office:value="9800" calcext:value-type="float">
            <text:p>9800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13425925925926" calcext:value-type="float">
            <text:p>0,00113425925925926000</text:p>
          </table:table-cell>
          <table:table-cell table:formula="of:=[.D198]-[.D19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50" office:value-type="float" office:value="9850" calcext:value-type="float">
            <text:p>9850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1400462962963" calcext:value-type="float">
            <text:p>0,00114004629629630000</text:p>
          </table:table-cell>
          <table:table-cell table:formula="of:=[.D199]-[.D19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50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14583333333333" calcext:value-type="float">
            <text:p>0,00114583333333333000</text:p>
          </table:table-cell>
          <table:table-cell table:formula="of:=[.D200]-[.D19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50" office:value-type="float" office:value="9950" calcext:value-type="float">
            <text:p>9950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15162037037037" calcext:value-type="float">
            <text:p>0,00115162037037037000</text:p>
          </table:table-cell>
          <table:table-cell table:formula="of:=[.D201]-[.D20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50" office:value-type="float" office:value="10000" calcext:value-type="float">
            <text:p>100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15740740740741" calcext:value-type="float">
            <text:p>0,00115740740740741000</text:p>
          </table:table-cell>
          <table:table-cell table:formula="of:=[.D202]-[.D20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50" office:value-type="float" office:value="10050" calcext:value-type="float">
            <text:p>10050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16319444444444" calcext:value-type="float">
            <text:p>0,00116319444444444000</text:p>
          </table:table-cell>
          <table:table-cell table:formula="of:=[.D203]-[.D202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50" office:value-type="float" office:value="10100" calcext:value-type="float">
            <text:p>10100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16898148148148" calcext:value-type="float">
            <text:p>0,00116898148148148000</text:p>
          </table:table-cell>
          <table:table-cell table:formula="of:=[.D204]-[.D20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50" office:value-type="float" office:value="10150" calcext:value-type="float">
            <text:p>10150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17476851851852" calcext:value-type="float">
            <text:p>0,00117476851851852000</text:p>
          </table:table-cell>
          <table:table-cell table:formula="of:=[.D205]-[.D20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50" office:value-type="float" office:value="10200" calcext:value-type="float">
            <text:p>10200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18055555555556" calcext:value-type="float">
            <text:p>0,00118055555555556000</text:p>
          </table:table-cell>
          <table:table-cell table:formula="of:=[.D206]-[.D20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50" office:value-type="float" office:value="10250" calcext:value-type="float">
            <text:p>1025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18634259259259" calcext:value-type="float">
            <text:p>0,00118634259259259000</text:p>
          </table:table-cell>
          <table:table-cell table:formula="of:=[.D207]-[.D20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50" office:value-type="float" office:value="10300" calcext:value-type="float">
            <text:p>10300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19212962962963" calcext:value-type="float">
            <text:p>0,00119212962962963000</text:p>
          </table:table-cell>
          <table:table-cell table:formula="of:=[.D208]-[.D20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50" office:value-type="float" office:value="10350" calcext:value-type="float">
            <text:p>10350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19791666666667" calcext:value-type="float">
            <text:p>0,00119791666666667000</text:p>
          </table:table-cell>
          <table:table-cell table:formula="of:=[.D209]-[.D208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50" office:value-type="float" office:value="10400" calcext:value-type="float">
            <text:p>10400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2037037037037" calcext:value-type="float">
            <text:p>0,00120370370370370000</text:p>
          </table:table-cell>
          <table:table-cell table:formula="of:=[.D210]-[.D20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50" office:value-type="float" office:value="10450" calcext:value-type="float">
            <text:p>10450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20949074074074" calcext:value-type="float">
            <text:p>0,00120949074074074000</text:p>
          </table:table-cell>
          <table:table-cell table:formula="of:=[.D211]-[.D21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50" office:value-type="float" office:value="10500" calcext:value-type="float">
            <text:p>1050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21527777777778" calcext:value-type="float">
            <text:p>0,00121527777777778000</text:p>
          </table:table-cell>
          <table:table-cell table:formula="of:=[.D212]-[.D21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50" office:value-type="float" office:value="10550" calcext:value-type="float">
            <text:p>10550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22106481481481" calcext:value-type="float">
            <text:p>0,00122106481481481000</text:p>
          </table:table-cell>
          <table:table-cell table:formula="of:=[.D213]-[.D21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50" office:value-type="float" office:value="10600" calcext:value-type="float">
            <text:p>10600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22685185185185" calcext:value-type="float">
            <text:p>0,00122685185185185000</text:p>
          </table:table-cell>
          <table:table-cell table:formula="of:=[.D214]-[.D21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50" office:value-type="float" office:value="10650" calcext:value-type="float">
            <text:p>10650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23263888888889" calcext:value-type="float">
            <text:p>0,00123263888888889000</text:p>
          </table:table-cell>
          <table:table-cell table:formula="of:=[.D215]-[.D214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50" office:value-type="float" office:value="10700" calcext:value-type="float">
            <text:p>10700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23842592592593" calcext:value-type="float">
            <text:p>0,00123842592592593000</text:p>
          </table:table-cell>
          <table:table-cell table:formula="of:=[.D216]-[.D21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50" office:value-type="float" office:value="10750" calcext:value-type="float">
            <text:p>1075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24421296296296" calcext:value-type="float">
            <text:p>0,00124421296296296000</text:p>
          </table:table-cell>
          <table:table-cell table:formula="of:=[.D217]-[.D21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50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25" calcext:value-type="float">
            <text:p>0,00125000000000000000</text:p>
          </table:table-cell>
          <table:table-cell table:formula="of:=[.D218]-[.D21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50" office:value-type="float" office:value="10850" calcext:value-type="float">
            <text:p>10850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25578703703704" calcext:value-type="float">
            <text:p>0,00125578703703704000</text:p>
          </table:table-cell>
          <table:table-cell table:formula="of:=[.D219]-[.D21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50" office:value-type="float" office:value="10900" calcext:value-type="float">
            <text:p>10900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26157407407407" calcext:value-type="float">
            <text:p>0,00126157407407407000</text:p>
          </table:table-cell>
          <table:table-cell table:formula="of:=[.D220]-[.D21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50" office:value-type="float" office:value="10950" calcext:value-type="float">
            <text:p>10950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26736111111111" calcext:value-type="float">
            <text:p>0,00126736111111111000</text:p>
          </table:table-cell>
          <table:table-cell table:formula="of:=[.D221]-[.D220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50" office:value-type="float" office:value="11000" calcext:value-type="float">
            <text:p>1100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27314814814815" calcext:value-type="float">
            <text:p>0,00127314814814815000</text:p>
          </table:table-cell>
          <table:table-cell table:formula="of:=[.D222]-[.D22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50" office:value-type="float" office:value="11050" calcext:value-type="float">
            <text:p>11050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27893518518519" calcext:value-type="float">
            <text:p>0,00127893518518519000</text:p>
          </table:table-cell>
          <table:table-cell table:formula="of:=[.D223]-[.D22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50" office:value-type="float" office:value="11100" calcext:value-type="float">
            <text:p>11100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28472222222222" calcext:value-type="float">
            <text:p>0,00128472222222222000</text:p>
          </table:table-cell>
          <table:table-cell table:formula="of:=[.D224]-[.D22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50" office:value-type="float" office:value="11150" calcext:value-type="float">
            <text:p>11150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29050925925926" calcext:value-type="float">
            <text:p>0,00129050925925926000</text:p>
          </table:table-cell>
          <table:table-cell table:formula="of:=[.D225]-[.D22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50" office:value-type="float" office:value="11200" calcext:value-type="float">
            <text:p>11200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2962962962963" calcext:value-type="float">
            <text:p>0,00129629629629630000</text:p>
          </table:table-cell>
          <table:table-cell table:formula="of:=[.D226]-[.D22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50" office:value-type="float" office:value="11250" calcext:value-type="float">
            <text:p>112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30208333333333" calcext:value-type="float">
            <text:p>0,00130208333333333000</text:p>
          </table:table-cell>
          <table:table-cell table:formula="of:=[.D227]-[.D22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50" office:value-type="float" office:value="11300" calcext:value-type="float">
            <text:p>11300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30787037037037" calcext:value-type="float">
            <text:p>0,00130787037037037000</text:p>
          </table:table-cell>
          <table:table-cell table:formula="of:=[.D228]-[.D227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50" office:value-type="float" office:value="11350" calcext:value-type="float">
            <text:p>11350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31365740740741" calcext:value-type="float">
            <text:p>0,00131365740740741000</text:p>
          </table:table-cell>
          <table:table-cell table:formula="of:=[.D229]-[.D22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50" office:value-type="float" office:value="11400" calcext:value-type="float">
            <text:p>11400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31944444444444" calcext:value-type="float">
            <text:p>0,00131944444444444000</text:p>
          </table:table-cell>
          <table:table-cell table:formula="of:=[.D230]-[.D22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50" office:value-type="float" office:value="11450" calcext:value-type="float">
            <text:p>11450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32523148148148" calcext:value-type="float">
            <text:p>0,00132523148148148000</text:p>
          </table:table-cell>
          <table:table-cell table:formula="of:=[.D231]-[.D23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50" office:value-type="float" office:value="11500" calcext:value-type="float">
            <text:p>1150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33101851851852" calcext:value-type="float">
            <text:p>0,00133101851851852000</text:p>
          </table:table-cell>
          <table:table-cell table:formula="of:=[.D232]-[.D23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50" office:value-type="float" office:value="11550" calcext:value-type="float">
            <text:p>11550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33680555555556" calcext:value-type="float">
            <text:p>0,00133680555555556000</text:p>
          </table:table-cell>
          <table:table-cell table:formula="of:=[.D233]-[.D23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50" office:value-type="float" office:value="11600" calcext:value-type="float">
            <text:p>11600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34259259259259" calcext:value-type="float">
            <text:p>0,00134259259259259000</text:p>
          </table:table-cell>
          <table:table-cell table:formula="of:=[.D234]-[.D233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50" office:value-type="float" office:value="11650" calcext:value-type="float">
            <text:p>11650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34837962962963" calcext:value-type="float">
            <text:p>0,00134837962962963000</text:p>
          </table:table-cell>
          <table:table-cell table:formula="of:=[.D235]-[.D23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50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35416666666667" calcext:value-type="float">
            <text:p>0,00135416666666667000</text:p>
          </table:table-cell>
          <table:table-cell table:formula="of:=[.D236]-[.D23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50" office:value-type="float" office:value="11750" calcext:value-type="float">
            <text:p>1175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3599537037037" calcext:value-type="float">
            <text:p>0,00135995370370370000</text:p>
          </table:table-cell>
          <table:table-cell table:formula="of:=[.D237]-[.D23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50" office:value-type="float" office:value="11800" calcext:value-type="float">
            <text:p>11800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36574074074074" calcext:value-type="float">
            <text:p>0,00136574074074074000</text:p>
          </table:table-cell>
          <table:table-cell table:formula="of:=[.D238]-[.D23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50" office:value-type="float" office:value="11850" calcext:value-type="float">
            <text:p>11850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37152777777778" calcext:value-type="float">
            <text:p>0,00137152777777778000</text:p>
          </table:table-cell>
          <table:table-cell table:formula="of:=[.D239]-[.D23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50" office:value-type="float" office:value="11900" calcext:value-type="float">
            <text:p>11900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37731481481481" calcext:value-type="float">
            <text:p>0,00137731481481481000</text:p>
          </table:table-cell>
          <table:table-cell table:formula="of:=[.D240]-[.D239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50" office:value-type="float" office:value="11950" calcext:value-type="float">
            <text:p>11950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38310185185185" calcext:value-type="float">
            <text:p>0,00138310185185185000</text:p>
          </table:table-cell>
          <table:table-cell table:formula="of:=[.D241]-[.D24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formula="of:=[.B240]+50" office:value-type="float" office:value="12000" calcext:value-type="float">
            <text:p>1200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38888888888889" calcext:value-type="float">
            <text:p>0,00138888888888889000</text:p>
          </table:table-cell>
          <table:table-cell table:formula="of:=[.D242]-[.D24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50" office:value-type="float" office:value="12050" calcext:value-type="float">
            <text:p>12050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39467592592593" calcext:value-type="float">
            <text:p>0,00139467592592593000</text:p>
          </table:table-cell>
          <table:table-cell table:formula="of:=[.D243]-[.D24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50" office:value-type="float" office:value="12100" calcext:value-type="float">
            <text:p>12100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40046296296296" calcext:value-type="float">
            <text:p>0,00140046296296296000</text:p>
          </table:table-cell>
          <table:table-cell table:formula="of:=[.D244]-[.D24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50" office:value-type="float" office:value="12150" calcext:value-type="float">
            <text:p>12150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40625" calcext:value-type="float">
            <text:p>0,00140625000000000000</text:p>
          </table:table-cell>
          <table:table-cell table:formula="of:=[.D245]-[.D24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50" office:value-type="float" office:value="12200" calcext:value-type="float">
            <text:p>12200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41203703703704" calcext:value-type="float">
            <text:p>0,00141203703703704000</text:p>
          </table:table-cell>
          <table:table-cell table:formula="of:=[.D246]-[.D245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50" office:value-type="float" office:value="12250" calcext:value-type="float">
            <text:p>1225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41782407407407" calcext:value-type="float">
            <text:p>0,00141782407407407000</text:p>
          </table:table-cell>
          <table:table-cell table:formula="of:=[.D247]-[.D24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50" office:value-type="float" office:value="12300" calcext:value-type="float">
            <text:p>12300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42361111111111" calcext:value-type="float">
            <text:p>0,00142361111111111000</text:p>
          </table:table-cell>
          <table:table-cell table:formula="of:=[.D248]-[.D24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50" office:value-type="float" office:value="12350" calcext:value-type="float">
            <text:p>12350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42939814814815" calcext:value-type="float">
            <text:p>0,00142939814814815000</text:p>
          </table:table-cell>
          <table:table-cell table:formula="of:=[.D249]-[.D24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50" office:value-type="float" office:value="12400" calcext:value-type="float">
            <text:p>12400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43518518518519" calcext:value-type="float">
            <text:p>0,00143518518518519000</text:p>
          </table:table-cell>
          <table:table-cell table:formula="of:=[.D250]-[.D24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50" office:value-type="float" office:value="12450" calcext:value-type="float">
            <text:p>12450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44097222222222" calcext:value-type="float">
            <text:p>0,00144097222222222000</text:p>
          </table:table-cell>
          <table:table-cell table:formula="of:=[.D251]-[.D25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50" office:value-type="float" office:value="12500" calcext:value-type="float">
            <text:p>12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44675925925926" calcext:value-type="float">
            <text:p>0,00144675925925926000</text:p>
          </table:table-cell>
          <table:table-cell table:formula="of:=[.D252]-[.D251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50" office:value-type="float" office:value="12550" calcext:value-type="float">
            <text:p>12550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4525462962963" calcext:value-type="float">
            <text:p>0,00145254629629630000</text:p>
          </table:table-cell>
          <table:table-cell table:formula="of:=[.D253]-[.D25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50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45833333333333" calcext:value-type="float">
            <text:p>0,00145833333333333000</text:p>
          </table:table-cell>
          <table:table-cell table:formula="of:=[.D254]-[.D25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50" office:value-type="float" office:value="12650" calcext:value-type="float">
            <text:p>12650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46412037037037" calcext:value-type="float">
            <text:p>0,00146412037037037000</text:p>
          </table:table-cell>
          <table:table-cell table:formula="of:=[.D255]-[.D25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50" office:value-type="float" office:value="12700" calcext:value-type="float">
            <text:p>12700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46990740740741" calcext:value-type="float">
            <text:p>0,00146990740740741000</text:p>
          </table:table-cell>
          <table:table-cell table:formula="of:=[.D256]-[.D25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50" office:value-type="float" office:value="12750" calcext:value-type="float">
            <text:p>1275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47569444444444" calcext:value-type="float">
            <text:p>0,00147569444444444000</text:p>
          </table:table-cell>
          <table:table-cell table:formula="of:=[.D257]-[.D25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50" office:value-type="float" office:value="12800" calcext:value-type="float">
            <text:p>12800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48148148148148" calcext:value-type="float">
            <text:p>0,00148148148148148000</text:p>
          </table:table-cell>
          <table:table-cell table:formula="of:=[.D258]-[.D257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50" office:value-type="float" office:value="12850" calcext:value-type="float">
            <text:p>12850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48726851851852" calcext:value-type="float">
            <text:p>0,00148726851851852000</text:p>
          </table:table-cell>
          <table:table-cell table:formula="of:=[.D259]-[.D25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50" office:value-type="float" office:value="12900" calcext:value-type="float">
            <text:p>12900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49305555555556" calcext:value-type="float">
            <text:p>0,00149305555555556000</text:p>
          </table:table-cell>
          <table:table-cell table:formula="of:=[.D260]-[.D25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50" office:value-type="float" office:value="12950" calcext:value-type="float">
            <text:p>12950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49884259259259" calcext:value-type="float">
            <text:p>0,00149884259259259000</text:p>
          </table:table-cell>
          <table:table-cell table:formula="of:=[.D261]-[.D26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50" office:value-type="float" office:value="13000" calcext:value-type="float">
            <text:p>1300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50462962962963" calcext:value-type="float">
            <text:p>0,00150462962962963000</text:p>
          </table:table-cell>
          <table:table-cell table:formula="of:=[.D262]-[.D26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50" office:value-type="float" office:value="13050" calcext:value-type="float">
            <text:p>13050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51041666666667" calcext:value-type="float">
            <text:p>0,00151041666666667000</text:p>
          </table:table-cell>
          <table:table-cell table:formula="of:=[.D263]-[.D26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50" office:value-type="float" office:value="13100" calcext:value-type="float">
            <text:p>13100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5162037037037" calcext:value-type="float">
            <text:p>0,00151620370370370000</text:p>
          </table:table-cell>
          <table:table-cell table:formula="of:=[.D264]-[.D26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50" office:value-type="float" office:value="13150" calcext:value-type="float">
            <text:p>13150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52199074074074" calcext:value-type="float">
            <text:p>0,00152199074074074000</text:p>
          </table:table-cell>
          <table:table-cell table:formula="of:=[.D265]-[.D264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50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52777777777778" calcext:value-type="float">
            <text:p>0,00152777777777778000</text:p>
          </table:table-cell>
          <table:table-cell table:formula="of:=[.D266]-[.D26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50" office:value-type="float" office:value="13250" calcext:value-type="float">
            <text:p>1325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53356481481481" calcext:value-type="float">
            <text:p>0,00153356481481481000</text:p>
          </table:table-cell>
          <table:table-cell table:formula="of:=[.D267]-[.D26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50" office:value-type="float" office:value="13300" calcext:value-type="float">
            <text:p>13300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53935185185185" calcext:value-type="float">
            <text:p>0,00153935185185185000</text:p>
          </table:table-cell>
          <table:table-cell table:formula="of:=[.D268]-[.D26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50" office:value-type="float" office:value="13350" calcext:value-type="float">
            <text:p>13350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54513888888889" calcext:value-type="float">
            <text:p>0,00154513888888889000</text:p>
          </table:table-cell>
          <table:table-cell table:formula="of:=[.D269]-[.D26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50" office:value-type="float" office:value="13400" calcext:value-type="float">
            <text:p>13400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55092592592593" calcext:value-type="float">
            <text:p>0,00155092592592593000</text:p>
          </table:table-cell>
          <table:table-cell table:formula="of:=[.D270]-[.D26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50" office:value-type="float" office:value="13450" calcext:value-type="float">
            <text:p>13450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55671296296296" calcext:value-type="float">
            <text:p>0,00155671296296296000</text:p>
          </table:table-cell>
          <table:table-cell table:formula="of:=[.D271]-[.D270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50" office:value-type="float" office:value="13500" calcext:value-type="float">
            <text:p>1350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5625" calcext:value-type="float">
            <text:p>0,00156250000000000000</text:p>
          </table:table-cell>
          <table:table-cell table:formula="of:=[.D272]-[.D27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50" office:value-type="float" office:value="13550" calcext:value-type="float">
            <text:p>13550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56828703703704" calcext:value-type="float">
            <text:p>0,00156828703703704000</text:p>
          </table:table-cell>
          <table:table-cell table:formula="of:=[.D273]-[.D27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50" office:value-type="float" office:value="13600" calcext:value-type="float">
            <text:p>13600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57407407407407" calcext:value-type="float">
            <text:p>0,00157407407407407000</text:p>
          </table:table-cell>
          <table:table-cell table:formula="of:=[.D274]-[.D27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50" office:value-type="float" office:value="13650" calcext:value-type="float">
            <text:p>13650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57986111111111" calcext:value-type="float">
            <text:p>0,00157986111111111000</text:p>
          </table:table-cell>
          <table:table-cell table:formula="of:=[.D275]-[.D27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50" office:value-type="float" office:value="13700" calcext:value-type="float">
            <text:p>13700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58564814814815" calcext:value-type="float">
            <text:p>0,00158564814814815000</text:p>
          </table:table-cell>
          <table:table-cell table:formula="of:=[.D276]-[.D27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50" office:value-type="float" office:value="13750" calcext:value-type="float">
            <text:p>137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59143518518519" calcext:value-type="float">
            <text:p>0,00159143518518518000</text:p>
          </table:table-cell>
          <table:table-cell table:formula="of:=[.D277]-[.D276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50" office:value-type="float" office:value="13800" calcext:value-type="float">
            <text:p>13800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59722222222222" calcext:value-type="float">
            <text:p>0,00159722222222222000</text:p>
          </table:table-cell>
          <table:table-cell table:formula="of:=[.D278]-[.D27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50" office:value-type="float" office:value="13850" calcext:value-type="float">
            <text:p>13850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60300925925926" calcext:value-type="float">
            <text:p>0,00160300925925926000</text:p>
          </table:table-cell>
          <table:table-cell table:formula="of:=[.D279]-[.D27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50" office:value-type="float" office:value="13900" calcext:value-type="float">
            <text:p>13900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6087962962963" calcext:value-type="float">
            <text:p>0,00160879629629630000</text:p>
          </table:table-cell>
          <table:table-cell table:formula="of:=[.D280]-[.D27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50" office:value-type="float" office:value="13950" calcext:value-type="float">
            <text:p>13950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61458333333333" calcext:value-type="float">
            <text:p>0,00161458333333333000</text:p>
          </table:table-cell>
          <table:table-cell table:formula="of:=[.D281]-[.D28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50" office:value-type="float" office:value="14000" calcext:value-type="float">
            <text:p>1400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62037037037037" calcext:value-type="float">
            <text:p>0,00162037037037037000</text:p>
          </table:table-cell>
          <table:table-cell table:formula="of:=[.D282]-[.D28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50" office:value-type="float" office:value="14050" calcext:value-type="float">
            <text:p>14050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62615740740741" calcext:value-type="float">
            <text:p>0,00162615740740741000</text:p>
          </table:table-cell>
          <table:table-cell table:formula="of:=[.D283]-[.D282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50" office:value-type="float" office:value="14100" calcext:value-type="float">
            <text:p>14100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63194444444444" calcext:value-type="float">
            <text:p>0,00163194444444444000</text:p>
          </table:table-cell>
          <table:table-cell table:formula="of:=[.D284]-[.D28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50" office:value-type="float" office:value="14150" calcext:value-type="float">
            <text:p>14150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63773148148148" calcext:value-type="float">
            <text:p>0,00163773148148148000</text:p>
          </table:table-cell>
          <table:table-cell table:formula="of:=[.D285]-[.D28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50" office:value-type="float" office:value="14200" calcext:value-type="float">
            <text:p>14200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64351851851852" calcext:value-type="float">
            <text:p>0,00164351851851852000</text:p>
          </table:table-cell>
          <table:table-cell table:formula="of:=[.D286]-[.D28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50" office:value-type="float" office:value="14250" calcext:value-type="float">
            <text:p>1425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64930555555556" calcext:value-type="float">
            <text:p>0,00164930555555556000</text:p>
          </table:table-cell>
          <table:table-cell table:formula="of:=[.D287]-[.D28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50" office:value-type="float" office:value="14300" calcext:value-type="float">
            <text:p>14300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65509259259259" calcext:value-type="float">
            <text:p>0,00165509259259259000</text:p>
          </table:table-cell>
          <table:table-cell table:formula="of:=[.D288]-[.D28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50" office:value-type="float" office:value="14350" calcext:value-type="float">
            <text:p>14350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66087962962963" calcext:value-type="float">
            <text:p>0,00166087962962963000</text:p>
          </table:table-cell>
          <table:table-cell table:formula="of:=[.D289]-[.D288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50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66666666666667" calcext:value-type="float">
            <text:p>0,00166666666666667000</text:p>
          </table:table-cell>
          <table:table-cell table:formula="of:=[.D290]-[.D28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50" office:value-type="float" office:value="14450" calcext:value-type="float">
            <text:p>14450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6724537037037" calcext:value-type="float">
            <text:p>0,00167245370370370000</text:p>
          </table:table-cell>
          <table:table-cell table:formula="of:=[.D291]-[.D29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50" office:value-type="float" office:value="14500" calcext:value-type="float">
            <text:p>1450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67824074074074" calcext:value-type="float">
            <text:p>0,00167824074074074000</text:p>
          </table:table-cell>
          <table:table-cell table:formula="of:=[.D292]-[.D29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50" office:value-type="float" office:value="14550" calcext:value-type="float">
            <text:p>14550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68402777777778" calcext:value-type="float">
            <text:p>0,00168402777777778000</text:p>
          </table:table-cell>
          <table:table-cell table:formula="of:=[.D293]-[.D29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50" office:value-type="float" office:value="14600" calcext:value-type="float">
            <text:p>14600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68981481481481" calcext:value-type="float">
            <text:p>0,00168981481481481000</text:p>
          </table:table-cell>
          <table:table-cell table:formula="of:=[.D294]-[.D29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50" office:value-type="float" office:value="14650" calcext:value-type="float">
            <text:p>14650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69560185185185" calcext:value-type="float">
            <text:p>0,00169560185185185000</text:p>
          </table:table-cell>
          <table:table-cell table:formula="of:=[.D295]-[.D29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50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70138888888889" calcext:value-type="float">
            <text:p>0,00170138888888889000</text:p>
          </table:table-cell>
          <table:table-cell table:formula="of:=[.D296]-[.D295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50" office:value-type="float" office:value="14750" calcext:value-type="float">
            <text:p>1475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70717592592593" calcext:value-type="float">
            <text:p>0,00170717592592593000</text:p>
          </table:table-cell>
          <table:table-cell table:formula="of:=[.D297]-[.D29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50" office:value-type="float" office:value="14800" calcext:value-type="float">
            <text:p>14800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71296296296296" calcext:value-type="float">
            <text:p>0,00171296296296296000</text:p>
          </table:table-cell>
          <table:table-cell table:formula="of:=[.D298]-[.D29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50" office:value-type="float" office:value="14850" calcext:value-type="float">
            <text:p>14850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71875" calcext:value-type="float">
            <text:p>0,00171875000000000000</text:p>
          </table:table-cell>
          <table:table-cell table:formula="of:=[.D299]-[.D29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50" office:value-type="float" office:value="14900" calcext:value-type="float">
            <text:p>14900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72453703703704" calcext:value-type="float">
            <text:p>0,00172453703703704000</text:p>
          </table:table-cell>
          <table:table-cell table:formula="of:=[.D300]-[.D29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50" office:value-type="float" office:value="14950" calcext:value-type="float">
            <text:p>14950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73032407407407" calcext:value-type="float">
            <text:p>0,00173032407407407000</text:p>
          </table:table-cell>
          <table:table-cell table:formula="of:=[.D301]-[.D30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50" office:value-type="float" office:value="15000" calcext:value-type="float">
            <text:p>150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73611111111111" calcext:value-type="float">
            <text:p>0,00173611111111111000</text:p>
          </table:table-cell>
          <table:table-cell table:formula="of:=[.D302]-[.D301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50" office:value-type="float" office:value="15050" calcext:value-type="float">
            <text:p>15050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74189814814815" calcext:value-type="float">
            <text:p>0,00174189814814815000</text:p>
          </table:table-cell>
          <table:table-cell table:formula="of:=[.D303]-[.D30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50" office:value-type="float" office:value="15100" calcext:value-type="float">
            <text:p>15100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74768518518519" calcext:value-type="float">
            <text:p>0,00174768518518519000</text:p>
          </table:table-cell>
          <table:table-cell table:formula="of:=[.D304]-[.D30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50" office:value-type="float" office:value="15150" calcext:value-type="float">
            <text:p>15150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75347222222222" calcext:value-type="float">
            <text:p>0,00175347222222222000</text:p>
          </table:table-cell>
          <table:table-cell table:formula="of:=[.D305]-[.D30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50" office:value-type="float" office:value="15200" calcext:value-type="float">
            <text:p>15200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75925925925926" calcext:value-type="float">
            <text:p>0,00175925925925926000</text:p>
          </table:table-cell>
          <table:table-cell table:formula="of:=[.D306]-[.D30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50" office:value-type="float" office:value="15250" calcext:value-type="float">
            <text:p>1525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7650462962963" calcext:value-type="float">
            <text:p>0,00176504629629630000</text:p>
          </table:table-cell>
          <table:table-cell table:formula="of:=[.D307]-[.D30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50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77083333333333" calcext:value-type="float">
            <text:p>0,00177083333333333000</text:p>
          </table:table-cell>
          <table:table-cell table:formula="of:=[.D308]-[.D307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50" office:value-type="float" office:value="15350" calcext:value-type="float">
            <text:p>15350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77662037037037" calcext:value-type="float">
            <text:p>0,00177662037037037000</text:p>
          </table:table-cell>
          <table:table-cell table:formula="of:=[.D309]-[.D30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50" office:value-type="float" office:value="15400" calcext:value-type="float">
            <text:p>15400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78240740740741" calcext:value-type="float">
            <text:p>0,00178240740740741000</text:p>
          </table:table-cell>
          <table:table-cell table:formula="of:=[.D310]-[.D30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50" office:value-type="float" office:value="15450" calcext:value-type="float">
            <text:p>15450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78819444444444" calcext:value-type="float">
            <text:p>0,00178819444444444000</text:p>
          </table:table-cell>
          <table:table-cell table:formula="of:=[.D311]-[.D31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50" office:value-type="float" office:value="15500" calcext:value-type="float">
            <text:p>1550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79398148148148" calcext:value-type="float">
            <text:p>0,00179398148148148000</text:p>
          </table:table-cell>
          <table:table-cell table:formula="of:=[.D312]-[.D31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50" office:value-type="float" office:value="15550" calcext:value-type="float">
            <text:p>15550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79976851851852" calcext:value-type="float">
            <text:p>0,00179976851851852000</text:p>
          </table:table-cell>
          <table:table-cell table:formula="of:=[.D313]-[.D31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50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80555555555556" calcext:value-type="float">
            <text:p>0,00180555555555556000</text:p>
          </table:table-cell>
          <table:table-cell table:formula="of:=[.D314]-[.D313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50" office:value-type="float" office:value="15650" calcext:value-type="float">
            <text:p>15650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81134259259259" calcext:value-type="float">
            <text:p>0,00181134259259259000</text:p>
          </table:table-cell>
          <table:table-cell table:formula="of:=[.D315]-[.D31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50" office:value-type="float" office:value="15700" calcext:value-type="float">
            <text:p>15700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81712962962963" calcext:value-type="float">
            <text:p>0,00181712962962963000</text:p>
          </table:table-cell>
          <table:table-cell table:formula="of:=[.D316]-[.D31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50" office:value-type="float" office:value="15750" calcext:value-type="float">
            <text:p>1575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82291666666667" calcext:value-type="float">
            <text:p>0,00182291666666667000</text:p>
          </table:table-cell>
          <table:table-cell table:formula="of:=[.D317]-[.D31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50" office:value-type="float" office:value="15800" calcext:value-type="float">
            <text:p>15800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8287037037037" calcext:value-type="float">
            <text:p>0,00182870370370370000</text:p>
          </table:table-cell>
          <table:table-cell table:formula="of:=[.D318]-[.D31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50" office:value-type="float" office:value="15850" calcext:value-type="float">
            <text:p>15850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83449074074074" calcext:value-type="float">
            <text:p>0,00183449074074074000</text:p>
          </table:table-cell>
          <table:table-cell table:formula="of:=[.D319]-[.D31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50" office:value-type="float" office:value="15900" calcext:value-type="float">
            <text:p>15900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84027777777778" calcext:value-type="float">
            <text:p>0,00184027777777778000</text:p>
          </table:table-cell>
          <table:table-cell table:formula="of:=[.D320]-[.D319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50" office:value-type="float" office:value="15950" calcext:value-type="float">
            <text:p>15950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84606481481482" calcext:value-type="float">
            <text:p>0,00184606481481482000</text:p>
          </table:table-cell>
          <table:table-cell table:formula="of:=[.D321]-[.D32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50" office:value-type="float" office:value="16000" calcext:value-type="float">
            <text:p>1600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85185185185185" calcext:value-type="float">
            <text:p>0,00185185185185185000</text:p>
          </table:table-cell>
          <table:table-cell table:formula="of:=[.D322]-[.D32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50" office:value-type="float" office:value="16050" calcext:value-type="float">
            <text:p>16050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85763888888889" calcext:value-type="float">
            <text:p>0,00185763888888889000</text:p>
          </table:table-cell>
          <table:table-cell table:formula="of:=[.D323]-[.D322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50" office:value-type="float" office:value="16100" calcext:value-type="float">
            <text:p>16100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86342592592593" calcext:value-type="float">
            <text:p>0,00186342592592593000</text:p>
          </table:table-cell>
          <table:table-cell table:formula="of:=[.D324]-[.D32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50" office:value-type="float" office:value="16150" calcext:value-type="float">
            <text:p>16150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86921296296296" calcext:value-type="float">
            <text:p>0,00186921296296296000</text:p>
          </table:table-cell>
          <table:table-cell table:formula="of:=[.D325]-[.D32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50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875" calcext:value-type="float">
            <text:p>0,00187500000000000000</text:p>
          </table:table-cell>
          <table:table-cell table:formula="of:=[.D326]-[.D32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50" office:value-type="float" office:value="16250" calcext:value-type="float">
            <text:p>1625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88078703703704" calcext:value-type="float">
            <text:p>0,00188078703703704000</text:p>
          </table:table-cell>
          <table:table-cell table:formula="of:=[.D327]-[.D326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50" office:value-type="float" office:value="16300" calcext:value-type="float">
            <text:p>16300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88657407407407" calcext:value-type="float">
            <text:p>0,00188657407407407000</text:p>
          </table:table-cell>
          <table:table-cell table:formula="of:=[.D328]-[.D32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50" office:value-type="float" office:value="16350" calcext:value-type="float">
            <text:p>16350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89236111111111" calcext:value-type="float">
            <text:p>0,00189236111111111000</text:p>
          </table:table-cell>
          <table:table-cell table:formula="of:=[.D329]-[.D32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50" office:value-type="float" office:value="16400" calcext:value-type="float">
            <text:p>16400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89814814814815" calcext:value-type="float">
            <text:p>0,00189814814814815000</text:p>
          </table:table-cell>
          <table:table-cell table:formula="of:=[.D330]-[.D329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50" office:value-type="float" office:value="16450" calcext:value-type="float">
            <text:p>16450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90393518518519" calcext:value-type="float">
            <text:p>0,00190393518518519000</text:p>
          </table:table-cell>
          <table:table-cell table:formula="of:=[.D331]-[.D330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50" office:value-type="float" office:value="16500" calcext:value-type="float">
            <text:p>1650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90972222222222" calcext:value-type="float">
            <text:p>0,00190972222222222000</text:p>
          </table:table-cell>
          <table:table-cell table:formula="of:=[.D332]-[.D331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50" office:value-type="float" office:value="16550" calcext:value-type="float">
            <text:p>16550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91550925925926" calcext:value-type="float">
            <text:p>0,00191550925925926000</text:p>
          </table:table-cell>
          <table:table-cell table:formula="of:=[.D333]-[.D332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50" office:value-type="float" office:value="16600" calcext:value-type="float">
            <text:p>16600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9212962962963" calcext:value-type="float">
            <text:p>0,00192129629629630000</text:p>
          </table:table-cell>
          <table:table-cell table:formula="of:=[.D334]-[.D333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50" office:value-type="float" office:value="16650" calcext:value-type="float">
            <text:p>16650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92708333333333" calcext:value-type="float">
            <text:p>0,00192708333333333000</text:p>
          </table:table-cell>
          <table:table-cell table:formula="of:=[.D335]-[.D334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50" office:value-type="float" office:value="16700" calcext:value-type="float">
            <text:p>16700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93287037037037" calcext:value-type="float">
            <text:p>0,00193287037037037000</text:p>
          </table:table-cell>
          <table:table-cell table:formula="of:=[.D336]-[.D335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50" office:value-type="float" office:value="16750" calcext:value-type="float">
            <text:p>1675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93865740740741" calcext:value-type="float">
            <text:p>0,00193865740740741000</text:p>
          </table:table-cell>
          <table:table-cell table:formula="of:=[.D337]-[.D336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50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94444444444444" calcext:value-type="float">
            <text:p>0,00194444444444444000</text:p>
          </table:table-cell>
          <table:table-cell table:formula="of:=[.D338]-[.D337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50" office:value-type="float" office:value="16850" calcext:value-type="float">
            <text:p>16850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95023148148148" calcext:value-type="float">
            <text:p>0,00195023148148148000</text:p>
          </table:table-cell>
          <table:table-cell table:formula="of:=[.D339]-[.D338]" office:value-type="float" office:value="0.000005787037037037" calcext:value-type="float">
            <text:p>0,0000057870370370370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50" office:value-type="float" office:value="16900" calcext:value-type="float">
            <text:p>16900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95601851851852" calcext:value-type="float">
            <text:p>0,00195601851851852000</text:p>
          </table:table-cell>
          <table:table-cell table:formula="of:=[.D340]-[.D339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50" office:value-type="float" office:value="16950" calcext:value-type="float">
            <text:p>16950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96180555555556" calcext:value-type="float">
            <text:p>0,00196180555555556000</text:p>
          </table:table-cell>
          <table:table-cell table:formula="of:=[.D341]-[.D340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50" office:value-type="float" office:value="17000" calcext:value-type="float">
            <text:p>1700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96759259259259" calcext:value-type="float">
            <text:p>0,00196759259259259000</text:p>
          </table:table-cell>
          <table:table-cell table:formula="of:=[.D342]-[.D341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50" office:value-type="float" office:value="17050" calcext:value-type="float">
            <text:p>17050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97337962962963" calcext:value-type="float">
            <text:p>0,00197337962962963000</text:p>
          </table:table-cell>
          <table:table-cell table:formula="of:=[.D343]-[.D342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50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97916666666667" calcext:value-type="float">
            <text:p>0,00197916666666667000</text:p>
          </table:table-cell>
          <table:table-cell table:formula="of:=[.D344]-[.D343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50" office:value-type="float" office:value="17150" calcext:value-type="float">
            <text:p>17150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9849537037037" calcext:value-type="float">
            <text:p>0,00198495370370370000</text:p>
          </table:table-cell>
          <table:table-cell table:formula="of:=[.D345]-[.D344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50" office:value-type="float" office:value="17200" calcext:value-type="float">
            <text:p>17200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99074074074074" calcext:value-type="float">
            <text:p>0,00199074074074074000</text:p>
          </table:table-cell>
          <table:table-cell table:formula="of:=[.D346]-[.D345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50" office:value-type="float" office:value="17250" calcext:value-type="float">
            <text:p>1725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99652777777778" calcext:value-type="float">
            <text:p>0,00199652777777778000</text:p>
          </table:table-cell>
          <table:table-cell table:formula="of:=[.D347]-[.D346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50" office:value-type="float" office:value="17300" calcext:value-type="float">
            <text:p>17300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00231481481482" calcext:value-type="float">
            <text:p>0,00200231481481482000</text:p>
          </table:table-cell>
          <table:table-cell table:formula="of:=[.D348]-[.D347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50" office:value-type="float" office:value="17350" calcext:value-type="float">
            <text:p>17350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00810185185185" calcext:value-type="float">
            <text:p>0,00200810185185185000</text:p>
          </table:table-cell>
          <table:table-cell table:formula="of:=[.D349]-[.D348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50" office:value-type="float" office:value="17400" calcext:value-type="float">
            <text:p>17400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201388888888889" calcext:value-type="float">
            <text:p>0,00201388888888889000</text:p>
          </table:table-cell>
          <table:table-cell table:formula="of:=[.D350]-[.D349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50" office:value-type="float" office:value="17450" calcext:value-type="float">
            <text:p>17450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201967592592593" calcext:value-type="float">
            <text:p>0,00201967592592593000</text:p>
          </table:table-cell>
          <table:table-cell table:formula="of:=[.D351]-[.D350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50" office:value-type="float" office:value="17500" calcext:value-type="float">
            <text:p>175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202546296296296" calcext:value-type="float">
            <text:p>0,00202546296296296000</text:p>
          </table:table-cell>
          <table:table-cell table:formula="of:=[.D352]-[.D351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50" office:value-type="float" office:value="17550" calcext:value-type="float">
            <text:p>17550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203125" calcext:value-type="float">
            <text:p>0,00203125000000000000</text:p>
          </table:table-cell>
          <table:table-cell table:formula="of:=[.D353]-[.D352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50" office:value-type="float" office:value="17600" calcext:value-type="float">
            <text:p>17600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203703703703704" calcext:value-type="float">
            <text:p>0,00203703703703704000</text:p>
          </table:table-cell>
          <table:table-cell table:formula="of:=[.D354]-[.D353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50" office:value-type="float" office:value="17650" calcext:value-type="float">
            <text:p>17650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204282407407407" calcext:value-type="float">
            <text:p>0,00204282407407407000</text:p>
          </table:table-cell>
          <table:table-cell table:formula="of:=[.D355]-[.D354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50" office:value-type="float" office:value="17700" calcext:value-type="float">
            <text:p>17700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204861111111111" calcext:value-type="float">
            <text:p>0,00204861111111111000</text:p>
          </table:table-cell>
          <table:table-cell table:formula="of:=[.D356]-[.D355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50" office:value-type="float" office:value="17750" calcext:value-type="float">
            <text:p>1775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205439814814815" calcext:value-type="float">
            <text:p>0,00205439814814815000</text:p>
          </table:table-cell>
          <table:table-cell table:formula="of:=[.D357]-[.D356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50" office:value-type="float" office:value="17800" calcext:value-type="float">
            <text:p>17800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206018518518519" calcext:value-type="float">
            <text:p>0,00206018518518519000</text:p>
          </table:table-cell>
          <table:table-cell table:formula="of:=[.D358]-[.D357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50" office:value-type="float" office:value="17850" calcext:value-type="float">
            <text:p>17850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206597222222222" calcext:value-type="float">
            <text:p>0,00206597222222222000</text:p>
          </table:table-cell>
          <table:table-cell table:formula="of:=[.D359]-[.D358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50" office:value-type="float" office:value="17900" calcext:value-type="float">
            <text:p>17900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207175925925926" calcext:value-type="float">
            <text:p>0,00207175925925926000</text:p>
          </table:table-cell>
          <table:table-cell table:formula="of:=[.D360]-[.D359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50" office:value-type="float" office:value="17950" calcext:value-type="float">
            <text:p>17950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20775462962963" calcext:value-type="float">
            <text:p>0,00207754629629630000</text:p>
          </table:table-cell>
          <table:table-cell table:formula="of:=[.D361]-[.D360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50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208333333333333" calcext:value-type="float">
            <text:p>0,00208333333333333000</text:p>
          </table:table-cell>
          <table:table-cell table:formula="of:=[.D362]-[.D361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50" office:value-type="float" office:value="18050" calcext:value-type="float">
            <text:p>18050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208912037037037" calcext:value-type="float">
            <text:p>0,00208912037037037000</text:p>
          </table:table-cell>
          <table:table-cell table:formula="of:=[.D363]-[.D362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50" office:value-type="float" office:value="18100" calcext:value-type="float">
            <text:p>18100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209490740740741" calcext:value-type="float">
            <text:p>0,00209490740740741000</text:p>
          </table:table-cell>
          <table:table-cell table:formula="of:=[.D364]-[.D363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50" office:value-type="float" office:value="18150" calcext:value-type="float">
            <text:p>18150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210069444444444" calcext:value-type="float">
            <text:p>0,00210069444444444000</text:p>
          </table:table-cell>
          <table:table-cell table:formula="of:=[.D365]-[.D364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50" office:value-type="float" office:value="18200" calcext:value-type="float">
            <text:p>18200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210648148148148" calcext:value-type="float">
            <text:p>0,00210648148148148000</text:p>
          </table:table-cell>
          <table:table-cell table:formula="of:=[.D366]-[.D365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50" office:value-type="float" office:value="18250" calcext:value-type="float">
            <text:p>1825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211226851851852" calcext:value-type="float">
            <text:p>0,00211226851851852000</text:p>
          </table:table-cell>
          <table:table-cell table:formula="of:=[.D367]-[.D366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50" office:value-type="float" office:value="18300" calcext:value-type="float">
            <text:p>18300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211805555555556" calcext:value-type="float">
            <text:p>0,00211805555555556000</text:p>
          </table:table-cell>
          <table:table-cell table:formula="of:=[.D368]-[.D367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50" office:value-type="float" office:value="18350" calcext:value-type="float">
            <text:p>18350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212384259259259" calcext:value-type="float">
            <text:p>0,00212384259259259000</text:p>
          </table:table-cell>
          <table:table-cell table:formula="of:=[.D369]-[.D368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50" office:value-type="float" office:value="18400" calcext:value-type="float">
            <text:p>18400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212962962962963" calcext:value-type="float">
            <text:p>0,00212962962962963000</text:p>
          </table:table-cell>
          <table:table-cell table:formula="of:=[.D370]-[.D369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50" office:value-type="float" office:value="18450" calcext:value-type="float">
            <text:p>18450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213541666666667" calcext:value-type="float">
            <text:p>0,00213541666666667000</text:p>
          </table:table-cell>
          <table:table-cell table:formula="of:=[.D371]-[.D370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50" office:value-type="float" office:value="18500" calcext:value-type="float">
            <text:p>1850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21412037037037" calcext:value-type="float">
            <text:p>0,00214120370370370000</text:p>
          </table:table-cell>
          <table:table-cell table:formula="of:=[.D372]-[.D371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50" office:value-type="float" office:value="18550" calcext:value-type="float">
            <text:p>18550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214699074074074" calcext:value-type="float">
            <text:p>0,00214699074074074000</text:p>
          </table:table-cell>
          <table:table-cell table:formula="of:=[.D373]-[.D372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50" office:value-type="float" office:value="18600" calcext:value-type="float">
            <text:p>18600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215277777777778" calcext:value-type="float">
            <text:p>0,00215277777777778000</text:p>
          </table:table-cell>
          <table:table-cell table:formula="of:=[.D374]-[.D373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50" office:value-type="float" office:value="18650" calcext:value-type="float">
            <text:p>18650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215856481481482" calcext:value-type="float">
            <text:p>0,00215856481481482000</text:p>
          </table:table-cell>
          <table:table-cell table:formula="of:=[.D375]-[.D374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50" office:value-type="float" office:value="18700" calcext:value-type="float">
            <text:p>18700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216435185185185" calcext:value-type="float">
            <text:p>0,00216435185185185000</text:p>
          </table:table-cell>
          <table:table-cell table:formula="of:=[.D376]-[.D375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50" office:value-type="float" office:value="18750" calcext:value-type="float">
            <text:p>1875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217013888888889" calcext:value-type="float">
            <text:p>0,00217013888888889000</text:p>
          </table:table-cell>
          <table:table-cell table:formula="of:=[.D377]-[.D376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50" office:value-type="float" office:value="18800" calcext:value-type="float">
            <text:p>18800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217592592592593" calcext:value-type="float">
            <text:p>0,00217592592592593000</text:p>
          </table:table-cell>
          <table:table-cell table:formula="of:=[.D378]-[.D377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50" office:value-type="float" office:value="18850" calcext:value-type="float">
            <text:p>18850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218171296296296" calcext:value-type="float">
            <text:p>0,00218171296296296000</text:p>
          </table:table-cell>
          <table:table-cell table:formula="of:=[.D379]-[.D378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50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21875" calcext:value-type="float">
            <text:p>0,00218750000000000000</text:p>
          </table:table-cell>
          <table:table-cell table:formula="of:=[.D380]-[.D379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50" office:value-type="float" office:value="18950" calcext:value-type="float">
            <text:p>18950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219328703703704" calcext:value-type="float">
            <text:p>0,00219328703703704000</text:p>
          </table:table-cell>
          <table:table-cell table:formula="of:=[.D381]-[.D380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50" office:value-type="float" office:value="19000" calcext:value-type="float">
            <text:p>1900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219907407407407" calcext:value-type="float">
            <text:p>0,00219907407407407000</text:p>
          </table:table-cell>
          <table:table-cell table:formula="of:=[.D382]-[.D381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50" office:value-type="float" office:value="19050" calcext:value-type="float">
            <text:p>19050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220486111111111" calcext:value-type="float">
            <text:p>0,00220486111111111000</text:p>
          </table:table-cell>
          <table:table-cell table:formula="of:=[.D383]-[.D382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50" office:value-type="float" office:value="19100" calcext:value-type="float">
            <text:p>19100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221064814814815" calcext:value-type="float">
            <text:p>0,00221064814814815000</text:p>
          </table:table-cell>
          <table:table-cell table:formula="of:=[.D384]-[.D383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50" office:value-type="float" office:value="19150" calcext:value-type="float">
            <text:p>19150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221643518518519" calcext:value-type="float">
            <text:p>0,00221643518518519000</text:p>
          </table:table-cell>
          <table:table-cell table:formula="of:=[.D385]-[.D384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50" office:value-type="float" office:value="19200" calcext:value-type="float">
            <text:p>19200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222222222222222" calcext:value-type="float">
            <text:p>0,00222222222222222000</text:p>
          </table:table-cell>
          <table:table-cell table:formula="of:=[.D386]-[.D385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50" office:value-type="float" office:value="19250" calcext:value-type="float">
            <text:p>1925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222800925925926" calcext:value-type="float">
            <text:p>0,00222800925925926000</text:p>
          </table:table-cell>
          <table:table-cell table:formula="of:=[.D387]-[.D386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50" office:value-type="float" office:value="19300" calcext:value-type="float">
            <text:p>19300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22337962962963" calcext:value-type="float">
            <text:p>0,00223379629629630000</text:p>
          </table:table-cell>
          <table:table-cell table:formula="of:=[.D388]-[.D387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50" office:value-type="float" office:value="19350" calcext:value-type="float">
            <text:p>19350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223958333333333" calcext:value-type="float">
            <text:p>0,00223958333333333000</text:p>
          </table:table-cell>
          <table:table-cell table:formula="of:=[.D389]-[.D388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50" office:value-type="float" office:value="19400" calcext:value-type="float">
            <text:p>19400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224537037037037" calcext:value-type="float">
            <text:p>0,00224537037037037000</text:p>
          </table:table-cell>
          <table:table-cell table:formula="of:=[.D390]-[.D389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50" office:value-type="float" office:value="19450" calcext:value-type="float">
            <text:p>19450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225115740740741" calcext:value-type="float">
            <text:p>0,00225115740740741000</text:p>
          </table:table-cell>
          <table:table-cell table:formula="of:=[.D391]-[.D390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50" office:value-type="float" office:value="19500" calcext:value-type="float">
            <text:p>1950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225694444444444" calcext:value-type="float">
            <text:p>0,00225694444444444000</text:p>
          </table:table-cell>
          <table:table-cell table:formula="of:=[.D392]-[.D391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50" office:value-type="float" office:value="19550" calcext:value-type="float">
            <text:p>19550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226273148148148" calcext:value-type="float">
            <text:p>0,00226273148148148000</text:p>
          </table:table-cell>
          <table:table-cell table:formula="of:=[.D393]-[.D392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50" office:value-type="float" office:value="19600" calcext:value-type="float">
            <text:p>19600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226851851851852" calcext:value-type="float">
            <text:p>0,00226851851851852000</text:p>
          </table:table-cell>
          <table:table-cell table:formula="of:=[.D394]-[.D393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50" office:value-type="float" office:value="19650" calcext:value-type="float">
            <text:p>19650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227430555555556" calcext:value-type="float">
            <text:p>0,00227430555555556000</text:p>
          </table:table-cell>
          <table:table-cell table:formula="of:=[.D395]-[.D394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50" office:value-type="float" office:value="19700" calcext:value-type="float">
            <text:p>19700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228009259259259" calcext:value-type="float">
            <text:p>0,00228009259259259000</text:p>
          </table:table-cell>
          <table:table-cell table:formula="of:=[.D396]-[.D395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50" office:value-type="float" office:value="19750" calcext:value-type="float">
            <text:p>1975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228587962962963" calcext:value-type="float">
            <text:p>0,00228587962962963000</text:p>
          </table:table-cell>
          <table:table-cell table:formula="of:=[.D397]-[.D396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50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229166666666667" calcext:value-type="float">
            <text:p>0,00229166666666667000</text:p>
          </table:table-cell>
          <table:table-cell table:formula="of:=[.D398]-[.D397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50" office:value-type="float" office:value="19850" calcext:value-type="float">
            <text:p>19850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22974537037037" calcext:value-type="float">
            <text:p>0,00229745370370370000</text:p>
          </table:table-cell>
          <table:table-cell table:formula="of:=[.D399]-[.D398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50" office:value-type="float" office:value="19900" calcext:value-type="float">
            <text:p>19900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230324074074074" calcext:value-type="float">
            <text:p>0,00230324074074074000</text:p>
          </table:table-cell>
          <table:table-cell table:formula="of:=[.D400]-[.D399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50" office:value-type="float" office:value="19950" calcext:value-type="float">
            <text:p>19950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230902777777778" calcext:value-type="float">
            <text:p>0,00230902777777778000</text:p>
          </table:table-cell>
          <table:table-cell table:formula="of:=[.D401]-[.D400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50" office:value-type="float" office:value="20000" calcext:value-type="float">
            <text:p>200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231481481481481" calcext:value-type="float">
            <text:p>0,00231481481481481000</text:p>
          </table:table-cell>
          <table:table-cell table:formula="of:=[.D402]-[.D401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50" office:value-type="float" office:value="20050" calcext:value-type="float">
            <text:p>20050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232060185185185" calcext:value-type="float">
            <text:p>0,00232060185185185000</text:p>
          </table:table-cell>
          <table:table-cell table:formula="of:=[.D403]-[.D402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50" office:value-type="float" office:value="20100" calcext:value-type="float">
            <text:p>20100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232638888888889" calcext:value-type="float">
            <text:p>0,00232638888888889000</text:p>
          </table:table-cell>
          <table:table-cell table:formula="of:=[.D404]-[.D403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50" office:value-type="float" office:value="20150" calcext:value-type="float">
            <text:p>20150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233217592592593" calcext:value-type="float">
            <text:p>0,00233217592592593000</text:p>
          </table:table-cell>
          <table:table-cell table:formula="of:=[.D405]-[.D404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50" office:value-type="float" office:value="20200" calcext:value-type="float">
            <text:p>20200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233796296296296" calcext:value-type="float">
            <text:p>0,00233796296296296000</text:p>
          </table:table-cell>
          <table:table-cell table:formula="of:=[.D406]-[.D405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50" office:value-type="float" office:value="20250" calcext:value-type="float">
            <text:p>2025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234375" calcext:value-type="float">
            <text:p>0,00234375000000000000</text:p>
          </table:table-cell>
          <table:table-cell table:formula="of:=[.D407]-[.D406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50" office:value-type="float" office:value="20300" calcext:value-type="float">
            <text:p>20300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234953703703704" calcext:value-type="float">
            <text:p>0,00234953703703704000</text:p>
          </table:table-cell>
          <table:table-cell table:formula="of:=[.D408]-[.D407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50" office:value-type="float" office:value="20350" calcext:value-type="float">
            <text:p>20350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235532407407407" calcext:value-type="float">
            <text:p>0,00235532407407407000</text:p>
          </table:table-cell>
          <table:table-cell table:formula="of:=[.D409]-[.D408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50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236111111111111" calcext:value-type="float">
            <text:p>0,00236111111111111000</text:p>
          </table:table-cell>
          <table:table-cell table:formula="of:=[.D410]-[.D409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50" office:value-type="float" office:value="20450" calcext:value-type="float">
            <text:p>20450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236689814814815" calcext:value-type="float">
            <text:p>0,00236689814814815000</text:p>
          </table:table-cell>
          <table:table-cell table:formula="of:=[.D411]-[.D410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50" office:value-type="float" office:value="20500" calcext:value-type="float">
            <text:p>2050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237268518518519" calcext:value-type="float">
            <text:p>0,00237268518518519000</text:p>
          </table:table-cell>
          <table:table-cell table:formula="of:=[.D412]-[.D411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50" office:value-type="float" office:value="20550" calcext:value-type="float">
            <text:p>20550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237847222222222" calcext:value-type="float">
            <text:p>0,00237847222222222000</text:p>
          </table:table-cell>
          <table:table-cell table:formula="of:=[.D413]-[.D412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50" office:value-type="float" office:value="20600" calcext:value-type="float">
            <text:p>20600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238425925925926" calcext:value-type="float">
            <text:p>0,00238425925925926000</text:p>
          </table:table-cell>
          <table:table-cell table:formula="of:=[.D414]-[.D413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50" office:value-type="float" office:value="20650" calcext:value-type="float">
            <text:p>20650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23900462962963" calcext:value-type="float">
            <text:p>0,00239004629629630000</text:p>
          </table:table-cell>
          <table:table-cell table:formula="of:=[.D415]-[.D414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50" office:value-type="float" office:value="20700" calcext:value-type="float">
            <text:p>20700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239583333333333" calcext:value-type="float">
            <text:p>0,00239583333333333000</text:p>
          </table:table-cell>
          <table:table-cell table:formula="of:=[.D416]-[.D415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50" office:value-type="float" office:value="20750" calcext:value-type="float">
            <text:p>2075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240162037037037" calcext:value-type="float">
            <text:p>0,00240162037037037000</text:p>
          </table:table-cell>
          <table:table-cell table:formula="of:=[.D417]-[.D416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50" office:value-type="float" office:value="20800" calcext:value-type="float">
            <text:p>20800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240740740740741" calcext:value-type="float">
            <text:p>0,00240740740740741000</text:p>
          </table:table-cell>
          <table:table-cell table:formula="of:=[.D418]-[.D417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50" office:value-type="float" office:value="20850" calcext:value-type="float">
            <text:p>20850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241319444444444" calcext:value-type="float">
            <text:p>0,00241319444444444000</text:p>
          </table:table-cell>
          <table:table-cell table:formula="of:=[.D419]-[.D418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50" office:value-type="float" office:value="20900" calcext:value-type="float">
            <text:p>20900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241898148148148" calcext:value-type="float">
            <text:p>0,00241898148148148000</text:p>
          </table:table-cell>
          <table:table-cell table:formula="of:=[.D420]-[.D419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50" office:value-type="float" office:value="20950" calcext:value-type="float">
            <text:p>20950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242476851851852" calcext:value-type="float">
            <text:p>0,00242476851851852000</text:p>
          </table:table-cell>
          <table:table-cell table:formula="of:=[.D421]-[.D420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50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243055555555556" calcext:value-type="float">
            <text:p>0,00243055555555556000</text:p>
          </table:table-cell>
          <table:table-cell table:formula="of:=[.D422]-[.D421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50" office:value-type="float" office:value="21050" calcext:value-type="float">
            <text:p>21050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243634259259259" calcext:value-type="float">
            <text:p>0,00243634259259259000</text:p>
          </table:table-cell>
          <table:table-cell table:formula="of:=[.D423]-[.D422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50" office:value-type="float" office:value="21100" calcext:value-type="float">
            <text:p>21100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244212962962963" calcext:value-type="float">
            <text:p>0,00244212962962963000</text:p>
          </table:table-cell>
          <table:table-cell table:formula="of:=[.D424]-[.D423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50" office:value-type="float" office:value="21150" calcext:value-type="float">
            <text:p>21150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244791666666667" calcext:value-type="float">
            <text:p>0,00244791666666667000</text:p>
          </table:table-cell>
          <table:table-cell table:formula="of:=[.D425]-[.D424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50" office:value-type="float" office:value="21200" calcext:value-type="float">
            <text:p>21200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24537037037037" calcext:value-type="float">
            <text:p>0,00245370370370370000</text:p>
          </table:table-cell>
          <table:table-cell table:formula="of:=[.D426]-[.D425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50" office:value-type="float" office:value="21250" calcext:value-type="float">
            <text:p>2125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245949074074074" calcext:value-type="float">
            <text:p>0,00245949074074074000</text:p>
          </table:table-cell>
          <table:table-cell table:formula="of:=[.D427]-[.D426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50" office:value-type="float" office:value="21300" calcext:value-type="float">
            <text:p>21300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246527777777778" calcext:value-type="float">
            <text:p>0,00246527777777778000</text:p>
          </table:table-cell>
          <table:table-cell table:formula="of:=[.D428]-[.D427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50" office:value-type="float" office:value="21350" calcext:value-type="float">
            <text:p>21350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247106481481482" calcext:value-type="float">
            <text:p>0,00247106481481482000</text:p>
          </table:table-cell>
          <table:table-cell table:formula="of:=[.D429]-[.D428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50" office:value-type="float" office:value="21400" calcext:value-type="float">
            <text:p>21400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247685185185185" calcext:value-type="float">
            <text:p>0,00247685185185185000</text:p>
          </table:table-cell>
          <table:table-cell table:formula="of:=[.D430]-[.D429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50" office:value-type="float" office:value="21450" calcext:value-type="float">
            <text:p>21450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248263888888889" calcext:value-type="float">
            <text:p>0,00248263888888889000</text:p>
          </table:table-cell>
          <table:table-cell table:formula="of:=[.D431]-[.D430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50" office:value-type="float" office:value="21500" calcext:value-type="float">
            <text:p>2150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248842592592593" calcext:value-type="float">
            <text:p>0,00248842592592593000</text:p>
          </table:table-cell>
          <table:table-cell table:formula="of:=[.D432]-[.D431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50" office:value-type="float" office:value="21550" calcext:value-type="float">
            <text:p>21550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249421296296296" calcext:value-type="float">
            <text:p>0,00249421296296296000</text:p>
          </table:table-cell>
          <table:table-cell table:formula="of:=[.D433]-[.D432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50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25" calcext:value-type="float">
            <text:p>0,00250000000000000000</text:p>
          </table:table-cell>
          <table:table-cell table:formula="of:=[.D434]-[.D433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50" office:value-type="float" office:value="21650" calcext:value-type="float">
            <text:p>21650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250578703703704" calcext:value-type="float">
            <text:p>0,00250578703703704000</text:p>
          </table:table-cell>
          <table:table-cell table:formula="of:=[.D435]-[.D434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50" office:value-type="float" office:value="21700" calcext:value-type="float">
            <text:p>21700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251157407407407" calcext:value-type="float">
            <text:p>0,00251157407407407000</text:p>
          </table:table-cell>
          <table:table-cell table:formula="of:=[.D436]-[.D435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50" office:value-type="float" office:value="21750" calcext:value-type="float">
            <text:p>2175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251736111111111" calcext:value-type="float">
            <text:p>0,00251736111111111000</text:p>
          </table:table-cell>
          <table:table-cell table:formula="of:=[.D437]-[.D436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50" office:value-type="float" office:value="21800" calcext:value-type="float">
            <text:p>21800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252314814814815" calcext:value-type="float">
            <text:p>0,00252314814814815000</text:p>
          </table:table-cell>
          <table:table-cell table:formula="of:=[.D438]-[.D437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50" office:value-type="float" office:value="21850" calcext:value-type="float">
            <text:p>21850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252893518518519" calcext:value-type="float">
            <text:p>0,00252893518518519000</text:p>
          </table:table-cell>
          <table:table-cell table:formula="of:=[.D439]-[.D438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50" office:value-type="float" office:value="21900" calcext:value-type="float">
            <text:p>21900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253472222222222" calcext:value-type="float">
            <text:p>0,00253472222222222000</text:p>
          </table:table-cell>
          <table:table-cell table:formula="of:=[.D440]-[.D439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50" office:value-type="float" office:value="21950" calcext:value-type="float">
            <text:p>21950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254050925925926" calcext:value-type="float">
            <text:p>0,00254050925925926000</text:p>
          </table:table-cell>
          <table:table-cell table:formula="of:=[.D441]-[.D440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50" office:value-type="float" office:value="22000" calcext:value-type="float">
            <text:p>2200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25462962962963" calcext:value-type="float">
            <text:p>0,00254629629629630000</text:p>
          </table:table-cell>
          <table:table-cell table:formula="of:=[.D442]-[.D441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50" office:value-type="float" office:value="22050" calcext:value-type="float">
            <text:p>22050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255208333333333" calcext:value-type="float">
            <text:p>0,00255208333333333000</text:p>
          </table:table-cell>
          <table:table-cell table:formula="of:=[.D443]-[.D442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50" office:value-type="float" office:value="22100" calcext:value-type="float">
            <text:p>22100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255787037037037" calcext:value-type="float">
            <text:p>0,00255787037037037000</text:p>
          </table:table-cell>
          <table:table-cell table:formula="of:=[.D444]-[.D443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50" office:value-type="float" office:value="22150" calcext:value-type="float">
            <text:p>22150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256365740740741" calcext:value-type="float">
            <text:p>0,00256365740740741000</text:p>
          </table:table-cell>
          <table:table-cell table:formula="of:=[.D445]-[.D444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50" office:value-type="float" office:value="22200" calcext:value-type="float">
            <text:p>22200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256944444444444" calcext:value-type="float">
            <text:p>0,00256944444444444000</text:p>
          </table:table-cell>
          <table:table-cell table:formula="of:=[.D446]-[.D445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50" office:value-type="float" office:value="22250" calcext:value-type="float">
            <text:p>2225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257523148148148" calcext:value-type="float">
            <text:p>0,00257523148148148000</text:p>
          </table:table-cell>
          <table:table-cell table:formula="of:=[.D447]-[.D446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50" office:value-type="float" office:value="22300" calcext:value-type="float">
            <text:p>22300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258101851851852" calcext:value-type="float">
            <text:p>0,00258101851851852000</text:p>
          </table:table-cell>
          <table:table-cell table:formula="of:=[.D448]-[.D447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50" office:value-type="float" office:value="22350" calcext:value-type="float">
            <text:p>22350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258680555555556" calcext:value-type="float">
            <text:p>0,00258680555555556000</text:p>
          </table:table-cell>
          <table:table-cell table:formula="of:=[.D449]-[.D448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50" office:value-type="float" office:value="22400" calcext:value-type="float">
            <text:p>22400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259259259259259" calcext:value-type="float">
            <text:p>0,00259259259259259000</text:p>
          </table:table-cell>
          <table:table-cell table:formula="of:=[.D450]-[.D449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50" office:value-type="float" office:value="22450" calcext:value-type="float">
            <text:p>22450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259837962962963" calcext:value-type="float">
            <text:p>0,00259837962962963000</text:p>
          </table:table-cell>
          <table:table-cell table:formula="of:=[.D451]-[.D450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50" office:value-type="float" office:value="22500" calcext:value-type="float">
            <text:p>225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260416666666667" calcext:value-type="float">
            <text:p>0,00260416666666667000</text:p>
          </table:table-cell>
          <table:table-cell table:formula="of:=[.D452]-[.D451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50" office:value-type="float" office:value="22550" calcext:value-type="float">
            <text:p>22550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26099537037037" calcext:value-type="float">
            <text:p>0,00260995370370370000</text:p>
          </table:table-cell>
          <table:table-cell table:formula="of:=[.D453]-[.D452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50" office:value-type="float" office:value="22600" calcext:value-type="float">
            <text:p>22600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261574074074074" calcext:value-type="float">
            <text:p>0,00261574074074074000</text:p>
          </table:table-cell>
          <table:table-cell table:formula="of:=[.D454]-[.D453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50" office:value-type="float" office:value="22650" calcext:value-type="float">
            <text:p>22650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262152777777778" calcext:value-type="float">
            <text:p>0,00262152777777778000</text:p>
          </table:table-cell>
          <table:table-cell table:formula="of:=[.D455]-[.D454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50" office:value-type="float" office:value="22700" calcext:value-type="float">
            <text:p>22700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262731481481482" calcext:value-type="float">
            <text:p>0,00262731481481482000</text:p>
          </table:table-cell>
          <table:table-cell table:formula="of:=[.D456]-[.D455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50" office:value-type="float" office:value="22750" calcext:value-type="float">
            <text:p>2275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263310185185185" calcext:value-type="float">
            <text:p>0,00263310185185185000</text:p>
          </table:table-cell>
          <table:table-cell table:formula="of:=[.D457]-[.D456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50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263888888888889" calcext:value-type="float">
            <text:p>0,00263888888888889000</text:p>
          </table:table-cell>
          <table:table-cell table:formula="of:=[.D458]-[.D457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50" office:value-type="float" office:value="22850" calcext:value-type="float">
            <text:p>22850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264467592592593" calcext:value-type="float">
            <text:p>0,00264467592592593000</text:p>
          </table:table-cell>
          <table:table-cell table:formula="of:=[.D459]-[.D458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50" office:value-type="float" office:value="22900" calcext:value-type="float">
            <text:p>22900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265046296296296" calcext:value-type="float">
            <text:p>0,00265046296296296000</text:p>
          </table:table-cell>
          <table:table-cell table:formula="of:=[.D460]-[.D459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50" office:value-type="float" office:value="22950" calcext:value-type="float">
            <text:p>22950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265625" calcext:value-type="float">
            <text:p>0,00265625000000000000</text:p>
          </table:table-cell>
          <table:table-cell table:formula="of:=[.D461]-[.D460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50" office:value-type="float" office:value="23000" calcext:value-type="float">
            <text:p>2300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266203703703704" calcext:value-type="float">
            <text:p>0,00266203703703704000</text:p>
          </table:table-cell>
          <table:table-cell table:formula="of:=[.D462]-[.D461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50" office:value-type="float" office:value="23050" calcext:value-type="float">
            <text:p>23050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266782407407407" calcext:value-type="float">
            <text:p>0,00266782407407407000</text:p>
          </table:table-cell>
          <table:table-cell table:formula="of:=[.D463]-[.D462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50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267361111111111" calcext:value-type="float">
            <text:p>0,00267361111111111000</text:p>
          </table:table-cell>
          <table:table-cell table:formula="of:=[.D464]-[.D463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50" office:value-type="float" office:value="23150" calcext:value-type="float">
            <text:p>23150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267939814814815" calcext:value-type="float">
            <text:p>0,00267939814814815000</text:p>
          </table:table-cell>
          <table:table-cell table:formula="of:=[.D465]-[.D464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50" office:value-type="float" office:value="23200" calcext:value-type="float">
            <text:p>23200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268518518518519" calcext:value-type="float">
            <text:p>0,00268518518518519000</text:p>
          </table:table-cell>
          <table:table-cell table:formula="of:=[.D466]-[.D465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50" office:value-type="float" office:value="23250" calcext:value-type="float">
            <text:p>2325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269097222222222" calcext:value-type="float">
            <text:p>0,00269097222222222000</text:p>
          </table:table-cell>
          <table:table-cell table:formula="of:=[.D467]-[.D466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50" office:value-type="float" office:value="23300" calcext:value-type="float">
            <text:p>23300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269675925925926" calcext:value-type="float">
            <text:p>0,00269675925925926000</text:p>
          </table:table-cell>
          <table:table-cell table:formula="of:=[.D468]-[.D467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50" office:value-type="float" office:value="23350" calcext:value-type="float">
            <text:p>23350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27025462962963" calcext:value-type="float">
            <text:p>0,00270254629629630000</text:p>
          </table:table-cell>
          <table:table-cell table:formula="of:=[.D469]-[.D468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50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270833333333333" calcext:value-type="float">
            <text:p>0,00270833333333333000</text:p>
          </table:table-cell>
          <table:table-cell table:formula="of:=[.D470]-[.D469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50" office:value-type="float" office:value="23450" calcext:value-type="float">
            <text:p>23450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271412037037037" calcext:value-type="float">
            <text:p>0,00271412037037037000</text:p>
          </table:table-cell>
          <table:table-cell table:formula="of:=[.D471]-[.D470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50" office:value-type="float" office:value="23500" calcext:value-type="float">
            <text:p>2350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271990740740741" calcext:value-type="float">
            <text:p>0,00271990740740741000</text:p>
          </table:table-cell>
          <table:table-cell table:formula="of:=[.D472]-[.D471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50" office:value-type="float" office:value="23550" calcext:value-type="float">
            <text:p>23550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272569444444444" calcext:value-type="float">
            <text:p>0,00272569444444444000</text:p>
          </table:table-cell>
          <table:table-cell table:formula="of:=[.D473]-[.D472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50" office:value-type="float" office:value="23600" calcext:value-type="float">
            <text:p>23600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273148148148148" calcext:value-type="float">
            <text:p>0,00273148148148148000</text:p>
          </table:table-cell>
          <table:table-cell table:formula="of:=[.D474]-[.D473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50" office:value-type="float" office:value="23650" calcext:value-type="float">
            <text:p>23650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273726851851852" calcext:value-type="float">
            <text:p>0,00273726851851852000</text:p>
          </table:table-cell>
          <table:table-cell table:formula="of:=[.D475]-[.D474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50" office:value-type="float" office:value="23700" calcext:value-type="float">
            <text:p>23700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274305555555556" calcext:value-type="float">
            <text:p>0,00274305555555556000</text:p>
          </table:table-cell>
          <table:table-cell table:formula="of:=[.D476]-[.D475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50" office:value-type="float" office:value="23750" calcext:value-type="float">
            <text:p>2375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274884259259259" calcext:value-type="float">
            <text:p>0,00274884259259259000</text:p>
          </table:table-cell>
          <table:table-cell table:formula="of:=[.D477]-[.D476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50" office:value-type="float" office:value="23800" calcext:value-type="float">
            <text:p>23800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275462962962963" calcext:value-type="float">
            <text:p>0,00275462962962963000</text:p>
          </table:table-cell>
          <table:table-cell table:formula="of:=[.D478]-[.D477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50" office:value-type="float" office:value="23850" calcext:value-type="float">
            <text:p>23850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276041666666667" calcext:value-type="float">
            <text:p>0,00276041666666667000</text:p>
          </table:table-cell>
          <table:table-cell table:formula="of:=[.D479]-[.D478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50" office:value-type="float" office:value="23900" calcext:value-type="float">
            <text:p>23900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27662037037037" calcext:value-type="float">
            <text:p>0,00276620370370370000</text:p>
          </table:table-cell>
          <table:table-cell table:formula="of:=[.D480]-[.D479]" office:value-type="float" office:value="0.00000578703703703679" calcext:value-type="float">
            <text:p>0,0000057870370370367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50" office:value-type="float" office:value="23950" calcext:value-type="float">
            <text:p>23950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277199074074074" calcext:value-type="float">
            <text:p>0,00277199074074074000</text:p>
          </table:table-cell>
          <table:table-cell table:formula="of:=[.D481]-[.D480]" office:value-type="float" office:value="0.00000578703703703722" calcext:value-type="float">
            <text:p>0,0000057870370370372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50" office:value-type="float" office:value="24000" calcext:value-type="float">
            <text:p>2400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277777777777778" calcext:value-type="float">
            <text:p>0,00277777777777778000</text:p>
          </table:table-cell>
          <table:table-cell table:formula="of:=#REF!-[.D481]" office:value-type="string" office:string-value="" calcext:value-type="error">
            <text:p>#REF!</text:p>
          </table:table-cell>
        </table:table-row>
        <table:table-row table:style-name="ro1" table:number-rows-repeated="104809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7:45:50.632181988</meta:creation-date>
    <dc:date>2026-05-17T17:45:58.584150129</dc:date>
    <meta:editing-duration>PT9S</meta:editing-duration>
    <meta:editing-cycles>1</meta:editing-cycles>
    <meta:document-statistic meta:table-count="1" meta:cell-count="2405" meta:object-count="0"/>
    <meta:generator>LibreOffice/24.2.7.2$Linux_X86_64 LibreOffice_project/420$Build-2</meta:generator>
  </office:meta>
</office:document-meta>
</file>