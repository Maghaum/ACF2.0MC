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74cm"/>
    </style:style>
    <style:style style:name="co4" style:family="table-column">
      <style:table-column-properties fo:break-before="auto" style:column-width="4.9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</style:style>
    <style:style style:name="T1" style:family="text">
      <style:text-properties fo:language="pt" fo:country="BR"/>
    </style:style>
  </office:automatic-styles>
  <office:body>
    <office:spreadsheet>
      <table:calculation-settings table:automatic-find-labels="false" table:use-regular-expressions="false" table:use-wildcards="true"/>
      <table:table table:name="73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4"/>
        <table:table-column table:style-name="co2" table:number-columns-repeated="5" table:default-cell-style-name="ce2"/>
        <table:table-row table:style-name="ro1">
          <table:table-cell table:style-name="ce1" office:value-type="string" calcext:value-type="string">
            <text:p>Naturais</text:p>
          </table:table-cell>
          <table:table-cell table:style-name="ce1" office:value-type="string" calcext:value-type="string">
            <text:p>B + 72</text:p>
          </table:table-cell>
          <table:table-cell table:style-name="ce1" office:value-type="string" calcext:value-type="string">
            <text:p><text:span text:style-name="T1">Ciclo</text:span> Perfeito</text:p>
          </table:table-cell>
          <table:table-cell table:style-name="ce3" office:value-type="string" calcext:value-type="string">
            <text:p>B / C</text:p>
          </table:table-cell>
          <table:table-cell table:style-name="ce3" office:value-type="string" calcext:value-type="string">
            <text:p>D posterior – D atual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8640000" calcext:value-type="float">
            <text:p>8640000</text:p>
          </table:table-cell>
          <table:table-cell table:formula="of:=[.B2]/[.C2]" office:value-type="float" office:value="0.00000844907407407407" calcext:value-type="float">
            <text:p>0,00000844907407407407</text:p>
          </table:table-cell>
          <table:table-cell table:formula="of:=[.D3]-[.D2]" office:value-type="float" office:value="0.00000844907407407407" calcext:value-type="float">
            <text:p>0,0000084490740740740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73" office:value-type="float" office:value="146" calcext:value-type="float">
            <text:p>146</text:p>
          </table:table-cell>
          <table:table-cell office:value-type="float" office:value="8640000" calcext:value-type="float">
            <text:p>8640000</text:p>
          </table:table-cell>
          <table:table-cell table:formula="of:=[.B3]/[.C3]" office:value-type="float" office:value="0.0000168981481481481" calcext:value-type="float">
            <text:p>0,00001689814814814810</text:p>
          </table:table-cell>
          <table:table-cell table:formula="of:=[.D4]-[.D3]" office:value-type="float" office:value="0.00000844907407407407" calcext:value-type="float">
            <text:p>0,0000084490740740740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73" office:value-type="float" office:value="219" calcext:value-type="float">
            <text:p>219</text:p>
          </table:table-cell>
          <table:table-cell office:value-type="float" office:value="8640000" calcext:value-type="float">
            <text:p>8640000</text:p>
          </table:table-cell>
          <table:table-cell table:formula="of:=[.B4]/[.C4]" office:value-type="float" office:value="0.0000253472222222222" calcext:value-type="float">
            <text:p>0,00002534722222222220</text:p>
          </table:table-cell>
          <table:table-cell table:formula="of:=[.D5]-[.D4]" office:value-type="float" office:value="0.00000844907407407407" calcext:value-type="float">
            <text:p>0,0000084490740740740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73" office:value-type="float" office:value="292" calcext:value-type="float">
            <text:p>292</text:p>
          </table:table-cell>
          <table:table-cell office:value-type="float" office:value="8640000" calcext:value-type="float">
            <text:p>8640000</text:p>
          </table:table-cell>
          <table:table-cell table:formula="of:=[.B5]/[.C5]" office:value-type="float" office:value="0.0000337962962962963" calcext:value-type="float">
            <text:p>0,00003379629629629630</text:p>
          </table:table-cell>
          <table:table-cell table:formula="of:=[.D6]-[.D5]" office:value-type="float" office:value="0.00000844907407407408" calcext:value-type="float">
            <text:p>0,00000844907407407408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73" office:value-type="float" office:value="365" calcext:value-type="float">
            <text:p>365</text:p>
          </table:table-cell>
          <table:table-cell office:value-type="float" office:value="8640000" calcext:value-type="float">
            <text:p>8640000</text:p>
          </table:table-cell>
          <table:table-cell table:formula="of:=[.B6]/[.C6]" office:value-type="float" office:value="0.0000422453703703704" calcext:value-type="float">
            <text:p>0,00004224537037037040</text:p>
          </table:table-cell>
          <table:table-cell table:formula="of:=[.D7]-[.D6]" office:value-type="float" office:value="0.00000844907407407407" calcext:value-type="float">
            <text:p>0,0000084490740740740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+73" office:value-type="float" office:value="438" calcext:value-type="float">
            <text:p>438</text:p>
          </table:table-cell>
          <table:table-cell office:value-type="float" office:value="8640000" calcext:value-type="float">
            <text:p>8640000</text:p>
          </table:table-cell>
          <table:table-cell table:formula="of:=[.B7]/[.C7]" office:value-type="float" office:value="0.0000506944444444444" calcext:value-type="float">
            <text:p>0,00005069444444444440</text:p>
          </table:table-cell>
          <table:table-cell table:formula="of:=[.D8]-[.D7]" office:value-type="float" office:value="0.00000844907407407408" calcext:value-type="float">
            <text:p>0,0000084490740740740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+73" office:value-type="float" office:value="511" calcext:value-type="float">
            <text:p>511</text:p>
          </table:table-cell>
          <table:table-cell office:value-type="float" office:value="8640000" calcext:value-type="float">
            <text:p>8640000</text:p>
          </table:table-cell>
          <table:table-cell table:formula="of:=[.B8]/[.C8]" office:value-type="float" office:value="0.0000591435185185185" calcext:value-type="float">
            <text:p>0,00005914351851851850</text:p>
          </table:table-cell>
          <table:table-cell table:formula="of:=[.D9]-[.D8]" office:value-type="float" office:value="0.00000844907407407407" calcext:value-type="float">
            <text:p>0,0000084490740740740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+73" office:value-type="float" office:value="584" calcext:value-type="float">
            <text:p>584</text:p>
          </table:table-cell>
          <table:table-cell office:value-type="float" office:value="8640000" calcext:value-type="float">
            <text:p>8640000</text:p>
          </table:table-cell>
          <table:table-cell table:formula="of:=[.B9]/[.C9]" office:value-type="float" office:value="0.0000675925925925926" calcext:value-type="float">
            <text:p>0,00006759259259259260</text:p>
          </table:table-cell>
          <table:table-cell table:formula="of:=[.D10]-[.D9]" office:value-type="float" office:value="0.00000844907407407408" calcext:value-type="float">
            <text:p>0,0000084490740740740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+73" office:value-type="float" office:value="657" calcext:value-type="float">
            <text:p>657</text:p>
          </table:table-cell>
          <table:table-cell office:value-type="float" office:value="8640000" calcext:value-type="float">
            <text:p>8640000</text:p>
          </table:table-cell>
          <table:table-cell table:formula="of:=[.B10]/[.C10]" office:value-type="float" office:value="0.0000760416666666667" calcext:value-type="float">
            <text:p>0,00007604166666666670</text:p>
          </table:table-cell>
          <table:table-cell table:formula="of:=[.D11]-[.D10]" office:value-type="float" office:value="0.00000844907407407408" calcext:value-type="float">
            <text:p>0,00000844907407407408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+73" office:value-type="float" office:value="730" calcext:value-type="float">
            <text:p>730</text:p>
          </table:table-cell>
          <table:table-cell office:value-type="float" office:value="8640000" calcext:value-type="float">
            <text:p>8640000</text:p>
          </table:table-cell>
          <table:table-cell table:formula="of:=[.B11]/[.C11]" office:value-type="float" office:value="0.0000844907407407407" calcext:value-type="float">
            <text:p>0,00008449074074074070</text:p>
          </table:table-cell>
          <table:table-cell table:formula="of:=[.D12]-[.D11]" office:value-type="float" office:value="0.00000844907407407406" calcext:value-type="float">
            <text:p>0,00000844907407407406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+73" office:value-type="float" office:value="803" calcext:value-type="float">
            <text:p>803</text:p>
          </table:table-cell>
          <table:table-cell office:value-type="float" office:value="8640000" calcext:value-type="float">
            <text:p>8640000</text:p>
          </table:table-cell>
          <table:table-cell table:formula="of:=[.B12]/[.C12]" office:value-type="float" office:value="0.0000929398148148148" calcext:value-type="float">
            <text:p>0,00009293981481481480</text:p>
          </table:table-cell>
          <table:table-cell table:formula="of:=[.D13]-[.D12]" office:value-type="float" office:value="0.00000844907407407408" calcext:value-type="float">
            <text:p>0,0000084490740740740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+73" office:value-type="float" office:value="876" calcext:value-type="float">
            <text:p>876</text:p>
          </table:table-cell>
          <table:table-cell office:value-type="float" office:value="8640000" calcext:value-type="float">
            <text:p>8640000</text:p>
          </table:table-cell>
          <table:table-cell table:formula="of:=[.B13]/[.C13]" office:value-type="float" office:value="0.000101388888888889" calcext:value-type="float">
            <text:p>0,00010138888888888900</text:p>
          </table:table-cell>
          <table:table-cell table:formula="of:=[.D14]-[.D13]" office:value-type="float" office:value="0.00000844907407407408" calcext:value-type="float">
            <text:p>0,00000844907407407408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+73" office:value-type="float" office:value="949" calcext:value-type="float">
            <text:p>949</text:p>
          </table:table-cell>
          <table:table-cell office:value-type="float" office:value="8640000" calcext:value-type="float">
            <text:p>8640000</text:p>
          </table:table-cell>
          <table:table-cell table:formula="of:=[.B14]/[.C14]" office:value-type="float" office:value="0.000109837962962963" calcext:value-type="float">
            <text:p>0,00010983796296296300</text:p>
          </table:table-cell>
          <table:table-cell table:formula="of:=[.D15]-[.D14]" office:value-type="float" office:value="0.00000844907407407408" calcext:value-type="float">
            <text:p>0,00000844907407407408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+73" office:value-type="float" office:value="1022" calcext:value-type="float">
            <text:p>1022</text:p>
          </table:table-cell>
          <table:table-cell office:value-type="float" office:value="8640000" calcext:value-type="float">
            <text:p>8640000</text:p>
          </table:table-cell>
          <table:table-cell table:formula="of:=[.B15]/[.C15]" office:value-type="float" office:value="0.000118287037037037" calcext:value-type="float">
            <text:p>0,00011828703703703700</text:p>
          </table:table-cell>
          <table:table-cell table:formula="of:=[.D16]-[.D15]" office:value-type="float" office:value="0.00000844907407407406" calcext:value-type="float">
            <text:p>0,00000844907407407406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+73" office:value-type="float" office:value="1095" calcext:value-type="float">
            <text:p>1095</text:p>
          </table:table-cell>
          <table:table-cell office:value-type="float" office:value="8640000" calcext:value-type="float">
            <text:p>8640000</text:p>
          </table:table-cell>
          <table:table-cell table:formula="of:=[.B16]/[.C16]" office:value-type="float" office:value="0.000126736111111111" calcext:value-type="float">
            <text:p>0,00012673611111111100</text:p>
          </table:table-cell>
          <table:table-cell table:formula="of:=[.D17]-[.D16]" office:value-type="float" office:value="0.00000844907407407408" calcext:value-type="float">
            <text:p>0,00000844907407407408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+73" office:value-type="float" office:value="1168" calcext:value-type="float">
            <text:p>1168</text:p>
          </table:table-cell>
          <table:table-cell office:value-type="float" office:value="8640000" calcext:value-type="float">
            <text:p>8640000</text:p>
          </table:table-cell>
          <table:table-cell table:formula="of:=[.B17]/[.C17]" office:value-type="float" office:value="0.000135185185185185" calcext:value-type="float">
            <text:p>0,00013518518518518500</text:p>
          </table:table-cell>
          <table:table-cell table:formula="of:=[.D18]-[.D17]" office:value-type="float" office:value="0.00000844907407407408" calcext:value-type="float">
            <text:p>0,00000844907407407408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+73" office:value-type="float" office:value="1241" calcext:value-type="float">
            <text:p>1241</text:p>
          </table:table-cell>
          <table:table-cell office:value-type="float" office:value="8640000" calcext:value-type="float">
            <text:p>8640000</text:p>
          </table:table-cell>
          <table:table-cell table:formula="of:=[.B18]/[.C18]" office:value-type="float" office:value="0.000143634259259259" calcext:value-type="float">
            <text:p>0,00014363425925925900</text:p>
          </table:table-cell>
          <table:table-cell table:formula="of:=[.D19]-[.D18]" office:value-type="float" office:value="0.00000844907407407408" calcext:value-type="float">
            <text:p>0,0000084490740740740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+73" office:value-type="float" office:value="1314" calcext:value-type="float">
            <text:p>1314</text:p>
          </table:table-cell>
          <table:table-cell office:value-type="float" office:value="8640000" calcext:value-type="float">
            <text:p>8640000</text:p>
          </table:table-cell>
          <table:table-cell table:formula="of:=[.B19]/[.C19]" office:value-type="float" office:value="0.000152083333333333" calcext:value-type="float">
            <text:p>0,00015208333333333300</text:p>
          </table:table-cell>
          <table:table-cell table:formula="of:=[.D20]-[.D19]" office:value-type="float" office:value="0.00000844907407407408" calcext:value-type="float">
            <text:p>0,00000844907407407408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+73" office:value-type="float" office:value="1387" calcext:value-type="float">
            <text:p>1387</text:p>
          </table:table-cell>
          <table:table-cell office:value-type="float" office:value="8640000" calcext:value-type="float">
            <text:p>8640000</text:p>
          </table:table-cell>
          <table:table-cell table:formula="of:=[.B20]/[.C20]" office:value-type="float" office:value="0.000160532407407407" calcext:value-type="float">
            <text:p>0,00016053240740740700</text:p>
          </table:table-cell>
          <table:table-cell table:formula="of:=[.D21]-[.D20]" office:value-type="float" office:value="0.00000844907407407408" calcext:value-type="float">
            <text:p>0,00000844907407407408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+73" office:value-type="float" office:value="1460" calcext:value-type="float">
            <text:p>1460</text:p>
          </table:table-cell>
          <table:table-cell office:value-type="float" office:value="8640000" calcext:value-type="float">
            <text:p>8640000</text:p>
          </table:table-cell>
          <table:table-cell table:formula="of:=[.B21]/[.C21]" office:value-type="float" office:value="0.000168981481481482" calcext:value-type="float">
            <text:p>0,00016898148148148200</text:p>
          </table:table-cell>
          <table:table-cell table:formula="of:=[.D22]-[.D21]" office:value-type="float" office:value="0.00000844907407407408" calcext:value-type="float">
            <text:p>0,00000844907407407408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+73" office:value-type="float" office:value="1533" calcext:value-type="float">
            <text:p>1533</text:p>
          </table:table-cell>
          <table:table-cell office:value-type="float" office:value="8640000" calcext:value-type="float">
            <text:p>8640000</text:p>
          </table:table-cell>
          <table:table-cell table:formula="of:=[.B22]/[.C22]" office:value-type="float" office:value="0.000177430555555556" calcext:value-type="float">
            <text:p>0,00017743055555555600</text:p>
          </table:table-cell>
          <table:table-cell table:formula="of:=[.D23]-[.D22]" office:value-type="float" office:value="0.00000844907407407405" calcext:value-type="float">
            <text:p>0,00000844907407407405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+73" office:value-type="float" office:value="1606" calcext:value-type="float">
            <text:p>1606</text:p>
          </table:table-cell>
          <table:table-cell office:value-type="float" office:value="8640000" calcext:value-type="float">
            <text:p>8640000</text:p>
          </table:table-cell>
          <table:table-cell table:formula="of:=[.B23]/[.C23]" office:value-type="float" office:value="0.00018587962962963" calcext:value-type="float">
            <text:p>0,00018587962962963000</text:p>
          </table:table-cell>
          <table:table-cell table:formula="of:=[.D24]-[.D23]" office:value-type="float" office:value="0.00000844907407407408" calcext:value-type="float">
            <text:p>0,00000844907407407408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+73" office:value-type="float" office:value="1679" calcext:value-type="float">
            <text:p>1679</text:p>
          </table:table-cell>
          <table:table-cell office:value-type="float" office:value="8640000" calcext:value-type="float">
            <text:p>8640000</text:p>
          </table:table-cell>
          <table:table-cell table:formula="of:=[.B24]/[.C24]" office:value-type="float" office:value="0.000194328703703704" calcext:value-type="float">
            <text:p>0,00019432870370370400</text:p>
          </table:table-cell>
          <table:table-cell table:formula="of:=[.D25]-[.D24]" office:value-type="float" office:value="0.00000844907407407408" calcext:value-type="float">
            <text:p>0,00000844907407407408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+73" office:value-type="float" office:value="1752" calcext:value-type="float">
            <text:p>1752</text:p>
          </table:table-cell>
          <table:table-cell office:value-type="float" office:value="8640000" calcext:value-type="float">
            <text:p>8640000</text:p>
          </table:table-cell>
          <table:table-cell table:formula="of:=[.B25]/[.C25]" office:value-type="float" office:value="0.000202777777777778" calcext:value-type="float">
            <text:p>0,00020277777777777800</text:p>
          </table:table-cell>
          <table:table-cell table:formula="of:=[.D26]-[.D25]" office:value-type="float" office:value="0.00000844907407407408" calcext:value-type="float">
            <text:p>0,00000844907407407408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5]+73" office:value-type="float" office:value="1825" calcext:value-type="float">
            <text:p>1825</text:p>
          </table:table-cell>
          <table:table-cell office:value-type="float" office:value="8640000" calcext:value-type="float">
            <text:p>8640000</text:p>
          </table:table-cell>
          <table:table-cell table:formula="of:=[.B26]/[.C26]" office:value-type="float" office:value="0.000211226851851852" calcext:value-type="float">
            <text:p>0,00021122685185185200</text:p>
          </table:table-cell>
          <table:table-cell table:formula="of:=[.D27]-[.D26]" office:value-type="float" office:value="0.00000844907407407408" calcext:value-type="float">
            <text:p>0,00000844907407407408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+73" office:value-type="float" office:value="1898" calcext:value-type="float">
            <text:p>1898</text:p>
          </table:table-cell>
          <table:table-cell office:value-type="float" office:value="8640000" calcext:value-type="float">
            <text:p>8640000</text:p>
          </table:table-cell>
          <table:table-cell table:formula="of:=[.B27]/[.C27]" office:value-type="float" office:value="0.000219675925925926" calcext:value-type="float">
            <text:p>0,00021967592592592600</text:p>
          </table:table-cell>
          <table:table-cell table:formula="of:=[.D28]-[.D27]" office:value-type="float" office:value="0.00000844907407407408" calcext:value-type="float">
            <text:p>0,00000844907407407408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7]+73" office:value-type="float" office:value="1971" calcext:value-type="float">
            <text:p>1971</text:p>
          </table:table-cell>
          <table:table-cell office:value-type="float" office:value="8640000" calcext:value-type="float">
            <text:p>8640000</text:p>
          </table:table-cell>
          <table:table-cell table:formula="of:=[.B28]/[.C28]" office:value-type="float" office:value="0.000228125" calcext:value-type="float">
            <text:p>0,00022812500000000000</text:p>
          </table:table-cell>
          <table:table-cell table:formula="of:=[.D29]-[.D28]" office:value-type="float" office:value="0.00000844907407407408" calcext:value-type="float">
            <text:p>0,00000844907407407408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+73" office:value-type="float" office:value="2044" calcext:value-type="float">
            <text:p>2044</text:p>
          </table:table-cell>
          <table:table-cell office:value-type="float" office:value="8640000" calcext:value-type="float">
            <text:p>8640000</text:p>
          </table:table-cell>
          <table:table-cell table:formula="of:=[.B29]/[.C29]" office:value-type="float" office:value="0.000236574074074074" calcext:value-type="float">
            <text:p>0,00023657407407407400</text:p>
          </table:table-cell>
          <table:table-cell table:formula="of:=[.D30]-[.D29]" office:value-type="float" office:value="0.00000844907407407405" calcext:value-type="float">
            <text:p>0,00000844907407407405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9]+73" office:value-type="float" office:value="2117" calcext:value-type="float">
            <text:p>2117</text:p>
          </table:table-cell>
          <table:table-cell office:value-type="float" office:value="8640000" calcext:value-type="float">
            <text:p>8640000</text:p>
          </table:table-cell>
          <table:table-cell table:formula="of:=[.B30]/[.C30]" office:value-type="float" office:value="0.000245023148148148" calcext:value-type="float">
            <text:p>0,00024502314814814800</text:p>
          </table:table-cell>
          <table:table-cell table:formula="of:=[.D31]-[.D30]" office:value-type="float" office:value="0.00000844907407407408" calcext:value-type="float">
            <text:p>0,00000844907407407408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+73" office:value-type="float" office:value="2190" calcext:value-type="float">
            <text:p>2190</text:p>
          </table:table-cell>
          <table:table-cell office:value-type="float" office:value="8640000" calcext:value-type="float">
            <text:p>8640000</text:p>
          </table:table-cell>
          <table:table-cell table:formula="of:=[.B31]/[.C31]" office:value-type="float" office:value="0.000253472222222222" calcext:value-type="float">
            <text:p>0,00025347222222222200</text:p>
          </table:table-cell>
          <table:table-cell table:formula="of:=[.D32]-[.D31]" office:value-type="float" office:value="0.00000844907407407408" calcext:value-type="float">
            <text:p>0,00000844907407407408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1]+73" office:value-type="float" office:value="2263" calcext:value-type="float">
            <text:p>2263</text:p>
          </table:table-cell>
          <table:table-cell office:value-type="float" office:value="8640000" calcext:value-type="float">
            <text:p>8640000</text:p>
          </table:table-cell>
          <table:table-cell table:formula="of:=[.B32]/[.C32]" office:value-type="float" office:value="0.000261921296296296" calcext:value-type="float">
            <text:p>0,00026192129629629600</text:p>
          </table:table-cell>
          <table:table-cell table:formula="of:=[.D33]-[.D32]" office:value-type="float" office:value="0.00000844907407407408" calcext:value-type="float">
            <text:p>0,00000844907407407408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2]+73" office:value-type="float" office:value="2336" calcext:value-type="float">
            <text:p>2336</text:p>
          </table:table-cell>
          <table:table-cell office:value-type="float" office:value="8640000" calcext:value-type="float">
            <text:p>8640000</text:p>
          </table:table-cell>
          <table:table-cell table:formula="of:=[.B33]/[.C33]" office:value-type="float" office:value="0.00027037037037037" calcext:value-type="float">
            <text:p>0,00027037037037037000</text:p>
          </table:table-cell>
          <table:table-cell table:formula="of:=[.D34]-[.D33]" office:value-type="float" office:value="0.00000844907407407408" calcext:value-type="float">
            <text:p>0,00000844907407407408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3]+73" office:value-type="float" office:value="2409" calcext:value-type="float">
            <text:p>2409</text:p>
          </table:table-cell>
          <table:table-cell office:value-type="float" office:value="8640000" calcext:value-type="float">
            <text:p>8640000</text:p>
          </table:table-cell>
          <table:table-cell table:formula="of:=[.B34]/[.C34]" office:value-type="float" office:value="0.000278819444444444" calcext:value-type="float">
            <text:p>0,00027881944444444400</text:p>
          </table:table-cell>
          <table:table-cell table:formula="of:=[.D35]-[.D34]" office:value-type="float" office:value="0.00000844907407407408" calcext:value-type="float">
            <text:p>0,00000844907407407408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4]+73" office:value-type="float" office:value="2482" calcext:value-type="float">
            <text:p>2482</text:p>
          </table:table-cell>
          <table:table-cell office:value-type="float" office:value="8640000" calcext:value-type="float">
            <text:p>8640000</text:p>
          </table:table-cell>
          <table:table-cell table:formula="of:=[.B35]/[.C35]" office:value-type="float" office:value="0.000287268518518519" calcext:value-type="float">
            <text:p>0,00028726851851851900</text:p>
          </table:table-cell>
          <table:table-cell table:formula="of:=[.D36]-[.D35]" office:value-type="float" office:value="0.00000844907407407408" calcext:value-type="float">
            <text:p>0,00000844907407407408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]+73" office:value-type="float" office:value="2555" calcext:value-type="float">
            <text:p>2555</text:p>
          </table:table-cell>
          <table:table-cell office:value-type="float" office:value="8640000" calcext:value-type="float">
            <text:p>8640000</text:p>
          </table:table-cell>
          <table:table-cell table:formula="of:=[.B36]/[.C36]" office:value-type="float" office:value="0.000295717592592593" calcext:value-type="float">
            <text:p>0,00029571759259259300</text:p>
          </table:table-cell>
          <table:table-cell table:formula="of:=[.D37]-[.D36]" office:value-type="float" office:value="0.00000844907407407408" calcext:value-type="float">
            <text:p>0,00000844907407407408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6]+73" office:value-type="float" office:value="2628" calcext:value-type="float">
            <text:p>2628</text:p>
          </table:table-cell>
          <table:table-cell office:value-type="float" office:value="8640000" calcext:value-type="float">
            <text:p>8640000</text:p>
          </table:table-cell>
          <table:table-cell table:formula="of:=[.B37]/[.C37]" office:value-type="float" office:value="0.000304166666666667" calcext:value-type="float">
            <text:p>0,00030416666666666700</text:p>
          </table:table-cell>
          <table:table-cell table:formula="of:=[.D38]-[.D37]" office:value-type="float" office:value="0.00000844907407407408" calcext:value-type="float">
            <text:p>0,00000844907407407408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7]+73" office:value-type="float" office:value="2701" calcext:value-type="float">
            <text:p>2701</text:p>
          </table:table-cell>
          <table:table-cell office:value-type="float" office:value="8640000" calcext:value-type="float">
            <text:p>8640000</text:p>
          </table:table-cell>
          <table:table-cell table:formula="of:=[.B38]/[.C38]" office:value-type="float" office:value="0.000312615740740741" calcext:value-type="float">
            <text:p>0,00031261574074074100</text:p>
          </table:table-cell>
          <table:table-cell table:formula="of:=[.D39]-[.D38]" office:value-type="float" office:value="0.00000844907407407408" calcext:value-type="float">
            <text:p>0,0000084490740740740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8]+73" office:value-type="float" office:value="2774" calcext:value-type="float">
            <text:p>2774</text:p>
          </table:table-cell>
          <table:table-cell office:value-type="float" office:value="8640000" calcext:value-type="float">
            <text:p>8640000</text:p>
          </table:table-cell>
          <table:table-cell table:formula="of:=[.B39]/[.C39]" office:value-type="float" office:value="0.000321064814814815" calcext:value-type="float">
            <text:p>0,00032106481481481500</text:p>
          </table:table-cell>
          <table:table-cell table:formula="of:=[.D40]-[.D39]" office:value-type="float" office:value="0.00000844907407407408" calcext:value-type="float">
            <text:p>0,00000844907407407408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9]+73" office:value-type="float" office:value="2847" calcext:value-type="float">
            <text:p>2847</text:p>
          </table:table-cell>
          <table:table-cell office:value-type="float" office:value="8640000" calcext:value-type="float">
            <text:p>8640000</text:p>
          </table:table-cell>
          <table:table-cell table:formula="of:=[.B40]/[.C40]" office:value-type="float" office:value="0.000329513888888889" calcext:value-type="float">
            <text:p>0,00032951388888888900</text:p>
          </table:table-cell>
          <table:table-cell table:formula="of:=[.D41]-[.D40]" office:value-type="float" office:value="0.00000844907407407408" calcext:value-type="float">
            <text:p>0,00000844907407407408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0]+73" office:value-type="float" office:value="2920" calcext:value-type="float">
            <text:p>2920</text:p>
          </table:table-cell>
          <table:table-cell office:value-type="float" office:value="8640000" calcext:value-type="float">
            <text:p>8640000</text:p>
          </table:table-cell>
          <table:table-cell table:formula="of:=[.B41]/[.C41]" office:value-type="float" office:value="0.000337962962962963" calcext:value-type="float">
            <text:p>0,00033796296296296300</text:p>
          </table:table-cell>
          <table:table-cell table:formula="of:=[.D42]-[.D41]" office:value-type="float" office:value="0.00000844907407407408" calcext:value-type="float">
            <text:p>0,00000844907407407408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]+73" office:value-type="float" office:value="2993" calcext:value-type="float">
            <text:p>2993</text:p>
          </table:table-cell>
          <table:table-cell office:value-type="float" office:value="8640000" calcext:value-type="float">
            <text:p>8640000</text:p>
          </table:table-cell>
          <table:table-cell table:formula="of:=[.B42]/[.C42]" office:value-type="float" office:value="0.000346412037037037" calcext:value-type="float">
            <text:p>0,00034641203703703700</text:p>
          </table:table-cell>
          <table:table-cell table:formula="of:=[.D43]-[.D42]" office:value-type="float" office:value="0.00000844907407407408" calcext:value-type="float">
            <text:p>0,00000844907407407408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2]+73" office:value-type="float" office:value="3066" calcext:value-type="float">
            <text:p>3066</text:p>
          </table:table-cell>
          <table:table-cell office:value-type="float" office:value="8640000" calcext:value-type="float">
            <text:p>8640000</text:p>
          </table:table-cell>
          <table:table-cell table:formula="of:=[.B43]/[.C43]" office:value-type="float" office:value="0.000354861111111111" calcext:value-type="float">
            <text:p>0,00035486111111111100</text:p>
          </table:table-cell>
          <table:table-cell table:formula="of:=[.D44]-[.D43]" office:value-type="float" office:value="0.00000844907407407408" calcext:value-type="float">
            <text:p>0,00000844907407407408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3]+73" office:value-type="float" office:value="3139" calcext:value-type="float">
            <text:p>3139</text:p>
          </table:table-cell>
          <table:table-cell office:value-type="float" office:value="8640000" calcext:value-type="float">
            <text:p>8640000</text:p>
          </table:table-cell>
          <table:table-cell table:formula="of:=[.B44]/[.C44]" office:value-type="float" office:value="0.000363310185185185" calcext:value-type="float">
            <text:p>0,00036331018518518500</text:p>
          </table:table-cell>
          <table:table-cell table:formula="of:=[.D45]-[.D44]" office:value-type="float" office:value="0.00000844907407407402" calcext:value-type="float">
            <text:p>0,00000844907407407402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4]+73" office:value-type="float" office:value="3212" calcext:value-type="float">
            <text:p>3212</text:p>
          </table:table-cell>
          <table:table-cell office:value-type="float" office:value="8640000" calcext:value-type="float">
            <text:p>8640000</text:p>
          </table:table-cell>
          <table:table-cell table:formula="of:=[.B45]/[.C45]" office:value-type="float" office:value="0.000371759259259259" calcext:value-type="float">
            <text:p>0,00037175925925925900</text:p>
          </table:table-cell>
          <table:table-cell table:formula="of:=[.D46]-[.D45]" office:value-type="float" office:value="0.00000844907407407408" calcext:value-type="float">
            <text:p>0,00000844907407407408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5]+73" office:value-type="float" office:value="3285" calcext:value-type="float">
            <text:p>3285</text:p>
          </table:table-cell>
          <table:table-cell office:value-type="float" office:value="8640000" calcext:value-type="float">
            <text:p>8640000</text:p>
          </table:table-cell>
          <table:table-cell table:formula="of:=[.B46]/[.C46]" office:value-type="float" office:value="0.000380208333333333" calcext:value-type="float">
            <text:p>0,00038020833333333300</text:p>
          </table:table-cell>
          <table:table-cell table:formula="of:=[.D47]-[.D46]" office:value-type="float" office:value="0.00000844907407407408" calcext:value-type="float">
            <text:p>0,00000844907407407408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6]+73" office:value-type="float" office:value="3358" calcext:value-type="float">
            <text:p>3358</text:p>
          </table:table-cell>
          <table:table-cell office:value-type="float" office:value="8640000" calcext:value-type="float">
            <text:p>8640000</text:p>
          </table:table-cell>
          <table:table-cell table:formula="of:=[.B47]/[.C47]" office:value-type="float" office:value="0.000388657407407407" calcext:value-type="float">
            <text:p>0,00038865740740740700</text:p>
          </table:table-cell>
          <table:table-cell table:formula="of:=[.D48]-[.D47]" office:value-type="float" office:value="0.00000844907407407408" calcext:value-type="float">
            <text:p>0,00000844907407407408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7]+73" office:value-type="float" office:value="3431" calcext:value-type="float">
            <text:p>3431</text:p>
          </table:table-cell>
          <table:table-cell office:value-type="float" office:value="8640000" calcext:value-type="float">
            <text:p>8640000</text:p>
          </table:table-cell>
          <table:table-cell table:formula="of:=[.B48]/[.C48]" office:value-type="float" office:value="0.000397106481481481" calcext:value-type="float">
            <text:p>0,00039710648148148100</text:p>
          </table:table-cell>
          <table:table-cell table:formula="of:=[.D49]-[.D48]" office:value-type="float" office:value="0.00000844907407407408" calcext:value-type="float">
            <text:p>0,0000084490740740740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8]+73" office:value-type="float" office:value="3504" calcext:value-type="float">
            <text:p>3504</text:p>
          </table:table-cell>
          <table:table-cell office:value-type="float" office:value="8640000" calcext:value-type="float">
            <text:p>8640000</text:p>
          </table:table-cell>
          <table:table-cell table:formula="of:=[.B49]/[.C49]" office:value-type="float" office:value="0.000405555555555556" calcext:value-type="float">
            <text:p>0,00040555555555555600</text:p>
          </table:table-cell>
          <table:table-cell table:formula="of:=[.D50]-[.D49]" office:value-type="float" office:value="0.00000844907407407408" calcext:value-type="float">
            <text:p>0,00000844907407407408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9]+73" office:value-type="float" office:value="3577" calcext:value-type="float">
            <text:p>3577</text:p>
          </table:table-cell>
          <table:table-cell office:value-type="float" office:value="8640000" calcext:value-type="float">
            <text:p>8640000</text:p>
          </table:table-cell>
          <table:table-cell table:formula="of:=[.B50]/[.C50]" office:value-type="float" office:value="0.00041400462962963" calcext:value-type="float">
            <text:p>0,00041400462962963000</text:p>
          </table:table-cell>
          <table:table-cell table:formula="of:=[.D51]-[.D50]" office:value-type="float" office:value="0.00000844907407407408" calcext:value-type="float">
            <text:p>0,00000844907407407408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0]+73" office:value-type="float" office:value="3650" calcext:value-type="float">
            <text:p>3650</text:p>
          </table:table-cell>
          <table:table-cell office:value-type="float" office:value="8640000" calcext:value-type="float">
            <text:p>8640000</text:p>
          </table:table-cell>
          <table:table-cell table:formula="of:=[.B51]/[.C51]" office:value-type="float" office:value="0.000422453703703704" calcext:value-type="float">
            <text:p>0,00042245370370370400</text:p>
          </table:table-cell>
          <table:table-cell table:formula="of:=[.D52]-[.D51]" office:value-type="float" office:value="0.00000844907407407408" calcext:value-type="float">
            <text:p>0,00000844907407407408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1]+73" office:value-type="float" office:value="3723" calcext:value-type="float">
            <text:p>3723</text:p>
          </table:table-cell>
          <table:table-cell office:value-type="float" office:value="8640000" calcext:value-type="float">
            <text:p>8640000</text:p>
          </table:table-cell>
          <table:table-cell table:formula="of:=[.B52]/[.C52]" office:value-type="float" office:value="0.000430902777777778" calcext:value-type="float">
            <text:p>0,00043090277777777800</text:p>
          </table:table-cell>
          <table:table-cell table:formula="of:=[.D53]-[.D52]" office:value-type="float" office:value="0.00000844907407407408" calcext:value-type="float">
            <text:p>0,00000844907407407408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2]+73" office:value-type="float" office:value="3796" calcext:value-type="float">
            <text:p>3796</text:p>
          </table:table-cell>
          <table:table-cell office:value-type="float" office:value="8640000" calcext:value-type="float">
            <text:p>8640000</text:p>
          </table:table-cell>
          <table:table-cell table:formula="of:=[.B53]/[.C53]" office:value-type="float" office:value="0.000439351851851852" calcext:value-type="float">
            <text:p>0,00043935185185185200</text:p>
          </table:table-cell>
          <table:table-cell table:formula="of:=[.D54]-[.D53]" office:value-type="float" office:value="0.00000844907407407408" calcext:value-type="float">
            <text:p>0,00000844907407407408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3]+73" office:value-type="float" office:value="3869" calcext:value-type="float">
            <text:p>3869</text:p>
          </table:table-cell>
          <table:table-cell office:value-type="float" office:value="8640000" calcext:value-type="float">
            <text:p>8640000</text:p>
          </table:table-cell>
          <table:table-cell table:formula="of:=[.B54]/[.C54]" office:value-type="float" office:value="0.000447800925925926" calcext:value-type="float">
            <text:p>0,00044780092592592600</text:p>
          </table:table-cell>
          <table:table-cell table:formula="of:=[.D55]-[.D54]" office:value-type="float" office:value="0.00000844907407407408" calcext:value-type="float">
            <text:p>0,00000844907407407408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4]+73" office:value-type="float" office:value="3942" calcext:value-type="float">
            <text:p>3942</text:p>
          </table:table-cell>
          <table:table-cell office:value-type="float" office:value="8640000" calcext:value-type="float">
            <text:p>8640000</text:p>
          </table:table-cell>
          <table:table-cell table:formula="of:=[.B55]/[.C55]" office:value-type="float" office:value="0.00045625" calcext:value-type="float">
            <text:p>0,00045625000000000000</text:p>
          </table:table-cell>
          <table:table-cell table:formula="of:=[.D56]-[.D55]" office:value-type="float" office:value="0.00000844907407407408" calcext:value-type="float">
            <text:p>0,00000844907407407408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5]+73" office:value-type="float" office:value="4015" calcext:value-type="float">
            <text:p>4015</text:p>
          </table:table-cell>
          <table:table-cell office:value-type="float" office:value="8640000" calcext:value-type="float">
            <text:p>8640000</text:p>
          </table:table-cell>
          <table:table-cell table:formula="of:=[.B56]/[.C56]" office:value-type="float" office:value="0.000464699074074074" calcext:value-type="float">
            <text:p>0,00046469907407407400</text:p>
          </table:table-cell>
          <table:table-cell table:formula="of:=[.D57]-[.D56]" office:value-type="float" office:value="0.00000844907407407408" calcext:value-type="float">
            <text:p>0,00000844907407407408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6]+73" office:value-type="float" office:value="4088" calcext:value-type="float">
            <text:p>4088</text:p>
          </table:table-cell>
          <table:table-cell office:value-type="float" office:value="8640000" calcext:value-type="float">
            <text:p>8640000</text:p>
          </table:table-cell>
          <table:table-cell table:formula="of:=[.B57]/[.C57]" office:value-type="float" office:value="0.000473148148148148" calcext:value-type="float">
            <text:p>0,00047314814814814800</text:p>
          </table:table-cell>
          <table:table-cell table:formula="of:=[.D58]-[.D57]" office:value-type="float" office:value="0.00000844907407407408" calcext:value-type="float">
            <text:p>0,00000844907407407408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7]+73" office:value-type="float" office:value="4161" calcext:value-type="float">
            <text:p>4161</text:p>
          </table:table-cell>
          <table:table-cell office:value-type="float" office:value="8640000" calcext:value-type="float">
            <text:p>8640000</text:p>
          </table:table-cell>
          <table:table-cell table:formula="of:=[.B58]/[.C58]" office:value-type="float" office:value="0.000481597222222222" calcext:value-type="float">
            <text:p>0,00048159722222222200</text:p>
          </table:table-cell>
          <table:table-cell table:formula="of:=[.D59]-[.D58]" office:value-type="float" office:value="0.00000844907407407402" calcext:value-type="float">
            <text:p>0,00000844907407407402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8]+73" office:value-type="float" office:value="4234" calcext:value-type="float">
            <text:p>4234</text:p>
          </table:table-cell>
          <table:table-cell office:value-type="float" office:value="8640000" calcext:value-type="float">
            <text:p>8640000</text:p>
          </table:table-cell>
          <table:table-cell table:formula="of:=[.B59]/[.C59]" office:value-type="float" office:value="0.000490046296296296" calcext:value-type="float">
            <text:p>0,00049004629629629600</text:p>
          </table:table-cell>
          <table:table-cell table:formula="of:=[.D60]-[.D59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9]+73" office:value-type="float" office:value="4307" calcext:value-type="float">
            <text:p>4307</text:p>
          </table:table-cell>
          <table:table-cell office:value-type="float" office:value="8640000" calcext:value-type="float">
            <text:p>8640000</text:p>
          </table:table-cell>
          <table:table-cell table:formula="of:=[.B60]/[.C60]" office:value-type="float" office:value="0.00049849537037037" calcext:value-type="float">
            <text:p>0,00049849537037037000</text:p>
          </table:table-cell>
          <table:table-cell table:formula="of:=[.D61]-[.D60]" office:value-type="float" office:value="0.00000844907407407402" calcext:value-type="float">
            <text:p>0,00000844907407407402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0]+73" office:value-type="float" office:value="4380" calcext:value-type="float">
            <text:p>4380</text:p>
          </table:table-cell>
          <table:table-cell office:value-type="float" office:value="8640000" calcext:value-type="float">
            <text:p>8640000</text:p>
          </table:table-cell>
          <table:table-cell table:formula="of:=[.B61]/[.C61]" office:value-type="float" office:value="0.000506944444444444" calcext:value-type="float">
            <text:p>0,00050694444444444400</text:p>
          </table:table-cell>
          <table:table-cell table:formula="of:=[.D62]-[.D61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1]+73" office:value-type="float" office:value="4453" calcext:value-type="float">
            <text:p>4453</text:p>
          </table:table-cell>
          <table:table-cell office:value-type="float" office:value="8640000" calcext:value-type="float">
            <text:p>8640000</text:p>
          </table:table-cell>
          <table:table-cell table:formula="of:=[.B62]/[.C62]" office:value-type="float" office:value="0.000515393518518519" calcext:value-type="float">
            <text:p>0,00051539351851851900</text:p>
          </table:table-cell>
          <table:table-cell table:formula="of:=[.D63]-[.D62]" office:value-type="float" office:value="0.00000844907407407402" calcext:value-type="float">
            <text:p>0,00000844907407407402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2]+73" office:value-type="float" office:value="4526" calcext:value-type="float">
            <text:p>4526</text:p>
          </table:table-cell>
          <table:table-cell office:value-type="float" office:value="8640000" calcext:value-type="float">
            <text:p>8640000</text:p>
          </table:table-cell>
          <table:table-cell table:formula="of:=[.B63]/[.C63]" office:value-type="float" office:value="0.000523842592592593" calcext:value-type="float">
            <text:p>0,00052384259259259300</text:p>
          </table:table-cell>
          <table:table-cell table:formula="of:=[.D64]-[.D63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3]+73" office:value-type="float" office:value="4599" calcext:value-type="float">
            <text:p>4599</text:p>
          </table:table-cell>
          <table:table-cell office:value-type="float" office:value="8640000" calcext:value-type="float">
            <text:p>8640000</text:p>
          </table:table-cell>
          <table:table-cell table:formula="of:=[.B64]/[.C64]" office:value-type="float" office:value="0.000532291666666667" calcext:value-type="float">
            <text:p>0,00053229166666666700</text:p>
          </table:table-cell>
          <table:table-cell table:formula="of:=[.D65]-[.D64]" office:value-type="float" office:value="0.00000844907407407402" calcext:value-type="float">
            <text:p>0,00000844907407407402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4]+73" office:value-type="float" office:value="4672" calcext:value-type="float">
            <text:p>4672</text:p>
          </table:table-cell>
          <table:table-cell office:value-type="float" office:value="8640000" calcext:value-type="float">
            <text:p>8640000</text:p>
          </table:table-cell>
          <table:table-cell table:formula="of:=[.B65]/[.C65]" office:value-type="float" office:value="0.000540740740740741" calcext:value-type="float">
            <text:p>0,00054074074074074100</text:p>
          </table:table-cell>
          <table:table-cell table:formula="of:=[.D66]-[.D65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5]+73" office:value-type="float" office:value="4745" calcext:value-type="float">
            <text:p>4745</text:p>
          </table:table-cell>
          <table:table-cell office:value-type="float" office:value="8640000" calcext:value-type="float">
            <text:p>8640000</text:p>
          </table:table-cell>
          <table:table-cell table:formula="of:=[.B66]/[.C66]" office:value-type="float" office:value="0.000549189814814815" calcext:value-type="float">
            <text:p>0,00054918981481481500</text:p>
          </table:table-cell>
          <table:table-cell table:formula="of:=[.D67]-[.D66]" office:value-type="float" office:value="0.00000844907407407402" calcext:value-type="float">
            <text:p>0,00000844907407407402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6]+73" office:value-type="float" office:value="4818" calcext:value-type="float">
            <text:p>4818</text:p>
          </table:table-cell>
          <table:table-cell office:value-type="float" office:value="8640000" calcext:value-type="float">
            <text:p>8640000</text:p>
          </table:table-cell>
          <table:table-cell table:formula="of:=[.B67]/[.C67]" office:value-type="float" office:value="0.000557638888888889" calcext:value-type="float">
            <text:p>0,00055763888888888900</text:p>
          </table:table-cell>
          <table:table-cell table:formula="of:=[.D68]-[.D67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7]+73" office:value-type="float" office:value="4891" calcext:value-type="float">
            <text:p>4891</text:p>
          </table:table-cell>
          <table:table-cell office:value-type="float" office:value="8640000" calcext:value-type="float">
            <text:p>8640000</text:p>
          </table:table-cell>
          <table:table-cell table:formula="of:=[.B68]/[.C68]" office:value-type="float" office:value="0.000566087962962963" calcext:value-type="float">
            <text:p>0,00056608796296296300</text:p>
          </table:table-cell>
          <table:table-cell table:formula="of:=[.D69]-[.D68]" office:value-type="float" office:value="0.00000844907407407402" calcext:value-type="float">
            <text:p>0,00000844907407407402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8]+73" office:value-type="float" office:value="4964" calcext:value-type="float">
            <text:p>4964</text:p>
          </table:table-cell>
          <table:table-cell office:value-type="float" office:value="8640000" calcext:value-type="float">
            <text:p>8640000</text:p>
          </table:table-cell>
          <table:table-cell table:formula="of:=[.B69]/[.C69]" office:value-type="float" office:value="0.000574537037037037" calcext:value-type="float">
            <text:p>0,00057453703703703700</text:p>
          </table:table-cell>
          <table:table-cell table:formula="of:=[.D70]-[.D69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9]+73" office:value-type="float" office:value="5037" calcext:value-type="float">
            <text:p>5037</text:p>
          </table:table-cell>
          <table:table-cell office:value-type="float" office:value="8640000" calcext:value-type="float">
            <text:p>8640000</text:p>
          </table:table-cell>
          <table:table-cell table:formula="of:=[.B70]/[.C70]" office:value-type="float" office:value="0.000582986111111111" calcext:value-type="float">
            <text:p>0,00058298611111111100</text:p>
          </table:table-cell>
          <table:table-cell table:formula="of:=[.D71]-[.D70]" office:value-type="float" office:value="0.00000844907407407402" calcext:value-type="float">
            <text:p>0,00000844907407407402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0]+73" office:value-type="float" office:value="5110" calcext:value-type="float">
            <text:p>5110</text:p>
          </table:table-cell>
          <table:table-cell office:value-type="float" office:value="8640000" calcext:value-type="float">
            <text:p>8640000</text:p>
          </table:table-cell>
          <table:table-cell table:formula="of:=[.B71]/[.C71]" office:value-type="float" office:value="0.000591435185185185" calcext:value-type="float">
            <text:p>0,00059143518518518500</text:p>
          </table:table-cell>
          <table:table-cell table:formula="of:=[.D72]-[.D71]" office:value-type="float" office:value="0.00000844907407407402" calcext:value-type="float">
            <text:p>0,00000844907407407402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1]+73" office:value-type="float" office:value="5183" calcext:value-type="float">
            <text:p>5183</text:p>
          </table:table-cell>
          <table:table-cell office:value-type="float" office:value="8640000" calcext:value-type="float">
            <text:p>8640000</text:p>
          </table:table-cell>
          <table:table-cell table:formula="of:=[.B72]/[.C72]" office:value-type="float" office:value="0.000599884259259259" calcext:value-type="float">
            <text:p>0,00059988425925925900</text:p>
          </table:table-cell>
          <table:table-cell table:formula="of:=[.D73]-[.D72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2]+73" office:value-type="float" office:value="5256" calcext:value-type="float">
            <text:p>5256</text:p>
          </table:table-cell>
          <table:table-cell office:value-type="float" office:value="8640000" calcext:value-type="float">
            <text:p>8640000</text:p>
          </table:table-cell>
          <table:table-cell table:formula="of:=[.B73]/[.C73]" office:value-type="float" office:value="0.000608333333333333" calcext:value-type="float">
            <text:p>0,00060833333333333300</text:p>
          </table:table-cell>
          <table:table-cell table:formula="of:=[.D74]-[.D73]" office:value-type="float" office:value="0.00000844907407407402" calcext:value-type="float">
            <text:p>0,00000844907407407402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3]+73" office:value-type="float" office:value="5329" calcext:value-type="float">
            <text:p>5329</text:p>
          </table:table-cell>
          <table:table-cell office:value-type="float" office:value="8640000" calcext:value-type="float">
            <text:p>8640000</text:p>
          </table:table-cell>
          <table:table-cell table:formula="of:=[.B74]/[.C74]" office:value-type="float" office:value="0.000616782407407407" calcext:value-type="float">
            <text:p>0,00061678240740740700</text:p>
          </table:table-cell>
          <table:table-cell table:formula="of:=[.D75]-[.D74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4]+73" office:value-type="float" office:value="5402" calcext:value-type="float">
            <text:p>5402</text:p>
          </table:table-cell>
          <table:table-cell office:value-type="float" office:value="8640000" calcext:value-type="float">
            <text:p>8640000</text:p>
          </table:table-cell>
          <table:table-cell table:formula="of:=[.B75]/[.C75]" office:value-type="float" office:value="0.000625231481481482" calcext:value-type="float">
            <text:p>0,00062523148148148200</text:p>
          </table:table-cell>
          <table:table-cell table:formula="of:=[.D76]-[.D75]" office:value-type="float" office:value="0.00000844907407407402" calcext:value-type="float">
            <text:p>0,00000844907407407402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5]+73" office:value-type="float" office:value="5475" calcext:value-type="float">
            <text:p>5475</text:p>
          </table:table-cell>
          <table:table-cell office:value-type="float" office:value="8640000" calcext:value-type="float">
            <text:p>8640000</text:p>
          </table:table-cell>
          <table:table-cell table:formula="of:=[.B76]/[.C76]" office:value-type="float" office:value="0.000633680555555556" calcext:value-type="float">
            <text:p>0,00063368055555555600</text:p>
          </table:table-cell>
          <table:table-cell table:formula="of:=[.D77]-[.D76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6]+73" office:value-type="float" office:value="5548" calcext:value-type="float">
            <text:p>5548</text:p>
          </table:table-cell>
          <table:table-cell office:value-type="float" office:value="8640000" calcext:value-type="float">
            <text:p>8640000</text:p>
          </table:table-cell>
          <table:table-cell table:formula="of:=[.B77]/[.C77]" office:value-type="float" office:value="0.00064212962962963" calcext:value-type="float">
            <text:p>0,00064212962962963000</text:p>
          </table:table-cell>
          <table:table-cell table:formula="of:=[.D78]-[.D77]" office:value-type="float" office:value="0.00000844907407407402" calcext:value-type="float">
            <text:p>0,00000844907407407402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7]+73" office:value-type="float" office:value="5621" calcext:value-type="float">
            <text:p>5621</text:p>
          </table:table-cell>
          <table:table-cell office:value-type="float" office:value="8640000" calcext:value-type="float">
            <text:p>8640000</text:p>
          </table:table-cell>
          <table:table-cell table:formula="of:=[.B78]/[.C78]" office:value-type="float" office:value="0.000650578703703704" calcext:value-type="float">
            <text:p>0,00065057870370370400</text:p>
          </table:table-cell>
          <table:table-cell table:formula="of:=[.D79]-[.D78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8]+73" office:value-type="float" office:value="5694" calcext:value-type="float">
            <text:p>5694</text:p>
          </table:table-cell>
          <table:table-cell office:value-type="float" office:value="8640000" calcext:value-type="float">
            <text:p>8640000</text:p>
          </table:table-cell>
          <table:table-cell table:formula="of:=[.B79]/[.C79]" office:value-type="float" office:value="0.000659027777777778" calcext:value-type="float">
            <text:p>0,00065902777777777800</text:p>
          </table:table-cell>
          <table:table-cell table:formula="of:=[.D80]-[.D79]" office:value-type="float" office:value="0.00000844907407407402" calcext:value-type="float">
            <text:p>0,00000844907407407402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9]+73" office:value-type="float" office:value="5767" calcext:value-type="float">
            <text:p>5767</text:p>
          </table:table-cell>
          <table:table-cell office:value-type="float" office:value="8640000" calcext:value-type="float">
            <text:p>8640000</text:p>
          </table:table-cell>
          <table:table-cell table:formula="of:=[.B80]/[.C80]" office:value-type="float" office:value="0.000667476851851852" calcext:value-type="float">
            <text:p>0,00066747685185185200</text:p>
          </table:table-cell>
          <table:table-cell table:formula="of:=[.D81]-[.D80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0]+73" office:value-type="float" office:value="5840" calcext:value-type="float">
            <text:p>5840</text:p>
          </table:table-cell>
          <table:table-cell office:value-type="float" office:value="8640000" calcext:value-type="float">
            <text:p>8640000</text:p>
          </table:table-cell>
          <table:table-cell table:formula="of:=[.B81]/[.C81]" office:value-type="float" office:value="0.000675925925925926" calcext:value-type="float">
            <text:p>0,00067592592592592600</text:p>
          </table:table-cell>
          <table:table-cell table:formula="of:=[.D82]-[.D81]" office:value-type="float" office:value="0.00000844907407407402" calcext:value-type="float">
            <text:p>0,00000844907407407402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1]+73" office:value-type="float" office:value="5913" calcext:value-type="float">
            <text:p>5913</text:p>
          </table:table-cell>
          <table:table-cell office:value-type="float" office:value="8640000" calcext:value-type="float">
            <text:p>8640000</text:p>
          </table:table-cell>
          <table:table-cell table:formula="of:=[.B82]/[.C82]" office:value-type="float" office:value="0.000684375" calcext:value-type="float">
            <text:p>0,00068437500000000000</text:p>
          </table:table-cell>
          <table:table-cell table:formula="of:=[.D83]-[.D82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2]+73" office:value-type="float" office:value="5986" calcext:value-type="float">
            <text:p>5986</text:p>
          </table:table-cell>
          <table:table-cell office:value-type="float" office:value="8640000" calcext:value-type="float">
            <text:p>8640000</text:p>
          </table:table-cell>
          <table:table-cell table:formula="of:=[.B83]/[.C83]" office:value-type="float" office:value="0.000692824074074074" calcext:value-type="float">
            <text:p>0,00069282407407407400</text:p>
          </table:table-cell>
          <table:table-cell table:formula="of:=[.D84]-[.D83]" office:value-type="float" office:value="0.00000844907407407402" calcext:value-type="float">
            <text:p>0,00000844907407407402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3]+73" office:value-type="float" office:value="6059" calcext:value-type="float">
            <text:p>6059</text:p>
          </table:table-cell>
          <table:table-cell office:value-type="float" office:value="8640000" calcext:value-type="float">
            <text:p>8640000</text:p>
          </table:table-cell>
          <table:table-cell table:formula="of:=[.B84]/[.C84]" office:value-type="float" office:value="0.000701273148148148" calcext:value-type="float">
            <text:p>0,00070127314814814800</text:p>
          </table:table-cell>
          <table:table-cell table:formula="of:=[.D85]-[.D84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4]+73" office:value-type="float" office:value="6132" calcext:value-type="float">
            <text:p>6132</text:p>
          </table:table-cell>
          <table:table-cell office:value-type="float" office:value="8640000" calcext:value-type="float">
            <text:p>8640000</text:p>
          </table:table-cell>
          <table:table-cell table:formula="of:=[.B85]/[.C85]" office:value-type="float" office:value="0.000709722222222222" calcext:value-type="float">
            <text:p>0,00070972222222222200</text:p>
          </table:table-cell>
          <table:table-cell table:formula="of:=[.D86]-[.D85]" office:value-type="float" office:value="0.00000844907407407402" calcext:value-type="float">
            <text:p>0,00000844907407407402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5]+73" office:value-type="float" office:value="6205" calcext:value-type="float">
            <text:p>6205</text:p>
          </table:table-cell>
          <table:table-cell office:value-type="float" office:value="8640000" calcext:value-type="float">
            <text:p>8640000</text:p>
          </table:table-cell>
          <table:table-cell table:formula="of:=[.B86]/[.C86]" office:value-type="float" office:value="0.000718171296296296" calcext:value-type="float">
            <text:p>0,00071817129629629600</text:p>
          </table:table-cell>
          <table:table-cell table:formula="of:=[.D87]-[.D86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6]+73" office:value-type="float" office:value="6278" calcext:value-type="float">
            <text:p>6278</text:p>
          </table:table-cell>
          <table:table-cell office:value-type="float" office:value="8640000" calcext:value-type="float">
            <text:p>8640000</text:p>
          </table:table-cell>
          <table:table-cell table:formula="of:=[.B87]/[.C87]" office:value-type="float" office:value="0.00072662037037037" calcext:value-type="float">
            <text:p>0,00072662037037037000</text:p>
          </table:table-cell>
          <table:table-cell table:formula="of:=[.D88]-[.D87]" office:value-type="float" office:value="0.00000844907407407402" calcext:value-type="float">
            <text:p>0,00000844907407407402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7]+73" office:value-type="float" office:value="6351" calcext:value-type="float">
            <text:p>6351</text:p>
          </table:table-cell>
          <table:table-cell office:value-type="float" office:value="8640000" calcext:value-type="float">
            <text:p>8640000</text:p>
          </table:table-cell>
          <table:table-cell table:formula="of:=[.B88]/[.C88]" office:value-type="float" office:value="0.000735069444444444" calcext:value-type="float">
            <text:p>0,00073506944444444400</text:p>
          </table:table-cell>
          <table:table-cell table:formula="of:=[.D89]-[.D88]" office:value-type="float" office:value="0.00000844907407407402" calcext:value-type="float">
            <text:p>0,00000844907407407402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8]+73" office:value-type="float" office:value="6424" calcext:value-type="float">
            <text:p>6424</text:p>
          </table:table-cell>
          <table:table-cell office:value-type="float" office:value="8640000" calcext:value-type="float">
            <text:p>8640000</text:p>
          </table:table-cell>
          <table:table-cell table:formula="of:=[.B89]/[.C89]" office:value-type="float" office:value="0.000743518518518519" calcext:value-type="float">
            <text:p>0,00074351851851851900</text:p>
          </table:table-cell>
          <table:table-cell table:formula="of:=[.D90]-[.D89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9]+73" office:value-type="float" office:value="6497" calcext:value-type="float">
            <text:p>6497</text:p>
          </table:table-cell>
          <table:table-cell office:value-type="float" office:value="8640000" calcext:value-type="float">
            <text:p>8640000</text:p>
          </table:table-cell>
          <table:table-cell table:formula="of:=[.B90]/[.C90]" office:value-type="float" office:value="0.000751967592592593" calcext:value-type="float">
            <text:p>0,00075196759259259300</text:p>
          </table:table-cell>
          <table:table-cell table:formula="of:=[.D91]-[.D90]" office:value-type="float" office:value="0.00000844907407407402" calcext:value-type="float">
            <text:p>0,00000844907407407402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0]+73" office:value-type="float" office:value="6570" calcext:value-type="float">
            <text:p>6570</text:p>
          </table:table-cell>
          <table:table-cell office:value-type="float" office:value="8640000" calcext:value-type="float">
            <text:p>8640000</text:p>
          </table:table-cell>
          <table:table-cell table:formula="of:=[.B91]/[.C91]" office:value-type="float" office:value="0.000760416666666667" calcext:value-type="float">
            <text:p>0,00076041666666666700</text:p>
          </table:table-cell>
          <table:table-cell table:formula="of:=[.D92]-[.D91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1]+73" office:value-type="float" office:value="6643" calcext:value-type="float">
            <text:p>6643</text:p>
          </table:table-cell>
          <table:table-cell office:value-type="float" office:value="8640000" calcext:value-type="float">
            <text:p>8640000</text:p>
          </table:table-cell>
          <table:table-cell table:formula="of:=[.B92]/[.C92]" office:value-type="float" office:value="0.000768865740740741" calcext:value-type="float">
            <text:p>0,00076886574074074100</text:p>
          </table:table-cell>
          <table:table-cell table:formula="of:=[.D93]-[.D92]" office:value-type="float" office:value="0.00000844907407407402" calcext:value-type="float">
            <text:p>0,00000844907407407402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2]+73" office:value-type="float" office:value="6716" calcext:value-type="float">
            <text:p>6716</text:p>
          </table:table-cell>
          <table:table-cell office:value-type="float" office:value="8640000" calcext:value-type="float">
            <text:p>8640000</text:p>
          </table:table-cell>
          <table:table-cell table:formula="of:=[.B93]/[.C93]" office:value-type="float" office:value="0.000777314814814815" calcext:value-type="float">
            <text:p>0,00077731481481481500</text:p>
          </table:table-cell>
          <table:table-cell table:formula="of:=[.D94]-[.D93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3]+73" office:value-type="float" office:value="6789" calcext:value-type="float">
            <text:p>6789</text:p>
          </table:table-cell>
          <table:table-cell office:value-type="float" office:value="8640000" calcext:value-type="float">
            <text:p>8640000</text:p>
          </table:table-cell>
          <table:table-cell table:formula="of:=[.B94]/[.C94]" office:value-type="float" office:value="0.000785763888888889" calcext:value-type="float">
            <text:p>0,00078576388888888900</text:p>
          </table:table-cell>
          <table:table-cell table:formula="of:=[.D95]-[.D94]" office:value-type="float" office:value="0.00000844907407407402" calcext:value-type="float">
            <text:p>0,00000844907407407402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4]+73" office:value-type="float" office:value="6862" calcext:value-type="float">
            <text:p>6862</text:p>
          </table:table-cell>
          <table:table-cell office:value-type="float" office:value="8640000" calcext:value-type="float">
            <text:p>8640000</text:p>
          </table:table-cell>
          <table:table-cell table:formula="of:=[.B95]/[.C95]" office:value-type="float" office:value="0.000794212962962963" calcext:value-type="float">
            <text:p>0,00079421296296296300</text:p>
          </table:table-cell>
          <table:table-cell table:formula="of:=[.D96]-[.D95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5]+73" office:value-type="float" office:value="6935" calcext:value-type="float">
            <text:p>6935</text:p>
          </table:table-cell>
          <table:table-cell office:value-type="float" office:value="8640000" calcext:value-type="float">
            <text:p>8640000</text:p>
          </table:table-cell>
          <table:table-cell table:formula="of:=[.B96]/[.C96]" office:value-type="float" office:value="0.000802662037037037" calcext:value-type="float">
            <text:p>0,00080266203703703700</text:p>
          </table:table-cell>
          <table:table-cell table:formula="of:=[.D97]-[.D96]" office:value-type="float" office:value="0.00000844907407407402" calcext:value-type="float">
            <text:p>0,00000844907407407402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6]+73" office:value-type="float" office:value="7008" calcext:value-type="float">
            <text:p>7008</text:p>
          </table:table-cell>
          <table:table-cell office:value-type="float" office:value="8640000" calcext:value-type="float">
            <text:p>8640000</text:p>
          </table:table-cell>
          <table:table-cell table:formula="of:=[.B97]/[.C97]" office:value-type="float" office:value="0.000811111111111111" calcext:value-type="float">
            <text:p>0,00081111111111111100</text:p>
          </table:table-cell>
          <table:table-cell table:formula="of:=[.D98]-[.D97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7]+73" office:value-type="float" office:value="7081" calcext:value-type="float">
            <text:p>7081</text:p>
          </table:table-cell>
          <table:table-cell office:value-type="float" office:value="8640000" calcext:value-type="float">
            <text:p>8640000</text:p>
          </table:table-cell>
          <table:table-cell table:formula="of:=[.B98]/[.C98]" office:value-type="float" office:value="0.000819560185185185" calcext:value-type="float">
            <text:p>0,00081956018518518500</text:p>
          </table:table-cell>
          <table:table-cell table:formula="of:=[.D99]-[.D98]" office:value-type="float" office:value="0.00000844907407407402" calcext:value-type="float">
            <text:p>0,00000844907407407402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8]+73" office:value-type="float" office:value="7154" calcext:value-type="float">
            <text:p>7154</text:p>
          </table:table-cell>
          <table:table-cell office:value-type="float" office:value="8640000" calcext:value-type="float">
            <text:p>8640000</text:p>
          </table:table-cell>
          <table:table-cell table:formula="of:=[.B99]/[.C99]" office:value-type="float" office:value="0.000828009259259259" calcext:value-type="float">
            <text:p>0,00082800925925925900</text:p>
          </table:table-cell>
          <table:table-cell table:formula="of:=[.D100]-[.D99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9]+73" office:value-type="float" office:value="7227" calcext:value-type="float">
            <text:p>7227</text:p>
          </table:table-cell>
          <table:table-cell office:value-type="float" office:value="8640000" calcext:value-type="float">
            <text:p>8640000</text:p>
          </table:table-cell>
          <table:table-cell table:formula="of:=[.B100]/[.C100]" office:value-type="float" office:value="0.000836458333333333" calcext:value-type="float">
            <text:p>0,00083645833333333300</text:p>
          </table:table-cell>
          <table:table-cell table:formula="of:=[.D101]-[.D100]" office:value-type="float" office:value="0.00000844907407407402" calcext:value-type="float">
            <text:p>0,00000844907407407402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0]+73" office:value-type="float" office:value="7300" calcext:value-type="float">
            <text:p>7300</text:p>
          </table:table-cell>
          <table:table-cell office:value-type="float" office:value="8640000" calcext:value-type="float">
            <text:p>8640000</text:p>
          </table:table-cell>
          <table:table-cell table:formula="of:=[.B101]/[.C101]" office:value-type="float" office:value="0.000844907407407407" calcext:value-type="float">
            <text:p>0,00084490740740740700</text:p>
          </table:table-cell>
          <table:table-cell table:formula="of:=[.D102]-[.D101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1]+73" office:value-type="float" office:value="7373" calcext:value-type="float">
            <text:p>7373</text:p>
          </table:table-cell>
          <table:table-cell office:value-type="float" office:value="8640000" calcext:value-type="float">
            <text:p>8640000</text:p>
          </table:table-cell>
          <table:table-cell table:formula="of:=[.B102]/[.C102]" office:value-type="float" office:value="0.000853356481481482" calcext:value-type="float">
            <text:p>0,00085335648148148200</text:p>
          </table:table-cell>
          <table:table-cell table:formula="of:=[.D103]-[.D102]" office:value-type="float" office:value="0.00000844907407407402" calcext:value-type="float">
            <text:p>0,00000844907407407402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2]+73" office:value-type="float" office:value="7446" calcext:value-type="float">
            <text:p>7446</text:p>
          </table:table-cell>
          <table:table-cell office:value-type="float" office:value="8640000" calcext:value-type="float">
            <text:p>8640000</text:p>
          </table:table-cell>
          <table:table-cell table:formula="of:=[.B103]/[.C103]" office:value-type="float" office:value="0.000861805555555556" calcext:value-type="float">
            <text:p>0,00086180555555555600</text:p>
          </table:table-cell>
          <table:table-cell table:formula="of:=[.D104]-[.D103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3]+73" office:value-type="float" office:value="7519" calcext:value-type="float">
            <text:p>7519</text:p>
          </table:table-cell>
          <table:table-cell office:value-type="float" office:value="8640000" calcext:value-type="float">
            <text:p>8640000</text:p>
          </table:table-cell>
          <table:table-cell table:formula="of:=[.B104]/[.C104]" office:value-type="float" office:value="0.00087025462962963" calcext:value-type="float">
            <text:p>0,00087025462962963000</text:p>
          </table:table-cell>
          <table:table-cell table:formula="of:=[.D105]-[.D104]" office:value-type="float" office:value="0.00000844907407407402" calcext:value-type="float">
            <text:p>0,00000844907407407402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4]+73" office:value-type="float" office:value="7592" calcext:value-type="float">
            <text:p>7592</text:p>
          </table:table-cell>
          <table:table-cell office:value-type="float" office:value="8640000" calcext:value-type="float">
            <text:p>8640000</text:p>
          </table:table-cell>
          <table:table-cell table:formula="of:=[.B105]/[.C105]" office:value-type="float" office:value="0.000878703703703704" calcext:value-type="float">
            <text:p>0,00087870370370370400</text:p>
          </table:table-cell>
          <table:table-cell table:formula="of:=[.D106]-[.D105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5]+73" office:value-type="float" office:value="7665" calcext:value-type="float">
            <text:p>7665</text:p>
          </table:table-cell>
          <table:table-cell office:value-type="float" office:value="8640000" calcext:value-type="float">
            <text:p>8640000</text:p>
          </table:table-cell>
          <table:table-cell table:formula="of:=[.B106]/[.C106]" office:value-type="float" office:value="0.000887152777777778" calcext:value-type="float">
            <text:p>0,00088715277777777800</text:p>
          </table:table-cell>
          <table:table-cell table:formula="of:=[.D107]-[.D106]" office:value-type="float" office:value="0.00000844907407407402" calcext:value-type="float">
            <text:p>0,00000844907407407402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6]+73" office:value-type="float" office:value="7738" calcext:value-type="float">
            <text:p>7738</text:p>
          </table:table-cell>
          <table:table-cell office:value-type="float" office:value="8640000" calcext:value-type="float">
            <text:p>8640000</text:p>
          </table:table-cell>
          <table:table-cell table:formula="of:=[.B107]/[.C107]" office:value-type="float" office:value="0.000895601851851852" calcext:value-type="float">
            <text:p>0,00089560185185185200</text:p>
          </table:table-cell>
          <table:table-cell table:formula="of:=[.D108]-[.D107]" office:value-type="float" office:value="0.00000844907407407402" calcext:value-type="float">
            <text:p>0,00000844907407407402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7]+73" office:value-type="float" office:value="7811" calcext:value-type="float">
            <text:p>7811</text:p>
          </table:table-cell>
          <table:table-cell office:value-type="float" office:value="8640000" calcext:value-type="float">
            <text:p>8640000</text:p>
          </table:table-cell>
          <table:table-cell table:formula="of:=[.B108]/[.C108]" office:value-type="float" office:value="0.000904050925925926" calcext:value-type="float">
            <text:p>0,00090405092592592600</text:p>
          </table:table-cell>
          <table:table-cell table:formula="of:=[.D109]-[.D108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8]+73" office:value-type="float" office:value="7884" calcext:value-type="float">
            <text:p>7884</text:p>
          </table:table-cell>
          <table:table-cell office:value-type="float" office:value="8640000" calcext:value-type="float">
            <text:p>8640000</text:p>
          </table:table-cell>
          <table:table-cell table:formula="of:=[.B109]/[.C109]" office:value-type="float" office:value="0.0009125" calcext:value-type="float">
            <text:p>0,00091250000000000000</text:p>
          </table:table-cell>
          <table:table-cell table:formula="of:=[.D110]-[.D109]" office:value-type="float" office:value="0.00000844907407407402" calcext:value-type="float">
            <text:p>0,00000844907407407402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9]+73" office:value-type="float" office:value="7957" calcext:value-type="float">
            <text:p>7957</text:p>
          </table:table-cell>
          <table:table-cell office:value-type="float" office:value="8640000" calcext:value-type="float">
            <text:p>8640000</text:p>
          </table:table-cell>
          <table:table-cell table:formula="of:=[.B110]/[.C110]" office:value-type="float" office:value="0.000920949074074074" calcext:value-type="float">
            <text:p>0,00092094907407407400</text:p>
          </table:table-cell>
          <table:table-cell table:formula="of:=[.D111]-[.D110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0]+73" office:value-type="float" office:value="8030" calcext:value-type="float">
            <text:p>8030</text:p>
          </table:table-cell>
          <table:table-cell office:value-type="float" office:value="8640000" calcext:value-type="float">
            <text:p>8640000</text:p>
          </table:table-cell>
          <table:table-cell table:formula="of:=[.B111]/[.C111]" office:value-type="float" office:value="0.000929398148148148" calcext:value-type="float">
            <text:p>0,00092939814814814800</text:p>
          </table:table-cell>
          <table:table-cell table:formula="of:=[.D112]-[.D111]" office:value-type="float" office:value="0.00000844907407407402" calcext:value-type="float">
            <text:p>0,00000844907407407402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1]+73" office:value-type="float" office:value="8103" calcext:value-type="float">
            <text:p>8103</text:p>
          </table:table-cell>
          <table:table-cell office:value-type="float" office:value="8640000" calcext:value-type="float">
            <text:p>8640000</text:p>
          </table:table-cell>
          <table:table-cell table:formula="of:=[.B112]/[.C112]" office:value-type="float" office:value="0.000937847222222222" calcext:value-type="float">
            <text:p>0,00093784722222222200</text:p>
          </table:table-cell>
          <table:table-cell table:formula="of:=[.D113]-[.D112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2]+73" office:value-type="float" office:value="8176" calcext:value-type="float">
            <text:p>8176</text:p>
          </table:table-cell>
          <table:table-cell office:value-type="float" office:value="8640000" calcext:value-type="float">
            <text:p>8640000</text:p>
          </table:table-cell>
          <table:table-cell table:formula="of:=[.B113]/[.C113]" office:value-type="float" office:value="0.000946296296296296" calcext:value-type="float">
            <text:p>0,00094629629629629600</text:p>
          </table:table-cell>
          <table:table-cell table:formula="of:=[.D114]-[.D113]" office:value-type="float" office:value="0.00000844907407407402" calcext:value-type="float">
            <text:p>0,00000844907407407402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3]+73" office:value-type="float" office:value="8249" calcext:value-type="float">
            <text:p>8249</text:p>
          </table:table-cell>
          <table:table-cell office:value-type="float" office:value="8640000" calcext:value-type="float">
            <text:p>8640000</text:p>
          </table:table-cell>
          <table:table-cell table:formula="of:=[.B114]/[.C114]" office:value-type="float" office:value="0.00095474537037037" calcext:value-type="float">
            <text:p>0,00095474537037037000</text:p>
          </table:table-cell>
          <table:table-cell table:formula="of:=[.D115]-[.D114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4]+73" office:value-type="float" office:value="8322" calcext:value-type="float">
            <text:p>8322</text:p>
          </table:table-cell>
          <table:table-cell office:value-type="float" office:value="8640000" calcext:value-type="float">
            <text:p>8640000</text:p>
          </table:table-cell>
          <table:table-cell table:formula="of:=[.B115]/[.C115]" office:value-type="float" office:value="0.000963194444444445" calcext:value-type="float">
            <text:p>0,00096319444444444500</text:p>
          </table:table-cell>
          <table:table-cell table:formula="of:=[.D116]-[.D115]" office:value-type="float" office:value="0.00000844907407407402" calcext:value-type="float">
            <text:p>0,00000844907407407402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5]+73" office:value-type="float" office:value="8395" calcext:value-type="float">
            <text:p>8395</text:p>
          </table:table-cell>
          <table:table-cell office:value-type="float" office:value="8640000" calcext:value-type="float">
            <text:p>8640000</text:p>
          </table:table-cell>
          <table:table-cell table:formula="of:=[.B116]/[.C116]" office:value-type="float" office:value="0.000971643518518519" calcext:value-type="float">
            <text:p>0,00097164351851851900</text:p>
          </table:table-cell>
          <table:table-cell table:formula="of:=[.D117]-[.D116]" office:value-type="float" office:value="0.00000844907407407402" calcext:value-type="float">
            <text:p>0,00000844907407407402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6]+73" office:value-type="float" office:value="8468" calcext:value-type="float">
            <text:p>8468</text:p>
          </table:table-cell>
          <table:table-cell office:value-type="float" office:value="8640000" calcext:value-type="float">
            <text:p>8640000</text:p>
          </table:table-cell>
          <table:table-cell table:formula="of:=[.B117]/[.C117]" office:value-type="float" office:value="0.000980092592592593" calcext:value-type="float">
            <text:p>0,00098009259259259300</text:p>
          </table:table-cell>
          <table:table-cell table:formula="of:=[.D118]-[.D117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7]+73" office:value-type="float" office:value="8541" calcext:value-type="float">
            <text:p>8541</text:p>
          </table:table-cell>
          <table:table-cell office:value-type="float" office:value="8640000" calcext:value-type="float">
            <text:p>8640000</text:p>
          </table:table-cell>
          <table:table-cell table:formula="of:=[.B118]/[.C118]" office:value-type="float" office:value="0.000988541666666667" calcext:value-type="float">
            <text:p>0,00098854166666666700</text:p>
          </table:table-cell>
          <table:table-cell table:formula="of:=[.D119]-[.D118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8]+73" office:value-type="float" office:value="8614" calcext:value-type="float">
            <text:p>8614</text:p>
          </table:table-cell>
          <table:table-cell office:value-type="float" office:value="8640000" calcext:value-type="float">
            <text:p>8640000</text:p>
          </table:table-cell>
          <table:table-cell table:formula="of:=[.B119]/[.C119]" office:value-type="float" office:value="0.000996990740740741" calcext:value-type="float">
            <text:p>0,00099699074074074100</text:p>
          </table:table-cell>
          <table:table-cell table:formula="of:=[.D120]-[.D119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9]+73" office:value-type="float" office:value="8687" calcext:value-type="float">
            <text:p>8687</text:p>
          </table:table-cell>
          <table:table-cell office:value-type="float" office:value="8640000" calcext:value-type="float">
            <text:p>8640000</text:p>
          </table:table-cell>
          <table:table-cell table:formula="of:=[.B120]/[.C120]" office:value-type="float" office:value="0.00100543981481482" calcext:value-type="float">
            <text:p>0,00100543981481482000</text:p>
          </table:table-cell>
          <table:table-cell table:formula="of:=[.D121]-[.D120]" office:value-type="float" office:value="0.00000844907407407392" calcext:value-type="float">
            <text:p>0,00000844907407407392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0]+73" office:value-type="float" office:value="8760" calcext:value-type="float">
            <text:p>8760</text:p>
          </table:table-cell>
          <table:table-cell office:value-type="float" office:value="8640000" calcext:value-type="float">
            <text:p>8640000</text:p>
          </table:table-cell>
          <table:table-cell table:formula="of:=[.B121]/[.C121]" office:value-type="float" office:value="0.00101388888888889" calcext:value-type="float">
            <text:p>0,00101388888888889000</text:p>
          </table:table-cell>
          <table:table-cell table:formula="of:=[.D122]-[.D121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1]+73" office:value-type="float" office:value="8833" calcext:value-type="float">
            <text:p>8833</text:p>
          </table:table-cell>
          <table:table-cell office:value-type="float" office:value="8640000" calcext:value-type="float">
            <text:p>8640000</text:p>
          </table:table-cell>
          <table:table-cell table:formula="of:=[.B122]/[.C122]" office:value-type="float" office:value="0.00102233796296296" calcext:value-type="float">
            <text:p>0,00102233796296296000</text:p>
          </table:table-cell>
          <table:table-cell table:formula="of:=[.D123]-[.D122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2]+73" office:value-type="float" office:value="8906" calcext:value-type="float">
            <text:p>8906</text:p>
          </table:table-cell>
          <table:table-cell office:value-type="float" office:value="8640000" calcext:value-type="float">
            <text:p>8640000</text:p>
          </table:table-cell>
          <table:table-cell table:formula="of:=[.B123]/[.C123]" office:value-type="float" office:value="0.00103078703703704" calcext:value-type="float">
            <text:p>0,00103078703703704000</text:p>
          </table:table-cell>
          <table:table-cell table:formula="of:=[.D124]-[.D123]" office:value-type="float" office:value="0.00000844907407407392" calcext:value-type="float">
            <text:p>0,00000844907407407392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3]+73" office:value-type="float" office:value="8979" calcext:value-type="float">
            <text:p>8979</text:p>
          </table:table-cell>
          <table:table-cell office:value-type="float" office:value="8640000" calcext:value-type="float">
            <text:p>8640000</text:p>
          </table:table-cell>
          <table:table-cell table:formula="of:=[.B124]/[.C124]" office:value-type="float" office:value="0.00103923611111111" calcext:value-type="float">
            <text:p>0,00103923611111111000</text:p>
          </table:table-cell>
          <table:table-cell table:formula="of:=[.D125]-[.D124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4]+73" office:value-type="float" office:value="9052" calcext:value-type="float">
            <text:p>9052</text:p>
          </table:table-cell>
          <table:table-cell office:value-type="float" office:value="8640000" calcext:value-type="float">
            <text:p>8640000</text:p>
          </table:table-cell>
          <table:table-cell table:formula="of:=[.B125]/[.C125]" office:value-type="float" office:value="0.00104768518518519" calcext:value-type="float">
            <text:p>0,00104768518518519000</text:p>
          </table:table-cell>
          <table:table-cell table:formula="of:=[.D126]-[.D125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5]+73" office:value-type="float" office:value="9125" calcext:value-type="float">
            <text:p>9125</text:p>
          </table:table-cell>
          <table:table-cell office:value-type="float" office:value="8640000" calcext:value-type="float">
            <text:p>8640000</text:p>
          </table:table-cell>
          <table:table-cell table:formula="of:=[.B126]/[.C126]" office:value-type="float" office:value="0.00105613425925926" calcext:value-type="float">
            <text:p>0,00105613425925926000</text:p>
          </table:table-cell>
          <table:table-cell table:formula="of:=[.D127]-[.D126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6]+73" office:value-type="float" office:value="9198" calcext:value-type="float">
            <text:p>9198</text:p>
          </table:table-cell>
          <table:table-cell office:value-type="float" office:value="8640000" calcext:value-type="float">
            <text:p>8640000</text:p>
          </table:table-cell>
          <table:table-cell table:formula="of:=[.B127]/[.C127]" office:value-type="float" office:value="0.00106458333333333" calcext:value-type="float">
            <text:p>0,00106458333333333000</text:p>
          </table:table-cell>
          <table:table-cell table:formula="of:=[.D128]-[.D127]" office:value-type="float" office:value="0.00000844907407407392" calcext:value-type="float">
            <text:p>0,00000844907407407392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7]+73" office:value-type="float" office:value="9271" calcext:value-type="float">
            <text:p>9271</text:p>
          </table:table-cell>
          <table:table-cell office:value-type="float" office:value="8640000" calcext:value-type="float">
            <text:p>8640000</text:p>
          </table:table-cell>
          <table:table-cell table:formula="of:=[.B128]/[.C128]" office:value-type="float" office:value="0.00107303240740741" calcext:value-type="float">
            <text:p>0,00107303240740741000</text:p>
          </table:table-cell>
          <table:table-cell table:formula="of:=[.D129]-[.D128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8]+73" office:value-type="float" office:value="9344" calcext:value-type="float">
            <text:p>9344</text:p>
          </table:table-cell>
          <table:table-cell office:value-type="float" office:value="8640000" calcext:value-type="float">
            <text:p>8640000</text:p>
          </table:table-cell>
          <table:table-cell table:formula="of:=[.B129]/[.C129]" office:value-type="float" office:value="0.00108148148148148" calcext:value-type="float">
            <text:p>0,00108148148148148000</text:p>
          </table:table-cell>
          <table:table-cell table:formula="of:=[.D130]-[.D129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9]+73" office:value-type="float" office:value="9417" calcext:value-type="float">
            <text:p>9417</text:p>
          </table:table-cell>
          <table:table-cell office:value-type="float" office:value="8640000" calcext:value-type="float">
            <text:p>8640000</text:p>
          </table:table-cell>
          <table:table-cell table:formula="of:=[.B130]/[.C130]" office:value-type="float" office:value="0.00108993055555556" calcext:value-type="float">
            <text:p>0,00108993055555556000</text:p>
          </table:table-cell>
          <table:table-cell table:formula="of:=[.D131]-[.D130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0]+73" office:value-type="float" office:value="9490" calcext:value-type="float">
            <text:p>9490</text:p>
          </table:table-cell>
          <table:table-cell office:value-type="float" office:value="8640000" calcext:value-type="float">
            <text:p>8640000</text:p>
          </table:table-cell>
          <table:table-cell table:formula="of:=[.B131]/[.C131]" office:value-type="float" office:value="0.00109837962962963" calcext:value-type="float">
            <text:p>0,00109837962962963000</text:p>
          </table:table-cell>
          <table:table-cell table:formula="of:=[.D132]-[.D131]" office:value-type="float" office:value="0.00000844907407407392" calcext:value-type="float">
            <text:p>0,00000844907407407392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1]+73" office:value-type="float" office:value="9563" calcext:value-type="float">
            <text:p>9563</text:p>
          </table:table-cell>
          <table:table-cell office:value-type="float" office:value="8640000" calcext:value-type="float">
            <text:p>8640000</text:p>
          </table:table-cell>
          <table:table-cell table:formula="of:=[.B132]/[.C132]" office:value-type="float" office:value="0.0011068287037037" calcext:value-type="float">
            <text:p>0,00110682870370370000</text:p>
          </table:table-cell>
          <table:table-cell table:formula="of:=[.D133]-[.D132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2]+73" office:value-type="float" office:value="9636" calcext:value-type="float">
            <text:p>9636</text:p>
          </table:table-cell>
          <table:table-cell office:value-type="float" office:value="8640000" calcext:value-type="float">
            <text:p>8640000</text:p>
          </table:table-cell>
          <table:table-cell table:formula="of:=[.B133]/[.C133]" office:value-type="float" office:value="0.00111527777777778" calcext:value-type="float">
            <text:p>0,00111527777777778000</text:p>
          </table:table-cell>
          <table:table-cell table:formula="of:=[.D134]-[.D133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3]+73" office:value-type="float" office:value="9709" calcext:value-type="float">
            <text:p>9709</text:p>
          </table:table-cell>
          <table:table-cell office:value-type="float" office:value="8640000" calcext:value-type="float">
            <text:p>8640000</text:p>
          </table:table-cell>
          <table:table-cell table:formula="of:=[.B134]/[.C134]" office:value-type="float" office:value="0.00112372685185185" calcext:value-type="float">
            <text:p>0,00112372685185185000</text:p>
          </table:table-cell>
          <table:table-cell table:formula="of:=[.D135]-[.D134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4]+73" office:value-type="float" office:value="9782" calcext:value-type="float">
            <text:p>9782</text:p>
          </table:table-cell>
          <table:table-cell office:value-type="float" office:value="8640000" calcext:value-type="float">
            <text:p>8640000</text:p>
          </table:table-cell>
          <table:table-cell table:formula="of:=[.B135]/[.C135]" office:value-type="float" office:value="0.00113217592592593" calcext:value-type="float">
            <text:p>0,00113217592592593000</text:p>
          </table:table-cell>
          <table:table-cell table:formula="of:=[.D136]-[.D135]" office:value-type="float" office:value="0.00000844907407407392" calcext:value-type="float">
            <text:p>0,00000844907407407392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5]+73" office:value-type="float" office:value="9855" calcext:value-type="float">
            <text:p>9855</text:p>
          </table:table-cell>
          <table:table-cell office:value-type="float" office:value="8640000" calcext:value-type="float">
            <text:p>8640000</text:p>
          </table:table-cell>
          <table:table-cell table:formula="of:=[.B136]/[.C136]" office:value-type="float" office:value="0.001140625" calcext:value-type="float">
            <text:p>0,00114062500000000000</text:p>
          </table:table-cell>
          <table:table-cell table:formula="of:=[.D137]-[.D136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6]+73" office:value-type="float" office:value="9928" calcext:value-type="float">
            <text:p>9928</text:p>
          </table:table-cell>
          <table:table-cell office:value-type="float" office:value="8640000" calcext:value-type="float">
            <text:p>8640000</text:p>
          </table:table-cell>
          <table:table-cell table:formula="of:=[.B137]/[.C137]" office:value-type="float" office:value="0.00114907407407407" calcext:value-type="float">
            <text:p>0,00114907407407407000</text:p>
          </table:table-cell>
          <table:table-cell table:formula="of:=[.D138]-[.D137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7]+73" office:value-type="float" office:value="10001" calcext:value-type="float">
            <text:p>10001</text:p>
          </table:table-cell>
          <table:table-cell office:value-type="float" office:value="8640000" calcext:value-type="float">
            <text:p>8640000</text:p>
          </table:table-cell>
          <table:table-cell table:formula="of:=[.B138]/[.C138]" office:value-type="float" office:value="0.00115752314814815" calcext:value-type="float">
            <text:p>0,00115752314814815000</text:p>
          </table:table-cell>
          <table:table-cell table:formula="of:=[.D139]-[.D138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8]+73" office:value-type="float" office:value="10074" calcext:value-type="float">
            <text:p>10074</text:p>
          </table:table-cell>
          <table:table-cell office:value-type="float" office:value="8640000" calcext:value-type="float">
            <text:p>8640000</text:p>
          </table:table-cell>
          <table:table-cell table:formula="of:=[.B139]/[.C139]" office:value-type="float" office:value="0.00116597222222222" calcext:value-type="float">
            <text:p>0,00116597222222222000</text:p>
          </table:table-cell>
          <table:table-cell table:formula="of:=[.D140]-[.D139]" office:value-type="float" office:value="0.00000844907407407392" calcext:value-type="float">
            <text:p>0,00000844907407407392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9]+73" office:value-type="float" office:value="10147" calcext:value-type="float">
            <text:p>10147</text:p>
          </table:table-cell>
          <table:table-cell office:value-type="float" office:value="8640000" calcext:value-type="float">
            <text:p>8640000</text:p>
          </table:table-cell>
          <table:table-cell table:formula="of:=[.B140]/[.C140]" office:value-type="float" office:value="0.0011744212962963" calcext:value-type="float">
            <text:p>0,00117442129629630000</text:p>
          </table:table-cell>
          <table:table-cell table:formula="of:=[.D141]-[.D140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0]+73" office:value-type="float" office:value="10220" calcext:value-type="float">
            <text:p>10220</text:p>
          </table:table-cell>
          <table:table-cell office:value-type="float" office:value="8640000" calcext:value-type="float">
            <text:p>8640000</text:p>
          </table:table-cell>
          <table:table-cell table:formula="of:=[.B141]/[.C141]" office:value-type="float" office:value="0.00118287037037037" calcext:value-type="float">
            <text:p>0,00118287037037037000</text:p>
          </table:table-cell>
          <table:table-cell table:formula="of:=[.D142]-[.D141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1]+73" office:value-type="float" office:value="10293" calcext:value-type="float">
            <text:p>10293</text:p>
          </table:table-cell>
          <table:table-cell office:value-type="float" office:value="8640000" calcext:value-type="float">
            <text:p>8640000</text:p>
          </table:table-cell>
          <table:table-cell table:formula="of:=[.B142]/[.C142]" office:value-type="float" office:value="0.00119131944444444" calcext:value-type="float">
            <text:p>0,00119131944444444000</text:p>
          </table:table-cell>
          <table:table-cell table:formula="of:=[.D143]-[.D142]" office:value-type="float" office:value="0.00000844907407407392" calcext:value-type="float">
            <text:p>0,00000844907407407392</text:p>
          </table:table-cell>
          <table:table-cell table:number-columns-repeated="5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2]+73" office:value-type="float" office:value="10366" calcext:value-type="float">
            <text:p>10366</text:p>
          </table:table-cell>
          <table:table-cell office:value-type="float" office:value="8640000" calcext:value-type="float">
            <text:p>8640000</text:p>
          </table:table-cell>
          <table:table-cell table:formula="of:=[.B143]/[.C143]" office:value-type="float" office:value="0.00119976851851852" calcext:value-type="float">
            <text:p>0,00119976851851852000</text:p>
          </table:table-cell>
          <table:table-cell table:formula="of:=[.D144]-[.D143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3]+73" office:value-type="float" office:value="10439" calcext:value-type="float">
            <text:p>10439</text:p>
          </table:table-cell>
          <table:table-cell office:value-type="float" office:value="8640000" calcext:value-type="float">
            <text:p>8640000</text:p>
          </table:table-cell>
          <table:table-cell table:formula="of:=[.B144]/[.C144]" office:value-type="float" office:value="0.00120821759259259" calcext:value-type="float">
            <text:p>0,00120821759259259000</text:p>
          </table:table-cell>
          <table:table-cell table:formula="of:=[.D145]-[.D144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4]+73" office:value-type="float" office:value="10512" calcext:value-type="float">
            <text:p>10512</text:p>
          </table:table-cell>
          <table:table-cell office:value-type="float" office:value="8640000" calcext:value-type="float">
            <text:p>8640000</text:p>
          </table:table-cell>
          <table:table-cell table:formula="of:=[.B145]/[.C145]" office:value-type="float" office:value="0.00121666666666667" calcext:value-type="float">
            <text:p>0,00121666666666667000</text:p>
          </table:table-cell>
          <table:table-cell table:formula="of:=[.D146]-[.D145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5]+73" office:value-type="float" office:value="10585" calcext:value-type="float">
            <text:p>10585</text:p>
          </table:table-cell>
          <table:table-cell office:value-type="float" office:value="8640000" calcext:value-type="float">
            <text:p>8640000</text:p>
          </table:table-cell>
          <table:table-cell table:formula="of:=[.B146]/[.C146]" office:value-type="float" office:value="0.00122511574074074" calcext:value-type="float">
            <text:p>0,00122511574074074000</text:p>
          </table:table-cell>
          <table:table-cell table:formula="of:=[.D147]-[.D146]" office:value-type="float" office:value="0.00000844907407407392" calcext:value-type="float">
            <text:p>0,00000844907407407392</text:p>
          </table:table-cell>
          <table:table-cell table:number-columns-repeated="5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6]+73" office:value-type="float" office:value="10658" calcext:value-type="float">
            <text:p>10658</text:p>
          </table:table-cell>
          <table:table-cell office:value-type="float" office:value="8640000" calcext:value-type="float">
            <text:p>8640000</text:p>
          </table:table-cell>
          <table:table-cell table:formula="of:=[.B147]/[.C147]" office:value-type="float" office:value="0.00123356481481481" calcext:value-type="float">
            <text:p>0,00123356481481481000</text:p>
          </table:table-cell>
          <table:table-cell table:formula="of:=[.D148]-[.D147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7]+73" office:value-type="float" office:value="10731" calcext:value-type="float">
            <text:p>10731</text:p>
          </table:table-cell>
          <table:table-cell office:value-type="float" office:value="8640000" calcext:value-type="float">
            <text:p>8640000</text:p>
          </table:table-cell>
          <table:table-cell table:formula="of:=[.B148]/[.C148]" office:value-type="float" office:value="0.00124201388888889" calcext:value-type="float">
            <text:p>0,00124201388888889000</text:p>
          </table:table-cell>
          <table:table-cell table:formula="of:=[.D149]-[.D148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8]+73" office:value-type="float" office:value="10804" calcext:value-type="float">
            <text:p>10804</text:p>
          </table:table-cell>
          <table:table-cell office:value-type="float" office:value="8640000" calcext:value-type="float">
            <text:p>8640000</text:p>
          </table:table-cell>
          <table:table-cell table:formula="of:=[.B149]/[.C149]" office:value-type="float" office:value="0.00125046296296296" calcext:value-type="float">
            <text:p>0,00125046296296296000</text:p>
          </table:table-cell>
          <table:table-cell table:formula="of:=[.D150]-[.D149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9]+73" office:value-type="float" office:value="10877" calcext:value-type="float">
            <text:p>10877</text:p>
          </table:table-cell>
          <table:table-cell office:value-type="float" office:value="8640000" calcext:value-type="float">
            <text:p>8640000</text:p>
          </table:table-cell>
          <table:table-cell table:formula="of:=[.B150]/[.C150]" office:value-type="float" office:value="0.00125891203703704" calcext:value-type="float">
            <text:p>0,00125891203703704000</text:p>
          </table:table-cell>
          <table:table-cell table:formula="of:=[.D151]-[.D150]" office:value-type="float" office:value="0.00000844907407407392" calcext:value-type="float">
            <text:p>0,00000844907407407392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0]+73" office:value-type="float" office:value="10950" calcext:value-type="float">
            <text:p>10950</text:p>
          </table:table-cell>
          <table:table-cell office:value-type="float" office:value="8640000" calcext:value-type="float">
            <text:p>8640000</text:p>
          </table:table-cell>
          <table:table-cell table:formula="of:=[.B151]/[.C151]" office:value-type="float" office:value="0.00126736111111111" calcext:value-type="float">
            <text:p>0,00126736111111111000</text:p>
          </table:table-cell>
          <table:table-cell table:formula="of:=[.D152]-[.D151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1]+73" office:value-type="float" office:value="11023" calcext:value-type="float">
            <text:p>11023</text:p>
          </table:table-cell>
          <table:table-cell office:value-type="float" office:value="8640000" calcext:value-type="float">
            <text:p>8640000</text:p>
          </table:table-cell>
          <table:table-cell table:formula="of:=[.B152]/[.C152]" office:value-type="float" office:value="0.00127581018518519" calcext:value-type="float">
            <text:p>0,00127581018518519000</text:p>
          </table:table-cell>
          <table:table-cell table:formula="of:=[.D153]-[.D152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2]+73" office:value-type="float" office:value="11096" calcext:value-type="float">
            <text:p>11096</text:p>
          </table:table-cell>
          <table:table-cell office:value-type="float" office:value="8640000" calcext:value-type="float">
            <text:p>8640000</text:p>
          </table:table-cell>
          <table:table-cell table:formula="of:=[.B153]/[.C153]" office:value-type="float" office:value="0.00128425925925926" calcext:value-type="float">
            <text:p>0,00128425925925926000</text:p>
          </table:table-cell>
          <table:table-cell table:formula="of:=[.D154]-[.D153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3]+73" office:value-type="float" office:value="11169" calcext:value-type="float">
            <text:p>11169</text:p>
          </table:table-cell>
          <table:table-cell office:value-type="float" office:value="8640000" calcext:value-type="float">
            <text:p>8640000</text:p>
          </table:table-cell>
          <table:table-cell table:formula="of:=[.B154]/[.C154]" office:value-type="float" office:value="0.00129270833333333" calcext:value-type="float">
            <text:p>0,00129270833333333000</text:p>
          </table:table-cell>
          <table:table-cell table:formula="of:=[.D155]-[.D154]" office:value-type="float" office:value="0.00000844907407407392" calcext:value-type="float">
            <text:p>0,00000844907407407392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4]+73" office:value-type="float" office:value="11242" calcext:value-type="float">
            <text:p>11242</text:p>
          </table:table-cell>
          <table:table-cell office:value-type="float" office:value="8640000" calcext:value-type="float">
            <text:p>8640000</text:p>
          </table:table-cell>
          <table:table-cell table:formula="of:=[.B155]/[.C155]" office:value-type="float" office:value="0.00130115740740741" calcext:value-type="float">
            <text:p>0,00130115740740741000</text:p>
          </table:table-cell>
          <table:table-cell table:formula="of:=[.D156]-[.D155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5]+73" office:value-type="float" office:value="11315" calcext:value-type="float">
            <text:p>11315</text:p>
          </table:table-cell>
          <table:table-cell office:value-type="float" office:value="8640000" calcext:value-type="float">
            <text:p>8640000</text:p>
          </table:table-cell>
          <table:table-cell table:formula="of:=[.B156]/[.C156]" office:value-type="float" office:value="0.00130960648148148" calcext:value-type="float">
            <text:p>0,00130960648148148000</text:p>
          </table:table-cell>
          <table:table-cell table:formula="of:=[.D157]-[.D156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6]+73" office:value-type="float" office:value="11388" calcext:value-type="float">
            <text:p>11388</text:p>
          </table:table-cell>
          <table:table-cell office:value-type="float" office:value="8640000" calcext:value-type="float">
            <text:p>8640000</text:p>
          </table:table-cell>
          <table:table-cell table:formula="of:=[.B157]/[.C157]" office:value-type="float" office:value="0.00131805555555556" calcext:value-type="float">
            <text:p>0,00131805555555556000</text:p>
          </table:table-cell>
          <table:table-cell table:formula="of:=[.D158]-[.D157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7]+73" office:value-type="float" office:value="11461" calcext:value-type="float">
            <text:p>11461</text:p>
          </table:table-cell>
          <table:table-cell office:value-type="float" office:value="8640000" calcext:value-type="float">
            <text:p>8640000</text:p>
          </table:table-cell>
          <table:table-cell table:formula="of:=[.B158]/[.C158]" office:value-type="float" office:value="0.00132650462962963" calcext:value-type="float">
            <text:p>0,00132650462962963000</text:p>
          </table:table-cell>
          <table:table-cell table:formula="of:=[.D159]-[.D158]" office:value-type="float" office:value="0.00000844907407407392" calcext:value-type="float">
            <text:p>0,00000844907407407392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8]+73" office:value-type="float" office:value="11534" calcext:value-type="float">
            <text:p>11534</text:p>
          </table:table-cell>
          <table:table-cell office:value-type="float" office:value="8640000" calcext:value-type="float">
            <text:p>8640000</text:p>
          </table:table-cell>
          <table:table-cell table:formula="of:=[.B159]/[.C159]" office:value-type="float" office:value="0.0013349537037037" calcext:value-type="float">
            <text:p>0,00133495370370370000</text:p>
          </table:table-cell>
          <table:table-cell table:formula="of:=[.D160]-[.D159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9]+73" office:value-type="float" office:value="11607" calcext:value-type="float">
            <text:p>11607</text:p>
          </table:table-cell>
          <table:table-cell office:value-type="float" office:value="8640000" calcext:value-type="float">
            <text:p>8640000</text:p>
          </table:table-cell>
          <table:table-cell table:formula="of:=[.B160]/[.C160]" office:value-type="float" office:value="0.00134340277777778" calcext:value-type="float">
            <text:p>0,00134340277777778000</text:p>
          </table:table-cell>
          <table:table-cell table:formula="of:=[.D161]-[.D160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0]+73" office:value-type="float" office:value="11680" calcext:value-type="float">
            <text:p>11680</text:p>
          </table:table-cell>
          <table:table-cell office:value-type="float" office:value="8640000" calcext:value-type="float">
            <text:p>8640000</text:p>
          </table:table-cell>
          <table:table-cell table:formula="of:=[.B161]/[.C161]" office:value-type="float" office:value="0.00135185185185185" calcext:value-type="float">
            <text:p>0,00135185185185185000</text:p>
          </table:table-cell>
          <table:table-cell table:formula="of:=[.D162]-[.D161]" office:value-type="float" office:value="0.00000844907407407392" calcext:value-type="float">
            <text:p>0,00000844907407407392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1]+73" office:value-type="float" office:value="11753" calcext:value-type="float">
            <text:p>11753</text:p>
          </table:table-cell>
          <table:table-cell office:value-type="float" office:value="8640000" calcext:value-type="float">
            <text:p>8640000</text:p>
          </table:table-cell>
          <table:table-cell table:formula="of:=[.B162]/[.C162]" office:value-type="float" office:value="0.00136030092592593" calcext:value-type="float">
            <text:p>0,00136030092592593000</text:p>
          </table:table-cell>
          <table:table-cell table:formula="of:=[.D163]-[.D162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2]+73" office:value-type="float" office:value="11826" calcext:value-type="float">
            <text:p>11826</text:p>
          </table:table-cell>
          <table:table-cell office:value-type="float" office:value="8640000" calcext:value-type="float">
            <text:p>8640000</text:p>
          </table:table-cell>
          <table:table-cell table:formula="of:=[.B163]/[.C163]" office:value-type="float" office:value="0.00136875" calcext:value-type="float">
            <text:p>0,00136875000000000000</text:p>
          </table:table-cell>
          <table:table-cell table:formula="of:=[.D164]-[.D163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3]+73" office:value-type="float" office:value="11899" calcext:value-type="float">
            <text:p>11899</text:p>
          </table:table-cell>
          <table:table-cell office:value-type="float" office:value="8640000" calcext:value-type="float">
            <text:p>8640000</text:p>
          </table:table-cell>
          <table:table-cell table:formula="of:=[.B164]/[.C164]" office:value-type="float" office:value="0.00137719907407407" calcext:value-type="float">
            <text:p>0,00137719907407407000</text:p>
          </table:table-cell>
          <table:table-cell table:formula="of:=[.D165]-[.D164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4]+73" office:value-type="float" office:value="11972" calcext:value-type="float">
            <text:p>11972</text:p>
          </table:table-cell>
          <table:table-cell office:value-type="float" office:value="8640000" calcext:value-type="float">
            <text:p>8640000</text:p>
          </table:table-cell>
          <table:table-cell table:formula="of:=[.B165]/[.C165]" office:value-type="float" office:value="0.00138564814814815" calcext:value-type="float">
            <text:p>0,00138564814814815000</text:p>
          </table:table-cell>
          <table:table-cell table:formula="of:=[.D166]-[.D165]" office:value-type="float" office:value="0.00000844907407407392" calcext:value-type="float">
            <text:p>0,00000844907407407392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5]+73" office:value-type="float" office:value="12045" calcext:value-type="float">
            <text:p>12045</text:p>
          </table:table-cell>
          <table:table-cell office:value-type="float" office:value="8640000" calcext:value-type="float">
            <text:p>8640000</text:p>
          </table:table-cell>
          <table:table-cell table:formula="of:=[.B166]/[.C166]" office:value-type="float" office:value="0.00139409722222222" calcext:value-type="float">
            <text:p>0,00139409722222222000</text:p>
          </table:table-cell>
          <table:table-cell table:formula="of:=[.D167]-[.D166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6]+73" office:value-type="float" office:value="12118" calcext:value-type="float">
            <text:p>12118</text:p>
          </table:table-cell>
          <table:table-cell office:value-type="float" office:value="8640000" calcext:value-type="float">
            <text:p>8640000</text:p>
          </table:table-cell>
          <table:table-cell table:formula="of:=[.B167]/[.C167]" office:value-type="float" office:value="0.0014025462962963" calcext:value-type="float">
            <text:p>0,00140254629629630000</text:p>
          </table:table-cell>
          <table:table-cell table:formula="of:=[.D168]-[.D167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7]+73" office:value-type="float" office:value="12191" calcext:value-type="float">
            <text:p>12191</text:p>
          </table:table-cell>
          <table:table-cell office:value-type="float" office:value="8640000" calcext:value-type="float">
            <text:p>8640000</text:p>
          </table:table-cell>
          <table:table-cell table:formula="of:=[.B168]/[.C168]" office:value-type="float" office:value="0.00141099537037037" calcext:value-type="float">
            <text:p>0,00141099537037037000</text:p>
          </table:table-cell>
          <table:table-cell table:formula="of:=[.D169]-[.D168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8]+73" office:value-type="float" office:value="12264" calcext:value-type="float">
            <text:p>12264</text:p>
          </table:table-cell>
          <table:table-cell office:value-type="float" office:value="8640000" calcext:value-type="float">
            <text:p>8640000</text:p>
          </table:table-cell>
          <table:table-cell table:formula="of:=[.B169]/[.C169]" office:value-type="float" office:value="0.00141944444444444" calcext:value-type="float">
            <text:p>0,00141944444444444000</text:p>
          </table:table-cell>
          <table:table-cell table:formula="of:=[.D170]-[.D169]" office:value-type="float" office:value="0.00000844907407407392" calcext:value-type="float">
            <text:p>0,00000844907407407392</text:p>
          </table:table-cell>
          <table:table-cell table:number-columns-repeated="5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9]+73" office:value-type="float" office:value="12337" calcext:value-type="float">
            <text:p>12337</text:p>
          </table:table-cell>
          <table:table-cell office:value-type="float" office:value="8640000" calcext:value-type="float">
            <text:p>8640000</text:p>
          </table:table-cell>
          <table:table-cell table:formula="of:=[.B170]/[.C170]" office:value-type="float" office:value="0.00142789351851852" calcext:value-type="float">
            <text:p>0,00142789351851852000</text:p>
          </table:table-cell>
          <table:table-cell table:formula="of:=[.D171]-[.D170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0]+73" office:value-type="float" office:value="12410" calcext:value-type="float">
            <text:p>12410</text:p>
          </table:table-cell>
          <table:table-cell office:value-type="float" office:value="8640000" calcext:value-type="float">
            <text:p>8640000</text:p>
          </table:table-cell>
          <table:table-cell table:formula="of:=[.B171]/[.C171]" office:value-type="float" office:value="0.00143634259259259" calcext:value-type="float">
            <text:p>0,00143634259259259000</text:p>
          </table:table-cell>
          <table:table-cell table:formula="of:=[.D172]-[.D171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1]+73" office:value-type="float" office:value="12483" calcext:value-type="float">
            <text:p>12483</text:p>
          </table:table-cell>
          <table:table-cell office:value-type="float" office:value="8640000" calcext:value-type="float">
            <text:p>8640000</text:p>
          </table:table-cell>
          <table:table-cell table:formula="of:=[.B172]/[.C172]" office:value-type="float" office:value="0.00144479166666667" calcext:value-type="float">
            <text:p>0,00144479166666667000</text:p>
          </table:table-cell>
          <table:table-cell table:formula="of:=[.D173]-[.D172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2]+73" office:value-type="float" office:value="12556" calcext:value-type="float">
            <text:p>12556</text:p>
          </table:table-cell>
          <table:table-cell office:value-type="float" office:value="8640000" calcext:value-type="float">
            <text:p>8640000</text:p>
          </table:table-cell>
          <table:table-cell table:formula="of:=[.B173]/[.C173]" office:value-type="float" office:value="0.00145324074074074" calcext:value-type="float">
            <text:p>0,00145324074074074000</text:p>
          </table:table-cell>
          <table:table-cell table:formula="of:=[.D174]-[.D173]" office:value-type="float" office:value="0.00000844907407407392" calcext:value-type="float">
            <text:p>0,00000844907407407392</text:p>
          </table:table-cell>
          <table:table-cell table:number-columns-repeated="5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3]+73" office:value-type="float" office:value="12629" calcext:value-type="float">
            <text:p>12629</text:p>
          </table:table-cell>
          <table:table-cell office:value-type="float" office:value="8640000" calcext:value-type="float">
            <text:p>8640000</text:p>
          </table:table-cell>
          <table:table-cell table:formula="of:=[.B174]/[.C174]" office:value-type="float" office:value="0.00146168981481481" calcext:value-type="float">
            <text:p>0,00146168981481481000</text:p>
          </table:table-cell>
          <table:table-cell table:formula="of:=[.D175]-[.D174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4]+73" office:value-type="float" office:value="12702" calcext:value-type="float">
            <text:p>12702</text:p>
          </table:table-cell>
          <table:table-cell office:value-type="float" office:value="8640000" calcext:value-type="float">
            <text:p>8640000</text:p>
          </table:table-cell>
          <table:table-cell table:formula="of:=[.B175]/[.C175]" office:value-type="float" office:value="0.00147013888888889" calcext:value-type="float">
            <text:p>0,00147013888888889000</text:p>
          </table:table-cell>
          <table:table-cell table:formula="of:=[.D176]-[.D175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5]+73" office:value-type="float" office:value="12775" calcext:value-type="float">
            <text:p>12775</text:p>
          </table:table-cell>
          <table:table-cell office:value-type="float" office:value="8640000" calcext:value-type="float">
            <text:p>8640000</text:p>
          </table:table-cell>
          <table:table-cell table:formula="of:=[.B176]/[.C176]" office:value-type="float" office:value="0.00147858796296296" calcext:value-type="float">
            <text:p>0,00147858796296296000</text:p>
          </table:table-cell>
          <table:table-cell table:formula="of:=[.D177]-[.D176]" office:value-type="float" office:value="0.00000844907407407392" calcext:value-type="float">
            <text:p>0,00000844907407407392</text:p>
          </table:table-cell>
          <table:table-cell table:number-columns-repeated="5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6]+73" office:value-type="float" office:value="12848" calcext:value-type="float">
            <text:p>12848</text:p>
          </table:table-cell>
          <table:table-cell office:value-type="float" office:value="8640000" calcext:value-type="float">
            <text:p>8640000</text:p>
          </table:table-cell>
          <table:table-cell table:formula="of:=[.B177]/[.C177]" office:value-type="float" office:value="0.00148703703703704" calcext:value-type="float">
            <text:p>0,00148703703703704000</text:p>
          </table:table-cell>
          <table:table-cell table:formula="of:=[.D178]-[.D177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7]+73" office:value-type="float" office:value="12921" calcext:value-type="float">
            <text:p>12921</text:p>
          </table:table-cell>
          <table:table-cell office:value-type="float" office:value="8640000" calcext:value-type="float">
            <text:p>8640000</text:p>
          </table:table-cell>
          <table:table-cell table:formula="of:=[.B178]/[.C178]" office:value-type="float" office:value="0.00149548611111111" calcext:value-type="float">
            <text:p>0,00149548611111111000</text:p>
          </table:table-cell>
          <table:table-cell table:formula="of:=[.D179]-[.D178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8]+73" office:value-type="float" office:value="12994" calcext:value-type="float">
            <text:p>12994</text:p>
          </table:table-cell>
          <table:table-cell office:value-type="float" office:value="8640000" calcext:value-type="float">
            <text:p>8640000</text:p>
          </table:table-cell>
          <table:table-cell table:formula="of:=[.B179]/[.C179]" office:value-type="float" office:value="0.00150393518518519" calcext:value-type="float">
            <text:p>0,00150393518518519000</text:p>
          </table:table-cell>
          <table:table-cell table:formula="of:=[.D180]-[.D179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9]+73" office:value-type="float" office:value="13067" calcext:value-type="float">
            <text:p>13067</text:p>
          </table:table-cell>
          <table:table-cell office:value-type="float" office:value="8640000" calcext:value-type="float">
            <text:p>8640000</text:p>
          </table:table-cell>
          <table:table-cell table:formula="of:=[.B180]/[.C180]" office:value-type="float" office:value="0.00151238425925926" calcext:value-type="float">
            <text:p>0,00151238425925926000</text:p>
          </table:table-cell>
          <table:table-cell table:formula="of:=[.D181]-[.D180]" office:value-type="float" office:value="0.00000844907407407392" calcext:value-type="float">
            <text:p>0,00000844907407407392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0]+73" office:value-type="float" office:value="13140" calcext:value-type="float">
            <text:p>13140</text:p>
          </table:table-cell>
          <table:table-cell office:value-type="float" office:value="8640000" calcext:value-type="float">
            <text:p>8640000</text:p>
          </table:table-cell>
          <table:table-cell table:formula="of:=[.B181]/[.C181]" office:value-type="float" office:value="0.00152083333333333" calcext:value-type="float">
            <text:p>0,00152083333333333000</text:p>
          </table:table-cell>
          <table:table-cell table:formula="of:=[.D182]-[.D181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1]+73" office:value-type="float" office:value="13213" calcext:value-type="float">
            <text:p>13213</text:p>
          </table:table-cell>
          <table:table-cell office:value-type="float" office:value="8640000" calcext:value-type="float">
            <text:p>8640000</text:p>
          </table:table-cell>
          <table:table-cell table:formula="of:=[.B182]/[.C182]" office:value-type="float" office:value="0.00152928240740741" calcext:value-type="float">
            <text:p>0,00152928240740741000</text:p>
          </table:table-cell>
          <table:table-cell table:formula="of:=[.D183]-[.D182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2]+73" office:value-type="float" office:value="13286" calcext:value-type="float">
            <text:p>13286</text:p>
          </table:table-cell>
          <table:table-cell office:value-type="float" office:value="8640000" calcext:value-type="float">
            <text:p>8640000</text:p>
          </table:table-cell>
          <table:table-cell table:formula="of:=[.B183]/[.C183]" office:value-type="float" office:value="0.00153773148148148" calcext:value-type="float">
            <text:p>0,00153773148148148000</text:p>
          </table:table-cell>
          <table:table-cell table:formula="of:=[.D184]-[.D183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3]+73" office:value-type="float" office:value="13359" calcext:value-type="float">
            <text:p>13359</text:p>
          </table:table-cell>
          <table:table-cell office:value-type="float" office:value="8640000" calcext:value-type="float">
            <text:p>8640000</text:p>
          </table:table-cell>
          <table:table-cell table:formula="of:=[.B184]/[.C184]" office:value-type="float" office:value="0.00154618055555556" calcext:value-type="float">
            <text:p>0,00154618055555556000</text:p>
          </table:table-cell>
          <table:table-cell table:formula="of:=[.D185]-[.D184]" office:value-type="float" office:value="0.00000844907407407392" calcext:value-type="float">
            <text:p>0,00000844907407407392</text:p>
          </table:table-cell>
          <table:table-cell table:number-columns-repeated="5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4]+73" office:value-type="float" office:value="13432" calcext:value-type="float">
            <text:p>13432</text:p>
          </table:table-cell>
          <table:table-cell office:value-type="float" office:value="8640000" calcext:value-type="float">
            <text:p>8640000</text:p>
          </table:table-cell>
          <table:table-cell table:formula="of:=[.B185]/[.C185]" office:value-type="float" office:value="0.00155462962962963" calcext:value-type="float">
            <text:p>0,00155462962962963000</text:p>
          </table:table-cell>
          <table:table-cell table:formula="of:=[.D186]-[.D185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5]+73" office:value-type="float" office:value="13505" calcext:value-type="float">
            <text:p>13505</text:p>
          </table:table-cell>
          <table:table-cell office:value-type="float" office:value="8640000" calcext:value-type="float">
            <text:p>8640000</text:p>
          </table:table-cell>
          <table:table-cell table:formula="of:=[.B186]/[.C186]" office:value-type="float" office:value="0.0015630787037037" calcext:value-type="float">
            <text:p>0,00156307870370370000</text:p>
          </table:table-cell>
          <table:table-cell table:formula="of:=[.D187]-[.D186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6]+73" office:value-type="float" office:value="13578" calcext:value-type="float">
            <text:p>13578</text:p>
          </table:table-cell>
          <table:table-cell office:value-type="float" office:value="8640000" calcext:value-type="float">
            <text:p>8640000</text:p>
          </table:table-cell>
          <table:table-cell table:formula="of:=[.B187]/[.C187]" office:value-type="float" office:value="0.00157152777777778" calcext:value-type="float">
            <text:p>0,00157152777777778000</text:p>
          </table:table-cell>
          <table:table-cell table:formula="of:=[.D188]-[.D187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7]+73" office:value-type="float" office:value="13651" calcext:value-type="float">
            <text:p>13651</text:p>
          </table:table-cell>
          <table:table-cell office:value-type="float" office:value="8640000" calcext:value-type="float">
            <text:p>8640000</text:p>
          </table:table-cell>
          <table:table-cell table:formula="of:=[.B188]/[.C188]" office:value-type="float" office:value="0.00157997685185185" calcext:value-type="float">
            <text:p>0,00157997685185185000</text:p>
          </table:table-cell>
          <table:table-cell table:formula="of:=[.D189]-[.D188]" office:value-type="float" office:value="0.00000844907407407392" calcext:value-type="float">
            <text:p>0,00000844907407407392</text:p>
          </table:table-cell>
          <table:table-cell table:number-columns-repeated="5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8]+73" office:value-type="float" office:value="13724" calcext:value-type="float">
            <text:p>13724</text:p>
          </table:table-cell>
          <table:table-cell office:value-type="float" office:value="8640000" calcext:value-type="float">
            <text:p>8640000</text:p>
          </table:table-cell>
          <table:table-cell table:formula="of:=[.B189]/[.C189]" office:value-type="float" office:value="0.00158842592592593" calcext:value-type="float">
            <text:p>0,00158842592592593000</text:p>
          </table:table-cell>
          <table:table-cell table:formula="of:=[.D190]-[.D189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9]+73" office:value-type="float" office:value="13797" calcext:value-type="float">
            <text:p>13797</text:p>
          </table:table-cell>
          <table:table-cell office:value-type="float" office:value="8640000" calcext:value-type="float">
            <text:p>8640000</text:p>
          </table:table-cell>
          <table:table-cell table:formula="of:=[.B190]/[.C190]" office:value-type="float" office:value="0.001596875" calcext:value-type="float">
            <text:p>0,00159687500000000000</text:p>
          </table:table-cell>
          <table:table-cell table:formula="of:=[.D191]-[.D190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0]+73" office:value-type="float" office:value="13870" calcext:value-type="float">
            <text:p>13870</text:p>
          </table:table-cell>
          <table:table-cell office:value-type="float" office:value="8640000" calcext:value-type="float">
            <text:p>8640000</text:p>
          </table:table-cell>
          <table:table-cell table:formula="of:=[.B191]/[.C191]" office:value-type="float" office:value="0.00160532407407407" calcext:value-type="float">
            <text:p>0,00160532407407407000</text:p>
          </table:table-cell>
          <table:table-cell table:formula="of:=[.D192]-[.D191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1]+73" office:value-type="float" office:value="13943" calcext:value-type="float">
            <text:p>13943</text:p>
          </table:table-cell>
          <table:table-cell office:value-type="float" office:value="8640000" calcext:value-type="float">
            <text:p>8640000</text:p>
          </table:table-cell>
          <table:table-cell table:formula="of:=[.B192]/[.C192]" office:value-type="float" office:value="0.00161377314814815" calcext:value-type="float">
            <text:p>0,00161377314814815000</text:p>
          </table:table-cell>
          <table:table-cell table:formula="of:=[.D193]-[.D192]" office:value-type="float" office:value="0.00000844907407407392" calcext:value-type="float">
            <text:p>0,00000844907407407392</text:p>
          </table:table-cell>
          <table:table-cell table:number-columns-repeated="5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2]+73" office:value-type="float" office:value="14016" calcext:value-type="float">
            <text:p>14016</text:p>
          </table:table-cell>
          <table:table-cell office:value-type="float" office:value="8640000" calcext:value-type="float">
            <text:p>8640000</text:p>
          </table:table-cell>
          <table:table-cell table:formula="of:=[.B193]/[.C193]" office:value-type="float" office:value="0.00162222222222222" calcext:value-type="float">
            <text:p>0,00162222222222222000</text:p>
          </table:table-cell>
          <table:table-cell table:formula="of:=[.D194]-[.D193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3]+73" office:value-type="float" office:value="14089" calcext:value-type="float">
            <text:p>14089</text:p>
          </table:table-cell>
          <table:table-cell office:value-type="float" office:value="8640000" calcext:value-type="float">
            <text:p>8640000</text:p>
          </table:table-cell>
          <table:table-cell table:formula="of:=[.B194]/[.C194]" office:value-type="float" office:value="0.0016306712962963" calcext:value-type="float">
            <text:p>0,00163067129629630000</text:p>
          </table:table-cell>
          <table:table-cell table:formula="of:=[.D195]-[.D194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4]+73" office:value-type="float" office:value="14162" calcext:value-type="float">
            <text:p>14162</text:p>
          </table:table-cell>
          <table:table-cell office:value-type="float" office:value="8640000" calcext:value-type="float">
            <text:p>8640000</text:p>
          </table:table-cell>
          <table:table-cell table:formula="of:=[.B195]/[.C195]" office:value-type="float" office:value="0.00163912037037037" calcext:value-type="float">
            <text:p>0,00163912037037037000</text:p>
          </table:table-cell>
          <table:table-cell table:formula="of:=[.D196]-[.D195]" office:value-type="float" office:value="0.00000844907407407392" calcext:value-type="float">
            <text:p>0,00000844907407407392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5]+73" office:value-type="float" office:value="14235" calcext:value-type="float">
            <text:p>14235</text:p>
          </table:table-cell>
          <table:table-cell office:value-type="float" office:value="8640000" calcext:value-type="float">
            <text:p>8640000</text:p>
          </table:table-cell>
          <table:table-cell table:formula="of:=[.B196]/[.C196]" office:value-type="float" office:value="0.00164756944444444" calcext:value-type="float">
            <text:p>0,00164756944444444000</text:p>
          </table:table-cell>
          <table:table-cell table:formula="of:=[.D197]-[.D196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6]+73" office:value-type="float" office:value="14308" calcext:value-type="float">
            <text:p>14308</text:p>
          </table:table-cell>
          <table:table-cell office:value-type="float" office:value="8640000" calcext:value-type="float">
            <text:p>8640000</text:p>
          </table:table-cell>
          <table:table-cell table:formula="of:=[.B197]/[.C197]" office:value-type="float" office:value="0.00165601851851852" calcext:value-type="float">
            <text:p>0,00165601851851852000</text:p>
          </table:table-cell>
          <table:table-cell table:formula="of:=[.D198]-[.D197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7]+73" office:value-type="float" office:value="14381" calcext:value-type="float">
            <text:p>14381</text:p>
          </table:table-cell>
          <table:table-cell office:value-type="float" office:value="8640000" calcext:value-type="float">
            <text:p>8640000</text:p>
          </table:table-cell>
          <table:table-cell table:formula="of:=[.B198]/[.C198]" office:value-type="float" office:value="0.00166446759259259" calcext:value-type="float">
            <text:p>0,00166446759259259000</text:p>
          </table:table-cell>
          <table:table-cell table:formula="of:=[.D199]-[.D198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8]+73" office:value-type="float" office:value="14454" calcext:value-type="float">
            <text:p>14454</text:p>
          </table:table-cell>
          <table:table-cell office:value-type="float" office:value="8640000" calcext:value-type="float">
            <text:p>8640000</text:p>
          </table:table-cell>
          <table:table-cell table:formula="of:=[.B199]/[.C199]" office:value-type="float" office:value="0.00167291666666667" calcext:value-type="float">
            <text:p>0,00167291666666667000</text:p>
          </table:table-cell>
          <table:table-cell table:formula="of:=[.D200]-[.D199]" office:value-type="float" office:value="0.00000844907407407392" calcext:value-type="float">
            <text:p>0,00000844907407407392</text:p>
          </table:table-cell>
          <table:table-cell table:number-columns-repeated="5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9]+73" office:value-type="float" office:value="14527" calcext:value-type="float">
            <text:p>14527</text:p>
          </table:table-cell>
          <table:table-cell office:value-type="float" office:value="8640000" calcext:value-type="float">
            <text:p>8640000</text:p>
          </table:table-cell>
          <table:table-cell table:formula="of:=[.B200]/[.C200]" office:value-type="float" office:value="0.00168136574074074" calcext:value-type="float">
            <text:p>0,00168136574074074000</text:p>
          </table:table-cell>
          <table:table-cell table:formula="of:=[.D201]-[.D200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0]+73" office:value-type="float" office:value="14600" calcext:value-type="float">
            <text:p>14600</text:p>
          </table:table-cell>
          <table:table-cell office:value-type="float" office:value="8640000" calcext:value-type="float">
            <text:p>8640000</text:p>
          </table:table-cell>
          <table:table-cell table:formula="of:=[.B201]/[.C201]" office:value-type="float" office:value="0.00168981481481481" calcext:value-type="float">
            <text:p>0,00168981481481481000</text:p>
          </table:table-cell>
          <table:table-cell table:formula="of:=[.D202]-[.D201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1]+73" office:value-type="float" office:value="14673" calcext:value-type="float">
            <text:p>14673</text:p>
          </table:table-cell>
          <table:table-cell office:value-type="float" office:value="8640000" calcext:value-type="float">
            <text:p>8640000</text:p>
          </table:table-cell>
          <table:table-cell table:formula="of:=[.B202]/[.C202]" office:value-type="float" office:value="0.00169826388888889" calcext:value-type="float">
            <text:p>0,00169826388888889000</text:p>
          </table:table-cell>
          <table:table-cell table:formula="of:=[.D203]-[.D202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2]+73" office:value-type="float" office:value="14746" calcext:value-type="float">
            <text:p>14746</text:p>
          </table:table-cell>
          <table:table-cell office:value-type="float" office:value="8640000" calcext:value-type="float">
            <text:p>8640000</text:p>
          </table:table-cell>
          <table:table-cell table:formula="of:=[.B203]/[.C203]" office:value-type="float" office:value="0.00170671296296296" calcext:value-type="float">
            <text:p>0,00170671296296296000</text:p>
          </table:table-cell>
          <table:table-cell table:formula="of:=[.D204]-[.D203]" office:value-type="float" office:value="0.00000844907407407392" calcext:value-type="float">
            <text:p>0,00000844907407407392</text:p>
          </table:table-cell>
          <table:table-cell table:number-columns-repeated="5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3]+73" office:value-type="float" office:value="14819" calcext:value-type="float">
            <text:p>14819</text:p>
          </table:table-cell>
          <table:table-cell office:value-type="float" office:value="8640000" calcext:value-type="float">
            <text:p>8640000</text:p>
          </table:table-cell>
          <table:table-cell table:formula="of:=[.B204]/[.C204]" office:value-type="float" office:value="0.00171516203703704" calcext:value-type="float">
            <text:p>0,00171516203703704000</text:p>
          </table:table-cell>
          <table:table-cell table:formula="of:=[.D205]-[.D204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4]+73" office:value-type="float" office:value="14892" calcext:value-type="float">
            <text:p>14892</text:p>
          </table:table-cell>
          <table:table-cell office:value-type="float" office:value="8640000" calcext:value-type="float">
            <text:p>8640000</text:p>
          </table:table-cell>
          <table:table-cell table:formula="of:=[.B205]/[.C205]" office:value-type="float" office:value="0.00172361111111111" calcext:value-type="float">
            <text:p>0,00172361111111111000</text:p>
          </table:table-cell>
          <table:table-cell table:formula="of:=[.D206]-[.D205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5]+73" office:value-type="float" office:value="14965" calcext:value-type="float">
            <text:p>14965</text:p>
          </table:table-cell>
          <table:table-cell office:value-type="float" office:value="8640000" calcext:value-type="float">
            <text:p>8640000</text:p>
          </table:table-cell>
          <table:table-cell table:formula="of:=[.B206]/[.C206]" office:value-type="float" office:value="0.00173206018518519" calcext:value-type="float">
            <text:p>0,00173206018518519000</text:p>
          </table:table-cell>
          <table:table-cell table:formula="of:=[.D207]-[.D206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6]+73" office:value-type="float" office:value="15038" calcext:value-type="float">
            <text:p>15038</text:p>
          </table:table-cell>
          <table:table-cell office:value-type="float" office:value="8640000" calcext:value-type="float">
            <text:p>8640000</text:p>
          </table:table-cell>
          <table:table-cell table:formula="of:=[.B207]/[.C207]" office:value-type="float" office:value="0.00174050925925926" calcext:value-type="float">
            <text:p>0,00174050925925926000</text:p>
          </table:table-cell>
          <table:table-cell table:formula="of:=[.D208]-[.D207]" office:value-type="float" office:value="0.00000844907407407392" calcext:value-type="float">
            <text:p>0,00000844907407407392</text:p>
          </table:table-cell>
          <table:table-cell table:number-columns-repeated="5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7]+73" office:value-type="float" office:value="15111" calcext:value-type="float">
            <text:p>15111</text:p>
          </table:table-cell>
          <table:table-cell office:value-type="float" office:value="8640000" calcext:value-type="float">
            <text:p>8640000</text:p>
          </table:table-cell>
          <table:table-cell table:formula="of:=[.B208]/[.C208]" office:value-type="float" office:value="0.00174895833333333" calcext:value-type="float">
            <text:p>0,00174895833333333000</text:p>
          </table:table-cell>
          <table:table-cell table:formula="of:=[.D209]-[.D208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8]+73" office:value-type="float" office:value="15184" calcext:value-type="float">
            <text:p>15184</text:p>
          </table:table-cell>
          <table:table-cell office:value-type="float" office:value="8640000" calcext:value-type="float">
            <text:p>8640000</text:p>
          </table:table-cell>
          <table:table-cell table:formula="of:=[.B209]/[.C209]" office:value-type="float" office:value="0.00175740740740741" calcext:value-type="float">
            <text:p>0,00175740740740741000</text:p>
          </table:table-cell>
          <table:table-cell table:formula="of:=[.D210]-[.D209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9]+73" office:value-type="float" office:value="15257" calcext:value-type="float">
            <text:p>15257</text:p>
          </table:table-cell>
          <table:table-cell office:value-type="float" office:value="8640000" calcext:value-type="float">
            <text:p>8640000</text:p>
          </table:table-cell>
          <table:table-cell table:formula="of:=[.B210]/[.C210]" office:value-type="float" office:value="0.00176585648148148" calcext:value-type="float">
            <text:p>0,00176585648148148000</text:p>
          </table:table-cell>
          <table:table-cell table:formula="of:=[.D211]-[.D210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0]+73" office:value-type="float" office:value="15330" calcext:value-type="float">
            <text:p>15330</text:p>
          </table:table-cell>
          <table:table-cell office:value-type="float" office:value="8640000" calcext:value-type="float">
            <text:p>8640000</text:p>
          </table:table-cell>
          <table:table-cell table:formula="of:=[.B211]/[.C211]" office:value-type="float" office:value="0.00177430555555556" calcext:value-type="float">
            <text:p>0,00177430555555556000</text:p>
          </table:table-cell>
          <table:table-cell table:formula="of:=[.D212]-[.D211]" office:value-type="float" office:value="0.00000844907407407392" calcext:value-type="float">
            <text:p>0,00000844907407407392</text:p>
          </table:table-cell>
          <table:table-cell table:number-columns-repeated="5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1]+73" office:value-type="float" office:value="15403" calcext:value-type="float">
            <text:p>15403</text:p>
          </table:table-cell>
          <table:table-cell office:value-type="float" office:value="8640000" calcext:value-type="float">
            <text:p>8640000</text:p>
          </table:table-cell>
          <table:table-cell table:formula="of:=[.B212]/[.C212]" office:value-type="float" office:value="0.00178275462962963" calcext:value-type="float">
            <text:p>0,00178275462962963000</text:p>
          </table:table-cell>
          <table:table-cell table:formula="of:=[.D213]-[.D212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2]+73" office:value-type="float" office:value="15476" calcext:value-type="float">
            <text:p>15476</text:p>
          </table:table-cell>
          <table:table-cell office:value-type="float" office:value="8640000" calcext:value-type="float">
            <text:p>8640000</text:p>
          </table:table-cell>
          <table:table-cell table:formula="of:=[.B213]/[.C213]" office:value-type="float" office:value="0.0017912037037037" calcext:value-type="float">
            <text:p>0,00179120370370370000</text:p>
          </table:table-cell>
          <table:table-cell table:formula="of:=[.D214]-[.D213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3]+73" office:value-type="float" office:value="15549" calcext:value-type="float">
            <text:p>15549</text:p>
          </table:table-cell>
          <table:table-cell office:value-type="float" office:value="8640000" calcext:value-type="float">
            <text:p>8640000</text:p>
          </table:table-cell>
          <table:table-cell table:formula="of:=[.B214]/[.C214]" office:value-type="float" office:value="0.00179965277777778" calcext:value-type="float">
            <text:p>0,00179965277777778000</text:p>
          </table:table-cell>
          <table:table-cell table:formula="of:=[.D215]-[.D214]" office:value-type="float" office:value="0.00000844907407407392" calcext:value-type="float">
            <text:p>0,00000844907407407392</text:p>
          </table:table-cell>
          <table:table-cell table:number-columns-repeated="5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4]+73" office:value-type="float" office:value="15622" calcext:value-type="float">
            <text:p>15622</text:p>
          </table:table-cell>
          <table:table-cell office:value-type="float" office:value="8640000" calcext:value-type="float">
            <text:p>8640000</text:p>
          </table:table-cell>
          <table:table-cell table:formula="of:=[.B215]/[.C215]" office:value-type="float" office:value="0.00180810185185185" calcext:value-type="float">
            <text:p>0,00180810185185185000</text:p>
          </table:table-cell>
          <table:table-cell table:formula="of:=[.D216]-[.D215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5]+73" office:value-type="float" office:value="15695" calcext:value-type="float">
            <text:p>15695</text:p>
          </table:table-cell>
          <table:table-cell office:value-type="float" office:value="8640000" calcext:value-type="float">
            <text:p>8640000</text:p>
          </table:table-cell>
          <table:table-cell table:formula="of:=[.B216]/[.C216]" office:value-type="float" office:value="0.00181655092592593" calcext:value-type="float">
            <text:p>0,00181655092592593000</text:p>
          </table:table-cell>
          <table:table-cell table:formula="of:=[.D217]-[.D216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6]+73" office:value-type="float" office:value="15768" calcext:value-type="float">
            <text:p>15768</text:p>
          </table:table-cell>
          <table:table-cell office:value-type="float" office:value="8640000" calcext:value-type="float">
            <text:p>8640000</text:p>
          </table:table-cell>
          <table:table-cell table:formula="of:=[.B217]/[.C217]" office:value-type="float" office:value="0.001825" calcext:value-type="float">
            <text:p>0,00182500000000000000</text:p>
          </table:table-cell>
          <table:table-cell table:formula="of:=[.D218]-[.D217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7]+73" office:value-type="float" office:value="15841" calcext:value-type="float">
            <text:p>15841</text:p>
          </table:table-cell>
          <table:table-cell office:value-type="float" office:value="8640000" calcext:value-type="float">
            <text:p>8640000</text:p>
          </table:table-cell>
          <table:table-cell table:formula="of:=[.B218]/[.C218]" office:value-type="float" office:value="0.00183344907407407" calcext:value-type="float">
            <text:p>0,00183344907407407000</text:p>
          </table:table-cell>
          <table:table-cell table:formula="of:=[.D219]-[.D218]" office:value-type="float" office:value="0.00000844907407407392" calcext:value-type="float">
            <text:p>0,00000844907407407392</text:p>
          </table:table-cell>
          <table:table-cell table:number-columns-repeated="5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8]+73" office:value-type="float" office:value="15914" calcext:value-type="float">
            <text:p>15914</text:p>
          </table:table-cell>
          <table:table-cell office:value-type="float" office:value="8640000" calcext:value-type="float">
            <text:p>8640000</text:p>
          </table:table-cell>
          <table:table-cell table:formula="of:=[.B219]/[.C219]" office:value-type="float" office:value="0.00184189814814815" calcext:value-type="float">
            <text:p>0,00184189814814815000</text:p>
          </table:table-cell>
          <table:table-cell table:formula="of:=[.D220]-[.D219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9]+73" office:value-type="float" office:value="15987" calcext:value-type="float">
            <text:p>15987</text:p>
          </table:table-cell>
          <table:table-cell office:value-type="float" office:value="8640000" calcext:value-type="float">
            <text:p>8640000</text:p>
          </table:table-cell>
          <table:table-cell table:formula="of:=[.B220]/[.C220]" office:value-type="float" office:value="0.00185034722222222" calcext:value-type="float">
            <text:p>0,00185034722222222000</text:p>
          </table:table-cell>
          <table:table-cell table:formula="of:=[.D221]-[.D220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0]+73" office:value-type="float" office:value="16060" calcext:value-type="float">
            <text:p>16060</text:p>
          </table:table-cell>
          <table:table-cell office:value-type="float" office:value="8640000" calcext:value-type="float">
            <text:p>8640000</text:p>
          </table:table-cell>
          <table:table-cell table:formula="of:=[.B221]/[.C221]" office:value-type="float" office:value="0.0018587962962963" calcext:value-type="float">
            <text:p>0,00185879629629630000</text:p>
          </table:table-cell>
          <table:table-cell table:formula="of:=[.D222]-[.D221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1]+73" office:value-type="float" office:value="16133" calcext:value-type="float">
            <text:p>16133</text:p>
          </table:table-cell>
          <table:table-cell office:value-type="float" office:value="8640000" calcext:value-type="float">
            <text:p>8640000</text:p>
          </table:table-cell>
          <table:table-cell table:formula="of:=[.B222]/[.C222]" office:value-type="float" office:value="0.00186724537037037" calcext:value-type="float">
            <text:p>0,00186724537037037000</text:p>
          </table:table-cell>
          <table:table-cell table:formula="of:=[.D223]-[.D222]" office:value-type="float" office:value="0.00000844907407407392" calcext:value-type="float">
            <text:p>0,00000844907407407392</text:p>
          </table:table-cell>
          <table:table-cell table:number-columns-repeated="5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2]+73" office:value-type="float" office:value="16206" calcext:value-type="float">
            <text:p>16206</text:p>
          </table:table-cell>
          <table:table-cell office:value-type="float" office:value="8640000" calcext:value-type="float">
            <text:p>8640000</text:p>
          </table:table-cell>
          <table:table-cell table:formula="of:=[.B223]/[.C223]" office:value-type="float" office:value="0.00187569444444444" calcext:value-type="float">
            <text:p>0,00187569444444444000</text:p>
          </table:table-cell>
          <table:table-cell table:formula="of:=[.D224]-[.D223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3]+73" office:value-type="float" office:value="16279" calcext:value-type="float">
            <text:p>16279</text:p>
          </table:table-cell>
          <table:table-cell office:value-type="float" office:value="8640000" calcext:value-type="float">
            <text:p>8640000</text:p>
          </table:table-cell>
          <table:table-cell table:formula="of:=[.B224]/[.C224]" office:value-type="float" office:value="0.00188414351851852" calcext:value-type="float">
            <text:p>0,00188414351851852000</text:p>
          </table:table-cell>
          <table:table-cell table:formula="of:=[.D225]-[.D224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4]+73" office:value-type="float" office:value="16352" calcext:value-type="float">
            <text:p>16352</text:p>
          </table:table-cell>
          <table:table-cell office:value-type="float" office:value="8640000" calcext:value-type="float">
            <text:p>8640000</text:p>
          </table:table-cell>
          <table:table-cell table:formula="of:=[.B225]/[.C225]" office:value-type="float" office:value="0.00189259259259259" calcext:value-type="float">
            <text:p>0,00189259259259259000</text:p>
          </table:table-cell>
          <table:table-cell table:formula="of:=[.D226]-[.D225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5]+73" office:value-type="float" office:value="16425" calcext:value-type="float">
            <text:p>16425</text:p>
          </table:table-cell>
          <table:table-cell office:value-type="float" office:value="8640000" calcext:value-type="float">
            <text:p>8640000</text:p>
          </table:table-cell>
          <table:table-cell table:formula="of:=[.B226]/[.C226]" office:value-type="float" office:value="0.00190104166666667" calcext:value-type="float">
            <text:p>0,00190104166666667000</text:p>
          </table:table-cell>
          <table:table-cell table:formula="of:=[.D227]-[.D226]" office:value-type="float" office:value="0.00000844907407407392" calcext:value-type="float">
            <text:p>0,00000844907407407392</text:p>
          </table:table-cell>
          <table:table-cell table:number-columns-repeated="5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6]+73" office:value-type="float" office:value="16498" calcext:value-type="float">
            <text:p>16498</text:p>
          </table:table-cell>
          <table:table-cell office:value-type="float" office:value="8640000" calcext:value-type="float">
            <text:p>8640000</text:p>
          </table:table-cell>
          <table:table-cell table:formula="of:=[.B227]/[.C227]" office:value-type="float" office:value="0.00190949074074074" calcext:value-type="float">
            <text:p>0,00190949074074074000</text:p>
          </table:table-cell>
          <table:table-cell table:formula="of:=[.D228]-[.D227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7]+73" office:value-type="float" office:value="16571" calcext:value-type="float">
            <text:p>16571</text:p>
          </table:table-cell>
          <table:table-cell office:value-type="float" office:value="8640000" calcext:value-type="float">
            <text:p>8640000</text:p>
          </table:table-cell>
          <table:table-cell table:formula="of:=[.B228]/[.C228]" office:value-type="float" office:value="0.00191793981481481" calcext:value-type="float">
            <text:p>0,00191793981481481000</text:p>
          </table:table-cell>
          <table:table-cell table:formula="of:=[.D229]-[.D228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8]+73" office:value-type="float" office:value="16644" calcext:value-type="float">
            <text:p>16644</text:p>
          </table:table-cell>
          <table:table-cell office:value-type="float" office:value="8640000" calcext:value-type="float">
            <text:p>8640000</text:p>
          </table:table-cell>
          <table:table-cell table:formula="of:=[.B229]/[.C229]" office:value-type="float" office:value="0.00192638888888889" calcext:value-type="float">
            <text:p>0,00192638888888889000</text:p>
          </table:table-cell>
          <table:table-cell table:formula="of:=[.D230]-[.D229]" office:value-type="float" office:value="0.00000844907407407392" calcext:value-type="float">
            <text:p>0,00000844907407407392</text:p>
          </table:table-cell>
          <table:table-cell table:number-columns-repeated="5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9]+73" office:value-type="float" office:value="16717" calcext:value-type="float">
            <text:p>16717</text:p>
          </table:table-cell>
          <table:table-cell office:value-type="float" office:value="8640000" calcext:value-type="float">
            <text:p>8640000</text:p>
          </table:table-cell>
          <table:table-cell table:formula="of:=[.B230]/[.C230]" office:value-type="float" office:value="0.00193483796296296" calcext:value-type="float">
            <text:p>0,00193483796296296000</text:p>
          </table:table-cell>
          <table:table-cell table:formula="of:=[.D231]-[.D230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0]+73" office:value-type="float" office:value="16790" calcext:value-type="float">
            <text:p>16790</text:p>
          </table:table-cell>
          <table:table-cell office:value-type="float" office:value="8640000" calcext:value-type="float">
            <text:p>8640000</text:p>
          </table:table-cell>
          <table:table-cell table:formula="of:=[.B231]/[.C231]" office:value-type="float" office:value="0.00194328703703704" calcext:value-type="float">
            <text:p>0,00194328703703704000</text:p>
          </table:table-cell>
          <table:table-cell table:formula="of:=[.D232]-[.D231]" office:value-type="float" office:value="0.00000844907407407413" calcext:value-type="float">
            <text:p>0,00000844907407407413</text:p>
          </table:table-cell>
          <table:table-cell table:number-columns-repeated="5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1]+73" office:value-type="float" office:value="16863" calcext:value-type="float">
            <text:p>16863</text:p>
          </table:table-cell>
          <table:table-cell office:value-type="float" office:value="8640000" calcext:value-type="float">
            <text:p>8640000</text:p>
          </table:table-cell>
          <table:table-cell table:formula="of:=[.B232]/[.C232]" office:value-type="float" office:value="0.00195173611111111" calcext:value-type="float">
            <text:p>0,00195173611111111000</text:p>
          </table:table-cell>
          <table:table-cell table:formula="of:=[.D233]-[.D232]" office:value-type="float" office:value="0.00000844907407407392" calcext:value-type="float">
            <text:p>0,00000844907407407392</text:p>
          </table:table-cell>
          <table:table-cell table:number-columns-repeated="5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2]+73" office:value-type="float" office:value="16936" calcext:value-type="float">
            <text:p>16936</text:p>
          </table:table-cell>
          <table:table-cell office:value-type="float" office:value="8640000" calcext:value-type="float">
            <text:p>8640000</text:p>
          </table:table-cell>
          <table:table-cell table:formula="of:=[.B233]/[.C233]" office:value-type="float" office:value="0.00196018518518519" calcext:value-type="float">
            <text:p>0,00196018518518519000</text:p>
          </table:table-cell>
          <table:table-cell table:formula="of:=[.D234]-[.D233]" office:value-type="float" office:value="0.00000844907407407435" calcext:value-type="float">
            <text:p>0,00000844907407407435</text:p>
          </table:table-cell>
          <table:table-cell table:number-columns-repeated="5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3]+73" office:value-type="float" office:value="17009" calcext:value-type="float">
            <text:p>17009</text:p>
          </table:table-cell>
          <table:table-cell office:value-type="float" office:value="8640000" calcext:value-type="float">
            <text:p>8640000</text:p>
          </table:table-cell>
          <table:table-cell table:formula="of:=[.B234]/[.C234]" office:value-type="float" office:value="0.00196863425925926" calcext:value-type="float">
            <text:p>0,00196863425925926000</text:p>
          </table:table-cell>
          <table:table-cell table:formula="of:=[.D235]-[.D234]" office:value-type="float" office:value="0.00000844907407407392" calcext:value-type="float">
            <text:p>0,00000844907407407392</text:p>
          </table:table-cell>
          <table:table-cell table:number-columns-repeated="5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4]+73" office:value-type="float" office:value="17082" calcext:value-type="float">
            <text:p>17082</text:p>
          </table:table-cell>
          <table:table-cell office:value-type="float" office:value="8640000" calcext:value-type="float">
            <text:p>8640000</text:p>
          </table:table-cell>
          <table:table-cell table:formula="of:=[.B235]/[.C235]" office:value-type="float" office:value="0.00197708333333333" calcext:value-type="float">
            <text:p>0,00197708333333333000</text:p>
          </table:table-cell>
          <table:table-cell table:formula="of:=[.D236]-[.D235]" office:value-type="float" office:value="0.00000844907407407392" calcext:value-type="float">
            <text:p>0,00000844907407407392</text:p>
          </table:table-cell>
          <table:table-cell table:number-columns-repeated="5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5]+73" office:value-type="float" office:value="17155" calcext:value-type="float">
            <text:p>17155</text:p>
          </table:table-cell>
          <table:table-cell office:value-type="float" office:value="8640000" calcext:value-type="float">
            <text:p>8640000</text:p>
          </table:table-cell>
          <table:table-cell table:formula="of:=[.B236]/[.C236]" office:value-type="float" office:value="0.00198553240740741" calcext:value-type="float">
            <text:p>0,00198553240740741000</text:p>
          </table:table-cell>
          <table:table-cell table:formula="of:=[.D237]-[.D236]" office:value-type="float" office:value="0.00000844907407407435" calcext:value-type="float">
            <text:p>0,00000844907407407435</text:p>
          </table:table-cell>
          <table:table-cell table:number-columns-repeated="5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6]+73" office:value-type="float" office:value="17228" calcext:value-type="float">
            <text:p>17228</text:p>
          </table:table-cell>
          <table:table-cell office:value-type="float" office:value="8640000" calcext:value-type="float">
            <text:p>8640000</text:p>
          </table:table-cell>
          <table:table-cell table:formula="of:=[.B237]/[.C237]" office:value-type="float" office:value="0.00199398148148148" calcext:value-type="float">
            <text:p>0,00199398148148148000</text:p>
          </table:table-cell>
          <table:table-cell table:formula="of:=[.D238]-[.D237]" office:value-type="float" office:value="0.00000844907407407392" calcext:value-type="float">
            <text:p>0,00000844907407407392</text:p>
          </table:table-cell>
          <table:table-cell table:number-columns-repeated="5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7]+73" office:value-type="float" office:value="17301" calcext:value-type="float">
            <text:p>17301</text:p>
          </table:table-cell>
          <table:table-cell office:value-type="float" office:value="8640000" calcext:value-type="float">
            <text:p>8640000</text:p>
          </table:table-cell>
          <table:table-cell table:formula="of:=[.B238]/[.C238]" office:value-type="float" office:value="0.00200243055555556" calcext:value-type="float">
            <text:p>0,00200243055555556000</text:p>
          </table:table-cell>
          <table:table-cell table:formula="of:=[.D239]-[.D238]" office:value-type="float" office:value="0.00000844907407407435" calcext:value-type="float">
            <text:p>0,00000844907407407435</text:p>
          </table:table-cell>
          <table:table-cell table:number-columns-repeated="5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8]+73" office:value-type="float" office:value="17374" calcext:value-type="float">
            <text:p>17374</text:p>
          </table:table-cell>
          <table:table-cell office:value-type="float" office:value="8640000" calcext:value-type="float">
            <text:p>8640000</text:p>
          </table:table-cell>
          <table:table-cell table:formula="of:=[.B239]/[.C239]" office:value-type="float" office:value="0.00201087962962963" calcext:value-type="float">
            <text:p>0,00201087962962963000</text:p>
          </table:table-cell>
          <table:table-cell table:formula="of:=[.D240]-[.D239]" office:value-type="float" office:value="0.00000844907407407392" calcext:value-type="float">
            <text:p>0,00000844907407407392</text:p>
          </table:table-cell>
          <table:table-cell table:number-columns-repeated="5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9]+73" office:value-type="float" office:value="17447" calcext:value-type="float">
            <text:p>17447</text:p>
          </table:table-cell>
          <table:table-cell office:value-type="float" office:value="8640000" calcext:value-type="float">
            <text:p>8640000</text:p>
          </table:table-cell>
          <table:table-cell table:formula="of:=[.B240]/[.C240]" office:value-type="float" office:value="0.0020193287037037" calcext:value-type="float">
            <text:p>0,00201932870370370000</text:p>
          </table:table-cell>
          <table:table-cell table:formula="of:=[.D241]-[.D240]" office:value-type="float" office:value="0.00000844907407407392" calcext:value-type="float">
            <text:p>0,00000844907407407392</text:p>
          </table:table-cell>
          <table:table-cell table:number-columns-repeated="5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0]+73" office:value-type="float" office:value="17520" calcext:value-type="float">
            <text:p>17520</text:p>
          </table:table-cell>
          <table:table-cell office:value-type="float" office:value="8640000" calcext:value-type="float">
            <text:p>8640000</text:p>
          </table:table-cell>
          <table:table-cell table:formula="of:=[.B241]/[.C241]" office:value-type="float" office:value="0.00202777777777778" calcext:value-type="float">
            <text:p>0,00202777777777778000</text:p>
          </table:table-cell>
          <table:table-cell table:formula="of:=[.D242]-[.D241]" office:value-type="float" office:value="0.00000844907407407435" calcext:value-type="float">
            <text:p>0,00000844907407407435</text:p>
          </table:table-cell>
          <table:table-cell table:number-columns-repeated="5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1]+73" office:value-type="float" office:value="17593" calcext:value-type="float">
            <text:p>17593</text:p>
          </table:table-cell>
          <table:table-cell office:value-type="float" office:value="8640000" calcext:value-type="float">
            <text:p>8640000</text:p>
          </table:table-cell>
          <table:table-cell table:formula="of:=[.B242]/[.C242]" office:value-type="float" office:value="0.00203622685185185" calcext:value-type="float">
            <text:p>0,00203622685185185000</text:p>
          </table:table-cell>
          <table:table-cell table:formula="of:=[.D243]-[.D242]" office:value-type="float" office:value="0.00000844907407407392" calcext:value-type="float">
            <text:p>0,00000844907407407392</text:p>
          </table:table-cell>
          <table:table-cell table:number-columns-repeated="5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2]+73" office:value-type="float" office:value="17666" calcext:value-type="float">
            <text:p>17666</text:p>
          </table:table-cell>
          <table:table-cell office:value-type="float" office:value="8640000" calcext:value-type="float">
            <text:p>8640000</text:p>
          </table:table-cell>
          <table:table-cell table:formula="of:=[.B243]/[.C243]" office:value-type="float" office:value="0.00204467592592593" calcext:value-type="float">
            <text:p>0,00204467592592593000</text:p>
          </table:table-cell>
          <table:table-cell table:formula="of:=[.D244]-[.D243]" office:value-type="float" office:value="0.00000844907407407392" calcext:value-type="float">
            <text:p>0,00000844907407407392</text:p>
          </table:table-cell>
          <table:table-cell table:number-columns-repeated="5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3]+73" office:value-type="float" office:value="17739" calcext:value-type="float">
            <text:p>17739</text:p>
          </table:table-cell>
          <table:table-cell office:value-type="float" office:value="8640000" calcext:value-type="float">
            <text:p>8640000</text:p>
          </table:table-cell>
          <table:table-cell table:formula="of:=[.B244]/[.C244]" office:value-type="float" office:value="0.002053125" calcext:value-type="float">
            <text:p>0,00205312500000000000</text:p>
          </table:table-cell>
          <table:table-cell table:formula="of:=[.D245]-[.D244]" office:value-type="float" office:value="0.00000844907407407435" calcext:value-type="float">
            <text:p>0,00000844907407407435</text:p>
          </table:table-cell>
          <table:table-cell table:number-columns-repeated="5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4]+73" office:value-type="float" office:value="17812" calcext:value-type="float">
            <text:p>17812</text:p>
          </table:table-cell>
          <table:table-cell office:value-type="float" office:value="8640000" calcext:value-type="float">
            <text:p>8640000</text:p>
          </table:table-cell>
          <table:table-cell table:formula="of:=[.B245]/[.C245]" office:value-type="float" office:value="0.00206157407407407" calcext:value-type="float">
            <text:p>0,00206157407407407000</text:p>
          </table:table-cell>
          <table:table-cell table:formula="of:=[.D246]-[.D245]" office:value-type="float" office:value="0.00000844907407407392" calcext:value-type="float">
            <text:p>0,00000844907407407392</text:p>
          </table:table-cell>
          <table:table-cell table:number-columns-repeated="5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5]+73" office:value-type="float" office:value="17885" calcext:value-type="float">
            <text:p>17885</text:p>
          </table:table-cell>
          <table:table-cell office:value-type="float" office:value="8640000" calcext:value-type="float">
            <text:p>8640000</text:p>
          </table:table-cell>
          <table:table-cell table:formula="of:=[.B246]/[.C246]" office:value-type="float" office:value="0.00207002314814815" calcext:value-type="float">
            <text:p>0,00207002314814815000</text:p>
          </table:table-cell>
          <table:table-cell table:formula="of:=[.D247]-[.D246]" office:value-type="float" office:value="0.00000844907407407392" calcext:value-type="float">
            <text:p>0,00000844907407407392</text:p>
          </table:table-cell>
          <table:table-cell table:number-columns-repeated="5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6]+73" office:value-type="float" office:value="17958" calcext:value-type="float">
            <text:p>17958</text:p>
          </table:table-cell>
          <table:table-cell office:value-type="float" office:value="8640000" calcext:value-type="float">
            <text:p>8640000</text:p>
          </table:table-cell>
          <table:table-cell table:formula="of:=[.B247]/[.C247]" office:value-type="float" office:value="0.00207847222222222" calcext:value-type="float">
            <text:p>0,00207847222222222000</text:p>
          </table:table-cell>
          <table:table-cell table:formula="of:=[.D248]-[.D247]" office:value-type="float" office:value="0.00000844907407407435" calcext:value-type="float">
            <text:p>0,00000844907407407435</text:p>
          </table:table-cell>
          <table:table-cell table:number-columns-repeated="5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7]+73" office:value-type="float" office:value="18031" calcext:value-type="float">
            <text:p>18031</text:p>
          </table:table-cell>
          <table:table-cell office:value-type="float" office:value="8640000" calcext:value-type="float">
            <text:p>8640000</text:p>
          </table:table-cell>
          <table:table-cell table:formula="of:=[.B248]/[.C248]" office:value-type="float" office:value="0.0020869212962963" calcext:value-type="float">
            <text:p>0,00208692129629630000</text:p>
          </table:table-cell>
          <table:table-cell table:formula="of:=[.D249]-[.D248]" office:value-type="float" office:value="0.00000844907407407392" calcext:value-type="float">
            <text:p>0,00000844907407407392</text:p>
          </table:table-cell>
          <table:table-cell table:number-columns-repeated="5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8]+73" office:value-type="float" office:value="18104" calcext:value-type="float">
            <text:p>18104</text:p>
          </table:table-cell>
          <table:table-cell office:value-type="float" office:value="8640000" calcext:value-type="float">
            <text:p>8640000</text:p>
          </table:table-cell>
          <table:table-cell table:formula="of:=[.B249]/[.C249]" office:value-type="float" office:value="0.00209537037037037" calcext:value-type="float">
            <text:p>0,00209537037037037000</text:p>
          </table:table-cell>
          <table:table-cell table:formula="of:=[.D250]-[.D249]" office:value-type="float" office:value="0.00000844907407407435" calcext:value-type="float">
            <text:p>0,00000844907407407435</text:p>
          </table:table-cell>
          <table:table-cell table:number-columns-repeated="5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9]+73" office:value-type="float" office:value="18177" calcext:value-type="float">
            <text:p>18177</text:p>
          </table:table-cell>
          <table:table-cell office:value-type="float" office:value="8640000" calcext:value-type="float">
            <text:p>8640000</text:p>
          </table:table-cell>
          <table:table-cell table:formula="of:=[.B250]/[.C250]" office:value-type="float" office:value="0.00210381944444444" calcext:value-type="float">
            <text:p>0,00210381944444444000</text:p>
          </table:table-cell>
          <table:table-cell table:formula="of:=[.D251]-[.D250]" office:value-type="float" office:value="0.00000844907407407392" calcext:value-type="float">
            <text:p>0,00000844907407407392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0]+73" office:value-type="float" office:value="18250" calcext:value-type="float">
            <text:p>18250</text:p>
          </table:table-cell>
          <table:table-cell office:value-type="float" office:value="8640000" calcext:value-type="float">
            <text:p>8640000</text:p>
          </table:table-cell>
          <table:table-cell table:formula="of:=[.B251]/[.C251]" office:value-type="float" office:value="0.00211226851851852" calcext:value-type="float">
            <text:p>0,00211226851851852000</text:p>
          </table:table-cell>
          <table:table-cell table:formula="of:=[.D252]-[.D251]" office:value-type="float" office:value="0.00000844907407407392" calcext:value-type="float">
            <text:p>0,00000844907407407392</text:p>
          </table:table-cell>
          <table:table-cell table:number-columns-repeated="5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1]+73" office:value-type="float" office:value="18323" calcext:value-type="float">
            <text:p>18323</text:p>
          </table:table-cell>
          <table:table-cell office:value-type="float" office:value="8640000" calcext:value-type="float">
            <text:p>8640000</text:p>
          </table:table-cell>
          <table:table-cell table:formula="of:=[.B252]/[.C252]" office:value-type="float" office:value="0.00212071759259259" calcext:value-type="float">
            <text:p>0,00212071759259259000</text:p>
          </table:table-cell>
          <table:table-cell table:formula="of:=[.D253]-[.D252]" office:value-type="float" office:value="0.00000844907407407435" calcext:value-type="float">
            <text:p>0,00000844907407407435</text:p>
          </table:table-cell>
          <table:table-cell table:number-columns-repeated="5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2]+73" office:value-type="float" office:value="18396" calcext:value-type="float">
            <text:p>18396</text:p>
          </table:table-cell>
          <table:table-cell office:value-type="float" office:value="8640000" calcext:value-type="float">
            <text:p>8640000</text:p>
          </table:table-cell>
          <table:table-cell table:formula="of:=[.B253]/[.C253]" office:value-type="float" office:value="0.00212916666666667" calcext:value-type="float">
            <text:p>0,00212916666666667000</text:p>
          </table:table-cell>
          <table:table-cell table:formula="of:=[.D254]-[.D253]" office:value-type="float" office:value="0.00000844907407407392" calcext:value-type="float">
            <text:p>0,00000844907407407392</text:p>
          </table:table-cell>
          <table:table-cell table:number-columns-repeated="5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3]+73" office:value-type="float" office:value="18469" calcext:value-type="float">
            <text:p>18469</text:p>
          </table:table-cell>
          <table:table-cell office:value-type="float" office:value="8640000" calcext:value-type="float">
            <text:p>8640000</text:p>
          </table:table-cell>
          <table:table-cell table:formula="of:=[.B254]/[.C254]" office:value-type="float" office:value="0.00213761574074074" calcext:value-type="float">
            <text:p>0,00213761574074074000</text:p>
          </table:table-cell>
          <table:table-cell table:formula="of:=[.D255]-[.D254]" office:value-type="float" office:value="0.00000844907407407392" calcext:value-type="float">
            <text:p>0,00000844907407407392</text:p>
          </table:table-cell>
          <table:table-cell table:number-columns-repeated="5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4]+73" office:value-type="float" office:value="18542" calcext:value-type="float">
            <text:p>18542</text:p>
          </table:table-cell>
          <table:table-cell office:value-type="float" office:value="8640000" calcext:value-type="float">
            <text:p>8640000</text:p>
          </table:table-cell>
          <table:table-cell table:formula="of:=[.B255]/[.C255]" office:value-type="float" office:value="0.00214606481481481" calcext:value-type="float">
            <text:p>0,00214606481481481000</text:p>
          </table:table-cell>
          <table:table-cell table:formula="of:=[.D256]-[.D255]" office:value-type="float" office:value="0.00000844907407407435" calcext:value-type="float">
            <text:p>0,00000844907407407435</text:p>
          </table:table-cell>
          <table:table-cell table:number-columns-repeated="5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5]+73" office:value-type="float" office:value="18615" calcext:value-type="float">
            <text:p>18615</text:p>
          </table:table-cell>
          <table:table-cell office:value-type="float" office:value="8640000" calcext:value-type="float">
            <text:p>8640000</text:p>
          </table:table-cell>
          <table:table-cell table:formula="of:=[.B256]/[.C256]" office:value-type="float" office:value="0.00215451388888889" calcext:value-type="float">
            <text:p>0,00215451388888889000</text:p>
          </table:table-cell>
          <table:table-cell table:formula="of:=[.D257]-[.D256]" office:value-type="float" office:value="0.00000844907407407392" calcext:value-type="float">
            <text:p>0,00000844907407407392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56]+73" office:value-type="float" office:value="18688" calcext:value-type="float">
            <text:p>18688</text:p>
          </table:table-cell>
          <table:table-cell office:value-type="float" office:value="8640000" calcext:value-type="float">
            <text:p>8640000</text:p>
          </table:table-cell>
          <table:table-cell table:formula="of:=[.B257]/[.C257]" office:value-type="float" office:value="0.00216296296296296" calcext:value-type="float">
            <text:p>0,00216296296296296000</text:p>
          </table:table-cell>
          <table:table-cell table:formula="of:=[.D258]-[.D257]" office:value-type="float" office:value="0.00000844907407407435" calcext:value-type="float">
            <text:p>0,00000844907407407435</text:p>
          </table:table-cell>
          <table:table-cell table:number-columns-repeated="5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257]+73" office:value-type="float" office:value="18761" calcext:value-type="float">
            <text:p>18761</text:p>
          </table:table-cell>
          <table:table-cell office:value-type="float" office:value="8640000" calcext:value-type="float">
            <text:p>8640000</text:p>
          </table:table-cell>
          <table:table-cell table:formula="of:=[.B258]/[.C258]" office:value-type="float" office:value="0.00217141203703704" calcext:value-type="float">
            <text:p>0,00217141203703704000</text:p>
          </table:table-cell>
          <table:table-cell table:formula="of:=[.D259]-[.D258]" office:value-type="float" office:value="0.00000844907407407392" calcext:value-type="float">
            <text:p>0,00000844907407407392</text:p>
          </table:table-cell>
          <table:table-cell table:number-columns-repeated="5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258]+73" office:value-type="float" office:value="18834" calcext:value-type="float">
            <text:p>18834</text:p>
          </table:table-cell>
          <table:table-cell office:value-type="float" office:value="8640000" calcext:value-type="float">
            <text:p>8640000</text:p>
          </table:table-cell>
          <table:table-cell table:formula="of:=[.B259]/[.C259]" office:value-type="float" office:value="0.00217986111111111" calcext:value-type="float">
            <text:p>0,00217986111111111000</text:p>
          </table:table-cell>
          <table:table-cell table:formula="of:=[.D260]-[.D259]" office:value-type="float" office:value="0.00000844907407407392" calcext:value-type="float">
            <text:p>0,00000844907407407392</text:p>
          </table:table-cell>
          <table:table-cell table:number-columns-repeated="5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259]+73" office:value-type="float" office:value="18907" calcext:value-type="float">
            <text:p>18907</text:p>
          </table:table-cell>
          <table:table-cell office:value-type="float" office:value="8640000" calcext:value-type="float">
            <text:p>8640000</text:p>
          </table:table-cell>
          <table:table-cell table:formula="of:=[.B260]/[.C260]" office:value-type="float" office:value="0.00218831018518519" calcext:value-type="float">
            <text:p>0,00218831018518519000</text:p>
          </table:table-cell>
          <table:table-cell table:formula="of:=[.D261]-[.D260]" office:value-type="float" office:value="0.00000844907407407435" calcext:value-type="float">
            <text:p>0,00000844907407407435</text:p>
          </table:table-cell>
          <table:table-cell table:number-columns-repeated="5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260]+73" office:value-type="float" office:value="18980" calcext:value-type="float">
            <text:p>18980</text:p>
          </table:table-cell>
          <table:table-cell office:value-type="float" office:value="8640000" calcext:value-type="float">
            <text:p>8640000</text:p>
          </table:table-cell>
          <table:table-cell table:formula="of:=[.B261]/[.C261]" office:value-type="float" office:value="0.00219675925925926" calcext:value-type="float">
            <text:p>0,00219675925925926000</text:p>
          </table:table-cell>
          <table:table-cell table:formula="of:=[.D262]-[.D261]" office:value-type="float" office:value="0.00000844907407407392" calcext:value-type="float">
            <text:p>0,00000844907407407392</text:p>
          </table:table-cell>
          <table:table-cell table:number-columns-repeated="5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261]+73" office:value-type="float" office:value="19053" calcext:value-type="float">
            <text:p>19053</text:p>
          </table:table-cell>
          <table:table-cell office:value-type="float" office:value="8640000" calcext:value-type="float">
            <text:p>8640000</text:p>
          </table:table-cell>
          <table:table-cell table:formula="of:=[.B262]/[.C262]" office:value-type="float" office:value="0.00220520833333333" calcext:value-type="float">
            <text:p>0,00220520833333333000</text:p>
          </table:table-cell>
          <table:table-cell table:formula="of:=[.D263]-[.D262]" office:value-type="float" office:value="0.00000844907407407392" calcext:value-type="float">
            <text:p>0,00000844907407407392</text:p>
          </table:table-cell>
          <table:table-cell table:number-columns-repeated="5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B262]+73" office:value-type="float" office:value="19126" calcext:value-type="float">
            <text:p>19126</text:p>
          </table:table-cell>
          <table:table-cell office:value-type="float" office:value="8640000" calcext:value-type="float">
            <text:p>8640000</text:p>
          </table:table-cell>
          <table:table-cell table:formula="of:=[.B263]/[.C263]" office:value-type="float" office:value="0.00221365740740741" calcext:value-type="float">
            <text:p>0,00221365740740741000</text:p>
          </table:table-cell>
          <table:table-cell table:formula="of:=[.D264]-[.D263]" office:value-type="float" office:value="0.00000844907407407435" calcext:value-type="float">
            <text:p>0,00000844907407407435</text:p>
          </table:table-cell>
          <table:table-cell table:number-columns-repeated="5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B263]+73" office:value-type="float" office:value="19199" calcext:value-type="float">
            <text:p>19199</text:p>
          </table:table-cell>
          <table:table-cell office:value-type="float" office:value="8640000" calcext:value-type="float">
            <text:p>8640000</text:p>
          </table:table-cell>
          <table:table-cell table:formula="of:=[.B264]/[.C264]" office:value-type="float" office:value="0.00222210648148148" calcext:value-type="float">
            <text:p>0,00222210648148148000</text:p>
          </table:table-cell>
          <table:table-cell table:formula="of:=[.D265]-[.D264]" office:value-type="float" office:value="0.00000844907407407392" calcext:value-type="float">
            <text:p>0,00000844907407407392</text:p>
          </table:table-cell>
          <table:table-cell table:number-columns-repeated="5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264]+73" office:value-type="float" office:value="19272" calcext:value-type="float">
            <text:p>19272</text:p>
          </table:table-cell>
          <table:table-cell office:value-type="float" office:value="8640000" calcext:value-type="float">
            <text:p>8640000</text:p>
          </table:table-cell>
          <table:table-cell table:formula="of:=[.B265]/[.C265]" office:value-type="float" office:value="0.00223055555555556" calcext:value-type="float">
            <text:p>0,00223055555555556000</text:p>
          </table:table-cell>
          <table:table-cell table:formula="of:=[.D266]-[.D265]" office:value-type="float" office:value="0.00000844907407407392" calcext:value-type="float">
            <text:p>0,00000844907407407392</text:p>
          </table:table-cell>
          <table:table-cell table:number-columns-repeated="5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B265]+73" office:value-type="float" office:value="19345" calcext:value-type="float">
            <text:p>19345</text:p>
          </table:table-cell>
          <table:table-cell office:value-type="float" office:value="8640000" calcext:value-type="float">
            <text:p>8640000</text:p>
          </table:table-cell>
          <table:table-cell table:formula="of:=[.B266]/[.C266]" office:value-type="float" office:value="0.00223900462962963" calcext:value-type="float">
            <text:p>0,00223900462962963000</text:p>
          </table:table-cell>
          <table:table-cell table:formula="of:=[.D267]-[.D266]" office:value-type="float" office:value="0.00000844907407407435" calcext:value-type="float">
            <text:p>0,00000844907407407435</text:p>
          </table:table-cell>
          <table:table-cell table:number-columns-repeated="5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B266]+73" office:value-type="float" office:value="19418" calcext:value-type="float">
            <text:p>19418</text:p>
          </table:table-cell>
          <table:table-cell office:value-type="float" office:value="8640000" calcext:value-type="float">
            <text:p>8640000</text:p>
          </table:table-cell>
          <table:table-cell table:formula="of:=[.B267]/[.C267]" office:value-type="float" office:value="0.0022474537037037" calcext:value-type="float">
            <text:p>0,00224745370370370000</text:p>
          </table:table-cell>
          <table:table-cell table:formula="of:=[.D268]-[.D267]" office:value-type="float" office:value="0.00000844907407407392" calcext:value-type="float">
            <text:p>0,00000844907407407392</text:p>
          </table:table-cell>
          <table:table-cell table:number-columns-repeated="5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B267]+73" office:value-type="float" office:value="19491" calcext:value-type="float">
            <text:p>19491</text:p>
          </table:table-cell>
          <table:table-cell office:value-type="float" office:value="8640000" calcext:value-type="float">
            <text:p>8640000</text:p>
          </table:table-cell>
          <table:table-cell table:formula="of:=[.B268]/[.C268]" office:value-type="float" office:value="0.00225590277777778" calcext:value-type="float">
            <text:p>0,00225590277777778000</text:p>
          </table:table-cell>
          <table:table-cell table:formula="of:=[.D269]-[.D268]" office:value-type="float" office:value="0.00000844907407407435" calcext:value-type="float">
            <text:p>0,00000844907407407435</text:p>
          </table:table-cell>
          <table:table-cell table:number-columns-repeated="5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B268]+73" office:value-type="float" office:value="19564" calcext:value-type="float">
            <text:p>19564</text:p>
          </table:table-cell>
          <table:table-cell office:value-type="float" office:value="8640000" calcext:value-type="float">
            <text:p>8640000</text:p>
          </table:table-cell>
          <table:table-cell table:formula="of:=[.B269]/[.C269]" office:value-type="float" office:value="0.00226435185185185" calcext:value-type="float">
            <text:p>0,00226435185185185000</text:p>
          </table:table-cell>
          <table:table-cell table:formula="of:=[.D270]-[.D269]" office:value-type="float" office:value="0.00000844907407407392" calcext:value-type="float">
            <text:p>0,00000844907407407392</text:p>
          </table:table-cell>
          <table:table-cell table:number-columns-repeated="5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B269]+73" office:value-type="float" office:value="19637" calcext:value-type="float">
            <text:p>19637</text:p>
          </table:table-cell>
          <table:table-cell office:value-type="float" office:value="8640000" calcext:value-type="float">
            <text:p>8640000</text:p>
          </table:table-cell>
          <table:table-cell table:formula="of:=[.B270]/[.C270]" office:value-type="float" office:value="0.00227280092592593" calcext:value-type="float">
            <text:p>0,00227280092592593000</text:p>
          </table:table-cell>
          <table:table-cell table:formula="of:=[.D271]-[.D270]" office:value-type="float" office:value="0.00000844907407407392" calcext:value-type="float">
            <text:p>0,00000844907407407392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270]+73" office:value-type="float" office:value="19710" calcext:value-type="float">
            <text:p>19710</text:p>
          </table:table-cell>
          <table:table-cell office:value-type="float" office:value="8640000" calcext:value-type="float">
            <text:p>8640000</text:p>
          </table:table-cell>
          <table:table-cell table:formula="of:=[.B271]/[.C271]" office:value-type="float" office:value="0.00228125" calcext:value-type="float">
            <text:p>0,00228125000000000000</text:p>
          </table:table-cell>
          <table:table-cell table:formula="of:=[.D272]-[.D271]" office:value-type="float" office:value="0.00000844907407407435" calcext:value-type="float">
            <text:p>0,00000844907407407435</text:p>
          </table:table-cell>
          <table:table-cell table:number-columns-repeated="5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B271]+73" office:value-type="float" office:value="19783" calcext:value-type="float">
            <text:p>19783</text:p>
          </table:table-cell>
          <table:table-cell office:value-type="float" office:value="8640000" calcext:value-type="float">
            <text:p>8640000</text:p>
          </table:table-cell>
          <table:table-cell table:formula="of:=[.B272]/[.C272]" office:value-type="float" office:value="0.00228969907407407" calcext:value-type="float">
            <text:p>0,00228969907407407000</text:p>
          </table:table-cell>
          <table:table-cell table:formula="of:=[.D273]-[.D272]" office:value-type="float" office:value="0.00000844907407407392" calcext:value-type="float">
            <text:p>0,00000844907407407392</text:p>
          </table:table-cell>
          <table:table-cell table:number-columns-repeated="5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B272]+73" office:value-type="float" office:value="19856" calcext:value-type="float">
            <text:p>19856</text:p>
          </table:table-cell>
          <table:table-cell office:value-type="float" office:value="8640000" calcext:value-type="float">
            <text:p>8640000</text:p>
          </table:table-cell>
          <table:table-cell table:formula="of:=[.B273]/[.C273]" office:value-type="float" office:value="0.00229814814814815" calcext:value-type="float">
            <text:p>0,00229814814814815000</text:p>
          </table:table-cell>
          <table:table-cell table:formula="of:=[.D274]-[.D273]" office:value-type="float" office:value="0.00000844907407407392" calcext:value-type="float">
            <text:p>0,00000844907407407392</text:p>
          </table:table-cell>
          <table:table-cell table:number-columns-repeated="5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B273]+73" office:value-type="float" office:value="19929" calcext:value-type="float">
            <text:p>19929</text:p>
          </table:table-cell>
          <table:table-cell office:value-type="float" office:value="8640000" calcext:value-type="float">
            <text:p>8640000</text:p>
          </table:table-cell>
          <table:table-cell table:formula="of:=[.B274]/[.C274]" office:value-type="float" office:value="0.00230659722222222" calcext:value-type="float">
            <text:p>0,00230659722222222000</text:p>
          </table:table-cell>
          <table:table-cell table:formula="of:=[.D275]-[.D274]" office:value-type="float" office:value="0.00000844907407407435" calcext:value-type="float">
            <text:p>0,00000844907407407435</text:p>
          </table:table-cell>
          <table:table-cell table:number-columns-repeated="5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B274]+73" office:value-type="float" office:value="20002" calcext:value-type="float">
            <text:p>20002</text:p>
          </table:table-cell>
          <table:table-cell office:value-type="float" office:value="8640000" calcext:value-type="float">
            <text:p>8640000</text:p>
          </table:table-cell>
          <table:table-cell table:formula="of:=[.B275]/[.C275]" office:value-type="float" office:value="0.0023150462962963" calcext:value-type="float">
            <text:p>0,00231504629629630000</text:p>
          </table:table-cell>
          <table:table-cell table:formula="of:=[.D276]-[.D275]" office:value-type="float" office:value="0.00000844907407407392" calcext:value-type="float">
            <text:p>0,00000844907407407392</text:p>
          </table:table-cell>
          <table:table-cell table:number-columns-repeated="5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B275]+73" office:value-type="float" office:value="20075" calcext:value-type="float">
            <text:p>20075</text:p>
          </table:table-cell>
          <table:table-cell office:value-type="float" office:value="8640000" calcext:value-type="float">
            <text:p>8640000</text:p>
          </table:table-cell>
          <table:table-cell table:formula="of:=[.B276]/[.C276]" office:value-type="float" office:value="0.00232349537037037" calcext:value-type="float">
            <text:p>0,00232349537037037000</text:p>
          </table:table-cell>
          <table:table-cell table:formula="of:=[.D277]-[.D276]" office:value-type="float" office:value="0.00000844907407407435" calcext:value-type="float">
            <text:p>0,00000844907407407435</text:p>
          </table:table-cell>
          <table:table-cell table:number-columns-repeated="5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B276]+73" office:value-type="float" office:value="20148" calcext:value-type="float">
            <text:p>20148</text:p>
          </table:table-cell>
          <table:table-cell office:value-type="float" office:value="8640000" calcext:value-type="float">
            <text:p>8640000</text:p>
          </table:table-cell>
          <table:table-cell table:formula="of:=[.B277]/[.C277]" office:value-type="float" office:value="0.00233194444444444" calcext:value-type="float">
            <text:p>0,00233194444444444000</text:p>
          </table:table-cell>
          <table:table-cell table:formula="of:=[.D278]-[.D277]" office:value-type="float" office:value="0.00000844907407407392" calcext:value-type="float">
            <text:p>0,00000844907407407392</text:p>
          </table:table-cell>
          <table:table-cell table:number-columns-repeated="5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B277]+73" office:value-type="float" office:value="20221" calcext:value-type="float">
            <text:p>20221</text:p>
          </table:table-cell>
          <table:table-cell office:value-type="float" office:value="8640000" calcext:value-type="float">
            <text:p>8640000</text:p>
          </table:table-cell>
          <table:table-cell table:formula="of:=[.B278]/[.C278]" office:value-type="float" office:value="0.00234039351851852" calcext:value-type="float">
            <text:p>0,00234039351851852000</text:p>
          </table:table-cell>
          <table:table-cell table:formula="of:=[.D279]-[.D278]" office:value-type="float" office:value="0.00000844907407407392" calcext:value-type="float">
            <text:p>0,00000844907407407392</text:p>
          </table:table-cell>
          <table:table-cell table:number-columns-repeated="5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B278]+73" office:value-type="float" office:value="20294" calcext:value-type="float">
            <text:p>20294</text:p>
          </table:table-cell>
          <table:table-cell office:value-type="float" office:value="8640000" calcext:value-type="float">
            <text:p>8640000</text:p>
          </table:table-cell>
          <table:table-cell table:formula="of:=[.B279]/[.C279]" office:value-type="float" office:value="0.00234884259259259" calcext:value-type="float">
            <text:p>0,00234884259259259000</text:p>
          </table:table-cell>
          <table:table-cell table:formula="of:=[.D280]-[.D279]" office:value-type="float" office:value="0.00000844907407407435" calcext:value-type="float">
            <text:p>0,00000844907407407435</text:p>
          </table:table-cell>
          <table:table-cell table:number-columns-repeated="5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B279]+73" office:value-type="float" office:value="20367" calcext:value-type="float">
            <text:p>20367</text:p>
          </table:table-cell>
          <table:table-cell office:value-type="float" office:value="8640000" calcext:value-type="float">
            <text:p>8640000</text:p>
          </table:table-cell>
          <table:table-cell table:formula="of:=[.B280]/[.C280]" office:value-type="float" office:value="0.00235729166666667" calcext:value-type="float">
            <text:p>0,00235729166666667000</text:p>
          </table:table-cell>
          <table:table-cell table:formula="of:=[.D281]-[.D280]" office:value-type="float" office:value="0.00000844907407407392" calcext:value-type="float">
            <text:p>0,00000844907407407392</text:p>
          </table:table-cell>
          <table:table-cell table:number-columns-repeated="5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B280]+73" office:value-type="float" office:value="20440" calcext:value-type="float">
            <text:p>20440</text:p>
          </table:table-cell>
          <table:table-cell office:value-type="float" office:value="8640000" calcext:value-type="float">
            <text:p>8640000</text:p>
          </table:table-cell>
          <table:table-cell table:formula="of:=[.B281]/[.C281]" office:value-type="float" office:value="0.00236574074074074" calcext:value-type="float">
            <text:p>0,00236574074074074000</text:p>
          </table:table-cell>
          <table:table-cell table:formula="of:=[.D282]-[.D281]" office:value-type="float" office:value="0.00000844907407407392" calcext:value-type="float">
            <text:p>0,00000844907407407392</text:p>
          </table:table-cell>
          <table:table-cell table:number-columns-repeated="5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B281]+73" office:value-type="float" office:value="20513" calcext:value-type="float">
            <text:p>20513</text:p>
          </table:table-cell>
          <table:table-cell office:value-type="float" office:value="8640000" calcext:value-type="float">
            <text:p>8640000</text:p>
          </table:table-cell>
          <table:table-cell table:formula="of:=[.B282]/[.C282]" office:value-type="float" office:value="0.00237418981481481" calcext:value-type="float">
            <text:p>0,00237418981481481000</text:p>
          </table:table-cell>
          <table:table-cell table:formula="of:=[.D283]-[.D282]" office:value-type="float" office:value="0.00000844907407407435" calcext:value-type="float">
            <text:p>0,00000844907407407435</text:p>
          </table:table-cell>
          <table:table-cell table:number-columns-repeated="5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B282]+73" office:value-type="float" office:value="20586" calcext:value-type="float">
            <text:p>20586</text:p>
          </table:table-cell>
          <table:table-cell office:value-type="float" office:value="8640000" calcext:value-type="float">
            <text:p>8640000</text:p>
          </table:table-cell>
          <table:table-cell table:formula="of:=[.B283]/[.C283]" office:value-type="float" office:value="0.00238263888888889" calcext:value-type="float">
            <text:p>0,00238263888888889000</text:p>
          </table:table-cell>
          <table:table-cell table:formula="of:=[.D284]-[.D283]" office:value-type="float" office:value="0.00000844907407407392" calcext:value-type="float">
            <text:p>0,00000844907407407392</text:p>
          </table:table-cell>
          <table:table-cell table:number-columns-repeated="5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B283]+73" office:value-type="float" office:value="20659" calcext:value-type="float">
            <text:p>20659</text:p>
          </table:table-cell>
          <table:table-cell office:value-type="float" office:value="8640000" calcext:value-type="float">
            <text:p>8640000</text:p>
          </table:table-cell>
          <table:table-cell table:formula="of:=[.B284]/[.C284]" office:value-type="float" office:value="0.00239108796296296" calcext:value-type="float">
            <text:p>0,00239108796296296000</text:p>
          </table:table-cell>
          <table:table-cell table:formula="of:=[.D285]-[.D284]" office:value-type="float" office:value="0.00000844907407407392" calcext:value-type="float">
            <text:p>0,00000844907407407392</text:p>
          </table:table-cell>
          <table:table-cell table:number-columns-repeated="5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B284]+73" office:value-type="float" office:value="20732" calcext:value-type="float">
            <text:p>20732</text:p>
          </table:table-cell>
          <table:table-cell office:value-type="float" office:value="8640000" calcext:value-type="float">
            <text:p>8640000</text:p>
          </table:table-cell>
          <table:table-cell table:formula="of:=[.B285]/[.C285]" office:value-type="float" office:value="0.00239953703703704" calcext:value-type="float">
            <text:p>0,00239953703703704000</text:p>
          </table:table-cell>
          <table:table-cell table:formula="of:=[.D286]-[.D285]" office:value-type="float" office:value="0.00000844907407407435" calcext:value-type="float">
            <text:p>0,00000844907407407435</text:p>
          </table:table-cell>
          <table:table-cell table:number-columns-repeated="5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B285]+73" office:value-type="float" office:value="20805" calcext:value-type="float">
            <text:p>20805</text:p>
          </table:table-cell>
          <table:table-cell office:value-type="float" office:value="8640000" calcext:value-type="float">
            <text:p>8640000</text:p>
          </table:table-cell>
          <table:table-cell table:formula="of:=[.B286]/[.C286]" office:value-type="float" office:value="0.00240798611111111" calcext:value-type="float">
            <text:p>0,00240798611111111000</text:p>
          </table:table-cell>
          <table:table-cell table:formula="of:=[.D287]-[.D286]" office:value-type="float" office:value="0.00000844907407407392" calcext:value-type="float">
            <text:p>0,00000844907407407392</text:p>
          </table:table-cell>
          <table:table-cell table:number-columns-repeated="5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B286]+73" office:value-type="float" office:value="20878" calcext:value-type="float">
            <text:p>20878</text:p>
          </table:table-cell>
          <table:table-cell office:value-type="float" office:value="8640000" calcext:value-type="float">
            <text:p>8640000</text:p>
          </table:table-cell>
          <table:table-cell table:formula="of:=[.B287]/[.C287]" office:value-type="float" office:value="0.00241643518518519" calcext:value-type="float">
            <text:p>0,00241643518518519000</text:p>
          </table:table-cell>
          <table:table-cell table:formula="of:=[.D288]-[.D287]" office:value-type="float" office:value="0.00000844907407407435" calcext:value-type="float">
            <text:p>0,00000844907407407435</text:p>
          </table:table-cell>
          <table:table-cell table:number-columns-repeated="5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B287]+73" office:value-type="float" office:value="20951" calcext:value-type="float">
            <text:p>20951</text:p>
          </table:table-cell>
          <table:table-cell office:value-type="float" office:value="8640000" calcext:value-type="float">
            <text:p>8640000</text:p>
          </table:table-cell>
          <table:table-cell table:formula="of:=[.B288]/[.C288]" office:value-type="float" office:value="0.00242488425925926" calcext:value-type="float">
            <text:p>0,00242488425925926000</text:p>
          </table:table-cell>
          <table:table-cell table:formula="of:=[.D289]-[.D288]" office:value-type="float" office:value="0.00000844907407407392" calcext:value-type="float">
            <text:p>0,00000844907407407392</text:p>
          </table:table-cell>
          <table:table-cell table:number-columns-repeated="5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B288]+73" office:value-type="float" office:value="21024" calcext:value-type="float">
            <text:p>21024</text:p>
          </table:table-cell>
          <table:table-cell office:value-type="float" office:value="8640000" calcext:value-type="float">
            <text:p>8640000</text:p>
          </table:table-cell>
          <table:table-cell table:formula="of:=[.B289]/[.C289]" office:value-type="float" office:value="0.00243333333333333" calcext:value-type="float">
            <text:p>0,00243333333333333000</text:p>
          </table:table-cell>
          <table:table-cell table:formula="of:=[.D290]-[.D289]" office:value-type="float" office:value="0.00000844907407407392" calcext:value-type="float">
            <text:p>0,00000844907407407392</text:p>
          </table:table-cell>
          <table:table-cell table:number-columns-repeated="5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B289]+73" office:value-type="float" office:value="21097" calcext:value-type="float">
            <text:p>21097</text:p>
          </table:table-cell>
          <table:table-cell office:value-type="float" office:value="8640000" calcext:value-type="float">
            <text:p>8640000</text:p>
          </table:table-cell>
          <table:table-cell table:formula="of:=[.B290]/[.C290]" office:value-type="float" office:value="0.00244178240740741" calcext:value-type="float">
            <text:p>0,00244178240740741000</text:p>
          </table:table-cell>
          <table:table-cell table:formula="of:=[.D291]-[.D290]" office:value-type="float" office:value="0.00000844907407407435" calcext:value-type="float">
            <text:p>0,00000844907407407435</text:p>
          </table:table-cell>
          <table:table-cell table:number-columns-repeated="5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B290]+73" office:value-type="float" office:value="21170" calcext:value-type="float">
            <text:p>21170</text:p>
          </table:table-cell>
          <table:table-cell office:value-type="float" office:value="8640000" calcext:value-type="float">
            <text:p>8640000</text:p>
          </table:table-cell>
          <table:table-cell table:formula="of:=[.B291]/[.C291]" office:value-type="float" office:value="0.00245023148148148" calcext:value-type="float">
            <text:p>0,00245023148148148000</text:p>
          </table:table-cell>
          <table:table-cell table:formula="of:=[.D292]-[.D291]" office:value-type="float" office:value="0.00000844907407407392" calcext:value-type="float">
            <text:p>0,00000844907407407392</text:p>
          </table:table-cell>
          <table:table-cell table:number-columns-repeated="5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B291]+73" office:value-type="float" office:value="21243" calcext:value-type="float">
            <text:p>21243</text:p>
          </table:table-cell>
          <table:table-cell office:value-type="float" office:value="8640000" calcext:value-type="float">
            <text:p>8640000</text:p>
          </table:table-cell>
          <table:table-cell table:formula="of:=[.B292]/[.C292]" office:value-type="float" office:value="0.00245868055555556" calcext:value-type="float">
            <text:p>0,00245868055555556000</text:p>
          </table:table-cell>
          <table:table-cell table:formula="of:=[.D293]-[.D292]" office:value-type="float" office:value="0.00000844907407407392" calcext:value-type="float">
            <text:p>0,00000844907407407392</text:p>
          </table:table-cell>
          <table:table-cell table:number-columns-repeated="5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B292]+73" office:value-type="float" office:value="21316" calcext:value-type="float">
            <text:p>21316</text:p>
          </table:table-cell>
          <table:table-cell office:value-type="float" office:value="8640000" calcext:value-type="float">
            <text:p>8640000</text:p>
          </table:table-cell>
          <table:table-cell table:formula="of:=[.B293]/[.C293]" office:value-type="float" office:value="0.00246712962962963" calcext:value-type="float">
            <text:p>0,00246712962962963000</text:p>
          </table:table-cell>
          <table:table-cell table:formula="of:=[.D294]-[.D293]" office:value-type="float" office:value="0.00000844907407407435" calcext:value-type="float">
            <text:p>0,00000844907407407435</text:p>
          </table:table-cell>
          <table:table-cell table:number-columns-repeated="5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B293]+73" office:value-type="float" office:value="21389" calcext:value-type="float">
            <text:p>21389</text:p>
          </table:table-cell>
          <table:table-cell office:value-type="float" office:value="8640000" calcext:value-type="float">
            <text:p>8640000</text:p>
          </table:table-cell>
          <table:table-cell table:formula="of:=[.B294]/[.C294]" office:value-type="float" office:value="0.0024755787037037" calcext:value-type="float">
            <text:p>0,00247557870370370000</text:p>
          </table:table-cell>
          <table:table-cell table:formula="of:=[.D295]-[.D294]" office:value-type="float" office:value="0.00000844907407407392" calcext:value-type="float">
            <text:p>0,00000844907407407392</text:p>
          </table:table-cell>
          <table:table-cell table:number-columns-repeated="5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B294]+73" office:value-type="float" office:value="21462" calcext:value-type="float">
            <text:p>21462</text:p>
          </table:table-cell>
          <table:table-cell office:value-type="float" office:value="8640000" calcext:value-type="float">
            <text:p>8640000</text:p>
          </table:table-cell>
          <table:table-cell table:formula="of:=[.B295]/[.C295]" office:value-type="float" office:value="0.00248402777777778" calcext:value-type="float">
            <text:p>0,00248402777777778000</text:p>
          </table:table-cell>
          <table:table-cell table:formula="of:=[.D296]-[.D295]" office:value-type="float" office:value="0.00000844907407407435" calcext:value-type="float">
            <text:p>0,00000844907407407435</text:p>
          </table:table-cell>
          <table:table-cell table:number-columns-repeated="5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B295]+73" office:value-type="float" office:value="21535" calcext:value-type="float">
            <text:p>21535</text:p>
          </table:table-cell>
          <table:table-cell office:value-type="float" office:value="8640000" calcext:value-type="float">
            <text:p>8640000</text:p>
          </table:table-cell>
          <table:table-cell table:formula="of:=[.B296]/[.C296]" office:value-type="float" office:value="0.00249247685185185" calcext:value-type="float">
            <text:p>0,00249247685185185000</text:p>
          </table:table-cell>
          <table:table-cell table:formula="of:=[.D297]-[.D296]" office:value-type="float" office:value="0.00000844907407407392" calcext:value-type="float">
            <text:p>0,00000844907407407392</text:p>
          </table:table-cell>
          <table:table-cell table:number-columns-repeated="5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B296]+73" office:value-type="float" office:value="21608" calcext:value-type="float">
            <text:p>21608</text:p>
          </table:table-cell>
          <table:table-cell office:value-type="float" office:value="8640000" calcext:value-type="float">
            <text:p>8640000</text:p>
          </table:table-cell>
          <table:table-cell table:formula="of:=[.B297]/[.C297]" office:value-type="float" office:value="0.00250092592592593" calcext:value-type="float">
            <text:p>0,00250092592592593000</text:p>
          </table:table-cell>
          <table:table-cell table:formula="of:=[.D298]-[.D297]" office:value-type="float" office:value="0.00000844907407407392" calcext:value-type="float">
            <text:p>0,00000844907407407392</text:p>
          </table:table-cell>
          <table:table-cell table:number-columns-repeated="5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B297]+73" office:value-type="float" office:value="21681" calcext:value-type="float">
            <text:p>21681</text:p>
          </table:table-cell>
          <table:table-cell office:value-type="float" office:value="8640000" calcext:value-type="float">
            <text:p>8640000</text:p>
          </table:table-cell>
          <table:table-cell table:formula="of:=[.B298]/[.C298]" office:value-type="float" office:value="0.002509375" calcext:value-type="float">
            <text:p>0,00250937500000000000</text:p>
          </table:table-cell>
          <table:table-cell table:formula="of:=[.D299]-[.D298]" office:value-type="float" office:value="0.00000844907407407435" calcext:value-type="float">
            <text:p>0,00000844907407407435</text:p>
          </table:table-cell>
          <table:table-cell table:number-columns-repeated="5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B298]+73" office:value-type="float" office:value="21754" calcext:value-type="float">
            <text:p>21754</text:p>
          </table:table-cell>
          <table:table-cell office:value-type="float" office:value="8640000" calcext:value-type="float">
            <text:p>8640000</text:p>
          </table:table-cell>
          <table:table-cell table:formula="of:=[.B299]/[.C299]" office:value-type="float" office:value="0.00251782407407407" calcext:value-type="float">
            <text:p>0,00251782407407407000</text:p>
          </table:table-cell>
          <table:table-cell table:formula="of:=[.D300]-[.D299]" office:value-type="float" office:value="0.00000844907407407392" calcext:value-type="float">
            <text:p>0,00000844907407407392</text:p>
          </table:table-cell>
          <table:table-cell table:number-columns-repeated="5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B299]+73" office:value-type="float" office:value="21827" calcext:value-type="float">
            <text:p>21827</text:p>
          </table:table-cell>
          <table:table-cell office:value-type="float" office:value="8640000" calcext:value-type="float">
            <text:p>8640000</text:p>
          </table:table-cell>
          <table:table-cell table:formula="of:=[.B300]/[.C300]" office:value-type="float" office:value="0.00252627314814815" calcext:value-type="float">
            <text:p>0,00252627314814815000</text:p>
          </table:table-cell>
          <table:table-cell table:formula="of:=[.D301]-[.D300]" office:value-type="float" office:value="0.00000844907407407392" calcext:value-type="float">
            <text:p>0,00000844907407407392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B300]+73" office:value-type="float" office:value="21900" calcext:value-type="float">
            <text:p>21900</text:p>
          </table:table-cell>
          <table:table-cell office:value-type="float" office:value="8640000" calcext:value-type="float">
            <text:p>8640000</text:p>
          </table:table-cell>
          <table:table-cell table:formula="of:=[.B301]/[.C301]" office:value-type="float" office:value="0.00253472222222222" calcext:value-type="float">
            <text:p>0,00253472222222222000</text:p>
          </table:table-cell>
          <table:table-cell table:formula="of:=[.D302]-[.D301]" office:value-type="float" office:value="0.00000844907407407435" calcext:value-type="float">
            <text:p>0,00000844907407407435</text:p>
          </table:table-cell>
          <table:table-cell table:number-columns-repeated="5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B301]+73" office:value-type="float" office:value="21973" calcext:value-type="float">
            <text:p>21973</text:p>
          </table:table-cell>
          <table:table-cell office:value-type="float" office:value="8640000" calcext:value-type="float">
            <text:p>8640000</text:p>
          </table:table-cell>
          <table:table-cell table:formula="of:=[.B302]/[.C302]" office:value-type="float" office:value="0.0025431712962963" calcext:value-type="float">
            <text:p>0,00254317129629630000</text:p>
          </table:table-cell>
          <table:table-cell table:formula="of:=[.D303]-[.D302]" office:value-type="float" office:value="0.00000844907407407392" calcext:value-type="float">
            <text:p>0,00000844907407407392</text:p>
          </table:table-cell>
          <table:table-cell table:number-columns-repeated="5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B302]+73" office:value-type="float" office:value="22046" calcext:value-type="float">
            <text:p>22046</text:p>
          </table:table-cell>
          <table:table-cell office:value-type="float" office:value="8640000" calcext:value-type="float">
            <text:p>8640000</text:p>
          </table:table-cell>
          <table:table-cell table:formula="of:=[.B303]/[.C303]" office:value-type="float" office:value="0.00255162037037037" calcext:value-type="float">
            <text:p>0,00255162037037037000</text:p>
          </table:table-cell>
          <table:table-cell table:formula="of:=[.D304]-[.D303]" office:value-type="float" office:value="0.00000844907407407392" calcext:value-type="float">
            <text:p>0,00000844907407407392</text:p>
          </table:table-cell>
          <table:table-cell table:number-columns-repeated="5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B303]+73" office:value-type="float" office:value="22119" calcext:value-type="float">
            <text:p>22119</text:p>
          </table:table-cell>
          <table:table-cell office:value-type="float" office:value="8640000" calcext:value-type="float">
            <text:p>8640000</text:p>
          </table:table-cell>
          <table:table-cell table:formula="of:=[.B304]/[.C304]" office:value-type="float" office:value="0.00256006944444444" calcext:value-type="float">
            <text:p>0,00256006944444444000</text:p>
          </table:table-cell>
          <table:table-cell table:formula="of:=[.D305]-[.D304]" office:value-type="float" office:value="0.00000844907407407435" calcext:value-type="float">
            <text:p>0,00000844907407407435</text:p>
          </table:table-cell>
          <table:table-cell table:number-columns-repeated="5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B304]+73" office:value-type="float" office:value="22192" calcext:value-type="float">
            <text:p>22192</text:p>
          </table:table-cell>
          <table:table-cell office:value-type="float" office:value="8640000" calcext:value-type="float">
            <text:p>8640000</text:p>
          </table:table-cell>
          <table:table-cell table:formula="of:=[.B305]/[.C305]" office:value-type="float" office:value="0.00256851851851852" calcext:value-type="float">
            <text:p>0,00256851851851852000</text:p>
          </table:table-cell>
          <table:table-cell table:formula="of:=[.D306]-[.D305]" office:value-type="float" office:value="0.00000844907407407392" calcext:value-type="float">
            <text:p>0,00000844907407407392</text:p>
          </table:table-cell>
          <table:table-cell table:number-columns-repeated="5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B305]+73" office:value-type="float" office:value="22265" calcext:value-type="float">
            <text:p>22265</text:p>
          </table:table-cell>
          <table:table-cell office:value-type="float" office:value="8640000" calcext:value-type="float">
            <text:p>8640000</text:p>
          </table:table-cell>
          <table:table-cell table:formula="of:=[.B306]/[.C306]" office:value-type="float" office:value="0.00257696759259259" calcext:value-type="float">
            <text:p>0,00257696759259259000</text:p>
          </table:table-cell>
          <table:table-cell table:formula="of:=[.D307]-[.D306]" office:value-type="float" office:value="0.00000844907407407435" calcext:value-type="float">
            <text:p>0,00000844907407407435</text:p>
          </table:table-cell>
          <table:table-cell table:number-columns-repeated="5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B306]+73" office:value-type="float" office:value="22338" calcext:value-type="float">
            <text:p>22338</text:p>
          </table:table-cell>
          <table:table-cell office:value-type="float" office:value="8640000" calcext:value-type="float">
            <text:p>8640000</text:p>
          </table:table-cell>
          <table:table-cell table:formula="of:=[.B307]/[.C307]" office:value-type="float" office:value="0.00258541666666667" calcext:value-type="float">
            <text:p>0,00258541666666667000</text:p>
          </table:table-cell>
          <table:table-cell table:formula="of:=[.D308]-[.D307]" office:value-type="float" office:value="0.00000844907407407392" calcext:value-type="float">
            <text:p>0,00000844907407407392</text:p>
          </table:table-cell>
          <table:table-cell table:number-columns-repeated="5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B307]+73" office:value-type="float" office:value="22411" calcext:value-type="float">
            <text:p>22411</text:p>
          </table:table-cell>
          <table:table-cell office:value-type="float" office:value="8640000" calcext:value-type="float">
            <text:p>8640000</text:p>
          </table:table-cell>
          <table:table-cell table:formula="of:=[.B308]/[.C308]" office:value-type="float" office:value="0.00259386574074074" calcext:value-type="float">
            <text:p>0,00259386574074074000</text:p>
          </table:table-cell>
          <table:table-cell table:formula="of:=[.D309]-[.D308]" office:value-type="float" office:value="0.00000844907407407392" calcext:value-type="float">
            <text:p>0,00000844907407407392</text:p>
          </table:table-cell>
          <table:table-cell table:number-columns-repeated="5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B308]+73" office:value-type="float" office:value="22484" calcext:value-type="float">
            <text:p>22484</text:p>
          </table:table-cell>
          <table:table-cell office:value-type="float" office:value="8640000" calcext:value-type="float">
            <text:p>8640000</text:p>
          </table:table-cell>
          <table:table-cell table:formula="of:=[.B309]/[.C309]" office:value-type="float" office:value="0.00260231481481481" calcext:value-type="float">
            <text:p>0,00260231481481481000</text:p>
          </table:table-cell>
          <table:table-cell table:formula="of:=[.D310]-[.D309]" office:value-type="float" office:value="0.00000844907407407435" calcext:value-type="float">
            <text:p>0,00000844907407407435</text:p>
          </table:table-cell>
          <table:table-cell table:number-columns-repeated="5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B309]+73" office:value-type="float" office:value="22557" calcext:value-type="float">
            <text:p>22557</text:p>
          </table:table-cell>
          <table:table-cell office:value-type="float" office:value="8640000" calcext:value-type="float">
            <text:p>8640000</text:p>
          </table:table-cell>
          <table:table-cell table:formula="of:=[.B310]/[.C310]" office:value-type="float" office:value="0.00261076388888889" calcext:value-type="float">
            <text:p>0,00261076388888889000</text:p>
          </table:table-cell>
          <table:table-cell table:formula="of:=[.D311]-[.D310]" office:value-type="float" office:value="0.00000844907407407392" calcext:value-type="float">
            <text:p>0,00000844907407407392</text:p>
          </table:table-cell>
          <table:table-cell table:number-columns-repeated="5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B310]+73" office:value-type="float" office:value="22630" calcext:value-type="float">
            <text:p>22630</text:p>
          </table:table-cell>
          <table:table-cell office:value-type="float" office:value="8640000" calcext:value-type="float">
            <text:p>8640000</text:p>
          </table:table-cell>
          <table:table-cell table:formula="of:=[.B311]/[.C311]" office:value-type="float" office:value="0.00261921296296296" calcext:value-type="float">
            <text:p>0,00261921296296296000</text:p>
          </table:table-cell>
          <table:table-cell table:formula="of:=[.D312]-[.D311]" office:value-type="float" office:value="0.00000844907407407392" calcext:value-type="float">
            <text:p>0,00000844907407407392</text:p>
          </table:table-cell>
          <table:table-cell table:number-columns-repeated="5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B311]+73" office:value-type="float" office:value="22703" calcext:value-type="float">
            <text:p>22703</text:p>
          </table:table-cell>
          <table:table-cell office:value-type="float" office:value="8640000" calcext:value-type="float">
            <text:p>8640000</text:p>
          </table:table-cell>
          <table:table-cell table:formula="of:=[.B312]/[.C312]" office:value-type="float" office:value="0.00262766203703704" calcext:value-type="float">
            <text:p>0,00262766203703704000</text:p>
          </table:table-cell>
          <table:table-cell table:formula="of:=[.D313]-[.D312]" office:value-type="float" office:value="0.00000844907407407435" calcext:value-type="float">
            <text:p>0,00000844907407407435</text:p>
          </table:table-cell>
          <table:table-cell table:number-columns-repeated="5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B312]+73" office:value-type="float" office:value="22776" calcext:value-type="float">
            <text:p>22776</text:p>
          </table:table-cell>
          <table:table-cell office:value-type="float" office:value="8640000" calcext:value-type="float">
            <text:p>8640000</text:p>
          </table:table-cell>
          <table:table-cell table:formula="of:=[.B313]/[.C313]" office:value-type="float" office:value="0.00263611111111111" calcext:value-type="float">
            <text:p>0,00263611111111111000</text:p>
          </table:table-cell>
          <table:table-cell table:formula="of:=[.D314]-[.D313]" office:value-type="float" office:value="0.00000844907407407392" calcext:value-type="float">
            <text:p>0,00000844907407407392</text:p>
          </table:table-cell>
          <table:table-cell table:number-columns-repeated="5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B313]+73" office:value-type="float" office:value="22849" calcext:value-type="float">
            <text:p>22849</text:p>
          </table:table-cell>
          <table:table-cell office:value-type="float" office:value="8640000" calcext:value-type="float">
            <text:p>8640000</text:p>
          </table:table-cell>
          <table:table-cell table:formula="of:=[.B314]/[.C314]" office:value-type="float" office:value="0.00264456018518519" calcext:value-type="float">
            <text:p>0,00264456018518519000</text:p>
          </table:table-cell>
          <table:table-cell table:formula="of:=[.D315]-[.D314]" office:value-type="float" office:value="0.00000844907407407435" calcext:value-type="float">
            <text:p>0,00000844907407407435</text:p>
          </table:table-cell>
          <table:table-cell table:number-columns-repeated="5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B314]+73" office:value-type="float" office:value="22922" calcext:value-type="float">
            <text:p>22922</text:p>
          </table:table-cell>
          <table:table-cell office:value-type="float" office:value="8640000" calcext:value-type="float">
            <text:p>8640000</text:p>
          </table:table-cell>
          <table:table-cell table:formula="of:=[.B315]/[.C315]" office:value-type="float" office:value="0.00265300925925926" calcext:value-type="float">
            <text:p>0,00265300925925926000</text:p>
          </table:table-cell>
          <table:table-cell table:formula="of:=[.D316]-[.D315]" office:value-type="float" office:value="0.00000844907407407392" calcext:value-type="float">
            <text:p>0,00000844907407407392</text:p>
          </table:table-cell>
          <table:table-cell table:number-columns-repeated="5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B315]+73" office:value-type="float" office:value="22995" calcext:value-type="float">
            <text:p>22995</text:p>
          </table:table-cell>
          <table:table-cell office:value-type="float" office:value="8640000" calcext:value-type="float">
            <text:p>8640000</text:p>
          </table:table-cell>
          <table:table-cell table:formula="of:=[.B316]/[.C316]" office:value-type="float" office:value="0.00266145833333333" calcext:value-type="float">
            <text:p>0,00266145833333333000</text:p>
          </table:table-cell>
          <table:table-cell table:formula="of:=[.D317]-[.D316]" office:value-type="float" office:value="0.00000844907407407392" calcext:value-type="float">
            <text:p>0,00000844907407407392</text:p>
          </table:table-cell>
          <table:table-cell table:number-columns-repeated="5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B316]+73" office:value-type="float" office:value="23068" calcext:value-type="float">
            <text:p>23068</text:p>
          </table:table-cell>
          <table:table-cell office:value-type="float" office:value="8640000" calcext:value-type="float">
            <text:p>8640000</text:p>
          </table:table-cell>
          <table:table-cell table:formula="of:=[.B317]/[.C317]" office:value-type="float" office:value="0.00266990740740741" calcext:value-type="float">
            <text:p>0,00266990740740741000</text:p>
          </table:table-cell>
          <table:table-cell table:formula="of:=[.D318]-[.D317]" office:value-type="float" office:value="0.00000844907407407435" calcext:value-type="float">
            <text:p>0,00000844907407407435</text:p>
          </table:table-cell>
          <table:table-cell table:number-columns-repeated="5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B317]+73" office:value-type="float" office:value="23141" calcext:value-type="float">
            <text:p>23141</text:p>
          </table:table-cell>
          <table:table-cell office:value-type="float" office:value="8640000" calcext:value-type="float">
            <text:p>8640000</text:p>
          </table:table-cell>
          <table:table-cell table:formula="of:=[.B318]/[.C318]" office:value-type="float" office:value="0.00267835648148148" calcext:value-type="float">
            <text:p>0,00267835648148148000</text:p>
          </table:table-cell>
          <table:table-cell table:formula="of:=[.D319]-[.D318]" office:value-type="float" office:value="0.00000844907407407392" calcext:value-type="float">
            <text:p>0,00000844907407407392</text:p>
          </table:table-cell>
          <table:table-cell table:number-columns-repeated="5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B318]+73" office:value-type="float" office:value="23214" calcext:value-type="float">
            <text:p>23214</text:p>
          </table:table-cell>
          <table:table-cell office:value-type="float" office:value="8640000" calcext:value-type="float">
            <text:p>8640000</text:p>
          </table:table-cell>
          <table:table-cell table:formula="of:=[.B319]/[.C319]" office:value-type="float" office:value="0.00268680555555556" calcext:value-type="float">
            <text:p>0,00268680555555556000</text:p>
          </table:table-cell>
          <table:table-cell table:formula="of:=[.D320]-[.D319]" office:value-type="float" office:value="0.00000844907407407392" calcext:value-type="float">
            <text:p>0,00000844907407407392</text:p>
          </table:table-cell>
          <table:table-cell table:number-columns-repeated="5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B319]+73" office:value-type="float" office:value="23287" calcext:value-type="float">
            <text:p>23287</text:p>
          </table:table-cell>
          <table:table-cell office:value-type="float" office:value="8640000" calcext:value-type="float">
            <text:p>8640000</text:p>
          </table:table-cell>
          <table:table-cell table:formula="of:=[.B320]/[.C320]" office:value-type="float" office:value="0.00269525462962963" calcext:value-type="float">
            <text:p>0,00269525462962963000</text:p>
          </table:table-cell>
          <table:table-cell table:formula="of:=[.D321]-[.D320]" office:value-type="float" office:value="0.00000844907407407435" calcext:value-type="float">
            <text:p>0,00000844907407407435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320]+73" office:value-type="float" office:value="23360" calcext:value-type="float">
            <text:p>23360</text:p>
          </table:table-cell>
          <table:table-cell office:value-type="float" office:value="8640000" calcext:value-type="float">
            <text:p>8640000</text:p>
          </table:table-cell>
          <table:table-cell table:formula="of:=[.B321]/[.C321]" office:value-type="float" office:value="0.0027037037037037" calcext:value-type="float">
            <text:p>0,00270370370370370000</text:p>
          </table:table-cell>
          <table:table-cell table:formula="of:=[.D322]-[.D321]" office:value-type="float" office:value="0.00000844907407407392" calcext:value-type="float">
            <text:p>0,00000844907407407392</text:p>
          </table:table-cell>
          <table:table-cell table:number-columns-repeated="5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B321]+73" office:value-type="float" office:value="23433" calcext:value-type="float">
            <text:p>23433</text:p>
          </table:table-cell>
          <table:table-cell office:value-type="float" office:value="8640000" calcext:value-type="float">
            <text:p>8640000</text:p>
          </table:table-cell>
          <table:table-cell table:formula="of:=[.B322]/[.C322]" office:value-type="float" office:value="0.00271215277777778" calcext:value-type="float">
            <text:p>0,00271215277777778000</text:p>
          </table:table-cell>
          <table:table-cell table:formula="of:=[.D323]-[.D322]" office:value-type="float" office:value="0.00000844907407407392" calcext:value-type="float">
            <text:p>0,00000844907407407392</text:p>
          </table:table-cell>
          <table:table-cell table:number-columns-repeated="5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B322]+73" office:value-type="float" office:value="23506" calcext:value-type="float">
            <text:p>23506</text:p>
          </table:table-cell>
          <table:table-cell office:value-type="float" office:value="8640000" calcext:value-type="float">
            <text:p>8640000</text:p>
          </table:table-cell>
          <table:table-cell table:formula="of:=[.B323]/[.C323]" office:value-type="float" office:value="0.00272060185185185" calcext:value-type="float">
            <text:p>0,00272060185185185000</text:p>
          </table:table-cell>
          <table:table-cell table:formula="of:=[.D324]-[.D323]" office:value-type="float" office:value="0.00000844907407407435" calcext:value-type="float">
            <text:p>0,00000844907407407435</text:p>
          </table:table-cell>
          <table:table-cell table:number-columns-repeated="5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B323]+73" office:value-type="float" office:value="23579" calcext:value-type="float">
            <text:p>23579</text:p>
          </table:table-cell>
          <table:table-cell office:value-type="float" office:value="8640000" calcext:value-type="float">
            <text:p>8640000</text:p>
          </table:table-cell>
          <table:table-cell table:formula="of:=[.B324]/[.C324]" office:value-type="float" office:value="0.00272905092592593" calcext:value-type="float">
            <text:p>0,00272905092592593000</text:p>
          </table:table-cell>
          <table:table-cell table:formula="of:=[.D325]-[.D324]" office:value-type="float" office:value="0.00000844907407407392" calcext:value-type="float">
            <text:p>0,00000844907407407392</text:p>
          </table:table-cell>
          <table:table-cell table:number-columns-repeated="5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B324]+73" office:value-type="float" office:value="23652" calcext:value-type="float">
            <text:p>23652</text:p>
          </table:table-cell>
          <table:table-cell office:value-type="float" office:value="8640000" calcext:value-type="float">
            <text:p>8640000</text:p>
          </table:table-cell>
          <table:table-cell table:formula="of:=[.B325]/[.C325]" office:value-type="float" office:value="0.0027375" calcext:value-type="float">
            <text:p>0,00273750000000000000</text:p>
          </table:table-cell>
          <table:table-cell table:formula="of:=[.D326]-[.D325]" office:value-type="float" office:value="0.00000844907407407435" calcext:value-type="float">
            <text:p>0,00000844907407407435</text:p>
          </table:table-cell>
          <table:table-cell table:number-columns-repeated="5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B325]+73" office:value-type="float" office:value="23725" calcext:value-type="float">
            <text:p>23725</text:p>
          </table:table-cell>
          <table:table-cell office:value-type="float" office:value="8640000" calcext:value-type="float">
            <text:p>8640000</text:p>
          </table:table-cell>
          <table:table-cell table:formula="of:=[.B326]/[.C326]" office:value-type="float" office:value="0.00274594907407407" calcext:value-type="float">
            <text:p>0,00274594907407407000</text:p>
          </table:table-cell>
          <table:table-cell table:formula="of:=[.D327]-[.D326]" office:value-type="float" office:value="0.00000844907407407392" calcext:value-type="float">
            <text:p>0,00000844907407407392</text:p>
          </table:table-cell>
          <table:table-cell table:number-columns-repeated="5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B326]+73" office:value-type="float" office:value="23798" calcext:value-type="float">
            <text:p>23798</text:p>
          </table:table-cell>
          <table:table-cell office:value-type="float" office:value="8640000" calcext:value-type="float">
            <text:p>8640000</text:p>
          </table:table-cell>
          <table:table-cell table:formula="of:=[.B327]/[.C327]" office:value-type="float" office:value="0.00275439814814815" calcext:value-type="float">
            <text:p>0,00275439814814815000</text:p>
          </table:table-cell>
          <table:table-cell table:formula="of:=[.D328]-[.D327]" office:value-type="float" office:value="0.00000844907407407392" calcext:value-type="float">
            <text:p>0,00000844907407407392</text:p>
          </table:table-cell>
          <table:table-cell table:number-columns-repeated="5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B327]+73" office:value-type="float" office:value="23871" calcext:value-type="float">
            <text:p>23871</text:p>
          </table:table-cell>
          <table:table-cell office:value-type="float" office:value="8640000" calcext:value-type="float">
            <text:p>8640000</text:p>
          </table:table-cell>
          <table:table-cell table:formula="of:=[.B328]/[.C328]" office:value-type="float" office:value="0.00276284722222222" calcext:value-type="float">
            <text:p>0,00276284722222222000</text:p>
          </table:table-cell>
          <table:table-cell table:formula="of:=[.D329]-[.D328]" office:value-type="float" office:value="0.00000844907407407435" calcext:value-type="float">
            <text:p>0,00000844907407407435</text:p>
          </table:table-cell>
          <table:table-cell table:number-columns-repeated="5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B328]+73" office:value-type="float" office:value="23944" calcext:value-type="float">
            <text:p>23944</text:p>
          </table:table-cell>
          <table:table-cell office:value-type="float" office:value="8640000" calcext:value-type="float">
            <text:p>8640000</text:p>
          </table:table-cell>
          <table:table-cell table:formula="of:=[.B329]/[.C329]" office:value-type="float" office:value="0.0027712962962963" calcext:value-type="float">
            <text:p>0,00277129629629630000</text:p>
          </table:table-cell>
          <table:table-cell table:formula="of:=#REF!-[.D329]" office:value-type="string" office:string-value="" calcext:value-type="error">
            <text:p>#REF!</text:p>
          </table:table-cell>
          <table:table-cell table:number-columns-repeated="5"/>
        </table:table-row>
        <table:table-row table:style-name="ro1" table:number-rows-repeated="1048246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1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1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1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1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number number:decimal-places="4" number:min-decimal-places="4" number:min-integer-digits="1"/>
    </number:number-style>
    <number:number-style style:name="N123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4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6">
      <number:number number:decimal-places="17" number:min-decimal-places="17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8" number:min-decimal-places="18" number:min-integer-digits="1"/>
    </number:number-style>
    <number:number-style style:name="N134">
      <number:number number:decimal-places="19" number:min-decimal-places="19" number:min-integer-digits="1"/>
    </number:number-style>
    <number:number-style style:name="N135">
      <number:number number:decimal-places="20" number:min-decimal-places="20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5" number:min-decimal-places="15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7" number:min-decimal-places="7" number:min-integer-digits="1"/>
    </number:number-style>
    <number:number-style style:name="N142">
      <number:number number:decimal-places="8" number:min-decimal-places="8" number:min-integer-digits="1"/>
    </number:number-style>
    <number:number-style style:name="N143">
      <number:number number:decimal-places="9" number:min-decimal-places="9" number:min-integer-digits="1"/>
    </number:number-style>
    <number:number-style style:name="N144">
      <number:number number:decimal-places="10" number:min-decimal-places="10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6">
      <number:number number:decimal-places="4" number:min-decimal-places="4" number:min-integer-digits="1" number:grouping="true"/>
    </number:number-style>
    <number:number-style style:name="N147">
      <number:number number:decimal-places="1" number:min-decimal-places="1" number:min-integer-digits="1" number:grouping="true"/>
    </number:number-style>
    <number:number-style style:name="N148">
      <number:number number:decimal-places="3" number:min-decimal-places="3" number:min-integer-digits="1" number:grouping="true"/>
    </number:number-style>
    <number:number-style style:name="N149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50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5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 style:data-style-name="N2" text:time-value="18:47:59.66778173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7T18:46:50.981187026</meta:creation-date>
    <dc:date>2026-05-17T18:48:11.041749164</dc:date>
    <meta:editing-duration>PT31S</meta:editing-duration>
    <meta:editing-cycles>2</meta:editing-cycles>
    <meta:generator>LibreOffice/24.2.7.2$Linux_X86_64 LibreOffice_project/420$Build-2</meta:generator>
    <meta:document-statistic meta:table-count="1" meta:cell-count="1645" meta:object-count="0"/>
  </office:meta>
</office:document-meta>
</file>