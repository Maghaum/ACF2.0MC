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4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1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15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173611111111111" calcext:value-type="float">
            <text:p>0,00000173611111111111</text:p>
          </table:table-cell>
          <table:table-cell table:formula="of:=[.D3]-[.D2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15" office:value-type="float" office:value="30" calcext:value-type="float">
            <text:p>30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347222222222222" calcext:value-type="float">
            <text:p>0,00000347222222222222</text:p>
          </table:table-cell>
          <table:table-cell table:formula="of:=[.D4]-[.D3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15" office:value-type="float" office:value="45" calcext:value-type="float">
            <text:p>45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0520833333333333" calcext:value-type="float">
            <text:p>0,00000520833333333333</text:p>
          </table:table-cell>
          <table:table-cell table:formula="of:=[.D5]-[.D4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15" office:value-type="float" office:value="60" calcext:value-type="float">
            <text:p>60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0694444444444445" calcext:value-type="float">
            <text:p>0,00000694444444444445</text:p>
          </table:table-cell>
          <table:table-cell table:formula="of:=[.D6]-[.D5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15" office:value-type="float" office:value="75" calcext:value-type="float">
            <text:p>7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0868055555555556" calcext:value-type="float">
            <text:p>0,00000868055555555556</text:p>
          </table:table-cell>
          <table:table-cell table:formula="of:=[.D7]-[.D6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15" office:value-type="float" office:value="90" calcext:value-type="float">
            <text:p>90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104166666666667" calcext:value-type="float">
            <text:p>0,00001041666666666670</text:p>
          </table:table-cell>
          <table:table-cell table:formula="of:=[.D8]-[.D7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15" office:value-type="float" office:value="105" calcext:value-type="float">
            <text:p>105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121527777777778" calcext:value-type="float">
            <text:p>0,00001215277777777780</text:p>
          </table:table-cell>
          <table:table-cell table:formula="of:=[.D9]-[.D8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15" office:value-type="float" office:value="120" calcext:value-type="float">
            <text:p>120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138888888888889" calcext:value-type="float">
            <text:p>0,00001388888888888890</text:p>
          </table:table-cell>
          <table:table-cell table:formula="of:=[.D10]-[.D9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15" office:value-type="float" office:value="135" calcext:value-type="float">
            <text:p>135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15625" calcext:value-type="float">
            <text:p>0,00001562500000000000</text:p>
          </table:table-cell>
          <table:table-cell table:formula="of:=[.D11]-[.D10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15" office:value-type="float" office:value="150" calcext:value-type="float">
            <text:p>15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173611111111111" calcext:value-type="float">
            <text:p>0,00001736111111111110</text:p>
          </table:table-cell>
          <table:table-cell table:formula="of:=[.D12]-[.D11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15" office:value-type="float" office:value="165" calcext:value-type="float">
            <text:p>165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190972222222222" calcext:value-type="float">
            <text:p>0,00001909722222222220</text:p>
          </table:table-cell>
          <table:table-cell table:formula="of:=[.D13]-[.D12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15" office:value-type="float" office:value="180" calcext:value-type="float">
            <text:p>180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208333333333333" calcext:value-type="float">
            <text:p>0,00002083333333333330</text:p>
          </table:table-cell>
          <table:table-cell table:formula="of:=[.D14]-[.D13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15" office:value-type="float" office:value="195" calcext:value-type="float">
            <text:p>195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225694444444444" calcext:value-type="float">
            <text:p>0,00002256944444444450</text:p>
          </table:table-cell>
          <table:table-cell table:formula="of:=[.D15]-[.D14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15" office:value-type="float" office:value="210" calcext:value-type="float">
            <text:p>210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243055555555556" calcext:value-type="float">
            <text:p>0,00002430555555555560</text:p>
          </table:table-cell>
          <table:table-cell table:formula="of:=[.D16]-[.D15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15" office:value-type="float" office:value="225" calcext:value-type="float">
            <text:p>22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260416666666667" calcext:value-type="float">
            <text:p>0,00002604166666666670</text:p>
          </table:table-cell>
          <table:table-cell table:formula="of:=[.D17]-[.D16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15" office:value-type="float" office:value="240" calcext:value-type="float">
            <text:p>240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277777777777778" calcext:value-type="float">
            <text:p>0,00002777777777777780</text:p>
          </table:table-cell>
          <table:table-cell table:formula="of:=[.D18]-[.D17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15" office:value-type="float" office:value="255" calcext:value-type="float">
            <text:p>255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295138888888889" calcext:value-type="float">
            <text:p>0,00002951388888888890</text:p>
          </table:table-cell>
          <table:table-cell table:formula="of:=[.D19]-[.D18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15" office:value-type="float" office:value="270" calcext:value-type="float">
            <text:p>270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3125" calcext:value-type="float">
            <text:p>0,00003125000000000000</text:p>
          </table:table-cell>
          <table:table-cell table:formula="of:=[.D20]-[.D19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15" office:value-type="float" office:value="285" calcext:value-type="float">
            <text:p>285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329861111111111" calcext:value-type="float">
            <text:p>0,00003298611111111110</text:p>
          </table:table-cell>
          <table:table-cell table:formula="of:=[.D21]-[.D20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15" office:value-type="float" office:value="300" calcext:value-type="float">
            <text:p>30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347222222222222" calcext:value-type="float">
            <text:p>0,00003472222222222220</text:p>
          </table:table-cell>
          <table:table-cell table:formula="of:=[.D22]-[.D21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15" office:value-type="float" office:value="315" calcext:value-type="float">
            <text:p>315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364583333333333" calcext:value-type="float">
            <text:p>0,00003645833333333330</text:p>
          </table:table-cell>
          <table:table-cell table:formula="of:=[.D23]-[.D22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15" office:value-type="float" office:value="330" calcext:value-type="float">
            <text:p>330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0381944444444444" calcext:value-type="float">
            <text:p>0,00003819444444444450</text:p>
          </table:table-cell>
          <table:table-cell table:formula="of:=[.D24]-[.D23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15" office:value-type="float" office:value="345" calcext:value-type="float">
            <text:p>345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0399305555555556" calcext:value-type="float">
            <text:p>0,00003993055555555560</text:p>
          </table:table-cell>
          <table:table-cell table:formula="of:=[.D25]-[.D24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15" office:value-type="float" office:value="360" calcext:value-type="float">
            <text:p>360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0416666666666667" calcext:value-type="float">
            <text:p>0,00004166666666666670</text:p>
          </table:table-cell>
          <table:table-cell table:formula="of:=[.D26]-[.D25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15" office:value-type="float" office:value="375" calcext:value-type="float">
            <text:p>37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0434027777777778" calcext:value-type="float">
            <text:p>0,00004340277777777780</text:p>
          </table:table-cell>
          <table:table-cell table:formula="of:=[.D27]-[.D26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15" office:value-type="float" office:value="390" calcext:value-type="float">
            <text:p>390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0451388888888889" calcext:value-type="float">
            <text:p>0,00004513888888888890</text:p>
          </table:table-cell>
          <table:table-cell table:formula="of:=[.D28]-[.D27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15" office:value-type="float" office:value="405" calcext:value-type="float">
            <text:p>405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046875" calcext:value-type="float">
            <text:p>0,00004687500000000000</text:p>
          </table:table-cell>
          <table:table-cell table:formula="of:=[.D29]-[.D28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15" office:value-type="float" office:value="420" calcext:value-type="float">
            <text:p>420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0486111111111111" calcext:value-type="float">
            <text:p>0,00004861111111111110</text:p>
          </table:table-cell>
          <table:table-cell table:formula="of:=[.D30]-[.D29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15" office:value-type="float" office:value="435" calcext:value-type="float">
            <text:p>435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0503472222222222" calcext:value-type="float">
            <text:p>0,00005034722222222220</text:p>
          </table:table-cell>
          <table:table-cell table:formula="of:=[.D31]-[.D30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15" office:value-type="float" office:value="450" calcext:value-type="float">
            <text:p>45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0520833333333333" calcext:value-type="float">
            <text:p>0,00005208333333333330</text:p>
          </table:table-cell>
          <table:table-cell table:formula="of:=[.D32]-[.D31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15" office:value-type="float" office:value="465" calcext:value-type="float">
            <text:p>465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0538194444444444" calcext:value-type="float">
            <text:p>0,00005381944444444440</text:p>
          </table:table-cell>
          <table:table-cell table:formula="of:=[.D33]-[.D32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15" office:value-type="float" office:value="480" calcext:value-type="float">
            <text:p>480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0555555555555556" calcext:value-type="float">
            <text:p>0,00005555555555555560</text:p>
          </table:table-cell>
          <table:table-cell table:formula="of:=[.D34]-[.D33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15" office:value-type="float" office:value="495" calcext:value-type="float">
            <text:p>495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0572916666666667" calcext:value-type="float">
            <text:p>0,00005729166666666670</text:p>
          </table:table-cell>
          <table:table-cell table:formula="of:=[.D35]-[.D34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15" office:value-type="float" office:value="510" calcext:value-type="float">
            <text:p>510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0590277777777778" calcext:value-type="float">
            <text:p>0,00005902777777777780</text:p>
          </table:table-cell>
          <table:table-cell table:formula="of:=[.D36]-[.D35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15" office:value-type="float" office:value="525" calcext:value-type="float">
            <text:p>52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0607638888888889" calcext:value-type="float">
            <text:p>0,00006076388888888890</text:p>
          </table:table-cell>
          <table:table-cell table:formula="of:=[.D37]-[.D36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15" office:value-type="float" office:value="540" calcext:value-type="float">
            <text:p>540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0625" calcext:value-type="float">
            <text:p>0,00006250000000000000</text:p>
          </table:table-cell>
          <table:table-cell table:formula="of:=[.D38]-[.D37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15" office:value-type="float" office:value="555" calcext:value-type="float">
            <text:p>555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0642361111111111" calcext:value-type="float">
            <text:p>0,00006423611111111110</text:p>
          </table:table-cell>
          <table:table-cell table:formula="of:=[.D39]-[.D3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15" office:value-type="float" office:value="570" calcext:value-type="float">
            <text:p>570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0659722222222222" calcext:value-type="float">
            <text:p>0,00006597222222222220</text:p>
          </table:table-cell>
          <table:table-cell table:formula="of:=[.D40]-[.D39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15" office:value-type="float" office:value="585" calcext:value-type="float">
            <text:p>585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0677083333333333" calcext:value-type="float">
            <text:p>0,00006770833333333330</text:p>
          </table:table-cell>
          <table:table-cell table:formula="of:=[.D41]-[.D40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15" office:value-type="float" office:value="600" calcext:value-type="float">
            <text:p>60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0694444444444444" calcext:value-type="float">
            <text:p>0,00006944444444444440</text:p>
          </table:table-cell>
          <table:table-cell table:formula="of:=[.D42]-[.D41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15" office:value-type="float" office:value="615" calcext:value-type="float">
            <text:p>615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0711805555555556" calcext:value-type="float">
            <text:p>0,00007118055555555560</text:p>
          </table:table-cell>
          <table:table-cell table:formula="of:=[.D43]-[.D42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15" office:value-type="float" office:value="630" calcext:value-type="float">
            <text:p>630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0729166666666667" calcext:value-type="float">
            <text:p>0,00007291666666666670</text:p>
          </table:table-cell>
          <table:table-cell table:formula="of:=[.D44]-[.D4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15" office:value-type="float" office:value="645" calcext:value-type="float">
            <text:p>645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0746527777777778" calcext:value-type="float">
            <text:p>0,00007465277777777780</text:p>
          </table:table-cell>
          <table:table-cell table:formula="of:=[.D45]-[.D44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15" office:value-type="float" office:value="660" calcext:value-type="float">
            <text:p>660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0763888888888889" calcext:value-type="float">
            <text:p>0,00007638888888888890</text:p>
          </table:table-cell>
          <table:table-cell table:formula="of:=[.D46]-[.D45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15" office:value-type="float" office:value="675" calcext:value-type="float">
            <text:p>67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078125" calcext:value-type="float">
            <text:p>0,00007812500000000000</text:p>
          </table:table-cell>
          <table:table-cell table:formula="of:=[.D47]-[.D46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15" office:value-type="float" office:value="690" calcext:value-type="float">
            <text:p>690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0798611111111111" calcext:value-type="float">
            <text:p>0,00007986111111111110</text:p>
          </table:table-cell>
          <table:table-cell table:formula="of:=[.D48]-[.D4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15" office:value-type="float" office:value="705" calcext:value-type="float">
            <text:p>705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0815972222222222" calcext:value-type="float">
            <text:p>0,00008159722222222220</text:p>
          </table:table-cell>
          <table:table-cell table:formula="of:=[.D49]-[.D48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15" office:value-type="float" office:value="720" calcext:value-type="float">
            <text:p>720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0833333333333333" calcext:value-type="float">
            <text:p>0,00008333333333333330</text:p>
          </table:table-cell>
          <table:table-cell table:formula="of:=[.D50]-[.D49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15" office:value-type="float" office:value="735" calcext:value-type="float">
            <text:p>735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0850694444444444" calcext:value-type="float">
            <text:p>0,00008506944444444440</text:p>
          </table:table-cell>
          <table:table-cell table:formula="of:=[.D51]-[.D50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15" office:value-type="float" office:value="750" calcext:value-type="float">
            <text:p>7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0868055555555556" calcext:value-type="float">
            <text:p>0,00008680555555555560</text:p>
          </table:table-cell>
          <table:table-cell table:formula="of:=[.D52]-[.D51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15" office:value-type="float" office:value="765" calcext:value-type="float">
            <text:p>765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0885416666666667" calcext:value-type="float">
            <text:p>0,00008854166666666670</text:p>
          </table:table-cell>
          <table:table-cell table:formula="of:=[.D53]-[.D5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15" office:value-type="float" office:value="780" calcext:value-type="float">
            <text:p>780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0902777777777778" calcext:value-type="float">
            <text:p>0,00009027777777777780</text:p>
          </table:table-cell>
          <table:table-cell table:formula="of:=[.D54]-[.D53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15" office:value-type="float" office:value="795" calcext:value-type="float">
            <text:p>795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0920138888888889" calcext:value-type="float">
            <text:p>0,00009201388888888890</text:p>
          </table:table-cell>
          <table:table-cell table:formula="of:=[.D55]-[.D54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15" office:value-type="float" office:value="810" calcext:value-type="float">
            <text:p>810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09375" calcext:value-type="float">
            <text:p>0,00009375000000000000</text:p>
          </table:table-cell>
          <table:table-cell table:formula="of:=[.D56]-[.D55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15" office:value-type="float" office:value="825" calcext:value-type="float">
            <text:p>82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0954861111111111" calcext:value-type="float">
            <text:p>0,00009548611111111110</text:p>
          </table:table-cell>
          <table:table-cell table:formula="of:=[.D57]-[.D5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15" office:value-type="float" office:value="840" calcext:value-type="float">
            <text:p>840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0972222222222222" calcext:value-type="float">
            <text:p>0,00009722222222222220</text:p>
          </table:table-cell>
          <table:table-cell table:formula="of:=[.D58]-[.D57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15" office:value-type="float" office:value="855" calcext:value-type="float">
            <text:p>855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0989583333333333" calcext:value-type="float">
            <text:p>0,00009895833333333330</text:p>
          </table:table-cell>
          <table:table-cell table:formula="of:=[.D59]-[.D58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15" office:value-type="float" office:value="870" calcext:value-type="float">
            <text:p>870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100694444444444" calcext:value-type="float">
            <text:p>0,00010069444444444400</text:p>
          </table:table-cell>
          <table:table-cell table:formula="of:=[.D60]-[.D59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15" office:value-type="float" office:value="885" calcext:value-type="float">
            <text:p>885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102430555555556" calcext:value-type="float">
            <text:p>0,00010243055555555600</text:p>
          </table:table-cell>
          <table:table-cell table:formula="of:=[.D61]-[.D60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15" office:value-type="float" office:value="900" calcext:value-type="float">
            <text:p>90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104166666666667" calcext:value-type="float">
            <text:p>0,00010416666666666700</text:p>
          </table:table-cell>
          <table:table-cell table:formula="of:=[.D62]-[.D6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15" office:value-type="float" office:value="915" calcext:value-type="float">
            <text:p>915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105902777777778" calcext:value-type="float">
            <text:p>0,00010590277777777800</text:p>
          </table:table-cell>
          <table:table-cell table:formula="of:=[.D63]-[.D62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15" office:value-type="float" office:value="930" calcext:value-type="float">
            <text:p>930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107638888888889" calcext:value-type="float">
            <text:p>0,00010763888888888900</text:p>
          </table:table-cell>
          <table:table-cell table:formula="of:=[.D64]-[.D63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15" office:value-type="float" office:value="945" calcext:value-type="float">
            <text:p>945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109375" calcext:value-type="float">
            <text:p>0,00010937500000000000</text:p>
          </table:table-cell>
          <table:table-cell table:formula="of:=[.D65]-[.D64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15" office:value-type="float" office:value="960" calcext:value-type="float">
            <text:p>960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111111111111111" calcext:value-type="float">
            <text:p>0,00011111111111111100</text:p>
          </table:table-cell>
          <table:table-cell table:formula="of:=[.D66]-[.D6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15" office:value-type="float" office:value="975" calcext:value-type="float">
            <text:p>97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112847222222222" calcext:value-type="float">
            <text:p>0,00011284722222222200</text:p>
          </table:table-cell>
          <table:table-cell table:formula="of:=[.D67]-[.D66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15" office:value-type="float" office:value="990" calcext:value-type="float">
            <text:p>990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114583333333333" calcext:value-type="float">
            <text:p>0,00011458333333333300</text:p>
          </table:table-cell>
          <table:table-cell table:formula="of:=[.D68]-[.D67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15" office:value-type="float" office:value="1005" calcext:value-type="float">
            <text:p>1005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116319444444444" calcext:value-type="float">
            <text:p>0,00011631944444444400</text:p>
          </table:table-cell>
          <table:table-cell table:formula="of:=[.D69]-[.D68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15" office:value-type="float" office:value="1020" calcext:value-type="float">
            <text:p>1020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118055555555556" calcext:value-type="float">
            <text:p>0,00011805555555555600</text:p>
          </table:table-cell>
          <table:table-cell table:formula="of:=[.D70]-[.D6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15" office:value-type="float" office:value="1035" calcext:value-type="float">
            <text:p>1035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119791666666667" calcext:value-type="float">
            <text:p>0,00011979166666666700</text:p>
          </table:table-cell>
          <table:table-cell table:formula="of:=[.D71]-[.D70]" office:value-type="float" office:value="0.00000173611111111111" calcext:value-type="float">
            <text:p>0,000001736111111111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15" office:value-type="float" office:value="1050" calcext:value-type="float">
            <text:p>105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121527777777778" calcext:value-type="float">
            <text:p>0,00012152777777777800</text:p>
          </table:table-cell>
          <table:table-cell table:formula="of:=[.D72]-[.D71]" office:value-type="float" office:value="0.00000173611111111113" calcext:value-type="float">
            <text:p>0,000001736111111111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15" office:value-type="float" office:value="1065" calcext:value-type="float">
            <text:p>1065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123263888888889" calcext:value-type="float">
            <text:p>0,00012326388888888900</text:p>
          </table:table-cell>
          <table:table-cell table:formula="of:=[.D73]-[.D7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15" office:value-type="float" office:value="1080" calcext:value-type="float">
            <text:p>1080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125" calcext:value-type="float">
            <text:p>0,00012500000000000000</text:p>
          </table:table-cell>
          <table:table-cell table:formula="of:=[.D74]-[.D7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15" office:value-type="float" office:value="1095" calcext:value-type="float">
            <text:p>1095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126736111111111" calcext:value-type="float">
            <text:p>0,00012673611111111100</text:p>
          </table:table-cell>
          <table:table-cell table:formula="of:=[.D75]-[.D74]" office:value-type="float" office:value="0.00000173611111111113" calcext:value-type="float">
            <text:p>0,0000017361111111111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15" office:value-type="float" office:value="1110" calcext:value-type="float">
            <text:p>1110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128472222222222" calcext:value-type="float">
            <text:p>0,00012847222222222200</text:p>
          </table:table-cell>
          <table:table-cell table:formula="of:=[.D76]-[.D7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15" office:value-type="float" office:value="1125" calcext:value-type="float">
            <text:p>112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130208333333333" calcext:value-type="float">
            <text:p>0,00013020833333333300</text:p>
          </table:table-cell>
          <table:table-cell table:formula="of:=[.D77]-[.D7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15" office:value-type="float" office:value="1140" calcext:value-type="float">
            <text:p>1140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131944444444444" calcext:value-type="float">
            <text:p>0,00013194444444444400</text:p>
          </table:table-cell>
          <table:table-cell table:formula="of:=[.D78]-[.D77]" office:value-type="float" office:value="0.00000173611111111113" calcext:value-type="float">
            <text:p>0,000001736111111111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15" office:value-type="float" office:value="1155" calcext:value-type="float">
            <text:p>1155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133680555555556" calcext:value-type="float">
            <text:p>0,00013368055555555600</text:p>
          </table:table-cell>
          <table:table-cell table:formula="of:=[.D79]-[.D7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15" office:value-type="float" office:value="1170" calcext:value-type="float">
            <text:p>1170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135416666666667" calcext:value-type="float">
            <text:p>0,00013541666666666700</text:p>
          </table:table-cell>
          <table:table-cell table:formula="of:=[.D80]-[.D79]" office:value-type="float" office:value="0.00000173611111111113" calcext:value-type="float">
            <text:p>0,000001736111111111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15" office:value-type="float" office:value="1185" calcext:value-type="float">
            <text:p>1185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137152777777778" calcext:value-type="float">
            <text:p>0,00013715277777777800</text:p>
          </table:table-cell>
          <table:table-cell table:formula="of:=[.D81]-[.D8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15" office:value-type="float" office:value="1200" calcext:value-type="float">
            <text:p>120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138888888888889" calcext:value-type="float">
            <text:p>0,00013888888888888900</text:p>
          </table:table-cell>
          <table:table-cell table:formula="of:=[.D82]-[.D8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15" office:value-type="float" office:value="1215" calcext:value-type="float">
            <text:p>1215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140625" calcext:value-type="float">
            <text:p>0,00014062500000000000</text:p>
          </table:table-cell>
          <table:table-cell table:formula="of:=[.D83]-[.D82]" office:value-type="float" office:value="0.00000173611111111113" calcext:value-type="float">
            <text:p>0,000001736111111111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15" office:value-type="float" office:value="1230" calcext:value-type="float">
            <text:p>1230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142361111111111" calcext:value-type="float">
            <text:p>0,00014236111111111100</text:p>
          </table:table-cell>
          <table:table-cell table:formula="of:=[.D84]-[.D8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15" office:value-type="float" office:value="1245" calcext:value-type="float">
            <text:p>1245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144097222222222" calcext:value-type="float">
            <text:p>0,00014409722222222200</text:p>
          </table:table-cell>
          <table:table-cell table:formula="of:=[.D85]-[.D84]" office:value-type="float" office:value="0.00000173611111111113" calcext:value-type="float">
            <text:p>0,0000017361111111111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15" office:value-type="float" office:value="1260" calcext:value-type="float">
            <text:p>1260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145833333333333" calcext:value-type="float">
            <text:p>0,00014583333333333300</text:p>
          </table:table-cell>
          <table:table-cell table:formula="of:=[.D86]-[.D8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15" office:value-type="float" office:value="1275" calcext:value-type="float">
            <text:p>127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147569444444444" calcext:value-type="float">
            <text:p>0,00014756944444444400</text:p>
          </table:table-cell>
          <table:table-cell table:formula="of:=[.D87]-[.D8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15" office:value-type="float" office:value="1290" calcext:value-type="float">
            <text:p>1290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149305555555556" calcext:value-type="float">
            <text:p>0,00014930555555555600</text:p>
          </table:table-cell>
          <table:table-cell table:formula="of:=[.D88]-[.D87]" office:value-type="float" office:value="0.00000173611111111113" calcext:value-type="float">
            <text:p>0,0000017361111111111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15" office:value-type="float" office:value="1305" calcext:value-type="float">
            <text:p>1305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151041666666667" calcext:value-type="float">
            <text:p>0,00015104166666666700</text:p>
          </table:table-cell>
          <table:table-cell table:formula="of:=[.D89]-[.D8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15" office:value-type="float" office:value="1320" calcext:value-type="float">
            <text:p>1320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152777777777778" calcext:value-type="float">
            <text:p>0,00015277777777777800</text:p>
          </table:table-cell>
          <table:table-cell table:formula="of:=[.D90]-[.D8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15" office:value-type="float" office:value="1335" calcext:value-type="float">
            <text:p>1335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154513888888889" calcext:value-type="float">
            <text:p>0,00015451388888888900</text:p>
          </table:table-cell>
          <table:table-cell table:formula="of:=[.D91]-[.D90]" office:value-type="float" office:value="0.00000173611111111113" calcext:value-type="float">
            <text:p>0,000001736111111111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15" office:value-type="float" office:value="1350" calcext:value-type="float">
            <text:p>135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15625" calcext:value-type="float">
            <text:p>0,00015625000000000000</text:p>
          </table:table-cell>
          <table:table-cell table:formula="of:=[.D92]-[.D9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15" office:value-type="float" office:value="1365" calcext:value-type="float">
            <text:p>1365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157986111111111" calcext:value-type="float">
            <text:p>0,00015798611111111100</text:p>
          </table:table-cell>
          <table:table-cell table:formula="of:=[.D93]-[.D92]" office:value-type="float" office:value="0.00000173611111111113" calcext:value-type="float">
            <text:p>0,000001736111111111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15" office:value-type="float" office:value="1380" calcext:value-type="float">
            <text:p>1380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159722222222222" calcext:value-type="float">
            <text:p>0,00015972222222222200</text:p>
          </table:table-cell>
          <table:table-cell table:formula="of:=[.D94]-[.D9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15" office:value-type="float" office:value="1395" calcext:value-type="float">
            <text:p>1395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161458333333333" calcext:value-type="float">
            <text:p>0,00016145833333333300</text:p>
          </table:table-cell>
          <table:table-cell table:formula="of:=[.D95]-[.D9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15" office:value-type="float" office:value="1410" calcext:value-type="float">
            <text:p>1410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163194444444444" calcext:value-type="float">
            <text:p>0,00016319444444444400</text:p>
          </table:table-cell>
          <table:table-cell table:formula="of:=[.D96]-[.D95]" office:value-type="float" office:value="0.00000173611111111113" calcext:value-type="float">
            <text:p>0,000001736111111111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15" office:value-type="float" office:value="1425" calcext:value-type="float">
            <text:p>142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164930555555556" calcext:value-type="float">
            <text:p>0,00016493055555555600</text:p>
          </table:table-cell>
          <table:table-cell table:formula="of:=[.D97]-[.D9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15" office:value-type="float" office:value="1440" calcext:value-type="float">
            <text:p>1440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166666666666667" calcext:value-type="float">
            <text:p>0,00016666666666666700</text:p>
          </table:table-cell>
          <table:table-cell table:formula="of:=[.D98]-[.D97]" office:value-type="float" office:value="0.00000173611111111113" calcext:value-type="float">
            <text:p>0,0000017361111111111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15" office:value-type="float" office:value="1455" calcext:value-type="float">
            <text:p>1455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168402777777778" calcext:value-type="float">
            <text:p>0,00016840277777777800</text:p>
          </table:table-cell>
          <table:table-cell table:formula="of:=[.D99]-[.D9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15" office:value-type="float" office:value="1470" calcext:value-type="float">
            <text:p>1470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170138888888889" calcext:value-type="float">
            <text:p>0,00017013888888888900</text:p>
          </table:table-cell>
          <table:table-cell table:formula="of:=[.D100]-[.D9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15" office:value-type="float" office:value="1485" calcext:value-type="float">
            <text:p>1485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171875" calcext:value-type="float">
            <text:p>0,00017187500000000000</text:p>
          </table:table-cell>
          <table:table-cell table:formula="of:=[.D101]-[.D100]" office:value-type="float" office:value="0.00000173611111111113" calcext:value-type="float">
            <text:p>0,000001736111111111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15" office:value-type="float" office:value="1500" calcext:value-type="float">
            <text:p>15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173611111111111" calcext:value-type="float">
            <text:p>0,00017361111111111100</text:p>
          </table:table-cell>
          <table:table-cell table:formula="of:=[.D102]-[.D10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15" office:value-type="float" office:value="1515" calcext:value-type="float">
            <text:p>1515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175347222222222" calcext:value-type="float">
            <text:p>0,00017534722222222200</text:p>
          </table:table-cell>
          <table:table-cell table:formula="of:=[.D103]-[.D102]" office:value-type="float" office:value="0.00000173611111111113" calcext:value-type="float">
            <text:p>0,000001736111111111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15" office:value-type="float" office:value="1530" calcext:value-type="float">
            <text:p>1530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177083333333333" calcext:value-type="float">
            <text:p>0,00017708333333333300</text:p>
          </table:table-cell>
          <table:table-cell table:formula="of:=[.D104]-[.D10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15" office:value-type="float" office:value="1545" calcext:value-type="float">
            <text:p>1545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178819444444444" calcext:value-type="float">
            <text:p>0,00017881944444444400</text:p>
          </table:table-cell>
          <table:table-cell table:formula="of:=[.D105]-[.D10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15" office:value-type="float" office:value="1560" calcext:value-type="float">
            <text:p>1560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180555555555556" calcext:value-type="float">
            <text:p>0,00018055555555555600</text:p>
          </table:table-cell>
          <table:table-cell table:formula="of:=[.D106]-[.D105]" office:value-type="float" office:value="0.00000173611111111113" calcext:value-type="float">
            <text:p>0,0000017361111111111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15" office:value-type="float" office:value="1575" calcext:value-type="float">
            <text:p>157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182291666666667" calcext:value-type="float">
            <text:p>0,00018229166666666700</text:p>
          </table:table-cell>
          <table:table-cell table:formula="of:=[.D107]-[.D10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15" office:value-type="float" office:value="1590" calcext:value-type="float">
            <text:p>1590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184027777777778" calcext:value-type="float">
            <text:p>0,00018402777777777800</text:p>
          </table:table-cell>
          <table:table-cell table:formula="of:=[.D108]-[.D10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15" office:value-type="float" office:value="1605" calcext:value-type="float">
            <text:p>1605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185763888888889" calcext:value-type="float">
            <text:p>0,00018576388888888900</text:p>
          </table:table-cell>
          <table:table-cell table:formula="of:=[.D109]-[.D108]" office:value-type="float" office:value="0.00000173611111111113" calcext:value-type="float">
            <text:p>0,0000017361111111111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15" office:value-type="float" office:value="1620" calcext:value-type="float">
            <text:p>1620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1875" calcext:value-type="float">
            <text:p>0,00018750000000000000</text:p>
          </table:table-cell>
          <table:table-cell table:formula="of:=[.D110]-[.D10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15" office:value-type="float" office:value="1635" calcext:value-type="float">
            <text:p>1635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189236111111111" calcext:value-type="float">
            <text:p>0,00018923611111111100</text:p>
          </table:table-cell>
          <table:table-cell table:formula="of:=[.D111]-[.D110]" office:value-type="float" office:value="0.00000173611111111113" calcext:value-type="float">
            <text:p>0,000001736111111111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15" office:value-type="float" office:value="1650" calcext:value-type="float">
            <text:p>165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190972222222222" calcext:value-type="float">
            <text:p>0,00019097222222222200</text:p>
          </table:table-cell>
          <table:table-cell table:formula="of:=[.D112]-[.D11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15" office:value-type="float" office:value="1665" calcext:value-type="float">
            <text:p>1665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192708333333333" calcext:value-type="float">
            <text:p>0,00019270833333333300</text:p>
          </table:table-cell>
          <table:table-cell table:formula="of:=[.D113]-[.D11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15" office:value-type="float" office:value="1680" calcext:value-type="float">
            <text:p>1680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194444444444444" calcext:value-type="float">
            <text:p>0,00019444444444444400</text:p>
          </table:table-cell>
          <table:table-cell table:formula="of:=[.D114]-[.D113]" office:value-type="float" office:value="0.00000173611111111113" calcext:value-type="float">
            <text:p>0,0000017361111111111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15" office:value-type="float" office:value="1695" calcext:value-type="float">
            <text:p>1695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196180555555556" calcext:value-type="float">
            <text:p>0,00019618055555555600</text:p>
          </table:table-cell>
          <table:table-cell table:formula="of:=[.D115]-[.D11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15" office:value-type="float" office:value="1710" calcext:value-type="float">
            <text:p>1710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197916666666667" calcext:value-type="float">
            <text:p>0,00019791666666666700</text:p>
          </table:table-cell>
          <table:table-cell table:formula="of:=[.D116]-[.D115]" office:value-type="float" office:value="0.00000173611111111113" calcext:value-type="float">
            <text:p>0,000001736111111111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15" office:value-type="float" office:value="1725" calcext:value-type="float">
            <text:p>172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199652777777778" calcext:value-type="float">
            <text:p>0,00019965277777777800</text:p>
          </table:table-cell>
          <table:table-cell table:formula="of:=[.D117]-[.D11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15" office:value-type="float" office:value="1740" calcext:value-type="float">
            <text:p>1740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201388888888889" calcext:value-type="float">
            <text:p>0,00020138888888888900</text:p>
          </table:table-cell>
          <table:table-cell table:formula="of:=[.D118]-[.D11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15" office:value-type="float" office:value="1755" calcext:value-type="float">
            <text:p>1755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203125" calcext:value-type="float">
            <text:p>0,00020312500000000000</text:p>
          </table:table-cell>
          <table:table-cell table:formula="of:=[.D119]-[.D118]" office:value-type="float" office:value="0.00000173611111111113" calcext:value-type="float">
            <text:p>0,0000017361111111111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15" office:value-type="float" office:value="1770" calcext:value-type="float">
            <text:p>1770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204861111111111" calcext:value-type="float">
            <text:p>0,00020486111111111100</text:p>
          </table:table-cell>
          <table:table-cell table:formula="of:=[.D120]-[.D11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15" office:value-type="float" office:value="1785" calcext:value-type="float">
            <text:p>1785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206597222222222" calcext:value-type="float">
            <text:p>0,00020659722222222200</text:p>
          </table:table-cell>
          <table:table-cell table:formula="of:=[.D121]-[.D120]" office:value-type="float" office:value="0.00000173611111111113" calcext:value-type="float">
            <text:p>0,000001736111111111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15" office:value-type="float" office:value="1800" calcext:value-type="float">
            <text:p>180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208333333333333" calcext:value-type="float">
            <text:p>0,00020833333333333300</text:p>
          </table:table-cell>
          <table:table-cell table:formula="of:=[.D122]-[.D12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15" office:value-type="float" office:value="1815" calcext:value-type="float">
            <text:p>1815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210069444444444" calcext:value-type="float">
            <text:p>0,00021006944444444400</text:p>
          </table:table-cell>
          <table:table-cell table:formula="of:=[.D123]-[.D12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15" office:value-type="float" office:value="1830" calcext:value-type="float">
            <text:p>1830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211805555555556" calcext:value-type="float">
            <text:p>0,00021180555555555600</text:p>
          </table:table-cell>
          <table:table-cell table:formula="of:=[.D124]-[.D123]" office:value-type="float" office:value="0.00000173611111111113" calcext:value-type="float">
            <text:p>0,0000017361111111111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15" office:value-type="float" office:value="1845" calcext:value-type="float">
            <text:p>1845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213541666666667" calcext:value-type="float">
            <text:p>0,00021354166666666700</text:p>
          </table:table-cell>
          <table:table-cell table:formula="of:=[.D125]-[.D12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15" office:value-type="float" office:value="1860" calcext:value-type="float">
            <text:p>1860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215277777777778" calcext:value-type="float">
            <text:p>0,00021527777777777800</text:p>
          </table:table-cell>
          <table:table-cell table:formula="of:=[.D126]-[.D12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15" office:value-type="float" office:value="1875" calcext:value-type="float">
            <text:p>187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217013888888889" calcext:value-type="float">
            <text:p>0,00021701388888888900</text:p>
          </table:table-cell>
          <table:table-cell table:formula="of:=[.D127]-[.D126]" office:value-type="float" office:value="0.00000173611111111113" calcext:value-type="float">
            <text:p>0,0000017361111111111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15" office:value-type="float" office:value="1890" calcext:value-type="float">
            <text:p>1890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21875" calcext:value-type="float">
            <text:p>0,00021875000000000000</text:p>
          </table:table-cell>
          <table:table-cell table:formula="of:=[.D128]-[.D12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15" office:value-type="float" office:value="1905" calcext:value-type="float">
            <text:p>1905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220486111111111" calcext:value-type="float">
            <text:p>0,00022048611111111100</text:p>
          </table:table-cell>
          <table:table-cell table:formula="of:=[.D129]-[.D128]" office:value-type="float" office:value="0.00000173611111111113" calcext:value-type="float">
            <text:p>0,000001736111111111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15" office:value-type="float" office:value="1920" calcext:value-type="float">
            <text:p>1920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222222222222222" calcext:value-type="float">
            <text:p>0,00022222222222222200</text:p>
          </table:table-cell>
          <table:table-cell table:formula="of:=[.D130]-[.D12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15" office:value-type="float" office:value="1935" calcext:value-type="float">
            <text:p>1935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223958333333333" calcext:value-type="float">
            <text:p>0,00022395833333333300</text:p>
          </table:table-cell>
          <table:table-cell table:formula="of:=[.D131]-[.D13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15" office:value-type="float" office:value="1950" calcext:value-type="float">
            <text:p>195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225694444444444" calcext:value-type="float">
            <text:p>0,00022569444444444400</text:p>
          </table:table-cell>
          <table:table-cell table:formula="of:=[.D132]-[.D131]" office:value-type="float" office:value="0.00000173611111111113" calcext:value-type="float">
            <text:p>0,0000017361111111111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15" office:value-type="float" office:value="1965" calcext:value-type="float">
            <text:p>1965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227430555555556" calcext:value-type="float">
            <text:p>0,00022743055555555600</text:p>
          </table:table-cell>
          <table:table-cell table:formula="of:=[.D133]-[.D13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15" office:value-type="float" office:value="1980" calcext:value-type="float">
            <text:p>1980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229166666666667" calcext:value-type="float">
            <text:p>0,00022916666666666700</text:p>
          </table:table-cell>
          <table:table-cell table:formula="of:=[.D134]-[.D133]" office:value-type="float" office:value="0.00000173611111111113" calcext:value-type="float">
            <text:p>0,0000017361111111111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15" office:value-type="float" office:value="1995" calcext:value-type="float">
            <text:p>1995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230902777777778" calcext:value-type="float">
            <text:p>0,00023090277777777800</text:p>
          </table:table-cell>
          <table:table-cell table:formula="of:=[.D135]-[.D13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15" office:value-type="float" office:value="2010" calcext:value-type="float">
            <text:p>2010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232638888888889" calcext:value-type="float">
            <text:p>0,00023263888888888900</text:p>
          </table:table-cell>
          <table:table-cell table:formula="of:=[.D136]-[.D13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15" office:value-type="float" office:value="2025" calcext:value-type="float">
            <text:p>202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234375" calcext:value-type="float">
            <text:p>0,00023437500000000000</text:p>
          </table:table-cell>
          <table:table-cell table:formula="of:=[.D137]-[.D136]" office:value-type="float" office:value="0.00000173611111111113" calcext:value-type="float">
            <text:p>0,0000017361111111111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15" office:value-type="float" office:value="2040" calcext:value-type="float">
            <text:p>2040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236111111111111" calcext:value-type="float">
            <text:p>0,00023611111111111100</text:p>
          </table:table-cell>
          <table:table-cell table:formula="of:=[.D138]-[.D13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15" office:value-type="float" office:value="2055" calcext:value-type="float">
            <text:p>2055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237847222222222" calcext:value-type="float">
            <text:p>0,00023784722222222200</text:p>
          </table:table-cell>
          <table:table-cell table:formula="of:=[.D139]-[.D13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15" office:value-type="float" office:value="2070" calcext:value-type="float">
            <text:p>2070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239583333333333" calcext:value-type="float">
            <text:p>0,00023958333333333300</text:p>
          </table:table-cell>
          <table:table-cell table:formula="of:=[.D140]-[.D139]" office:value-type="float" office:value="0.00000173611111111113" calcext:value-type="float">
            <text:p>0,000001736111111111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15" office:value-type="float" office:value="2085" calcext:value-type="float">
            <text:p>2085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241319444444444" calcext:value-type="float">
            <text:p>0,00024131944444444400</text:p>
          </table:table-cell>
          <table:table-cell table:formula="of:=[.D141]-[.D14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15" office:value-type="float" office:value="2100" calcext:value-type="float">
            <text:p>210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243055555555556" calcext:value-type="float">
            <text:p>0,00024305555555555600</text:p>
          </table:table-cell>
          <table:table-cell table:formula="of:=[.D142]-[.D14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15" office:value-type="float" office:value="2115" calcext:value-type="float">
            <text:p>2115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244791666666667" calcext:value-type="float">
            <text:p>0,00024479166666666700</text:p>
          </table:table-cell>
          <table:table-cell table:formula="of:=[.D143]-[.D142]" office:value-type="float" office:value="0.00000173611111111115" calcext:value-type="float">
            <text:p>0,0000017361111111111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15" office:value-type="float" office:value="2130" calcext:value-type="float">
            <text:p>2130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246527777777778" calcext:value-type="float">
            <text:p>0,00024652777777777800</text:p>
          </table:table-cell>
          <table:table-cell table:formula="of:=[.D144]-[.D14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15" office:value-type="float" office:value="2145" calcext:value-type="float">
            <text:p>2145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248263888888889" calcext:value-type="float">
            <text:p>0,00024826388888888900</text:p>
          </table:table-cell>
          <table:table-cell table:formula="of:=[.D145]-[.D14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15" office:value-type="float" office:value="2160" calcext:value-type="float">
            <text:p>2160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25" calcext:value-type="float">
            <text:p>0,00025000000000000000</text:p>
          </table:table-cell>
          <table:table-cell table:formula="of:=[.D146]-[.D14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15" office:value-type="float" office:value="2175" calcext:value-type="float">
            <text:p>217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251736111111111" calcext:value-type="float">
            <text:p>0,00025173611111111100</text:p>
          </table:table-cell>
          <table:table-cell table:formula="of:=[.D147]-[.D14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15" office:value-type="float" office:value="2190" calcext:value-type="float">
            <text:p>2190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253472222222222" calcext:value-type="float">
            <text:p>0,00025347222222222200</text:p>
          </table:table-cell>
          <table:table-cell table:formula="of:=[.D148]-[.D14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15" office:value-type="float" office:value="2205" calcext:value-type="float">
            <text:p>2205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255208333333333" calcext:value-type="float">
            <text:p>0,00025520833333333300</text:p>
          </table:table-cell>
          <table:table-cell table:formula="of:=[.D149]-[.D148]" office:value-type="float" office:value="0.00000173611111111115" calcext:value-type="float">
            <text:p>0,0000017361111111111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15" office:value-type="float" office:value="2220" calcext:value-type="float">
            <text:p>2220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256944444444444" calcext:value-type="float">
            <text:p>0,00025694444444444400</text:p>
          </table:table-cell>
          <table:table-cell table:formula="of:=[.D150]-[.D14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15" office:value-type="float" office:value="2235" calcext:value-type="float">
            <text:p>2235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258680555555556" calcext:value-type="float">
            <text:p>0,00025868055555555600</text:p>
          </table:table-cell>
          <table:table-cell table:formula="of:=[.D151]-[.D15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15" office:value-type="float" office:value="2250" calcext:value-type="float">
            <text:p>22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260416666666667" calcext:value-type="float">
            <text:p>0,00026041666666666700</text:p>
          </table:table-cell>
          <table:table-cell table:formula="of:=[.D152]-[.D15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15" office:value-type="float" office:value="2265" calcext:value-type="float">
            <text:p>2265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262152777777778" calcext:value-type="float">
            <text:p>0,00026215277777777800</text:p>
          </table:table-cell>
          <table:table-cell table:formula="of:=[.D153]-[.D15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15" office:value-type="float" office:value="2280" calcext:value-type="float">
            <text:p>2280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263888888888889" calcext:value-type="float">
            <text:p>0,00026388888888888900</text:p>
          </table:table-cell>
          <table:table-cell table:formula="of:=[.D154]-[.D153]" office:value-type="float" office:value="0.00000173611111111115" calcext:value-type="float">
            <text:p>0,0000017361111111111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15" office:value-type="float" office:value="2295" calcext:value-type="float">
            <text:p>2295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265625" calcext:value-type="float">
            <text:p>0,00026562500000000000</text:p>
          </table:table-cell>
          <table:table-cell table:formula="of:=[.D155]-[.D15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15" office:value-type="float" office:value="2310" calcext:value-type="float">
            <text:p>2310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267361111111111" calcext:value-type="float">
            <text:p>0,00026736111111111100</text:p>
          </table:table-cell>
          <table:table-cell table:formula="of:=[.D156]-[.D15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15" office:value-type="float" office:value="2325" calcext:value-type="float">
            <text:p>232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269097222222222" calcext:value-type="float">
            <text:p>0,00026909722222222200</text:p>
          </table:table-cell>
          <table:table-cell table:formula="of:=[.D157]-[.D15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15" office:value-type="float" office:value="2340" calcext:value-type="float">
            <text:p>2340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270833333333333" calcext:value-type="float">
            <text:p>0,00027083333333333300</text:p>
          </table:table-cell>
          <table:table-cell table:formula="of:=[.D158]-[.D15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15" office:value-type="float" office:value="2355" calcext:value-type="float">
            <text:p>2355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272569444444444" calcext:value-type="float">
            <text:p>0,00027256944444444400</text:p>
          </table:table-cell>
          <table:table-cell table:formula="of:=[.D159]-[.D158]" office:value-type="float" office:value="0.00000173611111111115" calcext:value-type="float">
            <text:p>0,0000017361111111111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15" office:value-type="float" office:value="2370" calcext:value-type="float">
            <text:p>2370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274305555555556" calcext:value-type="float">
            <text:p>0,00027430555555555600</text:p>
          </table:table-cell>
          <table:table-cell table:formula="of:=[.D160]-[.D15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15" office:value-type="float" office:value="2385" calcext:value-type="float">
            <text:p>2385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276041666666667" calcext:value-type="float">
            <text:p>0,00027604166666666700</text:p>
          </table:table-cell>
          <table:table-cell table:formula="of:=[.D161]-[.D16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15" office:value-type="float" office:value="2400" calcext:value-type="float">
            <text:p>240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277777777777778" calcext:value-type="float">
            <text:p>0,00027777777777777800</text:p>
          </table:table-cell>
          <table:table-cell table:formula="of:=[.D162]-[.D16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15" office:value-type="float" office:value="2415" calcext:value-type="float">
            <text:p>2415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279513888888889" calcext:value-type="float">
            <text:p>0,00027951388888888900</text:p>
          </table:table-cell>
          <table:table-cell table:formula="of:=[.D163]-[.D16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15" office:value-type="float" office:value="2430" calcext:value-type="float">
            <text:p>2430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28125" calcext:value-type="float">
            <text:p>0,00028125000000000000</text:p>
          </table:table-cell>
          <table:table-cell table:formula="of:=[.D164]-[.D163]" office:value-type="float" office:value="0.00000173611111111115" calcext:value-type="float">
            <text:p>0,0000017361111111111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15" office:value-type="float" office:value="2445" calcext:value-type="float">
            <text:p>2445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282986111111111" calcext:value-type="float">
            <text:p>0,00028298611111111100</text:p>
          </table:table-cell>
          <table:table-cell table:formula="of:=[.D165]-[.D16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15" office:value-type="float" office:value="2460" calcext:value-type="float">
            <text:p>2460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284722222222222" calcext:value-type="float">
            <text:p>0,00028472222222222200</text:p>
          </table:table-cell>
          <table:table-cell table:formula="of:=[.D166]-[.D16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15" office:value-type="float" office:value="2475" calcext:value-type="float">
            <text:p>247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286458333333333" calcext:value-type="float">
            <text:p>0,00028645833333333300</text:p>
          </table:table-cell>
          <table:table-cell table:formula="of:=[.D167]-[.D16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15" office:value-type="float" office:value="2490" calcext:value-type="float">
            <text:p>2490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288194444444444" calcext:value-type="float">
            <text:p>0,00028819444444444400</text:p>
          </table:table-cell>
          <table:table-cell table:formula="of:=[.D168]-[.D16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15" office:value-type="float" office:value="2505" calcext:value-type="float">
            <text:p>2505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289930555555556" calcext:value-type="float">
            <text:p>0,00028993055555555600</text:p>
          </table:table-cell>
          <table:table-cell table:formula="of:=[.D169]-[.D168]" office:value-type="float" office:value="0.00000173611111111115" calcext:value-type="float">
            <text:p>0,0000017361111111111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15" office:value-type="float" office:value="2520" calcext:value-type="float">
            <text:p>2520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291666666666667" calcext:value-type="float">
            <text:p>0,00029166666666666700</text:p>
          </table:table-cell>
          <table:table-cell table:formula="of:=[.D170]-[.D16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15" office:value-type="float" office:value="2535" calcext:value-type="float">
            <text:p>2535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293402777777778" calcext:value-type="float">
            <text:p>0,00029340277777777800</text:p>
          </table:table-cell>
          <table:table-cell table:formula="of:=[.D171]-[.D17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15" office:value-type="float" office:value="2550" calcext:value-type="float">
            <text:p>255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295138888888889" calcext:value-type="float">
            <text:p>0,00029513888888888900</text:p>
          </table:table-cell>
          <table:table-cell table:formula="of:=[.D172]-[.D17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15" office:value-type="float" office:value="2565" calcext:value-type="float">
            <text:p>2565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296875" calcext:value-type="float">
            <text:p>0,00029687500000000000</text:p>
          </table:table-cell>
          <table:table-cell table:formula="of:=[.D173]-[.D17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15" office:value-type="float" office:value="2580" calcext:value-type="float">
            <text:p>2580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298611111111111" calcext:value-type="float">
            <text:p>0,00029861111111111100</text:p>
          </table:table-cell>
          <table:table-cell table:formula="of:=[.D174]-[.D173]" office:value-type="float" office:value="0.00000173611111111115" calcext:value-type="float">
            <text:p>0,0000017361111111111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15" office:value-type="float" office:value="2595" calcext:value-type="float">
            <text:p>2595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300347222222222" calcext:value-type="float">
            <text:p>0,00030034722222222200</text:p>
          </table:table-cell>
          <table:table-cell table:formula="of:=[.D175]-[.D17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15" office:value-type="float" office:value="2610" calcext:value-type="float">
            <text:p>2610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302083333333333" calcext:value-type="float">
            <text:p>0,00030208333333333300</text:p>
          </table:table-cell>
          <table:table-cell table:formula="of:=[.D176]-[.D17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15" office:value-type="float" office:value="2625" calcext:value-type="float">
            <text:p>262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303819444444444" calcext:value-type="float">
            <text:p>0,00030381944444444400</text:p>
          </table:table-cell>
          <table:table-cell table:formula="of:=[.D177]-[.D17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15" office:value-type="float" office:value="2640" calcext:value-type="float">
            <text:p>2640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305555555555556" calcext:value-type="float">
            <text:p>0,00030555555555555600</text:p>
          </table:table-cell>
          <table:table-cell table:formula="of:=[.D178]-[.D17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15" office:value-type="float" office:value="2655" calcext:value-type="float">
            <text:p>2655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307291666666667" calcext:value-type="float">
            <text:p>0,00030729166666666700</text:p>
          </table:table-cell>
          <table:table-cell table:formula="of:=[.D179]-[.D17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15" office:value-type="float" office:value="2670" calcext:value-type="float">
            <text:p>2670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309027777777778" calcext:value-type="float">
            <text:p>0,00030902777777777800</text:p>
          </table:table-cell>
          <table:table-cell table:formula="of:=[.D180]-[.D179]" office:value-type="float" office:value="0.00000173611111111115" calcext:value-type="float">
            <text:p>0,0000017361111111111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15" office:value-type="float" office:value="2685" calcext:value-type="float">
            <text:p>2685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310763888888889" calcext:value-type="float">
            <text:p>0,00031076388888888900</text:p>
          </table:table-cell>
          <table:table-cell table:formula="of:=[.D181]-[.D18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15" office:value-type="float" office:value="2700" calcext:value-type="float">
            <text:p>270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3125" calcext:value-type="float">
            <text:p>0,00031250000000000000</text:p>
          </table:table-cell>
          <table:table-cell table:formula="of:=[.D182]-[.D18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15" office:value-type="float" office:value="2715" calcext:value-type="float">
            <text:p>2715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314236111111111" calcext:value-type="float">
            <text:p>0,00031423611111111100</text:p>
          </table:table-cell>
          <table:table-cell table:formula="of:=[.D183]-[.D18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15" office:value-type="float" office:value="2730" calcext:value-type="float">
            <text:p>2730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315972222222222" calcext:value-type="float">
            <text:p>0,00031597222222222200</text:p>
          </table:table-cell>
          <table:table-cell table:formula="of:=[.D184]-[.D18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15" office:value-type="float" office:value="2745" calcext:value-type="float">
            <text:p>2745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317708333333333" calcext:value-type="float">
            <text:p>0,00031770833333333300</text:p>
          </table:table-cell>
          <table:table-cell table:formula="of:=[.D185]-[.D184]" office:value-type="float" office:value="0.00000173611111111115" calcext:value-type="float">
            <text:p>0,0000017361111111111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15" office:value-type="float" office:value="2760" calcext:value-type="float">
            <text:p>2760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319444444444444" calcext:value-type="float">
            <text:p>0,00031944444444444400</text:p>
          </table:table-cell>
          <table:table-cell table:formula="of:=[.D186]-[.D18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15" office:value-type="float" office:value="2775" calcext:value-type="float">
            <text:p>277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321180555555556" calcext:value-type="float">
            <text:p>0,00032118055555555600</text:p>
          </table:table-cell>
          <table:table-cell table:formula="of:=[.D187]-[.D18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15" office:value-type="float" office:value="2790" calcext:value-type="float">
            <text:p>2790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322916666666667" calcext:value-type="float">
            <text:p>0,00032291666666666700</text:p>
          </table:table-cell>
          <table:table-cell table:formula="of:=[.D188]-[.D18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15" office:value-type="float" office:value="2805" calcext:value-type="float">
            <text:p>2805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324652777777778" calcext:value-type="float">
            <text:p>0,00032465277777777800</text:p>
          </table:table-cell>
          <table:table-cell table:formula="of:=[.D189]-[.D18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15" office:value-type="float" office:value="2820" calcext:value-type="float">
            <text:p>2820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326388888888889" calcext:value-type="float">
            <text:p>0,00032638888888888900</text:p>
          </table:table-cell>
          <table:table-cell table:formula="of:=[.D190]-[.D189]" office:value-type="float" office:value="0.00000173611111111115" calcext:value-type="float">
            <text:p>0,0000017361111111111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15" office:value-type="float" office:value="2835" calcext:value-type="float">
            <text:p>2835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328125" calcext:value-type="float">
            <text:p>0,00032812500000000000</text:p>
          </table:table-cell>
          <table:table-cell table:formula="of:=[.D191]-[.D19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15" office:value-type="float" office:value="2850" calcext:value-type="float">
            <text:p>285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329861111111111" calcext:value-type="float">
            <text:p>0,00032986111111111100</text:p>
          </table:table-cell>
          <table:table-cell table:formula="of:=[.D192]-[.D19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15" office:value-type="float" office:value="2865" calcext:value-type="float">
            <text:p>2865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331597222222222" calcext:value-type="float">
            <text:p>0,00033159722222222200</text:p>
          </table:table-cell>
          <table:table-cell table:formula="of:=[.D193]-[.D19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15" office:value-type="float" office:value="2880" calcext:value-type="float">
            <text:p>2880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333333333333333" calcext:value-type="float">
            <text:p>0,00033333333333333300</text:p>
          </table:table-cell>
          <table:table-cell table:formula="of:=[.D194]-[.D19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15" office:value-type="float" office:value="2895" calcext:value-type="float">
            <text:p>2895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335069444444444" calcext:value-type="float">
            <text:p>0,00033506944444444400</text:p>
          </table:table-cell>
          <table:table-cell table:formula="of:=[.D195]-[.D194]" office:value-type="float" office:value="0.00000173611111111115" calcext:value-type="float">
            <text:p>0,0000017361111111111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15" office:value-type="float" office:value="2910" calcext:value-type="float">
            <text:p>2910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336805555555556" calcext:value-type="float">
            <text:p>0,00033680555555555600</text:p>
          </table:table-cell>
          <table:table-cell table:formula="of:=[.D196]-[.D19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15" office:value-type="float" office:value="2925" calcext:value-type="float">
            <text:p>292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338541666666667" calcext:value-type="float">
            <text:p>0,00033854166666666700</text:p>
          </table:table-cell>
          <table:table-cell table:formula="of:=[.D197]-[.D19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15" office:value-type="float" office:value="2940" calcext:value-type="float">
            <text:p>2940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340277777777778" calcext:value-type="float">
            <text:p>0,00034027777777777800</text:p>
          </table:table-cell>
          <table:table-cell table:formula="of:=[.D198]-[.D19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15" office:value-type="float" office:value="2955" calcext:value-type="float">
            <text:p>2955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342013888888889" calcext:value-type="float">
            <text:p>0,00034201388888888900</text:p>
          </table:table-cell>
          <table:table-cell table:formula="of:=[.D199]-[.D19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15" office:value-type="float" office:value="2970" calcext:value-type="float">
            <text:p>2970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34375" calcext:value-type="float">
            <text:p>0,00034375000000000000</text:p>
          </table:table-cell>
          <table:table-cell table:formula="of:=[.D200]-[.D199]" office:value-type="float" office:value="0.00000173611111111115" calcext:value-type="float">
            <text:p>0,000001736111111111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15" office:value-type="float" office:value="2985" calcext:value-type="float">
            <text:p>2985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345486111111111" calcext:value-type="float">
            <text:p>0,00034548611111111100</text:p>
          </table:table-cell>
          <table:table-cell table:formula="of:=[.D201]-[.D20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15" office:value-type="float" office:value="3000" calcext:value-type="float">
            <text:p>30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347222222222222" calcext:value-type="float">
            <text:p>0,00034722222222222200</text:p>
          </table:table-cell>
          <table:table-cell table:formula="of:=[.D202]-[.D20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15" office:value-type="float" office:value="3015" calcext:value-type="float">
            <text:p>3015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348958333333333" calcext:value-type="float">
            <text:p>0,00034895833333333300</text:p>
          </table:table-cell>
          <table:table-cell table:formula="of:=[.D203]-[.D20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15" office:value-type="float" office:value="3030" calcext:value-type="float">
            <text:p>3030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350694444444444" calcext:value-type="float">
            <text:p>0,00035069444444444400</text:p>
          </table:table-cell>
          <table:table-cell table:formula="of:=[.D204]-[.D20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15" office:value-type="float" office:value="3045" calcext:value-type="float">
            <text:p>3045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352430555555556" calcext:value-type="float">
            <text:p>0,00035243055555555600</text:p>
          </table:table-cell>
          <table:table-cell table:formula="of:=[.D205]-[.D204]" office:value-type="float" office:value="0.00000173611111111115" calcext:value-type="float">
            <text:p>0,0000017361111111111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15" office:value-type="float" office:value="3060" calcext:value-type="float">
            <text:p>3060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354166666666667" calcext:value-type="float">
            <text:p>0,00035416666666666700</text:p>
          </table:table-cell>
          <table:table-cell table:formula="of:=[.D206]-[.D20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15" office:value-type="float" office:value="3075" calcext:value-type="float">
            <text:p>307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355902777777778" calcext:value-type="float">
            <text:p>0,00035590277777777800</text:p>
          </table:table-cell>
          <table:table-cell table:formula="of:=[.D207]-[.D20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15" office:value-type="float" office:value="3090" calcext:value-type="float">
            <text:p>3090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357638888888889" calcext:value-type="float">
            <text:p>0,00035763888888888900</text:p>
          </table:table-cell>
          <table:table-cell table:formula="of:=[.D208]-[.D20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15" office:value-type="float" office:value="3105" calcext:value-type="float">
            <text:p>3105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359375" calcext:value-type="float">
            <text:p>0,00035937500000000000</text:p>
          </table:table-cell>
          <table:table-cell table:formula="of:=[.D209]-[.D20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15" office:value-type="float" office:value="3120" calcext:value-type="float">
            <text:p>3120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361111111111111" calcext:value-type="float">
            <text:p>0,00036111111111111100</text:p>
          </table:table-cell>
          <table:table-cell table:formula="of:=[.D210]-[.D20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15" office:value-type="float" office:value="3135" calcext:value-type="float">
            <text:p>3135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362847222222222" calcext:value-type="float">
            <text:p>0,00036284722222222200</text:p>
          </table:table-cell>
          <table:table-cell table:formula="of:=[.D211]-[.D210]" office:value-type="float" office:value="0.00000173611111111115" calcext:value-type="float">
            <text:p>0,0000017361111111111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15" office:value-type="float" office:value="3150" calcext:value-type="float">
            <text:p>315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364583333333333" calcext:value-type="float">
            <text:p>0,00036458333333333300</text:p>
          </table:table-cell>
          <table:table-cell table:formula="of:=[.D212]-[.D21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15" office:value-type="float" office:value="3165" calcext:value-type="float">
            <text:p>3165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366319444444444" calcext:value-type="float">
            <text:p>0,00036631944444444500</text:p>
          </table:table-cell>
          <table:table-cell table:formula="of:=[.D213]-[.D21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15" office:value-type="float" office:value="3180" calcext:value-type="float">
            <text:p>3180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368055555555556" calcext:value-type="float">
            <text:p>0,00036805555555555600</text:p>
          </table:table-cell>
          <table:table-cell table:formula="of:=[.D214]-[.D21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15" office:value-type="float" office:value="3195" calcext:value-type="float">
            <text:p>3195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369791666666667" calcext:value-type="float">
            <text:p>0,00036979166666666700</text:p>
          </table:table-cell>
          <table:table-cell table:formula="of:=[.D215]-[.D21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15" office:value-type="float" office:value="3210" calcext:value-type="float">
            <text:p>3210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371527777777778" calcext:value-type="float">
            <text:p>0,00037152777777777800</text:p>
          </table:table-cell>
          <table:table-cell table:formula="of:=[.D216]-[.D215]" office:value-type="float" office:value="0.00000173611111111115" calcext:value-type="float">
            <text:p>0,0000017361111111111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15" office:value-type="float" office:value="3225" calcext:value-type="float">
            <text:p>322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373263888888889" calcext:value-type="float">
            <text:p>0,00037326388888888900</text:p>
          </table:table-cell>
          <table:table-cell table:formula="of:=[.D217]-[.D21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15" office:value-type="float" office:value="3240" calcext:value-type="float">
            <text:p>3240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0375" calcext:value-type="float">
            <text:p>0,00037500000000000000</text:p>
          </table:table-cell>
          <table:table-cell table:formula="of:=[.D218]-[.D21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15" office:value-type="float" office:value="3255" calcext:value-type="float">
            <text:p>3255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0376736111111111" calcext:value-type="float">
            <text:p>0,00037673611111111100</text:p>
          </table:table-cell>
          <table:table-cell table:formula="of:=[.D219]-[.D21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15" office:value-type="float" office:value="3270" calcext:value-type="float">
            <text:p>3270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0378472222222222" calcext:value-type="float">
            <text:p>0,00037847222222222200</text:p>
          </table:table-cell>
          <table:table-cell table:formula="of:=[.D220]-[.D21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15" office:value-type="float" office:value="3285" calcext:value-type="float">
            <text:p>3285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0380208333333333" calcext:value-type="float">
            <text:p>0,00038020833333333300</text:p>
          </table:table-cell>
          <table:table-cell table:formula="of:=[.D221]-[.D220]" office:value-type="float" office:value="0.00000173611111111115" calcext:value-type="float">
            <text:p>0,0000017361111111111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15" office:value-type="float" office:value="3300" calcext:value-type="float">
            <text:p>330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0381944444444444" calcext:value-type="float">
            <text:p>0,00038194444444444400</text:p>
          </table:table-cell>
          <table:table-cell table:formula="of:=[.D222]-[.D22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15" office:value-type="float" office:value="3315" calcext:value-type="float">
            <text:p>3315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0383680555555556" calcext:value-type="float">
            <text:p>0,00038368055555555600</text:p>
          </table:table-cell>
          <table:table-cell table:formula="of:=[.D223]-[.D22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15" office:value-type="float" office:value="3330" calcext:value-type="float">
            <text:p>3330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0385416666666667" calcext:value-type="float">
            <text:p>0,00038541666666666700</text:p>
          </table:table-cell>
          <table:table-cell table:formula="of:=[.D224]-[.D22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15" office:value-type="float" office:value="3345" calcext:value-type="float">
            <text:p>3345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0387152777777778" calcext:value-type="float">
            <text:p>0,00038715277777777800</text:p>
          </table:table-cell>
          <table:table-cell table:formula="of:=[.D225]-[.D22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15" office:value-type="float" office:value="3360" calcext:value-type="float">
            <text:p>3360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0388888888888889" calcext:value-type="float">
            <text:p>0,00038888888888888900</text:p>
          </table:table-cell>
          <table:table-cell table:formula="of:=[.D226]-[.D225]" office:value-type="float" office:value="0.00000173611111111115" calcext:value-type="float">
            <text:p>0,0000017361111111111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15" office:value-type="float" office:value="3375" calcext:value-type="float">
            <text:p>337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0390625" calcext:value-type="float">
            <text:p>0,00039062500000000000</text:p>
          </table:table-cell>
          <table:table-cell table:formula="of:=[.D227]-[.D22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15" office:value-type="float" office:value="3390" calcext:value-type="float">
            <text:p>3390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0392361111111111" calcext:value-type="float">
            <text:p>0,00039236111111111100</text:p>
          </table:table-cell>
          <table:table-cell table:formula="of:=[.D228]-[.D22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15" office:value-type="float" office:value="3405" calcext:value-type="float">
            <text:p>3405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0394097222222222" calcext:value-type="float">
            <text:p>0,00039409722222222200</text:p>
          </table:table-cell>
          <table:table-cell table:formula="of:=[.D229]-[.D22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15" office:value-type="float" office:value="3420" calcext:value-type="float">
            <text:p>3420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0395833333333333" calcext:value-type="float">
            <text:p>0,00039583333333333300</text:p>
          </table:table-cell>
          <table:table-cell table:formula="of:=[.D230]-[.D22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15" office:value-type="float" office:value="3435" calcext:value-type="float">
            <text:p>3435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0397569444444444" calcext:value-type="float">
            <text:p>0,00039756944444444400</text:p>
          </table:table-cell>
          <table:table-cell table:formula="of:=[.D231]-[.D230]" office:value-type="float" office:value="0.00000173611111111115" calcext:value-type="float">
            <text:p>0,0000017361111111111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15" office:value-type="float" office:value="3450" calcext:value-type="float">
            <text:p>345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0399305555555556" calcext:value-type="float">
            <text:p>0,00039930555555555600</text:p>
          </table:table-cell>
          <table:table-cell table:formula="of:=[.D232]-[.D23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15" office:value-type="float" office:value="3465" calcext:value-type="float">
            <text:p>3465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0401041666666667" calcext:value-type="float">
            <text:p>0,00040104166666666700</text:p>
          </table:table-cell>
          <table:table-cell table:formula="of:=[.D233]-[.D23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15" office:value-type="float" office:value="3480" calcext:value-type="float">
            <text:p>3480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0402777777777778" calcext:value-type="float">
            <text:p>0,00040277777777777800</text:p>
          </table:table-cell>
          <table:table-cell table:formula="of:=[.D234]-[.D23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15" office:value-type="float" office:value="3495" calcext:value-type="float">
            <text:p>3495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0404513888888889" calcext:value-type="float">
            <text:p>0,00040451388888888900</text:p>
          </table:table-cell>
          <table:table-cell table:formula="of:=[.D235]-[.D23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15" office:value-type="float" office:value="3510" calcext:value-type="float">
            <text:p>3510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040625" calcext:value-type="float">
            <text:p>0,00040625000000000000</text:p>
          </table:table-cell>
          <table:table-cell table:formula="of:=[.D236]-[.D235]" office:value-type="float" office:value="0.00000173611111111115" calcext:value-type="float">
            <text:p>0,0000017361111111111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15" office:value-type="float" office:value="3525" calcext:value-type="float">
            <text:p>352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0407986111111111" calcext:value-type="float">
            <text:p>0,00040798611111111100</text:p>
          </table:table-cell>
          <table:table-cell table:formula="of:=[.D237]-[.D23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15" office:value-type="float" office:value="3540" calcext:value-type="float">
            <text:p>3540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0409722222222222" calcext:value-type="float">
            <text:p>0,00040972222222222200</text:p>
          </table:table-cell>
          <table:table-cell table:formula="of:=[.D238]-[.D23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15" office:value-type="float" office:value="3555" calcext:value-type="float">
            <text:p>3555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0411458333333333" calcext:value-type="float">
            <text:p>0,00041145833333333300</text:p>
          </table:table-cell>
          <table:table-cell table:formula="of:=[.D239]-[.D23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15" office:value-type="float" office:value="3570" calcext:value-type="float">
            <text:p>3570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0413194444444444" calcext:value-type="float">
            <text:p>0,00041319444444444400</text:p>
          </table:table-cell>
          <table:table-cell table:formula="of:=[.D240]-[.D23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15" office:value-type="float" office:value="3585" calcext:value-type="float">
            <text:p>3585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0414930555555556" calcext:value-type="float">
            <text:p>0,00041493055555555600</text:p>
          </table:table-cell>
          <table:table-cell table:formula="of:=[.D241]-[.D240]" office:value-type="float" office:value="0.00000173611111111115" calcext:value-type="float">
            <text:p>0,000001736111111111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15" office:value-type="float" office:value="3600" calcext:value-type="float">
            <text:p>360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0416666666666667" calcext:value-type="float">
            <text:p>0,00041666666666666700</text:p>
          </table:table-cell>
          <table:table-cell table:formula="of:=[.D242]-[.D24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15" office:value-type="float" office:value="3615" calcext:value-type="float">
            <text:p>3615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0418402777777778" calcext:value-type="float">
            <text:p>0,00041840277777777800</text:p>
          </table:table-cell>
          <table:table-cell table:formula="of:=[.D243]-[.D24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15" office:value-type="float" office:value="3630" calcext:value-type="float">
            <text:p>3630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0420138888888889" calcext:value-type="float">
            <text:p>0,00042013888888888900</text:p>
          </table:table-cell>
          <table:table-cell table:formula="of:=[.D244]-[.D24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15" office:value-type="float" office:value="3645" calcext:value-type="float">
            <text:p>3645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0421875" calcext:value-type="float">
            <text:p>0,00042187500000000000</text:p>
          </table:table-cell>
          <table:table-cell table:formula="of:=[.D245]-[.D24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15" office:value-type="float" office:value="3660" calcext:value-type="float">
            <text:p>3660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0423611111111111" calcext:value-type="float">
            <text:p>0,00042361111111111100</text:p>
          </table:table-cell>
          <table:table-cell table:formula="of:=[.D246]-[.D24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15" office:value-type="float" office:value="3675" calcext:value-type="float">
            <text:p>367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0425347222222222" calcext:value-type="float">
            <text:p>0,00042534722222222200</text:p>
          </table:table-cell>
          <table:table-cell table:formula="of:=[.D247]-[.D246]" office:value-type="float" office:value="0.00000173611111111115" calcext:value-type="float">
            <text:p>0,0000017361111111111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15" office:value-type="float" office:value="3690" calcext:value-type="float">
            <text:p>3690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0427083333333333" calcext:value-type="float">
            <text:p>0,00042708333333333300</text:p>
          </table:table-cell>
          <table:table-cell table:formula="of:=[.D248]-[.D24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15" office:value-type="float" office:value="3705" calcext:value-type="float">
            <text:p>3705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0428819444444444" calcext:value-type="float">
            <text:p>0,00042881944444444500</text:p>
          </table:table-cell>
          <table:table-cell table:formula="of:=[.D249]-[.D24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15" office:value-type="float" office:value="3720" calcext:value-type="float">
            <text:p>3720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0430555555555556" calcext:value-type="float">
            <text:p>0,00043055555555555600</text:p>
          </table:table-cell>
          <table:table-cell table:formula="of:=[.D250]-[.D24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15" office:value-type="float" office:value="3735" calcext:value-type="float">
            <text:p>3735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0432291666666667" calcext:value-type="float">
            <text:p>0,00043229166666666700</text:p>
          </table:table-cell>
          <table:table-cell table:formula="of:=[.D251]-[.D25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15" office:value-type="float" office:value="3750" calcext:value-type="float">
            <text:p>37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0434027777777778" calcext:value-type="float">
            <text:p>0,00043402777777777800</text:p>
          </table:table-cell>
          <table:table-cell table:formula="of:=[.D252]-[.D251]" office:value-type="float" office:value="0.00000173611111111115" calcext:value-type="float">
            <text:p>0,0000017361111111111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15" office:value-type="float" office:value="3765" calcext:value-type="float">
            <text:p>3765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0435763888888889" calcext:value-type="float">
            <text:p>0,00043576388888888900</text:p>
          </table:table-cell>
          <table:table-cell table:formula="of:=[.D253]-[.D25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15" office:value-type="float" office:value="3780" calcext:value-type="float">
            <text:p>3780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04375" calcext:value-type="float">
            <text:p>0,00043750000000000000</text:p>
          </table:table-cell>
          <table:table-cell table:formula="of:=[.D254]-[.D25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15" office:value-type="float" office:value="3795" calcext:value-type="float">
            <text:p>3795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0439236111111111" calcext:value-type="float">
            <text:p>0,00043923611111111100</text:p>
          </table:table-cell>
          <table:table-cell table:formula="of:=[.D255]-[.D25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15" office:value-type="float" office:value="3810" calcext:value-type="float">
            <text:p>3810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0440972222222222" calcext:value-type="float">
            <text:p>0,00044097222222222200</text:p>
          </table:table-cell>
          <table:table-cell table:formula="of:=[.D256]-[.D25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15" office:value-type="float" office:value="3825" calcext:value-type="float">
            <text:p>382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0442708333333333" calcext:value-type="float">
            <text:p>0,00044270833333333300</text:p>
          </table:table-cell>
          <table:table-cell table:formula="of:=[.D257]-[.D256]" office:value-type="float" office:value="0.00000173611111111115" calcext:value-type="float">
            <text:p>0,0000017361111111111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15" office:value-type="float" office:value="3840" calcext:value-type="float">
            <text:p>3840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0444444444444444" calcext:value-type="float">
            <text:p>0,00044444444444444400</text:p>
          </table:table-cell>
          <table:table-cell table:formula="of:=[.D258]-[.D25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15" office:value-type="float" office:value="3855" calcext:value-type="float">
            <text:p>3855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0446180555555556" calcext:value-type="float">
            <text:p>0,00044618055555555600</text:p>
          </table:table-cell>
          <table:table-cell table:formula="of:=[.D259]-[.D25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15" office:value-type="float" office:value="3870" calcext:value-type="float">
            <text:p>3870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0447916666666667" calcext:value-type="float">
            <text:p>0,00044791666666666700</text:p>
          </table:table-cell>
          <table:table-cell table:formula="of:=[.D260]-[.D25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15" office:value-type="float" office:value="3885" calcext:value-type="float">
            <text:p>3885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0449652777777778" calcext:value-type="float">
            <text:p>0,00044965277777777800</text:p>
          </table:table-cell>
          <table:table-cell table:formula="of:=[.D261]-[.D26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15" office:value-type="float" office:value="3900" calcext:value-type="float">
            <text:p>390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0451388888888889" calcext:value-type="float">
            <text:p>0,00045138888888888900</text:p>
          </table:table-cell>
          <table:table-cell table:formula="of:=[.D262]-[.D261]" office:value-type="float" office:value="0.00000173611111111115" calcext:value-type="float">
            <text:p>0,0000017361111111111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15" office:value-type="float" office:value="3915" calcext:value-type="float">
            <text:p>3915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0453125" calcext:value-type="float">
            <text:p>0,00045312500000000000</text:p>
          </table:table-cell>
          <table:table-cell table:formula="of:=[.D263]-[.D26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15" office:value-type="float" office:value="3930" calcext:value-type="float">
            <text:p>3930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0454861111111111" calcext:value-type="float">
            <text:p>0,00045486111111111100</text:p>
          </table:table-cell>
          <table:table-cell table:formula="of:=[.D264]-[.D26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15" office:value-type="float" office:value="3945" calcext:value-type="float">
            <text:p>3945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0456597222222222" calcext:value-type="float">
            <text:p>0,00045659722222222200</text:p>
          </table:table-cell>
          <table:table-cell table:formula="of:=[.D265]-[.D26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15" office:value-type="float" office:value="3960" calcext:value-type="float">
            <text:p>3960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0458333333333333" calcext:value-type="float">
            <text:p>0,00045833333333333300</text:p>
          </table:table-cell>
          <table:table-cell table:formula="of:=[.D266]-[.D26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15" office:value-type="float" office:value="3975" calcext:value-type="float">
            <text:p>397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0460069444444444" calcext:value-type="float">
            <text:p>0,00046006944444444400</text:p>
          </table:table-cell>
          <table:table-cell table:formula="of:=[.D267]-[.D266]" office:value-type="float" office:value="0.00000173611111111115" calcext:value-type="float">
            <text:p>0,0000017361111111111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15" office:value-type="float" office:value="3990" calcext:value-type="float">
            <text:p>3990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0461805555555556" calcext:value-type="float">
            <text:p>0,00046180555555555600</text:p>
          </table:table-cell>
          <table:table-cell table:formula="of:=[.D268]-[.D26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15" office:value-type="float" office:value="4005" calcext:value-type="float">
            <text:p>4005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0463541666666667" calcext:value-type="float">
            <text:p>0,00046354166666666700</text:p>
          </table:table-cell>
          <table:table-cell table:formula="of:=[.D269]-[.D26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15" office:value-type="float" office:value="4020" calcext:value-type="float">
            <text:p>4020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0465277777777778" calcext:value-type="float">
            <text:p>0,00046527777777777800</text:p>
          </table:table-cell>
          <table:table-cell table:formula="of:=[.D270]-[.D26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15" office:value-type="float" office:value="4035" calcext:value-type="float">
            <text:p>4035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0467013888888889" calcext:value-type="float">
            <text:p>0,00046701388888888900</text:p>
          </table:table-cell>
          <table:table-cell table:formula="of:=[.D271]-[.D27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15" office:value-type="float" office:value="4050" calcext:value-type="float">
            <text:p>405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046875" calcext:value-type="float">
            <text:p>0,00046875000000000000</text:p>
          </table:table-cell>
          <table:table-cell table:formula="of:=[.D272]-[.D271]" office:value-type="float" office:value="0.00000173611111111115" calcext:value-type="float">
            <text:p>0,0000017361111111111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15" office:value-type="float" office:value="4065" calcext:value-type="float">
            <text:p>4065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0470486111111111" calcext:value-type="float">
            <text:p>0,00047048611111111100</text:p>
          </table:table-cell>
          <table:table-cell table:formula="of:=[.D273]-[.D27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15" office:value-type="float" office:value="4080" calcext:value-type="float">
            <text:p>4080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0472222222222222" calcext:value-type="float">
            <text:p>0,00047222222222222200</text:p>
          </table:table-cell>
          <table:table-cell table:formula="of:=[.D274]-[.D27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15" office:value-type="float" office:value="4095" calcext:value-type="float">
            <text:p>4095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0473958333333333" calcext:value-type="float">
            <text:p>0,00047395833333333300</text:p>
          </table:table-cell>
          <table:table-cell table:formula="of:=[.D275]-[.D27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15" office:value-type="float" office:value="4110" calcext:value-type="float">
            <text:p>4110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0475694444444444" calcext:value-type="float">
            <text:p>0,00047569444444444400</text:p>
          </table:table-cell>
          <table:table-cell table:formula="of:=[.D276]-[.D27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15" office:value-type="float" office:value="4125" calcext:value-type="float">
            <text:p>412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0477430555555556" calcext:value-type="float">
            <text:p>0,00047743055555555600</text:p>
          </table:table-cell>
          <table:table-cell table:formula="of:=[.D277]-[.D27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15" office:value-type="float" office:value="4140" calcext:value-type="float">
            <text:p>4140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0479166666666667" calcext:value-type="float">
            <text:p>0,00047916666666666700</text:p>
          </table:table-cell>
          <table:table-cell table:formula="of:=[.D278]-[.D277]" office:value-type="float" office:value="0.00000173611111111115" calcext:value-type="float">
            <text:p>0,0000017361111111111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15" office:value-type="float" office:value="4155" calcext:value-type="float">
            <text:p>4155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0480902777777778" calcext:value-type="float">
            <text:p>0,00048090277777777800</text:p>
          </table:table-cell>
          <table:table-cell table:formula="of:=[.D279]-[.D27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15" office:value-type="float" office:value="4170" calcext:value-type="float">
            <text:p>4170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0482638888888889" calcext:value-type="float">
            <text:p>0,00048263888888888900</text:p>
          </table:table-cell>
          <table:table-cell table:formula="of:=[.D280]-[.D27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15" office:value-type="float" office:value="4185" calcext:value-type="float">
            <text:p>4185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0484375" calcext:value-type="float">
            <text:p>0,00048437500000000000</text:p>
          </table:table-cell>
          <table:table-cell table:formula="of:=[.D281]-[.D28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15" office:value-type="float" office:value="4200" calcext:value-type="float">
            <text:p>420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0486111111111111" calcext:value-type="float">
            <text:p>0,00048611111111111100</text:p>
          </table:table-cell>
          <table:table-cell table:formula="of:=[.D282]-[.D28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15" office:value-type="float" office:value="4215" calcext:value-type="float">
            <text:p>4215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0487847222222222" calcext:value-type="float">
            <text:p>0,00048784722222222200</text:p>
          </table:table-cell>
          <table:table-cell table:formula="of:=[.D283]-[.D28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15" office:value-type="float" office:value="4230" calcext:value-type="float">
            <text:p>4230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0489583333333333" calcext:value-type="float">
            <text:p>0,00048958333333333300</text:p>
          </table:table-cell>
          <table:table-cell table:formula="of:=[.D284]-[.D28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15" office:value-type="float" office:value="4245" calcext:value-type="float">
            <text:p>4245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0491319444444444" calcext:value-type="float">
            <text:p>0,00049131944444444400</text:p>
          </table:table-cell>
          <table:table-cell table:formula="of:=[.D285]-[.D28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15" office:value-type="float" office:value="4260" calcext:value-type="float">
            <text:p>4260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0493055555555556" calcext:value-type="float">
            <text:p>0,00049305555555555600</text:p>
          </table:table-cell>
          <table:table-cell table:formula="of:=[.D286]-[.D28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15" office:value-type="float" office:value="4275" calcext:value-type="float">
            <text:p>427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0494791666666667" calcext:value-type="float">
            <text:p>0,00049479166666666700</text:p>
          </table:table-cell>
          <table:table-cell table:formula="of:=[.D287]-[.D28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15" office:value-type="float" office:value="4290" calcext:value-type="float">
            <text:p>4290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0496527777777778" calcext:value-type="float">
            <text:p>0,00049652777777777800</text:p>
          </table:table-cell>
          <table:table-cell table:formula="of:=[.D288]-[.D28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15" office:value-type="float" office:value="4305" calcext:value-type="float">
            <text:p>4305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0498263888888889" calcext:value-type="float">
            <text:p>0,00049826388888888900</text:p>
          </table:table-cell>
          <table:table-cell table:formula="of:=[.D289]-[.D28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15" office:value-type="float" office:value="4320" calcext:value-type="float">
            <text:p>4320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05" calcext:value-type="float">
            <text:p>0,00050000000000000000</text:p>
          </table:table-cell>
          <table:table-cell table:formula="of:=[.D290]-[.D28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15" office:value-type="float" office:value="4335" calcext:value-type="float">
            <text:p>4335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0501736111111111" calcext:value-type="float">
            <text:p>0,00050173611111111100</text:p>
          </table:table-cell>
          <table:table-cell table:formula="of:=[.D291]-[.D29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15" office:value-type="float" office:value="4350" calcext:value-type="float">
            <text:p>435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0503472222222222" calcext:value-type="float">
            <text:p>0,00050347222222222200</text:p>
          </table:table-cell>
          <table:table-cell table:formula="of:=[.D292]-[.D29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15" office:value-type="float" office:value="4365" calcext:value-type="float">
            <text:p>4365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0505208333333333" calcext:value-type="float">
            <text:p>0,00050520833333333300</text:p>
          </table:table-cell>
          <table:table-cell table:formula="of:=[.D293]-[.D29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15" office:value-type="float" office:value="4380" calcext:value-type="float">
            <text:p>4380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0506944444444444" calcext:value-type="float">
            <text:p>0,00050694444444444400</text:p>
          </table:table-cell>
          <table:table-cell table:formula="of:=[.D294]-[.D29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15" office:value-type="float" office:value="4395" calcext:value-type="float">
            <text:p>4395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0508680555555556" calcext:value-type="float">
            <text:p>0,00050868055555555600</text:p>
          </table:table-cell>
          <table:table-cell table:formula="of:=[.D295]-[.D29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15" office:value-type="float" office:value="4410" calcext:value-type="float">
            <text:p>4410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0510416666666667" calcext:value-type="float">
            <text:p>0,00051041666666666700</text:p>
          </table:table-cell>
          <table:table-cell table:formula="of:=[.D296]-[.D29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15" office:value-type="float" office:value="4425" calcext:value-type="float">
            <text:p>442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0512152777777778" calcext:value-type="float">
            <text:p>0,00051215277777777800</text:p>
          </table:table-cell>
          <table:table-cell table:formula="of:=[.D297]-[.D29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15" office:value-type="float" office:value="4440" calcext:value-type="float">
            <text:p>4440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0513888888888889" calcext:value-type="float">
            <text:p>0,00051388888888888900</text:p>
          </table:table-cell>
          <table:table-cell table:formula="of:=[.D298]-[.D29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15" office:value-type="float" office:value="4455" calcext:value-type="float">
            <text:p>4455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0515625" calcext:value-type="float">
            <text:p>0,00051562500000000000</text:p>
          </table:table-cell>
          <table:table-cell table:formula="of:=[.D299]-[.D29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15" office:value-type="float" office:value="4470" calcext:value-type="float">
            <text:p>4470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0517361111111111" calcext:value-type="float">
            <text:p>0,00051736111111111100</text:p>
          </table:table-cell>
          <table:table-cell table:formula="of:=[.D300]-[.D29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15" office:value-type="float" office:value="4485" calcext:value-type="float">
            <text:p>4485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0519097222222222" calcext:value-type="float">
            <text:p>0,00051909722222222200</text:p>
          </table:table-cell>
          <table:table-cell table:formula="of:=[.D301]-[.D30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15" office:value-type="float" office:value="4500" calcext:value-type="float">
            <text:p>45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0520833333333333" calcext:value-type="float">
            <text:p>0,00052083333333333300</text:p>
          </table:table-cell>
          <table:table-cell table:formula="of:=[.D302]-[.D30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15" office:value-type="float" office:value="4515" calcext:value-type="float">
            <text:p>4515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0522569444444444" calcext:value-type="float">
            <text:p>0,00052256944444444400</text:p>
          </table:table-cell>
          <table:table-cell table:formula="of:=[.D303]-[.D30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15" office:value-type="float" office:value="4530" calcext:value-type="float">
            <text:p>4530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0524305555555556" calcext:value-type="float">
            <text:p>0,00052430555555555600</text:p>
          </table:table-cell>
          <table:table-cell table:formula="of:=[.D304]-[.D30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15" office:value-type="float" office:value="4545" calcext:value-type="float">
            <text:p>4545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0526041666666667" calcext:value-type="float">
            <text:p>0,00052604166666666700</text:p>
          </table:table-cell>
          <table:table-cell table:formula="of:=[.D305]-[.D30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15" office:value-type="float" office:value="4560" calcext:value-type="float">
            <text:p>4560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0527777777777778" calcext:value-type="float">
            <text:p>0,00052777777777777800</text:p>
          </table:table-cell>
          <table:table-cell table:formula="of:=[.D306]-[.D30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15" office:value-type="float" office:value="4575" calcext:value-type="float">
            <text:p>457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0529513888888889" calcext:value-type="float">
            <text:p>0,00052951388888888900</text:p>
          </table:table-cell>
          <table:table-cell table:formula="of:=[.D307]-[.D30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15" office:value-type="float" office:value="4590" calcext:value-type="float">
            <text:p>4590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053125" calcext:value-type="float">
            <text:p>0,00053125000000000000</text:p>
          </table:table-cell>
          <table:table-cell table:formula="of:=[.D308]-[.D30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15" office:value-type="float" office:value="4605" calcext:value-type="float">
            <text:p>4605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0532986111111111" calcext:value-type="float">
            <text:p>0,00053298611111111100</text:p>
          </table:table-cell>
          <table:table-cell table:formula="of:=[.D309]-[.D30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15" office:value-type="float" office:value="4620" calcext:value-type="float">
            <text:p>4620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0534722222222222" calcext:value-type="float">
            <text:p>0,00053472222222222200</text:p>
          </table:table-cell>
          <table:table-cell table:formula="of:=[.D310]-[.D30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15" office:value-type="float" office:value="4635" calcext:value-type="float">
            <text:p>4635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0536458333333333" calcext:value-type="float">
            <text:p>0,00053645833333333300</text:p>
          </table:table-cell>
          <table:table-cell table:formula="of:=[.D311]-[.D31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15" office:value-type="float" office:value="4650" calcext:value-type="float">
            <text:p>465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0538194444444444" calcext:value-type="float">
            <text:p>0,00053819444444444400</text:p>
          </table:table-cell>
          <table:table-cell table:formula="of:=[.D312]-[.D31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15" office:value-type="float" office:value="4665" calcext:value-type="float">
            <text:p>4665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0539930555555556" calcext:value-type="float">
            <text:p>0,00053993055555555600</text:p>
          </table:table-cell>
          <table:table-cell table:formula="of:=[.D313]-[.D31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15" office:value-type="float" office:value="4680" calcext:value-type="float">
            <text:p>4680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0541666666666667" calcext:value-type="float">
            <text:p>0,00054166666666666700</text:p>
          </table:table-cell>
          <table:table-cell table:formula="of:=[.D314]-[.D31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15" office:value-type="float" office:value="4695" calcext:value-type="float">
            <text:p>4695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0543402777777778" calcext:value-type="float">
            <text:p>0,00054340277777777800</text:p>
          </table:table-cell>
          <table:table-cell table:formula="of:=[.D315]-[.D31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15" office:value-type="float" office:value="4710" calcext:value-type="float">
            <text:p>4710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0545138888888889" calcext:value-type="float">
            <text:p>0,00054513888888888900</text:p>
          </table:table-cell>
          <table:table-cell table:formula="of:=[.D316]-[.D31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15" office:value-type="float" office:value="4725" calcext:value-type="float">
            <text:p>472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0546875" calcext:value-type="float">
            <text:p>0,00054687500000000000</text:p>
          </table:table-cell>
          <table:table-cell table:formula="of:=[.D317]-[.D31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15" office:value-type="float" office:value="4740" calcext:value-type="float">
            <text:p>4740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0548611111111111" calcext:value-type="float">
            <text:p>0,00054861111111111100</text:p>
          </table:table-cell>
          <table:table-cell table:formula="of:=[.D318]-[.D31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15" office:value-type="float" office:value="4755" calcext:value-type="float">
            <text:p>4755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0550347222222222" calcext:value-type="float">
            <text:p>0,00055034722222222200</text:p>
          </table:table-cell>
          <table:table-cell table:formula="of:=[.D319]-[.D31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15" office:value-type="float" office:value="4770" calcext:value-type="float">
            <text:p>4770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0552083333333333" calcext:value-type="float">
            <text:p>0,00055208333333333300</text:p>
          </table:table-cell>
          <table:table-cell table:formula="of:=[.D320]-[.D31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15" office:value-type="float" office:value="4785" calcext:value-type="float">
            <text:p>4785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0553819444444445" calcext:value-type="float">
            <text:p>0,00055381944444444500</text:p>
          </table:table-cell>
          <table:table-cell table:formula="of:=[.D321]-[.D32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15" office:value-type="float" office:value="4800" calcext:value-type="float">
            <text:p>480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0555555555555556" calcext:value-type="float">
            <text:p>0,00055555555555555600</text:p>
          </table:table-cell>
          <table:table-cell table:formula="of:=[.D322]-[.D32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15" office:value-type="float" office:value="4815" calcext:value-type="float">
            <text:p>4815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0557291666666667" calcext:value-type="float">
            <text:p>0,00055729166666666700</text:p>
          </table:table-cell>
          <table:table-cell table:formula="of:=[.D323]-[.D32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15" office:value-type="float" office:value="4830" calcext:value-type="float">
            <text:p>4830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0559027777777778" calcext:value-type="float">
            <text:p>0,00055902777777777800</text:p>
          </table:table-cell>
          <table:table-cell table:formula="of:=[.D324]-[.D32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15" office:value-type="float" office:value="4845" calcext:value-type="float">
            <text:p>4845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0560763888888889" calcext:value-type="float">
            <text:p>0,00056076388888888900</text:p>
          </table:table-cell>
          <table:table-cell table:formula="of:=[.D325]-[.D32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15" office:value-type="float" office:value="4860" calcext:value-type="float">
            <text:p>4860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05625" calcext:value-type="float">
            <text:p>0,00056250000000000000</text:p>
          </table:table-cell>
          <table:table-cell table:formula="of:=[.D326]-[.D32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15" office:value-type="float" office:value="4875" calcext:value-type="float">
            <text:p>487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0564236111111111" calcext:value-type="float">
            <text:p>0,00056423611111111100</text:p>
          </table:table-cell>
          <table:table-cell table:formula="of:=[.D327]-[.D32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15" office:value-type="float" office:value="4890" calcext:value-type="float">
            <text:p>4890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0565972222222222" calcext:value-type="float">
            <text:p>0,00056597222222222200</text:p>
          </table:table-cell>
          <table:table-cell table:formula="of:=[.D328]-[.D32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15" office:value-type="float" office:value="4905" calcext:value-type="float">
            <text:p>4905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0567708333333333" calcext:value-type="float">
            <text:p>0,00056770833333333300</text:p>
          </table:table-cell>
          <table:table-cell table:formula="of:=[.D329]-[.D32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15" office:value-type="float" office:value="4920" calcext:value-type="float">
            <text:p>4920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0569444444444445" calcext:value-type="float">
            <text:p>0,00056944444444444500</text:p>
          </table:table-cell>
          <table:table-cell table:formula="of:=[.D330]-[.D32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15" office:value-type="float" office:value="4935" calcext:value-type="float">
            <text:p>4935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0571180555555556" calcext:value-type="float">
            <text:p>0,00057118055555555600</text:p>
          </table:table-cell>
          <table:table-cell table:formula="of:=[.D331]-[.D33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15" office:value-type="float" office:value="4950" calcext:value-type="float">
            <text:p>495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0572916666666667" calcext:value-type="float">
            <text:p>0,00057291666666666700</text:p>
          </table:table-cell>
          <table:table-cell table:formula="of:=[.D332]-[.D33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15" office:value-type="float" office:value="4965" calcext:value-type="float">
            <text:p>4965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0574652777777778" calcext:value-type="float">
            <text:p>0,00057465277777777800</text:p>
          </table:table-cell>
          <table:table-cell table:formula="of:=[.D333]-[.D33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15" office:value-type="float" office:value="4980" calcext:value-type="float">
            <text:p>4980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0576388888888889" calcext:value-type="float">
            <text:p>0,00057638888888888900</text:p>
          </table:table-cell>
          <table:table-cell table:formula="of:=[.D334]-[.D33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15" office:value-type="float" office:value="4995" calcext:value-type="float">
            <text:p>4995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0578125" calcext:value-type="float">
            <text:p>0,00057812500000000000</text:p>
          </table:table-cell>
          <table:table-cell table:formula="of:=[.D335]-[.D33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15" office:value-type="float" office:value="5010" calcext:value-type="float">
            <text:p>5010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0579861111111111" calcext:value-type="float">
            <text:p>0,00057986111111111100</text:p>
          </table:table-cell>
          <table:table-cell table:formula="of:=[.D336]-[.D33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15" office:value-type="float" office:value="5025" calcext:value-type="float">
            <text:p>5025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0581597222222222" calcext:value-type="float">
            <text:p>0,00058159722222222200</text:p>
          </table:table-cell>
          <table:table-cell table:formula="of:=[.D337]-[.D33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15" office:value-type="float" office:value="5040" calcext:value-type="float">
            <text:p>5040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0583333333333333" calcext:value-type="float">
            <text:p>0,00058333333333333300</text:p>
          </table:table-cell>
          <table:table-cell table:formula="of:=[.D338]-[.D33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15" office:value-type="float" office:value="5055" calcext:value-type="float">
            <text:p>5055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0585069444444445" calcext:value-type="float">
            <text:p>0,00058506944444444500</text:p>
          </table:table-cell>
          <table:table-cell table:formula="of:=[.D339]-[.D33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15" office:value-type="float" office:value="5070" calcext:value-type="float">
            <text:p>5070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0586805555555556" calcext:value-type="float">
            <text:p>0,00058680555555555600</text:p>
          </table:table-cell>
          <table:table-cell table:formula="of:=[.D340]-[.D33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15" office:value-type="float" office:value="5085" calcext:value-type="float">
            <text:p>5085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0588541666666667" calcext:value-type="float">
            <text:p>0,00058854166666666700</text:p>
          </table:table-cell>
          <table:table-cell table:formula="of:=[.D341]-[.D34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15" office:value-type="float" office:value="5100" calcext:value-type="float">
            <text:p>510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0590277777777778" calcext:value-type="float">
            <text:p>0,00059027777777777800</text:p>
          </table:table-cell>
          <table:table-cell table:formula="of:=[.D342]-[.D34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15" office:value-type="float" office:value="5115" calcext:value-type="float">
            <text:p>5115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0592013888888889" calcext:value-type="float">
            <text:p>0,00059201388888888900</text:p>
          </table:table-cell>
          <table:table-cell table:formula="of:=[.D343]-[.D34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15" office:value-type="float" office:value="5130" calcext:value-type="float">
            <text:p>5130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059375" calcext:value-type="float">
            <text:p>0,00059375000000000000</text:p>
          </table:table-cell>
          <table:table-cell table:formula="of:=[.D344]-[.D34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15" office:value-type="float" office:value="5145" calcext:value-type="float">
            <text:p>5145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0595486111111111" calcext:value-type="float">
            <text:p>0,00059548611111111100</text:p>
          </table:table-cell>
          <table:table-cell table:formula="of:=[.D345]-[.D34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15" office:value-type="float" office:value="5160" calcext:value-type="float">
            <text:p>5160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0597222222222222" calcext:value-type="float">
            <text:p>0,00059722222222222200</text:p>
          </table:table-cell>
          <table:table-cell table:formula="of:=[.D346]-[.D34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15" office:value-type="float" office:value="5175" calcext:value-type="float">
            <text:p>5175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0598958333333333" calcext:value-type="float">
            <text:p>0,00059895833333333300</text:p>
          </table:table-cell>
          <table:table-cell table:formula="of:=[.D347]-[.D34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15" office:value-type="float" office:value="5190" calcext:value-type="float">
            <text:p>5190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0600694444444445" calcext:value-type="float">
            <text:p>0,00060069444444444500</text:p>
          </table:table-cell>
          <table:table-cell table:formula="of:=[.D348]-[.D34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15" office:value-type="float" office:value="5205" calcext:value-type="float">
            <text:p>5205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0602430555555556" calcext:value-type="float">
            <text:p>0,00060243055555555600</text:p>
          </table:table-cell>
          <table:table-cell table:formula="of:=[.D349]-[.D34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15" office:value-type="float" office:value="5220" calcext:value-type="float">
            <text:p>5220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0604166666666667" calcext:value-type="float">
            <text:p>0,00060416666666666700</text:p>
          </table:table-cell>
          <table:table-cell table:formula="of:=[.D350]-[.D34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15" office:value-type="float" office:value="5235" calcext:value-type="float">
            <text:p>5235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0605902777777778" calcext:value-type="float">
            <text:p>0,00060590277777777800</text:p>
          </table:table-cell>
          <table:table-cell table:formula="of:=[.D351]-[.D35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15" office:value-type="float" office:value="5250" calcext:value-type="float">
            <text:p>525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0607638888888889" calcext:value-type="float">
            <text:p>0,00060763888888888900</text:p>
          </table:table-cell>
          <table:table-cell table:formula="of:=[.D352]-[.D35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15" office:value-type="float" office:value="5265" calcext:value-type="float">
            <text:p>5265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0609375" calcext:value-type="float">
            <text:p>0,00060937500000000000</text:p>
          </table:table-cell>
          <table:table-cell table:formula="of:=[.D353]-[.D35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15" office:value-type="float" office:value="5280" calcext:value-type="float">
            <text:p>5280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0611111111111111" calcext:value-type="float">
            <text:p>0,00061111111111111100</text:p>
          </table:table-cell>
          <table:table-cell table:formula="of:=[.D354]-[.D35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15" office:value-type="float" office:value="5295" calcext:value-type="float">
            <text:p>5295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0612847222222222" calcext:value-type="float">
            <text:p>0,00061284722222222200</text:p>
          </table:table-cell>
          <table:table-cell table:formula="of:=[.D355]-[.D35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15" office:value-type="float" office:value="5310" calcext:value-type="float">
            <text:p>5310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0614583333333333" calcext:value-type="float">
            <text:p>0,00061458333333333300</text:p>
          </table:table-cell>
          <table:table-cell table:formula="of:=[.D356]-[.D35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15" office:value-type="float" office:value="5325" calcext:value-type="float">
            <text:p>5325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0616319444444444" calcext:value-type="float">
            <text:p>0,00061631944444444400</text:p>
          </table:table-cell>
          <table:table-cell table:formula="of:=[.D357]-[.D35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15" office:value-type="float" office:value="5340" calcext:value-type="float">
            <text:p>5340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0618055555555556" calcext:value-type="float">
            <text:p>0,00061805555555555600</text:p>
          </table:table-cell>
          <table:table-cell table:formula="of:=[.D358]-[.D35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15" office:value-type="float" office:value="5355" calcext:value-type="float">
            <text:p>5355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0619791666666667" calcext:value-type="float">
            <text:p>0,00061979166666666700</text:p>
          </table:table-cell>
          <table:table-cell table:formula="of:=[.D359]-[.D35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15" office:value-type="float" office:value="5370" calcext:value-type="float">
            <text:p>5370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0621527777777778" calcext:value-type="float">
            <text:p>0,00062152777777777800</text:p>
          </table:table-cell>
          <table:table-cell table:formula="of:=[.D360]-[.D35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15" office:value-type="float" office:value="5385" calcext:value-type="float">
            <text:p>5385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0623263888888889" calcext:value-type="float">
            <text:p>0,00062326388888888900</text:p>
          </table:table-cell>
          <table:table-cell table:formula="of:=[.D361]-[.D36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15" office:value-type="float" office:value="5400" calcext:value-type="float">
            <text:p>540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0625" calcext:value-type="float">
            <text:p>0,00062500000000000000</text:p>
          </table:table-cell>
          <table:table-cell table:formula="of:=[.D362]-[.D36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15" office:value-type="float" office:value="5415" calcext:value-type="float">
            <text:p>5415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0626736111111111" calcext:value-type="float">
            <text:p>0,00062673611111111100</text:p>
          </table:table-cell>
          <table:table-cell table:formula="of:=[.D363]-[.D36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15" office:value-type="float" office:value="5430" calcext:value-type="float">
            <text:p>5430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0628472222222222" calcext:value-type="float">
            <text:p>0,00062847222222222200</text:p>
          </table:table-cell>
          <table:table-cell table:formula="of:=[.D364]-[.D36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15" office:value-type="float" office:value="5445" calcext:value-type="float">
            <text:p>5445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0630208333333333" calcext:value-type="float">
            <text:p>0,00063020833333333300</text:p>
          </table:table-cell>
          <table:table-cell table:formula="of:=[.D365]-[.D36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15" office:value-type="float" office:value="5460" calcext:value-type="float">
            <text:p>5460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0631944444444444" calcext:value-type="float">
            <text:p>0,00063194444444444400</text:p>
          </table:table-cell>
          <table:table-cell table:formula="of:=[.D366]-[.D36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15" office:value-type="float" office:value="5475" calcext:value-type="float">
            <text:p>5475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0633680555555556" calcext:value-type="float">
            <text:p>0,00063368055555555600</text:p>
          </table:table-cell>
          <table:table-cell table:formula="of:=[.D367]-[.D36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15" office:value-type="float" office:value="5490" calcext:value-type="float">
            <text:p>5490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0635416666666667" calcext:value-type="float">
            <text:p>0,00063541666666666700</text:p>
          </table:table-cell>
          <table:table-cell table:formula="of:=[.D368]-[.D36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15" office:value-type="float" office:value="5505" calcext:value-type="float">
            <text:p>5505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0637152777777778" calcext:value-type="float">
            <text:p>0,00063715277777777800</text:p>
          </table:table-cell>
          <table:table-cell table:formula="of:=[.D369]-[.D36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15" office:value-type="float" office:value="5520" calcext:value-type="float">
            <text:p>5520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0638888888888889" calcext:value-type="float">
            <text:p>0,00063888888888888900</text:p>
          </table:table-cell>
          <table:table-cell table:formula="of:=[.D370]-[.D36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15" office:value-type="float" office:value="5535" calcext:value-type="float">
            <text:p>5535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0640625" calcext:value-type="float">
            <text:p>0,00064062500000000000</text:p>
          </table:table-cell>
          <table:table-cell table:formula="of:=[.D371]-[.D37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15" office:value-type="float" office:value="5550" calcext:value-type="float">
            <text:p>555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0642361111111111" calcext:value-type="float">
            <text:p>0,00064236111111111100</text:p>
          </table:table-cell>
          <table:table-cell table:formula="of:=[.D372]-[.D37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15" office:value-type="float" office:value="5565" calcext:value-type="float">
            <text:p>5565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0644097222222222" calcext:value-type="float">
            <text:p>0,00064409722222222200</text:p>
          </table:table-cell>
          <table:table-cell table:formula="of:=[.D373]-[.D37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15" office:value-type="float" office:value="5580" calcext:value-type="float">
            <text:p>5580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0645833333333333" calcext:value-type="float">
            <text:p>0,00064583333333333300</text:p>
          </table:table-cell>
          <table:table-cell table:formula="of:=[.D374]-[.D37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15" office:value-type="float" office:value="5595" calcext:value-type="float">
            <text:p>5595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0647569444444444" calcext:value-type="float">
            <text:p>0,00064756944444444400</text:p>
          </table:table-cell>
          <table:table-cell table:formula="of:=[.D375]-[.D37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15" office:value-type="float" office:value="5610" calcext:value-type="float">
            <text:p>5610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0649305555555556" calcext:value-type="float">
            <text:p>0,00064930555555555600</text:p>
          </table:table-cell>
          <table:table-cell table:formula="of:=[.D376]-[.D37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15" office:value-type="float" office:value="5625" calcext:value-type="float">
            <text:p>5625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0651041666666667" calcext:value-type="float">
            <text:p>0,00065104166666666700</text:p>
          </table:table-cell>
          <table:table-cell table:formula="of:=[.D377]-[.D37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15" office:value-type="float" office:value="5640" calcext:value-type="float">
            <text:p>5640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0652777777777778" calcext:value-type="float">
            <text:p>0,00065277777777777800</text:p>
          </table:table-cell>
          <table:table-cell table:formula="of:=[.D378]-[.D37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15" office:value-type="float" office:value="5655" calcext:value-type="float">
            <text:p>5655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0654513888888889" calcext:value-type="float">
            <text:p>0,00065451388888888900</text:p>
          </table:table-cell>
          <table:table-cell table:formula="of:=[.D379]-[.D37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15" office:value-type="float" office:value="5670" calcext:value-type="float">
            <text:p>5670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065625" calcext:value-type="float">
            <text:p>0,00065625000000000000</text:p>
          </table:table-cell>
          <table:table-cell table:formula="of:=[.D380]-[.D37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15" office:value-type="float" office:value="5685" calcext:value-type="float">
            <text:p>5685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0657986111111111" calcext:value-type="float">
            <text:p>0,00065798611111111100</text:p>
          </table:table-cell>
          <table:table-cell table:formula="of:=[.D381]-[.D38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15" office:value-type="float" office:value="5700" calcext:value-type="float">
            <text:p>570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0659722222222222" calcext:value-type="float">
            <text:p>0,00065972222222222200</text:p>
          </table:table-cell>
          <table:table-cell table:formula="of:=[.D382]-[.D38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15" office:value-type="float" office:value="5715" calcext:value-type="float">
            <text:p>5715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0661458333333333" calcext:value-type="float">
            <text:p>0,00066145833333333300</text:p>
          </table:table-cell>
          <table:table-cell table:formula="of:=[.D383]-[.D38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15" office:value-type="float" office:value="5730" calcext:value-type="float">
            <text:p>5730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0663194444444444" calcext:value-type="float">
            <text:p>0,00066319444444444400</text:p>
          </table:table-cell>
          <table:table-cell table:formula="of:=[.D384]-[.D38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15" office:value-type="float" office:value="5745" calcext:value-type="float">
            <text:p>5745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0664930555555556" calcext:value-type="float">
            <text:p>0,00066493055555555600</text:p>
          </table:table-cell>
          <table:table-cell table:formula="of:=[.D385]-[.D38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15" office:value-type="float" office:value="5760" calcext:value-type="float">
            <text:p>5760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0666666666666667" calcext:value-type="float">
            <text:p>0,00066666666666666700</text:p>
          </table:table-cell>
          <table:table-cell table:formula="of:=[.D386]-[.D38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15" office:value-type="float" office:value="5775" calcext:value-type="float">
            <text:p>5775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0668402777777778" calcext:value-type="float">
            <text:p>0,00066840277777777800</text:p>
          </table:table-cell>
          <table:table-cell table:formula="of:=[.D387]-[.D38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15" office:value-type="float" office:value="5790" calcext:value-type="float">
            <text:p>5790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0670138888888889" calcext:value-type="float">
            <text:p>0,00067013888888888900</text:p>
          </table:table-cell>
          <table:table-cell table:formula="of:=[.D388]-[.D38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15" office:value-type="float" office:value="5805" calcext:value-type="float">
            <text:p>5805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0671875" calcext:value-type="float">
            <text:p>0,00067187500000000000</text:p>
          </table:table-cell>
          <table:table-cell table:formula="of:=[.D389]-[.D38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15" office:value-type="float" office:value="5820" calcext:value-type="float">
            <text:p>5820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0673611111111111" calcext:value-type="float">
            <text:p>0,00067361111111111100</text:p>
          </table:table-cell>
          <table:table-cell table:formula="of:=[.D390]-[.D38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15" office:value-type="float" office:value="5835" calcext:value-type="float">
            <text:p>5835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0675347222222222" calcext:value-type="float">
            <text:p>0,00067534722222222200</text:p>
          </table:table-cell>
          <table:table-cell table:formula="of:=[.D391]-[.D39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15" office:value-type="float" office:value="5850" calcext:value-type="float">
            <text:p>585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0677083333333333" calcext:value-type="float">
            <text:p>0,00067708333333333300</text:p>
          </table:table-cell>
          <table:table-cell table:formula="of:=[.D392]-[.D39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15" office:value-type="float" office:value="5865" calcext:value-type="float">
            <text:p>5865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0678819444444445" calcext:value-type="float">
            <text:p>0,00067881944444444500</text:p>
          </table:table-cell>
          <table:table-cell table:formula="of:=[.D393]-[.D39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15" office:value-type="float" office:value="5880" calcext:value-type="float">
            <text:p>5880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0680555555555556" calcext:value-type="float">
            <text:p>0,00068055555555555600</text:p>
          </table:table-cell>
          <table:table-cell table:formula="of:=[.D394]-[.D39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15" office:value-type="float" office:value="5895" calcext:value-type="float">
            <text:p>5895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0682291666666667" calcext:value-type="float">
            <text:p>0,00068229166666666700</text:p>
          </table:table-cell>
          <table:table-cell table:formula="of:=[.D395]-[.D39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15" office:value-type="float" office:value="5910" calcext:value-type="float">
            <text:p>5910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0684027777777778" calcext:value-type="float">
            <text:p>0,00068402777777777800</text:p>
          </table:table-cell>
          <table:table-cell table:formula="of:=[.D396]-[.D39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15" office:value-type="float" office:value="5925" calcext:value-type="float">
            <text:p>5925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0685763888888889" calcext:value-type="float">
            <text:p>0,00068576388888888900</text:p>
          </table:table-cell>
          <table:table-cell table:formula="of:=[.D397]-[.D39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15" office:value-type="float" office:value="5940" calcext:value-type="float">
            <text:p>5940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06875" calcext:value-type="float">
            <text:p>0,00068750000000000000</text:p>
          </table:table-cell>
          <table:table-cell table:formula="of:=[.D398]-[.D39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15" office:value-type="float" office:value="5955" calcext:value-type="float">
            <text:p>5955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0689236111111111" calcext:value-type="float">
            <text:p>0,00068923611111111100</text:p>
          </table:table-cell>
          <table:table-cell table:formula="of:=[.D399]-[.D39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15" office:value-type="float" office:value="5970" calcext:value-type="float">
            <text:p>5970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0690972222222222" calcext:value-type="float">
            <text:p>0,00069097222222222200</text:p>
          </table:table-cell>
          <table:table-cell table:formula="of:=[.D400]-[.D39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15" office:value-type="float" office:value="5985" calcext:value-type="float">
            <text:p>5985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0692708333333333" calcext:value-type="float">
            <text:p>0,00069270833333333300</text:p>
          </table:table-cell>
          <table:table-cell table:formula="of:=[.D401]-[.D40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15" office:value-type="float" office:value="6000" calcext:value-type="float">
            <text:p>60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0694444444444445" calcext:value-type="float">
            <text:p>0,00069444444444444500</text:p>
          </table:table-cell>
          <table:table-cell table:formula="of:=[.D402]-[.D40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15" office:value-type="float" office:value="6015" calcext:value-type="float">
            <text:p>6015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0696180555555556" calcext:value-type="float">
            <text:p>0,00069618055555555600</text:p>
          </table:table-cell>
          <table:table-cell table:formula="of:=[.D403]-[.D40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15" office:value-type="float" office:value="6030" calcext:value-type="float">
            <text:p>6030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0697916666666667" calcext:value-type="float">
            <text:p>0,00069791666666666700</text:p>
          </table:table-cell>
          <table:table-cell table:formula="of:=[.D404]-[.D40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15" office:value-type="float" office:value="6045" calcext:value-type="float">
            <text:p>6045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0699652777777778" calcext:value-type="float">
            <text:p>0,00069965277777777800</text:p>
          </table:table-cell>
          <table:table-cell table:formula="of:=[.D405]-[.D40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15" office:value-type="float" office:value="6060" calcext:value-type="float">
            <text:p>6060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0701388888888889" calcext:value-type="float">
            <text:p>0,00070138888888888900</text:p>
          </table:table-cell>
          <table:table-cell table:formula="of:=[.D406]-[.D40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15" office:value-type="float" office:value="6075" calcext:value-type="float">
            <text:p>6075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0703125" calcext:value-type="float">
            <text:p>0,00070312500000000000</text:p>
          </table:table-cell>
          <table:table-cell table:formula="of:=[.D407]-[.D40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15" office:value-type="float" office:value="6090" calcext:value-type="float">
            <text:p>6090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0704861111111111" calcext:value-type="float">
            <text:p>0,00070486111111111100</text:p>
          </table:table-cell>
          <table:table-cell table:formula="of:=[.D408]-[.D40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15" office:value-type="float" office:value="6105" calcext:value-type="float">
            <text:p>6105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0706597222222222" calcext:value-type="float">
            <text:p>0,00070659722222222200</text:p>
          </table:table-cell>
          <table:table-cell table:formula="of:=[.D409]-[.D40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15" office:value-type="float" office:value="6120" calcext:value-type="float">
            <text:p>6120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0708333333333333" calcext:value-type="float">
            <text:p>0,00070833333333333300</text:p>
          </table:table-cell>
          <table:table-cell table:formula="of:=[.D410]-[.D40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15" office:value-type="float" office:value="6135" calcext:value-type="float">
            <text:p>6135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0710069444444445" calcext:value-type="float">
            <text:p>0,00071006944444444500</text:p>
          </table:table-cell>
          <table:table-cell table:formula="of:=[.D411]-[.D41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15" office:value-type="float" office:value="6150" calcext:value-type="float">
            <text:p>615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0711805555555556" calcext:value-type="float">
            <text:p>0,00071180555555555600</text:p>
          </table:table-cell>
          <table:table-cell table:formula="of:=[.D412]-[.D41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15" office:value-type="float" office:value="6165" calcext:value-type="float">
            <text:p>6165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0713541666666667" calcext:value-type="float">
            <text:p>0,00071354166666666700</text:p>
          </table:table-cell>
          <table:table-cell table:formula="of:=[.D413]-[.D41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15" office:value-type="float" office:value="6180" calcext:value-type="float">
            <text:p>6180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0715277777777778" calcext:value-type="float">
            <text:p>0,00071527777777777800</text:p>
          </table:table-cell>
          <table:table-cell table:formula="of:=[.D414]-[.D41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15" office:value-type="float" office:value="6195" calcext:value-type="float">
            <text:p>6195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0717013888888889" calcext:value-type="float">
            <text:p>0,00071701388888888900</text:p>
          </table:table-cell>
          <table:table-cell table:formula="of:=[.D415]-[.D41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15" office:value-type="float" office:value="6210" calcext:value-type="float">
            <text:p>6210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071875" calcext:value-type="float">
            <text:p>0,00071875000000000000</text:p>
          </table:table-cell>
          <table:table-cell table:formula="of:=[.D416]-[.D41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15" office:value-type="float" office:value="6225" calcext:value-type="float">
            <text:p>6225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0720486111111111" calcext:value-type="float">
            <text:p>0,00072048611111111100</text:p>
          </table:table-cell>
          <table:table-cell table:formula="of:=[.D417]-[.D41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15" office:value-type="float" office:value="6240" calcext:value-type="float">
            <text:p>6240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0722222222222222" calcext:value-type="float">
            <text:p>0,00072222222222222200</text:p>
          </table:table-cell>
          <table:table-cell table:formula="of:=[.D418]-[.D41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15" office:value-type="float" office:value="6255" calcext:value-type="float">
            <text:p>6255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0723958333333333" calcext:value-type="float">
            <text:p>0,00072395833333333300</text:p>
          </table:table-cell>
          <table:table-cell table:formula="of:=[.D419]-[.D41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15" office:value-type="float" office:value="6270" calcext:value-type="float">
            <text:p>6270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0725694444444444" calcext:value-type="float">
            <text:p>0,00072569444444444400</text:p>
          </table:table-cell>
          <table:table-cell table:formula="of:=[.D420]-[.D41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15" office:value-type="float" office:value="6285" calcext:value-type="float">
            <text:p>6285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0727430555555556" calcext:value-type="float">
            <text:p>0,00072743055555555600</text:p>
          </table:table-cell>
          <table:table-cell table:formula="of:=[.D421]-[.D42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15" office:value-type="float" office:value="6300" calcext:value-type="float">
            <text:p>630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0729166666666667" calcext:value-type="float">
            <text:p>0,00072916666666666700</text:p>
          </table:table-cell>
          <table:table-cell table:formula="of:=[.D422]-[.D42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15" office:value-type="float" office:value="6315" calcext:value-type="float">
            <text:p>6315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0730902777777778" calcext:value-type="float">
            <text:p>0,00073090277777777800</text:p>
          </table:table-cell>
          <table:table-cell table:formula="of:=[.D423]-[.D42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15" office:value-type="float" office:value="6330" calcext:value-type="float">
            <text:p>6330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0732638888888889" calcext:value-type="float">
            <text:p>0,00073263888888888900</text:p>
          </table:table-cell>
          <table:table-cell table:formula="of:=[.D424]-[.D42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15" office:value-type="float" office:value="6345" calcext:value-type="float">
            <text:p>6345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0734375" calcext:value-type="float">
            <text:p>0,00073437500000000000</text:p>
          </table:table-cell>
          <table:table-cell table:formula="of:=[.D425]-[.D42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15" office:value-type="float" office:value="6360" calcext:value-type="float">
            <text:p>6360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0736111111111111" calcext:value-type="float">
            <text:p>0,00073611111111111100</text:p>
          </table:table-cell>
          <table:table-cell table:formula="of:=[.D426]-[.D42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15" office:value-type="float" office:value="6375" calcext:value-type="float">
            <text:p>6375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0737847222222222" calcext:value-type="float">
            <text:p>0,00073784722222222200</text:p>
          </table:table-cell>
          <table:table-cell table:formula="of:=[.D427]-[.D42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15" office:value-type="float" office:value="6390" calcext:value-type="float">
            <text:p>6390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0739583333333333" calcext:value-type="float">
            <text:p>0,00073958333333333300</text:p>
          </table:table-cell>
          <table:table-cell table:formula="of:=[.D428]-[.D42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15" office:value-type="float" office:value="6405" calcext:value-type="float">
            <text:p>6405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0741319444444444" calcext:value-type="float">
            <text:p>0,00074131944444444500</text:p>
          </table:table-cell>
          <table:table-cell table:formula="of:=[.D429]-[.D42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15" office:value-type="float" office:value="6420" calcext:value-type="float">
            <text:p>6420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0743055555555556" calcext:value-type="float">
            <text:p>0,00074305555555555600</text:p>
          </table:table-cell>
          <table:table-cell table:formula="of:=[.D430]-[.D42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15" office:value-type="float" office:value="6435" calcext:value-type="float">
            <text:p>6435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0744791666666667" calcext:value-type="float">
            <text:p>0,00074479166666666700</text:p>
          </table:table-cell>
          <table:table-cell table:formula="of:=[.D431]-[.D43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15" office:value-type="float" office:value="6450" calcext:value-type="float">
            <text:p>645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0746527777777778" calcext:value-type="float">
            <text:p>0,00074652777777777800</text:p>
          </table:table-cell>
          <table:table-cell table:formula="of:=[.D432]-[.D43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15" office:value-type="float" office:value="6465" calcext:value-type="float">
            <text:p>6465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0748263888888889" calcext:value-type="float">
            <text:p>0,00074826388888888900</text:p>
          </table:table-cell>
          <table:table-cell table:formula="of:=[.D433]-[.D43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15" office:value-type="float" office:value="6480" calcext:value-type="float">
            <text:p>6480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075" calcext:value-type="float">
            <text:p>0,00075000000000000000</text:p>
          </table:table-cell>
          <table:table-cell table:formula="of:=[.D434]-[.D43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15" office:value-type="float" office:value="6495" calcext:value-type="float">
            <text:p>6495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0751736111111111" calcext:value-type="float">
            <text:p>0,00075173611111111100</text:p>
          </table:table-cell>
          <table:table-cell table:formula="of:=[.D435]-[.D43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15" office:value-type="float" office:value="6510" calcext:value-type="float">
            <text:p>6510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0753472222222222" calcext:value-type="float">
            <text:p>0,00075347222222222200</text:p>
          </table:table-cell>
          <table:table-cell table:formula="of:=[.D436]-[.D43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15" office:value-type="float" office:value="6525" calcext:value-type="float">
            <text:p>6525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0755208333333333" calcext:value-type="float">
            <text:p>0,00075520833333333300</text:p>
          </table:table-cell>
          <table:table-cell table:formula="of:=[.D437]-[.D43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15" office:value-type="float" office:value="6540" calcext:value-type="float">
            <text:p>6540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0756944444444444" calcext:value-type="float">
            <text:p>0,00075694444444444500</text:p>
          </table:table-cell>
          <table:table-cell table:formula="of:=[.D438]-[.D43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15" office:value-type="float" office:value="6555" calcext:value-type="float">
            <text:p>6555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0758680555555556" calcext:value-type="float">
            <text:p>0,00075868055555555600</text:p>
          </table:table-cell>
          <table:table-cell table:formula="of:=[.D439]-[.D43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15" office:value-type="float" office:value="6570" calcext:value-type="float">
            <text:p>6570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0760416666666667" calcext:value-type="float">
            <text:p>0,00076041666666666700</text:p>
          </table:table-cell>
          <table:table-cell table:formula="of:=[.D440]-[.D43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15" office:value-type="float" office:value="6585" calcext:value-type="float">
            <text:p>6585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0762152777777778" calcext:value-type="float">
            <text:p>0,00076215277777777800</text:p>
          </table:table-cell>
          <table:table-cell table:formula="of:=[.D441]-[.D44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15" office:value-type="float" office:value="6600" calcext:value-type="float">
            <text:p>660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0763888888888889" calcext:value-type="float">
            <text:p>0,00076388888888888900</text:p>
          </table:table-cell>
          <table:table-cell table:formula="of:=[.D442]-[.D44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15" office:value-type="float" office:value="6615" calcext:value-type="float">
            <text:p>6615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0765625" calcext:value-type="float">
            <text:p>0,00076562500000000000</text:p>
          </table:table-cell>
          <table:table-cell table:formula="of:=[.D443]-[.D44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15" office:value-type="float" office:value="6630" calcext:value-type="float">
            <text:p>6630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0767361111111111" calcext:value-type="float">
            <text:p>0,00076736111111111100</text:p>
          </table:table-cell>
          <table:table-cell table:formula="of:=[.D444]-[.D44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15" office:value-type="float" office:value="6645" calcext:value-type="float">
            <text:p>6645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0769097222222222" calcext:value-type="float">
            <text:p>0,00076909722222222200</text:p>
          </table:table-cell>
          <table:table-cell table:formula="of:=[.D445]-[.D44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15" office:value-type="float" office:value="6660" calcext:value-type="float">
            <text:p>6660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0770833333333333" calcext:value-type="float">
            <text:p>0,00077083333333333300</text:p>
          </table:table-cell>
          <table:table-cell table:formula="of:=[.D446]-[.D44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15" office:value-type="float" office:value="6675" calcext:value-type="float">
            <text:p>6675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0772569444444444" calcext:value-type="float">
            <text:p>0,00077256944444444400</text:p>
          </table:table-cell>
          <table:table-cell table:formula="of:=[.D447]-[.D44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15" office:value-type="float" office:value="6690" calcext:value-type="float">
            <text:p>6690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0774305555555556" calcext:value-type="float">
            <text:p>0,00077430555555555600</text:p>
          </table:table-cell>
          <table:table-cell table:formula="of:=[.D448]-[.D44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15" office:value-type="float" office:value="6705" calcext:value-type="float">
            <text:p>6705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0776041666666667" calcext:value-type="float">
            <text:p>0,00077604166666666700</text:p>
          </table:table-cell>
          <table:table-cell table:formula="of:=[.D449]-[.D44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15" office:value-type="float" office:value="6720" calcext:value-type="float">
            <text:p>6720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0777777777777778" calcext:value-type="float">
            <text:p>0,00077777777777777800</text:p>
          </table:table-cell>
          <table:table-cell table:formula="of:=[.D450]-[.D44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15" office:value-type="float" office:value="6735" calcext:value-type="float">
            <text:p>6735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0779513888888889" calcext:value-type="float">
            <text:p>0,00077951388888888900</text:p>
          </table:table-cell>
          <table:table-cell table:formula="of:=[.D451]-[.D45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15" office:value-type="float" office:value="6750" calcext:value-type="float">
            <text:p>675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078125" calcext:value-type="float">
            <text:p>0,00078125000000000000</text:p>
          </table:table-cell>
          <table:table-cell table:formula="of:=[.D452]-[.D45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15" office:value-type="float" office:value="6765" calcext:value-type="float">
            <text:p>6765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0782986111111111" calcext:value-type="float">
            <text:p>0,00078298611111111100</text:p>
          </table:table-cell>
          <table:table-cell table:formula="of:=[.D453]-[.D45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15" office:value-type="float" office:value="6780" calcext:value-type="float">
            <text:p>6780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0784722222222222" calcext:value-type="float">
            <text:p>0,00078472222222222200</text:p>
          </table:table-cell>
          <table:table-cell table:formula="of:=[.D454]-[.D45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15" office:value-type="float" office:value="6795" calcext:value-type="float">
            <text:p>6795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0786458333333333" calcext:value-type="float">
            <text:p>0,00078645833333333300</text:p>
          </table:table-cell>
          <table:table-cell table:formula="of:=[.D455]-[.D45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15" office:value-type="float" office:value="6810" calcext:value-type="float">
            <text:p>6810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0788194444444444" calcext:value-type="float">
            <text:p>0,00078819444444444400</text:p>
          </table:table-cell>
          <table:table-cell table:formula="of:=[.D456]-[.D45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15" office:value-type="float" office:value="6825" calcext:value-type="float">
            <text:p>6825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0789930555555556" calcext:value-type="float">
            <text:p>0,00078993055555555600</text:p>
          </table:table-cell>
          <table:table-cell table:formula="of:=[.D457]-[.D45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15" office:value-type="float" office:value="6840" calcext:value-type="float">
            <text:p>6840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0791666666666667" calcext:value-type="float">
            <text:p>0,00079166666666666700</text:p>
          </table:table-cell>
          <table:table-cell table:formula="of:=[.D458]-[.D45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15" office:value-type="float" office:value="6855" calcext:value-type="float">
            <text:p>6855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0793402777777778" calcext:value-type="float">
            <text:p>0,00079340277777777800</text:p>
          </table:table-cell>
          <table:table-cell table:formula="of:=[.D459]-[.D45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15" office:value-type="float" office:value="6870" calcext:value-type="float">
            <text:p>6870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0795138888888889" calcext:value-type="float">
            <text:p>0,00079513888888888900</text:p>
          </table:table-cell>
          <table:table-cell table:formula="of:=[.D460]-[.D45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15" office:value-type="float" office:value="6885" calcext:value-type="float">
            <text:p>6885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0796875" calcext:value-type="float">
            <text:p>0,00079687500000000000</text:p>
          </table:table-cell>
          <table:table-cell table:formula="of:=[.D461]-[.D46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15" office:value-type="float" office:value="6900" calcext:value-type="float">
            <text:p>690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0798611111111111" calcext:value-type="float">
            <text:p>0,00079861111111111100</text:p>
          </table:table-cell>
          <table:table-cell table:formula="of:=[.D462]-[.D46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15" office:value-type="float" office:value="6915" calcext:value-type="float">
            <text:p>6915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0800347222222222" calcext:value-type="float">
            <text:p>0,00080034722222222200</text:p>
          </table:table-cell>
          <table:table-cell table:formula="of:=[.D463]-[.D46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15" office:value-type="float" office:value="6930" calcext:value-type="float">
            <text:p>6930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0802083333333333" calcext:value-type="float">
            <text:p>0,00080208333333333300</text:p>
          </table:table-cell>
          <table:table-cell table:formula="of:=[.D464]-[.D46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15" office:value-type="float" office:value="6945" calcext:value-type="float">
            <text:p>6945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0803819444444445" calcext:value-type="float">
            <text:p>0,00080381944444444500</text:p>
          </table:table-cell>
          <table:table-cell table:formula="of:=[.D465]-[.D46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15" office:value-type="float" office:value="6960" calcext:value-type="float">
            <text:p>6960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0805555555555556" calcext:value-type="float">
            <text:p>0,00080555555555555600</text:p>
          </table:table-cell>
          <table:table-cell table:formula="of:=[.D466]-[.D46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15" office:value-type="float" office:value="6975" calcext:value-type="float">
            <text:p>6975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0807291666666667" calcext:value-type="float">
            <text:p>0,00080729166666666700</text:p>
          </table:table-cell>
          <table:table-cell table:formula="of:=[.D467]-[.D46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15" office:value-type="float" office:value="6990" calcext:value-type="float">
            <text:p>6990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0809027777777778" calcext:value-type="float">
            <text:p>0,00080902777777777800</text:p>
          </table:table-cell>
          <table:table-cell table:formula="of:=[.D468]-[.D46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15" office:value-type="float" office:value="7005" calcext:value-type="float">
            <text:p>7005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0810763888888889" calcext:value-type="float">
            <text:p>0,00081076388888888900</text:p>
          </table:table-cell>
          <table:table-cell table:formula="of:=[.D469]-[.D46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15" office:value-type="float" office:value="7020" calcext:value-type="float">
            <text:p>7020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08125" calcext:value-type="float">
            <text:p>0,00081250000000000000</text:p>
          </table:table-cell>
          <table:table-cell table:formula="of:=[.D470]-[.D46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15" office:value-type="float" office:value="7035" calcext:value-type="float">
            <text:p>7035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0814236111111111" calcext:value-type="float">
            <text:p>0,00081423611111111100</text:p>
          </table:table-cell>
          <table:table-cell table:formula="of:=[.D471]-[.D47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15" office:value-type="float" office:value="7050" calcext:value-type="float">
            <text:p>705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0815972222222222" calcext:value-type="float">
            <text:p>0,00081597222222222200</text:p>
          </table:table-cell>
          <table:table-cell table:formula="of:=[.D472]-[.D47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15" office:value-type="float" office:value="7065" calcext:value-type="float">
            <text:p>7065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0817708333333333" calcext:value-type="float">
            <text:p>0,00081770833333333400</text:p>
          </table:table-cell>
          <table:table-cell table:formula="of:=[.D473]-[.D47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15" office:value-type="float" office:value="7080" calcext:value-type="float">
            <text:p>7080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0819444444444445" calcext:value-type="float">
            <text:p>0,00081944444444444500</text:p>
          </table:table-cell>
          <table:table-cell table:formula="of:=[.D474]-[.D47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15" office:value-type="float" office:value="7095" calcext:value-type="float">
            <text:p>7095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0821180555555556" calcext:value-type="float">
            <text:p>0,00082118055555555600</text:p>
          </table:table-cell>
          <table:table-cell table:formula="of:=[.D475]-[.D47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15" office:value-type="float" office:value="7110" calcext:value-type="float">
            <text:p>7110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0822916666666667" calcext:value-type="float">
            <text:p>0,00082291666666666700</text:p>
          </table:table-cell>
          <table:table-cell table:formula="of:=[.D476]-[.D47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15" office:value-type="float" office:value="7125" calcext:value-type="float">
            <text:p>7125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0824652777777778" calcext:value-type="float">
            <text:p>0,00082465277777777800</text:p>
          </table:table-cell>
          <table:table-cell table:formula="of:=[.D477]-[.D47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15" office:value-type="float" office:value="7140" calcext:value-type="float">
            <text:p>7140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0826388888888889" calcext:value-type="float">
            <text:p>0,00082638888888888900</text:p>
          </table:table-cell>
          <table:table-cell table:formula="of:=[.D478]-[.D47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15" office:value-type="float" office:value="7155" calcext:value-type="float">
            <text:p>7155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0828125" calcext:value-type="float">
            <text:p>0,00082812500000000000</text:p>
          </table:table-cell>
          <table:table-cell table:formula="of:=[.D479]-[.D47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15" office:value-type="float" office:value="7170" calcext:value-type="float">
            <text:p>7170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0829861111111111" calcext:value-type="float">
            <text:p>0,00082986111111111100</text:p>
          </table:table-cell>
          <table:table-cell table:formula="of:=[.D480]-[.D47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15" office:value-type="float" office:value="7185" calcext:value-type="float">
            <text:p>7185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0831597222222222" calcext:value-type="float">
            <text:p>0,00083159722222222200</text:p>
          </table:table-cell>
          <table:table-cell table:formula="of:=[.D481]-[.D48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15" office:value-type="float" office:value="7200" calcext:value-type="float">
            <text:p>720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0833333333333333" calcext:value-type="float">
            <text:p>0,00083333333333333300</text:p>
          </table:table-cell>
          <table:table-cell table:formula="of:=[.D482]-[.D48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15" office:value-type="float" office:value="7215" calcext:value-type="float">
            <text:p>7215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0835069444444445" calcext:value-type="float">
            <text:p>0,00083506944444444500</text:p>
          </table:table-cell>
          <table:table-cell table:formula="of:=[.D483]-[.D48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15" office:value-type="float" office:value="7230" calcext:value-type="float">
            <text:p>7230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0836805555555556" calcext:value-type="float">
            <text:p>0,00083680555555555600</text:p>
          </table:table-cell>
          <table:table-cell table:formula="of:=[.D484]-[.D48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15" office:value-type="float" office:value="7245" calcext:value-type="float">
            <text:p>7245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0838541666666667" calcext:value-type="float">
            <text:p>0,00083854166666666700</text:p>
          </table:table-cell>
          <table:table-cell table:formula="of:=[.D485]-[.D48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15" office:value-type="float" office:value="7260" calcext:value-type="float">
            <text:p>7260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0840277777777778" calcext:value-type="float">
            <text:p>0,00084027777777777800</text:p>
          </table:table-cell>
          <table:table-cell table:formula="of:=[.D486]-[.D48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15" office:value-type="float" office:value="7275" calcext:value-type="float">
            <text:p>7275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0842013888888889" calcext:value-type="float">
            <text:p>0,00084201388888888900</text:p>
          </table:table-cell>
          <table:table-cell table:formula="of:=[.D487]-[.D48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15" office:value-type="float" office:value="7290" calcext:value-type="float">
            <text:p>7290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084375" calcext:value-type="float">
            <text:p>0,00084375000000000000</text:p>
          </table:table-cell>
          <table:table-cell table:formula="of:=[.D488]-[.D48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15" office:value-type="float" office:value="7305" calcext:value-type="float">
            <text:p>7305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0845486111111111" calcext:value-type="float">
            <text:p>0,00084548611111111100</text:p>
          </table:table-cell>
          <table:table-cell table:formula="of:=[.D489]-[.D48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15" office:value-type="float" office:value="7320" calcext:value-type="float">
            <text:p>7320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0847222222222222" calcext:value-type="float">
            <text:p>0,00084722222222222200</text:p>
          </table:table-cell>
          <table:table-cell table:formula="of:=[.D490]-[.D48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15" office:value-type="float" office:value="7335" calcext:value-type="float">
            <text:p>7335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0848958333333333" calcext:value-type="float">
            <text:p>0,00084895833333333300</text:p>
          </table:table-cell>
          <table:table-cell table:formula="of:=[.D491]-[.D49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15" office:value-type="float" office:value="7350" calcext:value-type="float">
            <text:p>735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0850694444444444" calcext:value-type="float">
            <text:p>0,00085069444444444400</text:p>
          </table:table-cell>
          <table:table-cell table:formula="of:=[.D492]-[.D49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15" office:value-type="float" office:value="7365" calcext:value-type="float">
            <text:p>7365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0852430555555556" calcext:value-type="float">
            <text:p>0,00085243055555555600</text:p>
          </table:table-cell>
          <table:table-cell table:formula="of:=[.D493]-[.D49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15" office:value-type="float" office:value="7380" calcext:value-type="float">
            <text:p>7380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0854166666666667" calcext:value-type="float">
            <text:p>0,00085416666666666700</text:p>
          </table:table-cell>
          <table:table-cell table:formula="of:=[.D494]-[.D49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15" office:value-type="float" office:value="7395" calcext:value-type="float">
            <text:p>7395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0855902777777778" calcext:value-type="float">
            <text:p>0,00085590277777777800</text:p>
          </table:table-cell>
          <table:table-cell table:formula="of:=[.D495]-[.D49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15" office:value-type="float" office:value="7410" calcext:value-type="float">
            <text:p>7410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0857638888888889" calcext:value-type="float">
            <text:p>0,00085763888888888900</text:p>
          </table:table-cell>
          <table:table-cell table:formula="of:=[.D496]-[.D49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15" office:value-type="float" office:value="7425" calcext:value-type="float">
            <text:p>7425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0859375" calcext:value-type="float">
            <text:p>0,00085937500000000000</text:p>
          </table:table-cell>
          <table:table-cell table:formula="of:=[.D497]-[.D49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15" office:value-type="float" office:value="7440" calcext:value-type="float">
            <text:p>7440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0861111111111111" calcext:value-type="float">
            <text:p>0,00086111111111111100</text:p>
          </table:table-cell>
          <table:table-cell table:formula="of:=[.D498]-[.D49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15" office:value-type="float" office:value="7455" calcext:value-type="float">
            <text:p>7455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0862847222222222" calcext:value-type="float">
            <text:p>0,00086284722222222200</text:p>
          </table:table-cell>
          <table:table-cell table:formula="of:=[.D499]-[.D49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15" office:value-type="float" office:value="7470" calcext:value-type="float">
            <text:p>7470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0864583333333333" calcext:value-type="float">
            <text:p>0,00086458333333333300</text:p>
          </table:table-cell>
          <table:table-cell table:formula="of:=[.D500]-[.D49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15" office:value-type="float" office:value="7485" calcext:value-type="float">
            <text:p>7485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0866319444444444" calcext:value-type="float">
            <text:p>0,00086631944444444500</text:p>
          </table:table-cell>
          <table:table-cell table:formula="of:=[.D501]-[.D50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15" office:value-type="float" office:value="7500" calcext:value-type="float">
            <text:p>75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0868055555555556" calcext:value-type="float">
            <text:p>0,00086805555555555600</text:p>
          </table:table-cell>
          <table:table-cell table:formula="of:=[.D502]-[.D50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15" office:value-type="float" office:value="7515" calcext:value-type="float">
            <text:p>7515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0869791666666667" calcext:value-type="float">
            <text:p>0,00086979166666666700</text:p>
          </table:table-cell>
          <table:table-cell table:formula="of:=[.D503]-[.D50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15" office:value-type="float" office:value="7530" calcext:value-type="float">
            <text:p>7530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0871527777777778" calcext:value-type="float">
            <text:p>0,00087152777777777800</text:p>
          </table:table-cell>
          <table:table-cell table:formula="of:=[.D504]-[.D50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15" office:value-type="float" office:value="7545" calcext:value-type="float">
            <text:p>7545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0873263888888889" calcext:value-type="float">
            <text:p>0,00087326388888888900</text:p>
          </table:table-cell>
          <table:table-cell table:formula="of:=[.D505]-[.D50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15" office:value-type="float" office:value="7560" calcext:value-type="float">
            <text:p>7560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0875" calcext:value-type="float">
            <text:p>0,00087500000000000000</text:p>
          </table:table-cell>
          <table:table-cell table:formula="of:=[.D506]-[.D50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15" office:value-type="float" office:value="7575" calcext:value-type="float">
            <text:p>7575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0876736111111111" calcext:value-type="float">
            <text:p>0,00087673611111111100</text:p>
          </table:table-cell>
          <table:table-cell table:formula="of:=[.D507]-[.D50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15" office:value-type="float" office:value="7590" calcext:value-type="float">
            <text:p>7590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0878472222222222" calcext:value-type="float">
            <text:p>0,00087847222222222200</text:p>
          </table:table-cell>
          <table:table-cell table:formula="of:=[.D508]-[.D50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15" office:value-type="float" office:value="7605" calcext:value-type="float">
            <text:p>7605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0880208333333333" calcext:value-type="float">
            <text:p>0,00088020833333333300</text:p>
          </table:table-cell>
          <table:table-cell table:formula="of:=[.D509]-[.D50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15" office:value-type="float" office:value="7620" calcext:value-type="float">
            <text:p>7620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0881944444444444" calcext:value-type="float">
            <text:p>0,00088194444444444500</text:p>
          </table:table-cell>
          <table:table-cell table:formula="of:=[.D510]-[.D50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15" office:value-type="float" office:value="7635" calcext:value-type="float">
            <text:p>7635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0883680555555556" calcext:value-type="float">
            <text:p>0,00088368055555555600</text:p>
          </table:table-cell>
          <table:table-cell table:formula="of:=[.D511]-[.D51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15" office:value-type="float" office:value="7650" calcext:value-type="float">
            <text:p>765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0885416666666667" calcext:value-type="float">
            <text:p>0,00088541666666666700</text:p>
          </table:table-cell>
          <table:table-cell table:formula="of:=[.D512]-[.D51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15" office:value-type="float" office:value="7665" calcext:value-type="float">
            <text:p>7665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0887152777777778" calcext:value-type="float">
            <text:p>0,00088715277777777800</text:p>
          </table:table-cell>
          <table:table-cell table:formula="of:=[.D513]-[.D51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15" office:value-type="float" office:value="7680" calcext:value-type="float">
            <text:p>7680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0888888888888889" calcext:value-type="float">
            <text:p>0,00088888888888888900</text:p>
          </table:table-cell>
          <table:table-cell table:formula="of:=[.D514]-[.D51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15" office:value-type="float" office:value="7695" calcext:value-type="float">
            <text:p>7695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0890625" calcext:value-type="float">
            <text:p>0,00089062500000000000</text:p>
          </table:table-cell>
          <table:table-cell table:formula="of:=[.D515]-[.D51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15" office:value-type="float" office:value="7710" calcext:value-type="float">
            <text:p>7710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0892361111111111" calcext:value-type="float">
            <text:p>0,00089236111111111100</text:p>
          </table:table-cell>
          <table:table-cell table:formula="of:=[.D516]-[.D51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15" office:value-type="float" office:value="7725" calcext:value-type="float">
            <text:p>7725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0894097222222222" calcext:value-type="float">
            <text:p>0,00089409722222222200</text:p>
          </table:table-cell>
          <table:table-cell table:formula="of:=[.D517]-[.D51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15" office:value-type="float" office:value="7740" calcext:value-type="float">
            <text:p>7740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0895833333333333" calcext:value-type="float">
            <text:p>0,00089583333333333300</text:p>
          </table:table-cell>
          <table:table-cell table:formula="of:=[.D518]-[.D51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15" office:value-type="float" office:value="7755" calcext:value-type="float">
            <text:p>7755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0897569444444444" calcext:value-type="float">
            <text:p>0,00089756944444444400</text:p>
          </table:table-cell>
          <table:table-cell table:formula="of:=[.D519]-[.D51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15" office:value-type="float" office:value="7770" calcext:value-type="float">
            <text:p>7770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0899305555555556" calcext:value-type="float">
            <text:p>0,00089930555555555600</text:p>
          </table:table-cell>
          <table:table-cell table:formula="of:=[.D520]-[.D51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15" office:value-type="float" office:value="7785" calcext:value-type="float">
            <text:p>7785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0901041666666667" calcext:value-type="float">
            <text:p>0,00090104166666666700</text:p>
          </table:table-cell>
          <table:table-cell table:formula="of:=[.D521]-[.D52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15" office:value-type="float" office:value="7800" calcext:value-type="float">
            <text:p>780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0902777777777778" calcext:value-type="float">
            <text:p>0,00090277777777777800</text:p>
          </table:table-cell>
          <table:table-cell table:formula="of:=[.D522]-[.D52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15" office:value-type="float" office:value="7815" calcext:value-type="float">
            <text:p>7815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0904513888888889" calcext:value-type="float">
            <text:p>0,00090451388888888900</text:p>
          </table:table-cell>
          <table:table-cell table:formula="of:=[.D523]-[.D52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15" office:value-type="float" office:value="7830" calcext:value-type="float">
            <text:p>7830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090625" calcext:value-type="float">
            <text:p>0,00090625000000000000</text:p>
          </table:table-cell>
          <table:table-cell table:formula="of:=[.D524]-[.D52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15" office:value-type="float" office:value="7845" calcext:value-type="float">
            <text:p>7845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0907986111111111" calcext:value-type="float">
            <text:p>0,00090798611111111100</text:p>
          </table:table-cell>
          <table:table-cell table:formula="of:=[.D525]-[.D52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15" office:value-type="float" office:value="7860" calcext:value-type="float">
            <text:p>7860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0909722222222222" calcext:value-type="float">
            <text:p>0,00090972222222222200</text:p>
          </table:table-cell>
          <table:table-cell table:formula="of:=[.D526]-[.D52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15" office:value-type="float" office:value="7875" calcext:value-type="float">
            <text:p>7875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0911458333333333" calcext:value-type="float">
            <text:p>0,00091145833333333300</text:p>
          </table:table-cell>
          <table:table-cell table:formula="of:=[.D527]-[.D52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15" office:value-type="float" office:value="7890" calcext:value-type="float">
            <text:p>7890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0913194444444444" calcext:value-type="float">
            <text:p>0,00091319444444444400</text:p>
          </table:table-cell>
          <table:table-cell table:formula="of:=[.D528]-[.D52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15" office:value-type="float" office:value="7905" calcext:value-type="float">
            <text:p>7905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0914930555555556" calcext:value-type="float">
            <text:p>0,00091493055555555600</text:p>
          </table:table-cell>
          <table:table-cell table:formula="of:=[.D529]-[.D52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15" office:value-type="float" office:value="7920" calcext:value-type="float">
            <text:p>7920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0916666666666667" calcext:value-type="float">
            <text:p>0,00091666666666666700</text:p>
          </table:table-cell>
          <table:table-cell table:formula="of:=[.D530]-[.D52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15" office:value-type="float" office:value="7935" calcext:value-type="float">
            <text:p>7935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0918402777777778" calcext:value-type="float">
            <text:p>0,00091840277777777800</text:p>
          </table:table-cell>
          <table:table-cell table:formula="of:=[.D531]-[.D53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15" office:value-type="float" office:value="7950" calcext:value-type="float">
            <text:p>795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0920138888888889" calcext:value-type="float">
            <text:p>0,00092013888888888900</text:p>
          </table:table-cell>
          <table:table-cell table:formula="of:=[.D532]-[.D53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15" office:value-type="float" office:value="7965" calcext:value-type="float">
            <text:p>7965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0921875" calcext:value-type="float">
            <text:p>0,00092187500000000000</text:p>
          </table:table-cell>
          <table:table-cell table:formula="of:=[.D533]-[.D53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15" office:value-type="float" office:value="7980" calcext:value-type="float">
            <text:p>7980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0923611111111111" calcext:value-type="float">
            <text:p>0,00092361111111111100</text:p>
          </table:table-cell>
          <table:table-cell table:formula="of:=[.D534]-[.D53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15" office:value-type="float" office:value="7995" calcext:value-type="float">
            <text:p>7995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0925347222222222" calcext:value-type="float">
            <text:p>0,00092534722222222200</text:p>
          </table:table-cell>
          <table:table-cell table:formula="of:=[.D535]-[.D53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15" office:value-type="float" office:value="8010" calcext:value-type="float">
            <text:p>8010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0927083333333333" calcext:value-type="float">
            <text:p>0,00092708333333333400</text:p>
          </table:table-cell>
          <table:table-cell table:formula="of:=[.D536]-[.D53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15" office:value-type="float" office:value="8025" calcext:value-type="float">
            <text:p>8025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0928819444444445" calcext:value-type="float">
            <text:p>0,00092881944444444500</text:p>
          </table:table-cell>
          <table:table-cell table:formula="of:=[.D537]-[.D53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15" office:value-type="float" office:value="8040" calcext:value-type="float">
            <text:p>8040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0930555555555556" calcext:value-type="float">
            <text:p>0,00093055555555555600</text:p>
          </table:table-cell>
          <table:table-cell table:formula="of:=[.D538]-[.D53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15" office:value-type="float" office:value="8055" calcext:value-type="float">
            <text:p>8055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0932291666666667" calcext:value-type="float">
            <text:p>0,00093229166666666700</text:p>
          </table:table-cell>
          <table:table-cell table:formula="of:=[.D539]-[.D53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15" office:value-type="float" office:value="8070" calcext:value-type="float">
            <text:p>8070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0934027777777778" calcext:value-type="float">
            <text:p>0,00093402777777777800</text:p>
          </table:table-cell>
          <table:table-cell table:formula="of:=[.D540]-[.D53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15" office:value-type="float" office:value="8085" calcext:value-type="float">
            <text:p>8085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0935763888888889" calcext:value-type="float">
            <text:p>0,00093576388888888900</text:p>
          </table:table-cell>
          <table:table-cell table:formula="of:=[.D541]-[.D54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15" office:value-type="float" office:value="8100" calcext:value-type="float">
            <text:p>810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09375" calcext:value-type="float">
            <text:p>0,00093750000000000000</text:p>
          </table:table-cell>
          <table:table-cell table:formula="of:=[.D542]-[.D54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15" office:value-type="float" office:value="8115" calcext:value-type="float">
            <text:p>8115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0939236111111111" calcext:value-type="float">
            <text:p>0,00093923611111111100</text:p>
          </table:table-cell>
          <table:table-cell table:formula="of:=[.D543]-[.D54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15" office:value-type="float" office:value="8130" calcext:value-type="float">
            <text:p>8130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0940972222222222" calcext:value-type="float">
            <text:p>0,00094097222222222200</text:p>
          </table:table-cell>
          <table:table-cell table:formula="of:=[.D544]-[.D543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15" office:value-type="float" office:value="8145" calcext:value-type="float">
            <text:p>8145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0942708333333333" calcext:value-type="float">
            <text:p>0,00094270833333333400</text:p>
          </table:table-cell>
          <table:table-cell table:formula="of:=[.D545]-[.D54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15" office:value-type="float" office:value="8160" calcext:value-type="float">
            <text:p>8160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0944444444444445" calcext:value-type="float">
            <text:p>0,00094444444444444500</text:p>
          </table:table-cell>
          <table:table-cell table:formula="of:=[.D546]-[.D54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15" office:value-type="float" office:value="8175" calcext:value-type="float">
            <text:p>8175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0946180555555556" calcext:value-type="float">
            <text:p>0,00094618055555555600</text:p>
          </table:table-cell>
          <table:table-cell table:formula="of:=[.D547]-[.D54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15" office:value-type="float" office:value="8190" calcext:value-type="float">
            <text:p>8190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0947916666666667" calcext:value-type="float">
            <text:p>0,00094791666666666700</text:p>
          </table:table-cell>
          <table:table-cell table:formula="of:=[.D548]-[.D54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15" office:value-type="float" office:value="8205" calcext:value-type="float">
            <text:p>8205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0949652777777778" calcext:value-type="float">
            <text:p>0,00094965277777777800</text:p>
          </table:table-cell>
          <table:table-cell table:formula="of:=[.D549]-[.D54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15" office:value-type="float" office:value="8220" calcext:value-type="float">
            <text:p>8220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0951388888888889" calcext:value-type="float">
            <text:p>0,00095138888888888900</text:p>
          </table:table-cell>
          <table:table-cell table:formula="of:=[.D550]-[.D54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15" office:value-type="float" office:value="8235" calcext:value-type="float">
            <text:p>8235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0953125" calcext:value-type="float">
            <text:p>0,00095312500000000000</text:p>
          </table:table-cell>
          <table:table-cell table:formula="of:=[.D551]-[.D55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15" office:value-type="float" office:value="8250" calcext:value-type="float">
            <text:p>825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0954861111111111" calcext:value-type="float">
            <text:p>0,00095486111111111100</text:p>
          </table:table-cell>
          <table:table-cell table:formula="of:=[.D552]-[.D55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15" office:value-type="float" office:value="8265" calcext:value-type="float">
            <text:p>8265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0956597222222222" calcext:value-type="float">
            <text:p>0,00095659722222222200</text:p>
          </table:table-cell>
          <table:table-cell table:formula="of:=[.D553]-[.D55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15" office:value-type="float" office:value="8280" calcext:value-type="float">
            <text:p>8280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0958333333333333" calcext:value-type="float">
            <text:p>0,00095833333333333300</text:p>
          </table:table-cell>
          <table:table-cell table:formula="of:=[.D554]-[.D55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15" office:value-type="float" office:value="8295" calcext:value-type="float">
            <text:p>8295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0960069444444445" calcext:value-type="float">
            <text:p>0,00096006944444444500</text:p>
          </table:table-cell>
          <table:table-cell table:formula="of:=[.D555]-[.D554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15" office:value-type="float" office:value="8310" calcext:value-type="float">
            <text:p>8310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0961805555555556" calcext:value-type="float">
            <text:p>0,00096180555555555600</text:p>
          </table:table-cell>
          <table:table-cell table:formula="of:=[.D556]-[.D555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15" office:value-type="float" office:value="8325" calcext:value-type="float">
            <text:p>8325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0963541666666667" calcext:value-type="float">
            <text:p>0,00096354166666666700</text:p>
          </table:table-cell>
          <table:table-cell table:formula="of:=[.D557]-[.D556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15" office:value-type="float" office:value="8340" calcext:value-type="float">
            <text:p>8340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0965277777777778" calcext:value-type="float">
            <text:p>0,00096527777777777800</text:p>
          </table:table-cell>
          <table:table-cell table:formula="of:=[.D558]-[.D557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15" office:value-type="float" office:value="8355" calcext:value-type="float">
            <text:p>8355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0967013888888889" calcext:value-type="float">
            <text:p>0,00096701388888888900</text:p>
          </table:table-cell>
          <table:table-cell table:formula="of:=[.D559]-[.D558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15" office:value-type="float" office:value="8370" calcext:value-type="float">
            <text:p>8370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096875" calcext:value-type="float">
            <text:p>0,00096875000000000000</text:p>
          </table:table-cell>
          <table:table-cell table:formula="of:=[.D560]-[.D559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15" office:value-type="float" office:value="8385" calcext:value-type="float">
            <text:p>8385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0970486111111111" calcext:value-type="float">
            <text:p>0,00097048611111111100</text:p>
          </table:table-cell>
          <table:table-cell table:formula="of:=[.D561]-[.D560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15" office:value-type="float" office:value="8400" calcext:value-type="float">
            <text:p>840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0972222222222222" calcext:value-type="float">
            <text:p>0,00097222222222222200</text:p>
          </table:table-cell>
          <table:table-cell table:formula="of:=[.D562]-[.D561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15" office:value-type="float" office:value="8415" calcext:value-type="float">
            <text:p>8415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0973958333333333" calcext:value-type="float">
            <text:p>0,00097395833333333300</text:p>
          </table:table-cell>
          <table:table-cell table:formula="of:=[.D563]-[.D562]" office:value-type="float" office:value="0.0000017361111111111" calcext:value-type="float">
            <text:p>0,0000017361111111111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15" office:value-type="float" office:value="8430" calcext:value-type="float">
            <text:p>8430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0975694444444444" calcext:value-type="float">
            <text:p>0,00097569444444444400</text:p>
          </table:table-cell>
          <table:table-cell table:formula="of:=[.D564]-[.D56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15" office:value-type="float" office:value="8445" calcext:value-type="float">
            <text:p>8445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0977430555555556" calcext:value-type="float">
            <text:p>0,00097743055555555600</text:p>
          </table:table-cell>
          <table:table-cell table:formula="of:=[.D565]-[.D564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15" office:value-type="float" office:value="8460" calcext:value-type="float">
            <text:p>8460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0979166666666667" calcext:value-type="float">
            <text:p>0,00097916666666666700</text:p>
          </table:table-cell>
          <table:table-cell table:formula="of:=[.D566]-[.D56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15" office:value-type="float" office:value="8475" calcext:value-type="float">
            <text:p>8475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0980902777777778" calcext:value-type="float">
            <text:p>0,00098090277777777800</text:p>
          </table:table-cell>
          <table:table-cell table:formula="of:=[.D567]-[.D566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15" office:value-type="float" office:value="8490" calcext:value-type="float">
            <text:p>8490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0982638888888889" calcext:value-type="float">
            <text:p>0,00098263888888888900</text:p>
          </table:table-cell>
          <table:table-cell table:formula="of:=[.D568]-[.D56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15" office:value-type="float" office:value="8505" calcext:value-type="float">
            <text:p>8505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0984375" calcext:value-type="float">
            <text:p>0,00098437500000000000</text:p>
          </table:table-cell>
          <table:table-cell table:formula="of:=[.D569]-[.D56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15" office:value-type="float" office:value="8520" calcext:value-type="float">
            <text:p>8520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0986111111111111" calcext:value-type="float">
            <text:p>0,00098611111111111100</text:p>
          </table:table-cell>
          <table:table-cell table:formula="of:=[.D570]-[.D569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15" office:value-type="float" office:value="8535" calcext:value-type="float">
            <text:p>8535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0987847222222222" calcext:value-type="float">
            <text:p>0,00098784722222222200</text:p>
          </table:table-cell>
          <table:table-cell table:formula="of:=[.D571]-[.D57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15" office:value-type="float" office:value="8550" calcext:value-type="float">
            <text:p>855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0989583333333333" calcext:value-type="float">
            <text:p>0,00098958333333333300</text:p>
          </table:table-cell>
          <table:table-cell table:formula="of:=[.D572]-[.D571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15" office:value-type="float" office:value="8565" calcext:value-type="float">
            <text:p>8565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0991319444444444" calcext:value-type="float">
            <text:p>0,00099131944444444400</text:p>
          </table:table-cell>
          <table:table-cell table:formula="of:=[.D573]-[.D57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15" office:value-type="float" office:value="8580" calcext:value-type="float">
            <text:p>8580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0993055555555556" calcext:value-type="float">
            <text:p>0,00099305555555555600</text:p>
          </table:table-cell>
          <table:table-cell table:formula="of:=[.D574]-[.D573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15" office:value-type="float" office:value="8595" calcext:value-type="float">
            <text:p>8595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0994791666666667" calcext:value-type="float">
            <text:p>0,00099479166666666700</text:p>
          </table:table-cell>
          <table:table-cell table:formula="of:=[.D575]-[.D57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15" office:value-type="float" office:value="8610" calcext:value-type="float">
            <text:p>8610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0996527777777778" calcext:value-type="float">
            <text:p>0,00099652777777777800</text:p>
          </table:table-cell>
          <table:table-cell table:formula="of:=[.D576]-[.D575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15" office:value-type="float" office:value="8625" calcext:value-type="float">
            <text:p>8625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0998263888888889" calcext:value-type="float">
            <text:p>0,00099826388888888900</text:p>
          </table:table-cell>
          <table:table-cell table:formula="of:=[.D577]-[.D57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15" office:value-type="float" office:value="8640" calcext:value-type="float">
            <text:p>8640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1" calcext:value-type="float">
            <text:p>0,00100000000000000000</text:p>
          </table:table-cell>
          <table:table-cell table:formula="of:=[.D578]-[.D577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15" office:value-type="float" office:value="8655" calcext:value-type="float">
            <text:p>8655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100173611111111" calcext:value-type="float">
            <text:p>0,00100173611111111000</text:p>
          </table:table-cell>
          <table:table-cell table:formula="of:=[.D579]-[.D57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15" office:value-type="float" office:value="8670" calcext:value-type="float">
            <text:p>8670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100347222222222" calcext:value-type="float">
            <text:p>0,00100347222222222000</text:p>
          </table:table-cell>
          <table:table-cell table:formula="of:=[.D580]-[.D57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15" office:value-type="float" office:value="8685" calcext:value-type="float">
            <text:p>8685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100520833333333" calcext:value-type="float">
            <text:p>0,00100520833333333000</text:p>
          </table:table-cell>
          <table:table-cell table:formula="of:=[.D581]-[.D580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15" office:value-type="float" office:value="8700" calcext:value-type="float">
            <text:p>870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100694444444444" calcext:value-type="float">
            <text:p>0,00100694444444444000</text:p>
          </table:table-cell>
          <table:table-cell table:formula="of:=[.D582]-[.D58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15" office:value-type="float" office:value="8715" calcext:value-type="float">
            <text:p>8715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100868055555556" calcext:value-type="float">
            <text:p>0,00100868055555556000</text:p>
          </table:table-cell>
          <table:table-cell table:formula="of:=[.D583]-[.D582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15" office:value-type="float" office:value="8730" calcext:value-type="float">
            <text:p>8730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101041666666667" calcext:value-type="float">
            <text:p>0,00101041666666667000</text:p>
          </table:table-cell>
          <table:table-cell table:formula="of:=[.D584]-[.D58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15" office:value-type="float" office:value="8745" calcext:value-type="float">
            <text:p>8745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101215277777778" calcext:value-type="float">
            <text:p>0,00101215277777778000</text:p>
          </table:table-cell>
          <table:table-cell table:formula="of:=[.D585]-[.D584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15" office:value-type="float" office:value="8760" calcext:value-type="float">
            <text:p>8760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101388888888889" calcext:value-type="float">
            <text:p>0,00101388888888889000</text:p>
          </table:table-cell>
          <table:table-cell table:formula="of:=[.D586]-[.D58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15" office:value-type="float" office:value="8775" calcext:value-type="float">
            <text:p>8775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1015625" calcext:value-type="float">
            <text:p>0,00101562500000000000</text:p>
          </table:table-cell>
          <table:table-cell table:formula="of:=[.D587]-[.D586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15" office:value-type="float" office:value="8790" calcext:value-type="float">
            <text:p>8790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101736111111111" calcext:value-type="float">
            <text:p>0,00101736111111111000</text:p>
          </table:table-cell>
          <table:table-cell table:formula="of:=[.D588]-[.D58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15" office:value-type="float" office:value="8805" calcext:value-type="float">
            <text:p>8805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101909722222222" calcext:value-type="float">
            <text:p>0,00101909722222222000</text:p>
          </table:table-cell>
          <table:table-cell table:formula="of:=[.D589]-[.D588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15" office:value-type="float" office:value="8820" calcext:value-type="float">
            <text:p>8820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102083333333333" calcext:value-type="float">
            <text:p>0,00102083333333333000</text:p>
          </table:table-cell>
          <table:table-cell table:formula="of:=[.D590]-[.D58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15" office:value-type="float" office:value="8835" calcext:value-type="float">
            <text:p>8835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102256944444444" calcext:value-type="float">
            <text:p>0,00102256944444444000</text:p>
          </table:table-cell>
          <table:table-cell table:formula="of:=[.D591]-[.D59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15" office:value-type="float" office:value="8850" calcext:value-type="float">
            <text:p>885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102430555555556" calcext:value-type="float">
            <text:p>0,00102430555555556000</text:p>
          </table:table-cell>
          <table:table-cell table:formula="of:=[.D592]-[.D591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15" office:value-type="float" office:value="8865" calcext:value-type="float">
            <text:p>8865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102604166666667" calcext:value-type="float">
            <text:p>0,00102604166666667000</text:p>
          </table:table-cell>
          <table:table-cell table:formula="of:=[.D593]-[.D59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15" office:value-type="float" office:value="8880" calcext:value-type="float">
            <text:p>8880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102777777777778" calcext:value-type="float">
            <text:p>0,00102777777777778000</text:p>
          </table:table-cell>
          <table:table-cell table:formula="of:=[.D594]-[.D593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15" office:value-type="float" office:value="8895" calcext:value-type="float">
            <text:p>8895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102951388888889" calcext:value-type="float">
            <text:p>0,00102951388888889000</text:p>
          </table:table-cell>
          <table:table-cell table:formula="of:=[.D595]-[.D59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15" office:value-type="float" office:value="8910" calcext:value-type="float">
            <text:p>8910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103125" calcext:value-type="float">
            <text:p>0,00103125000000000000</text:p>
          </table:table-cell>
          <table:table-cell table:formula="of:=[.D596]-[.D595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15" office:value-type="float" office:value="8925" calcext:value-type="float">
            <text:p>8925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103298611111111" calcext:value-type="float">
            <text:p>0,00103298611111111000</text:p>
          </table:table-cell>
          <table:table-cell table:formula="of:=[.D597]-[.D59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15" office:value-type="float" office:value="8940" calcext:value-type="float">
            <text:p>8940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103472222222222" calcext:value-type="float">
            <text:p>0,00103472222222222000</text:p>
          </table:table-cell>
          <table:table-cell table:formula="of:=[.D598]-[.D597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15" office:value-type="float" office:value="8955" calcext:value-type="float">
            <text:p>8955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103645833333333" calcext:value-type="float">
            <text:p>0,00103645833333333000</text:p>
          </table:table-cell>
          <table:table-cell table:formula="of:=[.D599]-[.D59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15" office:value-type="float" office:value="8970" calcext:value-type="float">
            <text:p>8970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103819444444444" calcext:value-type="float">
            <text:p>0,00103819444444444000</text:p>
          </table:table-cell>
          <table:table-cell table:formula="of:=[.D600]-[.D59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15" office:value-type="float" office:value="8985" calcext:value-type="float">
            <text:p>8985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103993055555556" calcext:value-type="float">
            <text:p>0,00103993055555556000</text:p>
          </table:table-cell>
          <table:table-cell table:formula="of:=[.D601]-[.D600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15" office:value-type="float" office:value="9000" calcext:value-type="float">
            <text:p>90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104166666666667" calcext:value-type="float">
            <text:p>0,00104166666666667000</text:p>
          </table:table-cell>
          <table:table-cell table:formula="of:=[.D602]-[.D60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15" office:value-type="float" office:value="9015" calcext:value-type="float">
            <text:p>9015</text:p>
          </table:table-cell>
          <table:table-cell office:value-type="float" office:value="8640000" calcext:value-type="float">
            <text:p>8640000</text:p>
          </table:table-cell>
          <table:table-cell table:formula="of:=[.B602]/[.C602]" office:value-type="float" office:value="0.00104340277777778" calcext:value-type="float">
            <text:p>0,00104340277777778000</text:p>
          </table:table-cell>
          <table:table-cell table:formula="of:=[.D603]-[.D602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15" office:value-type="float" office:value="9030" calcext:value-type="float">
            <text:p>9030</text:p>
          </table:table-cell>
          <table:table-cell office:value-type="float" office:value="8640000" calcext:value-type="float">
            <text:p>8640000</text:p>
          </table:table-cell>
          <table:table-cell table:formula="of:=[.B603]/[.C603]" office:value-type="float" office:value="0.00104513888888889" calcext:value-type="float">
            <text:p>0,00104513888888889000</text:p>
          </table:table-cell>
          <table:table-cell table:formula="of:=[.D604]-[.D60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15" office:value-type="float" office:value="9045" calcext:value-type="float">
            <text:p>9045</text:p>
          </table:table-cell>
          <table:table-cell office:value-type="float" office:value="8640000" calcext:value-type="float">
            <text:p>8640000</text:p>
          </table:table-cell>
          <table:table-cell table:formula="of:=[.B604]/[.C604]" office:value-type="float" office:value="0.001046875" calcext:value-type="float">
            <text:p>0,00104687500000000000</text:p>
          </table:table-cell>
          <table:table-cell table:formula="of:=[.D605]-[.D604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15" office:value-type="float" office:value="9060" calcext:value-type="float">
            <text:p>9060</text:p>
          </table:table-cell>
          <table:table-cell office:value-type="float" office:value="8640000" calcext:value-type="float">
            <text:p>8640000</text:p>
          </table:table-cell>
          <table:table-cell table:formula="of:=[.B605]/[.C605]" office:value-type="float" office:value="0.00104861111111111" calcext:value-type="float">
            <text:p>0,00104861111111111000</text:p>
          </table:table-cell>
          <table:table-cell table:formula="of:=[.D606]-[.D60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15" office:value-type="float" office:value="9075" calcext:value-type="float">
            <text:p>9075</text:p>
          </table:table-cell>
          <table:table-cell office:value-type="float" office:value="8640000" calcext:value-type="float">
            <text:p>8640000</text:p>
          </table:table-cell>
          <table:table-cell table:formula="of:=[.B606]/[.C606]" office:value-type="float" office:value="0.00105034722222222" calcext:value-type="float">
            <text:p>0,00105034722222222000</text:p>
          </table:table-cell>
          <table:table-cell table:formula="of:=[.D607]-[.D606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15" office:value-type="float" office:value="9090" calcext:value-type="float">
            <text:p>9090</text:p>
          </table:table-cell>
          <table:table-cell office:value-type="float" office:value="8640000" calcext:value-type="float">
            <text:p>8640000</text:p>
          </table:table-cell>
          <table:table-cell table:formula="of:=[.B607]/[.C607]" office:value-type="float" office:value="0.00105208333333333" calcext:value-type="float">
            <text:p>0,00105208333333333000</text:p>
          </table:table-cell>
          <table:table-cell table:formula="of:=[.D608]-[.D60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15" office:value-type="float" office:value="9105" calcext:value-type="float">
            <text:p>9105</text:p>
          </table:table-cell>
          <table:table-cell office:value-type="float" office:value="8640000" calcext:value-type="float">
            <text:p>8640000</text:p>
          </table:table-cell>
          <table:table-cell table:formula="of:=[.B608]/[.C608]" office:value-type="float" office:value="0.00105381944444444" calcext:value-type="float">
            <text:p>0,00105381944444444000</text:p>
          </table:table-cell>
          <table:table-cell table:formula="of:=[.D609]-[.D608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15" office:value-type="float" office:value="9120" calcext:value-type="float">
            <text:p>9120</text:p>
          </table:table-cell>
          <table:table-cell office:value-type="float" office:value="8640000" calcext:value-type="float">
            <text:p>8640000</text:p>
          </table:table-cell>
          <table:table-cell table:formula="of:=[.B609]/[.C609]" office:value-type="float" office:value="0.00105555555555556" calcext:value-type="float">
            <text:p>0,00105555555555556000</text:p>
          </table:table-cell>
          <table:table-cell table:formula="of:=[.D610]-[.D60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15" office:value-type="float" office:value="9135" calcext:value-type="float">
            <text:p>9135</text:p>
          </table:table-cell>
          <table:table-cell office:value-type="float" office:value="8640000" calcext:value-type="float">
            <text:p>8640000</text:p>
          </table:table-cell>
          <table:table-cell table:formula="of:=[.B610]/[.C610]" office:value-type="float" office:value="0.00105729166666667" calcext:value-type="float">
            <text:p>0,00105729166666667000</text:p>
          </table:table-cell>
          <table:table-cell table:formula="of:=[.D611]-[.D61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15" office:value-type="float" office:value="9150" calcext:value-type="float">
            <text:p>9150</text:p>
          </table:table-cell>
          <table:table-cell office:value-type="float" office:value="8640000" calcext:value-type="float">
            <text:p>8640000</text:p>
          </table:table-cell>
          <table:table-cell table:formula="of:=[.B611]/[.C611]" office:value-type="float" office:value="0.00105902777777778" calcext:value-type="float">
            <text:p>0,00105902777777778000</text:p>
          </table:table-cell>
          <table:table-cell table:formula="of:=[.D612]-[.D611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15" office:value-type="float" office:value="9165" calcext:value-type="float">
            <text:p>9165</text:p>
          </table:table-cell>
          <table:table-cell office:value-type="float" office:value="8640000" calcext:value-type="float">
            <text:p>8640000</text:p>
          </table:table-cell>
          <table:table-cell table:formula="of:=[.B612]/[.C612]" office:value-type="float" office:value="0.00106076388888889" calcext:value-type="float">
            <text:p>0,00106076388888889000</text:p>
          </table:table-cell>
          <table:table-cell table:formula="of:=[.D613]-[.D61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15" office:value-type="float" office:value="9180" calcext:value-type="float">
            <text:p>9180</text:p>
          </table:table-cell>
          <table:table-cell office:value-type="float" office:value="8640000" calcext:value-type="float">
            <text:p>8640000</text:p>
          </table:table-cell>
          <table:table-cell table:formula="of:=[.B613]/[.C613]" office:value-type="float" office:value="0.0010625" calcext:value-type="float">
            <text:p>0,00106250000000000000</text:p>
          </table:table-cell>
          <table:table-cell table:formula="of:=[.D614]-[.D613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15" office:value-type="float" office:value="9195" calcext:value-type="float">
            <text:p>9195</text:p>
          </table:table-cell>
          <table:table-cell office:value-type="float" office:value="8640000" calcext:value-type="float">
            <text:p>8640000</text:p>
          </table:table-cell>
          <table:table-cell table:formula="of:=[.B614]/[.C614]" office:value-type="float" office:value="0.00106423611111111" calcext:value-type="float">
            <text:p>0,00106423611111111000</text:p>
          </table:table-cell>
          <table:table-cell table:formula="of:=[.D615]-[.D61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15" office:value-type="float" office:value="9210" calcext:value-type="float">
            <text:p>9210</text:p>
          </table:table-cell>
          <table:table-cell office:value-type="float" office:value="8640000" calcext:value-type="float">
            <text:p>8640000</text:p>
          </table:table-cell>
          <table:table-cell table:formula="of:=[.B615]/[.C615]" office:value-type="float" office:value="0.00106597222222222" calcext:value-type="float">
            <text:p>0,00106597222222222000</text:p>
          </table:table-cell>
          <table:table-cell table:formula="of:=[.D616]-[.D615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15" office:value-type="float" office:value="9225" calcext:value-type="float">
            <text:p>9225</text:p>
          </table:table-cell>
          <table:table-cell office:value-type="float" office:value="8640000" calcext:value-type="float">
            <text:p>8640000</text:p>
          </table:table-cell>
          <table:table-cell table:formula="of:=[.B616]/[.C616]" office:value-type="float" office:value="0.00106770833333333" calcext:value-type="float">
            <text:p>0,00106770833333333000</text:p>
          </table:table-cell>
          <table:table-cell table:formula="of:=[.D617]-[.D61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+15" office:value-type="float" office:value="9240" calcext:value-type="float">
            <text:p>9240</text:p>
          </table:table-cell>
          <table:table-cell office:value-type="float" office:value="8640000" calcext:value-type="float">
            <text:p>8640000</text:p>
          </table:table-cell>
          <table:table-cell table:formula="of:=[.B617]/[.C617]" office:value-type="float" office:value="0.00106944444444444" calcext:value-type="float">
            <text:p>0,00106944444444444000</text:p>
          </table:table-cell>
          <table:table-cell table:formula="of:=[.D618]-[.D617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+15" office:value-type="float" office:value="9255" calcext:value-type="float">
            <text:p>9255</text:p>
          </table:table-cell>
          <table:table-cell office:value-type="float" office:value="8640000" calcext:value-type="float">
            <text:p>8640000</text:p>
          </table:table-cell>
          <table:table-cell table:formula="of:=[.B618]/[.C618]" office:value-type="float" office:value="0.00107118055555556" calcext:value-type="float">
            <text:p>0,00107118055555556000</text:p>
          </table:table-cell>
          <table:table-cell table:formula="of:=[.D619]-[.D61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+15" office:value-type="float" office:value="9270" calcext:value-type="float">
            <text:p>9270</text:p>
          </table:table-cell>
          <table:table-cell office:value-type="float" office:value="8640000" calcext:value-type="float">
            <text:p>8640000</text:p>
          </table:table-cell>
          <table:table-cell table:formula="of:=[.B619]/[.C619]" office:value-type="float" office:value="0.00107291666666667" calcext:value-type="float">
            <text:p>0,00107291666666667000</text:p>
          </table:table-cell>
          <table:table-cell table:formula="of:=[.D620]-[.D619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+15" office:value-type="float" office:value="9285" calcext:value-type="float">
            <text:p>9285</text:p>
          </table:table-cell>
          <table:table-cell office:value-type="float" office:value="8640000" calcext:value-type="float">
            <text:p>8640000</text:p>
          </table:table-cell>
          <table:table-cell table:formula="of:=[.B620]/[.C620]" office:value-type="float" office:value="0.00107465277777778" calcext:value-type="float">
            <text:p>0,00107465277777778000</text:p>
          </table:table-cell>
          <table:table-cell table:formula="of:=[.D621]-[.D62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+15" office:value-type="float" office:value="9300" calcext:value-type="float">
            <text:p>9300</text:p>
          </table:table-cell>
          <table:table-cell office:value-type="float" office:value="8640000" calcext:value-type="float">
            <text:p>8640000</text:p>
          </table:table-cell>
          <table:table-cell table:formula="of:=[.B621]/[.C621]" office:value-type="float" office:value="0.00107638888888889" calcext:value-type="float">
            <text:p>0,00107638888888889000</text:p>
          </table:table-cell>
          <table:table-cell table:formula="of:=[.D622]-[.D62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+15" office:value-type="float" office:value="9315" calcext:value-type="float">
            <text:p>9315</text:p>
          </table:table-cell>
          <table:table-cell office:value-type="float" office:value="8640000" calcext:value-type="float">
            <text:p>8640000</text:p>
          </table:table-cell>
          <table:table-cell table:formula="of:=[.B622]/[.C622]" office:value-type="float" office:value="0.001078125" calcext:value-type="float">
            <text:p>0,00107812500000000000</text:p>
          </table:table-cell>
          <table:table-cell table:formula="of:=[.D623]-[.D622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+15" office:value-type="float" office:value="9330" calcext:value-type="float">
            <text:p>9330</text:p>
          </table:table-cell>
          <table:table-cell office:value-type="float" office:value="8640000" calcext:value-type="float">
            <text:p>8640000</text:p>
          </table:table-cell>
          <table:table-cell table:formula="of:=[.B623]/[.C623]" office:value-type="float" office:value="0.00107986111111111" calcext:value-type="float">
            <text:p>0,00107986111111111000</text:p>
          </table:table-cell>
          <table:table-cell table:formula="of:=[.D624]-[.D62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+15" office:value-type="float" office:value="9345" calcext:value-type="float">
            <text:p>9345</text:p>
          </table:table-cell>
          <table:table-cell office:value-type="float" office:value="8640000" calcext:value-type="float">
            <text:p>8640000</text:p>
          </table:table-cell>
          <table:table-cell table:formula="of:=[.B624]/[.C624]" office:value-type="float" office:value="0.00108159722222222" calcext:value-type="float">
            <text:p>0,00108159722222222000</text:p>
          </table:table-cell>
          <table:table-cell table:formula="of:=[.D625]-[.D624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+15" office:value-type="float" office:value="9360" calcext:value-type="float">
            <text:p>9360</text:p>
          </table:table-cell>
          <table:table-cell office:value-type="float" office:value="8640000" calcext:value-type="float">
            <text:p>8640000</text:p>
          </table:table-cell>
          <table:table-cell table:formula="of:=[.B625]/[.C625]" office:value-type="float" office:value="0.00108333333333333" calcext:value-type="float">
            <text:p>0,00108333333333333000</text:p>
          </table:table-cell>
          <table:table-cell table:formula="of:=[.D626]-[.D62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+15" office:value-type="float" office:value="9375" calcext:value-type="float">
            <text:p>9375</text:p>
          </table:table-cell>
          <table:table-cell office:value-type="float" office:value="8640000" calcext:value-type="float">
            <text:p>8640000</text:p>
          </table:table-cell>
          <table:table-cell table:formula="of:=[.B626]/[.C626]" office:value-type="float" office:value="0.00108506944444444" calcext:value-type="float">
            <text:p>0,00108506944444444000</text:p>
          </table:table-cell>
          <table:table-cell table:formula="of:=[.D627]-[.D626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+15" office:value-type="float" office:value="9390" calcext:value-type="float">
            <text:p>9390</text:p>
          </table:table-cell>
          <table:table-cell office:value-type="float" office:value="8640000" calcext:value-type="float">
            <text:p>8640000</text:p>
          </table:table-cell>
          <table:table-cell table:formula="of:=[.B627]/[.C627]" office:value-type="float" office:value="0.00108680555555556" calcext:value-type="float">
            <text:p>0,00108680555555556000</text:p>
          </table:table-cell>
          <table:table-cell table:formula="of:=[.D628]-[.D62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+15" office:value-type="float" office:value="9405" calcext:value-type="float">
            <text:p>9405</text:p>
          </table:table-cell>
          <table:table-cell office:value-type="float" office:value="8640000" calcext:value-type="float">
            <text:p>8640000</text:p>
          </table:table-cell>
          <table:table-cell table:formula="of:=[.B628]/[.C628]" office:value-type="float" office:value="0.00108854166666667" calcext:value-type="float">
            <text:p>0,00108854166666667000</text:p>
          </table:table-cell>
          <table:table-cell table:formula="of:=[.D629]-[.D628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+15" office:value-type="float" office:value="9420" calcext:value-type="float">
            <text:p>9420</text:p>
          </table:table-cell>
          <table:table-cell office:value-type="float" office:value="8640000" calcext:value-type="float">
            <text:p>8640000</text:p>
          </table:table-cell>
          <table:table-cell table:formula="of:=[.B629]/[.C629]" office:value-type="float" office:value="0.00109027777777778" calcext:value-type="float">
            <text:p>0,00109027777777778000</text:p>
          </table:table-cell>
          <table:table-cell table:formula="of:=[.D630]-[.D62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+15" office:value-type="float" office:value="9435" calcext:value-type="float">
            <text:p>9435</text:p>
          </table:table-cell>
          <table:table-cell office:value-type="float" office:value="8640000" calcext:value-type="float">
            <text:p>8640000</text:p>
          </table:table-cell>
          <table:table-cell table:formula="of:=[.B630]/[.C630]" office:value-type="float" office:value="0.00109201388888889" calcext:value-type="float">
            <text:p>0,00109201388888889000</text:p>
          </table:table-cell>
          <table:table-cell table:formula="of:=[.D631]-[.D63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+15" office:value-type="float" office:value="9450" calcext:value-type="float">
            <text:p>9450</text:p>
          </table:table-cell>
          <table:table-cell office:value-type="float" office:value="8640000" calcext:value-type="float">
            <text:p>8640000</text:p>
          </table:table-cell>
          <table:table-cell table:formula="of:=[.B631]/[.C631]" office:value-type="float" office:value="0.00109375" calcext:value-type="float">
            <text:p>0,00109375000000000000</text:p>
          </table:table-cell>
          <table:table-cell table:formula="of:=[.D632]-[.D631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+15" office:value-type="float" office:value="9465" calcext:value-type="float">
            <text:p>9465</text:p>
          </table:table-cell>
          <table:table-cell office:value-type="float" office:value="8640000" calcext:value-type="float">
            <text:p>8640000</text:p>
          </table:table-cell>
          <table:table-cell table:formula="of:=[.B632]/[.C632]" office:value-type="float" office:value="0.00109548611111111" calcext:value-type="float">
            <text:p>0,00109548611111111000</text:p>
          </table:table-cell>
          <table:table-cell table:formula="of:=[.D633]-[.D63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+15" office:value-type="float" office:value="9480" calcext:value-type="float">
            <text:p>9480</text:p>
          </table:table-cell>
          <table:table-cell office:value-type="float" office:value="8640000" calcext:value-type="float">
            <text:p>8640000</text:p>
          </table:table-cell>
          <table:table-cell table:formula="of:=[.B633]/[.C633]" office:value-type="float" office:value="0.00109722222222222" calcext:value-type="float">
            <text:p>0,00109722222222222000</text:p>
          </table:table-cell>
          <table:table-cell table:formula="of:=[.D634]-[.D633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+15" office:value-type="float" office:value="9495" calcext:value-type="float">
            <text:p>9495</text:p>
          </table:table-cell>
          <table:table-cell office:value-type="float" office:value="8640000" calcext:value-type="float">
            <text:p>8640000</text:p>
          </table:table-cell>
          <table:table-cell table:formula="of:=[.B634]/[.C634]" office:value-type="float" office:value="0.00109895833333333" calcext:value-type="float">
            <text:p>0,00109895833333333000</text:p>
          </table:table-cell>
          <table:table-cell table:formula="of:=[.D635]-[.D63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+15" office:value-type="float" office:value="9510" calcext:value-type="float">
            <text:p>9510</text:p>
          </table:table-cell>
          <table:table-cell office:value-type="float" office:value="8640000" calcext:value-type="float">
            <text:p>8640000</text:p>
          </table:table-cell>
          <table:table-cell table:formula="of:=[.B635]/[.C635]" office:value-type="float" office:value="0.00110069444444444" calcext:value-type="float">
            <text:p>0,00110069444444444000</text:p>
          </table:table-cell>
          <table:table-cell table:formula="of:=[.D636]-[.D635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+15" office:value-type="float" office:value="9525" calcext:value-type="float">
            <text:p>9525</text:p>
          </table:table-cell>
          <table:table-cell office:value-type="float" office:value="8640000" calcext:value-type="float">
            <text:p>8640000</text:p>
          </table:table-cell>
          <table:table-cell table:formula="of:=[.B636]/[.C636]" office:value-type="float" office:value="0.00110243055555556" calcext:value-type="float">
            <text:p>0,00110243055555556000</text:p>
          </table:table-cell>
          <table:table-cell table:formula="of:=[.D637]-[.D63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+15" office:value-type="float" office:value="9540" calcext:value-type="float">
            <text:p>9540</text:p>
          </table:table-cell>
          <table:table-cell office:value-type="float" office:value="8640000" calcext:value-type="float">
            <text:p>8640000</text:p>
          </table:table-cell>
          <table:table-cell table:formula="of:=[.B637]/[.C637]" office:value-type="float" office:value="0.00110416666666667" calcext:value-type="float">
            <text:p>0,00110416666666667000</text:p>
          </table:table-cell>
          <table:table-cell table:formula="of:=[.D638]-[.D637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+15" office:value-type="float" office:value="9555" calcext:value-type="float">
            <text:p>9555</text:p>
          </table:table-cell>
          <table:table-cell office:value-type="float" office:value="8640000" calcext:value-type="float">
            <text:p>8640000</text:p>
          </table:table-cell>
          <table:table-cell table:formula="of:=[.B638]/[.C638]" office:value-type="float" office:value="0.00110590277777778" calcext:value-type="float">
            <text:p>0,00110590277777778000</text:p>
          </table:table-cell>
          <table:table-cell table:formula="of:=[.D639]-[.D63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+15" office:value-type="float" office:value="9570" calcext:value-type="float">
            <text:p>9570</text:p>
          </table:table-cell>
          <table:table-cell office:value-type="float" office:value="8640000" calcext:value-type="float">
            <text:p>8640000</text:p>
          </table:table-cell>
          <table:table-cell table:formula="of:=[.B639]/[.C639]" office:value-type="float" office:value="0.00110763888888889" calcext:value-type="float">
            <text:p>0,00110763888888889000</text:p>
          </table:table-cell>
          <table:table-cell table:formula="of:=[.D640]-[.D639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+15" office:value-type="float" office:value="9585" calcext:value-type="float">
            <text:p>9585</text:p>
          </table:table-cell>
          <table:table-cell office:value-type="float" office:value="8640000" calcext:value-type="float">
            <text:p>8640000</text:p>
          </table:table-cell>
          <table:table-cell table:formula="of:=[.B640]/[.C640]" office:value-type="float" office:value="0.001109375" calcext:value-type="float">
            <text:p>0,00110937500000000000</text:p>
          </table:table-cell>
          <table:table-cell table:formula="of:=[.D641]-[.D64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+15" office:value-type="float" office:value="9600" calcext:value-type="float">
            <text:p>9600</text:p>
          </table:table-cell>
          <table:table-cell office:value-type="float" office:value="8640000" calcext:value-type="float">
            <text:p>8640000</text:p>
          </table:table-cell>
          <table:table-cell table:formula="of:=[.B641]/[.C641]" office:value-type="float" office:value="0.00111111111111111" calcext:value-type="float">
            <text:p>0,00111111111111111000</text:p>
          </table:table-cell>
          <table:table-cell table:formula="of:=[.D642]-[.D64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+15" office:value-type="float" office:value="9615" calcext:value-type="float">
            <text:p>9615</text:p>
          </table:table-cell>
          <table:table-cell office:value-type="float" office:value="8640000" calcext:value-type="float">
            <text:p>8640000</text:p>
          </table:table-cell>
          <table:table-cell table:formula="of:=[.B642]/[.C642]" office:value-type="float" office:value="0.00111284722222222" calcext:value-type="float">
            <text:p>0,00111284722222222000</text:p>
          </table:table-cell>
          <table:table-cell table:formula="of:=[.D643]-[.D642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+15" office:value-type="float" office:value="9630" calcext:value-type="float">
            <text:p>9630</text:p>
          </table:table-cell>
          <table:table-cell office:value-type="float" office:value="8640000" calcext:value-type="float">
            <text:p>8640000</text:p>
          </table:table-cell>
          <table:table-cell table:formula="of:=[.B643]/[.C643]" office:value-type="float" office:value="0.00111458333333333" calcext:value-type="float">
            <text:p>0,00111458333333333000</text:p>
          </table:table-cell>
          <table:table-cell table:formula="of:=[.D644]-[.D64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+15" office:value-type="float" office:value="9645" calcext:value-type="float">
            <text:p>9645</text:p>
          </table:table-cell>
          <table:table-cell office:value-type="float" office:value="8640000" calcext:value-type="float">
            <text:p>8640000</text:p>
          </table:table-cell>
          <table:table-cell table:formula="of:=[.B644]/[.C644]" office:value-type="float" office:value="0.00111631944444444" calcext:value-type="float">
            <text:p>0,00111631944444444000</text:p>
          </table:table-cell>
          <table:table-cell table:formula="of:=[.D645]-[.D644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+15" office:value-type="float" office:value="9660" calcext:value-type="float">
            <text:p>9660</text:p>
          </table:table-cell>
          <table:table-cell office:value-type="float" office:value="8640000" calcext:value-type="float">
            <text:p>8640000</text:p>
          </table:table-cell>
          <table:table-cell table:formula="of:=[.B645]/[.C645]" office:value-type="float" office:value="0.00111805555555556" calcext:value-type="float">
            <text:p>0,00111805555555556000</text:p>
          </table:table-cell>
          <table:table-cell table:formula="of:=[.D646]-[.D64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+15" office:value-type="float" office:value="9675" calcext:value-type="float">
            <text:p>9675</text:p>
          </table:table-cell>
          <table:table-cell office:value-type="float" office:value="8640000" calcext:value-type="float">
            <text:p>8640000</text:p>
          </table:table-cell>
          <table:table-cell table:formula="of:=[.B646]/[.C646]" office:value-type="float" office:value="0.00111979166666667" calcext:value-type="float">
            <text:p>0,00111979166666667000</text:p>
          </table:table-cell>
          <table:table-cell table:formula="of:=[.D647]-[.D646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+15" office:value-type="float" office:value="9690" calcext:value-type="float">
            <text:p>9690</text:p>
          </table:table-cell>
          <table:table-cell office:value-type="float" office:value="8640000" calcext:value-type="float">
            <text:p>8640000</text:p>
          </table:table-cell>
          <table:table-cell table:formula="of:=[.B647]/[.C647]" office:value-type="float" office:value="0.00112152777777778" calcext:value-type="float">
            <text:p>0,00112152777777778000</text:p>
          </table:table-cell>
          <table:table-cell table:formula="of:=[.D648]-[.D64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+15" office:value-type="float" office:value="9705" calcext:value-type="float">
            <text:p>9705</text:p>
          </table:table-cell>
          <table:table-cell office:value-type="float" office:value="8640000" calcext:value-type="float">
            <text:p>8640000</text:p>
          </table:table-cell>
          <table:table-cell table:formula="of:=[.B648]/[.C648]" office:value-type="float" office:value="0.00112326388888889" calcext:value-type="float">
            <text:p>0,00112326388888889000</text:p>
          </table:table-cell>
          <table:table-cell table:formula="of:=[.D649]-[.D648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+15" office:value-type="float" office:value="9720" calcext:value-type="float">
            <text:p>9720</text:p>
          </table:table-cell>
          <table:table-cell office:value-type="float" office:value="8640000" calcext:value-type="float">
            <text:p>8640000</text:p>
          </table:table-cell>
          <table:table-cell table:formula="of:=[.B649]/[.C649]" office:value-type="float" office:value="0.001125" calcext:value-type="float">
            <text:p>0,00112500000000000000</text:p>
          </table:table-cell>
          <table:table-cell table:formula="of:=[.D650]-[.D64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49]+15" office:value-type="float" office:value="9735" calcext:value-type="float">
            <text:p>9735</text:p>
          </table:table-cell>
          <table:table-cell office:value-type="float" office:value="8640000" calcext:value-type="float">
            <text:p>8640000</text:p>
          </table:table-cell>
          <table:table-cell table:formula="of:=[.B650]/[.C650]" office:value-type="float" office:value="0.00112673611111111" calcext:value-type="float">
            <text:p>0,00112673611111111000</text:p>
          </table:table-cell>
          <table:table-cell table:formula="of:=[.D651]-[.D650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0]+15" office:value-type="float" office:value="9750" calcext:value-type="float">
            <text:p>9750</text:p>
          </table:table-cell>
          <table:table-cell office:value-type="float" office:value="8640000" calcext:value-type="float">
            <text:p>8640000</text:p>
          </table:table-cell>
          <table:table-cell table:formula="of:=[.B651]/[.C651]" office:value-type="float" office:value="0.00112847222222222" calcext:value-type="float">
            <text:p>0,00112847222222222000</text:p>
          </table:table-cell>
          <table:table-cell table:formula="of:=[.D652]-[.D65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1]+15" office:value-type="float" office:value="9765" calcext:value-type="float">
            <text:p>9765</text:p>
          </table:table-cell>
          <table:table-cell office:value-type="float" office:value="8640000" calcext:value-type="float">
            <text:p>8640000</text:p>
          </table:table-cell>
          <table:table-cell table:formula="of:=[.B652]/[.C652]" office:value-type="float" office:value="0.00113020833333333" calcext:value-type="float">
            <text:p>0,00113020833333333000</text:p>
          </table:table-cell>
          <table:table-cell table:formula="of:=[.D653]-[.D65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2]+15" office:value-type="float" office:value="9780" calcext:value-type="float">
            <text:p>9780</text:p>
          </table:table-cell>
          <table:table-cell office:value-type="float" office:value="8640000" calcext:value-type="float">
            <text:p>8640000</text:p>
          </table:table-cell>
          <table:table-cell table:formula="of:=[.B653]/[.C653]" office:value-type="float" office:value="0.00113194444444444" calcext:value-type="float">
            <text:p>0,00113194444444444000</text:p>
          </table:table-cell>
          <table:table-cell table:formula="of:=[.D654]-[.D653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3]+15" office:value-type="float" office:value="9795" calcext:value-type="float">
            <text:p>9795</text:p>
          </table:table-cell>
          <table:table-cell office:value-type="float" office:value="8640000" calcext:value-type="float">
            <text:p>8640000</text:p>
          </table:table-cell>
          <table:table-cell table:formula="of:=[.B654]/[.C654]" office:value-type="float" office:value="0.00113368055555556" calcext:value-type="float">
            <text:p>0,00113368055555556000</text:p>
          </table:table-cell>
          <table:table-cell table:formula="of:=[.D655]-[.D65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4]+15" office:value-type="float" office:value="9810" calcext:value-type="float">
            <text:p>9810</text:p>
          </table:table-cell>
          <table:table-cell office:value-type="float" office:value="8640000" calcext:value-type="float">
            <text:p>8640000</text:p>
          </table:table-cell>
          <table:table-cell table:formula="of:=[.B655]/[.C655]" office:value-type="float" office:value="0.00113541666666667" calcext:value-type="float">
            <text:p>0,00113541666666667000</text:p>
          </table:table-cell>
          <table:table-cell table:formula="of:=[.D656]-[.D655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5]+15" office:value-type="float" office:value="9825" calcext:value-type="float">
            <text:p>9825</text:p>
          </table:table-cell>
          <table:table-cell office:value-type="float" office:value="8640000" calcext:value-type="float">
            <text:p>8640000</text:p>
          </table:table-cell>
          <table:table-cell table:formula="of:=[.B656]/[.C656]" office:value-type="float" office:value="0.00113715277777778" calcext:value-type="float">
            <text:p>0,00113715277777778000</text:p>
          </table:table-cell>
          <table:table-cell table:formula="of:=[.D657]-[.D65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6]+15" office:value-type="float" office:value="9840" calcext:value-type="float">
            <text:p>9840</text:p>
          </table:table-cell>
          <table:table-cell office:value-type="float" office:value="8640000" calcext:value-type="float">
            <text:p>8640000</text:p>
          </table:table-cell>
          <table:table-cell table:formula="of:=[.B657]/[.C657]" office:value-type="float" office:value="0.00113888888888889" calcext:value-type="float">
            <text:p>0,00113888888888889000</text:p>
          </table:table-cell>
          <table:table-cell table:formula="of:=[.D658]-[.D657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57]+15" office:value-type="float" office:value="9855" calcext:value-type="float">
            <text:p>9855</text:p>
          </table:table-cell>
          <table:table-cell office:value-type="float" office:value="8640000" calcext:value-type="float">
            <text:p>8640000</text:p>
          </table:table-cell>
          <table:table-cell table:formula="of:=[.B658]/[.C658]" office:value-type="float" office:value="0.001140625" calcext:value-type="float">
            <text:p>0,00114062500000000000</text:p>
          </table:table-cell>
          <table:table-cell table:formula="of:=[.D659]-[.D65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58]+15" office:value-type="float" office:value="9870" calcext:value-type="float">
            <text:p>9870</text:p>
          </table:table-cell>
          <table:table-cell office:value-type="float" office:value="8640000" calcext:value-type="float">
            <text:p>8640000</text:p>
          </table:table-cell>
          <table:table-cell table:formula="of:=[.B659]/[.C659]" office:value-type="float" office:value="0.00114236111111111" calcext:value-type="float">
            <text:p>0,00114236111111111000</text:p>
          </table:table-cell>
          <table:table-cell table:formula="of:=[.D660]-[.D659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59]+15" office:value-type="float" office:value="9885" calcext:value-type="float">
            <text:p>9885</text:p>
          </table:table-cell>
          <table:table-cell office:value-type="float" office:value="8640000" calcext:value-type="float">
            <text:p>8640000</text:p>
          </table:table-cell>
          <table:table-cell table:formula="of:=[.B660]/[.C660]" office:value-type="float" office:value="0.00114409722222222" calcext:value-type="float">
            <text:p>0,00114409722222222000</text:p>
          </table:table-cell>
          <table:table-cell table:formula="of:=[.D661]-[.D66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0]+15" office:value-type="float" office:value="9900" calcext:value-type="float">
            <text:p>9900</text:p>
          </table:table-cell>
          <table:table-cell office:value-type="float" office:value="8640000" calcext:value-type="float">
            <text:p>8640000</text:p>
          </table:table-cell>
          <table:table-cell table:formula="of:=[.B661]/[.C661]" office:value-type="float" office:value="0.00114583333333333" calcext:value-type="float">
            <text:p>0,00114583333333333000</text:p>
          </table:table-cell>
          <table:table-cell table:formula="of:=[.D662]-[.D66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1]+15" office:value-type="float" office:value="9915" calcext:value-type="float">
            <text:p>9915</text:p>
          </table:table-cell>
          <table:table-cell office:value-type="float" office:value="8640000" calcext:value-type="float">
            <text:p>8640000</text:p>
          </table:table-cell>
          <table:table-cell table:formula="of:=[.B662]/[.C662]" office:value-type="float" office:value="0.00114756944444444" calcext:value-type="float">
            <text:p>0,00114756944444444000</text:p>
          </table:table-cell>
          <table:table-cell table:formula="of:=[.D663]-[.D662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2]+15" office:value-type="float" office:value="9930" calcext:value-type="float">
            <text:p>9930</text:p>
          </table:table-cell>
          <table:table-cell office:value-type="float" office:value="8640000" calcext:value-type="float">
            <text:p>8640000</text:p>
          </table:table-cell>
          <table:table-cell table:formula="of:=[.B663]/[.C663]" office:value-type="float" office:value="0.00114930555555556" calcext:value-type="float">
            <text:p>0,00114930555555556000</text:p>
          </table:table-cell>
          <table:table-cell table:formula="of:=[.D664]-[.D66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3]+15" office:value-type="float" office:value="9945" calcext:value-type="float">
            <text:p>9945</text:p>
          </table:table-cell>
          <table:table-cell office:value-type="float" office:value="8640000" calcext:value-type="float">
            <text:p>8640000</text:p>
          </table:table-cell>
          <table:table-cell table:formula="of:=[.B664]/[.C664]" office:value-type="float" office:value="0.00115104166666667" calcext:value-type="float">
            <text:p>0,00115104166666667000</text:p>
          </table:table-cell>
          <table:table-cell table:formula="of:=[.D665]-[.D664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4]+15" office:value-type="float" office:value="9960" calcext:value-type="float">
            <text:p>9960</text:p>
          </table:table-cell>
          <table:table-cell office:value-type="float" office:value="8640000" calcext:value-type="float">
            <text:p>8640000</text:p>
          </table:table-cell>
          <table:table-cell table:formula="of:=[.B665]/[.C665]" office:value-type="float" office:value="0.00115277777777778" calcext:value-type="float">
            <text:p>0,00115277777777778000</text:p>
          </table:table-cell>
          <table:table-cell table:formula="of:=[.D666]-[.D66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5]+15" office:value-type="float" office:value="9975" calcext:value-type="float">
            <text:p>9975</text:p>
          </table:table-cell>
          <table:table-cell office:value-type="float" office:value="8640000" calcext:value-type="float">
            <text:p>8640000</text:p>
          </table:table-cell>
          <table:table-cell table:formula="of:=[.B666]/[.C666]" office:value-type="float" office:value="0.00115451388888889" calcext:value-type="float">
            <text:p>0,00115451388888889000</text:p>
          </table:table-cell>
          <table:table-cell table:formula="of:=[.D667]-[.D666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6]+15" office:value-type="float" office:value="9990" calcext:value-type="float">
            <text:p>9990</text:p>
          </table:table-cell>
          <table:table-cell office:value-type="float" office:value="8640000" calcext:value-type="float">
            <text:p>8640000</text:p>
          </table:table-cell>
          <table:table-cell table:formula="of:=[.B667]/[.C667]" office:value-type="float" office:value="0.00115625" calcext:value-type="float">
            <text:p>0,00115625000000000000</text:p>
          </table:table-cell>
          <table:table-cell table:formula="of:=[.D668]-[.D66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667]+15" office:value-type="float" office:value="10005" calcext:value-type="float">
            <text:p>10005</text:p>
          </table:table-cell>
          <table:table-cell office:value-type="float" office:value="8640000" calcext:value-type="float">
            <text:p>8640000</text:p>
          </table:table-cell>
          <table:table-cell table:formula="of:=[.B668]/[.C668]" office:value-type="float" office:value="0.00115798611111111" calcext:value-type="float">
            <text:p>0,00115798611111111000</text:p>
          </table:table-cell>
          <table:table-cell table:formula="of:=[.D669]-[.D668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668]+15" office:value-type="float" office:value="10020" calcext:value-type="float">
            <text:p>10020</text:p>
          </table:table-cell>
          <table:table-cell office:value-type="float" office:value="8640000" calcext:value-type="float">
            <text:p>8640000</text:p>
          </table:table-cell>
          <table:table-cell table:formula="of:=[.B669]/[.C669]" office:value-type="float" office:value="0.00115972222222222" calcext:value-type="float">
            <text:p>0,00115972222222222000</text:p>
          </table:table-cell>
          <table:table-cell table:formula="of:=[.D670]-[.D66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669]+15" office:value-type="float" office:value="10035" calcext:value-type="float">
            <text:p>10035</text:p>
          </table:table-cell>
          <table:table-cell office:value-type="float" office:value="8640000" calcext:value-type="float">
            <text:p>8640000</text:p>
          </table:table-cell>
          <table:table-cell table:formula="of:=[.B670]/[.C670]" office:value-type="float" office:value="0.00116145833333333" calcext:value-type="float">
            <text:p>0,00116145833333333000</text:p>
          </table:table-cell>
          <table:table-cell table:formula="of:=[.D671]-[.D670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670]+15" office:value-type="float" office:value="10050" calcext:value-type="float">
            <text:p>10050</text:p>
          </table:table-cell>
          <table:table-cell office:value-type="float" office:value="8640000" calcext:value-type="float">
            <text:p>8640000</text:p>
          </table:table-cell>
          <table:table-cell table:formula="of:=[.B671]/[.C671]" office:value-type="float" office:value="0.00116319444444444" calcext:value-type="float">
            <text:p>0,00116319444444444000</text:p>
          </table:table-cell>
          <table:table-cell table:formula="of:=[.D672]-[.D67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671]+15" office:value-type="float" office:value="10065" calcext:value-type="float">
            <text:p>10065</text:p>
          </table:table-cell>
          <table:table-cell office:value-type="float" office:value="8640000" calcext:value-type="float">
            <text:p>8640000</text:p>
          </table:table-cell>
          <table:table-cell table:formula="of:=[.B672]/[.C672]" office:value-type="float" office:value="0.00116493055555556" calcext:value-type="float">
            <text:p>0,00116493055555556000</text:p>
          </table:table-cell>
          <table:table-cell table:formula="of:=[.D673]-[.D67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672]+15" office:value-type="float" office:value="10080" calcext:value-type="float">
            <text:p>10080</text:p>
          </table:table-cell>
          <table:table-cell office:value-type="float" office:value="8640000" calcext:value-type="float">
            <text:p>8640000</text:p>
          </table:table-cell>
          <table:table-cell table:formula="of:=[.B673]/[.C673]" office:value-type="float" office:value="0.00116666666666667" calcext:value-type="float">
            <text:p>0,00116666666666667000</text:p>
          </table:table-cell>
          <table:table-cell table:formula="of:=[.D674]-[.D673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673]+15" office:value-type="float" office:value="10095" calcext:value-type="float">
            <text:p>10095</text:p>
          </table:table-cell>
          <table:table-cell office:value-type="float" office:value="8640000" calcext:value-type="float">
            <text:p>8640000</text:p>
          </table:table-cell>
          <table:table-cell table:formula="of:=[.B674]/[.C674]" office:value-type="float" office:value="0.00116840277777778" calcext:value-type="float">
            <text:p>0,00116840277777778000</text:p>
          </table:table-cell>
          <table:table-cell table:formula="of:=[.D675]-[.D67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674]+15" office:value-type="float" office:value="10110" calcext:value-type="float">
            <text:p>10110</text:p>
          </table:table-cell>
          <table:table-cell office:value-type="float" office:value="8640000" calcext:value-type="float">
            <text:p>8640000</text:p>
          </table:table-cell>
          <table:table-cell table:formula="of:=[.B675]/[.C675]" office:value-type="float" office:value="0.00117013888888889" calcext:value-type="float">
            <text:p>0,00117013888888889000</text:p>
          </table:table-cell>
          <table:table-cell table:formula="of:=[.D676]-[.D675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675]+15" office:value-type="float" office:value="10125" calcext:value-type="float">
            <text:p>10125</text:p>
          </table:table-cell>
          <table:table-cell office:value-type="float" office:value="8640000" calcext:value-type="float">
            <text:p>8640000</text:p>
          </table:table-cell>
          <table:table-cell table:formula="of:=[.B676]/[.C676]" office:value-type="float" office:value="0.001171875" calcext:value-type="float">
            <text:p>0,00117187500000000000</text:p>
          </table:table-cell>
          <table:table-cell table:formula="of:=[.D677]-[.D67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676]+15" office:value-type="float" office:value="10140" calcext:value-type="float">
            <text:p>10140</text:p>
          </table:table-cell>
          <table:table-cell office:value-type="float" office:value="8640000" calcext:value-type="float">
            <text:p>8640000</text:p>
          </table:table-cell>
          <table:table-cell table:formula="of:=[.B677]/[.C677]" office:value-type="float" office:value="0.00117361111111111" calcext:value-type="float">
            <text:p>0,00117361111111111000</text:p>
          </table:table-cell>
          <table:table-cell table:formula="of:=[.D678]-[.D677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677]+15" office:value-type="float" office:value="10155" calcext:value-type="float">
            <text:p>10155</text:p>
          </table:table-cell>
          <table:table-cell office:value-type="float" office:value="8640000" calcext:value-type="float">
            <text:p>8640000</text:p>
          </table:table-cell>
          <table:table-cell table:formula="of:=[.B678]/[.C678]" office:value-type="float" office:value="0.00117534722222222" calcext:value-type="float">
            <text:p>0,00117534722222222000</text:p>
          </table:table-cell>
          <table:table-cell table:formula="of:=[.D679]-[.D67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678]+15" office:value-type="float" office:value="10170" calcext:value-type="float">
            <text:p>10170</text:p>
          </table:table-cell>
          <table:table-cell office:value-type="float" office:value="8640000" calcext:value-type="float">
            <text:p>8640000</text:p>
          </table:table-cell>
          <table:table-cell table:formula="of:=[.B679]/[.C679]" office:value-type="float" office:value="0.00117708333333333" calcext:value-type="float">
            <text:p>0,00117708333333333000</text:p>
          </table:table-cell>
          <table:table-cell table:formula="of:=[.D680]-[.D679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679]+15" office:value-type="float" office:value="10185" calcext:value-type="float">
            <text:p>10185</text:p>
          </table:table-cell>
          <table:table-cell office:value-type="float" office:value="8640000" calcext:value-type="float">
            <text:p>8640000</text:p>
          </table:table-cell>
          <table:table-cell table:formula="of:=[.B680]/[.C680]" office:value-type="float" office:value="0.00117881944444444" calcext:value-type="float">
            <text:p>0,00117881944444444000</text:p>
          </table:table-cell>
          <table:table-cell table:formula="of:=[.D681]-[.D68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680]+15" office:value-type="float" office:value="10200" calcext:value-type="float">
            <text:p>10200</text:p>
          </table:table-cell>
          <table:table-cell office:value-type="float" office:value="8640000" calcext:value-type="float">
            <text:p>8640000</text:p>
          </table:table-cell>
          <table:table-cell table:formula="of:=[.B681]/[.C681]" office:value-type="float" office:value="0.00118055555555556" calcext:value-type="float">
            <text:p>0,00118055555555556000</text:p>
          </table:table-cell>
          <table:table-cell table:formula="of:=[.D682]-[.D681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681]+15" office:value-type="float" office:value="10215" calcext:value-type="float">
            <text:p>10215</text:p>
          </table:table-cell>
          <table:table-cell office:value-type="float" office:value="8640000" calcext:value-type="float">
            <text:p>8640000</text:p>
          </table:table-cell>
          <table:table-cell table:formula="of:=[.B682]/[.C682]" office:value-type="float" office:value="0.00118229166666667" calcext:value-type="float">
            <text:p>0,00118229166666667000</text:p>
          </table:table-cell>
          <table:table-cell table:formula="of:=[.D683]-[.D68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682]+15" office:value-type="float" office:value="10230" calcext:value-type="float">
            <text:p>10230</text:p>
          </table:table-cell>
          <table:table-cell office:value-type="float" office:value="8640000" calcext:value-type="float">
            <text:p>8640000</text:p>
          </table:table-cell>
          <table:table-cell table:formula="of:=[.B683]/[.C683]" office:value-type="float" office:value="0.00118402777777778" calcext:value-type="float">
            <text:p>0,00118402777777778000</text:p>
          </table:table-cell>
          <table:table-cell table:formula="of:=[.D684]-[.D68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683]+15" office:value-type="float" office:value="10245" calcext:value-type="float">
            <text:p>10245</text:p>
          </table:table-cell>
          <table:table-cell office:value-type="float" office:value="8640000" calcext:value-type="float">
            <text:p>8640000</text:p>
          </table:table-cell>
          <table:table-cell table:formula="of:=[.B684]/[.C684]" office:value-type="float" office:value="0.00118576388888889" calcext:value-type="float">
            <text:p>0,00118576388888889000</text:p>
          </table:table-cell>
          <table:table-cell table:formula="of:=[.D685]-[.D684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684]+15" office:value-type="float" office:value="10260" calcext:value-type="float">
            <text:p>10260</text:p>
          </table:table-cell>
          <table:table-cell office:value-type="float" office:value="8640000" calcext:value-type="float">
            <text:p>8640000</text:p>
          </table:table-cell>
          <table:table-cell table:formula="of:=[.B685]/[.C685]" office:value-type="float" office:value="0.0011875" calcext:value-type="float">
            <text:p>0,00118750000000000000</text:p>
          </table:table-cell>
          <table:table-cell table:formula="of:=[.D686]-[.D68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685]+15" office:value-type="float" office:value="10275" calcext:value-type="float">
            <text:p>10275</text:p>
          </table:table-cell>
          <table:table-cell office:value-type="float" office:value="8640000" calcext:value-type="float">
            <text:p>8640000</text:p>
          </table:table-cell>
          <table:table-cell table:formula="of:=[.B686]/[.C686]" office:value-type="float" office:value="0.00118923611111111" calcext:value-type="float">
            <text:p>0,00118923611111111000</text:p>
          </table:table-cell>
          <table:table-cell table:formula="of:=[.D687]-[.D686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B686]+15" office:value-type="float" office:value="10290" calcext:value-type="float">
            <text:p>10290</text:p>
          </table:table-cell>
          <table:table-cell office:value-type="float" office:value="8640000" calcext:value-type="float">
            <text:p>8640000</text:p>
          </table:table-cell>
          <table:table-cell table:formula="of:=[.B687]/[.C687]" office:value-type="float" office:value="0.00119097222222222" calcext:value-type="float">
            <text:p>0,00119097222222222000</text:p>
          </table:table-cell>
          <table:table-cell table:formula="of:=[.D688]-[.D68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B687]+15" office:value-type="float" office:value="10305" calcext:value-type="float">
            <text:p>10305</text:p>
          </table:table-cell>
          <table:table-cell office:value-type="float" office:value="8640000" calcext:value-type="float">
            <text:p>8640000</text:p>
          </table:table-cell>
          <table:table-cell table:formula="of:=[.B688]/[.C688]" office:value-type="float" office:value="0.00119270833333333" calcext:value-type="float">
            <text:p>0,00119270833333333000</text:p>
          </table:table-cell>
          <table:table-cell table:formula="of:=[.D689]-[.D688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B688]+15" office:value-type="float" office:value="10320" calcext:value-type="float">
            <text:p>10320</text:p>
          </table:table-cell>
          <table:table-cell office:value-type="float" office:value="8640000" calcext:value-type="float">
            <text:p>8640000</text:p>
          </table:table-cell>
          <table:table-cell table:formula="of:=[.B689]/[.C689]" office:value-type="float" office:value="0.00119444444444444" calcext:value-type="float">
            <text:p>0,00119444444444444000</text:p>
          </table:table-cell>
          <table:table-cell table:formula="of:=[.D690]-[.D68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B689]+15" office:value-type="float" office:value="10335" calcext:value-type="float">
            <text:p>10335</text:p>
          </table:table-cell>
          <table:table-cell office:value-type="float" office:value="8640000" calcext:value-type="float">
            <text:p>8640000</text:p>
          </table:table-cell>
          <table:table-cell table:formula="of:=[.B690]/[.C690]" office:value-type="float" office:value="0.00119618055555556" calcext:value-type="float">
            <text:p>0,00119618055555556000</text:p>
          </table:table-cell>
          <table:table-cell table:formula="of:=[.D691]-[.D690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B690]+15" office:value-type="float" office:value="10350" calcext:value-type="float">
            <text:p>10350</text:p>
          </table:table-cell>
          <table:table-cell office:value-type="float" office:value="8640000" calcext:value-type="float">
            <text:p>8640000</text:p>
          </table:table-cell>
          <table:table-cell table:formula="of:=[.B691]/[.C691]" office:value-type="float" office:value="0.00119791666666667" calcext:value-type="float">
            <text:p>0,00119791666666667000</text:p>
          </table:table-cell>
          <table:table-cell table:formula="of:=[.D692]-[.D69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B691]+15" office:value-type="float" office:value="10365" calcext:value-type="float">
            <text:p>10365</text:p>
          </table:table-cell>
          <table:table-cell office:value-type="float" office:value="8640000" calcext:value-type="float">
            <text:p>8640000</text:p>
          </table:table-cell>
          <table:table-cell table:formula="of:=[.B692]/[.C692]" office:value-type="float" office:value="0.00119965277777778" calcext:value-type="float">
            <text:p>0,00119965277777778000</text:p>
          </table:table-cell>
          <table:table-cell table:formula="of:=[.D693]-[.D69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92]+15" office:value-type="float" office:value="10380" calcext:value-type="float">
            <text:p>10380</text:p>
          </table:table-cell>
          <table:table-cell office:value-type="float" office:value="8640000" calcext:value-type="float">
            <text:p>8640000</text:p>
          </table:table-cell>
          <table:table-cell table:formula="of:=[.B693]/[.C693]" office:value-type="float" office:value="0.00120138888888889" calcext:value-type="float">
            <text:p>0,00120138888888889000</text:p>
          </table:table-cell>
          <table:table-cell table:formula="of:=[.D694]-[.D693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B693]+15" office:value-type="float" office:value="10395" calcext:value-type="float">
            <text:p>10395</text:p>
          </table:table-cell>
          <table:table-cell office:value-type="float" office:value="8640000" calcext:value-type="float">
            <text:p>8640000</text:p>
          </table:table-cell>
          <table:table-cell table:formula="of:=[.B694]/[.C694]" office:value-type="float" office:value="0.001203125" calcext:value-type="float">
            <text:p>0,00120312500000000000</text:p>
          </table:table-cell>
          <table:table-cell table:formula="of:=[.D695]-[.D69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B694]+15" office:value-type="float" office:value="10410" calcext:value-type="float">
            <text:p>10410</text:p>
          </table:table-cell>
          <table:table-cell office:value-type="float" office:value="8640000" calcext:value-type="float">
            <text:p>8640000</text:p>
          </table:table-cell>
          <table:table-cell table:formula="of:=[.B695]/[.C695]" office:value-type="float" office:value="0.00120486111111111" calcext:value-type="float">
            <text:p>0,00120486111111111000</text:p>
          </table:table-cell>
          <table:table-cell table:formula="of:=[.D696]-[.D695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695]+15" office:value-type="float" office:value="10425" calcext:value-type="float">
            <text:p>10425</text:p>
          </table:table-cell>
          <table:table-cell office:value-type="float" office:value="8640000" calcext:value-type="float">
            <text:p>8640000</text:p>
          </table:table-cell>
          <table:table-cell table:formula="of:=[.B696]/[.C696]" office:value-type="float" office:value="0.00120659722222222" calcext:value-type="float">
            <text:p>0,00120659722222222000</text:p>
          </table:table-cell>
          <table:table-cell table:formula="of:=[.D697]-[.D69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B696]+15" office:value-type="float" office:value="10440" calcext:value-type="float">
            <text:p>10440</text:p>
          </table:table-cell>
          <table:table-cell office:value-type="float" office:value="8640000" calcext:value-type="float">
            <text:p>8640000</text:p>
          </table:table-cell>
          <table:table-cell table:formula="of:=[.B697]/[.C697]" office:value-type="float" office:value="0.00120833333333333" calcext:value-type="float">
            <text:p>0,00120833333333333000</text:p>
          </table:table-cell>
          <table:table-cell table:formula="of:=[.D698]-[.D697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B697]+15" office:value-type="float" office:value="10455" calcext:value-type="float">
            <text:p>10455</text:p>
          </table:table-cell>
          <table:table-cell office:value-type="float" office:value="8640000" calcext:value-type="float">
            <text:p>8640000</text:p>
          </table:table-cell>
          <table:table-cell table:formula="of:=[.B698]/[.C698]" office:value-type="float" office:value="0.00121006944444444" calcext:value-type="float">
            <text:p>0,00121006944444444000</text:p>
          </table:table-cell>
          <table:table-cell table:formula="of:=[.D699]-[.D69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698]+15" office:value-type="float" office:value="10470" calcext:value-type="float">
            <text:p>10470</text:p>
          </table:table-cell>
          <table:table-cell office:value-type="float" office:value="8640000" calcext:value-type="float">
            <text:p>8640000</text:p>
          </table:table-cell>
          <table:table-cell table:formula="of:=[.B699]/[.C699]" office:value-type="float" office:value="0.00121180555555556" calcext:value-type="float">
            <text:p>0,00121180555555556000</text:p>
          </table:table-cell>
          <table:table-cell table:formula="of:=[.D700]-[.D699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B699]+15" office:value-type="float" office:value="10485" calcext:value-type="float">
            <text:p>10485</text:p>
          </table:table-cell>
          <table:table-cell office:value-type="float" office:value="8640000" calcext:value-type="float">
            <text:p>8640000</text:p>
          </table:table-cell>
          <table:table-cell table:formula="of:=[.B700]/[.C700]" office:value-type="float" office:value="0.00121354166666667" calcext:value-type="float">
            <text:p>0,00121354166666667000</text:p>
          </table:table-cell>
          <table:table-cell table:formula="of:=[.D701]-[.D70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700]+15" office:value-type="float" office:value="10500" calcext:value-type="float">
            <text:p>10500</text:p>
          </table:table-cell>
          <table:table-cell office:value-type="float" office:value="8640000" calcext:value-type="float">
            <text:p>8640000</text:p>
          </table:table-cell>
          <table:table-cell table:formula="of:=[.B701]/[.C701]" office:value-type="float" office:value="0.00121527777777778" calcext:value-type="float">
            <text:p>0,00121527777777778000</text:p>
          </table:table-cell>
          <table:table-cell table:formula="of:=[.D702]-[.D701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B701]+15" office:value-type="float" office:value="10515" calcext:value-type="float">
            <text:p>10515</text:p>
          </table:table-cell>
          <table:table-cell office:value-type="float" office:value="8640000" calcext:value-type="float">
            <text:p>8640000</text:p>
          </table:table-cell>
          <table:table-cell table:formula="of:=[.B702]/[.C702]" office:value-type="float" office:value="0.00121701388888889" calcext:value-type="float">
            <text:p>0,00121701388888889000</text:p>
          </table:table-cell>
          <table:table-cell table:formula="of:=[.D703]-[.D70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B702]+15" office:value-type="float" office:value="10530" calcext:value-type="float">
            <text:p>10530</text:p>
          </table:table-cell>
          <table:table-cell office:value-type="float" office:value="8640000" calcext:value-type="float">
            <text:p>8640000</text:p>
          </table:table-cell>
          <table:table-cell table:formula="of:=[.B703]/[.C703]" office:value-type="float" office:value="0.00121875" calcext:value-type="float">
            <text:p>0,00121875000000000000</text:p>
          </table:table-cell>
          <table:table-cell table:formula="of:=[.D704]-[.D70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B703]+15" office:value-type="float" office:value="10545" calcext:value-type="float">
            <text:p>10545</text:p>
          </table:table-cell>
          <table:table-cell office:value-type="float" office:value="8640000" calcext:value-type="float">
            <text:p>8640000</text:p>
          </table:table-cell>
          <table:table-cell table:formula="of:=[.B704]/[.C704]" office:value-type="float" office:value="0.00122048611111111" calcext:value-type="float">
            <text:p>0,00122048611111111000</text:p>
          </table:table-cell>
          <table:table-cell table:formula="of:=[.D705]-[.D704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B704]+15" office:value-type="float" office:value="10560" calcext:value-type="float">
            <text:p>10560</text:p>
          </table:table-cell>
          <table:table-cell office:value-type="float" office:value="8640000" calcext:value-type="float">
            <text:p>8640000</text:p>
          </table:table-cell>
          <table:table-cell table:formula="of:=[.B705]/[.C705]" office:value-type="float" office:value="0.00122222222222222" calcext:value-type="float">
            <text:p>0,00122222222222222000</text:p>
          </table:table-cell>
          <table:table-cell table:formula="of:=[.D706]-[.D70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B705]+15" office:value-type="float" office:value="10575" calcext:value-type="float">
            <text:p>10575</text:p>
          </table:table-cell>
          <table:table-cell office:value-type="float" office:value="8640000" calcext:value-type="float">
            <text:p>8640000</text:p>
          </table:table-cell>
          <table:table-cell table:formula="of:=[.B706]/[.C706]" office:value-type="float" office:value="0.00122395833333333" calcext:value-type="float">
            <text:p>0,00122395833333333000</text:p>
          </table:table-cell>
          <table:table-cell table:formula="of:=[.D707]-[.D706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B706]+15" office:value-type="float" office:value="10590" calcext:value-type="float">
            <text:p>10590</text:p>
          </table:table-cell>
          <table:table-cell office:value-type="float" office:value="8640000" calcext:value-type="float">
            <text:p>8640000</text:p>
          </table:table-cell>
          <table:table-cell table:formula="of:=[.B707]/[.C707]" office:value-type="float" office:value="0.00122569444444444" calcext:value-type="float">
            <text:p>0,00122569444444444000</text:p>
          </table:table-cell>
          <table:table-cell table:formula="of:=[.D708]-[.D70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B707]+15" office:value-type="float" office:value="10605" calcext:value-type="float">
            <text:p>10605</text:p>
          </table:table-cell>
          <table:table-cell office:value-type="float" office:value="8640000" calcext:value-type="float">
            <text:p>8640000</text:p>
          </table:table-cell>
          <table:table-cell table:formula="of:=[.B708]/[.C708]" office:value-type="float" office:value="0.00122743055555556" calcext:value-type="float">
            <text:p>0,00122743055555556000</text:p>
          </table:table-cell>
          <table:table-cell table:formula="of:=[.D709]-[.D708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B708]+15" office:value-type="float" office:value="10620" calcext:value-type="float">
            <text:p>10620</text:p>
          </table:table-cell>
          <table:table-cell office:value-type="float" office:value="8640000" calcext:value-type="float">
            <text:p>8640000</text:p>
          </table:table-cell>
          <table:table-cell table:formula="of:=[.B709]/[.C709]" office:value-type="float" office:value="0.00122916666666667" calcext:value-type="float">
            <text:p>0,00122916666666667000</text:p>
          </table:table-cell>
          <table:table-cell table:formula="of:=[.D710]-[.D70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B709]+15" office:value-type="float" office:value="10635" calcext:value-type="float">
            <text:p>10635</text:p>
          </table:table-cell>
          <table:table-cell office:value-type="float" office:value="8640000" calcext:value-type="float">
            <text:p>8640000</text:p>
          </table:table-cell>
          <table:table-cell table:formula="of:=[.B710]/[.C710]" office:value-type="float" office:value="0.00123090277777778" calcext:value-type="float">
            <text:p>0,00123090277777778000</text:p>
          </table:table-cell>
          <table:table-cell table:formula="of:=[.D711]-[.D710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B710]+15" office:value-type="float" office:value="10650" calcext:value-type="float">
            <text:p>10650</text:p>
          </table:table-cell>
          <table:table-cell office:value-type="float" office:value="8640000" calcext:value-type="float">
            <text:p>8640000</text:p>
          </table:table-cell>
          <table:table-cell table:formula="of:=[.B711]/[.C711]" office:value-type="float" office:value="0.00123263888888889" calcext:value-type="float">
            <text:p>0,00123263888888889000</text:p>
          </table:table-cell>
          <table:table-cell table:formula="of:=[.D712]-[.D71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B711]+15" office:value-type="float" office:value="10665" calcext:value-type="float">
            <text:p>10665</text:p>
          </table:table-cell>
          <table:table-cell office:value-type="float" office:value="8640000" calcext:value-type="float">
            <text:p>8640000</text:p>
          </table:table-cell>
          <table:table-cell table:formula="of:=[.B712]/[.C712]" office:value-type="float" office:value="0.001234375" calcext:value-type="float">
            <text:p>0,00123437500000000000</text:p>
          </table:table-cell>
          <table:table-cell table:formula="of:=[.D713]-[.D712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B712]+15" office:value-type="float" office:value="10680" calcext:value-type="float">
            <text:p>10680</text:p>
          </table:table-cell>
          <table:table-cell office:value-type="float" office:value="8640000" calcext:value-type="float">
            <text:p>8640000</text:p>
          </table:table-cell>
          <table:table-cell table:formula="of:=[.B713]/[.C713]" office:value-type="float" office:value="0.00123611111111111" calcext:value-type="float">
            <text:p>0,00123611111111111000</text:p>
          </table:table-cell>
          <table:table-cell table:formula="of:=[.D714]-[.D71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B713]+15" office:value-type="float" office:value="10695" calcext:value-type="float">
            <text:p>10695</text:p>
          </table:table-cell>
          <table:table-cell office:value-type="float" office:value="8640000" calcext:value-type="float">
            <text:p>8640000</text:p>
          </table:table-cell>
          <table:table-cell table:formula="of:=[.B714]/[.C714]" office:value-type="float" office:value="0.00123784722222222" calcext:value-type="float">
            <text:p>0,00123784722222222000</text:p>
          </table:table-cell>
          <table:table-cell table:formula="of:=[.D715]-[.D71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B714]+15" office:value-type="float" office:value="10710" calcext:value-type="float">
            <text:p>10710</text:p>
          </table:table-cell>
          <table:table-cell office:value-type="float" office:value="8640000" calcext:value-type="float">
            <text:p>8640000</text:p>
          </table:table-cell>
          <table:table-cell table:formula="of:=[.B715]/[.C715]" office:value-type="float" office:value="0.00123958333333333" calcext:value-type="float">
            <text:p>0,00123958333333333000</text:p>
          </table:table-cell>
          <table:table-cell table:formula="of:=[.D716]-[.D715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B715]+15" office:value-type="float" office:value="10725" calcext:value-type="float">
            <text:p>10725</text:p>
          </table:table-cell>
          <table:table-cell office:value-type="float" office:value="8640000" calcext:value-type="float">
            <text:p>8640000</text:p>
          </table:table-cell>
          <table:table-cell table:formula="of:=[.B716]/[.C716]" office:value-type="float" office:value="0.00124131944444444" calcext:value-type="float">
            <text:p>0,00124131944444444000</text:p>
          </table:table-cell>
          <table:table-cell table:formula="of:=[.D717]-[.D71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B716]+15" office:value-type="float" office:value="10740" calcext:value-type="float">
            <text:p>10740</text:p>
          </table:table-cell>
          <table:table-cell office:value-type="float" office:value="8640000" calcext:value-type="float">
            <text:p>8640000</text:p>
          </table:table-cell>
          <table:table-cell table:formula="of:=[.B717]/[.C717]" office:value-type="float" office:value="0.00124305555555556" calcext:value-type="float">
            <text:p>0,00124305555555556000</text:p>
          </table:table-cell>
          <table:table-cell table:formula="of:=[.D718]-[.D717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B717]+15" office:value-type="float" office:value="10755" calcext:value-type="float">
            <text:p>10755</text:p>
          </table:table-cell>
          <table:table-cell office:value-type="float" office:value="8640000" calcext:value-type="float">
            <text:p>8640000</text:p>
          </table:table-cell>
          <table:table-cell table:formula="of:=[.B718]/[.C718]" office:value-type="float" office:value="0.00124479166666667" calcext:value-type="float">
            <text:p>0,00124479166666667000</text:p>
          </table:table-cell>
          <table:table-cell table:formula="of:=[.D719]-[.D71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B718]+15" office:value-type="float" office:value="10770" calcext:value-type="float">
            <text:p>10770</text:p>
          </table:table-cell>
          <table:table-cell office:value-type="float" office:value="8640000" calcext:value-type="float">
            <text:p>8640000</text:p>
          </table:table-cell>
          <table:table-cell table:formula="of:=[.B719]/[.C719]" office:value-type="float" office:value="0.00124652777777778" calcext:value-type="float">
            <text:p>0,00124652777777778000</text:p>
          </table:table-cell>
          <table:table-cell table:formula="of:=[.D720]-[.D719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B719]+15" office:value-type="float" office:value="10785" calcext:value-type="float">
            <text:p>10785</text:p>
          </table:table-cell>
          <table:table-cell office:value-type="float" office:value="8640000" calcext:value-type="float">
            <text:p>8640000</text:p>
          </table:table-cell>
          <table:table-cell table:formula="of:=[.B720]/[.C720]" office:value-type="float" office:value="0.00124826388888889" calcext:value-type="float">
            <text:p>0,00124826388888889000</text:p>
          </table:table-cell>
          <table:table-cell table:formula="of:=[.D721]-[.D72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B720]+15" office:value-type="float" office:value="10800" calcext:value-type="float">
            <text:p>10800</text:p>
          </table:table-cell>
          <table:table-cell office:value-type="float" office:value="8640000" calcext:value-type="float">
            <text:p>8640000</text:p>
          </table:table-cell>
          <table:table-cell table:formula="of:=[.B721]/[.C721]" office:value-type="float" office:value="0.00125" calcext:value-type="float">
            <text:p>0,00125000000000000000</text:p>
          </table:table-cell>
          <table:table-cell table:formula="of:=[.D722]-[.D721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B721]+15" office:value-type="float" office:value="10815" calcext:value-type="float">
            <text:p>10815</text:p>
          </table:table-cell>
          <table:table-cell office:value-type="float" office:value="8640000" calcext:value-type="float">
            <text:p>8640000</text:p>
          </table:table-cell>
          <table:table-cell table:formula="of:=[.B722]/[.C722]" office:value-type="float" office:value="0.00125173611111111" calcext:value-type="float">
            <text:p>0,00125173611111111000</text:p>
          </table:table-cell>
          <table:table-cell table:formula="of:=[.D723]-[.D72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B722]+15" office:value-type="float" office:value="10830" calcext:value-type="float">
            <text:p>10830</text:p>
          </table:table-cell>
          <table:table-cell office:value-type="float" office:value="8640000" calcext:value-type="float">
            <text:p>8640000</text:p>
          </table:table-cell>
          <table:table-cell table:formula="of:=[.B723]/[.C723]" office:value-type="float" office:value="0.00125347222222222" calcext:value-type="float">
            <text:p>0,00125347222222222000</text:p>
          </table:table-cell>
          <table:table-cell table:formula="of:=[.D724]-[.D72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B723]+15" office:value-type="float" office:value="10845" calcext:value-type="float">
            <text:p>10845</text:p>
          </table:table-cell>
          <table:table-cell office:value-type="float" office:value="8640000" calcext:value-type="float">
            <text:p>8640000</text:p>
          </table:table-cell>
          <table:table-cell table:formula="of:=[.B724]/[.C724]" office:value-type="float" office:value="0.00125520833333333" calcext:value-type="float">
            <text:p>0,00125520833333333000</text:p>
          </table:table-cell>
          <table:table-cell table:formula="of:=[.D725]-[.D724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B724]+15" office:value-type="float" office:value="10860" calcext:value-type="float">
            <text:p>10860</text:p>
          </table:table-cell>
          <table:table-cell office:value-type="float" office:value="8640000" calcext:value-type="float">
            <text:p>8640000</text:p>
          </table:table-cell>
          <table:table-cell table:formula="of:=[.B725]/[.C725]" office:value-type="float" office:value="0.00125694444444444" calcext:value-type="float">
            <text:p>0,00125694444444444000</text:p>
          </table:table-cell>
          <table:table-cell table:formula="of:=[.D726]-[.D72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B725]+15" office:value-type="float" office:value="10875" calcext:value-type="float">
            <text:p>10875</text:p>
          </table:table-cell>
          <table:table-cell office:value-type="float" office:value="8640000" calcext:value-type="float">
            <text:p>8640000</text:p>
          </table:table-cell>
          <table:table-cell table:formula="of:=[.B726]/[.C726]" office:value-type="float" office:value="0.00125868055555556" calcext:value-type="float">
            <text:p>0,00125868055555556000</text:p>
          </table:table-cell>
          <table:table-cell table:formula="of:=[.D727]-[.D726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B726]+15" office:value-type="float" office:value="10890" calcext:value-type="float">
            <text:p>10890</text:p>
          </table:table-cell>
          <table:table-cell office:value-type="float" office:value="8640000" calcext:value-type="float">
            <text:p>8640000</text:p>
          </table:table-cell>
          <table:table-cell table:formula="of:=[.B727]/[.C727]" office:value-type="float" office:value="0.00126041666666667" calcext:value-type="float">
            <text:p>0,00126041666666667000</text:p>
          </table:table-cell>
          <table:table-cell table:formula="of:=[.D728]-[.D72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B727]+15" office:value-type="float" office:value="10905" calcext:value-type="float">
            <text:p>10905</text:p>
          </table:table-cell>
          <table:table-cell office:value-type="float" office:value="8640000" calcext:value-type="float">
            <text:p>8640000</text:p>
          </table:table-cell>
          <table:table-cell table:formula="of:=[.B728]/[.C728]" office:value-type="float" office:value="0.00126215277777778" calcext:value-type="float">
            <text:p>0,00126215277777778000</text:p>
          </table:table-cell>
          <table:table-cell table:formula="of:=[.D729]-[.D728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B728]+15" office:value-type="float" office:value="10920" calcext:value-type="float">
            <text:p>10920</text:p>
          </table:table-cell>
          <table:table-cell office:value-type="float" office:value="8640000" calcext:value-type="float">
            <text:p>8640000</text:p>
          </table:table-cell>
          <table:table-cell table:formula="of:=[.B729]/[.C729]" office:value-type="float" office:value="0.00126388888888889" calcext:value-type="float">
            <text:p>0,00126388888888889000</text:p>
          </table:table-cell>
          <table:table-cell table:formula="of:=[.D730]-[.D72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B729]+15" office:value-type="float" office:value="10935" calcext:value-type="float">
            <text:p>10935</text:p>
          </table:table-cell>
          <table:table-cell office:value-type="float" office:value="8640000" calcext:value-type="float">
            <text:p>8640000</text:p>
          </table:table-cell>
          <table:table-cell table:formula="of:=[.B730]/[.C730]" office:value-type="float" office:value="0.001265625" calcext:value-type="float">
            <text:p>0,00126562500000000000</text:p>
          </table:table-cell>
          <table:table-cell table:formula="of:=[.D731]-[.D730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B730]+15" office:value-type="float" office:value="10950" calcext:value-type="float">
            <text:p>10950</text:p>
          </table:table-cell>
          <table:table-cell office:value-type="float" office:value="8640000" calcext:value-type="float">
            <text:p>8640000</text:p>
          </table:table-cell>
          <table:table-cell table:formula="of:=[.B731]/[.C731]" office:value-type="float" office:value="0.00126736111111111" calcext:value-type="float">
            <text:p>0,00126736111111111000</text:p>
          </table:table-cell>
          <table:table-cell table:formula="of:=[.D732]-[.D73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B731]+15" office:value-type="float" office:value="10965" calcext:value-type="float">
            <text:p>10965</text:p>
          </table:table-cell>
          <table:table-cell office:value-type="float" office:value="8640000" calcext:value-type="float">
            <text:p>8640000</text:p>
          </table:table-cell>
          <table:table-cell table:formula="of:=[.B732]/[.C732]" office:value-type="float" office:value="0.00126909722222222" calcext:value-type="float">
            <text:p>0,00126909722222222000</text:p>
          </table:table-cell>
          <table:table-cell table:formula="of:=[.D733]-[.D732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B732]+15" office:value-type="float" office:value="10980" calcext:value-type="float">
            <text:p>10980</text:p>
          </table:table-cell>
          <table:table-cell office:value-type="float" office:value="8640000" calcext:value-type="float">
            <text:p>8640000</text:p>
          </table:table-cell>
          <table:table-cell table:formula="of:=[.B733]/[.C733]" office:value-type="float" office:value="0.00127083333333333" calcext:value-type="float">
            <text:p>0,00127083333333333000</text:p>
          </table:table-cell>
          <table:table-cell table:formula="of:=[.D734]-[.D73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B733]+15" office:value-type="float" office:value="10995" calcext:value-type="float">
            <text:p>10995</text:p>
          </table:table-cell>
          <table:table-cell office:value-type="float" office:value="8640000" calcext:value-type="float">
            <text:p>8640000</text:p>
          </table:table-cell>
          <table:table-cell table:formula="of:=[.B734]/[.C734]" office:value-type="float" office:value="0.00127256944444444" calcext:value-type="float">
            <text:p>0,00127256944444444000</text:p>
          </table:table-cell>
          <table:table-cell table:formula="of:=[.D735]-[.D73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B734]+15" office:value-type="float" office:value="11010" calcext:value-type="float">
            <text:p>11010</text:p>
          </table:table-cell>
          <table:table-cell office:value-type="float" office:value="8640000" calcext:value-type="float">
            <text:p>8640000</text:p>
          </table:table-cell>
          <table:table-cell table:formula="of:=[.B735]/[.C735]" office:value-type="float" office:value="0.00127430555555556" calcext:value-type="float">
            <text:p>0,00127430555555556000</text:p>
          </table:table-cell>
          <table:table-cell table:formula="of:=[.D736]-[.D735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B735]+15" office:value-type="float" office:value="11025" calcext:value-type="float">
            <text:p>11025</text:p>
          </table:table-cell>
          <table:table-cell office:value-type="float" office:value="8640000" calcext:value-type="float">
            <text:p>8640000</text:p>
          </table:table-cell>
          <table:table-cell table:formula="of:=[.B736]/[.C736]" office:value-type="float" office:value="0.00127604166666667" calcext:value-type="float">
            <text:p>0,00127604166666667000</text:p>
          </table:table-cell>
          <table:table-cell table:formula="of:=[.D737]-[.D73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B736]+15" office:value-type="float" office:value="11040" calcext:value-type="float">
            <text:p>11040</text:p>
          </table:table-cell>
          <table:table-cell office:value-type="float" office:value="8640000" calcext:value-type="float">
            <text:p>8640000</text:p>
          </table:table-cell>
          <table:table-cell table:formula="of:=[.B737]/[.C737]" office:value-type="float" office:value="0.00127777777777778" calcext:value-type="float">
            <text:p>0,00127777777777778000</text:p>
          </table:table-cell>
          <table:table-cell table:formula="of:=[.D738]-[.D737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B737]+15" office:value-type="float" office:value="11055" calcext:value-type="float">
            <text:p>11055</text:p>
          </table:table-cell>
          <table:table-cell office:value-type="float" office:value="8640000" calcext:value-type="float">
            <text:p>8640000</text:p>
          </table:table-cell>
          <table:table-cell table:formula="of:=[.B738]/[.C738]" office:value-type="float" office:value="0.00127951388888889" calcext:value-type="float">
            <text:p>0,00127951388888889000</text:p>
          </table:table-cell>
          <table:table-cell table:formula="of:=[.D739]-[.D73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B738]+15" office:value-type="float" office:value="11070" calcext:value-type="float">
            <text:p>11070</text:p>
          </table:table-cell>
          <table:table-cell office:value-type="float" office:value="8640000" calcext:value-type="float">
            <text:p>8640000</text:p>
          </table:table-cell>
          <table:table-cell table:formula="of:=[.B739]/[.C739]" office:value-type="float" office:value="0.00128125" calcext:value-type="float">
            <text:p>0,00128125000000000000</text:p>
          </table:table-cell>
          <table:table-cell table:formula="of:=[.D740]-[.D739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B739]+15" office:value-type="float" office:value="11085" calcext:value-type="float">
            <text:p>11085</text:p>
          </table:table-cell>
          <table:table-cell office:value-type="float" office:value="8640000" calcext:value-type="float">
            <text:p>8640000</text:p>
          </table:table-cell>
          <table:table-cell table:formula="of:=[.B740]/[.C740]" office:value-type="float" office:value="0.00128298611111111" calcext:value-type="float">
            <text:p>0,00128298611111111000</text:p>
          </table:table-cell>
          <table:table-cell table:formula="of:=[.D741]-[.D74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B740]+15" office:value-type="float" office:value="11100" calcext:value-type="float">
            <text:p>11100</text:p>
          </table:table-cell>
          <table:table-cell office:value-type="float" office:value="8640000" calcext:value-type="float">
            <text:p>8640000</text:p>
          </table:table-cell>
          <table:table-cell table:formula="of:=[.B741]/[.C741]" office:value-type="float" office:value="0.00128472222222222" calcext:value-type="float">
            <text:p>0,00128472222222222000</text:p>
          </table:table-cell>
          <table:table-cell table:formula="of:=[.D742]-[.D741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B741]+15" office:value-type="float" office:value="11115" calcext:value-type="float">
            <text:p>11115</text:p>
          </table:table-cell>
          <table:table-cell office:value-type="float" office:value="8640000" calcext:value-type="float">
            <text:p>8640000</text:p>
          </table:table-cell>
          <table:table-cell table:formula="of:=[.B742]/[.C742]" office:value-type="float" office:value="0.00128645833333333" calcext:value-type="float">
            <text:p>0,00128645833333333000</text:p>
          </table:table-cell>
          <table:table-cell table:formula="of:=[.D743]-[.D74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B742]+15" office:value-type="float" office:value="11130" calcext:value-type="float">
            <text:p>11130</text:p>
          </table:table-cell>
          <table:table-cell office:value-type="float" office:value="8640000" calcext:value-type="float">
            <text:p>8640000</text:p>
          </table:table-cell>
          <table:table-cell table:formula="of:=[.B743]/[.C743]" office:value-type="float" office:value="0.00128819444444444" calcext:value-type="float">
            <text:p>0,00128819444444444000</text:p>
          </table:table-cell>
          <table:table-cell table:formula="of:=[.D744]-[.D743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B743]+15" office:value-type="float" office:value="11145" calcext:value-type="float">
            <text:p>11145</text:p>
          </table:table-cell>
          <table:table-cell office:value-type="float" office:value="8640000" calcext:value-type="float">
            <text:p>8640000</text:p>
          </table:table-cell>
          <table:table-cell table:formula="of:=[.B744]/[.C744]" office:value-type="float" office:value="0.00128993055555556" calcext:value-type="float">
            <text:p>0,00128993055555556000</text:p>
          </table:table-cell>
          <table:table-cell table:formula="of:=[.D745]-[.D74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B744]+15" office:value-type="float" office:value="11160" calcext:value-type="float">
            <text:p>11160</text:p>
          </table:table-cell>
          <table:table-cell office:value-type="float" office:value="8640000" calcext:value-type="float">
            <text:p>8640000</text:p>
          </table:table-cell>
          <table:table-cell table:formula="of:=[.B745]/[.C745]" office:value-type="float" office:value="0.00129166666666667" calcext:value-type="float">
            <text:p>0,00129166666666667000</text:p>
          </table:table-cell>
          <table:table-cell table:formula="of:=[.D746]-[.D74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B745]+15" office:value-type="float" office:value="11175" calcext:value-type="float">
            <text:p>11175</text:p>
          </table:table-cell>
          <table:table-cell office:value-type="float" office:value="8640000" calcext:value-type="float">
            <text:p>8640000</text:p>
          </table:table-cell>
          <table:table-cell table:formula="of:=[.B746]/[.C746]" office:value-type="float" office:value="0.00129340277777778" calcext:value-type="float">
            <text:p>0,00129340277777778000</text:p>
          </table:table-cell>
          <table:table-cell table:formula="of:=[.D747]-[.D746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B746]+15" office:value-type="float" office:value="11190" calcext:value-type="float">
            <text:p>11190</text:p>
          </table:table-cell>
          <table:table-cell office:value-type="float" office:value="8640000" calcext:value-type="float">
            <text:p>8640000</text:p>
          </table:table-cell>
          <table:table-cell table:formula="of:=[.B747]/[.C747]" office:value-type="float" office:value="0.00129513888888889" calcext:value-type="float">
            <text:p>0,00129513888888889000</text:p>
          </table:table-cell>
          <table:table-cell table:formula="of:=[.D748]-[.D74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B747]+15" office:value-type="float" office:value="11205" calcext:value-type="float">
            <text:p>11205</text:p>
          </table:table-cell>
          <table:table-cell office:value-type="float" office:value="8640000" calcext:value-type="float">
            <text:p>8640000</text:p>
          </table:table-cell>
          <table:table-cell table:formula="of:=[.B748]/[.C748]" office:value-type="float" office:value="0.001296875" calcext:value-type="float">
            <text:p>0,00129687500000000000</text:p>
          </table:table-cell>
          <table:table-cell table:formula="of:=[.D749]-[.D748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B748]+15" office:value-type="float" office:value="11220" calcext:value-type="float">
            <text:p>11220</text:p>
          </table:table-cell>
          <table:table-cell office:value-type="float" office:value="8640000" calcext:value-type="float">
            <text:p>8640000</text:p>
          </table:table-cell>
          <table:table-cell table:formula="of:=[.B749]/[.C749]" office:value-type="float" office:value="0.00129861111111111" calcext:value-type="float">
            <text:p>0,00129861111111111000</text:p>
          </table:table-cell>
          <table:table-cell table:formula="of:=[.D750]-[.D74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B749]+15" office:value-type="float" office:value="11235" calcext:value-type="float">
            <text:p>11235</text:p>
          </table:table-cell>
          <table:table-cell office:value-type="float" office:value="8640000" calcext:value-type="float">
            <text:p>8640000</text:p>
          </table:table-cell>
          <table:table-cell table:formula="of:=[.B750]/[.C750]" office:value-type="float" office:value="0.00130034722222222" calcext:value-type="float">
            <text:p>0,00130034722222222000</text:p>
          </table:table-cell>
          <table:table-cell table:formula="of:=[.D751]-[.D750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B750]+15" office:value-type="float" office:value="11250" calcext:value-type="float">
            <text:p>11250</text:p>
          </table:table-cell>
          <table:table-cell office:value-type="float" office:value="8640000" calcext:value-type="float">
            <text:p>8640000</text:p>
          </table:table-cell>
          <table:table-cell table:formula="of:=[.B751]/[.C751]" office:value-type="float" office:value="0.00130208333333333" calcext:value-type="float">
            <text:p>0,00130208333333333000</text:p>
          </table:table-cell>
          <table:table-cell table:formula="of:=[.D752]-[.D75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B751]+15" office:value-type="float" office:value="11265" calcext:value-type="float">
            <text:p>11265</text:p>
          </table:table-cell>
          <table:table-cell office:value-type="float" office:value="8640000" calcext:value-type="float">
            <text:p>8640000</text:p>
          </table:table-cell>
          <table:table-cell table:formula="of:=[.B752]/[.C752]" office:value-type="float" office:value="0.00130381944444444" calcext:value-type="float">
            <text:p>0,00130381944444444000</text:p>
          </table:table-cell>
          <table:table-cell table:formula="of:=[.D753]-[.D752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B752]+15" office:value-type="float" office:value="11280" calcext:value-type="float">
            <text:p>11280</text:p>
          </table:table-cell>
          <table:table-cell office:value-type="float" office:value="8640000" calcext:value-type="float">
            <text:p>8640000</text:p>
          </table:table-cell>
          <table:table-cell table:formula="of:=[.B753]/[.C753]" office:value-type="float" office:value="0.00130555555555556" calcext:value-type="float">
            <text:p>0,00130555555555556000</text:p>
          </table:table-cell>
          <table:table-cell table:formula="of:=[.D754]-[.D75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B753]+15" office:value-type="float" office:value="11295" calcext:value-type="float">
            <text:p>11295</text:p>
          </table:table-cell>
          <table:table-cell office:value-type="float" office:value="8640000" calcext:value-type="float">
            <text:p>8640000</text:p>
          </table:table-cell>
          <table:table-cell table:formula="of:=[.B754]/[.C754]" office:value-type="float" office:value="0.00130729166666667" calcext:value-type="float">
            <text:p>0,00130729166666667000</text:p>
          </table:table-cell>
          <table:table-cell table:formula="of:=[.D755]-[.D75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B754]+15" office:value-type="float" office:value="11310" calcext:value-type="float">
            <text:p>11310</text:p>
          </table:table-cell>
          <table:table-cell office:value-type="float" office:value="8640000" calcext:value-type="float">
            <text:p>8640000</text:p>
          </table:table-cell>
          <table:table-cell table:formula="of:=[.B755]/[.C755]" office:value-type="float" office:value="0.00130902777777778" calcext:value-type="float">
            <text:p>0,00130902777777778000</text:p>
          </table:table-cell>
          <table:table-cell table:formula="of:=[.D756]-[.D755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B755]+15" office:value-type="float" office:value="11325" calcext:value-type="float">
            <text:p>11325</text:p>
          </table:table-cell>
          <table:table-cell office:value-type="float" office:value="8640000" calcext:value-type="float">
            <text:p>8640000</text:p>
          </table:table-cell>
          <table:table-cell table:formula="of:=[.B756]/[.C756]" office:value-type="float" office:value="0.00131076388888889" calcext:value-type="float">
            <text:p>0,00131076388888889000</text:p>
          </table:table-cell>
          <table:table-cell table:formula="of:=[.D757]-[.D75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B756]+15" office:value-type="float" office:value="11340" calcext:value-type="float">
            <text:p>11340</text:p>
          </table:table-cell>
          <table:table-cell office:value-type="float" office:value="8640000" calcext:value-type="float">
            <text:p>8640000</text:p>
          </table:table-cell>
          <table:table-cell table:formula="of:=[.B757]/[.C757]" office:value-type="float" office:value="0.0013125" calcext:value-type="float">
            <text:p>0,00131250000000000000</text:p>
          </table:table-cell>
          <table:table-cell table:formula="of:=[.D758]-[.D757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B757]+15" office:value-type="float" office:value="11355" calcext:value-type="float">
            <text:p>11355</text:p>
          </table:table-cell>
          <table:table-cell office:value-type="float" office:value="8640000" calcext:value-type="float">
            <text:p>8640000</text:p>
          </table:table-cell>
          <table:table-cell table:formula="of:=[.B758]/[.C758]" office:value-type="float" office:value="0.00131423611111111" calcext:value-type="float">
            <text:p>0,00131423611111111000</text:p>
          </table:table-cell>
          <table:table-cell table:formula="of:=[.D759]-[.D75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B758]+15" office:value-type="float" office:value="11370" calcext:value-type="float">
            <text:p>11370</text:p>
          </table:table-cell>
          <table:table-cell office:value-type="float" office:value="8640000" calcext:value-type="float">
            <text:p>8640000</text:p>
          </table:table-cell>
          <table:table-cell table:formula="of:=[.B759]/[.C759]" office:value-type="float" office:value="0.00131597222222222" calcext:value-type="float">
            <text:p>0,00131597222222222000</text:p>
          </table:table-cell>
          <table:table-cell table:formula="of:=[.D760]-[.D759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B759]+15" office:value-type="float" office:value="11385" calcext:value-type="float">
            <text:p>11385</text:p>
          </table:table-cell>
          <table:table-cell office:value-type="float" office:value="8640000" calcext:value-type="float">
            <text:p>8640000</text:p>
          </table:table-cell>
          <table:table-cell table:formula="of:=[.B760]/[.C760]" office:value-type="float" office:value="0.00131770833333333" calcext:value-type="float">
            <text:p>0,00131770833333333000</text:p>
          </table:table-cell>
          <table:table-cell table:formula="of:=[.D761]-[.D76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B760]+15" office:value-type="float" office:value="11400" calcext:value-type="float">
            <text:p>11400</text:p>
          </table:table-cell>
          <table:table-cell office:value-type="float" office:value="8640000" calcext:value-type="float">
            <text:p>8640000</text:p>
          </table:table-cell>
          <table:table-cell table:formula="of:=[.B761]/[.C761]" office:value-type="float" office:value="0.00131944444444444" calcext:value-type="float">
            <text:p>0,00131944444444444000</text:p>
          </table:table-cell>
          <table:table-cell table:formula="of:=[.D762]-[.D761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B761]+15" office:value-type="float" office:value="11415" calcext:value-type="float">
            <text:p>11415</text:p>
          </table:table-cell>
          <table:table-cell office:value-type="float" office:value="8640000" calcext:value-type="float">
            <text:p>8640000</text:p>
          </table:table-cell>
          <table:table-cell table:formula="of:=[.B762]/[.C762]" office:value-type="float" office:value="0.00132118055555556" calcext:value-type="float">
            <text:p>0,00132118055555556000</text:p>
          </table:table-cell>
          <table:table-cell table:formula="of:=[.D763]-[.D76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B762]+15" office:value-type="float" office:value="11430" calcext:value-type="float">
            <text:p>11430</text:p>
          </table:table-cell>
          <table:table-cell office:value-type="float" office:value="8640000" calcext:value-type="float">
            <text:p>8640000</text:p>
          </table:table-cell>
          <table:table-cell table:formula="of:=[.B763]/[.C763]" office:value-type="float" office:value="0.00132291666666667" calcext:value-type="float">
            <text:p>0,00132291666666667000</text:p>
          </table:table-cell>
          <table:table-cell table:formula="of:=[.D764]-[.D763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B763]+15" office:value-type="float" office:value="11445" calcext:value-type="float">
            <text:p>11445</text:p>
          </table:table-cell>
          <table:table-cell office:value-type="float" office:value="8640000" calcext:value-type="float">
            <text:p>8640000</text:p>
          </table:table-cell>
          <table:table-cell table:formula="of:=[.B764]/[.C764]" office:value-type="float" office:value="0.00132465277777778" calcext:value-type="float">
            <text:p>0,00132465277777778000</text:p>
          </table:table-cell>
          <table:table-cell table:formula="of:=[.D765]-[.D76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B764]+15" office:value-type="float" office:value="11460" calcext:value-type="float">
            <text:p>11460</text:p>
          </table:table-cell>
          <table:table-cell office:value-type="float" office:value="8640000" calcext:value-type="float">
            <text:p>8640000</text:p>
          </table:table-cell>
          <table:table-cell table:formula="of:=[.B765]/[.C765]" office:value-type="float" office:value="0.00132638888888889" calcext:value-type="float">
            <text:p>0,00132638888888889000</text:p>
          </table:table-cell>
          <table:table-cell table:formula="of:=[.D766]-[.D76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B765]+15" office:value-type="float" office:value="11475" calcext:value-type="float">
            <text:p>11475</text:p>
          </table:table-cell>
          <table:table-cell office:value-type="float" office:value="8640000" calcext:value-type="float">
            <text:p>8640000</text:p>
          </table:table-cell>
          <table:table-cell table:formula="of:=[.B766]/[.C766]" office:value-type="float" office:value="0.001328125" calcext:value-type="float">
            <text:p>0,00132812500000000000</text:p>
          </table:table-cell>
          <table:table-cell table:formula="of:=[.D767]-[.D766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B766]+15" office:value-type="float" office:value="11490" calcext:value-type="float">
            <text:p>11490</text:p>
          </table:table-cell>
          <table:table-cell office:value-type="float" office:value="8640000" calcext:value-type="float">
            <text:p>8640000</text:p>
          </table:table-cell>
          <table:table-cell table:formula="of:=[.B767]/[.C767]" office:value-type="float" office:value="0.00132986111111111" calcext:value-type="float">
            <text:p>0,00132986111111111000</text:p>
          </table:table-cell>
          <table:table-cell table:formula="of:=[.D768]-[.D76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B767]+15" office:value-type="float" office:value="11505" calcext:value-type="float">
            <text:p>11505</text:p>
          </table:table-cell>
          <table:table-cell office:value-type="float" office:value="8640000" calcext:value-type="float">
            <text:p>8640000</text:p>
          </table:table-cell>
          <table:table-cell table:formula="of:=[.B768]/[.C768]" office:value-type="float" office:value="0.00133159722222222" calcext:value-type="float">
            <text:p>0,00133159722222222000</text:p>
          </table:table-cell>
          <table:table-cell table:formula="of:=[.D769]-[.D768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B768]+15" office:value-type="float" office:value="11520" calcext:value-type="float">
            <text:p>11520</text:p>
          </table:table-cell>
          <table:table-cell office:value-type="float" office:value="8640000" calcext:value-type="float">
            <text:p>8640000</text:p>
          </table:table-cell>
          <table:table-cell table:formula="of:=[.B769]/[.C769]" office:value-type="float" office:value="0.00133333333333333" calcext:value-type="float">
            <text:p>0,00133333333333333000</text:p>
          </table:table-cell>
          <table:table-cell table:formula="of:=[.D770]-[.D76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B769]+15" office:value-type="float" office:value="11535" calcext:value-type="float">
            <text:p>11535</text:p>
          </table:table-cell>
          <table:table-cell office:value-type="float" office:value="8640000" calcext:value-type="float">
            <text:p>8640000</text:p>
          </table:table-cell>
          <table:table-cell table:formula="of:=[.B770]/[.C770]" office:value-type="float" office:value="0.00133506944444444" calcext:value-type="float">
            <text:p>0,00133506944444444000</text:p>
          </table:table-cell>
          <table:table-cell table:formula="of:=[.D771]-[.D770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B770]+15" office:value-type="float" office:value="11550" calcext:value-type="float">
            <text:p>11550</text:p>
          </table:table-cell>
          <table:table-cell office:value-type="float" office:value="8640000" calcext:value-type="float">
            <text:p>8640000</text:p>
          </table:table-cell>
          <table:table-cell table:formula="of:=[.B771]/[.C771]" office:value-type="float" office:value="0.00133680555555556" calcext:value-type="float">
            <text:p>0,00133680555555556000</text:p>
          </table:table-cell>
          <table:table-cell table:formula="of:=[.D772]-[.D77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B771]+15" office:value-type="float" office:value="11565" calcext:value-type="float">
            <text:p>11565</text:p>
          </table:table-cell>
          <table:table-cell office:value-type="float" office:value="8640000" calcext:value-type="float">
            <text:p>8640000</text:p>
          </table:table-cell>
          <table:table-cell table:formula="of:=[.B772]/[.C772]" office:value-type="float" office:value="0.00133854166666667" calcext:value-type="float">
            <text:p>0,00133854166666667000</text:p>
          </table:table-cell>
          <table:table-cell table:formula="of:=[.D773]-[.D772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B772]+15" office:value-type="float" office:value="11580" calcext:value-type="float">
            <text:p>11580</text:p>
          </table:table-cell>
          <table:table-cell office:value-type="float" office:value="8640000" calcext:value-type="float">
            <text:p>8640000</text:p>
          </table:table-cell>
          <table:table-cell table:formula="of:=[.B773]/[.C773]" office:value-type="float" office:value="0.00134027777777778" calcext:value-type="float">
            <text:p>0,00134027777777778000</text:p>
          </table:table-cell>
          <table:table-cell table:formula="of:=[.D774]-[.D77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B773]+15" office:value-type="float" office:value="11595" calcext:value-type="float">
            <text:p>11595</text:p>
          </table:table-cell>
          <table:table-cell office:value-type="float" office:value="8640000" calcext:value-type="float">
            <text:p>8640000</text:p>
          </table:table-cell>
          <table:table-cell table:formula="of:=[.B774]/[.C774]" office:value-type="float" office:value="0.00134201388888889" calcext:value-type="float">
            <text:p>0,00134201388888889000</text:p>
          </table:table-cell>
          <table:table-cell table:formula="of:=[.D775]-[.D774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B774]+15" office:value-type="float" office:value="11610" calcext:value-type="float">
            <text:p>11610</text:p>
          </table:table-cell>
          <table:table-cell office:value-type="float" office:value="8640000" calcext:value-type="float">
            <text:p>8640000</text:p>
          </table:table-cell>
          <table:table-cell table:formula="of:=[.B775]/[.C775]" office:value-type="float" office:value="0.00134375" calcext:value-type="float">
            <text:p>0,00134375000000000000</text:p>
          </table:table-cell>
          <table:table-cell table:formula="of:=[.D776]-[.D77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B775]+15" office:value-type="float" office:value="11625" calcext:value-type="float">
            <text:p>11625</text:p>
          </table:table-cell>
          <table:table-cell office:value-type="float" office:value="8640000" calcext:value-type="float">
            <text:p>8640000</text:p>
          </table:table-cell>
          <table:table-cell table:formula="of:=[.B776]/[.C776]" office:value-type="float" office:value="0.00134548611111111" calcext:value-type="float">
            <text:p>0,00134548611111111000</text:p>
          </table:table-cell>
          <table:table-cell table:formula="of:=[.D777]-[.D77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B776]+15" office:value-type="float" office:value="11640" calcext:value-type="float">
            <text:p>11640</text:p>
          </table:table-cell>
          <table:table-cell office:value-type="float" office:value="8640000" calcext:value-type="float">
            <text:p>8640000</text:p>
          </table:table-cell>
          <table:table-cell table:formula="of:=[.B777]/[.C777]" office:value-type="float" office:value="0.00134722222222222" calcext:value-type="float">
            <text:p>0,00134722222222222000</text:p>
          </table:table-cell>
          <table:table-cell table:formula="of:=[.D778]-[.D777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B777]+15" office:value-type="float" office:value="11655" calcext:value-type="float">
            <text:p>11655</text:p>
          </table:table-cell>
          <table:table-cell office:value-type="float" office:value="8640000" calcext:value-type="float">
            <text:p>8640000</text:p>
          </table:table-cell>
          <table:table-cell table:formula="of:=[.B778]/[.C778]" office:value-type="float" office:value="0.00134895833333333" calcext:value-type="float">
            <text:p>0,00134895833333333000</text:p>
          </table:table-cell>
          <table:table-cell table:formula="of:=[.D779]-[.D77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B778]+15" office:value-type="float" office:value="11670" calcext:value-type="float">
            <text:p>11670</text:p>
          </table:table-cell>
          <table:table-cell office:value-type="float" office:value="8640000" calcext:value-type="float">
            <text:p>8640000</text:p>
          </table:table-cell>
          <table:table-cell table:formula="of:=[.B779]/[.C779]" office:value-type="float" office:value="0.00135069444444444" calcext:value-type="float">
            <text:p>0,00135069444444444000</text:p>
          </table:table-cell>
          <table:table-cell table:formula="of:=[.D780]-[.D779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B779]+15" office:value-type="float" office:value="11685" calcext:value-type="float">
            <text:p>11685</text:p>
          </table:table-cell>
          <table:table-cell office:value-type="float" office:value="8640000" calcext:value-type="float">
            <text:p>8640000</text:p>
          </table:table-cell>
          <table:table-cell table:formula="of:=[.B780]/[.C780]" office:value-type="float" office:value="0.00135243055555556" calcext:value-type="float">
            <text:p>0,00135243055555556000</text:p>
          </table:table-cell>
          <table:table-cell table:formula="of:=[.D781]-[.D78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B780]+15" office:value-type="float" office:value="11700" calcext:value-type="float">
            <text:p>11700</text:p>
          </table:table-cell>
          <table:table-cell office:value-type="float" office:value="8640000" calcext:value-type="float">
            <text:p>8640000</text:p>
          </table:table-cell>
          <table:table-cell table:formula="of:=[.B781]/[.C781]" office:value-type="float" office:value="0.00135416666666667" calcext:value-type="float">
            <text:p>0,00135416666666667000</text:p>
          </table:table-cell>
          <table:table-cell table:formula="of:=[.D782]-[.D781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B781]+15" office:value-type="float" office:value="11715" calcext:value-type="float">
            <text:p>11715</text:p>
          </table:table-cell>
          <table:table-cell office:value-type="float" office:value="8640000" calcext:value-type="float">
            <text:p>8640000</text:p>
          </table:table-cell>
          <table:table-cell table:formula="of:=[.B782]/[.C782]" office:value-type="float" office:value="0.00135590277777778" calcext:value-type="float">
            <text:p>0,00135590277777778000</text:p>
          </table:table-cell>
          <table:table-cell table:formula="of:=[.D783]-[.D78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B782]+15" office:value-type="float" office:value="11730" calcext:value-type="float">
            <text:p>11730</text:p>
          </table:table-cell>
          <table:table-cell office:value-type="float" office:value="8640000" calcext:value-type="float">
            <text:p>8640000</text:p>
          </table:table-cell>
          <table:table-cell table:formula="of:=[.B783]/[.C783]" office:value-type="float" office:value="0.00135763888888889" calcext:value-type="float">
            <text:p>0,00135763888888889000</text:p>
          </table:table-cell>
          <table:table-cell table:formula="of:=[.D784]-[.D783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B783]+15" office:value-type="float" office:value="11745" calcext:value-type="float">
            <text:p>11745</text:p>
          </table:table-cell>
          <table:table-cell office:value-type="float" office:value="8640000" calcext:value-type="float">
            <text:p>8640000</text:p>
          </table:table-cell>
          <table:table-cell table:formula="of:=[.B784]/[.C784]" office:value-type="float" office:value="0.001359375" calcext:value-type="float">
            <text:p>0,00135937500000000000</text:p>
          </table:table-cell>
          <table:table-cell table:formula="of:=[.D785]-[.D78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B784]+15" office:value-type="float" office:value="11760" calcext:value-type="float">
            <text:p>11760</text:p>
          </table:table-cell>
          <table:table-cell office:value-type="float" office:value="8640000" calcext:value-type="float">
            <text:p>8640000</text:p>
          </table:table-cell>
          <table:table-cell table:formula="of:=[.B785]/[.C785]" office:value-type="float" office:value="0.00136111111111111" calcext:value-type="float">
            <text:p>0,00136111111111111000</text:p>
          </table:table-cell>
          <table:table-cell table:formula="of:=[.D786]-[.D78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B785]+15" office:value-type="float" office:value="11775" calcext:value-type="float">
            <text:p>11775</text:p>
          </table:table-cell>
          <table:table-cell office:value-type="float" office:value="8640000" calcext:value-type="float">
            <text:p>8640000</text:p>
          </table:table-cell>
          <table:table-cell table:formula="of:=[.B786]/[.C786]" office:value-type="float" office:value="0.00136284722222222" calcext:value-type="float">
            <text:p>0,00136284722222222000</text:p>
          </table:table-cell>
          <table:table-cell table:formula="of:=[.D787]-[.D786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B786]+15" office:value-type="float" office:value="11790" calcext:value-type="float">
            <text:p>11790</text:p>
          </table:table-cell>
          <table:table-cell office:value-type="float" office:value="8640000" calcext:value-type="float">
            <text:p>8640000</text:p>
          </table:table-cell>
          <table:table-cell table:formula="of:=[.B787]/[.C787]" office:value-type="float" office:value="0.00136458333333333" calcext:value-type="float">
            <text:p>0,00136458333333333000</text:p>
          </table:table-cell>
          <table:table-cell table:formula="of:=[.D788]-[.D78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B787]+15" office:value-type="float" office:value="11805" calcext:value-type="float">
            <text:p>11805</text:p>
          </table:table-cell>
          <table:table-cell office:value-type="float" office:value="8640000" calcext:value-type="float">
            <text:p>8640000</text:p>
          </table:table-cell>
          <table:table-cell table:formula="of:=[.B788]/[.C788]" office:value-type="float" office:value="0.00136631944444444" calcext:value-type="float">
            <text:p>0,00136631944444444000</text:p>
          </table:table-cell>
          <table:table-cell table:formula="of:=[.D789]-[.D788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B788]+15" office:value-type="float" office:value="11820" calcext:value-type="float">
            <text:p>11820</text:p>
          </table:table-cell>
          <table:table-cell office:value-type="float" office:value="8640000" calcext:value-type="float">
            <text:p>8640000</text:p>
          </table:table-cell>
          <table:table-cell table:formula="of:=[.B789]/[.C789]" office:value-type="float" office:value="0.00136805555555556" calcext:value-type="float">
            <text:p>0,00136805555555556000</text:p>
          </table:table-cell>
          <table:table-cell table:formula="of:=[.D790]-[.D78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B789]+15" office:value-type="float" office:value="11835" calcext:value-type="float">
            <text:p>11835</text:p>
          </table:table-cell>
          <table:table-cell office:value-type="float" office:value="8640000" calcext:value-type="float">
            <text:p>8640000</text:p>
          </table:table-cell>
          <table:table-cell table:formula="of:=[.B790]/[.C790]" office:value-type="float" office:value="0.00136979166666667" calcext:value-type="float">
            <text:p>0,00136979166666667000</text:p>
          </table:table-cell>
          <table:table-cell table:formula="of:=[.D791]-[.D790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B790]+15" office:value-type="float" office:value="11850" calcext:value-type="float">
            <text:p>11850</text:p>
          </table:table-cell>
          <table:table-cell office:value-type="float" office:value="8640000" calcext:value-type="float">
            <text:p>8640000</text:p>
          </table:table-cell>
          <table:table-cell table:formula="of:=[.B791]/[.C791]" office:value-type="float" office:value="0.00137152777777778" calcext:value-type="float">
            <text:p>0,00137152777777778000</text:p>
          </table:table-cell>
          <table:table-cell table:formula="of:=[.D792]-[.D79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B791]+15" office:value-type="float" office:value="11865" calcext:value-type="float">
            <text:p>11865</text:p>
          </table:table-cell>
          <table:table-cell office:value-type="float" office:value="8640000" calcext:value-type="float">
            <text:p>8640000</text:p>
          </table:table-cell>
          <table:table-cell table:formula="of:=[.B792]/[.C792]" office:value-type="float" office:value="0.00137326388888889" calcext:value-type="float">
            <text:p>0,00137326388888889000</text:p>
          </table:table-cell>
          <table:table-cell table:formula="of:=[.D793]-[.D792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B792]+15" office:value-type="float" office:value="11880" calcext:value-type="float">
            <text:p>11880</text:p>
          </table:table-cell>
          <table:table-cell office:value-type="float" office:value="8640000" calcext:value-type="float">
            <text:p>8640000</text:p>
          </table:table-cell>
          <table:table-cell table:formula="of:=[.B793]/[.C793]" office:value-type="float" office:value="0.001375" calcext:value-type="float">
            <text:p>0,00137500000000000000</text:p>
          </table:table-cell>
          <table:table-cell table:formula="of:=[.D794]-[.D79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B793]+15" office:value-type="float" office:value="11895" calcext:value-type="float">
            <text:p>11895</text:p>
          </table:table-cell>
          <table:table-cell office:value-type="float" office:value="8640000" calcext:value-type="float">
            <text:p>8640000</text:p>
          </table:table-cell>
          <table:table-cell table:formula="of:=[.B794]/[.C794]" office:value-type="float" office:value="0.00137673611111111" calcext:value-type="float">
            <text:p>0,00137673611111111000</text:p>
          </table:table-cell>
          <table:table-cell table:formula="of:=[.D795]-[.D794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B794]+15" office:value-type="float" office:value="11910" calcext:value-type="float">
            <text:p>11910</text:p>
          </table:table-cell>
          <table:table-cell office:value-type="float" office:value="8640000" calcext:value-type="float">
            <text:p>8640000</text:p>
          </table:table-cell>
          <table:table-cell table:formula="of:=[.B795]/[.C795]" office:value-type="float" office:value="0.00137847222222222" calcext:value-type="float">
            <text:p>0,00137847222222222000</text:p>
          </table:table-cell>
          <table:table-cell table:formula="of:=[.D796]-[.D79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B795]+15" office:value-type="float" office:value="11925" calcext:value-type="float">
            <text:p>11925</text:p>
          </table:table-cell>
          <table:table-cell office:value-type="float" office:value="8640000" calcext:value-type="float">
            <text:p>8640000</text:p>
          </table:table-cell>
          <table:table-cell table:formula="of:=[.B796]/[.C796]" office:value-type="float" office:value="0.00138020833333333" calcext:value-type="float">
            <text:p>0,00138020833333333000</text:p>
          </table:table-cell>
          <table:table-cell table:formula="of:=[.D797]-[.D79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B796]+15" office:value-type="float" office:value="11940" calcext:value-type="float">
            <text:p>11940</text:p>
          </table:table-cell>
          <table:table-cell office:value-type="float" office:value="8640000" calcext:value-type="float">
            <text:p>8640000</text:p>
          </table:table-cell>
          <table:table-cell table:formula="of:=[.B797]/[.C797]" office:value-type="float" office:value="0.00138194444444444" calcext:value-type="float">
            <text:p>0,00138194444444444000</text:p>
          </table:table-cell>
          <table:table-cell table:formula="of:=[.D798]-[.D797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B797]+15" office:value-type="float" office:value="11955" calcext:value-type="float">
            <text:p>11955</text:p>
          </table:table-cell>
          <table:table-cell office:value-type="float" office:value="8640000" calcext:value-type="float">
            <text:p>8640000</text:p>
          </table:table-cell>
          <table:table-cell table:formula="of:=[.B798]/[.C798]" office:value-type="float" office:value="0.00138368055555556" calcext:value-type="float">
            <text:p>0,00138368055555556000</text:p>
          </table:table-cell>
          <table:table-cell table:formula="of:=[.D799]-[.D79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B798]+15" office:value-type="float" office:value="11970" calcext:value-type="float">
            <text:p>11970</text:p>
          </table:table-cell>
          <table:table-cell office:value-type="float" office:value="8640000" calcext:value-type="float">
            <text:p>8640000</text:p>
          </table:table-cell>
          <table:table-cell table:formula="of:=[.B799]/[.C799]" office:value-type="float" office:value="0.00138541666666667" calcext:value-type="float">
            <text:p>0,00138541666666667000</text:p>
          </table:table-cell>
          <table:table-cell table:formula="of:=[.D800]-[.D799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B799]+15" office:value-type="float" office:value="11985" calcext:value-type="float">
            <text:p>11985</text:p>
          </table:table-cell>
          <table:table-cell office:value-type="float" office:value="8640000" calcext:value-type="float">
            <text:p>8640000</text:p>
          </table:table-cell>
          <table:table-cell table:formula="of:=[.B800]/[.C800]" office:value-type="float" office:value="0.00138715277777778" calcext:value-type="float">
            <text:p>0,00138715277777778000</text:p>
          </table:table-cell>
          <table:table-cell table:formula="of:=[.D801]-[.D80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B800]+15" office:value-type="float" office:value="12000" calcext:value-type="float">
            <text:p>12000</text:p>
          </table:table-cell>
          <table:table-cell office:value-type="float" office:value="8640000" calcext:value-type="float">
            <text:p>8640000</text:p>
          </table:table-cell>
          <table:table-cell table:formula="of:=[.B801]/[.C801]" office:value-type="float" office:value="0.00138888888888889" calcext:value-type="float">
            <text:p>0,00138888888888889000</text:p>
          </table:table-cell>
          <table:table-cell table:formula="of:=[.D802]-[.D801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B801]+15" office:value-type="float" office:value="12015" calcext:value-type="float">
            <text:p>12015</text:p>
          </table:table-cell>
          <table:table-cell office:value-type="float" office:value="8640000" calcext:value-type="float">
            <text:p>8640000</text:p>
          </table:table-cell>
          <table:table-cell table:formula="of:=[.B802]/[.C802]" office:value-type="float" office:value="0.001390625" calcext:value-type="float">
            <text:p>0,00139062500000000000</text:p>
          </table:table-cell>
          <table:table-cell table:formula="of:=[.D803]-[.D80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B802]+15" office:value-type="float" office:value="12030" calcext:value-type="float">
            <text:p>12030</text:p>
          </table:table-cell>
          <table:table-cell office:value-type="float" office:value="8640000" calcext:value-type="float">
            <text:p>8640000</text:p>
          </table:table-cell>
          <table:table-cell table:formula="of:=[.B803]/[.C803]" office:value-type="float" office:value="0.00139236111111111" calcext:value-type="float">
            <text:p>0,00139236111111111000</text:p>
          </table:table-cell>
          <table:table-cell table:formula="of:=[.D804]-[.D803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B803]+15" office:value-type="float" office:value="12045" calcext:value-type="float">
            <text:p>12045</text:p>
          </table:table-cell>
          <table:table-cell office:value-type="float" office:value="8640000" calcext:value-type="float">
            <text:p>8640000</text:p>
          </table:table-cell>
          <table:table-cell table:formula="of:=[.B804]/[.C804]" office:value-type="float" office:value="0.00139409722222222" calcext:value-type="float">
            <text:p>0,00139409722222222000</text:p>
          </table:table-cell>
          <table:table-cell table:formula="of:=[.D805]-[.D80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B804]+15" office:value-type="float" office:value="12060" calcext:value-type="float">
            <text:p>12060</text:p>
          </table:table-cell>
          <table:table-cell office:value-type="float" office:value="8640000" calcext:value-type="float">
            <text:p>8640000</text:p>
          </table:table-cell>
          <table:table-cell table:formula="of:=[.B805]/[.C805]" office:value-type="float" office:value="0.00139583333333333" calcext:value-type="float">
            <text:p>0,00139583333333333000</text:p>
          </table:table-cell>
          <table:table-cell table:formula="of:=[.D806]-[.D805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B805]+15" office:value-type="float" office:value="12075" calcext:value-type="float">
            <text:p>12075</text:p>
          </table:table-cell>
          <table:table-cell office:value-type="float" office:value="8640000" calcext:value-type="float">
            <text:p>8640000</text:p>
          </table:table-cell>
          <table:table-cell table:formula="of:=[.B806]/[.C806]" office:value-type="float" office:value="0.00139756944444444" calcext:value-type="float">
            <text:p>0,00139756944444444000</text:p>
          </table:table-cell>
          <table:table-cell table:formula="of:=[.D807]-[.D80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B806]+15" office:value-type="float" office:value="12090" calcext:value-type="float">
            <text:p>12090</text:p>
          </table:table-cell>
          <table:table-cell office:value-type="float" office:value="8640000" calcext:value-type="float">
            <text:p>8640000</text:p>
          </table:table-cell>
          <table:table-cell table:formula="of:=[.B807]/[.C807]" office:value-type="float" office:value="0.00139930555555556" calcext:value-type="float">
            <text:p>0,00139930555555556000</text:p>
          </table:table-cell>
          <table:table-cell table:formula="of:=[.D808]-[.D80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B807]+15" office:value-type="float" office:value="12105" calcext:value-type="float">
            <text:p>12105</text:p>
          </table:table-cell>
          <table:table-cell office:value-type="float" office:value="8640000" calcext:value-type="float">
            <text:p>8640000</text:p>
          </table:table-cell>
          <table:table-cell table:formula="of:=[.B808]/[.C808]" office:value-type="float" office:value="0.00140104166666667" calcext:value-type="float">
            <text:p>0,00140104166666667000</text:p>
          </table:table-cell>
          <table:table-cell table:formula="of:=[.D809]-[.D808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B808]+15" office:value-type="float" office:value="12120" calcext:value-type="float">
            <text:p>12120</text:p>
          </table:table-cell>
          <table:table-cell office:value-type="float" office:value="8640000" calcext:value-type="float">
            <text:p>8640000</text:p>
          </table:table-cell>
          <table:table-cell table:formula="of:=[.B809]/[.C809]" office:value-type="float" office:value="0.00140277777777778" calcext:value-type="float">
            <text:p>0,00140277777777778000</text:p>
          </table:table-cell>
          <table:table-cell table:formula="of:=[.D810]-[.D80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B809]+15" office:value-type="float" office:value="12135" calcext:value-type="float">
            <text:p>12135</text:p>
          </table:table-cell>
          <table:table-cell office:value-type="float" office:value="8640000" calcext:value-type="float">
            <text:p>8640000</text:p>
          </table:table-cell>
          <table:table-cell table:formula="of:=[.B810]/[.C810]" office:value-type="float" office:value="0.00140451388888889" calcext:value-type="float">
            <text:p>0,00140451388888889000</text:p>
          </table:table-cell>
          <table:table-cell table:formula="of:=[.D811]-[.D810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B810]+15" office:value-type="float" office:value="12150" calcext:value-type="float">
            <text:p>12150</text:p>
          </table:table-cell>
          <table:table-cell office:value-type="float" office:value="8640000" calcext:value-type="float">
            <text:p>8640000</text:p>
          </table:table-cell>
          <table:table-cell table:formula="of:=[.B811]/[.C811]" office:value-type="float" office:value="0.00140625" calcext:value-type="float">
            <text:p>0,00140625000000000000</text:p>
          </table:table-cell>
          <table:table-cell table:formula="of:=[.D812]-[.D81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B811]+15" office:value-type="float" office:value="12165" calcext:value-type="float">
            <text:p>12165</text:p>
          </table:table-cell>
          <table:table-cell office:value-type="float" office:value="8640000" calcext:value-type="float">
            <text:p>8640000</text:p>
          </table:table-cell>
          <table:table-cell table:formula="of:=[.B812]/[.C812]" office:value-type="float" office:value="0.00140798611111111" calcext:value-type="float">
            <text:p>0,00140798611111111000</text:p>
          </table:table-cell>
          <table:table-cell table:formula="of:=[.D813]-[.D812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B812]+15" office:value-type="float" office:value="12180" calcext:value-type="float">
            <text:p>12180</text:p>
          </table:table-cell>
          <table:table-cell office:value-type="float" office:value="8640000" calcext:value-type="float">
            <text:p>8640000</text:p>
          </table:table-cell>
          <table:table-cell table:formula="of:=[.B813]/[.C813]" office:value-type="float" office:value="0.00140972222222222" calcext:value-type="float">
            <text:p>0,00140972222222222000</text:p>
          </table:table-cell>
          <table:table-cell table:formula="of:=[.D814]-[.D81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B813]+15" office:value-type="float" office:value="12195" calcext:value-type="float">
            <text:p>12195</text:p>
          </table:table-cell>
          <table:table-cell office:value-type="float" office:value="8640000" calcext:value-type="float">
            <text:p>8640000</text:p>
          </table:table-cell>
          <table:table-cell table:formula="of:=[.B814]/[.C814]" office:value-type="float" office:value="0.00141145833333333" calcext:value-type="float">
            <text:p>0,00141145833333333000</text:p>
          </table:table-cell>
          <table:table-cell table:formula="of:=[.D815]-[.D814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B814]+15" office:value-type="float" office:value="12210" calcext:value-type="float">
            <text:p>12210</text:p>
          </table:table-cell>
          <table:table-cell office:value-type="float" office:value="8640000" calcext:value-type="float">
            <text:p>8640000</text:p>
          </table:table-cell>
          <table:table-cell table:formula="of:=[.B815]/[.C815]" office:value-type="float" office:value="0.00141319444444444" calcext:value-type="float">
            <text:p>0,00141319444444444000</text:p>
          </table:table-cell>
          <table:table-cell table:formula="of:=[.D816]-[.D81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B815]+15" office:value-type="float" office:value="12225" calcext:value-type="float">
            <text:p>12225</text:p>
          </table:table-cell>
          <table:table-cell office:value-type="float" office:value="8640000" calcext:value-type="float">
            <text:p>8640000</text:p>
          </table:table-cell>
          <table:table-cell table:formula="of:=[.B816]/[.C816]" office:value-type="float" office:value="0.00141493055555556" calcext:value-type="float">
            <text:p>0,00141493055555556000</text:p>
          </table:table-cell>
          <table:table-cell table:formula="of:=[.D817]-[.D81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B816]+15" office:value-type="float" office:value="12240" calcext:value-type="float">
            <text:p>12240</text:p>
          </table:table-cell>
          <table:table-cell office:value-type="float" office:value="8640000" calcext:value-type="float">
            <text:p>8640000</text:p>
          </table:table-cell>
          <table:table-cell table:formula="of:=[.B817]/[.C817]" office:value-type="float" office:value="0.00141666666666667" calcext:value-type="float">
            <text:p>0,00141666666666667000</text:p>
          </table:table-cell>
          <table:table-cell table:formula="of:=[.D818]-[.D817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B817]+15" office:value-type="float" office:value="12255" calcext:value-type="float">
            <text:p>12255</text:p>
          </table:table-cell>
          <table:table-cell office:value-type="float" office:value="8640000" calcext:value-type="float">
            <text:p>8640000</text:p>
          </table:table-cell>
          <table:table-cell table:formula="of:=[.B818]/[.C818]" office:value-type="float" office:value="0.00141840277777778" calcext:value-type="float">
            <text:p>0,00141840277777778000</text:p>
          </table:table-cell>
          <table:table-cell table:formula="of:=[.D819]-[.D81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B818]+15" office:value-type="float" office:value="12270" calcext:value-type="float">
            <text:p>12270</text:p>
          </table:table-cell>
          <table:table-cell office:value-type="float" office:value="8640000" calcext:value-type="float">
            <text:p>8640000</text:p>
          </table:table-cell>
          <table:table-cell table:formula="of:=[.B819]/[.C819]" office:value-type="float" office:value="0.00142013888888889" calcext:value-type="float">
            <text:p>0,00142013888888889000</text:p>
          </table:table-cell>
          <table:table-cell table:formula="of:=[.D820]-[.D819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B819]+15" office:value-type="float" office:value="12285" calcext:value-type="float">
            <text:p>12285</text:p>
          </table:table-cell>
          <table:table-cell office:value-type="float" office:value="8640000" calcext:value-type="float">
            <text:p>8640000</text:p>
          </table:table-cell>
          <table:table-cell table:formula="of:=[.B820]/[.C820]" office:value-type="float" office:value="0.001421875" calcext:value-type="float">
            <text:p>0,00142187500000000000</text:p>
          </table:table-cell>
          <table:table-cell table:formula="of:=[.D821]-[.D82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B820]+15" office:value-type="float" office:value="12300" calcext:value-type="float">
            <text:p>12300</text:p>
          </table:table-cell>
          <table:table-cell office:value-type="float" office:value="8640000" calcext:value-type="float">
            <text:p>8640000</text:p>
          </table:table-cell>
          <table:table-cell table:formula="of:=[.B821]/[.C821]" office:value-type="float" office:value="0.00142361111111111" calcext:value-type="float">
            <text:p>0,00142361111111111000</text:p>
          </table:table-cell>
          <table:table-cell table:formula="of:=[.D822]-[.D821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B821]+15" office:value-type="float" office:value="12315" calcext:value-type="float">
            <text:p>12315</text:p>
          </table:table-cell>
          <table:table-cell office:value-type="float" office:value="8640000" calcext:value-type="float">
            <text:p>8640000</text:p>
          </table:table-cell>
          <table:table-cell table:formula="of:=[.B822]/[.C822]" office:value-type="float" office:value="0.00142534722222222" calcext:value-type="float">
            <text:p>0,00142534722222222000</text:p>
          </table:table-cell>
          <table:table-cell table:formula="of:=[.D823]-[.D82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B822]+15" office:value-type="float" office:value="12330" calcext:value-type="float">
            <text:p>12330</text:p>
          </table:table-cell>
          <table:table-cell office:value-type="float" office:value="8640000" calcext:value-type="float">
            <text:p>8640000</text:p>
          </table:table-cell>
          <table:table-cell table:formula="of:=[.B823]/[.C823]" office:value-type="float" office:value="0.00142708333333333" calcext:value-type="float">
            <text:p>0,00142708333333333000</text:p>
          </table:table-cell>
          <table:table-cell table:formula="of:=[.D824]-[.D823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B823]+15" office:value-type="float" office:value="12345" calcext:value-type="float">
            <text:p>12345</text:p>
          </table:table-cell>
          <table:table-cell office:value-type="float" office:value="8640000" calcext:value-type="float">
            <text:p>8640000</text:p>
          </table:table-cell>
          <table:table-cell table:formula="of:=[.B824]/[.C824]" office:value-type="float" office:value="0.00142881944444444" calcext:value-type="float">
            <text:p>0,00142881944444444000</text:p>
          </table:table-cell>
          <table:table-cell table:formula="of:=[.D825]-[.D82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B824]+15" office:value-type="float" office:value="12360" calcext:value-type="float">
            <text:p>12360</text:p>
          </table:table-cell>
          <table:table-cell office:value-type="float" office:value="8640000" calcext:value-type="float">
            <text:p>8640000</text:p>
          </table:table-cell>
          <table:table-cell table:formula="of:=[.B825]/[.C825]" office:value-type="float" office:value="0.00143055555555556" calcext:value-type="float">
            <text:p>0,00143055555555556000</text:p>
          </table:table-cell>
          <table:table-cell table:formula="of:=[.D826]-[.D825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B825]+15" office:value-type="float" office:value="12375" calcext:value-type="float">
            <text:p>12375</text:p>
          </table:table-cell>
          <table:table-cell office:value-type="float" office:value="8640000" calcext:value-type="float">
            <text:p>8640000</text:p>
          </table:table-cell>
          <table:table-cell table:formula="of:=[.B826]/[.C826]" office:value-type="float" office:value="0.00143229166666667" calcext:value-type="float">
            <text:p>0,00143229166666667000</text:p>
          </table:table-cell>
          <table:table-cell table:formula="of:=[.D827]-[.D82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B826]+15" office:value-type="float" office:value="12390" calcext:value-type="float">
            <text:p>12390</text:p>
          </table:table-cell>
          <table:table-cell office:value-type="float" office:value="8640000" calcext:value-type="float">
            <text:p>8640000</text:p>
          </table:table-cell>
          <table:table-cell table:formula="of:=[.B827]/[.C827]" office:value-type="float" office:value="0.00143402777777778" calcext:value-type="float">
            <text:p>0,00143402777777778000</text:p>
          </table:table-cell>
          <table:table-cell table:formula="of:=[.D828]-[.D82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B827]+15" office:value-type="float" office:value="12405" calcext:value-type="float">
            <text:p>12405</text:p>
          </table:table-cell>
          <table:table-cell office:value-type="float" office:value="8640000" calcext:value-type="float">
            <text:p>8640000</text:p>
          </table:table-cell>
          <table:table-cell table:formula="of:=[.B828]/[.C828]" office:value-type="float" office:value="0.00143576388888889" calcext:value-type="float">
            <text:p>0,00143576388888889000</text:p>
          </table:table-cell>
          <table:table-cell table:formula="of:=[.D829]-[.D828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B828]+15" office:value-type="float" office:value="12420" calcext:value-type="float">
            <text:p>12420</text:p>
          </table:table-cell>
          <table:table-cell office:value-type="float" office:value="8640000" calcext:value-type="float">
            <text:p>8640000</text:p>
          </table:table-cell>
          <table:table-cell table:formula="of:=[.B829]/[.C829]" office:value-type="float" office:value="0.0014375" calcext:value-type="float">
            <text:p>0,00143750000000000000</text:p>
          </table:table-cell>
          <table:table-cell table:formula="of:=[.D830]-[.D82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B829]+15" office:value-type="float" office:value="12435" calcext:value-type="float">
            <text:p>12435</text:p>
          </table:table-cell>
          <table:table-cell office:value-type="float" office:value="8640000" calcext:value-type="float">
            <text:p>8640000</text:p>
          </table:table-cell>
          <table:table-cell table:formula="of:=[.B830]/[.C830]" office:value-type="float" office:value="0.00143923611111111" calcext:value-type="float">
            <text:p>0,00143923611111111000</text:p>
          </table:table-cell>
          <table:table-cell table:formula="of:=[.D831]-[.D830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B830]+15" office:value-type="float" office:value="12450" calcext:value-type="float">
            <text:p>12450</text:p>
          </table:table-cell>
          <table:table-cell office:value-type="float" office:value="8640000" calcext:value-type="float">
            <text:p>8640000</text:p>
          </table:table-cell>
          <table:table-cell table:formula="of:=[.B831]/[.C831]" office:value-type="float" office:value="0.00144097222222222" calcext:value-type="float">
            <text:p>0,00144097222222222000</text:p>
          </table:table-cell>
          <table:table-cell table:formula="of:=[.D832]-[.D83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B831]+15" office:value-type="float" office:value="12465" calcext:value-type="float">
            <text:p>12465</text:p>
          </table:table-cell>
          <table:table-cell office:value-type="float" office:value="8640000" calcext:value-type="float">
            <text:p>8640000</text:p>
          </table:table-cell>
          <table:table-cell table:formula="of:=[.B832]/[.C832]" office:value-type="float" office:value="0.00144270833333333" calcext:value-type="float">
            <text:p>0,00144270833333333000</text:p>
          </table:table-cell>
          <table:table-cell table:formula="of:=[.D833]-[.D832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B832]+15" office:value-type="float" office:value="12480" calcext:value-type="float">
            <text:p>12480</text:p>
          </table:table-cell>
          <table:table-cell office:value-type="float" office:value="8640000" calcext:value-type="float">
            <text:p>8640000</text:p>
          </table:table-cell>
          <table:table-cell table:formula="of:=[.B833]/[.C833]" office:value-type="float" office:value="0.00144444444444444" calcext:value-type="float">
            <text:p>0,00144444444444444000</text:p>
          </table:table-cell>
          <table:table-cell table:formula="of:=[.D834]-[.D83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B833]+15" office:value-type="float" office:value="12495" calcext:value-type="float">
            <text:p>12495</text:p>
          </table:table-cell>
          <table:table-cell office:value-type="float" office:value="8640000" calcext:value-type="float">
            <text:p>8640000</text:p>
          </table:table-cell>
          <table:table-cell table:formula="of:=[.B834]/[.C834]" office:value-type="float" office:value="0.00144618055555556" calcext:value-type="float">
            <text:p>0,00144618055555556000</text:p>
          </table:table-cell>
          <table:table-cell table:formula="of:=[.D835]-[.D834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B834]+15" office:value-type="float" office:value="12510" calcext:value-type="float">
            <text:p>12510</text:p>
          </table:table-cell>
          <table:table-cell office:value-type="float" office:value="8640000" calcext:value-type="float">
            <text:p>8640000</text:p>
          </table:table-cell>
          <table:table-cell table:formula="of:=[.B835]/[.C835]" office:value-type="float" office:value="0.00144791666666667" calcext:value-type="float">
            <text:p>0,00144791666666667000</text:p>
          </table:table-cell>
          <table:table-cell table:formula="of:=[.D836]-[.D83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B835]+15" office:value-type="float" office:value="12525" calcext:value-type="float">
            <text:p>12525</text:p>
          </table:table-cell>
          <table:table-cell office:value-type="float" office:value="8640000" calcext:value-type="float">
            <text:p>8640000</text:p>
          </table:table-cell>
          <table:table-cell table:formula="of:=[.B836]/[.C836]" office:value-type="float" office:value="0.00144965277777778" calcext:value-type="float">
            <text:p>0,00144965277777778000</text:p>
          </table:table-cell>
          <table:table-cell table:formula="of:=[.D837]-[.D836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B836]+15" office:value-type="float" office:value="12540" calcext:value-type="float">
            <text:p>12540</text:p>
          </table:table-cell>
          <table:table-cell office:value-type="float" office:value="8640000" calcext:value-type="float">
            <text:p>8640000</text:p>
          </table:table-cell>
          <table:table-cell table:formula="of:=[.B837]/[.C837]" office:value-type="float" office:value="0.00145138888888889" calcext:value-type="float">
            <text:p>0,00145138888888889000</text:p>
          </table:table-cell>
          <table:table-cell table:formula="of:=[.D838]-[.D83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B837]+15" office:value-type="float" office:value="12555" calcext:value-type="float">
            <text:p>12555</text:p>
          </table:table-cell>
          <table:table-cell office:value-type="float" office:value="8640000" calcext:value-type="float">
            <text:p>8640000</text:p>
          </table:table-cell>
          <table:table-cell table:formula="of:=[.B838]/[.C838]" office:value-type="float" office:value="0.001453125" calcext:value-type="float">
            <text:p>0,00145312500000000000</text:p>
          </table:table-cell>
          <table:table-cell table:formula="of:=[.D839]-[.D83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B838]+15" office:value-type="float" office:value="12570" calcext:value-type="float">
            <text:p>12570</text:p>
          </table:table-cell>
          <table:table-cell office:value-type="float" office:value="8640000" calcext:value-type="float">
            <text:p>8640000</text:p>
          </table:table-cell>
          <table:table-cell table:formula="of:=[.B839]/[.C839]" office:value-type="float" office:value="0.00145486111111111" calcext:value-type="float">
            <text:p>0,00145486111111111000</text:p>
          </table:table-cell>
          <table:table-cell table:formula="of:=[.D840]-[.D839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B839]+15" office:value-type="float" office:value="12585" calcext:value-type="float">
            <text:p>12585</text:p>
          </table:table-cell>
          <table:table-cell office:value-type="float" office:value="8640000" calcext:value-type="float">
            <text:p>8640000</text:p>
          </table:table-cell>
          <table:table-cell table:formula="of:=[.B840]/[.C840]" office:value-type="float" office:value="0.00145659722222222" calcext:value-type="float">
            <text:p>0,00145659722222222000</text:p>
          </table:table-cell>
          <table:table-cell table:formula="of:=[.D841]-[.D84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B840]+15" office:value-type="float" office:value="12600" calcext:value-type="float">
            <text:p>12600</text:p>
          </table:table-cell>
          <table:table-cell office:value-type="float" office:value="8640000" calcext:value-type="float">
            <text:p>8640000</text:p>
          </table:table-cell>
          <table:table-cell table:formula="of:=[.B841]/[.C841]" office:value-type="float" office:value="0.00145833333333333" calcext:value-type="float">
            <text:p>0,00145833333333333000</text:p>
          </table:table-cell>
          <table:table-cell table:formula="of:=[.D842]-[.D841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B841]+15" office:value-type="float" office:value="12615" calcext:value-type="float">
            <text:p>12615</text:p>
          </table:table-cell>
          <table:table-cell office:value-type="float" office:value="8640000" calcext:value-type="float">
            <text:p>8640000</text:p>
          </table:table-cell>
          <table:table-cell table:formula="of:=[.B842]/[.C842]" office:value-type="float" office:value="0.00146006944444444" calcext:value-type="float">
            <text:p>0,00146006944444444000</text:p>
          </table:table-cell>
          <table:table-cell table:formula="of:=[.D843]-[.D84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B842]+15" office:value-type="float" office:value="12630" calcext:value-type="float">
            <text:p>12630</text:p>
          </table:table-cell>
          <table:table-cell office:value-type="float" office:value="8640000" calcext:value-type="float">
            <text:p>8640000</text:p>
          </table:table-cell>
          <table:table-cell table:formula="of:=[.B843]/[.C843]" office:value-type="float" office:value="0.00146180555555556" calcext:value-type="float">
            <text:p>0,00146180555555556000</text:p>
          </table:table-cell>
          <table:table-cell table:formula="of:=[.D844]-[.D843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B843]+15" office:value-type="float" office:value="12645" calcext:value-type="float">
            <text:p>12645</text:p>
          </table:table-cell>
          <table:table-cell office:value-type="float" office:value="8640000" calcext:value-type="float">
            <text:p>8640000</text:p>
          </table:table-cell>
          <table:table-cell table:formula="of:=[.B844]/[.C844]" office:value-type="float" office:value="0.00146354166666667" calcext:value-type="float">
            <text:p>0,00146354166666667000</text:p>
          </table:table-cell>
          <table:table-cell table:formula="of:=[.D845]-[.D84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B844]+15" office:value-type="float" office:value="12660" calcext:value-type="float">
            <text:p>12660</text:p>
          </table:table-cell>
          <table:table-cell office:value-type="float" office:value="8640000" calcext:value-type="float">
            <text:p>8640000</text:p>
          </table:table-cell>
          <table:table-cell table:formula="of:=[.B845]/[.C845]" office:value-type="float" office:value="0.00146527777777778" calcext:value-type="float">
            <text:p>0,00146527777777778000</text:p>
          </table:table-cell>
          <table:table-cell table:formula="of:=[.D846]-[.D845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B845]+15" office:value-type="float" office:value="12675" calcext:value-type="float">
            <text:p>12675</text:p>
          </table:table-cell>
          <table:table-cell office:value-type="float" office:value="8640000" calcext:value-type="float">
            <text:p>8640000</text:p>
          </table:table-cell>
          <table:table-cell table:formula="of:=[.B846]/[.C846]" office:value-type="float" office:value="0.00146701388888889" calcext:value-type="float">
            <text:p>0,00146701388888889000</text:p>
          </table:table-cell>
          <table:table-cell table:formula="of:=[.D847]-[.D84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B846]+15" office:value-type="float" office:value="12690" calcext:value-type="float">
            <text:p>12690</text:p>
          </table:table-cell>
          <table:table-cell office:value-type="float" office:value="8640000" calcext:value-type="float">
            <text:p>8640000</text:p>
          </table:table-cell>
          <table:table-cell table:formula="of:=[.B847]/[.C847]" office:value-type="float" office:value="0.00146875" calcext:value-type="float">
            <text:p>0,00146875000000000000</text:p>
          </table:table-cell>
          <table:table-cell table:formula="of:=[.D848]-[.D84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B847]+15" office:value-type="float" office:value="12705" calcext:value-type="float">
            <text:p>12705</text:p>
          </table:table-cell>
          <table:table-cell office:value-type="float" office:value="8640000" calcext:value-type="float">
            <text:p>8640000</text:p>
          </table:table-cell>
          <table:table-cell table:formula="of:=[.B848]/[.C848]" office:value-type="float" office:value="0.00147048611111111" calcext:value-type="float">
            <text:p>0,00147048611111111000</text:p>
          </table:table-cell>
          <table:table-cell table:formula="of:=[.D849]-[.D848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B848]+15" office:value-type="float" office:value="12720" calcext:value-type="float">
            <text:p>12720</text:p>
          </table:table-cell>
          <table:table-cell office:value-type="float" office:value="8640000" calcext:value-type="float">
            <text:p>8640000</text:p>
          </table:table-cell>
          <table:table-cell table:formula="of:=[.B849]/[.C849]" office:value-type="float" office:value="0.00147222222222222" calcext:value-type="float">
            <text:p>0,00147222222222222000</text:p>
          </table:table-cell>
          <table:table-cell table:formula="of:=[.D850]-[.D84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B849]+15" office:value-type="float" office:value="12735" calcext:value-type="float">
            <text:p>12735</text:p>
          </table:table-cell>
          <table:table-cell office:value-type="float" office:value="8640000" calcext:value-type="float">
            <text:p>8640000</text:p>
          </table:table-cell>
          <table:table-cell table:formula="of:=[.B850]/[.C850]" office:value-type="float" office:value="0.00147395833333333" calcext:value-type="float">
            <text:p>0,00147395833333333000</text:p>
          </table:table-cell>
          <table:table-cell table:formula="of:=[.D851]-[.D850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B850]+15" office:value-type="float" office:value="12750" calcext:value-type="float">
            <text:p>12750</text:p>
          </table:table-cell>
          <table:table-cell office:value-type="float" office:value="8640000" calcext:value-type="float">
            <text:p>8640000</text:p>
          </table:table-cell>
          <table:table-cell table:formula="of:=[.B851]/[.C851]" office:value-type="float" office:value="0.00147569444444444" calcext:value-type="float">
            <text:p>0,00147569444444444000</text:p>
          </table:table-cell>
          <table:table-cell table:formula="of:=[.D852]-[.D85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B851]+15" office:value-type="float" office:value="12765" calcext:value-type="float">
            <text:p>12765</text:p>
          </table:table-cell>
          <table:table-cell office:value-type="float" office:value="8640000" calcext:value-type="float">
            <text:p>8640000</text:p>
          </table:table-cell>
          <table:table-cell table:formula="of:=[.B852]/[.C852]" office:value-type="float" office:value="0.00147743055555556" calcext:value-type="float">
            <text:p>0,00147743055555556000</text:p>
          </table:table-cell>
          <table:table-cell table:formula="of:=[.D853]-[.D852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B852]+15" office:value-type="float" office:value="12780" calcext:value-type="float">
            <text:p>12780</text:p>
          </table:table-cell>
          <table:table-cell office:value-type="float" office:value="8640000" calcext:value-type="float">
            <text:p>8640000</text:p>
          </table:table-cell>
          <table:table-cell table:formula="of:=[.B853]/[.C853]" office:value-type="float" office:value="0.00147916666666667" calcext:value-type="float">
            <text:p>0,00147916666666667000</text:p>
          </table:table-cell>
          <table:table-cell table:formula="of:=[.D854]-[.D85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B853]+15" office:value-type="float" office:value="12795" calcext:value-type="float">
            <text:p>12795</text:p>
          </table:table-cell>
          <table:table-cell office:value-type="float" office:value="8640000" calcext:value-type="float">
            <text:p>8640000</text:p>
          </table:table-cell>
          <table:table-cell table:formula="of:=[.B854]/[.C854]" office:value-type="float" office:value="0.00148090277777778" calcext:value-type="float">
            <text:p>0,00148090277777778000</text:p>
          </table:table-cell>
          <table:table-cell table:formula="of:=[.D855]-[.D854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B854]+15" office:value-type="float" office:value="12810" calcext:value-type="float">
            <text:p>12810</text:p>
          </table:table-cell>
          <table:table-cell office:value-type="float" office:value="8640000" calcext:value-type="float">
            <text:p>8640000</text:p>
          </table:table-cell>
          <table:table-cell table:formula="of:=[.B855]/[.C855]" office:value-type="float" office:value="0.00148263888888889" calcext:value-type="float">
            <text:p>0,00148263888888889000</text:p>
          </table:table-cell>
          <table:table-cell table:formula="of:=[.D856]-[.D85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B855]+15" office:value-type="float" office:value="12825" calcext:value-type="float">
            <text:p>12825</text:p>
          </table:table-cell>
          <table:table-cell office:value-type="float" office:value="8640000" calcext:value-type="float">
            <text:p>8640000</text:p>
          </table:table-cell>
          <table:table-cell table:formula="of:=[.B856]/[.C856]" office:value-type="float" office:value="0.001484375" calcext:value-type="float">
            <text:p>0,00148437500000000000</text:p>
          </table:table-cell>
          <table:table-cell table:formula="of:=[.D857]-[.D856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B856]+15" office:value-type="float" office:value="12840" calcext:value-type="float">
            <text:p>12840</text:p>
          </table:table-cell>
          <table:table-cell office:value-type="float" office:value="8640000" calcext:value-type="float">
            <text:p>8640000</text:p>
          </table:table-cell>
          <table:table-cell table:formula="of:=[.B857]/[.C857]" office:value-type="float" office:value="0.00148611111111111" calcext:value-type="float">
            <text:p>0,00148611111111111000</text:p>
          </table:table-cell>
          <table:table-cell table:formula="of:=[.D858]-[.D85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B857]+15" office:value-type="float" office:value="12855" calcext:value-type="float">
            <text:p>12855</text:p>
          </table:table-cell>
          <table:table-cell office:value-type="float" office:value="8640000" calcext:value-type="float">
            <text:p>8640000</text:p>
          </table:table-cell>
          <table:table-cell table:formula="of:=[.B858]/[.C858]" office:value-type="float" office:value="0.00148784722222222" calcext:value-type="float">
            <text:p>0,00148784722222222000</text:p>
          </table:table-cell>
          <table:table-cell table:formula="of:=[.D859]-[.D85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B858]+15" office:value-type="float" office:value="12870" calcext:value-type="float">
            <text:p>12870</text:p>
          </table:table-cell>
          <table:table-cell office:value-type="float" office:value="8640000" calcext:value-type="float">
            <text:p>8640000</text:p>
          </table:table-cell>
          <table:table-cell table:formula="of:=[.B859]/[.C859]" office:value-type="float" office:value="0.00148958333333333" calcext:value-type="float">
            <text:p>0,00148958333333333000</text:p>
          </table:table-cell>
          <table:table-cell table:formula="of:=[.D860]-[.D859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B859]+15" office:value-type="float" office:value="12885" calcext:value-type="float">
            <text:p>12885</text:p>
          </table:table-cell>
          <table:table-cell office:value-type="float" office:value="8640000" calcext:value-type="float">
            <text:p>8640000</text:p>
          </table:table-cell>
          <table:table-cell table:formula="of:=[.B860]/[.C860]" office:value-type="float" office:value="0.00149131944444444" calcext:value-type="float">
            <text:p>0,00149131944444444000</text:p>
          </table:table-cell>
          <table:table-cell table:formula="of:=[.D861]-[.D86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B860]+15" office:value-type="float" office:value="12900" calcext:value-type="float">
            <text:p>12900</text:p>
          </table:table-cell>
          <table:table-cell office:value-type="float" office:value="8640000" calcext:value-type="float">
            <text:p>8640000</text:p>
          </table:table-cell>
          <table:table-cell table:formula="of:=[.B861]/[.C861]" office:value-type="float" office:value="0.00149305555555556" calcext:value-type="float">
            <text:p>0,00149305555555556000</text:p>
          </table:table-cell>
          <table:table-cell table:formula="of:=[.D862]-[.D861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B861]+15" office:value-type="float" office:value="12915" calcext:value-type="float">
            <text:p>12915</text:p>
          </table:table-cell>
          <table:table-cell office:value-type="float" office:value="8640000" calcext:value-type="float">
            <text:p>8640000</text:p>
          </table:table-cell>
          <table:table-cell table:formula="of:=[.B862]/[.C862]" office:value-type="float" office:value="0.00149479166666667" calcext:value-type="float">
            <text:p>0,00149479166666667000</text:p>
          </table:table-cell>
          <table:table-cell table:formula="of:=[.D863]-[.D86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B862]+15" office:value-type="float" office:value="12930" calcext:value-type="float">
            <text:p>12930</text:p>
          </table:table-cell>
          <table:table-cell office:value-type="float" office:value="8640000" calcext:value-type="float">
            <text:p>8640000</text:p>
          </table:table-cell>
          <table:table-cell table:formula="of:=[.B863]/[.C863]" office:value-type="float" office:value="0.00149652777777778" calcext:value-type="float">
            <text:p>0,00149652777777778000</text:p>
          </table:table-cell>
          <table:table-cell table:formula="of:=[.D864]-[.D863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B863]+15" office:value-type="float" office:value="12945" calcext:value-type="float">
            <text:p>12945</text:p>
          </table:table-cell>
          <table:table-cell office:value-type="float" office:value="8640000" calcext:value-type="float">
            <text:p>8640000</text:p>
          </table:table-cell>
          <table:table-cell table:formula="of:=[.B864]/[.C864]" office:value-type="float" office:value="0.00149826388888889" calcext:value-type="float">
            <text:p>0,00149826388888889000</text:p>
          </table:table-cell>
          <table:table-cell table:formula="of:=[.D865]-[.D86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B864]+15" office:value-type="float" office:value="12960" calcext:value-type="float">
            <text:p>12960</text:p>
          </table:table-cell>
          <table:table-cell office:value-type="float" office:value="8640000" calcext:value-type="float">
            <text:p>8640000</text:p>
          </table:table-cell>
          <table:table-cell table:formula="of:=[.B865]/[.C865]" office:value-type="float" office:value="0.0015" calcext:value-type="float">
            <text:p>0,00150000000000000000</text:p>
          </table:table-cell>
          <table:table-cell table:formula="of:=[.D866]-[.D865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B865]+15" office:value-type="float" office:value="12975" calcext:value-type="float">
            <text:p>12975</text:p>
          </table:table-cell>
          <table:table-cell office:value-type="float" office:value="8640000" calcext:value-type="float">
            <text:p>8640000</text:p>
          </table:table-cell>
          <table:table-cell table:formula="of:=[.B866]/[.C866]" office:value-type="float" office:value="0.00150173611111111" calcext:value-type="float">
            <text:p>0,00150173611111111000</text:p>
          </table:table-cell>
          <table:table-cell table:formula="of:=[.D867]-[.D86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B866]+15" office:value-type="float" office:value="12990" calcext:value-type="float">
            <text:p>12990</text:p>
          </table:table-cell>
          <table:table-cell office:value-type="float" office:value="8640000" calcext:value-type="float">
            <text:p>8640000</text:p>
          </table:table-cell>
          <table:table-cell table:formula="of:=[.B867]/[.C867]" office:value-type="float" office:value="0.00150347222222222" calcext:value-type="float">
            <text:p>0,00150347222222222000</text:p>
          </table:table-cell>
          <table:table-cell table:formula="of:=[.D868]-[.D86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B867]+15" office:value-type="float" office:value="13005" calcext:value-type="float">
            <text:p>13005</text:p>
          </table:table-cell>
          <table:table-cell office:value-type="float" office:value="8640000" calcext:value-type="float">
            <text:p>8640000</text:p>
          </table:table-cell>
          <table:table-cell table:formula="of:=[.B868]/[.C868]" office:value-type="float" office:value="0.00150520833333333" calcext:value-type="float">
            <text:p>0,00150520833333333000</text:p>
          </table:table-cell>
          <table:table-cell table:formula="of:=[.D869]-[.D868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B868]+15" office:value-type="float" office:value="13020" calcext:value-type="float">
            <text:p>13020</text:p>
          </table:table-cell>
          <table:table-cell office:value-type="float" office:value="8640000" calcext:value-type="float">
            <text:p>8640000</text:p>
          </table:table-cell>
          <table:table-cell table:formula="of:=[.B869]/[.C869]" office:value-type="float" office:value="0.00150694444444444" calcext:value-type="float">
            <text:p>0,00150694444444444000</text:p>
          </table:table-cell>
          <table:table-cell table:formula="of:=[.D870]-[.D86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B869]+15" office:value-type="float" office:value="13035" calcext:value-type="float">
            <text:p>13035</text:p>
          </table:table-cell>
          <table:table-cell office:value-type="float" office:value="8640000" calcext:value-type="float">
            <text:p>8640000</text:p>
          </table:table-cell>
          <table:table-cell table:formula="of:=[.B870]/[.C870]" office:value-type="float" office:value="0.00150868055555556" calcext:value-type="float">
            <text:p>0,00150868055555556000</text:p>
          </table:table-cell>
          <table:table-cell table:formula="of:=[.D871]-[.D870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B870]+15" office:value-type="float" office:value="13050" calcext:value-type="float">
            <text:p>13050</text:p>
          </table:table-cell>
          <table:table-cell office:value-type="float" office:value="8640000" calcext:value-type="float">
            <text:p>8640000</text:p>
          </table:table-cell>
          <table:table-cell table:formula="of:=[.B871]/[.C871]" office:value-type="float" office:value="0.00151041666666667" calcext:value-type="float">
            <text:p>0,00151041666666667000</text:p>
          </table:table-cell>
          <table:table-cell table:formula="of:=[.D872]-[.D87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B871]+15" office:value-type="float" office:value="13065" calcext:value-type="float">
            <text:p>13065</text:p>
          </table:table-cell>
          <table:table-cell office:value-type="float" office:value="8640000" calcext:value-type="float">
            <text:p>8640000</text:p>
          </table:table-cell>
          <table:table-cell table:formula="of:=[.B872]/[.C872]" office:value-type="float" office:value="0.00151215277777778" calcext:value-type="float">
            <text:p>0,00151215277777778000</text:p>
          </table:table-cell>
          <table:table-cell table:formula="of:=[.D873]-[.D872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B872]+15" office:value-type="float" office:value="13080" calcext:value-type="float">
            <text:p>13080</text:p>
          </table:table-cell>
          <table:table-cell office:value-type="float" office:value="8640000" calcext:value-type="float">
            <text:p>8640000</text:p>
          </table:table-cell>
          <table:table-cell table:formula="of:=[.B873]/[.C873]" office:value-type="float" office:value="0.00151388888888889" calcext:value-type="float">
            <text:p>0,00151388888888889000</text:p>
          </table:table-cell>
          <table:table-cell table:formula="of:=[.D874]-[.D87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B873]+15" office:value-type="float" office:value="13095" calcext:value-type="float">
            <text:p>13095</text:p>
          </table:table-cell>
          <table:table-cell office:value-type="float" office:value="8640000" calcext:value-type="float">
            <text:p>8640000</text:p>
          </table:table-cell>
          <table:table-cell table:formula="of:=[.B874]/[.C874]" office:value-type="float" office:value="0.001515625" calcext:value-type="float">
            <text:p>0,00151562500000000000</text:p>
          </table:table-cell>
          <table:table-cell table:formula="of:=[.D875]-[.D874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B874]+15" office:value-type="float" office:value="13110" calcext:value-type="float">
            <text:p>13110</text:p>
          </table:table-cell>
          <table:table-cell office:value-type="float" office:value="8640000" calcext:value-type="float">
            <text:p>8640000</text:p>
          </table:table-cell>
          <table:table-cell table:formula="of:=[.B875]/[.C875]" office:value-type="float" office:value="0.00151736111111111" calcext:value-type="float">
            <text:p>0,00151736111111111000</text:p>
          </table:table-cell>
          <table:table-cell table:formula="of:=[.D876]-[.D87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B875]+15" office:value-type="float" office:value="13125" calcext:value-type="float">
            <text:p>13125</text:p>
          </table:table-cell>
          <table:table-cell office:value-type="float" office:value="8640000" calcext:value-type="float">
            <text:p>8640000</text:p>
          </table:table-cell>
          <table:table-cell table:formula="of:=[.B876]/[.C876]" office:value-type="float" office:value="0.00151909722222222" calcext:value-type="float">
            <text:p>0,00151909722222222000</text:p>
          </table:table-cell>
          <table:table-cell table:formula="of:=[.D877]-[.D876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B876]+15" office:value-type="float" office:value="13140" calcext:value-type="float">
            <text:p>13140</text:p>
          </table:table-cell>
          <table:table-cell office:value-type="float" office:value="8640000" calcext:value-type="float">
            <text:p>8640000</text:p>
          </table:table-cell>
          <table:table-cell table:formula="of:=[.B877]/[.C877]" office:value-type="float" office:value="0.00152083333333333" calcext:value-type="float">
            <text:p>0,00152083333333333000</text:p>
          </table:table-cell>
          <table:table-cell table:formula="of:=[.D878]-[.D87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B877]+15" office:value-type="float" office:value="13155" calcext:value-type="float">
            <text:p>13155</text:p>
          </table:table-cell>
          <table:table-cell office:value-type="float" office:value="8640000" calcext:value-type="float">
            <text:p>8640000</text:p>
          </table:table-cell>
          <table:table-cell table:formula="of:=[.B878]/[.C878]" office:value-type="float" office:value="0.00152256944444444" calcext:value-type="float">
            <text:p>0,00152256944444444000</text:p>
          </table:table-cell>
          <table:table-cell table:formula="of:=[.D879]-[.D87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B878]+15" office:value-type="float" office:value="13170" calcext:value-type="float">
            <text:p>13170</text:p>
          </table:table-cell>
          <table:table-cell office:value-type="float" office:value="8640000" calcext:value-type="float">
            <text:p>8640000</text:p>
          </table:table-cell>
          <table:table-cell table:formula="of:=[.B879]/[.C879]" office:value-type="float" office:value="0.00152430555555556" calcext:value-type="float">
            <text:p>0,00152430555555556000</text:p>
          </table:table-cell>
          <table:table-cell table:formula="of:=[.D880]-[.D879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B879]+15" office:value-type="float" office:value="13185" calcext:value-type="float">
            <text:p>13185</text:p>
          </table:table-cell>
          <table:table-cell office:value-type="float" office:value="8640000" calcext:value-type="float">
            <text:p>8640000</text:p>
          </table:table-cell>
          <table:table-cell table:formula="of:=[.B880]/[.C880]" office:value-type="float" office:value="0.00152604166666667" calcext:value-type="float">
            <text:p>0,00152604166666667000</text:p>
          </table:table-cell>
          <table:table-cell table:formula="of:=[.D881]-[.D88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B880]+15" office:value-type="float" office:value="13200" calcext:value-type="float">
            <text:p>13200</text:p>
          </table:table-cell>
          <table:table-cell office:value-type="float" office:value="8640000" calcext:value-type="float">
            <text:p>8640000</text:p>
          </table:table-cell>
          <table:table-cell table:formula="of:=[.B881]/[.C881]" office:value-type="float" office:value="0.00152777777777778" calcext:value-type="float">
            <text:p>0,00152777777777778000</text:p>
          </table:table-cell>
          <table:table-cell table:formula="of:=[.D882]-[.D881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B881]+15" office:value-type="float" office:value="13215" calcext:value-type="float">
            <text:p>13215</text:p>
          </table:table-cell>
          <table:table-cell office:value-type="float" office:value="8640000" calcext:value-type="float">
            <text:p>8640000</text:p>
          </table:table-cell>
          <table:table-cell table:formula="of:=[.B882]/[.C882]" office:value-type="float" office:value="0.00152951388888889" calcext:value-type="float">
            <text:p>0,00152951388888889000</text:p>
          </table:table-cell>
          <table:table-cell table:formula="of:=[.D883]-[.D88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B882]+15" office:value-type="float" office:value="13230" calcext:value-type="float">
            <text:p>13230</text:p>
          </table:table-cell>
          <table:table-cell office:value-type="float" office:value="8640000" calcext:value-type="float">
            <text:p>8640000</text:p>
          </table:table-cell>
          <table:table-cell table:formula="of:=[.B883]/[.C883]" office:value-type="float" office:value="0.00153125" calcext:value-type="float">
            <text:p>0,00153125000000000000</text:p>
          </table:table-cell>
          <table:table-cell table:formula="of:=[.D884]-[.D883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B883]+15" office:value-type="float" office:value="13245" calcext:value-type="float">
            <text:p>13245</text:p>
          </table:table-cell>
          <table:table-cell office:value-type="float" office:value="8640000" calcext:value-type="float">
            <text:p>8640000</text:p>
          </table:table-cell>
          <table:table-cell table:formula="of:=[.B884]/[.C884]" office:value-type="float" office:value="0.00153298611111111" calcext:value-type="float">
            <text:p>0,00153298611111111000</text:p>
          </table:table-cell>
          <table:table-cell table:formula="of:=[.D885]-[.D88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B884]+15" office:value-type="float" office:value="13260" calcext:value-type="float">
            <text:p>13260</text:p>
          </table:table-cell>
          <table:table-cell office:value-type="float" office:value="8640000" calcext:value-type="float">
            <text:p>8640000</text:p>
          </table:table-cell>
          <table:table-cell table:formula="of:=[.B885]/[.C885]" office:value-type="float" office:value="0.00153472222222222" calcext:value-type="float">
            <text:p>0,00153472222222222000</text:p>
          </table:table-cell>
          <table:table-cell table:formula="of:=[.D886]-[.D885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B885]+15" office:value-type="float" office:value="13275" calcext:value-type="float">
            <text:p>13275</text:p>
          </table:table-cell>
          <table:table-cell office:value-type="float" office:value="8640000" calcext:value-type="float">
            <text:p>8640000</text:p>
          </table:table-cell>
          <table:table-cell table:formula="of:=[.B886]/[.C886]" office:value-type="float" office:value="0.00153645833333333" calcext:value-type="float">
            <text:p>0,00153645833333333000</text:p>
          </table:table-cell>
          <table:table-cell table:formula="of:=[.D887]-[.D88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B886]+15" office:value-type="float" office:value="13290" calcext:value-type="float">
            <text:p>13290</text:p>
          </table:table-cell>
          <table:table-cell office:value-type="float" office:value="8640000" calcext:value-type="float">
            <text:p>8640000</text:p>
          </table:table-cell>
          <table:table-cell table:formula="of:=[.B887]/[.C887]" office:value-type="float" office:value="0.00153819444444444" calcext:value-type="float">
            <text:p>0,00153819444444444000</text:p>
          </table:table-cell>
          <table:table-cell table:formula="of:=[.D888]-[.D887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B887]+15" office:value-type="float" office:value="13305" calcext:value-type="float">
            <text:p>13305</text:p>
          </table:table-cell>
          <table:table-cell office:value-type="float" office:value="8640000" calcext:value-type="float">
            <text:p>8640000</text:p>
          </table:table-cell>
          <table:table-cell table:formula="of:=[.B888]/[.C888]" office:value-type="float" office:value="0.00153993055555556" calcext:value-type="float">
            <text:p>0,00153993055555556000</text:p>
          </table:table-cell>
          <table:table-cell table:formula="of:=[.D889]-[.D88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B888]+15" office:value-type="float" office:value="13320" calcext:value-type="float">
            <text:p>13320</text:p>
          </table:table-cell>
          <table:table-cell office:value-type="float" office:value="8640000" calcext:value-type="float">
            <text:p>8640000</text:p>
          </table:table-cell>
          <table:table-cell table:formula="of:=[.B889]/[.C889]" office:value-type="float" office:value="0.00154166666666667" calcext:value-type="float">
            <text:p>0,00154166666666667000</text:p>
          </table:table-cell>
          <table:table-cell table:formula="of:=[.D890]-[.D88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B889]+15" office:value-type="float" office:value="13335" calcext:value-type="float">
            <text:p>13335</text:p>
          </table:table-cell>
          <table:table-cell office:value-type="float" office:value="8640000" calcext:value-type="float">
            <text:p>8640000</text:p>
          </table:table-cell>
          <table:table-cell table:formula="of:=[.B890]/[.C890]" office:value-type="float" office:value="0.00154340277777778" calcext:value-type="float">
            <text:p>0,00154340277777778000</text:p>
          </table:table-cell>
          <table:table-cell table:formula="of:=[.D891]-[.D890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B890]+15" office:value-type="float" office:value="13350" calcext:value-type="float">
            <text:p>13350</text:p>
          </table:table-cell>
          <table:table-cell office:value-type="float" office:value="8640000" calcext:value-type="float">
            <text:p>8640000</text:p>
          </table:table-cell>
          <table:table-cell table:formula="of:=[.B891]/[.C891]" office:value-type="float" office:value="0.00154513888888889" calcext:value-type="float">
            <text:p>0,00154513888888889000</text:p>
          </table:table-cell>
          <table:table-cell table:formula="of:=[.D892]-[.D89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B891]+15" office:value-type="float" office:value="13365" calcext:value-type="float">
            <text:p>13365</text:p>
          </table:table-cell>
          <table:table-cell office:value-type="float" office:value="8640000" calcext:value-type="float">
            <text:p>8640000</text:p>
          </table:table-cell>
          <table:table-cell table:formula="of:=[.B892]/[.C892]" office:value-type="float" office:value="0.001546875" calcext:value-type="float">
            <text:p>0,00154687500000000000</text:p>
          </table:table-cell>
          <table:table-cell table:formula="of:=[.D893]-[.D892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B892]+15" office:value-type="float" office:value="13380" calcext:value-type="float">
            <text:p>13380</text:p>
          </table:table-cell>
          <table:table-cell office:value-type="float" office:value="8640000" calcext:value-type="float">
            <text:p>8640000</text:p>
          </table:table-cell>
          <table:table-cell table:formula="of:=[.B893]/[.C893]" office:value-type="float" office:value="0.00154861111111111" calcext:value-type="float">
            <text:p>0,00154861111111111000</text:p>
          </table:table-cell>
          <table:table-cell table:formula="of:=[.D894]-[.D89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B893]+15" office:value-type="float" office:value="13395" calcext:value-type="float">
            <text:p>13395</text:p>
          </table:table-cell>
          <table:table-cell office:value-type="float" office:value="8640000" calcext:value-type="float">
            <text:p>8640000</text:p>
          </table:table-cell>
          <table:table-cell table:formula="of:=[.B894]/[.C894]" office:value-type="float" office:value="0.00155034722222222" calcext:value-type="float">
            <text:p>0,00155034722222222000</text:p>
          </table:table-cell>
          <table:table-cell table:formula="of:=[.D895]-[.D894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B894]+15" office:value-type="float" office:value="13410" calcext:value-type="float">
            <text:p>13410</text:p>
          </table:table-cell>
          <table:table-cell office:value-type="float" office:value="8640000" calcext:value-type="float">
            <text:p>8640000</text:p>
          </table:table-cell>
          <table:table-cell table:formula="of:=[.B895]/[.C895]" office:value-type="float" office:value="0.00155208333333333" calcext:value-type="float">
            <text:p>0,00155208333333333000</text:p>
          </table:table-cell>
          <table:table-cell table:formula="of:=[.D896]-[.D89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B895]+15" office:value-type="float" office:value="13425" calcext:value-type="float">
            <text:p>13425</text:p>
          </table:table-cell>
          <table:table-cell office:value-type="float" office:value="8640000" calcext:value-type="float">
            <text:p>8640000</text:p>
          </table:table-cell>
          <table:table-cell table:formula="of:=[.B896]/[.C896]" office:value-type="float" office:value="0.00155381944444444" calcext:value-type="float">
            <text:p>0,00155381944444444000</text:p>
          </table:table-cell>
          <table:table-cell table:formula="of:=[.D897]-[.D896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B896]+15" office:value-type="float" office:value="13440" calcext:value-type="float">
            <text:p>13440</text:p>
          </table:table-cell>
          <table:table-cell office:value-type="float" office:value="8640000" calcext:value-type="float">
            <text:p>8640000</text:p>
          </table:table-cell>
          <table:table-cell table:formula="of:=[.B897]/[.C897]" office:value-type="float" office:value="0.00155555555555556" calcext:value-type="float">
            <text:p>0,00155555555555556000</text:p>
          </table:table-cell>
          <table:table-cell table:formula="of:=[.D898]-[.D89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B897]+15" office:value-type="float" office:value="13455" calcext:value-type="float">
            <text:p>13455</text:p>
          </table:table-cell>
          <table:table-cell office:value-type="float" office:value="8640000" calcext:value-type="float">
            <text:p>8640000</text:p>
          </table:table-cell>
          <table:table-cell table:formula="of:=[.B898]/[.C898]" office:value-type="float" office:value="0.00155729166666667" calcext:value-type="float">
            <text:p>0,00155729166666667000</text:p>
          </table:table-cell>
          <table:table-cell table:formula="of:=[.D899]-[.D89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B898]+15" office:value-type="float" office:value="13470" calcext:value-type="float">
            <text:p>13470</text:p>
          </table:table-cell>
          <table:table-cell office:value-type="float" office:value="8640000" calcext:value-type="float">
            <text:p>8640000</text:p>
          </table:table-cell>
          <table:table-cell table:formula="of:=[.B899]/[.C899]" office:value-type="float" office:value="0.00155902777777778" calcext:value-type="float">
            <text:p>0,00155902777777778000</text:p>
          </table:table-cell>
          <table:table-cell table:formula="of:=[.D900]-[.D899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B899]+15" office:value-type="float" office:value="13485" calcext:value-type="float">
            <text:p>13485</text:p>
          </table:table-cell>
          <table:table-cell office:value-type="float" office:value="8640000" calcext:value-type="float">
            <text:p>8640000</text:p>
          </table:table-cell>
          <table:table-cell table:formula="of:=[.B900]/[.C900]" office:value-type="float" office:value="0.00156076388888889" calcext:value-type="float">
            <text:p>0,00156076388888889000</text:p>
          </table:table-cell>
          <table:table-cell table:formula="of:=[.D901]-[.D90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B900]+15" office:value-type="float" office:value="13500" calcext:value-type="float">
            <text:p>13500</text:p>
          </table:table-cell>
          <table:table-cell office:value-type="float" office:value="8640000" calcext:value-type="float">
            <text:p>8640000</text:p>
          </table:table-cell>
          <table:table-cell table:formula="of:=[.B901]/[.C901]" office:value-type="float" office:value="0.0015625" calcext:value-type="float">
            <text:p>0,00156250000000000000</text:p>
          </table:table-cell>
          <table:table-cell table:formula="of:=[.D902]-[.D901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B901]+15" office:value-type="float" office:value="13515" calcext:value-type="float">
            <text:p>13515</text:p>
          </table:table-cell>
          <table:table-cell office:value-type="float" office:value="8640000" calcext:value-type="float">
            <text:p>8640000</text:p>
          </table:table-cell>
          <table:table-cell table:formula="of:=[.B902]/[.C902]" office:value-type="float" office:value="0.00156423611111111" calcext:value-type="float">
            <text:p>0,00156423611111111000</text:p>
          </table:table-cell>
          <table:table-cell table:formula="of:=[.D903]-[.D90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B902]+15" office:value-type="float" office:value="13530" calcext:value-type="float">
            <text:p>13530</text:p>
          </table:table-cell>
          <table:table-cell office:value-type="float" office:value="8640000" calcext:value-type="float">
            <text:p>8640000</text:p>
          </table:table-cell>
          <table:table-cell table:formula="of:=[.B903]/[.C903]" office:value-type="float" office:value="0.00156597222222222" calcext:value-type="float">
            <text:p>0,00156597222222222000</text:p>
          </table:table-cell>
          <table:table-cell table:formula="of:=[.D904]-[.D903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B903]+15" office:value-type="float" office:value="13545" calcext:value-type="float">
            <text:p>13545</text:p>
          </table:table-cell>
          <table:table-cell office:value-type="float" office:value="8640000" calcext:value-type="float">
            <text:p>8640000</text:p>
          </table:table-cell>
          <table:table-cell table:formula="of:=[.B904]/[.C904]" office:value-type="float" office:value="0.00156770833333333" calcext:value-type="float">
            <text:p>0,00156770833333333000</text:p>
          </table:table-cell>
          <table:table-cell table:formula="of:=[.D905]-[.D90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B904]+15" office:value-type="float" office:value="13560" calcext:value-type="float">
            <text:p>13560</text:p>
          </table:table-cell>
          <table:table-cell office:value-type="float" office:value="8640000" calcext:value-type="float">
            <text:p>8640000</text:p>
          </table:table-cell>
          <table:table-cell table:formula="of:=[.B905]/[.C905]" office:value-type="float" office:value="0.00156944444444444" calcext:value-type="float">
            <text:p>0,00156944444444444000</text:p>
          </table:table-cell>
          <table:table-cell table:formula="of:=[.D906]-[.D905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B905]+15" office:value-type="float" office:value="13575" calcext:value-type="float">
            <text:p>13575</text:p>
          </table:table-cell>
          <table:table-cell office:value-type="float" office:value="8640000" calcext:value-type="float">
            <text:p>8640000</text:p>
          </table:table-cell>
          <table:table-cell table:formula="of:=[.B906]/[.C906]" office:value-type="float" office:value="0.00157118055555556" calcext:value-type="float">
            <text:p>0,00157118055555556000</text:p>
          </table:table-cell>
          <table:table-cell table:formula="of:=[.D907]-[.D90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B906]+15" office:value-type="float" office:value="13590" calcext:value-type="float">
            <text:p>13590</text:p>
          </table:table-cell>
          <table:table-cell office:value-type="float" office:value="8640000" calcext:value-type="float">
            <text:p>8640000</text:p>
          </table:table-cell>
          <table:table-cell table:formula="of:=[.B907]/[.C907]" office:value-type="float" office:value="0.00157291666666667" calcext:value-type="float">
            <text:p>0,00157291666666667000</text:p>
          </table:table-cell>
          <table:table-cell table:formula="of:=[.D908]-[.D907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B907]+15" office:value-type="float" office:value="13605" calcext:value-type="float">
            <text:p>13605</text:p>
          </table:table-cell>
          <table:table-cell office:value-type="float" office:value="8640000" calcext:value-type="float">
            <text:p>8640000</text:p>
          </table:table-cell>
          <table:table-cell table:formula="of:=[.B908]/[.C908]" office:value-type="float" office:value="0.00157465277777778" calcext:value-type="float">
            <text:p>0,00157465277777778000</text:p>
          </table:table-cell>
          <table:table-cell table:formula="of:=[.D909]-[.D90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B908]+15" office:value-type="float" office:value="13620" calcext:value-type="float">
            <text:p>13620</text:p>
          </table:table-cell>
          <table:table-cell office:value-type="float" office:value="8640000" calcext:value-type="float">
            <text:p>8640000</text:p>
          </table:table-cell>
          <table:table-cell table:formula="of:=[.B909]/[.C909]" office:value-type="float" office:value="0.00157638888888889" calcext:value-type="float">
            <text:p>0,00157638888888889000</text:p>
          </table:table-cell>
          <table:table-cell table:formula="of:=[.D910]-[.D90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B909]+15" office:value-type="float" office:value="13635" calcext:value-type="float">
            <text:p>13635</text:p>
          </table:table-cell>
          <table:table-cell office:value-type="float" office:value="8640000" calcext:value-type="float">
            <text:p>8640000</text:p>
          </table:table-cell>
          <table:table-cell table:formula="of:=[.B910]/[.C910]" office:value-type="float" office:value="0.001578125" calcext:value-type="float">
            <text:p>0,00157812500000000000</text:p>
          </table:table-cell>
          <table:table-cell table:formula="of:=[.D911]-[.D910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B910]+15" office:value-type="float" office:value="13650" calcext:value-type="float">
            <text:p>13650</text:p>
          </table:table-cell>
          <table:table-cell office:value-type="float" office:value="8640000" calcext:value-type="float">
            <text:p>8640000</text:p>
          </table:table-cell>
          <table:table-cell table:formula="of:=[.B911]/[.C911]" office:value-type="float" office:value="0.00157986111111111" calcext:value-type="float">
            <text:p>0,00157986111111111000</text:p>
          </table:table-cell>
          <table:table-cell table:formula="of:=[.D912]-[.D91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B911]+15" office:value-type="float" office:value="13665" calcext:value-type="float">
            <text:p>13665</text:p>
          </table:table-cell>
          <table:table-cell office:value-type="float" office:value="8640000" calcext:value-type="float">
            <text:p>8640000</text:p>
          </table:table-cell>
          <table:table-cell table:formula="of:=[.B912]/[.C912]" office:value-type="float" office:value="0.00158159722222222" calcext:value-type="float">
            <text:p>0,00158159722222222000</text:p>
          </table:table-cell>
          <table:table-cell table:formula="of:=[.D913]-[.D912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B912]+15" office:value-type="float" office:value="13680" calcext:value-type="float">
            <text:p>13680</text:p>
          </table:table-cell>
          <table:table-cell office:value-type="float" office:value="8640000" calcext:value-type="float">
            <text:p>8640000</text:p>
          </table:table-cell>
          <table:table-cell table:formula="of:=[.B913]/[.C913]" office:value-type="float" office:value="0.00158333333333333" calcext:value-type="float">
            <text:p>0,00158333333333333000</text:p>
          </table:table-cell>
          <table:table-cell table:formula="of:=[.D914]-[.D91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B913]+15" office:value-type="float" office:value="13695" calcext:value-type="float">
            <text:p>13695</text:p>
          </table:table-cell>
          <table:table-cell office:value-type="float" office:value="8640000" calcext:value-type="float">
            <text:p>8640000</text:p>
          </table:table-cell>
          <table:table-cell table:formula="of:=[.B914]/[.C914]" office:value-type="float" office:value="0.00158506944444444" calcext:value-type="float">
            <text:p>0,00158506944444444000</text:p>
          </table:table-cell>
          <table:table-cell table:formula="of:=[.D915]-[.D914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B914]+15" office:value-type="float" office:value="13710" calcext:value-type="float">
            <text:p>13710</text:p>
          </table:table-cell>
          <table:table-cell office:value-type="float" office:value="8640000" calcext:value-type="float">
            <text:p>8640000</text:p>
          </table:table-cell>
          <table:table-cell table:formula="of:=[.B915]/[.C915]" office:value-type="float" office:value="0.00158680555555556" calcext:value-type="float">
            <text:p>0,00158680555555556000</text:p>
          </table:table-cell>
          <table:table-cell table:formula="of:=[.D916]-[.D91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B915]+15" office:value-type="float" office:value="13725" calcext:value-type="float">
            <text:p>13725</text:p>
          </table:table-cell>
          <table:table-cell office:value-type="float" office:value="8640000" calcext:value-type="float">
            <text:p>8640000</text:p>
          </table:table-cell>
          <table:table-cell table:formula="of:=[.B916]/[.C916]" office:value-type="float" office:value="0.00158854166666667" calcext:value-type="float">
            <text:p>0,00158854166666667000</text:p>
          </table:table-cell>
          <table:table-cell table:formula="of:=[.D917]-[.D916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B916]+15" office:value-type="float" office:value="13740" calcext:value-type="float">
            <text:p>13740</text:p>
          </table:table-cell>
          <table:table-cell office:value-type="float" office:value="8640000" calcext:value-type="float">
            <text:p>8640000</text:p>
          </table:table-cell>
          <table:table-cell table:formula="of:=[.B917]/[.C917]" office:value-type="float" office:value="0.00159027777777778" calcext:value-type="float">
            <text:p>0,00159027777777778000</text:p>
          </table:table-cell>
          <table:table-cell table:formula="of:=[.D918]-[.D91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B917]+15" office:value-type="float" office:value="13755" calcext:value-type="float">
            <text:p>13755</text:p>
          </table:table-cell>
          <table:table-cell office:value-type="float" office:value="8640000" calcext:value-type="float">
            <text:p>8640000</text:p>
          </table:table-cell>
          <table:table-cell table:formula="of:=[.B918]/[.C918]" office:value-type="float" office:value="0.00159201388888889" calcext:value-type="float">
            <text:p>0,00159201388888889000</text:p>
          </table:table-cell>
          <table:table-cell table:formula="of:=[.D919]-[.D918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B918]+15" office:value-type="float" office:value="13770" calcext:value-type="float">
            <text:p>13770</text:p>
          </table:table-cell>
          <table:table-cell office:value-type="float" office:value="8640000" calcext:value-type="float">
            <text:p>8640000</text:p>
          </table:table-cell>
          <table:table-cell table:formula="of:=[.B919]/[.C919]" office:value-type="float" office:value="0.00159375" calcext:value-type="float">
            <text:p>0,00159375000000000000</text:p>
          </table:table-cell>
          <table:table-cell table:formula="of:=[.D920]-[.D91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B919]+15" office:value-type="float" office:value="13785" calcext:value-type="float">
            <text:p>13785</text:p>
          </table:table-cell>
          <table:table-cell office:value-type="float" office:value="8640000" calcext:value-type="float">
            <text:p>8640000</text:p>
          </table:table-cell>
          <table:table-cell table:formula="of:=[.B920]/[.C920]" office:value-type="float" office:value="0.00159548611111111" calcext:value-type="float">
            <text:p>0,00159548611111111000</text:p>
          </table:table-cell>
          <table:table-cell table:formula="of:=[.D921]-[.D92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B920]+15" office:value-type="float" office:value="13800" calcext:value-type="float">
            <text:p>13800</text:p>
          </table:table-cell>
          <table:table-cell office:value-type="float" office:value="8640000" calcext:value-type="float">
            <text:p>8640000</text:p>
          </table:table-cell>
          <table:table-cell table:formula="of:=[.B921]/[.C921]" office:value-type="float" office:value="0.00159722222222222" calcext:value-type="float">
            <text:p>0,00159722222222222000</text:p>
          </table:table-cell>
          <table:table-cell table:formula="of:=[.D922]-[.D921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B921]+15" office:value-type="float" office:value="13815" calcext:value-type="float">
            <text:p>13815</text:p>
          </table:table-cell>
          <table:table-cell office:value-type="float" office:value="8640000" calcext:value-type="float">
            <text:p>8640000</text:p>
          </table:table-cell>
          <table:table-cell table:formula="of:=[.B922]/[.C922]" office:value-type="float" office:value="0.00159895833333333" calcext:value-type="float">
            <text:p>0,00159895833333333000</text:p>
          </table:table-cell>
          <table:table-cell table:formula="of:=[.D923]-[.D92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B922]+15" office:value-type="float" office:value="13830" calcext:value-type="float">
            <text:p>13830</text:p>
          </table:table-cell>
          <table:table-cell office:value-type="float" office:value="8640000" calcext:value-type="float">
            <text:p>8640000</text:p>
          </table:table-cell>
          <table:table-cell table:formula="of:=[.B923]/[.C923]" office:value-type="float" office:value="0.00160069444444444" calcext:value-type="float">
            <text:p>0,00160069444444444000</text:p>
          </table:table-cell>
          <table:table-cell table:formula="of:=[.D924]-[.D923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B923]+15" office:value-type="float" office:value="13845" calcext:value-type="float">
            <text:p>13845</text:p>
          </table:table-cell>
          <table:table-cell office:value-type="float" office:value="8640000" calcext:value-type="float">
            <text:p>8640000</text:p>
          </table:table-cell>
          <table:table-cell table:formula="of:=[.B924]/[.C924]" office:value-type="float" office:value="0.00160243055555556" calcext:value-type="float">
            <text:p>0,00160243055555556000</text:p>
          </table:table-cell>
          <table:table-cell table:formula="of:=[.D925]-[.D92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B924]+15" office:value-type="float" office:value="13860" calcext:value-type="float">
            <text:p>13860</text:p>
          </table:table-cell>
          <table:table-cell office:value-type="float" office:value="8640000" calcext:value-type="float">
            <text:p>8640000</text:p>
          </table:table-cell>
          <table:table-cell table:formula="of:=[.B925]/[.C925]" office:value-type="float" office:value="0.00160416666666667" calcext:value-type="float">
            <text:p>0,00160416666666667000</text:p>
          </table:table-cell>
          <table:table-cell table:formula="of:=[.D926]-[.D925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B925]+15" office:value-type="float" office:value="13875" calcext:value-type="float">
            <text:p>13875</text:p>
          </table:table-cell>
          <table:table-cell office:value-type="float" office:value="8640000" calcext:value-type="float">
            <text:p>8640000</text:p>
          </table:table-cell>
          <table:table-cell table:formula="of:=[.B926]/[.C926]" office:value-type="float" office:value="0.00160590277777778" calcext:value-type="float">
            <text:p>0,00160590277777778000</text:p>
          </table:table-cell>
          <table:table-cell table:formula="of:=[.D927]-[.D92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B926]+15" office:value-type="float" office:value="13890" calcext:value-type="float">
            <text:p>13890</text:p>
          </table:table-cell>
          <table:table-cell office:value-type="float" office:value="8640000" calcext:value-type="float">
            <text:p>8640000</text:p>
          </table:table-cell>
          <table:table-cell table:formula="of:=[.B927]/[.C927]" office:value-type="float" office:value="0.00160763888888889" calcext:value-type="float">
            <text:p>0,00160763888888889000</text:p>
          </table:table-cell>
          <table:table-cell table:formula="of:=[.D928]-[.D927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B927]+15" office:value-type="float" office:value="13905" calcext:value-type="float">
            <text:p>13905</text:p>
          </table:table-cell>
          <table:table-cell office:value-type="float" office:value="8640000" calcext:value-type="float">
            <text:p>8640000</text:p>
          </table:table-cell>
          <table:table-cell table:formula="of:=[.B928]/[.C928]" office:value-type="float" office:value="0.001609375" calcext:value-type="float">
            <text:p>0,00160937500000000000</text:p>
          </table:table-cell>
          <table:table-cell table:formula="of:=[.D929]-[.D92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B928]+15" office:value-type="float" office:value="13920" calcext:value-type="float">
            <text:p>13920</text:p>
          </table:table-cell>
          <table:table-cell office:value-type="float" office:value="8640000" calcext:value-type="float">
            <text:p>8640000</text:p>
          </table:table-cell>
          <table:table-cell table:formula="of:=[.B929]/[.C929]" office:value-type="float" office:value="0.00161111111111111" calcext:value-type="float">
            <text:p>0,00161111111111111000</text:p>
          </table:table-cell>
          <table:table-cell table:formula="of:=[.D930]-[.D92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B929]+15" office:value-type="float" office:value="13935" calcext:value-type="float">
            <text:p>13935</text:p>
          </table:table-cell>
          <table:table-cell office:value-type="float" office:value="8640000" calcext:value-type="float">
            <text:p>8640000</text:p>
          </table:table-cell>
          <table:table-cell table:formula="of:=[.B930]/[.C930]" office:value-type="float" office:value="0.00161284722222222" calcext:value-type="float">
            <text:p>0,00161284722222222000</text:p>
          </table:table-cell>
          <table:table-cell table:formula="of:=[.D931]-[.D930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B930]+15" office:value-type="float" office:value="13950" calcext:value-type="float">
            <text:p>13950</text:p>
          </table:table-cell>
          <table:table-cell office:value-type="float" office:value="8640000" calcext:value-type="float">
            <text:p>8640000</text:p>
          </table:table-cell>
          <table:table-cell table:formula="of:=[.B931]/[.C931]" office:value-type="float" office:value="0.00161458333333333" calcext:value-type="float">
            <text:p>0,00161458333333333000</text:p>
          </table:table-cell>
          <table:table-cell table:formula="of:=[.D932]-[.D93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B931]+15" office:value-type="float" office:value="13965" calcext:value-type="float">
            <text:p>13965</text:p>
          </table:table-cell>
          <table:table-cell office:value-type="float" office:value="8640000" calcext:value-type="float">
            <text:p>8640000</text:p>
          </table:table-cell>
          <table:table-cell table:formula="of:=[.B932]/[.C932]" office:value-type="float" office:value="0.00161631944444444" calcext:value-type="float">
            <text:p>0,00161631944444444000</text:p>
          </table:table-cell>
          <table:table-cell table:formula="of:=[.D933]-[.D932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B932]+15" office:value-type="float" office:value="13980" calcext:value-type="float">
            <text:p>13980</text:p>
          </table:table-cell>
          <table:table-cell office:value-type="float" office:value="8640000" calcext:value-type="float">
            <text:p>8640000</text:p>
          </table:table-cell>
          <table:table-cell table:formula="of:=[.B933]/[.C933]" office:value-type="float" office:value="0.00161805555555556" calcext:value-type="float">
            <text:p>0,00161805555555556000</text:p>
          </table:table-cell>
          <table:table-cell table:formula="of:=[.D934]-[.D93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B933]+15" office:value-type="float" office:value="13995" calcext:value-type="float">
            <text:p>13995</text:p>
          </table:table-cell>
          <table:table-cell office:value-type="float" office:value="8640000" calcext:value-type="float">
            <text:p>8640000</text:p>
          </table:table-cell>
          <table:table-cell table:formula="of:=[.B934]/[.C934]" office:value-type="float" office:value="0.00161979166666667" calcext:value-type="float">
            <text:p>0,00161979166666667000</text:p>
          </table:table-cell>
          <table:table-cell table:formula="of:=[.D935]-[.D934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B934]+15" office:value-type="float" office:value="14010" calcext:value-type="float">
            <text:p>14010</text:p>
          </table:table-cell>
          <table:table-cell office:value-type="float" office:value="8640000" calcext:value-type="float">
            <text:p>8640000</text:p>
          </table:table-cell>
          <table:table-cell table:formula="of:=[.B935]/[.C935]" office:value-type="float" office:value="0.00162152777777778" calcext:value-type="float">
            <text:p>0,00162152777777778000</text:p>
          </table:table-cell>
          <table:table-cell table:formula="of:=[.D936]-[.D93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B935]+15" office:value-type="float" office:value="14025" calcext:value-type="float">
            <text:p>14025</text:p>
          </table:table-cell>
          <table:table-cell office:value-type="float" office:value="8640000" calcext:value-type="float">
            <text:p>8640000</text:p>
          </table:table-cell>
          <table:table-cell table:formula="of:=[.B936]/[.C936]" office:value-type="float" office:value="0.00162326388888889" calcext:value-type="float">
            <text:p>0,00162326388888889000</text:p>
          </table:table-cell>
          <table:table-cell table:formula="of:=[.D937]-[.D936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B936]+15" office:value-type="float" office:value="14040" calcext:value-type="float">
            <text:p>14040</text:p>
          </table:table-cell>
          <table:table-cell office:value-type="float" office:value="8640000" calcext:value-type="float">
            <text:p>8640000</text:p>
          </table:table-cell>
          <table:table-cell table:formula="of:=[.B937]/[.C937]" office:value-type="float" office:value="0.001625" calcext:value-type="float">
            <text:p>0,00162500000000000000</text:p>
          </table:table-cell>
          <table:table-cell table:formula="of:=[.D938]-[.D93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B937]+15" office:value-type="float" office:value="14055" calcext:value-type="float">
            <text:p>14055</text:p>
          </table:table-cell>
          <table:table-cell office:value-type="float" office:value="8640000" calcext:value-type="float">
            <text:p>8640000</text:p>
          </table:table-cell>
          <table:table-cell table:formula="of:=[.B938]/[.C938]" office:value-type="float" office:value="0.00162673611111111" calcext:value-type="float">
            <text:p>0,00162673611111111000</text:p>
          </table:table-cell>
          <table:table-cell table:formula="of:=[.D939]-[.D938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B938]+15" office:value-type="float" office:value="14070" calcext:value-type="float">
            <text:p>14070</text:p>
          </table:table-cell>
          <table:table-cell office:value-type="float" office:value="8640000" calcext:value-type="float">
            <text:p>8640000</text:p>
          </table:table-cell>
          <table:table-cell table:formula="of:=[.B939]/[.C939]" office:value-type="float" office:value="0.00162847222222222" calcext:value-type="float">
            <text:p>0,00162847222222222000</text:p>
          </table:table-cell>
          <table:table-cell table:formula="of:=[.D940]-[.D93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B939]+15" office:value-type="float" office:value="14085" calcext:value-type="float">
            <text:p>14085</text:p>
          </table:table-cell>
          <table:table-cell office:value-type="float" office:value="8640000" calcext:value-type="float">
            <text:p>8640000</text:p>
          </table:table-cell>
          <table:table-cell table:formula="of:=[.B940]/[.C940]" office:value-type="float" office:value="0.00163020833333333" calcext:value-type="float">
            <text:p>0,00163020833333333000</text:p>
          </table:table-cell>
          <table:table-cell table:formula="of:=[.D941]-[.D94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B940]+15" office:value-type="float" office:value="14100" calcext:value-type="float">
            <text:p>14100</text:p>
          </table:table-cell>
          <table:table-cell office:value-type="float" office:value="8640000" calcext:value-type="float">
            <text:p>8640000</text:p>
          </table:table-cell>
          <table:table-cell table:formula="of:=[.B941]/[.C941]" office:value-type="float" office:value="0.00163194444444444" calcext:value-type="float">
            <text:p>0,00163194444444444000</text:p>
          </table:table-cell>
          <table:table-cell table:formula="of:=[.D942]-[.D941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B941]+15" office:value-type="float" office:value="14115" calcext:value-type="float">
            <text:p>14115</text:p>
          </table:table-cell>
          <table:table-cell office:value-type="float" office:value="8640000" calcext:value-type="float">
            <text:p>8640000</text:p>
          </table:table-cell>
          <table:table-cell table:formula="of:=[.B942]/[.C942]" office:value-type="float" office:value="0.00163368055555556" calcext:value-type="float">
            <text:p>0,00163368055555556000</text:p>
          </table:table-cell>
          <table:table-cell table:formula="of:=[.D943]-[.D94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B942]+15" office:value-type="float" office:value="14130" calcext:value-type="float">
            <text:p>14130</text:p>
          </table:table-cell>
          <table:table-cell office:value-type="float" office:value="8640000" calcext:value-type="float">
            <text:p>8640000</text:p>
          </table:table-cell>
          <table:table-cell table:formula="of:=[.B943]/[.C943]" office:value-type="float" office:value="0.00163541666666667" calcext:value-type="float">
            <text:p>0,00163541666666667000</text:p>
          </table:table-cell>
          <table:table-cell table:formula="of:=[.D944]-[.D943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B943]+15" office:value-type="float" office:value="14145" calcext:value-type="float">
            <text:p>14145</text:p>
          </table:table-cell>
          <table:table-cell office:value-type="float" office:value="8640000" calcext:value-type="float">
            <text:p>8640000</text:p>
          </table:table-cell>
          <table:table-cell table:formula="of:=[.B944]/[.C944]" office:value-type="float" office:value="0.00163715277777778" calcext:value-type="float">
            <text:p>0,00163715277777778000</text:p>
          </table:table-cell>
          <table:table-cell table:formula="of:=[.D945]-[.D94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B944]+15" office:value-type="float" office:value="14160" calcext:value-type="float">
            <text:p>14160</text:p>
          </table:table-cell>
          <table:table-cell office:value-type="float" office:value="8640000" calcext:value-type="float">
            <text:p>8640000</text:p>
          </table:table-cell>
          <table:table-cell table:formula="of:=[.B945]/[.C945]" office:value-type="float" office:value="0.00163888888888889" calcext:value-type="float">
            <text:p>0,00163888888888889000</text:p>
          </table:table-cell>
          <table:table-cell table:formula="of:=[.D946]-[.D945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B945]+15" office:value-type="float" office:value="14175" calcext:value-type="float">
            <text:p>14175</text:p>
          </table:table-cell>
          <table:table-cell office:value-type="float" office:value="8640000" calcext:value-type="float">
            <text:p>8640000</text:p>
          </table:table-cell>
          <table:table-cell table:formula="of:=[.B946]/[.C946]" office:value-type="float" office:value="0.001640625" calcext:value-type="float">
            <text:p>0,00164062500000000000</text:p>
          </table:table-cell>
          <table:table-cell table:formula="of:=[.D947]-[.D94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B946]+15" office:value-type="float" office:value="14190" calcext:value-type="float">
            <text:p>14190</text:p>
          </table:table-cell>
          <table:table-cell office:value-type="float" office:value="8640000" calcext:value-type="float">
            <text:p>8640000</text:p>
          </table:table-cell>
          <table:table-cell table:formula="of:=[.B947]/[.C947]" office:value-type="float" office:value="0.00164236111111111" calcext:value-type="float">
            <text:p>0,00164236111111111000</text:p>
          </table:table-cell>
          <table:table-cell table:formula="of:=[.D948]-[.D947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B947]+15" office:value-type="float" office:value="14205" calcext:value-type="float">
            <text:p>14205</text:p>
          </table:table-cell>
          <table:table-cell office:value-type="float" office:value="8640000" calcext:value-type="float">
            <text:p>8640000</text:p>
          </table:table-cell>
          <table:table-cell table:formula="of:=[.B948]/[.C948]" office:value-type="float" office:value="0.00164409722222222" calcext:value-type="float">
            <text:p>0,00164409722222222000</text:p>
          </table:table-cell>
          <table:table-cell table:formula="of:=[.D949]-[.D94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B948]+15" office:value-type="float" office:value="14220" calcext:value-type="float">
            <text:p>14220</text:p>
          </table:table-cell>
          <table:table-cell office:value-type="float" office:value="8640000" calcext:value-type="float">
            <text:p>8640000</text:p>
          </table:table-cell>
          <table:table-cell table:formula="of:=[.B949]/[.C949]" office:value-type="float" office:value="0.00164583333333333" calcext:value-type="float">
            <text:p>0,00164583333333333000</text:p>
          </table:table-cell>
          <table:table-cell table:formula="of:=[.D950]-[.D949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B949]+15" office:value-type="float" office:value="14235" calcext:value-type="float">
            <text:p>14235</text:p>
          </table:table-cell>
          <table:table-cell office:value-type="float" office:value="8640000" calcext:value-type="float">
            <text:p>8640000</text:p>
          </table:table-cell>
          <table:table-cell table:formula="of:=[.B950]/[.C950]" office:value-type="float" office:value="0.00164756944444444" calcext:value-type="float">
            <text:p>0,00164756944444444000</text:p>
          </table:table-cell>
          <table:table-cell table:formula="of:=[.D951]-[.D95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B950]+15" office:value-type="float" office:value="14250" calcext:value-type="float">
            <text:p>14250</text:p>
          </table:table-cell>
          <table:table-cell office:value-type="float" office:value="8640000" calcext:value-type="float">
            <text:p>8640000</text:p>
          </table:table-cell>
          <table:table-cell table:formula="of:=[.B951]/[.C951]" office:value-type="float" office:value="0.00164930555555556" calcext:value-type="float">
            <text:p>0,00164930555555556000</text:p>
          </table:table-cell>
          <table:table-cell table:formula="of:=[.D952]-[.D95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B951]+15" office:value-type="float" office:value="14265" calcext:value-type="float">
            <text:p>14265</text:p>
          </table:table-cell>
          <table:table-cell office:value-type="float" office:value="8640000" calcext:value-type="float">
            <text:p>8640000</text:p>
          </table:table-cell>
          <table:table-cell table:formula="of:=[.B952]/[.C952]" office:value-type="float" office:value="0.00165104166666667" calcext:value-type="float">
            <text:p>0,00165104166666667000</text:p>
          </table:table-cell>
          <table:table-cell table:formula="of:=[.D953]-[.D952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B952]+15" office:value-type="float" office:value="14280" calcext:value-type="float">
            <text:p>14280</text:p>
          </table:table-cell>
          <table:table-cell office:value-type="float" office:value="8640000" calcext:value-type="float">
            <text:p>8640000</text:p>
          </table:table-cell>
          <table:table-cell table:formula="of:=[.B953]/[.C953]" office:value-type="float" office:value="0.00165277777777778" calcext:value-type="float">
            <text:p>0,00165277777777778000</text:p>
          </table:table-cell>
          <table:table-cell table:formula="of:=[.D954]-[.D95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B953]+15" office:value-type="float" office:value="14295" calcext:value-type="float">
            <text:p>14295</text:p>
          </table:table-cell>
          <table:table-cell office:value-type="float" office:value="8640000" calcext:value-type="float">
            <text:p>8640000</text:p>
          </table:table-cell>
          <table:table-cell table:formula="of:=[.B954]/[.C954]" office:value-type="float" office:value="0.00165451388888889" calcext:value-type="float">
            <text:p>0,00165451388888889000</text:p>
          </table:table-cell>
          <table:table-cell table:formula="of:=[.D955]-[.D954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B954]+15" office:value-type="float" office:value="14310" calcext:value-type="float">
            <text:p>14310</text:p>
          </table:table-cell>
          <table:table-cell office:value-type="float" office:value="8640000" calcext:value-type="float">
            <text:p>8640000</text:p>
          </table:table-cell>
          <table:table-cell table:formula="of:=[.B955]/[.C955]" office:value-type="float" office:value="0.00165625" calcext:value-type="float">
            <text:p>0,00165625000000000000</text:p>
          </table:table-cell>
          <table:table-cell table:formula="of:=[.D956]-[.D95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B955]+15" office:value-type="float" office:value="14325" calcext:value-type="float">
            <text:p>14325</text:p>
          </table:table-cell>
          <table:table-cell office:value-type="float" office:value="8640000" calcext:value-type="float">
            <text:p>8640000</text:p>
          </table:table-cell>
          <table:table-cell table:formula="of:=[.B956]/[.C956]" office:value-type="float" office:value="0.00165798611111111" calcext:value-type="float">
            <text:p>0,00165798611111111000</text:p>
          </table:table-cell>
          <table:table-cell table:formula="of:=[.D957]-[.D956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B956]+15" office:value-type="float" office:value="14340" calcext:value-type="float">
            <text:p>14340</text:p>
          </table:table-cell>
          <table:table-cell office:value-type="float" office:value="8640000" calcext:value-type="float">
            <text:p>8640000</text:p>
          </table:table-cell>
          <table:table-cell table:formula="of:=[.B957]/[.C957]" office:value-type="float" office:value="0.00165972222222222" calcext:value-type="float">
            <text:p>0,00165972222222222000</text:p>
          </table:table-cell>
          <table:table-cell table:formula="of:=[.D958]-[.D95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B957]+15" office:value-type="float" office:value="14355" calcext:value-type="float">
            <text:p>14355</text:p>
          </table:table-cell>
          <table:table-cell office:value-type="float" office:value="8640000" calcext:value-type="float">
            <text:p>8640000</text:p>
          </table:table-cell>
          <table:table-cell table:formula="of:=[.B958]/[.C958]" office:value-type="float" office:value="0.00166145833333333" calcext:value-type="float">
            <text:p>0,00166145833333333000</text:p>
          </table:table-cell>
          <table:table-cell table:formula="of:=[.D959]-[.D958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B958]+15" office:value-type="float" office:value="14370" calcext:value-type="float">
            <text:p>14370</text:p>
          </table:table-cell>
          <table:table-cell office:value-type="float" office:value="8640000" calcext:value-type="float">
            <text:p>8640000</text:p>
          </table:table-cell>
          <table:table-cell table:formula="of:=[.B959]/[.C959]" office:value-type="float" office:value="0.00166319444444444" calcext:value-type="float">
            <text:p>0,00166319444444444000</text:p>
          </table:table-cell>
          <table:table-cell table:formula="of:=[.D960]-[.D95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B959]+15" office:value-type="float" office:value="14385" calcext:value-type="float">
            <text:p>14385</text:p>
          </table:table-cell>
          <table:table-cell office:value-type="float" office:value="8640000" calcext:value-type="float">
            <text:p>8640000</text:p>
          </table:table-cell>
          <table:table-cell table:formula="of:=[.B960]/[.C960]" office:value-type="float" office:value="0.00166493055555556" calcext:value-type="float">
            <text:p>0,00166493055555556000</text:p>
          </table:table-cell>
          <table:table-cell table:formula="of:=[.D961]-[.D96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B960]+15" office:value-type="float" office:value="14400" calcext:value-type="float">
            <text:p>14400</text:p>
          </table:table-cell>
          <table:table-cell office:value-type="float" office:value="8640000" calcext:value-type="float">
            <text:p>8640000</text:p>
          </table:table-cell>
          <table:table-cell table:formula="of:=[.B961]/[.C961]" office:value-type="float" office:value="0.00166666666666667" calcext:value-type="float">
            <text:p>0,00166666666666667000</text:p>
          </table:table-cell>
          <table:table-cell table:formula="of:=[.D962]-[.D961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B961]+15" office:value-type="float" office:value="14415" calcext:value-type="float">
            <text:p>14415</text:p>
          </table:table-cell>
          <table:table-cell office:value-type="float" office:value="8640000" calcext:value-type="float">
            <text:p>8640000</text:p>
          </table:table-cell>
          <table:table-cell table:formula="of:=[.B962]/[.C962]" office:value-type="float" office:value="0.00166840277777778" calcext:value-type="float">
            <text:p>0,00166840277777778000</text:p>
          </table:table-cell>
          <table:table-cell table:formula="of:=[.D963]-[.D96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B962]+15" office:value-type="float" office:value="14430" calcext:value-type="float">
            <text:p>14430</text:p>
          </table:table-cell>
          <table:table-cell office:value-type="float" office:value="8640000" calcext:value-type="float">
            <text:p>8640000</text:p>
          </table:table-cell>
          <table:table-cell table:formula="of:=[.B963]/[.C963]" office:value-type="float" office:value="0.00167013888888889" calcext:value-type="float">
            <text:p>0,00167013888888889000</text:p>
          </table:table-cell>
          <table:table-cell table:formula="of:=[.D964]-[.D963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B963]+15" office:value-type="float" office:value="14445" calcext:value-type="float">
            <text:p>14445</text:p>
          </table:table-cell>
          <table:table-cell office:value-type="float" office:value="8640000" calcext:value-type="float">
            <text:p>8640000</text:p>
          </table:table-cell>
          <table:table-cell table:formula="of:=[.B964]/[.C964]" office:value-type="float" office:value="0.001671875" calcext:value-type="float">
            <text:p>0,00167187500000000000</text:p>
          </table:table-cell>
          <table:table-cell table:formula="of:=[.D965]-[.D96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B964]+15" office:value-type="float" office:value="14460" calcext:value-type="float">
            <text:p>14460</text:p>
          </table:table-cell>
          <table:table-cell office:value-type="float" office:value="8640000" calcext:value-type="float">
            <text:p>8640000</text:p>
          </table:table-cell>
          <table:table-cell table:formula="of:=[.B965]/[.C965]" office:value-type="float" office:value="0.00167361111111111" calcext:value-type="float">
            <text:p>0,00167361111111111000</text:p>
          </table:table-cell>
          <table:table-cell table:formula="of:=[.D966]-[.D965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B965]+15" office:value-type="float" office:value="14475" calcext:value-type="float">
            <text:p>14475</text:p>
          </table:table-cell>
          <table:table-cell office:value-type="float" office:value="8640000" calcext:value-type="float">
            <text:p>8640000</text:p>
          </table:table-cell>
          <table:table-cell table:formula="of:=[.B966]/[.C966]" office:value-type="float" office:value="0.00167534722222222" calcext:value-type="float">
            <text:p>0,00167534722222222000</text:p>
          </table:table-cell>
          <table:table-cell table:formula="of:=[.D967]-[.D96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B966]+15" office:value-type="float" office:value="14490" calcext:value-type="float">
            <text:p>14490</text:p>
          </table:table-cell>
          <table:table-cell office:value-type="float" office:value="8640000" calcext:value-type="float">
            <text:p>8640000</text:p>
          </table:table-cell>
          <table:table-cell table:formula="of:=[.B967]/[.C967]" office:value-type="float" office:value="0.00167708333333333" calcext:value-type="float">
            <text:p>0,00167708333333333000</text:p>
          </table:table-cell>
          <table:table-cell table:formula="of:=[.D968]-[.D967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B967]+15" office:value-type="float" office:value="14505" calcext:value-type="float">
            <text:p>14505</text:p>
          </table:table-cell>
          <table:table-cell office:value-type="float" office:value="8640000" calcext:value-type="float">
            <text:p>8640000</text:p>
          </table:table-cell>
          <table:table-cell table:formula="of:=[.B968]/[.C968]" office:value-type="float" office:value="0.00167881944444444" calcext:value-type="float">
            <text:p>0,00167881944444444000</text:p>
          </table:table-cell>
          <table:table-cell table:formula="of:=[.D969]-[.D96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B968]+15" office:value-type="float" office:value="14520" calcext:value-type="float">
            <text:p>14520</text:p>
          </table:table-cell>
          <table:table-cell office:value-type="float" office:value="8640000" calcext:value-type="float">
            <text:p>8640000</text:p>
          </table:table-cell>
          <table:table-cell table:formula="of:=[.B969]/[.C969]" office:value-type="float" office:value="0.00168055555555556" calcext:value-type="float">
            <text:p>0,00168055555555556000</text:p>
          </table:table-cell>
          <table:table-cell table:formula="of:=[.D970]-[.D969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B969]+15" office:value-type="float" office:value="14535" calcext:value-type="float">
            <text:p>14535</text:p>
          </table:table-cell>
          <table:table-cell office:value-type="float" office:value="8640000" calcext:value-type="float">
            <text:p>8640000</text:p>
          </table:table-cell>
          <table:table-cell table:formula="of:=[.B970]/[.C970]" office:value-type="float" office:value="0.00168229166666667" calcext:value-type="float">
            <text:p>0,00168229166666667000</text:p>
          </table:table-cell>
          <table:table-cell table:formula="of:=[.D971]-[.D97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B970]+15" office:value-type="float" office:value="14550" calcext:value-type="float">
            <text:p>14550</text:p>
          </table:table-cell>
          <table:table-cell office:value-type="float" office:value="8640000" calcext:value-type="float">
            <text:p>8640000</text:p>
          </table:table-cell>
          <table:table-cell table:formula="of:=[.B971]/[.C971]" office:value-type="float" office:value="0.00168402777777778" calcext:value-type="float">
            <text:p>0,00168402777777778000</text:p>
          </table:table-cell>
          <table:table-cell table:formula="of:=[.D972]-[.D97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B971]+15" office:value-type="float" office:value="14565" calcext:value-type="float">
            <text:p>14565</text:p>
          </table:table-cell>
          <table:table-cell office:value-type="float" office:value="8640000" calcext:value-type="float">
            <text:p>8640000</text:p>
          </table:table-cell>
          <table:table-cell table:formula="of:=[.B972]/[.C972]" office:value-type="float" office:value="0.00168576388888889" calcext:value-type="float">
            <text:p>0,00168576388888889000</text:p>
          </table:table-cell>
          <table:table-cell table:formula="of:=[.D973]-[.D972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B972]+15" office:value-type="float" office:value="14580" calcext:value-type="float">
            <text:p>14580</text:p>
          </table:table-cell>
          <table:table-cell office:value-type="float" office:value="8640000" calcext:value-type="float">
            <text:p>8640000</text:p>
          </table:table-cell>
          <table:table-cell table:formula="of:=[.B973]/[.C973]" office:value-type="float" office:value="0.0016875" calcext:value-type="float">
            <text:p>0,00168750000000000000</text:p>
          </table:table-cell>
          <table:table-cell table:formula="of:=[.D974]-[.D97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B973]+15" office:value-type="float" office:value="14595" calcext:value-type="float">
            <text:p>14595</text:p>
          </table:table-cell>
          <table:table-cell office:value-type="float" office:value="8640000" calcext:value-type="float">
            <text:p>8640000</text:p>
          </table:table-cell>
          <table:table-cell table:formula="of:=[.B974]/[.C974]" office:value-type="float" office:value="0.00168923611111111" calcext:value-type="float">
            <text:p>0,00168923611111111000</text:p>
          </table:table-cell>
          <table:table-cell table:formula="of:=[.D975]-[.D974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B974]+15" office:value-type="float" office:value="14610" calcext:value-type="float">
            <text:p>14610</text:p>
          </table:table-cell>
          <table:table-cell office:value-type="float" office:value="8640000" calcext:value-type="float">
            <text:p>8640000</text:p>
          </table:table-cell>
          <table:table-cell table:formula="of:=[.B975]/[.C975]" office:value-type="float" office:value="0.00169097222222222" calcext:value-type="float">
            <text:p>0,00169097222222222000</text:p>
          </table:table-cell>
          <table:table-cell table:formula="of:=[.D976]-[.D97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B975]+15" office:value-type="float" office:value="14625" calcext:value-type="float">
            <text:p>14625</text:p>
          </table:table-cell>
          <table:table-cell office:value-type="float" office:value="8640000" calcext:value-type="float">
            <text:p>8640000</text:p>
          </table:table-cell>
          <table:table-cell table:formula="of:=[.B976]/[.C976]" office:value-type="float" office:value="0.00169270833333333" calcext:value-type="float">
            <text:p>0,00169270833333333000</text:p>
          </table:table-cell>
          <table:table-cell table:formula="of:=[.D977]-[.D976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B976]+15" office:value-type="float" office:value="14640" calcext:value-type="float">
            <text:p>14640</text:p>
          </table:table-cell>
          <table:table-cell office:value-type="float" office:value="8640000" calcext:value-type="float">
            <text:p>8640000</text:p>
          </table:table-cell>
          <table:table-cell table:formula="of:=[.B977]/[.C977]" office:value-type="float" office:value="0.00169444444444444" calcext:value-type="float">
            <text:p>0,00169444444444444000</text:p>
          </table:table-cell>
          <table:table-cell table:formula="of:=[.D978]-[.D97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B977]+15" office:value-type="float" office:value="14655" calcext:value-type="float">
            <text:p>14655</text:p>
          </table:table-cell>
          <table:table-cell office:value-type="float" office:value="8640000" calcext:value-type="float">
            <text:p>8640000</text:p>
          </table:table-cell>
          <table:table-cell table:formula="of:=[.B978]/[.C978]" office:value-type="float" office:value="0.00169618055555556" calcext:value-type="float">
            <text:p>0,00169618055555556000</text:p>
          </table:table-cell>
          <table:table-cell table:formula="of:=[.D979]-[.D978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B978]+15" office:value-type="float" office:value="14670" calcext:value-type="float">
            <text:p>14670</text:p>
          </table:table-cell>
          <table:table-cell office:value-type="float" office:value="8640000" calcext:value-type="float">
            <text:p>8640000</text:p>
          </table:table-cell>
          <table:table-cell table:formula="of:=[.B979]/[.C979]" office:value-type="float" office:value="0.00169791666666667" calcext:value-type="float">
            <text:p>0,00169791666666667000</text:p>
          </table:table-cell>
          <table:table-cell table:formula="of:=[.D980]-[.D97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B979]+15" office:value-type="float" office:value="14685" calcext:value-type="float">
            <text:p>14685</text:p>
          </table:table-cell>
          <table:table-cell office:value-type="float" office:value="8640000" calcext:value-type="float">
            <text:p>8640000</text:p>
          </table:table-cell>
          <table:table-cell table:formula="of:=[.B980]/[.C980]" office:value-type="float" office:value="0.00169965277777778" calcext:value-type="float">
            <text:p>0,00169965277777778000</text:p>
          </table:table-cell>
          <table:table-cell table:formula="of:=[.D981]-[.D980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B980]+15" office:value-type="float" office:value="14700" calcext:value-type="float">
            <text:p>14700</text:p>
          </table:table-cell>
          <table:table-cell office:value-type="float" office:value="8640000" calcext:value-type="float">
            <text:p>8640000</text:p>
          </table:table-cell>
          <table:table-cell table:formula="of:=[.B981]/[.C981]" office:value-type="float" office:value="0.00170138888888889" calcext:value-type="float">
            <text:p>0,00170138888888889000</text:p>
          </table:table-cell>
          <table:table-cell table:formula="of:=[.D982]-[.D98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B981]+15" office:value-type="float" office:value="14715" calcext:value-type="float">
            <text:p>14715</text:p>
          </table:table-cell>
          <table:table-cell office:value-type="float" office:value="8640000" calcext:value-type="float">
            <text:p>8640000</text:p>
          </table:table-cell>
          <table:table-cell table:formula="of:=[.B982]/[.C982]" office:value-type="float" office:value="0.001703125" calcext:value-type="float">
            <text:p>0,00170312500000000000</text:p>
          </table:table-cell>
          <table:table-cell table:formula="of:=[.D983]-[.D98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B982]+15" office:value-type="float" office:value="14730" calcext:value-type="float">
            <text:p>14730</text:p>
          </table:table-cell>
          <table:table-cell office:value-type="float" office:value="8640000" calcext:value-type="float">
            <text:p>8640000</text:p>
          </table:table-cell>
          <table:table-cell table:formula="of:=[.B983]/[.C983]" office:value-type="float" office:value="0.00170486111111111" calcext:value-type="float">
            <text:p>0,00170486111111111000</text:p>
          </table:table-cell>
          <table:table-cell table:formula="of:=[.D984]-[.D983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B983]+15" office:value-type="float" office:value="14745" calcext:value-type="float">
            <text:p>14745</text:p>
          </table:table-cell>
          <table:table-cell office:value-type="float" office:value="8640000" calcext:value-type="float">
            <text:p>8640000</text:p>
          </table:table-cell>
          <table:table-cell table:formula="of:=[.B984]/[.C984]" office:value-type="float" office:value="0.00170659722222222" calcext:value-type="float">
            <text:p>0,00170659722222222000</text:p>
          </table:table-cell>
          <table:table-cell table:formula="of:=[.D985]-[.D98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B984]+15" office:value-type="float" office:value="14760" calcext:value-type="float">
            <text:p>14760</text:p>
          </table:table-cell>
          <table:table-cell office:value-type="float" office:value="8640000" calcext:value-type="float">
            <text:p>8640000</text:p>
          </table:table-cell>
          <table:table-cell table:formula="of:=[.B985]/[.C985]" office:value-type="float" office:value="0.00170833333333333" calcext:value-type="float">
            <text:p>0,00170833333333333000</text:p>
          </table:table-cell>
          <table:table-cell table:formula="of:=[.D986]-[.D985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B985]+15" office:value-type="float" office:value="14775" calcext:value-type="float">
            <text:p>14775</text:p>
          </table:table-cell>
          <table:table-cell office:value-type="float" office:value="8640000" calcext:value-type="float">
            <text:p>8640000</text:p>
          </table:table-cell>
          <table:table-cell table:formula="of:=[.B986]/[.C986]" office:value-type="float" office:value="0.00171006944444444" calcext:value-type="float">
            <text:p>0,00171006944444444000</text:p>
          </table:table-cell>
          <table:table-cell table:formula="of:=[.D987]-[.D98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B986]+15" office:value-type="float" office:value="14790" calcext:value-type="float">
            <text:p>14790</text:p>
          </table:table-cell>
          <table:table-cell office:value-type="float" office:value="8640000" calcext:value-type="float">
            <text:p>8640000</text:p>
          </table:table-cell>
          <table:table-cell table:formula="of:=[.B987]/[.C987]" office:value-type="float" office:value="0.00171180555555556" calcext:value-type="float">
            <text:p>0,00171180555555556000</text:p>
          </table:table-cell>
          <table:table-cell table:formula="of:=[.D988]-[.D987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B987]+15" office:value-type="float" office:value="14805" calcext:value-type="float">
            <text:p>14805</text:p>
          </table:table-cell>
          <table:table-cell office:value-type="float" office:value="8640000" calcext:value-type="float">
            <text:p>8640000</text:p>
          </table:table-cell>
          <table:table-cell table:formula="of:=[.B988]/[.C988]" office:value-type="float" office:value="0.00171354166666667" calcext:value-type="float">
            <text:p>0,00171354166666667000</text:p>
          </table:table-cell>
          <table:table-cell table:formula="of:=[.D989]-[.D98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B988]+15" office:value-type="float" office:value="14820" calcext:value-type="float">
            <text:p>14820</text:p>
          </table:table-cell>
          <table:table-cell office:value-type="float" office:value="8640000" calcext:value-type="float">
            <text:p>8640000</text:p>
          </table:table-cell>
          <table:table-cell table:formula="of:=[.B989]/[.C989]" office:value-type="float" office:value="0.00171527777777778" calcext:value-type="float">
            <text:p>0,00171527777777778000</text:p>
          </table:table-cell>
          <table:table-cell table:formula="of:=[.D990]-[.D989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B989]+15" office:value-type="float" office:value="14835" calcext:value-type="float">
            <text:p>14835</text:p>
          </table:table-cell>
          <table:table-cell office:value-type="float" office:value="8640000" calcext:value-type="float">
            <text:p>8640000</text:p>
          </table:table-cell>
          <table:table-cell table:formula="of:=[.B990]/[.C990]" office:value-type="float" office:value="0.00171701388888889" calcext:value-type="float">
            <text:p>0,00171701388888889000</text:p>
          </table:table-cell>
          <table:table-cell table:formula="of:=[.D991]-[.D99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B990]+15" office:value-type="float" office:value="14850" calcext:value-type="float">
            <text:p>14850</text:p>
          </table:table-cell>
          <table:table-cell office:value-type="float" office:value="8640000" calcext:value-type="float">
            <text:p>8640000</text:p>
          </table:table-cell>
          <table:table-cell table:formula="of:=[.B991]/[.C991]" office:value-type="float" office:value="0.00171875" calcext:value-type="float">
            <text:p>0,00171875000000000000</text:p>
          </table:table-cell>
          <table:table-cell table:formula="of:=[.D992]-[.D99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B991]+15" office:value-type="float" office:value="14865" calcext:value-type="float">
            <text:p>14865</text:p>
          </table:table-cell>
          <table:table-cell office:value-type="float" office:value="8640000" calcext:value-type="float">
            <text:p>8640000</text:p>
          </table:table-cell>
          <table:table-cell table:formula="of:=[.B992]/[.C992]" office:value-type="float" office:value="0.00172048611111111" calcext:value-type="float">
            <text:p>0,00172048611111111000</text:p>
          </table:table-cell>
          <table:table-cell table:formula="of:=[.D993]-[.D992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B992]+15" office:value-type="float" office:value="14880" calcext:value-type="float">
            <text:p>14880</text:p>
          </table:table-cell>
          <table:table-cell office:value-type="float" office:value="8640000" calcext:value-type="float">
            <text:p>8640000</text:p>
          </table:table-cell>
          <table:table-cell table:formula="of:=[.B993]/[.C993]" office:value-type="float" office:value="0.00172222222222222" calcext:value-type="float">
            <text:p>0,00172222222222222000</text:p>
          </table:table-cell>
          <table:table-cell table:formula="of:=[.D994]-[.D99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B993]+15" office:value-type="float" office:value="14895" calcext:value-type="float">
            <text:p>14895</text:p>
          </table:table-cell>
          <table:table-cell office:value-type="float" office:value="8640000" calcext:value-type="float">
            <text:p>8640000</text:p>
          </table:table-cell>
          <table:table-cell table:formula="of:=[.B994]/[.C994]" office:value-type="float" office:value="0.00172395833333333" calcext:value-type="float">
            <text:p>0,00172395833333333000</text:p>
          </table:table-cell>
          <table:table-cell table:formula="of:=[.D995]-[.D994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B994]+15" office:value-type="float" office:value="14910" calcext:value-type="float">
            <text:p>14910</text:p>
          </table:table-cell>
          <table:table-cell office:value-type="float" office:value="8640000" calcext:value-type="float">
            <text:p>8640000</text:p>
          </table:table-cell>
          <table:table-cell table:formula="of:=[.B995]/[.C995]" office:value-type="float" office:value="0.00172569444444444" calcext:value-type="float">
            <text:p>0,00172569444444444000</text:p>
          </table:table-cell>
          <table:table-cell table:formula="of:=[.D996]-[.D99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B995]+15" office:value-type="float" office:value="14925" calcext:value-type="float">
            <text:p>14925</text:p>
          </table:table-cell>
          <table:table-cell office:value-type="float" office:value="8640000" calcext:value-type="float">
            <text:p>8640000</text:p>
          </table:table-cell>
          <table:table-cell table:formula="of:=[.B996]/[.C996]" office:value-type="float" office:value="0.00172743055555556" calcext:value-type="float">
            <text:p>0,00172743055555556000</text:p>
          </table:table-cell>
          <table:table-cell table:formula="of:=[.D997]-[.D996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B996]+15" office:value-type="float" office:value="14940" calcext:value-type="float">
            <text:p>14940</text:p>
          </table:table-cell>
          <table:table-cell office:value-type="float" office:value="8640000" calcext:value-type="float">
            <text:p>8640000</text:p>
          </table:table-cell>
          <table:table-cell table:formula="of:=[.B997]/[.C997]" office:value-type="float" office:value="0.00172916666666667" calcext:value-type="float">
            <text:p>0,00172916666666667000</text:p>
          </table:table-cell>
          <table:table-cell table:formula="of:=[.D998]-[.D99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B997]+15" office:value-type="float" office:value="14955" calcext:value-type="float">
            <text:p>14955</text:p>
          </table:table-cell>
          <table:table-cell office:value-type="float" office:value="8640000" calcext:value-type="float">
            <text:p>8640000</text:p>
          </table:table-cell>
          <table:table-cell table:formula="of:=[.B998]/[.C998]" office:value-type="float" office:value="0.00173090277777778" calcext:value-type="float">
            <text:p>0,00173090277777778000</text:p>
          </table:table-cell>
          <table:table-cell table:formula="of:=[.D999]-[.D998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B998]+15" office:value-type="float" office:value="14970" calcext:value-type="float">
            <text:p>14970</text:p>
          </table:table-cell>
          <table:table-cell office:value-type="float" office:value="8640000" calcext:value-type="float">
            <text:p>8640000</text:p>
          </table:table-cell>
          <table:table-cell table:formula="of:=[.B999]/[.C999]" office:value-type="float" office:value="0.00173263888888889" calcext:value-type="float">
            <text:p>0,00173263888888889000</text:p>
          </table:table-cell>
          <table:table-cell table:formula="of:=[.D1000]-[.D99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B999]+15" office:value-type="float" office:value="14985" calcext:value-type="float">
            <text:p>14985</text:p>
          </table:table-cell>
          <table:table-cell office:value-type="float" office:value="8640000" calcext:value-type="float">
            <text:p>8640000</text:p>
          </table:table-cell>
          <table:table-cell table:formula="of:=[.B1000]/[.C1000]" office:value-type="float" office:value="0.001734375" calcext:value-type="float">
            <text:p>0,00173437500000000000</text:p>
          </table:table-cell>
          <table:table-cell table:formula="of:=[.D1001]-[.D1000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000]+15" office:value-type="float" office:value="15000" calcext:value-type="float">
            <text:p>15000</text:p>
          </table:table-cell>
          <table:table-cell office:value-type="float" office:value="8640000" calcext:value-type="float">
            <text:p>8640000</text:p>
          </table:table-cell>
          <table:table-cell table:formula="of:=[.B1001]/[.C1001]" office:value-type="float" office:value="0.00173611111111111" calcext:value-type="float">
            <text:p>0,00173611111111111000</text:p>
          </table:table-cell>
          <table:table-cell table:formula="of:=[.D1002]-[.D100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[.B1001]+15" office:value-type="float" office:value="15015" calcext:value-type="float">
            <text:p>15015</text:p>
          </table:table-cell>
          <table:table-cell office:value-type="float" office:value="8640000" calcext:value-type="float">
            <text:p>8640000</text:p>
          </table:table-cell>
          <table:table-cell table:formula="of:=[.B1002]/[.C1002]" office:value-type="float" office:value="0.00173784722222222" calcext:value-type="float">
            <text:p>0,00173784722222222000</text:p>
          </table:table-cell>
          <table:table-cell table:formula="of:=[.D1003]-[.D100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[.B1002]+15" office:value-type="float" office:value="15030" calcext:value-type="float">
            <text:p>15030</text:p>
          </table:table-cell>
          <table:table-cell office:value-type="float" office:value="8640000" calcext:value-type="float">
            <text:p>8640000</text:p>
          </table:table-cell>
          <table:table-cell table:formula="of:=[.B1003]/[.C1003]" office:value-type="float" office:value="0.00173958333333333" calcext:value-type="float">
            <text:p>0,00173958333333333000</text:p>
          </table:table-cell>
          <table:table-cell table:formula="of:=[.D1004]-[.D1003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[.B1003]+15" office:value-type="float" office:value="15045" calcext:value-type="float">
            <text:p>15045</text:p>
          </table:table-cell>
          <table:table-cell office:value-type="float" office:value="8640000" calcext:value-type="float">
            <text:p>8640000</text:p>
          </table:table-cell>
          <table:table-cell table:formula="of:=[.B1004]/[.C1004]" office:value-type="float" office:value="0.00174131944444444" calcext:value-type="float">
            <text:p>0,00174131944444444000</text:p>
          </table:table-cell>
          <table:table-cell table:formula="of:=[.D1005]-[.D100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[.B1004]+15" office:value-type="float" office:value="15060" calcext:value-type="float">
            <text:p>15060</text:p>
          </table:table-cell>
          <table:table-cell office:value-type="float" office:value="8640000" calcext:value-type="float">
            <text:p>8640000</text:p>
          </table:table-cell>
          <table:table-cell table:formula="of:=[.B1005]/[.C1005]" office:value-type="float" office:value="0.00174305555555556" calcext:value-type="float">
            <text:p>0,00174305555555556000</text:p>
          </table:table-cell>
          <table:table-cell table:formula="of:=[.D1006]-[.D1005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[.B1005]+15" office:value-type="float" office:value="15075" calcext:value-type="float">
            <text:p>15075</text:p>
          </table:table-cell>
          <table:table-cell office:value-type="float" office:value="8640000" calcext:value-type="float">
            <text:p>8640000</text:p>
          </table:table-cell>
          <table:table-cell table:formula="of:=[.B1006]/[.C1006]" office:value-type="float" office:value="0.00174479166666667" calcext:value-type="float">
            <text:p>0,00174479166666667000</text:p>
          </table:table-cell>
          <table:table-cell table:formula="of:=[.D1007]-[.D100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[.B1006]+15" office:value-type="float" office:value="15090" calcext:value-type="float">
            <text:p>15090</text:p>
          </table:table-cell>
          <table:table-cell office:value-type="float" office:value="8640000" calcext:value-type="float">
            <text:p>8640000</text:p>
          </table:table-cell>
          <table:table-cell table:formula="of:=[.B1007]/[.C1007]" office:value-type="float" office:value="0.00174652777777778" calcext:value-type="float">
            <text:p>0,00174652777777778000</text:p>
          </table:table-cell>
          <table:table-cell table:formula="of:=[.D1008]-[.D1007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[.B1007]+15" office:value-type="float" office:value="15105" calcext:value-type="float">
            <text:p>15105</text:p>
          </table:table-cell>
          <table:table-cell office:value-type="float" office:value="8640000" calcext:value-type="float">
            <text:p>8640000</text:p>
          </table:table-cell>
          <table:table-cell table:formula="of:=[.B1008]/[.C1008]" office:value-type="float" office:value="0.00174826388888889" calcext:value-type="float">
            <text:p>0,00174826388888889000</text:p>
          </table:table-cell>
          <table:table-cell table:formula="of:=[.D1009]-[.D100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[.B1008]+15" office:value-type="float" office:value="15120" calcext:value-type="float">
            <text:p>15120</text:p>
          </table:table-cell>
          <table:table-cell office:value-type="float" office:value="8640000" calcext:value-type="float">
            <text:p>8640000</text:p>
          </table:table-cell>
          <table:table-cell table:formula="of:=[.B1009]/[.C1009]" office:value-type="float" office:value="0.00175" calcext:value-type="float">
            <text:p>0,00175000000000000000</text:p>
          </table:table-cell>
          <table:table-cell table:formula="of:=[.D1010]-[.D1009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[.B1009]+15" office:value-type="float" office:value="15135" calcext:value-type="float">
            <text:p>15135</text:p>
          </table:table-cell>
          <table:table-cell office:value-type="float" office:value="8640000" calcext:value-type="float">
            <text:p>8640000</text:p>
          </table:table-cell>
          <table:table-cell table:formula="of:=[.B1010]/[.C1010]" office:value-type="float" office:value="0.00175173611111111" calcext:value-type="float">
            <text:p>0,00175173611111111000</text:p>
          </table:table-cell>
          <table:table-cell table:formula="of:=[.D1011]-[.D101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B1010]+15" office:value-type="float" office:value="15150" calcext:value-type="float">
            <text:p>15150</text:p>
          </table:table-cell>
          <table:table-cell office:value-type="float" office:value="8640000" calcext:value-type="float">
            <text:p>8640000</text:p>
          </table:table-cell>
          <table:table-cell table:formula="of:=[.B1011]/[.C1011]" office:value-type="float" office:value="0.00175347222222222" calcext:value-type="float">
            <text:p>0,00175347222222222000</text:p>
          </table:table-cell>
          <table:table-cell table:formula="of:=[.D1012]-[.D1011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[.B1011]+15" office:value-type="float" office:value="15165" calcext:value-type="float">
            <text:p>15165</text:p>
          </table:table-cell>
          <table:table-cell office:value-type="float" office:value="8640000" calcext:value-type="float">
            <text:p>8640000</text:p>
          </table:table-cell>
          <table:table-cell table:formula="of:=[.B1012]/[.C1012]" office:value-type="float" office:value="0.00175520833333333" calcext:value-type="float">
            <text:p>0,00175520833333333000</text:p>
          </table:table-cell>
          <table:table-cell table:formula="of:=[.D1013]-[.D101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[.B1012]+15" office:value-type="float" office:value="15180" calcext:value-type="float">
            <text:p>15180</text:p>
          </table:table-cell>
          <table:table-cell office:value-type="float" office:value="8640000" calcext:value-type="float">
            <text:p>8640000</text:p>
          </table:table-cell>
          <table:table-cell table:formula="of:=[.B1013]/[.C1013]" office:value-type="float" office:value="0.00175694444444444" calcext:value-type="float">
            <text:p>0,00175694444444444000</text:p>
          </table:table-cell>
          <table:table-cell table:formula="of:=[.D1014]-[.D101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[.B1013]+15" office:value-type="float" office:value="15195" calcext:value-type="float">
            <text:p>15195</text:p>
          </table:table-cell>
          <table:table-cell office:value-type="float" office:value="8640000" calcext:value-type="float">
            <text:p>8640000</text:p>
          </table:table-cell>
          <table:table-cell table:formula="of:=[.B1014]/[.C1014]" office:value-type="float" office:value="0.00175868055555556" calcext:value-type="float">
            <text:p>0,00175868055555556000</text:p>
          </table:table-cell>
          <table:table-cell table:formula="of:=[.D1015]-[.D1014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[.B1014]+15" office:value-type="float" office:value="15210" calcext:value-type="float">
            <text:p>15210</text:p>
          </table:table-cell>
          <table:table-cell office:value-type="float" office:value="8640000" calcext:value-type="float">
            <text:p>8640000</text:p>
          </table:table-cell>
          <table:table-cell table:formula="of:=[.B1015]/[.C1015]" office:value-type="float" office:value="0.00176041666666667" calcext:value-type="float">
            <text:p>0,00176041666666667000</text:p>
          </table:table-cell>
          <table:table-cell table:formula="of:=[.D1016]-[.D101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[.B1015]+15" office:value-type="float" office:value="15225" calcext:value-type="float">
            <text:p>15225</text:p>
          </table:table-cell>
          <table:table-cell office:value-type="float" office:value="8640000" calcext:value-type="float">
            <text:p>8640000</text:p>
          </table:table-cell>
          <table:table-cell table:formula="of:=[.B1016]/[.C1016]" office:value-type="float" office:value="0.00176215277777778" calcext:value-type="float">
            <text:p>0,00176215277777778000</text:p>
          </table:table-cell>
          <table:table-cell table:formula="of:=[.D1017]-[.D1016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[.B1016]+15" office:value-type="float" office:value="15240" calcext:value-type="float">
            <text:p>15240</text:p>
          </table:table-cell>
          <table:table-cell office:value-type="float" office:value="8640000" calcext:value-type="float">
            <text:p>8640000</text:p>
          </table:table-cell>
          <table:table-cell table:formula="of:=[.B1017]/[.C1017]" office:value-type="float" office:value="0.00176388888888889" calcext:value-type="float">
            <text:p>0,00176388888888889000</text:p>
          </table:table-cell>
          <table:table-cell table:formula="of:=[.D1018]-[.D101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[.B1017]+15" office:value-type="float" office:value="15255" calcext:value-type="float">
            <text:p>15255</text:p>
          </table:table-cell>
          <table:table-cell office:value-type="float" office:value="8640000" calcext:value-type="float">
            <text:p>8640000</text:p>
          </table:table-cell>
          <table:table-cell table:formula="of:=[.B1018]/[.C1018]" office:value-type="float" office:value="0.001765625" calcext:value-type="float">
            <text:p>0,00176562500000000000</text:p>
          </table:table-cell>
          <table:table-cell table:formula="of:=[.D1019]-[.D1018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[.B1018]+15" office:value-type="float" office:value="15270" calcext:value-type="float">
            <text:p>15270</text:p>
          </table:table-cell>
          <table:table-cell office:value-type="float" office:value="8640000" calcext:value-type="float">
            <text:p>8640000</text:p>
          </table:table-cell>
          <table:table-cell table:formula="of:=[.B1019]/[.C1019]" office:value-type="float" office:value="0.00176736111111111" calcext:value-type="float">
            <text:p>0,00176736111111111000</text:p>
          </table:table-cell>
          <table:table-cell table:formula="of:=[.D1020]-[.D101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[.B1019]+15" office:value-type="float" office:value="15285" calcext:value-type="float">
            <text:p>15285</text:p>
          </table:table-cell>
          <table:table-cell office:value-type="float" office:value="8640000" calcext:value-type="float">
            <text:p>8640000</text:p>
          </table:table-cell>
          <table:table-cell table:formula="of:=[.B1020]/[.C1020]" office:value-type="float" office:value="0.00176909722222222" calcext:value-type="float">
            <text:p>0,00176909722222222000</text:p>
          </table:table-cell>
          <table:table-cell table:formula="of:=[.D1021]-[.D1020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B1020]+15" office:value-type="float" office:value="15300" calcext:value-type="float">
            <text:p>15300</text:p>
          </table:table-cell>
          <table:table-cell office:value-type="float" office:value="8640000" calcext:value-type="float">
            <text:p>8640000</text:p>
          </table:table-cell>
          <table:table-cell table:formula="of:=[.B1021]/[.C1021]" office:value-type="float" office:value="0.00177083333333333" calcext:value-type="float">
            <text:p>0,00177083333333333000</text:p>
          </table:table-cell>
          <table:table-cell table:formula="of:=[.D1022]-[.D102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[.B1021]+15" office:value-type="float" office:value="15315" calcext:value-type="float">
            <text:p>15315</text:p>
          </table:table-cell>
          <table:table-cell office:value-type="float" office:value="8640000" calcext:value-type="float">
            <text:p>8640000</text:p>
          </table:table-cell>
          <table:table-cell table:formula="of:=[.B1022]/[.C1022]" office:value-type="float" office:value="0.00177256944444444" calcext:value-type="float">
            <text:p>0,00177256944444444000</text:p>
          </table:table-cell>
          <table:table-cell table:formula="of:=[.D1023]-[.D102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[.B1022]+15" office:value-type="float" office:value="15330" calcext:value-type="float">
            <text:p>15330</text:p>
          </table:table-cell>
          <table:table-cell office:value-type="float" office:value="8640000" calcext:value-type="float">
            <text:p>8640000</text:p>
          </table:table-cell>
          <table:table-cell table:formula="of:=[.B1023]/[.C1023]" office:value-type="float" office:value="0.00177430555555556" calcext:value-type="float">
            <text:p>0,00177430555555556000</text:p>
          </table:table-cell>
          <table:table-cell table:formula="of:=[.D1024]-[.D1023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[.B1023]+15" office:value-type="float" office:value="15345" calcext:value-type="float">
            <text:p>15345</text:p>
          </table:table-cell>
          <table:table-cell office:value-type="float" office:value="8640000" calcext:value-type="float">
            <text:p>8640000</text:p>
          </table:table-cell>
          <table:table-cell table:formula="of:=[.B1024]/[.C1024]" office:value-type="float" office:value="0.00177604166666667" calcext:value-type="float">
            <text:p>0,00177604166666667000</text:p>
          </table:table-cell>
          <table:table-cell table:formula="of:=[.D1025]-[.D102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B1024]+15" office:value-type="float" office:value="15360" calcext:value-type="float">
            <text:p>15360</text:p>
          </table:table-cell>
          <table:table-cell office:value-type="float" office:value="8640000" calcext:value-type="float">
            <text:p>8640000</text:p>
          </table:table-cell>
          <table:table-cell table:formula="of:=[.B1025]/[.C1025]" office:value-type="float" office:value="0.00177777777777778" calcext:value-type="float">
            <text:p>0,00177777777777778000</text:p>
          </table:table-cell>
          <table:table-cell table:formula="of:=[.D1026]-[.D1025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[.B1025]+15" office:value-type="float" office:value="15375" calcext:value-type="float">
            <text:p>15375</text:p>
          </table:table-cell>
          <table:table-cell office:value-type="float" office:value="8640000" calcext:value-type="float">
            <text:p>8640000</text:p>
          </table:table-cell>
          <table:table-cell table:formula="of:=[.B1026]/[.C1026]" office:value-type="float" office:value="0.00177951388888889" calcext:value-type="float">
            <text:p>0,00177951388888889000</text:p>
          </table:table-cell>
          <table:table-cell table:formula="of:=[.D1027]-[.D102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[.B1026]+15" office:value-type="float" office:value="15390" calcext:value-type="float">
            <text:p>15390</text:p>
          </table:table-cell>
          <table:table-cell office:value-type="float" office:value="8640000" calcext:value-type="float">
            <text:p>8640000</text:p>
          </table:table-cell>
          <table:table-cell table:formula="of:=[.B1027]/[.C1027]" office:value-type="float" office:value="0.00178125" calcext:value-type="float">
            <text:p>0,00178125000000000000</text:p>
          </table:table-cell>
          <table:table-cell table:formula="of:=[.D1028]-[.D1027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[.B1027]+15" office:value-type="float" office:value="15405" calcext:value-type="float">
            <text:p>15405</text:p>
          </table:table-cell>
          <table:table-cell office:value-type="float" office:value="8640000" calcext:value-type="float">
            <text:p>8640000</text:p>
          </table:table-cell>
          <table:table-cell table:formula="of:=[.B1028]/[.C1028]" office:value-type="float" office:value="0.00178298611111111" calcext:value-type="float">
            <text:p>0,00178298611111111000</text:p>
          </table:table-cell>
          <table:table-cell table:formula="of:=[.D1029]-[.D102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[.B1028]+15" office:value-type="float" office:value="15420" calcext:value-type="float">
            <text:p>15420</text:p>
          </table:table-cell>
          <table:table-cell office:value-type="float" office:value="8640000" calcext:value-type="float">
            <text:p>8640000</text:p>
          </table:table-cell>
          <table:table-cell table:formula="of:=[.B1029]/[.C1029]" office:value-type="float" office:value="0.00178472222222222" calcext:value-type="float">
            <text:p>0,00178472222222222000</text:p>
          </table:table-cell>
          <table:table-cell table:formula="of:=[.D1030]-[.D1029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[.B1029]+15" office:value-type="float" office:value="15435" calcext:value-type="float">
            <text:p>15435</text:p>
          </table:table-cell>
          <table:table-cell office:value-type="float" office:value="8640000" calcext:value-type="float">
            <text:p>8640000</text:p>
          </table:table-cell>
          <table:table-cell table:formula="of:=[.B1030]/[.C1030]" office:value-type="float" office:value="0.00178645833333333" calcext:value-type="float">
            <text:p>0,00178645833333333000</text:p>
          </table:table-cell>
          <table:table-cell table:formula="of:=[.D1031]-[.D103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.B1030]+15" office:value-type="float" office:value="15450" calcext:value-type="float">
            <text:p>15450</text:p>
          </table:table-cell>
          <table:table-cell office:value-type="float" office:value="8640000" calcext:value-type="float">
            <text:p>8640000</text:p>
          </table:table-cell>
          <table:table-cell table:formula="of:=[.B1031]/[.C1031]" office:value-type="float" office:value="0.00178819444444444" calcext:value-type="float">
            <text:p>0,00178819444444444000</text:p>
          </table:table-cell>
          <table:table-cell table:formula="of:=[.D1032]-[.D1031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[.B1031]+15" office:value-type="float" office:value="15465" calcext:value-type="float">
            <text:p>15465</text:p>
          </table:table-cell>
          <table:table-cell office:value-type="float" office:value="8640000" calcext:value-type="float">
            <text:p>8640000</text:p>
          </table:table-cell>
          <table:table-cell table:formula="of:=[.B1032]/[.C1032]" office:value-type="float" office:value="0.00178993055555556" calcext:value-type="float">
            <text:p>0,00178993055555556000</text:p>
          </table:table-cell>
          <table:table-cell table:formula="of:=[.D1033]-[.D103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[.B1032]+15" office:value-type="float" office:value="15480" calcext:value-type="float">
            <text:p>15480</text:p>
          </table:table-cell>
          <table:table-cell office:value-type="float" office:value="8640000" calcext:value-type="float">
            <text:p>8640000</text:p>
          </table:table-cell>
          <table:table-cell table:formula="of:=[.B1033]/[.C1033]" office:value-type="float" office:value="0.00179166666666667" calcext:value-type="float">
            <text:p>0,00179166666666667000</text:p>
          </table:table-cell>
          <table:table-cell table:formula="of:=[.D1034]-[.D103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[.B1033]+15" office:value-type="float" office:value="15495" calcext:value-type="float">
            <text:p>15495</text:p>
          </table:table-cell>
          <table:table-cell office:value-type="float" office:value="8640000" calcext:value-type="float">
            <text:p>8640000</text:p>
          </table:table-cell>
          <table:table-cell table:formula="of:=[.B1034]/[.C1034]" office:value-type="float" office:value="0.00179340277777778" calcext:value-type="float">
            <text:p>0,00179340277777778000</text:p>
          </table:table-cell>
          <table:table-cell table:formula="of:=[.D1035]-[.D1034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[.B1034]+15" office:value-type="float" office:value="15510" calcext:value-type="float">
            <text:p>15510</text:p>
          </table:table-cell>
          <table:table-cell office:value-type="float" office:value="8640000" calcext:value-type="float">
            <text:p>8640000</text:p>
          </table:table-cell>
          <table:table-cell table:formula="of:=[.B1035]/[.C1035]" office:value-type="float" office:value="0.00179513888888889" calcext:value-type="float">
            <text:p>0,00179513888888889000</text:p>
          </table:table-cell>
          <table:table-cell table:formula="of:=[.D1036]-[.D103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.B1035]+15" office:value-type="float" office:value="15525" calcext:value-type="float">
            <text:p>15525</text:p>
          </table:table-cell>
          <table:table-cell office:value-type="float" office:value="8640000" calcext:value-type="float">
            <text:p>8640000</text:p>
          </table:table-cell>
          <table:table-cell table:formula="of:=[.B1036]/[.C1036]" office:value-type="float" office:value="0.001796875" calcext:value-type="float">
            <text:p>0,00179687500000000000</text:p>
          </table:table-cell>
          <table:table-cell table:formula="of:=[.D1037]-[.D1036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[.B1036]+15" office:value-type="float" office:value="15540" calcext:value-type="float">
            <text:p>15540</text:p>
          </table:table-cell>
          <table:table-cell office:value-type="float" office:value="8640000" calcext:value-type="float">
            <text:p>8640000</text:p>
          </table:table-cell>
          <table:table-cell table:formula="of:=[.B1037]/[.C1037]" office:value-type="float" office:value="0.00179861111111111" calcext:value-type="float">
            <text:p>0,00179861111111111000</text:p>
          </table:table-cell>
          <table:table-cell table:formula="of:=[.D1038]-[.D103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[.B1037]+15" office:value-type="float" office:value="15555" calcext:value-type="float">
            <text:p>15555</text:p>
          </table:table-cell>
          <table:table-cell office:value-type="float" office:value="8640000" calcext:value-type="float">
            <text:p>8640000</text:p>
          </table:table-cell>
          <table:table-cell table:formula="of:=[.B1038]/[.C1038]" office:value-type="float" office:value="0.00180034722222222" calcext:value-type="float">
            <text:p>0,00180034722222222000</text:p>
          </table:table-cell>
          <table:table-cell table:formula="of:=[.D1039]-[.D1038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[.B1038]+15" office:value-type="float" office:value="15570" calcext:value-type="float">
            <text:p>15570</text:p>
          </table:table-cell>
          <table:table-cell office:value-type="float" office:value="8640000" calcext:value-type="float">
            <text:p>8640000</text:p>
          </table:table-cell>
          <table:table-cell table:formula="of:=[.B1039]/[.C1039]" office:value-type="float" office:value="0.00180208333333333" calcext:value-type="float">
            <text:p>0,00180208333333333000</text:p>
          </table:table-cell>
          <table:table-cell table:formula="of:=[.D1040]-[.D103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[.B1039]+15" office:value-type="float" office:value="15585" calcext:value-type="float">
            <text:p>15585</text:p>
          </table:table-cell>
          <table:table-cell office:value-type="float" office:value="8640000" calcext:value-type="float">
            <text:p>8640000</text:p>
          </table:table-cell>
          <table:table-cell table:formula="of:=[.B1040]/[.C1040]" office:value-type="float" office:value="0.00180381944444444" calcext:value-type="float">
            <text:p>0,00180381944444444000</text:p>
          </table:table-cell>
          <table:table-cell table:formula="of:=[.D1041]-[.D1040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[.B1040]+15" office:value-type="float" office:value="15600" calcext:value-type="float">
            <text:p>15600</text:p>
          </table:table-cell>
          <table:table-cell office:value-type="float" office:value="8640000" calcext:value-type="float">
            <text:p>8640000</text:p>
          </table:table-cell>
          <table:table-cell table:formula="of:=[.B1041]/[.C1041]" office:value-type="float" office:value="0.00180555555555556" calcext:value-type="float">
            <text:p>0,00180555555555556000</text:p>
          </table:table-cell>
          <table:table-cell table:formula="of:=[.D1042]-[.D104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[.B1041]+15" office:value-type="float" office:value="15615" calcext:value-type="float">
            <text:p>15615</text:p>
          </table:table-cell>
          <table:table-cell office:value-type="float" office:value="8640000" calcext:value-type="float">
            <text:p>8640000</text:p>
          </table:table-cell>
          <table:table-cell table:formula="of:=[.B1042]/[.C1042]" office:value-type="float" office:value="0.00180729166666667" calcext:value-type="float">
            <text:p>0,00180729166666667000</text:p>
          </table:table-cell>
          <table:table-cell table:formula="of:=[.D1043]-[.D1042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[.B1042]+15" office:value-type="float" office:value="15630" calcext:value-type="float">
            <text:p>15630</text:p>
          </table:table-cell>
          <table:table-cell office:value-type="float" office:value="8640000" calcext:value-type="float">
            <text:p>8640000</text:p>
          </table:table-cell>
          <table:table-cell table:formula="of:=[.B1043]/[.C1043]" office:value-type="float" office:value="0.00180902777777778" calcext:value-type="float">
            <text:p>0,00180902777777778000</text:p>
          </table:table-cell>
          <table:table-cell table:formula="of:=[.D1044]-[.D104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[.B1043]+15" office:value-type="float" office:value="15645" calcext:value-type="float">
            <text:p>15645</text:p>
          </table:table-cell>
          <table:table-cell office:value-type="float" office:value="8640000" calcext:value-type="float">
            <text:p>8640000</text:p>
          </table:table-cell>
          <table:table-cell table:formula="of:=[.B1044]/[.C1044]" office:value-type="float" office:value="0.00181076388888889" calcext:value-type="float">
            <text:p>0,00181076388888889000</text:p>
          </table:table-cell>
          <table:table-cell table:formula="of:=[.D1045]-[.D104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[.B1044]+15" office:value-type="float" office:value="15660" calcext:value-type="float">
            <text:p>15660</text:p>
          </table:table-cell>
          <table:table-cell office:value-type="float" office:value="8640000" calcext:value-type="float">
            <text:p>8640000</text:p>
          </table:table-cell>
          <table:table-cell table:formula="of:=[.B1045]/[.C1045]" office:value-type="float" office:value="0.0018125" calcext:value-type="float">
            <text:p>0,00181250000000000000</text:p>
          </table:table-cell>
          <table:table-cell table:formula="of:=[.D1046]-[.D1045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[.B1045]+15" office:value-type="float" office:value="15675" calcext:value-type="float">
            <text:p>15675</text:p>
          </table:table-cell>
          <table:table-cell office:value-type="float" office:value="8640000" calcext:value-type="float">
            <text:p>8640000</text:p>
          </table:table-cell>
          <table:table-cell table:formula="of:=[.B1046]/[.C1046]" office:value-type="float" office:value="0.00181423611111111" calcext:value-type="float">
            <text:p>0,00181423611111111000</text:p>
          </table:table-cell>
          <table:table-cell table:formula="of:=[.D1047]-[.D104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[.B1046]+15" office:value-type="float" office:value="15690" calcext:value-type="float">
            <text:p>15690</text:p>
          </table:table-cell>
          <table:table-cell office:value-type="float" office:value="8640000" calcext:value-type="float">
            <text:p>8640000</text:p>
          </table:table-cell>
          <table:table-cell table:formula="of:=[.B1047]/[.C1047]" office:value-type="float" office:value="0.00181597222222222" calcext:value-type="float">
            <text:p>0,00181597222222222000</text:p>
          </table:table-cell>
          <table:table-cell table:formula="of:=[.D1048]-[.D1047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[.B1047]+15" office:value-type="float" office:value="15705" calcext:value-type="float">
            <text:p>15705</text:p>
          </table:table-cell>
          <table:table-cell office:value-type="float" office:value="8640000" calcext:value-type="float">
            <text:p>8640000</text:p>
          </table:table-cell>
          <table:table-cell table:formula="of:=[.B1048]/[.C1048]" office:value-type="float" office:value="0.00181770833333333" calcext:value-type="float">
            <text:p>0,00181770833333333000</text:p>
          </table:table-cell>
          <table:table-cell table:formula="of:=[.D1049]-[.D104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[.B1048]+15" office:value-type="float" office:value="15720" calcext:value-type="float">
            <text:p>15720</text:p>
          </table:table-cell>
          <table:table-cell office:value-type="float" office:value="8640000" calcext:value-type="float">
            <text:p>8640000</text:p>
          </table:table-cell>
          <table:table-cell table:formula="of:=[.B1049]/[.C1049]" office:value-type="float" office:value="0.00181944444444444" calcext:value-type="float">
            <text:p>0,00181944444444444000</text:p>
          </table:table-cell>
          <table:table-cell table:formula="of:=[.D1050]-[.D1049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[.B1049]+15" office:value-type="float" office:value="15735" calcext:value-type="float">
            <text:p>15735</text:p>
          </table:table-cell>
          <table:table-cell office:value-type="float" office:value="8640000" calcext:value-type="float">
            <text:p>8640000</text:p>
          </table:table-cell>
          <table:table-cell table:formula="of:=[.B1050]/[.C1050]" office:value-type="float" office:value="0.00182118055555556" calcext:value-type="float">
            <text:p>0,00182118055555556000</text:p>
          </table:table-cell>
          <table:table-cell table:formula="of:=[.D1051]-[.D105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B1050]+15" office:value-type="float" office:value="15750" calcext:value-type="float">
            <text:p>15750</text:p>
          </table:table-cell>
          <table:table-cell office:value-type="float" office:value="8640000" calcext:value-type="float">
            <text:p>8640000</text:p>
          </table:table-cell>
          <table:table-cell table:formula="of:=[.B1051]/[.C1051]" office:value-type="float" office:value="0.00182291666666667" calcext:value-type="float">
            <text:p>0,00182291666666667000</text:p>
          </table:table-cell>
          <table:table-cell table:formula="of:=[.D1052]-[.D1051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[.B1051]+15" office:value-type="float" office:value="15765" calcext:value-type="float">
            <text:p>15765</text:p>
          </table:table-cell>
          <table:table-cell office:value-type="float" office:value="8640000" calcext:value-type="float">
            <text:p>8640000</text:p>
          </table:table-cell>
          <table:table-cell table:formula="of:=[.B1052]/[.C1052]" office:value-type="float" office:value="0.00182465277777778" calcext:value-type="float">
            <text:p>0,00182465277777778000</text:p>
          </table:table-cell>
          <table:table-cell table:formula="of:=[.D1053]-[.D105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[.B1052]+15" office:value-type="float" office:value="15780" calcext:value-type="float">
            <text:p>15780</text:p>
          </table:table-cell>
          <table:table-cell office:value-type="float" office:value="8640000" calcext:value-type="float">
            <text:p>8640000</text:p>
          </table:table-cell>
          <table:table-cell table:formula="of:=[.B1053]/[.C1053]" office:value-type="float" office:value="0.00182638888888889" calcext:value-type="float">
            <text:p>0,00182638888888889000</text:p>
          </table:table-cell>
          <table:table-cell table:formula="of:=[.D1054]-[.D105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[.B1053]+15" office:value-type="float" office:value="15795" calcext:value-type="float">
            <text:p>15795</text:p>
          </table:table-cell>
          <table:table-cell office:value-type="float" office:value="8640000" calcext:value-type="float">
            <text:p>8640000</text:p>
          </table:table-cell>
          <table:table-cell table:formula="of:=[.B1054]/[.C1054]" office:value-type="float" office:value="0.001828125" calcext:value-type="float">
            <text:p>0,00182812500000000000</text:p>
          </table:table-cell>
          <table:table-cell table:formula="of:=[.D1055]-[.D1054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[.B1054]+15" office:value-type="float" office:value="15810" calcext:value-type="float">
            <text:p>15810</text:p>
          </table:table-cell>
          <table:table-cell office:value-type="float" office:value="8640000" calcext:value-type="float">
            <text:p>8640000</text:p>
          </table:table-cell>
          <table:table-cell table:formula="of:=[.B1055]/[.C1055]" office:value-type="float" office:value="0.00182986111111111" calcext:value-type="float">
            <text:p>0,00182986111111111000</text:p>
          </table:table-cell>
          <table:table-cell table:formula="of:=[.D1056]-[.D105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[.B1055]+15" office:value-type="float" office:value="15825" calcext:value-type="float">
            <text:p>15825</text:p>
          </table:table-cell>
          <table:table-cell office:value-type="float" office:value="8640000" calcext:value-type="float">
            <text:p>8640000</text:p>
          </table:table-cell>
          <table:table-cell table:formula="of:=[.B1056]/[.C1056]" office:value-type="float" office:value="0.00183159722222222" calcext:value-type="float">
            <text:p>0,00183159722222222000</text:p>
          </table:table-cell>
          <table:table-cell table:formula="of:=[.D1057]-[.D1056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[.B1056]+15" office:value-type="float" office:value="15840" calcext:value-type="float">
            <text:p>15840</text:p>
          </table:table-cell>
          <table:table-cell office:value-type="float" office:value="8640000" calcext:value-type="float">
            <text:p>8640000</text:p>
          </table:table-cell>
          <table:table-cell table:formula="of:=[.B1057]/[.C1057]" office:value-type="float" office:value="0.00183333333333333" calcext:value-type="float">
            <text:p>0,00183333333333333000</text:p>
          </table:table-cell>
          <table:table-cell table:formula="of:=[.D1058]-[.D105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[.B1057]+15" office:value-type="float" office:value="15855" calcext:value-type="float">
            <text:p>15855</text:p>
          </table:table-cell>
          <table:table-cell office:value-type="float" office:value="8640000" calcext:value-type="float">
            <text:p>8640000</text:p>
          </table:table-cell>
          <table:table-cell table:formula="of:=[.B1058]/[.C1058]" office:value-type="float" office:value="0.00183506944444444" calcext:value-type="float">
            <text:p>0,00183506944444444000</text:p>
          </table:table-cell>
          <table:table-cell table:formula="of:=[.D1059]-[.D1058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[.B1058]+15" office:value-type="float" office:value="15870" calcext:value-type="float">
            <text:p>15870</text:p>
          </table:table-cell>
          <table:table-cell office:value-type="float" office:value="8640000" calcext:value-type="float">
            <text:p>8640000</text:p>
          </table:table-cell>
          <table:table-cell table:formula="of:=[.B1059]/[.C1059]" office:value-type="float" office:value="0.00183680555555556" calcext:value-type="float">
            <text:p>0,00183680555555556000</text:p>
          </table:table-cell>
          <table:table-cell table:formula="of:=[.D1060]-[.D105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[.B1059]+15" office:value-type="float" office:value="15885" calcext:value-type="float">
            <text:p>15885</text:p>
          </table:table-cell>
          <table:table-cell office:value-type="float" office:value="8640000" calcext:value-type="float">
            <text:p>8640000</text:p>
          </table:table-cell>
          <table:table-cell table:formula="of:=[.B1060]/[.C1060]" office:value-type="float" office:value="0.00183854166666667" calcext:value-type="float">
            <text:p>0,00183854166666667000</text:p>
          </table:table-cell>
          <table:table-cell table:formula="of:=[.D1061]-[.D1060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.B1060]+15" office:value-type="float" office:value="15900" calcext:value-type="float">
            <text:p>15900</text:p>
          </table:table-cell>
          <table:table-cell office:value-type="float" office:value="8640000" calcext:value-type="float">
            <text:p>8640000</text:p>
          </table:table-cell>
          <table:table-cell table:formula="of:=[.B1061]/[.C1061]" office:value-type="float" office:value="0.00184027777777778" calcext:value-type="float">
            <text:p>0,00184027777777778000</text:p>
          </table:table-cell>
          <table:table-cell table:formula="of:=[.D1062]-[.D106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[.B1061]+15" office:value-type="float" office:value="15915" calcext:value-type="float">
            <text:p>15915</text:p>
          </table:table-cell>
          <table:table-cell office:value-type="float" office:value="8640000" calcext:value-type="float">
            <text:p>8640000</text:p>
          </table:table-cell>
          <table:table-cell table:formula="of:=[.B1062]/[.C1062]" office:value-type="float" office:value="0.00184201388888889" calcext:value-type="float">
            <text:p>0,00184201388888889000</text:p>
          </table:table-cell>
          <table:table-cell table:formula="of:=[.D1063]-[.D1062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[.B1062]+15" office:value-type="float" office:value="15930" calcext:value-type="float">
            <text:p>15930</text:p>
          </table:table-cell>
          <table:table-cell office:value-type="float" office:value="8640000" calcext:value-type="float">
            <text:p>8640000</text:p>
          </table:table-cell>
          <table:table-cell table:formula="of:=[.B1063]/[.C1063]" office:value-type="float" office:value="0.00184375" calcext:value-type="float">
            <text:p>0,00184375000000000000</text:p>
          </table:table-cell>
          <table:table-cell table:formula="of:=[.D1064]-[.D106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[.B1063]+15" office:value-type="float" office:value="15945" calcext:value-type="float">
            <text:p>15945</text:p>
          </table:table-cell>
          <table:table-cell office:value-type="float" office:value="8640000" calcext:value-type="float">
            <text:p>8640000</text:p>
          </table:table-cell>
          <table:table-cell table:formula="of:=[.B1064]/[.C1064]" office:value-type="float" office:value="0.00184548611111111" calcext:value-type="float">
            <text:p>0,00184548611111111000</text:p>
          </table:table-cell>
          <table:table-cell table:formula="of:=[.D1065]-[.D106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[.B1064]+15" office:value-type="float" office:value="15960" calcext:value-type="float">
            <text:p>15960</text:p>
          </table:table-cell>
          <table:table-cell office:value-type="float" office:value="8640000" calcext:value-type="float">
            <text:p>8640000</text:p>
          </table:table-cell>
          <table:table-cell table:formula="of:=[.B1065]/[.C1065]" office:value-type="float" office:value="0.00184722222222222" calcext:value-type="float">
            <text:p>0,00184722222222222000</text:p>
          </table:table-cell>
          <table:table-cell table:formula="of:=[.D1066]-[.D1065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[.B1065]+15" office:value-type="float" office:value="15975" calcext:value-type="float">
            <text:p>15975</text:p>
          </table:table-cell>
          <table:table-cell office:value-type="float" office:value="8640000" calcext:value-type="float">
            <text:p>8640000</text:p>
          </table:table-cell>
          <table:table-cell table:formula="of:=[.B1066]/[.C1066]" office:value-type="float" office:value="0.00184895833333333" calcext:value-type="float">
            <text:p>0,00184895833333333000</text:p>
          </table:table-cell>
          <table:table-cell table:formula="of:=[.D1067]-[.D106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[.B1066]+15" office:value-type="float" office:value="15990" calcext:value-type="float">
            <text:p>15990</text:p>
          </table:table-cell>
          <table:table-cell office:value-type="float" office:value="8640000" calcext:value-type="float">
            <text:p>8640000</text:p>
          </table:table-cell>
          <table:table-cell table:formula="of:=[.B1067]/[.C1067]" office:value-type="float" office:value="0.00185069444444444" calcext:value-type="float">
            <text:p>0,00185069444444444000</text:p>
          </table:table-cell>
          <table:table-cell table:formula="of:=[.D1068]-[.D1067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[.B1067]+15" office:value-type="float" office:value="16005" calcext:value-type="float">
            <text:p>16005</text:p>
          </table:table-cell>
          <table:table-cell office:value-type="float" office:value="8640000" calcext:value-type="float">
            <text:p>8640000</text:p>
          </table:table-cell>
          <table:table-cell table:formula="of:=[.B1068]/[.C1068]" office:value-type="float" office:value="0.00185243055555556" calcext:value-type="float">
            <text:p>0,00185243055555556000</text:p>
          </table:table-cell>
          <table:table-cell table:formula="of:=[.D1069]-[.D106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[.B1068]+15" office:value-type="float" office:value="16020" calcext:value-type="float">
            <text:p>16020</text:p>
          </table:table-cell>
          <table:table-cell office:value-type="float" office:value="8640000" calcext:value-type="float">
            <text:p>8640000</text:p>
          </table:table-cell>
          <table:table-cell table:formula="of:=[.B1069]/[.C1069]" office:value-type="float" office:value="0.00185416666666667" calcext:value-type="float">
            <text:p>0,00185416666666667000</text:p>
          </table:table-cell>
          <table:table-cell table:formula="of:=[.D1070]-[.D1069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[.B1069]+15" office:value-type="float" office:value="16035" calcext:value-type="float">
            <text:p>16035</text:p>
          </table:table-cell>
          <table:table-cell office:value-type="float" office:value="8640000" calcext:value-type="float">
            <text:p>8640000</text:p>
          </table:table-cell>
          <table:table-cell table:formula="of:=[.B1070]/[.C1070]" office:value-type="float" office:value="0.00185590277777778" calcext:value-type="float">
            <text:p>0,00185590277777778000</text:p>
          </table:table-cell>
          <table:table-cell table:formula="of:=[.D1071]-[.D107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[.B1070]+15" office:value-type="float" office:value="16050" calcext:value-type="float">
            <text:p>16050</text:p>
          </table:table-cell>
          <table:table-cell office:value-type="float" office:value="8640000" calcext:value-type="float">
            <text:p>8640000</text:p>
          </table:table-cell>
          <table:table-cell table:formula="of:=[.B1071]/[.C1071]" office:value-type="float" office:value="0.00185763888888889" calcext:value-type="float">
            <text:p>0,00185763888888889000</text:p>
          </table:table-cell>
          <table:table-cell table:formula="of:=[.D1072]-[.D1071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[.B1071]+15" office:value-type="float" office:value="16065" calcext:value-type="float">
            <text:p>16065</text:p>
          </table:table-cell>
          <table:table-cell office:value-type="float" office:value="8640000" calcext:value-type="float">
            <text:p>8640000</text:p>
          </table:table-cell>
          <table:table-cell table:formula="of:=[.B1072]/[.C1072]" office:value-type="float" office:value="0.001859375" calcext:value-type="float">
            <text:p>0,00185937500000000000</text:p>
          </table:table-cell>
          <table:table-cell table:formula="of:=[.D1073]-[.D107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[.B1072]+15" office:value-type="float" office:value="16080" calcext:value-type="float">
            <text:p>16080</text:p>
          </table:table-cell>
          <table:table-cell office:value-type="float" office:value="8640000" calcext:value-type="float">
            <text:p>8640000</text:p>
          </table:table-cell>
          <table:table-cell table:formula="of:=[.B1073]/[.C1073]" office:value-type="float" office:value="0.00186111111111111" calcext:value-type="float">
            <text:p>0,00186111111111111000</text:p>
          </table:table-cell>
          <table:table-cell table:formula="of:=[.D1074]-[.D1073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[.B1073]+15" office:value-type="float" office:value="16095" calcext:value-type="float">
            <text:p>16095</text:p>
          </table:table-cell>
          <table:table-cell office:value-type="float" office:value="8640000" calcext:value-type="float">
            <text:p>8640000</text:p>
          </table:table-cell>
          <table:table-cell table:formula="of:=[.B1074]/[.C1074]" office:value-type="float" office:value="0.00186284722222222" calcext:value-type="float">
            <text:p>0,00186284722222222000</text:p>
          </table:table-cell>
          <table:table-cell table:formula="of:=[.D1075]-[.D107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[.B1074]+15" office:value-type="float" office:value="16110" calcext:value-type="float">
            <text:p>16110</text:p>
          </table:table-cell>
          <table:table-cell office:value-type="float" office:value="8640000" calcext:value-type="float">
            <text:p>8640000</text:p>
          </table:table-cell>
          <table:table-cell table:formula="of:=[.B1075]/[.C1075]" office:value-type="float" office:value="0.00186458333333333" calcext:value-type="float">
            <text:p>0,00186458333333333000</text:p>
          </table:table-cell>
          <table:table-cell table:formula="of:=[.D1076]-[.D107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[.B1075]+15" office:value-type="float" office:value="16125" calcext:value-type="float">
            <text:p>16125</text:p>
          </table:table-cell>
          <table:table-cell office:value-type="float" office:value="8640000" calcext:value-type="float">
            <text:p>8640000</text:p>
          </table:table-cell>
          <table:table-cell table:formula="of:=[.B1076]/[.C1076]" office:value-type="float" office:value="0.00186631944444444" calcext:value-type="float">
            <text:p>0,00186631944444444000</text:p>
          </table:table-cell>
          <table:table-cell table:formula="of:=[.D1077]-[.D1076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[.B1076]+15" office:value-type="float" office:value="16140" calcext:value-type="float">
            <text:p>16140</text:p>
          </table:table-cell>
          <table:table-cell office:value-type="float" office:value="8640000" calcext:value-type="float">
            <text:p>8640000</text:p>
          </table:table-cell>
          <table:table-cell table:formula="of:=[.B1077]/[.C1077]" office:value-type="float" office:value="0.00186805555555556" calcext:value-type="float">
            <text:p>0,00186805555555556000</text:p>
          </table:table-cell>
          <table:table-cell table:formula="of:=[.D1078]-[.D107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[.B1077]+15" office:value-type="float" office:value="16155" calcext:value-type="float">
            <text:p>16155</text:p>
          </table:table-cell>
          <table:table-cell office:value-type="float" office:value="8640000" calcext:value-type="float">
            <text:p>8640000</text:p>
          </table:table-cell>
          <table:table-cell table:formula="of:=[.B1078]/[.C1078]" office:value-type="float" office:value="0.00186979166666667" calcext:value-type="float">
            <text:p>0,00186979166666667000</text:p>
          </table:table-cell>
          <table:table-cell table:formula="of:=[.D1079]-[.D1078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[.B1078]+15" office:value-type="float" office:value="16170" calcext:value-type="float">
            <text:p>16170</text:p>
          </table:table-cell>
          <table:table-cell office:value-type="float" office:value="8640000" calcext:value-type="float">
            <text:p>8640000</text:p>
          </table:table-cell>
          <table:table-cell table:formula="of:=[.B1079]/[.C1079]" office:value-type="float" office:value="0.00187152777777778" calcext:value-type="float">
            <text:p>0,00187152777777778000</text:p>
          </table:table-cell>
          <table:table-cell table:formula="of:=[.D1080]-[.D107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[.B1079]+15" office:value-type="float" office:value="16185" calcext:value-type="float">
            <text:p>16185</text:p>
          </table:table-cell>
          <table:table-cell office:value-type="float" office:value="8640000" calcext:value-type="float">
            <text:p>8640000</text:p>
          </table:table-cell>
          <table:table-cell table:formula="of:=[.B1080]/[.C1080]" office:value-type="float" office:value="0.00187326388888889" calcext:value-type="float">
            <text:p>0,00187326388888889000</text:p>
          </table:table-cell>
          <table:table-cell table:formula="of:=[.D1081]-[.D1080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B1080]+15" office:value-type="float" office:value="16200" calcext:value-type="float">
            <text:p>16200</text:p>
          </table:table-cell>
          <table:table-cell office:value-type="float" office:value="8640000" calcext:value-type="float">
            <text:p>8640000</text:p>
          </table:table-cell>
          <table:table-cell table:formula="of:=[.B1081]/[.C1081]" office:value-type="float" office:value="0.001875" calcext:value-type="float">
            <text:p>0,00187500000000000000</text:p>
          </table:table-cell>
          <table:table-cell table:formula="of:=[.D1082]-[.D108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[.B1081]+15" office:value-type="float" office:value="16215" calcext:value-type="float">
            <text:p>16215</text:p>
          </table:table-cell>
          <table:table-cell office:value-type="float" office:value="8640000" calcext:value-type="float">
            <text:p>8640000</text:p>
          </table:table-cell>
          <table:table-cell table:formula="of:=[.B1082]/[.C1082]" office:value-type="float" office:value="0.00187673611111111" calcext:value-type="float">
            <text:p>0,00187673611111111000</text:p>
          </table:table-cell>
          <table:table-cell table:formula="of:=[.D1083]-[.D1082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[.B1082]+15" office:value-type="float" office:value="16230" calcext:value-type="float">
            <text:p>16230</text:p>
          </table:table-cell>
          <table:table-cell office:value-type="float" office:value="8640000" calcext:value-type="float">
            <text:p>8640000</text:p>
          </table:table-cell>
          <table:table-cell table:formula="of:=[.B1083]/[.C1083]" office:value-type="float" office:value="0.00187847222222222" calcext:value-type="float">
            <text:p>0,00187847222222222000</text:p>
          </table:table-cell>
          <table:table-cell table:formula="of:=[.D1084]-[.D108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[.B1083]+15" office:value-type="float" office:value="16245" calcext:value-type="float">
            <text:p>16245</text:p>
          </table:table-cell>
          <table:table-cell office:value-type="float" office:value="8640000" calcext:value-type="float">
            <text:p>8640000</text:p>
          </table:table-cell>
          <table:table-cell table:formula="of:=[.B1084]/[.C1084]" office:value-type="float" office:value="0.00188020833333333" calcext:value-type="float">
            <text:p>0,00188020833333333000</text:p>
          </table:table-cell>
          <table:table-cell table:formula="of:=[.D1085]-[.D108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[.B1084]+15" office:value-type="float" office:value="16260" calcext:value-type="float">
            <text:p>16260</text:p>
          </table:table-cell>
          <table:table-cell office:value-type="float" office:value="8640000" calcext:value-type="float">
            <text:p>8640000</text:p>
          </table:table-cell>
          <table:table-cell table:formula="of:=[.B1085]/[.C1085]" office:value-type="float" office:value="0.00188194444444444" calcext:value-type="float">
            <text:p>0,00188194444444444000</text:p>
          </table:table-cell>
          <table:table-cell table:formula="of:=[.D1086]-[.D1085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[.B1085]+15" office:value-type="float" office:value="16275" calcext:value-type="float">
            <text:p>16275</text:p>
          </table:table-cell>
          <table:table-cell office:value-type="float" office:value="8640000" calcext:value-type="float">
            <text:p>8640000</text:p>
          </table:table-cell>
          <table:table-cell table:formula="of:=[.B1086]/[.C1086]" office:value-type="float" office:value="0.00188368055555556" calcext:value-type="float">
            <text:p>0,00188368055555556000</text:p>
          </table:table-cell>
          <table:table-cell table:formula="of:=[.D1087]-[.D108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[.B1086]+15" office:value-type="float" office:value="16290" calcext:value-type="float">
            <text:p>16290</text:p>
          </table:table-cell>
          <table:table-cell office:value-type="float" office:value="8640000" calcext:value-type="float">
            <text:p>8640000</text:p>
          </table:table-cell>
          <table:table-cell table:formula="of:=[.B1087]/[.C1087]" office:value-type="float" office:value="0.00188541666666667" calcext:value-type="float">
            <text:p>0,00188541666666667000</text:p>
          </table:table-cell>
          <table:table-cell table:formula="of:=[.D1088]-[.D1087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[.B1087]+15" office:value-type="float" office:value="16305" calcext:value-type="float">
            <text:p>16305</text:p>
          </table:table-cell>
          <table:table-cell office:value-type="float" office:value="8640000" calcext:value-type="float">
            <text:p>8640000</text:p>
          </table:table-cell>
          <table:table-cell table:formula="of:=[.B1088]/[.C1088]" office:value-type="float" office:value="0.00188715277777778" calcext:value-type="float">
            <text:p>0,00188715277777778000</text:p>
          </table:table-cell>
          <table:table-cell table:formula="of:=[.D1089]-[.D108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[.B1088]+15" office:value-type="float" office:value="16320" calcext:value-type="float">
            <text:p>16320</text:p>
          </table:table-cell>
          <table:table-cell office:value-type="float" office:value="8640000" calcext:value-type="float">
            <text:p>8640000</text:p>
          </table:table-cell>
          <table:table-cell table:formula="of:=[.B1089]/[.C1089]" office:value-type="float" office:value="0.00188888888888889" calcext:value-type="float">
            <text:p>0,00188888888888889000</text:p>
          </table:table-cell>
          <table:table-cell table:formula="of:=[.D1090]-[.D1089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[.B1089]+15" office:value-type="float" office:value="16335" calcext:value-type="float">
            <text:p>16335</text:p>
          </table:table-cell>
          <table:table-cell office:value-type="float" office:value="8640000" calcext:value-type="float">
            <text:p>8640000</text:p>
          </table:table-cell>
          <table:table-cell table:formula="of:=[.B1090]/[.C1090]" office:value-type="float" office:value="0.001890625" calcext:value-type="float">
            <text:p>0,00189062500000000000</text:p>
          </table:table-cell>
          <table:table-cell table:formula="of:=[.D1091]-[.D109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[.B1090]+15" office:value-type="float" office:value="16350" calcext:value-type="float">
            <text:p>16350</text:p>
          </table:table-cell>
          <table:table-cell office:value-type="float" office:value="8640000" calcext:value-type="float">
            <text:p>8640000</text:p>
          </table:table-cell>
          <table:table-cell table:formula="of:=[.B1091]/[.C1091]" office:value-type="float" office:value="0.00189236111111111" calcext:value-type="float">
            <text:p>0,00189236111111111000</text:p>
          </table:table-cell>
          <table:table-cell table:formula="of:=[.D1092]-[.D1091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[.B1091]+15" office:value-type="float" office:value="16365" calcext:value-type="float">
            <text:p>16365</text:p>
          </table:table-cell>
          <table:table-cell office:value-type="float" office:value="8640000" calcext:value-type="float">
            <text:p>8640000</text:p>
          </table:table-cell>
          <table:table-cell table:formula="of:=[.B1092]/[.C1092]" office:value-type="float" office:value="0.00189409722222222" calcext:value-type="float">
            <text:p>0,00189409722222222000</text:p>
          </table:table-cell>
          <table:table-cell table:formula="of:=[.D1093]-[.D109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[.B1092]+15" office:value-type="float" office:value="16380" calcext:value-type="float">
            <text:p>16380</text:p>
          </table:table-cell>
          <table:table-cell office:value-type="float" office:value="8640000" calcext:value-type="float">
            <text:p>8640000</text:p>
          </table:table-cell>
          <table:table-cell table:formula="of:=[.B1093]/[.C1093]" office:value-type="float" office:value="0.00189583333333333" calcext:value-type="float">
            <text:p>0,00189583333333333000</text:p>
          </table:table-cell>
          <table:table-cell table:formula="of:=[.D1094]-[.D1093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[.B1093]+15" office:value-type="float" office:value="16395" calcext:value-type="float">
            <text:p>16395</text:p>
          </table:table-cell>
          <table:table-cell office:value-type="float" office:value="8640000" calcext:value-type="float">
            <text:p>8640000</text:p>
          </table:table-cell>
          <table:table-cell table:formula="of:=[.B1094]/[.C1094]" office:value-type="float" office:value="0.00189756944444444" calcext:value-type="float">
            <text:p>0,00189756944444444000</text:p>
          </table:table-cell>
          <table:table-cell table:formula="of:=[.D1095]-[.D109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[.B1094]+15" office:value-type="float" office:value="16410" calcext:value-type="float">
            <text:p>16410</text:p>
          </table:table-cell>
          <table:table-cell office:value-type="float" office:value="8640000" calcext:value-type="float">
            <text:p>8640000</text:p>
          </table:table-cell>
          <table:table-cell table:formula="of:=[.B1095]/[.C1095]" office:value-type="float" office:value="0.00189930555555556" calcext:value-type="float">
            <text:p>0,00189930555555556000</text:p>
          </table:table-cell>
          <table:table-cell table:formula="of:=[.D1096]-[.D109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[.B1095]+15" office:value-type="float" office:value="16425" calcext:value-type="float">
            <text:p>16425</text:p>
          </table:table-cell>
          <table:table-cell office:value-type="float" office:value="8640000" calcext:value-type="float">
            <text:p>8640000</text:p>
          </table:table-cell>
          <table:table-cell table:formula="of:=[.B1096]/[.C1096]" office:value-type="float" office:value="0.00190104166666667" calcext:value-type="float">
            <text:p>0,00190104166666667000</text:p>
          </table:table-cell>
          <table:table-cell table:formula="of:=[.D1097]-[.D1096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[.B1096]+15" office:value-type="float" office:value="16440" calcext:value-type="float">
            <text:p>16440</text:p>
          </table:table-cell>
          <table:table-cell office:value-type="float" office:value="8640000" calcext:value-type="float">
            <text:p>8640000</text:p>
          </table:table-cell>
          <table:table-cell table:formula="of:=[.B1097]/[.C1097]" office:value-type="float" office:value="0.00190277777777778" calcext:value-type="float">
            <text:p>0,00190277777777778000</text:p>
          </table:table-cell>
          <table:table-cell table:formula="of:=[.D1098]-[.D109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[.B1097]+15" office:value-type="float" office:value="16455" calcext:value-type="float">
            <text:p>16455</text:p>
          </table:table-cell>
          <table:table-cell office:value-type="float" office:value="8640000" calcext:value-type="float">
            <text:p>8640000</text:p>
          </table:table-cell>
          <table:table-cell table:formula="of:=[.B1098]/[.C1098]" office:value-type="float" office:value="0.00190451388888889" calcext:value-type="float">
            <text:p>0,00190451388888889000</text:p>
          </table:table-cell>
          <table:table-cell table:formula="of:=[.D1099]-[.D1098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[.B1098]+15" office:value-type="float" office:value="16470" calcext:value-type="float">
            <text:p>16470</text:p>
          </table:table-cell>
          <table:table-cell office:value-type="float" office:value="8640000" calcext:value-type="float">
            <text:p>8640000</text:p>
          </table:table-cell>
          <table:table-cell table:formula="of:=[.B1099]/[.C1099]" office:value-type="float" office:value="0.00190625" calcext:value-type="float">
            <text:p>0,00190625000000000000</text:p>
          </table:table-cell>
          <table:table-cell table:formula="of:=[.D1100]-[.D109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[.B1099]+15" office:value-type="float" office:value="16485" calcext:value-type="float">
            <text:p>16485</text:p>
          </table:table-cell>
          <table:table-cell office:value-type="float" office:value="8640000" calcext:value-type="float">
            <text:p>8640000</text:p>
          </table:table-cell>
          <table:table-cell table:formula="of:=[.B1100]/[.C1100]" office:value-type="float" office:value="0.00190798611111111" calcext:value-type="float">
            <text:p>0,00190798611111111000</text:p>
          </table:table-cell>
          <table:table-cell table:formula="of:=[.D1101]-[.D1100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B1100]+15" office:value-type="float" office:value="16500" calcext:value-type="float">
            <text:p>16500</text:p>
          </table:table-cell>
          <table:table-cell office:value-type="float" office:value="8640000" calcext:value-type="float">
            <text:p>8640000</text:p>
          </table:table-cell>
          <table:table-cell table:formula="of:=[.B1101]/[.C1101]" office:value-type="float" office:value="0.00190972222222222" calcext:value-type="float">
            <text:p>0,00190972222222222000</text:p>
          </table:table-cell>
          <table:table-cell table:formula="of:=[.D1102]-[.D110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[.B1101]+15" office:value-type="float" office:value="16515" calcext:value-type="float">
            <text:p>16515</text:p>
          </table:table-cell>
          <table:table-cell office:value-type="float" office:value="8640000" calcext:value-type="float">
            <text:p>8640000</text:p>
          </table:table-cell>
          <table:table-cell table:formula="of:=[.B1102]/[.C1102]" office:value-type="float" office:value="0.00191145833333333" calcext:value-type="float">
            <text:p>0,00191145833333333000</text:p>
          </table:table-cell>
          <table:table-cell table:formula="of:=[.D1103]-[.D1102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[.B1102]+15" office:value-type="float" office:value="16530" calcext:value-type="float">
            <text:p>16530</text:p>
          </table:table-cell>
          <table:table-cell office:value-type="float" office:value="8640000" calcext:value-type="float">
            <text:p>8640000</text:p>
          </table:table-cell>
          <table:table-cell table:formula="of:=[.B1103]/[.C1103]" office:value-type="float" office:value="0.00191319444444444" calcext:value-type="float">
            <text:p>0,00191319444444444000</text:p>
          </table:table-cell>
          <table:table-cell table:formula="of:=[.D1104]-[.D110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[.B1103]+15" office:value-type="float" office:value="16545" calcext:value-type="float">
            <text:p>16545</text:p>
          </table:table-cell>
          <table:table-cell office:value-type="float" office:value="8640000" calcext:value-type="float">
            <text:p>8640000</text:p>
          </table:table-cell>
          <table:table-cell table:formula="of:=[.B1104]/[.C1104]" office:value-type="float" office:value="0.00191493055555556" calcext:value-type="float">
            <text:p>0,00191493055555556000</text:p>
          </table:table-cell>
          <table:table-cell table:formula="of:=[.D1105]-[.D1104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[.B1104]+15" office:value-type="float" office:value="16560" calcext:value-type="float">
            <text:p>16560</text:p>
          </table:table-cell>
          <table:table-cell office:value-type="float" office:value="8640000" calcext:value-type="float">
            <text:p>8640000</text:p>
          </table:table-cell>
          <table:table-cell table:formula="of:=[.B1105]/[.C1105]" office:value-type="float" office:value="0.00191666666666667" calcext:value-type="float">
            <text:p>0,00191666666666667000</text:p>
          </table:table-cell>
          <table:table-cell table:formula="of:=[.D1106]-[.D110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[.B1105]+15" office:value-type="float" office:value="16575" calcext:value-type="float">
            <text:p>16575</text:p>
          </table:table-cell>
          <table:table-cell office:value-type="float" office:value="8640000" calcext:value-type="float">
            <text:p>8640000</text:p>
          </table:table-cell>
          <table:table-cell table:formula="of:=[.B1106]/[.C1106]" office:value-type="float" office:value="0.00191840277777778" calcext:value-type="float">
            <text:p>0,00191840277777778000</text:p>
          </table:table-cell>
          <table:table-cell table:formula="of:=[.D1107]-[.D110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[.B1106]+15" office:value-type="float" office:value="16590" calcext:value-type="float">
            <text:p>16590</text:p>
          </table:table-cell>
          <table:table-cell office:value-type="float" office:value="8640000" calcext:value-type="float">
            <text:p>8640000</text:p>
          </table:table-cell>
          <table:table-cell table:formula="of:=[.B1107]/[.C1107]" office:value-type="float" office:value="0.00192013888888889" calcext:value-type="float">
            <text:p>0,00192013888888889000</text:p>
          </table:table-cell>
          <table:table-cell table:formula="of:=[.D1108]-[.D1107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[.B1107]+15" office:value-type="float" office:value="16605" calcext:value-type="float">
            <text:p>16605</text:p>
          </table:table-cell>
          <table:table-cell office:value-type="float" office:value="8640000" calcext:value-type="float">
            <text:p>8640000</text:p>
          </table:table-cell>
          <table:table-cell table:formula="of:=[.B1108]/[.C1108]" office:value-type="float" office:value="0.001921875" calcext:value-type="float">
            <text:p>0,00192187500000000000</text:p>
          </table:table-cell>
          <table:table-cell table:formula="of:=[.D1109]-[.D110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[.B1108]+15" office:value-type="float" office:value="16620" calcext:value-type="float">
            <text:p>16620</text:p>
          </table:table-cell>
          <table:table-cell office:value-type="float" office:value="8640000" calcext:value-type="float">
            <text:p>8640000</text:p>
          </table:table-cell>
          <table:table-cell table:formula="of:=[.B1109]/[.C1109]" office:value-type="float" office:value="0.00192361111111111" calcext:value-type="float">
            <text:p>0,00192361111111111000</text:p>
          </table:table-cell>
          <table:table-cell table:formula="of:=[.D1110]-[.D1109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[.B1109]+15" office:value-type="float" office:value="16635" calcext:value-type="float">
            <text:p>16635</text:p>
          </table:table-cell>
          <table:table-cell office:value-type="float" office:value="8640000" calcext:value-type="float">
            <text:p>8640000</text:p>
          </table:table-cell>
          <table:table-cell table:formula="of:=[.B1110]/[.C1110]" office:value-type="float" office:value="0.00192534722222222" calcext:value-type="float">
            <text:p>0,00192534722222222000</text:p>
          </table:table-cell>
          <table:table-cell table:formula="of:=[.D1111]-[.D111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[.B1110]+15" office:value-type="float" office:value="16650" calcext:value-type="float">
            <text:p>16650</text:p>
          </table:table-cell>
          <table:table-cell office:value-type="float" office:value="8640000" calcext:value-type="float">
            <text:p>8640000</text:p>
          </table:table-cell>
          <table:table-cell table:formula="of:=[.B1111]/[.C1111]" office:value-type="float" office:value="0.00192708333333333" calcext:value-type="float">
            <text:p>0,00192708333333333000</text:p>
          </table:table-cell>
          <table:table-cell table:formula="of:=[.D1112]-[.D1111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[.B1111]+15" office:value-type="float" office:value="16665" calcext:value-type="float">
            <text:p>16665</text:p>
          </table:table-cell>
          <table:table-cell office:value-type="float" office:value="8640000" calcext:value-type="float">
            <text:p>8640000</text:p>
          </table:table-cell>
          <table:table-cell table:formula="of:=[.B1112]/[.C1112]" office:value-type="float" office:value="0.00192881944444444" calcext:value-type="float">
            <text:p>0,00192881944444444000</text:p>
          </table:table-cell>
          <table:table-cell table:formula="of:=[.D1113]-[.D111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[.B1112]+15" office:value-type="float" office:value="16680" calcext:value-type="float">
            <text:p>16680</text:p>
          </table:table-cell>
          <table:table-cell office:value-type="float" office:value="8640000" calcext:value-type="float">
            <text:p>8640000</text:p>
          </table:table-cell>
          <table:table-cell table:formula="of:=[.B1113]/[.C1113]" office:value-type="float" office:value="0.00193055555555556" calcext:value-type="float">
            <text:p>0,00193055555555556000</text:p>
          </table:table-cell>
          <table:table-cell table:formula="of:=[.D1114]-[.D1113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[.B1113]+15" office:value-type="float" office:value="16695" calcext:value-type="float">
            <text:p>16695</text:p>
          </table:table-cell>
          <table:table-cell office:value-type="float" office:value="8640000" calcext:value-type="float">
            <text:p>8640000</text:p>
          </table:table-cell>
          <table:table-cell table:formula="of:=[.B1114]/[.C1114]" office:value-type="float" office:value="0.00193229166666667" calcext:value-type="float">
            <text:p>0,00193229166666667000</text:p>
          </table:table-cell>
          <table:table-cell table:formula="of:=[.D1115]-[.D111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[.B1114]+15" office:value-type="float" office:value="16710" calcext:value-type="float">
            <text:p>16710</text:p>
          </table:table-cell>
          <table:table-cell office:value-type="float" office:value="8640000" calcext:value-type="float">
            <text:p>8640000</text:p>
          </table:table-cell>
          <table:table-cell table:formula="of:=[.B1115]/[.C1115]" office:value-type="float" office:value="0.00193402777777778" calcext:value-type="float">
            <text:p>0,00193402777777778000</text:p>
          </table:table-cell>
          <table:table-cell table:formula="of:=[.D1116]-[.D111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[.B1115]+15" office:value-type="float" office:value="16725" calcext:value-type="float">
            <text:p>16725</text:p>
          </table:table-cell>
          <table:table-cell office:value-type="float" office:value="8640000" calcext:value-type="float">
            <text:p>8640000</text:p>
          </table:table-cell>
          <table:table-cell table:formula="of:=[.B1116]/[.C1116]" office:value-type="float" office:value="0.00193576388888889" calcext:value-type="float">
            <text:p>0,00193576388888889000</text:p>
          </table:table-cell>
          <table:table-cell table:formula="of:=[.D1117]-[.D1116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[.B1116]+15" office:value-type="float" office:value="16740" calcext:value-type="float">
            <text:p>16740</text:p>
          </table:table-cell>
          <table:table-cell office:value-type="float" office:value="8640000" calcext:value-type="float">
            <text:p>8640000</text:p>
          </table:table-cell>
          <table:table-cell table:formula="of:=[.B1117]/[.C1117]" office:value-type="float" office:value="0.0019375" calcext:value-type="float">
            <text:p>0,00193750000000000000</text:p>
          </table:table-cell>
          <table:table-cell table:formula="of:=[.D1118]-[.D111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[.B1117]+15" office:value-type="float" office:value="16755" calcext:value-type="float">
            <text:p>16755</text:p>
          </table:table-cell>
          <table:table-cell office:value-type="float" office:value="8640000" calcext:value-type="float">
            <text:p>8640000</text:p>
          </table:table-cell>
          <table:table-cell table:formula="of:=[.B1118]/[.C1118]" office:value-type="float" office:value="0.00193923611111111" calcext:value-type="float">
            <text:p>0,00193923611111111000</text:p>
          </table:table-cell>
          <table:table-cell table:formula="of:=[.D1119]-[.D1118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[.B1118]+15" office:value-type="float" office:value="16770" calcext:value-type="float">
            <text:p>16770</text:p>
          </table:table-cell>
          <table:table-cell office:value-type="float" office:value="8640000" calcext:value-type="float">
            <text:p>8640000</text:p>
          </table:table-cell>
          <table:table-cell table:formula="of:=[.B1119]/[.C1119]" office:value-type="float" office:value="0.00194097222222222" calcext:value-type="float">
            <text:p>0,00194097222222222000</text:p>
          </table:table-cell>
          <table:table-cell table:formula="of:=[.D1120]-[.D111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[.B1119]+15" office:value-type="float" office:value="16785" calcext:value-type="float">
            <text:p>16785</text:p>
          </table:table-cell>
          <table:table-cell office:value-type="float" office:value="8640000" calcext:value-type="float">
            <text:p>8640000</text:p>
          </table:table-cell>
          <table:table-cell table:formula="of:=[.B1120]/[.C1120]" office:value-type="float" office:value="0.00194270833333333" calcext:value-type="float">
            <text:p>0,00194270833333333000</text:p>
          </table:table-cell>
          <table:table-cell table:formula="of:=[.D1121]-[.D1120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[.B1120]+15" office:value-type="float" office:value="16800" calcext:value-type="float">
            <text:p>16800</text:p>
          </table:table-cell>
          <table:table-cell office:value-type="float" office:value="8640000" calcext:value-type="float">
            <text:p>8640000</text:p>
          </table:table-cell>
          <table:table-cell table:formula="of:=[.B1121]/[.C1121]" office:value-type="float" office:value="0.00194444444444444" calcext:value-type="float">
            <text:p>0,00194444444444444000</text:p>
          </table:table-cell>
          <table:table-cell table:formula="of:=[.D1122]-[.D112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[.B1121]+15" office:value-type="float" office:value="16815" calcext:value-type="float">
            <text:p>16815</text:p>
          </table:table-cell>
          <table:table-cell office:value-type="float" office:value="8640000" calcext:value-type="float">
            <text:p>8640000</text:p>
          </table:table-cell>
          <table:table-cell table:formula="of:=[.B1122]/[.C1122]" office:value-type="float" office:value="0.00194618055555556" calcext:value-type="float">
            <text:p>0,00194618055555556000</text:p>
          </table:table-cell>
          <table:table-cell table:formula="of:=[.D1123]-[.D1122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[.B1122]+15" office:value-type="float" office:value="16830" calcext:value-type="float">
            <text:p>16830</text:p>
          </table:table-cell>
          <table:table-cell office:value-type="float" office:value="8640000" calcext:value-type="float">
            <text:p>8640000</text:p>
          </table:table-cell>
          <table:table-cell table:formula="of:=[.B1123]/[.C1123]" office:value-type="float" office:value="0.00194791666666667" calcext:value-type="float">
            <text:p>0,00194791666666667000</text:p>
          </table:table-cell>
          <table:table-cell table:formula="of:=[.D1124]-[.D112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[.B1123]+15" office:value-type="float" office:value="16845" calcext:value-type="float">
            <text:p>16845</text:p>
          </table:table-cell>
          <table:table-cell office:value-type="float" office:value="8640000" calcext:value-type="float">
            <text:p>8640000</text:p>
          </table:table-cell>
          <table:table-cell table:formula="of:=[.B1124]/[.C1124]" office:value-type="float" office:value="0.00194965277777778" calcext:value-type="float">
            <text:p>0,00194965277777778000</text:p>
          </table:table-cell>
          <table:table-cell table:formula="of:=[.D1125]-[.D1124]" office:value-type="float" office:value="0.00000173611111111099" calcext:value-type="float">
            <text:p>0,00000173611111111099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[.B1124]+15" office:value-type="float" office:value="16860" calcext:value-type="float">
            <text:p>16860</text:p>
          </table:table-cell>
          <table:table-cell office:value-type="float" office:value="8640000" calcext:value-type="float">
            <text:p>8640000</text:p>
          </table:table-cell>
          <table:table-cell table:formula="of:=[.B1125]/[.C1125]" office:value-type="float" office:value="0.00195138888888889" calcext:value-type="float">
            <text:p>0,00195138888888889000</text:p>
          </table:table-cell>
          <table:table-cell table:formula="of:=[.D1126]-[.D112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[.B1125]+15" office:value-type="float" office:value="16875" calcext:value-type="float">
            <text:p>16875</text:p>
          </table:table-cell>
          <table:table-cell office:value-type="float" office:value="8640000" calcext:value-type="float">
            <text:p>8640000</text:p>
          </table:table-cell>
          <table:table-cell table:formula="of:=[.B1126]/[.C1126]" office:value-type="float" office:value="0.001953125" calcext:value-type="float">
            <text:p>0,00195312500000000000</text:p>
          </table:table-cell>
          <table:table-cell table:formula="of:=[.D1127]-[.D112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[.B1126]+15" office:value-type="float" office:value="16890" calcext:value-type="float">
            <text:p>16890</text:p>
          </table:table-cell>
          <table:table-cell office:value-type="float" office:value="8640000" calcext:value-type="float">
            <text:p>8640000</text:p>
          </table:table-cell>
          <table:table-cell table:formula="of:=[.B1127]/[.C1127]" office:value-type="float" office:value="0.00195486111111111" calcext:value-type="float">
            <text:p>0,00195486111111111000</text:p>
          </table:table-cell>
          <table:table-cell table:formula="of:=[.D1128]-[.D112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[.B1127]+15" office:value-type="float" office:value="16905" calcext:value-type="float">
            <text:p>16905</text:p>
          </table:table-cell>
          <table:table-cell office:value-type="float" office:value="8640000" calcext:value-type="float">
            <text:p>8640000</text:p>
          </table:table-cell>
          <table:table-cell table:formula="of:=[.B1128]/[.C1128]" office:value-type="float" office:value="0.00195659722222222" calcext:value-type="float">
            <text:p>0,00195659722222222000</text:p>
          </table:table-cell>
          <table:table-cell table:formula="of:=[.D1129]-[.D1128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[.B1128]+15" office:value-type="float" office:value="16920" calcext:value-type="float">
            <text:p>16920</text:p>
          </table:table-cell>
          <table:table-cell office:value-type="float" office:value="8640000" calcext:value-type="float">
            <text:p>8640000</text:p>
          </table:table-cell>
          <table:table-cell table:formula="of:=[.B1129]/[.C1129]" office:value-type="float" office:value="0.00195833333333333" calcext:value-type="float">
            <text:p>0,00195833333333333000</text:p>
          </table:table-cell>
          <table:table-cell table:formula="of:=[.D1130]-[.D112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[.B1129]+15" office:value-type="float" office:value="16935" calcext:value-type="float">
            <text:p>16935</text:p>
          </table:table-cell>
          <table:table-cell office:value-type="float" office:value="8640000" calcext:value-type="float">
            <text:p>8640000</text:p>
          </table:table-cell>
          <table:table-cell table:formula="of:=[.B1130]/[.C1130]" office:value-type="float" office:value="0.00196006944444444" calcext:value-type="float">
            <text:p>0,00196006944444444000</text:p>
          </table:table-cell>
          <table:table-cell table:formula="of:=[.D1131]-[.D113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[.B1130]+15" office:value-type="float" office:value="16950" calcext:value-type="float">
            <text:p>16950</text:p>
          </table:table-cell>
          <table:table-cell office:value-type="float" office:value="8640000" calcext:value-type="float">
            <text:p>8640000</text:p>
          </table:table-cell>
          <table:table-cell table:formula="of:=[.B1131]/[.C1131]" office:value-type="float" office:value="0.00196180555555556" calcext:value-type="float">
            <text:p>0,00196180555555556000</text:p>
          </table:table-cell>
          <table:table-cell table:formula="of:=[.D1132]-[.D113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[.B1131]+15" office:value-type="float" office:value="16965" calcext:value-type="float">
            <text:p>16965</text:p>
          </table:table-cell>
          <table:table-cell office:value-type="float" office:value="8640000" calcext:value-type="float">
            <text:p>8640000</text:p>
          </table:table-cell>
          <table:table-cell table:formula="of:=[.B1132]/[.C1132]" office:value-type="float" office:value="0.00196354166666667" calcext:value-type="float">
            <text:p>0,00196354166666667000</text:p>
          </table:table-cell>
          <table:table-cell table:formula="of:=[.D1133]-[.D1132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[.B1132]+15" office:value-type="float" office:value="16980" calcext:value-type="float">
            <text:p>16980</text:p>
          </table:table-cell>
          <table:table-cell office:value-type="float" office:value="8640000" calcext:value-type="float">
            <text:p>8640000</text:p>
          </table:table-cell>
          <table:table-cell table:formula="of:=[.B1133]/[.C1133]" office:value-type="float" office:value="0.00196527777777778" calcext:value-type="float">
            <text:p>0,00196527777777778000</text:p>
          </table:table-cell>
          <table:table-cell table:formula="of:=[.D1134]-[.D113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[.B1133]+15" office:value-type="float" office:value="16995" calcext:value-type="float">
            <text:p>16995</text:p>
          </table:table-cell>
          <table:table-cell office:value-type="float" office:value="8640000" calcext:value-type="float">
            <text:p>8640000</text:p>
          </table:table-cell>
          <table:table-cell table:formula="of:=[.B1134]/[.C1134]" office:value-type="float" office:value="0.00196701388888889" calcext:value-type="float">
            <text:p>0,00196701388888889000</text:p>
          </table:table-cell>
          <table:table-cell table:formula="of:=[.D1135]-[.D113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[.B1134]+15" office:value-type="float" office:value="17010" calcext:value-type="float">
            <text:p>17010</text:p>
          </table:table-cell>
          <table:table-cell office:value-type="float" office:value="8640000" calcext:value-type="float">
            <text:p>8640000</text:p>
          </table:table-cell>
          <table:table-cell table:formula="of:=[.B1135]/[.C1135]" office:value-type="float" office:value="0.00196875" calcext:value-type="float">
            <text:p>0,00196875000000000000</text:p>
          </table:table-cell>
          <table:table-cell table:formula="of:=[.D1136]-[.D113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[.B1135]+15" office:value-type="float" office:value="17025" calcext:value-type="float">
            <text:p>17025</text:p>
          </table:table-cell>
          <table:table-cell office:value-type="float" office:value="8640000" calcext:value-type="float">
            <text:p>8640000</text:p>
          </table:table-cell>
          <table:table-cell table:formula="of:=[.B1136]/[.C1136]" office:value-type="float" office:value="0.00197048611111111" calcext:value-type="float">
            <text:p>0,00197048611111111000</text:p>
          </table:table-cell>
          <table:table-cell table:formula="of:=[.D1137]-[.D113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[.B1136]+15" office:value-type="float" office:value="17040" calcext:value-type="float">
            <text:p>17040</text:p>
          </table:table-cell>
          <table:table-cell office:value-type="float" office:value="8640000" calcext:value-type="float">
            <text:p>8640000</text:p>
          </table:table-cell>
          <table:table-cell table:formula="of:=[.B1137]/[.C1137]" office:value-type="float" office:value="0.00197222222222222" calcext:value-type="float">
            <text:p>0,00197222222222222000</text:p>
          </table:table-cell>
          <table:table-cell table:formula="of:=[.D1138]-[.D1137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[.B1137]+15" office:value-type="float" office:value="17055" calcext:value-type="float">
            <text:p>17055</text:p>
          </table:table-cell>
          <table:table-cell office:value-type="float" office:value="8640000" calcext:value-type="float">
            <text:p>8640000</text:p>
          </table:table-cell>
          <table:table-cell table:formula="of:=[.B1138]/[.C1138]" office:value-type="float" office:value="0.00197395833333333" calcext:value-type="float">
            <text:p>0,00197395833333333000</text:p>
          </table:table-cell>
          <table:table-cell table:formula="of:=[.D1139]-[.D113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[.B1138]+15" office:value-type="float" office:value="17070" calcext:value-type="float">
            <text:p>17070</text:p>
          </table:table-cell>
          <table:table-cell office:value-type="float" office:value="8640000" calcext:value-type="float">
            <text:p>8640000</text:p>
          </table:table-cell>
          <table:table-cell table:formula="of:=[.B1139]/[.C1139]" office:value-type="float" office:value="0.00197569444444444" calcext:value-type="float">
            <text:p>0,00197569444444444000</text:p>
          </table:table-cell>
          <table:table-cell table:formula="of:=[.D1140]-[.D113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[.B1139]+15" office:value-type="float" office:value="17085" calcext:value-type="float">
            <text:p>17085</text:p>
          </table:table-cell>
          <table:table-cell office:value-type="float" office:value="8640000" calcext:value-type="float">
            <text:p>8640000</text:p>
          </table:table-cell>
          <table:table-cell table:formula="of:=[.B1140]/[.C1140]" office:value-type="float" office:value="0.00197743055555556" calcext:value-type="float">
            <text:p>0,00197743055555556000</text:p>
          </table:table-cell>
          <table:table-cell table:formula="of:=[.D1141]-[.D114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[.B1140]+15" office:value-type="float" office:value="17100" calcext:value-type="float">
            <text:p>17100</text:p>
          </table:table-cell>
          <table:table-cell office:value-type="float" office:value="8640000" calcext:value-type="float">
            <text:p>8640000</text:p>
          </table:table-cell>
          <table:table-cell table:formula="of:=[.B1141]/[.C1141]" office:value-type="float" office:value="0.00197916666666667" calcext:value-type="float">
            <text:p>0,00197916666666667000</text:p>
          </table:table-cell>
          <table:table-cell table:formula="of:=[.D1142]-[.D1141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[.B1141]+15" office:value-type="float" office:value="17115" calcext:value-type="float">
            <text:p>17115</text:p>
          </table:table-cell>
          <table:table-cell office:value-type="float" office:value="8640000" calcext:value-type="float">
            <text:p>8640000</text:p>
          </table:table-cell>
          <table:table-cell table:formula="of:=[.B1142]/[.C1142]" office:value-type="float" office:value="0.00198090277777778" calcext:value-type="float">
            <text:p>0,00198090277777778000</text:p>
          </table:table-cell>
          <table:table-cell table:formula="of:=[.D1143]-[.D114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[.B1142]+15" office:value-type="float" office:value="17130" calcext:value-type="float">
            <text:p>17130</text:p>
          </table:table-cell>
          <table:table-cell office:value-type="float" office:value="8640000" calcext:value-type="float">
            <text:p>8640000</text:p>
          </table:table-cell>
          <table:table-cell table:formula="of:=[.B1143]/[.C1143]" office:value-type="float" office:value="0.00198263888888889" calcext:value-type="float">
            <text:p>0,00198263888888889000</text:p>
          </table:table-cell>
          <table:table-cell table:formula="of:=[.D1144]-[.D114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[.B1143]+15" office:value-type="float" office:value="17145" calcext:value-type="float">
            <text:p>17145</text:p>
          </table:table-cell>
          <table:table-cell office:value-type="float" office:value="8640000" calcext:value-type="float">
            <text:p>8640000</text:p>
          </table:table-cell>
          <table:table-cell table:formula="of:=[.B1144]/[.C1144]" office:value-type="float" office:value="0.001984375" calcext:value-type="float">
            <text:p>0,00198437500000000000</text:p>
          </table:table-cell>
          <table:table-cell table:formula="of:=[.D1145]-[.D114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[.B1144]+15" office:value-type="float" office:value="17160" calcext:value-type="float">
            <text:p>17160</text:p>
          </table:table-cell>
          <table:table-cell office:value-type="float" office:value="8640000" calcext:value-type="float">
            <text:p>8640000</text:p>
          </table:table-cell>
          <table:table-cell table:formula="of:=[.B1145]/[.C1145]" office:value-type="float" office:value="0.00198611111111111" calcext:value-type="float">
            <text:p>0,00198611111111111000</text:p>
          </table:table-cell>
          <table:table-cell table:formula="of:=[.D1146]-[.D1145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[.B1145]+15" office:value-type="float" office:value="17175" calcext:value-type="float">
            <text:p>17175</text:p>
          </table:table-cell>
          <table:table-cell office:value-type="float" office:value="8640000" calcext:value-type="float">
            <text:p>8640000</text:p>
          </table:table-cell>
          <table:table-cell table:formula="of:=[.B1146]/[.C1146]" office:value-type="float" office:value="0.00198784722222222" calcext:value-type="float">
            <text:p>0,00198784722222222000</text:p>
          </table:table-cell>
          <table:table-cell table:formula="of:=[.D1147]-[.D114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[.B1146]+15" office:value-type="float" office:value="17190" calcext:value-type="float">
            <text:p>17190</text:p>
          </table:table-cell>
          <table:table-cell office:value-type="float" office:value="8640000" calcext:value-type="float">
            <text:p>8640000</text:p>
          </table:table-cell>
          <table:table-cell table:formula="of:=[.B1147]/[.C1147]" office:value-type="float" office:value="0.00198958333333333" calcext:value-type="float">
            <text:p>0,00198958333333333000</text:p>
          </table:table-cell>
          <table:table-cell table:formula="of:=[.D1148]-[.D114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[.B1147]+15" office:value-type="float" office:value="17205" calcext:value-type="float">
            <text:p>17205</text:p>
          </table:table-cell>
          <table:table-cell office:value-type="float" office:value="8640000" calcext:value-type="float">
            <text:p>8640000</text:p>
          </table:table-cell>
          <table:table-cell table:formula="of:=[.B1148]/[.C1148]" office:value-type="float" office:value="0.00199131944444444" calcext:value-type="float">
            <text:p>0,00199131944444444000</text:p>
          </table:table-cell>
          <table:table-cell table:formula="of:=[.D1149]-[.D114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[.B1148]+15" office:value-type="float" office:value="17220" calcext:value-type="float">
            <text:p>17220</text:p>
          </table:table-cell>
          <table:table-cell office:value-type="float" office:value="8640000" calcext:value-type="float">
            <text:p>8640000</text:p>
          </table:table-cell>
          <table:table-cell table:formula="of:=[.B1149]/[.C1149]" office:value-type="float" office:value="0.00199305555555556" calcext:value-type="float">
            <text:p>0,00199305555555556000</text:p>
          </table:table-cell>
          <table:table-cell table:formula="of:=[.D1150]-[.D114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[.B1149]+15" office:value-type="float" office:value="17235" calcext:value-type="float">
            <text:p>17235</text:p>
          </table:table-cell>
          <table:table-cell office:value-type="float" office:value="8640000" calcext:value-type="float">
            <text:p>8640000</text:p>
          </table:table-cell>
          <table:table-cell table:formula="of:=[.B1150]/[.C1150]" office:value-type="float" office:value="0.00199479166666667" calcext:value-type="float">
            <text:p>0,00199479166666667000</text:p>
          </table:table-cell>
          <table:table-cell table:formula="of:=[.D1151]-[.D1150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[.B1150]+15" office:value-type="float" office:value="17250" calcext:value-type="float">
            <text:p>17250</text:p>
          </table:table-cell>
          <table:table-cell office:value-type="float" office:value="8640000" calcext:value-type="float">
            <text:p>8640000</text:p>
          </table:table-cell>
          <table:table-cell table:formula="of:=[.B1151]/[.C1151]" office:value-type="float" office:value="0.00199652777777778" calcext:value-type="float">
            <text:p>0,00199652777777778000</text:p>
          </table:table-cell>
          <table:table-cell table:formula="of:=[.D1152]-[.D115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[.B1151]+15" office:value-type="float" office:value="17265" calcext:value-type="float">
            <text:p>17265</text:p>
          </table:table-cell>
          <table:table-cell office:value-type="float" office:value="8640000" calcext:value-type="float">
            <text:p>8640000</text:p>
          </table:table-cell>
          <table:table-cell table:formula="of:=[.B1152]/[.C1152]" office:value-type="float" office:value="0.00199826388888889" calcext:value-type="float">
            <text:p>0,00199826388888889000</text:p>
          </table:table-cell>
          <table:table-cell table:formula="of:=[.D1153]-[.D115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[.B1152]+15" office:value-type="float" office:value="17280" calcext:value-type="float">
            <text:p>17280</text:p>
          </table:table-cell>
          <table:table-cell office:value-type="float" office:value="8640000" calcext:value-type="float">
            <text:p>8640000</text:p>
          </table:table-cell>
          <table:table-cell table:formula="of:=[.B1153]/[.C1153]" office:value-type="float" office:value="0.002" calcext:value-type="float">
            <text:p>0,00200000000000000000</text:p>
          </table:table-cell>
          <table:table-cell table:formula="of:=[.D1154]-[.D115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[.B1153]+15" office:value-type="float" office:value="17295" calcext:value-type="float">
            <text:p>17295</text:p>
          </table:table-cell>
          <table:table-cell office:value-type="float" office:value="8640000" calcext:value-type="float">
            <text:p>8640000</text:p>
          </table:table-cell>
          <table:table-cell table:formula="of:=[.B1154]/[.C1154]" office:value-type="float" office:value="0.00200173611111111" calcext:value-type="float">
            <text:p>0,00200173611111111000</text:p>
          </table:table-cell>
          <table:table-cell table:formula="of:=[.D1155]-[.D1154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[.B1154]+15" office:value-type="float" office:value="17310" calcext:value-type="float">
            <text:p>17310</text:p>
          </table:table-cell>
          <table:table-cell office:value-type="float" office:value="8640000" calcext:value-type="float">
            <text:p>8640000</text:p>
          </table:table-cell>
          <table:table-cell table:formula="of:=[.B1155]/[.C1155]" office:value-type="float" office:value="0.00200347222222222" calcext:value-type="float">
            <text:p>0,00200347222222222000</text:p>
          </table:table-cell>
          <table:table-cell table:formula="of:=[.D1156]-[.D115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[.B1155]+15" office:value-type="float" office:value="17325" calcext:value-type="float">
            <text:p>17325</text:p>
          </table:table-cell>
          <table:table-cell office:value-type="float" office:value="8640000" calcext:value-type="float">
            <text:p>8640000</text:p>
          </table:table-cell>
          <table:table-cell table:formula="of:=[.B1156]/[.C1156]" office:value-type="float" office:value="0.00200520833333333" calcext:value-type="float">
            <text:p>0,00200520833333333000</text:p>
          </table:table-cell>
          <table:table-cell table:formula="of:=[.D1157]-[.D115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[.B1156]+15" office:value-type="float" office:value="17340" calcext:value-type="float">
            <text:p>17340</text:p>
          </table:table-cell>
          <table:table-cell office:value-type="float" office:value="8640000" calcext:value-type="float">
            <text:p>8640000</text:p>
          </table:table-cell>
          <table:table-cell table:formula="of:=[.B1157]/[.C1157]" office:value-type="float" office:value="0.00200694444444444" calcext:value-type="float">
            <text:p>0,00200694444444444000</text:p>
          </table:table-cell>
          <table:table-cell table:formula="of:=[.D1158]-[.D115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[.B1157]+15" office:value-type="float" office:value="17355" calcext:value-type="float">
            <text:p>17355</text:p>
          </table:table-cell>
          <table:table-cell office:value-type="float" office:value="8640000" calcext:value-type="float">
            <text:p>8640000</text:p>
          </table:table-cell>
          <table:table-cell table:formula="of:=[.B1158]/[.C1158]" office:value-type="float" office:value="0.00200868055555556" calcext:value-type="float">
            <text:p>0,00200868055555556000</text:p>
          </table:table-cell>
          <table:table-cell table:formula="of:=[.D1159]-[.D115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[.B1158]+15" office:value-type="float" office:value="17370" calcext:value-type="float">
            <text:p>17370</text:p>
          </table:table-cell>
          <table:table-cell office:value-type="float" office:value="8640000" calcext:value-type="float">
            <text:p>8640000</text:p>
          </table:table-cell>
          <table:table-cell table:formula="of:=[.B1159]/[.C1159]" office:value-type="float" office:value="0.00201041666666667" calcext:value-type="float">
            <text:p>0,00201041666666667000</text:p>
          </table:table-cell>
          <table:table-cell table:formula="of:=[.D1160]-[.D1159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[.B1159]+15" office:value-type="float" office:value="17385" calcext:value-type="float">
            <text:p>17385</text:p>
          </table:table-cell>
          <table:table-cell office:value-type="float" office:value="8640000" calcext:value-type="float">
            <text:p>8640000</text:p>
          </table:table-cell>
          <table:table-cell table:formula="of:=[.B1160]/[.C1160]" office:value-type="float" office:value="0.00201215277777778" calcext:value-type="float">
            <text:p>0,00201215277777778000</text:p>
          </table:table-cell>
          <table:table-cell table:formula="of:=[.D1161]-[.D116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[.B1160]+15" office:value-type="float" office:value="17400" calcext:value-type="float">
            <text:p>17400</text:p>
          </table:table-cell>
          <table:table-cell office:value-type="float" office:value="8640000" calcext:value-type="float">
            <text:p>8640000</text:p>
          </table:table-cell>
          <table:table-cell table:formula="of:=[.B1161]/[.C1161]" office:value-type="float" office:value="0.00201388888888889" calcext:value-type="float">
            <text:p>0,00201388888888889000</text:p>
          </table:table-cell>
          <table:table-cell table:formula="of:=[.D1162]-[.D116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[.B1161]+15" office:value-type="float" office:value="17415" calcext:value-type="float">
            <text:p>17415</text:p>
          </table:table-cell>
          <table:table-cell office:value-type="float" office:value="8640000" calcext:value-type="float">
            <text:p>8640000</text:p>
          </table:table-cell>
          <table:table-cell table:formula="of:=[.B1162]/[.C1162]" office:value-type="float" office:value="0.002015625" calcext:value-type="float">
            <text:p>0,00201562500000000000</text:p>
          </table:table-cell>
          <table:table-cell table:formula="of:=[.D1163]-[.D116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[.B1162]+15" office:value-type="float" office:value="17430" calcext:value-type="float">
            <text:p>17430</text:p>
          </table:table-cell>
          <table:table-cell office:value-type="float" office:value="8640000" calcext:value-type="float">
            <text:p>8640000</text:p>
          </table:table-cell>
          <table:table-cell table:formula="of:=[.B1163]/[.C1163]" office:value-type="float" office:value="0.00201736111111111" calcext:value-type="float">
            <text:p>0,00201736111111111000</text:p>
          </table:table-cell>
          <table:table-cell table:formula="of:=[.D1164]-[.D1163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[.B1163]+15" office:value-type="float" office:value="17445" calcext:value-type="float">
            <text:p>17445</text:p>
          </table:table-cell>
          <table:table-cell office:value-type="float" office:value="8640000" calcext:value-type="float">
            <text:p>8640000</text:p>
          </table:table-cell>
          <table:table-cell table:formula="of:=[.B1164]/[.C1164]" office:value-type="float" office:value="0.00201909722222222" calcext:value-type="float">
            <text:p>0,00201909722222222000</text:p>
          </table:table-cell>
          <table:table-cell table:formula="of:=[.D1165]-[.D116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[.B1164]+15" office:value-type="float" office:value="17460" calcext:value-type="float">
            <text:p>17460</text:p>
          </table:table-cell>
          <table:table-cell office:value-type="float" office:value="8640000" calcext:value-type="float">
            <text:p>8640000</text:p>
          </table:table-cell>
          <table:table-cell table:formula="of:=[.B1165]/[.C1165]" office:value-type="float" office:value="0.00202083333333333" calcext:value-type="float">
            <text:p>0,00202083333333333000</text:p>
          </table:table-cell>
          <table:table-cell table:formula="of:=[.D1166]-[.D116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[.B1165]+15" office:value-type="float" office:value="17475" calcext:value-type="float">
            <text:p>17475</text:p>
          </table:table-cell>
          <table:table-cell office:value-type="float" office:value="8640000" calcext:value-type="float">
            <text:p>8640000</text:p>
          </table:table-cell>
          <table:table-cell table:formula="of:=[.B1166]/[.C1166]" office:value-type="float" office:value="0.00202256944444444" calcext:value-type="float">
            <text:p>0,00202256944444444000</text:p>
          </table:table-cell>
          <table:table-cell table:formula="of:=[.D1167]-[.D116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[.B1166]+15" office:value-type="float" office:value="17490" calcext:value-type="float">
            <text:p>17490</text:p>
          </table:table-cell>
          <table:table-cell office:value-type="float" office:value="8640000" calcext:value-type="float">
            <text:p>8640000</text:p>
          </table:table-cell>
          <table:table-cell table:formula="of:=[.B1167]/[.C1167]" office:value-type="float" office:value="0.00202430555555556" calcext:value-type="float">
            <text:p>0,00202430555555556000</text:p>
          </table:table-cell>
          <table:table-cell table:formula="of:=[.D1168]-[.D116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[.B1167]+15" office:value-type="float" office:value="17505" calcext:value-type="float">
            <text:p>17505</text:p>
          </table:table-cell>
          <table:table-cell office:value-type="float" office:value="8640000" calcext:value-type="float">
            <text:p>8640000</text:p>
          </table:table-cell>
          <table:table-cell table:formula="of:=[.B1168]/[.C1168]" office:value-type="float" office:value="0.00202604166666667" calcext:value-type="float">
            <text:p>0,00202604166666667000</text:p>
          </table:table-cell>
          <table:table-cell table:formula="of:=[.D1169]-[.D1168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[.B1168]+15" office:value-type="float" office:value="17520" calcext:value-type="float">
            <text:p>17520</text:p>
          </table:table-cell>
          <table:table-cell office:value-type="float" office:value="8640000" calcext:value-type="float">
            <text:p>8640000</text:p>
          </table:table-cell>
          <table:table-cell table:formula="of:=[.B1169]/[.C1169]" office:value-type="float" office:value="0.00202777777777778" calcext:value-type="float">
            <text:p>0,00202777777777778000</text:p>
          </table:table-cell>
          <table:table-cell table:formula="of:=[.D1170]-[.D116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[.B1169]+15" office:value-type="float" office:value="17535" calcext:value-type="float">
            <text:p>17535</text:p>
          </table:table-cell>
          <table:table-cell office:value-type="float" office:value="8640000" calcext:value-type="float">
            <text:p>8640000</text:p>
          </table:table-cell>
          <table:table-cell table:formula="of:=[.B1170]/[.C1170]" office:value-type="float" office:value="0.00202951388888889" calcext:value-type="float">
            <text:p>0,00202951388888889000</text:p>
          </table:table-cell>
          <table:table-cell table:formula="of:=[.D1171]-[.D117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[.B1170]+15" office:value-type="float" office:value="17550" calcext:value-type="float">
            <text:p>17550</text:p>
          </table:table-cell>
          <table:table-cell office:value-type="float" office:value="8640000" calcext:value-type="float">
            <text:p>8640000</text:p>
          </table:table-cell>
          <table:table-cell table:formula="of:=[.B1171]/[.C1171]" office:value-type="float" office:value="0.00203125" calcext:value-type="float">
            <text:p>0,00203125000000000000</text:p>
          </table:table-cell>
          <table:table-cell table:formula="of:=[.D1172]-[.D117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[.B1171]+15" office:value-type="float" office:value="17565" calcext:value-type="float">
            <text:p>17565</text:p>
          </table:table-cell>
          <table:table-cell office:value-type="float" office:value="8640000" calcext:value-type="float">
            <text:p>8640000</text:p>
          </table:table-cell>
          <table:table-cell table:formula="of:=[.B1172]/[.C1172]" office:value-type="float" office:value="0.00203298611111111" calcext:value-type="float">
            <text:p>0,00203298611111111000</text:p>
          </table:table-cell>
          <table:table-cell table:formula="of:=[.D1173]-[.D1172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[.B1172]+15" office:value-type="float" office:value="17580" calcext:value-type="float">
            <text:p>17580</text:p>
          </table:table-cell>
          <table:table-cell office:value-type="float" office:value="8640000" calcext:value-type="float">
            <text:p>8640000</text:p>
          </table:table-cell>
          <table:table-cell table:formula="of:=[.B1173]/[.C1173]" office:value-type="float" office:value="0.00203472222222222" calcext:value-type="float">
            <text:p>0,00203472222222222000</text:p>
          </table:table-cell>
          <table:table-cell table:formula="of:=[.D1174]-[.D117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[.B1173]+15" office:value-type="float" office:value="17595" calcext:value-type="float">
            <text:p>17595</text:p>
          </table:table-cell>
          <table:table-cell office:value-type="float" office:value="8640000" calcext:value-type="float">
            <text:p>8640000</text:p>
          </table:table-cell>
          <table:table-cell table:formula="of:=[.B1174]/[.C1174]" office:value-type="float" office:value="0.00203645833333333" calcext:value-type="float">
            <text:p>0,00203645833333333000</text:p>
          </table:table-cell>
          <table:table-cell table:formula="of:=[.D1175]-[.D117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[.B1174]+15" office:value-type="float" office:value="17610" calcext:value-type="float">
            <text:p>17610</text:p>
          </table:table-cell>
          <table:table-cell office:value-type="float" office:value="8640000" calcext:value-type="float">
            <text:p>8640000</text:p>
          </table:table-cell>
          <table:table-cell table:formula="of:=[.B1175]/[.C1175]" office:value-type="float" office:value="0.00203819444444444" calcext:value-type="float">
            <text:p>0,00203819444444444000</text:p>
          </table:table-cell>
          <table:table-cell table:formula="of:=[.D1176]-[.D117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[.B1175]+15" office:value-type="float" office:value="17625" calcext:value-type="float">
            <text:p>17625</text:p>
          </table:table-cell>
          <table:table-cell office:value-type="float" office:value="8640000" calcext:value-type="float">
            <text:p>8640000</text:p>
          </table:table-cell>
          <table:table-cell table:formula="of:=[.B1176]/[.C1176]" office:value-type="float" office:value="0.00203993055555556" calcext:value-type="float">
            <text:p>0,00203993055555556000</text:p>
          </table:table-cell>
          <table:table-cell table:formula="of:=[.D1177]-[.D1176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[.B1176]+15" office:value-type="float" office:value="17640" calcext:value-type="float">
            <text:p>17640</text:p>
          </table:table-cell>
          <table:table-cell office:value-type="float" office:value="8640000" calcext:value-type="float">
            <text:p>8640000</text:p>
          </table:table-cell>
          <table:table-cell table:formula="of:=[.B1177]/[.C1177]" office:value-type="float" office:value="0.00204166666666667" calcext:value-type="float">
            <text:p>0,00204166666666667000</text:p>
          </table:table-cell>
          <table:table-cell table:formula="of:=[.D1178]-[.D117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[.B1177]+15" office:value-type="float" office:value="17655" calcext:value-type="float">
            <text:p>17655</text:p>
          </table:table-cell>
          <table:table-cell office:value-type="float" office:value="8640000" calcext:value-type="float">
            <text:p>8640000</text:p>
          </table:table-cell>
          <table:table-cell table:formula="of:=[.B1178]/[.C1178]" office:value-type="float" office:value="0.00204340277777778" calcext:value-type="float">
            <text:p>0,00204340277777778000</text:p>
          </table:table-cell>
          <table:table-cell table:formula="of:=[.D1179]-[.D117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[.B1178]+15" office:value-type="float" office:value="17670" calcext:value-type="float">
            <text:p>17670</text:p>
          </table:table-cell>
          <table:table-cell office:value-type="float" office:value="8640000" calcext:value-type="float">
            <text:p>8640000</text:p>
          </table:table-cell>
          <table:table-cell table:formula="of:=[.B1179]/[.C1179]" office:value-type="float" office:value="0.00204513888888889" calcext:value-type="float">
            <text:p>0,00204513888888889000</text:p>
          </table:table-cell>
          <table:table-cell table:formula="of:=[.D1180]-[.D117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[.B1179]+15" office:value-type="float" office:value="17685" calcext:value-type="float">
            <text:p>17685</text:p>
          </table:table-cell>
          <table:table-cell office:value-type="float" office:value="8640000" calcext:value-type="float">
            <text:p>8640000</text:p>
          </table:table-cell>
          <table:table-cell table:formula="of:=[.B1180]/[.C1180]" office:value-type="float" office:value="0.002046875" calcext:value-type="float">
            <text:p>0,00204687500000000000</text:p>
          </table:table-cell>
          <table:table-cell table:formula="of:=[.D1181]-[.D118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[.B1180]+15" office:value-type="float" office:value="17700" calcext:value-type="float">
            <text:p>17700</text:p>
          </table:table-cell>
          <table:table-cell office:value-type="float" office:value="8640000" calcext:value-type="float">
            <text:p>8640000</text:p>
          </table:table-cell>
          <table:table-cell table:formula="of:=[.B1181]/[.C1181]" office:value-type="float" office:value="0.00204861111111111" calcext:value-type="float">
            <text:p>0,00204861111111111000</text:p>
          </table:table-cell>
          <table:table-cell table:formula="of:=[.D1182]-[.D1181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[.B1181]+15" office:value-type="float" office:value="17715" calcext:value-type="float">
            <text:p>17715</text:p>
          </table:table-cell>
          <table:table-cell office:value-type="float" office:value="8640000" calcext:value-type="float">
            <text:p>8640000</text:p>
          </table:table-cell>
          <table:table-cell table:formula="of:=[.B1182]/[.C1182]" office:value-type="float" office:value="0.00205034722222222" calcext:value-type="float">
            <text:p>0,00205034722222222000</text:p>
          </table:table-cell>
          <table:table-cell table:formula="of:=[.D1183]-[.D118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[.B1182]+15" office:value-type="float" office:value="17730" calcext:value-type="float">
            <text:p>17730</text:p>
          </table:table-cell>
          <table:table-cell office:value-type="float" office:value="8640000" calcext:value-type="float">
            <text:p>8640000</text:p>
          </table:table-cell>
          <table:table-cell table:formula="of:=[.B1183]/[.C1183]" office:value-type="float" office:value="0.00205208333333333" calcext:value-type="float">
            <text:p>0,00205208333333333000</text:p>
          </table:table-cell>
          <table:table-cell table:formula="of:=[.D1184]-[.D118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[.B1183]+15" office:value-type="float" office:value="17745" calcext:value-type="float">
            <text:p>17745</text:p>
          </table:table-cell>
          <table:table-cell office:value-type="float" office:value="8640000" calcext:value-type="float">
            <text:p>8640000</text:p>
          </table:table-cell>
          <table:table-cell table:formula="of:=[.B1184]/[.C1184]" office:value-type="float" office:value="0.00205381944444444" calcext:value-type="float">
            <text:p>0,00205381944444444000</text:p>
          </table:table-cell>
          <table:table-cell table:formula="of:=[.D1185]-[.D118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[.B1184]+15" office:value-type="float" office:value="17760" calcext:value-type="float">
            <text:p>17760</text:p>
          </table:table-cell>
          <table:table-cell office:value-type="float" office:value="8640000" calcext:value-type="float">
            <text:p>8640000</text:p>
          </table:table-cell>
          <table:table-cell table:formula="of:=[.B1185]/[.C1185]" office:value-type="float" office:value="0.00205555555555556" calcext:value-type="float">
            <text:p>0,00205555555555556000</text:p>
          </table:table-cell>
          <table:table-cell table:formula="of:=[.D1186]-[.D1185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[.B1185]+15" office:value-type="float" office:value="17775" calcext:value-type="float">
            <text:p>17775</text:p>
          </table:table-cell>
          <table:table-cell office:value-type="float" office:value="8640000" calcext:value-type="float">
            <text:p>8640000</text:p>
          </table:table-cell>
          <table:table-cell table:formula="of:=[.B1186]/[.C1186]" office:value-type="float" office:value="0.00205729166666667" calcext:value-type="float">
            <text:p>0,00205729166666667000</text:p>
          </table:table-cell>
          <table:table-cell table:formula="of:=[.D1187]-[.D118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[.B1186]+15" office:value-type="float" office:value="17790" calcext:value-type="float">
            <text:p>17790</text:p>
          </table:table-cell>
          <table:table-cell office:value-type="float" office:value="8640000" calcext:value-type="float">
            <text:p>8640000</text:p>
          </table:table-cell>
          <table:table-cell table:formula="of:=[.B1187]/[.C1187]" office:value-type="float" office:value="0.00205902777777778" calcext:value-type="float">
            <text:p>0,00205902777777778000</text:p>
          </table:table-cell>
          <table:table-cell table:formula="of:=[.D1188]-[.D118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[.B1187]+15" office:value-type="float" office:value="17805" calcext:value-type="float">
            <text:p>17805</text:p>
          </table:table-cell>
          <table:table-cell office:value-type="float" office:value="8640000" calcext:value-type="float">
            <text:p>8640000</text:p>
          </table:table-cell>
          <table:table-cell table:formula="of:=[.B1188]/[.C1188]" office:value-type="float" office:value="0.00206076388888889" calcext:value-type="float">
            <text:p>0,00206076388888889000</text:p>
          </table:table-cell>
          <table:table-cell table:formula="of:=[.D1189]-[.D118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[.B1188]+15" office:value-type="float" office:value="17820" calcext:value-type="float">
            <text:p>17820</text:p>
          </table:table-cell>
          <table:table-cell office:value-type="float" office:value="8640000" calcext:value-type="float">
            <text:p>8640000</text:p>
          </table:table-cell>
          <table:table-cell table:formula="of:=[.B1189]/[.C1189]" office:value-type="float" office:value="0.0020625" calcext:value-type="float">
            <text:p>0,00206250000000000000</text:p>
          </table:table-cell>
          <table:table-cell table:formula="of:=[.D1190]-[.D118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[.B1189]+15" office:value-type="float" office:value="17835" calcext:value-type="float">
            <text:p>17835</text:p>
          </table:table-cell>
          <table:table-cell office:value-type="float" office:value="8640000" calcext:value-type="float">
            <text:p>8640000</text:p>
          </table:table-cell>
          <table:table-cell table:formula="of:=[.B1190]/[.C1190]" office:value-type="float" office:value="0.00206423611111111" calcext:value-type="float">
            <text:p>0,00206423611111111000</text:p>
          </table:table-cell>
          <table:table-cell table:formula="of:=[.D1191]-[.D1190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[.B1190]+15" office:value-type="float" office:value="17850" calcext:value-type="float">
            <text:p>17850</text:p>
          </table:table-cell>
          <table:table-cell office:value-type="float" office:value="8640000" calcext:value-type="float">
            <text:p>8640000</text:p>
          </table:table-cell>
          <table:table-cell table:formula="of:=[.B1191]/[.C1191]" office:value-type="float" office:value="0.00206597222222222" calcext:value-type="float">
            <text:p>0,00206597222222222000</text:p>
          </table:table-cell>
          <table:table-cell table:formula="of:=[.D1192]-[.D119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[.B1191]+15" office:value-type="float" office:value="17865" calcext:value-type="float">
            <text:p>17865</text:p>
          </table:table-cell>
          <table:table-cell office:value-type="float" office:value="8640000" calcext:value-type="float">
            <text:p>8640000</text:p>
          </table:table-cell>
          <table:table-cell table:formula="of:=[.B1192]/[.C1192]" office:value-type="float" office:value="0.00206770833333333" calcext:value-type="float">
            <text:p>0,00206770833333333000</text:p>
          </table:table-cell>
          <table:table-cell table:formula="of:=[.D1193]-[.D119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[.B1192]+15" office:value-type="float" office:value="17880" calcext:value-type="float">
            <text:p>17880</text:p>
          </table:table-cell>
          <table:table-cell office:value-type="float" office:value="8640000" calcext:value-type="float">
            <text:p>8640000</text:p>
          </table:table-cell>
          <table:table-cell table:formula="of:=[.B1193]/[.C1193]" office:value-type="float" office:value="0.00206944444444444" calcext:value-type="float">
            <text:p>0,00206944444444444000</text:p>
          </table:table-cell>
          <table:table-cell table:formula="of:=[.D1194]-[.D119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[.B1193]+15" office:value-type="float" office:value="17895" calcext:value-type="float">
            <text:p>17895</text:p>
          </table:table-cell>
          <table:table-cell office:value-type="float" office:value="8640000" calcext:value-type="float">
            <text:p>8640000</text:p>
          </table:table-cell>
          <table:table-cell table:formula="of:=[.B1194]/[.C1194]" office:value-type="float" office:value="0.00207118055555556" calcext:value-type="float">
            <text:p>0,00207118055555556000</text:p>
          </table:table-cell>
          <table:table-cell table:formula="of:=[.D1195]-[.D1194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[.B1194]+15" office:value-type="float" office:value="17910" calcext:value-type="float">
            <text:p>17910</text:p>
          </table:table-cell>
          <table:table-cell office:value-type="float" office:value="8640000" calcext:value-type="float">
            <text:p>8640000</text:p>
          </table:table-cell>
          <table:table-cell table:formula="of:=[.B1195]/[.C1195]" office:value-type="float" office:value="0.00207291666666667" calcext:value-type="float">
            <text:p>0,00207291666666667000</text:p>
          </table:table-cell>
          <table:table-cell table:formula="of:=[.D1196]-[.D119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[.B1195]+15" office:value-type="float" office:value="17925" calcext:value-type="float">
            <text:p>17925</text:p>
          </table:table-cell>
          <table:table-cell office:value-type="float" office:value="8640000" calcext:value-type="float">
            <text:p>8640000</text:p>
          </table:table-cell>
          <table:table-cell table:formula="of:=[.B1196]/[.C1196]" office:value-type="float" office:value="0.00207465277777778" calcext:value-type="float">
            <text:p>0,00207465277777778000</text:p>
          </table:table-cell>
          <table:table-cell table:formula="of:=[.D1197]-[.D119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[.B1196]+15" office:value-type="float" office:value="17940" calcext:value-type="float">
            <text:p>17940</text:p>
          </table:table-cell>
          <table:table-cell office:value-type="float" office:value="8640000" calcext:value-type="float">
            <text:p>8640000</text:p>
          </table:table-cell>
          <table:table-cell table:formula="of:=[.B1197]/[.C1197]" office:value-type="float" office:value="0.00207638888888889" calcext:value-type="float">
            <text:p>0,00207638888888889000</text:p>
          </table:table-cell>
          <table:table-cell table:formula="of:=[.D1198]-[.D119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[.B1197]+15" office:value-type="float" office:value="17955" calcext:value-type="float">
            <text:p>17955</text:p>
          </table:table-cell>
          <table:table-cell office:value-type="float" office:value="8640000" calcext:value-type="float">
            <text:p>8640000</text:p>
          </table:table-cell>
          <table:table-cell table:formula="of:=[.B1198]/[.C1198]" office:value-type="float" office:value="0.002078125" calcext:value-type="float">
            <text:p>0,00207812500000000000</text:p>
          </table:table-cell>
          <table:table-cell table:formula="of:=[.D1199]-[.D119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[.B1198]+15" office:value-type="float" office:value="17970" calcext:value-type="float">
            <text:p>17970</text:p>
          </table:table-cell>
          <table:table-cell office:value-type="float" office:value="8640000" calcext:value-type="float">
            <text:p>8640000</text:p>
          </table:table-cell>
          <table:table-cell table:formula="of:=[.B1199]/[.C1199]" office:value-type="float" office:value="0.00207986111111111" calcext:value-type="float">
            <text:p>0,00207986111111111000</text:p>
          </table:table-cell>
          <table:table-cell table:formula="of:=[.D1200]-[.D1199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[.B1199]+15" office:value-type="float" office:value="17985" calcext:value-type="float">
            <text:p>17985</text:p>
          </table:table-cell>
          <table:table-cell office:value-type="float" office:value="8640000" calcext:value-type="float">
            <text:p>8640000</text:p>
          </table:table-cell>
          <table:table-cell table:formula="of:=[.B1200]/[.C1200]" office:value-type="float" office:value="0.00208159722222222" calcext:value-type="float">
            <text:p>0,00208159722222222000</text:p>
          </table:table-cell>
          <table:table-cell table:formula="of:=[.D1201]-[.D120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B1200]+15" office:value-type="float" office:value="18000" calcext:value-type="float">
            <text:p>18000</text:p>
          </table:table-cell>
          <table:table-cell office:value-type="float" office:value="8640000" calcext:value-type="float">
            <text:p>8640000</text:p>
          </table:table-cell>
          <table:table-cell table:formula="of:=[.B1201]/[.C1201]" office:value-type="float" office:value="0.00208333333333333" calcext:value-type="float">
            <text:p>0,00208333333333333000</text:p>
          </table:table-cell>
          <table:table-cell table:formula="of:=[.D1202]-[.D120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[.B1201]+15" office:value-type="float" office:value="18015" calcext:value-type="float">
            <text:p>18015</text:p>
          </table:table-cell>
          <table:table-cell office:value-type="float" office:value="8640000" calcext:value-type="float">
            <text:p>8640000</text:p>
          </table:table-cell>
          <table:table-cell table:formula="of:=[.B1202]/[.C1202]" office:value-type="float" office:value="0.00208506944444444" calcext:value-type="float">
            <text:p>0,00208506944444444000</text:p>
          </table:table-cell>
          <table:table-cell table:formula="of:=[.D1203]-[.D120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[.B1202]+15" office:value-type="float" office:value="18030" calcext:value-type="float">
            <text:p>18030</text:p>
          </table:table-cell>
          <table:table-cell office:value-type="float" office:value="8640000" calcext:value-type="float">
            <text:p>8640000</text:p>
          </table:table-cell>
          <table:table-cell table:formula="of:=[.B1203]/[.C1203]" office:value-type="float" office:value="0.00208680555555556" calcext:value-type="float">
            <text:p>0,00208680555555556000</text:p>
          </table:table-cell>
          <table:table-cell table:formula="of:=[.D1204]-[.D1203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[.B1203]+15" office:value-type="float" office:value="18045" calcext:value-type="float">
            <text:p>18045</text:p>
          </table:table-cell>
          <table:table-cell office:value-type="float" office:value="8640000" calcext:value-type="float">
            <text:p>8640000</text:p>
          </table:table-cell>
          <table:table-cell table:formula="of:=[.B1204]/[.C1204]" office:value-type="float" office:value="0.00208854166666667" calcext:value-type="float">
            <text:p>0,00208854166666667000</text:p>
          </table:table-cell>
          <table:table-cell table:formula="of:=[.D1205]-[.D120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[.B1204]+15" office:value-type="float" office:value="18060" calcext:value-type="float">
            <text:p>18060</text:p>
          </table:table-cell>
          <table:table-cell office:value-type="float" office:value="8640000" calcext:value-type="float">
            <text:p>8640000</text:p>
          </table:table-cell>
          <table:table-cell table:formula="of:=[.B1205]/[.C1205]" office:value-type="float" office:value="0.00209027777777778" calcext:value-type="float">
            <text:p>0,00209027777777778000</text:p>
          </table:table-cell>
          <table:table-cell table:formula="of:=[.D1206]-[.D120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[.B1205]+15" office:value-type="float" office:value="18075" calcext:value-type="float">
            <text:p>18075</text:p>
          </table:table-cell>
          <table:table-cell office:value-type="float" office:value="8640000" calcext:value-type="float">
            <text:p>8640000</text:p>
          </table:table-cell>
          <table:table-cell table:formula="of:=[.B1206]/[.C1206]" office:value-type="float" office:value="0.00209201388888889" calcext:value-type="float">
            <text:p>0,00209201388888889000</text:p>
          </table:table-cell>
          <table:table-cell table:formula="of:=[.D1207]-[.D120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[.B1206]+15" office:value-type="float" office:value="18090" calcext:value-type="float">
            <text:p>18090</text:p>
          </table:table-cell>
          <table:table-cell office:value-type="float" office:value="8640000" calcext:value-type="float">
            <text:p>8640000</text:p>
          </table:table-cell>
          <table:table-cell table:formula="of:=[.B1207]/[.C1207]" office:value-type="float" office:value="0.00209375" calcext:value-type="float">
            <text:p>0,00209375000000000000</text:p>
          </table:table-cell>
          <table:table-cell table:formula="of:=[.D1208]-[.D1207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[.B1207]+15" office:value-type="float" office:value="18105" calcext:value-type="float">
            <text:p>18105</text:p>
          </table:table-cell>
          <table:table-cell office:value-type="float" office:value="8640000" calcext:value-type="float">
            <text:p>8640000</text:p>
          </table:table-cell>
          <table:table-cell table:formula="of:=[.B1208]/[.C1208]" office:value-type="float" office:value="0.00209548611111111" calcext:value-type="float">
            <text:p>0,00209548611111111000</text:p>
          </table:table-cell>
          <table:table-cell table:formula="of:=[.D1209]-[.D120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[.B1208]+15" office:value-type="float" office:value="18120" calcext:value-type="float">
            <text:p>18120</text:p>
          </table:table-cell>
          <table:table-cell office:value-type="float" office:value="8640000" calcext:value-type="float">
            <text:p>8640000</text:p>
          </table:table-cell>
          <table:table-cell table:formula="of:=[.B1209]/[.C1209]" office:value-type="float" office:value="0.00209722222222222" calcext:value-type="float">
            <text:p>0,00209722222222222000</text:p>
          </table:table-cell>
          <table:table-cell table:formula="of:=[.D1210]-[.D120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[.B1209]+15" office:value-type="float" office:value="18135" calcext:value-type="float">
            <text:p>18135</text:p>
          </table:table-cell>
          <table:table-cell office:value-type="float" office:value="8640000" calcext:value-type="float">
            <text:p>8640000</text:p>
          </table:table-cell>
          <table:table-cell table:formula="of:=[.B1210]/[.C1210]" office:value-type="float" office:value="0.00209895833333333" calcext:value-type="float">
            <text:p>0,00209895833333333000</text:p>
          </table:table-cell>
          <table:table-cell table:formula="of:=[.D1211]-[.D121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[.B1210]+15" office:value-type="float" office:value="18150" calcext:value-type="float">
            <text:p>18150</text:p>
          </table:table-cell>
          <table:table-cell office:value-type="float" office:value="8640000" calcext:value-type="float">
            <text:p>8640000</text:p>
          </table:table-cell>
          <table:table-cell table:formula="of:=[.B1211]/[.C1211]" office:value-type="float" office:value="0.00210069444444444" calcext:value-type="float">
            <text:p>0,00210069444444444000</text:p>
          </table:table-cell>
          <table:table-cell table:formula="of:=[.D1212]-[.D121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[.B1211]+15" office:value-type="float" office:value="18165" calcext:value-type="float">
            <text:p>18165</text:p>
          </table:table-cell>
          <table:table-cell office:value-type="float" office:value="8640000" calcext:value-type="float">
            <text:p>8640000</text:p>
          </table:table-cell>
          <table:table-cell table:formula="of:=[.B1212]/[.C1212]" office:value-type="float" office:value="0.00210243055555556" calcext:value-type="float">
            <text:p>0,00210243055555556000</text:p>
          </table:table-cell>
          <table:table-cell table:formula="of:=[.D1213]-[.D1212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[.B1212]+15" office:value-type="float" office:value="18180" calcext:value-type="float">
            <text:p>18180</text:p>
          </table:table-cell>
          <table:table-cell office:value-type="float" office:value="8640000" calcext:value-type="float">
            <text:p>8640000</text:p>
          </table:table-cell>
          <table:table-cell table:formula="of:=[.B1213]/[.C1213]" office:value-type="float" office:value="0.00210416666666667" calcext:value-type="float">
            <text:p>0,00210416666666667000</text:p>
          </table:table-cell>
          <table:table-cell table:formula="of:=[.D1214]-[.D121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[.B1213]+15" office:value-type="float" office:value="18195" calcext:value-type="float">
            <text:p>18195</text:p>
          </table:table-cell>
          <table:table-cell office:value-type="float" office:value="8640000" calcext:value-type="float">
            <text:p>8640000</text:p>
          </table:table-cell>
          <table:table-cell table:formula="of:=[.B1214]/[.C1214]" office:value-type="float" office:value="0.00210590277777778" calcext:value-type="float">
            <text:p>0,00210590277777778000</text:p>
          </table:table-cell>
          <table:table-cell table:formula="of:=[.D1215]-[.D121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[.B1214]+15" office:value-type="float" office:value="18210" calcext:value-type="float">
            <text:p>18210</text:p>
          </table:table-cell>
          <table:table-cell office:value-type="float" office:value="8640000" calcext:value-type="float">
            <text:p>8640000</text:p>
          </table:table-cell>
          <table:table-cell table:formula="of:=[.B1215]/[.C1215]" office:value-type="float" office:value="0.00210763888888889" calcext:value-type="float">
            <text:p>0,00210763888888889000</text:p>
          </table:table-cell>
          <table:table-cell table:formula="of:=[.D1216]-[.D121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[.B1215]+15" office:value-type="float" office:value="18225" calcext:value-type="float">
            <text:p>18225</text:p>
          </table:table-cell>
          <table:table-cell office:value-type="float" office:value="8640000" calcext:value-type="float">
            <text:p>8640000</text:p>
          </table:table-cell>
          <table:table-cell table:formula="of:=[.B1216]/[.C1216]" office:value-type="float" office:value="0.002109375" calcext:value-type="float">
            <text:p>0,00210937500000000000</text:p>
          </table:table-cell>
          <table:table-cell table:formula="of:=[.D1217]-[.D1216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[.B1216]+15" office:value-type="float" office:value="18240" calcext:value-type="float">
            <text:p>18240</text:p>
          </table:table-cell>
          <table:table-cell office:value-type="float" office:value="8640000" calcext:value-type="float">
            <text:p>8640000</text:p>
          </table:table-cell>
          <table:table-cell table:formula="of:=[.B1217]/[.C1217]" office:value-type="float" office:value="0.00211111111111111" calcext:value-type="float">
            <text:p>0,00211111111111111000</text:p>
          </table:table-cell>
          <table:table-cell table:formula="of:=[.D1218]-[.D121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[.B1217]+15" office:value-type="float" office:value="18255" calcext:value-type="float">
            <text:p>18255</text:p>
          </table:table-cell>
          <table:table-cell office:value-type="float" office:value="8640000" calcext:value-type="float">
            <text:p>8640000</text:p>
          </table:table-cell>
          <table:table-cell table:formula="of:=[.B1218]/[.C1218]" office:value-type="float" office:value="0.00211284722222222" calcext:value-type="float">
            <text:p>0,00211284722222222000</text:p>
          </table:table-cell>
          <table:table-cell table:formula="of:=[.D1219]-[.D121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[.B1218]+15" office:value-type="float" office:value="18270" calcext:value-type="float">
            <text:p>18270</text:p>
          </table:table-cell>
          <table:table-cell office:value-type="float" office:value="8640000" calcext:value-type="float">
            <text:p>8640000</text:p>
          </table:table-cell>
          <table:table-cell table:formula="of:=[.B1219]/[.C1219]" office:value-type="float" office:value="0.00211458333333333" calcext:value-type="float">
            <text:p>0,00211458333333333000</text:p>
          </table:table-cell>
          <table:table-cell table:formula="of:=[.D1220]-[.D121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[.B1219]+15" office:value-type="float" office:value="18285" calcext:value-type="float">
            <text:p>18285</text:p>
          </table:table-cell>
          <table:table-cell office:value-type="float" office:value="8640000" calcext:value-type="float">
            <text:p>8640000</text:p>
          </table:table-cell>
          <table:table-cell table:formula="of:=[.B1220]/[.C1220]" office:value-type="float" office:value="0.00211631944444444" calcext:value-type="float">
            <text:p>0,00211631944444444000</text:p>
          </table:table-cell>
          <table:table-cell table:formula="of:=[.D1221]-[.D122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[.B1220]+15" office:value-type="float" office:value="18300" calcext:value-type="float">
            <text:p>18300</text:p>
          </table:table-cell>
          <table:table-cell office:value-type="float" office:value="8640000" calcext:value-type="float">
            <text:p>8640000</text:p>
          </table:table-cell>
          <table:table-cell table:formula="of:=[.B1221]/[.C1221]" office:value-type="float" office:value="0.00211805555555556" calcext:value-type="float">
            <text:p>0,00211805555555556000</text:p>
          </table:table-cell>
          <table:table-cell table:formula="of:=[.D1222]-[.D1221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[.B1221]+15" office:value-type="float" office:value="18315" calcext:value-type="float">
            <text:p>18315</text:p>
          </table:table-cell>
          <table:table-cell office:value-type="float" office:value="8640000" calcext:value-type="float">
            <text:p>8640000</text:p>
          </table:table-cell>
          <table:table-cell table:formula="of:=[.B1222]/[.C1222]" office:value-type="float" office:value="0.00211979166666667" calcext:value-type="float">
            <text:p>0,00211979166666667000</text:p>
          </table:table-cell>
          <table:table-cell table:formula="of:=[.D1223]-[.D122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[.B1222]+15" office:value-type="float" office:value="18330" calcext:value-type="float">
            <text:p>18330</text:p>
          </table:table-cell>
          <table:table-cell office:value-type="float" office:value="8640000" calcext:value-type="float">
            <text:p>8640000</text:p>
          </table:table-cell>
          <table:table-cell table:formula="of:=[.B1223]/[.C1223]" office:value-type="float" office:value="0.00212152777777778" calcext:value-type="float">
            <text:p>0,00212152777777778000</text:p>
          </table:table-cell>
          <table:table-cell table:formula="of:=[.D1224]-[.D122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[.B1223]+15" office:value-type="float" office:value="18345" calcext:value-type="float">
            <text:p>18345</text:p>
          </table:table-cell>
          <table:table-cell office:value-type="float" office:value="8640000" calcext:value-type="float">
            <text:p>8640000</text:p>
          </table:table-cell>
          <table:table-cell table:formula="of:=[.B1224]/[.C1224]" office:value-type="float" office:value="0.00212326388888889" calcext:value-type="float">
            <text:p>0,00212326388888889000</text:p>
          </table:table-cell>
          <table:table-cell table:formula="of:=[.D1225]-[.D122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[.B1224]+15" office:value-type="float" office:value="18360" calcext:value-type="float">
            <text:p>18360</text:p>
          </table:table-cell>
          <table:table-cell office:value-type="float" office:value="8640000" calcext:value-type="float">
            <text:p>8640000</text:p>
          </table:table-cell>
          <table:table-cell table:formula="of:=[.B1225]/[.C1225]" office:value-type="float" office:value="0.002125" calcext:value-type="float">
            <text:p>0,00212500000000000000</text:p>
          </table:table-cell>
          <table:table-cell table:formula="of:=[.D1226]-[.D1225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[.B1225]+15" office:value-type="float" office:value="18375" calcext:value-type="float">
            <text:p>18375</text:p>
          </table:table-cell>
          <table:table-cell office:value-type="float" office:value="8640000" calcext:value-type="float">
            <text:p>8640000</text:p>
          </table:table-cell>
          <table:table-cell table:formula="of:=[.B1226]/[.C1226]" office:value-type="float" office:value="0.00212673611111111" calcext:value-type="float">
            <text:p>0,00212673611111111000</text:p>
          </table:table-cell>
          <table:table-cell table:formula="of:=[.D1227]-[.D122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[.B1226]+15" office:value-type="float" office:value="18390" calcext:value-type="float">
            <text:p>18390</text:p>
          </table:table-cell>
          <table:table-cell office:value-type="float" office:value="8640000" calcext:value-type="float">
            <text:p>8640000</text:p>
          </table:table-cell>
          <table:table-cell table:formula="of:=[.B1227]/[.C1227]" office:value-type="float" office:value="0.00212847222222222" calcext:value-type="float">
            <text:p>0,00212847222222222000</text:p>
          </table:table-cell>
          <table:table-cell table:formula="of:=[.D1228]-[.D122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[.B1227]+15" office:value-type="float" office:value="18405" calcext:value-type="float">
            <text:p>18405</text:p>
          </table:table-cell>
          <table:table-cell office:value-type="float" office:value="8640000" calcext:value-type="float">
            <text:p>8640000</text:p>
          </table:table-cell>
          <table:table-cell table:formula="of:=[.B1228]/[.C1228]" office:value-type="float" office:value="0.00213020833333333" calcext:value-type="float">
            <text:p>0,00213020833333333000</text:p>
          </table:table-cell>
          <table:table-cell table:formula="of:=[.D1229]-[.D122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[.B1228]+15" office:value-type="float" office:value="18420" calcext:value-type="float">
            <text:p>18420</text:p>
          </table:table-cell>
          <table:table-cell office:value-type="float" office:value="8640000" calcext:value-type="float">
            <text:p>8640000</text:p>
          </table:table-cell>
          <table:table-cell table:formula="of:=[.B1229]/[.C1229]" office:value-type="float" office:value="0.00213194444444444" calcext:value-type="float">
            <text:p>0,00213194444444444000</text:p>
          </table:table-cell>
          <table:table-cell table:formula="of:=[.D1230]-[.D122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[.B1229]+15" office:value-type="float" office:value="18435" calcext:value-type="float">
            <text:p>18435</text:p>
          </table:table-cell>
          <table:table-cell office:value-type="float" office:value="8640000" calcext:value-type="float">
            <text:p>8640000</text:p>
          </table:table-cell>
          <table:table-cell table:formula="of:=[.B1230]/[.C1230]" office:value-type="float" office:value="0.00213368055555556" calcext:value-type="float">
            <text:p>0,00213368055555556000</text:p>
          </table:table-cell>
          <table:table-cell table:formula="of:=[.D1231]-[.D1230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[.B1230]+15" office:value-type="float" office:value="18450" calcext:value-type="float">
            <text:p>18450</text:p>
          </table:table-cell>
          <table:table-cell office:value-type="float" office:value="8640000" calcext:value-type="float">
            <text:p>8640000</text:p>
          </table:table-cell>
          <table:table-cell table:formula="of:=[.B1231]/[.C1231]" office:value-type="float" office:value="0.00213541666666667" calcext:value-type="float">
            <text:p>0,00213541666666667000</text:p>
          </table:table-cell>
          <table:table-cell table:formula="of:=[.D1232]-[.D123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[.B1231]+15" office:value-type="float" office:value="18465" calcext:value-type="float">
            <text:p>18465</text:p>
          </table:table-cell>
          <table:table-cell office:value-type="float" office:value="8640000" calcext:value-type="float">
            <text:p>8640000</text:p>
          </table:table-cell>
          <table:table-cell table:formula="of:=[.B1232]/[.C1232]" office:value-type="float" office:value="0.00213715277777778" calcext:value-type="float">
            <text:p>0,00213715277777778000</text:p>
          </table:table-cell>
          <table:table-cell table:formula="of:=[.D1233]-[.D123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[.B1232]+15" office:value-type="float" office:value="18480" calcext:value-type="float">
            <text:p>18480</text:p>
          </table:table-cell>
          <table:table-cell office:value-type="float" office:value="8640000" calcext:value-type="float">
            <text:p>8640000</text:p>
          </table:table-cell>
          <table:table-cell table:formula="of:=[.B1233]/[.C1233]" office:value-type="float" office:value="0.00213888888888889" calcext:value-type="float">
            <text:p>0,00213888888888889000</text:p>
          </table:table-cell>
          <table:table-cell table:formula="of:=[.D1234]-[.D123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[.B1233]+15" office:value-type="float" office:value="18495" calcext:value-type="float">
            <text:p>18495</text:p>
          </table:table-cell>
          <table:table-cell office:value-type="float" office:value="8640000" calcext:value-type="float">
            <text:p>8640000</text:p>
          </table:table-cell>
          <table:table-cell table:formula="of:=[.B1234]/[.C1234]" office:value-type="float" office:value="0.002140625" calcext:value-type="float">
            <text:p>0,00214062500000000000</text:p>
          </table:table-cell>
          <table:table-cell table:formula="of:=[.D1235]-[.D1234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[.B1234]+15" office:value-type="float" office:value="18510" calcext:value-type="float">
            <text:p>18510</text:p>
          </table:table-cell>
          <table:table-cell office:value-type="float" office:value="8640000" calcext:value-type="float">
            <text:p>8640000</text:p>
          </table:table-cell>
          <table:table-cell table:formula="of:=[.B1235]/[.C1235]" office:value-type="float" office:value="0.00214236111111111" calcext:value-type="float">
            <text:p>0,00214236111111111000</text:p>
          </table:table-cell>
          <table:table-cell table:formula="of:=[.D1236]-[.D123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[.B1235]+15" office:value-type="float" office:value="18525" calcext:value-type="float">
            <text:p>18525</text:p>
          </table:table-cell>
          <table:table-cell office:value-type="float" office:value="8640000" calcext:value-type="float">
            <text:p>8640000</text:p>
          </table:table-cell>
          <table:table-cell table:formula="of:=[.B1236]/[.C1236]" office:value-type="float" office:value="0.00214409722222222" calcext:value-type="float">
            <text:p>0,00214409722222222000</text:p>
          </table:table-cell>
          <table:table-cell table:formula="of:=[.D1237]-[.D123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[.B1236]+15" office:value-type="float" office:value="18540" calcext:value-type="float">
            <text:p>18540</text:p>
          </table:table-cell>
          <table:table-cell office:value-type="float" office:value="8640000" calcext:value-type="float">
            <text:p>8640000</text:p>
          </table:table-cell>
          <table:table-cell table:formula="of:=[.B1237]/[.C1237]" office:value-type="float" office:value="0.00214583333333333" calcext:value-type="float">
            <text:p>0,00214583333333333000</text:p>
          </table:table-cell>
          <table:table-cell table:formula="of:=[.D1238]-[.D123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[.B1237]+15" office:value-type="float" office:value="18555" calcext:value-type="float">
            <text:p>18555</text:p>
          </table:table-cell>
          <table:table-cell office:value-type="float" office:value="8640000" calcext:value-type="float">
            <text:p>8640000</text:p>
          </table:table-cell>
          <table:table-cell table:formula="of:=[.B1238]/[.C1238]" office:value-type="float" office:value="0.00214756944444444" calcext:value-type="float">
            <text:p>0,00214756944444444000</text:p>
          </table:table-cell>
          <table:table-cell table:formula="of:=[.D1239]-[.D1238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[.B1238]+15" office:value-type="float" office:value="18570" calcext:value-type="float">
            <text:p>18570</text:p>
          </table:table-cell>
          <table:table-cell office:value-type="float" office:value="8640000" calcext:value-type="float">
            <text:p>8640000</text:p>
          </table:table-cell>
          <table:table-cell table:formula="of:=[.B1239]/[.C1239]" office:value-type="float" office:value="0.00214930555555556" calcext:value-type="float">
            <text:p>0,00214930555555556000</text:p>
          </table:table-cell>
          <table:table-cell table:formula="of:=[.D1240]-[.D123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[.B1239]+15" office:value-type="float" office:value="18585" calcext:value-type="float">
            <text:p>18585</text:p>
          </table:table-cell>
          <table:table-cell office:value-type="float" office:value="8640000" calcext:value-type="float">
            <text:p>8640000</text:p>
          </table:table-cell>
          <table:table-cell table:formula="of:=[.B1240]/[.C1240]" office:value-type="float" office:value="0.00215104166666667" calcext:value-type="float">
            <text:p>0,00215104166666667000</text:p>
          </table:table-cell>
          <table:table-cell table:formula="of:=[.D1241]-[.D124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[.B1240]+15" office:value-type="float" office:value="18600" calcext:value-type="float">
            <text:p>18600</text:p>
          </table:table-cell>
          <table:table-cell office:value-type="float" office:value="8640000" calcext:value-type="float">
            <text:p>8640000</text:p>
          </table:table-cell>
          <table:table-cell table:formula="of:=[.B1241]/[.C1241]" office:value-type="float" office:value="0.00215277777777778" calcext:value-type="float">
            <text:p>0,00215277777777778000</text:p>
          </table:table-cell>
          <table:table-cell table:formula="of:=[.D1242]-[.D124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[.B1241]+15" office:value-type="float" office:value="18615" calcext:value-type="float">
            <text:p>18615</text:p>
          </table:table-cell>
          <table:table-cell office:value-type="float" office:value="8640000" calcext:value-type="float">
            <text:p>8640000</text:p>
          </table:table-cell>
          <table:table-cell table:formula="of:=[.B1242]/[.C1242]" office:value-type="float" office:value="0.00215451388888889" calcext:value-type="float">
            <text:p>0,00215451388888889000</text:p>
          </table:table-cell>
          <table:table-cell table:formula="of:=[.D1243]-[.D124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[.B1242]+15" office:value-type="float" office:value="18630" calcext:value-type="float">
            <text:p>18630</text:p>
          </table:table-cell>
          <table:table-cell office:value-type="float" office:value="8640000" calcext:value-type="float">
            <text:p>8640000</text:p>
          </table:table-cell>
          <table:table-cell table:formula="of:=[.B1243]/[.C1243]" office:value-type="float" office:value="0.00215625" calcext:value-type="float">
            <text:p>0,00215625000000000000</text:p>
          </table:table-cell>
          <table:table-cell table:formula="of:=[.D1244]-[.D1243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[.B1243]+15" office:value-type="float" office:value="18645" calcext:value-type="float">
            <text:p>18645</text:p>
          </table:table-cell>
          <table:table-cell office:value-type="float" office:value="8640000" calcext:value-type="float">
            <text:p>8640000</text:p>
          </table:table-cell>
          <table:table-cell table:formula="of:=[.B1244]/[.C1244]" office:value-type="float" office:value="0.00215798611111111" calcext:value-type="float">
            <text:p>0,00215798611111111000</text:p>
          </table:table-cell>
          <table:table-cell table:formula="of:=[.D1245]-[.D124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[.B1244]+15" office:value-type="float" office:value="18660" calcext:value-type="float">
            <text:p>18660</text:p>
          </table:table-cell>
          <table:table-cell office:value-type="float" office:value="8640000" calcext:value-type="float">
            <text:p>8640000</text:p>
          </table:table-cell>
          <table:table-cell table:formula="of:=[.B1245]/[.C1245]" office:value-type="float" office:value="0.00215972222222222" calcext:value-type="float">
            <text:p>0,00215972222222222000</text:p>
          </table:table-cell>
          <table:table-cell table:formula="of:=[.D1246]-[.D124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[.B1245]+15" office:value-type="float" office:value="18675" calcext:value-type="float">
            <text:p>18675</text:p>
          </table:table-cell>
          <table:table-cell office:value-type="float" office:value="8640000" calcext:value-type="float">
            <text:p>8640000</text:p>
          </table:table-cell>
          <table:table-cell table:formula="of:=[.B1246]/[.C1246]" office:value-type="float" office:value="0.00216145833333333" calcext:value-type="float">
            <text:p>0,00216145833333333000</text:p>
          </table:table-cell>
          <table:table-cell table:formula="of:=[.D1247]-[.D124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[.B1246]+15" office:value-type="float" office:value="18690" calcext:value-type="float">
            <text:p>18690</text:p>
          </table:table-cell>
          <table:table-cell office:value-type="float" office:value="8640000" calcext:value-type="float">
            <text:p>8640000</text:p>
          </table:table-cell>
          <table:table-cell table:formula="of:=[.B1247]/[.C1247]" office:value-type="float" office:value="0.00216319444444444" calcext:value-type="float">
            <text:p>0,00216319444444444000</text:p>
          </table:table-cell>
          <table:table-cell table:formula="of:=[.D1248]-[.D1247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[.B1247]+15" office:value-type="float" office:value="18705" calcext:value-type="float">
            <text:p>18705</text:p>
          </table:table-cell>
          <table:table-cell office:value-type="float" office:value="8640000" calcext:value-type="float">
            <text:p>8640000</text:p>
          </table:table-cell>
          <table:table-cell table:formula="of:=[.B1248]/[.C1248]" office:value-type="float" office:value="0.00216493055555556" calcext:value-type="float">
            <text:p>0,00216493055555556000</text:p>
          </table:table-cell>
          <table:table-cell table:formula="of:=[.D1249]-[.D124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[.B1248]+15" office:value-type="float" office:value="18720" calcext:value-type="float">
            <text:p>18720</text:p>
          </table:table-cell>
          <table:table-cell office:value-type="float" office:value="8640000" calcext:value-type="float">
            <text:p>8640000</text:p>
          </table:table-cell>
          <table:table-cell table:formula="of:=[.B1249]/[.C1249]" office:value-type="float" office:value="0.00216666666666667" calcext:value-type="float">
            <text:p>0,00216666666666667000</text:p>
          </table:table-cell>
          <table:table-cell table:formula="of:=[.D1250]-[.D124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[.B1249]+15" office:value-type="float" office:value="18735" calcext:value-type="float">
            <text:p>18735</text:p>
          </table:table-cell>
          <table:table-cell office:value-type="float" office:value="8640000" calcext:value-type="float">
            <text:p>8640000</text:p>
          </table:table-cell>
          <table:table-cell table:formula="of:=[.B1250]/[.C1250]" office:value-type="float" office:value="0.00216840277777778" calcext:value-type="float">
            <text:p>0,00216840277777778000</text:p>
          </table:table-cell>
          <table:table-cell table:formula="of:=[.D1251]-[.D125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[.B1250]+15" office:value-type="float" office:value="18750" calcext:value-type="float">
            <text:p>18750</text:p>
          </table:table-cell>
          <table:table-cell office:value-type="float" office:value="8640000" calcext:value-type="float">
            <text:p>8640000</text:p>
          </table:table-cell>
          <table:table-cell table:formula="of:=[.B1251]/[.C1251]" office:value-type="float" office:value="0.00217013888888889" calcext:value-type="float">
            <text:p>0,00217013888888889000</text:p>
          </table:table-cell>
          <table:table-cell table:formula="of:=[.D1252]-[.D125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[.B1251]+15" office:value-type="float" office:value="18765" calcext:value-type="float">
            <text:p>18765</text:p>
          </table:table-cell>
          <table:table-cell office:value-type="float" office:value="8640000" calcext:value-type="float">
            <text:p>8640000</text:p>
          </table:table-cell>
          <table:table-cell table:formula="of:=[.B1252]/[.C1252]" office:value-type="float" office:value="0.002171875" calcext:value-type="float">
            <text:p>0,00217187500000000000</text:p>
          </table:table-cell>
          <table:table-cell table:formula="of:=[.D1253]-[.D1252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[.B1252]+15" office:value-type="float" office:value="18780" calcext:value-type="float">
            <text:p>18780</text:p>
          </table:table-cell>
          <table:table-cell office:value-type="float" office:value="8640000" calcext:value-type="float">
            <text:p>8640000</text:p>
          </table:table-cell>
          <table:table-cell table:formula="of:=[.B1253]/[.C1253]" office:value-type="float" office:value="0.00217361111111111" calcext:value-type="float">
            <text:p>0,00217361111111111000</text:p>
          </table:table-cell>
          <table:table-cell table:formula="of:=[.D1254]-[.D125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[.B1253]+15" office:value-type="float" office:value="18795" calcext:value-type="float">
            <text:p>18795</text:p>
          </table:table-cell>
          <table:table-cell office:value-type="float" office:value="8640000" calcext:value-type="float">
            <text:p>8640000</text:p>
          </table:table-cell>
          <table:table-cell table:formula="of:=[.B1254]/[.C1254]" office:value-type="float" office:value="0.00217534722222222" calcext:value-type="float">
            <text:p>0,00217534722222222000</text:p>
          </table:table-cell>
          <table:table-cell table:formula="of:=[.D1255]-[.D125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[.B1254]+15" office:value-type="float" office:value="18810" calcext:value-type="float">
            <text:p>18810</text:p>
          </table:table-cell>
          <table:table-cell office:value-type="float" office:value="8640000" calcext:value-type="float">
            <text:p>8640000</text:p>
          </table:table-cell>
          <table:table-cell table:formula="of:=[.B1255]/[.C1255]" office:value-type="float" office:value="0.00217708333333333" calcext:value-type="float">
            <text:p>0,00217708333333333000</text:p>
          </table:table-cell>
          <table:table-cell table:formula="of:=[.D1256]-[.D125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[.B1255]+15" office:value-type="float" office:value="18825" calcext:value-type="float">
            <text:p>18825</text:p>
          </table:table-cell>
          <table:table-cell office:value-type="float" office:value="8640000" calcext:value-type="float">
            <text:p>8640000</text:p>
          </table:table-cell>
          <table:table-cell table:formula="of:=[.B1256]/[.C1256]" office:value-type="float" office:value="0.00217881944444444" calcext:value-type="float">
            <text:p>0,00217881944444444000</text:p>
          </table:table-cell>
          <table:table-cell table:formula="of:=[.D1257]-[.D1256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[.B1256]+15" office:value-type="float" office:value="18840" calcext:value-type="float">
            <text:p>18840</text:p>
          </table:table-cell>
          <table:table-cell office:value-type="float" office:value="8640000" calcext:value-type="float">
            <text:p>8640000</text:p>
          </table:table-cell>
          <table:table-cell table:formula="of:=[.B1257]/[.C1257]" office:value-type="float" office:value="0.00218055555555556" calcext:value-type="float">
            <text:p>0,00218055555555556000</text:p>
          </table:table-cell>
          <table:table-cell table:formula="of:=[.D1258]-[.D125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[.B1257]+15" office:value-type="float" office:value="18855" calcext:value-type="float">
            <text:p>18855</text:p>
          </table:table-cell>
          <table:table-cell office:value-type="float" office:value="8640000" calcext:value-type="float">
            <text:p>8640000</text:p>
          </table:table-cell>
          <table:table-cell table:formula="of:=[.B1258]/[.C1258]" office:value-type="float" office:value="0.00218229166666667" calcext:value-type="float">
            <text:p>0,00218229166666667000</text:p>
          </table:table-cell>
          <table:table-cell table:formula="of:=[.D1259]-[.D125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[.B1258]+15" office:value-type="float" office:value="18870" calcext:value-type="float">
            <text:p>18870</text:p>
          </table:table-cell>
          <table:table-cell office:value-type="float" office:value="8640000" calcext:value-type="float">
            <text:p>8640000</text:p>
          </table:table-cell>
          <table:table-cell table:formula="of:=[.B1259]/[.C1259]" office:value-type="float" office:value="0.00218402777777778" calcext:value-type="float">
            <text:p>0,00218402777777778000</text:p>
          </table:table-cell>
          <table:table-cell table:formula="of:=[.D1260]-[.D125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[.B1259]+15" office:value-type="float" office:value="18885" calcext:value-type="float">
            <text:p>18885</text:p>
          </table:table-cell>
          <table:table-cell office:value-type="float" office:value="8640000" calcext:value-type="float">
            <text:p>8640000</text:p>
          </table:table-cell>
          <table:table-cell table:formula="of:=[.B1260]/[.C1260]" office:value-type="float" office:value="0.00218576388888889" calcext:value-type="float">
            <text:p>0,00218576388888889000</text:p>
          </table:table-cell>
          <table:table-cell table:formula="of:=[.D1261]-[.D126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[.B1260]+15" office:value-type="float" office:value="18900" calcext:value-type="float">
            <text:p>18900</text:p>
          </table:table-cell>
          <table:table-cell office:value-type="float" office:value="8640000" calcext:value-type="float">
            <text:p>8640000</text:p>
          </table:table-cell>
          <table:table-cell table:formula="of:=[.B1261]/[.C1261]" office:value-type="float" office:value="0.0021875" calcext:value-type="float">
            <text:p>0,00218750000000000000</text:p>
          </table:table-cell>
          <table:table-cell table:formula="of:=[.D1262]-[.D1261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[.B1261]+15" office:value-type="float" office:value="18915" calcext:value-type="float">
            <text:p>18915</text:p>
          </table:table-cell>
          <table:table-cell office:value-type="float" office:value="8640000" calcext:value-type="float">
            <text:p>8640000</text:p>
          </table:table-cell>
          <table:table-cell table:formula="of:=[.B1262]/[.C1262]" office:value-type="float" office:value="0.00218923611111111" calcext:value-type="float">
            <text:p>0,00218923611111111000</text:p>
          </table:table-cell>
          <table:table-cell table:formula="of:=[.D1263]-[.D126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[.B1262]+15" office:value-type="float" office:value="18930" calcext:value-type="float">
            <text:p>18930</text:p>
          </table:table-cell>
          <table:table-cell office:value-type="float" office:value="8640000" calcext:value-type="float">
            <text:p>8640000</text:p>
          </table:table-cell>
          <table:table-cell table:formula="of:=[.B1263]/[.C1263]" office:value-type="float" office:value="0.00219097222222222" calcext:value-type="float">
            <text:p>0,00219097222222222000</text:p>
          </table:table-cell>
          <table:table-cell table:formula="of:=[.D1264]-[.D126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[.B1263]+15" office:value-type="float" office:value="18945" calcext:value-type="float">
            <text:p>18945</text:p>
          </table:table-cell>
          <table:table-cell office:value-type="float" office:value="8640000" calcext:value-type="float">
            <text:p>8640000</text:p>
          </table:table-cell>
          <table:table-cell table:formula="of:=[.B1264]/[.C1264]" office:value-type="float" office:value="0.00219270833333333" calcext:value-type="float">
            <text:p>0,00219270833333333000</text:p>
          </table:table-cell>
          <table:table-cell table:formula="of:=[.D1265]-[.D126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[.B1264]+15" office:value-type="float" office:value="18960" calcext:value-type="float">
            <text:p>18960</text:p>
          </table:table-cell>
          <table:table-cell office:value-type="float" office:value="8640000" calcext:value-type="float">
            <text:p>8640000</text:p>
          </table:table-cell>
          <table:table-cell table:formula="of:=[.B1265]/[.C1265]" office:value-type="float" office:value="0.00219444444444444" calcext:value-type="float">
            <text:p>0,00219444444444444000</text:p>
          </table:table-cell>
          <table:table-cell table:formula="of:=[.D1266]-[.D1265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[.B1265]+15" office:value-type="float" office:value="18975" calcext:value-type="float">
            <text:p>18975</text:p>
          </table:table-cell>
          <table:table-cell office:value-type="float" office:value="8640000" calcext:value-type="float">
            <text:p>8640000</text:p>
          </table:table-cell>
          <table:table-cell table:formula="of:=[.B1266]/[.C1266]" office:value-type="float" office:value="0.00219618055555556" calcext:value-type="float">
            <text:p>0,00219618055555556000</text:p>
          </table:table-cell>
          <table:table-cell table:formula="of:=[.D1267]-[.D126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[.B1266]+15" office:value-type="float" office:value="18990" calcext:value-type="float">
            <text:p>18990</text:p>
          </table:table-cell>
          <table:table-cell office:value-type="float" office:value="8640000" calcext:value-type="float">
            <text:p>8640000</text:p>
          </table:table-cell>
          <table:table-cell table:formula="of:=[.B1267]/[.C1267]" office:value-type="float" office:value="0.00219791666666667" calcext:value-type="float">
            <text:p>0,00219791666666667000</text:p>
          </table:table-cell>
          <table:table-cell table:formula="of:=[.D1268]-[.D126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[.B1267]+15" office:value-type="float" office:value="19005" calcext:value-type="float">
            <text:p>19005</text:p>
          </table:table-cell>
          <table:table-cell office:value-type="float" office:value="8640000" calcext:value-type="float">
            <text:p>8640000</text:p>
          </table:table-cell>
          <table:table-cell table:formula="of:=[.B1268]/[.C1268]" office:value-type="float" office:value="0.00219965277777778" calcext:value-type="float">
            <text:p>0,00219965277777778000</text:p>
          </table:table-cell>
          <table:table-cell table:formula="of:=[.D1269]-[.D126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[.B1268]+15" office:value-type="float" office:value="19020" calcext:value-type="float">
            <text:p>19020</text:p>
          </table:table-cell>
          <table:table-cell office:value-type="float" office:value="8640000" calcext:value-type="float">
            <text:p>8640000</text:p>
          </table:table-cell>
          <table:table-cell table:formula="of:=[.B1269]/[.C1269]" office:value-type="float" office:value="0.00220138888888889" calcext:value-type="float">
            <text:p>0,00220138888888889000</text:p>
          </table:table-cell>
          <table:table-cell table:formula="of:=[.D1270]-[.D1269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[.B1269]+15" office:value-type="float" office:value="19035" calcext:value-type="float">
            <text:p>19035</text:p>
          </table:table-cell>
          <table:table-cell office:value-type="float" office:value="8640000" calcext:value-type="float">
            <text:p>8640000</text:p>
          </table:table-cell>
          <table:table-cell table:formula="of:=[.B1270]/[.C1270]" office:value-type="float" office:value="0.002203125" calcext:value-type="float">
            <text:p>0,00220312500000000000</text:p>
          </table:table-cell>
          <table:table-cell table:formula="of:=[.D1271]-[.D127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[.B1270]+15" office:value-type="float" office:value="19050" calcext:value-type="float">
            <text:p>19050</text:p>
          </table:table-cell>
          <table:table-cell office:value-type="float" office:value="8640000" calcext:value-type="float">
            <text:p>8640000</text:p>
          </table:table-cell>
          <table:table-cell table:formula="of:=[.B1271]/[.C1271]" office:value-type="float" office:value="0.00220486111111111" calcext:value-type="float">
            <text:p>0,00220486111111111000</text:p>
          </table:table-cell>
          <table:table-cell table:formula="of:=[.D1272]-[.D127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[.B1271]+15" office:value-type="float" office:value="19065" calcext:value-type="float">
            <text:p>19065</text:p>
          </table:table-cell>
          <table:table-cell office:value-type="float" office:value="8640000" calcext:value-type="float">
            <text:p>8640000</text:p>
          </table:table-cell>
          <table:table-cell table:formula="of:=[.B1272]/[.C1272]" office:value-type="float" office:value="0.00220659722222222" calcext:value-type="float">
            <text:p>0,00220659722222222000</text:p>
          </table:table-cell>
          <table:table-cell table:formula="of:=[.D1273]-[.D127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[.B1272]+15" office:value-type="float" office:value="19080" calcext:value-type="float">
            <text:p>19080</text:p>
          </table:table-cell>
          <table:table-cell office:value-type="float" office:value="8640000" calcext:value-type="float">
            <text:p>8640000</text:p>
          </table:table-cell>
          <table:table-cell table:formula="of:=[.B1273]/[.C1273]" office:value-type="float" office:value="0.00220833333333333" calcext:value-type="float">
            <text:p>0,00220833333333333000</text:p>
          </table:table-cell>
          <table:table-cell table:formula="of:=[.D1274]-[.D127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[.B1273]+15" office:value-type="float" office:value="19095" calcext:value-type="float">
            <text:p>19095</text:p>
          </table:table-cell>
          <table:table-cell office:value-type="float" office:value="8640000" calcext:value-type="float">
            <text:p>8640000</text:p>
          </table:table-cell>
          <table:table-cell table:formula="of:=[.B1274]/[.C1274]" office:value-type="float" office:value="0.00221006944444444" calcext:value-type="float">
            <text:p>0,00221006944444444000</text:p>
          </table:table-cell>
          <table:table-cell table:formula="of:=[.D1275]-[.D1274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[.B1274]+15" office:value-type="float" office:value="19110" calcext:value-type="float">
            <text:p>19110</text:p>
          </table:table-cell>
          <table:table-cell office:value-type="float" office:value="8640000" calcext:value-type="float">
            <text:p>8640000</text:p>
          </table:table-cell>
          <table:table-cell table:formula="of:=[.B1275]/[.C1275]" office:value-type="float" office:value="0.00221180555555556" calcext:value-type="float">
            <text:p>0,00221180555555556000</text:p>
          </table:table-cell>
          <table:table-cell table:formula="of:=[.D1276]-[.D127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[.B1275]+15" office:value-type="float" office:value="19125" calcext:value-type="float">
            <text:p>19125</text:p>
          </table:table-cell>
          <table:table-cell office:value-type="float" office:value="8640000" calcext:value-type="float">
            <text:p>8640000</text:p>
          </table:table-cell>
          <table:table-cell table:formula="of:=[.B1276]/[.C1276]" office:value-type="float" office:value="0.00221354166666667" calcext:value-type="float">
            <text:p>0,00221354166666667000</text:p>
          </table:table-cell>
          <table:table-cell table:formula="of:=[.D1277]-[.D127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[.B1276]+15" office:value-type="float" office:value="19140" calcext:value-type="float">
            <text:p>19140</text:p>
          </table:table-cell>
          <table:table-cell office:value-type="float" office:value="8640000" calcext:value-type="float">
            <text:p>8640000</text:p>
          </table:table-cell>
          <table:table-cell table:formula="of:=[.B1277]/[.C1277]" office:value-type="float" office:value="0.00221527777777778" calcext:value-type="float">
            <text:p>0,00221527777777778000</text:p>
          </table:table-cell>
          <table:table-cell table:formula="of:=[.D1278]-[.D127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[.B1277]+15" office:value-type="float" office:value="19155" calcext:value-type="float">
            <text:p>19155</text:p>
          </table:table-cell>
          <table:table-cell office:value-type="float" office:value="8640000" calcext:value-type="float">
            <text:p>8640000</text:p>
          </table:table-cell>
          <table:table-cell table:formula="of:=[.B1278]/[.C1278]" office:value-type="float" office:value="0.00221701388888889" calcext:value-type="float">
            <text:p>0,00221701388888889000</text:p>
          </table:table-cell>
          <table:table-cell table:formula="of:=[.D1279]-[.D1278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[.B1278]+15" office:value-type="float" office:value="19170" calcext:value-type="float">
            <text:p>19170</text:p>
          </table:table-cell>
          <table:table-cell office:value-type="float" office:value="8640000" calcext:value-type="float">
            <text:p>8640000</text:p>
          </table:table-cell>
          <table:table-cell table:formula="of:=[.B1279]/[.C1279]" office:value-type="float" office:value="0.00221875" calcext:value-type="float">
            <text:p>0,00221875000000000000</text:p>
          </table:table-cell>
          <table:table-cell table:formula="of:=[.D1280]-[.D127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[.B1279]+15" office:value-type="float" office:value="19185" calcext:value-type="float">
            <text:p>19185</text:p>
          </table:table-cell>
          <table:table-cell office:value-type="float" office:value="8640000" calcext:value-type="float">
            <text:p>8640000</text:p>
          </table:table-cell>
          <table:table-cell table:formula="of:=[.B1280]/[.C1280]" office:value-type="float" office:value="0.00222048611111111" calcext:value-type="float">
            <text:p>0,00222048611111111000</text:p>
          </table:table-cell>
          <table:table-cell table:formula="of:=[.D1281]-[.D128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[.B1280]+15" office:value-type="float" office:value="19200" calcext:value-type="float">
            <text:p>19200</text:p>
          </table:table-cell>
          <table:table-cell office:value-type="float" office:value="8640000" calcext:value-type="float">
            <text:p>8640000</text:p>
          </table:table-cell>
          <table:table-cell table:formula="of:=[.B1281]/[.C1281]" office:value-type="float" office:value="0.00222222222222222" calcext:value-type="float">
            <text:p>0,00222222222222222000</text:p>
          </table:table-cell>
          <table:table-cell table:formula="of:=[.D1282]-[.D128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[.B1281]+15" office:value-type="float" office:value="19215" calcext:value-type="float">
            <text:p>19215</text:p>
          </table:table-cell>
          <table:table-cell office:value-type="float" office:value="8640000" calcext:value-type="float">
            <text:p>8640000</text:p>
          </table:table-cell>
          <table:table-cell table:formula="of:=[.B1282]/[.C1282]" office:value-type="float" office:value="0.00222395833333333" calcext:value-type="float">
            <text:p>0,00222395833333333000</text:p>
          </table:table-cell>
          <table:table-cell table:formula="of:=[.D1283]-[.D128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[.B1282]+15" office:value-type="float" office:value="19230" calcext:value-type="float">
            <text:p>19230</text:p>
          </table:table-cell>
          <table:table-cell office:value-type="float" office:value="8640000" calcext:value-type="float">
            <text:p>8640000</text:p>
          </table:table-cell>
          <table:table-cell table:formula="of:=[.B1283]/[.C1283]" office:value-type="float" office:value="0.00222569444444444" calcext:value-type="float">
            <text:p>0,00222569444444444000</text:p>
          </table:table-cell>
          <table:table-cell table:formula="of:=[.D1284]-[.D1283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[.B1283]+15" office:value-type="float" office:value="19245" calcext:value-type="float">
            <text:p>19245</text:p>
          </table:table-cell>
          <table:table-cell office:value-type="float" office:value="8640000" calcext:value-type="float">
            <text:p>8640000</text:p>
          </table:table-cell>
          <table:table-cell table:formula="of:=[.B1284]/[.C1284]" office:value-type="float" office:value="0.00222743055555556" calcext:value-type="float">
            <text:p>0,00222743055555556000</text:p>
          </table:table-cell>
          <table:table-cell table:formula="of:=[.D1285]-[.D128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[.B1284]+15" office:value-type="float" office:value="19260" calcext:value-type="float">
            <text:p>19260</text:p>
          </table:table-cell>
          <table:table-cell office:value-type="float" office:value="8640000" calcext:value-type="float">
            <text:p>8640000</text:p>
          </table:table-cell>
          <table:table-cell table:formula="of:=[.B1285]/[.C1285]" office:value-type="float" office:value="0.00222916666666667" calcext:value-type="float">
            <text:p>0,00222916666666667000</text:p>
          </table:table-cell>
          <table:table-cell table:formula="of:=[.D1286]-[.D128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[.B1285]+15" office:value-type="float" office:value="19275" calcext:value-type="float">
            <text:p>19275</text:p>
          </table:table-cell>
          <table:table-cell office:value-type="float" office:value="8640000" calcext:value-type="float">
            <text:p>8640000</text:p>
          </table:table-cell>
          <table:table-cell table:formula="of:=[.B1286]/[.C1286]" office:value-type="float" office:value="0.00223090277777778" calcext:value-type="float">
            <text:p>0,00223090277777778000</text:p>
          </table:table-cell>
          <table:table-cell table:formula="of:=[.D1287]-[.D128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[.B1286]+15" office:value-type="float" office:value="19290" calcext:value-type="float">
            <text:p>19290</text:p>
          </table:table-cell>
          <table:table-cell office:value-type="float" office:value="8640000" calcext:value-type="float">
            <text:p>8640000</text:p>
          </table:table-cell>
          <table:table-cell table:formula="of:=[.B1287]/[.C1287]" office:value-type="float" office:value="0.00223263888888889" calcext:value-type="float">
            <text:p>0,00223263888888889000</text:p>
          </table:table-cell>
          <table:table-cell table:formula="of:=[.D1288]-[.D1287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[.B1287]+15" office:value-type="float" office:value="19305" calcext:value-type="float">
            <text:p>19305</text:p>
          </table:table-cell>
          <table:table-cell office:value-type="float" office:value="8640000" calcext:value-type="float">
            <text:p>8640000</text:p>
          </table:table-cell>
          <table:table-cell table:formula="of:=[.B1288]/[.C1288]" office:value-type="float" office:value="0.002234375" calcext:value-type="float">
            <text:p>0,00223437500000000000</text:p>
          </table:table-cell>
          <table:table-cell table:formula="of:=[.D1289]-[.D128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[.B1288]+15" office:value-type="float" office:value="19320" calcext:value-type="float">
            <text:p>19320</text:p>
          </table:table-cell>
          <table:table-cell office:value-type="float" office:value="8640000" calcext:value-type="float">
            <text:p>8640000</text:p>
          </table:table-cell>
          <table:table-cell table:formula="of:=[.B1289]/[.C1289]" office:value-type="float" office:value="0.00223611111111111" calcext:value-type="float">
            <text:p>0,00223611111111111000</text:p>
          </table:table-cell>
          <table:table-cell table:formula="of:=[.D1290]-[.D128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[.B1289]+15" office:value-type="float" office:value="19335" calcext:value-type="float">
            <text:p>19335</text:p>
          </table:table-cell>
          <table:table-cell office:value-type="float" office:value="8640000" calcext:value-type="float">
            <text:p>8640000</text:p>
          </table:table-cell>
          <table:table-cell table:formula="of:=[.B1290]/[.C1290]" office:value-type="float" office:value="0.00223784722222222" calcext:value-type="float">
            <text:p>0,00223784722222222000</text:p>
          </table:table-cell>
          <table:table-cell table:formula="of:=[.D1291]-[.D129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[.B1290]+15" office:value-type="float" office:value="19350" calcext:value-type="float">
            <text:p>19350</text:p>
          </table:table-cell>
          <table:table-cell office:value-type="float" office:value="8640000" calcext:value-type="float">
            <text:p>8640000</text:p>
          </table:table-cell>
          <table:table-cell table:formula="of:=[.B1291]/[.C1291]" office:value-type="float" office:value="0.00223958333333333" calcext:value-type="float">
            <text:p>0,00223958333333333000</text:p>
          </table:table-cell>
          <table:table-cell table:formula="of:=[.D1292]-[.D129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[.B1291]+15" office:value-type="float" office:value="19365" calcext:value-type="float">
            <text:p>19365</text:p>
          </table:table-cell>
          <table:table-cell office:value-type="float" office:value="8640000" calcext:value-type="float">
            <text:p>8640000</text:p>
          </table:table-cell>
          <table:table-cell table:formula="of:=[.B1292]/[.C1292]" office:value-type="float" office:value="0.00224131944444444" calcext:value-type="float">
            <text:p>0,00224131944444444000</text:p>
          </table:table-cell>
          <table:table-cell table:formula="of:=[.D1293]-[.D1292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[.B1292]+15" office:value-type="float" office:value="19380" calcext:value-type="float">
            <text:p>19380</text:p>
          </table:table-cell>
          <table:table-cell office:value-type="float" office:value="8640000" calcext:value-type="float">
            <text:p>8640000</text:p>
          </table:table-cell>
          <table:table-cell table:formula="of:=[.B1293]/[.C1293]" office:value-type="float" office:value="0.00224305555555556" calcext:value-type="float">
            <text:p>0,00224305555555556000</text:p>
          </table:table-cell>
          <table:table-cell table:formula="of:=[.D1294]-[.D129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[.B1293]+15" office:value-type="float" office:value="19395" calcext:value-type="float">
            <text:p>19395</text:p>
          </table:table-cell>
          <table:table-cell office:value-type="float" office:value="8640000" calcext:value-type="float">
            <text:p>8640000</text:p>
          </table:table-cell>
          <table:table-cell table:formula="of:=[.B1294]/[.C1294]" office:value-type="float" office:value="0.00224479166666667" calcext:value-type="float">
            <text:p>0,00224479166666667000</text:p>
          </table:table-cell>
          <table:table-cell table:formula="of:=[.D1295]-[.D129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[.B1294]+15" office:value-type="float" office:value="19410" calcext:value-type="float">
            <text:p>19410</text:p>
          </table:table-cell>
          <table:table-cell office:value-type="float" office:value="8640000" calcext:value-type="float">
            <text:p>8640000</text:p>
          </table:table-cell>
          <table:table-cell table:formula="of:=[.B1295]/[.C1295]" office:value-type="float" office:value="0.00224652777777778" calcext:value-type="float">
            <text:p>0,00224652777777778000</text:p>
          </table:table-cell>
          <table:table-cell table:formula="of:=[.D1296]-[.D129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[.B1295]+15" office:value-type="float" office:value="19425" calcext:value-type="float">
            <text:p>19425</text:p>
          </table:table-cell>
          <table:table-cell office:value-type="float" office:value="8640000" calcext:value-type="float">
            <text:p>8640000</text:p>
          </table:table-cell>
          <table:table-cell table:formula="of:=[.B1296]/[.C1296]" office:value-type="float" office:value="0.00224826388888889" calcext:value-type="float">
            <text:p>0,00224826388888889000</text:p>
          </table:table-cell>
          <table:table-cell table:formula="of:=[.D1297]-[.D1296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[.B1296]+15" office:value-type="float" office:value="19440" calcext:value-type="float">
            <text:p>19440</text:p>
          </table:table-cell>
          <table:table-cell office:value-type="float" office:value="8640000" calcext:value-type="float">
            <text:p>8640000</text:p>
          </table:table-cell>
          <table:table-cell table:formula="of:=[.B1297]/[.C1297]" office:value-type="float" office:value="0.00225" calcext:value-type="float">
            <text:p>0,00225000000000000000</text:p>
          </table:table-cell>
          <table:table-cell table:formula="of:=[.D1298]-[.D129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[.B1297]+15" office:value-type="float" office:value="19455" calcext:value-type="float">
            <text:p>19455</text:p>
          </table:table-cell>
          <table:table-cell office:value-type="float" office:value="8640000" calcext:value-type="float">
            <text:p>8640000</text:p>
          </table:table-cell>
          <table:table-cell table:formula="of:=[.B1298]/[.C1298]" office:value-type="float" office:value="0.00225173611111111" calcext:value-type="float">
            <text:p>0,00225173611111111000</text:p>
          </table:table-cell>
          <table:table-cell table:formula="of:=[.D1299]-[.D129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[.B1298]+15" office:value-type="float" office:value="19470" calcext:value-type="float">
            <text:p>19470</text:p>
          </table:table-cell>
          <table:table-cell office:value-type="float" office:value="8640000" calcext:value-type="float">
            <text:p>8640000</text:p>
          </table:table-cell>
          <table:table-cell table:formula="of:=[.B1299]/[.C1299]" office:value-type="float" office:value="0.00225347222222222" calcext:value-type="float">
            <text:p>0,00225347222222222000</text:p>
          </table:table-cell>
          <table:table-cell table:formula="of:=[.D1300]-[.D129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[.B1299]+15" office:value-type="float" office:value="19485" calcext:value-type="float">
            <text:p>19485</text:p>
          </table:table-cell>
          <table:table-cell office:value-type="float" office:value="8640000" calcext:value-type="float">
            <text:p>8640000</text:p>
          </table:table-cell>
          <table:table-cell table:formula="of:=[.B1300]/[.C1300]" office:value-type="float" office:value="0.00225520833333333" calcext:value-type="float">
            <text:p>0,00225520833333333000</text:p>
          </table:table-cell>
          <table:table-cell table:formula="of:=[.D1301]-[.D1300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B1300]+15" office:value-type="float" office:value="19500" calcext:value-type="float">
            <text:p>19500</text:p>
          </table:table-cell>
          <table:table-cell office:value-type="float" office:value="8640000" calcext:value-type="float">
            <text:p>8640000</text:p>
          </table:table-cell>
          <table:table-cell table:formula="of:=[.B1301]/[.C1301]" office:value-type="float" office:value="0.00225694444444444" calcext:value-type="float">
            <text:p>0,00225694444444444000</text:p>
          </table:table-cell>
          <table:table-cell table:formula="of:=[.D1302]-[.D130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[.B1301]+15" office:value-type="float" office:value="19515" calcext:value-type="float">
            <text:p>19515</text:p>
          </table:table-cell>
          <table:table-cell office:value-type="float" office:value="8640000" calcext:value-type="float">
            <text:p>8640000</text:p>
          </table:table-cell>
          <table:table-cell table:formula="of:=[.B1302]/[.C1302]" office:value-type="float" office:value="0.00225868055555556" calcext:value-type="float">
            <text:p>0,00225868055555556000</text:p>
          </table:table-cell>
          <table:table-cell table:formula="of:=[.D1303]-[.D130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[.B1302]+15" office:value-type="float" office:value="19530" calcext:value-type="float">
            <text:p>19530</text:p>
          </table:table-cell>
          <table:table-cell office:value-type="float" office:value="8640000" calcext:value-type="float">
            <text:p>8640000</text:p>
          </table:table-cell>
          <table:table-cell table:formula="of:=[.B1303]/[.C1303]" office:value-type="float" office:value="0.00226041666666667" calcext:value-type="float">
            <text:p>0,00226041666666667000</text:p>
          </table:table-cell>
          <table:table-cell table:formula="of:=[.D1304]-[.D130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[.B1303]+15" office:value-type="float" office:value="19545" calcext:value-type="float">
            <text:p>19545</text:p>
          </table:table-cell>
          <table:table-cell office:value-type="float" office:value="8640000" calcext:value-type="float">
            <text:p>8640000</text:p>
          </table:table-cell>
          <table:table-cell table:formula="of:=[.B1304]/[.C1304]" office:value-type="float" office:value="0.00226215277777778" calcext:value-type="float">
            <text:p>0,00226215277777778000</text:p>
          </table:table-cell>
          <table:table-cell table:formula="of:=[.D1305]-[.D130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[.B1304]+15" office:value-type="float" office:value="19560" calcext:value-type="float">
            <text:p>19560</text:p>
          </table:table-cell>
          <table:table-cell office:value-type="float" office:value="8640000" calcext:value-type="float">
            <text:p>8640000</text:p>
          </table:table-cell>
          <table:table-cell table:formula="of:=[.B1305]/[.C1305]" office:value-type="float" office:value="0.00226388888888889" calcext:value-type="float">
            <text:p>0,00226388888888889000</text:p>
          </table:table-cell>
          <table:table-cell table:formula="of:=[.D1306]-[.D1305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[.B1305]+15" office:value-type="float" office:value="19575" calcext:value-type="float">
            <text:p>19575</text:p>
          </table:table-cell>
          <table:table-cell office:value-type="float" office:value="8640000" calcext:value-type="float">
            <text:p>8640000</text:p>
          </table:table-cell>
          <table:table-cell table:formula="of:=[.B1306]/[.C1306]" office:value-type="float" office:value="0.002265625" calcext:value-type="float">
            <text:p>0,00226562500000000000</text:p>
          </table:table-cell>
          <table:table-cell table:formula="of:=[.D1307]-[.D130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[.B1306]+15" office:value-type="float" office:value="19590" calcext:value-type="float">
            <text:p>19590</text:p>
          </table:table-cell>
          <table:table-cell office:value-type="float" office:value="8640000" calcext:value-type="float">
            <text:p>8640000</text:p>
          </table:table-cell>
          <table:table-cell table:formula="of:=[.B1307]/[.C1307]" office:value-type="float" office:value="0.00226736111111111" calcext:value-type="float">
            <text:p>0,00226736111111111000</text:p>
          </table:table-cell>
          <table:table-cell table:formula="of:=[.D1308]-[.D130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[.B1307]+15" office:value-type="float" office:value="19605" calcext:value-type="float">
            <text:p>19605</text:p>
          </table:table-cell>
          <table:table-cell office:value-type="float" office:value="8640000" calcext:value-type="float">
            <text:p>8640000</text:p>
          </table:table-cell>
          <table:table-cell table:formula="of:=[.B1308]/[.C1308]" office:value-type="float" office:value="0.00226909722222222" calcext:value-type="float">
            <text:p>0,00226909722222222000</text:p>
          </table:table-cell>
          <table:table-cell table:formula="of:=[.D1309]-[.D130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[.B1308]+15" office:value-type="float" office:value="19620" calcext:value-type="float">
            <text:p>19620</text:p>
          </table:table-cell>
          <table:table-cell office:value-type="float" office:value="8640000" calcext:value-type="float">
            <text:p>8640000</text:p>
          </table:table-cell>
          <table:table-cell table:formula="of:=[.B1309]/[.C1309]" office:value-type="float" office:value="0.00227083333333333" calcext:value-type="float">
            <text:p>0,00227083333333333000</text:p>
          </table:table-cell>
          <table:table-cell table:formula="of:=[.D1310]-[.D1309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[.B1309]+15" office:value-type="float" office:value="19635" calcext:value-type="float">
            <text:p>19635</text:p>
          </table:table-cell>
          <table:table-cell office:value-type="float" office:value="8640000" calcext:value-type="float">
            <text:p>8640000</text:p>
          </table:table-cell>
          <table:table-cell table:formula="of:=[.B1310]/[.C1310]" office:value-type="float" office:value="0.00227256944444444" calcext:value-type="float">
            <text:p>0,00227256944444444000</text:p>
          </table:table-cell>
          <table:table-cell table:formula="of:=[.D1311]-[.D131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[.B1310]+15" office:value-type="float" office:value="19650" calcext:value-type="float">
            <text:p>19650</text:p>
          </table:table-cell>
          <table:table-cell office:value-type="float" office:value="8640000" calcext:value-type="float">
            <text:p>8640000</text:p>
          </table:table-cell>
          <table:table-cell table:formula="of:=[.B1311]/[.C1311]" office:value-type="float" office:value="0.00227430555555556" calcext:value-type="float">
            <text:p>0,00227430555555556000</text:p>
          </table:table-cell>
          <table:table-cell table:formula="of:=[.D1312]-[.D131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[.B1311]+15" office:value-type="float" office:value="19665" calcext:value-type="float">
            <text:p>19665</text:p>
          </table:table-cell>
          <table:table-cell office:value-type="float" office:value="8640000" calcext:value-type="float">
            <text:p>8640000</text:p>
          </table:table-cell>
          <table:table-cell table:formula="of:=[.B1312]/[.C1312]" office:value-type="float" office:value="0.00227604166666667" calcext:value-type="float">
            <text:p>0,00227604166666667000</text:p>
          </table:table-cell>
          <table:table-cell table:formula="of:=[.D1313]-[.D131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[.B1312]+15" office:value-type="float" office:value="19680" calcext:value-type="float">
            <text:p>19680</text:p>
          </table:table-cell>
          <table:table-cell office:value-type="float" office:value="8640000" calcext:value-type="float">
            <text:p>8640000</text:p>
          </table:table-cell>
          <table:table-cell table:formula="of:=[.B1313]/[.C1313]" office:value-type="float" office:value="0.00227777777777778" calcext:value-type="float">
            <text:p>0,00227777777777778000</text:p>
          </table:table-cell>
          <table:table-cell table:formula="of:=[.D1314]-[.D131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[.B1313]+15" office:value-type="float" office:value="19695" calcext:value-type="float">
            <text:p>19695</text:p>
          </table:table-cell>
          <table:table-cell office:value-type="float" office:value="8640000" calcext:value-type="float">
            <text:p>8640000</text:p>
          </table:table-cell>
          <table:table-cell table:formula="of:=[.B1314]/[.C1314]" office:value-type="float" office:value="0.00227951388888889" calcext:value-type="float">
            <text:p>0,00227951388888889000</text:p>
          </table:table-cell>
          <table:table-cell table:formula="of:=[.D1315]-[.D1314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[.B1314]+15" office:value-type="float" office:value="19710" calcext:value-type="float">
            <text:p>19710</text:p>
          </table:table-cell>
          <table:table-cell office:value-type="float" office:value="8640000" calcext:value-type="float">
            <text:p>8640000</text:p>
          </table:table-cell>
          <table:table-cell table:formula="of:=[.B1315]/[.C1315]" office:value-type="float" office:value="0.00228125" calcext:value-type="float">
            <text:p>0,00228125000000000000</text:p>
          </table:table-cell>
          <table:table-cell table:formula="of:=[.D1316]-[.D131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[.B1315]+15" office:value-type="float" office:value="19725" calcext:value-type="float">
            <text:p>19725</text:p>
          </table:table-cell>
          <table:table-cell office:value-type="float" office:value="8640000" calcext:value-type="float">
            <text:p>8640000</text:p>
          </table:table-cell>
          <table:table-cell table:formula="of:=[.B1316]/[.C1316]" office:value-type="float" office:value="0.00228298611111111" calcext:value-type="float">
            <text:p>0,00228298611111111000</text:p>
          </table:table-cell>
          <table:table-cell table:formula="of:=[.D1317]-[.D131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[.B1316]+15" office:value-type="float" office:value="19740" calcext:value-type="float">
            <text:p>19740</text:p>
          </table:table-cell>
          <table:table-cell office:value-type="float" office:value="8640000" calcext:value-type="float">
            <text:p>8640000</text:p>
          </table:table-cell>
          <table:table-cell table:formula="of:=[.B1317]/[.C1317]" office:value-type="float" office:value="0.00228472222222222" calcext:value-type="float">
            <text:p>0,00228472222222222000</text:p>
          </table:table-cell>
          <table:table-cell table:formula="of:=[.D1318]-[.D131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[.B1317]+15" office:value-type="float" office:value="19755" calcext:value-type="float">
            <text:p>19755</text:p>
          </table:table-cell>
          <table:table-cell office:value-type="float" office:value="8640000" calcext:value-type="float">
            <text:p>8640000</text:p>
          </table:table-cell>
          <table:table-cell table:formula="of:=[.B1318]/[.C1318]" office:value-type="float" office:value="0.00228645833333333" calcext:value-type="float">
            <text:p>0,00228645833333333000</text:p>
          </table:table-cell>
          <table:table-cell table:formula="of:=[.D1319]-[.D1318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[.B1318]+15" office:value-type="float" office:value="19770" calcext:value-type="float">
            <text:p>19770</text:p>
          </table:table-cell>
          <table:table-cell office:value-type="float" office:value="8640000" calcext:value-type="float">
            <text:p>8640000</text:p>
          </table:table-cell>
          <table:table-cell table:formula="of:=[.B1319]/[.C1319]" office:value-type="float" office:value="0.00228819444444444" calcext:value-type="float">
            <text:p>0,00228819444444444000</text:p>
          </table:table-cell>
          <table:table-cell table:formula="of:=[.D1320]-[.D131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[.B1319]+15" office:value-type="float" office:value="19785" calcext:value-type="float">
            <text:p>19785</text:p>
          </table:table-cell>
          <table:table-cell office:value-type="float" office:value="8640000" calcext:value-type="float">
            <text:p>8640000</text:p>
          </table:table-cell>
          <table:table-cell table:formula="of:=[.B1320]/[.C1320]" office:value-type="float" office:value="0.00228993055555556" calcext:value-type="float">
            <text:p>0,00228993055555556000</text:p>
          </table:table-cell>
          <table:table-cell table:formula="of:=[.D1321]-[.D132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[.B1320]+15" office:value-type="float" office:value="19800" calcext:value-type="float">
            <text:p>19800</text:p>
          </table:table-cell>
          <table:table-cell office:value-type="float" office:value="8640000" calcext:value-type="float">
            <text:p>8640000</text:p>
          </table:table-cell>
          <table:table-cell table:formula="of:=[.B1321]/[.C1321]" office:value-type="float" office:value="0.00229166666666667" calcext:value-type="float">
            <text:p>0,00229166666666667000</text:p>
          </table:table-cell>
          <table:table-cell table:formula="of:=[.D1322]-[.D132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[.B1321]+15" office:value-type="float" office:value="19815" calcext:value-type="float">
            <text:p>19815</text:p>
          </table:table-cell>
          <table:table-cell office:value-type="float" office:value="8640000" calcext:value-type="float">
            <text:p>8640000</text:p>
          </table:table-cell>
          <table:table-cell table:formula="of:=[.B1322]/[.C1322]" office:value-type="float" office:value="0.00229340277777778" calcext:value-type="float">
            <text:p>0,00229340277777778000</text:p>
          </table:table-cell>
          <table:table-cell table:formula="of:=[.D1323]-[.D132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[.B1322]+15" office:value-type="float" office:value="19830" calcext:value-type="float">
            <text:p>19830</text:p>
          </table:table-cell>
          <table:table-cell office:value-type="float" office:value="8640000" calcext:value-type="float">
            <text:p>8640000</text:p>
          </table:table-cell>
          <table:table-cell table:formula="of:=[.B1323]/[.C1323]" office:value-type="float" office:value="0.00229513888888889" calcext:value-type="float">
            <text:p>0,00229513888888889000</text:p>
          </table:table-cell>
          <table:table-cell table:formula="of:=[.D1324]-[.D1323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[.B1323]+15" office:value-type="float" office:value="19845" calcext:value-type="float">
            <text:p>19845</text:p>
          </table:table-cell>
          <table:table-cell office:value-type="float" office:value="8640000" calcext:value-type="float">
            <text:p>8640000</text:p>
          </table:table-cell>
          <table:table-cell table:formula="of:=[.B1324]/[.C1324]" office:value-type="float" office:value="0.002296875" calcext:value-type="float">
            <text:p>0,00229687500000000000</text:p>
          </table:table-cell>
          <table:table-cell table:formula="of:=[.D1325]-[.D132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[.B1324]+15" office:value-type="float" office:value="19860" calcext:value-type="float">
            <text:p>19860</text:p>
          </table:table-cell>
          <table:table-cell office:value-type="float" office:value="8640000" calcext:value-type="float">
            <text:p>8640000</text:p>
          </table:table-cell>
          <table:table-cell table:formula="of:=[.B1325]/[.C1325]" office:value-type="float" office:value="0.00229861111111111" calcext:value-type="float">
            <text:p>0,00229861111111111000</text:p>
          </table:table-cell>
          <table:table-cell table:formula="of:=[.D1326]-[.D132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[.B1325]+15" office:value-type="float" office:value="19875" calcext:value-type="float">
            <text:p>19875</text:p>
          </table:table-cell>
          <table:table-cell office:value-type="float" office:value="8640000" calcext:value-type="float">
            <text:p>8640000</text:p>
          </table:table-cell>
          <table:table-cell table:formula="of:=[.B1326]/[.C1326]" office:value-type="float" office:value="0.00230034722222222" calcext:value-type="float">
            <text:p>0,00230034722222222000</text:p>
          </table:table-cell>
          <table:table-cell table:formula="of:=[.D1327]-[.D132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[.B1326]+15" office:value-type="float" office:value="19890" calcext:value-type="float">
            <text:p>19890</text:p>
          </table:table-cell>
          <table:table-cell office:value-type="float" office:value="8640000" calcext:value-type="float">
            <text:p>8640000</text:p>
          </table:table-cell>
          <table:table-cell table:formula="of:=[.B1327]/[.C1327]" office:value-type="float" office:value="0.00230208333333333" calcext:value-type="float">
            <text:p>0,00230208333333333000</text:p>
          </table:table-cell>
          <table:table-cell table:formula="of:=[.D1328]-[.D1327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[.B1327]+15" office:value-type="float" office:value="19905" calcext:value-type="float">
            <text:p>19905</text:p>
          </table:table-cell>
          <table:table-cell office:value-type="float" office:value="8640000" calcext:value-type="float">
            <text:p>8640000</text:p>
          </table:table-cell>
          <table:table-cell table:formula="of:=[.B1328]/[.C1328]" office:value-type="float" office:value="0.00230381944444444" calcext:value-type="float">
            <text:p>0,00230381944444444000</text:p>
          </table:table-cell>
          <table:table-cell table:formula="of:=[.D1329]-[.D132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[.B1328]+15" office:value-type="float" office:value="19920" calcext:value-type="float">
            <text:p>19920</text:p>
          </table:table-cell>
          <table:table-cell office:value-type="float" office:value="8640000" calcext:value-type="float">
            <text:p>8640000</text:p>
          </table:table-cell>
          <table:table-cell table:formula="of:=[.B1329]/[.C1329]" office:value-type="float" office:value="0.00230555555555556" calcext:value-type="float">
            <text:p>0,00230555555555556000</text:p>
          </table:table-cell>
          <table:table-cell table:formula="of:=[.D1330]-[.D132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[.B1329]+15" office:value-type="float" office:value="19935" calcext:value-type="float">
            <text:p>19935</text:p>
          </table:table-cell>
          <table:table-cell office:value-type="float" office:value="8640000" calcext:value-type="float">
            <text:p>8640000</text:p>
          </table:table-cell>
          <table:table-cell table:formula="of:=[.B1330]/[.C1330]" office:value-type="float" office:value="0.00230729166666667" calcext:value-type="float">
            <text:p>0,00230729166666667000</text:p>
          </table:table-cell>
          <table:table-cell table:formula="of:=[.D1331]-[.D133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[.B1330]+15" office:value-type="float" office:value="19950" calcext:value-type="float">
            <text:p>19950</text:p>
          </table:table-cell>
          <table:table-cell office:value-type="float" office:value="8640000" calcext:value-type="float">
            <text:p>8640000</text:p>
          </table:table-cell>
          <table:table-cell table:formula="of:=[.B1331]/[.C1331]" office:value-type="float" office:value="0.00230902777777778" calcext:value-type="float">
            <text:p>0,00230902777777778000</text:p>
          </table:table-cell>
          <table:table-cell table:formula="of:=[.D1332]-[.D1331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[.B1331]+15" office:value-type="float" office:value="19965" calcext:value-type="float">
            <text:p>19965</text:p>
          </table:table-cell>
          <table:table-cell office:value-type="float" office:value="8640000" calcext:value-type="float">
            <text:p>8640000</text:p>
          </table:table-cell>
          <table:table-cell table:formula="of:=[.B1332]/[.C1332]" office:value-type="float" office:value="0.00231076388888889" calcext:value-type="float">
            <text:p>0,00231076388888889000</text:p>
          </table:table-cell>
          <table:table-cell table:formula="of:=[.D1333]-[.D133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[.B1332]+15" office:value-type="float" office:value="19980" calcext:value-type="float">
            <text:p>19980</text:p>
          </table:table-cell>
          <table:table-cell office:value-type="float" office:value="8640000" calcext:value-type="float">
            <text:p>8640000</text:p>
          </table:table-cell>
          <table:table-cell table:formula="of:=[.B1333]/[.C1333]" office:value-type="float" office:value="0.0023125" calcext:value-type="float">
            <text:p>0,00231250000000000000</text:p>
          </table:table-cell>
          <table:table-cell table:formula="of:=[.D1334]-[.D133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[.B1333]+15" office:value-type="float" office:value="19995" calcext:value-type="float">
            <text:p>19995</text:p>
          </table:table-cell>
          <table:table-cell office:value-type="float" office:value="8640000" calcext:value-type="float">
            <text:p>8640000</text:p>
          </table:table-cell>
          <table:table-cell table:formula="of:=[.B1334]/[.C1334]" office:value-type="float" office:value="0.00231423611111111" calcext:value-type="float">
            <text:p>0,00231423611111111000</text:p>
          </table:table-cell>
          <table:table-cell table:formula="of:=[.D1335]-[.D133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[.B1334]+15" office:value-type="float" office:value="20010" calcext:value-type="float">
            <text:p>20010</text:p>
          </table:table-cell>
          <table:table-cell office:value-type="float" office:value="8640000" calcext:value-type="float">
            <text:p>8640000</text:p>
          </table:table-cell>
          <table:table-cell table:formula="of:=[.B1335]/[.C1335]" office:value-type="float" office:value="0.00231597222222222" calcext:value-type="float">
            <text:p>0,00231597222222222000</text:p>
          </table:table-cell>
          <table:table-cell table:formula="of:=[.D1336]-[.D133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[.B1335]+15" office:value-type="float" office:value="20025" calcext:value-type="float">
            <text:p>20025</text:p>
          </table:table-cell>
          <table:table-cell office:value-type="float" office:value="8640000" calcext:value-type="float">
            <text:p>8640000</text:p>
          </table:table-cell>
          <table:table-cell table:formula="of:=[.B1336]/[.C1336]" office:value-type="float" office:value="0.00231770833333333" calcext:value-type="float">
            <text:p>0,00231770833333333000</text:p>
          </table:table-cell>
          <table:table-cell table:formula="of:=[.D1337]-[.D1336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[.B1336]+15" office:value-type="float" office:value="20040" calcext:value-type="float">
            <text:p>20040</text:p>
          </table:table-cell>
          <table:table-cell office:value-type="float" office:value="8640000" calcext:value-type="float">
            <text:p>8640000</text:p>
          </table:table-cell>
          <table:table-cell table:formula="of:=[.B1337]/[.C1337]" office:value-type="float" office:value="0.00231944444444444" calcext:value-type="float">
            <text:p>0,00231944444444444000</text:p>
          </table:table-cell>
          <table:table-cell table:formula="of:=[.D1338]-[.D133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[.B1337]+15" office:value-type="float" office:value="20055" calcext:value-type="float">
            <text:p>20055</text:p>
          </table:table-cell>
          <table:table-cell office:value-type="float" office:value="8640000" calcext:value-type="float">
            <text:p>8640000</text:p>
          </table:table-cell>
          <table:table-cell table:formula="of:=[.B1338]/[.C1338]" office:value-type="float" office:value="0.00232118055555556" calcext:value-type="float">
            <text:p>0,00232118055555556000</text:p>
          </table:table-cell>
          <table:table-cell table:formula="of:=[.D1339]-[.D133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[.B1338]+15" office:value-type="float" office:value="20070" calcext:value-type="float">
            <text:p>20070</text:p>
          </table:table-cell>
          <table:table-cell office:value-type="float" office:value="8640000" calcext:value-type="float">
            <text:p>8640000</text:p>
          </table:table-cell>
          <table:table-cell table:formula="of:=[.B1339]/[.C1339]" office:value-type="float" office:value="0.00232291666666667" calcext:value-type="float">
            <text:p>0,00232291666666667000</text:p>
          </table:table-cell>
          <table:table-cell table:formula="of:=[.D1340]-[.D133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[.B1339]+15" office:value-type="float" office:value="20085" calcext:value-type="float">
            <text:p>20085</text:p>
          </table:table-cell>
          <table:table-cell office:value-type="float" office:value="8640000" calcext:value-type="float">
            <text:p>8640000</text:p>
          </table:table-cell>
          <table:table-cell table:formula="of:=[.B1340]/[.C1340]" office:value-type="float" office:value="0.00232465277777778" calcext:value-type="float">
            <text:p>0,00232465277777778000</text:p>
          </table:table-cell>
          <table:table-cell table:formula="of:=[.D1341]-[.D1340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[.B1340]+15" office:value-type="float" office:value="20100" calcext:value-type="float">
            <text:p>20100</text:p>
          </table:table-cell>
          <table:table-cell office:value-type="float" office:value="8640000" calcext:value-type="float">
            <text:p>8640000</text:p>
          </table:table-cell>
          <table:table-cell table:formula="of:=[.B1341]/[.C1341]" office:value-type="float" office:value="0.00232638888888889" calcext:value-type="float">
            <text:p>0,00232638888888889000</text:p>
          </table:table-cell>
          <table:table-cell table:formula="of:=[.D1342]-[.D134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[.B1341]+15" office:value-type="float" office:value="20115" calcext:value-type="float">
            <text:p>20115</text:p>
          </table:table-cell>
          <table:table-cell office:value-type="float" office:value="8640000" calcext:value-type="float">
            <text:p>8640000</text:p>
          </table:table-cell>
          <table:table-cell table:formula="of:=[.B1342]/[.C1342]" office:value-type="float" office:value="0.002328125" calcext:value-type="float">
            <text:p>0,00232812500000000000</text:p>
          </table:table-cell>
          <table:table-cell table:formula="of:=[.D1343]-[.D134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[.B1342]+15" office:value-type="float" office:value="20130" calcext:value-type="float">
            <text:p>20130</text:p>
          </table:table-cell>
          <table:table-cell office:value-type="float" office:value="8640000" calcext:value-type="float">
            <text:p>8640000</text:p>
          </table:table-cell>
          <table:table-cell table:formula="of:=[.B1343]/[.C1343]" office:value-type="float" office:value="0.00232986111111111" calcext:value-type="float">
            <text:p>0,00232986111111111000</text:p>
          </table:table-cell>
          <table:table-cell table:formula="of:=[.D1344]-[.D134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[.B1343]+15" office:value-type="float" office:value="20145" calcext:value-type="float">
            <text:p>20145</text:p>
          </table:table-cell>
          <table:table-cell office:value-type="float" office:value="8640000" calcext:value-type="float">
            <text:p>8640000</text:p>
          </table:table-cell>
          <table:table-cell table:formula="of:=[.B1344]/[.C1344]" office:value-type="float" office:value="0.00233159722222222" calcext:value-type="float">
            <text:p>0,00233159722222222000</text:p>
          </table:table-cell>
          <table:table-cell table:formula="of:=[.D1345]-[.D134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[.B1344]+15" office:value-type="float" office:value="20160" calcext:value-type="float">
            <text:p>20160</text:p>
          </table:table-cell>
          <table:table-cell office:value-type="float" office:value="8640000" calcext:value-type="float">
            <text:p>8640000</text:p>
          </table:table-cell>
          <table:table-cell table:formula="of:=[.B1345]/[.C1345]" office:value-type="float" office:value="0.00233333333333333" calcext:value-type="float">
            <text:p>0,00233333333333333000</text:p>
          </table:table-cell>
          <table:table-cell table:formula="of:=[.D1346]-[.D1345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[.B1345]+15" office:value-type="float" office:value="20175" calcext:value-type="float">
            <text:p>20175</text:p>
          </table:table-cell>
          <table:table-cell office:value-type="float" office:value="8640000" calcext:value-type="float">
            <text:p>8640000</text:p>
          </table:table-cell>
          <table:table-cell table:formula="of:=[.B1346]/[.C1346]" office:value-type="float" office:value="0.00233506944444444" calcext:value-type="float">
            <text:p>0,00233506944444444000</text:p>
          </table:table-cell>
          <table:table-cell table:formula="of:=[.D1347]-[.D134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[.B1346]+15" office:value-type="float" office:value="20190" calcext:value-type="float">
            <text:p>20190</text:p>
          </table:table-cell>
          <table:table-cell office:value-type="float" office:value="8640000" calcext:value-type="float">
            <text:p>8640000</text:p>
          </table:table-cell>
          <table:table-cell table:formula="of:=[.B1347]/[.C1347]" office:value-type="float" office:value="0.00233680555555556" calcext:value-type="float">
            <text:p>0,00233680555555556000</text:p>
          </table:table-cell>
          <table:table-cell table:formula="of:=[.D1348]-[.D134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[.B1347]+15" office:value-type="float" office:value="20205" calcext:value-type="float">
            <text:p>20205</text:p>
          </table:table-cell>
          <table:table-cell office:value-type="float" office:value="8640000" calcext:value-type="float">
            <text:p>8640000</text:p>
          </table:table-cell>
          <table:table-cell table:formula="of:=[.B1348]/[.C1348]" office:value-type="float" office:value="0.00233854166666667" calcext:value-type="float">
            <text:p>0,00233854166666667000</text:p>
          </table:table-cell>
          <table:table-cell table:formula="of:=[.D1349]-[.D134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[.B1348]+15" office:value-type="float" office:value="20220" calcext:value-type="float">
            <text:p>20220</text:p>
          </table:table-cell>
          <table:table-cell office:value-type="float" office:value="8640000" calcext:value-type="float">
            <text:p>8640000</text:p>
          </table:table-cell>
          <table:table-cell table:formula="of:=[.B1349]/[.C1349]" office:value-type="float" office:value="0.00234027777777778" calcext:value-type="float">
            <text:p>0,00234027777777778000</text:p>
          </table:table-cell>
          <table:table-cell table:formula="of:=[.D1350]-[.D1349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[.B1349]+15" office:value-type="float" office:value="20235" calcext:value-type="float">
            <text:p>20235</text:p>
          </table:table-cell>
          <table:table-cell office:value-type="float" office:value="8640000" calcext:value-type="float">
            <text:p>8640000</text:p>
          </table:table-cell>
          <table:table-cell table:formula="of:=[.B1350]/[.C1350]" office:value-type="float" office:value="0.00234201388888889" calcext:value-type="float">
            <text:p>0,00234201388888889000</text:p>
          </table:table-cell>
          <table:table-cell table:formula="of:=[.D1351]-[.D135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[.B1350]+15" office:value-type="float" office:value="20250" calcext:value-type="float">
            <text:p>20250</text:p>
          </table:table-cell>
          <table:table-cell office:value-type="float" office:value="8640000" calcext:value-type="float">
            <text:p>8640000</text:p>
          </table:table-cell>
          <table:table-cell table:formula="of:=[.B1351]/[.C1351]" office:value-type="float" office:value="0.00234375" calcext:value-type="float">
            <text:p>0,00234375000000000000</text:p>
          </table:table-cell>
          <table:table-cell table:formula="of:=[.D1352]-[.D135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[.B1351]+15" office:value-type="float" office:value="20265" calcext:value-type="float">
            <text:p>20265</text:p>
          </table:table-cell>
          <table:table-cell office:value-type="float" office:value="8640000" calcext:value-type="float">
            <text:p>8640000</text:p>
          </table:table-cell>
          <table:table-cell table:formula="of:=[.B1352]/[.C1352]" office:value-type="float" office:value="0.00234548611111111" calcext:value-type="float">
            <text:p>0,00234548611111111000</text:p>
          </table:table-cell>
          <table:table-cell table:formula="of:=[.D1353]-[.D135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[.B1352]+15" office:value-type="float" office:value="20280" calcext:value-type="float">
            <text:p>20280</text:p>
          </table:table-cell>
          <table:table-cell office:value-type="float" office:value="8640000" calcext:value-type="float">
            <text:p>8640000</text:p>
          </table:table-cell>
          <table:table-cell table:formula="of:=[.B1353]/[.C1353]" office:value-type="float" office:value="0.00234722222222222" calcext:value-type="float">
            <text:p>0,00234722222222222000</text:p>
          </table:table-cell>
          <table:table-cell table:formula="of:=[.D1354]-[.D135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[.B1353]+15" office:value-type="float" office:value="20295" calcext:value-type="float">
            <text:p>20295</text:p>
          </table:table-cell>
          <table:table-cell office:value-type="float" office:value="8640000" calcext:value-type="float">
            <text:p>8640000</text:p>
          </table:table-cell>
          <table:table-cell table:formula="of:=[.B1354]/[.C1354]" office:value-type="float" office:value="0.00234895833333333" calcext:value-type="float">
            <text:p>0,00234895833333333000</text:p>
          </table:table-cell>
          <table:table-cell table:formula="of:=[.D1355]-[.D1354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[.B1354]+15" office:value-type="float" office:value="20310" calcext:value-type="float">
            <text:p>20310</text:p>
          </table:table-cell>
          <table:table-cell office:value-type="float" office:value="8640000" calcext:value-type="float">
            <text:p>8640000</text:p>
          </table:table-cell>
          <table:table-cell table:formula="of:=[.B1355]/[.C1355]" office:value-type="float" office:value="0.00235069444444444" calcext:value-type="float">
            <text:p>0,00235069444444444000</text:p>
          </table:table-cell>
          <table:table-cell table:formula="of:=[.D1356]-[.D135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[.B1355]+15" office:value-type="float" office:value="20325" calcext:value-type="float">
            <text:p>20325</text:p>
          </table:table-cell>
          <table:table-cell office:value-type="float" office:value="8640000" calcext:value-type="float">
            <text:p>8640000</text:p>
          </table:table-cell>
          <table:table-cell table:formula="of:=[.B1356]/[.C1356]" office:value-type="float" office:value="0.00235243055555556" calcext:value-type="float">
            <text:p>0,00235243055555556000</text:p>
          </table:table-cell>
          <table:table-cell table:formula="of:=[.D1357]-[.D135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[.B1356]+15" office:value-type="float" office:value="20340" calcext:value-type="float">
            <text:p>20340</text:p>
          </table:table-cell>
          <table:table-cell office:value-type="float" office:value="8640000" calcext:value-type="float">
            <text:p>8640000</text:p>
          </table:table-cell>
          <table:table-cell table:formula="of:=[.B1357]/[.C1357]" office:value-type="float" office:value="0.00235416666666667" calcext:value-type="float">
            <text:p>0,00235416666666667000</text:p>
          </table:table-cell>
          <table:table-cell table:formula="of:=[.D1358]-[.D135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[.B1357]+15" office:value-type="float" office:value="20355" calcext:value-type="float">
            <text:p>20355</text:p>
          </table:table-cell>
          <table:table-cell office:value-type="float" office:value="8640000" calcext:value-type="float">
            <text:p>8640000</text:p>
          </table:table-cell>
          <table:table-cell table:formula="of:=[.B1358]/[.C1358]" office:value-type="float" office:value="0.00235590277777778" calcext:value-type="float">
            <text:p>0,00235590277777778000</text:p>
          </table:table-cell>
          <table:table-cell table:formula="of:=[.D1359]-[.D1358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[.B1358]+15" office:value-type="float" office:value="20370" calcext:value-type="float">
            <text:p>20370</text:p>
          </table:table-cell>
          <table:table-cell office:value-type="float" office:value="8640000" calcext:value-type="float">
            <text:p>8640000</text:p>
          </table:table-cell>
          <table:table-cell table:formula="of:=[.B1359]/[.C1359]" office:value-type="float" office:value="0.00235763888888889" calcext:value-type="float">
            <text:p>0,00235763888888889000</text:p>
          </table:table-cell>
          <table:table-cell table:formula="of:=[.D1360]-[.D135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[.B1359]+15" office:value-type="float" office:value="20385" calcext:value-type="float">
            <text:p>20385</text:p>
          </table:table-cell>
          <table:table-cell office:value-type="float" office:value="8640000" calcext:value-type="float">
            <text:p>8640000</text:p>
          </table:table-cell>
          <table:table-cell table:formula="of:=[.B1360]/[.C1360]" office:value-type="float" office:value="0.002359375" calcext:value-type="float">
            <text:p>0,00235937500000000000</text:p>
          </table:table-cell>
          <table:table-cell table:formula="of:=[.D1361]-[.D136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[.B1360]+15" office:value-type="float" office:value="20400" calcext:value-type="float">
            <text:p>20400</text:p>
          </table:table-cell>
          <table:table-cell office:value-type="float" office:value="8640000" calcext:value-type="float">
            <text:p>8640000</text:p>
          </table:table-cell>
          <table:table-cell table:formula="of:=[.B1361]/[.C1361]" office:value-type="float" office:value="0.00236111111111111" calcext:value-type="float">
            <text:p>0,00236111111111111000</text:p>
          </table:table-cell>
          <table:table-cell table:formula="of:=[.D1362]-[.D136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[.B1361]+15" office:value-type="float" office:value="20415" calcext:value-type="float">
            <text:p>20415</text:p>
          </table:table-cell>
          <table:table-cell office:value-type="float" office:value="8640000" calcext:value-type="float">
            <text:p>8640000</text:p>
          </table:table-cell>
          <table:table-cell table:formula="of:=[.B1362]/[.C1362]" office:value-type="float" office:value="0.00236284722222222" calcext:value-type="float">
            <text:p>0,00236284722222222000</text:p>
          </table:table-cell>
          <table:table-cell table:formula="of:=[.D1363]-[.D1362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[.B1362]+15" office:value-type="float" office:value="20430" calcext:value-type="float">
            <text:p>20430</text:p>
          </table:table-cell>
          <table:table-cell office:value-type="float" office:value="8640000" calcext:value-type="float">
            <text:p>8640000</text:p>
          </table:table-cell>
          <table:table-cell table:formula="of:=[.B1363]/[.C1363]" office:value-type="float" office:value="0.00236458333333333" calcext:value-type="float">
            <text:p>0,00236458333333333000</text:p>
          </table:table-cell>
          <table:table-cell table:formula="of:=[.D1364]-[.D136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[.B1363]+15" office:value-type="float" office:value="20445" calcext:value-type="float">
            <text:p>20445</text:p>
          </table:table-cell>
          <table:table-cell office:value-type="float" office:value="8640000" calcext:value-type="float">
            <text:p>8640000</text:p>
          </table:table-cell>
          <table:table-cell table:formula="of:=[.B1364]/[.C1364]" office:value-type="float" office:value="0.00236631944444444" calcext:value-type="float">
            <text:p>0,00236631944444444000</text:p>
          </table:table-cell>
          <table:table-cell table:formula="of:=[.D1365]-[.D136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[.B1364]+15" office:value-type="float" office:value="20460" calcext:value-type="float">
            <text:p>20460</text:p>
          </table:table-cell>
          <table:table-cell office:value-type="float" office:value="8640000" calcext:value-type="float">
            <text:p>8640000</text:p>
          </table:table-cell>
          <table:table-cell table:formula="of:=[.B1365]/[.C1365]" office:value-type="float" office:value="0.00236805555555556" calcext:value-type="float">
            <text:p>0,00236805555555556000</text:p>
          </table:table-cell>
          <table:table-cell table:formula="of:=[.D1366]-[.D136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[.B1365]+15" office:value-type="float" office:value="20475" calcext:value-type="float">
            <text:p>20475</text:p>
          </table:table-cell>
          <table:table-cell office:value-type="float" office:value="8640000" calcext:value-type="float">
            <text:p>8640000</text:p>
          </table:table-cell>
          <table:table-cell table:formula="of:=[.B1366]/[.C1366]" office:value-type="float" office:value="0.00236979166666667" calcext:value-type="float">
            <text:p>0,00236979166666667000</text:p>
          </table:table-cell>
          <table:table-cell table:formula="of:=[.D1367]-[.D136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[.B1366]+15" office:value-type="float" office:value="20490" calcext:value-type="float">
            <text:p>20490</text:p>
          </table:table-cell>
          <table:table-cell office:value-type="float" office:value="8640000" calcext:value-type="float">
            <text:p>8640000</text:p>
          </table:table-cell>
          <table:table-cell table:formula="of:=[.B1367]/[.C1367]" office:value-type="float" office:value="0.00237152777777778" calcext:value-type="float">
            <text:p>0,00237152777777778000</text:p>
          </table:table-cell>
          <table:table-cell table:formula="of:=[.D1368]-[.D1367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[.B1367]+15" office:value-type="float" office:value="20505" calcext:value-type="float">
            <text:p>20505</text:p>
          </table:table-cell>
          <table:table-cell office:value-type="float" office:value="8640000" calcext:value-type="float">
            <text:p>8640000</text:p>
          </table:table-cell>
          <table:table-cell table:formula="of:=[.B1368]/[.C1368]" office:value-type="float" office:value="0.00237326388888889" calcext:value-type="float">
            <text:p>0,00237326388888889000</text:p>
          </table:table-cell>
          <table:table-cell table:formula="of:=[.D1369]-[.D136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[.B1368]+15" office:value-type="float" office:value="20520" calcext:value-type="float">
            <text:p>20520</text:p>
          </table:table-cell>
          <table:table-cell office:value-type="float" office:value="8640000" calcext:value-type="float">
            <text:p>8640000</text:p>
          </table:table-cell>
          <table:table-cell table:formula="of:=[.B1369]/[.C1369]" office:value-type="float" office:value="0.002375" calcext:value-type="float">
            <text:p>0,00237500000000000000</text:p>
          </table:table-cell>
          <table:table-cell table:formula="of:=[.D1370]-[.D136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[.B1369]+15" office:value-type="float" office:value="20535" calcext:value-type="float">
            <text:p>20535</text:p>
          </table:table-cell>
          <table:table-cell office:value-type="float" office:value="8640000" calcext:value-type="float">
            <text:p>8640000</text:p>
          </table:table-cell>
          <table:table-cell table:formula="of:=[.B1370]/[.C1370]" office:value-type="float" office:value="0.00237673611111111" calcext:value-type="float">
            <text:p>0,00237673611111111000</text:p>
          </table:table-cell>
          <table:table-cell table:formula="of:=[.D1371]-[.D137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[.B1370]+15" office:value-type="float" office:value="20550" calcext:value-type="float">
            <text:p>20550</text:p>
          </table:table-cell>
          <table:table-cell office:value-type="float" office:value="8640000" calcext:value-type="float">
            <text:p>8640000</text:p>
          </table:table-cell>
          <table:table-cell table:formula="of:=[.B1371]/[.C1371]" office:value-type="float" office:value="0.00237847222222222" calcext:value-type="float">
            <text:p>0,00237847222222222000</text:p>
          </table:table-cell>
          <table:table-cell table:formula="of:=[.D1372]-[.D1371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[.B1371]+15" office:value-type="float" office:value="20565" calcext:value-type="float">
            <text:p>20565</text:p>
          </table:table-cell>
          <table:table-cell office:value-type="float" office:value="8640000" calcext:value-type="float">
            <text:p>8640000</text:p>
          </table:table-cell>
          <table:table-cell table:formula="of:=[.B1372]/[.C1372]" office:value-type="float" office:value="0.00238020833333333" calcext:value-type="float">
            <text:p>0,00238020833333333000</text:p>
          </table:table-cell>
          <table:table-cell table:formula="of:=[.D1373]-[.D137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[.B1372]+15" office:value-type="float" office:value="20580" calcext:value-type="float">
            <text:p>20580</text:p>
          </table:table-cell>
          <table:table-cell office:value-type="float" office:value="8640000" calcext:value-type="float">
            <text:p>8640000</text:p>
          </table:table-cell>
          <table:table-cell table:formula="of:=[.B1373]/[.C1373]" office:value-type="float" office:value="0.00238194444444444" calcext:value-type="float">
            <text:p>0,00238194444444444000</text:p>
          </table:table-cell>
          <table:table-cell table:formula="of:=[.D1374]-[.D137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[.B1373]+15" office:value-type="float" office:value="20595" calcext:value-type="float">
            <text:p>20595</text:p>
          </table:table-cell>
          <table:table-cell office:value-type="float" office:value="8640000" calcext:value-type="float">
            <text:p>8640000</text:p>
          </table:table-cell>
          <table:table-cell table:formula="of:=[.B1374]/[.C1374]" office:value-type="float" office:value="0.00238368055555556" calcext:value-type="float">
            <text:p>0,00238368055555556000</text:p>
          </table:table-cell>
          <table:table-cell table:formula="of:=[.D1375]-[.D137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[.B1374]+15" office:value-type="float" office:value="20610" calcext:value-type="float">
            <text:p>20610</text:p>
          </table:table-cell>
          <table:table-cell office:value-type="float" office:value="8640000" calcext:value-type="float">
            <text:p>8640000</text:p>
          </table:table-cell>
          <table:table-cell table:formula="of:=[.B1375]/[.C1375]" office:value-type="float" office:value="0.00238541666666667" calcext:value-type="float">
            <text:p>0,00238541666666667000</text:p>
          </table:table-cell>
          <table:table-cell table:formula="of:=[.D1376]-[.D137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[.B1375]+15" office:value-type="float" office:value="20625" calcext:value-type="float">
            <text:p>20625</text:p>
          </table:table-cell>
          <table:table-cell office:value-type="float" office:value="8640000" calcext:value-type="float">
            <text:p>8640000</text:p>
          </table:table-cell>
          <table:table-cell table:formula="of:=[.B1376]/[.C1376]" office:value-type="float" office:value="0.00238715277777778" calcext:value-type="float">
            <text:p>0,00238715277777778000</text:p>
          </table:table-cell>
          <table:table-cell table:formula="of:=[.D1377]-[.D1376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[.B1376]+15" office:value-type="float" office:value="20640" calcext:value-type="float">
            <text:p>20640</text:p>
          </table:table-cell>
          <table:table-cell office:value-type="float" office:value="8640000" calcext:value-type="float">
            <text:p>8640000</text:p>
          </table:table-cell>
          <table:table-cell table:formula="of:=[.B1377]/[.C1377]" office:value-type="float" office:value="0.00238888888888889" calcext:value-type="float">
            <text:p>0,00238888888888889000</text:p>
          </table:table-cell>
          <table:table-cell table:formula="of:=[.D1378]-[.D137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[.B1377]+15" office:value-type="float" office:value="20655" calcext:value-type="float">
            <text:p>20655</text:p>
          </table:table-cell>
          <table:table-cell office:value-type="float" office:value="8640000" calcext:value-type="float">
            <text:p>8640000</text:p>
          </table:table-cell>
          <table:table-cell table:formula="of:=[.B1378]/[.C1378]" office:value-type="float" office:value="0.002390625" calcext:value-type="float">
            <text:p>0,00239062500000000000</text:p>
          </table:table-cell>
          <table:table-cell table:formula="of:=[.D1379]-[.D137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[.B1378]+15" office:value-type="float" office:value="20670" calcext:value-type="float">
            <text:p>20670</text:p>
          </table:table-cell>
          <table:table-cell office:value-type="float" office:value="8640000" calcext:value-type="float">
            <text:p>8640000</text:p>
          </table:table-cell>
          <table:table-cell table:formula="of:=[.B1379]/[.C1379]" office:value-type="float" office:value="0.00239236111111111" calcext:value-type="float">
            <text:p>0,00239236111111111000</text:p>
          </table:table-cell>
          <table:table-cell table:formula="of:=[.D1380]-[.D137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[.B1379]+15" office:value-type="float" office:value="20685" calcext:value-type="float">
            <text:p>20685</text:p>
          </table:table-cell>
          <table:table-cell office:value-type="float" office:value="8640000" calcext:value-type="float">
            <text:p>8640000</text:p>
          </table:table-cell>
          <table:table-cell table:formula="of:=[.B1380]/[.C1380]" office:value-type="float" office:value="0.00239409722222222" calcext:value-type="float">
            <text:p>0,00239409722222222000</text:p>
          </table:table-cell>
          <table:table-cell table:formula="of:=[.D1381]-[.D1380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[.B1380]+15" office:value-type="float" office:value="20700" calcext:value-type="float">
            <text:p>20700</text:p>
          </table:table-cell>
          <table:table-cell office:value-type="float" office:value="8640000" calcext:value-type="float">
            <text:p>8640000</text:p>
          </table:table-cell>
          <table:table-cell table:formula="of:=[.B1381]/[.C1381]" office:value-type="float" office:value="0.00239583333333333" calcext:value-type="float">
            <text:p>0,00239583333333333000</text:p>
          </table:table-cell>
          <table:table-cell table:formula="of:=[.D1382]-[.D138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[.B1381]+15" office:value-type="float" office:value="20715" calcext:value-type="float">
            <text:p>20715</text:p>
          </table:table-cell>
          <table:table-cell office:value-type="float" office:value="8640000" calcext:value-type="float">
            <text:p>8640000</text:p>
          </table:table-cell>
          <table:table-cell table:formula="of:=[.B1382]/[.C1382]" office:value-type="float" office:value="0.00239756944444444" calcext:value-type="float">
            <text:p>0,00239756944444444000</text:p>
          </table:table-cell>
          <table:table-cell table:formula="of:=[.D1383]-[.D138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[.B1382]+15" office:value-type="float" office:value="20730" calcext:value-type="float">
            <text:p>20730</text:p>
          </table:table-cell>
          <table:table-cell office:value-type="float" office:value="8640000" calcext:value-type="float">
            <text:p>8640000</text:p>
          </table:table-cell>
          <table:table-cell table:formula="of:=[.B1383]/[.C1383]" office:value-type="float" office:value="0.00239930555555556" calcext:value-type="float">
            <text:p>0,00239930555555556000</text:p>
          </table:table-cell>
          <table:table-cell table:formula="of:=[.D1384]-[.D138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[.B1383]+15" office:value-type="float" office:value="20745" calcext:value-type="float">
            <text:p>20745</text:p>
          </table:table-cell>
          <table:table-cell office:value-type="float" office:value="8640000" calcext:value-type="float">
            <text:p>8640000</text:p>
          </table:table-cell>
          <table:table-cell table:formula="of:=[.B1384]/[.C1384]" office:value-type="float" office:value="0.00240104166666667" calcext:value-type="float">
            <text:p>0,00240104166666667000</text:p>
          </table:table-cell>
          <table:table-cell table:formula="of:=[.D1385]-[.D138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[.B1384]+15" office:value-type="float" office:value="20760" calcext:value-type="float">
            <text:p>20760</text:p>
          </table:table-cell>
          <table:table-cell office:value-type="float" office:value="8640000" calcext:value-type="float">
            <text:p>8640000</text:p>
          </table:table-cell>
          <table:table-cell table:formula="of:=[.B1385]/[.C1385]" office:value-type="float" office:value="0.00240277777777778" calcext:value-type="float">
            <text:p>0,00240277777777778000</text:p>
          </table:table-cell>
          <table:table-cell table:formula="of:=[.D1386]-[.D1385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[.B1385]+15" office:value-type="float" office:value="20775" calcext:value-type="float">
            <text:p>20775</text:p>
          </table:table-cell>
          <table:table-cell office:value-type="float" office:value="8640000" calcext:value-type="float">
            <text:p>8640000</text:p>
          </table:table-cell>
          <table:table-cell table:formula="of:=[.B1386]/[.C1386]" office:value-type="float" office:value="0.00240451388888889" calcext:value-type="float">
            <text:p>0,00240451388888889000</text:p>
          </table:table-cell>
          <table:table-cell table:formula="of:=[.D1387]-[.D138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[.B1386]+15" office:value-type="float" office:value="20790" calcext:value-type="float">
            <text:p>20790</text:p>
          </table:table-cell>
          <table:table-cell office:value-type="float" office:value="8640000" calcext:value-type="float">
            <text:p>8640000</text:p>
          </table:table-cell>
          <table:table-cell table:formula="of:=[.B1387]/[.C1387]" office:value-type="float" office:value="0.00240625" calcext:value-type="float">
            <text:p>0,00240625000000000000</text:p>
          </table:table-cell>
          <table:table-cell table:formula="of:=[.D1388]-[.D138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[.B1387]+15" office:value-type="float" office:value="20805" calcext:value-type="float">
            <text:p>20805</text:p>
          </table:table-cell>
          <table:table-cell office:value-type="float" office:value="8640000" calcext:value-type="float">
            <text:p>8640000</text:p>
          </table:table-cell>
          <table:table-cell table:formula="of:=[.B1388]/[.C1388]" office:value-type="float" office:value="0.00240798611111111" calcext:value-type="float">
            <text:p>0,00240798611111111000</text:p>
          </table:table-cell>
          <table:table-cell table:formula="of:=[.D1389]-[.D138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[.B1388]+15" office:value-type="float" office:value="20820" calcext:value-type="float">
            <text:p>20820</text:p>
          </table:table-cell>
          <table:table-cell office:value-type="float" office:value="8640000" calcext:value-type="float">
            <text:p>8640000</text:p>
          </table:table-cell>
          <table:table-cell table:formula="of:=[.B1389]/[.C1389]" office:value-type="float" office:value="0.00240972222222222" calcext:value-type="float">
            <text:p>0,00240972222222222000</text:p>
          </table:table-cell>
          <table:table-cell table:formula="of:=[.D1390]-[.D1389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[.B1389]+15" office:value-type="float" office:value="20835" calcext:value-type="float">
            <text:p>20835</text:p>
          </table:table-cell>
          <table:table-cell office:value-type="float" office:value="8640000" calcext:value-type="float">
            <text:p>8640000</text:p>
          </table:table-cell>
          <table:table-cell table:formula="of:=[.B1390]/[.C1390]" office:value-type="float" office:value="0.00241145833333333" calcext:value-type="float">
            <text:p>0,00241145833333333000</text:p>
          </table:table-cell>
          <table:table-cell table:formula="of:=[.D1391]-[.D139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[.B1390]+15" office:value-type="float" office:value="20850" calcext:value-type="float">
            <text:p>20850</text:p>
          </table:table-cell>
          <table:table-cell office:value-type="float" office:value="8640000" calcext:value-type="float">
            <text:p>8640000</text:p>
          </table:table-cell>
          <table:table-cell table:formula="of:=[.B1391]/[.C1391]" office:value-type="float" office:value="0.00241319444444444" calcext:value-type="float">
            <text:p>0,00241319444444444000</text:p>
          </table:table-cell>
          <table:table-cell table:formula="of:=[.D1392]-[.D139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[.B1391]+15" office:value-type="float" office:value="20865" calcext:value-type="float">
            <text:p>20865</text:p>
          </table:table-cell>
          <table:table-cell office:value-type="float" office:value="8640000" calcext:value-type="float">
            <text:p>8640000</text:p>
          </table:table-cell>
          <table:table-cell table:formula="of:=[.B1392]/[.C1392]" office:value-type="float" office:value="0.00241493055555556" calcext:value-type="float">
            <text:p>0,00241493055555556000</text:p>
          </table:table-cell>
          <table:table-cell table:formula="of:=[.D1393]-[.D139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[.B1392]+15" office:value-type="float" office:value="20880" calcext:value-type="float">
            <text:p>20880</text:p>
          </table:table-cell>
          <table:table-cell office:value-type="float" office:value="8640000" calcext:value-type="float">
            <text:p>8640000</text:p>
          </table:table-cell>
          <table:table-cell table:formula="of:=[.B1393]/[.C1393]" office:value-type="float" office:value="0.00241666666666667" calcext:value-type="float">
            <text:p>0,00241666666666667000</text:p>
          </table:table-cell>
          <table:table-cell table:formula="of:=[.D1394]-[.D1393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[.B1393]+15" office:value-type="float" office:value="20895" calcext:value-type="float">
            <text:p>20895</text:p>
          </table:table-cell>
          <table:table-cell office:value-type="float" office:value="8640000" calcext:value-type="float">
            <text:p>8640000</text:p>
          </table:table-cell>
          <table:table-cell table:formula="of:=[.B1394]/[.C1394]" office:value-type="float" office:value="0.00241840277777778" calcext:value-type="float">
            <text:p>0,00241840277777778000</text:p>
          </table:table-cell>
          <table:table-cell table:formula="of:=[.D1395]-[.D139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[.B1394]+15" office:value-type="float" office:value="20910" calcext:value-type="float">
            <text:p>20910</text:p>
          </table:table-cell>
          <table:table-cell office:value-type="float" office:value="8640000" calcext:value-type="float">
            <text:p>8640000</text:p>
          </table:table-cell>
          <table:table-cell table:formula="of:=[.B1395]/[.C1395]" office:value-type="float" office:value="0.00242013888888889" calcext:value-type="float">
            <text:p>0,00242013888888889000</text:p>
          </table:table-cell>
          <table:table-cell table:formula="of:=[.D1396]-[.D139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[.B1395]+15" office:value-type="float" office:value="20925" calcext:value-type="float">
            <text:p>20925</text:p>
          </table:table-cell>
          <table:table-cell office:value-type="float" office:value="8640000" calcext:value-type="float">
            <text:p>8640000</text:p>
          </table:table-cell>
          <table:table-cell table:formula="of:=[.B1396]/[.C1396]" office:value-type="float" office:value="0.002421875" calcext:value-type="float">
            <text:p>0,00242187500000000000</text:p>
          </table:table-cell>
          <table:table-cell table:formula="of:=[.D1397]-[.D139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[.B1396]+15" office:value-type="float" office:value="20940" calcext:value-type="float">
            <text:p>20940</text:p>
          </table:table-cell>
          <table:table-cell office:value-type="float" office:value="8640000" calcext:value-type="float">
            <text:p>8640000</text:p>
          </table:table-cell>
          <table:table-cell table:formula="of:=[.B1397]/[.C1397]" office:value-type="float" office:value="0.00242361111111111" calcext:value-type="float">
            <text:p>0,00242361111111111000</text:p>
          </table:table-cell>
          <table:table-cell table:formula="of:=[.D1398]-[.D139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[.B1397]+15" office:value-type="float" office:value="20955" calcext:value-type="float">
            <text:p>20955</text:p>
          </table:table-cell>
          <table:table-cell office:value-type="float" office:value="8640000" calcext:value-type="float">
            <text:p>8640000</text:p>
          </table:table-cell>
          <table:table-cell table:formula="of:=[.B1398]/[.C1398]" office:value-type="float" office:value="0.00242534722222222" calcext:value-type="float">
            <text:p>0,00242534722222222000</text:p>
          </table:table-cell>
          <table:table-cell table:formula="of:=[.D1399]-[.D1398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[.B1398]+15" office:value-type="float" office:value="20970" calcext:value-type="float">
            <text:p>20970</text:p>
          </table:table-cell>
          <table:table-cell office:value-type="float" office:value="8640000" calcext:value-type="float">
            <text:p>8640000</text:p>
          </table:table-cell>
          <table:table-cell table:formula="of:=[.B1399]/[.C1399]" office:value-type="float" office:value="0.00242708333333333" calcext:value-type="float">
            <text:p>0,00242708333333333000</text:p>
          </table:table-cell>
          <table:table-cell table:formula="of:=[.D1400]-[.D139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[.B1399]+15" office:value-type="float" office:value="20985" calcext:value-type="float">
            <text:p>20985</text:p>
          </table:table-cell>
          <table:table-cell office:value-type="float" office:value="8640000" calcext:value-type="float">
            <text:p>8640000</text:p>
          </table:table-cell>
          <table:table-cell table:formula="of:=[.B1400]/[.C1400]" office:value-type="float" office:value="0.00242881944444444" calcext:value-type="float">
            <text:p>0,00242881944444444000</text:p>
          </table:table-cell>
          <table:table-cell table:formula="of:=[.D1401]-[.D140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B1400]+15" office:value-type="float" office:value="21000" calcext:value-type="float">
            <text:p>21000</text:p>
          </table:table-cell>
          <table:table-cell office:value-type="float" office:value="8640000" calcext:value-type="float">
            <text:p>8640000</text:p>
          </table:table-cell>
          <table:table-cell table:formula="of:=[.B1401]/[.C1401]" office:value-type="float" office:value="0.00243055555555556" calcext:value-type="float">
            <text:p>0,00243055555555556000</text:p>
          </table:table-cell>
          <table:table-cell table:formula="of:=[.D1402]-[.D140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[.B1401]+15" office:value-type="float" office:value="21015" calcext:value-type="float">
            <text:p>21015</text:p>
          </table:table-cell>
          <table:table-cell office:value-type="float" office:value="8640000" calcext:value-type="float">
            <text:p>8640000</text:p>
          </table:table-cell>
          <table:table-cell table:formula="of:=[.B1402]/[.C1402]" office:value-type="float" office:value="0.00243229166666667" calcext:value-type="float">
            <text:p>0,00243229166666667000</text:p>
          </table:table-cell>
          <table:table-cell table:formula="of:=[.D1403]-[.D1402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[.B1402]+15" office:value-type="float" office:value="21030" calcext:value-type="float">
            <text:p>21030</text:p>
          </table:table-cell>
          <table:table-cell office:value-type="float" office:value="8640000" calcext:value-type="float">
            <text:p>8640000</text:p>
          </table:table-cell>
          <table:table-cell table:formula="of:=[.B1403]/[.C1403]" office:value-type="float" office:value="0.00243402777777778" calcext:value-type="float">
            <text:p>0,00243402777777778000</text:p>
          </table:table-cell>
          <table:table-cell table:formula="of:=[.D1404]-[.D140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[.B1403]+15" office:value-type="float" office:value="21045" calcext:value-type="float">
            <text:p>21045</text:p>
          </table:table-cell>
          <table:table-cell office:value-type="float" office:value="8640000" calcext:value-type="float">
            <text:p>8640000</text:p>
          </table:table-cell>
          <table:table-cell table:formula="of:=[.B1404]/[.C1404]" office:value-type="float" office:value="0.00243576388888889" calcext:value-type="float">
            <text:p>0,00243576388888889000</text:p>
          </table:table-cell>
          <table:table-cell table:formula="of:=[.D1405]-[.D140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[.B1404]+15" office:value-type="float" office:value="21060" calcext:value-type="float">
            <text:p>21060</text:p>
          </table:table-cell>
          <table:table-cell office:value-type="float" office:value="8640000" calcext:value-type="float">
            <text:p>8640000</text:p>
          </table:table-cell>
          <table:table-cell table:formula="of:=[.B1405]/[.C1405]" office:value-type="float" office:value="0.0024375" calcext:value-type="float">
            <text:p>0,00243750000000000000</text:p>
          </table:table-cell>
          <table:table-cell table:formula="of:=[.D1406]-[.D140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[.B1405]+15" office:value-type="float" office:value="21075" calcext:value-type="float">
            <text:p>21075</text:p>
          </table:table-cell>
          <table:table-cell office:value-type="float" office:value="8640000" calcext:value-type="float">
            <text:p>8640000</text:p>
          </table:table-cell>
          <table:table-cell table:formula="of:=[.B1406]/[.C1406]" office:value-type="float" office:value="0.00243923611111111" calcext:value-type="float">
            <text:p>0,00243923611111111000</text:p>
          </table:table-cell>
          <table:table-cell table:formula="of:=[.D1407]-[.D140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[.B1406]+15" office:value-type="float" office:value="21090" calcext:value-type="float">
            <text:p>21090</text:p>
          </table:table-cell>
          <table:table-cell office:value-type="float" office:value="8640000" calcext:value-type="float">
            <text:p>8640000</text:p>
          </table:table-cell>
          <table:table-cell table:formula="of:=[.B1407]/[.C1407]" office:value-type="float" office:value="0.00244097222222222" calcext:value-type="float">
            <text:p>0,00244097222222222000</text:p>
          </table:table-cell>
          <table:table-cell table:formula="of:=[.D1408]-[.D1407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[.B1407]+15" office:value-type="float" office:value="21105" calcext:value-type="float">
            <text:p>21105</text:p>
          </table:table-cell>
          <table:table-cell office:value-type="float" office:value="8640000" calcext:value-type="float">
            <text:p>8640000</text:p>
          </table:table-cell>
          <table:table-cell table:formula="of:=[.B1408]/[.C1408]" office:value-type="float" office:value="0.00244270833333333" calcext:value-type="float">
            <text:p>0,00244270833333333000</text:p>
          </table:table-cell>
          <table:table-cell table:formula="of:=[.D1409]-[.D140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[.B1408]+15" office:value-type="float" office:value="21120" calcext:value-type="float">
            <text:p>21120</text:p>
          </table:table-cell>
          <table:table-cell office:value-type="float" office:value="8640000" calcext:value-type="float">
            <text:p>8640000</text:p>
          </table:table-cell>
          <table:table-cell table:formula="of:=[.B1409]/[.C1409]" office:value-type="float" office:value="0.00244444444444444" calcext:value-type="float">
            <text:p>0,00244444444444444000</text:p>
          </table:table-cell>
          <table:table-cell table:formula="of:=[.D1410]-[.D140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[.B1409]+15" office:value-type="float" office:value="21135" calcext:value-type="float">
            <text:p>21135</text:p>
          </table:table-cell>
          <table:table-cell office:value-type="float" office:value="8640000" calcext:value-type="float">
            <text:p>8640000</text:p>
          </table:table-cell>
          <table:table-cell table:formula="of:=[.B1410]/[.C1410]" office:value-type="float" office:value="0.00244618055555556" calcext:value-type="float">
            <text:p>0,00244618055555556000</text:p>
          </table:table-cell>
          <table:table-cell table:formula="of:=[.D1411]-[.D141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[.B1410]+15" office:value-type="float" office:value="21150" calcext:value-type="float">
            <text:p>21150</text:p>
          </table:table-cell>
          <table:table-cell office:value-type="float" office:value="8640000" calcext:value-type="float">
            <text:p>8640000</text:p>
          </table:table-cell>
          <table:table-cell table:formula="of:=[.B1411]/[.C1411]" office:value-type="float" office:value="0.00244791666666667" calcext:value-type="float">
            <text:p>0,00244791666666667000</text:p>
          </table:table-cell>
          <table:table-cell table:formula="of:=[.D1412]-[.D1411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[.B1411]+15" office:value-type="float" office:value="21165" calcext:value-type="float">
            <text:p>21165</text:p>
          </table:table-cell>
          <table:table-cell office:value-type="float" office:value="8640000" calcext:value-type="float">
            <text:p>8640000</text:p>
          </table:table-cell>
          <table:table-cell table:formula="of:=[.B1412]/[.C1412]" office:value-type="float" office:value="0.00244965277777778" calcext:value-type="float">
            <text:p>0,00244965277777778000</text:p>
          </table:table-cell>
          <table:table-cell table:formula="of:=[.D1413]-[.D141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[.B1412]+15" office:value-type="float" office:value="21180" calcext:value-type="float">
            <text:p>21180</text:p>
          </table:table-cell>
          <table:table-cell office:value-type="float" office:value="8640000" calcext:value-type="float">
            <text:p>8640000</text:p>
          </table:table-cell>
          <table:table-cell table:formula="of:=[.B1413]/[.C1413]" office:value-type="float" office:value="0.00245138888888889" calcext:value-type="float">
            <text:p>0,00245138888888889000</text:p>
          </table:table-cell>
          <table:table-cell table:formula="of:=[.D1414]-[.D141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[.B1413]+15" office:value-type="float" office:value="21195" calcext:value-type="float">
            <text:p>21195</text:p>
          </table:table-cell>
          <table:table-cell office:value-type="float" office:value="8640000" calcext:value-type="float">
            <text:p>8640000</text:p>
          </table:table-cell>
          <table:table-cell table:formula="of:=[.B1414]/[.C1414]" office:value-type="float" office:value="0.002453125" calcext:value-type="float">
            <text:p>0,00245312500000000000</text:p>
          </table:table-cell>
          <table:table-cell table:formula="of:=[.D1415]-[.D141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[.B1414]+15" office:value-type="float" office:value="21210" calcext:value-type="float">
            <text:p>21210</text:p>
          </table:table-cell>
          <table:table-cell office:value-type="float" office:value="8640000" calcext:value-type="float">
            <text:p>8640000</text:p>
          </table:table-cell>
          <table:table-cell table:formula="of:=[.B1415]/[.C1415]" office:value-type="float" office:value="0.00245486111111111" calcext:value-type="float">
            <text:p>0,00245486111111111000</text:p>
          </table:table-cell>
          <table:table-cell table:formula="of:=[.D1416]-[.D141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[.B1415]+15" office:value-type="float" office:value="21225" calcext:value-type="float">
            <text:p>21225</text:p>
          </table:table-cell>
          <table:table-cell office:value-type="float" office:value="8640000" calcext:value-type="float">
            <text:p>8640000</text:p>
          </table:table-cell>
          <table:table-cell table:formula="of:=[.B1416]/[.C1416]" office:value-type="float" office:value="0.00245659722222222" calcext:value-type="float">
            <text:p>0,00245659722222222000</text:p>
          </table:table-cell>
          <table:table-cell table:formula="of:=[.D1417]-[.D1416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[.B1416]+15" office:value-type="float" office:value="21240" calcext:value-type="float">
            <text:p>21240</text:p>
          </table:table-cell>
          <table:table-cell office:value-type="float" office:value="8640000" calcext:value-type="float">
            <text:p>8640000</text:p>
          </table:table-cell>
          <table:table-cell table:formula="of:=[.B1417]/[.C1417]" office:value-type="float" office:value="0.00245833333333333" calcext:value-type="float">
            <text:p>0,00245833333333333000</text:p>
          </table:table-cell>
          <table:table-cell table:formula="of:=[.D1418]-[.D141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[.B1417]+15" office:value-type="float" office:value="21255" calcext:value-type="float">
            <text:p>21255</text:p>
          </table:table-cell>
          <table:table-cell office:value-type="float" office:value="8640000" calcext:value-type="float">
            <text:p>8640000</text:p>
          </table:table-cell>
          <table:table-cell table:formula="of:=[.B1418]/[.C1418]" office:value-type="float" office:value="0.00246006944444444" calcext:value-type="float">
            <text:p>0,00246006944444444000</text:p>
          </table:table-cell>
          <table:table-cell table:formula="of:=[.D1419]-[.D141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[.B1418]+15" office:value-type="float" office:value="21270" calcext:value-type="float">
            <text:p>21270</text:p>
          </table:table-cell>
          <table:table-cell office:value-type="float" office:value="8640000" calcext:value-type="float">
            <text:p>8640000</text:p>
          </table:table-cell>
          <table:table-cell table:formula="of:=[.B1419]/[.C1419]" office:value-type="float" office:value="0.00246180555555556" calcext:value-type="float">
            <text:p>0,00246180555555556000</text:p>
          </table:table-cell>
          <table:table-cell table:formula="of:=[.D1420]-[.D141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[.B1419]+15" office:value-type="float" office:value="21285" calcext:value-type="float">
            <text:p>21285</text:p>
          </table:table-cell>
          <table:table-cell office:value-type="float" office:value="8640000" calcext:value-type="float">
            <text:p>8640000</text:p>
          </table:table-cell>
          <table:table-cell table:formula="of:=[.B1420]/[.C1420]" office:value-type="float" office:value="0.00246354166666667" calcext:value-type="float">
            <text:p>0,00246354166666667000</text:p>
          </table:table-cell>
          <table:table-cell table:formula="of:=[.D1421]-[.D1420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[.B1420]+15" office:value-type="float" office:value="21300" calcext:value-type="float">
            <text:p>21300</text:p>
          </table:table-cell>
          <table:table-cell office:value-type="float" office:value="8640000" calcext:value-type="float">
            <text:p>8640000</text:p>
          </table:table-cell>
          <table:table-cell table:formula="of:=[.B1421]/[.C1421]" office:value-type="float" office:value="0.00246527777777778" calcext:value-type="float">
            <text:p>0,00246527777777778000</text:p>
          </table:table-cell>
          <table:table-cell table:formula="of:=[.D1422]-[.D142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[.B1421]+15" office:value-type="float" office:value="21315" calcext:value-type="float">
            <text:p>21315</text:p>
          </table:table-cell>
          <table:table-cell office:value-type="float" office:value="8640000" calcext:value-type="float">
            <text:p>8640000</text:p>
          </table:table-cell>
          <table:table-cell table:formula="of:=[.B1422]/[.C1422]" office:value-type="float" office:value="0.00246701388888889" calcext:value-type="float">
            <text:p>0,00246701388888889000</text:p>
          </table:table-cell>
          <table:table-cell table:formula="of:=[.D1423]-[.D142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[.B1422]+15" office:value-type="float" office:value="21330" calcext:value-type="float">
            <text:p>21330</text:p>
          </table:table-cell>
          <table:table-cell office:value-type="float" office:value="8640000" calcext:value-type="float">
            <text:p>8640000</text:p>
          </table:table-cell>
          <table:table-cell table:formula="of:=[.B1423]/[.C1423]" office:value-type="float" office:value="0.00246875" calcext:value-type="float">
            <text:p>0,00246875000000000000</text:p>
          </table:table-cell>
          <table:table-cell table:formula="of:=[.D1424]-[.D142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[.B1423]+15" office:value-type="float" office:value="21345" calcext:value-type="float">
            <text:p>21345</text:p>
          </table:table-cell>
          <table:table-cell office:value-type="float" office:value="8640000" calcext:value-type="float">
            <text:p>8640000</text:p>
          </table:table-cell>
          <table:table-cell table:formula="of:=[.B1424]/[.C1424]" office:value-type="float" office:value="0.00247048611111111" calcext:value-type="float">
            <text:p>0,00247048611111111000</text:p>
          </table:table-cell>
          <table:table-cell table:formula="of:=[.D1425]-[.D1424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[.B1424]+15" office:value-type="float" office:value="21360" calcext:value-type="float">
            <text:p>21360</text:p>
          </table:table-cell>
          <table:table-cell office:value-type="float" office:value="8640000" calcext:value-type="float">
            <text:p>8640000</text:p>
          </table:table-cell>
          <table:table-cell table:formula="of:=[.B1425]/[.C1425]" office:value-type="float" office:value="0.00247222222222222" calcext:value-type="float">
            <text:p>0,00247222222222222000</text:p>
          </table:table-cell>
          <table:table-cell table:formula="of:=[.D1426]-[.D142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[.B1425]+15" office:value-type="float" office:value="21375" calcext:value-type="float">
            <text:p>21375</text:p>
          </table:table-cell>
          <table:table-cell office:value-type="float" office:value="8640000" calcext:value-type="float">
            <text:p>8640000</text:p>
          </table:table-cell>
          <table:table-cell table:formula="of:=[.B1426]/[.C1426]" office:value-type="float" office:value="0.00247395833333333" calcext:value-type="float">
            <text:p>0,00247395833333333000</text:p>
          </table:table-cell>
          <table:table-cell table:formula="of:=[.D1427]-[.D142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[.B1426]+15" office:value-type="float" office:value="21390" calcext:value-type="float">
            <text:p>21390</text:p>
          </table:table-cell>
          <table:table-cell office:value-type="float" office:value="8640000" calcext:value-type="float">
            <text:p>8640000</text:p>
          </table:table-cell>
          <table:table-cell table:formula="of:=[.B1427]/[.C1427]" office:value-type="float" office:value="0.00247569444444444" calcext:value-type="float">
            <text:p>0,00247569444444444000</text:p>
          </table:table-cell>
          <table:table-cell table:formula="of:=[.D1428]-[.D142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[.B1427]+15" office:value-type="float" office:value="21405" calcext:value-type="float">
            <text:p>21405</text:p>
          </table:table-cell>
          <table:table-cell office:value-type="float" office:value="8640000" calcext:value-type="float">
            <text:p>8640000</text:p>
          </table:table-cell>
          <table:table-cell table:formula="of:=[.B1428]/[.C1428]" office:value-type="float" office:value="0.00247743055555556" calcext:value-type="float">
            <text:p>0,00247743055555556000</text:p>
          </table:table-cell>
          <table:table-cell table:formula="of:=[.D1429]-[.D142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[.B1428]+15" office:value-type="float" office:value="21420" calcext:value-type="float">
            <text:p>21420</text:p>
          </table:table-cell>
          <table:table-cell office:value-type="float" office:value="8640000" calcext:value-type="float">
            <text:p>8640000</text:p>
          </table:table-cell>
          <table:table-cell table:formula="of:=[.B1429]/[.C1429]" office:value-type="float" office:value="0.00247916666666667" calcext:value-type="float">
            <text:p>0,00247916666666667000</text:p>
          </table:table-cell>
          <table:table-cell table:formula="of:=[.D1430]-[.D1429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[.B1429]+15" office:value-type="float" office:value="21435" calcext:value-type="float">
            <text:p>21435</text:p>
          </table:table-cell>
          <table:table-cell office:value-type="float" office:value="8640000" calcext:value-type="float">
            <text:p>8640000</text:p>
          </table:table-cell>
          <table:table-cell table:formula="of:=[.B1430]/[.C1430]" office:value-type="float" office:value="0.00248090277777778" calcext:value-type="float">
            <text:p>0,00248090277777778000</text:p>
          </table:table-cell>
          <table:table-cell table:formula="of:=[.D1431]-[.D143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[.B1430]+15" office:value-type="float" office:value="21450" calcext:value-type="float">
            <text:p>21450</text:p>
          </table:table-cell>
          <table:table-cell office:value-type="float" office:value="8640000" calcext:value-type="float">
            <text:p>8640000</text:p>
          </table:table-cell>
          <table:table-cell table:formula="of:=[.B1431]/[.C1431]" office:value-type="float" office:value="0.00248263888888889" calcext:value-type="float">
            <text:p>0,00248263888888889000</text:p>
          </table:table-cell>
          <table:table-cell table:formula="of:=[.D1432]-[.D143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[.B1431]+15" office:value-type="float" office:value="21465" calcext:value-type="float">
            <text:p>21465</text:p>
          </table:table-cell>
          <table:table-cell office:value-type="float" office:value="8640000" calcext:value-type="float">
            <text:p>8640000</text:p>
          </table:table-cell>
          <table:table-cell table:formula="of:=[.B1432]/[.C1432]" office:value-type="float" office:value="0.002484375" calcext:value-type="float">
            <text:p>0,00248437500000000000</text:p>
          </table:table-cell>
          <table:table-cell table:formula="of:=[.D1433]-[.D143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[.B1432]+15" office:value-type="float" office:value="21480" calcext:value-type="float">
            <text:p>21480</text:p>
          </table:table-cell>
          <table:table-cell office:value-type="float" office:value="8640000" calcext:value-type="float">
            <text:p>8640000</text:p>
          </table:table-cell>
          <table:table-cell table:formula="of:=[.B1433]/[.C1433]" office:value-type="float" office:value="0.00248611111111111" calcext:value-type="float">
            <text:p>0,00248611111111111000</text:p>
          </table:table-cell>
          <table:table-cell table:formula="of:=[.D1434]-[.D1433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[.B1433]+15" office:value-type="float" office:value="21495" calcext:value-type="float">
            <text:p>21495</text:p>
          </table:table-cell>
          <table:table-cell office:value-type="float" office:value="8640000" calcext:value-type="float">
            <text:p>8640000</text:p>
          </table:table-cell>
          <table:table-cell table:formula="of:=[.B1434]/[.C1434]" office:value-type="float" office:value="0.00248784722222222" calcext:value-type="float">
            <text:p>0,00248784722222222000</text:p>
          </table:table-cell>
          <table:table-cell table:formula="of:=[.D1435]-[.D143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[.B1434]+15" office:value-type="float" office:value="21510" calcext:value-type="float">
            <text:p>21510</text:p>
          </table:table-cell>
          <table:table-cell office:value-type="float" office:value="8640000" calcext:value-type="float">
            <text:p>8640000</text:p>
          </table:table-cell>
          <table:table-cell table:formula="of:=[.B1435]/[.C1435]" office:value-type="float" office:value="0.00248958333333333" calcext:value-type="float">
            <text:p>0,00248958333333333000</text:p>
          </table:table-cell>
          <table:table-cell table:formula="of:=[.D1436]-[.D143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[.B1435]+15" office:value-type="float" office:value="21525" calcext:value-type="float">
            <text:p>21525</text:p>
          </table:table-cell>
          <table:table-cell office:value-type="float" office:value="8640000" calcext:value-type="float">
            <text:p>8640000</text:p>
          </table:table-cell>
          <table:table-cell table:formula="of:=[.B1436]/[.C1436]" office:value-type="float" office:value="0.00249131944444444" calcext:value-type="float">
            <text:p>0,00249131944444444000</text:p>
          </table:table-cell>
          <table:table-cell table:formula="of:=[.D1437]-[.D143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[.B1436]+15" office:value-type="float" office:value="21540" calcext:value-type="float">
            <text:p>21540</text:p>
          </table:table-cell>
          <table:table-cell office:value-type="float" office:value="8640000" calcext:value-type="float">
            <text:p>8640000</text:p>
          </table:table-cell>
          <table:table-cell table:formula="of:=[.B1437]/[.C1437]" office:value-type="float" office:value="0.00249305555555556" calcext:value-type="float">
            <text:p>0,00249305555555556000</text:p>
          </table:table-cell>
          <table:table-cell table:formula="of:=[.D1438]-[.D143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[.B1437]+15" office:value-type="float" office:value="21555" calcext:value-type="float">
            <text:p>21555</text:p>
          </table:table-cell>
          <table:table-cell office:value-type="float" office:value="8640000" calcext:value-type="float">
            <text:p>8640000</text:p>
          </table:table-cell>
          <table:table-cell table:formula="of:=[.B1438]/[.C1438]" office:value-type="float" office:value="0.00249479166666667" calcext:value-type="float">
            <text:p>0,00249479166666667000</text:p>
          </table:table-cell>
          <table:table-cell table:formula="of:=[.D1439]-[.D1438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[.B1438]+15" office:value-type="float" office:value="21570" calcext:value-type="float">
            <text:p>21570</text:p>
          </table:table-cell>
          <table:table-cell office:value-type="float" office:value="8640000" calcext:value-type="float">
            <text:p>8640000</text:p>
          </table:table-cell>
          <table:table-cell table:formula="of:=[.B1439]/[.C1439]" office:value-type="float" office:value="0.00249652777777778" calcext:value-type="float">
            <text:p>0,00249652777777778000</text:p>
          </table:table-cell>
          <table:table-cell table:formula="of:=[.D1440]-[.D143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[.B1439]+15" office:value-type="float" office:value="21585" calcext:value-type="float">
            <text:p>21585</text:p>
          </table:table-cell>
          <table:table-cell office:value-type="float" office:value="8640000" calcext:value-type="float">
            <text:p>8640000</text:p>
          </table:table-cell>
          <table:table-cell table:formula="of:=[.B1440]/[.C1440]" office:value-type="float" office:value="0.00249826388888889" calcext:value-type="float">
            <text:p>0,00249826388888889000</text:p>
          </table:table-cell>
          <table:table-cell table:formula="of:=[.D1441]-[.D144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[.B1440]+15" office:value-type="float" office:value="21600" calcext:value-type="float">
            <text:p>21600</text:p>
          </table:table-cell>
          <table:table-cell office:value-type="float" office:value="8640000" calcext:value-type="float">
            <text:p>8640000</text:p>
          </table:table-cell>
          <table:table-cell table:formula="of:=[.B1441]/[.C1441]" office:value-type="float" office:value="0.0025" calcext:value-type="float">
            <text:p>0,00250000000000000000</text:p>
          </table:table-cell>
          <table:table-cell table:formula="of:=[.D1442]-[.D144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[.B1441]+15" office:value-type="float" office:value="21615" calcext:value-type="float">
            <text:p>21615</text:p>
          </table:table-cell>
          <table:table-cell office:value-type="float" office:value="8640000" calcext:value-type="float">
            <text:p>8640000</text:p>
          </table:table-cell>
          <table:table-cell table:formula="of:=[.B1442]/[.C1442]" office:value-type="float" office:value="0.00250173611111111" calcext:value-type="float">
            <text:p>0,00250173611111111000</text:p>
          </table:table-cell>
          <table:table-cell table:formula="of:=[.D1443]-[.D1442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[.B1442]+15" office:value-type="float" office:value="21630" calcext:value-type="float">
            <text:p>21630</text:p>
          </table:table-cell>
          <table:table-cell office:value-type="float" office:value="8640000" calcext:value-type="float">
            <text:p>8640000</text:p>
          </table:table-cell>
          <table:table-cell table:formula="of:=[.B1443]/[.C1443]" office:value-type="float" office:value="0.00250347222222222" calcext:value-type="float">
            <text:p>0,00250347222222222000</text:p>
          </table:table-cell>
          <table:table-cell table:formula="of:=[.D1444]-[.D144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[.B1443]+15" office:value-type="float" office:value="21645" calcext:value-type="float">
            <text:p>21645</text:p>
          </table:table-cell>
          <table:table-cell office:value-type="float" office:value="8640000" calcext:value-type="float">
            <text:p>8640000</text:p>
          </table:table-cell>
          <table:table-cell table:formula="of:=[.B1444]/[.C1444]" office:value-type="float" office:value="0.00250520833333333" calcext:value-type="float">
            <text:p>0,00250520833333333000</text:p>
          </table:table-cell>
          <table:table-cell table:formula="of:=[.D1445]-[.D144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[.B1444]+15" office:value-type="float" office:value="21660" calcext:value-type="float">
            <text:p>21660</text:p>
          </table:table-cell>
          <table:table-cell office:value-type="float" office:value="8640000" calcext:value-type="float">
            <text:p>8640000</text:p>
          </table:table-cell>
          <table:table-cell table:formula="of:=[.B1445]/[.C1445]" office:value-type="float" office:value="0.00250694444444444" calcext:value-type="float">
            <text:p>0,00250694444444444000</text:p>
          </table:table-cell>
          <table:table-cell table:formula="of:=[.D1446]-[.D144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[.B1445]+15" office:value-type="float" office:value="21675" calcext:value-type="float">
            <text:p>21675</text:p>
          </table:table-cell>
          <table:table-cell office:value-type="float" office:value="8640000" calcext:value-type="float">
            <text:p>8640000</text:p>
          </table:table-cell>
          <table:table-cell table:formula="of:=[.B1446]/[.C1446]" office:value-type="float" office:value="0.00250868055555556" calcext:value-type="float">
            <text:p>0,00250868055555556000</text:p>
          </table:table-cell>
          <table:table-cell table:formula="of:=[.D1447]-[.D144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[.B1446]+15" office:value-type="float" office:value="21690" calcext:value-type="float">
            <text:p>21690</text:p>
          </table:table-cell>
          <table:table-cell office:value-type="float" office:value="8640000" calcext:value-type="float">
            <text:p>8640000</text:p>
          </table:table-cell>
          <table:table-cell table:formula="of:=[.B1447]/[.C1447]" office:value-type="float" office:value="0.00251041666666667" calcext:value-type="float">
            <text:p>0,00251041666666667000</text:p>
          </table:table-cell>
          <table:table-cell table:formula="of:=[.D1448]-[.D1447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[.B1447]+15" office:value-type="float" office:value="21705" calcext:value-type="float">
            <text:p>21705</text:p>
          </table:table-cell>
          <table:table-cell office:value-type="float" office:value="8640000" calcext:value-type="float">
            <text:p>8640000</text:p>
          </table:table-cell>
          <table:table-cell table:formula="of:=[.B1448]/[.C1448]" office:value-type="float" office:value="0.00251215277777778" calcext:value-type="float">
            <text:p>0,00251215277777778000</text:p>
          </table:table-cell>
          <table:table-cell table:formula="of:=[.D1449]-[.D144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[.B1448]+15" office:value-type="float" office:value="21720" calcext:value-type="float">
            <text:p>21720</text:p>
          </table:table-cell>
          <table:table-cell office:value-type="float" office:value="8640000" calcext:value-type="float">
            <text:p>8640000</text:p>
          </table:table-cell>
          <table:table-cell table:formula="of:=[.B1449]/[.C1449]" office:value-type="float" office:value="0.00251388888888889" calcext:value-type="float">
            <text:p>0,00251388888888889000</text:p>
          </table:table-cell>
          <table:table-cell table:formula="of:=[.D1450]-[.D144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[.B1449]+15" office:value-type="float" office:value="21735" calcext:value-type="float">
            <text:p>21735</text:p>
          </table:table-cell>
          <table:table-cell office:value-type="float" office:value="8640000" calcext:value-type="float">
            <text:p>8640000</text:p>
          </table:table-cell>
          <table:table-cell table:formula="of:=[.B1450]/[.C1450]" office:value-type="float" office:value="0.002515625" calcext:value-type="float">
            <text:p>0,00251562500000000000</text:p>
          </table:table-cell>
          <table:table-cell table:formula="of:=[.D1451]-[.D145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[.B1450]+15" office:value-type="float" office:value="21750" calcext:value-type="float">
            <text:p>21750</text:p>
          </table:table-cell>
          <table:table-cell office:value-type="float" office:value="8640000" calcext:value-type="float">
            <text:p>8640000</text:p>
          </table:table-cell>
          <table:table-cell table:formula="of:=[.B1451]/[.C1451]" office:value-type="float" office:value="0.00251736111111111" calcext:value-type="float">
            <text:p>0,00251736111111111000</text:p>
          </table:table-cell>
          <table:table-cell table:formula="of:=[.D1452]-[.D1451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[.B1451]+15" office:value-type="float" office:value="21765" calcext:value-type="float">
            <text:p>21765</text:p>
          </table:table-cell>
          <table:table-cell office:value-type="float" office:value="8640000" calcext:value-type="float">
            <text:p>8640000</text:p>
          </table:table-cell>
          <table:table-cell table:formula="of:=[.B1452]/[.C1452]" office:value-type="float" office:value="0.00251909722222222" calcext:value-type="float">
            <text:p>0,00251909722222222000</text:p>
          </table:table-cell>
          <table:table-cell table:formula="of:=[.D1453]-[.D145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[.B1452]+15" office:value-type="float" office:value="21780" calcext:value-type="float">
            <text:p>21780</text:p>
          </table:table-cell>
          <table:table-cell office:value-type="float" office:value="8640000" calcext:value-type="float">
            <text:p>8640000</text:p>
          </table:table-cell>
          <table:table-cell table:formula="of:=[.B1453]/[.C1453]" office:value-type="float" office:value="0.00252083333333333" calcext:value-type="float">
            <text:p>0,00252083333333333000</text:p>
          </table:table-cell>
          <table:table-cell table:formula="of:=[.D1454]-[.D145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[.B1453]+15" office:value-type="float" office:value="21795" calcext:value-type="float">
            <text:p>21795</text:p>
          </table:table-cell>
          <table:table-cell office:value-type="float" office:value="8640000" calcext:value-type="float">
            <text:p>8640000</text:p>
          </table:table-cell>
          <table:table-cell table:formula="of:=[.B1454]/[.C1454]" office:value-type="float" office:value="0.00252256944444444" calcext:value-type="float">
            <text:p>0,00252256944444444000</text:p>
          </table:table-cell>
          <table:table-cell table:formula="of:=[.D1455]-[.D145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[.B1454]+15" office:value-type="float" office:value="21810" calcext:value-type="float">
            <text:p>21810</text:p>
          </table:table-cell>
          <table:table-cell office:value-type="float" office:value="8640000" calcext:value-type="float">
            <text:p>8640000</text:p>
          </table:table-cell>
          <table:table-cell table:formula="of:=[.B1455]/[.C1455]" office:value-type="float" office:value="0.00252430555555556" calcext:value-type="float">
            <text:p>0,00252430555555556000</text:p>
          </table:table-cell>
          <table:table-cell table:formula="of:=[.D1456]-[.D1455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[.B1455]+15" office:value-type="float" office:value="21825" calcext:value-type="float">
            <text:p>21825</text:p>
          </table:table-cell>
          <table:table-cell office:value-type="float" office:value="8640000" calcext:value-type="float">
            <text:p>8640000</text:p>
          </table:table-cell>
          <table:table-cell table:formula="of:=[.B1456]/[.C1456]" office:value-type="float" office:value="0.00252604166666667" calcext:value-type="float">
            <text:p>0,00252604166666667000</text:p>
          </table:table-cell>
          <table:table-cell table:formula="of:=[.D1457]-[.D145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[.B1456]+15" office:value-type="float" office:value="21840" calcext:value-type="float">
            <text:p>21840</text:p>
          </table:table-cell>
          <table:table-cell office:value-type="float" office:value="8640000" calcext:value-type="float">
            <text:p>8640000</text:p>
          </table:table-cell>
          <table:table-cell table:formula="of:=[.B1457]/[.C1457]" office:value-type="float" office:value="0.00252777777777778" calcext:value-type="float">
            <text:p>0,00252777777777778000</text:p>
          </table:table-cell>
          <table:table-cell table:formula="of:=[.D1458]-[.D145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[.B1457]+15" office:value-type="float" office:value="21855" calcext:value-type="float">
            <text:p>21855</text:p>
          </table:table-cell>
          <table:table-cell office:value-type="float" office:value="8640000" calcext:value-type="float">
            <text:p>8640000</text:p>
          </table:table-cell>
          <table:table-cell table:formula="of:=[.B1458]/[.C1458]" office:value-type="float" office:value="0.00252951388888889" calcext:value-type="float">
            <text:p>0,00252951388888889000</text:p>
          </table:table-cell>
          <table:table-cell table:formula="of:=[.D1459]-[.D145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[.B1458]+15" office:value-type="float" office:value="21870" calcext:value-type="float">
            <text:p>21870</text:p>
          </table:table-cell>
          <table:table-cell office:value-type="float" office:value="8640000" calcext:value-type="float">
            <text:p>8640000</text:p>
          </table:table-cell>
          <table:table-cell table:formula="of:=[.B1459]/[.C1459]" office:value-type="float" office:value="0.00253125" calcext:value-type="float">
            <text:p>0,00253125000000000000</text:p>
          </table:table-cell>
          <table:table-cell table:formula="of:=[.D1460]-[.D145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[.B1459]+15" office:value-type="float" office:value="21885" calcext:value-type="float">
            <text:p>21885</text:p>
          </table:table-cell>
          <table:table-cell office:value-type="float" office:value="8640000" calcext:value-type="float">
            <text:p>8640000</text:p>
          </table:table-cell>
          <table:table-cell table:formula="of:=[.B1460]/[.C1460]" office:value-type="float" office:value="0.00253298611111111" calcext:value-type="float">
            <text:p>0,00253298611111111000</text:p>
          </table:table-cell>
          <table:table-cell table:formula="of:=[.D1461]-[.D1460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[.B1460]+15" office:value-type="float" office:value="21900" calcext:value-type="float">
            <text:p>21900</text:p>
          </table:table-cell>
          <table:table-cell office:value-type="float" office:value="8640000" calcext:value-type="float">
            <text:p>8640000</text:p>
          </table:table-cell>
          <table:table-cell table:formula="of:=[.B1461]/[.C1461]" office:value-type="float" office:value="0.00253472222222222" calcext:value-type="float">
            <text:p>0,00253472222222222000</text:p>
          </table:table-cell>
          <table:table-cell table:formula="of:=[.D1462]-[.D146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[.B1461]+15" office:value-type="float" office:value="21915" calcext:value-type="float">
            <text:p>21915</text:p>
          </table:table-cell>
          <table:table-cell office:value-type="float" office:value="8640000" calcext:value-type="float">
            <text:p>8640000</text:p>
          </table:table-cell>
          <table:table-cell table:formula="of:=[.B1462]/[.C1462]" office:value-type="float" office:value="0.00253645833333333" calcext:value-type="float">
            <text:p>0,00253645833333333000</text:p>
          </table:table-cell>
          <table:table-cell table:formula="of:=[.D1463]-[.D146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[.B1462]+15" office:value-type="float" office:value="21930" calcext:value-type="float">
            <text:p>21930</text:p>
          </table:table-cell>
          <table:table-cell office:value-type="float" office:value="8640000" calcext:value-type="float">
            <text:p>8640000</text:p>
          </table:table-cell>
          <table:table-cell table:formula="of:=[.B1463]/[.C1463]" office:value-type="float" office:value="0.00253819444444444" calcext:value-type="float">
            <text:p>0,00253819444444444000</text:p>
          </table:table-cell>
          <table:table-cell table:formula="of:=[.D1464]-[.D146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[.B1463]+15" office:value-type="float" office:value="21945" calcext:value-type="float">
            <text:p>21945</text:p>
          </table:table-cell>
          <table:table-cell office:value-type="float" office:value="8640000" calcext:value-type="float">
            <text:p>8640000</text:p>
          </table:table-cell>
          <table:table-cell table:formula="of:=[.B1464]/[.C1464]" office:value-type="float" office:value="0.00253993055555556" calcext:value-type="float">
            <text:p>0,00253993055555556000</text:p>
          </table:table-cell>
          <table:table-cell table:formula="of:=[.D1465]-[.D1464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[.B1464]+15" office:value-type="float" office:value="21960" calcext:value-type="float">
            <text:p>21960</text:p>
          </table:table-cell>
          <table:table-cell office:value-type="float" office:value="8640000" calcext:value-type="float">
            <text:p>8640000</text:p>
          </table:table-cell>
          <table:table-cell table:formula="of:=[.B1465]/[.C1465]" office:value-type="float" office:value="0.00254166666666667" calcext:value-type="float">
            <text:p>0,00254166666666667000</text:p>
          </table:table-cell>
          <table:table-cell table:formula="of:=[.D1466]-[.D146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[.B1465]+15" office:value-type="float" office:value="21975" calcext:value-type="float">
            <text:p>21975</text:p>
          </table:table-cell>
          <table:table-cell office:value-type="float" office:value="8640000" calcext:value-type="float">
            <text:p>8640000</text:p>
          </table:table-cell>
          <table:table-cell table:formula="of:=[.B1466]/[.C1466]" office:value-type="float" office:value="0.00254340277777778" calcext:value-type="float">
            <text:p>0,00254340277777778000</text:p>
          </table:table-cell>
          <table:table-cell table:formula="of:=[.D1467]-[.D146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[.B1466]+15" office:value-type="float" office:value="21990" calcext:value-type="float">
            <text:p>21990</text:p>
          </table:table-cell>
          <table:table-cell office:value-type="float" office:value="8640000" calcext:value-type="float">
            <text:p>8640000</text:p>
          </table:table-cell>
          <table:table-cell table:formula="of:=[.B1467]/[.C1467]" office:value-type="float" office:value="0.00254513888888889" calcext:value-type="float">
            <text:p>0,00254513888888889000</text:p>
          </table:table-cell>
          <table:table-cell table:formula="of:=[.D1468]-[.D146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[.B1467]+15" office:value-type="float" office:value="22005" calcext:value-type="float">
            <text:p>22005</text:p>
          </table:table-cell>
          <table:table-cell office:value-type="float" office:value="8640000" calcext:value-type="float">
            <text:p>8640000</text:p>
          </table:table-cell>
          <table:table-cell table:formula="of:=[.B1468]/[.C1468]" office:value-type="float" office:value="0.002546875" calcext:value-type="float">
            <text:p>0,00254687500000000000</text:p>
          </table:table-cell>
          <table:table-cell table:formula="of:=[.D1469]-[.D146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[.B1468]+15" office:value-type="float" office:value="22020" calcext:value-type="float">
            <text:p>22020</text:p>
          </table:table-cell>
          <table:table-cell office:value-type="float" office:value="8640000" calcext:value-type="float">
            <text:p>8640000</text:p>
          </table:table-cell>
          <table:table-cell table:formula="of:=[.B1469]/[.C1469]" office:value-type="float" office:value="0.00254861111111111" calcext:value-type="float">
            <text:p>0,00254861111111111000</text:p>
          </table:table-cell>
          <table:table-cell table:formula="of:=[.D1470]-[.D1469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[.B1469]+15" office:value-type="float" office:value="22035" calcext:value-type="float">
            <text:p>22035</text:p>
          </table:table-cell>
          <table:table-cell office:value-type="float" office:value="8640000" calcext:value-type="float">
            <text:p>8640000</text:p>
          </table:table-cell>
          <table:table-cell table:formula="of:=[.B1470]/[.C1470]" office:value-type="float" office:value="0.00255034722222222" calcext:value-type="float">
            <text:p>0,00255034722222222000</text:p>
          </table:table-cell>
          <table:table-cell table:formula="of:=[.D1471]-[.D147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[.B1470]+15" office:value-type="float" office:value="22050" calcext:value-type="float">
            <text:p>22050</text:p>
          </table:table-cell>
          <table:table-cell office:value-type="float" office:value="8640000" calcext:value-type="float">
            <text:p>8640000</text:p>
          </table:table-cell>
          <table:table-cell table:formula="of:=[.B1471]/[.C1471]" office:value-type="float" office:value="0.00255208333333333" calcext:value-type="float">
            <text:p>0,00255208333333333000</text:p>
          </table:table-cell>
          <table:table-cell table:formula="of:=[.D1472]-[.D147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[.B1471]+15" office:value-type="float" office:value="22065" calcext:value-type="float">
            <text:p>22065</text:p>
          </table:table-cell>
          <table:table-cell office:value-type="float" office:value="8640000" calcext:value-type="float">
            <text:p>8640000</text:p>
          </table:table-cell>
          <table:table-cell table:formula="of:=[.B1472]/[.C1472]" office:value-type="float" office:value="0.00255381944444444" calcext:value-type="float">
            <text:p>0,00255381944444444000</text:p>
          </table:table-cell>
          <table:table-cell table:formula="of:=[.D1473]-[.D147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[.B1472]+15" office:value-type="float" office:value="22080" calcext:value-type="float">
            <text:p>22080</text:p>
          </table:table-cell>
          <table:table-cell office:value-type="float" office:value="8640000" calcext:value-type="float">
            <text:p>8640000</text:p>
          </table:table-cell>
          <table:table-cell table:formula="of:=[.B1473]/[.C1473]" office:value-type="float" office:value="0.00255555555555556" calcext:value-type="float">
            <text:p>0,00255555555555556000</text:p>
          </table:table-cell>
          <table:table-cell table:formula="of:=[.D1474]-[.D1473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[.B1473]+15" office:value-type="float" office:value="22095" calcext:value-type="float">
            <text:p>22095</text:p>
          </table:table-cell>
          <table:table-cell office:value-type="float" office:value="8640000" calcext:value-type="float">
            <text:p>8640000</text:p>
          </table:table-cell>
          <table:table-cell table:formula="of:=[.B1474]/[.C1474]" office:value-type="float" office:value="0.00255729166666667" calcext:value-type="float">
            <text:p>0,00255729166666667000</text:p>
          </table:table-cell>
          <table:table-cell table:formula="of:=[.D1475]-[.D147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[.B1474]+15" office:value-type="float" office:value="22110" calcext:value-type="float">
            <text:p>22110</text:p>
          </table:table-cell>
          <table:table-cell office:value-type="float" office:value="8640000" calcext:value-type="float">
            <text:p>8640000</text:p>
          </table:table-cell>
          <table:table-cell table:formula="of:=[.B1475]/[.C1475]" office:value-type="float" office:value="0.00255902777777778" calcext:value-type="float">
            <text:p>0,00255902777777778000</text:p>
          </table:table-cell>
          <table:table-cell table:formula="of:=[.D1476]-[.D147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[.B1475]+15" office:value-type="float" office:value="22125" calcext:value-type="float">
            <text:p>22125</text:p>
          </table:table-cell>
          <table:table-cell office:value-type="float" office:value="8640000" calcext:value-type="float">
            <text:p>8640000</text:p>
          </table:table-cell>
          <table:table-cell table:formula="of:=[.B1476]/[.C1476]" office:value-type="float" office:value="0.00256076388888889" calcext:value-type="float">
            <text:p>0,00256076388888889000</text:p>
          </table:table-cell>
          <table:table-cell table:formula="of:=[.D1477]-[.D147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[.B1476]+15" office:value-type="float" office:value="22140" calcext:value-type="float">
            <text:p>22140</text:p>
          </table:table-cell>
          <table:table-cell office:value-type="float" office:value="8640000" calcext:value-type="float">
            <text:p>8640000</text:p>
          </table:table-cell>
          <table:table-cell table:formula="of:=[.B1477]/[.C1477]" office:value-type="float" office:value="0.0025625" calcext:value-type="float">
            <text:p>0,00256250000000000000</text:p>
          </table:table-cell>
          <table:table-cell table:formula="of:=[.D1478]-[.D147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[.B1477]+15" office:value-type="float" office:value="22155" calcext:value-type="float">
            <text:p>22155</text:p>
          </table:table-cell>
          <table:table-cell office:value-type="float" office:value="8640000" calcext:value-type="float">
            <text:p>8640000</text:p>
          </table:table-cell>
          <table:table-cell table:formula="of:=[.B1478]/[.C1478]" office:value-type="float" office:value="0.00256423611111111" calcext:value-type="float">
            <text:p>0,00256423611111111000</text:p>
          </table:table-cell>
          <table:table-cell table:formula="of:=[.D1479]-[.D1478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[.B1478]+15" office:value-type="float" office:value="22170" calcext:value-type="float">
            <text:p>22170</text:p>
          </table:table-cell>
          <table:table-cell office:value-type="float" office:value="8640000" calcext:value-type="float">
            <text:p>8640000</text:p>
          </table:table-cell>
          <table:table-cell table:formula="of:=[.B1479]/[.C1479]" office:value-type="float" office:value="0.00256597222222222" calcext:value-type="float">
            <text:p>0,00256597222222222000</text:p>
          </table:table-cell>
          <table:table-cell table:formula="of:=[.D1480]-[.D147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[.B1479]+15" office:value-type="float" office:value="22185" calcext:value-type="float">
            <text:p>22185</text:p>
          </table:table-cell>
          <table:table-cell office:value-type="float" office:value="8640000" calcext:value-type="float">
            <text:p>8640000</text:p>
          </table:table-cell>
          <table:table-cell table:formula="of:=[.B1480]/[.C1480]" office:value-type="float" office:value="0.00256770833333333" calcext:value-type="float">
            <text:p>0,00256770833333333000</text:p>
          </table:table-cell>
          <table:table-cell table:formula="of:=[.D1481]-[.D148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[.B1480]+15" office:value-type="float" office:value="22200" calcext:value-type="float">
            <text:p>22200</text:p>
          </table:table-cell>
          <table:table-cell office:value-type="float" office:value="8640000" calcext:value-type="float">
            <text:p>8640000</text:p>
          </table:table-cell>
          <table:table-cell table:formula="of:=[.B1481]/[.C1481]" office:value-type="float" office:value="0.00256944444444444" calcext:value-type="float">
            <text:p>0,00256944444444444000</text:p>
          </table:table-cell>
          <table:table-cell table:formula="of:=[.D1482]-[.D148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[.B1481]+15" office:value-type="float" office:value="22215" calcext:value-type="float">
            <text:p>22215</text:p>
          </table:table-cell>
          <table:table-cell office:value-type="float" office:value="8640000" calcext:value-type="float">
            <text:p>8640000</text:p>
          </table:table-cell>
          <table:table-cell table:formula="of:=[.B1482]/[.C1482]" office:value-type="float" office:value="0.00257118055555556" calcext:value-type="float">
            <text:p>0,00257118055555556000</text:p>
          </table:table-cell>
          <table:table-cell table:formula="of:=[.D1483]-[.D1482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[.B1482]+15" office:value-type="float" office:value="22230" calcext:value-type="float">
            <text:p>22230</text:p>
          </table:table-cell>
          <table:table-cell office:value-type="float" office:value="8640000" calcext:value-type="float">
            <text:p>8640000</text:p>
          </table:table-cell>
          <table:table-cell table:formula="of:=[.B1483]/[.C1483]" office:value-type="float" office:value="0.00257291666666667" calcext:value-type="float">
            <text:p>0,00257291666666667000</text:p>
          </table:table-cell>
          <table:table-cell table:formula="of:=[.D1484]-[.D148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[.B1483]+15" office:value-type="float" office:value="22245" calcext:value-type="float">
            <text:p>22245</text:p>
          </table:table-cell>
          <table:table-cell office:value-type="float" office:value="8640000" calcext:value-type="float">
            <text:p>8640000</text:p>
          </table:table-cell>
          <table:table-cell table:formula="of:=[.B1484]/[.C1484]" office:value-type="float" office:value="0.00257465277777778" calcext:value-type="float">
            <text:p>0,00257465277777778000</text:p>
          </table:table-cell>
          <table:table-cell table:formula="of:=[.D1485]-[.D148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[.B1484]+15" office:value-type="float" office:value="22260" calcext:value-type="float">
            <text:p>22260</text:p>
          </table:table-cell>
          <table:table-cell office:value-type="float" office:value="8640000" calcext:value-type="float">
            <text:p>8640000</text:p>
          </table:table-cell>
          <table:table-cell table:formula="of:=[.B1485]/[.C1485]" office:value-type="float" office:value="0.00257638888888889" calcext:value-type="float">
            <text:p>0,00257638888888889000</text:p>
          </table:table-cell>
          <table:table-cell table:formula="of:=[.D1486]-[.D148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[.B1485]+15" office:value-type="float" office:value="22275" calcext:value-type="float">
            <text:p>22275</text:p>
          </table:table-cell>
          <table:table-cell office:value-type="float" office:value="8640000" calcext:value-type="float">
            <text:p>8640000</text:p>
          </table:table-cell>
          <table:table-cell table:formula="of:=[.B1486]/[.C1486]" office:value-type="float" office:value="0.002578125" calcext:value-type="float">
            <text:p>0,00257812500000000000</text:p>
          </table:table-cell>
          <table:table-cell table:formula="of:=[.D1487]-[.D1486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[.B1486]+15" office:value-type="float" office:value="22290" calcext:value-type="float">
            <text:p>22290</text:p>
          </table:table-cell>
          <table:table-cell office:value-type="float" office:value="8640000" calcext:value-type="float">
            <text:p>8640000</text:p>
          </table:table-cell>
          <table:table-cell table:formula="of:=[.B1487]/[.C1487]" office:value-type="float" office:value="0.00257986111111111" calcext:value-type="float">
            <text:p>0,00257986111111111000</text:p>
          </table:table-cell>
          <table:table-cell table:formula="of:=[.D1488]-[.D148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[.B1487]+15" office:value-type="float" office:value="22305" calcext:value-type="float">
            <text:p>22305</text:p>
          </table:table-cell>
          <table:table-cell office:value-type="float" office:value="8640000" calcext:value-type="float">
            <text:p>8640000</text:p>
          </table:table-cell>
          <table:table-cell table:formula="of:=[.B1488]/[.C1488]" office:value-type="float" office:value="0.00258159722222222" calcext:value-type="float">
            <text:p>0,00258159722222222000</text:p>
          </table:table-cell>
          <table:table-cell table:formula="of:=[.D1489]-[.D148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[.B1488]+15" office:value-type="float" office:value="22320" calcext:value-type="float">
            <text:p>22320</text:p>
          </table:table-cell>
          <table:table-cell office:value-type="float" office:value="8640000" calcext:value-type="float">
            <text:p>8640000</text:p>
          </table:table-cell>
          <table:table-cell table:formula="of:=[.B1489]/[.C1489]" office:value-type="float" office:value="0.00258333333333333" calcext:value-type="float">
            <text:p>0,00258333333333333000</text:p>
          </table:table-cell>
          <table:table-cell table:formula="of:=[.D1490]-[.D148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[.B1489]+15" office:value-type="float" office:value="22335" calcext:value-type="float">
            <text:p>22335</text:p>
          </table:table-cell>
          <table:table-cell office:value-type="float" office:value="8640000" calcext:value-type="float">
            <text:p>8640000</text:p>
          </table:table-cell>
          <table:table-cell table:formula="of:=[.B1490]/[.C1490]" office:value-type="float" office:value="0.00258506944444444" calcext:value-type="float">
            <text:p>0,00258506944444444000</text:p>
          </table:table-cell>
          <table:table-cell table:formula="of:=[.D1491]-[.D149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[.B1490]+15" office:value-type="float" office:value="22350" calcext:value-type="float">
            <text:p>22350</text:p>
          </table:table-cell>
          <table:table-cell office:value-type="float" office:value="8640000" calcext:value-type="float">
            <text:p>8640000</text:p>
          </table:table-cell>
          <table:table-cell table:formula="of:=[.B1491]/[.C1491]" office:value-type="float" office:value="0.00258680555555556" calcext:value-type="float">
            <text:p>0,00258680555555556000</text:p>
          </table:table-cell>
          <table:table-cell table:formula="of:=[.D1492]-[.D1491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[.B1491]+15" office:value-type="float" office:value="22365" calcext:value-type="float">
            <text:p>22365</text:p>
          </table:table-cell>
          <table:table-cell office:value-type="float" office:value="8640000" calcext:value-type="float">
            <text:p>8640000</text:p>
          </table:table-cell>
          <table:table-cell table:formula="of:=[.B1492]/[.C1492]" office:value-type="float" office:value="0.00258854166666667" calcext:value-type="float">
            <text:p>0,00258854166666667000</text:p>
          </table:table-cell>
          <table:table-cell table:formula="of:=[.D1493]-[.D149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[.B1492]+15" office:value-type="float" office:value="22380" calcext:value-type="float">
            <text:p>22380</text:p>
          </table:table-cell>
          <table:table-cell office:value-type="float" office:value="8640000" calcext:value-type="float">
            <text:p>8640000</text:p>
          </table:table-cell>
          <table:table-cell table:formula="of:=[.B1493]/[.C1493]" office:value-type="float" office:value="0.00259027777777778" calcext:value-type="float">
            <text:p>0,00259027777777778000</text:p>
          </table:table-cell>
          <table:table-cell table:formula="of:=[.D1494]-[.D149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[.B1493]+15" office:value-type="float" office:value="22395" calcext:value-type="float">
            <text:p>22395</text:p>
          </table:table-cell>
          <table:table-cell office:value-type="float" office:value="8640000" calcext:value-type="float">
            <text:p>8640000</text:p>
          </table:table-cell>
          <table:table-cell table:formula="of:=[.B1494]/[.C1494]" office:value-type="float" office:value="0.00259201388888889" calcext:value-type="float">
            <text:p>0,00259201388888889000</text:p>
          </table:table-cell>
          <table:table-cell table:formula="of:=[.D1495]-[.D149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[.B1494]+15" office:value-type="float" office:value="22410" calcext:value-type="float">
            <text:p>22410</text:p>
          </table:table-cell>
          <table:table-cell office:value-type="float" office:value="8640000" calcext:value-type="float">
            <text:p>8640000</text:p>
          </table:table-cell>
          <table:table-cell table:formula="of:=[.B1495]/[.C1495]" office:value-type="float" office:value="0.00259375" calcext:value-type="float">
            <text:p>0,00259375000000000000</text:p>
          </table:table-cell>
          <table:table-cell table:formula="of:=[.D1496]-[.D1495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[.B1495]+15" office:value-type="float" office:value="22425" calcext:value-type="float">
            <text:p>22425</text:p>
          </table:table-cell>
          <table:table-cell office:value-type="float" office:value="8640000" calcext:value-type="float">
            <text:p>8640000</text:p>
          </table:table-cell>
          <table:table-cell table:formula="of:=[.B1496]/[.C1496]" office:value-type="float" office:value="0.00259548611111111" calcext:value-type="float">
            <text:p>0,00259548611111111000</text:p>
          </table:table-cell>
          <table:table-cell table:formula="of:=[.D1497]-[.D149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[.B1496]+15" office:value-type="float" office:value="22440" calcext:value-type="float">
            <text:p>22440</text:p>
          </table:table-cell>
          <table:table-cell office:value-type="float" office:value="8640000" calcext:value-type="float">
            <text:p>8640000</text:p>
          </table:table-cell>
          <table:table-cell table:formula="of:=[.B1497]/[.C1497]" office:value-type="float" office:value="0.00259722222222222" calcext:value-type="float">
            <text:p>0,00259722222222222000</text:p>
          </table:table-cell>
          <table:table-cell table:formula="of:=[.D1498]-[.D149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[.B1497]+15" office:value-type="float" office:value="22455" calcext:value-type="float">
            <text:p>22455</text:p>
          </table:table-cell>
          <table:table-cell office:value-type="float" office:value="8640000" calcext:value-type="float">
            <text:p>8640000</text:p>
          </table:table-cell>
          <table:table-cell table:formula="of:=[.B1498]/[.C1498]" office:value-type="float" office:value="0.00259895833333333" calcext:value-type="float">
            <text:p>0,00259895833333333000</text:p>
          </table:table-cell>
          <table:table-cell table:formula="of:=[.D1499]-[.D149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[.B1498]+15" office:value-type="float" office:value="22470" calcext:value-type="float">
            <text:p>22470</text:p>
          </table:table-cell>
          <table:table-cell office:value-type="float" office:value="8640000" calcext:value-type="float">
            <text:p>8640000</text:p>
          </table:table-cell>
          <table:table-cell table:formula="of:=[.B1499]/[.C1499]" office:value-type="float" office:value="0.00260069444444444" calcext:value-type="float">
            <text:p>0,00260069444444444000</text:p>
          </table:table-cell>
          <table:table-cell table:formula="of:=[.D1500]-[.D149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[.B1499]+15" office:value-type="float" office:value="22485" calcext:value-type="float">
            <text:p>22485</text:p>
          </table:table-cell>
          <table:table-cell office:value-type="float" office:value="8640000" calcext:value-type="float">
            <text:p>8640000</text:p>
          </table:table-cell>
          <table:table-cell table:formula="of:=[.B1500]/[.C1500]" office:value-type="float" office:value="0.00260243055555556" calcext:value-type="float">
            <text:p>0,00260243055555556000</text:p>
          </table:table-cell>
          <table:table-cell table:formula="of:=[.D1501]-[.D1500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B1500]+15" office:value-type="float" office:value="22500" calcext:value-type="float">
            <text:p>22500</text:p>
          </table:table-cell>
          <table:table-cell office:value-type="float" office:value="8640000" calcext:value-type="float">
            <text:p>8640000</text:p>
          </table:table-cell>
          <table:table-cell table:formula="of:=[.B1501]/[.C1501]" office:value-type="float" office:value="0.00260416666666667" calcext:value-type="float">
            <text:p>0,00260416666666667000</text:p>
          </table:table-cell>
          <table:table-cell table:formula="of:=[.D1502]-[.D150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table:formula="of:=[.B1501]+15" office:value-type="float" office:value="22515" calcext:value-type="float">
            <text:p>22515</text:p>
          </table:table-cell>
          <table:table-cell office:value-type="float" office:value="8640000" calcext:value-type="float">
            <text:p>8640000</text:p>
          </table:table-cell>
          <table:table-cell table:formula="of:=[.B1502]/[.C1502]" office:value-type="float" office:value="0.00260590277777778" calcext:value-type="float">
            <text:p>0,00260590277777778000</text:p>
          </table:table-cell>
          <table:table-cell table:formula="of:=[.D1503]-[.D150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[.B1502]+15" office:value-type="float" office:value="22530" calcext:value-type="float">
            <text:p>22530</text:p>
          </table:table-cell>
          <table:table-cell office:value-type="float" office:value="8640000" calcext:value-type="float">
            <text:p>8640000</text:p>
          </table:table-cell>
          <table:table-cell table:formula="of:=[.B1503]/[.C1503]" office:value-type="float" office:value="0.00260763888888889" calcext:value-type="float">
            <text:p>0,00260763888888889000</text:p>
          </table:table-cell>
          <table:table-cell table:formula="of:=[.D1504]-[.D150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table:formula="of:=[.B1503]+15" office:value-type="float" office:value="22545" calcext:value-type="float">
            <text:p>22545</text:p>
          </table:table-cell>
          <table:table-cell office:value-type="float" office:value="8640000" calcext:value-type="float">
            <text:p>8640000</text:p>
          </table:table-cell>
          <table:table-cell table:formula="of:=[.B1504]/[.C1504]" office:value-type="float" office:value="0.002609375" calcext:value-type="float">
            <text:p>0,00260937500000000000</text:p>
          </table:table-cell>
          <table:table-cell table:formula="of:=[.D1505]-[.D1504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table:formula="of:=[.B1504]+15" office:value-type="float" office:value="22560" calcext:value-type="float">
            <text:p>22560</text:p>
          </table:table-cell>
          <table:table-cell office:value-type="float" office:value="8640000" calcext:value-type="float">
            <text:p>8640000</text:p>
          </table:table-cell>
          <table:table-cell table:formula="of:=[.B1505]/[.C1505]" office:value-type="float" office:value="0.00261111111111111" calcext:value-type="float">
            <text:p>0,00261111111111111000</text:p>
          </table:table-cell>
          <table:table-cell table:formula="of:=[.D1506]-[.D150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[.B1505]+15" office:value-type="float" office:value="22575" calcext:value-type="float">
            <text:p>22575</text:p>
          </table:table-cell>
          <table:table-cell office:value-type="float" office:value="8640000" calcext:value-type="float">
            <text:p>8640000</text:p>
          </table:table-cell>
          <table:table-cell table:formula="of:=[.B1506]/[.C1506]" office:value-type="float" office:value="0.00261284722222222" calcext:value-type="float">
            <text:p>0,00261284722222222000</text:p>
          </table:table-cell>
          <table:table-cell table:formula="of:=[.D1507]-[.D150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[.B1506]+15" office:value-type="float" office:value="22590" calcext:value-type="float">
            <text:p>22590</text:p>
          </table:table-cell>
          <table:table-cell office:value-type="float" office:value="8640000" calcext:value-type="float">
            <text:p>8640000</text:p>
          </table:table-cell>
          <table:table-cell table:formula="of:=[.B1507]/[.C1507]" office:value-type="float" office:value="0.00261458333333333" calcext:value-type="float">
            <text:p>0,00261458333333333000</text:p>
          </table:table-cell>
          <table:table-cell table:formula="of:=[.D1508]-[.D150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[.B1507]+15" office:value-type="float" office:value="22605" calcext:value-type="float">
            <text:p>22605</text:p>
          </table:table-cell>
          <table:table-cell office:value-type="float" office:value="8640000" calcext:value-type="float">
            <text:p>8640000</text:p>
          </table:table-cell>
          <table:table-cell table:formula="of:=[.B1508]/[.C1508]" office:value-type="float" office:value="0.00261631944444444" calcext:value-type="float">
            <text:p>0,00261631944444444000</text:p>
          </table:table-cell>
          <table:table-cell table:formula="of:=[.D1509]-[.D150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[.B1508]+15" office:value-type="float" office:value="22620" calcext:value-type="float">
            <text:p>22620</text:p>
          </table:table-cell>
          <table:table-cell office:value-type="float" office:value="8640000" calcext:value-type="float">
            <text:p>8640000</text:p>
          </table:table-cell>
          <table:table-cell table:formula="of:=[.B1509]/[.C1509]" office:value-type="float" office:value="0.00261805555555556" calcext:value-type="float">
            <text:p>0,00261805555555556000</text:p>
          </table:table-cell>
          <table:table-cell table:formula="of:=[.D1510]-[.D1509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table:formula="of:=[.B1509]+15" office:value-type="float" office:value="22635" calcext:value-type="float">
            <text:p>22635</text:p>
          </table:table-cell>
          <table:table-cell office:value-type="float" office:value="8640000" calcext:value-type="float">
            <text:p>8640000</text:p>
          </table:table-cell>
          <table:table-cell table:formula="of:=[.B1510]/[.C1510]" office:value-type="float" office:value="0.00261979166666667" calcext:value-type="float">
            <text:p>0,00261979166666667000</text:p>
          </table:table-cell>
          <table:table-cell table:formula="of:=[.D1511]-[.D151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[.B1510]+15" office:value-type="float" office:value="22650" calcext:value-type="float">
            <text:p>22650</text:p>
          </table:table-cell>
          <table:table-cell office:value-type="float" office:value="8640000" calcext:value-type="float">
            <text:p>8640000</text:p>
          </table:table-cell>
          <table:table-cell table:formula="of:=[.B1511]/[.C1511]" office:value-type="float" office:value="0.00262152777777778" calcext:value-type="float">
            <text:p>0,00262152777777778000</text:p>
          </table:table-cell>
          <table:table-cell table:formula="of:=[.D1512]-[.D151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table:formula="of:=[.B1511]+15" office:value-type="float" office:value="22665" calcext:value-type="float">
            <text:p>22665</text:p>
          </table:table-cell>
          <table:table-cell office:value-type="float" office:value="8640000" calcext:value-type="float">
            <text:p>8640000</text:p>
          </table:table-cell>
          <table:table-cell table:formula="of:=[.B1512]/[.C1512]" office:value-type="float" office:value="0.00262326388888889" calcext:value-type="float">
            <text:p>0,00262326388888889000</text:p>
          </table:table-cell>
          <table:table-cell table:formula="of:=[.D1513]-[.D151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[.B1512]+15" office:value-type="float" office:value="22680" calcext:value-type="float">
            <text:p>22680</text:p>
          </table:table-cell>
          <table:table-cell office:value-type="float" office:value="8640000" calcext:value-type="float">
            <text:p>8640000</text:p>
          </table:table-cell>
          <table:table-cell table:formula="of:=[.B1513]/[.C1513]" office:value-type="float" office:value="0.002625" calcext:value-type="float">
            <text:p>0,00262500000000000000</text:p>
          </table:table-cell>
          <table:table-cell table:formula="of:=[.D1514]-[.D1513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[.B1513]+15" office:value-type="float" office:value="22695" calcext:value-type="float">
            <text:p>22695</text:p>
          </table:table-cell>
          <table:table-cell office:value-type="float" office:value="8640000" calcext:value-type="float">
            <text:p>8640000</text:p>
          </table:table-cell>
          <table:table-cell table:formula="of:=[.B1514]/[.C1514]" office:value-type="float" office:value="0.00262673611111111" calcext:value-type="float">
            <text:p>0,00262673611111111000</text:p>
          </table:table-cell>
          <table:table-cell table:formula="of:=[.D1515]-[.D151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[.B1514]+15" office:value-type="float" office:value="22710" calcext:value-type="float">
            <text:p>22710</text:p>
          </table:table-cell>
          <table:table-cell office:value-type="float" office:value="8640000" calcext:value-type="float">
            <text:p>8640000</text:p>
          </table:table-cell>
          <table:table-cell table:formula="of:=[.B1515]/[.C1515]" office:value-type="float" office:value="0.00262847222222222" calcext:value-type="float">
            <text:p>0,00262847222222222000</text:p>
          </table:table-cell>
          <table:table-cell table:formula="of:=[.D1516]-[.D151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[.B1515]+15" office:value-type="float" office:value="22725" calcext:value-type="float">
            <text:p>22725</text:p>
          </table:table-cell>
          <table:table-cell office:value-type="float" office:value="8640000" calcext:value-type="float">
            <text:p>8640000</text:p>
          </table:table-cell>
          <table:table-cell table:formula="of:=[.B1516]/[.C1516]" office:value-type="float" office:value="0.00263020833333333" calcext:value-type="float">
            <text:p>0,00263020833333333000</text:p>
          </table:table-cell>
          <table:table-cell table:formula="of:=[.D1517]-[.D151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[.B1516]+15" office:value-type="float" office:value="22740" calcext:value-type="float">
            <text:p>22740</text:p>
          </table:table-cell>
          <table:table-cell office:value-type="float" office:value="8640000" calcext:value-type="float">
            <text:p>8640000</text:p>
          </table:table-cell>
          <table:table-cell table:formula="of:=[.B1517]/[.C1517]" office:value-type="float" office:value="0.00263194444444444" calcext:value-type="float">
            <text:p>0,00263194444444444000</text:p>
          </table:table-cell>
          <table:table-cell table:formula="of:=[.D1518]-[.D1517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[.B1517]+15" office:value-type="float" office:value="22755" calcext:value-type="float">
            <text:p>22755</text:p>
          </table:table-cell>
          <table:table-cell office:value-type="float" office:value="8640000" calcext:value-type="float">
            <text:p>8640000</text:p>
          </table:table-cell>
          <table:table-cell table:formula="of:=[.B1518]/[.C1518]" office:value-type="float" office:value="0.00263368055555556" calcext:value-type="float">
            <text:p>0,00263368055555556000</text:p>
          </table:table-cell>
          <table:table-cell table:formula="of:=[.D1519]-[.D151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table:formula="of:=[.B1518]+15" office:value-type="float" office:value="22770" calcext:value-type="float">
            <text:p>22770</text:p>
          </table:table-cell>
          <table:table-cell office:value-type="float" office:value="8640000" calcext:value-type="float">
            <text:p>8640000</text:p>
          </table:table-cell>
          <table:table-cell table:formula="of:=[.B1519]/[.C1519]" office:value-type="float" office:value="0.00263541666666667" calcext:value-type="float">
            <text:p>0,00263541666666667000</text:p>
          </table:table-cell>
          <table:table-cell table:formula="of:=[.D1520]-[.D151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[.B1519]+15" office:value-type="float" office:value="22785" calcext:value-type="float">
            <text:p>22785</text:p>
          </table:table-cell>
          <table:table-cell office:value-type="float" office:value="8640000" calcext:value-type="float">
            <text:p>8640000</text:p>
          </table:table-cell>
          <table:table-cell table:formula="of:=[.B1520]/[.C1520]" office:value-type="float" office:value="0.00263715277777778" calcext:value-type="float">
            <text:p>0,00263715277777778000</text:p>
          </table:table-cell>
          <table:table-cell table:formula="of:=[.D1521]-[.D152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[.B1520]+15" office:value-type="float" office:value="22800" calcext:value-type="float">
            <text:p>22800</text:p>
          </table:table-cell>
          <table:table-cell office:value-type="float" office:value="8640000" calcext:value-type="float">
            <text:p>8640000</text:p>
          </table:table-cell>
          <table:table-cell table:formula="of:=[.B1521]/[.C1521]" office:value-type="float" office:value="0.00263888888888889" calcext:value-type="float">
            <text:p>0,00263888888888889000</text:p>
          </table:table-cell>
          <table:table-cell table:formula="of:=[.D1522]-[.D152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table:formula="of:=[.B1521]+15" office:value-type="float" office:value="22815" calcext:value-type="float">
            <text:p>22815</text:p>
          </table:table-cell>
          <table:table-cell office:value-type="float" office:value="8640000" calcext:value-type="float">
            <text:p>8640000</text:p>
          </table:table-cell>
          <table:table-cell table:formula="of:=[.B1522]/[.C1522]" office:value-type="float" office:value="0.002640625" calcext:value-type="float">
            <text:p>0,00264062500000000000</text:p>
          </table:table-cell>
          <table:table-cell table:formula="of:=[.D1523]-[.D1522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[.B1522]+15" office:value-type="float" office:value="22830" calcext:value-type="float">
            <text:p>22830</text:p>
          </table:table-cell>
          <table:table-cell office:value-type="float" office:value="8640000" calcext:value-type="float">
            <text:p>8640000</text:p>
          </table:table-cell>
          <table:table-cell table:formula="of:=[.B1523]/[.C1523]" office:value-type="float" office:value="0.00264236111111111" calcext:value-type="float">
            <text:p>0,00264236111111111000</text:p>
          </table:table-cell>
          <table:table-cell table:formula="of:=[.D1524]-[.D152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table:formula="of:=[.B1523]+15" office:value-type="float" office:value="22845" calcext:value-type="float">
            <text:p>22845</text:p>
          </table:table-cell>
          <table:table-cell office:value-type="float" office:value="8640000" calcext:value-type="float">
            <text:p>8640000</text:p>
          </table:table-cell>
          <table:table-cell table:formula="of:=[.B1524]/[.C1524]" office:value-type="float" office:value="0.00264409722222222" calcext:value-type="float">
            <text:p>0,00264409722222222000</text:p>
          </table:table-cell>
          <table:table-cell table:formula="of:=[.D1525]-[.D152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[.B1524]+15" office:value-type="float" office:value="22860" calcext:value-type="float">
            <text:p>22860</text:p>
          </table:table-cell>
          <table:table-cell office:value-type="float" office:value="8640000" calcext:value-type="float">
            <text:p>8640000</text:p>
          </table:table-cell>
          <table:table-cell table:formula="of:=[.B1525]/[.C1525]" office:value-type="float" office:value="0.00264583333333333" calcext:value-type="float">
            <text:p>0,00264583333333333000</text:p>
          </table:table-cell>
          <table:table-cell table:formula="of:=[.D1526]-[.D152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[.B1525]+15" office:value-type="float" office:value="22875" calcext:value-type="float">
            <text:p>22875</text:p>
          </table:table-cell>
          <table:table-cell office:value-type="float" office:value="8640000" calcext:value-type="float">
            <text:p>8640000</text:p>
          </table:table-cell>
          <table:table-cell table:formula="of:=[.B1526]/[.C1526]" office:value-type="float" office:value="0.00264756944444444" calcext:value-type="float">
            <text:p>0,00264756944444444000</text:p>
          </table:table-cell>
          <table:table-cell table:formula="of:=[.D1527]-[.D1526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[.B1526]+15" office:value-type="float" office:value="22890" calcext:value-type="float">
            <text:p>22890</text:p>
          </table:table-cell>
          <table:table-cell office:value-type="float" office:value="8640000" calcext:value-type="float">
            <text:p>8640000</text:p>
          </table:table-cell>
          <table:table-cell table:formula="of:=[.B1527]/[.C1527]" office:value-type="float" office:value="0.00264930555555556" calcext:value-type="float">
            <text:p>0,00264930555555556000</text:p>
          </table:table-cell>
          <table:table-cell table:formula="of:=[.D1528]-[.D152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[.B1527]+15" office:value-type="float" office:value="22905" calcext:value-type="float">
            <text:p>22905</text:p>
          </table:table-cell>
          <table:table-cell office:value-type="float" office:value="8640000" calcext:value-type="float">
            <text:p>8640000</text:p>
          </table:table-cell>
          <table:table-cell table:formula="of:=[.B1528]/[.C1528]" office:value-type="float" office:value="0.00265104166666667" calcext:value-type="float">
            <text:p>0,00265104166666667000</text:p>
          </table:table-cell>
          <table:table-cell table:formula="of:=[.D1529]-[.D152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[.B1528]+15" office:value-type="float" office:value="22920" calcext:value-type="float">
            <text:p>22920</text:p>
          </table:table-cell>
          <table:table-cell office:value-type="float" office:value="8640000" calcext:value-type="float">
            <text:p>8640000</text:p>
          </table:table-cell>
          <table:table-cell table:formula="of:=[.B1529]/[.C1529]" office:value-type="float" office:value="0.00265277777777778" calcext:value-type="float">
            <text:p>0,00265277777777778000</text:p>
          </table:table-cell>
          <table:table-cell table:formula="of:=[.D1530]-[.D152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table:formula="of:=[.B1529]+15" office:value-type="float" office:value="22935" calcext:value-type="float">
            <text:p>22935</text:p>
          </table:table-cell>
          <table:table-cell office:value-type="float" office:value="8640000" calcext:value-type="float">
            <text:p>8640000</text:p>
          </table:table-cell>
          <table:table-cell table:formula="of:=[.B1530]/[.C1530]" office:value-type="float" office:value="0.00265451388888889" calcext:value-type="float">
            <text:p>0,00265451388888889000</text:p>
          </table:table-cell>
          <table:table-cell table:formula="of:=[.D1531]-[.D153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[.B1530]+15" office:value-type="float" office:value="22950" calcext:value-type="float">
            <text:p>22950</text:p>
          </table:table-cell>
          <table:table-cell office:value-type="float" office:value="8640000" calcext:value-type="float">
            <text:p>8640000</text:p>
          </table:table-cell>
          <table:table-cell table:formula="of:=[.B1531]/[.C1531]" office:value-type="float" office:value="0.00265625" calcext:value-type="float">
            <text:p>0,00265625000000000000</text:p>
          </table:table-cell>
          <table:table-cell table:formula="of:=[.D1532]-[.D1531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formula="of:=[.B1531]+15" office:value-type="float" office:value="22965" calcext:value-type="float">
            <text:p>22965</text:p>
          </table:table-cell>
          <table:table-cell office:value-type="float" office:value="8640000" calcext:value-type="float">
            <text:p>8640000</text:p>
          </table:table-cell>
          <table:table-cell table:formula="of:=[.B1532]/[.C1532]" office:value-type="float" office:value="0.00265798611111111" calcext:value-type="float">
            <text:p>0,00265798611111111000</text:p>
          </table:table-cell>
          <table:table-cell table:formula="of:=[.D1533]-[.D153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table:formula="of:=[.B1532]+15" office:value-type="float" office:value="22980" calcext:value-type="float">
            <text:p>22980</text:p>
          </table:table-cell>
          <table:table-cell office:value-type="float" office:value="8640000" calcext:value-type="float">
            <text:p>8640000</text:p>
          </table:table-cell>
          <table:table-cell table:formula="of:=[.B1533]/[.C1533]" office:value-type="float" office:value="0.00265972222222222" calcext:value-type="float">
            <text:p>0,00265972222222222000</text:p>
          </table:table-cell>
          <table:table-cell table:formula="of:=[.D1534]-[.D153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[.B1533]+15" office:value-type="float" office:value="22995" calcext:value-type="float">
            <text:p>22995</text:p>
          </table:table-cell>
          <table:table-cell office:value-type="float" office:value="8640000" calcext:value-type="float">
            <text:p>8640000</text:p>
          </table:table-cell>
          <table:table-cell table:formula="of:=[.B1534]/[.C1534]" office:value-type="float" office:value="0.00266145833333333" calcext:value-type="float">
            <text:p>0,00266145833333333000</text:p>
          </table:table-cell>
          <table:table-cell table:formula="of:=[.D1535]-[.D153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table:formula="of:=[.B1534]+15" office:value-type="float" office:value="23010" calcext:value-type="float">
            <text:p>23010</text:p>
          </table:table-cell>
          <table:table-cell office:value-type="float" office:value="8640000" calcext:value-type="float">
            <text:p>8640000</text:p>
          </table:table-cell>
          <table:table-cell table:formula="of:=[.B1535]/[.C1535]" office:value-type="float" office:value="0.00266319444444444" calcext:value-type="float">
            <text:p>0,00266319444444444000</text:p>
          </table:table-cell>
          <table:table-cell table:formula="of:=[.D1536]-[.D1535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table:formula="of:=[.B1535]+15" office:value-type="float" office:value="23025" calcext:value-type="float">
            <text:p>23025</text:p>
          </table:table-cell>
          <table:table-cell office:value-type="float" office:value="8640000" calcext:value-type="float">
            <text:p>8640000</text:p>
          </table:table-cell>
          <table:table-cell table:formula="of:=[.B1536]/[.C1536]" office:value-type="float" office:value="0.00266493055555556" calcext:value-type="float">
            <text:p>0,00266493055555556000</text:p>
          </table:table-cell>
          <table:table-cell table:formula="of:=[.D1537]-[.D153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[.B1536]+15" office:value-type="float" office:value="23040" calcext:value-type="float">
            <text:p>23040</text:p>
          </table:table-cell>
          <table:table-cell office:value-type="float" office:value="8640000" calcext:value-type="float">
            <text:p>8640000</text:p>
          </table:table-cell>
          <table:table-cell table:formula="of:=[.B1537]/[.C1537]" office:value-type="float" office:value="0.00266666666666667" calcext:value-type="float">
            <text:p>0,00266666666666667000</text:p>
          </table:table-cell>
          <table:table-cell table:formula="of:=[.D1538]-[.D153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table:formula="of:=[.B1537]+15" office:value-type="float" office:value="23055" calcext:value-type="float">
            <text:p>23055</text:p>
          </table:table-cell>
          <table:table-cell office:value-type="float" office:value="8640000" calcext:value-type="float">
            <text:p>8640000</text:p>
          </table:table-cell>
          <table:table-cell table:formula="of:=[.B1538]/[.C1538]" office:value-type="float" office:value="0.00266840277777778" calcext:value-type="float">
            <text:p>0,00266840277777778000</text:p>
          </table:table-cell>
          <table:table-cell table:formula="of:=[.D1539]-[.D153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[.B1538]+15" office:value-type="float" office:value="23070" calcext:value-type="float">
            <text:p>23070</text:p>
          </table:table-cell>
          <table:table-cell office:value-type="float" office:value="8640000" calcext:value-type="float">
            <text:p>8640000</text:p>
          </table:table-cell>
          <table:table-cell table:formula="of:=[.B1539]/[.C1539]" office:value-type="float" office:value="0.00267013888888889" calcext:value-type="float">
            <text:p>0,00267013888888889000</text:p>
          </table:table-cell>
          <table:table-cell table:formula="of:=[.D1540]-[.D153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[.B1539]+15" office:value-type="float" office:value="23085" calcext:value-type="float">
            <text:p>23085</text:p>
          </table:table-cell>
          <table:table-cell office:value-type="float" office:value="8640000" calcext:value-type="float">
            <text:p>8640000</text:p>
          </table:table-cell>
          <table:table-cell table:formula="of:=[.B1540]/[.C1540]" office:value-type="float" office:value="0.002671875" calcext:value-type="float">
            <text:p>0,00267187500000000000</text:p>
          </table:table-cell>
          <table:table-cell table:formula="of:=[.D1541]-[.D1540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[.B1540]+15" office:value-type="float" office:value="23100" calcext:value-type="float">
            <text:p>23100</text:p>
          </table:table-cell>
          <table:table-cell office:value-type="float" office:value="8640000" calcext:value-type="float">
            <text:p>8640000</text:p>
          </table:table-cell>
          <table:table-cell table:formula="of:=[.B1541]/[.C1541]" office:value-type="float" office:value="0.00267361111111111" calcext:value-type="float">
            <text:p>0,00267361111111111000</text:p>
          </table:table-cell>
          <table:table-cell table:formula="of:=[.D1542]-[.D154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[.B1541]+15" office:value-type="float" office:value="23115" calcext:value-type="float">
            <text:p>23115</text:p>
          </table:table-cell>
          <table:table-cell office:value-type="float" office:value="8640000" calcext:value-type="float">
            <text:p>8640000</text:p>
          </table:table-cell>
          <table:table-cell table:formula="of:=[.B1542]/[.C1542]" office:value-type="float" office:value="0.00267534722222222" calcext:value-type="float">
            <text:p>0,00267534722222222000</text:p>
          </table:table-cell>
          <table:table-cell table:formula="of:=[.D1543]-[.D154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table:formula="of:=[.B1542]+15" office:value-type="float" office:value="23130" calcext:value-type="float">
            <text:p>23130</text:p>
          </table:table-cell>
          <table:table-cell office:value-type="float" office:value="8640000" calcext:value-type="float">
            <text:p>8640000</text:p>
          </table:table-cell>
          <table:table-cell table:formula="of:=[.B1543]/[.C1543]" office:value-type="float" office:value="0.00267708333333333" calcext:value-type="float">
            <text:p>0,00267708333333333000</text:p>
          </table:table-cell>
          <table:table-cell table:formula="of:=[.D1544]-[.D154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table:formula="of:=[.B1543]+15" office:value-type="float" office:value="23145" calcext:value-type="float">
            <text:p>23145</text:p>
          </table:table-cell>
          <table:table-cell office:value-type="float" office:value="8640000" calcext:value-type="float">
            <text:p>8640000</text:p>
          </table:table-cell>
          <table:table-cell table:formula="of:=[.B1544]/[.C1544]" office:value-type="float" office:value="0.00267881944444444" calcext:value-type="float">
            <text:p>0,00267881944444444000</text:p>
          </table:table-cell>
          <table:table-cell table:formula="of:=[.D1545]-[.D1544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[.B1544]+15" office:value-type="float" office:value="23160" calcext:value-type="float">
            <text:p>23160</text:p>
          </table:table-cell>
          <table:table-cell office:value-type="float" office:value="8640000" calcext:value-type="float">
            <text:p>8640000</text:p>
          </table:table-cell>
          <table:table-cell table:formula="of:=[.B1545]/[.C1545]" office:value-type="float" office:value="0.00268055555555556" calcext:value-type="float">
            <text:p>0,00268055555555556000</text:p>
          </table:table-cell>
          <table:table-cell table:formula="of:=[.D1546]-[.D154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[.B1545]+15" office:value-type="float" office:value="23175" calcext:value-type="float">
            <text:p>23175</text:p>
          </table:table-cell>
          <table:table-cell office:value-type="float" office:value="8640000" calcext:value-type="float">
            <text:p>8640000</text:p>
          </table:table-cell>
          <table:table-cell table:formula="of:=[.B1546]/[.C1546]" office:value-type="float" office:value="0.00268229166666667" calcext:value-type="float">
            <text:p>0,00268229166666667000</text:p>
          </table:table-cell>
          <table:table-cell table:formula="of:=[.D1547]-[.D154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[.B1546]+15" office:value-type="float" office:value="23190" calcext:value-type="float">
            <text:p>23190</text:p>
          </table:table-cell>
          <table:table-cell office:value-type="float" office:value="8640000" calcext:value-type="float">
            <text:p>8640000</text:p>
          </table:table-cell>
          <table:table-cell table:formula="of:=[.B1547]/[.C1547]" office:value-type="float" office:value="0.00268402777777778" calcext:value-type="float">
            <text:p>0,00268402777777778000</text:p>
          </table:table-cell>
          <table:table-cell table:formula="of:=[.D1548]-[.D154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table:formula="of:=[.B1547]+15" office:value-type="float" office:value="23205" calcext:value-type="float">
            <text:p>23205</text:p>
          </table:table-cell>
          <table:table-cell office:value-type="float" office:value="8640000" calcext:value-type="float">
            <text:p>8640000</text:p>
          </table:table-cell>
          <table:table-cell table:formula="of:=[.B1548]/[.C1548]" office:value-type="float" office:value="0.00268576388888889" calcext:value-type="float">
            <text:p>0,00268576388888889000</text:p>
          </table:table-cell>
          <table:table-cell table:formula="of:=[.D1549]-[.D1548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[.B1548]+15" office:value-type="float" office:value="23220" calcext:value-type="float">
            <text:p>23220</text:p>
          </table:table-cell>
          <table:table-cell office:value-type="float" office:value="8640000" calcext:value-type="float">
            <text:p>8640000</text:p>
          </table:table-cell>
          <table:table-cell table:formula="of:=[.B1549]/[.C1549]" office:value-type="float" office:value="0.0026875" calcext:value-type="float">
            <text:p>0,00268750000000000000</text:p>
          </table:table-cell>
          <table:table-cell table:formula="of:=[.D1550]-[.D154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table:formula="of:=[.B1549]+15" office:value-type="float" office:value="23235" calcext:value-type="float">
            <text:p>23235</text:p>
          </table:table-cell>
          <table:table-cell office:value-type="float" office:value="8640000" calcext:value-type="float">
            <text:p>8640000</text:p>
          </table:table-cell>
          <table:table-cell table:formula="of:=[.B1550]/[.C1550]" office:value-type="float" office:value="0.00268923611111111" calcext:value-type="float">
            <text:p>0,00268923611111111000</text:p>
          </table:table-cell>
          <table:table-cell table:formula="of:=[.D1551]-[.D155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[.B1550]+15" office:value-type="float" office:value="23250" calcext:value-type="float">
            <text:p>23250</text:p>
          </table:table-cell>
          <table:table-cell office:value-type="float" office:value="8640000" calcext:value-type="float">
            <text:p>8640000</text:p>
          </table:table-cell>
          <table:table-cell table:formula="of:=[.B1551]/[.C1551]" office:value-type="float" office:value="0.00269097222222222" calcext:value-type="float">
            <text:p>0,00269097222222222000</text:p>
          </table:table-cell>
          <table:table-cell table:formula="of:=[.D1552]-[.D155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[.B1551]+15" office:value-type="float" office:value="23265" calcext:value-type="float">
            <text:p>23265</text:p>
          </table:table-cell>
          <table:table-cell office:value-type="float" office:value="8640000" calcext:value-type="float">
            <text:p>8640000</text:p>
          </table:table-cell>
          <table:table-cell table:formula="of:=[.B1552]/[.C1552]" office:value-type="float" office:value="0.00269270833333333" calcext:value-type="float">
            <text:p>0,00269270833333333000</text:p>
          </table:table-cell>
          <table:table-cell table:formula="of:=[.D1553]-[.D155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[.B1552]+15" office:value-type="float" office:value="23280" calcext:value-type="float">
            <text:p>23280</text:p>
          </table:table-cell>
          <table:table-cell office:value-type="float" office:value="8640000" calcext:value-type="float">
            <text:p>8640000</text:p>
          </table:table-cell>
          <table:table-cell table:formula="of:=[.B1553]/[.C1553]" office:value-type="float" office:value="0.00269444444444444" calcext:value-type="float">
            <text:p>0,00269444444444444000</text:p>
          </table:table-cell>
          <table:table-cell table:formula="of:=[.D1554]-[.D1553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table:formula="of:=[.B1553]+15" office:value-type="float" office:value="23295" calcext:value-type="float">
            <text:p>23295</text:p>
          </table:table-cell>
          <table:table-cell office:value-type="float" office:value="8640000" calcext:value-type="float">
            <text:p>8640000</text:p>
          </table:table-cell>
          <table:table-cell table:formula="of:=[.B1554]/[.C1554]" office:value-type="float" office:value="0.00269618055555556" calcext:value-type="float">
            <text:p>0,00269618055555556000</text:p>
          </table:table-cell>
          <table:table-cell table:formula="of:=[.D1555]-[.D155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table:formula="of:=[.B1554]+15" office:value-type="float" office:value="23310" calcext:value-type="float">
            <text:p>23310</text:p>
          </table:table-cell>
          <table:table-cell office:value-type="float" office:value="8640000" calcext:value-type="float">
            <text:p>8640000</text:p>
          </table:table-cell>
          <table:table-cell table:formula="of:=[.B1555]/[.C1555]" office:value-type="float" office:value="0.00269791666666667" calcext:value-type="float">
            <text:p>0,00269791666666667000</text:p>
          </table:table-cell>
          <table:table-cell table:formula="of:=[.D1556]-[.D155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table:formula="of:=[.B1555]+15" office:value-type="float" office:value="23325" calcext:value-type="float">
            <text:p>23325</text:p>
          </table:table-cell>
          <table:table-cell office:value-type="float" office:value="8640000" calcext:value-type="float">
            <text:p>8640000</text:p>
          </table:table-cell>
          <table:table-cell table:formula="of:=[.B1556]/[.C1556]" office:value-type="float" office:value="0.00269965277777778" calcext:value-type="float">
            <text:p>0,00269965277777778000</text:p>
          </table:table-cell>
          <table:table-cell table:formula="of:=[.D1557]-[.D155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table:formula="of:=[.B1556]+15" office:value-type="float" office:value="23340" calcext:value-type="float">
            <text:p>23340</text:p>
          </table:table-cell>
          <table:table-cell office:value-type="float" office:value="8640000" calcext:value-type="float">
            <text:p>8640000</text:p>
          </table:table-cell>
          <table:table-cell table:formula="of:=[.B1557]/[.C1557]" office:value-type="float" office:value="0.00270138888888889" calcext:value-type="float">
            <text:p>0,00270138888888889000</text:p>
          </table:table-cell>
          <table:table-cell table:formula="of:=[.D1558]-[.D1557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table:formula="of:=[.B1557]+15" office:value-type="float" office:value="23355" calcext:value-type="float">
            <text:p>23355</text:p>
          </table:table-cell>
          <table:table-cell office:value-type="float" office:value="8640000" calcext:value-type="float">
            <text:p>8640000</text:p>
          </table:table-cell>
          <table:table-cell table:formula="of:=[.B1558]/[.C1558]" office:value-type="float" office:value="0.002703125" calcext:value-type="float">
            <text:p>0,00270312500000000000</text:p>
          </table:table-cell>
          <table:table-cell table:formula="of:=[.D1559]-[.D155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[.B1558]+15" office:value-type="float" office:value="23370" calcext:value-type="float">
            <text:p>23370</text:p>
          </table:table-cell>
          <table:table-cell office:value-type="float" office:value="8640000" calcext:value-type="float">
            <text:p>8640000</text:p>
          </table:table-cell>
          <table:table-cell table:formula="of:=[.B1559]/[.C1559]" office:value-type="float" office:value="0.00270486111111111" calcext:value-type="float">
            <text:p>0,00270486111111111000</text:p>
          </table:table-cell>
          <table:table-cell table:formula="of:=[.D1560]-[.D155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table:formula="of:=[.B1559]+15" office:value-type="float" office:value="23385" calcext:value-type="float">
            <text:p>23385</text:p>
          </table:table-cell>
          <table:table-cell office:value-type="float" office:value="8640000" calcext:value-type="float">
            <text:p>8640000</text:p>
          </table:table-cell>
          <table:table-cell table:formula="of:=[.B1560]/[.C1560]" office:value-type="float" office:value="0.00270659722222222" calcext:value-type="float">
            <text:p>0,00270659722222222000</text:p>
          </table:table-cell>
          <table:table-cell table:formula="of:=[.D1561]-[.D156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[.B1560]+15" office:value-type="float" office:value="23400" calcext:value-type="float">
            <text:p>23400</text:p>
          </table:table-cell>
          <table:table-cell office:value-type="float" office:value="8640000" calcext:value-type="float">
            <text:p>8640000</text:p>
          </table:table-cell>
          <table:table-cell table:formula="of:=[.B1561]/[.C1561]" office:value-type="float" office:value="0.00270833333333333" calcext:value-type="float">
            <text:p>0,00270833333333333000</text:p>
          </table:table-cell>
          <table:table-cell table:formula="of:=[.D1562]-[.D156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[.B1561]+15" office:value-type="float" office:value="23415" calcext:value-type="float">
            <text:p>23415</text:p>
          </table:table-cell>
          <table:table-cell office:value-type="float" office:value="8640000" calcext:value-type="float">
            <text:p>8640000</text:p>
          </table:table-cell>
          <table:table-cell table:formula="of:=[.B1562]/[.C1562]" office:value-type="float" office:value="0.00271006944444444" calcext:value-type="float">
            <text:p>0,00271006944444444000</text:p>
          </table:table-cell>
          <table:table-cell table:formula="of:=[.D1563]-[.D1562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[.B1562]+15" office:value-type="float" office:value="23430" calcext:value-type="float">
            <text:p>23430</text:p>
          </table:table-cell>
          <table:table-cell office:value-type="float" office:value="8640000" calcext:value-type="float">
            <text:p>8640000</text:p>
          </table:table-cell>
          <table:table-cell table:formula="of:=[.B1563]/[.C1563]" office:value-type="float" office:value="0.00271180555555556" calcext:value-type="float">
            <text:p>0,00271180555555556000</text:p>
          </table:table-cell>
          <table:table-cell table:formula="of:=[.D1564]-[.D156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table:formula="of:=[.B1563]+15" office:value-type="float" office:value="23445" calcext:value-type="float">
            <text:p>23445</text:p>
          </table:table-cell>
          <table:table-cell office:value-type="float" office:value="8640000" calcext:value-type="float">
            <text:p>8640000</text:p>
          </table:table-cell>
          <table:table-cell table:formula="of:=[.B1564]/[.C1564]" office:value-type="float" office:value="0.00271354166666667" calcext:value-type="float">
            <text:p>0,00271354166666667000</text:p>
          </table:table-cell>
          <table:table-cell table:formula="of:=[.D1565]-[.D156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table:formula="of:=[.B1564]+15" office:value-type="float" office:value="23460" calcext:value-type="float">
            <text:p>23460</text:p>
          </table:table-cell>
          <table:table-cell office:value-type="float" office:value="8640000" calcext:value-type="float">
            <text:p>8640000</text:p>
          </table:table-cell>
          <table:table-cell table:formula="of:=[.B1565]/[.C1565]" office:value-type="float" office:value="0.00271527777777778" calcext:value-type="float">
            <text:p>0,00271527777777778000</text:p>
          </table:table-cell>
          <table:table-cell table:formula="of:=[.D1566]-[.D156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table:formula="of:=[.B1565]+15" office:value-type="float" office:value="23475" calcext:value-type="float">
            <text:p>23475</text:p>
          </table:table-cell>
          <table:table-cell office:value-type="float" office:value="8640000" calcext:value-type="float">
            <text:p>8640000</text:p>
          </table:table-cell>
          <table:table-cell table:formula="of:=[.B1566]/[.C1566]" office:value-type="float" office:value="0.00271701388888889" calcext:value-type="float">
            <text:p>0,00271701388888889000</text:p>
          </table:table-cell>
          <table:table-cell table:formula="of:=[.D1567]-[.D1566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table:formula="of:=[.B1566]+15" office:value-type="float" office:value="23490" calcext:value-type="float">
            <text:p>23490</text:p>
          </table:table-cell>
          <table:table-cell office:value-type="float" office:value="8640000" calcext:value-type="float">
            <text:p>8640000</text:p>
          </table:table-cell>
          <table:table-cell table:formula="of:=[.B1567]/[.C1567]" office:value-type="float" office:value="0.00271875" calcext:value-type="float">
            <text:p>0,00271875000000000000</text:p>
          </table:table-cell>
          <table:table-cell table:formula="of:=[.D1568]-[.D156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[.B1567]+15" office:value-type="float" office:value="23505" calcext:value-type="float">
            <text:p>23505</text:p>
          </table:table-cell>
          <table:table-cell office:value-type="float" office:value="8640000" calcext:value-type="float">
            <text:p>8640000</text:p>
          </table:table-cell>
          <table:table-cell table:formula="of:=[.B1568]/[.C1568]" office:value-type="float" office:value="0.00272048611111111" calcext:value-type="float">
            <text:p>0,00272048611111111000</text:p>
          </table:table-cell>
          <table:table-cell table:formula="of:=[.D1569]-[.D156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table:formula="of:=[.B1568]+15" office:value-type="float" office:value="23520" calcext:value-type="float">
            <text:p>23520</text:p>
          </table:table-cell>
          <table:table-cell office:value-type="float" office:value="8640000" calcext:value-type="float">
            <text:p>8640000</text:p>
          </table:table-cell>
          <table:table-cell table:formula="of:=[.B1569]/[.C1569]" office:value-type="float" office:value="0.00272222222222222" calcext:value-type="float">
            <text:p>0,00272222222222222000</text:p>
          </table:table-cell>
          <table:table-cell table:formula="of:=[.D1570]-[.D156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table:formula="of:=[.B1569]+15" office:value-type="float" office:value="23535" calcext:value-type="float">
            <text:p>23535</text:p>
          </table:table-cell>
          <table:table-cell office:value-type="float" office:value="8640000" calcext:value-type="float">
            <text:p>8640000</text:p>
          </table:table-cell>
          <table:table-cell table:formula="of:=[.B1570]/[.C1570]" office:value-type="float" office:value="0.00272395833333333" calcext:value-type="float">
            <text:p>0,00272395833333333000</text:p>
          </table:table-cell>
          <table:table-cell table:formula="of:=[.D1571]-[.D157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[.B1570]+15" office:value-type="float" office:value="23550" calcext:value-type="float">
            <text:p>23550</text:p>
          </table:table-cell>
          <table:table-cell office:value-type="float" office:value="8640000" calcext:value-type="float">
            <text:p>8640000</text:p>
          </table:table-cell>
          <table:table-cell table:formula="of:=[.B1571]/[.C1571]" office:value-type="float" office:value="0.00272569444444444" calcext:value-type="float">
            <text:p>0,00272569444444444000</text:p>
          </table:table-cell>
          <table:table-cell table:formula="of:=[.D1572]-[.D1571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[.B1571]+15" office:value-type="float" office:value="23565" calcext:value-type="float">
            <text:p>23565</text:p>
          </table:table-cell>
          <table:table-cell office:value-type="float" office:value="8640000" calcext:value-type="float">
            <text:p>8640000</text:p>
          </table:table-cell>
          <table:table-cell table:formula="of:=[.B1572]/[.C1572]" office:value-type="float" office:value="0.00272743055555556" calcext:value-type="float">
            <text:p>0,00272743055555556000</text:p>
          </table:table-cell>
          <table:table-cell table:formula="of:=[.D1573]-[.D157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table:formula="of:=[.B1572]+15" office:value-type="float" office:value="23580" calcext:value-type="float">
            <text:p>23580</text:p>
          </table:table-cell>
          <table:table-cell office:value-type="float" office:value="8640000" calcext:value-type="float">
            <text:p>8640000</text:p>
          </table:table-cell>
          <table:table-cell table:formula="of:=[.B1573]/[.C1573]" office:value-type="float" office:value="0.00272916666666667" calcext:value-type="float">
            <text:p>0,00272916666666667000</text:p>
          </table:table-cell>
          <table:table-cell table:formula="of:=[.D1574]-[.D157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[.B1573]+15" office:value-type="float" office:value="23595" calcext:value-type="float">
            <text:p>23595</text:p>
          </table:table-cell>
          <table:table-cell office:value-type="float" office:value="8640000" calcext:value-type="float">
            <text:p>8640000</text:p>
          </table:table-cell>
          <table:table-cell table:formula="of:=[.B1574]/[.C1574]" office:value-type="float" office:value="0.00273090277777778" calcext:value-type="float">
            <text:p>0,00273090277777778000</text:p>
          </table:table-cell>
          <table:table-cell table:formula="of:=[.D1575]-[.D157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table:formula="of:=[.B1574]+15" office:value-type="float" office:value="23610" calcext:value-type="float">
            <text:p>23610</text:p>
          </table:table-cell>
          <table:table-cell office:value-type="float" office:value="8640000" calcext:value-type="float">
            <text:p>8640000</text:p>
          </table:table-cell>
          <table:table-cell table:formula="of:=[.B1575]/[.C1575]" office:value-type="float" office:value="0.00273263888888889" calcext:value-type="float">
            <text:p>0,00273263888888889000</text:p>
          </table:table-cell>
          <table:table-cell table:formula="of:=[.D1576]-[.D1575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[.B1575]+15" office:value-type="float" office:value="23625" calcext:value-type="float">
            <text:p>23625</text:p>
          </table:table-cell>
          <table:table-cell office:value-type="float" office:value="8640000" calcext:value-type="float">
            <text:p>8640000</text:p>
          </table:table-cell>
          <table:table-cell table:formula="of:=[.B1576]/[.C1576]" office:value-type="float" office:value="0.002734375" calcext:value-type="float">
            <text:p>0,00273437500000000000</text:p>
          </table:table-cell>
          <table:table-cell table:formula="of:=[.D1577]-[.D157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table:formula="of:=[.B1576]+15" office:value-type="float" office:value="23640" calcext:value-type="float">
            <text:p>23640</text:p>
          </table:table-cell>
          <table:table-cell office:value-type="float" office:value="8640000" calcext:value-type="float">
            <text:p>8640000</text:p>
          </table:table-cell>
          <table:table-cell table:formula="of:=[.B1577]/[.C1577]" office:value-type="float" office:value="0.00273611111111111" calcext:value-type="float">
            <text:p>0,00273611111111111000</text:p>
          </table:table-cell>
          <table:table-cell table:formula="of:=[.D1578]-[.D157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[.B1577]+15" office:value-type="float" office:value="23655" calcext:value-type="float">
            <text:p>23655</text:p>
          </table:table-cell>
          <table:table-cell office:value-type="float" office:value="8640000" calcext:value-type="float">
            <text:p>8640000</text:p>
          </table:table-cell>
          <table:table-cell table:formula="of:=[.B1578]/[.C1578]" office:value-type="float" office:value="0.00273784722222222" calcext:value-type="float">
            <text:p>0,00273784722222222000</text:p>
          </table:table-cell>
          <table:table-cell table:formula="of:=[.D1579]-[.D157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[.B1578]+15" office:value-type="float" office:value="23670" calcext:value-type="float">
            <text:p>23670</text:p>
          </table:table-cell>
          <table:table-cell office:value-type="float" office:value="8640000" calcext:value-type="float">
            <text:p>8640000</text:p>
          </table:table-cell>
          <table:table-cell table:formula="of:=[.B1579]/[.C1579]" office:value-type="float" office:value="0.00273958333333333" calcext:value-type="float">
            <text:p>0,00273958333333333000</text:p>
          </table:table-cell>
          <table:table-cell table:formula="of:=[.D1580]-[.D1579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table:formula="of:=[.B1579]+15" office:value-type="float" office:value="23685" calcext:value-type="float">
            <text:p>23685</text:p>
          </table:table-cell>
          <table:table-cell office:value-type="float" office:value="8640000" calcext:value-type="float">
            <text:p>8640000</text:p>
          </table:table-cell>
          <table:table-cell table:formula="of:=[.B1580]/[.C1580]" office:value-type="float" office:value="0.00274131944444444" calcext:value-type="float">
            <text:p>0,00274131944444444000</text:p>
          </table:table-cell>
          <table:table-cell table:formula="of:=[.D1581]-[.D158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[.B1580]+15" office:value-type="float" office:value="23700" calcext:value-type="float">
            <text:p>23700</text:p>
          </table:table-cell>
          <table:table-cell office:value-type="float" office:value="8640000" calcext:value-type="float">
            <text:p>8640000</text:p>
          </table:table-cell>
          <table:table-cell table:formula="of:=[.B1581]/[.C1581]" office:value-type="float" office:value="0.00274305555555556" calcext:value-type="float">
            <text:p>0,00274305555555556000</text:p>
          </table:table-cell>
          <table:table-cell table:formula="of:=[.D1582]-[.D158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[.B1581]+15" office:value-type="float" office:value="23715" calcext:value-type="float">
            <text:p>23715</text:p>
          </table:table-cell>
          <table:table-cell office:value-type="float" office:value="8640000" calcext:value-type="float">
            <text:p>8640000</text:p>
          </table:table-cell>
          <table:table-cell table:formula="of:=[.B1582]/[.C1582]" office:value-type="float" office:value="0.00274479166666667" calcext:value-type="float">
            <text:p>0,00274479166666667000</text:p>
          </table:table-cell>
          <table:table-cell table:formula="of:=[.D1583]-[.D158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[.B1582]+15" office:value-type="float" office:value="23730" calcext:value-type="float">
            <text:p>23730</text:p>
          </table:table-cell>
          <table:table-cell office:value-type="float" office:value="8640000" calcext:value-type="float">
            <text:p>8640000</text:p>
          </table:table-cell>
          <table:table-cell table:formula="of:=[.B1583]/[.C1583]" office:value-type="float" office:value="0.00274652777777778" calcext:value-type="float">
            <text:p>0,00274652777777778000</text:p>
          </table:table-cell>
          <table:table-cell table:formula="of:=[.D1584]-[.D1583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[.B1583]+15" office:value-type="float" office:value="23745" calcext:value-type="float">
            <text:p>23745</text:p>
          </table:table-cell>
          <table:table-cell office:value-type="float" office:value="8640000" calcext:value-type="float">
            <text:p>8640000</text:p>
          </table:table-cell>
          <table:table-cell table:formula="of:=[.B1584]/[.C1584]" office:value-type="float" office:value="0.00274826388888889" calcext:value-type="float">
            <text:p>0,00274826388888889000</text:p>
          </table:table-cell>
          <table:table-cell table:formula="of:=[.D1585]-[.D1584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[.B1584]+15" office:value-type="float" office:value="23760" calcext:value-type="float">
            <text:p>23760</text:p>
          </table:table-cell>
          <table:table-cell office:value-type="float" office:value="8640000" calcext:value-type="float">
            <text:p>8640000</text:p>
          </table:table-cell>
          <table:table-cell table:formula="of:=[.B1585]/[.C1585]" office:value-type="float" office:value="0.00275" calcext:value-type="float">
            <text:p>0,00275000000000000000</text:p>
          </table:table-cell>
          <table:table-cell table:formula="of:=[.D1586]-[.D158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table:formula="of:=[.B1585]+15" office:value-type="float" office:value="23775" calcext:value-type="float">
            <text:p>23775</text:p>
          </table:table-cell>
          <table:table-cell office:value-type="float" office:value="8640000" calcext:value-type="float">
            <text:p>8640000</text:p>
          </table:table-cell>
          <table:table-cell table:formula="of:=[.B1586]/[.C1586]" office:value-type="float" office:value="0.00275173611111111" calcext:value-type="float">
            <text:p>0,00275173611111111000</text:p>
          </table:table-cell>
          <table:table-cell table:formula="of:=[.D1587]-[.D158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table:formula="of:=[.B1586]+15" office:value-type="float" office:value="23790" calcext:value-type="float">
            <text:p>23790</text:p>
          </table:table-cell>
          <table:table-cell office:value-type="float" office:value="8640000" calcext:value-type="float">
            <text:p>8640000</text:p>
          </table:table-cell>
          <table:table-cell table:formula="of:=[.B1587]/[.C1587]" office:value-type="float" office:value="0.00275347222222222" calcext:value-type="float">
            <text:p>0,00275347222222222000</text:p>
          </table:table-cell>
          <table:table-cell table:formula="of:=[.D1588]-[.D1587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[.B1587]+15" office:value-type="float" office:value="23805" calcext:value-type="float">
            <text:p>23805</text:p>
          </table:table-cell>
          <table:table-cell office:value-type="float" office:value="8640000" calcext:value-type="float">
            <text:p>8640000</text:p>
          </table:table-cell>
          <table:table-cell table:formula="of:=[.B1588]/[.C1588]" office:value-type="float" office:value="0.00275520833333333" calcext:value-type="float">
            <text:p>0,00275520833333333000</text:p>
          </table:table-cell>
          <table:table-cell table:formula="of:=[.D1589]-[.D1588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[.B1588]+15" office:value-type="float" office:value="23820" calcext:value-type="float">
            <text:p>23820</text:p>
          </table:table-cell>
          <table:table-cell office:value-type="float" office:value="8640000" calcext:value-type="float">
            <text:p>8640000</text:p>
          </table:table-cell>
          <table:table-cell table:formula="of:=[.B1589]/[.C1589]" office:value-type="float" office:value="0.00275694444444444" calcext:value-type="float">
            <text:p>0,00275694444444444000</text:p>
          </table:table-cell>
          <table:table-cell table:formula="of:=[.D1590]-[.D158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table:formula="of:=[.B1589]+15" office:value-type="float" office:value="23835" calcext:value-type="float">
            <text:p>23835</text:p>
          </table:table-cell>
          <table:table-cell office:value-type="float" office:value="8640000" calcext:value-type="float">
            <text:p>8640000</text:p>
          </table:table-cell>
          <table:table-cell table:formula="of:=[.B1590]/[.C1590]" office:value-type="float" office:value="0.00275868055555556" calcext:value-type="float">
            <text:p>0,00275868055555556000</text:p>
          </table:table-cell>
          <table:table-cell table:formula="of:=[.D1591]-[.D159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[.B1590]+15" office:value-type="float" office:value="23850" calcext:value-type="float">
            <text:p>23850</text:p>
          </table:table-cell>
          <table:table-cell office:value-type="float" office:value="8640000" calcext:value-type="float">
            <text:p>8640000</text:p>
          </table:table-cell>
          <table:table-cell table:formula="of:=[.B1591]/[.C1591]" office:value-type="float" office:value="0.00276041666666667" calcext:value-type="float">
            <text:p>0,00276041666666667000</text:p>
          </table:table-cell>
          <table:table-cell table:formula="of:=[.D1592]-[.D1591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table:formula="of:=[.B1591]+15" office:value-type="float" office:value="23865" calcext:value-type="float">
            <text:p>23865</text:p>
          </table:table-cell>
          <table:table-cell office:value-type="float" office:value="8640000" calcext:value-type="float">
            <text:p>8640000</text:p>
          </table:table-cell>
          <table:table-cell table:formula="of:=[.B1592]/[.C1592]" office:value-type="float" office:value="0.00276215277777778" calcext:value-type="float">
            <text:p>0,00276215277777778000</text:p>
          </table:table-cell>
          <table:table-cell table:formula="of:=[.D1593]-[.D1592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[.B1592]+15" office:value-type="float" office:value="23880" calcext:value-type="float">
            <text:p>23880</text:p>
          </table:table-cell>
          <table:table-cell office:value-type="float" office:value="8640000" calcext:value-type="float">
            <text:p>8640000</text:p>
          </table:table-cell>
          <table:table-cell table:formula="of:=[.B1593]/[.C1593]" office:value-type="float" office:value="0.00276388888888889" calcext:value-type="float">
            <text:p>0,00276388888888889000</text:p>
          </table:table-cell>
          <table:table-cell table:formula="of:=[.D1594]-[.D1593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table:formula="of:=[.B1593]+15" office:value-type="float" office:value="23895" calcext:value-type="float">
            <text:p>23895</text:p>
          </table:table-cell>
          <table:table-cell office:value-type="float" office:value="8640000" calcext:value-type="float">
            <text:p>8640000</text:p>
          </table:table-cell>
          <table:table-cell table:formula="of:=[.B1594]/[.C1594]" office:value-type="float" office:value="0.002765625" calcext:value-type="float">
            <text:p>0,00276562500000000000</text:p>
          </table:table-cell>
          <table:table-cell table:formula="of:=[.D1595]-[.D1594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table:formula="of:=[.B1594]+15" office:value-type="float" office:value="23910" calcext:value-type="float">
            <text:p>23910</text:p>
          </table:table-cell>
          <table:table-cell office:value-type="float" office:value="8640000" calcext:value-type="float">
            <text:p>8640000</text:p>
          </table:table-cell>
          <table:table-cell table:formula="of:=[.B1595]/[.C1595]" office:value-type="float" office:value="0.00276736111111111" calcext:value-type="float">
            <text:p>0,00276736111111111000</text:p>
          </table:table-cell>
          <table:table-cell table:formula="of:=[.D1596]-[.D1595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[.B1595]+15" office:value-type="float" office:value="23925" calcext:value-type="float">
            <text:p>23925</text:p>
          </table:table-cell>
          <table:table-cell office:value-type="float" office:value="8640000" calcext:value-type="float">
            <text:p>8640000</text:p>
          </table:table-cell>
          <table:table-cell table:formula="of:=[.B1596]/[.C1596]" office:value-type="float" office:value="0.00276909722222222" calcext:value-type="float">
            <text:p>0,00276909722222222000</text:p>
          </table:table-cell>
          <table:table-cell table:formula="of:=[.D1597]-[.D1596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[.B1596]+15" office:value-type="float" office:value="23940" calcext:value-type="float">
            <text:p>23940</text:p>
          </table:table-cell>
          <table:table-cell office:value-type="float" office:value="8640000" calcext:value-type="float">
            <text:p>8640000</text:p>
          </table:table-cell>
          <table:table-cell table:formula="of:=[.B1597]/[.C1597]" office:value-type="float" office:value="0.00277083333333333" calcext:value-type="float">
            <text:p>0,00277083333333333000</text:p>
          </table:table-cell>
          <table:table-cell table:formula="of:=[.D1598]-[.D1597]" office:value-type="float" office:value="0.00000173611111111078" calcext:value-type="float">
            <text:p>0,00000173611111111078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table:formula="of:=[.B1597]+15" office:value-type="float" office:value="23955" calcext:value-type="float">
            <text:p>23955</text:p>
          </table:table-cell>
          <table:table-cell office:value-type="float" office:value="8640000" calcext:value-type="float">
            <text:p>8640000</text:p>
          </table:table-cell>
          <table:table-cell table:formula="of:=[.B1598]/[.C1598]" office:value-type="float" office:value="0.00277256944444444" calcext:value-type="float">
            <text:p>0,00277256944444444000</text:p>
          </table:table-cell>
          <table:table-cell table:formula="of:=[.D1599]-[.D1598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[.B1598]+15" office:value-type="float" office:value="23970" calcext:value-type="float">
            <text:p>23970</text:p>
          </table:table-cell>
          <table:table-cell office:value-type="float" office:value="8640000" calcext:value-type="float">
            <text:p>8640000</text:p>
          </table:table-cell>
          <table:table-cell table:formula="of:=[.B1599]/[.C1599]" office:value-type="float" office:value="0.00277430555555556" calcext:value-type="float">
            <text:p>0,00277430555555556000</text:p>
          </table:table-cell>
          <table:table-cell table:formula="of:=[.D1600]-[.D1599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table:formula="of:=[.B1599]+15" office:value-type="float" office:value="23985" calcext:value-type="float">
            <text:p>23985</text:p>
          </table:table-cell>
          <table:table-cell office:value-type="float" office:value="8640000" calcext:value-type="float">
            <text:p>8640000</text:p>
          </table:table-cell>
          <table:table-cell table:formula="of:=[.B1600]/[.C1600]" office:value-type="float" office:value="0.00277604166666667" calcext:value-type="float">
            <text:p>0,00277604166666667000</text:p>
          </table:table-cell>
          <table:table-cell table:formula="of:=[.D1601]-[.D1600]" office:value-type="float" office:value="0.00000173611111111121" calcext:value-type="float">
            <text:p>0,0000017361111111112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B1600]+15" office:value-type="float" office:value="24000" calcext:value-type="float">
            <text:p>24000</text:p>
          </table:table-cell>
          <table:table-cell office:value-type="float" office:value="8640000" calcext:value-type="float">
            <text:p>8640000</text:p>
          </table:table-cell>
          <table:table-cell table:formula="of:=[.B1601]/[.C1601]" office:value-type="float" office:value="0.00277777777777778" calcext:value-type="float">
            <text:p>0,00277777777777778000</text:p>
          </table:table-cell>
          <table:table-cell table:formula="of:=#REF!-[.D1601]" office:value-type="string" office:string-value="" calcext:value-type="error">
            <text:p>#REF!</text:p>
          </table:table-cell>
        </table:table-row>
        <table:table-row table:style-name="ro1" table:number-rows-repeated="104697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5:35:26.456375006</meta:creation-date>
    <dc:date>2026-05-17T15:36:05.553445823</dc:date>
    <meta:editing-duration>PT40S</meta:editing-duration>
    <meta:editing-cycles>1</meta:editing-cycles>
    <meta:document-statistic meta:table-count="1" meta:cell-count="8005" meta:object-count="0"/>
    <meta:generator>LibreOffice/24.2.7.2$Linux_X86_64 LibreOffice_project/420$Build-2</meta:generator>
  </office:meta>
</office:document-meta>
</file>