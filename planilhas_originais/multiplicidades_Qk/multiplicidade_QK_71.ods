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5.2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transparent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7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5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71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821759259259259" calcext:value-type="float">
            <text:p>0,00000821759259259259</text:p>
          </table:table-cell>
          <table:table-cell table:formula="of:=[.D3]-[.D2]" office:value-type="float" office:value="0.00000821759259259259" calcext:value-type="float">
            <text:p>0,00000821759259259259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71" office:value-type="float" office:value="142" calcext:value-type="float">
            <text:p>14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64351851851852" calcext:value-type="float">
            <text:p>0,00001643518518518520</text:p>
          </table:table-cell>
          <table:table-cell table:formula="of:=[.D4]-[.D3]" office:value-type="float" office:value="0.00000821759259259259" calcext:value-type="float">
            <text:p>0,00000821759259259259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71" office:value-type="float" office:value="213" calcext:value-type="float">
            <text:p>213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46527777777778" calcext:value-type="float">
            <text:p>0,00002465277777777780</text:p>
          </table:table-cell>
          <table:table-cell table:formula="of:=[.D5]-[.D4]" office:value-type="float" office:value="0.00000821759259259259" calcext:value-type="float">
            <text:p>0,00000821759259259259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71" office:value-type="float" office:value="284" calcext:value-type="float">
            <text:p>28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28703703703704" calcext:value-type="float">
            <text:p>0,00003287037037037040</text:p>
          </table:table-cell>
          <table:table-cell table:formula="of:=[.D6]-[.D5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71" office:value-type="float" office:value="355" calcext:value-type="float">
            <text:p>35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1087962962963" calcext:value-type="float">
            <text:p>0,00004108796296296300</text:p>
          </table:table-cell>
          <table:table-cell table:formula="of:=[.D7]-[.D6]" office:value-type="float" office:value="0.00000821759259259259" calcext:value-type="float">
            <text:p>0,00000821759259259259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71" office:value-type="float" office:value="426" calcext:value-type="float">
            <text:p>42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493055555555556" calcext:value-type="float">
            <text:p>0,00004930555555555560</text:p>
          </table:table-cell>
          <table:table-cell table:formula="of:=[.D8]-[.D7]" office:value-type="float" office:value="0.00000821759259259259" calcext:value-type="float">
            <text:p>0,00000821759259259259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71" office:value-type="float" office:value="497" calcext:value-type="float">
            <text:p>497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575231481481481" calcext:value-type="float">
            <text:p>0,00005752314814814820</text:p>
          </table:table-cell>
          <table:table-cell table:formula="of:=[.D9]-[.D8]" office:value-type="float" office:value="0.00000821759259259259" calcext:value-type="float">
            <text:p>0,00000821759259259259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71" office:value-type="float" office:value="568" calcext:value-type="float">
            <text:p>56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657407407407407" calcext:value-type="float">
            <text:p>0,00006574074074074070</text:p>
          </table:table-cell>
          <table:table-cell table:formula="of:=[.D10]-[.D9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71" office:value-type="float" office:value="639" calcext:value-type="float">
            <text:p>639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739583333333333" calcext:value-type="float">
            <text:p>0,00007395833333333330</text:p>
          </table:table-cell>
          <table:table-cell table:formula="of:=[.D11]-[.D10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71" office:value-type="float" office:value="710" calcext:value-type="float">
            <text:p>71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821759259259259" calcext:value-type="float">
            <text:p>0,00008217592592592590</text:p>
          </table:table-cell>
          <table:table-cell table:formula="of:=[.D12]-[.D11]" office:value-type="float" office:value="0.00000821759259259258" calcext:value-type="float">
            <text:p>0,00000821759259259258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71" office:value-type="float" office:value="781" calcext:value-type="float">
            <text:p>781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903935185185185" calcext:value-type="float">
            <text:p>0,00009039351851851850</text:p>
          </table:table-cell>
          <table:table-cell table:formula="of:=[.D13]-[.D12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71" office:value-type="float" office:value="852" calcext:value-type="float">
            <text:p>85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986111111111111" calcext:value-type="float">
            <text:p>0,00009861111111111110</text:p>
          </table:table-cell>
          <table:table-cell table:formula="of:=[.D14]-[.D13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71" office:value-type="float" office:value="923" calcext:value-type="float">
            <text:p>923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06828703703704" calcext:value-type="float">
            <text:p>0,00010682870370370400</text:p>
          </table:table-cell>
          <table:table-cell table:formula="of:=[.D15]-[.D14]" office:value-type="float" office:value="0.00000821759259259258" calcext:value-type="float">
            <text:p>0,00000821759259259258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71" office:value-type="float" office:value="994" calcext:value-type="float">
            <text:p>99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15046296296296" calcext:value-type="float">
            <text:p>0,00011504629629629600</text:p>
          </table:table-cell>
          <table:table-cell table:formula="of:=[.D16]-[.D15]" office:value-type="float" office:value="0.00000821759259259261" calcext:value-type="float">
            <text:p>0,00000821759259259261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71" office:value-type="float" office:value="1065" calcext:value-type="float">
            <text:p>106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23263888888889" calcext:value-type="float">
            <text:p>0,00012326388888888900</text:p>
          </table:table-cell>
          <table:table-cell table:formula="of:=[.D17]-[.D16]" office:value-type="float" office:value="0.00000821759259259257" calcext:value-type="float">
            <text:p>0,00000821759259259257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71" office:value-type="float" office:value="1136" calcext:value-type="float">
            <text:p>113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31481481481481" calcext:value-type="float">
            <text:p>0,00013148148148148100</text:p>
          </table:table-cell>
          <table:table-cell table:formula="of:=[.D18]-[.D17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71" office:value-type="float" office:value="1207" calcext:value-type="float">
            <text:p>1207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39699074074074" calcext:value-type="float">
            <text:p>0,00013969907407407400</text:p>
          </table:table-cell>
          <table:table-cell table:formula="of:=[.D19]-[.D18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71" office:value-type="float" office:value="1278" calcext:value-type="float">
            <text:p>127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47916666666667" calcext:value-type="float">
            <text:p>0,00014791666666666700</text:p>
          </table:table-cell>
          <table:table-cell table:formula="of:=[.D20]-[.D19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71" office:value-type="float" office:value="1349" calcext:value-type="float">
            <text:p>1349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56134259259259" calcext:value-type="float">
            <text:p>0,00015613425925925900</text:p>
          </table:table-cell>
          <table:table-cell table:formula="of:=[.D21]-[.D20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71" office:value-type="float" office:value="1420" calcext:value-type="float">
            <text:p>14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64351851851852" calcext:value-type="float">
            <text:p>0,00016435185185185200</text:p>
          </table:table-cell>
          <table:table-cell table:formula="of:=[.D22]-[.D21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71" office:value-type="float" office:value="1491" calcext:value-type="float">
            <text:p>1491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72569444444444" calcext:value-type="float">
            <text:p>0,00017256944444444400</text:p>
          </table:table-cell>
          <table:table-cell table:formula="of:=[.D23]-[.D22]" office:value-type="float" office:value="0.00000821759259259257" calcext:value-type="float">
            <text:p>0,00000821759259259257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71" office:value-type="float" office:value="1562" calcext:value-type="float">
            <text:p>156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80787037037037" calcext:value-type="float">
            <text:p>0,00018078703703703700</text:p>
          </table:table-cell>
          <table:table-cell table:formula="of:=[.D24]-[.D23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71" office:value-type="float" office:value="1633" calcext:value-type="float">
            <text:p>1633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8900462962963" calcext:value-type="float">
            <text:p>0,00018900462962963000</text:p>
          </table:table-cell>
          <table:table-cell table:formula="of:=[.D25]-[.D24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71" office:value-type="float" office:value="1704" calcext:value-type="float">
            <text:p>170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97222222222222" calcext:value-type="float">
            <text:p>0,00019722222222222200</text:p>
          </table:table-cell>
          <table:table-cell table:formula="of:=[.D26]-[.D25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71" office:value-type="float" office:value="1775" calcext:value-type="float">
            <text:p>17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05439814814815" calcext:value-type="float">
            <text:p>0,00020543981481481500</text:p>
          </table:table-cell>
          <table:table-cell table:formula="of:=[.D27]-[.D26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71" office:value-type="float" office:value="1846" calcext:value-type="float">
            <text:p>184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13657407407407" calcext:value-type="float">
            <text:p>0,00021365740740740700</text:p>
          </table:table-cell>
          <table:table-cell table:formula="of:=[.D28]-[.D27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71" office:value-type="float" office:value="1917" calcext:value-type="float">
            <text:p>1917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21875" calcext:value-type="float">
            <text:p>0,00022187500000000000</text:p>
          </table:table-cell>
          <table:table-cell table:formula="of:=[.D29]-[.D28]" office:value-type="float" office:value="0.00000821759259259257" calcext:value-type="float">
            <text:p>0,00000821759259259257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71" office:value-type="float" office:value="1988" calcext:value-type="float">
            <text:p>198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30092592592593" calcext:value-type="float">
            <text:p>0,00023009259259259300</text:p>
          </table:table-cell>
          <table:table-cell table:formula="of:=[.D30]-[.D29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71" office:value-type="float" office:value="2059" calcext:value-type="float">
            <text:p>2059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38310185185185" calcext:value-type="float">
            <text:p>0,00023831018518518500</text:p>
          </table:table-cell>
          <table:table-cell table:formula="of:=[.D31]-[.D30]" office:value-type="float" office:value="0.00000821759259259262" calcext:value-type="float">
            <text:p>0,00000821759259259262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71" office:value-type="float" office:value="2130" calcext:value-type="float">
            <text:p>213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46527777777778" calcext:value-type="float">
            <text:p>0,00024652777777777800</text:p>
          </table:table-cell>
          <table:table-cell table:formula="of:=[.D32]-[.D31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71" office:value-type="float" office:value="2201" calcext:value-type="float">
            <text:p>2201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5474537037037" calcext:value-type="float">
            <text:p>0,00025474537037037000</text:p>
          </table:table-cell>
          <table:table-cell table:formula="of:=[.D33]-[.D32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71" office:value-type="float" office:value="2272" calcext:value-type="float">
            <text:p>227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62962962962963" calcext:value-type="float">
            <text:p>0,00026296296296296300</text:p>
          </table:table-cell>
          <table:table-cell table:formula="of:=[.D34]-[.D33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71" office:value-type="float" office:value="2343" calcext:value-type="float">
            <text:p>2343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71180555555556" calcext:value-type="float">
            <text:p>0,00027118055555555600</text:p>
          </table:table-cell>
          <table:table-cell table:formula="of:=[.D35]-[.D34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71" office:value-type="float" office:value="2414" calcext:value-type="float">
            <text:p>241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79398148148148" calcext:value-type="float">
            <text:p>0,00027939814814814800</text:p>
          </table:table-cell>
          <table:table-cell table:formula="of:=[.D36]-[.D35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71" office:value-type="float" office:value="2485" calcext:value-type="float">
            <text:p>248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87615740740741" calcext:value-type="float">
            <text:p>0,00028761574074074100</text:p>
          </table:table-cell>
          <table:table-cell table:formula="of:=[.D37]-[.D36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71" office:value-type="float" office:value="2556" calcext:value-type="float">
            <text:p>255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95833333333333" calcext:value-type="float">
            <text:p>0,00029583333333333300</text:p>
          </table:table-cell>
          <table:table-cell table:formula="of:=[.D38]-[.D37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71" office:value-type="float" office:value="2627" calcext:value-type="float">
            <text:p>2627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04050925925926" calcext:value-type="float">
            <text:p>0,00030405092592592600</text:p>
          </table:table-cell>
          <table:table-cell table:formula="of:=[.D39]-[.D38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71" office:value-type="float" office:value="2698" calcext:value-type="float">
            <text:p>269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12268518518519" calcext:value-type="float">
            <text:p>0,00031226851851851900</text:p>
          </table:table-cell>
          <table:table-cell table:formula="of:=[.D40]-[.D39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71" office:value-type="float" office:value="2769" calcext:value-type="float">
            <text:p>2769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20486111111111" calcext:value-type="float">
            <text:p>0,00032048611111111100</text:p>
          </table:table-cell>
          <table:table-cell table:formula="of:=[.D41]-[.D40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71" office:value-type="float" office:value="2840" calcext:value-type="float">
            <text:p>28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28703703703704" calcext:value-type="float">
            <text:p>0,00032870370370370400</text:p>
          </table:table-cell>
          <table:table-cell table:formula="of:=[.D42]-[.D41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71" office:value-type="float" office:value="2911" calcext:value-type="float">
            <text:p>2911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36921296296296" calcext:value-type="float">
            <text:p>0,00033692129629629600</text:p>
          </table:table-cell>
          <table:table-cell table:formula="of:=[.D43]-[.D42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71" office:value-type="float" office:value="2982" calcext:value-type="float">
            <text:p>298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45138888888889" calcext:value-type="float">
            <text:p>0,00034513888888888900</text:p>
          </table:table-cell>
          <table:table-cell table:formula="of:=[.D44]-[.D43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71" office:value-type="float" office:value="3053" calcext:value-type="float">
            <text:p>3053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53356481481481" calcext:value-type="float">
            <text:p>0,00035335648148148100</text:p>
          </table:table-cell>
          <table:table-cell table:formula="of:=[.D45]-[.D44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71" office:value-type="float" office:value="3124" calcext:value-type="float">
            <text:p>312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61574074074074" calcext:value-type="float">
            <text:p>0,00036157407407407400</text:p>
          </table:table-cell>
          <table:table-cell table:formula="of:=[.D46]-[.D45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71" office:value-type="float" office:value="3195" calcext:value-type="float">
            <text:p>319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69791666666667" calcext:value-type="float">
            <text:p>0,00036979166666666700</text:p>
          </table:table-cell>
          <table:table-cell table:formula="of:=[.D47]-[.D46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71" office:value-type="float" office:value="3266" calcext:value-type="float">
            <text:p>326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78009259259259" calcext:value-type="float">
            <text:p>0,00037800925925925900</text:p>
          </table:table-cell>
          <table:table-cell table:formula="of:=[.D48]-[.D47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71" office:value-type="float" office:value="3337" calcext:value-type="float">
            <text:p>3337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86226851851852" calcext:value-type="float">
            <text:p>0,00038622685185185200</text:p>
          </table:table-cell>
          <table:table-cell table:formula="of:=[.D49]-[.D48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71" office:value-type="float" office:value="3408" calcext:value-type="float">
            <text:p>340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94444444444444" calcext:value-type="float">
            <text:p>0,00039444444444444500</text:p>
          </table:table-cell>
          <table:table-cell table:formula="of:=[.D50]-[.D49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71" office:value-type="float" office:value="3479" calcext:value-type="float">
            <text:p>3479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02662037037037" calcext:value-type="float">
            <text:p>0,00040266203703703700</text:p>
          </table:table-cell>
          <table:table-cell table:formula="of:=[.D51]-[.D50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71" office:value-type="float" office:value="3550" calcext:value-type="float">
            <text:p>35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1087962962963" calcext:value-type="float">
            <text:p>0,00041087962962963000</text:p>
          </table:table-cell>
          <table:table-cell table:formula="of:=[.D52]-[.D51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71" office:value-type="float" office:value="3621" calcext:value-type="float">
            <text:p>3621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19097222222222" calcext:value-type="float">
            <text:p>0,00041909722222222200</text:p>
          </table:table-cell>
          <table:table-cell table:formula="of:=[.D53]-[.D52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71" office:value-type="float" office:value="3692" calcext:value-type="float">
            <text:p>369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27314814814815" calcext:value-type="float">
            <text:p>0,00042731481481481500</text:p>
          </table:table-cell>
          <table:table-cell table:formula="of:=[.D54]-[.D53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71" office:value-type="float" office:value="3763" calcext:value-type="float">
            <text:p>3763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435532407407407" calcext:value-type="float">
            <text:p>0,00043553240740740700</text:p>
          </table:table-cell>
          <table:table-cell table:formula="of:=[.D55]-[.D54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71" office:value-type="float" office:value="3834" calcext:value-type="float">
            <text:p>383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44375" calcext:value-type="float">
            <text:p>0,00044375000000000000</text:p>
          </table:table-cell>
          <table:table-cell table:formula="of:=[.D56]-[.D55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71" office:value-type="float" office:value="3905" calcext:value-type="float">
            <text:p>390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451967592592593" calcext:value-type="float">
            <text:p>0,00045196759259259300</text:p>
          </table:table-cell>
          <table:table-cell table:formula="of:=[.D57]-[.D56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71" office:value-type="float" office:value="3976" calcext:value-type="float">
            <text:p>397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460185185185185" calcext:value-type="float">
            <text:p>0,00046018518518518500</text:p>
          </table:table-cell>
          <table:table-cell table:formula="of:=[.D58]-[.D57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71" office:value-type="float" office:value="4047" calcext:value-type="float">
            <text:p>4047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468402777777778" calcext:value-type="float">
            <text:p>0,00046840277777777800</text:p>
          </table:table-cell>
          <table:table-cell table:formula="of:=[.D59]-[.D58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71" office:value-type="float" office:value="4118" calcext:value-type="float">
            <text:p>411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47662037037037" calcext:value-type="float">
            <text:p>0,00047662037037037000</text:p>
          </table:table-cell>
          <table:table-cell table:formula="of:=[.D60]-[.D59]" office:value-type="float" office:value="0.0000082175925925926" calcext:value-type="float">
            <text:p>0,00000821759259259260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71" office:value-type="float" office:value="4189" calcext:value-type="float">
            <text:p>4189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484837962962963" calcext:value-type="float">
            <text:p>0,00048483796296296300</text:p>
          </table:table-cell>
          <table:table-cell table:formula="of:=[.D61]-[.D6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71" office:value-type="float" office:value="4260" calcext:value-type="float">
            <text:p>42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493055555555556" calcext:value-type="float">
            <text:p>0,00049305555555555600</text:p>
          </table:table-cell>
          <table:table-cell table:formula="of:=[.D62]-[.D61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71" office:value-type="float" office:value="4331" calcext:value-type="float">
            <text:p>4331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501273148148148" calcext:value-type="float">
            <text:p>0,00050127314814814800</text:p>
          </table:table-cell>
          <table:table-cell table:formula="of:=[.D63]-[.D62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71" office:value-type="float" office:value="4402" calcext:value-type="float">
            <text:p>440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509490740740741" calcext:value-type="float">
            <text:p>0,00050949074074074100</text:p>
          </table:table-cell>
          <table:table-cell table:formula="of:=[.D64]-[.D6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71" office:value-type="float" office:value="4473" calcext:value-type="float">
            <text:p>4473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517708333333333" calcext:value-type="float">
            <text:p>0,00051770833333333300</text:p>
          </table:table-cell>
          <table:table-cell table:formula="of:=[.D65]-[.D64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71" office:value-type="float" office:value="4544" calcext:value-type="float">
            <text:p>454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525925925925926" calcext:value-type="float">
            <text:p>0,00052592592592592600</text:p>
          </table:table-cell>
          <table:table-cell table:formula="of:=[.D66]-[.D6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71" office:value-type="float" office:value="4615" calcext:value-type="float">
            <text:p>461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534143518518519" calcext:value-type="float">
            <text:p>0,00053414351851851900</text:p>
          </table:table-cell>
          <table:table-cell table:formula="of:=[.D67]-[.D66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71" office:value-type="float" office:value="4686" calcext:value-type="float">
            <text:p>468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542361111111111" calcext:value-type="float">
            <text:p>0,00054236111111111100</text:p>
          </table:table-cell>
          <table:table-cell table:formula="of:=[.D68]-[.D6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71" office:value-type="float" office:value="4757" calcext:value-type="float">
            <text:p>4757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550578703703704" calcext:value-type="float">
            <text:p>0,00055057870370370400</text:p>
          </table:table-cell>
          <table:table-cell table:formula="of:=[.D69]-[.D68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71" office:value-type="float" office:value="4828" calcext:value-type="float">
            <text:p>482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558796296296296" calcext:value-type="float">
            <text:p>0,00055879629629629600</text:p>
          </table:table-cell>
          <table:table-cell table:formula="of:=[.D70]-[.D6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71" office:value-type="float" office:value="4899" calcext:value-type="float">
            <text:p>4899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567013888888889" calcext:value-type="float">
            <text:p>0,00056701388888888900</text:p>
          </table:table-cell>
          <table:table-cell table:formula="of:=[.D71]-[.D70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71" office:value-type="float" office:value="4970" calcext:value-type="float">
            <text:p>497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575231481481482" calcext:value-type="float">
            <text:p>0,00057523148148148200</text:p>
          </table:table-cell>
          <table:table-cell table:formula="of:=[.D72]-[.D7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71" office:value-type="float" office:value="5041" calcext:value-type="float">
            <text:p>5041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583449074074074" calcext:value-type="float">
            <text:p>0,00058344907407407400</text:p>
          </table:table-cell>
          <table:table-cell table:formula="of:=[.D73]-[.D72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71" office:value-type="float" office:value="5112" calcext:value-type="float">
            <text:p>511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591666666666667" calcext:value-type="float">
            <text:p>0,00059166666666666700</text:p>
          </table:table-cell>
          <table:table-cell table:formula="of:=[.D74]-[.D73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71" office:value-type="float" office:value="5183" calcext:value-type="float">
            <text:p>5183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599884259259259" calcext:value-type="float">
            <text:p>0,00059988425925925900</text:p>
          </table:table-cell>
          <table:table-cell table:formula="of:=[.D75]-[.D7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71" office:value-type="float" office:value="5254" calcext:value-type="float">
            <text:p>525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608101851851852" calcext:value-type="float">
            <text:p>0,00060810185185185200</text:p>
          </table:table-cell>
          <table:table-cell table:formula="of:=[.D76]-[.D75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71" office:value-type="float" office:value="5325" calcext:value-type="float">
            <text:p>53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616319444444444" calcext:value-type="float">
            <text:p>0,00061631944444444400</text:p>
          </table:table-cell>
          <table:table-cell table:formula="of:=[.D77]-[.D7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71" office:value-type="float" office:value="5396" calcext:value-type="float">
            <text:p>539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624537037037037" calcext:value-type="float">
            <text:p>0,00062453703703703700</text:p>
          </table:table-cell>
          <table:table-cell table:formula="of:=[.D78]-[.D77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71" office:value-type="float" office:value="5467" calcext:value-type="float">
            <text:p>5467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63275462962963" calcext:value-type="float">
            <text:p>0,00063275462962963000</text:p>
          </table:table-cell>
          <table:table-cell table:formula="of:=[.D79]-[.D7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71" office:value-type="float" office:value="5538" calcext:value-type="float">
            <text:p>553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640972222222222" calcext:value-type="float">
            <text:p>0,00064097222222222200</text:p>
          </table:table-cell>
          <table:table-cell table:formula="of:=[.D80]-[.D79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71" office:value-type="float" office:value="5609" calcext:value-type="float">
            <text:p>5609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649189814814815" calcext:value-type="float">
            <text:p>0,00064918981481481500</text:p>
          </table:table-cell>
          <table:table-cell table:formula="of:=[.D81]-[.D8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71" office:value-type="float" office:value="5680" calcext:value-type="float">
            <text:p>56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657407407407407" calcext:value-type="float">
            <text:p>0,00065740740740740700</text:p>
          </table:table-cell>
          <table:table-cell table:formula="of:=[.D82]-[.D81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71" office:value-type="float" office:value="5751" calcext:value-type="float">
            <text:p>5751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665625" calcext:value-type="float">
            <text:p>0,00066562500000000000</text:p>
          </table:table-cell>
          <table:table-cell table:formula="of:=[.D83]-[.D8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71" office:value-type="float" office:value="5822" calcext:value-type="float">
            <text:p>582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673842592592593" calcext:value-type="float">
            <text:p>0,00067384259259259300</text:p>
          </table:table-cell>
          <table:table-cell table:formula="of:=[.D84]-[.D83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71" office:value-type="float" office:value="5893" calcext:value-type="float">
            <text:p>5893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682060185185185" calcext:value-type="float">
            <text:p>0,00068206018518518500</text:p>
          </table:table-cell>
          <table:table-cell table:formula="of:=[.D85]-[.D8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71" office:value-type="float" office:value="5964" calcext:value-type="float">
            <text:p>596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690277777777778" calcext:value-type="float">
            <text:p>0,00069027777777777800</text:p>
          </table:table-cell>
          <table:table-cell table:formula="of:=[.D86]-[.D85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71" office:value-type="float" office:value="6035" calcext:value-type="float">
            <text:p>603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69849537037037" calcext:value-type="float">
            <text:p>0,00069849537037037000</text:p>
          </table:table-cell>
          <table:table-cell table:formula="of:=[.D87]-[.D86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71" office:value-type="float" office:value="6106" calcext:value-type="float">
            <text:p>610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706712962962963" calcext:value-type="float">
            <text:p>0,00070671296296296300</text:p>
          </table:table-cell>
          <table:table-cell table:formula="of:=[.D88]-[.D8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71" office:value-type="float" office:value="6177" calcext:value-type="float">
            <text:p>6177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714930555555556" calcext:value-type="float">
            <text:p>0,00071493055555555600</text:p>
          </table:table-cell>
          <table:table-cell table:formula="of:=[.D89]-[.D88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71" office:value-type="float" office:value="6248" calcext:value-type="float">
            <text:p>624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723148148148148" calcext:value-type="float">
            <text:p>0,00072314814814814800</text:p>
          </table:table-cell>
          <table:table-cell table:formula="of:=[.D90]-[.D8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71" office:value-type="float" office:value="6319" calcext:value-type="float">
            <text:p>6319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731365740740741" calcext:value-type="float">
            <text:p>0,00073136574074074100</text:p>
          </table:table-cell>
          <table:table-cell table:formula="of:=[.D91]-[.D90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71" office:value-type="float" office:value="6390" calcext:value-type="float">
            <text:p>639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739583333333333" calcext:value-type="float">
            <text:p>0,00073958333333333300</text:p>
          </table:table-cell>
          <table:table-cell table:formula="of:=[.D92]-[.D9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71" office:value-type="float" office:value="6461" calcext:value-type="float">
            <text:p>6461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747800925925926" calcext:value-type="float">
            <text:p>0,00074780092592592600</text:p>
          </table:table-cell>
          <table:table-cell table:formula="of:=[.D93]-[.D92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71" office:value-type="float" office:value="6532" calcext:value-type="float">
            <text:p>653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756018518518519" calcext:value-type="float">
            <text:p>0,00075601851851851900</text:p>
          </table:table-cell>
          <table:table-cell table:formula="of:=[.D94]-[.D9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71" office:value-type="float" office:value="6603" calcext:value-type="float">
            <text:p>6603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764236111111111" calcext:value-type="float">
            <text:p>0,00076423611111111100</text:p>
          </table:table-cell>
          <table:table-cell table:formula="of:=[.D95]-[.D94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71" office:value-type="float" office:value="6674" calcext:value-type="float">
            <text:p>667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772453703703704" calcext:value-type="float">
            <text:p>0,00077245370370370400</text:p>
          </table:table-cell>
          <table:table-cell table:formula="of:=[.D96]-[.D9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71" office:value-type="float" office:value="6745" calcext:value-type="float">
            <text:p>674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780671296296296" calcext:value-type="float">
            <text:p>0,00078067129629629600</text:p>
          </table:table-cell>
          <table:table-cell table:formula="of:=[.D97]-[.D96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71" office:value-type="float" office:value="6816" calcext:value-type="float">
            <text:p>681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788888888888889" calcext:value-type="float">
            <text:p>0,00078888888888888900</text:p>
          </table:table-cell>
          <table:table-cell table:formula="of:=[.D98]-[.D97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71" office:value-type="float" office:value="6887" calcext:value-type="float">
            <text:p>6887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797106481481481" calcext:value-type="float">
            <text:p>0,00079710648148148100</text:p>
          </table:table-cell>
          <table:table-cell table:formula="of:=[.D99]-[.D9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71" office:value-type="float" office:value="6958" calcext:value-type="float">
            <text:p>695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805324074074074" calcext:value-type="float">
            <text:p>0,00080532407407407400</text:p>
          </table:table-cell>
          <table:table-cell table:formula="of:=[.D100]-[.D99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71" office:value-type="float" office:value="7029" calcext:value-type="float">
            <text:p>7029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813541666666667" calcext:value-type="float">
            <text:p>0,00081354166666666700</text:p>
          </table:table-cell>
          <table:table-cell table:formula="of:=[.D101]-[.D10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71" office:value-type="float" office:value="7100" calcext:value-type="float">
            <text:p>71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821759259259259" calcext:value-type="float">
            <text:p>0,00082175925925925900</text:p>
          </table:table-cell>
          <table:table-cell table:formula="of:=[.D102]-[.D101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71" office:value-type="float" office:value="7171" calcext:value-type="float">
            <text:p>7171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829976851851852" calcext:value-type="float">
            <text:p>0,00082997685185185200</text:p>
          </table:table-cell>
          <table:table-cell table:formula="of:=[.D103]-[.D10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71" office:value-type="float" office:value="7242" calcext:value-type="float">
            <text:p>724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838194444444445" calcext:value-type="float">
            <text:p>0,00083819444444444500</text:p>
          </table:table-cell>
          <table:table-cell table:formula="of:=[.D104]-[.D103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71" office:value-type="float" office:value="7313" calcext:value-type="float">
            <text:p>7313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846412037037037" calcext:value-type="float">
            <text:p>0,00084641203703703700</text:p>
          </table:table-cell>
          <table:table-cell table:formula="of:=[.D105]-[.D10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71" office:value-type="float" office:value="7384" calcext:value-type="float">
            <text:p>738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85462962962963" calcext:value-type="float">
            <text:p>0,00085462962962963000</text:p>
          </table:table-cell>
          <table:table-cell table:formula="of:=[.D106]-[.D105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71" office:value-type="float" office:value="7455" calcext:value-type="float">
            <text:p>745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862847222222222" calcext:value-type="float">
            <text:p>0,00086284722222222200</text:p>
          </table:table-cell>
          <table:table-cell table:formula="of:=[.D107]-[.D10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71" office:value-type="float" office:value="7526" calcext:value-type="float">
            <text:p>752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871064814814815" calcext:value-type="float">
            <text:p>0,00087106481481481500</text:p>
          </table:table-cell>
          <table:table-cell table:formula="of:=[.D108]-[.D107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71" office:value-type="float" office:value="7597" calcext:value-type="float">
            <text:p>7597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879282407407407" calcext:value-type="float">
            <text:p>0,00087928240740740700</text:p>
          </table:table-cell>
          <table:table-cell table:formula="of:=[.D109]-[.D10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71" office:value-type="float" office:value="7668" calcext:value-type="float">
            <text:p>766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8875" calcext:value-type="float">
            <text:p>0,00088750000000000000</text:p>
          </table:table-cell>
          <table:table-cell table:formula="of:=[.D110]-[.D109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71" office:value-type="float" office:value="7739" calcext:value-type="float">
            <text:p>7739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895717592592593" calcext:value-type="float">
            <text:p>0,00089571759259259300</text:p>
          </table:table-cell>
          <table:table-cell table:formula="of:=[.D111]-[.D110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71" office:value-type="float" office:value="7810" calcext:value-type="float">
            <text:p>781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903935185185185" calcext:value-type="float">
            <text:p>0,00090393518518518500</text:p>
          </table:table-cell>
          <table:table-cell table:formula="of:=[.D112]-[.D11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71" office:value-type="float" office:value="7881" calcext:value-type="float">
            <text:p>7881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912152777777778" calcext:value-type="float">
            <text:p>0,00091215277777777800</text:p>
          </table:table-cell>
          <table:table-cell table:formula="of:=[.D113]-[.D112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71" office:value-type="float" office:value="7952" calcext:value-type="float">
            <text:p>795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92037037037037" calcext:value-type="float">
            <text:p>0,00092037037037037000</text:p>
          </table:table-cell>
          <table:table-cell table:formula="of:=[.D114]-[.D11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71" office:value-type="float" office:value="8023" calcext:value-type="float">
            <text:p>8023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928587962962963" calcext:value-type="float">
            <text:p>0,00092858796296296300</text:p>
          </table:table-cell>
          <table:table-cell table:formula="of:=[.D115]-[.D114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71" office:value-type="float" office:value="8094" calcext:value-type="float">
            <text:p>809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936805555555556" calcext:value-type="float">
            <text:p>0,00093680555555555600</text:p>
          </table:table-cell>
          <table:table-cell table:formula="of:=[.D116]-[.D11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71" office:value-type="float" office:value="8165" calcext:value-type="float">
            <text:p>816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945023148148148" calcext:value-type="float">
            <text:p>0,00094502314814814800</text:p>
          </table:table-cell>
          <table:table-cell table:formula="of:=[.D117]-[.D116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71" office:value-type="float" office:value="8236" calcext:value-type="float">
            <text:p>823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953240740740741" calcext:value-type="float">
            <text:p>0,00095324074074074100</text:p>
          </table:table-cell>
          <table:table-cell table:formula="of:=[.D118]-[.D11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71" office:value-type="float" office:value="8307" calcext:value-type="float">
            <text:p>8307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961458333333333" calcext:value-type="float">
            <text:p>0,00096145833333333400</text:p>
          </table:table-cell>
          <table:table-cell table:formula="of:=[.D119]-[.D118]" office:value-type="float" office:value="0.00000821759259259254" calcext:value-type="float">
            <text:p>0,00000821759259259254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71" office:value-type="float" office:value="8378" calcext:value-type="float">
            <text:p>837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969675925925926" calcext:value-type="float">
            <text:p>0,00096967592592592600</text:p>
          </table:table-cell>
          <table:table-cell table:formula="of:=[.D120]-[.D11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71" office:value-type="float" office:value="8449" calcext:value-type="float">
            <text:p>8449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977893518518519" calcext:value-type="float">
            <text:p>0,00097789351851851900</text:p>
          </table:table-cell>
          <table:table-cell table:formula="of:=[.D121]-[.D12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71" office:value-type="float" office:value="8520" calcext:value-type="float">
            <text:p>85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986111111111111" calcext:value-type="float">
            <text:p>0,00098611111111111100</text:p>
          </table:table-cell>
          <table:table-cell table:formula="of:=[.D122]-[.D121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71" office:value-type="float" office:value="8591" calcext:value-type="float">
            <text:p>8591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994328703703704" calcext:value-type="float">
            <text:p>0,00099432870370370400</text:p>
          </table:table-cell>
          <table:table-cell table:formula="of:=[.D123]-[.D12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71" office:value-type="float" office:value="8662" calcext:value-type="float">
            <text:p>866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0025462962963" calcext:value-type="float">
            <text:p>0,00100254629629630000</text:p>
          </table:table-cell>
          <table:table-cell table:formula="of:=[.D124]-[.D12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71" office:value-type="float" office:value="8733" calcext:value-type="float">
            <text:p>8733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01076388888889" calcext:value-type="float">
            <text:p>0,00101076388888889000</text:p>
          </table:table-cell>
          <table:table-cell table:formula="of:=[.D125]-[.D124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71" office:value-type="float" office:value="8804" calcext:value-type="float">
            <text:p>880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01898148148148" calcext:value-type="float">
            <text:p>0,00101898148148148000</text:p>
          </table:table-cell>
          <table:table-cell table:formula="of:=[.D126]-[.D12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71" office:value-type="float" office:value="8875" calcext:value-type="float">
            <text:p>88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02719907407407" calcext:value-type="float">
            <text:p>0,00102719907407407000</text:p>
          </table:table-cell>
          <table:table-cell table:formula="of:=[.D127]-[.D12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71" office:value-type="float" office:value="8946" calcext:value-type="float">
            <text:p>894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03541666666667" calcext:value-type="float">
            <text:p>0,00103541666666667000</text:p>
          </table:table-cell>
          <table:table-cell table:formula="of:=[.D128]-[.D12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71" office:value-type="float" office:value="9017" calcext:value-type="float">
            <text:p>9017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04363425925926" calcext:value-type="float">
            <text:p>0,00104363425925926000</text:p>
          </table:table-cell>
          <table:table-cell table:formula="of:=[.D129]-[.D128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71" office:value-type="float" office:value="9088" calcext:value-type="float">
            <text:p>908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05185185185185" calcext:value-type="float">
            <text:p>0,00105185185185185000</text:p>
          </table:table-cell>
          <table:table-cell table:formula="of:=[.D130]-[.D12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71" office:value-type="float" office:value="9159" calcext:value-type="float">
            <text:p>9159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06006944444444" calcext:value-type="float">
            <text:p>0,00106006944444444000</text:p>
          </table:table-cell>
          <table:table-cell table:formula="of:=[.D131]-[.D13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71" office:value-type="float" office:value="9230" calcext:value-type="float">
            <text:p>923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06828703703704" calcext:value-type="float">
            <text:p>0,00106828703703704000</text:p>
          </table:table-cell>
          <table:table-cell table:formula="of:=[.D132]-[.D13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71" office:value-type="float" office:value="9301" calcext:value-type="float">
            <text:p>9301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07650462962963" calcext:value-type="float">
            <text:p>0,00107650462962963000</text:p>
          </table:table-cell>
          <table:table-cell table:formula="of:=[.D133]-[.D132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71" office:value-type="float" office:value="9372" calcext:value-type="float">
            <text:p>937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08472222222222" calcext:value-type="float">
            <text:p>0,00108472222222222000</text:p>
          </table:table-cell>
          <table:table-cell table:formula="of:=[.D134]-[.D13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71" office:value-type="float" office:value="9443" calcext:value-type="float">
            <text:p>9443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09293981481481" calcext:value-type="float">
            <text:p>0,00109293981481481000</text:p>
          </table:table-cell>
          <table:table-cell table:formula="of:=[.D135]-[.D13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71" office:value-type="float" office:value="9514" calcext:value-type="float">
            <text:p>951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10115740740741" calcext:value-type="float">
            <text:p>0,00110115740740741000</text:p>
          </table:table-cell>
          <table:table-cell table:formula="of:=[.D136]-[.D135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71" office:value-type="float" office:value="9585" calcext:value-type="float">
            <text:p>958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109375" calcext:value-type="float">
            <text:p>0,00110937500000000000</text:p>
          </table:table-cell>
          <table:table-cell table:formula="of:=[.D137]-[.D13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71" office:value-type="float" office:value="9656" calcext:value-type="float">
            <text:p>965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11759259259259" calcext:value-type="float">
            <text:p>0,00111759259259259000</text:p>
          </table:table-cell>
          <table:table-cell table:formula="of:=[.D138]-[.D13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71" office:value-type="float" office:value="9727" calcext:value-type="float">
            <text:p>9727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12581018518519" calcext:value-type="float">
            <text:p>0,00112581018518519000</text:p>
          </table:table-cell>
          <table:table-cell table:formula="of:=[.D139]-[.D13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71" office:value-type="float" office:value="9798" calcext:value-type="float">
            <text:p>979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13402777777778" calcext:value-type="float">
            <text:p>0,00113402777777778000</text:p>
          </table:table-cell>
          <table:table-cell table:formula="of:=[.D140]-[.D139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71" office:value-type="float" office:value="9869" calcext:value-type="float">
            <text:p>9869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14224537037037" calcext:value-type="float">
            <text:p>0,00114224537037037000</text:p>
          </table:table-cell>
          <table:table-cell table:formula="of:=[.D141]-[.D14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71" office:value-type="float" office:value="9940" calcext:value-type="float">
            <text:p>99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15046296296296" calcext:value-type="float">
            <text:p>0,00115046296296296000</text:p>
          </table:table-cell>
          <table:table-cell table:formula="of:=[.D142]-[.D14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71" office:value-type="float" office:value="10011" calcext:value-type="float">
            <text:p>10011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15868055555556" calcext:value-type="float">
            <text:p>0,00115868055555556000</text:p>
          </table:table-cell>
          <table:table-cell table:formula="of:=[.D143]-[.D14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71" office:value-type="float" office:value="10082" calcext:value-type="float">
            <text:p>1008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16689814814815" calcext:value-type="float">
            <text:p>0,00116689814814815000</text:p>
          </table:table-cell>
          <table:table-cell table:formula="of:=[.D144]-[.D143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71" office:value-type="float" office:value="10153" calcext:value-type="float">
            <text:p>10153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17511574074074" calcext:value-type="float">
            <text:p>0,00117511574074074000</text:p>
          </table:table-cell>
          <table:table-cell table:formula="of:=[.D145]-[.D14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71" office:value-type="float" office:value="10224" calcext:value-type="float">
            <text:p>1022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18333333333333" calcext:value-type="float">
            <text:p>0,00118333333333333000</text:p>
          </table:table-cell>
          <table:table-cell table:formula="of:=[.D146]-[.D14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71" office:value-type="float" office:value="10295" calcext:value-type="float">
            <text:p>1029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19155092592593" calcext:value-type="float">
            <text:p>0,00119155092592593000</text:p>
          </table:table-cell>
          <table:table-cell table:formula="of:=[.D147]-[.D146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71" office:value-type="float" office:value="10366" calcext:value-type="float">
            <text:p>1036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19976851851852" calcext:value-type="float">
            <text:p>0,00119976851851852000</text:p>
          </table:table-cell>
          <table:table-cell table:formula="of:=[.D148]-[.D14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71" office:value-type="float" office:value="10437" calcext:value-type="float">
            <text:p>10437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20798611111111" calcext:value-type="float">
            <text:p>0,00120798611111111000</text:p>
          </table:table-cell>
          <table:table-cell table:formula="of:=[.D149]-[.D14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71" office:value-type="float" office:value="10508" calcext:value-type="float">
            <text:p>1050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2162037037037" calcext:value-type="float">
            <text:p>0,00121620370370370000</text:p>
          </table:table-cell>
          <table:table-cell table:formula="of:=[.D150]-[.D14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71" office:value-type="float" office:value="10579" calcext:value-type="float">
            <text:p>10579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2244212962963" calcext:value-type="float">
            <text:p>0,00122442129629630000</text:p>
          </table:table-cell>
          <table:table-cell table:formula="of:=[.D151]-[.D150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71" office:value-type="float" office:value="10650" calcext:value-type="float">
            <text:p>106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23263888888889" calcext:value-type="float">
            <text:p>0,00123263888888889000</text:p>
          </table:table-cell>
          <table:table-cell table:formula="of:=[.D152]-[.D15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71" office:value-type="float" office:value="10721" calcext:value-type="float">
            <text:p>10721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24085648148148" calcext:value-type="float">
            <text:p>0,00124085648148148000</text:p>
          </table:table-cell>
          <table:table-cell table:formula="of:=[.D153]-[.D15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71" office:value-type="float" office:value="10792" calcext:value-type="float">
            <text:p>1079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24907407407407" calcext:value-type="float">
            <text:p>0,00124907407407407000</text:p>
          </table:table-cell>
          <table:table-cell table:formula="of:=[.D154]-[.D15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71" office:value-type="float" office:value="10863" calcext:value-type="float">
            <text:p>10863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25729166666667" calcext:value-type="float">
            <text:p>0,00125729166666667000</text:p>
          </table:table-cell>
          <table:table-cell table:formula="of:=[.D155]-[.D154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71" office:value-type="float" office:value="10934" calcext:value-type="float">
            <text:p>1093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26550925925926" calcext:value-type="float">
            <text:p>0,00126550925925926000</text:p>
          </table:table-cell>
          <table:table-cell table:formula="of:=[.D156]-[.D15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71" office:value-type="float" office:value="11005" calcext:value-type="float">
            <text:p>1100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27372685185185" calcext:value-type="float">
            <text:p>0,00127372685185185000</text:p>
          </table:table-cell>
          <table:table-cell table:formula="of:=[.D157]-[.D15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71" office:value-type="float" office:value="11076" calcext:value-type="float">
            <text:p>1107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28194444444444" calcext:value-type="float">
            <text:p>0,00128194444444444000</text:p>
          </table:table-cell>
          <table:table-cell table:formula="of:=[.D158]-[.D15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71" office:value-type="float" office:value="11147" calcext:value-type="float">
            <text:p>11147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29016203703704" calcext:value-type="float">
            <text:p>0,00129016203703704000</text:p>
          </table:table-cell>
          <table:table-cell table:formula="of:=[.D159]-[.D158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71" office:value-type="float" office:value="11218" calcext:value-type="float">
            <text:p>1121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29837962962963" calcext:value-type="float">
            <text:p>0,00129837962962963000</text:p>
          </table:table-cell>
          <table:table-cell table:formula="of:=[.D160]-[.D15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71" office:value-type="float" office:value="11289" calcext:value-type="float">
            <text:p>11289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30659722222222" calcext:value-type="float">
            <text:p>0,00130659722222222000</text:p>
          </table:table-cell>
          <table:table-cell table:formula="of:=[.D161]-[.D16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71" office:value-type="float" office:value="11360" calcext:value-type="float">
            <text:p>113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31481481481481" calcext:value-type="float">
            <text:p>0,00131481481481481000</text:p>
          </table:table-cell>
          <table:table-cell table:formula="of:=[.D162]-[.D161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71" office:value-type="float" office:value="11431" calcext:value-type="float">
            <text:p>11431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32303240740741" calcext:value-type="float">
            <text:p>0,00132303240740741000</text:p>
          </table:table-cell>
          <table:table-cell table:formula="of:=[.D163]-[.D16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71" office:value-type="float" office:value="11502" calcext:value-type="float">
            <text:p>1150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33125" calcext:value-type="float">
            <text:p>0,00133125000000000000</text:p>
          </table:table-cell>
          <table:table-cell table:formula="of:=[.D164]-[.D16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71" office:value-type="float" office:value="11573" calcext:value-type="float">
            <text:p>11573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33946759259259" calcext:value-type="float">
            <text:p>0,00133946759259259000</text:p>
          </table:table-cell>
          <table:table-cell table:formula="of:=[.D165]-[.D16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71" office:value-type="float" office:value="11644" calcext:value-type="float">
            <text:p>1164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34768518518519" calcext:value-type="float">
            <text:p>0,00134768518518519000</text:p>
          </table:table-cell>
          <table:table-cell table:formula="of:=[.D166]-[.D165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71" office:value-type="float" office:value="11715" calcext:value-type="float">
            <text:p>1171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35590277777778" calcext:value-type="float">
            <text:p>0,00135590277777778000</text:p>
          </table:table-cell>
          <table:table-cell table:formula="of:=[.D167]-[.D16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71" office:value-type="float" office:value="11786" calcext:value-type="float">
            <text:p>1178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36412037037037" calcext:value-type="float">
            <text:p>0,00136412037037037000</text:p>
          </table:table-cell>
          <table:table-cell table:formula="of:=[.D168]-[.D16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71" office:value-type="float" office:value="11857" calcext:value-type="float">
            <text:p>11857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37233796296296" calcext:value-type="float">
            <text:p>0,00137233796296296000</text:p>
          </table:table-cell>
          <table:table-cell table:formula="of:=[.D169]-[.D16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71" office:value-type="float" office:value="11928" calcext:value-type="float">
            <text:p>1192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38055555555556" calcext:value-type="float">
            <text:p>0,00138055555555556000</text:p>
          </table:table-cell>
          <table:table-cell table:formula="of:=[.D170]-[.D169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71" office:value-type="float" office:value="11999" calcext:value-type="float">
            <text:p>11999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38877314814815" calcext:value-type="float">
            <text:p>0,00138877314814815000</text:p>
          </table:table-cell>
          <table:table-cell table:formula="of:=[.D171]-[.D17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71" office:value-type="float" office:value="12070" calcext:value-type="float">
            <text:p>1207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39699074074074" calcext:value-type="float">
            <text:p>0,00139699074074074000</text:p>
          </table:table-cell>
          <table:table-cell table:formula="of:=[.D172]-[.D17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71" office:value-type="float" office:value="12141" calcext:value-type="float">
            <text:p>12141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40520833333333" calcext:value-type="float">
            <text:p>0,00140520833333333000</text:p>
          </table:table-cell>
          <table:table-cell table:formula="of:=[.D173]-[.D172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71" office:value-type="float" office:value="12212" calcext:value-type="float">
            <text:p>1221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41342592592593" calcext:value-type="float">
            <text:p>0,00141342592592593000</text:p>
          </table:table-cell>
          <table:table-cell table:formula="of:=[.D174]-[.D17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71" office:value-type="float" office:value="12283" calcext:value-type="float">
            <text:p>12283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42164351851852" calcext:value-type="float">
            <text:p>0,00142164351851852000</text:p>
          </table:table-cell>
          <table:table-cell table:formula="of:=[.D175]-[.D17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71" office:value-type="float" office:value="12354" calcext:value-type="float">
            <text:p>1235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42986111111111" calcext:value-type="float">
            <text:p>0,00142986111111111000</text:p>
          </table:table-cell>
          <table:table-cell table:formula="of:=[.D176]-[.D17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71" office:value-type="float" office:value="12425" calcext:value-type="float">
            <text:p>124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4380787037037" calcext:value-type="float">
            <text:p>0,00143807870370370000</text:p>
          </table:table-cell>
          <table:table-cell table:formula="of:=[.D177]-[.D176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71" office:value-type="float" office:value="12496" calcext:value-type="float">
            <text:p>1249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4462962962963" calcext:value-type="float">
            <text:p>0,00144629629629630000</text:p>
          </table:table-cell>
          <table:table-cell table:formula="of:=[.D178]-[.D17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71" office:value-type="float" office:value="12567" calcext:value-type="float">
            <text:p>12567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45451388888889" calcext:value-type="float">
            <text:p>0,00145451388888889000</text:p>
          </table:table-cell>
          <table:table-cell table:formula="of:=[.D179]-[.D17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71" office:value-type="float" office:value="12638" calcext:value-type="float">
            <text:p>1263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46273148148148" calcext:value-type="float">
            <text:p>0,00146273148148148000</text:p>
          </table:table-cell>
          <table:table-cell table:formula="of:=[.D180]-[.D17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71" office:value-type="float" office:value="12709" calcext:value-type="float">
            <text:p>12709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47094907407407" calcext:value-type="float">
            <text:p>0,00147094907407407000</text:p>
          </table:table-cell>
          <table:table-cell table:formula="of:=[.D181]-[.D180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71" office:value-type="float" office:value="12780" calcext:value-type="float">
            <text:p>127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47916666666667" calcext:value-type="float">
            <text:p>0,00147916666666667000</text:p>
          </table:table-cell>
          <table:table-cell table:formula="of:=[.D182]-[.D18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71" office:value-type="float" office:value="12851" calcext:value-type="float">
            <text:p>12851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48738425925926" calcext:value-type="float">
            <text:p>0,00148738425925926000</text:p>
          </table:table-cell>
          <table:table-cell table:formula="of:=[.D183]-[.D18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71" office:value-type="float" office:value="12922" calcext:value-type="float">
            <text:p>1292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49560185185185" calcext:value-type="float">
            <text:p>0,00149560185185185000</text:p>
          </table:table-cell>
          <table:table-cell table:formula="of:=[.D184]-[.D183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71" office:value-type="float" office:value="12993" calcext:value-type="float">
            <text:p>12993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50381944444444" calcext:value-type="float">
            <text:p>0,00150381944444444000</text:p>
          </table:table-cell>
          <table:table-cell table:formula="of:=[.D185]-[.D18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71" office:value-type="float" office:value="13064" calcext:value-type="float">
            <text:p>1306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51203703703704" calcext:value-type="float">
            <text:p>0,00151203703703704000</text:p>
          </table:table-cell>
          <table:table-cell table:formula="of:=[.D186]-[.D18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71" office:value-type="float" office:value="13135" calcext:value-type="float">
            <text:p>1313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52025462962963" calcext:value-type="float">
            <text:p>0,00152025462962963000</text:p>
          </table:table-cell>
          <table:table-cell table:formula="of:=[.D187]-[.D18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71" office:value-type="float" office:value="13206" calcext:value-type="float">
            <text:p>1320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52847222222222" calcext:value-type="float">
            <text:p>0,00152847222222222000</text:p>
          </table:table-cell>
          <table:table-cell table:formula="of:=[.D188]-[.D187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71" office:value-type="float" office:value="13277" calcext:value-type="float">
            <text:p>13277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53668981481481" calcext:value-type="float">
            <text:p>0,00153668981481481000</text:p>
          </table:table-cell>
          <table:table-cell table:formula="of:=[.D189]-[.D18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71" office:value-type="float" office:value="13348" calcext:value-type="float">
            <text:p>1334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54490740740741" calcext:value-type="float">
            <text:p>0,00154490740740741000</text:p>
          </table:table-cell>
          <table:table-cell table:formula="of:=[.D190]-[.D18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71" office:value-type="float" office:value="13419" calcext:value-type="float">
            <text:p>13419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553125" calcext:value-type="float">
            <text:p>0,00155312500000000000</text:p>
          </table:table-cell>
          <table:table-cell table:formula="of:=[.D191]-[.D19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71" office:value-type="float" office:value="13490" calcext:value-type="float">
            <text:p>1349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56134259259259" calcext:value-type="float">
            <text:p>0,00156134259259259000</text:p>
          </table:table-cell>
          <table:table-cell table:formula="of:=[.D192]-[.D191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71" office:value-type="float" office:value="13561" calcext:value-type="float">
            <text:p>13561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56956018518519" calcext:value-type="float">
            <text:p>0,00156956018518519000</text:p>
          </table:table-cell>
          <table:table-cell table:formula="of:=[.D193]-[.D19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71" office:value-type="float" office:value="13632" calcext:value-type="float">
            <text:p>1363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57777777777778" calcext:value-type="float">
            <text:p>0,00157777777777778000</text:p>
          </table:table-cell>
          <table:table-cell table:formula="of:=[.D194]-[.D19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71" office:value-type="float" office:value="13703" calcext:value-type="float">
            <text:p>13703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58599537037037" calcext:value-type="float">
            <text:p>0,00158599537037037000</text:p>
          </table:table-cell>
          <table:table-cell table:formula="of:=[.D195]-[.D194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71" office:value-type="float" office:value="13774" calcext:value-type="float">
            <text:p>1377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59421296296296" calcext:value-type="float">
            <text:p>0,00159421296296296000</text:p>
          </table:table-cell>
          <table:table-cell table:formula="of:=[.D196]-[.D19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71" office:value-type="float" office:value="13845" calcext:value-type="float">
            <text:p>1384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60243055555556" calcext:value-type="float">
            <text:p>0,00160243055555556000</text:p>
          </table:table-cell>
          <table:table-cell table:formula="of:=[.D197]-[.D19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71" office:value-type="float" office:value="13916" calcext:value-type="float">
            <text:p>1391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61064814814815" calcext:value-type="float">
            <text:p>0,00161064814814815000</text:p>
          </table:table-cell>
          <table:table-cell table:formula="of:=[.D198]-[.D19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71" office:value-type="float" office:value="13987" calcext:value-type="float">
            <text:p>13987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61886574074074" calcext:value-type="float">
            <text:p>0,00161886574074074000</text:p>
          </table:table-cell>
          <table:table-cell table:formula="of:=[.D199]-[.D198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71" office:value-type="float" office:value="14058" calcext:value-type="float">
            <text:p>1405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62708333333333" calcext:value-type="float">
            <text:p>0,00162708333333333000</text:p>
          </table:table-cell>
          <table:table-cell table:formula="of:=[.D200]-[.D19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71" office:value-type="float" office:value="14129" calcext:value-type="float">
            <text:p>14129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63530092592593" calcext:value-type="float">
            <text:p>0,00163530092592593000</text:p>
          </table:table-cell>
          <table:table-cell table:formula="of:=[.D201]-[.D20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71" office:value-type="float" office:value="14200" calcext:value-type="float">
            <text:p>14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64351851851852" calcext:value-type="float">
            <text:p>0,00164351851851852000</text:p>
          </table:table-cell>
          <table:table-cell table:formula="of:=[.D202]-[.D20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71" office:value-type="float" office:value="14271" calcext:value-type="float">
            <text:p>14271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65173611111111" calcext:value-type="float">
            <text:p>0,00165173611111111000</text:p>
          </table:table-cell>
          <table:table-cell table:formula="of:=[.D203]-[.D202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71" office:value-type="float" office:value="14342" calcext:value-type="float">
            <text:p>1434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6599537037037" calcext:value-type="float">
            <text:p>0,00165995370370370000</text:p>
          </table:table-cell>
          <table:table-cell table:formula="of:=[.D204]-[.D20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71" office:value-type="float" office:value="14413" calcext:value-type="float">
            <text:p>14413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6681712962963" calcext:value-type="float">
            <text:p>0,00166817129629630000</text:p>
          </table:table-cell>
          <table:table-cell table:formula="of:=[.D205]-[.D20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71" office:value-type="float" office:value="14484" calcext:value-type="float">
            <text:p>1448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67638888888889" calcext:value-type="float">
            <text:p>0,00167638888888889000</text:p>
          </table:table-cell>
          <table:table-cell table:formula="of:=[.D206]-[.D20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71" office:value-type="float" office:value="14555" calcext:value-type="float">
            <text:p>1455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68460648148148" calcext:value-type="float">
            <text:p>0,00168460648148148000</text:p>
          </table:table-cell>
          <table:table-cell table:formula="of:=[.D207]-[.D206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71" office:value-type="float" office:value="14626" calcext:value-type="float">
            <text:p>1462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69282407407407" calcext:value-type="float">
            <text:p>0,00169282407407407000</text:p>
          </table:table-cell>
          <table:table-cell table:formula="of:=[.D208]-[.D20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71" office:value-type="float" office:value="14697" calcext:value-type="float">
            <text:p>14697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70104166666667" calcext:value-type="float">
            <text:p>0,00170104166666667000</text:p>
          </table:table-cell>
          <table:table-cell table:formula="of:=[.D209]-[.D20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71" office:value-type="float" office:value="14768" calcext:value-type="float">
            <text:p>1476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70925925925926" calcext:value-type="float">
            <text:p>0,00170925925925926000</text:p>
          </table:table-cell>
          <table:table-cell table:formula="of:=[.D210]-[.D209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71" office:value-type="float" office:value="14839" calcext:value-type="float">
            <text:p>14839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71747685185185" calcext:value-type="float">
            <text:p>0,00171747685185185000</text:p>
          </table:table-cell>
          <table:table-cell table:formula="of:=[.D211]-[.D21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71" office:value-type="float" office:value="14910" calcext:value-type="float">
            <text:p>1491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72569444444444" calcext:value-type="float">
            <text:p>0,00172569444444444000</text:p>
          </table:table-cell>
          <table:table-cell table:formula="of:=[.D212]-[.D21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71" office:value-type="float" office:value="14981" calcext:value-type="float">
            <text:p>14981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73391203703704" calcext:value-type="float">
            <text:p>0,00173391203703704000</text:p>
          </table:table-cell>
          <table:table-cell table:formula="of:=[.D213]-[.D21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71" office:value-type="float" office:value="15052" calcext:value-type="float">
            <text:p>1505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74212962962963" calcext:value-type="float">
            <text:p>0,00174212962962963000</text:p>
          </table:table-cell>
          <table:table-cell table:formula="of:=[.D214]-[.D213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71" office:value-type="float" office:value="15123" calcext:value-type="float">
            <text:p>15123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75034722222222" calcext:value-type="float">
            <text:p>0,00175034722222222000</text:p>
          </table:table-cell>
          <table:table-cell table:formula="of:=[.D215]-[.D21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71" office:value-type="float" office:value="15194" calcext:value-type="float">
            <text:p>1519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75856481481481" calcext:value-type="float">
            <text:p>0,00175856481481481000</text:p>
          </table:table-cell>
          <table:table-cell table:formula="of:=[.D216]-[.D21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71" office:value-type="float" office:value="15265" calcext:value-type="float">
            <text:p>1526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76678240740741" calcext:value-type="float">
            <text:p>0,00176678240740741000</text:p>
          </table:table-cell>
          <table:table-cell table:formula="of:=[.D217]-[.D21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71" office:value-type="float" office:value="15336" calcext:value-type="float">
            <text:p>1533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775" calcext:value-type="float">
            <text:p>0,00177500000000000000</text:p>
          </table:table-cell>
          <table:table-cell table:formula="of:=[.D218]-[.D217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71" office:value-type="float" office:value="15407" calcext:value-type="float">
            <text:p>15407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78321759259259" calcext:value-type="float">
            <text:p>0,00178321759259259000</text:p>
          </table:table-cell>
          <table:table-cell table:formula="of:=[.D219]-[.D21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71" office:value-type="float" office:value="15478" calcext:value-type="float">
            <text:p>1547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79143518518519" calcext:value-type="float">
            <text:p>0,00179143518518519000</text:p>
          </table:table-cell>
          <table:table-cell table:formula="of:=[.D220]-[.D21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71" office:value-type="float" office:value="15549" calcext:value-type="float">
            <text:p>15549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79965277777778" calcext:value-type="float">
            <text:p>0,00179965277777778000</text:p>
          </table:table-cell>
          <table:table-cell table:formula="of:=[.D221]-[.D220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71" office:value-type="float" office:value="15620" calcext:value-type="float">
            <text:p>156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80787037037037" calcext:value-type="float">
            <text:p>0,00180787037037037000</text:p>
          </table:table-cell>
          <table:table-cell table:formula="of:=[.D222]-[.D22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71" office:value-type="float" office:value="15691" calcext:value-type="float">
            <text:p>15691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81608796296296" calcext:value-type="float">
            <text:p>0,00181608796296296000</text:p>
          </table:table-cell>
          <table:table-cell table:formula="of:=[.D223]-[.D22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71" office:value-type="float" office:value="15762" calcext:value-type="float">
            <text:p>1576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82430555555556" calcext:value-type="float">
            <text:p>0,00182430555555556000</text:p>
          </table:table-cell>
          <table:table-cell table:formula="of:=[.D224]-[.D22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71" office:value-type="float" office:value="15833" calcext:value-type="float">
            <text:p>15833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83252314814815" calcext:value-type="float">
            <text:p>0,00183252314814815000</text:p>
          </table:table-cell>
          <table:table-cell table:formula="of:=[.D225]-[.D224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71" office:value-type="float" office:value="15904" calcext:value-type="float">
            <text:p>1590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84074074074074" calcext:value-type="float">
            <text:p>0,00184074074074074000</text:p>
          </table:table-cell>
          <table:table-cell table:formula="of:=[.D226]-[.D22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71" office:value-type="float" office:value="15975" calcext:value-type="float">
            <text:p>159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84895833333333" calcext:value-type="float">
            <text:p>0,00184895833333333000</text:p>
          </table:table-cell>
          <table:table-cell table:formula="of:=[.D227]-[.D22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71" office:value-type="float" office:value="16046" calcext:value-type="float">
            <text:p>1604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85717592592593" calcext:value-type="float">
            <text:p>0,00185717592592593000</text:p>
          </table:table-cell>
          <table:table-cell table:formula="of:=[.D228]-[.D22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71" office:value-type="float" office:value="16117" calcext:value-type="float">
            <text:p>16117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86539351851852" calcext:value-type="float">
            <text:p>0,00186539351851852000</text:p>
          </table:table-cell>
          <table:table-cell table:formula="of:=[.D229]-[.D228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71" office:value-type="float" office:value="16188" calcext:value-type="float">
            <text:p>1618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87361111111111" calcext:value-type="float">
            <text:p>0,00187361111111111000</text:p>
          </table:table-cell>
          <table:table-cell table:formula="of:=[.D230]-[.D22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71" office:value-type="float" office:value="16259" calcext:value-type="float">
            <text:p>16259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8818287037037" calcext:value-type="float">
            <text:p>0,00188182870370370000</text:p>
          </table:table-cell>
          <table:table-cell table:formula="of:=[.D231]-[.D23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71" office:value-type="float" office:value="16330" calcext:value-type="float">
            <text:p>1633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8900462962963" calcext:value-type="float">
            <text:p>0,00189004629629630000</text:p>
          </table:table-cell>
          <table:table-cell table:formula="of:=[.D232]-[.D231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71" office:value-type="float" office:value="16401" calcext:value-type="float">
            <text:p>16401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89826388888889" calcext:value-type="float">
            <text:p>0,00189826388888889000</text:p>
          </table:table-cell>
          <table:table-cell table:formula="of:=[.D233]-[.D23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71" office:value-type="float" office:value="16472" calcext:value-type="float">
            <text:p>1647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90648148148148" calcext:value-type="float">
            <text:p>0,00190648148148148000</text:p>
          </table:table-cell>
          <table:table-cell table:formula="of:=[.D234]-[.D23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71" office:value-type="float" office:value="16543" calcext:value-type="float">
            <text:p>16543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91469907407407" calcext:value-type="float">
            <text:p>0,00191469907407407000</text:p>
          </table:table-cell>
          <table:table-cell table:formula="of:=[.D235]-[.D23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71" office:value-type="float" office:value="16614" calcext:value-type="float">
            <text:p>1661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92291666666667" calcext:value-type="float">
            <text:p>0,00192291666666667000</text:p>
          </table:table-cell>
          <table:table-cell table:formula="of:=[.D236]-[.D235]" office:value-type="float" office:value="0.00000821759259259243" calcext:value-type="float">
            <text:p>0,00000821759259259244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71" office:value-type="float" office:value="16685" calcext:value-type="float">
            <text:p>1668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93113425925926" calcext:value-type="float">
            <text:p>0,00193113425925926000</text:p>
          </table:table-cell>
          <table:table-cell table:formula="of:=[.D237]-[.D23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71" office:value-type="float" office:value="16756" calcext:value-type="float">
            <text:p>1675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93935185185185" calcext:value-type="float">
            <text:p>0,00193935185185185000</text:p>
          </table:table-cell>
          <table:table-cell table:formula="of:=[.D238]-[.D23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71" office:value-type="float" office:value="16827" calcext:value-type="float">
            <text:p>16827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94756944444444" calcext:value-type="float">
            <text:p>0,00194756944444444000</text:p>
          </table:table-cell>
          <table:table-cell table:formula="of:=[.D239]-[.D23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71" office:value-type="float" office:value="16898" calcext:value-type="float">
            <text:p>1689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95578703703704" calcext:value-type="float">
            <text:p>0,00195578703703704000</text:p>
          </table:table-cell>
          <table:table-cell table:formula="of:=[.D240]-[.D23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71" office:value-type="float" office:value="16969" calcext:value-type="float">
            <text:p>16969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96400462962963" calcext:value-type="float">
            <text:p>0,00196400462962963000</text:p>
          </table:table-cell>
          <table:table-cell table:formula="of:=[.D241]-[.D24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71" office:value-type="float" office:value="17040" calcext:value-type="float">
            <text:p>170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97222222222222" calcext:value-type="float">
            <text:p>0,00197222222222222000</text:p>
          </table:table-cell>
          <table:table-cell table:formula="of:=[.D242]-[.D241]" office:value-type="float" office:value="0.00000821759259259222" calcext:value-type="float">
            <text:p>0,00000821759259259222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71" office:value-type="float" office:value="17111" calcext:value-type="float">
            <text:p>17111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98043981481481" calcext:value-type="float">
            <text:p>0,00198043981481481000</text:p>
          </table:table-cell>
          <table:table-cell table:formula="of:=[.D243]-[.D24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71" office:value-type="float" office:value="17182" calcext:value-type="float">
            <text:p>1718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98865740740741" calcext:value-type="float">
            <text:p>0,00198865740740741000</text:p>
          </table:table-cell>
          <table:table-cell table:formula="of:=[.D244]-[.D24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71" office:value-type="float" office:value="17253" calcext:value-type="float">
            <text:p>17253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996875" calcext:value-type="float">
            <text:p>0,00199687500000000000</text:p>
          </table:table-cell>
          <table:table-cell table:formula="of:=[.D245]-[.D24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71" office:value-type="float" office:value="17324" calcext:value-type="float">
            <text:p>1732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00509259259259" calcext:value-type="float">
            <text:p>0,00200509259259259000</text:p>
          </table:table-cell>
          <table:table-cell table:formula="of:=[.D246]-[.D24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71" office:value-type="float" office:value="17395" calcext:value-type="float">
            <text:p>1739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01331018518519" calcext:value-type="float">
            <text:p>0,00201331018518519000</text:p>
          </table:table-cell>
          <table:table-cell table:formula="of:=[.D247]-[.D24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71" office:value-type="float" office:value="17466" calcext:value-type="float">
            <text:p>1746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02152777777778" calcext:value-type="float">
            <text:p>0,00202152777777778000</text:p>
          </table:table-cell>
          <table:table-cell table:formula="of:=[.D248]-[.D24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71" office:value-type="float" office:value="17537" calcext:value-type="float">
            <text:p>17537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02974537037037" calcext:value-type="float">
            <text:p>0,00202974537037037000</text:p>
          </table:table-cell>
          <table:table-cell table:formula="of:=[.D249]-[.D248]" office:value-type="float" office:value="0.00000821759259259222" calcext:value-type="float">
            <text:p>0,00000821759259259222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71" office:value-type="float" office:value="17608" calcext:value-type="float">
            <text:p>1760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03796296296296" calcext:value-type="float">
            <text:p>0,00203796296296296000</text:p>
          </table:table-cell>
          <table:table-cell table:formula="of:=[.D250]-[.D24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71" office:value-type="float" office:value="17679" calcext:value-type="float">
            <text:p>17679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04618055555556" calcext:value-type="float">
            <text:p>0,00204618055555556000</text:p>
          </table:table-cell>
          <table:table-cell table:formula="of:=[.D251]-[.D25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71" office:value-type="float" office:value="17750" calcext:value-type="float">
            <text:p>17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05439814814815" calcext:value-type="float">
            <text:p>0,00205439814814815000</text:p>
          </table:table-cell>
          <table:table-cell table:formula="of:=[.D252]-[.D25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71" office:value-type="float" office:value="17821" calcext:value-type="float">
            <text:p>17821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06261574074074" calcext:value-type="float">
            <text:p>0,00206261574074074000</text:p>
          </table:table-cell>
          <table:table-cell table:formula="of:=[.D253]-[.D25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71" office:value-type="float" office:value="17892" calcext:value-type="float">
            <text:p>1789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07083333333333" calcext:value-type="float">
            <text:p>0,00207083333333333000</text:p>
          </table:table-cell>
          <table:table-cell table:formula="of:=[.D254]-[.D25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71" office:value-type="float" office:value="17963" calcext:value-type="float">
            <text:p>17963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07905092592593" calcext:value-type="float">
            <text:p>0,00207905092592593000</text:p>
          </table:table-cell>
          <table:table-cell table:formula="of:=[.D255]-[.D25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71" office:value-type="float" office:value="18034" calcext:value-type="float">
            <text:p>1803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08726851851852" calcext:value-type="float">
            <text:p>0,00208726851851852000</text:p>
          </table:table-cell>
          <table:table-cell table:formula="of:=[.D256]-[.D255]" office:value-type="float" office:value="0.00000821759259259222" calcext:value-type="float">
            <text:p>0,00000821759259259222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71" office:value-type="float" office:value="18105" calcext:value-type="float">
            <text:p>1810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09548611111111" calcext:value-type="float">
            <text:p>0,00209548611111111000</text:p>
          </table:table-cell>
          <table:table-cell table:formula="of:=[.D257]-[.D25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71" office:value-type="float" office:value="18176" calcext:value-type="float">
            <text:p>1817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1037037037037" calcext:value-type="float">
            <text:p>0,00210370370370370000</text:p>
          </table:table-cell>
          <table:table-cell table:formula="of:=[.D258]-[.D25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71" office:value-type="float" office:value="18247" calcext:value-type="float">
            <text:p>18247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1119212962963" calcext:value-type="float">
            <text:p>0,00211192129629630000</text:p>
          </table:table-cell>
          <table:table-cell table:formula="of:=[.D259]-[.D25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71" office:value-type="float" office:value="18318" calcext:value-type="float">
            <text:p>1831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12013888888889" calcext:value-type="float">
            <text:p>0,00212013888888889000</text:p>
          </table:table-cell>
          <table:table-cell table:formula="of:=[.D260]-[.D25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71" office:value-type="float" office:value="18389" calcext:value-type="float">
            <text:p>18389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12835648148148" calcext:value-type="float">
            <text:p>0,00212835648148148000</text:p>
          </table:table-cell>
          <table:table-cell table:formula="of:=[.D261]-[.D26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71" office:value-type="float" office:value="18460" calcext:value-type="float">
            <text:p>184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13657407407407" calcext:value-type="float">
            <text:p>0,00213657407407407000</text:p>
          </table:table-cell>
          <table:table-cell table:formula="of:=[.D262]-[.D26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71" office:value-type="float" office:value="18531" calcext:value-type="float">
            <text:p>18531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14479166666667" calcext:value-type="float">
            <text:p>0,00214479166666667000</text:p>
          </table:table-cell>
          <table:table-cell table:formula="of:=[.D263]-[.D26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71" office:value-type="float" office:value="18602" calcext:value-type="float">
            <text:p>1860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15300925925926" calcext:value-type="float">
            <text:p>0,00215300925925926000</text:p>
          </table:table-cell>
          <table:table-cell table:formula="of:=[.D264]-[.D263]" office:value-type="float" office:value="0.00000821759259259222" calcext:value-type="float">
            <text:p>0,00000821759259259222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71" office:value-type="float" office:value="18673" calcext:value-type="float">
            <text:p>18673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16122685185185" calcext:value-type="float">
            <text:p>0,00216122685185185000</text:p>
          </table:table-cell>
          <table:table-cell table:formula="of:=[.D265]-[.D26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71" office:value-type="float" office:value="18744" calcext:value-type="float">
            <text:p>18744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16944444444444" calcext:value-type="float">
            <text:p>0,00216944444444444000</text:p>
          </table:table-cell>
          <table:table-cell table:formula="of:=[.D266]-[.D26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71" office:value-type="float" office:value="18815" calcext:value-type="float">
            <text:p>1881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17766203703704" calcext:value-type="float">
            <text:p>0,00217766203703704000</text:p>
          </table:table-cell>
          <table:table-cell table:formula="of:=[.D267]-[.D26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71" office:value-type="float" office:value="18886" calcext:value-type="float">
            <text:p>18886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18587962962963" calcext:value-type="float">
            <text:p>0,00218587962962963000</text:p>
          </table:table-cell>
          <table:table-cell table:formula="of:=[.D268]-[.D26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71" office:value-type="float" office:value="18957" calcext:value-type="float">
            <text:p>18957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19409722222222" calcext:value-type="float">
            <text:p>0,00219409722222222000</text:p>
          </table:table-cell>
          <table:table-cell table:formula="of:=[.D269]-[.D26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71" office:value-type="float" office:value="19028" calcext:value-type="float">
            <text:p>19028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20231481481482" calcext:value-type="float">
            <text:p>0,00220231481481482000</text:p>
          </table:table-cell>
          <table:table-cell table:formula="of:=[.D270]-[.D26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71" office:value-type="float" office:value="19099" calcext:value-type="float">
            <text:p>19099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21053240740741" calcext:value-type="float">
            <text:p>0,00221053240740741000</text:p>
          </table:table-cell>
          <table:table-cell table:formula="of:=[.D271]-[.D270]" office:value-type="float" office:value="0.00000821759259259222" calcext:value-type="float">
            <text:p>0,00000821759259259222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71" office:value-type="float" office:value="19170" calcext:value-type="float">
            <text:p>1917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21875" calcext:value-type="float">
            <text:p>0,00221875000000000000</text:p>
          </table:table-cell>
          <table:table-cell table:formula="of:=[.D272]-[.D27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71" office:value-type="float" office:value="19241" calcext:value-type="float">
            <text:p>19241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22696759259259" calcext:value-type="float">
            <text:p>0,00222696759259259000</text:p>
          </table:table-cell>
          <table:table-cell table:formula="of:=[.D273]-[.D27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71" office:value-type="float" office:value="19312" calcext:value-type="float">
            <text:p>19312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23518518518519" calcext:value-type="float">
            <text:p>0,00223518518518519000</text:p>
          </table:table-cell>
          <table:table-cell table:formula="of:=[.D274]-[.D27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71" office:value-type="float" office:value="19383" calcext:value-type="float">
            <text:p>19383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24340277777778" calcext:value-type="float">
            <text:p>0,00224340277777778000</text:p>
          </table:table-cell>
          <table:table-cell table:formula="of:=[.D275]-[.D27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71" office:value-type="float" office:value="19454" calcext:value-type="float">
            <text:p>19454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25162037037037" calcext:value-type="float">
            <text:p>0,00225162037037037000</text:p>
          </table:table-cell>
          <table:table-cell table:formula="of:=[.D276]-[.D27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71" office:value-type="float" office:value="19525" calcext:value-type="float">
            <text:p>195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25983796296296" calcext:value-type="float">
            <text:p>0,00225983796296296000</text:p>
          </table:table-cell>
          <table:table-cell table:formula="of:=[.D277]-[.D27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71" office:value-type="float" office:value="19596" calcext:value-type="float">
            <text:p>19596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26805555555556" calcext:value-type="float">
            <text:p>0,00226805555555556000</text:p>
          </table:table-cell>
          <table:table-cell table:formula="of:=[.D278]-[.D27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71" office:value-type="float" office:value="19667" calcext:value-type="float">
            <text:p>19667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27627314814815" calcext:value-type="float">
            <text:p>0,00227627314814815000</text:p>
          </table:table-cell>
          <table:table-cell table:formula="of:=[.D279]-[.D278]" office:value-type="float" office:value="0.00000821759259259222" calcext:value-type="float">
            <text:p>0,00000821759259259222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71" office:value-type="float" office:value="19738" calcext:value-type="float">
            <text:p>19738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28449074074074" calcext:value-type="float">
            <text:p>0,00228449074074074000</text:p>
          </table:table-cell>
          <table:table-cell table:formula="of:=[.D280]-[.D27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71" office:value-type="float" office:value="19809" calcext:value-type="float">
            <text:p>19809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29270833333333" calcext:value-type="float">
            <text:p>0,00229270833333333000</text:p>
          </table:table-cell>
          <table:table-cell table:formula="of:=[.D281]-[.D28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71" office:value-type="float" office:value="19880" calcext:value-type="float">
            <text:p>1988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30092592592593" calcext:value-type="float">
            <text:p>0,00230092592592593000</text:p>
          </table:table-cell>
          <table:table-cell table:formula="of:=[.D282]-[.D28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71" office:value-type="float" office:value="19951" calcext:value-type="float">
            <text:p>19951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30914351851852" calcext:value-type="float">
            <text:p>0,00230914351851852000</text:p>
          </table:table-cell>
          <table:table-cell table:formula="of:=[.D283]-[.D28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71" office:value-type="float" office:value="20022" calcext:value-type="float">
            <text:p>20022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31736111111111" calcext:value-type="float">
            <text:p>0,00231736111111111000</text:p>
          </table:table-cell>
          <table:table-cell table:formula="of:=[.D284]-[.D28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71" office:value-type="float" office:value="20093" calcext:value-type="float">
            <text:p>20093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3255787037037" calcext:value-type="float">
            <text:p>0,00232557870370370000</text:p>
          </table:table-cell>
          <table:table-cell table:formula="of:=[.D285]-[.D28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71" office:value-type="float" office:value="20164" calcext:value-type="float">
            <text:p>20164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3337962962963" calcext:value-type="float">
            <text:p>0,00233379629629630000</text:p>
          </table:table-cell>
          <table:table-cell table:formula="of:=[.D286]-[.D285]" office:value-type="float" office:value="0.00000821759259259222" calcext:value-type="float">
            <text:p>0,00000821759259259222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71" office:value-type="float" office:value="20235" calcext:value-type="float">
            <text:p>2023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34201388888889" calcext:value-type="float">
            <text:p>0,00234201388888889000</text:p>
          </table:table-cell>
          <table:table-cell table:formula="of:=[.D287]-[.D28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71" office:value-type="float" office:value="20306" calcext:value-type="float">
            <text:p>20306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35023148148148" calcext:value-type="float">
            <text:p>0,00235023148148148000</text:p>
          </table:table-cell>
          <table:table-cell table:formula="of:=[.D288]-[.D28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71" office:value-type="float" office:value="20377" calcext:value-type="float">
            <text:p>20377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35844907407407" calcext:value-type="float">
            <text:p>0,00235844907407407000</text:p>
          </table:table-cell>
          <table:table-cell table:formula="of:=[.D289]-[.D28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71" office:value-type="float" office:value="20448" calcext:value-type="float">
            <text:p>20448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36666666666667" calcext:value-type="float">
            <text:p>0,00236666666666667000</text:p>
          </table:table-cell>
          <table:table-cell table:formula="of:=[.D290]-[.D28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71" office:value-type="float" office:value="20519" calcext:value-type="float">
            <text:p>20519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37488425925926" calcext:value-type="float">
            <text:p>0,00237488425925926000</text:p>
          </table:table-cell>
          <table:table-cell table:formula="of:=[.D291]-[.D29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71" office:value-type="float" office:value="20590" calcext:value-type="float">
            <text:p>2059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38310185185185" calcext:value-type="float">
            <text:p>0,00238310185185185000</text:p>
          </table:table-cell>
          <table:table-cell table:formula="of:=[.D292]-[.D29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71" office:value-type="float" office:value="20661" calcext:value-type="float">
            <text:p>20661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39131944444444" calcext:value-type="float">
            <text:p>0,00239131944444444000</text:p>
          </table:table-cell>
          <table:table-cell table:formula="of:=[.D293]-[.D292]" office:value-type="float" office:value="0.00000821759259259222" calcext:value-type="float">
            <text:p>0,00000821759259259222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71" office:value-type="float" office:value="20732" calcext:value-type="float">
            <text:p>20732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39953703703704" calcext:value-type="float">
            <text:p>0,00239953703703704000</text:p>
          </table:table-cell>
          <table:table-cell table:formula="of:=[.D294]-[.D29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71" office:value-type="float" office:value="20803" calcext:value-type="float">
            <text:p>20803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40775462962963" calcext:value-type="float">
            <text:p>0,00240775462962963000</text:p>
          </table:table-cell>
          <table:table-cell table:formula="of:=[.D295]-[.D29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71" office:value-type="float" office:value="20874" calcext:value-type="float">
            <text:p>20874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41597222222222" calcext:value-type="float">
            <text:p>0,00241597222222222000</text:p>
          </table:table-cell>
          <table:table-cell table:formula="of:=[.D296]-[.D29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71" office:value-type="float" office:value="20945" calcext:value-type="float">
            <text:p>2094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42418981481482" calcext:value-type="float">
            <text:p>0,00242418981481482000</text:p>
          </table:table-cell>
          <table:table-cell table:formula="of:=[.D297]-[.D29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71" office:value-type="float" office:value="21016" calcext:value-type="float">
            <text:p>21016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43240740740741" calcext:value-type="float">
            <text:p>0,00243240740740741000</text:p>
          </table:table-cell>
          <table:table-cell table:formula="of:=[.D298]-[.D29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71" office:value-type="float" office:value="21087" calcext:value-type="float">
            <text:p>21087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440625" calcext:value-type="float">
            <text:p>0,00244062500000000000</text:p>
          </table:table-cell>
          <table:table-cell table:formula="of:=[.D299]-[.D29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71" office:value-type="float" office:value="21158" calcext:value-type="float">
            <text:p>21158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44884259259259" calcext:value-type="float">
            <text:p>0,00244884259259259000</text:p>
          </table:table-cell>
          <table:table-cell table:formula="of:=[.D300]-[.D29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71" office:value-type="float" office:value="21229" calcext:value-type="float">
            <text:p>21229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45706018518519" calcext:value-type="float">
            <text:p>0,00245706018518519000</text:p>
          </table:table-cell>
          <table:table-cell table:formula="of:=[.D301]-[.D300]" office:value-type="float" office:value="0.00000821759259259222" calcext:value-type="float">
            <text:p>0,00000821759259259222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71" office:value-type="float" office:value="21300" calcext:value-type="float">
            <text:p>213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46527777777778" calcext:value-type="float">
            <text:p>0,00246527777777778000</text:p>
          </table:table-cell>
          <table:table-cell table:formula="of:=[.D302]-[.D30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71" office:value-type="float" office:value="21371" calcext:value-type="float">
            <text:p>21371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47349537037037" calcext:value-type="float">
            <text:p>0,00247349537037037000</text:p>
          </table:table-cell>
          <table:table-cell table:formula="of:=[.D303]-[.D30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71" office:value-type="float" office:value="21442" calcext:value-type="float">
            <text:p>21442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48171296296296" calcext:value-type="float">
            <text:p>0,00248171296296296000</text:p>
          </table:table-cell>
          <table:table-cell table:formula="of:=[.D304]-[.D30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71" office:value-type="float" office:value="21513" calcext:value-type="float">
            <text:p>21513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48993055555556" calcext:value-type="float">
            <text:p>0,00248993055555556000</text:p>
          </table:table-cell>
          <table:table-cell table:formula="of:=[.D305]-[.D30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71" office:value-type="float" office:value="21584" calcext:value-type="float">
            <text:p>21584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49814814814815" calcext:value-type="float">
            <text:p>0,00249814814814815000</text:p>
          </table:table-cell>
          <table:table-cell table:formula="of:=[.D306]-[.D30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71" office:value-type="float" office:value="21655" calcext:value-type="float">
            <text:p>2165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50636574074074" calcext:value-type="float">
            <text:p>0,00250636574074074000</text:p>
          </table:table-cell>
          <table:table-cell table:formula="of:=[.D307]-[.D30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71" office:value-type="float" office:value="21726" calcext:value-type="float">
            <text:p>21726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51458333333333" calcext:value-type="float">
            <text:p>0,00251458333333333000</text:p>
          </table:table-cell>
          <table:table-cell table:formula="of:=[.D308]-[.D307]" office:value-type="float" office:value="0.00000821759259259222" calcext:value-type="float">
            <text:p>0,00000821759259259222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71" office:value-type="float" office:value="21797" calcext:value-type="float">
            <text:p>21797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52280092592593" calcext:value-type="float">
            <text:p>0,00252280092592593000</text:p>
          </table:table-cell>
          <table:table-cell table:formula="of:=[.D309]-[.D30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71" office:value-type="float" office:value="21868" calcext:value-type="float">
            <text:p>21868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53101851851852" calcext:value-type="float">
            <text:p>0,00253101851851852000</text:p>
          </table:table-cell>
          <table:table-cell table:formula="of:=[.D310]-[.D30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71" office:value-type="float" office:value="21939" calcext:value-type="float">
            <text:p>21939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53923611111111" calcext:value-type="float">
            <text:p>0,00253923611111111000</text:p>
          </table:table-cell>
          <table:table-cell table:formula="of:=[.D311]-[.D31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71" office:value-type="float" office:value="22010" calcext:value-type="float">
            <text:p>2201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5474537037037" calcext:value-type="float">
            <text:p>0,00254745370370370000</text:p>
          </table:table-cell>
          <table:table-cell table:formula="of:=[.D312]-[.D31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71" office:value-type="float" office:value="22081" calcext:value-type="float">
            <text:p>22081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5556712962963" calcext:value-type="float">
            <text:p>0,00255567129629630000</text:p>
          </table:table-cell>
          <table:table-cell table:formula="of:=[.D313]-[.D31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71" office:value-type="float" office:value="22152" calcext:value-type="float">
            <text:p>22152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56388888888889" calcext:value-type="float">
            <text:p>0,00256388888888889000</text:p>
          </table:table-cell>
          <table:table-cell table:formula="of:=[.D314]-[.D31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71" office:value-type="float" office:value="22223" calcext:value-type="float">
            <text:p>22223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57210648148148" calcext:value-type="float">
            <text:p>0,00257210648148148000</text:p>
          </table:table-cell>
          <table:table-cell table:formula="of:=[.D315]-[.D31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71" office:value-type="float" office:value="22294" calcext:value-type="float">
            <text:p>22294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58032407407407" calcext:value-type="float">
            <text:p>0,00258032407407407000</text:p>
          </table:table-cell>
          <table:table-cell table:formula="of:=[.D316]-[.D315]" office:value-type="float" office:value="0.00000821759259259222" calcext:value-type="float">
            <text:p>0,00000821759259259222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71" office:value-type="float" office:value="22365" calcext:value-type="float">
            <text:p>2236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58854166666667" calcext:value-type="float">
            <text:p>0,00258854166666667000</text:p>
          </table:table-cell>
          <table:table-cell table:formula="of:=[.D317]-[.D31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71" office:value-type="float" office:value="22436" calcext:value-type="float">
            <text:p>22436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59675925925926" calcext:value-type="float">
            <text:p>0,00259675925925926000</text:p>
          </table:table-cell>
          <table:table-cell table:formula="of:=[.D318]-[.D31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71" office:value-type="float" office:value="22507" calcext:value-type="float">
            <text:p>22507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60497685185185" calcext:value-type="float">
            <text:p>0,00260497685185185000</text:p>
          </table:table-cell>
          <table:table-cell table:formula="of:=[.D319]-[.D31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71" office:value-type="float" office:value="22578" calcext:value-type="float">
            <text:p>22578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61319444444444" calcext:value-type="float">
            <text:p>0,00261319444444444000</text:p>
          </table:table-cell>
          <table:table-cell table:formula="of:=[.D320]-[.D319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71" office:value-type="float" office:value="22649" calcext:value-type="float">
            <text:p>22649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62141203703704" calcext:value-type="float">
            <text:p>0,00262141203703704000</text:p>
          </table:table-cell>
          <table:table-cell table:formula="of:=[.D321]-[.D32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71" office:value-type="float" office:value="22720" calcext:value-type="float">
            <text:p>2272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62962962962963" calcext:value-type="float">
            <text:p>0,00262962962962963000</text:p>
          </table:table-cell>
          <table:table-cell table:formula="of:=[.D322]-[.D32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71" office:value-type="float" office:value="22791" calcext:value-type="float">
            <text:p>22791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63784722222222" calcext:value-type="float">
            <text:p>0,00263784722222222000</text:p>
          </table:table-cell>
          <table:table-cell table:formula="of:=[.D323]-[.D322]" office:value-type="float" office:value="0.00000821759259259222" calcext:value-type="float">
            <text:p>0,00000821759259259222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71" office:value-type="float" office:value="22862" calcext:value-type="float">
            <text:p>22862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64606481481481" calcext:value-type="float">
            <text:p>0,00264606481481481000</text:p>
          </table:table-cell>
          <table:table-cell table:formula="of:=[.D324]-[.D32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71" office:value-type="float" office:value="22933" calcext:value-type="float">
            <text:p>22933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65428240740741" calcext:value-type="float">
            <text:p>0,00265428240740741000</text:p>
          </table:table-cell>
          <table:table-cell table:formula="of:=[.D325]-[.D32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71" office:value-type="float" office:value="23004" calcext:value-type="float">
            <text:p>23004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6625" calcext:value-type="float">
            <text:p>0,00266250000000000000</text:p>
          </table:table-cell>
          <table:table-cell table:formula="of:=[.D326]-[.D32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71" office:value-type="float" office:value="23075" calcext:value-type="float">
            <text:p>230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67071759259259" calcext:value-type="float">
            <text:p>0,00267071759259259000</text:p>
          </table:table-cell>
          <table:table-cell table:formula="of:=[.D327]-[.D32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71" office:value-type="float" office:value="23146" calcext:value-type="float">
            <text:p>23146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67893518518519" calcext:value-type="float">
            <text:p>0,00267893518518519000</text:p>
          </table:table-cell>
          <table:table-cell table:formula="of:=[.D328]-[.D327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71" office:value-type="float" office:value="23217" calcext:value-type="float">
            <text:p>23217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68715277777778" calcext:value-type="float">
            <text:p>0,00268715277777778000</text:p>
          </table:table-cell>
          <table:table-cell table:formula="of:=[.D329]-[.D32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71" office:value-type="float" office:value="23288" calcext:value-type="float">
            <text:p>23288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69537037037037" calcext:value-type="float">
            <text:p>0,00269537037037037000</text:p>
          </table:table-cell>
          <table:table-cell table:formula="of:=[.D330]-[.D329]" office:value-type="float" office:value="0.00000821759259259222" calcext:value-type="float">
            <text:p>0,00000821759259259222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71" office:value-type="float" office:value="23359" calcext:value-type="float">
            <text:p>23359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70358796296296" calcext:value-type="float">
            <text:p>0,00270358796296296000</text:p>
          </table:table-cell>
          <table:table-cell table:formula="of:=[.D331]-[.D330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71" office:value-type="float" office:value="23430" calcext:value-type="float">
            <text:p>2343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71180555555556" calcext:value-type="float">
            <text:p>0,00271180555555556000</text:p>
          </table:table-cell>
          <table:table-cell table:formula="of:=[.D332]-[.D331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71" office:value-type="float" office:value="23501" calcext:value-type="float">
            <text:p>23501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72002314814815" calcext:value-type="float">
            <text:p>0,00272002314814815000</text:p>
          </table:table-cell>
          <table:table-cell table:formula="of:=[.D333]-[.D332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71" office:value-type="float" office:value="23572" calcext:value-type="float">
            <text:p>23572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72824074074074" calcext:value-type="float">
            <text:p>0,00272824074074074000</text:p>
          </table:table-cell>
          <table:table-cell table:formula="of:=[.D334]-[.D333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71" office:value-type="float" office:value="23643" calcext:value-type="float">
            <text:p>23643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73645833333333" calcext:value-type="float">
            <text:p>0,00273645833333333000</text:p>
          </table:table-cell>
          <table:table-cell table:formula="of:=[.D335]-[.D334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71" office:value-type="float" office:value="23714" calcext:value-type="float">
            <text:p>23714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74467592592593" calcext:value-type="float">
            <text:p>0,00274467592592593000</text:p>
          </table:table-cell>
          <table:table-cell table:formula="of:=[.D336]-[.D335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71" office:value-type="float" office:value="23785" calcext:value-type="float">
            <text:p>2378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75289351851852" calcext:value-type="float">
            <text:p>0,00275289351851852000</text:p>
          </table:table-cell>
          <table:table-cell table:formula="of:=[.D337]-[.D336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71" office:value-type="float" office:value="23856" calcext:value-type="float">
            <text:p>23856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76111111111111" calcext:value-type="float">
            <text:p>0,00276111111111111000</text:p>
          </table:table-cell>
          <table:table-cell table:formula="of:=[.D338]-[.D337]" office:value-type="float" office:value="0.00000821759259259222" calcext:value-type="float">
            <text:p>0,00000821759259259222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71" office:value-type="float" office:value="23927" calcext:value-type="float">
            <text:p>23927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7693287037037" calcext:value-type="float">
            <text:p>0,00276932870370370000</text:p>
          </table:table-cell>
          <table:table-cell table:formula="of:=[.D339]-[.D338]" office:value-type="float" office:value="0.00000821759259259265" calcext:value-type="float">
            <text:p>0,00000821759259259265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71" office:value-type="float" office:value="23998" calcext:value-type="float">
            <text:p>23998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7775462962963" calcext:value-type="float">
            <text:p>0,00277754629629630000</text:p>
          </table:table-cell>
          <table:table-cell table:formula="of:=#REF!-[.D339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2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37:08.147264944</meta:creation-date>
    <dc:date>2026-05-17T18:37:28.957578061</dc:date>
    <meta:editing-duration>PT22S</meta:editing-duration>
    <meta:editing-cycles>1</meta:editing-cycles>
    <meta:document-statistic meta:table-count="1" meta:cell-count="1695" meta:object-count="0"/>
    <meta:generator>LibreOffice/24.2.7.2$Linux_X86_64 LibreOffice_project/420$Build-2</meta:generator>
  </office:meta>
</office:document-meta>
</file>