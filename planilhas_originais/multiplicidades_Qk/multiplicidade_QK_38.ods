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39814814814815" calcext:value-type="float">
            <text:p>0,00000439814814814815</text:p>
          </table:table-cell>
          <table:table-cell table:formula="of:=[.D3]-[.D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8" office:value-type="float" office:value="76" calcext:value-type="float">
            <text:p>7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87962962962963" calcext:value-type="float">
            <text:p>0,00000879629629629630</text:p>
          </table:table-cell>
          <table:table-cell table:formula="of:=[.D4]-[.D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8" office:value-type="float" office:value="114" calcext:value-type="float">
            <text:p>11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31944444444444" calcext:value-type="float">
            <text:p>0,00001319444444444450</text:p>
          </table:table-cell>
          <table:table-cell table:formula="of:=[.D5]-[.D4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8" office:value-type="float" office:value="152" calcext:value-type="float">
            <text:p>15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75925925925926" calcext:value-type="float">
            <text:p>0,00001759259259259260</text:p>
          </table:table-cell>
          <table:table-cell table:formula="of:=[.D6]-[.D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8" office:value-type="float" office:value="190" calcext:value-type="float">
            <text:p>19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19907407407407" calcext:value-type="float">
            <text:p>0,00002199074074074070</text:p>
          </table:table-cell>
          <table:table-cell table:formula="of:=[.D7]-[.D6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8" office:value-type="float" office:value="228" calcext:value-type="float">
            <text:p>22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63888888888889" calcext:value-type="float">
            <text:p>0,00002638888888888890</text:p>
          </table:table-cell>
          <table:table-cell table:formula="of:=[.D8]-[.D7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8" office:value-type="float" office:value="266" calcext:value-type="float">
            <text:p>26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0787037037037" calcext:value-type="float">
            <text:p>0,00003078703703703700</text:p>
          </table:table-cell>
          <table:table-cell table:formula="of:=[.D9]-[.D8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8" office:value-type="float" office:value="304" calcext:value-type="float">
            <text:p>30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51851851851852" calcext:value-type="float">
            <text:p>0,00003518518518518520</text:p>
          </table:table-cell>
          <table:table-cell table:formula="of:=[.D10]-[.D9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8" office:value-type="float" office:value="342" calcext:value-type="float">
            <text:p>34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95833333333333" calcext:value-type="float">
            <text:p>0,00003958333333333330</text:p>
          </table:table-cell>
          <table:table-cell table:formula="of:=[.D11]-[.D10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8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39814814814815" calcext:value-type="float">
            <text:p>0,00004398148148148150</text:p>
          </table:table-cell>
          <table:table-cell table:formula="of:=[.D12]-[.D11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8" office:value-type="float" office:value="418" calcext:value-type="float">
            <text:p>41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83796296296296" calcext:value-type="float">
            <text:p>0,00004837962962962960</text:p>
          </table:table-cell>
          <table:table-cell table:formula="of:=[.D13]-[.D1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8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27777777777778" calcext:value-type="float">
            <text:p>0,00005277777777777780</text:p>
          </table:table-cell>
          <table:table-cell table:formula="of:=[.D14]-[.D1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8" office:value-type="float" office:value="494" calcext:value-type="float">
            <text:p>49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71759259259259" calcext:value-type="float">
            <text:p>0,00005717592592592590</text:p>
          </table:table-cell>
          <table:table-cell table:formula="of:=[.D15]-[.D14]" office:value-type="float" office:value="0.00000439814814814814" calcext:value-type="float">
            <text:p>0,000004398148148148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8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15740740740741" calcext:value-type="float">
            <text:p>0,00006157407407407410</text:p>
          </table:table-cell>
          <table:table-cell table:formula="of:=[.D16]-[.D1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8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59722222222222" calcext:value-type="float">
            <text:p>0,00006597222222222220</text:p>
          </table:table-cell>
          <table:table-cell table:formula="of:=[.D17]-[.D16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8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03703703703704" calcext:value-type="float">
            <text:p>0,00007037037037037040</text:p>
          </table:table-cell>
          <table:table-cell table:formula="of:=[.D18]-[.D17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8" office:value-type="float" office:value="646" calcext:value-type="float">
            <text:p>64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747685185185185" calcext:value-type="float">
            <text:p>0,00007476851851851850</text:p>
          </table:table-cell>
          <table:table-cell table:formula="of:=[.D19]-[.D18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8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791666666666667" calcext:value-type="float">
            <text:p>0,00007916666666666670</text:p>
          </table:table-cell>
          <table:table-cell table:formula="of:=[.D20]-[.D19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8" office:value-type="float" office:value="722" calcext:value-type="float">
            <text:p>72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835648148148148" calcext:value-type="float">
            <text:p>0,00008356481481481480</text:p>
          </table:table-cell>
          <table:table-cell table:formula="of:=[.D21]-[.D20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8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87962962962963" calcext:value-type="float">
            <text:p>0,00008796296296296300</text:p>
          </table:table-cell>
          <table:table-cell table:formula="of:=[.D22]-[.D21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8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923611111111111" calcext:value-type="float">
            <text:p>0,00009236111111111110</text:p>
          </table:table-cell>
          <table:table-cell table:formula="of:=[.D23]-[.D2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8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967592592592593" calcext:value-type="float">
            <text:p>0,00009675925925925930</text:p>
          </table:table-cell>
          <table:table-cell table:formula="of:=[.D24]-[.D2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8" office:value-type="float" office:value="874" calcext:value-type="float">
            <text:p>87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01157407407407" calcext:value-type="float">
            <text:p>0,00010115740740740700</text:p>
          </table:table-cell>
          <table:table-cell table:formula="of:=[.D25]-[.D24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8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05555555555556" calcext:value-type="float">
            <text:p>0,00010555555555555600</text:p>
          </table:table-cell>
          <table:table-cell table:formula="of:=[.D26]-[.D2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8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09953703703704" calcext:value-type="float">
            <text:p>0,00010995370370370400</text:p>
          </table:table-cell>
          <table:table-cell table:formula="of:=[.D27]-[.D26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8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14351851851852" calcext:value-type="float">
            <text:p>0,00011435185185185200</text:p>
          </table:table-cell>
          <table:table-cell table:formula="of:=[.D28]-[.D27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8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1875" calcext:value-type="float">
            <text:p>0,00011875000000000000</text:p>
          </table:table-cell>
          <table:table-cell table:formula="of:=[.D29]-[.D28]" office:value-type="float" office:value="0.00000439814814814814" calcext:value-type="float">
            <text:p>0,000004398148148148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8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23148148148148" calcext:value-type="float">
            <text:p>0,00012314814814814800</text:p>
          </table:table-cell>
          <table:table-cell table:formula="of:=[.D30]-[.D29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8" office:value-type="float" office:value="1102" calcext:value-type="float">
            <text:p>110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27546296296296" calcext:value-type="float">
            <text:p>0,00012754629629629600</text:p>
          </table:table-cell>
          <table:table-cell table:formula="of:=[.D31]-[.D30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8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31944444444444" calcext:value-type="float">
            <text:p>0,00013194444444444400</text:p>
          </table:table-cell>
          <table:table-cell table:formula="of:=[.D32]-[.D31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8" office:value-type="float" office:value="1178" calcext:value-type="float">
            <text:p>117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36342592592593" calcext:value-type="float">
            <text:p>0,00013634259259259300</text:p>
          </table:table-cell>
          <table:table-cell table:formula="of:=[.D33]-[.D3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8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40740740740741" calcext:value-type="float">
            <text:p>0,00014074074074074100</text:p>
          </table:table-cell>
          <table:table-cell table:formula="of:=[.D34]-[.D3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8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45138888888889" calcext:value-type="float">
            <text:p>0,00014513888888888900</text:p>
          </table:table-cell>
          <table:table-cell table:formula="of:=[.D35]-[.D34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8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49537037037037" calcext:value-type="float">
            <text:p>0,00014953703703703700</text:p>
          </table:table-cell>
          <table:table-cell table:formula="of:=[.D36]-[.D3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8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53935185185185" calcext:value-type="float">
            <text:p>0,00015393518518518500</text:p>
          </table:table-cell>
          <table:table-cell table:formula="of:=[.D37]-[.D36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8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58333333333333" calcext:value-type="float">
            <text:p>0,00015833333333333300</text:p>
          </table:table-cell>
          <table:table-cell table:formula="of:=[.D38]-[.D37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8" office:value-type="float" office:value="1406" calcext:value-type="float">
            <text:p>140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62731481481481" calcext:value-type="float">
            <text:p>0,00016273148148148100</text:p>
          </table:table-cell>
          <table:table-cell table:formula="of:=[.D39]-[.D38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8" office:value-type="float" office:value="1444" calcext:value-type="float">
            <text:p>144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6712962962963" calcext:value-type="float">
            <text:p>0,00016712962962963000</text:p>
          </table:table-cell>
          <table:table-cell table:formula="of:=[.D40]-[.D39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8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71527777777778" calcext:value-type="float">
            <text:p>0,00017152777777777800</text:p>
          </table:table-cell>
          <table:table-cell table:formula="of:=[.D41]-[.D40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8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75925925925926" calcext:value-type="float">
            <text:p>0,00017592592592592600</text:p>
          </table:table-cell>
          <table:table-cell table:formula="of:=[.D42]-[.D41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8" office:value-type="float" office:value="1558" calcext:value-type="float">
            <text:p>155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80324074074074" calcext:value-type="float">
            <text:p>0,00018032407407407400</text:p>
          </table:table-cell>
          <table:table-cell table:formula="of:=[.D43]-[.D4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8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84722222222222" calcext:value-type="float">
            <text:p>0,00018472222222222200</text:p>
          </table:table-cell>
          <table:table-cell table:formula="of:=[.D44]-[.D4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8" office:value-type="float" office:value="1634" calcext:value-type="float">
            <text:p>163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8912037037037" calcext:value-type="float">
            <text:p>0,00018912037037037000</text:p>
          </table:table-cell>
          <table:table-cell table:formula="of:=[.D45]-[.D44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8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93518518518519" calcext:value-type="float">
            <text:p>0,00019351851851851900</text:p>
          </table:table-cell>
          <table:table-cell table:formula="of:=[.D46]-[.D4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8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97916666666667" calcext:value-type="float">
            <text:p>0,00019791666666666700</text:p>
          </table:table-cell>
          <table:table-cell table:formula="of:=[.D47]-[.D46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8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02314814814815" calcext:value-type="float">
            <text:p>0,00020231481481481500</text:p>
          </table:table-cell>
          <table:table-cell table:formula="of:=[.D48]-[.D47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8" office:value-type="float" office:value="1786" calcext:value-type="float">
            <text:p>178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06712962962963" calcext:value-type="float">
            <text:p>0,00020671296296296300</text:p>
          </table:table-cell>
          <table:table-cell table:formula="of:=[.D49]-[.D48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8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11111111111111" calcext:value-type="float">
            <text:p>0,00021111111111111100</text:p>
          </table:table-cell>
          <table:table-cell table:formula="of:=[.D50]-[.D49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8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15509259259259" calcext:value-type="float">
            <text:p>0,00021550925925925900</text:p>
          </table:table-cell>
          <table:table-cell table:formula="of:=[.D51]-[.D50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8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19907407407407" calcext:value-type="float">
            <text:p>0,00021990740740740700</text:p>
          </table:table-cell>
          <table:table-cell table:formula="of:=[.D52]-[.D51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8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24305555555556" calcext:value-type="float">
            <text:p>0,00022430555555555600</text:p>
          </table:table-cell>
          <table:table-cell table:formula="of:=[.D53]-[.D52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8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28703703703704" calcext:value-type="float">
            <text:p>0,00022870370370370400</text:p>
          </table:table-cell>
          <table:table-cell table:formula="of:=[.D54]-[.D53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8" office:value-type="float" office:value="2014" calcext:value-type="float">
            <text:p>201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33101851851852" calcext:value-type="float">
            <text:p>0,00023310185185185200</text:p>
          </table:table-cell>
          <table:table-cell table:formula="of:=[.D55]-[.D54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8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375" calcext:value-type="float">
            <text:p>0,00023750000000000000</text:p>
          </table:table-cell>
          <table:table-cell table:formula="of:=[.D56]-[.D55]" office:value-type="float" office:value="0.00000439814814814815" calcext:value-type="float">
            <text:p>0,000004398148148148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8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41898148148148" calcext:value-type="float">
            <text:p>0,00024189814814814800</text:p>
          </table:table-cell>
          <table:table-cell table:formula="of:=[.D57]-[.D5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8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46296296296296" calcext:value-type="float">
            <text:p>0,00024629629629629600</text:p>
          </table:table-cell>
          <table:table-cell table:formula="of:=[.D58]-[.D5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8" office:value-type="float" office:value="2166" calcext:value-type="float">
            <text:p>216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50694444444444" calcext:value-type="float">
            <text:p>0,00025069444444444400</text:p>
          </table:table-cell>
          <table:table-cell table:formula="of:=[.D59]-[.D5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8" office:value-type="float" office:value="2204" calcext:value-type="float">
            <text:p>220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55092592592593" calcext:value-type="float">
            <text:p>0,00025509259259259300</text:p>
          </table:table-cell>
          <table:table-cell table:formula="of:=[.D60]-[.D5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8" office:value-type="float" office:value="2242" calcext:value-type="float">
            <text:p>224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59490740740741" calcext:value-type="float">
            <text:p>0,00025949074074074100</text:p>
          </table:table-cell>
          <table:table-cell table:formula="of:=[.D61]-[.D6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8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63888888888889" calcext:value-type="float">
            <text:p>0,00026388888888888900</text:p>
          </table:table-cell>
          <table:table-cell table:formula="of:=[.D62]-[.D61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8" office:value-type="float" office:value="2318" calcext:value-type="float">
            <text:p>231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68287037037037" calcext:value-type="float">
            <text:p>0,00026828703703703700</text:p>
          </table:table-cell>
          <table:table-cell table:formula="of:=[.D63]-[.D6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8" office:value-type="float" office:value="2356" calcext:value-type="float">
            <text:p>235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72685185185185" calcext:value-type="float">
            <text:p>0,00027268518518518500</text:p>
          </table:table-cell>
          <table:table-cell table:formula="of:=[.D64]-[.D63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8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77083333333333" calcext:value-type="float">
            <text:p>0,00027708333333333300</text:p>
          </table:table-cell>
          <table:table-cell table:formula="of:=[.D65]-[.D6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8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81481481481481" calcext:value-type="float">
            <text:p>0,00028148148148148100</text:p>
          </table:table-cell>
          <table:table-cell table:formula="of:=[.D66]-[.D65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8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8587962962963" calcext:value-type="float">
            <text:p>0,00028587962962963000</text:p>
          </table:table-cell>
          <table:table-cell table:formula="of:=[.D67]-[.D6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8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90277777777778" calcext:value-type="float">
            <text:p>0,00029027777777777800</text:p>
          </table:table-cell>
          <table:table-cell table:formula="of:=[.D68]-[.D6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8" office:value-type="float" office:value="2546" calcext:value-type="float">
            <text:p>254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94675925925926" calcext:value-type="float">
            <text:p>0,00029467592592592600</text:p>
          </table:table-cell>
          <table:table-cell table:formula="of:=[.D69]-[.D6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8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99074074074074" calcext:value-type="float">
            <text:p>0,00029907407407407400</text:p>
          </table:table-cell>
          <table:table-cell table:formula="of:=[.D70]-[.D6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8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03472222222222" calcext:value-type="float">
            <text:p>0,00030347222222222200</text:p>
          </table:table-cell>
          <table:table-cell table:formula="of:=[.D71]-[.D7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8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0787037037037" calcext:value-type="float">
            <text:p>0,00030787037037037000</text:p>
          </table:table-cell>
          <table:table-cell table:formula="of:=[.D72]-[.D71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8" office:value-type="float" office:value="2698" calcext:value-type="float">
            <text:p>269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12268518518519" calcext:value-type="float">
            <text:p>0,00031226851851851900</text:p>
          </table:table-cell>
          <table:table-cell table:formula="of:=[.D73]-[.D7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8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16666666666667" calcext:value-type="float">
            <text:p>0,00031666666666666700</text:p>
          </table:table-cell>
          <table:table-cell table:formula="of:=[.D74]-[.D73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8" office:value-type="float" office:value="2774" calcext:value-type="float">
            <text:p>277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21064814814815" calcext:value-type="float">
            <text:p>0,00032106481481481500</text:p>
          </table:table-cell>
          <table:table-cell table:formula="of:=[.D75]-[.D7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8" office:value-type="float" office:value="2812" calcext:value-type="float">
            <text:p>281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25462962962963" calcext:value-type="float">
            <text:p>0,00032546296296296300</text:p>
          </table:table-cell>
          <table:table-cell table:formula="of:=[.D76]-[.D75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8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29861111111111" calcext:value-type="float">
            <text:p>0,00032986111111111100</text:p>
          </table:table-cell>
          <table:table-cell table:formula="of:=[.D77]-[.D7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8" office:value-type="float" office:value="2888" calcext:value-type="float">
            <text:p>288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34259259259259" calcext:value-type="float">
            <text:p>0,00033425925925925900</text:p>
          </table:table-cell>
          <table:table-cell table:formula="of:=[.D78]-[.D7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8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38657407407407" calcext:value-type="float">
            <text:p>0,00033865740740740700</text:p>
          </table:table-cell>
          <table:table-cell table:formula="of:=[.D79]-[.D7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8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43055555555556" calcext:value-type="float">
            <text:p>0,00034305555555555600</text:p>
          </table:table-cell>
          <table:table-cell table:formula="of:=[.D80]-[.D7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8" office:value-type="float" office:value="3002" calcext:value-type="float">
            <text:p>300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47453703703704" calcext:value-type="float">
            <text:p>0,00034745370370370400</text:p>
          </table:table-cell>
          <table:table-cell table:formula="of:=[.D81]-[.D8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8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51851851851852" calcext:value-type="float">
            <text:p>0,00035185185185185200</text:p>
          </table:table-cell>
          <table:table-cell table:formula="of:=[.D82]-[.D81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8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5625" calcext:value-type="float">
            <text:p>0,00035625000000000000</text:p>
          </table:table-cell>
          <table:table-cell table:formula="of:=[.D83]-[.D8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8" office:value-type="float" office:value="3116" calcext:value-type="float">
            <text:p>311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60648148148148" calcext:value-type="float">
            <text:p>0,00036064814814814800</text:p>
          </table:table-cell>
          <table:table-cell table:formula="of:=[.D84]-[.D83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8" office:value-type="float" office:value="3154" calcext:value-type="float">
            <text:p>315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65046296296296" calcext:value-type="float">
            <text:p>0,00036504629629629600</text:p>
          </table:table-cell>
          <table:table-cell table:formula="of:=[.D85]-[.D8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8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69444444444444" calcext:value-type="float">
            <text:p>0,00036944444444444400</text:p>
          </table:table-cell>
          <table:table-cell table:formula="of:=[.D86]-[.D85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8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73842592592593" calcext:value-type="float">
            <text:p>0,00037384259259259300</text:p>
          </table:table-cell>
          <table:table-cell table:formula="of:=[.D87]-[.D8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8" office:value-type="float" office:value="3268" calcext:value-type="float">
            <text:p>326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78240740740741" calcext:value-type="float">
            <text:p>0,00037824074074074100</text:p>
          </table:table-cell>
          <table:table-cell table:formula="of:=[.D88]-[.D8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8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82638888888889" calcext:value-type="float">
            <text:p>0,00038263888888888900</text:p>
          </table:table-cell>
          <table:table-cell table:formula="of:=[.D89]-[.D8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8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87037037037037" calcext:value-type="float">
            <text:p>0,00038703703703703700</text:p>
          </table:table-cell>
          <table:table-cell table:formula="of:=[.D90]-[.D8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8" office:value-type="float" office:value="3382" calcext:value-type="float">
            <text:p>338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91435185185185" calcext:value-type="float">
            <text:p>0,00039143518518518500</text:p>
          </table:table-cell>
          <table:table-cell table:formula="of:=[.D91]-[.D9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8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95833333333333" calcext:value-type="float">
            <text:p>0,00039583333333333300</text:p>
          </table:table-cell>
          <table:table-cell table:formula="of:=[.D92]-[.D91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8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00231481481482" calcext:value-type="float">
            <text:p>0,00040023148148148200</text:p>
          </table:table-cell>
          <table:table-cell table:formula="of:=[.D93]-[.D9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8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0462962962963" calcext:value-type="float">
            <text:p>0,00040462962962963000</text:p>
          </table:table-cell>
          <table:table-cell table:formula="of:=[.D94]-[.D93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8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09027777777778" calcext:value-type="float">
            <text:p>0,00040902777777777800</text:p>
          </table:table-cell>
          <table:table-cell table:formula="of:=[.D95]-[.D9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8" office:value-type="float" office:value="3572" calcext:value-type="float">
            <text:p>357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13425925925926" calcext:value-type="float">
            <text:p>0,00041342592592592600</text:p>
          </table:table-cell>
          <table:table-cell table:formula="of:=[.D96]-[.D95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8" office:value-type="float" office:value="3610" calcext:value-type="float">
            <text:p>361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17824074074074" calcext:value-type="float">
            <text:p>0,00041782407407407400</text:p>
          </table:table-cell>
          <table:table-cell table:formula="of:=[.D97]-[.D9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8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22222222222222" calcext:value-type="float">
            <text:p>0,00042222222222222200</text:p>
          </table:table-cell>
          <table:table-cell table:formula="of:=[.D98]-[.D9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8" office:value-type="float" office:value="3686" calcext:value-type="float">
            <text:p>368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2662037037037" calcext:value-type="float">
            <text:p>0,00042662037037037000</text:p>
          </table:table-cell>
          <table:table-cell table:formula="of:=[.D99]-[.D9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8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31018518518519" calcext:value-type="float">
            <text:p>0,00043101851851851800</text:p>
          </table:table-cell>
          <table:table-cell table:formula="of:=[.D100]-[.D9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8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35416666666667" calcext:value-type="float">
            <text:p>0,00043541666666666700</text:p>
          </table:table-cell>
          <table:table-cell table:formula="of:=[.D101]-[.D10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8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39814814814815" calcext:value-type="float">
            <text:p>0,00043981481481481500</text:p>
          </table:table-cell>
          <table:table-cell table:formula="of:=[.D102]-[.D101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8" office:value-type="float" office:value="3838" calcext:value-type="float">
            <text:p>383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44212962962963" calcext:value-type="float">
            <text:p>0,00044421296296296300</text:p>
          </table:table-cell>
          <table:table-cell table:formula="of:=[.D103]-[.D10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8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48611111111111" calcext:value-type="float">
            <text:p>0,00044861111111111100</text:p>
          </table:table-cell>
          <table:table-cell table:formula="of:=[.D104]-[.D103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8" office:value-type="float" office:value="3914" calcext:value-type="float">
            <text:p>391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53009259259259" calcext:value-type="float">
            <text:p>0,00045300925925925900</text:p>
          </table:table-cell>
          <table:table-cell table:formula="of:=[.D105]-[.D10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8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57407407407407" calcext:value-type="float">
            <text:p>0,00045740740740740700</text:p>
          </table:table-cell>
          <table:table-cell table:formula="of:=[.D106]-[.D105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8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61805555555556" calcext:value-type="float">
            <text:p>0,00046180555555555600</text:p>
          </table:table-cell>
          <table:table-cell table:formula="of:=[.D107]-[.D10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8" office:value-type="float" office:value="4028" calcext:value-type="float">
            <text:p>402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66203703703704" calcext:value-type="float">
            <text:p>0,00046620370370370400</text:p>
          </table:table-cell>
          <table:table-cell table:formula="of:=[.D108]-[.D107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8" office:value-type="float" office:value="4066" calcext:value-type="float">
            <text:p>406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70601851851852" calcext:value-type="float">
            <text:p>0,00047060185185185200</text:p>
          </table:table-cell>
          <table:table-cell table:formula="of:=[.D109]-[.D10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8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75" calcext:value-type="float">
            <text:p>0,00047500000000000000</text:p>
          </table:table-cell>
          <table:table-cell table:formula="of:=[.D110]-[.D109]" office:value-type="float" office:value="0.00000439814814814818" calcext:value-type="float">
            <text:p>0,000004398148148148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8" office:value-type="float" office:value="4142" calcext:value-type="float">
            <text:p>414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79398148148148" calcext:value-type="float">
            <text:p>0,00047939814814814800</text:p>
          </table:table-cell>
          <table:table-cell table:formula="of:=[.D111]-[.D11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8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83796296296296" calcext:value-type="float">
            <text:p>0,00048379629629629600</text:p>
          </table:table-cell>
          <table:table-cell table:formula="of:=[.D112]-[.D11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8" office:value-type="float" office:value="4218" calcext:value-type="float">
            <text:p>421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88194444444444" calcext:value-type="float">
            <text:p>0,00048819444444444400</text:p>
          </table:table-cell>
          <table:table-cell table:formula="of:=[.D113]-[.D11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8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92592592592593" calcext:value-type="float">
            <text:p>0,00049259259259259300</text:p>
          </table:table-cell>
          <table:table-cell table:formula="of:=[.D114]-[.D113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8" office:value-type="float" office:value="4294" calcext:value-type="float">
            <text:p>429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96990740740741" calcext:value-type="float">
            <text:p>0,00049699074074074100</text:p>
          </table:table-cell>
          <table:table-cell table:formula="of:=[.D115]-[.D11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8" office:value-type="float" office:value="4332" calcext:value-type="float">
            <text:p>433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01388888888889" calcext:value-type="float">
            <text:p>0,00050138888888888900</text:p>
          </table:table-cell>
          <table:table-cell table:formula="of:=[.D116]-[.D11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8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05787037037037" calcext:value-type="float">
            <text:p>0,00050578703703703700</text:p>
          </table:table-cell>
          <table:table-cell table:formula="of:=[.D117]-[.D11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8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10185185185185" calcext:value-type="float">
            <text:p>0,00051018518518518500</text:p>
          </table:table-cell>
          <table:table-cell table:formula="of:=[.D118]-[.D117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8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14583333333333" calcext:value-type="float">
            <text:p>0,00051458333333333300</text:p>
          </table:table-cell>
          <table:table-cell table:formula="of:=[.D119]-[.D11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8" office:value-type="float" office:value="4484" calcext:value-type="float">
            <text:p>448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18981481481482" calcext:value-type="float">
            <text:p>0,00051898148148148200</text:p>
          </table:table-cell>
          <table:table-cell table:formula="of:=[.D120]-[.D11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8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2337962962963" calcext:value-type="float">
            <text:p>0,00052337962962963000</text:p>
          </table:table-cell>
          <table:table-cell table:formula="of:=[.D121]-[.D12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8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27777777777778" calcext:value-type="float">
            <text:p>0,00052777777777777800</text:p>
          </table:table-cell>
          <table:table-cell table:formula="of:=[.D122]-[.D121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8" office:value-type="float" office:value="4598" calcext:value-type="float">
            <text:p>459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32175925925926" calcext:value-type="float">
            <text:p>0,00053217592592592600</text:p>
          </table:table-cell>
          <table:table-cell table:formula="of:=[.D123]-[.D12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8" office:value-type="float" office:value="4636" calcext:value-type="float">
            <text:p>463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36574074074074" calcext:value-type="float">
            <text:p>0,00053657407407407400</text:p>
          </table:table-cell>
          <table:table-cell table:formula="of:=[.D124]-[.D12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8" office:value-type="float" office:value="4674" calcext:value-type="float">
            <text:p>467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40972222222222" calcext:value-type="float">
            <text:p>0,00054097222222222200</text:p>
          </table:table-cell>
          <table:table-cell table:formula="of:=[.D125]-[.D12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8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4537037037037" calcext:value-type="float">
            <text:p>0,00054537037037037000</text:p>
          </table:table-cell>
          <table:table-cell table:formula="of:=[.D126]-[.D125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8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49768518518519" calcext:value-type="float">
            <text:p>0,00054976851851851900</text:p>
          </table:table-cell>
          <table:table-cell table:formula="of:=[.D127]-[.D12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8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54166666666667" calcext:value-type="float">
            <text:p>0,00055416666666666700</text:p>
          </table:table-cell>
          <table:table-cell table:formula="of:=[.D128]-[.D12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8" office:value-type="float" office:value="4826" calcext:value-type="float">
            <text:p>482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58564814814815" calcext:value-type="float">
            <text:p>0,00055856481481481500</text:p>
          </table:table-cell>
          <table:table-cell table:formula="of:=[.D129]-[.D12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8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62962962962963" calcext:value-type="float">
            <text:p>0,00056296296296296300</text:p>
          </table:table-cell>
          <table:table-cell table:formula="of:=[.D130]-[.D129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8" office:value-type="float" office:value="4902" calcext:value-type="float">
            <text:p>490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67361111111111" calcext:value-type="float">
            <text:p>0,00056736111111111100</text:p>
          </table:table-cell>
          <table:table-cell table:formula="of:=[.D131]-[.D13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8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71759259259259" calcext:value-type="float">
            <text:p>0,00057175925925925900</text:p>
          </table:table-cell>
          <table:table-cell table:formula="of:=[.D132]-[.D13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8" office:value-type="float" office:value="4978" calcext:value-type="float">
            <text:p>497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76157407407407" calcext:value-type="float">
            <text:p>0,00057615740740740700</text:p>
          </table:table-cell>
          <table:table-cell table:formula="of:=[.D133]-[.D13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8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80555555555556" calcext:value-type="float">
            <text:p>0,00058055555555555600</text:p>
          </table:table-cell>
          <table:table-cell table:formula="of:=[.D134]-[.D133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8" office:value-type="float" office:value="5054" calcext:value-type="float">
            <text:p>505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84953703703704" calcext:value-type="float">
            <text:p>0,00058495370370370400</text:p>
          </table:table-cell>
          <table:table-cell table:formula="of:=[.D135]-[.D13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8" office:value-type="float" office:value="5092" calcext:value-type="float">
            <text:p>509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89351851851852" calcext:value-type="float">
            <text:p>0,00058935185185185200</text:p>
          </table:table-cell>
          <table:table-cell table:formula="of:=[.D136]-[.D13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8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9375" calcext:value-type="float">
            <text:p>0,00059375000000000000</text:p>
          </table:table-cell>
          <table:table-cell table:formula="of:=[.D137]-[.D13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8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98148148148148" calcext:value-type="float">
            <text:p>0,00059814814814814800</text:p>
          </table:table-cell>
          <table:table-cell table:formula="of:=[.D138]-[.D137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8" office:value-type="float" office:value="5206" calcext:value-type="float">
            <text:p>520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02546296296296" calcext:value-type="float">
            <text:p>0,00060254629629629600</text:p>
          </table:table-cell>
          <table:table-cell table:formula="of:=[.D139]-[.D13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8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06944444444445" calcext:value-type="float">
            <text:p>0,00060694444444444500</text:p>
          </table:table-cell>
          <table:table-cell table:formula="of:=[.D140]-[.D13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8" office:value-type="float" office:value="5282" calcext:value-type="float">
            <text:p>528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11342592592593" calcext:value-type="float">
            <text:p>0,00061134259259259300</text:p>
          </table:table-cell>
          <table:table-cell table:formula="of:=[.D141]-[.D14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8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15740740740741" calcext:value-type="float">
            <text:p>0,00061574074074074100</text:p>
          </table:table-cell>
          <table:table-cell table:formula="of:=[.D142]-[.D141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8" office:value-type="float" office:value="5358" calcext:value-type="float">
            <text:p>535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20138888888889" calcext:value-type="float">
            <text:p>0,00062013888888888900</text:p>
          </table:table-cell>
          <table:table-cell table:formula="of:=[.D143]-[.D14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8" office:value-type="float" office:value="5396" calcext:value-type="float">
            <text:p>539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24537037037037" calcext:value-type="float">
            <text:p>0,00062453703703703700</text:p>
          </table:table-cell>
          <table:table-cell table:formula="of:=[.D144]-[.D14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8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28935185185185" calcext:value-type="float">
            <text:p>0,00062893518518518500</text:p>
          </table:table-cell>
          <table:table-cell table:formula="of:=[.D145]-[.D14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8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33333333333333" calcext:value-type="float">
            <text:p>0,00063333333333333300</text:p>
          </table:table-cell>
          <table:table-cell table:formula="of:=[.D146]-[.D145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8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37731481481482" calcext:value-type="float">
            <text:p>0,00063773148148148200</text:p>
          </table:table-cell>
          <table:table-cell table:formula="of:=[.D147]-[.D14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8" office:value-type="float" office:value="5548" calcext:value-type="float">
            <text:p>554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4212962962963" calcext:value-type="float">
            <text:p>0,00064212962962963000</text:p>
          </table:table-cell>
          <table:table-cell table:formula="of:=[.D148]-[.D14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8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46527777777778" calcext:value-type="float">
            <text:p>0,00064652777777777800</text:p>
          </table:table-cell>
          <table:table-cell table:formula="of:=[.D149]-[.D14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8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650925925925926" calcext:value-type="float">
            <text:p>0,00065092592592592600</text:p>
          </table:table-cell>
          <table:table-cell table:formula="of:=[.D150]-[.D149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8" office:value-type="float" office:value="5662" calcext:value-type="float">
            <text:p>566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55324074074074" calcext:value-type="float">
            <text:p>0,00065532407407407400</text:p>
          </table:table-cell>
          <table:table-cell table:formula="of:=[.D151]-[.D15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8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59722222222222" calcext:value-type="float">
            <text:p>0,00065972222222222200</text:p>
          </table:table-cell>
          <table:table-cell table:formula="of:=[.D152]-[.D15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8" office:value-type="float" office:value="5738" calcext:value-type="float">
            <text:p>573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6412037037037" calcext:value-type="float">
            <text:p>0,00066412037037037000</text:p>
          </table:table-cell>
          <table:table-cell table:formula="of:=[.D153]-[.D15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8" office:value-type="float" office:value="5776" calcext:value-type="float">
            <text:p>577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668518518518519" calcext:value-type="float">
            <text:p>0,00066851851851851900</text:p>
          </table:table-cell>
          <table:table-cell table:formula="of:=[.D154]-[.D153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8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72916666666667" calcext:value-type="float">
            <text:p>0,00067291666666666700</text:p>
          </table:table-cell>
          <table:table-cell table:formula="of:=[.D155]-[.D15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8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77314814814815" calcext:value-type="float">
            <text:p>0,00067731481481481500</text:p>
          </table:table-cell>
          <table:table-cell table:formula="of:=[.D156]-[.D15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8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81712962962963" calcext:value-type="float">
            <text:p>0,00068171296296296300</text:p>
          </table:table-cell>
          <table:table-cell table:formula="of:=[.D157]-[.D15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8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686111111111111" calcext:value-type="float">
            <text:p>0,00068611111111111100</text:p>
          </table:table-cell>
          <table:table-cell table:formula="of:=[.D158]-[.D157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8" office:value-type="float" office:value="5966" calcext:value-type="float">
            <text:p>596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690509259259259" calcext:value-type="float">
            <text:p>0,00069050925925925900</text:p>
          </table:table-cell>
          <table:table-cell table:formula="of:=[.D159]-[.D15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8" office:value-type="float" office:value="6004" calcext:value-type="float">
            <text:p>600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94907407407407" calcext:value-type="float">
            <text:p>0,00069490740740740700</text:p>
          </table:table-cell>
          <table:table-cell table:formula="of:=[.D160]-[.D15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8" office:value-type="float" office:value="6042" calcext:value-type="float">
            <text:p>604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99305555555556" calcext:value-type="float">
            <text:p>0,00069930555555555600</text:p>
          </table:table-cell>
          <table:table-cell table:formula="of:=[.D161]-[.D16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8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03703703703704" calcext:value-type="float">
            <text:p>0,00070370370370370400</text:p>
          </table:table-cell>
          <table:table-cell table:formula="of:=[.D162]-[.D161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8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708101851851852" calcext:value-type="float">
            <text:p>0,00070810185185185200</text:p>
          </table:table-cell>
          <table:table-cell table:formula="of:=[.D163]-[.D16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8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7125" calcext:value-type="float">
            <text:p>0,00071250000000000000</text:p>
          </table:table-cell>
          <table:table-cell table:formula="of:=[.D164]-[.D16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8" office:value-type="float" office:value="6194" calcext:value-type="float">
            <text:p>619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716898148148148" calcext:value-type="float">
            <text:p>0,00071689814814814800</text:p>
          </table:table-cell>
          <table:table-cell table:formula="of:=[.D165]-[.D16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8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21296296296296" calcext:value-type="float">
            <text:p>0,00072129629629629600</text:p>
          </table:table-cell>
          <table:table-cell table:formula="of:=[.D166]-[.D16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8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725694444444444" calcext:value-type="float">
            <text:p>0,00072569444444444400</text:p>
          </table:table-cell>
          <table:table-cell table:formula="of:=[.D167]-[.D166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8" office:value-type="float" office:value="6308" calcext:value-type="float">
            <text:p>630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730092592592593" calcext:value-type="float">
            <text:p>0,00073009259259259300</text:p>
          </table:table-cell>
          <table:table-cell table:formula="of:=[.D168]-[.D16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8" office:value-type="float" office:value="6346" calcext:value-type="float">
            <text:p>634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734490740740741" calcext:value-type="float">
            <text:p>0,00073449074074074100</text:p>
          </table:table-cell>
          <table:table-cell table:formula="of:=[.D169]-[.D16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8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38888888888889" calcext:value-type="float">
            <text:p>0,00073888888888888900</text:p>
          </table:table-cell>
          <table:table-cell table:formula="of:=[.D170]-[.D16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8" office:value-type="float" office:value="6422" calcext:value-type="float">
            <text:p>642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743287037037037" calcext:value-type="float">
            <text:p>0,00074328703703703700</text:p>
          </table:table-cell>
          <table:table-cell table:formula="of:=[.D171]-[.D170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8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747685185185185" calcext:value-type="float">
            <text:p>0,00074768518518518500</text:p>
          </table:table-cell>
          <table:table-cell table:formula="of:=[.D172]-[.D17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8" office:value-type="float" office:value="6498" calcext:value-type="float">
            <text:p>649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752083333333333" calcext:value-type="float">
            <text:p>0,00075208333333333300</text:p>
          </table:table-cell>
          <table:table-cell table:formula="of:=[.D173]-[.D17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8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756481481481482" calcext:value-type="float">
            <text:p>0,00075648148148148200</text:p>
          </table:table-cell>
          <table:table-cell table:formula="of:=[.D174]-[.D17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8" office:value-type="float" office:value="6574" calcext:value-type="float">
            <text:p>657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76087962962963" calcext:value-type="float">
            <text:p>0,00076087962962963000</text:p>
          </table:table-cell>
          <table:table-cell table:formula="of:=[.D175]-[.D174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8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765277777777778" calcext:value-type="float">
            <text:p>0,00076527777777777800</text:p>
          </table:table-cell>
          <table:table-cell table:formula="of:=[.D176]-[.D17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8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769675925925926" calcext:value-type="float">
            <text:p>0,00076967592592592600</text:p>
          </table:table-cell>
          <table:table-cell table:formula="of:=[.D177]-[.D17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8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774074074074074" calcext:value-type="float">
            <text:p>0,00077407407407407400</text:p>
          </table:table-cell>
          <table:table-cell table:formula="of:=[.D178]-[.D17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8" office:value-type="float" office:value="6726" calcext:value-type="float">
            <text:p>672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778472222222222" calcext:value-type="float">
            <text:p>0,00077847222222222200</text:p>
          </table:table-cell>
          <table:table-cell table:formula="of:=[.D179]-[.D178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8" office:value-type="float" office:value="6764" calcext:value-type="float">
            <text:p>676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78287037037037" calcext:value-type="float">
            <text:p>0,00078287037037037000</text:p>
          </table:table-cell>
          <table:table-cell table:formula="of:=[.D180]-[.D17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8" office:value-type="float" office:value="6802" calcext:value-type="float">
            <text:p>680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787268518518519" calcext:value-type="float">
            <text:p>0,00078726851851851900</text:p>
          </table:table-cell>
          <table:table-cell table:formula="of:=[.D181]-[.D18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8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791666666666667" calcext:value-type="float">
            <text:p>0,00079166666666666700</text:p>
          </table:table-cell>
          <table:table-cell table:formula="of:=[.D182]-[.D18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8" office:value-type="float" office:value="6878" calcext:value-type="float">
            <text:p>687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796064814814815" calcext:value-type="float">
            <text:p>0,00079606481481481500</text:p>
          </table:table-cell>
          <table:table-cell table:formula="of:=[.D183]-[.D182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8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800462962962963" calcext:value-type="float">
            <text:p>0,00080046296296296300</text:p>
          </table:table-cell>
          <table:table-cell table:formula="of:=[.D184]-[.D18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8" office:value-type="float" office:value="6954" calcext:value-type="float">
            <text:p>695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804861111111111" calcext:value-type="float">
            <text:p>0,00080486111111111100</text:p>
          </table:table-cell>
          <table:table-cell table:formula="of:=[.D185]-[.D18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8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809259259259259" calcext:value-type="float">
            <text:p>0,00080925925925925900</text:p>
          </table:table-cell>
          <table:table-cell table:formula="of:=[.D186]-[.D18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8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813657407407407" calcext:value-type="float">
            <text:p>0,00081365740740740700</text:p>
          </table:table-cell>
          <table:table-cell table:formula="of:=[.D187]-[.D186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8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818055555555556" calcext:value-type="float">
            <text:p>0,00081805555555555600</text:p>
          </table:table-cell>
          <table:table-cell table:formula="of:=[.D188]-[.D18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8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822453703703704" calcext:value-type="float">
            <text:p>0,00082245370370370400</text:p>
          </table:table-cell>
          <table:table-cell table:formula="of:=[.D189]-[.D18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8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826851851851852" calcext:value-type="float">
            <text:p>0,00082685185185185200</text:p>
          </table:table-cell>
          <table:table-cell table:formula="of:=[.D190]-[.D18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8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83125" calcext:value-type="float">
            <text:p>0,00083125000000000000</text:p>
          </table:table-cell>
          <table:table-cell table:formula="of:=[.D191]-[.D190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8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835648148148148" calcext:value-type="float">
            <text:p>0,00083564814814814800</text:p>
          </table:table-cell>
          <table:table-cell table:formula="of:=[.D192]-[.D19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8" office:value-type="float" office:value="7258" calcext:value-type="float">
            <text:p>725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840046296296296" calcext:value-type="float">
            <text:p>0,00084004629629629600</text:p>
          </table:table-cell>
          <table:table-cell table:formula="of:=[.D193]-[.D19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8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844444444444444" calcext:value-type="float">
            <text:p>0,00084444444444444400</text:p>
          </table:table-cell>
          <table:table-cell table:formula="of:=[.D194]-[.D19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8" office:value-type="float" office:value="7334" calcext:value-type="float">
            <text:p>733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848842592592593" calcext:value-type="float">
            <text:p>0,00084884259259259200</text:p>
          </table:table-cell>
          <table:table-cell table:formula="of:=[.D195]-[.D194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8" office:value-type="float" office:value="7372" calcext:value-type="float">
            <text:p>737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853240740740741" calcext:value-type="float">
            <text:p>0,00085324074074074100</text:p>
          </table:table-cell>
          <table:table-cell table:formula="of:=[.D196]-[.D19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8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857638888888889" calcext:value-type="float">
            <text:p>0,00085763888888888900</text:p>
          </table:table-cell>
          <table:table-cell table:formula="of:=[.D197]-[.D19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8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862037037037037" calcext:value-type="float">
            <text:p>0,00086203703703703700</text:p>
          </table:table-cell>
          <table:table-cell table:formula="of:=[.D198]-[.D19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8" office:value-type="float" office:value="7486" calcext:value-type="float">
            <text:p>748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866435185185185" calcext:value-type="float">
            <text:p>0,00086643518518518500</text:p>
          </table:table-cell>
          <table:table-cell table:formula="of:=[.D199]-[.D198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8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870833333333333" calcext:value-type="float">
            <text:p>0,00087083333333333400</text:p>
          </table:table-cell>
          <table:table-cell table:formula="of:=[.D200]-[.D19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8" office:value-type="float" office:value="7562" calcext:value-type="float">
            <text:p>756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875231481481482" calcext:value-type="float">
            <text:p>0,00087523148148148100</text:p>
          </table:table-cell>
          <table:table-cell table:formula="of:=[.D201]-[.D20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8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87962962962963" calcext:value-type="float">
            <text:p>0,00087962962962963000</text:p>
          </table:table-cell>
          <table:table-cell table:formula="of:=[.D202]-[.D20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8" office:value-type="float" office:value="7638" calcext:value-type="float">
            <text:p>763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884027777777778" calcext:value-type="float">
            <text:p>0,00088402777777777800</text:p>
          </table:table-cell>
          <table:table-cell table:formula="of:=[.D203]-[.D202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8" office:value-type="float" office:value="7676" calcext:value-type="float">
            <text:p>767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888425925925926" calcext:value-type="float">
            <text:p>0,00088842592592592600</text:p>
          </table:table-cell>
          <table:table-cell table:formula="of:=[.D204]-[.D20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8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892824074074074" calcext:value-type="float">
            <text:p>0,00089282407407407400</text:p>
          </table:table-cell>
          <table:table-cell table:formula="of:=[.D205]-[.D20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8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897222222222222" calcext:value-type="float">
            <text:p>0,00089722222222222200</text:p>
          </table:table-cell>
          <table:table-cell table:formula="of:=[.D206]-[.D20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8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90162037037037" calcext:value-type="float">
            <text:p>0,00090162037037037000</text:p>
          </table:table-cell>
          <table:table-cell table:formula="of:=[.D207]-[.D206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8" office:value-type="float" office:value="7828" calcext:value-type="float">
            <text:p>782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906018518518519" calcext:value-type="float">
            <text:p>0,00090601851851851900</text:p>
          </table:table-cell>
          <table:table-cell table:formula="of:=[.D208]-[.D20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8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910416666666667" calcext:value-type="float">
            <text:p>0,00091041666666666700</text:p>
          </table:table-cell>
          <table:table-cell table:formula="of:=[.D209]-[.D20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8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914814814814815" calcext:value-type="float">
            <text:p>0,00091481481481481500</text:p>
          </table:table-cell>
          <table:table-cell table:formula="of:=[.D210]-[.D20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8" office:value-type="float" office:value="7942" calcext:value-type="float">
            <text:p>794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919212962962963" calcext:value-type="float">
            <text:p>0,00091921296296296300</text:p>
          </table:table-cell>
          <table:table-cell table:formula="of:=[.D211]-[.D210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8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923611111111111" calcext:value-type="float">
            <text:p>0,00092361111111111100</text:p>
          </table:table-cell>
          <table:table-cell table:formula="of:=[.D212]-[.D21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8" office:value-type="float" office:value="8018" calcext:value-type="float">
            <text:p>801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928009259259259" calcext:value-type="float">
            <text:p>0,00092800925925925900</text:p>
          </table:table-cell>
          <table:table-cell table:formula="of:=[.D213]-[.D21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8" office:value-type="float" office:value="8056" calcext:value-type="float">
            <text:p>805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932407407407407" calcext:value-type="float">
            <text:p>0,00093240740740740700</text:p>
          </table:table-cell>
          <table:table-cell table:formula="of:=[.D214]-[.D21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8" office:value-type="float" office:value="8094" calcext:value-type="float">
            <text:p>809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936805555555556" calcext:value-type="float">
            <text:p>0,00093680555555555600</text:p>
          </table:table-cell>
          <table:table-cell table:formula="of:=[.D215]-[.D214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8" office:value-type="float" office:value="8132" calcext:value-type="float">
            <text:p>813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941203703703704" calcext:value-type="float">
            <text:p>0,00094120370370370400</text:p>
          </table:table-cell>
          <table:table-cell table:formula="of:=[.D216]-[.D21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8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945601851851852" calcext:value-type="float">
            <text:p>0,00094560185185185200</text:p>
          </table:table-cell>
          <table:table-cell table:formula="of:=[.D217]-[.D21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8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95" calcext:value-type="float">
            <text:p>0,00095000000000000000</text:p>
          </table:table-cell>
          <table:table-cell table:formula="of:=[.D218]-[.D21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8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954398148148148" calcext:value-type="float">
            <text:p>0,00095439814814814800</text:p>
          </table:table-cell>
          <table:table-cell table:formula="of:=[.D219]-[.D218]" office:value-type="float" office:value="0.00000439814814814823" calcext:value-type="float">
            <text:p>0,000004398148148148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8" office:value-type="float" office:value="8284" calcext:value-type="float">
            <text:p>828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958796296296296" calcext:value-type="float">
            <text:p>0,00095879629629629600</text:p>
          </table:table-cell>
          <table:table-cell table:formula="of:=[.D220]-[.D21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8" office:value-type="float" office:value="8322" calcext:value-type="float">
            <text:p>832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963194444444445" calcext:value-type="float">
            <text:p>0,00096319444444444500</text:p>
          </table:table-cell>
          <table:table-cell table:formula="of:=[.D221]-[.D22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8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967592592592593" calcext:value-type="float">
            <text:p>0,00096759259259259300</text:p>
          </table:table-cell>
          <table:table-cell table:formula="of:=[.D222]-[.D22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8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971990740740741" calcext:value-type="float">
            <text:p>0,00097199074074074100</text:p>
          </table:table-cell>
          <table:table-cell table:formula="of:=[.D223]-[.D22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8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976388888888889" calcext:value-type="float">
            <text:p>0,00097638888888888900</text:p>
          </table:table-cell>
          <table:table-cell table:formula="of:=[.D224]-[.D22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8" office:value-type="float" office:value="8474" calcext:value-type="float">
            <text:p>847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980787037037037" calcext:value-type="float">
            <text:p>0,00098078703703703700</text:p>
          </table:table-cell>
          <table:table-cell table:formula="of:=[.D225]-[.D22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8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985185185185185" calcext:value-type="float">
            <text:p>0,00098518518518518500</text:p>
          </table:table-cell>
          <table:table-cell table:formula="of:=[.D226]-[.D22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8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989583333333333" calcext:value-type="float">
            <text:p>0,00098958333333333300</text:p>
          </table:table-cell>
          <table:table-cell table:formula="of:=[.D227]-[.D22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8" office:value-type="float" office:value="8588" calcext:value-type="float">
            <text:p>858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993981481481482" calcext:value-type="float">
            <text:p>0,00099398148148148200</text:p>
          </table:table-cell>
          <table:table-cell table:formula="of:=[.D228]-[.D22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8" office:value-type="float" office:value="8626" calcext:value-type="float">
            <text:p>862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99837962962963" calcext:value-type="float">
            <text:p>0,00099837962962963000</text:p>
          </table:table-cell>
          <table:table-cell table:formula="of:=[.D229]-[.D22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8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00277777777778" calcext:value-type="float">
            <text:p>0,00100277777777778000</text:p>
          </table:table-cell>
          <table:table-cell table:formula="of:=[.D230]-[.D22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8" office:value-type="float" office:value="8702" calcext:value-type="float">
            <text:p>870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00717592592593" calcext:value-type="float">
            <text:p>0,00100717592592593000</text:p>
          </table:table-cell>
          <table:table-cell table:formula="of:=[.D231]-[.D23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8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01157407407407" calcext:value-type="float">
            <text:p>0,00101157407407407000</text:p>
          </table:table-cell>
          <table:table-cell table:formula="of:=[.D232]-[.D23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8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01597222222222" calcext:value-type="float">
            <text:p>0,00101597222222222000</text:p>
          </table:table-cell>
          <table:table-cell table:formula="of:=[.D233]-[.D23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8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02037037037037" calcext:value-type="float">
            <text:p>0,00102037037037037000</text:p>
          </table:table-cell>
          <table:table-cell table:formula="of:=[.D234]-[.D23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8" office:value-type="float" office:value="8854" calcext:value-type="float">
            <text:p>885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02476851851852" calcext:value-type="float">
            <text:p>0,00102476851851852000</text:p>
          </table:table-cell>
          <table:table-cell table:formula="of:=[.D235]-[.D23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8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02916666666667" calcext:value-type="float">
            <text:p>0,00102916666666667000</text:p>
          </table:table-cell>
          <table:table-cell table:formula="of:=[.D236]-[.D23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8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03356481481481" calcext:value-type="float">
            <text:p>0,00103356481481481000</text:p>
          </table:table-cell>
          <table:table-cell table:formula="of:=[.D237]-[.D23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8" office:value-type="float" office:value="8968" calcext:value-type="float">
            <text:p>896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03796296296296" calcext:value-type="float">
            <text:p>0,00103796296296296000</text:p>
          </table:table-cell>
          <table:table-cell table:formula="of:=[.D238]-[.D23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8" office:value-type="float" office:value="9006" calcext:value-type="float">
            <text:p>900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04236111111111" calcext:value-type="float">
            <text:p>0,00104236111111111000</text:p>
          </table:table-cell>
          <table:table-cell table:formula="of:=[.D239]-[.D23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8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04675925925926" calcext:value-type="float">
            <text:p>0,00104675925925926000</text:p>
          </table:table-cell>
          <table:table-cell table:formula="of:=[.D240]-[.D23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8" office:value-type="float" office:value="9082" calcext:value-type="float">
            <text:p>908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05115740740741" calcext:value-type="float">
            <text:p>0,00105115740740741000</text:p>
          </table:table-cell>
          <table:table-cell table:formula="of:=[.D241]-[.D24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38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05555555555556" calcext:value-type="float">
            <text:p>0,00105555555555556000</text:p>
          </table:table-cell>
          <table:table-cell table:formula="of:=[.D242]-[.D24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8" office:value-type="float" office:value="9158" calcext:value-type="float">
            <text:p>915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0599537037037" calcext:value-type="float">
            <text:p>0,00105995370370370000</text:p>
          </table:table-cell>
          <table:table-cell table:formula="of:=[.D243]-[.D24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8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06435185185185" calcext:value-type="float">
            <text:p>0,00106435185185185000</text:p>
          </table:table-cell>
          <table:table-cell table:formula="of:=[.D244]-[.D24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8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06875" calcext:value-type="float">
            <text:p>0,00106875000000000000</text:p>
          </table:table-cell>
          <table:table-cell table:formula="of:=[.D245]-[.D24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8" office:value-type="float" office:value="9272" calcext:value-type="float">
            <text:p>927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07314814814815" calcext:value-type="float">
            <text:p>0,00107314814814815000</text:p>
          </table:table-cell>
          <table:table-cell table:formula="of:=[.D246]-[.D24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8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0775462962963" calcext:value-type="float">
            <text:p>0,00107754629629630000</text:p>
          </table:table-cell>
          <table:table-cell table:formula="of:=[.D247]-[.D24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8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08194444444444" calcext:value-type="float">
            <text:p>0,00108194444444444000</text:p>
          </table:table-cell>
          <table:table-cell table:formula="of:=[.D248]-[.D24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8" office:value-type="float" office:value="9386" calcext:value-type="float">
            <text:p>938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08634259259259" calcext:value-type="float">
            <text:p>0,00108634259259259000</text:p>
          </table:table-cell>
          <table:table-cell table:formula="of:=[.D249]-[.D24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8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09074074074074" calcext:value-type="float">
            <text:p>0,00109074074074074000</text:p>
          </table:table-cell>
          <table:table-cell table:formula="of:=[.D250]-[.D24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8" office:value-type="float" office:value="9462" calcext:value-type="float">
            <text:p>946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09513888888889" calcext:value-type="float">
            <text:p>0,00109513888888889000</text:p>
          </table:table-cell>
          <table:table-cell table:formula="of:=[.D251]-[.D25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8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09953703703704" calcext:value-type="float">
            <text:p>0,00109953703703704000</text:p>
          </table:table-cell>
          <table:table-cell table:formula="of:=[.D252]-[.D25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8" office:value-type="float" office:value="9538" calcext:value-type="float">
            <text:p>953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10393518518519" calcext:value-type="float">
            <text:p>0,00110393518518519000</text:p>
          </table:table-cell>
          <table:table-cell table:formula="of:=[.D253]-[.D25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8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10833333333333" calcext:value-type="float">
            <text:p>0,00110833333333333000</text:p>
          </table:table-cell>
          <table:table-cell table:formula="of:=[.D254]-[.D25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8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11273148148148" calcext:value-type="float">
            <text:p>0,00111273148148148000</text:p>
          </table:table-cell>
          <table:table-cell table:formula="of:=[.D255]-[.D25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8" office:value-type="float" office:value="9652" calcext:value-type="float">
            <text:p>965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11712962962963" calcext:value-type="float">
            <text:p>0,00111712962962963000</text:p>
          </table:table-cell>
          <table:table-cell table:formula="of:=[.D256]-[.D25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8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12152777777778" calcext:value-type="float">
            <text:p>0,00112152777777778000</text:p>
          </table:table-cell>
          <table:table-cell table:formula="of:=[.D257]-[.D25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8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12592592592593" calcext:value-type="float">
            <text:p>0,00112592592592593000</text:p>
          </table:table-cell>
          <table:table-cell table:formula="of:=[.D258]-[.D25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8" office:value-type="float" office:value="9766" calcext:value-type="float">
            <text:p>976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13032407407407" calcext:value-type="float">
            <text:p>0,00113032407407407000</text:p>
          </table:table-cell>
          <table:table-cell table:formula="of:=[.D259]-[.D25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8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13472222222222" calcext:value-type="float">
            <text:p>0,00113472222222222000</text:p>
          </table:table-cell>
          <table:table-cell table:formula="of:=[.D260]-[.D25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8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13912037037037" calcext:value-type="float">
            <text:p>0,00113912037037037000</text:p>
          </table:table-cell>
          <table:table-cell table:formula="of:=[.D261]-[.D26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8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14351851851852" calcext:value-type="float">
            <text:p>0,00114351851851852000</text:p>
          </table:table-cell>
          <table:table-cell table:formula="of:=[.D262]-[.D26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8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14791666666667" calcext:value-type="float">
            <text:p>0,00114791666666667000</text:p>
          </table:table-cell>
          <table:table-cell table:formula="of:=[.D263]-[.D26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8" office:value-type="float" office:value="9956" calcext:value-type="float">
            <text:p>995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15231481481481" calcext:value-type="float">
            <text:p>0,00115231481481481000</text:p>
          </table:table-cell>
          <table:table-cell table:formula="of:=[.D264]-[.D26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8" office:value-type="float" office:value="9994" calcext:value-type="float">
            <text:p>999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15671296296296" calcext:value-type="float">
            <text:p>0,00115671296296296000</text:p>
          </table:table-cell>
          <table:table-cell table:formula="of:=[.D265]-[.D26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8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16111111111111" calcext:value-type="float">
            <text:p>0,00116111111111111000</text:p>
          </table:table-cell>
          <table:table-cell table:formula="of:=[.D266]-[.D26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8" office:value-type="float" office:value="10070" calcext:value-type="float">
            <text:p>1007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16550925925926" calcext:value-type="float">
            <text:p>0,00116550925925926000</text:p>
          </table:table-cell>
          <table:table-cell table:formula="of:=[.D267]-[.D26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8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16990740740741" calcext:value-type="float">
            <text:p>0,00116990740740741000</text:p>
          </table:table-cell>
          <table:table-cell table:formula="of:=[.D268]-[.D26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8" office:value-type="float" office:value="10146" calcext:value-type="float">
            <text:p>1014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17430555555556" calcext:value-type="float">
            <text:p>0,00117430555555556000</text:p>
          </table:table-cell>
          <table:table-cell table:formula="of:=[.D269]-[.D26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8" office:value-type="float" office:value="10184" calcext:value-type="float">
            <text:p>1018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1787037037037" calcext:value-type="float">
            <text:p>0,00117870370370370000</text:p>
          </table:table-cell>
          <table:table-cell table:formula="of:=[.D270]-[.D26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8" office:value-type="float" office:value="10222" calcext:value-type="float">
            <text:p>1022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18310185185185" calcext:value-type="float">
            <text:p>0,00118310185185185000</text:p>
          </table:table-cell>
          <table:table-cell table:formula="of:=[.D271]-[.D27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8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1875" calcext:value-type="float">
            <text:p>0,00118750000000000000</text:p>
          </table:table-cell>
          <table:table-cell table:formula="of:=[.D272]-[.D27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8" office:value-type="float" office:value="10298" calcext:value-type="float">
            <text:p>1029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19189814814815" calcext:value-type="float">
            <text:p>0,00119189814814815000</text:p>
          </table:table-cell>
          <table:table-cell table:formula="of:=[.D273]-[.D27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8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1962962962963" calcext:value-type="float">
            <text:p>0,00119629629629630000</text:p>
          </table:table-cell>
          <table:table-cell table:formula="of:=[.D274]-[.D27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8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20069444444444" calcext:value-type="float">
            <text:p>0,00120069444444444000</text:p>
          </table:table-cell>
          <table:table-cell table:formula="of:=[.D275]-[.D27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8" office:value-type="float" office:value="10412" calcext:value-type="float">
            <text:p>1041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20509259259259" calcext:value-type="float">
            <text:p>0,00120509259259259000</text:p>
          </table:table-cell>
          <table:table-cell table:formula="of:=[.D276]-[.D27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8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20949074074074" calcext:value-type="float">
            <text:p>0,00120949074074074000</text:p>
          </table:table-cell>
          <table:table-cell table:formula="of:=[.D277]-[.D27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8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21388888888889" calcext:value-type="float">
            <text:p>0,00121388888888889000</text:p>
          </table:table-cell>
          <table:table-cell table:formula="of:=[.D278]-[.D27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8" office:value-type="float" office:value="10526" calcext:value-type="float">
            <text:p>1052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21828703703704" calcext:value-type="float">
            <text:p>0,00121828703703704000</text:p>
          </table:table-cell>
          <table:table-cell table:formula="of:=[.D279]-[.D27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8" office:value-type="float" office:value="10564" calcext:value-type="float">
            <text:p>1056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22268518518519" calcext:value-type="float">
            <text:p>0,00122268518518519000</text:p>
          </table:table-cell>
          <table:table-cell table:formula="of:=[.D280]-[.D27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8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22708333333333" calcext:value-type="float">
            <text:p>0,00122708333333333000</text:p>
          </table:table-cell>
          <table:table-cell table:formula="of:=[.D281]-[.D28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8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23148148148148" calcext:value-type="float">
            <text:p>0,00123148148148148000</text:p>
          </table:table-cell>
          <table:table-cell table:formula="of:=[.D282]-[.D28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8" office:value-type="float" office:value="10678" calcext:value-type="float">
            <text:p>1067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23587962962963" calcext:value-type="float">
            <text:p>0,00123587962962963000</text:p>
          </table:table-cell>
          <table:table-cell table:formula="of:=[.D283]-[.D28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8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24027777777778" calcext:value-type="float">
            <text:p>0,00124027777777778000</text:p>
          </table:table-cell>
          <table:table-cell table:formula="of:=[.D284]-[.D28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8" office:value-type="float" office:value="10754" calcext:value-type="float">
            <text:p>1075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24467592592593" calcext:value-type="float">
            <text:p>0,00124467592592593000</text:p>
          </table:table-cell>
          <table:table-cell table:formula="of:=[.D285]-[.D28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8" office:value-type="float" office:value="10792" calcext:value-type="float">
            <text:p>1079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24907407407407" calcext:value-type="float">
            <text:p>0,00124907407407407000</text:p>
          </table:table-cell>
          <table:table-cell table:formula="of:=[.D286]-[.D28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8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25347222222222" calcext:value-type="float">
            <text:p>0,00125347222222222000</text:p>
          </table:table-cell>
          <table:table-cell table:formula="of:=[.D287]-[.D28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8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25787037037037" calcext:value-type="float">
            <text:p>0,00125787037037037000</text:p>
          </table:table-cell>
          <table:table-cell table:formula="of:=[.D288]-[.D28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8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26226851851852" calcext:value-type="float">
            <text:p>0,00126226851851852000</text:p>
          </table:table-cell>
          <table:table-cell table:formula="of:=[.D289]-[.D28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8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26666666666667" calcext:value-type="float">
            <text:p>0,00126666666666667000</text:p>
          </table:table-cell>
          <table:table-cell table:formula="of:=[.D290]-[.D28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8" office:value-type="float" office:value="10982" calcext:value-type="float">
            <text:p>1098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27106481481481" calcext:value-type="float">
            <text:p>0,00127106481481481000</text:p>
          </table:table-cell>
          <table:table-cell table:formula="of:=[.D291]-[.D29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8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27546296296296" calcext:value-type="float">
            <text:p>0,00127546296296296000</text:p>
          </table:table-cell>
          <table:table-cell table:formula="of:=[.D292]-[.D29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8" office:value-type="float" office:value="11058" calcext:value-type="float">
            <text:p>1105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27986111111111" calcext:value-type="float">
            <text:p>0,00127986111111111000</text:p>
          </table:table-cell>
          <table:table-cell table:formula="of:=[.D293]-[.D29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8" office:value-type="float" office:value="11096" calcext:value-type="float">
            <text:p>1109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28425925925926" calcext:value-type="float">
            <text:p>0,00128425925925926000</text:p>
          </table:table-cell>
          <table:table-cell table:formula="of:=[.D294]-[.D29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8" office:value-type="float" office:value="11134" calcext:value-type="float">
            <text:p>1113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28865740740741" calcext:value-type="float">
            <text:p>0,00128865740740741000</text:p>
          </table:table-cell>
          <table:table-cell table:formula="of:=[.D295]-[.D29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8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29305555555556" calcext:value-type="float">
            <text:p>0,00129305555555556000</text:p>
          </table:table-cell>
          <table:table-cell table:formula="of:=[.D296]-[.D29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8" office:value-type="float" office:value="11210" calcext:value-type="float">
            <text:p>1121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2974537037037" calcext:value-type="float">
            <text:p>0,00129745370370370000</text:p>
          </table:table-cell>
          <table:table-cell table:formula="of:=[.D297]-[.D29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8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30185185185185" calcext:value-type="float">
            <text:p>0,00130185185185185000</text:p>
          </table:table-cell>
          <table:table-cell table:formula="of:=[.D298]-[.D29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8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30625" calcext:value-type="float">
            <text:p>0,00130625000000000000</text:p>
          </table:table-cell>
          <table:table-cell table:formula="of:=[.D299]-[.D29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8" office:value-type="float" office:value="11324" calcext:value-type="float">
            <text:p>1132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31064814814815" calcext:value-type="float">
            <text:p>0,00131064814814815000</text:p>
          </table:table-cell>
          <table:table-cell table:formula="of:=[.D300]-[.D29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8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3150462962963" calcext:value-type="float">
            <text:p>0,00131504629629630000</text:p>
          </table:table-cell>
          <table:table-cell table:formula="of:=[.D301]-[.D30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8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31944444444444" calcext:value-type="float">
            <text:p>0,00131944444444444000</text:p>
          </table:table-cell>
          <table:table-cell table:formula="of:=[.D302]-[.D30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8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32384259259259" calcext:value-type="float">
            <text:p>0,00132384259259259000</text:p>
          </table:table-cell>
          <table:table-cell table:formula="of:=[.D303]-[.D30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8" office:value-type="float" office:value="11476" calcext:value-type="float">
            <text:p>1147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32824074074074" calcext:value-type="float">
            <text:p>0,00132824074074074000</text:p>
          </table:table-cell>
          <table:table-cell table:formula="of:=[.D304]-[.D30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8" office:value-type="float" office:value="11514" calcext:value-type="float">
            <text:p>1151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33263888888889" calcext:value-type="float">
            <text:p>0,00133263888888889000</text:p>
          </table:table-cell>
          <table:table-cell table:formula="of:=[.D305]-[.D30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8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33703703703704" calcext:value-type="float">
            <text:p>0,00133703703703704000</text:p>
          </table:table-cell>
          <table:table-cell table:formula="of:=[.D306]-[.D30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8" office:value-type="float" office:value="11590" calcext:value-type="float">
            <text:p>1159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34143518518519" calcext:value-type="float">
            <text:p>0,00134143518518519000</text:p>
          </table:table-cell>
          <table:table-cell table:formula="of:=[.D307]-[.D30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8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34583333333333" calcext:value-type="float">
            <text:p>0,00134583333333333000</text:p>
          </table:table-cell>
          <table:table-cell table:formula="of:=[.D308]-[.D30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8" office:value-type="float" office:value="11666" calcext:value-type="float">
            <text:p>1166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35023148148148" calcext:value-type="float">
            <text:p>0,00135023148148148000</text:p>
          </table:table-cell>
          <table:table-cell table:formula="of:=[.D309]-[.D30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8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35462962962963" calcext:value-type="float">
            <text:p>0,00135462962962963000</text:p>
          </table:table-cell>
          <table:table-cell table:formula="of:=[.D310]-[.D30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8" office:value-type="float" office:value="11742" calcext:value-type="float">
            <text:p>1174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35902777777778" calcext:value-type="float">
            <text:p>0,00135902777777778000</text:p>
          </table:table-cell>
          <table:table-cell table:formula="of:=[.D311]-[.D31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8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36342592592593" calcext:value-type="float">
            <text:p>0,00136342592592593000</text:p>
          </table:table-cell>
          <table:table-cell table:formula="of:=[.D312]-[.D31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8" office:value-type="float" office:value="11818" calcext:value-type="float">
            <text:p>1181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36782407407407" calcext:value-type="float">
            <text:p>0,00136782407407407000</text:p>
          </table:table-cell>
          <table:table-cell table:formula="of:=[.D313]-[.D31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8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37222222222222" calcext:value-type="float">
            <text:p>0,00137222222222222000</text:p>
          </table:table-cell>
          <table:table-cell table:formula="of:=[.D314]-[.D31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8" office:value-type="float" office:value="11894" calcext:value-type="float">
            <text:p>1189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37662037037037" calcext:value-type="float">
            <text:p>0,00137662037037037000</text:p>
          </table:table-cell>
          <table:table-cell table:formula="of:=[.D315]-[.D31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8" office:value-type="float" office:value="11932" calcext:value-type="float">
            <text:p>1193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38101851851852" calcext:value-type="float">
            <text:p>0,00138101851851852000</text:p>
          </table:table-cell>
          <table:table-cell table:formula="of:=[.D316]-[.D31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8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38541666666667" calcext:value-type="float">
            <text:p>0,00138541666666667000</text:p>
          </table:table-cell>
          <table:table-cell table:formula="of:=[.D317]-[.D31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8" office:value-type="float" office:value="12008" calcext:value-type="float">
            <text:p>1200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38981481481481" calcext:value-type="float">
            <text:p>0,00138981481481481000</text:p>
          </table:table-cell>
          <table:table-cell table:formula="of:=[.D318]-[.D31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8" office:value-type="float" office:value="12046" calcext:value-type="float">
            <text:p>1204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39421296296296" calcext:value-type="float">
            <text:p>0,00139421296296296000</text:p>
          </table:table-cell>
          <table:table-cell table:formula="of:=[.D319]-[.D31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8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39861111111111" calcext:value-type="float">
            <text:p>0,00139861111111111000</text:p>
          </table:table-cell>
          <table:table-cell table:formula="of:=[.D320]-[.D31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8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40300925925926" calcext:value-type="float">
            <text:p>0,00140300925925926000</text:p>
          </table:table-cell>
          <table:table-cell table:formula="of:=[.D321]-[.D32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8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40740740740741" calcext:value-type="float">
            <text:p>0,00140740740740741000</text:p>
          </table:table-cell>
          <table:table-cell table:formula="of:=[.D322]-[.D32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8" office:value-type="float" office:value="12198" calcext:value-type="float">
            <text:p>1219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41180555555556" calcext:value-type="float">
            <text:p>0,00141180555555556000</text:p>
          </table:table-cell>
          <table:table-cell table:formula="of:=[.D323]-[.D32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8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4162037037037" calcext:value-type="float">
            <text:p>0,00141620370370370000</text:p>
          </table:table-cell>
          <table:table-cell table:formula="of:=[.D324]-[.D32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8" office:value-type="float" office:value="12274" calcext:value-type="float">
            <text:p>1227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42060185185185" calcext:value-type="float">
            <text:p>0,00142060185185185000</text:p>
          </table:table-cell>
          <table:table-cell table:formula="of:=[.D325]-[.D32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8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425" calcext:value-type="float">
            <text:p>0,00142500000000000000</text:p>
          </table:table-cell>
          <table:table-cell table:formula="of:=[.D326]-[.D32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8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42939814814815" calcext:value-type="float">
            <text:p>0,00142939814814815000</text:p>
          </table:table-cell>
          <table:table-cell table:formula="of:=[.D327]-[.D32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8" office:value-type="float" office:value="12388" calcext:value-type="float">
            <text:p>1238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4337962962963" calcext:value-type="float">
            <text:p>0,00143379629629630000</text:p>
          </table:table-cell>
          <table:table-cell table:formula="of:=[.D328]-[.D32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8" office:value-type="float" office:value="12426" calcext:value-type="float">
            <text:p>1242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43819444444444" calcext:value-type="float">
            <text:p>0,00143819444444444000</text:p>
          </table:table-cell>
          <table:table-cell table:formula="of:=[.D329]-[.D32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8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44259259259259" calcext:value-type="float">
            <text:p>0,00144259259259259000</text:p>
          </table:table-cell>
          <table:table-cell table:formula="of:=[.D330]-[.D32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8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44699074074074" calcext:value-type="float">
            <text:p>0,00144699074074074000</text:p>
          </table:table-cell>
          <table:table-cell table:formula="of:=[.D331]-[.D33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8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45138888888889" calcext:value-type="float">
            <text:p>0,00145138888888889000</text:p>
          </table:table-cell>
          <table:table-cell table:formula="of:=[.D332]-[.D33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8" office:value-type="float" office:value="12578" calcext:value-type="float">
            <text:p>1257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45578703703704" calcext:value-type="float">
            <text:p>0,00145578703703704000</text:p>
          </table:table-cell>
          <table:table-cell table:formula="of:=[.D333]-[.D33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8" office:value-type="float" office:value="12616" calcext:value-type="float">
            <text:p>1261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46018518518519" calcext:value-type="float">
            <text:p>0,00146018518518519000</text:p>
          </table:table-cell>
          <table:table-cell table:formula="of:=[.D334]-[.D33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8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46458333333333" calcext:value-type="float">
            <text:p>0,00146458333333333000</text:p>
          </table:table-cell>
          <table:table-cell table:formula="of:=[.D335]-[.D33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8" office:value-type="float" office:value="12692" calcext:value-type="float">
            <text:p>1269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46898148148148" calcext:value-type="float">
            <text:p>0,00146898148148148000</text:p>
          </table:table-cell>
          <table:table-cell table:formula="of:=[.D336]-[.D33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8" office:value-type="float" office:value="12730" calcext:value-type="float">
            <text:p>1273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47337962962963" calcext:value-type="float">
            <text:p>0,00147337962962963000</text:p>
          </table:table-cell>
          <table:table-cell table:formula="of:=[.D337]-[.D33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8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47777777777778" calcext:value-type="float">
            <text:p>0,00147777777777778000</text:p>
          </table:table-cell>
          <table:table-cell table:formula="of:=[.D338]-[.D33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8" office:value-type="float" office:value="12806" calcext:value-type="float">
            <text:p>1280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48217592592593" calcext:value-type="float">
            <text:p>0,00148217592592593000</text:p>
          </table:table-cell>
          <table:table-cell table:formula="of:=[.D339]-[.D33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8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48657407407407" calcext:value-type="float">
            <text:p>0,00148657407407407000</text:p>
          </table:table-cell>
          <table:table-cell table:formula="of:=[.D340]-[.D33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8" office:value-type="float" office:value="12882" calcext:value-type="float">
            <text:p>1288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49097222222222" calcext:value-type="float">
            <text:p>0,00149097222222222000</text:p>
          </table:table-cell>
          <table:table-cell table:formula="of:=[.D341]-[.D34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8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49537037037037" calcext:value-type="float">
            <text:p>0,00149537037037037000</text:p>
          </table:table-cell>
          <table:table-cell table:formula="of:=[.D342]-[.D34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8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49976851851852" calcext:value-type="float">
            <text:p>0,00149976851851852000</text:p>
          </table:table-cell>
          <table:table-cell table:formula="of:=[.D343]-[.D34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8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50416666666667" calcext:value-type="float">
            <text:p>0,00150416666666667000</text:p>
          </table:table-cell>
          <table:table-cell table:formula="of:=[.D344]-[.D34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8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50856481481481" calcext:value-type="float">
            <text:p>0,00150856481481481000</text:p>
          </table:table-cell>
          <table:table-cell table:formula="of:=[.D345]-[.D34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8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51296296296296" calcext:value-type="float">
            <text:p>0,00151296296296296000</text:p>
          </table:table-cell>
          <table:table-cell table:formula="of:=[.D346]-[.D34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8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51736111111111" calcext:value-type="float">
            <text:p>0,00151736111111111000</text:p>
          </table:table-cell>
          <table:table-cell table:formula="of:=[.D347]-[.D34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8" office:value-type="float" office:value="13148" calcext:value-type="float">
            <text:p>1314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52175925925926" calcext:value-type="float">
            <text:p>0,00152175925925926000</text:p>
          </table:table-cell>
          <table:table-cell table:formula="of:=[.D348]-[.D34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8" office:value-type="float" office:value="13186" calcext:value-type="float">
            <text:p>1318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52615740740741" calcext:value-type="float">
            <text:p>0,00152615740740741000</text:p>
          </table:table-cell>
          <table:table-cell table:formula="of:=[.D349]-[.D34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8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53055555555556" calcext:value-type="float">
            <text:p>0,00153055555555556000</text:p>
          </table:table-cell>
          <table:table-cell table:formula="of:=[.D350]-[.D34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8" office:value-type="float" office:value="13262" calcext:value-type="float">
            <text:p>1326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5349537037037" calcext:value-type="float">
            <text:p>0,00153495370370370000</text:p>
          </table:table-cell>
          <table:table-cell table:formula="of:=[.D351]-[.D35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8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53935185185185" calcext:value-type="float">
            <text:p>0,00153935185185185000</text:p>
          </table:table-cell>
          <table:table-cell table:formula="of:=[.D352]-[.D35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8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54375" calcext:value-type="float">
            <text:p>0,00154375000000000000</text:p>
          </table:table-cell>
          <table:table-cell table:formula="of:=[.D353]-[.D35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8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54814814814815" calcext:value-type="float">
            <text:p>0,00154814814814815000</text:p>
          </table:table-cell>
          <table:table-cell table:formula="of:=[.D354]-[.D35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8" office:value-type="float" office:value="13414" calcext:value-type="float">
            <text:p>1341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5525462962963" calcext:value-type="float">
            <text:p>0,00155254629629630000</text:p>
          </table:table-cell>
          <table:table-cell table:formula="of:=[.D355]-[.D35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8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55694444444444" calcext:value-type="float">
            <text:p>0,00155694444444444000</text:p>
          </table:table-cell>
          <table:table-cell table:formula="of:=[.D356]-[.D35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8" office:value-type="float" office:value="13490" calcext:value-type="float">
            <text:p>1349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56134259259259" calcext:value-type="float">
            <text:p>0,00156134259259259000</text:p>
          </table:table-cell>
          <table:table-cell table:formula="of:=[.D357]-[.D35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8" office:value-type="float" office:value="13528" calcext:value-type="float">
            <text:p>1352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56574074074074" calcext:value-type="float">
            <text:p>0,00156574074074074000</text:p>
          </table:table-cell>
          <table:table-cell table:formula="of:=[.D358]-[.D35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8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57013888888889" calcext:value-type="float">
            <text:p>0,00157013888888889000</text:p>
          </table:table-cell>
          <table:table-cell table:formula="of:=[.D359]-[.D35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8" office:value-type="float" office:value="13604" calcext:value-type="float">
            <text:p>1360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57453703703704" calcext:value-type="float">
            <text:p>0,00157453703703704000</text:p>
          </table:table-cell>
          <table:table-cell table:formula="of:=[.D360]-[.D35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8" office:value-type="float" office:value="13642" calcext:value-type="float">
            <text:p>1364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57893518518519" calcext:value-type="float">
            <text:p>0,00157893518518519000</text:p>
          </table:table-cell>
          <table:table-cell table:formula="of:=[.D361]-[.D36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8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58333333333333" calcext:value-type="float">
            <text:p>0,00158333333333333000</text:p>
          </table:table-cell>
          <table:table-cell table:formula="of:=[.D362]-[.D36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8" office:value-type="float" office:value="13718" calcext:value-type="float">
            <text:p>1371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58773148148148" calcext:value-type="float">
            <text:p>0,00158773148148148000</text:p>
          </table:table-cell>
          <table:table-cell table:formula="of:=[.D363]-[.D36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8" office:value-type="float" office:value="13756" calcext:value-type="float">
            <text:p>1375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59212962962963" calcext:value-type="float">
            <text:p>0,00159212962962963000</text:p>
          </table:table-cell>
          <table:table-cell table:formula="of:=[.D364]-[.D36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8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59652777777778" calcext:value-type="float">
            <text:p>0,00159652777777778000</text:p>
          </table:table-cell>
          <table:table-cell table:formula="of:=[.D365]-[.D36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8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60092592592593" calcext:value-type="float">
            <text:p>0,00160092592592593000</text:p>
          </table:table-cell>
          <table:table-cell table:formula="of:=[.D366]-[.D36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8" office:value-type="float" office:value="13870" calcext:value-type="float">
            <text:p>1387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60532407407407" calcext:value-type="float">
            <text:p>0,00160532407407407000</text:p>
          </table:table-cell>
          <table:table-cell table:formula="of:=[.D367]-[.D36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8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60972222222222" calcext:value-type="float">
            <text:p>0,00160972222222222000</text:p>
          </table:table-cell>
          <table:table-cell table:formula="of:=[.D368]-[.D36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8" office:value-type="float" office:value="13946" calcext:value-type="float">
            <text:p>1394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61412037037037" calcext:value-type="float">
            <text:p>0,00161412037037037000</text:p>
          </table:table-cell>
          <table:table-cell table:formula="of:=[.D369]-[.D36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8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61851851851852" calcext:value-type="float">
            <text:p>0,00161851851851852000</text:p>
          </table:table-cell>
          <table:table-cell table:formula="of:=[.D370]-[.D36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8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62291666666667" calcext:value-type="float">
            <text:p>0,00162291666666667000</text:p>
          </table:table-cell>
          <table:table-cell table:formula="of:=[.D371]-[.D37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8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62731481481481" calcext:value-type="float">
            <text:p>0,00162731481481481000</text:p>
          </table:table-cell>
          <table:table-cell table:formula="of:=[.D372]-[.D37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8" office:value-type="float" office:value="14098" calcext:value-type="float">
            <text:p>1409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63171296296296" calcext:value-type="float">
            <text:p>0,00163171296296296000</text:p>
          </table:table-cell>
          <table:table-cell table:formula="of:=[.D373]-[.D37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8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63611111111111" calcext:value-type="float">
            <text:p>0,00163611111111111000</text:p>
          </table:table-cell>
          <table:table-cell table:formula="of:=[.D374]-[.D37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8" office:value-type="float" office:value="14174" calcext:value-type="float">
            <text:p>1417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64050925925926" calcext:value-type="float">
            <text:p>0,00164050925925926000</text:p>
          </table:table-cell>
          <table:table-cell table:formula="of:=[.D375]-[.D37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8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64490740740741" calcext:value-type="float">
            <text:p>0,00164490740740741000</text:p>
          </table:table-cell>
          <table:table-cell table:formula="of:=[.D376]-[.D37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8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64930555555556" calcext:value-type="float">
            <text:p>0,00164930555555556000</text:p>
          </table:table-cell>
          <table:table-cell table:formula="of:=[.D377]-[.D37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8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6537037037037" calcext:value-type="float">
            <text:p>0,00165370370370370000</text:p>
          </table:table-cell>
          <table:table-cell table:formula="of:=[.D378]-[.D37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8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65810185185185" calcext:value-type="float">
            <text:p>0,00165810185185185000</text:p>
          </table:table-cell>
          <table:table-cell table:formula="of:=[.D379]-[.D37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8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6625" calcext:value-type="float">
            <text:p>0,00166250000000000000</text:p>
          </table:table-cell>
          <table:table-cell table:formula="of:=[.D380]-[.D37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8" office:value-type="float" office:value="14402" calcext:value-type="float">
            <text:p>1440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66689814814815" calcext:value-type="float">
            <text:p>0,00166689814814815000</text:p>
          </table:table-cell>
          <table:table-cell table:formula="of:=[.D381]-[.D38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8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6712962962963" calcext:value-type="float">
            <text:p>0,00167129629629630000</text:p>
          </table:table-cell>
          <table:table-cell table:formula="of:=[.D382]-[.D38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8" office:value-type="float" office:value="14478" calcext:value-type="float">
            <text:p>1447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67569444444444" calcext:value-type="float">
            <text:p>0,00167569444444444000</text:p>
          </table:table-cell>
          <table:table-cell table:formula="of:=[.D383]-[.D38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8" office:value-type="float" office:value="14516" calcext:value-type="float">
            <text:p>1451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68009259259259" calcext:value-type="float">
            <text:p>0,00168009259259259000</text:p>
          </table:table-cell>
          <table:table-cell table:formula="of:=[.D384]-[.D38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8" office:value-type="float" office:value="14554" calcext:value-type="float">
            <text:p>1455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68449074074074" calcext:value-type="float">
            <text:p>0,00168449074074074000</text:p>
          </table:table-cell>
          <table:table-cell table:formula="of:=[.D385]-[.D38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8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68888888888889" calcext:value-type="float">
            <text:p>0,00168888888888889000</text:p>
          </table:table-cell>
          <table:table-cell table:formula="of:=[.D386]-[.D38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8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69328703703704" calcext:value-type="float">
            <text:p>0,00169328703703704000</text:p>
          </table:table-cell>
          <table:table-cell table:formula="of:=[.D387]-[.D38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8" office:value-type="float" office:value="14668" calcext:value-type="float">
            <text:p>1466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69768518518519" calcext:value-type="float">
            <text:p>0,00169768518518518000</text:p>
          </table:table-cell>
          <table:table-cell table:formula="of:=[.D388]-[.D38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8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70208333333333" calcext:value-type="float">
            <text:p>0,00170208333333333000</text:p>
          </table:table-cell>
          <table:table-cell table:formula="of:=[.D389]-[.D38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8" office:value-type="float" office:value="14744" calcext:value-type="float">
            <text:p>1474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70648148148148" calcext:value-type="float">
            <text:p>0,00170648148148148000</text:p>
          </table:table-cell>
          <table:table-cell table:formula="of:=[.D390]-[.D38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8" office:value-type="float" office:value="14782" calcext:value-type="float">
            <text:p>1478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71087962962963" calcext:value-type="float">
            <text:p>0,00171087962962963000</text:p>
          </table:table-cell>
          <table:table-cell table:formula="of:=[.D391]-[.D39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8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71527777777778" calcext:value-type="float">
            <text:p>0,00171527777777778000</text:p>
          </table:table-cell>
          <table:table-cell table:formula="of:=[.D392]-[.D39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8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71967592592593" calcext:value-type="float">
            <text:p>0,00171967592592593000</text:p>
          </table:table-cell>
          <table:table-cell table:formula="of:=[.D393]-[.D39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8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72407407407407" calcext:value-type="float">
            <text:p>0,00172407407407407000</text:p>
          </table:table-cell>
          <table:table-cell table:formula="of:=[.D394]-[.D39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8" office:value-type="float" office:value="14934" calcext:value-type="float">
            <text:p>1493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72847222222222" calcext:value-type="float">
            <text:p>0,00172847222222222000</text:p>
          </table:table-cell>
          <table:table-cell table:formula="of:=[.D395]-[.D39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8" office:value-type="float" office:value="14972" calcext:value-type="float">
            <text:p>1497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73287037037037" calcext:value-type="float">
            <text:p>0,00173287037037037000</text:p>
          </table:table-cell>
          <table:table-cell table:formula="of:=[.D396]-[.D39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8" office:value-type="float" office:value="15010" calcext:value-type="float">
            <text:p>1501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73726851851852" calcext:value-type="float">
            <text:p>0,00173726851851852000</text:p>
          </table:table-cell>
          <table:table-cell table:formula="of:=[.D397]-[.D39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8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74166666666667" calcext:value-type="float">
            <text:p>0,00174166666666667000</text:p>
          </table:table-cell>
          <table:table-cell table:formula="of:=[.D398]-[.D39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8" office:value-type="float" office:value="15086" calcext:value-type="float">
            <text:p>1508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74606481481481" calcext:value-type="float">
            <text:p>0,00174606481481481000</text:p>
          </table:table-cell>
          <table:table-cell table:formula="of:=[.D399]-[.D39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8" office:value-type="float" office:value="15124" calcext:value-type="float">
            <text:p>1512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75046296296296" calcext:value-type="float">
            <text:p>0,00175046296296296000</text:p>
          </table:table-cell>
          <table:table-cell table:formula="of:=[.D400]-[.D39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8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75486111111111" calcext:value-type="float">
            <text:p>0,00175486111111111000</text:p>
          </table:table-cell>
          <table:table-cell table:formula="of:=[.D401]-[.D40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8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75925925925926" calcext:value-type="float">
            <text:p>0,00175925925925926000</text:p>
          </table:table-cell>
          <table:table-cell table:formula="of:=[.D402]-[.D40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8" office:value-type="float" office:value="15238" calcext:value-type="float">
            <text:p>1523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76365740740741" calcext:value-type="float">
            <text:p>0,00176365740740741000</text:p>
          </table:table-cell>
          <table:table-cell table:formula="of:=[.D403]-[.D40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8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76805555555556" calcext:value-type="float">
            <text:p>0,00176805555555556000</text:p>
          </table:table-cell>
          <table:table-cell table:formula="of:=[.D404]-[.D40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8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7724537037037" calcext:value-type="float">
            <text:p>0,00177245370370370000</text:p>
          </table:table-cell>
          <table:table-cell table:formula="of:=[.D405]-[.D40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8" office:value-type="float" office:value="15352" calcext:value-type="float">
            <text:p>1535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77685185185185" calcext:value-type="float">
            <text:p>0,00177685185185185000</text:p>
          </table:table-cell>
          <table:table-cell table:formula="of:=[.D406]-[.D40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8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78125" calcext:value-type="float">
            <text:p>0,00178125000000000000</text:p>
          </table:table-cell>
          <table:table-cell table:formula="of:=[.D407]-[.D40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8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78564814814815" calcext:value-type="float">
            <text:p>0,00178564814814815000</text:p>
          </table:table-cell>
          <table:table-cell table:formula="of:=[.D408]-[.D40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8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7900462962963" calcext:value-type="float">
            <text:p>0,00179004629629630000</text:p>
          </table:table-cell>
          <table:table-cell table:formula="of:=[.D409]-[.D40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8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79444444444444" calcext:value-type="float">
            <text:p>0,00179444444444444000</text:p>
          </table:table-cell>
          <table:table-cell table:formula="of:=[.D410]-[.D40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8" office:value-type="float" office:value="15542" calcext:value-type="float">
            <text:p>1554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79884259259259" calcext:value-type="float">
            <text:p>0,00179884259259259000</text:p>
          </table:table-cell>
          <table:table-cell table:formula="of:=[.D411]-[.D41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8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80324074074074" calcext:value-type="float">
            <text:p>0,00180324074074074000</text:p>
          </table:table-cell>
          <table:table-cell table:formula="of:=[.D412]-[.D41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8" office:value-type="float" office:value="15618" calcext:value-type="float">
            <text:p>1561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80763888888889" calcext:value-type="float">
            <text:p>0,00180763888888889000</text:p>
          </table:table-cell>
          <table:table-cell table:formula="of:=[.D413]-[.D41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8" office:value-type="float" office:value="15656" calcext:value-type="float">
            <text:p>1565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81203703703704" calcext:value-type="float">
            <text:p>0,00181203703703704000</text:p>
          </table:table-cell>
          <table:table-cell table:formula="of:=[.D414]-[.D41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8" office:value-type="float" office:value="15694" calcext:value-type="float">
            <text:p>1569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81643518518519" calcext:value-type="float">
            <text:p>0,00181643518518519000</text:p>
          </table:table-cell>
          <table:table-cell table:formula="of:=[.D415]-[.D41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8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82083333333333" calcext:value-type="float">
            <text:p>0,00182083333333333000</text:p>
          </table:table-cell>
          <table:table-cell table:formula="of:=[.D416]-[.D41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8" office:value-type="float" office:value="15770" calcext:value-type="float">
            <text:p>1577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82523148148148" calcext:value-type="float">
            <text:p>0,00182523148148148000</text:p>
          </table:table-cell>
          <table:table-cell table:formula="of:=[.D417]-[.D41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8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82962962962963" calcext:value-type="float">
            <text:p>0,00182962962962963000</text:p>
          </table:table-cell>
          <table:table-cell table:formula="of:=[.D418]-[.D41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8" office:value-type="float" office:value="15846" calcext:value-type="float">
            <text:p>15846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83402777777778" calcext:value-type="float">
            <text:p>0,00183402777777778000</text:p>
          </table:table-cell>
          <table:table-cell table:formula="of:=[.D419]-[.D41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8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83842592592593" calcext:value-type="float">
            <text:p>0,00183842592592593000</text:p>
          </table:table-cell>
          <table:table-cell table:formula="of:=[.D420]-[.D41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8" office:value-type="float" office:value="15922" calcext:value-type="float">
            <text:p>15922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84282407407407" calcext:value-type="float">
            <text:p>0,00184282407407407000</text:p>
          </table:table-cell>
          <table:table-cell table:formula="of:=[.D421]-[.D42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8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84722222222222" calcext:value-type="float">
            <text:p>0,00184722222222222000</text:p>
          </table:table-cell>
          <table:table-cell table:formula="of:=[.D422]-[.D42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8" office:value-type="float" office:value="15998" calcext:value-type="float">
            <text:p>15998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85162037037037" calcext:value-type="float">
            <text:p>0,00185162037037037000</text:p>
          </table:table-cell>
          <table:table-cell table:formula="of:=[.D423]-[.D42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8" office:value-type="float" office:value="16036" calcext:value-type="float">
            <text:p>1603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85601851851852" calcext:value-type="float">
            <text:p>0,00185601851851852000</text:p>
          </table:table-cell>
          <table:table-cell table:formula="of:=[.D424]-[.D42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8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86041666666667" calcext:value-type="float">
            <text:p>0,00186041666666667000</text:p>
          </table:table-cell>
          <table:table-cell table:formula="of:=[.D425]-[.D42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8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86481481481481" calcext:value-type="float">
            <text:p>0,00186481481481481000</text:p>
          </table:table-cell>
          <table:table-cell table:formula="of:=[.D426]-[.D42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8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86921296296296" calcext:value-type="float">
            <text:p>0,00186921296296296000</text:p>
          </table:table-cell>
          <table:table-cell table:formula="of:=[.D427]-[.D426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8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87361111111111" calcext:value-type="float">
            <text:p>0,00187361111111111000</text:p>
          </table:table-cell>
          <table:table-cell table:formula="of:=[.D428]-[.D42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8" office:value-type="float" office:value="16226" calcext:value-type="float">
            <text:p>16226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87800925925926" calcext:value-type="float">
            <text:p>0,00187800925925926000</text:p>
          </table:table-cell>
          <table:table-cell table:formula="of:=[.D429]-[.D42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8" office:value-type="float" office:value="16264" calcext:value-type="float">
            <text:p>1626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88240740740741" calcext:value-type="float">
            <text:p>0,00188240740740741000</text:p>
          </table:table-cell>
          <table:table-cell table:formula="of:=[.D430]-[.D42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8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88680555555556" calcext:value-type="float">
            <text:p>0,00188680555555556000</text:p>
          </table:table-cell>
          <table:table-cell table:formula="of:=[.D431]-[.D43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8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8912037037037" calcext:value-type="float">
            <text:p>0,00189120370370370000</text:p>
          </table:table-cell>
          <table:table-cell table:formula="of:=[.D432]-[.D43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8" office:value-type="float" office:value="16378" calcext:value-type="float">
            <text:p>16378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89560185185185" calcext:value-type="float">
            <text:p>0,00189560185185185000</text:p>
          </table:table-cell>
          <table:table-cell table:formula="of:=[.D433]-[.D43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8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9" calcext:value-type="float">
            <text:p>0,00190000000000000000</text:p>
          </table:table-cell>
          <table:table-cell table:formula="of:=[.D434]-[.D43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8" office:value-type="float" office:value="16454" calcext:value-type="float">
            <text:p>16454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90439814814815" calcext:value-type="float">
            <text:p>0,00190439814814815000</text:p>
          </table:table-cell>
          <table:table-cell table:formula="of:=[.D435]-[.D43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8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9087962962963" calcext:value-type="float">
            <text:p>0,00190879629629630000</text:p>
          </table:table-cell>
          <table:table-cell table:formula="of:=[.D436]-[.D435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8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91319444444444" calcext:value-type="float">
            <text:p>0,00191319444444444000</text:p>
          </table:table-cell>
          <table:table-cell table:formula="of:=[.D437]-[.D43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8" office:value-type="float" office:value="16568" calcext:value-type="float">
            <text:p>1656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91759259259259" calcext:value-type="float">
            <text:p>0,00191759259259259000</text:p>
          </table:table-cell>
          <table:table-cell table:formula="of:=[.D438]-[.D437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8" office:value-type="float" office:value="16606" calcext:value-type="float">
            <text:p>16606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92199074074074" calcext:value-type="float">
            <text:p>0,00192199074074074000</text:p>
          </table:table-cell>
          <table:table-cell table:formula="of:=[.D439]-[.D438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8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92638888888889" calcext:value-type="float">
            <text:p>0,00192638888888889000</text:p>
          </table:table-cell>
          <table:table-cell table:formula="of:=[.D440]-[.D439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8" office:value-type="float" office:value="16682" calcext:value-type="float">
            <text:p>16682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93078703703704" calcext:value-type="float">
            <text:p>0,00193078703703704000</text:p>
          </table:table-cell>
          <table:table-cell table:formula="of:=[.D441]-[.D440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8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93518518518519" calcext:value-type="float">
            <text:p>0,00193518518518519000</text:p>
          </table:table-cell>
          <table:table-cell table:formula="of:=[.D442]-[.D441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8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93958333333333" calcext:value-type="float">
            <text:p>0,00193958333333333000</text:p>
          </table:table-cell>
          <table:table-cell table:formula="of:=[.D443]-[.D442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8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94398148148148" calcext:value-type="float">
            <text:p>0,00194398148148148000</text:p>
          </table:table-cell>
          <table:table-cell table:formula="of:=[.D444]-[.D443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8" office:value-type="float" office:value="16834" calcext:value-type="float">
            <text:p>16834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94837962962963" calcext:value-type="float">
            <text:p>0,00194837962962963000</text:p>
          </table:table-cell>
          <table:table-cell table:formula="of:=[.D445]-[.D444]" office:value-type="float" office:value="0.00000439814814814812" calcext:value-type="float">
            <text:p>0,000004398148148148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8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95277777777778" calcext:value-type="float">
            <text:p>0,00195277777777778000</text:p>
          </table:table-cell>
          <table:table-cell table:formula="of:=[.D446]-[.D44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8" office:value-type="float" office:value="16910" calcext:value-type="float">
            <text:p>1691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95717592592593" calcext:value-type="float">
            <text:p>0,00195717592592593000</text:p>
          </table:table-cell>
          <table:table-cell table:formula="of:=[.D447]-[.D44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8" office:value-type="float" office:value="16948" calcext:value-type="float">
            <text:p>1694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96157407407407" calcext:value-type="float">
            <text:p>0,00196157407407407000</text:p>
          </table:table-cell>
          <table:table-cell table:formula="of:=[.D448]-[.D44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8" office:value-type="float" office:value="16986" calcext:value-type="float">
            <text:p>16986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96597222222222" calcext:value-type="float">
            <text:p>0,00196597222222222000</text:p>
          </table:table-cell>
          <table:table-cell table:formula="of:=[.D449]-[.D44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8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97037037037037" calcext:value-type="float">
            <text:p>0,00197037037037037000</text:p>
          </table:table-cell>
          <table:table-cell table:formula="of:=[.D450]-[.D44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8" office:value-type="float" office:value="17062" calcext:value-type="float">
            <text:p>17062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97476851851852" calcext:value-type="float">
            <text:p>0,00197476851851852000</text:p>
          </table:table-cell>
          <table:table-cell table:formula="of:=[.D451]-[.D45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8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97916666666667" calcext:value-type="float">
            <text:p>0,00197916666666667000</text:p>
          </table:table-cell>
          <table:table-cell table:formula="of:=[.D452]-[.D45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8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98356481481481" calcext:value-type="float">
            <text:p>0,00198356481481481000</text:p>
          </table:table-cell>
          <table:table-cell table:formula="of:=[.D453]-[.D45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8" office:value-type="float" office:value="17176" calcext:value-type="float">
            <text:p>1717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98796296296296" calcext:value-type="float">
            <text:p>0,00198796296296296000</text:p>
          </table:table-cell>
          <table:table-cell table:formula="of:=[.D454]-[.D45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8" office:value-type="float" office:value="17214" calcext:value-type="float">
            <text:p>17214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99236111111111" calcext:value-type="float">
            <text:p>0,00199236111111111000</text:p>
          </table:table-cell>
          <table:table-cell table:formula="of:=[.D455]-[.D45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8" office:value-type="float" office:value="17252" calcext:value-type="float">
            <text:p>1725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99675925925926" calcext:value-type="float">
            <text:p>0,00199675925925926000</text:p>
          </table:table-cell>
          <table:table-cell table:formula="of:=[.D456]-[.D45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8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00115740740741" calcext:value-type="float">
            <text:p>0,00200115740740741000</text:p>
          </table:table-cell>
          <table:table-cell table:formula="of:=[.D457]-[.D45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8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00555555555556" calcext:value-type="float">
            <text:p>0,00200555555555556000</text:p>
          </table:table-cell>
          <table:table-cell table:formula="of:=[.D458]-[.D45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8" office:value-type="float" office:value="17366" calcext:value-type="float">
            <text:p>17366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0099537037037" calcext:value-type="float">
            <text:p>0,00200995370370370000</text:p>
          </table:table-cell>
          <table:table-cell table:formula="of:=[.D459]-[.D45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8" office:value-type="float" office:value="17404" calcext:value-type="float">
            <text:p>1740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01435185185185" calcext:value-type="float">
            <text:p>0,00201435185185185000</text:p>
          </table:table-cell>
          <table:table-cell table:formula="of:=[.D460]-[.D45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8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01875" calcext:value-type="float">
            <text:p>0,00201875000000000000</text:p>
          </table:table-cell>
          <table:table-cell table:formula="of:=[.D461]-[.D46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8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02314814814815" calcext:value-type="float">
            <text:p>0,00202314814814815000</text:p>
          </table:table-cell>
          <table:table-cell table:formula="of:=[.D462]-[.D46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8" office:value-type="float" office:value="17518" calcext:value-type="float">
            <text:p>17518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0275462962963" calcext:value-type="float">
            <text:p>0,00202754629629630000</text:p>
          </table:table-cell>
          <table:table-cell table:formula="of:=[.D463]-[.D46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8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03194444444444" calcext:value-type="float">
            <text:p>0,00203194444444444000</text:p>
          </table:table-cell>
          <table:table-cell table:formula="of:=[.D464]-[.D46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8" office:value-type="float" office:value="17594" calcext:value-type="float">
            <text:p>17594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03634259259259" calcext:value-type="float">
            <text:p>0,00203634259259259000</text:p>
          </table:table-cell>
          <table:table-cell table:formula="of:=[.D465]-[.D46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8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04074074074074" calcext:value-type="float">
            <text:p>0,00204074074074074000</text:p>
          </table:table-cell>
          <table:table-cell table:formula="of:=[.D466]-[.D46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8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04513888888889" calcext:value-type="float">
            <text:p>0,00204513888888889000</text:p>
          </table:table-cell>
          <table:table-cell table:formula="of:=[.D467]-[.D46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8" office:value-type="float" office:value="17708" calcext:value-type="float">
            <text:p>1770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04953703703704" calcext:value-type="float">
            <text:p>0,00204953703703704000</text:p>
          </table:table-cell>
          <table:table-cell table:formula="of:=[.D468]-[.D46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8" office:value-type="float" office:value="17746" calcext:value-type="float">
            <text:p>17746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05393518518519" calcext:value-type="float">
            <text:p>0,00205393518518519000</text:p>
          </table:table-cell>
          <table:table-cell table:formula="of:=[.D469]-[.D46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8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05833333333333" calcext:value-type="float">
            <text:p>0,00205833333333333000</text:p>
          </table:table-cell>
          <table:table-cell table:formula="of:=[.D470]-[.D46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8" office:value-type="float" office:value="17822" calcext:value-type="float">
            <text:p>17822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06273148148148" calcext:value-type="float">
            <text:p>0,00206273148148148000</text:p>
          </table:table-cell>
          <table:table-cell table:formula="of:=[.D471]-[.D47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8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06712962962963" calcext:value-type="float">
            <text:p>0,00206712962962963000</text:p>
          </table:table-cell>
          <table:table-cell table:formula="of:=[.D472]-[.D47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8" office:value-type="float" office:value="17898" calcext:value-type="float">
            <text:p>17898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07152777777778" calcext:value-type="float">
            <text:p>0,00207152777777778000</text:p>
          </table:table-cell>
          <table:table-cell table:formula="of:=[.D473]-[.D47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8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07592592592593" calcext:value-type="float">
            <text:p>0,00207592592592593000</text:p>
          </table:table-cell>
          <table:table-cell table:formula="of:=[.D474]-[.D47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8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08032407407407" calcext:value-type="float">
            <text:p>0,00208032407407407000</text:p>
          </table:table-cell>
          <table:table-cell table:formula="of:=[.D475]-[.D47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8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08472222222222" calcext:value-type="float">
            <text:p>0,00208472222222222000</text:p>
          </table:table-cell>
          <table:table-cell table:formula="of:=[.D476]-[.D47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8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08912037037037" calcext:value-type="float">
            <text:p>0,00208912037037037000</text:p>
          </table:table-cell>
          <table:table-cell table:formula="of:=[.D477]-[.D47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8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09351851851852" calcext:value-type="float">
            <text:p>0,00209351851851852000</text:p>
          </table:table-cell>
          <table:table-cell table:formula="of:=[.D478]-[.D47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8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09791666666667" calcext:value-type="float">
            <text:p>0,00209791666666667000</text:p>
          </table:table-cell>
          <table:table-cell table:formula="of:=[.D479]-[.D47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8" office:value-type="float" office:value="18164" calcext:value-type="float">
            <text:p>1816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10231481481481" calcext:value-type="float">
            <text:p>0,00210231481481481000</text:p>
          </table:table-cell>
          <table:table-cell table:formula="of:=[.D480]-[.D47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8" office:value-type="float" office:value="18202" calcext:value-type="float">
            <text:p>18202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10671296296296" calcext:value-type="float">
            <text:p>0,00210671296296296000</text:p>
          </table:table-cell>
          <table:table-cell table:formula="of:=[.D481]-[.D48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8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11111111111111" calcext:value-type="float">
            <text:p>0,00211111111111111000</text:p>
          </table:table-cell>
          <table:table-cell table:formula="of:=[.D482]-[.D48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8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11550925925926" calcext:value-type="float">
            <text:p>0,00211550925925926000</text:p>
          </table:table-cell>
          <table:table-cell table:formula="of:=[.D483]-[.D48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8" office:value-type="float" office:value="18316" calcext:value-type="float">
            <text:p>1831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11990740740741" calcext:value-type="float">
            <text:p>0,00211990740740741000</text:p>
          </table:table-cell>
          <table:table-cell table:formula="of:=[.D484]-[.D48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8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12430555555556" calcext:value-type="float">
            <text:p>0,00212430555555556000</text:p>
          </table:table-cell>
          <table:table-cell table:formula="of:=[.D485]-[.D48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8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1287037037037" calcext:value-type="float">
            <text:p>0,00212870370370370000</text:p>
          </table:table-cell>
          <table:table-cell table:formula="of:=[.D486]-[.D48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8" office:value-type="float" office:value="18430" calcext:value-type="float">
            <text:p>1843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13310185185185" calcext:value-type="float">
            <text:p>0,00213310185185185000</text:p>
          </table:table-cell>
          <table:table-cell table:formula="of:=[.D487]-[.D48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8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1375" calcext:value-type="float">
            <text:p>0,00213750000000000000</text:p>
          </table:table-cell>
          <table:table-cell table:formula="of:=[.D488]-[.D48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8" office:value-type="float" office:value="18506" calcext:value-type="float">
            <text:p>18506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14189814814815" calcext:value-type="float">
            <text:p>0,00214189814814815000</text:p>
          </table:table-cell>
          <table:table-cell table:formula="of:=[.D489]-[.D48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8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1462962962963" calcext:value-type="float">
            <text:p>0,00214629629629630000</text:p>
          </table:table-cell>
          <table:table-cell table:formula="of:=[.D490]-[.D48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8" office:value-type="float" office:value="18582" calcext:value-type="float">
            <text:p>18582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15069444444444" calcext:value-type="float">
            <text:p>0,00215069444444444000</text:p>
          </table:table-cell>
          <table:table-cell table:formula="of:=[.D491]-[.D49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8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15509259259259" calcext:value-type="float">
            <text:p>0,00215509259259259000</text:p>
          </table:table-cell>
          <table:table-cell table:formula="of:=[.D492]-[.D49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8" office:value-type="float" office:value="18658" calcext:value-type="float">
            <text:p>18658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15949074074074" calcext:value-type="float">
            <text:p>0,00215949074074074000</text:p>
          </table:table-cell>
          <table:table-cell table:formula="of:=[.D493]-[.D49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8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16388888888889" calcext:value-type="float">
            <text:p>0,00216388888888889000</text:p>
          </table:table-cell>
          <table:table-cell table:formula="of:=[.D494]-[.D49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8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16828703703704" calcext:value-type="float">
            <text:p>0,00216828703703704000</text:p>
          </table:table-cell>
          <table:table-cell table:formula="of:=[.D495]-[.D49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8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17268518518519" calcext:value-type="float">
            <text:p>0,00217268518518519000</text:p>
          </table:table-cell>
          <table:table-cell table:formula="of:=[.D496]-[.D49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8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17708333333333" calcext:value-type="float">
            <text:p>0,00217708333333333000</text:p>
          </table:table-cell>
          <table:table-cell table:formula="of:=[.D497]-[.D49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8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18148148148148" calcext:value-type="float">
            <text:p>0,00218148148148148000</text:p>
          </table:table-cell>
          <table:table-cell table:formula="of:=[.D498]-[.D49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8" office:value-type="float" office:value="18886" calcext:value-type="float">
            <text:p>18886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18587962962963" calcext:value-type="float">
            <text:p>0,00218587962962963000</text:p>
          </table:table-cell>
          <table:table-cell table:formula="of:=[.D499]-[.D49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8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19027777777778" calcext:value-type="float">
            <text:p>0,00219027777777778000</text:p>
          </table:table-cell>
          <table:table-cell table:formula="of:=[.D500]-[.D49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8" office:value-type="float" office:value="18962" calcext:value-type="float">
            <text:p>18962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19467592592593" calcext:value-type="float">
            <text:p>0,00219467592592593000</text:p>
          </table:table-cell>
          <table:table-cell table:formula="of:=[.D501]-[.D50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8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19907407407407" calcext:value-type="float">
            <text:p>0,00219907407407407000</text:p>
          </table:table-cell>
          <table:table-cell table:formula="of:=[.D502]-[.D50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8" office:value-type="float" office:value="19038" calcext:value-type="float">
            <text:p>19038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20347222222222" calcext:value-type="float">
            <text:p>0,00220347222222222000</text:p>
          </table:table-cell>
          <table:table-cell table:formula="of:=[.D503]-[.D50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8" office:value-type="float" office:value="19076" calcext:value-type="float">
            <text:p>1907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20787037037037" calcext:value-type="float">
            <text:p>0,00220787037037037000</text:p>
          </table:table-cell>
          <table:table-cell table:formula="of:=[.D504]-[.D50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8" office:value-type="float" office:value="19114" calcext:value-type="float">
            <text:p>19114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21226851851852" calcext:value-type="float">
            <text:p>0,00221226851851852000</text:p>
          </table:table-cell>
          <table:table-cell table:formula="of:=[.D505]-[.D50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8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21666666666667" calcext:value-type="float">
            <text:p>0,00221666666666667000</text:p>
          </table:table-cell>
          <table:table-cell table:formula="of:=[.D506]-[.D50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8" office:value-type="float" office:value="19190" calcext:value-type="float">
            <text:p>1919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22106481481481" calcext:value-type="float">
            <text:p>0,00222106481481481000</text:p>
          </table:table-cell>
          <table:table-cell table:formula="of:=[.D507]-[.D50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8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22546296296296" calcext:value-type="float">
            <text:p>0,00222546296296296000</text:p>
          </table:table-cell>
          <table:table-cell table:formula="of:=[.D508]-[.D50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8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22986111111111" calcext:value-type="float">
            <text:p>0,00222986111111111000</text:p>
          </table:table-cell>
          <table:table-cell table:formula="of:=[.D509]-[.D50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8" office:value-type="float" office:value="19304" calcext:value-type="float">
            <text:p>1930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23425925925926" calcext:value-type="float">
            <text:p>0,00223425925925926000</text:p>
          </table:table-cell>
          <table:table-cell table:formula="of:=[.D510]-[.D50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8" office:value-type="float" office:value="19342" calcext:value-type="float">
            <text:p>19342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23865740740741" calcext:value-type="float">
            <text:p>0,00223865740740741000</text:p>
          </table:table-cell>
          <table:table-cell table:formula="of:=[.D511]-[.D51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8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24305555555556" calcext:value-type="float">
            <text:p>0,00224305555555556000</text:p>
          </table:table-cell>
          <table:table-cell table:formula="of:=[.D512]-[.D51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8" office:value-type="float" office:value="19418" calcext:value-type="float">
            <text:p>19418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2474537037037" calcext:value-type="float">
            <text:p>0,00224745370370370000</text:p>
          </table:table-cell>
          <table:table-cell table:formula="of:=[.D513]-[.D51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8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25185185185185" calcext:value-type="float">
            <text:p>0,00225185185185185000</text:p>
          </table:table-cell>
          <table:table-cell table:formula="of:=[.D514]-[.D51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8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25625" calcext:value-type="float">
            <text:p>0,00225625000000000000</text:p>
          </table:table-cell>
          <table:table-cell table:formula="of:=[.D515]-[.D51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8" office:value-type="float" office:value="19532" calcext:value-type="float">
            <text:p>1953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26064814814815" calcext:value-type="float">
            <text:p>0,00226064814814815000</text:p>
          </table:table-cell>
          <table:table-cell table:formula="of:=[.D516]-[.D51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8" office:value-type="float" office:value="19570" calcext:value-type="float">
            <text:p>1957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2650462962963" calcext:value-type="float">
            <text:p>0,00226504629629630000</text:p>
          </table:table-cell>
          <table:table-cell table:formula="of:=[.D517]-[.D51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8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26944444444444" calcext:value-type="float">
            <text:p>0,00226944444444444000</text:p>
          </table:table-cell>
          <table:table-cell table:formula="of:=[.D518]-[.D51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8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27384259259259" calcext:value-type="float">
            <text:p>0,00227384259259259000</text:p>
          </table:table-cell>
          <table:table-cell table:formula="of:=[.D519]-[.D51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8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27824074074074" calcext:value-type="float">
            <text:p>0,00227824074074074000</text:p>
          </table:table-cell>
          <table:table-cell table:formula="of:=[.D520]-[.D51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8" office:value-type="float" office:value="19722" calcext:value-type="float">
            <text:p>19722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28263888888889" calcext:value-type="float">
            <text:p>0,00228263888888889000</text:p>
          </table:table-cell>
          <table:table-cell table:formula="of:=[.D521]-[.D52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8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28703703703704" calcext:value-type="float">
            <text:p>0,00228703703703704000</text:p>
          </table:table-cell>
          <table:table-cell table:formula="of:=[.D522]-[.D52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8" office:value-type="float" office:value="19798" calcext:value-type="float">
            <text:p>19798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29143518518519" calcext:value-type="float">
            <text:p>0,00229143518518519000</text:p>
          </table:table-cell>
          <table:table-cell table:formula="of:=[.D523]-[.D52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8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29583333333333" calcext:value-type="float">
            <text:p>0,00229583333333333000</text:p>
          </table:table-cell>
          <table:table-cell table:formula="of:=[.D524]-[.D52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8" office:value-type="float" office:value="19874" calcext:value-type="float">
            <text:p>19874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30023148148148" calcext:value-type="float">
            <text:p>0,00230023148148148000</text:p>
          </table:table-cell>
          <table:table-cell table:formula="of:=[.D525]-[.D52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8" office:value-type="float" office:value="19912" calcext:value-type="float">
            <text:p>1991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30462962962963" calcext:value-type="float">
            <text:p>0,00230462962962963000</text:p>
          </table:table-cell>
          <table:table-cell table:formula="of:=[.D526]-[.D52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8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30902777777778" calcext:value-type="float">
            <text:p>0,00230902777777778000</text:p>
          </table:table-cell>
          <table:table-cell table:formula="of:=[.D527]-[.D52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8" office:value-type="float" office:value="19988" calcext:value-type="float">
            <text:p>1998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31342592592593" calcext:value-type="float">
            <text:p>0,00231342592592593000</text:p>
          </table:table-cell>
          <table:table-cell table:formula="of:=[.D528]-[.D52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8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31782407407407" calcext:value-type="float">
            <text:p>0,00231782407407407000</text:p>
          </table:table-cell>
          <table:table-cell table:formula="of:=[.D529]-[.D52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8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32222222222222" calcext:value-type="float">
            <text:p>0,00232222222222222000</text:p>
          </table:table-cell>
          <table:table-cell table:formula="of:=[.D530]-[.D52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8" office:value-type="float" office:value="20102" calcext:value-type="float">
            <text:p>20102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32662037037037" calcext:value-type="float">
            <text:p>0,00232662037037037000</text:p>
          </table:table-cell>
          <table:table-cell table:formula="of:=[.D531]-[.D53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8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33101851851852" calcext:value-type="float">
            <text:p>0,00233101851851852000</text:p>
          </table:table-cell>
          <table:table-cell table:formula="of:=[.D532]-[.D53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8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33541666666667" calcext:value-type="float">
            <text:p>0,00233541666666667000</text:p>
          </table:table-cell>
          <table:table-cell table:formula="of:=[.D533]-[.D53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8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33981481481482" calcext:value-type="float">
            <text:p>0,00233981481481482000</text:p>
          </table:table-cell>
          <table:table-cell table:formula="of:=[.D534]-[.D53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8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34421296296296" calcext:value-type="float">
            <text:p>0,00234421296296296000</text:p>
          </table:table-cell>
          <table:table-cell table:formula="of:=[.D535]-[.D53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8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34861111111111" calcext:value-type="float">
            <text:p>0,00234861111111111000</text:p>
          </table:table-cell>
          <table:table-cell table:formula="of:=[.D536]-[.D53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8" office:value-type="float" office:value="20330" calcext:value-type="float">
            <text:p>2033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35300925925926" calcext:value-type="float">
            <text:p>0,00235300925925926000</text:p>
          </table:table-cell>
          <table:table-cell table:formula="of:=[.D537]-[.D53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8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35740740740741" calcext:value-type="float">
            <text:p>0,00235740740740741000</text:p>
          </table:table-cell>
          <table:table-cell table:formula="of:=[.D538]-[.D53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8" office:value-type="float" office:value="20406" calcext:value-type="float">
            <text:p>20406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36180555555556" calcext:value-type="float">
            <text:p>0,00236180555555556000</text:p>
          </table:table-cell>
          <table:table-cell table:formula="of:=[.D539]-[.D53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8" office:value-type="float" office:value="20444" calcext:value-type="float">
            <text:p>2044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3662037037037" calcext:value-type="float">
            <text:p>0,00236620370370370000</text:p>
          </table:table-cell>
          <table:table-cell table:formula="of:=[.D540]-[.D53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8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37060185185185" calcext:value-type="float">
            <text:p>0,00237060185185185000</text:p>
          </table:table-cell>
          <table:table-cell table:formula="of:=[.D541]-[.D54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8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375" calcext:value-type="float">
            <text:p>0,00237500000000000000</text:p>
          </table:table-cell>
          <table:table-cell table:formula="of:=[.D542]-[.D54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8" office:value-type="float" office:value="20558" calcext:value-type="float">
            <text:p>20558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37939814814815" calcext:value-type="float">
            <text:p>0,00237939814814815000</text:p>
          </table:table-cell>
          <table:table-cell table:formula="of:=[.D543]-[.D54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8" office:value-type="float" office:value="20596" calcext:value-type="float">
            <text:p>2059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3837962962963" calcext:value-type="float">
            <text:p>0,00238379629629630000</text:p>
          </table:table-cell>
          <table:table-cell table:formula="of:=[.D544]-[.D54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8" office:value-type="float" office:value="20634" calcext:value-type="float">
            <text:p>20634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38819444444444" calcext:value-type="float">
            <text:p>0,00238819444444444000</text:p>
          </table:table-cell>
          <table:table-cell table:formula="of:=[.D545]-[.D54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8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39259259259259" calcext:value-type="float">
            <text:p>0,00239259259259259000</text:p>
          </table:table-cell>
          <table:table-cell table:formula="of:=[.D546]-[.D54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8" office:value-type="float" office:value="20710" calcext:value-type="float">
            <text:p>2071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39699074074074" calcext:value-type="float">
            <text:p>0,00239699074074074000</text:p>
          </table:table-cell>
          <table:table-cell table:formula="of:=[.D547]-[.D54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8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40138888888889" calcext:value-type="float">
            <text:p>0,00240138888888889000</text:p>
          </table:table-cell>
          <table:table-cell table:formula="of:=[.D548]-[.D54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8" office:value-type="float" office:value="20786" calcext:value-type="float">
            <text:p>20786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40578703703704" calcext:value-type="float">
            <text:p>0,00240578703703704000</text:p>
          </table:table-cell>
          <table:table-cell table:formula="of:=[.D549]-[.D54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8" office:value-type="float" office:value="20824" calcext:value-type="float">
            <text:p>2082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41018518518519" calcext:value-type="float">
            <text:p>0,00241018518518519000</text:p>
          </table:table-cell>
          <table:table-cell table:formula="of:=[.D550]-[.D54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8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41458333333333" calcext:value-type="float">
            <text:p>0,00241458333333333000</text:p>
          </table:table-cell>
          <table:table-cell table:formula="of:=[.D551]-[.D55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8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41898148148148" calcext:value-type="float">
            <text:p>0,00241898148148148000</text:p>
          </table:table-cell>
          <table:table-cell table:formula="of:=[.D552]-[.D55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8" office:value-type="float" office:value="20938" calcext:value-type="float">
            <text:p>20938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42337962962963" calcext:value-type="float">
            <text:p>0,00242337962962963000</text:p>
          </table:table-cell>
          <table:table-cell table:formula="of:=[.D553]-[.D55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8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42777777777778" calcext:value-type="float">
            <text:p>0,00242777777777778000</text:p>
          </table:table-cell>
          <table:table-cell table:formula="of:=[.D554]-[.D55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8" office:value-type="float" office:value="21014" calcext:value-type="float">
            <text:p>21014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43217592592593" calcext:value-type="float">
            <text:p>0,00243217592592593000</text:p>
          </table:table-cell>
          <table:table-cell table:formula="of:=[.D555]-[.D55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8" office:value-type="float" office:value="21052" calcext:value-type="float">
            <text:p>2105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43657407407407" calcext:value-type="float">
            <text:p>0,00243657407407407000</text:p>
          </table:table-cell>
          <table:table-cell table:formula="of:=[.D556]-[.D55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8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44097222222222" calcext:value-type="float">
            <text:p>0,00244097222222222000</text:p>
          </table:table-cell>
          <table:table-cell table:formula="of:=[.D557]-[.D55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8" office:value-type="float" office:value="21128" calcext:value-type="float">
            <text:p>2112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44537037037037" calcext:value-type="float">
            <text:p>0,00244537037037037000</text:p>
          </table:table-cell>
          <table:table-cell table:formula="of:=[.D558]-[.D55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8" office:value-type="float" office:value="21166" calcext:value-type="float">
            <text:p>21166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44976851851852" calcext:value-type="float">
            <text:p>0,00244976851851852000</text:p>
          </table:table-cell>
          <table:table-cell table:formula="of:=[.D559]-[.D55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8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45416666666667" calcext:value-type="float">
            <text:p>0,00245416666666667000</text:p>
          </table:table-cell>
          <table:table-cell table:formula="of:=[.D560]-[.D55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8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45856481481482" calcext:value-type="float">
            <text:p>0,00245856481481482000</text:p>
          </table:table-cell>
          <table:table-cell table:formula="of:=[.D561]-[.D56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8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46296296296296" calcext:value-type="float">
            <text:p>0,00246296296296296000</text:p>
          </table:table-cell>
          <table:table-cell table:formula="of:=[.D562]-[.D56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8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46736111111111" calcext:value-type="float">
            <text:p>0,00246736111111111000</text:p>
          </table:table-cell>
          <table:table-cell table:formula="of:=[.D563]-[.D56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8" office:value-type="float" office:value="21356" calcext:value-type="float">
            <text:p>2135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47175925925926" calcext:value-type="float">
            <text:p>0,00247175925925926000</text:p>
          </table:table-cell>
          <table:table-cell table:formula="of:=[.D564]-[.D56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8" office:value-type="float" office:value="21394" calcext:value-type="float">
            <text:p>21394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47615740740741" calcext:value-type="float">
            <text:p>0,00247615740740741000</text:p>
          </table:table-cell>
          <table:table-cell table:formula="of:=[.D565]-[.D56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8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48055555555556" calcext:value-type="float">
            <text:p>0,00248055555555556000</text:p>
          </table:table-cell>
          <table:table-cell table:formula="of:=[.D566]-[.D56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8" office:value-type="float" office:value="21470" calcext:value-type="float">
            <text:p>2147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4849537037037" calcext:value-type="float">
            <text:p>0,00248495370370370000</text:p>
          </table:table-cell>
          <table:table-cell table:formula="of:=[.D567]-[.D56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8" office:value-type="float" office:value="21508" calcext:value-type="float">
            <text:p>2150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48935185185185" calcext:value-type="float">
            <text:p>0,00248935185185185000</text:p>
          </table:table-cell>
          <table:table-cell table:formula="of:=[.D568]-[.D56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8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49375" calcext:value-type="float">
            <text:p>0,00249375000000000000</text:p>
          </table:table-cell>
          <table:table-cell table:formula="of:=[.D569]-[.D56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8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49814814814815" calcext:value-type="float">
            <text:p>0,00249814814814815000</text:p>
          </table:table-cell>
          <table:table-cell table:formula="of:=[.D570]-[.D56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8" office:value-type="float" office:value="21622" calcext:value-type="float">
            <text:p>21622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5025462962963" calcext:value-type="float">
            <text:p>0,00250254629629630000</text:p>
          </table:table-cell>
          <table:table-cell table:formula="of:=[.D571]-[.D57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8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50694444444444" calcext:value-type="float">
            <text:p>0,00250694444444444000</text:p>
          </table:table-cell>
          <table:table-cell table:formula="of:=[.D572]-[.D57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8" office:value-type="float" office:value="21698" calcext:value-type="float">
            <text:p>21698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51134259259259" calcext:value-type="float">
            <text:p>0,00251134259259259000</text:p>
          </table:table-cell>
          <table:table-cell table:formula="of:=[.D573]-[.D57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8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51574074074074" calcext:value-type="float">
            <text:p>0,00251574074074074000</text:p>
          </table:table-cell>
          <table:table-cell table:formula="of:=[.D574]-[.D57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8" office:value-type="float" office:value="21774" calcext:value-type="float">
            <text:p>21774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52013888888889" calcext:value-type="float">
            <text:p>0,00252013888888889000</text:p>
          </table:table-cell>
          <table:table-cell table:formula="of:=[.D575]-[.D57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8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52453703703704" calcext:value-type="float">
            <text:p>0,00252453703703704000</text:p>
          </table:table-cell>
          <table:table-cell table:formula="of:=[.D576]-[.D57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8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52893518518519" calcext:value-type="float">
            <text:p>0,00252893518518519000</text:p>
          </table:table-cell>
          <table:table-cell table:formula="of:=[.D577]-[.D57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8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53333333333333" calcext:value-type="float">
            <text:p>0,00253333333333333000</text:p>
          </table:table-cell>
          <table:table-cell table:formula="of:=[.D578]-[.D57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8" office:value-type="float" office:value="21926" calcext:value-type="float">
            <text:p>21926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53773148148148" calcext:value-type="float">
            <text:p>0,00253773148148148000</text:p>
          </table:table-cell>
          <table:table-cell table:formula="of:=[.D579]-[.D57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8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54212962962963" calcext:value-type="float">
            <text:p>0,00254212962962963000</text:p>
          </table:table-cell>
          <table:table-cell table:formula="of:=[.D580]-[.D57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8" office:value-type="float" office:value="22002" calcext:value-type="float">
            <text:p>22002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54652777777778" calcext:value-type="float">
            <text:p>0,00254652777777778000</text:p>
          </table:table-cell>
          <table:table-cell table:formula="of:=[.D581]-[.D58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8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55092592592593" calcext:value-type="float">
            <text:p>0,00255092592592593000</text:p>
          </table:table-cell>
          <table:table-cell table:formula="of:=[.D582]-[.D58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8" office:value-type="float" office:value="22078" calcext:value-type="float">
            <text:p>22078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55532407407407" calcext:value-type="float">
            <text:p>0,00255532407407407000</text:p>
          </table:table-cell>
          <table:table-cell table:formula="of:=[.D583]-[.D58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8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55972222222222" calcext:value-type="float">
            <text:p>0,00255972222222222000</text:p>
          </table:table-cell>
          <table:table-cell table:formula="of:=[.D584]-[.D58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8" office:value-type="float" office:value="22154" calcext:value-type="float">
            <text:p>22154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56412037037037" calcext:value-type="float">
            <text:p>0,00256412037037037000</text:p>
          </table:table-cell>
          <table:table-cell table:formula="of:=[.D585]-[.D58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8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56851851851852" calcext:value-type="float">
            <text:p>0,00256851851851852000</text:p>
          </table:table-cell>
          <table:table-cell table:formula="of:=[.D586]-[.D58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8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57291666666667" calcext:value-type="float">
            <text:p>0,00257291666666667000</text:p>
          </table:table-cell>
          <table:table-cell table:formula="of:=[.D587]-[.D58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8" office:value-type="float" office:value="22268" calcext:value-type="float">
            <text:p>2226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57731481481482" calcext:value-type="float">
            <text:p>0,00257731481481482000</text:p>
          </table:table-cell>
          <table:table-cell table:formula="of:=[.D588]-[.D58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8" office:value-type="float" office:value="22306" calcext:value-type="float">
            <text:p>22306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58171296296296" calcext:value-type="float">
            <text:p>0,00258171296296296000</text:p>
          </table:table-cell>
          <table:table-cell table:formula="of:=[.D589]-[.D58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8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58611111111111" calcext:value-type="float">
            <text:p>0,00258611111111111000</text:p>
          </table:table-cell>
          <table:table-cell table:formula="of:=[.D590]-[.D58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8" office:value-type="float" office:value="22382" calcext:value-type="float">
            <text:p>22382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59050925925926" calcext:value-type="float">
            <text:p>0,00259050925925926000</text:p>
          </table:table-cell>
          <table:table-cell table:formula="of:=[.D591]-[.D59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8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59490740740741" calcext:value-type="float">
            <text:p>0,00259490740740741000</text:p>
          </table:table-cell>
          <table:table-cell table:formula="of:=[.D592]-[.D59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8" office:value-type="float" office:value="22458" calcext:value-type="float">
            <text:p>22458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59930555555556" calcext:value-type="float">
            <text:p>0,00259930555555556000</text:p>
          </table:table-cell>
          <table:table-cell table:formula="of:=[.D593]-[.D59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8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6037037037037" calcext:value-type="float">
            <text:p>0,00260370370370370000</text:p>
          </table:table-cell>
          <table:table-cell table:formula="of:=[.D594]-[.D59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8" office:value-type="float" office:value="22534" calcext:value-type="float">
            <text:p>22534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60810185185185" calcext:value-type="float">
            <text:p>0,00260810185185185000</text:p>
          </table:table-cell>
          <table:table-cell table:formula="of:=[.D595]-[.D59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8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6125" calcext:value-type="float">
            <text:p>0,00261250000000000000</text:p>
          </table:table-cell>
          <table:table-cell table:formula="of:=[.D596]-[.D59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8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61689814814815" calcext:value-type="float">
            <text:p>0,00261689814814815000</text:p>
          </table:table-cell>
          <table:table-cell table:formula="of:=[.D597]-[.D59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8" office:value-type="float" office:value="22648" calcext:value-type="float">
            <text:p>2264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6212962962963" calcext:value-type="float">
            <text:p>0,00262129629629630000</text:p>
          </table:table-cell>
          <table:table-cell table:formula="of:=[.D598]-[.D59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8" office:value-type="float" office:value="22686" calcext:value-type="float">
            <text:p>22686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62569444444444" calcext:value-type="float">
            <text:p>0,00262569444444444000</text:p>
          </table:table-cell>
          <table:table-cell table:formula="of:=[.D599]-[.D59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8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63009259259259" calcext:value-type="float">
            <text:p>0,00263009259259259000</text:p>
          </table:table-cell>
          <table:table-cell table:formula="of:=[.D600]-[.D59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8" office:value-type="float" office:value="22762" calcext:value-type="float">
            <text:p>22762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63449074074074" calcext:value-type="float">
            <text:p>0,00263449074074074000</text:p>
          </table:table-cell>
          <table:table-cell table:formula="of:=[.D601]-[.D60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8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63888888888889" calcext:value-type="float">
            <text:p>0,00263888888888889000</text:p>
          </table:table-cell>
          <table:table-cell table:formula="of:=[.D602]-[.D60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8" office:value-type="float" office:value="22838" calcext:value-type="float">
            <text:p>22838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64328703703704" calcext:value-type="float">
            <text:p>0,00264328703703704000</text:p>
          </table:table-cell>
          <table:table-cell table:formula="of:=[.D603]-[.D60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8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64768518518519" calcext:value-type="float">
            <text:p>0,00264768518518519000</text:p>
          </table:table-cell>
          <table:table-cell table:formula="of:=[.D604]-[.D60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8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65208333333333" calcext:value-type="float">
            <text:p>0,00265208333333333000</text:p>
          </table:table-cell>
          <table:table-cell table:formula="of:=[.D605]-[.D60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8" office:value-type="float" office:value="22952" calcext:value-type="float">
            <text:p>2295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65648148148148" calcext:value-type="float">
            <text:p>0,00265648148148148000</text:p>
          </table:table-cell>
          <table:table-cell table:formula="of:=[.D606]-[.D60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8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66087962962963" calcext:value-type="float">
            <text:p>0,00266087962962963000</text:p>
          </table:table-cell>
          <table:table-cell table:formula="of:=[.D607]-[.D60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8" office:value-type="float" office:value="23028" calcext:value-type="float">
            <text:p>2302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66527777777778" calcext:value-type="float">
            <text:p>0,00266527777777778000</text:p>
          </table:table-cell>
          <table:table-cell table:formula="of:=[.D608]-[.D60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8" office:value-type="float" office:value="23066" calcext:value-type="float">
            <text:p>23066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66967592592593" calcext:value-type="float">
            <text:p>0,00266967592592593000</text:p>
          </table:table-cell>
          <table:table-cell table:formula="of:=[.D609]-[.D608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8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67407407407407" calcext:value-type="float">
            <text:p>0,00267407407407407000</text:p>
          </table:table-cell>
          <table:table-cell table:formula="of:=[.D610]-[.D609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8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67847222222222" calcext:value-type="float">
            <text:p>0,00267847222222222000</text:p>
          </table:table-cell>
          <table:table-cell table:formula="of:=[.D611]-[.D610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8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68287037037037" calcext:value-type="float">
            <text:p>0,00268287037037037000</text:p>
          </table:table-cell>
          <table:table-cell table:formula="of:=[.D612]-[.D61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8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68726851851852" calcext:value-type="float">
            <text:p>0,00268726851851852000</text:p>
          </table:table-cell>
          <table:table-cell table:formula="of:=[.D613]-[.D612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8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69166666666667" calcext:value-type="float">
            <text:p>0,00269166666666667000</text:p>
          </table:table-cell>
          <table:table-cell table:formula="of:=[.D614]-[.D613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8" office:value-type="float" office:value="23294" calcext:value-type="float">
            <text:p>23294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69606481481481" calcext:value-type="float">
            <text:p>0,00269606481481481000</text:p>
          </table:table-cell>
          <table:table-cell table:formula="of:=[.D615]-[.D614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8" office:value-type="float" office:value="23332" calcext:value-type="float">
            <text:p>2333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70046296296296" calcext:value-type="float">
            <text:p>0,00270046296296296000</text:p>
          </table:table-cell>
          <table:table-cell table:formula="of:=[.D616]-[.D615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8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70486111111111" calcext:value-type="float">
            <text:p>0,00270486111111111000</text:p>
          </table:table-cell>
          <table:table-cell table:formula="of:=[.D617]-[.D616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8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70925925925926" calcext:value-type="float">
            <text:p>0,00270925925925926000</text:p>
          </table:table-cell>
          <table:table-cell table:formula="of:=[.D618]-[.D617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8" office:value-type="float" office:value="23446" calcext:value-type="float">
            <text:p>23446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71365740740741" calcext:value-type="float">
            <text:p>0,00271365740740741000</text:p>
          </table:table-cell>
          <table:table-cell table:formula="of:=[.D619]-[.D61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8" office:value-type="float" office:value="23484" calcext:value-type="float">
            <text:p>2348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71805555555556" calcext:value-type="float">
            <text:p>0,00271805555555556000</text:p>
          </table:table-cell>
          <table:table-cell table:formula="of:=[.D620]-[.D61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8" office:value-type="float" office:value="23522" calcext:value-type="float">
            <text:p>23522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7224537037037" calcext:value-type="float">
            <text:p>0,00272245370370370000</text:p>
          </table:table-cell>
          <table:table-cell table:formula="of:=[.D621]-[.D62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8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72685185185185" calcext:value-type="float">
            <text:p>0,00272685185185185000</text:p>
          </table:table-cell>
          <table:table-cell table:formula="of:=[.D622]-[.D621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8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73125" calcext:value-type="float">
            <text:p>0,00273125000000000000</text:p>
          </table:table-cell>
          <table:table-cell table:formula="of:=[.D623]-[.D622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8" office:value-type="float" office:value="23636" calcext:value-type="float">
            <text:p>2363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73564814814815" calcext:value-type="float">
            <text:p>0,00273564814814815000</text:p>
          </table:table-cell>
          <table:table-cell table:formula="of:=[.D624]-[.D623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8" office:value-type="float" office:value="23674" calcext:value-type="float">
            <text:p>23674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7400462962963" calcext:value-type="float">
            <text:p>0,00274004629629630000</text:p>
          </table:table-cell>
          <table:table-cell table:formula="of:=[.D625]-[.D624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8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74444444444444" calcext:value-type="float">
            <text:p>0,00274444444444444000</text:p>
          </table:table-cell>
          <table:table-cell table:formula="of:=[.D626]-[.D625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8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74884259259259" calcext:value-type="float">
            <text:p>0,00274884259259259000</text:p>
          </table:table-cell>
          <table:table-cell table:formula="of:=[.D627]-[.D626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8" office:value-type="float" office:value="23788" calcext:value-type="float">
            <text:p>2378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75324074074074" calcext:value-type="float">
            <text:p>0,00275324074074074000</text:p>
          </table:table-cell>
          <table:table-cell table:formula="of:=[.D628]-[.D627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8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75763888888889" calcext:value-type="float">
            <text:p>0,00275763888888889000</text:p>
          </table:table-cell>
          <table:table-cell table:formula="of:=[.D629]-[.D628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8" office:value-type="float" office:value="23864" calcext:value-type="float">
            <text:p>2386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76203703703704" calcext:value-type="float">
            <text:p>0,00276203703703704000</text:p>
          </table:table-cell>
          <table:table-cell table:formula="of:=[.D630]-[.D629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8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76643518518519" calcext:value-type="float">
            <text:p>0,00276643518518519000</text:p>
          </table:table-cell>
          <table:table-cell table:formula="of:=[.D631]-[.D630]" office:value-type="float" office:value="0.00000439814814814834" calcext:value-type="float">
            <text:p>0,0000043981481481483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8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77083333333333" calcext:value-type="float">
            <text:p>0,00277083333333333000</text:p>
          </table:table-cell>
          <table:table-cell table:formula="of:=[.D632]-[.D631]" office:value-type="float" office:value="0.00000439814814814791" calcext:value-type="float">
            <text:p>0,0000043981481481479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8" office:value-type="float" office:value="23978" calcext:value-type="float">
            <text:p>23978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77523148148148" calcext:value-type="float">
            <text:p>0,00277523148148148000</text:p>
          </table:table-cell>
          <table:table-cell table:formula="of:=#REF!-[.D632]" office:value-type="string" office:string-value="" calcext:value-type="error">
            <text:p>#REF!</text:p>
          </table:table-cell>
        </table:table-row>
        <table:table-row table:style-name="ro1" table:number-rows-repeated="10479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3:12.655486336</meta:creation-date>
    <dc:date>2026-05-17T17:33:21.005933993</dc:date>
    <meta:editing-duration>PT9S</meta:editing-duration>
    <meta:editing-cycles>1</meta:editing-cycles>
    <meta:document-statistic meta:table-count="1" meta:cell-count="3160" meta:object-count="0"/>
    <meta:generator>LibreOffice/24.2.7.2$Linux_X86_64 LibreOffice_project/420$Build-2</meta:generator>
  </office:meta>
</office:document-meta>
</file>