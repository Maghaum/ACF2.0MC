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98611111111111" calcext:value-type="float">
            <text:p>0,00000798611111111111</text:p>
          </table:table-cell>
          <table:table-cell table:formula="of:=[.D3]-[.D2]" office:value-type="float" office:value="0.00000798611111111111" calcext:value-type="float">
            <text:p>0,0000079861111111111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9" office:value-type="float" office:value="138" calcext:value-type="float">
            <text:p>13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59722222222222" calcext:value-type="float">
            <text:p>0,00001597222222222220</text:p>
          </table:table-cell>
          <table:table-cell table:formula="of:=[.D4]-[.D3]" office:value-type="float" office:value="0.00000798611111111111" calcext:value-type="float">
            <text:p>0,0000079861111111111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9" office:value-type="float" office:value="207" calcext:value-type="float">
            <text:p>20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39583333333333" calcext:value-type="float">
            <text:p>0,00002395833333333330</text:p>
          </table:table-cell>
          <table:table-cell table:formula="of:=[.D5]-[.D4]" office:value-type="float" office:value="0.00000798611111111111" calcext:value-type="float">
            <text:p>0,0000079861111111111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9" office:value-type="float" office:value="276" calcext:value-type="float">
            <text:p>27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19444444444445" calcext:value-type="float">
            <text:p>0,00003194444444444450</text:p>
          </table:table-cell>
          <table:table-cell table:formula="of:=[.D6]-[.D5]" office:value-type="float" office:value="0.00000798611111111111" calcext:value-type="float">
            <text:p>0,0000079861111111111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9" office:value-type="float" office:value="345" calcext:value-type="float">
            <text:p>34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99305555555556" calcext:value-type="float">
            <text:p>0,00003993055555555560</text:p>
          </table:table-cell>
          <table:table-cell table:formula="of:=[.D7]-[.D6]" office:value-type="float" office:value="0.00000798611111111111" calcext:value-type="float">
            <text:p>0,0000079861111111111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9" office:value-type="float" office:value="414" calcext:value-type="float">
            <text:p>41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79166666666667" calcext:value-type="float">
            <text:p>0,00004791666666666670</text:p>
          </table:table-cell>
          <table:table-cell table:formula="of:=[.D8]-[.D7]" office:value-type="float" office:value="0.00000798611111111111" calcext:value-type="float">
            <text:p>0,0000079861111111111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9" office:value-type="float" office:value="483" calcext:value-type="float">
            <text:p>48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59027777777778" calcext:value-type="float">
            <text:p>0,00005590277777777780</text:p>
          </table:table-cell>
          <table:table-cell table:formula="of:=[.D9]-[.D8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9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38888888888889" calcext:value-type="float">
            <text:p>0,00006388888888888890</text:p>
          </table:table-cell>
          <table:table-cell table:formula="of:=[.D10]-[.D9]" office:value-type="float" office:value="0.0000079861111111111" calcext:value-type="float">
            <text:p>0,0000079861111111111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9" office:value-type="float" office:value="621" calcext:value-type="float">
            <text:p>62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1875" calcext:value-type="float">
            <text:p>0,00007187500000000000</text:p>
          </table:table-cell>
          <table:table-cell table:formula="of:=[.D11]-[.D10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9" office:value-type="float" office:value="690" calcext:value-type="float">
            <text:p>6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98611111111111" calcext:value-type="float">
            <text:p>0,00007986111111111110</text:p>
          </table:table-cell>
          <table:table-cell table:formula="of:=[.D12]-[.D11]" office:value-type="float" office:value="0.0000079861111111111" calcext:value-type="float">
            <text:p>0,0000079861111111111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9" office:value-type="float" office:value="759" calcext:value-type="float">
            <text:p>75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78472222222222" calcext:value-type="float">
            <text:p>0,00008784722222222220</text:p>
          </table:table-cell>
          <table:table-cell table:formula="of:=[.D13]-[.D12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9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58333333333333" calcext:value-type="float">
            <text:p>0,00009583333333333330</text:p>
          </table:table-cell>
          <table:table-cell table:formula="of:=[.D14]-[.D13]" office:value-type="float" office:value="0.0000079861111111111" calcext:value-type="float">
            <text:p>0,0000079861111111111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9" office:value-type="float" office:value="897" calcext:value-type="float">
            <text:p>89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3819444444444" calcext:value-type="float">
            <text:p>0,00010381944444444400</text:p>
          </table:table-cell>
          <table:table-cell table:formula="of:=[.D15]-[.D14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9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1805555555556" calcext:value-type="float">
            <text:p>0,00011180555555555600</text:p>
          </table:table-cell>
          <table:table-cell table:formula="of:=[.D16]-[.D15]" office:value-type="float" office:value="0.0000079861111111111" calcext:value-type="float">
            <text:p>0,0000079861111111111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9" office:value-type="float" office:value="1035" calcext:value-type="float">
            <text:p>103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19791666666667" calcext:value-type="float">
            <text:p>0,00011979166666666700</text:p>
          </table:table-cell>
          <table:table-cell table:formula="of:=[.D17]-[.D16]" office:value-type="float" office:value="0.00000798611111111113" calcext:value-type="float">
            <text:p>0,00000798611111111113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9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27777777777778" calcext:value-type="float">
            <text:p>0,00012777777777777800</text:p>
          </table:table-cell>
          <table:table-cell table:formula="of:=[.D18]-[.D17]" office:value-type="float" office:value="0.00000798611111111109" calcext:value-type="float">
            <text:p>0,00000798611111111109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9" office:value-type="float" office:value="1173" calcext:value-type="float">
            <text:p>117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35763888888889" calcext:value-type="float">
            <text:p>0,00013576388888888900</text:p>
          </table:table-cell>
          <table:table-cell table:formula="of:=[.D19]-[.D18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9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4375" calcext:value-type="float">
            <text:p>0,00014375000000000000</text:p>
          </table:table-cell>
          <table:table-cell table:formula="of:=[.D20]-[.D19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9" office:value-type="float" office:value="1311" calcext:value-type="float">
            <text:p>131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51736111111111" calcext:value-type="float">
            <text:p>0,00015173611111111100</text:p>
          </table:table-cell>
          <table:table-cell table:formula="of:=[.D21]-[.D20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9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59722222222222" calcext:value-type="float">
            <text:p>0,00015972222222222200</text:p>
          </table:table-cell>
          <table:table-cell table:formula="of:=[.D22]-[.D21]" office:value-type="float" office:value="0.00000798611111111109" calcext:value-type="float">
            <text:p>0,00000798611111111109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9" office:value-type="float" office:value="1449" calcext:value-type="float">
            <text:p>144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67708333333333" calcext:value-type="float">
            <text:p>0,00016770833333333300</text:p>
          </table:table-cell>
          <table:table-cell table:formula="of:=[.D23]-[.D22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9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75694444444444" calcext:value-type="float">
            <text:p>0,00017569444444444400</text:p>
          </table:table-cell>
          <table:table-cell table:formula="of:=[.D24]-[.D23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9" office:value-type="float" office:value="1587" calcext:value-type="float">
            <text:p>158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83680555555556" calcext:value-type="float">
            <text:p>0,00018368055555555600</text:p>
          </table:table-cell>
          <table:table-cell table:formula="of:=[.D25]-[.D24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9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91666666666667" calcext:value-type="float">
            <text:p>0,00019166666666666700</text:p>
          </table:table-cell>
          <table:table-cell table:formula="of:=[.D26]-[.D25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9" office:value-type="float" office:value="1725" calcext:value-type="float">
            <text:p>17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99652777777778" calcext:value-type="float">
            <text:p>0,00019965277777777800</text:p>
          </table:table-cell>
          <table:table-cell table:formula="of:=[.D27]-[.D26]" office:value-type="float" office:value="0.00000798611111111109" calcext:value-type="float">
            <text:p>0,00000798611111111109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9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07638888888889" calcext:value-type="float">
            <text:p>0,00020763888888888900</text:p>
          </table:table-cell>
          <table:table-cell table:formula="of:=[.D28]-[.D27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9" office:value-type="float" office:value="1863" calcext:value-type="float">
            <text:p>186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15625" calcext:value-type="float">
            <text:p>0,00021562500000000000</text:p>
          </table:table-cell>
          <table:table-cell table:formula="of:=[.D29]-[.D28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9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23611111111111" calcext:value-type="float">
            <text:p>0,00022361111111111100</text:p>
          </table:table-cell>
          <table:table-cell table:formula="of:=[.D30]-[.D29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9" office:value-type="float" office:value="2001" calcext:value-type="float">
            <text:p>200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31597222222222" calcext:value-type="float">
            <text:p>0,00023159722222222200</text:p>
          </table:table-cell>
          <table:table-cell table:formula="of:=[.D31]-[.D30]" office:value-type="float" office:value="0.00000798611111111109" calcext:value-type="float">
            <text:p>0,00000798611111111109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9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39583333333333" calcext:value-type="float">
            <text:p>0,00023958333333333300</text:p>
          </table:table-cell>
          <table:table-cell table:formula="of:=[.D32]-[.D31]" office:value-type="float" office:value="0.00000798611111111114" calcext:value-type="float">
            <text:p>0,0000079861111111111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9" office:value-type="float" office:value="2139" calcext:value-type="float">
            <text:p>213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47569444444444" calcext:value-type="float">
            <text:p>0,00024756944444444400</text:p>
          </table:table-cell>
          <table:table-cell table:formula="of:=[.D33]-[.D32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9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55555555555556" calcext:value-type="float">
            <text:p>0,00025555555555555600</text:p>
          </table:table-cell>
          <table:table-cell table:formula="of:=[.D34]-[.D33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9" office:value-type="float" office:value="2277" calcext:value-type="float">
            <text:p>227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63541666666667" calcext:value-type="float">
            <text:p>0,00026354166666666700</text:p>
          </table:table-cell>
          <table:table-cell table:formula="of:=[.D35]-[.D34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9" office:value-type="float" office:value="2346" calcext:value-type="float">
            <text:p>234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71527777777778" calcext:value-type="float">
            <text:p>0,00027152777777777800</text:p>
          </table:table-cell>
          <table:table-cell table:formula="of:=[.D36]-[.D35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9" office:value-type="float" office:value="2415" calcext:value-type="float">
            <text:p>241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79513888888889" calcext:value-type="float">
            <text:p>0,00027951388888888900</text:p>
          </table:table-cell>
          <table:table-cell table:formula="of:=[.D37]-[.D36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9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875" calcext:value-type="float">
            <text:p>0,00028750000000000000</text:p>
          </table:table-cell>
          <table:table-cell table:formula="of:=[.D38]-[.D37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9" office:value-type="float" office:value="2553" calcext:value-type="float">
            <text:p>255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95486111111111" calcext:value-type="float">
            <text:p>0,00029548611111111100</text:p>
          </table:table-cell>
          <table:table-cell table:formula="of:=[.D39]-[.D38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9" office:value-type="float" office:value="2622" calcext:value-type="float">
            <text:p>262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03472222222222" calcext:value-type="float">
            <text:p>0,00030347222222222200</text:p>
          </table:table-cell>
          <table:table-cell table:formula="of:=[.D40]-[.D39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9" office:value-type="float" office:value="2691" calcext:value-type="float">
            <text:p>269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11458333333333" calcext:value-type="float">
            <text:p>0,00031145833333333300</text:p>
          </table:table-cell>
          <table:table-cell table:formula="of:=[.D41]-[.D40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9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19444444444444" calcext:value-type="float">
            <text:p>0,00031944444444444400</text:p>
          </table:table-cell>
          <table:table-cell table:formula="of:=[.D42]-[.D41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9" office:value-type="float" office:value="2829" calcext:value-type="float">
            <text:p>282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27430555555556" calcext:value-type="float">
            <text:p>0,00032743055555555600</text:p>
          </table:table-cell>
          <table:table-cell table:formula="of:=[.D43]-[.D42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9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35416666666667" calcext:value-type="float">
            <text:p>0,00033541666666666700</text:p>
          </table:table-cell>
          <table:table-cell table:formula="of:=[.D44]-[.D43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9" office:value-type="float" office:value="2967" calcext:value-type="float">
            <text:p>296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43402777777778" calcext:value-type="float">
            <text:p>0,00034340277777777800</text:p>
          </table:table-cell>
          <table:table-cell table:formula="of:=[.D45]-[.D44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9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51388888888889" calcext:value-type="float">
            <text:p>0,00035138888888888900</text:p>
          </table:table-cell>
          <table:table-cell table:formula="of:=[.D46]-[.D45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9" office:value-type="float" office:value="3105" calcext:value-type="float">
            <text:p>310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59375" calcext:value-type="float">
            <text:p>0,00035937500000000000</text:p>
          </table:table-cell>
          <table:table-cell table:formula="of:=[.D47]-[.D46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9" office:value-type="float" office:value="3174" calcext:value-type="float">
            <text:p>317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67361111111111" calcext:value-type="float">
            <text:p>0,00036736111111111100</text:p>
          </table:table-cell>
          <table:table-cell table:formula="of:=[.D48]-[.D47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9" office:value-type="float" office:value="3243" calcext:value-type="float">
            <text:p>324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75347222222222" calcext:value-type="float">
            <text:p>0,00037534722222222200</text:p>
          </table:table-cell>
          <table:table-cell table:formula="of:=[.D49]-[.D48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9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83333333333333" calcext:value-type="float">
            <text:p>0,00038333333333333300</text:p>
          </table:table-cell>
          <table:table-cell table:formula="of:=[.D50]-[.D49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9" office:value-type="float" office:value="3381" calcext:value-type="float">
            <text:p>338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91319444444444" calcext:value-type="float">
            <text:p>0,00039131944444444400</text:p>
          </table:table-cell>
          <table:table-cell table:formula="of:=[.D51]-[.D50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9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99305555555556" calcext:value-type="float">
            <text:p>0,00039930555555555600</text:p>
          </table:table-cell>
          <table:table-cell table:formula="of:=[.D52]-[.D51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9" office:value-type="float" office:value="3519" calcext:value-type="float">
            <text:p>351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07291666666667" calcext:value-type="float">
            <text:p>0,00040729166666666700</text:p>
          </table:table-cell>
          <table:table-cell table:formula="of:=[.D53]-[.D52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9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15277777777778" calcext:value-type="float">
            <text:p>0,00041527777777777800</text:p>
          </table:table-cell>
          <table:table-cell table:formula="of:=[.D54]-[.D53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9" office:value-type="float" office:value="3657" calcext:value-type="float">
            <text:p>365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23263888888889" calcext:value-type="float">
            <text:p>0,00042326388888888900</text:p>
          </table:table-cell>
          <table:table-cell table:formula="of:=[.D55]-[.D54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9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3125" calcext:value-type="float">
            <text:p>0,00043125000000000000</text:p>
          </table:table-cell>
          <table:table-cell table:formula="of:=[.D56]-[.D55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9" office:value-type="float" office:value="3795" calcext:value-type="float">
            <text:p>379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39236111111111" calcext:value-type="float">
            <text:p>0,00043923611111111100</text:p>
          </table:table-cell>
          <table:table-cell table:formula="of:=[.D57]-[.D56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9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47222222222222" calcext:value-type="float">
            <text:p>0,00044722222222222200</text:p>
          </table:table-cell>
          <table:table-cell table:formula="of:=[.D58]-[.D57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9" office:value-type="float" office:value="3933" calcext:value-type="float">
            <text:p>393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55208333333333" calcext:value-type="float">
            <text:p>0,00045520833333333300</text:p>
          </table:table-cell>
          <table:table-cell table:formula="of:=[.D59]-[.D58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9" office:value-type="float" office:value="4002" calcext:value-type="float">
            <text:p>400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63194444444444" calcext:value-type="float">
            <text:p>0,00046319444444444400</text:p>
          </table:table-cell>
          <table:table-cell table:formula="of:=[.D60]-[.D59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9" office:value-type="float" office:value="4071" calcext:value-type="float">
            <text:p>407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71180555555556" calcext:value-type="float">
            <text:p>0,00047118055555555600</text:p>
          </table:table-cell>
          <table:table-cell table:formula="of:=[.D61]-[.D60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9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79166666666667" calcext:value-type="float">
            <text:p>0,00047916666666666700</text:p>
          </table:table-cell>
          <table:table-cell table:formula="of:=[.D62]-[.D61]" office:value-type="float" office:value="0.00000798611111111112" calcext:value-type="float">
            <text:p>0,00000798611111111112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9" office:value-type="float" office:value="4209" calcext:value-type="float">
            <text:p>420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87152777777778" calcext:value-type="float">
            <text:p>0,00048715277777777800</text:p>
          </table:table-cell>
          <table:table-cell table:formula="of:=[.D63]-[.D6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9" office:value-type="float" office:value="4278" calcext:value-type="float">
            <text:p>427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95138888888889" calcext:value-type="float">
            <text:p>0,00049513888888888900</text:p>
          </table:table-cell>
          <table:table-cell table:formula="of:=[.D64]-[.D63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9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03125" calcext:value-type="float">
            <text:p>0,00050312500000000000</text:p>
          </table:table-cell>
          <table:table-cell table:formula="of:=[.D65]-[.D6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9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11111111111111" calcext:value-type="float">
            <text:p>0,00051111111111111100</text:p>
          </table:table-cell>
          <table:table-cell table:formula="of:=[.D66]-[.D65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9" office:value-type="float" office:value="4485" calcext:value-type="float">
            <text:p>448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19097222222222" calcext:value-type="float">
            <text:p>0,00051909722222222200</text:p>
          </table:table-cell>
          <table:table-cell table:formula="of:=[.D67]-[.D66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9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27083333333333" calcext:value-type="float">
            <text:p>0,00052708333333333300</text:p>
          </table:table-cell>
          <table:table-cell table:formula="of:=[.D68]-[.D6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9" office:value-type="float" office:value="4623" calcext:value-type="float">
            <text:p>462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35069444444445" calcext:value-type="float">
            <text:p>0,00053506944444444500</text:p>
          </table:table-cell>
          <table:table-cell table:formula="of:=[.D69]-[.D68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9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43055555555556" calcext:value-type="float">
            <text:p>0,00054305555555555600</text:p>
          </table:table-cell>
          <table:table-cell table:formula="of:=[.D70]-[.D6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9" office:value-type="float" office:value="4761" calcext:value-type="float">
            <text:p>476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51041666666667" calcext:value-type="float">
            <text:p>0,00055104166666666700</text:p>
          </table:table-cell>
          <table:table-cell table:formula="of:=[.D71]-[.D70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9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59027777777778" calcext:value-type="float">
            <text:p>0,00055902777777777800</text:p>
          </table:table-cell>
          <table:table-cell table:formula="of:=[.D72]-[.D7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9" office:value-type="float" office:value="4899" calcext:value-type="float">
            <text:p>489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67013888888889" calcext:value-type="float">
            <text:p>0,00056701388888888900</text:p>
          </table:table-cell>
          <table:table-cell table:formula="of:=[.D73]-[.D72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9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75" calcext:value-type="float">
            <text:p>0,00057500000000000000</text:p>
          </table:table-cell>
          <table:table-cell table:formula="of:=[.D74]-[.D7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9" office:value-type="float" office:value="5037" calcext:value-type="float">
            <text:p>503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82986111111111" calcext:value-type="float">
            <text:p>0,00058298611111111100</text:p>
          </table:table-cell>
          <table:table-cell table:formula="of:=[.D75]-[.D74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9" office:value-type="float" office:value="5106" calcext:value-type="float">
            <text:p>510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90972222222222" calcext:value-type="float">
            <text:p>0,00059097222222222200</text:p>
          </table:table-cell>
          <table:table-cell table:formula="of:=[.D76]-[.D75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9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98958333333333" calcext:value-type="float">
            <text:p>0,00059895833333333300</text:p>
          </table:table-cell>
          <table:table-cell table:formula="of:=[.D77]-[.D7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9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06944444444445" calcext:value-type="float">
            <text:p>0,00060694444444444500</text:p>
          </table:table-cell>
          <table:table-cell table:formula="of:=[.D78]-[.D77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9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14930555555556" calcext:value-type="float">
            <text:p>0,00061493055555555600</text:p>
          </table:table-cell>
          <table:table-cell table:formula="of:=[.D79]-[.D7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9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22916666666667" calcext:value-type="float">
            <text:p>0,00062291666666666700</text:p>
          </table:table-cell>
          <table:table-cell table:formula="of:=[.D80]-[.D79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9" office:value-type="float" office:value="5451" calcext:value-type="float">
            <text:p>545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30902777777778" calcext:value-type="float">
            <text:p>0,00063090277777777800</text:p>
          </table:table-cell>
          <table:table-cell table:formula="of:=[.D81]-[.D8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9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38888888888889" calcext:value-type="float">
            <text:p>0,00063888888888888900</text:p>
          </table:table-cell>
          <table:table-cell table:formula="of:=[.D82]-[.D81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9" office:value-type="float" office:value="5589" calcext:value-type="float">
            <text:p>558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46875" calcext:value-type="float">
            <text:p>0,00064687500000000000</text:p>
          </table:table-cell>
          <table:table-cell table:formula="of:=[.D83]-[.D8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9" office:value-type="float" office:value="5658" calcext:value-type="float">
            <text:p>565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54861111111111" calcext:value-type="float">
            <text:p>0,00065486111111111100</text:p>
          </table:table-cell>
          <table:table-cell table:formula="of:=[.D84]-[.D83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9" office:value-type="float" office:value="5727" calcext:value-type="float">
            <text:p>572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62847222222222" calcext:value-type="float">
            <text:p>0,00066284722222222200</text:p>
          </table:table-cell>
          <table:table-cell table:formula="of:=[.D85]-[.D84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9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70833333333333" calcext:value-type="float">
            <text:p>0,00067083333333333300</text:p>
          </table:table-cell>
          <table:table-cell table:formula="of:=[.D86]-[.D8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9" office:value-type="float" office:value="5865" calcext:value-type="float">
            <text:p>586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78819444444445" calcext:value-type="float">
            <text:p>0,00067881944444444500</text:p>
          </table:table-cell>
          <table:table-cell table:formula="of:=[.D87]-[.D86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9" office:value-type="float" office:value="5934" calcext:value-type="float">
            <text:p>593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86805555555556" calcext:value-type="float">
            <text:p>0,00068680555555555600</text:p>
          </table:table-cell>
          <table:table-cell table:formula="of:=[.D88]-[.D8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9" office:value-type="float" office:value="6003" calcext:value-type="float">
            <text:p>600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94791666666667" calcext:value-type="float">
            <text:p>0,00069479166666666700</text:p>
          </table:table-cell>
          <table:table-cell table:formula="of:=[.D89]-[.D88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9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02777777777778" calcext:value-type="float">
            <text:p>0,00070277777777777800</text:p>
          </table:table-cell>
          <table:table-cell table:formula="of:=[.D90]-[.D8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9" office:value-type="float" office:value="6141" calcext:value-type="float">
            <text:p>614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10763888888889" calcext:value-type="float">
            <text:p>0,00071076388888888900</text:p>
          </table:table-cell>
          <table:table-cell table:formula="of:=[.D91]-[.D90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9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1875" calcext:value-type="float">
            <text:p>0,00071875000000000000</text:p>
          </table:table-cell>
          <table:table-cell table:formula="of:=[.D92]-[.D9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9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26736111111111" calcext:value-type="float">
            <text:p>0,00072673611111111100</text:p>
          </table:table-cell>
          <table:table-cell table:formula="of:=[.D93]-[.D92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9" office:value-type="float" office:value="6348" calcext:value-type="float">
            <text:p>634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34722222222222" calcext:value-type="float">
            <text:p>0,00073472222222222200</text:p>
          </table:table-cell>
          <table:table-cell table:formula="of:=[.D94]-[.D93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9" office:value-type="float" office:value="6417" calcext:value-type="float">
            <text:p>641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42708333333333" calcext:value-type="float">
            <text:p>0,00074270833333333300</text:p>
          </table:table-cell>
          <table:table-cell table:formula="of:=[.D95]-[.D9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9" office:value-type="float" office:value="6486" calcext:value-type="float">
            <text:p>648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50694444444445" calcext:value-type="float">
            <text:p>0,00075069444444444500</text:p>
          </table:table-cell>
          <table:table-cell table:formula="of:=[.D96]-[.D95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9" office:value-type="float" office:value="6555" calcext:value-type="float">
            <text:p>655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58680555555556" calcext:value-type="float">
            <text:p>0,00075868055555555600</text:p>
          </table:table-cell>
          <table:table-cell table:formula="of:=[.D97]-[.D9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9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66666666666667" calcext:value-type="float">
            <text:p>0,00076666666666666700</text:p>
          </table:table-cell>
          <table:table-cell table:formula="of:=[.D98]-[.D97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9" office:value-type="float" office:value="6693" calcext:value-type="float">
            <text:p>669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74652777777778" calcext:value-type="float">
            <text:p>0,00077465277777777800</text:p>
          </table:table-cell>
          <table:table-cell table:formula="of:=[.D99]-[.D9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9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82638888888889" calcext:value-type="float">
            <text:p>0,00078263888888888900</text:p>
          </table:table-cell>
          <table:table-cell table:formula="of:=[.D100]-[.D99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9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90625" calcext:value-type="float">
            <text:p>0,00079062500000000000</text:p>
          </table:table-cell>
          <table:table-cell table:formula="of:=[.D101]-[.D10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9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98611111111111" calcext:value-type="float">
            <text:p>0,00079861111111111100</text:p>
          </table:table-cell>
          <table:table-cell table:formula="of:=[.D102]-[.D101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9" office:value-type="float" office:value="6969" calcext:value-type="float">
            <text:p>696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06597222222222" calcext:value-type="float">
            <text:p>0,00080659722222222200</text:p>
          </table:table-cell>
          <table:table-cell table:formula="of:=[.D103]-[.D102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9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14583333333333" calcext:value-type="float">
            <text:p>0,00081458333333333300</text:p>
          </table:table-cell>
          <table:table-cell table:formula="of:=[.D104]-[.D10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9" office:value-type="float" office:value="7107" calcext:value-type="float">
            <text:p>710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22569444444445" calcext:value-type="float">
            <text:p>0,00082256944444444500</text:p>
          </table:table-cell>
          <table:table-cell table:formula="of:=[.D105]-[.D104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9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30555555555556" calcext:value-type="float">
            <text:p>0,00083055555555555600</text:p>
          </table:table-cell>
          <table:table-cell table:formula="of:=[.D106]-[.D10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9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38541666666667" calcext:value-type="float">
            <text:p>0,00083854166666666700</text:p>
          </table:table-cell>
          <table:table-cell table:formula="of:=[.D107]-[.D106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9" office:value-type="float" office:value="7314" calcext:value-type="float">
            <text:p>731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46527777777778" calcext:value-type="float">
            <text:p>0,00084652777777777800</text:p>
          </table:table-cell>
          <table:table-cell table:formula="of:=[.D108]-[.D10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9" office:value-type="float" office:value="7383" calcext:value-type="float">
            <text:p>738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54513888888889" calcext:value-type="float">
            <text:p>0,00085451388888888900</text:p>
          </table:table-cell>
          <table:table-cell table:formula="of:=[.D109]-[.D108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9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625" calcext:value-type="float">
            <text:p>0,00086250000000000000</text:p>
          </table:table-cell>
          <table:table-cell table:formula="of:=[.D110]-[.D10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9" office:value-type="float" office:value="7521" calcext:value-type="float">
            <text:p>752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70486111111111" calcext:value-type="float">
            <text:p>0,00087048611111111100</text:p>
          </table:table-cell>
          <table:table-cell table:formula="of:=[.D111]-[.D110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9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78472222222222" calcext:value-type="float">
            <text:p>0,00087847222222222200</text:p>
          </table:table-cell>
          <table:table-cell table:formula="of:=[.D112]-[.D111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9" office:value-type="float" office:value="7659" calcext:value-type="float">
            <text:p>765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86458333333333" calcext:value-type="float">
            <text:p>0,00088645833333333300</text:p>
          </table:table-cell>
          <table:table-cell table:formula="of:=[.D113]-[.D11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9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94444444444445" calcext:value-type="float">
            <text:p>0,00089444444444444500</text:p>
          </table:table-cell>
          <table:table-cell table:formula="of:=[.D114]-[.D113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9" office:value-type="float" office:value="7797" calcext:value-type="float">
            <text:p>779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02430555555556" calcext:value-type="float">
            <text:p>0,00090243055555555600</text:p>
          </table:table-cell>
          <table:table-cell table:formula="of:=[.D115]-[.D11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9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10416666666667" calcext:value-type="float">
            <text:p>0,00091041666666666700</text:p>
          </table:table-cell>
          <table:table-cell table:formula="of:=[.D116]-[.D115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9" office:value-type="float" office:value="7935" calcext:value-type="float">
            <text:p>793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18402777777778" calcext:value-type="float">
            <text:p>0,00091840277777777800</text:p>
          </table:table-cell>
          <table:table-cell table:formula="of:=[.D117]-[.D11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9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26388888888889" calcext:value-type="float">
            <text:p>0,00092638888888888900</text:p>
          </table:table-cell>
          <table:table-cell table:formula="of:=[.D118]-[.D117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9" office:value-type="float" office:value="8073" calcext:value-type="float">
            <text:p>807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34375" calcext:value-type="float">
            <text:p>0,00093437500000000000</text:p>
          </table:table-cell>
          <table:table-cell table:formula="of:=[.D119]-[.D11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9" office:value-type="float" office:value="8142" calcext:value-type="float">
            <text:p>814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42361111111111" calcext:value-type="float">
            <text:p>0,00094236111111111100</text:p>
          </table:table-cell>
          <table:table-cell table:formula="of:=[.D120]-[.D119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9" office:value-type="float" office:value="8211" calcext:value-type="float">
            <text:p>821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50347222222222" calcext:value-type="float">
            <text:p>0,00095034722222222200</text:p>
          </table:table-cell>
          <table:table-cell table:formula="of:=[.D121]-[.D120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9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58333333333333" calcext:value-type="float">
            <text:p>0,00095833333333333300</text:p>
          </table:table-cell>
          <table:table-cell table:formula="of:=[.D122]-[.D12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9" office:value-type="float" office:value="8349" calcext:value-type="float">
            <text:p>834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66319444444445" calcext:value-type="float">
            <text:p>0,00096631944444444500</text:p>
          </table:table-cell>
          <table:table-cell table:formula="of:=[.D123]-[.D122]" office:value-type="float" office:value="0.00000798611111111106" calcext:value-type="float">
            <text:p>0,00000798611111111106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9" office:value-type="float" office:value="8418" calcext:value-type="float">
            <text:p>841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74305555555556" calcext:value-type="float">
            <text:p>0,00097430555555555600</text:p>
          </table:table-cell>
          <table:table-cell table:formula="of:=[.D124]-[.D12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9" office:value-type="float" office:value="8487" calcext:value-type="float">
            <text:p>848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82291666666667" calcext:value-type="float">
            <text:p>0,00098229166666666700</text:p>
          </table:table-cell>
          <table:table-cell table:formula="of:=[.D125]-[.D12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9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90277777777778" calcext:value-type="float">
            <text:p>0,00099027777777777800</text:p>
          </table:table-cell>
          <table:table-cell table:formula="of:=[.D126]-[.D12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9" office:value-type="float" office:value="8625" calcext:value-type="float">
            <text:p>8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98263888888889" calcext:value-type="float">
            <text:p>0,00099826388888888900</text:p>
          </table:table-cell>
          <table:table-cell table:formula="of:=[.D127]-[.D12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9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0625" calcext:value-type="float">
            <text:p>0,00100625000000000000</text:p>
          </table:table-cell>
          <table:table-cell table:formula="of:=[.D128]-[.D12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9" office:value-type="float" office:value="8763" calcext:value-type="float">
            <text:p>876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01423611111111" calcext:value-type="float">
            <text:p>0,00101423611111111000</text:p>
          </table:table-cell>
          <table:table-cell table:formula="of:=[.D129]-[.D12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9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2222222222222" calcext:value-type="float">
            <text:p>0,00102222222222222000</text:p>
          </table:table-cell>
          <table:table-cell table:formula="of:=[.D130]-[.D12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9" office:value-type="float" office:value="8901" calcext:value-type="float">
            <text:p>890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3020833333333" calcext:value-type="float">
            <text:p>0,00103020833333333000</text:p>
          </table:table-cell>
          <table:table-cell table:formula="of:=[.D131]-[.D13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9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3819444444444" calcext:value-type="float">
            <text:p>0,00103819444444444000</text:p>
          </table:table-cell>
          <table:table-cell table:formula="of:=[.D132]-[.D13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9" office:value-type="float" office:value="9039" calcext:value-type="float">
            <text:p>903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4618055555556" calcext:value-type="float">
            <text:p>0,00104618055555556000</text:p>
          </table:table-cell>
          <table:table-cell table:formula="of:=[.D133]-[.D13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9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05416666666667" calcext:value-type="float">
            <text:p>0,00105416666666667000</text:p>
          </table:table-cell>
          <table:table-cell table:formula="of:=[.D134]-[.D13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9" office:value-type="float" office:value="9177" calcext:value-type="float">
            <text:p>917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6215277777778" calcext:value-type="float">
            <text:p>0,00106215277777778000</text:p>
          </table:table-cell>
          <table:table-cell table:formula="of:=[.D135]-[.D13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9" office:value-type="float" office:value="9246" calcext:value-type="float">
            <text:p>924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07013888888889" calcext:value-type="float">
            <text:p>0,00107013888888889000</text:p>
          </table:table-cell>
          <table:table-cell table:formula="of:=[.D136]-[.D13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9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078125" calcext:value-type="float">
            <text:p>0,00107812500000000000</text:p>
          </table:table-cell>
          <table:table-cell table:formula="of:=[.D137]-[.D13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9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08611111111111" calcext:value-type="float">
            <text:p>0,00108611111111111000</text:p>
          </table:table-cell>
          <table:table-cell table:formula="of:=[.D138]-[.D13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9" office:value-type="float" office:value="9453" calcext:value-type="float">
            <text:p>945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09409722222222" calcext:value-type="float">
            <text:p>0,00109409722222222000</text:p>
          </table:table-cell>
          <table:table-cell table:formula="of:=[.D139]-[.D13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9" office:value-type="float" office:value="9522" calcext:value-type="float">
            <text:p>952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0208333333333" calcext:value-type="float">
            <text:p>0,00110208333333333000</text:p>
          </table:table-cell>
          <table:table-cell table:formula="of:=[.D140]-[.D13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9" office:value-type="float" office:value="9591" calcext:value-type="float">
            <text:p>959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11006944444444" calcext:value-type="float">
            <text:p>0,00111006944444444000</text:p>
          </table:table-cell>
          <table:table-cell table:formula="of:=[.D141]-[.D14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9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1805555555556" calcext:value-type="float">
            <text:p>0,00111805555555556000</text:p>
          </table:table-cell>
          <table:table-cell table:formula="of:=[.D142]-[.D14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9" office:value-type="float" office:value="9729" calcext:value-type="float">
            <text:p>972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12604166666667" calcext:value-type="float">
            <text:p>0,00112604166666667000</text:p>
          </table:table-cell>
          <table:table-cell table:formula="of:=[.D143]-[.D14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9" office:value-type="float" office:value="9798" calcext:value-type="float">
            <text:p>979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3402777777778" calcext:value-type="float">
            <text:p>0,00113402777777778000</text:p>
          </table:table-cell>
          <table:table-cell table:formula="of:=[.D144]-[.D14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9" office:value-type="float" office:value="9867" calcext:value-type="float">
            <text:p>986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14201388888889" calcext:value-type="float">
            <text:p>0,00114201388888889000</text:p>
          </table:table-cell>
          <table:table-cell table:formula="of:=[.D145]-[.D14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9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15" calcext:value-type="float">
            <text:p>0,00115000000000000000</text:p>
          </table:table-cell>
          <table:table-cell table:formula="of:=[.D146]-[.D14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9" office:value-type="float" office:value="10005" calcext:value-type="float">
            <text:p>1000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15798611111111" calcext:value-type="float">
            <text:p>0,00115798611111111000</text:p>
          </table:table-cell>
          <table:table-cell table:formula="of:=[.D147]-[.D14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9" office:value-type="float" office:value="10074" calcext:value-type="float">
            <text:p>1007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16597222222222" calcext:value-type="float">
            <text:p>0,00116597222222222000</text:p>
          </table:table-cell>
          <table:table-cell table:formula="of:=[.D148]-[.D14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9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17395833333333" calcext:value-type="float">
            <text:p>0,00117395833333333000</text:p>
          </table:table-cell>
          <table:table-cell table:formula="of:=[.D149]-[.D14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9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18194444444444" calcext:value-type="float">
            <text:p>0,00118194444444444000</text:p>
          </table:table-cell>
          <table:table-cell table:formula="of:=[.D150]-[.D14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9" office:value-type="float" office:value="10281" calcext:value-type="float">
            <text:p>1028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18993055555556" calcext:value-type="float">
            <text:p>0,00118993055555556000</text:p>
          </table:table-cell>
          <table:table-cell table:formula="of:=[.D151]-[.D15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9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19791666666667" calcext:value-type="float">
            <text:p>0,00119791666666667000</text:p>
          </table:table-cell>
          <table:table-cell table:formula="of:=[.D152]-[.D15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9" office:value-type="float" office:value="10419" calcext:value-type="float">
            <text:p>1041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20590277777778" calcext:value-type="float">
            <text:p>0,00120590277777778000</text:p>
          </table:table-cell>
          <table:table-cell table:formula="of:=[.D153]-[.D15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9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21388888888889" calcext:value-type="float">
            <text:p>0,00121388888888889000</text:p>
          </table:table-cell>
          <table:table-cell table:formula="of:=[.D154]-[.D15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9" office:value-type="float" office:value="10557" calcext:value-type="float">
            <text:p>1055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221875" calcext:value-type="float">
            <text:p>0,00122187500000000000</text:p>
          </table:table-cell>
          <table:table-cell table:formula="of:=[.D155]-[.D15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9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22986111111111" calcext:value-type="float">
            <text:p>0,00122986111111111000</text:p>
          </table:table-cell>
          <table:table-cell table:formula="of:=[.D156]-[.D15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9" office:value-type="float" office:value="10695" calcext:value-type="float">
            <text:p>1069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23784722222222" calcext:value-type="float">
            <text:p>0,00123784722222222000</text:p>
          </table:table-cell>
          <table:table-cell table:formula="of:=[.D157]-[.D15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9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24583333333333" calcext:value-type="float">
            <text:p>0,00124583333333333000</text:p>
          </table:table-cell>
          <table:table-cell table:formula="of:=[.D158]-[.D15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9" office:value-type="float" office:value="10833" calcext:value-type="float">
            <text:p>1083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25381944444444" calcext:value-type="float">
            <text:p>0,00125381944444444000</text:p>
          </table:table-cell>
          <table:table-cell table:formula="of:=[.D159]-[.D15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9" office:value-type="float" office:value="10902" calcext:value-type="float">
            <text:p>1090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26180555555556" calcext:value-type="float">
            <text:p>0,00126180555555556000</text:p>
          </table:table-cell>
          <table:table-cell table:formula="of:=[.D160]-[.D15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9" office:value-type="float" office:value="10971" calcext:value-type="float">
            <text:p>1097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26979166666667" calcext:value-type="float">
            <text:p>0,00126979166666667000</text:p>
          </table:table-cell>
          <table:table-cell table:formula="of:=[.D161]-[.D16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9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27777777777778" calcext:value-type="float">
            <text:p>0,00127777777777778000</text:p>
          </table:table-cell>
          <table:table-cell table:formula="of:=[.D162]-[.D16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9" office:value-type="float" office:value="11109" calcext:value-type="float">
            <text:p>1110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28576388888889" calcext:value-type="float">
            <text:p>0,00128576388888889000</text:p>
          </table:table-cell>
          <table:table-cell table:formula="of:=[.D163]-[.D16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9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29375" calcext:value-type="float">
            <text:p>0,00129375000000000000</text:p>
          </table:table-cell>
          <table:table-cell table:formula="of:=[.D164]-[.D16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9" office:value-type="float" office:value="11247" calcext:value-type="float">
            <text:p>1124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30173611111111" calcext:value-type="float">
            <text:p>0,00130173611111111000</text:p>
          </table:table-cell>
          <table:table-cell table:formula="of:=[.D165]-[.D16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9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30972222222222" calcext:value-type="float">
            <text:p>0,00130972222222222000</text:p>
          </table:table-cell>
          <table:table-cell table:formula="of:=[.D166]-[.D16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9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31770833333333" calcext:value-type="float">
            <text:p>0,00131770833333333000</text:p>
          </table:table-cell>
          <table:table-cell table:formula="of:=[.D167]-[.D16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9" office:value-type="float" office:value="11454" calcext:value-type="float">
            <text:p>1145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32569444444444" calcext:value-type="float">
            <text:p>0,00132569444444444000</text:p>
          </table:table-cell>
          <table:table-cell table:formula="of:=[.D168]-[.D16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9" office:value-type="float" office:value="11523" calcext:value-type="float">
            <text:p>1152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33368055555556" calcext:value-type="float">
            <text:p>0,00133368055555556000</text:p>
          </table:table-cell>
          <table:table-cell table:formula="of:=[.D169]-[.D16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9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34166666666667" calcext:value-type="float">
            <text:p>0,00134166666666667000</text:p>
          </table:table-cell>
          <table:table-cell table:formula="of:=[.D170]-[.D16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9" office:value-type="float" office:value="11661" calcext:value-type="float">
            <text:p>1166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34965277777778" calcext:value-type="float">
            <text:p>0,00134965277777778000</text:p>
          </table:table-cell>
          <table:table-cell table:formula="of:=[.D171]-[.D17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9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35763888888889" calcext:value-type="float">
            <text:p>0,00135763888888889000</text:p>
          </table:table-cell>
          <table:table-cell table:formula="of:=[.D172]-[.D17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9" office:value-type="float" office:value="11799" calcext:value-type="float">
            <text:p>1179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365625" calcext:value-type="float">
            <text:p>0,00136562500000000000</text:p>
          </table:table-cell>
          <table:table-cell table:formula="of:=[.D173]-[.D17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9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37361111111111" calcext:value-type="float">
            <text:p>0,00137361111111111000</text:p>
          </table:table-cell>
          <table:table-cell table:formula="of:=[.D174]-[.D17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9" office:value-type="float" office:value="11937" calcext:value-type="float">
            <text:p>1193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38159722222222" calcext:value-type="float">
            <text:p>0,00138159722222222000</text:p>
          </table:table-cell>
          <table:table-cell table:formula="of:=[.D175]-[.D17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9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38958333333333" calcext:value-type="float">
            <text:p>0,00138958333333333000</text:p>
          </table:table-cell>
          <table:table-cell table:formula="of:=[.D176]-[.D17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9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39756944444444" calcext:value-type="float">
            <text:p>0,00139756944444444000</text:p>
          </table:table-cell>
          <table:table-cell table:formula="of:=[.D177]-[.D17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9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40555555555556" calcext:value-type="float">
            <text:p>0,00140555555555556000</text:p>
          </table:table-cell>
          <table:table-cell table:formula="of:=[.D178]-[.D17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9" office:value-type="float" office:value="12213" calcext:value-type="float">
            <text:p>1221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41354166666667" calcext:value-type="float">
            <text:p>0,00141354166666667000</text:p>
          </table:table-cell>
          <table:table-cell table:formula="of:=[.D179]-[.D17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9" office:value-type="float" office:value="12282" calcext:value-type="float">
            <text:p>1228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42152777777778" calcext:value-type="float">
            <text:p>0,00142152777777778000</text:p>
          </table:table-cell>
          <table:table-cell table:formula="of:=[.D180]-[.D17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9" office:value-type="float" office:value="12351" calcext:value-type="float">
            <text:p>1235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42951388888889" calcext:value-type="float">
            <text:p>0,00142951388888889000</text:p>
          </table:table-cell>
          <table:table-cell table:formula="of:=[.D181]-[.D18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9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4375" calcext:value-type="float">
            <text:p>0,00143750000000000000</text:p>
          </table:table-cell>
          <table:table-cell table:formula="of:=[.D182]-[.D18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9" office:value-type="float" office:value="12489" calcext:value-type="float">
            <text:p>1248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44548611111111" calcext:value-type="float">
            <text:p>0,00144548611111111000</text:p>
          </table:table-cell>
          <table:table-cell table:formula="of:=[.D183]-[.D18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9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45347222222222" calcext:value-type="float">
            <text:p>0,00145347222222222000</text:p>
          </table:table-cell>
          <table:table-cell table:formula="of:=[.D184]-[.D18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9" office:value-type="float" office:value="12627" calcext:value-type="float">
            <text:p>1262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46145833333333" calcext:value-type="float">
            <text:p>0,00146145833333333000</text:p>
          </table:table-cell>
          <table:table-cell table:formula="of:=[.D185]-[.D18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9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46944444444444" calcext:value-type="float">
            <text:p>0,00146944444444444000</text:p>
          </table:table-cell>
          <table:table-cell table:formula="of:=[.D186]-[.D18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9" office:value-type="float" office:value="12765" calcext:value-type="float">
            <text:p>1276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47743055555556" calcext:value-type="float">
            <text:p>0,00147743055555556000</text:p>
          </table:table-cell>
          <table:table-cell table:formula="of:=[.D187]-[.D18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9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48541666666667" calcext:value-type="float">
            <text:p>0,00148541666666667000</text:p>
          </table:table-cell>
          <table:table-cell table:formula="of:=[.D188]-[.D18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9" office:value-type="float" office:value="12903" calcext:value-type="float">
            <text:p>1290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49340277777778" calcext:value-type="float">
            <text:p>0,00149340277777778000</text:p>
          </table:table-cell>
          <table:table-cell table:formula="of:=[.D189]-[.D18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9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50138888888889" calcext:value-type="float">
            <text:p>0,00150138888888889000</text:p>
          </table:table-cell>
          <table:table-cell table:formula="of:=[.D190]-[.D18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9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509375" calcext:value-type="float">
            <text:p>0,00150937500000000000</text:p>
          </table:table-cell>
          <table:table-cell table:formula="of:=[.D191]-[.D19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9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51736111111111" calcext:value-type="float">
            <text:p>0,00151736111111111000</text:p>
          </table:table-cell>
          <table:table-cell table:formula="of:=[.D192]-[.D19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9" office:value-type="float" office:value="13179" calcext:value-type="float">
            <text:p>1317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52534722222222" calcext:value-type="float">
            <text:p>0,00152534722222222000</text:p>
          </table:table-cell>
          <table:table-cell table:formula="of:=[.D193]-[.D19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9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53333333333333" calcext:value-type="float">
            <text:p>0,00153333333333333000</text:p>
          </table:table-cell>
          <table:table-cell table:formula="of:=[.D194]-[.D19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9" office:value-type="float" office:value="13317" calcext:value-type="float">
            <text:p>1331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54131944444444" calcext:value-type="float">
            <text:p>0,00154131944444444000</text:p>
          </table:table-cell>
          <table:table-cell table:formula="of:=[.D195]-[.D19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9" office:value-type="float" office:value="13386" calcext:value-type="float">
            <text:p>1338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54930555555556" calcext:value-type="float">
            <text:p>0,00154930555555556000</text:p>
          </table:table-cell>
          <table:table-cell table:formula="of:=[.D196]-[.D19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9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55729166666667" calcext:value-type="float">
            <text:p>0,00155729166666667000</text:p>
          </table:table-cell>
          <table:table-cell table:formula="of:=[.D197]-[.D19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9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56527777777778" calcext:value-type="float">
            <text:p>0,00156527777777778000</text:p>
          </table:table-cell>
          <table:table-cell table:formula="of:=[.D198]-[.D19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9" office:value-type="float" office:value="13593" calcext:value-type="float">
            <text:p>1359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57326388888889" calcext:value-type="float">
            <text:p>0,00157326388888889000</text:p>
          </table:table-cell>
          <table:table-cell table:formula="of:=[.D199]-[.D19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9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58125" calcext:value-type="float">
            <text:p>0,00158125000000000000</text:p>
          </table:table-cell>
          <table:table-cell table:formula="of:=[.D200]-[.D19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9" office:value-type="float" office:value="13731" calcext:value-type="float">
            <text:p>1373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58923611111111" calcext:value-type="float">
            <text:p>0,00158923611111111000</text:p>
          </table:table-cell>
          <table:table-cell table:formula="of:=[.D201]-[.D20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9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59722222222222" calcext:value-type="float">
            <text:p>0,00159722222222222000</text:p>
          </table:table-cell>
          <table:table-cell table:formula="of:=[.D202]-[.D20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9" office:value-type="float" office:value="13869" calcext:value-type="float">
            <text:p>1386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60520833333333" calcext:value-type="float">
            <text:p>0,00160520833333333000</text:p>
          </table:table-cell>
          <table:table-cell table:formula="of:=[.D203]-[.D20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9" office:value-type="float" office:value="13938" calcext:value-type="float">
            <text:p>1393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61319444444444" calcext:value-type="float">
            <text:p>0,00161319444444444000</text:p>
          </table:table-cell>
          <table:table-cell table:formula="of:=[.D204]-[.D20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9" office:value-type="float" office:value="14007" calcext:value-type="float">
            <text:p>1400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62118055555556" calcext:value-type="float">
            <text:p>0,00162118055555556000</text:p>
          </table:table-cell>
          <table:table-cell table:formula="of:=[.D205]-[.D20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9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62916666666667" calcext:value-type="float">
            <text:p>0,00162916666666667000</text:p>
          </table:table-cell>
          <table:table-cell table:formula="of:=[.D206]-[.D20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9" office:value-type="float" office:value="14145" calcext:value-type="float">
            <text:p>1414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63715277777778" calcext:value-type="float">
            <text:p>0,00163715277777778000</text:p>
          </table:table-cell>
          <table:table-cell table:formula="of:=[.D207]-[.D20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9" office:value-type="float" office:value="14214" calcext:value-type="float">
            <text:p>1421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64513888888889" calcext:value-type="float">
            <text:p>0,00164513888888889000</text:p>
          </table:table-cell>
          <table:table-cell table:formula="of:=[.D208]-[.D20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9" office:value-type="float" office:value="14283" calcext:value-type="float">
            <text:p>1428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653125" calcext:value-type="float">
            <text:p>0,00165312500000000000</text:p>
          </table:table-cell>
          <table:table-cell table:formula="of:=[.D209]-[.D20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9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66111111111111" calcext:value-type="float">
            <text:p>0,00166111111111111000</text:p>
          </table:table-cell>
          <table:table-cell table:formula="of:=[.D210]-[.D20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9" office:value-type="float" office:value="14421" calcext:value-type="float">
            <text:p>1442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66909722222222" calcext:value-type="float">
            <text:p>0,00166909722222222000</text:p>
          </table:table-cell>
          <table:table-cell table:formula="of:=[.D211]-[.D21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9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67708333333333" calcext:value-type="float">
            <text:p>0,00167708333333333000</text:p>
          </table:table-cell>
          <table:table-cell table:formula="of:=[.D212]-[.D21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9" office:value-type="float" office:value="14559" calcext:value-type="float">
            <text:p>1455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68506944444444" calcext:value-type="float">
            <text:p>0,00168506944444444000</text:p>
          </table:table-cell>
          <table:table-cell table:formula="of:=[.D213]-[.D21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9" office:value-type="float" office:value="14628" calcext:value-type="float">
            <text:p>1462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69305555555556" calcext:value-type="float">
            <text:p>0,00169305555555556000</text:p>
          </table:table-cell>
          <table:table-cell table:formula="of:=[.D214]-[.D21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9" office:value-type="float" office:value="14697" calcext:value-type="float">
            <text:p>1469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70104166666667" calcext:value-type="float">
            <text:p>0,00170104166666667000</text:p>
          </table:table-cell>
          <table:table-cell table:formula="of:=[.D215]-[.D21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9" office:value-type="float" office:value="14766" calcext:value-type="float">
            <text:p>1476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70902777777778" calcext:value-type="float">
            <text:p>0,00170902777777778000</text:p>
          </table:table-cell>
          <table:table-cell table:formula="of:=[.D216]-[.D21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9" office:value-type="float" office:value="14835" calcext:value-type="float">
            <text:p>1483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71701388888889" calcext:value-type="float">
            <text:p>0,00171701388888889000</text:p>
          </table:table-cell>
          <table:table-cell table:formula="of:=[.D217]-[.D21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9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725" calcext:value-type="float">
            <text:p>0,00172500000000000000</text:p>
          </table:table-cell>
          <table:table-cell table:formula="of:=[.D218]-[.D21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9" office:value-type="float" office:value="14973" calcext:value-type="float">
            <text:p>1497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73298611111111" calcext:value-type="float">
            <text:p>0,00173298611111111000</text:p>
          </table:table-cell>
          <table:table-cell table:formula="of:=[.D219]-[.D21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9" office:value-type="float" office:value="15042" calcext:value-type="float">
            <text:p>1504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74097222222222" calcext:value-type="float">
            <text:p>0,00174097222222222000</text:p>
          </table:table-cell>
          <table:table-cell table:formula="of:=[.D220]-[.D21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9" office:value-type="float" office:value="15111" calcext:value-type="float">
            <text:p>1511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74895833333333" calcext:value-type="float">
            <text:p>0,00174895833333333000</text:p>
          </table:table-cell>
          <table:table-cell table:formula="of:=[.D221]-[.D220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9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75694444444444" calcext:value-type="float">
            <text:p>0,00175694444444444000</text:p>
          </table:table-cell>
          <table:table-cell table:formula="of:=[.D222]-[.D22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9" office:value-type="float" office:value="15249" calcext:value-type="float">
            <text:p>1524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76493055555556" calcext:value-type="float">
            <text:p>0,00176493055555556000</text:p>
          </table:table-cell>
          <table:table-cell table:formula="of:=[.D223]-[.D22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9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77291666666667" calcext:value-type="float">
            <text:p>0,00177291666666667000</text:p>
          </table:table-cell>
          <table:table-cell table:formula="of:=[.D224]-[.D22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9" office:value-type="float" office:value="15387" calcext:value-type="float">
            <text:p>1538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78090277777778" calcext:value-type="float">
            <text:p>0,00178090277777778000</text:p>
          </table:table-cell>
          <table:table-cell table:formula="of:=[.D225]-[.D22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9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78888888888889" calcext:value-type="float">
            <text:p>0,00178888888888889000</text:p>
          </table:table-cell>
          <table:table-cell table:formula="of:=[.D226]-[.D22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9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796875" calcext:value-type="float">
            <text:p>0,00179687500000000000</text:p>
          </table:table-cell>
          <table:table-cell table:formula="of:=[.D227]-[.D22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9" office:value-type="float" office:value="15594" calcext:value-type="float">
            <text:p>1559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80486111111111" calcext:value-type="float">
            <text:p>0,00180486111111111000</text:p>
          </table:table-cell>
          <table:table-cell table:formula="of:=[.D228]-[.D227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9" office:value-type="float" office:value="15663" calcext:value-type="float">
            <text:p>1566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81284722222222" calcext:value-type="float">
            <text:p>0,00181284722222222000</text:p>
          </table:table-cell>
          <table:table-cell table:formula="of:=[.D229]-[.D22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9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82083333333333" calcext:value-type="float">
            <text:p>0,00182083333333333000</text:p>
          </table:table-cell>
          <table:table-cell table:formula="of:=[.D230]-[.D22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9" office:value-type="float" office:value="15801" calcext:value-type="float">
            <text:p>1580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82881944444444" calcext:value-type="float">
            <text:p>0,00182881944444444000</text:p>
          </table:table-cell>
          <table:table-cell table:formula="of:=[.D231]-[.D23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9" office:value-type="float" office:value="15870" calcext:value-type="float">
            <text:p>158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83680555555556" calcext:value-type="float">
            <text:p>0,00183680555555556000</text:p>
          </table:table-cell>
          <table:table-cell table:formula="of:=[.D232]-[.D23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9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84479166666667" calcext:value-type="float">
            <text:p>0,00184479166666667000</text:p>
          </table:table-cell>
          <table:table-cell table:formula="of:=[.D233]-[.D23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9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85277777777778" calcext:value-type="float">
            <text:p>0,00185277777777778000</text:p>
          </table:table-cell>
          <table:table-cell table:formula="of:=[.D234]-[.D23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9" office:value-type="float" office:value="16077" calcext:value-type="float">
            <text:p>1607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86076388888889" calcext:value-type="float">
            <text:p>0,00186076388888889000</text:p>
          </table:table-cell>
          <table:table-cell table:formula="of:=[.D235]-[.D234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9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86875" calcext:value-type="float">
            <text:p>0,00186875000000000000</text:p>
          </table:table-cell>
          <table:table-cell table:formula="of:=[.D236]-[.D235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9" office:value-type="float" office:value="16215" calcext:value-type="float">
            <text:p>1621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87673611111111" calcext:value-type="float">
            <text:p>0,00187673611111111000</text:p>
          </table:table-cell>
          <table:table-cell table:formula="of:=[.D237]-[.D236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9" office:value-type="float" office:value="16284" calcext:value-type="float">
            <text:p>1628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88472222222222" calcext:value-type="float">
            <text:p>0,00188472222222222000</text:p>
          </table:table-cell>
          <table:table-cell table:formula="of:=[.D238]-[.D23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9" office:value-type="float" office:value="16353" calcext:value-type="float">
            <text:p>1635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89270833333333" calcext:value-type="float">
            <text:p>0,00189270833333333000</text:p>
          </table:table-cell>
          <table:table-cell table:formula="of:=[.D239]-[.D238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9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90069444444444" calcext:value-type="float">
            <text:p>0,00190069444444444000</text:p>
          </table:table-cell>
          <table:table-cell table:formula="of:=[.D240]-[.D239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9" office:value-type="float" office:value="16491" calcext:value-type="float">
            <text:p>1649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90868055555556" calcext:value-type="float">
            <text:p>0,00190868055555556000</text:p>
          </table:table-cell>
          <table:table-cell table:formula="of:=[.D241]-[.D24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9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91666666666667" calcext:value-type="float">
            <text:p>0,00191666666666667000</text:p>
          </table:table-cell>
          <table:table-cell table:formula="of:=[.D242]-[.D241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9" office:value-type="float" office:value="16629" calcext:value-type="float">
            <text:p>1662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92465277777778" calcext:value-type="float">
            <text:p>0,00192465277777778000</text:p>
          </table:table-cell>
          <table:table-cell table:formula="of:=[.D243]-[.D242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9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93263888888889" calcext:value-type="float">
            <text:p>0,00193263888888889000</text:p>
          </table:table-cell>
          <table:table-cell table:formula="of:=[.D244]-[.D243]" office:value-type="float" office:value="0.00000798611111111117" calcext:value-type="float">
            <text:p>0,00000798611111111117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9" office:value-type="float" office:value="16767" calcext:value-type="float">
            <text:p>1676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940625" calcext:value-type="float">
            <text:p>0,00194062500000000000</text:p>
          </table:table-cell>
          <table:table-cell table:formula="of:=[.D245]-[.D24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9" office:value-type="float" office:value="16836" calcext:value-type="float">
            <text:p>1683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94861111111111" calcext:value-type="float">
            <text:p>0,00194861111111111000</text:p>
          </table:table-cell>
          <table:table-cell table:formula="of:=[.D246]-[.D245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9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95659722222222" calcext:value-type="float">
            <text:p>0,00195659722222222000</text:p>
          </table:table-cell>
          <table:table-cell table:formula="of:=[.D247]-[.D24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9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96458333333333" calcext:value-type="float">
            <text:p>0,00196458333333333000</text:p>
          </table:table-cell>
          <table:table-cell table:formula="of:=[.D248]-[.D24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9" office:value-type="float" office:value="17043" calcext:value-type="float">
            <text:p>1704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97256944444444" calcext:value-type="float">
            <text:p>0,00197256944444444000</text:p>
          </table:table-cell>
          <table:table-cell table:formula="of:=[.D249]-[.D248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9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98055555555556" calcext:value-type="float">
            <text:p>0,00198055555555556000</text:p>
          </table:table-cell>
          <table:table-cell table:formula="of:=[.D250]-[.D24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9" office:value-type="float" office:value="17181" calcext:value-type="float">
            <text:p>1718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98854166666667" calcext:value-type="float">
            <text:p>0,00198854166666667000</text:p>
          </table:table-cell>
          <table:table-cell table:formula="of:=[.D251]-[.D25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9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99652777777778" calcext:value-type="float">
            <text:p>0,00199652777777778000</text:p>
          </table:table-cell>
          <table:table-cell table:formula="of:=[.D252]-[.D251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9" office:value-type="float" office:value="17319" calcext:value-type="float">
            <text:p>1731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00451388888889" calcext:value-type="float">
            <text:p>0,00200451388888889000</text:p>
          </table:table-cell>
          <table:table-cell table:formula="of:=[.D253]-[.D25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9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0125" calcext:value-type="float">
            <text:p>0,00201250000000000000</text:p>
          </table:table-cell>
          <table:table-cell table:formula="of:=[.D254]-[.D25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9" office:value-type="float" office:value="17457" calcext:value-type="float">
            <text:p>1745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02048611111111" calcext:value-type="float">
            <text:p>0,00202048611111111000</text:p>
          </table:table-cell>
          <table:table-cell table:formula="of:=[.D255]-[.D254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9" office:value-type="float" office:value="17526" calcext:value-type="float">
            <text:p>1752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02847222222222" calcext:value-type="float">
            <text:p>0,00202847222222222000</text:p>
          </table:table-cell>
          <table:table-cell table:formula="of:=[.D256]-[.D25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9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03645833333333" calcext:value-type="float">
            <text:p>0,00203645833333333000</text:p>
          </table:table-cell>
          <table:table-cell table:formula="of:=[.D257]-[.D256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9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04444444444444" calcext:value-type="float">
            <text:p>0,00204444444444444000</text:p>
          </table:table-cell>
          <table:table-cell table:formula="of:=[.D258]-[.D25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9" office:value-type="float" office:value="17733" calcext:value-type="float">
            <text:p>1773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05243055555556" calcext:value-type="float">
            <text:p>0,00205243055555556000</text:p>
          </table:table-cell>
          <table:table-cell table:formula="of:=[.D259]-[.D25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9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06041666666667" calcext:value-type="float">
            <text:p>0,00206041666666667000</text:p>
          </table:table-cell>
          <table:table-cell table:formula="of:=[.D260]-[.D259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9" office:value-type="float" office:value="17871" calcext:value-type="float">
            <text:p>1787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06840277777778" calcext:value-type="float">
            <text:p>0,00206840277777778000</text:p>
          </table:table-cell>
          <table:table-cell table:formula="of:=[.D261]-[.D26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9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07638888888889" calcext:value-type="float">
            <text:p>0,00207638888888889000</text:p>
          </table:table-cell>
          <table:table-cell table:formula="of:=[.D262]-[.D26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9" office:value-type="float" office:value="18009" calcext:value-type="float">
            <text:p>1800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084375" calcext:value-type="float">
            <text:p>0,00208437500000000000</text:p>
          </table:table-cell>
          <table:table-cell table:formula="of:=[.D263]-[.D262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9" office:value-type="float" office:value="18078" calcext:value-type="float">
            <text:p>1807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09236111111111" calcext:value-type="float">
            <text:p>0,00209236111111111000</text:p>
          </table:table-cell>
          <table:table-cell table:formula="of:=[.D264]-[.D26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9" office:value-type="float" office:value="18147" calcext:value-type="float">
            <text:p>1814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10034722222222" calcext:value-type="float">
            <text:p>0,00210034722222222000</text:p>
          </table:table-cell>
          <table:table-cell table:formula="of:=[.D265]-[.D26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9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10833333333333" calcext:value-type="float">
            <text:p>0,00210833333333333000</text:p>
          </table:table-cell>
          <table:table-cell table:formula="of:=[.D266]-[.D265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9" office:value-type="float" office:value="18285" calcext:value-type="float">
            <text:p>1828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11631944444444" calcext:value-type="float">
            <text:p>0,00211631944444444000</text:p>
          </table:table-cell>
          <table:table-cell table:formula="of:=[.D267]-[.D26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9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12430555555556" calcext:value-type="float">
            <text:p>0,00212430555555556000</text:p>
          </table:table-cell>
          <table:table-cell table:formula="of:=[.D268]-[.D26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9" office:value-type="float" office:value="18423" calcext:value-type="float">
            <text:p>1842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13229166666667" calcext:value-type="float">
            <text:p>0,00213229166666667000</text:p>
          </table:table-cell>
          <table:table-cell table:formula="of:=[.D269]-[.D268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9" office:value-type="float" office:value="18492" calcext:value-type="float">
            <text:p>1849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14027777777778" calcext:value-type="float">
            <text:p>0,00214027777777778000</text:p>
          </table:table-cell>
          <table:table-cell table:formula="of:=[.D270]-[.D26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9" office:value-type="float" office:value="18561" calcext:value-type="float">
            <text:p>1856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14826388888889" calcext:value-type="float">
            <text:p>0,00214826388888889000</text:p>
          </table:table-cell>
          <table:table-cell table:formula="of:=[.D271]-[.D270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9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15625" calcext:value-type="float">
            <text:p>0,00215625000000000000</text:p>
          </table:table-cell>
          <table:table-cell table:formula="of:=[.D272]-[.D27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9" office:value-type="float" office:value="18699" calcext:value-type="float">
            <text:p>1869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16423611111111" calcext:value-type="float">
            <text:p>0,00216423611111111000</text:p>
          </table:table-cell>
          <table:table-cell table:formula="of:=[.D273]-[.D27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9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17222222222222" calcext:value-type="float">
            <text:p>0,00217222222222222000</text:p>
          </table:table-cell>
          <table:table-cell table:formula="of:=[.D274]-[.D273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9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18020833333333" calcext:value-type="float">
            <text:p>0,00218020833333333000</text:p>
          </table:table-cell>
          <table:table-cell table:formula="of:=[.D275]-[.D27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9" office:value-type="float" office:value="18906" calcext:value-type="float">
            <text:p>1890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18819444444444" calcext:value-type="float">
            <text:p>0,00218819444444444000</text:p>
          </table:table-cell>
          <table:table-cell table:formula="of:=[.D276]-[.D27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9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19618055555556" calcext:value-type="float">
            <text:p>0,00219618055555556000</text:p>
          </table:table-cell>
          <table:table-cell table:formula="of:=[.D277]-[.D276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9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20416666666667" calcext:value-type="float">
            <text:p>0,00220416666666667000</text:p>
          </table:table-cell>
          <table:table-cell table:formula="of:=[.D278]-[.D27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9" office:value-type="float" office:value="19113" calcext:value-type="float">
            <text:p>1911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21215277777778" calcext:value-type="float">
            <text:p>0,00221215277777778000</text:p>
          </table:table-cell>
          <table:table-cell table:formula="of:=[.D279]-[.D27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9" office:value-type="float" office:value="19182" calcext:value-type="float">
            <text:p>1918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22013888888889" calcext:value-type="float">
            <text:p>0,00222013888888889000</text:p>
          </table:table-cell>
          <table:table-cell table:formula="of:=[.D280]-[.D279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9" office:value-type="float" office:value="19251" calcext:value-type="float">
            <text:p>1925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228125" calcext:value-type="float">
            <text:p>0,00222812500000000000</text:p>
          </table:table-cell>
          <table:table-cell table:formula="of:=[.D281]-[.D28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9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23611111111111" calcext:value-type="float">
            <text:p>0,00223611111111111000</text:p>
          </table:table-cell>
          <table:table-cell table:formula="of:=[.D282]-[.D281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9" office:value-type="float" office:value="19389" calcext:value-type="float">
            <text:p>1938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24409722222222" calcext:value-type="float">
            <text:p>0,00224409722222222000</text:p>
          </table:table-cell>
          <table:table-cell table:formula="of:=[.D283]-[.D28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9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25208333333333" calcext:value-type="float">
            <text:p>0,00225208333333333000</text:p>
          </table:table-cell>
          <table:table-cell table:formula="of:=[.D284]-[.D28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9" office:value-type="float" office:value="19527" calcext:value-type="float">
            <text:p>1952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26006944444444" calcext:value-type="float">
            <text:p>0,00226006944444444000</text:p>
          </table:table-cell>
          <table:table-cell table:formula="of:=[.D285]-[.D284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9" office:value-type="float" office:value="19596" calcext:value-type="float">
            <text:p>1959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26805555555556" calcext:value-type="float">
            <text:p>0,00226805555555556000</text:p>
          </table:table-cell>
          <table:table-cell table:formula="of:=[.D286]-[.D28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9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27604166666667" calcext:value-type="float">
            <text:p>0,00227604166666667000</text:p>
          </table:table-cell>
          <table:table-cell table:formula="of:=[.D287]-[.D28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9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28402777777778" calcext:value-type="float">
            <text:p>0,00228402777777778000</text:p>
          </table:table-cell>
          <table:table-cell table:formula="of:=[.D288]-[.D287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9" office:value-type="float" office:value="19803" calcext:value-type="float">
            <text:p>1980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29201388888889" calcext:value-type="float">
            <text:p>0,00229201388888889000</text:p>
          </table:table-cell>
          <table:table-cell table:formula="of:=[.D289]-[.D28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9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3" calcext:value-type="float">
            <text:p>0,00230000000000000000</text:p>
          </table:table-cell>
          <table:table-cell table:formula="of:=[.D290]-[.D28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9" office:value-type="float" office:value="19941" calcext:value-type="float">
            <text:p>1994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30798611111111" calcext:value-type="float">
            <text:p>0,00230798611111111000</text:p>
          </table:table-cell>
          <table:table-cell table:formula="of:=[.D291]-[.D290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9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31597222222222" calcext:value-type="float">
            <text:p>0,00231597222222222000</text:p>
          </table:table-cell>
          <table:table-cell table:formula="of:=[.D292]-[.D29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9" office:value-type="float" office:value="20079" calcext:value-type="float">
            <text:p>2007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32395833333333" calcext:value-type="float">
            <text:p>0,00232395833333333000</text:p>
          </table:table-cell>
          <table:table-cell table:formula="of:=[.D293]-[.D292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9" office:value-type="float" office:value="20148" calcext:value-type="float">
            <text:p>2014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33194444444444" calcext:value-type="float">
            <text:p>0,00233194444444444000</text:p>
          </table:table-cell>
          <table:table-cell table:formula="of:=[.D294]-[.D29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9" office:value-type="float" office:value="20217" calcext:value-type="float">
            <text:p>2021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33993055555556" calcext:value-type="float">
            <text:p>0,00233993055555556000</text:p>
          </table:table-cell>
          <table:table-cell table:formula="of:=[.D295]-[.D29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9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34791666666667" calcext:value-type="float">
            <text:p>0,00234791666666667000</text:p>
          </table:table-cell>
          <table:table-cell table:formula="of:=[.D296]-[.D295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9" office:value-type="float" office:value="20355" calcext:value-type="float">
            <text:p>2035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35590277777778" calcext:value-type="float">
            <text:p>0,00235590277777778000</text:p>
          </table:table-cell>
          <table:table-cell table:formula="of:=[.D297]-[.D29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9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36388888888889" calcext:value-type="float">
            <text:p>0,00236388888888889000</text:p>
          </table:table-cell>
          <table:table-cell table:formula="of:=[.D298]-[.D29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9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371875" calcext:value-type="float">
            <text:p>0,00237187500000000000</text:p>
          </table:table-cell>
          <table:table-cell table:formula="of:=[.D299]-[.D298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9" office:value-type="float" office:value="20562" calcext:value-type="float">
            <text:p>2056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37986111111111" calcext:value-type="float">
            <text:p>0,00237986111111111000</text:p>
          </table:table-cell>
          <table:table-cell table:formula="of:=[.D300]-[.D29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9" office:value-type="float" office:value="20631" calcext:value-type="float">
            <text:p>2063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38784722222222" calcext:value-type="float">
            <text:p>0,00238784722222222000</text:p>
          </table:table-cell>
          <table:table-cell table:formula="of:=[.D301]-[.D30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9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39583333333333" calcext:value-type="float">
            <text:p>0,00239583333333333000</text:p>
          </table:table-cell>
          <table:table-cell table:formula="of:=[.D302]-[.D301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9" office:value-type="float" office:value="20769" calcext:value-type="float">
            <text:p>2076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40381944444444" calcext:value-type="float">
            <text:p>0,00240381944444444000</text:p>
          </table:table-cell>
          <table:table-cell table:formula="of:=[.D303]-[.D30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9" office:value-type="float" office:value="20838" calcext:value-type="float">
            <text:p>2083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41180555555556" calcext:value-type="float">
            <text:p>0,00241180555555556000</text:p>
          </table:table-cell>
          <table:table-cell table:formula="of:=[.D304]-[.D303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9" office:value-type="float" office:value="20907" calcext:value-type="float">
            <text:p>2090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41979166666667" calcext:value-type="float">
            <text:p>0,00241979166666667000</text:p>
          </table:table-cell>
          <table:table-cell table:formula="of:=[.D305]-[.D30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9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42777777777778" calcext:value-type="float">
            <text:p>0,00242777777777778000</text:p>
          </table:table-cell>
          <table:table-cell table:formula="of:=[.D306]-[.D30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9" office:value-type="float" office:value="21045" calcext:value-type="float">
            <text:p>2104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43576388888889" calcext:value-type="float">
            <text:p>0,00243576388888889000</text:p>
          </table:table-cell>
          <table:table-cell table:formula="of:=[.D307]-[.D306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9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44375" calcext:value-type="float">
            <text:p>0,00244375000000000000</text:p>
          </table:table-cell>
          <table:table-cell table:formula="of:=[.D308]-[.D30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9" office:value-type="float" office:value="21183" calcext:value-type="float">
            <text:p>2118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45173611111111" calcext:value-type="float">
            <text:p>0,00245173611111111000</text:p>
          </table:table-cell>
          <table:table-cell table:formula="of:=[.D309]-[.D30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9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45972222222222" calcext:value-type="float">
            <text:p>0,00245972222222222000</text:p>
          </table:table-cell>
          <table:table-cell table:formula="of:=[.D310]-[.D309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9" office:value-type="float" office:value="21321" calcext:value-type="float">
            <text:p>2132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46770833333333" calcext:value-type="float">
            <text:p>0,00246770833333333000</text:p>
          </table:table-cell>
          <table:table-cell table:formula="of:=[.D311]-[.D31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9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47569444444444" calcext:value-type="float">
            <text:p>0,00247569444444444000</text:p>
          </table:table-cell>
          <table:table-cell table:formula="of:=[.D312]-[.D31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9" office:value-type="float" office:value="21459" calcext:value-type="float">
            <text:p>2145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48368055555556" calcext:value-type="float">
            <text:p>0,00248368055555556000</text:p>
          </table:table-cell>
          <table:table-cell table:formula="of:=[.D313]-[.D312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9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49166666666667" calcext:value-type="float">
            <text:p>0,00249166666666667000</text:p>
          </table:table-cell>
          <table:table-cell table:formula="of:=[.D314]-[.D31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9" office:value-type="float" office:value="21597" calcext:value-type="float">
            <text:p>2159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49965277777778" calcext:value-type="float">
            <text:p>0,00249965277777778000</text:p>
          </table:table-cell>
          <table:table-cell table:formula="of:=[.D315]-[.D31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9" office:value-type="float" office:value="21666" calcext:value-type="float">
            <text:p>2166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50763888888889" calcext:value-type="float">
            <text:p>0,00250763888888889000</text:p>
          </table:table-cell>
          <table:table-cell table:formula="of:=[.D316]-[.D315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9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515625" calcext:value-type="float">
            <text:p>0,00251562500000000000</text:p>
          </table:table-cell>
          <table:table-cell table:formula="of:=[.D317]-[.D31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9" office:value-type="float" office:value="21804" calcext:value-type="float">
            <text:p>2180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52361111111111" calcext:value-type="float">
            <text:p>0,00252361111111111000</text:p>
          </table:table-cell>
          <table:table-cell table:formula="of:=[.D318]-[.D317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9" office:value-type="float" office:value="21873" calcext:value-type="float">
            <text:p>2187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53159722222222" calcext:value-type="float">
            <text:p>0,00253159722222222000</text:p>
          </table:table-cell>
          <table:table-cell table:formula="of:=[.D319]-[.D31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9" office:value-type="float" office:value="21942" calcext:value-type="float">
            <text:p>2194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53958333333333" calcext:value-type="float">
            <text:p>0,00253958333333333000</text:p>
          </table:table-cell>
          <table:table-cell table:formula="of:=[.D320]-[.D31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9" office:value-type="float" office:value="22011" calcext:value-type="float">
            <text:p>2201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54756944444444" calcext:value-type="float">
            <text:p>0,00254756944444444000</text:p>
          </table:table-cell>
          <table:table-cell table:formula="of:=[.D321]-[.D320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9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55555555555556" calcext:value-type="float">
            <text:p>0,00255555555555556000</text:p>
          </table:table-cell>
          <table:table-cell table:formula="of:=[.D322]-[.D32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9" office:value-type="float" office:value="22149" calcext:value-type="float">
            <text:p>2214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56354166666667" calcext:value-type="float">
            <text:p>0,00256354166666667000</text:p>
          </table:table-cell>
          <table:table-cell table:formula="of:=[.D323]-[.D32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9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57152777777778" calcext:value-type="float">
            <text:p>0,00257152777777778000</text:p>
          </table:table-cell>
          <table:table-cell table:formula="of:=[.D324]-[.D323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9" office:value-type="float" office:value="22287" calcext:value-type="float">
            <text:p>2228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57951388888889" calcext:value-type="float">
            <text:p>0,00257951388888889000</text:p>
          </table:table-cell>
          <table:table-cell table:formula="of:=[.D325]-[.D32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9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5875" calcext:value-type="float">
            <text:p>0,00258750000000000000</text:p>
          </table:table-cell>
          <table:table-cell table:formula="of:=[.D326]-[.D32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9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59548611111111" calcext:value-type="float">
            <text:p>0,00259548611111111000</text:p>
          </table:table-cell>
          <table:table-cell table:formula="of:=[.D327]-[.D326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9" office:value-type="float" office:value="22494" calcext:value-type="float">
            <text:p>2249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60347222222222" calcext:value-type="float">
            <text:p>0,00260347222222222000</text:p>
          </table:table-cell>
          <table:table-cell table:formula="of:=[.D328]-[.D32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9" office:value-type="float" office:value="22563" calcext:value-type="float">
            <text:p>2256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61145833333333" calcext:value-type="float">
            <text:p>0,00261145833333333000</text:p>
          </table:table-cell>
          <table:table-cell table:formula="of:=[.D329]-[.D328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9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61944444444444" calcext:value-type="float">
            <text:p>0,00261944444444444000</text:p>
          </table:table-cell>
          <table:table-cell table:formula="of:=[.D330]-[.D329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9" office:value-type="float" office:value="22701" calcext:value-type="float">
            <text:p>2270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62743055555556" calcext:value-type="float">
            <text:p>0,00262743055555556000</text:p>
          </table:table-cell>
          <table:table-cell table:formula="of:=[.D331]-[.D33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9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63541666666667" calcext:value-type="float">
            <text:p>0,00263541666666667000</text:p>
          </table:table-cell>
          <table:table-cell table:formula="of:=[.D332]-[.D331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9" office:value-type="float" office:value="22839" calcext:value-type="float">
            <text:p>2283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64340277777778" calcext:value-type="float">
            <text:p>0,00264340277777778000</text:p>
          </table:table-cell>
          <table:table-cell table:formula="of:=[.D333]-[.D332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9" office:value-type="float" office:value="22908" calcext:value-type="float">
            <text:p>2290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65138888888889" calcext:value-type="float">
            <text:p>0,00265138888888889000</text:p>
          </table:table-cell>
          <table:table-cell table:formula="of:=[.D334]-[.D33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9" office:value-type="float" office:value="22977" calcext:value-type="float">
            <text:p>2297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659375" calcext:value-type="float">
            <text:p>0,00265937500000000000</text:p>
          </table:table-cell>
          <table:table-cell table:formula="of:=[.D335]-[.D334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9" office:value-type="float" office:value="23046" calcext:value-type="float">
            <text:p>2304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66736111111111" calcext:value-type="float">
            <text:p>0,00266736111111111000</text:p>
          </table:table-cell>
          <table:table-cell table:formula="of:=[.D336]-[.D335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9" office:value-type="float" office:value="23115" calcext:value-type="float">
            <text:p>2311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67534722222222" calcext:value-type="float">
            <text:p>0,00267534722222222000</text:p>
          </table:table-cell>
          <table:table-cell table:formula="of:=[.D337]-[.D33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9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68333333333333" calcext:value-type="float">
            <text:p>0,00268333333333333000</text:p>
          </table:table-cell>
          <table:table-cell table:formula="of:=[.D338]-[.D337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9" office:value-type="float" office:value="23253" calcext:value-type="float">
            <text:p>2325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69131944444444" calcext:value-type="float">
            <text:p>0,00269131944444444000</text:p>
          </table:table-cell>
          <table:table-cell table:formula="of:=[.D339]-[.D338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9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69930555555556" calcext:value-type="float">
            <text:p>0,00269930555555556000</text:p>
          </table:table-cell>
          <table:table-cell table:formula="of:=[.D340]-[.D339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9" office:value-type="float" office:value="23391" calcext:value-type="float">
            <text:p>2339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70729166666667" calcext:value-type="float">
            <text:p>0,00270729166666667000</text:p>
          </table:table-cell>
          <table:table-cell table:formula="of:=[.D341]-[.D340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9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71527777777778" calcext:value-type="float">
            <text:p>0,00271527777777778000</text:p>
          </table:table-cell>
          <table:table-cell table:formula="of:=[.D342]-[.D341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9" office:value-type="float" office:value="23529" calcext:value-type="float">
            <text:p>2352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72326388888889" calcext:value-type="float">
            <text:p>0,00272326388888889000</text:p>
          </table:table-cell>
          <table:table-cell table:formula="of:=[.D343]-[.D342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9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73125" calcext:value-type="float">
            <text:p>0,00273125000000000000</text:p>
          </table:table-cell>
          <table:table-cell table:formula="of:=[.D344]-[.D343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9" office:value-type="float" office:value="23667" calcext:value-type="float">
            <text:p>2366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73923611111111" calcext:value-type="float">
            <text:p>0,00273923611111111000</text:p>
          </table:table-cell>
          <table:table-cell table:formula="of:=[.D345]-[.D344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9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74722222222222" calcext:value-type="float">
            <text:p>0,00274722222222222000</text:p>
          </table:table-cell>
          <table:table-cell table:formula="of:=[.D346]-[.D345]" office:value-type="float" office:value="0.00000798611111111139" calcext:value-type="float">
            <text:p>0,00000798611111111139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9" office:value-type="float" office:value="23805" calcext:value-type="float">
            <text:p>2380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75520833333333" calcext:value-type="float">
            <text:p>0,00275520833333333000</text:p>
          </table:table-cell>
          <table:table-cell table:formula="of:=[.D347]-[.D346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9" office:value-type="float" office:value="23874" calcext:value-type="float">
            <text:p>2387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76319444444444" calcext:value-type="float">
            <text:p>0,00276319444444444000</text:p>
          </table:table-cell>
          <table:table-cell table:formula="of:=[.D348]-[.D347]" office:value-type="float" office:value="0.00000798611111111095" calcext:value-type="float">
            <text:p>0,00000798611111111095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9" office:value-type="float" office:value="23943" calcext:value-type="float">
            <text:p>2394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77118055555556" calcext:value-type="float">
            <text:p>0,00277118055555556000</text:p>
          </table:table-cell>
          <table:table-cell table:formula="of:=#REF!-[.D348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32:55.286779070</meta:creation-date>
    <dc:date>2026-05-17T18:33:08.883635926</dc:date>
    <meta:editing-duration>PT15S</meta:editing-duration>
    <meta:editing-cycles>1</meta:editing-cycles>
    <meta:document-statistic meta:table-count="1" meta:cell-count="1740" meta:object-count="0"/>
    <meta:generator>LibreOffice/24.2.7.2$Linux_X86_64 LibreOffice_project/420$Build-2</meta:generator>
  </office:meta>
</office:document-meta>
</file>