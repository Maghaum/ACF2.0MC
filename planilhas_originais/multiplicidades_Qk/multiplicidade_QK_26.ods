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00925925925926" calcext:value-type="float">
            <text:p>0,00000300925925925926</text:p>
          </table:table-cell>
          <table:table-cell table:formula="of:=[.D3]-[.D2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6" office:value-type="float" office:value="52" calcext:value-type="float">
            <text:p>5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601851851851852" calcext:value-type="float">
            <text:p>0,00000601851851851852</text:p>
          </table:table-cell>
          <table:table-cell table:formula="of:=[.D4]-[.D3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6" office:value-type="float" office:value="78" calcext:value-type="float">
            <text:p>7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902777777777778" calcext:value-type="float">
            <text:p>0,00000902777777777778</text:p>
          </table:table-cell>
          <table:table-cell table:formula="of:=[.D5]-[.D4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6" office:value-type="float" office:value="104" calcext:value-type="float">
            <text:p>10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2037037037037" calcext:value-type="float">
            <text:p>0,00001203703703703700</text:p>
          </table:table-cell>
          <table:table-cell table:formula="of:=[.D6]-[.D5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6" office:value-type="float" office:value="130" calcext:value-type="float">
            <text:p>13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50462962962963" calcext:value-type="float">
            <text:p>0,00001504629629629630</text:p>
          </table:table-cell>
          <table:table-cell table:formula="of:=[.D7]-[.D6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6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80555555555556" calcext:value-type="float">
            <text:p>0,00001805555555555560</text:p>
          </table:table-cell>
          <table:table-cell table:formula="of:=[.D8]-[.D7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6" office:value-type="float" office:value="182" calcext:value-type="float">
            <text:p>18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10648148148148" calcext:value-type="float">
            <text:p>0,00002106481481481480</text:p>
          </table:table-cell>
          <table:table-cell table:formula="of:=[.D9]-[.D8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6" office:value-type="float" office:value="208" calcext:value-type="float">
            <text:p>20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40740740740741" calcext:value-type="float">
            <text:p>0,00002407407407407410</text:p>
          </table:table-cell>
          <table:table-cell table:formula="of:=[.D10]-[.D9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6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70833333333333" calcext:value-type="float">
            <text:p>0,00002708333333333330</text:p>
          </table:table-cell>
          <table:table-cell table:formula="of:=[.D11]-[.D10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6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00925925925926" calcext:value-type="float">
            <text:p>0,00003009259259259260</text:p>
          </table:table-cell>
          <table:table-cell table:formula="of:=[.D12]-[.D11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6" office:value-type="float" office:value="286" calcext:value-type="float">
            <text:p>28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31018518518519" calcext:value-type="float">
            <text:p>0,00003310185185185190</text:p>
          </table:table-cell>
          <table:table-cell table:formula="of:=[.D13]-[.D12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6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61111111111111" calcext:value-type="float">
            <text:p>0,00003611111111111110</text:p>
          </table:table-cell>
          <table:table-cell table:formula="of:=[.D14]-[.D13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6" office:value-type="float" office:value="338" calcext:value-type="float">
            <text:p>33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91203703703704" calcext:value-type="float">
            <text:p>0,00003912037037037040</text:p>
          </table:table-cell>
          <table:table-cell table:formula="of:=[.D15]-[.D14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6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21296296296296" calcext:value-type="float">
            <text:p>0,00004212962962962960</text:p>
          </table:table-cell>
          <table:table-cell table:formula="of:=[.D16]-[.D15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6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451388888888889" calcext:value-type="float">
            <text:p>0,00004513888888888890</text:p>
          </table:table-cell>
          <table:table-cell table:formula="of:=[.D17]-[.D16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6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481481481481482" calcext:value-type="float">
            <text:p>0,00004814814814814820</text:p>
          </table:table-cell>
          <table:table-cell table:formula="of:=[.D18]-[.D17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6" office:value-type="float" office:value="442" calcext:value-type="float">
            <text:p>44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511574074074074" calcext:value-type="float">
            <text:p>0,00005115740740740740</text:p>
          </table:table-cell>
          <table:table-cell table:formula="of:=[.D19]-[.D18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6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541666666666667" calcext:value-type="float">
            <text:p>0,00005416666666666670</text:p>
          </table:table-cell>
          <table:table-cell table:formula="of:=[.D20]-[.D19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6" office:value-type="float" office:value="494" calcext:value-type="float">
            <text:p>49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571759259259259" calcext:value-type="float">
            <text:p>0,00005717592592592590</text:p>
          </table:table-cell>
          <table:table-cell table:formula="of:=[.D21]-[.D20]" office:value-type="float" office:value="0.00000300925925925926" calcext:value-type="float">
            <text:p>0,00000300925925925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6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601851851851852" calcext:value-type="float">
            <text:p>0,00006018518518518520</text:p>
          </table:table-cell>
          <table:table-cell table:formula="of:=[.D22]-[.D21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6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631944444444444" calcext:value-type="float">
            <text:p>0,00006319444444444440</text:p>
          </table:table-cell>
          <table:table-cell table:formula="of:=[.D23]-[.D22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6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662037037037037" calcext:value-type="float">
            <text:p>0,00006620370370370370</text:p>
          </table:table-cell>
          <table:table-cell table:formula="of:=[.D24]-[.D23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6" office:value-type="float" office:value="598" calcext:value-type="float">
            <text:p>59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69212962962963" calcext:value-type="float">
            <text:p>0,00006921296296296300</text:p>
          </table:table-cell>
          <table:table-cell table:formula="of:=[.D25]-[.D24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6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722222222222222" calcext:value-type="float">
            <text:p>0,00007222222222222220</text:p>
          </table:table-cell>
          <table:table-cell table:formula="of:=[.D26]-[.D25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6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752314814814815" calcext:value-type="float">
            <text:p>0,00007523148148148150</text:p>
          </table:table-cell>
          <table:table-cell table:formula="of:=[.D27]-[.D26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6" office:value-type="float" office:value="676" calcext:value-type="float">
            <text:p>67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782407407407407" calcext:value-type="float">
            <text:p>0,00007824074074074070</text:p>
          </table:table-cell>
          <table:table-cell table:formula="of:=[.D28]-[.D27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6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8125" calcext:value-type="float">
            <text:p>0,00008125000000000000</text:p>
          </table:table-cell>
          <table:table-cell table:formula="of:=[.D29]-[.D28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6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842592592592593" calcext:value-type="float">
            <text:p>0,00008425925925925930</text:p>
          </table:table-cell>
          <table:table-cell table:formula="of:=[.D30]-[.D29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6" office:value-type="float" office:value="754" calcext:value-type="float">
            <text:p>75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872685185185185" calcext:value-type="float">
            <text:p>0,00008726851851851850</text:p>
          </table:table-cell>
          <table:table-cell table:formula="of:=[.D31]-[.D30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6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902777777777778" calcext:value-type="float">
            <text:p>0,00009027777777777780</text:p>
          </table:table-cell>
          <table:table-cell table:formula="of:=[.D32]-[.D31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6" office:value-type="float" office:value="806" calcext:value-type="float">
            <text:p>80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93287037037037" calcext:value-type="float">
            <text:p>0,00009328703703703700</text:p>
          </table:table-cell>
          <table:table-cell table:formula="of:=[.D33]-[.D32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6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962962962962963" calcext:value-type="float">
            <text:p>0,00009629629629629630</text:p>
          </table:table-cell>
          <table:table-cell table:formula="of:=[.D34]-[.D33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6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993055555555556" calcext:value-type="float">
            <text:p>0,00009930555555555560</text:p>
          </table:table-cell>
          <table:table-cell table:formula="of:=[.D35]-[.D34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6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02314814814815" calcext:value-type="float">
            <text:p>0,00010231481481481500</text:p>
          </table:table-cell>
          <table:table-cell table:formula="of:=[.D36]-[.D35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6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05324074074074" calcext:value-type="float">
            <text:p>0,00010532407407407400</text:p>
          </table:table-cell>
          <table:table-cell table:formula="of:=[.D37]-[.D36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6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08333333333333" calcext:value-type="float">
            <text:p>0,00010833333333333300</text:p>
          </table:table-cell>
          <table:table-cell table:formula="of:=[.D38]-[.D37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6" office:value-type="float" office:value="962" calcext:value-type="float">
            <text:p>96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11342592592593" calcext:value-type="float">
            <text:p>0,00011134259259259300</text:p>
          </table:table-cell>
          <table:table-cell table:formula="of:=[.D39]-[.D38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6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14351851851852" calcext:value-type="float">
            <text:p>0,00011435185185185200</text:p>
          </table:table-cell>
          <table:table-cell table:formula="of:=[.D40]-[.D39]" office:value-type="float" office:value="0.00000300925925925925" calcext:value-type="float">
            <text:p>0,000003009259259259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6" office:value-type="float" office:value="1014" calcext:value-type="float">
            <text:p>101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17361111111111" calcext:value-type="float">
            <text:p>0,00011736111111111100</text:p>
          </table:table-cell>
          <table:table-cell table:formula="of:=[.D41]-[.D40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6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2037037037037" calcext:value-type="float">
            <text:p>0,00012037037037037000</text:p>
          </table:table-cell>
          <table:table-cell table:formula="of:=[.D42]-[.D41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6" office:value-type="float" office:value="1066" calcext:value-type="float">
            <text:p>106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2337962962963" calcext:value-type="float">
            <text:p>0,00012337962962963000</text:p>
          </table:table-cell>
          <table:table-cell table:formula="of:=[.D43]-[.D4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6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26388888888889" calcext:value-type="float">
            <text:p>0,00012638888888888900</text:p>
          </table:table-cell>
          <table:table-cell table:formula="of:=[.D44]-[.D43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6" office:value-type="float" office:value="1118" calcext:value-type="float">
            <text:p>111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29398148148148" calcext:value-type="float">
            <text:p>0,00012939814814814800</text:p>
          </table:table-cell>
          <table:table-cell table:formula="of:=[.D45]-[.D44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6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32407407407407" calcext:value-type="float">
            <text:p>0,00013240740740740700</text:p>
          </table:table-cell>
          <table:table-cell table:formula="of:=[.D46]-[.D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6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35416666666667" calcext:value-type="float">
            <text:p>0,00013541666666666700</text:p>
          </table:table-cell>
          <table:table-cell table:formula="of:=[.D47]-[.D46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6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38425925925926" calcext:value-type="float">
            <text:p>0,00013842592592592600</text:p>
          </table:table-cell>
          <table:table-cell table:formula="of:=[.D48]-[.D47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6" office:value-type="float" office:value="1222" calcext:value-type="float">
            <text:p>122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41435185185185" calcext:value-type="float">
            <text:p>0,00014143518518518500</text:p>
          </table:table-cell>
          <table:table-cell table:formula="of:=[.D49]-[.D4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6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44444444444444" calcext:value-type="float">
            <text:p>0,00014444444444444400</text:p>
          </table:table-cell>
          <table:table-cell table:formula="of:=[.D50]-[.D49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6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47453703703704" calcext:value-type="float">
            <text:p>0,00014745370370370400</text:p>
          </table:table-cell>
          <table:table-cell table:formula="of:=[.D51]-[.D50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6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50462962962963" calcext:value-type="float">
            <text:p>0,00015046296296296300</text:p>
          </table:table-cell>
          <table:table-cell table:formula="of:=[.D52]-[.D5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6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53472222222222" calcext:value-type="float">
            <text:p>0,00015347222222222200</text:p>
          </table:table-cell>
          <table:table-cell table:formula="of:=[.D53]-[.D52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6" office:value-type="float" office:value="1352" calcext:value-type="float">
            <text:p>135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56481481481481" calcext:value-type="float">
            <text:p>0,00015648148148148100</text:p>
          </table:table-cell>
          <table:table-cell table:formula="of:=[.D54]-[.D53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6" office:value-type="float" office:value="1378" calcext:value-type="float">
            <text:p>137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59490740740741" calcext:value-type="float">
            <text:p>0,00015949074074074100</text:p>
          </table:table-cell>
          <table:table-cell table:formula="of:=[.D55]-[.D5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6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625" calcext:value-type="float">
            <text:p>0,00016250000000000000</text:p>
          </table:table-cell>
          <table:table-cell table:formula="of:=[.D56]-[.D55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6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65509259259259" calcext:value-type="float">
            <text:p>0,00016550925925925900</text:p>
          </table:table-cell>
          <table:table-cell table:formula="of:=[.D57]-[.D56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6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68518518518519" calcext:value-type="float">
            <text:p>0,00016851851851851900</text:p>
          </table:table-cell>
          <table:table-cell table:formula="of:=[.D58]-[.D5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6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71527777777778" calcext:value-type="float">
            <text:p>0,00017152777777777800</text:p>
          </table:table-cell>
          <table:table-cell table:formula="of:=[.D59]-[.D58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6" office:value-type="float" office:value="1508" calcext:value-type="float">
            <text:p>150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74537037037037" calcext:value-type="float">
            <text:p>0,00017453703703703700</text:p>
          </table:table-cell>
          <table:table-cell table:formula="of:=[.D60]-[.D59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6" office:value-type="float" office:value="1534" calcext:value-type="float">
            <text:p>153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77546296296296" calcext:value-type="float">
            <text:p>0,00017754629629629600</text:p>
          </table:table-cell>
          <table:table-cell table:formula="of:=[.D61]-[.D6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6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80555555555556" calcext:value-type="float">
            <text:p>0,00018055555555555600</text:p>
          </table:table-cell>
          <table:table-cell table:formula="of:=[.D62]-[.D61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6" office:value-type="float" office:value="1586" calcext:value-type="float">
            <text:p>158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83564814814815" calcext:value-type="float">
            <text:p>0,00018356481481481500</text:p>
          </table:table-cell>
          <table:table-cell table:formula="of:=[.D63]-[.D62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6" office:value-type="float" office:value="1612" calcext:value-type="float">
            <text:p>161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86574074074074" calcext:value-type="float">
            <text:p>0,00018657407407407400</text:p>
          </table:table-cell>
          <table:table-cell table:formula="of:=[.D64]-[.D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6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89583333333333" calcext:value-type="float">
            <text:p>0,00018958333333333300</text:p>
          </table:table-cell>
          <table:table-cell table:formula="of:=[.D65]-[.D64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6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92592592592593" calcext:value-type="float">
            <text:p>0,00019259259259259300</text:p>
          </table:table-cell>
          <table:table-cell table:formula="of:=[.D66]-[.D65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6" office:value-type="float" office:value="1690" calcext:value-type="float">
            <text:p>169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95601851851852" calcext:value-type="float">
            <text:p>0,00019560185185185200</text:p>
          </table:table-cell>
          <table:table-cell table:formula="of:=[.D67]-[.D6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6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98611111111111" calcext:value-type="float">
            <text:p>0,00019861111111111100</text:p>
          </table:table-cell>
          <table:table-cell table:formula="of:=[.D68]-[.D67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6" office:value-type="float" office:value="1742" calcext:value-type="float">
            <text:p>174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0162037037037" calcext:value-type="float">
            <text:p>0,00020162037037037000</text:p>
          </table:table-cell>
          <table:table-cell table:formula="of:=[.D69]-[.D68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6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0462962962963" calcext:value-type="float">
            <text:p>0,00020462962962963000</text:p>
          </table:table-cell>
          <table:table-cell table:formula="of:=[.D70]-[.D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6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07638888888889" calcext:value-type="float">
            <text:p>0,00020763888888888900</text:p>
          </table:table-cell>
          <table:table-cell table:formula="of:=[.D71]-[.D70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6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10648148148148" calcext:value-type="float">
            <text:p>0,00021064814814814800</text:p>
          </table:table-cell>
          <table:table-cell table:formula="of:=[.D72]-[.D71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6" office:value-type="float" office:value="1846" calcext:value-type="float">
            <text:p>184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13657407407407" calcext:value-type="float">
            <text:p>0,00021365740740740700</text:p>
          </table:table-cell>
          <table:table-cell table:formula="of:=[.D73]-[.D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6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16666666666667" calcext:value-type="float">
            <text:p>0,00021666666666666700</text:p>
          </table:table-cell>
          <table:table-cell table:formula="of:=[.D74]-[.D73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6" office:value-type="float" office:value="1898" calcext:value-type="float">
            <text:p>189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19675925925926" calcext:value-type="float">
            <text:p>0,00021967592592592600</text:p>
          </table:table-cell>
          <table:table-cell table:formula="of:=[.D75]-[.D74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6" office:value-type="float" office:value="1924" calcext:value-type="float">
            <text:p>192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22685185185185" calcext:value-type="float">
            <text:p>0,00022268518518518500</text:p>
          </table:table-cell>
          <table:table-cell table:formula="of:=[.D76]-[.D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6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25694444444444" calcext:value-type="float">
            <text:p>0,00022569444444444400</text:p>
          </table:table-cell>
          <table:table-cell table:formula="of:=[.D77]-[.D76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6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28703703703704" calcext:value-type="float">
            <text:p>0,00022870370370370400</text:p>
          </table:table-cell>
          <table:table-cell table:formula="of:=[.D78]-[.D77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6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31712962962963" calcext:value-type="float">
            <text:p>0,00023171296296296300</text:p>
          </table:table-cell>
          <table:table-cell table:formula="of:=[.D79]-[.D7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6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34722222222222" calcext:value-type="float">
            <text:p>0,00023472222222222200</text:p>
          </table:table-cell>
          <table:table-cell table:formula="of:=[.D80]-[.D79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6" office:value-type="float" office:value="2054" calcext:value-type="float">
            <text:p>205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37731481481481" calcext:value-type="float">
            <text:p>0,00023773148148148100</text:p>
          </table:table-cell>
          <table:table-cell table:formula="of:=[.D81]-[.D80]" office:value-type="float" office:value="0.00000300925925925927" calcext:value-type="float">
            <text:p>0,000003009259259259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6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40740740740741" calcext:value-type="float">
            <text:p>0,00024074074074074100</text:p>
          </table:table-cell>
          <table:table-cell table:formula="of:=[.D82]-[.D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6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4375" calcext:value-type="float">
            <text:p>0,00024375000000000000</text:p>
          </table:table-cell>
          <table:table-cell table:formula="of:=[.D83]-[.D82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6" office:value-type="float" office:value="2132" calcext:value-type="float">
            <text:p>213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46759259259259" calcext:value-type="float">
            <text:p>0,00024675925925925900</text:p>
          </table:table-cell>
          <table:table-cell table:formula="of:=[.D84]-[.D8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6" office:value-type="float" office:value="2158" calcext:value-type="float">
            <text:p>215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49768518518519" calcext:value-type="float">
            <text:p>0,00024976851851851900</text:p>
          </table:table-cell>
          <table:table-cell table:formula="of:=[.D85]-[.D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6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52777777777778" calcext:value-type="float">
            <text:p>0,00025277777777777800</text:p>
          </table:table-cell>
          <table:table-cell table:formula="of:=[.D86]-[.D85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6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55787037037037" calcext:value-type="float">
            <text:p>0,00025578703703703700</text:p>
          </table:table-cell>
          <table:table-cell table:formula="of:=[.D87]-[.D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6" office:value-type="float" office:value="2236" calcext:value-type="float">
            <text:p>223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58796296296296" calcext:value-type="float">
            <text:p>0,00025879629629629600</text:p>
          </table:table-cell>
          <table:table-cell table:formula="of:=[.D88]-[.D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6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61805555555556" calcext:value-type="float">
            <text:p>0,00026180555555555600</text:p>
          </table:table-cell>
          <table:table-cell table:formula="of:=[.D89]-[.D88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6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64814814814815" calcext:value-type="float">
            <text:p>0,00026481481481481500</text:p>
          </table:table-cell>
          <table:table-cell table:formula="of:=[.D90]-[.D8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6" office:value-type="float" office:value="2314" calcext:value-type="float">
            <text:p>231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67824074074074" calcext:value-type="float">
            <text:p>0,00026782407407407400</text:p>
          </table:table-cell>
          <table:table-cell table:formula="of:=[.D91]-[.D9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6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70833333333333" calcext:value-type="float">
            <text:p>0,00027083333333333300</text:p>
          </table:table-cell>
          <table:table-cell table:formula="of:=[.D92]-[.D91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6" office:value-type="float" office:value="2366" calcext:value-type="float">
            <text:p>236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73842592592593" calcext:value-type="float">
            <text:p>0,00027384259259259300</text:p>
          </table:table-cell>
          <table:table-cell table:formula="of:=[.D93]-[.D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6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76851851851852" calcext:value-type="float">
            <text:p>0,00027685185185185200</text:p>
          </table:table-cell>
          <table:table-cell table:formula="of:=[.D94]-[.D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6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79861111111111" calcext:value-type="float">
            <text:p>0,00027986111111111100</text:p>
          </table:table-cell>
          <table:table-cell table:formula="of:=[.D95]-[.D94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6" office:value-type="float" office:value="2444" calcext:value-type="float">
            <text:p>244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8287037037037" calcext:value-type="float">
            <text:p>0,00028287037037037000</text:p>
          </table:table-cell>
          <table:table-cell table:formula="of:=[.D96]-[.D9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6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8587962962963" calcext:value-type="float">
            <text:p>0,00028587962962963000</text:p>
          </table:table-cell>
          <table:table-cell table:formula="of:=[.D97]-[.D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6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88888888888889" calcext:value-type="float">
            <text:p>0,00028888888888888900</text:p>
          </table:table-cell>
          <table:table-cell table:formula="of:=[.D98]-[.D97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6" office:value-type="float" office:value="2522" calcext:value-type="float">
            <text:p>252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91898148148148" calcext:value-type="float">
            <text:p>0,00029189814814814800</text:p>
          </table:table-cell>
          <table:table-cell table:formula="of:=[.D99]-[.D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6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94907407407407" calcext:value-type="float">
            <text:p>0,00029490740740740700</text:p>
          </table:table-cell>
          <table:table-cell table:formula="of:=[.D100]-[.D9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6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97916666666667" calcext:value-type="float">
            <text:p>0,00029791666666666700</text:p>
          </table:table-cell>
          <table:table-cell table:formula="of:=[.D101]-[.D100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6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00925925925926" calcext:value-type="float">
            <text:p>0,00030092592592592600</text:p>
          </table:table-cell>
          <table:table-cell table:formula="of:=[.D102]-[.D10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6" office:value-type="float" office:value="2626" calcext:value-type="float">
            <text:p>262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03935185185185" calcext:value-type="float">
            <text:p>0,00030393518518518500</text:p>
          </table:table-cell>
          <table:table-cell table:formula="of:=[.D103]-[.D10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6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06944444444444" calcext:value-type="float">
            <text:p>0,00030694444444444400</text:p>
          </table:table-cell>
          <table:table-cell table:formula="of:=[.D104]-[.D103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6" office:value-type="float" office:value="2678" calcext:value-type="float">
            <text:p>267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09953703703704" calcext:value-type="float">
            <text:p>0,00030995370370370400</text:p>
          </table:table-cell>
          <table:table-cell table:formula="of:=[.D105]-[.D1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6" office:value-type="float" office:value="2704" calcext:value-type="float">
            <text:p>270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12962962962963" calcext:value-type="float">
            <text:p>0,00031296296296296300</text:p>
          </table:table-cell>
          <table:table-cell table:formula="of:=[.D106]-[.D1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6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15972222222222" calcext:value-type="float">
            <text:p>0,00031597222222222200</text:p>
          </table:table-cell>
          <table:table-cell table:formula="of:=[.D107]-[.D106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6" office:value-type="float" office:value="2756" calcext:value-type="float">
            <text:p>275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18981481481482" calcext:value-type="float">
            <text:p>0,00031898148148148200</text:p>
          </table:table-cell>
          <table:table-cell table:formula="of:=[.D108]-[.D10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6" office:value-type="float" office:value="2782" calcext:value-type="float">
            <text:p>278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21990740740741" calcext:value-type="float">
            <text:p>0,00032199074074074100</text:p>
          </table:table-cell>
          <table:table-cell table:formula="of:=[.D109]-[.D1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6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25" calcext:value-type="float">
            <text:p>0,00032500000000000000</text:p>
          </table:table-cell>
          <table:table-cell table:formula="of:=[.D110]-[.D109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6" office:value-type="float" office:value="2834" calcext:value-type="float">
            <text:p>283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28009259259259" calcext:value-type="float">
            <text:p>0,00032800925925925900</text:p>
          </table:table-cell>
          <table:table-cell table:formula="of:=[.D111]-[.D1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6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31018518518519" calcext:value-type="float">
            <text:p>0,00033101851851851900</text:p>
          </table:table-cell>
          <table:table-cell table:formula="of:=[.D112]-[.D11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6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34027777777778" calcext:value-type="float">
            <text:p>0,00033402777777777800</text:p>
          </table:table-cell>
          <table:table-cell table:formula="of:=[.D113]-[.D112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6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37037037037037" calcext:value-type="float">
            <text:p>0,00033703703703703700</text:p>
          </table:table-cell>
          <table:table-cell table:formula="of:=[.D114]-[.D11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6" office:value-type="float" office:value="2938" calcext:value-type="float">
            <text:p>293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40046296296296" calcext:value-type="float">
            <text:p>0,00034004629629629600</text:p>
          </table:table-cell>
          <table:table-cell table:formula="of:=[.D115]-[.D11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6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43055555555556" calcext:value-type="float">
            <text:p>0,00034305555555555600</text:p>
          </table:table-cell>
          <table:table-cell table:formula="of:=[.D116]-[.D115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6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46064814814815" calcext:value-type="float">
            <text:p>0,00034606481481481500</text:p>
          </table:table-cell>
          <table:table-cell table:formula="of:=[.D117]-[.D1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6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49074074074074" calcext:value-type="float">
            <text:p>0,00034907407407407400</text:p>
          </table:table-cell>
          <table:table-cell table:formula="of:=[.D118]-[.D1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6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52083333333333" calcext:value-type="float">
            <text:p>0,00035208333333333300</text:p>
          </table:table-cell>
          <table:table-cell table:formula="of:=[.D119]-[.D118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6" office:value-type="float" office:value="3068" calcext:value-type="float">
            <text:p>306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55092592592593" calcext:value-type="float">
            <text:p>0,00035509259259259300</text:p>
          </table:table-cell>
          <table:table-cell table:formula="of:=[.D120]-[.D11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6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58101851851852" calcext:value-type="float">
            <text:p>0,00035810185185185200</text:p>
          </table:table-cell>
          <table:table-cell table:formula="of:=[.D121]-[.D1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6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61111111111111" calcext:value-type="float">
            <text:p>0,00036111111111111100</text:p>
          </table:table-cell>
          <table:table-cell table:formula="of:=[.D122]-[.D121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6" office:value-type="float" office:value="3146" calcext:value-type="float">
            <text:p>314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6412037037037" calcext:value-type="float">
            <text:p>0,00036412037037037000</text:p>
          </table:table-cell>
          <table:table-cell table:formula="of:=[.D123]-[.D1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6" office:value-type="float" office:value="3172" calcext:value-type="float">
            <text:p>317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6712962962963" calcext:value-type="float">
            <text:p>0,00036712962962963000</text:p>
          </table:table-cell>
          <table:table-cell table:formula="of:=[.D124]-[.D12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6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70138888888889" calcext:value-type="float">
            <text:p>0,00037013888888888900</text:p>
          </table:table-cell>
          <table:table-cell table:formula="of:=[.D125]-[.D124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6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73148148148148" calcext:value-type="float">
            <text:p>0,00037314814814814800</text:p>
          </table:table-cell>
          <table:table-cell table:formula="of:=[.D126]-[.D1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6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76157407407407" calcext:value-type="float">
            <text:p>0,00037615740740740700</text:p>
          </table:table-cell>
          <table:table-cell table:formula="of:=[.D127]-[.D12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6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79166666666667" calcext:value-type="float">
            <text:p>0,00037916666666666700</text:p>
          </table:table-cell>
          <table:table-cell table:formula="of:=[.D128]-[.D127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6" office:value-type="float" office:value="3302" calcext:value-type="float">
            <text:p>330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82175925925926" calcext:value-type="float">
            <text:p>0,00038217592592592600</text:p>
          </table:table-cell>
          <table:table-cell table:formula="of:=[.D129]-[.D12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6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85185185185185" calcext:value-type="float">
            <text:p>0,00038518518518518500</text:p>
          </table:table-cell>
          <table:table-cell table:formula="of:=[.D130]-[.D1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6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88194444444444" calcext:value-type="float">
            <text:p>0,00038819444444444400</text:p>
          </table:table-cell>
          <table:table-cell table:formula="of:=[.D131]-[.D130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6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91203703703704" calcext:value-type="float">
            <text:p>0,00039120370370370400</text:p>
          </table:table-cell>
          <table:table-cell table:formula="of:=[.D132]-[.D1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6" office:value-type="float" office:value="3406" calcext:value-type="float">
            <text:p>340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94212962962963" calcext:value-type="float">
            <text:p>0,00039421296296296300</text:p>
          </table:table-cell>
          <table:table-cell table:formula="of:=[.D133]-[.D1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6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97222222222222" calcext:value-type="float">
            <text:p>0,00039722222222222200</text:p>
          </table:table-cell>
          <table:table-cell table:formula="of:=[.D134]-[.D133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6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00231481481482" calcext:value-type="float">
            <text:p>0,00040023148148148200</text:p>
          </table:table-cell>
          <table:table-cell table:formula="of:=[.D135]-[.D1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6" office:value-type="float" office:value="3484" calcext:value-type="float">
            <text:p>348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03240740740741" calcext:value-type="float">
            <text:p>0,00040324074074074100</text:p>
          </table:table-cell>
          <table:table-cell table:formula="of:=[.D136]-[.D13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6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0625" calcext:value-type="float">
            <text:p>0,00040625000000000000</text:p>
          </table:table-cell>
          <table:table-cell table:formula="of:=[.D137]-[.D136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6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09259259259259" calcext:value-type="float">
            <text:p>0,00040925925925925900</text:p>
          </table:table-cell>
          <table:table-cell table:formula="of:=[.D138]-[.D1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6" office:value-type="float" office:value="3562" calcext:value-type="float">
            <text:p>356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12268518518519" calcext:value-type="float">
            <text:p>0,00041226851851851800</text:p>
          </table:table-cell>
          <table:table-cell table:formula="of:=[.D139]-[.D13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6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15277777777778" calcext:value-type="float">
            <text:p>0,00041527777777777800</text:p>
          </table:table-cell>
          <table:table-cell table:formula="of:=[.D140]-[.D139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6" office:value-type="float" office:value="3614" calcext:value-type="float">
            <text:p>361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18287037037037" calcext:value-type="float">
            <text:p>0,00041828703703703700</text:p>
          </table:table-cell>
          <table:table-cell table:formula="of:=[.D141]-[.D14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6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21296296296296" calcext:value-type="float">
            <text:p>0,00042129629629629600</text:p>
          </table:table-cell>
          <table:table-cell table:formula="of:=[.D142]-[.D1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6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24305555555556" calcext:value-type="float">
            <text:p>0,00042430555555555600</text:p>
          </table:table-cell>
          <table:table-cell table:formula="of:=[.D143]-[.D142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6" office:value-type="float" office:value="3692" calcext:value-type="float">
            <text:p>369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27314814814815" calcext:value-type="float">
            <text:p>0,00042731481481481500</text:p>
          </table:table-cell>
          <table:table-cell table:formula="of:=[.D144]-[.D1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6" office:value-type="float" office:value="3718" calcext:value-type="float">
            <text:p>371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30324074074074" calcext:value-type="float">
            <text:p>0,00043032407407407400</text:p>
          </table:table-cell>
          <table:table-cell table:formula="of:=[.D145]-[.D1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6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33333333333333" calcext:value-type="float">
            <text:p>0,00043333333333333300</text:p>
          </table:table-cell>
          <table:table-cell table:formula="of:=[.D146]-[.D145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6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36342592592593" calcext:value-type="float">
            <text:p>0,00043634259259259300</text:p>
          </table:table-cell>
          <table:table-cell table:formula="of:=[.D147]-[.D1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6" office:value-type="float" office:value="3796" calcext:value-type="float">
            <text:p>379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39351851851852" calcext:value-type="float">
            <text:p>0,00043935185185185200</text:p>
          </table:table-cell>
          <table:table-cell table:formula="of:=[.D148]-[.D14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6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42361111111111" calcext:value-type="float">
            <text:p>0,00044236111111111100</text:p>
          </table:table-cell>
          <table:table-cell table:formula="of:=[.D149]-[.D148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6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4537037037037" calcext:value-type="float">
            <text:p>0,00044537037037037000</text:p>
          </table:table-cell>
          <table:table-cell table:formula="of:=[.D150]-[.D1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6" office:value-type="float" office:value="3874" calcext:value-type="float">
            <text:p>387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44837962962963" calcext:value-type="float">
            <text:p>0,00044837962962963000</text:p>
          </table:table-cell>
          <table:table-cell table:formula="of:=[.D151]-[.D1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6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451388888888889" calcext:value-type="float">
            <text:p>0,00045138888888888900</text:p>
          </table:table-cell>
          <table:table-cell table:formula="of:=[.D152]-[.D151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6" office:value-type="float" office:value="3926" calcext:value-type="float">
            <text:p>392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54398148148148" calcext:value-type="float">
            <text:p>0,00045439814814814800</text:p>
          </table:table-cell>
          <table:table-cell table:formula="of:=[.D153]-[.D15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6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57407407407407" calcext:value-type="float">
            <text:p>0,00045740740740740700</text:p>
          </table:table-cell>
          <table:table-cell table:formula="of:=[.D154]-[.D15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6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60416666666667" calcext:value-type="float">
            <text:p>0,00046041666666666700</text:p>
          </table:table-cell>
          <table:table-cell table:formula="of:=[.D155]-[.D154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6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63425925925926" calcext:value-type="float">
            <text:p>0,00046342592592592600</text:p>
          </table:table-cell>
          <table:table-cell table:formula="of:=[.D156]-[.D15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6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466435185185185" calcext:value-type="float">
            <text:p>0,00046643518518518500</text:p>
          </table:table-cell>
          <table:table-cell table:formula="of:=[.D157]-[.D15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6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469444444444444" calcext:value-type="float">
            <text:p>0,00046944444444444400</text:p>
          </table:table-cell>
          <table:table-cell table:formula="of:=[.D158]-[.D157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6" office:value-type="float" office:value="4082" calcext:value-type="float">
            <text:p>408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472453703703704" calcext:value-type="float">
            <text:p>0,00047245370370370400</text:p>
          </table:table-cell>
          <table:table-cell table:formula="of:=[.D159]-[.D15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6" office:value-type="float" office:value="4108" calcext:value-type="float">
            <text:p>410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75462962962963" calcext:value-type="float">
            <text:p>0,00047546296296296300</text:p>
          </table:table-cell>
          <table:table-cell table:formula="of:=[.D160]-[.D15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6" office:value-type="float" office:value="4134" calcext:value-type="float">
            <text:p>413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78472222222222" calcext:value-type="float">
            <text:p>0,00047847222222222200</text:p>
          </table:table-cell>
          <table:table-cell table:formula="of:=[.D161]-[.D160]" office:value-type="float" office:value="0.0000030092592592593" calcext:value-type="float">
            <text:p>0,000003009259259259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6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481481481481482" calcext:value-type="float">
            <text:p>0,00048148148148148200</text:p>
          </table:table-cell>
          <table:table-cell table:formula="of:=[.D162]-[.D16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6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484490740740741" calcext:value-type="float">
            <text:p>0,00048449074074074100</text:p>
          </table:table-cell>
          <table:table-cell table:formula="of:=[.D163]-[.D16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6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4875" calcext:value-type="float">
            <text:p>0,00048750000000000000</text:p>
          </table:table-cell>
          <table:table-cell table:formula="of:=[.D164]-[.D1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6" office:value-type="float" office:value="4238" calcext:value-type="float">
            <text:p>423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490509259259259" calcext:value-type="float">
            <text:p>0,00049050925925925900</text:p>
          </table:table-cell>
          <table:table-cell table:formula="of:=[.D165]-[.D164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6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493518518518519" calcext:value-type="float">
            <text:p>0,00049351851851851900</text:p>
          </table:table-cell>
          <table:table-cell table:formula="of:=[.D166]-[.D16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6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96527777777778" calcext:value-type="float">
            <text:p>0,00049652777777777800</text:p>
          </table:table-cell>
          <table:table-cell table:formula="of:=[.D167]-[.D16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6" office:value-type="float" office:value="4316" calcext:value-type="float">
            <text:p>431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99537037037037" calcext:value-type="float">
            <text:p>0,00049953703703703700</text:p>
          </table:table-cell>
          <table:table-cell table:formula="of:=[.D168]-[.D16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6" office:value-type="float" office:value="4342" calcext:value-type="float">
            <text:p>434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02546296296296" calcext:value-type="float">
            <text:p>0,00050254629629629600</text:p>
          </table:table-cell>
          <table:table-cell table:formula="of:=[.D169]-[.D16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6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505555555555556" calcext:value-type="float">
            <text:p>0,00050555555555555600</text:p>
          </table:table-cell>
          <table:table-cell table:formula="of:=[.D170]-[.D1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6" office:value-type="float" office:value="4394" calcext:value-type="float">
            <text:p>439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508564814814815" calcext:value-type="float">
            <text:p>0,00050856481481481500</text:p>
          </table:table-cell>
          <table:table-cell table:formula="of:=[.D171]-[.D170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6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511574074074074" calcext:value-type="float">
            <text:p>0,00051157407407407400</text:p>
          </table:table-cell>
          <table:table-cell table:formula="of:=[.D172]-[.D17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6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514583333333333" calcext:value-type="float">
            <text:p>0,00051458333333333300</text:p>
          </table:table-cell>
          <table:table-cell table:formula="of:=[.D173]-[.D1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6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517592592592593" calcext:value-type="float">
            <text:p>0,00051759259259259300</text:p>
          </table:table-cell>
          <table:table-cell table:formula="of:=[.D174]-[.D17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6" office:value-type="float" office:value="4498" calcext:value-type="float">
            <text:p>449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520601851851852" calcext:value-type="float">
            <text:p>0,00052060185185185200</text:p>
          </table:table-cell>
          <table:table-cell table:formula="of:=[.D175]-[.D17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6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523611111111111" calcext:value-type="float">
            <text:p>0,00052361111111111100</text:p>
          </table:table-cell>
          <table:table-cell table:formula="of:=[.D176]-[.D1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6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52662037037037" calcext:value-type="float">
            <text:p>0,00052662037037037000</text:p>
          </table:table-cell>
          <table:table-cell table:formula="of:=[.D177]-[.D176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6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52962962962963" calcext:value-type="float">
            <text:p>0,00052962962962963000</text:p>
          </table:table-cell>
          <table:table-cell table:formula="of:=[.D178]-[.D17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6" office:value-type="float" office:value="4602" calcext:value-type="float">
            <text:p>460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532638888888889" calcext:value-type="float">
            <text:p>0,00053263888888888900</text:p>
          </table:table-cell>
          <table:table-cell table:formula="of:=[.D179]-[.D17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6" office:value-type="float" office:value="4628" calcext:value-type="float">
            <text:p>462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535648148148148" calcext:value-type="float">
            <text:p>0,00053564814814814800</text:p>
          </table:table-cell>
          <table:table-cell table:formula="of:=[.D180]-[.D17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6" office:value-type="float" office:value="4654" calcext:value-type="float">
            <text:p>465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538657407407407" calcext:value-type="float">
            <text:p>0,00053865740740740700</text:p>
          </table:table-cell>
          <table:table-cell table:formula="of:=[.D181]-[.D18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6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541666666666667" calcext:value-type="float">
            <text:p>0,00054166666666666700</text:p>
          </table:table-cell>
          <table:table-cell table:formula="of:=[.D182]-[.D1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6" office:value-type="float" office:value="4706" calcext:value-type="float">
            <text:p>470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544675925925926" calcext:value-type="float">
            <text:p>0,00054467592592592600</text:p>
          </table:table-cell>
          <table:table-cell table:formula="of:=[.D183]-[.D182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6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547685185185185" calcext:value-type="float">
            <text:p>0,00054768518518518500</text:p>
          </table:table-cell>
          <table:table-cell table:formula="of:=[.D184]-[.D18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6" office:value-type="float" office:value="4758" calcext:value-type="float">
            <text:p>475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550694444444445" calcext:value-type="float">
            <text:p>0,00055069444444444500</text:p>
          </table:table-cell>
          <table:table-cell table:formula="of:=[.D185]-[.D1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6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553703703703704" calcext:value-type="float">
            <text:p>0,00055370370370370400</text:p>
          </table:table-cell>
          <table:table-cell table:formula="of:=[.D186]-[.D18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6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556712962962963" calcext:value-type="float">
            <text:p>0,00055671296296296300</text:p>
          </table:table-cell>
          <table:table-cell table:formula="of:=[.D187]-[.D1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6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559722222222222" calcext:value-type="float">
            <text:p>0,00055972222222222200</text:p>
          </table:table-cell>
          <table:table-cell table:formula="of:=[.D188]-[.D1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6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562731481481481" calcext:value-type="float">
            <text:p>0,00056273148148148100</text:p>
          </table:table-cell>
          <table:table-cell table:formula="of:=[.D189]-[.D188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6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565740740740741" calcext:value-type="float">
            <text:p>0,00056574074074074100</text:p>
          </table:table-cell>
          <table:table-cell table:formula="of:=[.D190]-[.D18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6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56875" calcext:value-type="float">
            <text:p>0,00056875000000000000</text:p>
          </table:table-cell>
          <table:table-cell table:formula="of:=[.D191]-[.D19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6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571759259259259" calcext:value-type="float">
            <text:p>0,00057175925925925900</text:p>
          </table:table-cell>
          <table:table-cell table:formula="of:=[.D192]-[.D19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6" office:value-type="float" office:value="4966" calcext:value-type="float">
            <text:p>496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574768518518519" calcext:value-type="float">
            <text:p>0,00057476851851851900</text:p>
          </table:table-cell>
          <table:table-cell table:formula="of:=[.D193]-[.D1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6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577777777777778" calcext:value-type="float">
            <text:p>0,00057777777777777800</text:p>
          </table:table-cell>
          <table:table-cell table:formula="of:=[.D194]-[.D1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6" office:value-type="float" office:value="5018" calcext:value-type="float">
            <text:p>501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580787037037037" calcext:value-type="float">
            <text:p>0,00058078703703703700</text:p>
          </table:table-cell>
          <table:table-cell table:formula="of:=[.D195]-[.D194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6" office:value-type="float" office:value="5044" calcext:value-type="float">
            <text:p>504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583796296296296" calcext:value-type="float">
            <text:p>0,00058379629629629600</text:p>
          </table:table-cell>
          <table:table-cell table:formula="of:=[.D196]-[.D19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6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586805555555556" calcext:value-type="float">
            <text:p>0,00058680555555555600</text:p>
          </table:table-cell>
          <table:table-cell table:formula="of:=[.D197]-[.D1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6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589814814814815" calcext:value-type="float">
            <text:p>0,00058981481481481500</text:p>
          </table:table-cell>
          <table:table-cell table:formula="of:=[.D198]-[.D19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6" office:value-type="float" office:value="5122" calcext:value-type="float">
            <text:p>512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592824074074074" calcext:value-type="float">
            <text:p>0,00059282407407407400</text:p>
          </table:table-cell>
          <table:table-cell table:formula="of:=[.D199]-[.D1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6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595833333333333" calcext:value-type="float">
            <text:p>0,00059583333333333300</text:p>
          </table:table-cell>
          <table:table-cell table:formula="of:=[.D200]-[.D19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6" office:value-type="float" office:value="5174" calcext:value-type="float">
            <text:p>517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598842592592593" calcext:value-type="float">
            <text:p>0,00059884259259259300</text:p>
          </table:table-cell>
          <table:table-cell table:formula="of:=[.D201]-[.D200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6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601851851851852" calcext:value-type="float">
            <text:p>0,00060185185185185200</text:p>
          </table:table-cell>
          <table:table-cell table:formula="of:=[.D202]-[.D20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6" office:value-type="float" office:value="5226" calcext:value-type="float">
            <text:p>522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604861111111111" calcext:value-type="float">
            <text:p>0,00060486111111111100</text:p>
          </table:table-cell>
          <table:table-cell table:formula="of:=[.D203]-[.D20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6" office:value-type="float" office:value="5252" calcext:value-type="float">
            <text:p>525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60787037037037" calcext:value-type="float">
            <text:p>0,00060787037037037000</text:p>
          </table:table-cell>
          <table:table-cell table:formula="of:=[.D204]-[.D20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6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61087962962963" calcext:value-type="float">
            <text:p>0,00061087962962963000</text:p>
          </table:table-cell>
          <table:table-cell table:formula="of:=[.D205]-[.D2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6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613888888888889" calcext:value-type="float">
            <text:p>0,00061388888888888900</text:p>
          </table:table-cell>
          <table:table-cell table:formula="of:=[.D206]-[.D2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6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616898148148148" calcext:value-type="float">
            <text:p>0,00061689814814814800</text:p>
          </table:table-cell>
          <table:table-cell table:formula="of:=[.D207]-[.D206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6" office:value-type="float" office:value="5356" calcext:value-type="float">
            <text:p>535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619907407407408" calcext:value-type="float">
            <text:p>0,00061990740740740800</text:p>
          </table:table-cell>
          <table:table-cell table:formula="of:=[.D208]-[.D20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6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622916666666667" calcext:value-type="float">
            <text:p>0,00062291666666666700</text:p>
          </table:table-cell>
          <table:table-cell table:formula="of:=[.D209]-[.D2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6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625925925925926" calcext:value-type="float">
            <text:p>0,00062592592592592600</text:p>
          </table:table-cell>
          <table:table-cell table:formula="of:=[.D210]-[.D20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6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628935185185185" calcext:value-type="float">
            <text:p>0,00062893518518518500</text:p>
          </table:table-cell>
          <table:table-cell table:formula="of:=[.D211]-[.D2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6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631944444444444" calcext:value-type="float">
            <text:p>0,00063194444444444400</text:p>
          </table:table-cell>
          <table:table-cell table:formula="of:=[.D212]-[.D21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6" office:value-type="float" office:value="5486" calcext:value-type="float">
            <text:p>548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634953703703704" calcext:value-type="float">
            <text:p>0,00063495370370370400</text:p>
          </table:table-cell>
          <table:table-cell table:formula="of:=[.D213]-[.D212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6" office:value-type="float" office:value="5512" calcext:value-type="float">
            <text:p>551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637962962962963" calcext:value-type="float">
            <text:p>0,00063796296296296300</text:p>
          </table:table-cell>
          <table:table-cell table:formula="of:=[.D214]-[.D21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6" office:value-type="float" office:value="5538" calcext:value-type="float">
            <text:p>553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640972222222222" calcext:value-type="float">
            <text:p>0,00064097222222222200</text:p>
          </table:table-cell>
          <table:table-cell table:formula="of:=[.D215]-[.D21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6" office:value-type="float" office:value="5564" calcext:value-type="float">
            <text:p>556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643981481481482" calcext:value-type="float">
            <text:p>0,00064398148148148200</text:p>
          </table:table-cell>
          <table:table-cell table:formula="of:=[.D216]-[.D21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6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646990740740741" calcext:value-type="float">
            <text:p>0,00064699074074074100</text:p>
          </table:table-cell>
          <table:table-cell table:formula="of:=[.D217]-[.D2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6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65" calcext:value-type="float">
            <text:p>0,00065000000000000000</text:p>
          </table:table-cell>
          <table:table-cell table:formula="of:=[.D218]-[.D2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6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653009259259259" calcext:value-type="float">
            <text:p>0,00065300925925925900</text:p>
          </table:table-cell>
          <table:table-cell table:formula="of:=[.D219]-[.D218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6" office:value-type="float" office:value="5668" calcext:value-type="float">
            <text:p>566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656018518518519" calcext:value-type="float">
            <text:p>0,00065601851851851900</text:p>
          </table:table-cell>
          <table:table-cell table:formula="of:=[.D220]-[.D21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6" office:value-type="float" office:value="5694" calcext:value-type="float">
            <text:p>569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659027777777778" calcext:value-type="float">
            <text:p>0,00065902777777777800</text:p>
          </table:table-cell>
          <table:table-cell table:formula="of:=[.D221]-[.D2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6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662037037037037" calcext:value-type="float">
            <text:p>0,00066203703703703700</text:p>
          </table:table-cell>
          <table:table-cell table:formula="of:=[.D222]-[.D22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6" office:value-type="float" office:value="5746" calcext:value-type="float">
            <text:p>574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665046296296296" calcext:value-type="float">
            <text:p>0,00066504629629629600</text:p>
          </table:table-cell>
          <table:table-cell table:formula="of:=[.D223]-[.D2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6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668055555555556" calcext:value-type="float">
            <text:p>0,00066805555555555600</text:p>
          </table:table-cell>
          <table:table-cell table:formula="of:=[.D224]-[.D22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6" office:value-type="float" office:value="5798" calcext:value-type="float">
            <text:p>579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671064814814815" calcext:value-type="float">
            <text:p>0,00067106481481481500</text:p>
          </table:table-cell>
          <table:table-cell table:formula="of:=[.D225]-[.D224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6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674074074074074" calcext:value-type="float">
            <text:p>0,00067407407407407400</text:p>
          </table:table-cell>
          <table:table-cell table:formula="of:=[.D226]-[.D2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6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677083333333333" calcext:value-type="float">
            <text:p>0,00067708333333333300</text:p>
          </table:table-cell>
          <table:table-cell table:formula="of:=[.D227]-[.D22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6" office:value-type="float" office:value="5876" calcext:value-type="float">
            <text:p>587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680092592592593" calcext:value-type="float">
            <text:p>0,00068009259259259300</text:p>
          </table:table-cell>
          <table:table-cell table:formula="of:=[.D228]-[.D22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6" office:value-type="float" office:value="5902" calcext:value-type="float">
            <text:p>590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683101851851852" calcext:value-type="float">
            <text:p>0,00068310185185185200</text:p>
          </table:table-cell>
          <table:table-cell table:formula="of:=[.D229]-[.D22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6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686111111111111" calcext:value-type="float">
            <text:p>0,00068611111111111100</text:p>
          </table:table-cell>
          <table:table-cell table:formula="of:=[.D230]-[.D2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6" office:value-type="float" office:value="5954" calcext:value-type="float">
            <text:p>595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68912037037037" calcext:value-type="float">
            <text:p>0,00068912037037037000</text:p>
          </table:table-cell>
          <table:table-cell table:formula="of:=[.D231]-[.D230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6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69212962962963" calcext:value-type="float">
            <text:p>0,00069212962962963000</text:p>
          </table:table-cell>
          <table:table-cell table:formula="of:=[.D232]-[.D2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6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695138888888889" calcext:value-type="float">
            <text:p>0,00069513888888888900</text:p>
          </table:table-cell>
          <table:table-cell table:formula="of:=[.D233]-[.D2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6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698148148148148" calcext:value-type="float">
            <text:p>0,00069814814814814800</text:p>
          </table:table-cell>
          <table:table-cell table:formula="of:=[.D234]-[.D23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6" office:value-type="float" office:value="6058" calcext:value-type="float">
            <text:p>605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701157407407407" calcext:value-type="float">
            <text:p>0,00070115740740740700</text:p>
          </table:table-cell>
          <table:table-cell table:formula="of:=[.D235]-[.D2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6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704166666666667" calcext:value-type="float">
            <text:p>0,00070416666666666700</text:p>
          </table:table-cell>
          <table:table-cell table:formula="of:=[.D236]-[.D23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6" office:value-type="float" office:value="6110" calcext:value-type="float">
            <text:p>611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707175925925926" calcext:value-type="float">
            <text:p>0,00070717592592592600</text:p>
          </table:table-cell>
          <table:table-cell table:formula="of:=[.D237]-[.D236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6" office:value-type="float" office:value="6136" calcext:value-type="float">
            <text:p>613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710185185185185" calcext:value-type="float">
            <text:p>0,00071018518518518500</text:p>
          </table:table-cell>
          <table:table-cell table:formula="of:=[.D238]-[.D2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6" office:value-type="float" office:value="6162" calcext:value-type="float">
            <text:p>616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713194444444445" calcext:value-type="float">
            <text:p>0,00071319444444444500</text:p>
          </table:table-cell>
          <table:table-cell table:formula="of:=[.D239]-[.D23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6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716203703703704" calcext:value-type="float">
            <text:p>0,00071620370370370400</text:p>
          </table:table-cell>
          <table:table-cell table:formula="of:=[.D240]-[.D23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6" office:value-type="float" office:value="6214" calcext:value-type="float">
            <text:p>621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719212962962963" calcext:value-type="float">
            <text:p>0,00071921296296296300</text:p>
          </table:table-cell>
          <table:table-cell table:formula="of:=[.D241]-[.D24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6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722222222222222" calcext:value-type="float">
            <text:p>0,00072222222222222200</text:p>
          </table:table-cell>
          <table:table-cell table:formula="of:=[.D242]-[.D2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6" office:value-type="float" office:value="6266" calcext:value-type="float">
            <text:p>626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725231481481481" calcext:value-type="float">
            <text:p>0,00072523148148148100</text:p>
          </table:table-cell>
          <table:table-cell table:formula="of:=[.D243]-[.D242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6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728240740740741" calcext:value-type="float">
            <text:p>0,00072824074074074100</text:p>
          </table:table-cell>
          <table:table-cell table:formula="of:=[.D244]-[.D2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6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73125" calcext:value-type="float">
            <text:p>0,00073125000000000000</text:p>
          </table:table-cell>
          <table:table-cell table:formula="of:=[.D245]-[.D2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6" office:value-type="float" office:value="6344" calcext:value-type="float">
            <text:p>634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734259259259259" calcext:value-type="float">
            <text:p>0,00073425925925925900</text:p>
          </table:table-cell>
          <table:table-cell table:formula="of:=[.D246]-[.D2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6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737268518518519" calcext:value-type="float">
            <text:p>0,00073726851851851900</text:p>
          </table:table-cell>
          <table:table-cell table:formula="of:=[.D247]-[.D2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6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740277777777778" calcext:value-type="float">
            <text:p>0,00074027777777777800</text:p>
          </table:table-cell>
          <table:table-cell table:formula="of:=[.D248]-[.D24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6" office:value-type="float" office:value="6422" calcext:value-type="float">
            <text:p>642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743287037037037" calcext:value-type="float">
            <text:p>0,00074328703703703700</text:p>
          </table:table-cell>
          <table:table-cell table:formula="of:=[.D249]-[.D248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6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746296296296296" calcext:value-type="float">
            <text:p>0,00074629629629629600</text:p>
          </table:table-cell>
          <table:table-cell table:formula="of:=[.D250]-[.D2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6" office:value-type="float" office:value="6474" calcext:value-type="float">
            <text:p>647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749305555555556" calcext:value-type="float">
            <text:p>0,00074930555555555600</text:p>
          </table:table-cell>
          <table:table-cell table:formula="of:=[.D251]-[.D2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6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752314814814815" calcext:value-type="float">
            <text:p>0,00075231481481481500</text:p>
          </table:table-cell>
          <table:table-cell table:formula="of:=[.D252]-[.D25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6" office:value-type="float" office:value="6526" calcext:value-type="float">
            <text:p>652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755324074074074" calcext:value-type="float">
            <text:p>0,00075532407407407400</text:p>
          </table:table-cell>
          <table:table-cell table:formula="of:=[.D253]-[.D25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6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758333333333333" calcext:value-type="float">
            <text:p>0,00075833333333333300</text:p>
          </table:table-cell>
          <table:table-cell table:formula="of:=[.D254]-[.D25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6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761342592592593" calcext:value-type="float">
            <text:p>0,00076134259259259200</text:p>
          </table:table-cell>
          <table:table-cell table:formula="of:=[.D255]-[.D254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6" office:value-type="float" office:value="6604" calcext:value-type="float">
            <text:p>660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764351851851852" calcext:value-type="float">
            <text:p>0,00076435185185185200</text:p>
          </table:table-cell>
          <table:table-cell table:formula="of:=[.D256]-[.D25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6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767361111111111" calcext:value-type="float">
            <text:p>0,00076736111111111100</text:p>
          </table:table-cell>
          <table:table-cell table:formula="of:=[.D257]-[.D25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6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77037037037037" calcext:value-type="float">
            <text:p>0,00077037037037037000</text:p>
          </table:table-cell>
          <table:table-cell table:formula="of:=[.D258]-[.D25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6" office:value-type="float" office:value="6682" calcext:value-type="float">
            <text:p>668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77337962962963" calcext:value-type="float">
            <text:p>0,00077337962962963000</text:p>
          </table:table-cell>
          <table:table-cell table:formula="of:=[.D259]-[.D25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6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776388888888889" calcext:value-type="float">
            <text:p>0,00077638888888888900</text:p>
          </table:table-cell>
          <table:table-cell table:formula="of:=[.D260]-[.D25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6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779398148148148" calcext:value-type="float">
            <text:p>0,00077939814814814800</text:p>
          </table:table-cell>
          <table:table-cell table:formula="of:=[.D261]-[.D260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6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782407407407407" calcext:value-type="float">
            <text:p>0,00078240740740740800</text:p>
          </table:table-cell>
          <table:table-cell table:formula="of:=[.D262]-[.D26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6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785416666666667" calcext:value-type="float">
            <text:p>0,00078541666666666700</text:p>
          </table:table-cell>
          <table:table-cell table:formula="of:=[.D263]-[.D26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6" office:value-type="float" office:value="6812" calcext:value-type="float">
            <text:p>681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788425925925926" calcext:value-type="float">
            <text:p>0,00078842592592592600</text:p>
          </table:table-cell>
          <table:table-cell table:formula="of:=[.D264]-[.D2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6" office:value-type="float" office:value="6838" calcext:value-type="float">
            <text:p>683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791435185185185" calcext:value-type="float">
            <text:p>0,00079143518518518500</text:p>
          </table:table-cell>
          <table:table-cell table:formula="of:=[.D265]-[.D26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6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794444444444444" calcext:value-type="float">
            <text:p>0,00079444444444444500</text:p>
          </table:table-cell>
          <table:table-cell table:formula="of:=[.D266]-[.D265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6" office:value-type="float" office:value="6890" calcext:value-type="float">
            <text:p>689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797453703703704" calcext:value-type="float">
            <text:p>0,00079745370370370400</text:p>
          </table:table-cell>
          <table:table-cell table:formula="of:=[.D267]-[.D26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6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800462962962963" calcext:value-type="float">
            <text:p>0,00080046296296296300</text:p>
          </table:table-cell>
          <table:table-cell table:formula="of:=[.D268]-[.D26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6" office:value-type="float" office:value="6942" calcext:value-type="float">
            <text:p>694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803472222222222" calcext:value-type="float">
            <text:p>0,00080347222222222200</text:p>
          </table:table-cell>
          <table:table-cell table:formula="of:=[.D269]-[.D26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6" office:value-type="float" office:value="6968" calcext:value-type="float">
            <text:p>696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806481481481482" calcext:value-type="float">
            <text:p>0,00080648148148148200</text:p>
          </table:table-cell>
          <table:table-cell table:formula="of:=[.D270]-[.D2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6" office:value-type="float" office:value="6994" calcext:value-type="float">
            <text:p>699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809490740740741" calcext:value-type="float">
            <text:p>0,00080949074074074100</text:p>
          </table:table-cell>
          <table:table-cell table:formula="of:=[.D271]-[.D27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6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8125" calcext:value-type="float">
            <text:p>0,00081250000000000000</text:p>
          </table:table-cell>
          <table:table-cell table:formula="of:=[.D272]-[.D271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6" office:value-type="float" office:value="7046" calcext:value-type="float">
            <text:p>704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815509259259259" calcext:value-type="float">
            <text:p>0,00081550925925925900</text:p>
          </table:table-cell>
          <table:table-cell table:formula="of:=[.D273]-[.D2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6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818518518518519" calcext:value-type="float">
            <text:p>0,00081851851851851900</text:p>
          </table:table-cell>
          <table:table-cell table:formula="of:=[.D274]-[.D27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6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821527777777778" calcext:value-type="float">
            <text:p>0,00082152777777777800</text:p>
          </table:table-cell>
          <table:table-cell table:formula="of:=[.D275]-[.D27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6" office:value-type="float" office:value="7124" calcext:value-type="float">
            <text:p>712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824537037037037" calcext:value-type="float">
            <text:p>0,00082453703703703700</text:p>
          </table:table-cell>
          <table:table-cell table:formula="of:=[.D276]-[.D2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6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827546296296296" calcext:value-type="float">
            <text:p>0,00082754629629629600</text:p>
          </table:table-cell>
          <table:table-cell table:formula="of:=[.D277]-[.D27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6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830555555555556" calcext:value-type="float">
            <text:p>0,00083055555555555600</text:p>
          </table:table-cell>
          <table:table-cell table:formula="of:=[.D278]-[.D277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6" office:value-type="float" office:value="7202" calcext:value-type="float">
            <text:p>720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833564814814815" calcext:value-type="float">
            <text:p>0,00083356481481481500</text:p>
          </table:table-cell>
          <table:table-cell table:formula="of:=[.D279]-[.D27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6" office:value-type="float" office:value="7228" calcext:value-type="float">
            <text:p>722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836574074074074" calcext:value-type="float">
            <text:p>0,00083657407407407400</text:p>
          </table:table-cell>
          <table:table-cell table:formula="of:=[.D280]-[.D27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6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839583333333333" calcext:value-type="float">
            <text:p>0,00083958333333333300</text:p>
          </table:table-cell>
          <table:table-cell table:formula="of:=[.D281]-[.D28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6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842592592592593" calcext:value-type="float">
            <text:p>0,00084259259259259300</text:p>
          </table:table-cell>
          <table:table-cell table:formula="of:=[.D282]-[.D2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6" office:value-type="float" office:value="7306" calcext:value-type="float">
            <text:p>730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845601851851852" calcext:value-type="float">
            <text:p>0,00084560185185185200</text:p>
          </table:table-cell>
          <table:table-cell table:formula="of:=[.D283]-[.D28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6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848611111111111" calcext:value-type="float">
            <text:p>0,00084861111111111100</text:p>
          </table:table-cell>
          <table:table-cell table:formula="of:=[.D284]-[.D283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6" office:value-type="float" office:value="7358" calcext:value-type="float">
            <text:p>735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85162037037037" calcext:value-type="float">
            <text:p>0,00085162037037037000</text:p>
          </table:table-cell>
          <table:table-cell table:formula="of:=[.D285]-[.D2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6" office:value-type="float" office:value="7384" calcext:value-type="float">
            <text:p>738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85462962962963" calcext:value-type="float">
            <text:p>0,00085462962962963000</text:p>
          </table:table-cell>
          <table:table-cell table:formula="of:=[.D286]-[.D28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6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857638888888889" calcext:value-type="float">
            <text:p>0,00085763888888888900</text:p>
          </table:table-cell>
          <table:table-cell table:formula="of:=[.D287]-[.D2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6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860648148148148" calcext:value-type="float">
            <text:p>0,00086064814814814800</text:p>
          </table:table-cell>
          <table:table-cell table:formula="of:=[.D288]-[.D2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6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863657407407407" calcext:value-type="float">
            <text:p>0,00086365740740740700</text:p>
          </table:table-cell>
          <table:table-cell table:formula="of:=[.D289]-[.D28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6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866666666666667" calcext:value-type="float">
            <text:p>0,00086666666666666700</text:p>
          </table:table-cell>
          <table:table-cell table:formula="of:=[.D290]-[.D289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6" office:value-type="float" office:value="7514" calcext:value-type="float">
            <text:p>751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869675925925926" calcext:value-type="float">
            <text:p>0,00086967592592592600</text:p>
          </table:table-cell>
          <table:table-cell table:formula="of:=[.D291]-[.D29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6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872685185185185" calcext:value-type="float">
            <text:p>0,00087268518518518500</text:p>
          </table:table-cell>
          <table:table-cell table:formula="of:=[.D292]-[.D29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6" office:value-type="float" office:value="7566" calcext:value-type="float">
            <text:p>756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875694444444445" calcext:value-type="float">
            <text:p>0,00087569444444444500</text:p>
          </table:table-cell>
          <table:table-cell table:formula="of:=[.D293]-[.D2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6" office:value-type="float" office:value="7592" calcext:value-type="float">
            <text:p>759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878703703703704" calcext:value-type="float">
            <text:p>0,00087870370370370400</text:p>
          </table:table-cell>
          <table:table-cell table:formula="of:=[.D294]-[.D2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6" office:value-type="float" office:value="7618" calcext:value-type="float">
            <text:p>761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881712962962963" calcext:value-type="float">
            <text:p>0,00088171296296296300</text:p>
          </table:table-cell>
          <table:table-cell table:formula="of:=[.D295]-[.D29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6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884722222222222" calcext:value-type="float">
            <text:p>0,00088472222222222200</text:p>
          </table:table-cell>
          <table:table-cell table:formula="of:=[.D296]-[.D295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6" office:value-type="float" office:value="7670" calcext:value-type="float">
            <text:p>767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887731481481482" calcext:value-type="float">
            <text:p>0,00088773148148148200</text:p>
          </table:table-cell>
          <table:table-cell table:formula="of:=[.D297]-[.D2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6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890740740740741" calcext:value-type="float">
            <text:p>0,00089074074074074100</text:p>
          </table:table-cell>
          <table:table-cell table:formula="of:=[.D298]-[.D29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6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89375" calcext:value-type="float">
            <text:p>0,00089375000000000000</text:p>
          </table:table-cell>
          <table:table-cell table:formula="of:=[.D299]-[.D2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6" office:value-type="float" office:value="7748" calcext:value-type="float">
            <text:p>774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896759259259259" calcext:value-type="float">
            <text:p>0,00089675925925925900</text:p>
          </table:table-cell>
          <table:table-cell table:formula="of:=[.D300]-[.D29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6" office:value-type="float" office:value="7774" calcext:value-type="float">
            <text:p>777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899768518518519" calcext:value-type="float">
            <text:p>0,00089976851851851900</text:p>
          </table:table-cell>
          <table:table-cell table:formula="of:=[.D301]-[.D30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6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902777777777778" calcext:value-type="float">
            <text:p>0,00090277777777777800</text:p>
          </table:table-cell>
          <table:table-cell table:formula="of:=[.D302]-[.D301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6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905787037037037" calcext:value-type="float">
            <text:p>0,00090578703703703700</text:p>
          </table:table-cell>
          <table:table-cell table:formula="of:=[.D303]-[.D30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6" office:value-type="float" office:value="7852" calcext:value-type="float">
            <text:p>785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908796296296296" calcext:value-type="float">
            <text:p>0,00090879629629629600</text:p>
          </table:table-cell>
          <table:table-cell table:formula="of:=[.D304]-[.D30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6" office:value-type="float" office:value="7878" calcext:value-type="float">
            <text:p>787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911805555555556" calcext:value-type="float">
            <text:p>0,00091180555555555600</text:p>
          </table:table-cell>
          <table:table-cell table:formula="of:=[.D305]-[.D3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6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914814814814815" calcext:value-type="float">
            <text:p>0,00091481481481481500</text:p>
          </table:table-cell>
          <table:table-cell table:formula="of:=[.D306]-[.D3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6" office:value-type="float" office:value="7930" calcext:value-type="float">
            <text:p>793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917824074074074" calcext:value-type="float">
            <text:p>0,00091782407407407400</text:p>
          </table:table-cell>
          <table:table-cell table:formula="of:=[.D307]-[.D30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6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920833333333333" calcext:value-type="float">
            <text:p>0,00092083333333333300</text:p>
          </table:table-cell>
          <table:table-cell table:formula="of:=[.D308]-[.D307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6" office:value-type="float" office:value="7982" calcext:value-type="float">
            <text:p>798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923842592592593" calcext:value-type="float">
            <text:p>0,00092384259259259300</text:p>
          </table:table-cell>
          <table:table-cell table:formula="of:=[.D309]-[.D3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6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926851851851852" calcext:value-type="float">
            <text:p>0,00092685185185185200</text:p>
          </table:table-cell>
          <table:table-cell table:formula="of:=[.D310]-[.D30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6" office:value-type="float" office:value="8034" calcext:value-type="float">
            <text:p>803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929861111111111" calcext:value-type="float">
            <text:p>0,00092986111111111100</text:p>
          </table:table-cell>
          <table:table-cell table:formula="of:=[.D311]-[.D3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6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93287037037037" calcext:value-type="float">
            <text:p>0,00093287037037037000</text:p>
          </table:table-cell>
          <table:table-cell table:formula="of:=[.D312]-[.D31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6" office:value-type="float" office:value="8086" calcext:value-type="float">
            <text:p>808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93587962962963" calcext:value-type="float">
            <text:p>0,00093587962962963000</text:p>
          </table:table-cell>
          <table:table-cell table:formula="of:=[.D313]-[.D31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6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938888888888889" calcext:value-type="float">
            <text:p>0,00093888888888888900</text:p>
          </table:table-cell>
          <table:table-cell table:formula="of:=[.D314]-[.D313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6" office:value-type="float" office:value="8138" calcext:value-type="float">
            <text:p>813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941898148148148" calcext:value-type="float">
            <text:p>0,00094189814814814800</text:p>
          </table:table-cell>
          <table:table-cell table:formula="of:=[.D315]-[.D31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6" office:value-type="float" office:value="8164" calcext:value-type="float">
            <text:p>816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944907407407407" calcext:value-type="float">
            <text:p>0,00094490740740740700</text:p>
          </table:table-cell>
          <table:table-cell table:formula="of:=[.D316]-[.D31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6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947916666666667" calcext:value-type="float">
            <text:p>0,00094791666666666700</text:p>
          </table:table-cell>
          <table:table-cell table:formula="of:=[.D317]-[.D3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6" office:value-type="float" office:value="8216" calcext:value-type="float">
            <text:p>821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950925925925926" calcext:value-type="float">
            <text:p>0,00095092592592592600</text:p>
          </table:table-cell>
          <table:table-cell table:formula="of:=[.D318]-[.D3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6" office:value-type="float" office:value="8242" calcext:value-type="float">
            <text:p>824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953935185185185" calcext:value-type="float">
            <text:p>0,00095393518518518500</text:p>
          </table:table-cell>
          <table:table-cell table:formula="of:=[.D319]-[.D31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6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956944444444444" calcext:value-type="float">
            <text:p>0,00095694444444444500</text:p>
          </table:table-cell>
          <table:table-cell table:formula="of:=[.D320]-[.D319]" office:value-type="float" office:value="0.00000300925925925935" calcext:value-type="float">
            <text:p>0,000003009259259259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6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959953703703704" calcext:value-type="float">
            <text:p>0,00095995370370370400</text:p>
          </table:table-cell>
          <table:table-cell table:formula="of:=[.D321]-[.D3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6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962962962962963" calcext:value-type="float">
            <text:p>0,00096296296296296300</text:p>
          </table:table-cell>
          <table:table-cell table:formula="of:=[.D322]-[.D32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6" office:value-type="float" office:value="8346" calcext:value-type="float">
            <text:p>834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965972222222222" calcext:value-type="float">
            <text:p>0,00096597222222222200</text:p>
          </table:table-cell>
          <table:table-cell table:formula="of:=[.D323]-[.D3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6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968981481481482" calcext:value-type="float">
            <text:p>0,00096898148148148200</text:p>
          </table:table-cell>
          <table:table-cell table:formula="of:=[.D324]-[.D32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6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971990740740741" calcext:value-type="float">
            <text:p>0,00097199074074074100</text:p>
          </table:table-cell>
          <table:table-cell table:formula="of:=[.D325]-[.D32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6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975" calcext:value-type="float">
            <text:p>0,00097500000000000000</text:p>
          </table:table-cell>
          <table:table-cell table:formula="of:=[.D326]-[.D3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6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978009259259259" calcext:value-type="float">
            <text:p>0,00097800925925925900</text:p>
          </table:table-cell>
          <table:table-cell table:formula="of:=[.D327]-[.D32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6" office:value-type="float" office:value="8476" calcext:value-type="float">
            <text:p>847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981018518518518" calcext:value-type="float">
            <text:p>0,00098101851851851800</text:p>
          </table:table-cell>
          <table:table-cell table:formula="of:=[.D328]-[.D32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6" office:value-type="float" office:value="8502" calcext:value-type="float">
            <text:p>850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984027777777778" calcext:value-type="float">
            <text:p>0,00098402777777777800</text:p>
          </table:table-cell>
          <table:table-cell table:formula="of:=[.D329]-[.D32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6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987037037037037" calcext:value-type="float">
            <text:p>0,00098703703703703700</text:p>
          </table:table-cell>
          <table:table-cell table:formula="of:=[.D330]-[.D3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6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990046296296296" calcext:value-type="float">
            <text:p>0,00099004629629629600</text:p>
          </table:table-cell>
          <table:table-cell table:formula="of:=[.D331]-[.D33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6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993055555555556" calcext:value-type="float">
            <text:p>0,00099305555555555600</text:p>
          </table:table-cell>
          <table:table-cell table:formula="of:=[.D332]-[.D3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6" office:value-type="float" office:value="8606" calcext:value-type="float">
            <text:p>860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996064814814815" calcext:value-type="float">
            <text:p>0,00099606481481481500</text:p>
          </table:table-cell>
          <table:table-cell table:formula="of:=[.D333]-[.D3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6" office:value-type="float" office:value="8632" calcext:value-type="float">
            <text:p>863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999074074074074" calcext:value-type="float">
            <text:p>0,00099907407407407400</text:p>
          </table:table-cell>
          <table:table-cell table:formula="of:=[.D334]-[.D33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6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00208333333333" calcext:value-type="float">
            <text:p>0,00100208333333333000</text:p>
          </table:table-cell>
          <table:table-cell table:formula="of:=[.D335]-[.D3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6" office:value-type="float" office:value="8684" calcext:value-type="float">
            <text:p>868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00509259259259" calcext:value-type="float">
            <text:p>0,00100509259259259000</text:p>
          </table:table-cell>
          <table:table-cell table:formula="of:=[.D336]-[.D33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6" office:value-type="float" office:value="8710" calcext:value-type="float">
            <text:p>871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00810185185185" calcext:value-type="float">
            <text:p>0,00100810185185185000</text:p>
          </table:table-cell>
          <table:table-cell table:formula="of:=[.D337]-[.D33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6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01111111111111" calcext:value-type="float">
            <text:p>0,00101111111111111000</text:p>
          </table:table-cell>
          <table:table-cell table:formula="of:=[.D338]-[.D3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6" office:value-type="float" office:value="8762" calcext:value-type="float">
            <text:p>876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01412037037037" calcext:value-type="float">
            <text:p>0,00101412037037037000</text:p>
          </table:table-cell>
          <table:table-cell table:formula="of:=[.D339]-[.D33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6" office:value-type="float" office:value="8788" calcext:value-type="float">
            <text:p>878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01712962962963" calcext:value-type="float">
            <text:p>0,00101712962962963000</text:p>
          </table:table-cell>
          <table:table-cell table:formula="of:=[.D340]-[.D33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6" office:value-type="float" office:value="8814" calcext:value-type="float">
            <text:p>881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02013888888889" calcext:value-type="float">
            <text:p>0,00102013888888889000</text:p>
          </table:table-cell>
          <table:table-cell table:formula="of:=[.D341]-[.D34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6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02314814814815" calcext:value-type="float">
            <text:p>0,00102314814814815000</text:p>
          </table:table-cell>
          <table:table-cell table:formula="of:=[.D342]-[.D3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6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02615740740741" calcext:value-type="float">
            <text:p>0,00102615740740741000</text:p>
          </table:table-cell>
          <table:table-cell table:formula="of:=[.D343]-[.D34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6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02916666666667" calcext:value-type="float">
            <text:p>0,00102916666666667000</text:p>
          </table:table-cell>
          <table:table-cell table:formula="of:=[.D344]-[.D3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6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03217592592593" calcext:value-type="float">
            <text:p>0,00103217592592593000</text:p>
          </table:table-cell>
          <table:table-cell table:formula="of:=[.D345]-[.D3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6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03518518518519" calcext:value-type="float">
            <text:p>0,00103518518518519000</text:p>
          </table:table-cell>
          <table:table-cell table:formula="of:=[.D346]-[.D3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6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03819444444444" calcext:value-type="float">
            <text:p>0,00103819444444444000</text:p>
          </table:table-cell>
          <table:table-cell table:formula="of:=[.D347]-[.D3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6" office:value-type="float" office:value="8996" calcext:value-type="float">
            <text:p>899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0412037037037" calcext:value-type="float">
            <text:p>0,00104120370370370000</text:p>
          </table:table-cell>
          <table:table-cell table:formula="of:=[.D348]-[.D34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6" office:value-type="float" office:value="9022" calcext:value-type="float">
            <text:p>902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04421296296296" calcext:value-type="float">
            <text:p>0,00104421296296296000</text:p>
          </table:table-cell>
          <table:table-cell table:formula="of:=[.D349]-[.D34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6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04722222222222" calcext:value-type="float">
            <text:p>0,00104722222222222000</text:p>
          </table:table-cell>
          <table:table-cell table:formula="of:=[.D350]-[.D3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6" office:value-type="float" office:value="9074" calcext:value-type="float">
            <text:p>907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05023148148148" calcext:value-type="float">
            <text:p>0,00105023148148148000</text:p>
          </table:table-cell>
          <table:table-cell table:formula="of:=[.D351]-[.D3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6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05324074074074" calcext:value-type="float">
            <text:p>0,00105324074074074000</text:p>
          </table:table-cell>
          <table:table-cell table:formula="of:=[.D352]-[.D35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6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05625" calcext:value-type="float">
            <text:p>0,00105625000000000000</text:p>
          </table:table-cell>
          <table:table-cell table:formula="of:=[.D353]-[.D35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6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05925925925926" calcext:value-type="float">
            <text:p>0,00105925925925926000</text:p>
          </table:table-cell>
          <table:table-cell table:formula="of:=[.D354]-[.D35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6" office:value-type="float" office:value="9178" calcext:value-type="float">
            <text:p>917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06226851851852" calcext:value-type="float">
            <text:p>0,00106226851851852000</text:p>
          </table:table-cell>
          <table:table-cell table:formula="of:=[.D355]-[.D35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6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06527777777778" calcext:value-type="float">
            <text:p>0,00106527777777778000</text:p>
          </table:table-cell>
          <table:table-cell table:formula="of:=[.D356]-[.D35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6" office:value-type="float" office:value="9230" calcext:value-type="float">
            <text:p>923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06828703703704" calcext:value-type="float">
            <text:p>0,00106828703703704000</text:p>
          </table:table-cell>
          <table:table-cell table:formula="of:=[.D357]-[.D35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6" office:value-type="float" office:value="9256" calcext:value-type="float">
            <text:p>925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0712962962963" calcext:value-type="float">
            <text:p>0,00107129629629630000</text:p>
          </table:table-cell>
          <table:table-cell table:formula="of:=[.D358]-[.D35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6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07430555555556" calcext:value-type="float">
            <text:p>0,00107430555555556000</text:p>
          </table:table-cell>
          <table:table-cell table:formula="of:=[.D359]-[.D35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6" office:value-type="float" office:value="9308" calcext:value-type="float">
            <text:p>930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07731481481481" calcext:value-type="float">
            <text:p>0,00107731481481481000</text:p>
          </table:table-cell>
          <table:table-cell table:formula="of:=[.D360]-[.D35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6" office:value-type="float" office:value="9334" calcext:value-type="float">
            <text:p>933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08032407407407" calcext:value-type="float">
            <text:p>0,00108032407407407000</text:p>
          </table:table-cell>
          <table:table-cell table:formula="of:=[.D361]-[.D36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6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08333333333333" calcext:value-type="float">
            <text:p>0,00108333333333333000</text:p>
          </table:table-cell>
          <table:table-cell table:formula="of:=[.D362]-[.D36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6" office:value-type="float" office:value="9386" calcext:value-type="float">
            <text:p>938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08634259259259" calcext:value-type="float">
            <text:p>0,00108634259259259000</text:p>
          </table:table-cell>
          <table:table-cell table:formula="of:=[.D363]-[.D36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6" office:value-type="float" office:value="9412" calcext:value-type="float">
            <text:p>941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08935185185185" calcext:value-type="float">
            <text:p>0,00108935185185185000</text:p>
          </table:table-cell>
          <table:table-cell table:formula="of:=[.D364]-[.D3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6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09236111111111" calcext:value-type="float">
            <text:p>0,00109236111111111000</text:p>
          </table:table-cell>
          <table:table-cell table:formula="of:=[.D365]-[.D36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6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09537037037037" calcext:value-type="float">
            <text:p>0,00109537037037037000</text:p>
          </table:table-cell>
          <table:table-cell table:formula="of:=[.D366]-[.D36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6" office:value-type="float" office:value="9490" calcext:value-type="float">
            <text:p>949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09837962962963" calcext:value-type="float">
            <text:p>0,00109837962962963000</text:p>
          </table:table-cell>
          <table:table-cell table:formula="of:=[.D367]-[.D36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6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10138888888889" calcext:value-type="float">
            <text:p>0,00110138888888889000</text:p>
          </table:table-cell>
          <table:table-cell table:formula="of:=[.D368]-[.D36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6" office:value-type="float" office:value="9542" calcext:value-type="float">
            <text:p>9542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10439814814815" calcext:value-type="float">
            <text:p>0,00110439814814815000</text:p>
          </table:table-cell>
          <table:table-cell table:formula="of:=[.D369]-[.D36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6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10740740740741" calcext:value-type="float">
            <text:p>0,00110740740740741000</text:p>
          </table:table-cell>
          <table:table-cell table:formula="of:=[.D370]-[.D3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6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11041666666667" calcext:value-type="float">
            <text:p>0,00111041666666667000</text:p>
          </table:table-cell>
          <table:table-cell table:formula="of:=[.D371]-[.D37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6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11342592592593" calcext:value-type="float">
            <text:p>0,00111342592592593000</text:p>
          </table:table-cell>
          <table:table-cell table:formula="of:=[.D372]-[.D37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6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11643518518519" calcext:value-type="float">
            <text:p>0,00111643518518519000</text:p>
          </table:table-cell>
          <table:table-cell table:formula="of:=[.D373]-[.D3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6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11944444444444" calcext:value-type="float">
            <text:p>0,00111944444444444000</text:p>
          </table:table-cell>
          <table:table-cell table:formula="of:=[.D374]-[.D37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6" office:value-type="float" office:value="9698" calcext:value-type="float">
            <text:p>9698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1224537037037" calcext:value-type="float">
            <text:p>0,00112245370370370000</text:p>
          </table:table-cell>
          <table:table-cell table:formula="of:=[.D375]-[.D37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6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12546296296296" calcext:value-type="float">
            <text:p>0,00112546296296296000</text:p>
          </table:table-cell>
          <table:table-cell table:formula="of:=[.D376]-[.D3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6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12847222222222" calcext:value-type="float">
            <text:p>0,00112847222222222000</text:p>
          </table:table-cell>
          <table:table-cell table:formula="of:=[.D377]-[.D37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6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13148148148148" calcext:value-type="float">
            <text:p>0,00113148148148148000</text:p>
          </table:table-cell>
          <table:table-cell table:formula="of:=[.D378]-[.D37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6" office:value-type="float" office:value="9802" calcext:value-type="float">
            <text:p>9802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13449074074074" calcext:value-type="float">
            <text:p>0,00113449074074074000</text:p>
          </table:table-cell>
          <table:table-cell table:formula="of:=[.D379]-[.D37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6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1375" calcext:value-type="float">
            <text:p>0,00113750000000000000</text:p>
          </table:table-cell>
          <table:table-cell table:formula="of:=[.D380]-[.D37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6" office:value-type="float" office:value="9854" calcext:value-type="float">
            <text:p>9854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14050925925926" calcext:value-type="float">
            <text:p>0,00114050925925926000</text:p>
          </table:table-cell>
          <table:table-cell table:formula="of:=[.D381]-[.D38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6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14351851851852" calcext:value-type="float">
            <text:p>0,00114351851851852000</text:p>
          </table:table-cell>
          <table:table-cell table:formula="of:=[.D382]-[.D3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6" office:value-type="float" office:value="9906" calcext:value-type="float">
            <text:p>9906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14652777777778" calcext:value-type="float">
            <text:p>0,00114652777777778000</text:p>
          </table:table-cell>
          <table:table-cell table:formula="of:=[.D383]-[.D38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6" office:value-type="float" office:value="9932" calcext:value-type="float">
            <text:p>993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14953703703704" calcext:value-type="float">
            <text:p>0,00114953703703704000</text:p>
          </table:table-cell>
          <table:table-cell table:formula="of:=[.D384]-[.D38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6" office:value-type="float" office:value="9958" calcext:value-type="float">
            <text:p>9958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1525462962963" calcext:value-type="float">
            <text:p>0,00115254629629630000</text:p>
          </table:table-cell>
          <table:table-cell table:formula="of:=[.D385]-[.D3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6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15555555555556" calcext:value-type="float">
            <text:p>0,00115555555555556000</text:p>
          </table:table-cell>
          <table:table-cell table:formula="of:=[.D386]-[.D38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6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15856481481481" calcext:value-type="float">
            <text:p>0,00115856481481481000</text:p>
          </table:table-cell>
          <table:table-cell table:formula="of:=[.D387]-[.D3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6" office:value-type="float" office:value="10036" calcext:value-type="float">
            <text:p>1003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16157407407407" calcext:value-type="float">
            <text:p>0,00116157407407407000</text:p>
          </table:table-cell>
          <table:table-cell table:formula="of:=[.D388]-[.D3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6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16458333333333" calcext:value-type="float">
            <text:p>0,00116458333333333000</text:p>
          </table:table-cell>
          <table:table-cell table:formula="of:=[.D389]-[.D38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6" office:value-type="float" office:value="10088" calcext:value-type="float">
            <text:p>1008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16759259259259" calcext:value-type="float">
            <text:p>0,00116759259259259000</text:p>
          </table:table-cell>
          <table:table-cell table:formula="of:=[.D390]-[.D38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6" office:value-type="float" office:value="10114" calcext:value-type="float">
            <text:p>10114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17060185185185" calcext:value-type="float">
            <text:p>0,00117060185185185000</text:p>
          </table:table-cell>
          <table:table-cell table:formula="of:=[.D391]-[.D39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6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17361111111111" calcext:value-type="float">
            <text:p>0,00117361111111111000</text:p>
          </table:table-cell>
          <table:table-cell table:formula="of:=[.D392]-[.D39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6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17662037037037" calcext:value-type="float">
            <text:p>0,00117662037037037000</text:p>
          </table:table-cell>
          <table:table-cell table:formula="of:=[.D393]-[.D3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6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17962962962963" calcext:value-type="float">
            <text:p>0,00117962962962963000</text:p>
          </table:table-cell>
          <table:table-cell table:formula="of:=[.D394]-[.D3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6" office:value-type="float" office:value="10218" calcext:value-type="float">
            <text:p>10218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18263888888889" calcext:value-type="float">
            <text:p>0,00118263888888889000</text:p>
          </table:table-cell>
          <table:table-cell table:formula="of:=[.D395]-[.D39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6" office:value-type="float" office:value="10244" calcext:value-type="float">
            <text:p>1024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18564814814815" calcext:value-type="float">
            <text:p>0,00118564814814815000</text:p>
          </table:table-cell>
          <table:table-cell table:formula="of:=[.D396]-[.D39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6" office:value-type="float" office:value="10270" calcext:value-type="float">
            <text:p>1027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18865740740741" calcext:value-type="float">
            <text:p>0,00118865740740741000</text:p>
          </table:table-cell>
          <table:table-cell table:formula="of:=[.D397]-[.D3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6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19166666666667" calcext:value-type="float">
            <text:p>0,00119166666666667000</text:p>
          </table:table-cell>
          <table:table-cell table:formula="of:=[.D398]-[.D39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6" office:value-type="float" office:value="10322" calcext:value-type="float">
            <text:p>10322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19467592592593" calcext:value-type="float">
            <text:p>0,00119467592592593000</text:p>
          </table:table-cell>
          <table:table-cell table:formula="of:=[.D399]-[.D3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6" office:value-type="float" office:value="10348" calcext:value-type="float">
            <text:p>1034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19768518518519" calcext:value-type="float">
            <text:p>0,00119768518518519000</text:p>
          </table:table-cell>
          <table:table-cell table:formula="of:=[.D400]-[.D39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6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20069444444444" calcext:value-type="float">
            <text:p>0,00120069444444444000</text:p>
          </table:table-cell>
          <table:table-cell table:formula="of:=[.D401]-[.D40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6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2037037037037" calcext:value-type="float">
            <text:p>0,00120370370370370000</text:p>
          </table:table-cell>
          <table:table-cell table:formula="of:=[.D402]-[.D40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6" office:value-type="float" office:value="10426" calcext:value-type="float">
            <text:p>10426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20671296296296" calcext:value-type="float">
            <text:p>0,00120671296296296000</text:p>
          </table:table-cell>
          <table:table-cell table:formula="of:=[.D403]-[.D40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6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20972222222222" calcext:value-type="float">
            <text:p>0,00120972222222222000</text:p>
          </table:table-cell>
          <table:table-cell table:formula="of:=[.D404]-[.D40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6" office:value-type="float" office:value="10478" calcext:value-type="float">
            <text:p>10478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21273148148148" calcext:value-type="float">
            <text:p>0,00121273148148148000</text:p>
          </table:table-cell>
          <table:table-cell table:formula="of:=[.D405]-[.D4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6" office:value-type="float" office:value="10504" calcext:value-type="float">
            <text:p>1050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21574074074074" calcext:value-type="float">
            <text:p>0,00121574074074074000</text:p>
          </table:table-cell>
          <table:table-cell table:formula="of:=[.D406]-[.D4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6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21875" calcext:value-type="float">
            <text:p>0,00121875000000000000</text:p>
          </table:table-cell>
          <table:table-cell table:formula="of:=[.D407]-[.D40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6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22175925925926" calcext:value-type="float">
            <text:p>0,00122175925925926000</text:p>
          </table:table-cell>
          <table:table-cell table:formula="of:=[.D408]-[.D40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6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22476851851852" calcext:value-type="float">
            <text:p>0,00122476851851852000</text:p>
          </table:table-cell>
          <table:table-cell table:formula="of:=[.D409]-[.D4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6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22777777777778" calcext:value-type="float">
            <text:p>0,00122777777777778000</text:p>
          </table:table-cell>
          <table:table-cell table:formula="of:=[.D410]-[.D40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6" office:value-type="float" office:value="10634" calcext:value-type="float">
            <text:p>10634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23078703703704" calcext:value-type="float">
            <text:p>0,00123078703703704000</text:p>
          </table:table-cell>
          <table:table-cell table:formula="of:=[.D411]-[.D4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6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2337962962963" calcext:value-type="float">
            <text:p>0,00123379629629630000</text:p>
          </table:table-cell>
          <table:table-cell table:formula="of:=[.D412]-[.D41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6" office:value-type="float" office:value="10686" calcext:value-type="float">
            <text:p>10686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23680555555556" calcext:value-type="float">
            <text:p>0,00123680555555556000</text:p>
          </table:table-cell>
          <table:table-cell table:formula="of:=[.D413]-[.D41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6" office:value-type="float" office:value="10712" calcext:value-type="float">
            <text:p>1071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23981481481482" calcext:value-type="float">
            <text:p>0,00123981481481482000</text:p>
          </table:table-cell>
          <table:table-cell table:formula="of:=[.D414]-[.D41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6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24282407407407" calcext:value-type="float">
            <text:p>0,00124282407407407000</text:p>
          </table:table-cell>
          <table:table-cell table:formula="of:=[.D415]-[.D41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6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24583333333333" calcext:value-type="float">
            <text:p>0,00124583333333333000</text:p>
          </table:table-cell>
          <table:table-cell table:formula="of:=[.D416]-[.D41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6" office:value-type="float" office:value="10790" calcext:value-type="float">
            <text:p>1079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24884259259259" calcext:value-type="float">
            <text:p>0,00124884259259259000</text:p>
          </table:table-cell>
          <table:table-cell table:formula="of:=[.D417]-[.D4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6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25185185185185" calcext:value-type="float">
            <text:p>0,00125185185185185000</text:p>
          </table:table-cell>
          <table:table-cell table:formula="of:=[.D418]-[.D4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6" office:value-type="float" office:value="10842" calcext:value-type="float">
            <text:p>10842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25486111111111" calcext:value-type="float">
            <text:p>0,00125486111111111000</text:p>
          </table:table-cell>
          <table:table-cell table:formula="of:=[.D419]-[.D41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6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25787037037037" calcext:value-type="float">
            <text:p>0,00125787037037037000</text:p>
          </table:table-cell>
          <table:table-cell table:formula="of:=[.D420]-[.D41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6" office:value-type="float" office:value="10894" calcext:value-type="float">
            <text:p>10894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26087962962963" calcext:value-type="float">
            <text:p>0,00126087962962963000</text:p>
          </table:table-cell>
          <table:table-cell table:formula="of:=[.D421]-[.D4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6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26388888888889" calcext:value-type="float">
            <text:p>0,00126388888888889000</text:p>
          </table:table-cell>
          <table:table-cell table:formula="of:=[.D422]-[.D42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6" office:value-type="float" office:value="10946" calcext:value-type="float">
            <text:p>10946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26689814814815" calcext:value-type="float">
            <text:p>0,00126689814814815000</text:p>
          </table:table-cell>
          <table:table-cell table:formula="of:=[.D423]-[.D4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6" office:value-type="float" office:value="10972" calcext:value-type="float">
            <text:p>1097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26990740740741" calcext:value-type="float">
            <text:p>0,00126990740740741000</text:p>
          </table:table-cell>
          <table:table-cell table:formula="of:=[.D424]-[.D42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6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27291666666667" calcext:value-type="float">
            <text:p>0,00127291666666667000</text:p>
          </table:table-cell>
          <table:table-cell table:formula="of:=[.D425]-[.D42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6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27592592592593" calcext:value-type="float">
            <text:p>0,00127592592592593000</text:p>
          </table:table-cell>
          <table:table-cell table:formula="of:=[.D426]-[.D4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6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27893518518519" calcext:value-type="float">
            <text:p>0,00127893518518519000</text:p>
          </table:table-cell>
          <table:table-cell table:formula="of:=[.D427]-[.D42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6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28194444444444" calcext:value-type="float">
            <text:p>0,00128194444444444000</text:p>
          </table:table-cell>
          <table:table-cell table:formula="of:=[.D428]-[.D42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6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2849537037037" calcext:value-type="float">
            <text:p>0,00128495370370370000</text:p>
          </table:table-cell>
          <table:table-cell table:formula="of:=[.D429]-[.D42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6" office:value-type="float" office:value="11128" calcext:value-type="float">
            <text:p>1112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28796296296296" calcext:value-type="float">
            <text:p>0,00128796296296296000</text:p>
          </table:table-cell>
          <table:table-cell table:formula="of:=[.D430]-[.D4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6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29097222222222" calcext:value-type="float">
            <text:p>0,00129097222222222000</text:p>
          </table:table-cell>
          <table:table-cell table:formula="of:=[.D431]-[.D43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6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29398148148148" calcext:value-type="float">
            <text:p>0,00129398148148148000</text:p>
          </table:table-cell>
          <table:table-cell table:formula="of:=[.D432]-[.D4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6" office:value-type="float" office:value="11206" calcext:value-type="float">
            <text:p>11206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29699074074074" calcext:value-type="float">
            <text:p>0,00129699074074074000</text:p>
          </table:table-cell>
          <table:table-cell table:formula="of:=[.D433]-[.D4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6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3" calcext:value-type="float">
            <text:p>0,00130000000000000000</text:p>
          </table:table-cell>
          <table:table-cell table:formula="of:=[.D434]-[.D43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6" office:value-type="float" office:value="11258" calcext:value-type="float">
            <text:p>11258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30300925925926" calcext:value-type="float">
            <text:p>0,00130300925925926000</text:p>
          </table:table-cell>
          <table:table-cell table:formula="of:=[.D435]-[.D4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6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30601851851852" calcext:value-type="float">
            <text:p>0,00130601851851852000</text:p>
          </table:table-cell>
          <table:table-cell table:formula="of:=[.D436]-[.D43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6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30902777777778" calcext:value-type="float">
            <text:p>0,00130902777777778000</text:p>
          </table:table-cell>
          <table:table-cell table:formula="of:=[.D437]-[.D43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6" office:value-type="float" office:value="11336" calcext:value-type="float">
            <text:p>1133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31203703703704" calcext:value-type="float">
            <text:p>0,00131203703703704000</text:p>
          </table:table-cell>
          <table:table-cell table:formula="of:=[.D438]-[.D4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6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3150462962963" calcext:value-type="float">
            <text:p>0,00131504629629630000</text:p>
          </table:table-cell>
          <table:table-cell table:formula="of:=[.D439]-[.D43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6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31805555555556" calcext:value-type="float">
            <text:p>0,00131805555555556000</text:p>
          </table:table-cell>
          <table:table-cell table:formula="of:=[.D440]-[.D43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6" office:value-type="float" office:value="11414" calcext:value-type="float">
            <text:p>11414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32106481481481" calcext:value-type="float">
            <text:p>0,00132106481481481000</text:p>
          </table:table-cell>
          <table:table-cell table:formula="of:=[.D441]-[.D44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6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32407407407407" calcext:value-type="float">
            <text:p>0,00132407407407407000</text:p>
          </table:table-cell>
          <table:table-cell table:formula="of:=[.D442]-[.D4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6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32708333333333" calcext:value-type="float">
            <text:p>0,00132708333333333000</text:p>
          </table:table-cell>
          <table:table-cell table:formula="of:=[.D443]-[.D44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6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33009259259259" calcext:value-type="float">
            <text:p>0,00133009259259259000</text:p>
          </table:table-cell>
          <table:table-cell table:formula="of:=[.D444]-[.D4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6" office:value-type="float" office:value="11518" calcext:value-type="float">
            <text:p>11518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33310185185185" calcext:value-type="float">
            <text:p>0,00133310185185185000</text:p>
          </table:table-cell>
          <table:table-cell table:formula="of:=[.D445]-[.D4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6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33611111111111" calcext:value-type="float">
            <text:p>0,00133611111111111000</text:p>
          </table:table-cell>
          <table:table-cell table:formula="of:=[.D446]-[.D4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6" office:value-type="float" office:value="11570" calcext:value-type="float">
            <text:p>1157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33912037037037" calcext:value-type="float">
            <text:p>0,00133912037037037000</text:p>
          </table:table-cell>
          <table:table-cell table:formula="of:=[.D447]-[.D4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6" office:value-type="float" office:value="11596" calcext:value-type="float">
            <text:p>1159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34212962962963" calcext:value-type="float">
            <text:p>0,00134212962962963000</text:p>
          </table:table-cell>
          <table:table-cell table:formula="of:=[.D448]-[.D44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6" office:value-type="float" office:value="11622" calcext:value-type="float">
            <text:p>11622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34513888888889" calcext:value-type="float">
            <text:p>0,00134513888888889000</text:p>
          </table:table-cell>
          <table:table-cell table:formula="of:=[.D449]-[.D44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6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34814814814815" calcext:value-type="float">
            <text:p>0,00134814814814815000</text:p>
          </table:table-cell>
          <table:table-cell table:formula="of:=[.D450]-[.D4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6" office:value-type="float" office:value="11674" calcext:value-type="float">
            <text:p>11674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35115740740741" calcext:value-type="float">
            <text:p>0,00135115740740741000</text:p>
          </table:table-cell>
          <table:table-cell table:formula="of:=[.D451]-[.D4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6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35416666666667" calcext:value-type="float">
            <text:p>0,00135416666666667000</text:p>
          </table:table-cell>
          <table:table-cell table:formula="of:=[.D452]-[.D45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6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35717592592593" calcext:value-type="float">
            <text:p>0,00135717592592593000</text:p>
          </table:table-cell>
          <table:table-cell table:formula="of:=[.D453]-[.D45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6" office:value-type="float" office:value="11752" calcext:value-type="float">
            <text:p>1175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36018518518519" calcext:value-type="float">
            <text:p>0,00136018518518519000</text:p>
          </table:table-cell>
          <table:table-cell table:formula="of:=[.D454]-[.D45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6" office:value-type="float" office:value="11778" calcext:value-type="float">
            <text:p>11778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36319444444444" calcext:value-type="float">
            <text:p>0,00136319444444444000</text:p>
          </table:table-cell>
          <table:table-cell table:formula="of:=[.D455]-[.D45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6" office:value-type="float" office:value="11804" calcext:value-type="float">
            <text:p>1180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3662037037037" calcext:value-type="float">
            <text:p>0,00136620370370370000</text:p>
          </table:table-cell>
          <table:table-cell table:formula="of:=[.D456]-[.D45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6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36921296296296" calcext:value-type="float">
            <text:p>0,00136921296296296000</text:p>
          </table:table-cell>
          <table:table-cell table:formula="of:=[.D457]-[.D45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6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37222222222222" calcext:value-type="float">
            <text:p>0,00137222222222222000</text:p>
          </table:table-cell>
          <table:table-cell table:formula="of:=[.D458]-[.D45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6" office:value-type="float" office:value="11882" calcext:value-type="float">
            <text:p>11882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37523148148148" calcext:value-type="float">
            <text:p>0,00137523148148148000</text:p>
          </table:table-cell>
          <table:table-cell table:formula="of:=[.D459]-[.D45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6" office:value-type="float" office:value="11908" calcext:value-type="float">
            <text:p>1190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37824074074074" calcext:value-type="float">
            <text:p>0,00137824074074074000</text:p>
          </table:table-cell>
          <table:table-cell table:formula="of:=[.D460]-[.D45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6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38125" calcext:value-type="float">
            <text:p>0,00138125000000000000</text:p>
          </table:table-cell>
          <table:table-cell table:formula="of:=[.D461]-[.D46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6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38425925925926" calcext:value-type="float">
            <text:p>0,00138425925925926000</text:p>
          </table:table-cell>
          <table:table-cell table:formula="of:=[.D462]-[.D46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6" office:value-type="float" office:value="11986" calcext:value-type="float">
            <text:p>11986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38726851851852" calcext:value-type="float">
            <text:p>0,00138726851851852000</text:p>
          </table:table-cell>
          <table:table-cell table:formula="of:=[.D463]-[.D46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6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39027777777778" calcext:value-type="float">
            <text:p>0,00139027777777778000</text:p>
          </table:table-cell>
          <table:table-cell table:formula="of:=[.D464]-[.D4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6" office:value-type="float" office:value="12038" calcext:value-type="float">
            <text:p>12038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39328703703704" calcext:value-type="float">
            <text:p>0,00139328703703704000</text:p>
          </table:table-cell>
          <table:table-cell table:formula="of:=[.D465]-[.D46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6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3962962962963" calcext:value-type="float">
            <text:p>0,00139629629629630000</text:p>
          </table:table-cell>
          <table:table-cell table:formula="of:=[.D466]-[.D46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6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39930555555556" calcext:value-type="float">
            <text:p>0,00139930555555556000</text:p>
          </table:table-cell>
          <table:table-cell table:formula="of:=[.D467]-[.D46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6" office:value-type="float" office:value="12116" calcext:value-type="float">
            <text:p>1211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40231481481481" calcext:value-type="float">
            <text:p>0,00140231481481481000</text:p>
          </table:table-cell>
          <table:table-cell table:formula="of:=[.D468]-[.D46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6" office:value-type="float" office:value="12142" calcext:value-type="float">
            <text:p>12142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40532407407407" calcext:value-type="float">
            <text:p>0,00140532407407407000</text:p>
          </table:table-cell>
          <table:table-cell table:formula="of:=[.D469]-[.D46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6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40833333333333" calcext:value-type="float">
            <text:p>0,00140833333333333000</text:p>
          </table:table-cell>
          <table:table-cell table:formula="of:=[.D470]-[.D4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6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41134259259259" calcext:value-type="float">
            <text:p>0,00141134259259259000</text:p>
          </table:table-cell>
          <table:table-cell table:formula="of:=[.D471]-[.D47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6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41435185185185" calcext:value-type="float">
            <text:p>0,00141435185185185000</text:p>
          </table:table-cell>
          <table:table-cell table:formula="of:=[.D472]-[.D47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6" office:value-type="float" office:value="12246" calcext:value-type="float">
            <text:p>12246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41736111111111" calcext:value-type="float">
            <text:p>0,00141736111111111000</text:p>
          </table:table-cell>
          <table:table-cell table:formula="of:=[.D473]-[.D4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6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42037037037037" calcext:value-type="float">
            <text:p>0,00142037037037037000</text:p>
          </table:table-cell>
          <table:table-cell table:formula="of:=[.D474]-[.D47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6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42337962962963" calcext:value-type="float">
            <text:p>0,00142337962962963000</text:p>
          </table:table-cell>
          <table:table-cell table:formula="of:=[.D475]-[.D47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6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42638888888889" calcext:value-type="float">
            <text:p>0,00142638888888889000</text:p>
          </table:table-cell>
          <table:table-cell table:formula="of:=[.D476]-[.D4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6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42939814814815" calcext:value-type="float">
            <text:p>0,00142939814814815000</text:p>
          </table:table-cell>
          <table:table-cell table:formula="of:=[.D477]-[.D47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6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43240740740741" calcext:value-type="float">
            <text:p>0,00143240740740741000</text:p>
          </table:table-cell>
          <table:table-cell table:formula="of:=[.D478]-[.D47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6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43541666666667" calcext:value-type="float">
            <text:p>0,00143541666666667000</text:p>
          </table:table-cell>
          <table:table-cell table:formula="of:=[.D479]-[.D47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6" office:value-type="float" office:value="12428" calcext:value-type="float">
            <text:p>1242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43842592592593" calcext:value-type="float">
            <text:p>0,00143842592592593000</text:p>
          </table:table-cell>
          <table:table-cell table:formula="of:=[.D480]-[.D47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6" office:value-type="float" office:value="12454" calcext:value-type="float">
            <text:p>12454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44143518518519" calcext:value-type="float">
            <text:p>0,00144143518518519000</text:p>
          </table:table-cell>
          <table:table-cell table:formula="of:=[.D481]-[.D48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6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44444444444444" calcext:value-type="float">
            <text:p>0,00144444444444444000</text:p>
          </table:table-cell>
          <table:table-cell table:formula="of:=[.D482]-[.D4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6" office:value-type="float" office:value="12506" calcext:value-type="float">
            <text:p>12506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4474537037037" calcext:value-type="float">
            <text:p>0,00144745370370370000</text:p>
          </table:table-cell>
          <table:table-cell table:formula="of:=[.D483]-[.D48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6" office:value-type="float" office:value="12532" calcext:value-type="float">
            <text:p>1253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45046296296296" calcext:value-type="float">
            <text:p>0,00145046296296296000</text:p>
          </table:table-cell>
          <table:table-cell table:formula="of:=[.D484]-[.D48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6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45347222222222" calcext:value-type="float">
            <text:p>0,00145347222222222000</text:p>
          </table:table-cell>
          <table:table-cell table:formula="of:=[.D485]-[.D4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6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45648148148148" calcext:value-type="float">
            <text:p>0,00145648148148148000</text:p>
          </table:table-cell>
          <table:table-cell table:formula="of:=[.D486]-[.D48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6" office:value-type="float" office:value="12610" calcext:value-type="float">
            <text:p>1261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45949074074074" calcext:value-type="float">
            <text:p>0,00145949074074074000</text:p>
          </table:table-cell>
          <table:table-cell table:formula="of:=[.D487]-[.D4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6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4625" calcext:value-type="float">
            <text:p>0,00146250000000000000</text:p>
          </table:table-cell>
          <table:table-cell table:formula="of:=[.D488]-[.D4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6" office:value-type="float" office:value="12662" calcext:value-type="float">
            <text:p>12662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46550925925926" calcext:value-type="float">
            <text:p>0,00146550925925926000</text:p>
          </table:table-cell>
          <table:table-cell table:formula="of:=[.D489]-[.D48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6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46851851851852" calcext:value-type="float">
            <text:p>0,00146851851851852000</text:p>
          </table:table-cell>
          <table:table-cell table:formula="of:=[.D490]-[.D48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6" office:value-type="float" office:value="12714" calcext:value-type="float">
            <text:p>12714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47152777777778" calcext:value-type="float">
            <text:p>0,00147152777777778000</text:p>
          </table:table-cell>
          <table:table-cell table:formula="of:=[.D491]-[.D49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6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47453703703704" calcext:value-type="float">
            <text:p>0,00147453703703704000</text:p>
          </table:table-cell>
          <table:table-cell table:formula="of:=[.D492]-[.D49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6" office:value-type="float" office:value="12766" calcext:value-type="float">
            <text:p>12766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4775462962963" calcext:value-type="float">
            <text:p>0,00147754629629630000</text:p>
          </table:table-cell>
          <table:table-cell table:formula="of:=[.D493]-[.D4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6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48055555555556" calcext:value-type="float">
            <text:p>0,00148055555555556000</text:p>
          </table:table-cell>
          <table:table-cell table:formula="of:=[.D494]-[.D4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6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48356481481481" calcext:value-type="float">
            <text:p>0,00148356481481481000</text:p>
          </table:table-cell>
          <table:table-cell table:formula="of:=[.D495]-[.D49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6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48657407407407" calcext:value-type="float">
            <text:p>0,00148657407407407000</text:p>
          </table:table-cell>
          <table:table-cell table:formula="of:=[.D496]-[.D49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6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48958333333333" calcext:value-type="float">
            <text:p>0,00148958333333333000</text:p>
          </table:table-cell>
          <table:table-cell table:formula="of:=[.D497]-[.D4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6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49259259259259" calcext:value-type="float">
            <text:p>0,00149259259259259000</text:p>
          </table:table-cell>
          <table:table-cell table:formula="of:=[.D498]-[.D49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6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49560185185185" calcext:value-type="float">
            <text:p>0,00149560185185185000</text:p>
          </table:table-cell>
          <table:table-cell table:formula="of:=[.D499]-[.D4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6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49861111111111" calcext:value-type="float">
            <text:p>0,00149861111111111000</text:p>
          </table:table-cell>
          <table:table-cell table:formula="of:=[.D500]-[.D49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6" office:value-type="float" office:value="12974" calcext:value-type="float">
            <text:p>12974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50162037037037" calcext:value-type="float">
            <text:p>0,00150162037037037000</text:p>
          </table:table-cell>
          <table:table-cell table:formula="of:=[.D501]-[.D50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6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50462962962963" calcext:value-type="float">
            <text:p>0,00150462962962963000</text:p>
          </table:table-cell>
          <table:table-cell table:formula="of:=[.D502]-[.D50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6" office:value-type="float" office:value="13026" calcext:value-type="float">
            <text:p>13026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50763888888889" calcext:value-type="float">
            <text:p>0,00150763888888889000</text:p>
          </table:table-cell>
          <table:table-cell table:formula="of:=[.D503]-[.D50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6" office:value-type="float" office:value="13052" calcext:value-type="float">
            <text:p>1305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51064814814815" calcext:value-type="float">
            <text:p>0,00151064814814815000</text:p>
          </table:table-cell>
          <table:table-cell table:formula="of:=[.D504]-[.D50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6" office:value-type="float" office:value="13078" calcext:value-type="float">
            <text:p>13078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51365740740741" calcext:value-type="float">
            <text:p>0,00151365740740741000</text:p>
          </table:table-cell>
          <table:table-cell table:formula="of:=[.D505]-[.D5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6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51666666666667" calcext:value-type="float">
            <text:p>0,00151666666666667000</text:p>
          </table:table-cell>
          <table:table-cell table:formula="of:=[.D506]-[.D5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6" office:value-type="float" office:value="13130" calcext:value-type="float">
            <text:p>1313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51967592592593" calcext:value-type="float">
            <text:p>0,00151967592592593000</text:p>
          </table:table-cell>
          <table:table-cell table:formula="of:=[.D507]-[.D50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6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52268518518519" calcext:value-type="float">
            <text:p>0,00152268518518518000</text:p>
          </table:table-cell>
          <table:table-cell table:formula="of:=[.D508]-[.D50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6" office:value-type="float" office:value="13182" calcext:value-type="float">
            <text:p>13182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52569444444444" calcext:value-type="float">
            <text:p>0,00152569444444444000</text:p>
          </table:table-cell>
          <table:table-cell table:formula="of:=[.D509]-[.D5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6" office:value-type="float" office:value="13208" calcext:value-type="float">
            <text:p>1320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5287037037037" calcext:value-type="float">
            <text:p>0,00152870370370370000</text:p>
          </table:table-cell>
          <table:table-cell table:formula="of:=[.D510]-[.D50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6" office:value-type="float" office:value="13234" calcext:value-type="float">
            <text:p>13234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53171296296296" calcext:value-type="float">
            <text:p>0,00153171296296296000</text:p>
          </table:table-cell>
          <table:table-cell table:formula="of:=[.D511]-[.D5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6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53472222222222" calcext:value-type="float">
            <text:p>0,00153472222222222000</text:p>
          </table:table-cell>
          <table:table-cell table:formula="of:=[.D512]-[.D51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6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53773148148148" calcext:value-type="float">
            <text:p>0,00153773148148148000</text:p>
          </table:table-cell>
          <table:table-cell table:formula="of:=[.D513]-[.D51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6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54074074074074" calcext:value-type="float">
            <text:p>0,00154074074074074000</text:p>
          </table:table-cell>
          <table:table-cell table:formula="of:=[.D514]-[.D51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6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54375" calcext:value-type="float">
            <text:p>0,00154375000000000000</text:p>
          </table:table-cell>
          <table:table-cell table:formula="of:=[.D515]-[.D51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6" office:value-type="float" office:value="13364" calcext:value-type="float">
            <text:p>1336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54675925925926" calcext:value-type="float">
            <text:p>0,00154675925925926000</text:p>
          </table:table-cell>
          <table:table-cell table:formula="of:=[.D516]-[.D51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6" office:value-type="float" office:value="13390" calcext:value-type="float">
            <text:p>1339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54976851851852" calcext:value-type="float">
            <text:p>0,00154976851851852000</text:p>
          </table:table-cell>
          <table:table-cell table:formula="of:=[.D517]-[.D5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6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55277777777778" calcext:value-type="float">
            <text:p>0,00155277777777778000</text:p>
          </table:table-cell>
          <table:table-cell table:formula="of:=[.D518]-[.D5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6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55578703703704" calcext:value-type="float">
            <text:p>0,00155578703703704000</text:p>
          </table:table-cell>
          <table:table-cell table:formula="of:=[.D519]-[.D51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6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5587962962963" calcext:value-type="float">
            <text:p>0,00155879629629630000</text:p>
          </table:table-cell>
          <table:table-cell table:formula="of:=[.D520]-[.D51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6" office:value-type="float" office:value="13494" calcext:value-type="float">
            <text:p>13494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56180555555556" calcext:value-type="float">
            <text:p>0,00156180555555556000</text:p>
          </table:table-cell>
          <table:table-cell table:formula="of:=[.D521]-[.D5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6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56481481481481" calcext:value-type="float">
            <text:p>0,00156481481481482000</text:p>
          </table:table-cell>
          <table:table-cell table:formula="of:=[.D522]-[.D52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6" office:value-type="float" office:value="13546" calcext:value-type="float">
            <text:p>13546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56782407407407" calcext:value-type="float">
            <text:p>0,00156782407407407000</text:p>
          </table:table-cell>
          <table:table-cell table:formula="of:=[.D523]-[.D5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6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57083333333333" calcext:value-type="float">
            <text:p>0,00157083333333333000</text:p>
          </table:table-cell>
          <table:table-cell table:formula="of:=[.D524]-[.D52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6" office:value-type="float" office:value="13598" calcext:value-type="float">
            <text:p>13598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57384259259259" calcext:value-type="float">
            <text:p>0,00157384259259259000</text:p>
          </table:table-cell>
          <table:table-cell table:formula="of:=[.D525]-[.D52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6" office:value-type="float" office:value="13624" calcext:value-type="float">
            <text:p>1362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57685185185185" calcext:value-type="float">
            <text:p>0,00157685185185185000</text:p>
          </table:table-cell>
          <table:table-cell table:formula="of:=[.D526]-[.D5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6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57986111111111" calcext:value-type="float">
            <text:p>0,00157986111111111000</text:p>
          </table:table-cell>
          <table:table-cell table:formula="of:=[.D527]-[.D52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6" office:value-type="float" office:value="13676" calcext:value-type="float">
            <text:p>1367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58287037037037" calcext:value-type="float">
            <text:p>0,00158287037037037000</text:p>
          </table:table-cell>
          <table:table-cell table:formula="of:=[.D528]-[.D52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6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58587962962963" calcext:value-type="float">
            <text:p>0,00158587962962963000</text:p>
          </table:table-cell>
          <table:table-cell table:formula="of:=[.D529]-[.D52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6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58888888888889" calcext:value-type="float">
            <text:p>0,00158888888888889000</text:p>
          </table:table-cell>
          <table:table-cell table:formula="of:=[.D530]-[.D5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6" office:value-type="float" office:value="13754" calcext:value-type="float">
            <text:p>13754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59189814814815" calcext:value-type="float">
            <text:p>0,00159189814814815000</text:p>
          </table:table-cell>
          <table:table-cell table:formula="of:=[.D531]-[.D53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6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59490740740741" calcext:value-type="float">
            <text:p>0,00159490740740741000</text:p>
          </table:table-cell>
          <table:table-cell table:formula="of:=[.D532]-[.D5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6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59791666666667" calcext:value-type="float">
            <text:p>0,00159791666666667000</text:p>
          </table:table-cell>
          <table:table-cell table:formula="of:=[.D533]-[.D5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6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60092592592593" calcext:value-type="float">
            <text:p>0,00160092592592593000</text:p>
          </table:table-cell>
          <table:table-cell table:formula="of:=[.D534]-[.D53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6" office:value-type="float" office:value="13858" calcext:value-type="float">
            <text:p>13858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60393518518519" calcext:value-type="float">
            <text:p>0,00160393518518519000</text:p>
          </table:table-cell>
          <table:table-cell table:formula="of:=[.D535]-[.D5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6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60694444444444" calcext:value-type="float">
            <text:p>0,00160694444444444000</text:p>
          </table:table-cell>
          <table:table-cell table:formula="of:=[.D536]-[.D53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6" office:value-type="float" office:value="13910" calcext:value-type="float">
            <text:p>1391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6099537037037" calcext:value-type="float">
            <text:p>0,00160995370370370000</text:p>
          </table:table-cell>
          <table:table-cell table:formula="of:=[.D537]-[.D53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6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61296296296296" calcext:value-type="float">
            <text:p>0,00161296296296296000</text:p>
          </table:table-cell>
          <table:table-cell table:formula="of:=[.D538]-[.D5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6" office:value-type="float" office:value="13962" calcext:value-type="float">
            <text:p>13962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61597222222222" calcext:value-type="float">
            <text:p>0,00161597222222222000</text:p>
          </table:table-cell>
          <table:table-cell table:formula="of:=[.D539]-[.D53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6" office:value-type="float" office:value="13988" calcext:value-type="float">
            <text:p>1398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61898148148148" calcext:value-type="float">
            <text:p>0,00161898148148148000</text:p>
          </table:table-cell>
          <table:table-cell table:formula="of:=[.D540]-[.D53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6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62199074074074" calcext:value-type="float">
            <text:p>0,00162199074074074000</text:p>
          </table:table-cell>
          <table:table-cell table:formula="of:=[.D541]-[.D54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6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625" calcext:value-type="float">
            <text:p>0,00162500000000000000</text:p>
          </table:table-cell>
          <table:table-cell table:formula="of:=[.D542]-[.D5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6" office:value-type="float" office:value="14066" calcext:value-type="float">
            <text:p>14066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62800925925926" calcext:value-type="float">
            <text:p>0,00162800925925926000</text:p>
          </table:table-cell>
          <table:table-cell table:formula="of:=[.D543]-[.D54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6" office:value-type="float" office:value="14092" calcext:value-type="float">
            <text:p>1409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63101851851852" calcext:value-type="float">
            <text:p>0,00163101851851852000</text:p>
          </table:table-cell>
          <table:table-cell table:formula="of:=[.D544]-[.D5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6" office:value-type="float" office:value="14118" calcext:value-type="float">
            <text:p>14118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63402777777778" calcext:value-type="float">
            <text:p>0,00163402777777778000</text:p>
          </table:table-cell>
          <table:table-cell table:formula="of:=[.D545]-[.D5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6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63703703703704" calcext:value-type="float">
            <text:p>0,00163703703703704000</text:p>
          </table:table-cell>
          <table:table-cell table:formula="of:=[.D546]-[.D5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6" office:value-type="float" office:value="14170" calcext:value-type="float">
            <text:p>1417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6400462962963" calcext:value-type="float">
            <text:p>0,00164004629629630000</text:p>
          </table:table-cell>
          <table:table-cell table:formula="of:=[.D547]-[.D5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6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64305555555556" calcext:value-type="float">
            <text:p>0,00164305555555556000</text:p>
          </table:table-cell>
          <table:table-cell table:formula="of:=[.D548]-[.D54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6" office:value-type="float" office:value="14222" calcext:value-type="float">
            <text:p>14222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64606481481481" calcext:value-type="float">
            <text:p>0,00164606481481481000</text:p>
          </table:table-cell>
          <table:table-cell table:formula="of:=[.D549]-[.D54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6" office:value-type="float" office:value="14248" calcext:value-type="float">
            <text:p>1424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64907407407407" calcext:value-type="float">
            <text:p>0,00164907407407407000</text:p>
          </table:table-cell>
          <table:table-cell table:formula="of:=[.D550]-[.D5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6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65208333333333" calcext:value-type="float">
            <text:p>0,00165208333333333000</text:p>
          </table:table-cell>
          <table:table-cell table:formula="of:=[.D551]-[.D5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6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65509259259259" calcext:value-type="float">
            <text:p>0,00165509259259259000</text:p>
          </table:table-cell>
          <table:table-cell table:formula="of:=[.D552]-[.D55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6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65810185185185" calcext:value-type="float">
            <text:p>0,00165810185185185000</text:p>
          </table:table-cell>
          <table:table-cell table:formula="of:=[.D553]-[.D55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6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66111111111111" calcext:value-type="float">
            <text:p>0,00166111111111111000</text:p>
          </table:table-cell>
          <table:table-cell table:formula="of:=[.D554]-[.D55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6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66412037037037" calcext:value-type="float">
            <text:p>0,00166412037037037000</text:p>
          </table:table-cell>
          <table:table-cell table:formula="of:=[.D555]-[.D55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6" office:value-type="float" office:value="14404" calcext:value-type="float">
            <text:p>1440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66712962962963" calcext:value-type="float">
            <text:p>0,00166712962962963000</text:p>
          </table:table-cell>
          <table:table-cell table:formula="of:=[.D556]-[.D55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6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67013888888889" calcext:value-type="float">
            <text:p>0,00167013888888889000</text:p>
          </table:table-cell>
          <table:table-cell table:formula="of:=[.D557]-[.D55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6" office:value-type="float" office:value="14456" calcext:value-type="float">
            <text:p>1445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67314814814815" calcext:value-type="float">
            <text:p>0,00167314814814815000</text:p>
          </table:table-cell>
          <table:table-cell table:formula="of:=[.D558]-[.D55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6" office:value-type="float" office:value="14482" calcext:value-type="float">
            <text:p>14482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67615740740741" calcext:value-type="float">
            <text:p>0,00167615740740741000</text:p>
          </table:table-cell>
          <table:table-cell table:formula="of:=[.D559]-[.D55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6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67916666666667" calcext:value-type="float">
            <text:p>0,00167916666666667000</text:p>
          </table:table-cell>
          <table:table-cell table:formula="of:=[.D560]-[.D55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6" office:value-type="float" office:value="14534" calcext:value-type="float">
            <text:p>14534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68217592592593" calcext:value-type="float">
            <text:p>0,00168217592592593000</text:p>
          </table:table-cell>
          <table:table-cell table:formula="of:=[.D561]-[.D56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6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68518518518519" calcext:value-type="float">
            <text:p>0,00168518518518519000</text:p>
          </table:table-cell>
          <table:table-cell table:formula="of:=[.D562]-[.D56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6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68819444444444" calcext:value-type="float">
            <text:p>0,00168819444444444000</text:p>
          </table:table-cell>
          <table:table-cell table:formula="of:=[.D563]-[.D56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6" office:value-type="float" office:value="14612" calcext:value-type="float">
            <text:p>1461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6912037037037" calcext:value-type="float">
            <text:p>0,00169120370370370000</text:p>
          </table:table-cell>
          <table:table-cell table:formula="of:=[.D564]-[.D56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6" office:value-type="float" office:value="14638" calcext:value-type="float">
            <text:p>14638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69421296296296" calcext:value-type="float">
            <text:p>0,00169421296296296000</text:p>
          </table:table-cell>
          <table:table-cell table:formula="of:=[.D565]-[.D56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6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69722222222222" calcext:value-type="float">
            <text:p>0,00169722222222222000</text:p>
          </table:table-cell>
          <table:table-cell table:formula="of:=[.D566]-[.D56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6" office:value-type="float" office:value="14690" calcext:value-type="float">
            <text:p>1469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70023148148148" calcext:value-type="float">
            <text:p>0,00170023148148148000</text:p>
          </table:table-cell>
          <table:table-cell table:formula="of:=[.D567]-[.D56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6" office:value-type="float" office:value="14716" calcext:value-type="float">
            <text:p>1471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70324074074074" calcext:value-type="float">
            <text:p>0,00170324074074074000</text:p>
          </table:table-cell>
          <table:table-cell table:formula="of:=[.D568]-[.D56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6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70625" calcext:value-type="float">
            <text:p>0,00170625000000000000</text:p>
          </table:table-cell>
          <table:table-cell table:formula="of:=[.D569]-[.D56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6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70925925925926" calcext:value-type="float">
            <text:p>0,00170925925925926000</text:p>
          </table:table-cell>
          <table:table-cell table:formula="of:=[.D570]-[.D56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6" office:value-type="float" office:value="14794" calcext:value-type="float">
            <text:p>14794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71226851851852" calcext:value-type="float">
            <text:p>0,00171226851851852000</text:p>
          </table:table-cell>
          <table:table-cell table:formula="of:=[.D571]-[.D57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6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71527777777778" calcext:value-type="float">
            <text:p>0,00171527777777778000</text:p>
          </table:table-cell>
          <table:table-cell table:formula="of:=[.D572]-[.D57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6" office:value-type="float" office:value="14846" calcext:value-type="float">
            <text:p>14846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71828703703704" calcext:value-type="float">
            <text:p>0,00171828703703704000</text:p>
          </table:table-cell>
          <table:table-cell table:formula="of:=[.D573]-[.D57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6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7212962962963" calcext:value-type="float">
            <text:p>0,00172129629629630000</text:p>
          </table:table-cell>
          <table:table-cell table:formula="of:=[.D574]-[.D57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6" office:value-type="float" office:value="14898" calcext:value-type="float">
            <text:p>14898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72430555555556" calcext:value-type="float">
            <text:p>0,00172430555555556000</text:p>
          </table:table-cell>
          <table:table-cell table:formula="of:=[.D575]-[.D57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6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72731481481481" calcext:value-type="float">
            <text:p>0,00172731481481481000</text:p>
          </table:table-cell>
          <table:table-cell table:formula="of:=[.D576]-[.D57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6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73032407407407" calcext:value-type="float">
            <text:p>0,00173032407407407000</text:p>
          </table:table-cell>
          <table:table-cell table:formula="of:=[.D577]-[.D57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6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73333333333333" calcext:value-type="float">
            <text:p>0,00173333333333333000</text:p>
          </table:table-cell>
          <table:table-cell table:formula="of:=[.D578]-[.D57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6" office:value-type="float" office:value="15002" calcext:value-type="float">
            <text:p>15002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73634259259259" calcext:value-type="float">
            <text:p>0,00173634259259259000</text:p>
          </table:table-cell>
          <table:table-cell table:formula="of:=[.D579]-[.D57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6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73935185185185" calcext:value-type="float">
            <text:p>0,00173935185185185000</text:p>
          </table:table-cell>
          <table:table-cell table:formula="of:=[.D580]-[.D57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6" office:value-type="float" office:value="15054" calcext:value-type="float">
            <text:p>15054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74236111111111" calcext:value-type="float">
            <text:p>0,00174236111111111000</text:p>
          </table:table-cell>
          <table:table-cell table:formula="of:=[.D581]-[.D58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6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74537037037037" calcext:value-type="float">
            <text:p>0,00174537037037037000</text:p>
          </table:table-cell>
          <table:table-cell table:formula="of:=[.D582]-[.D58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6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74837962962963" calcext:value-type="float">
            <text:p>0,00174837962962963000</text:p>
          </table:table-cell>
          <table:table-cell table:formula="of:=[.D583]-[.D58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6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75138888888889" calcext:value-type="float">
            <text:p>0,00175138888888889000</text:p>
          </table:table-cell>
          <table:table-cell table:formula="of:=[.D584]-[.D58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6" office:value-type="float" office:value="15158" calcext:value-type="float">
            <text:p>15158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75439814814815" calcext:value-type="float">
            <text:p>0,00175439814814815000</text:p>
          </table:table-cell>
          <table:table-cell table:formula="of:=[.D585]-[.D58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6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75740740740741" calcext:value-type="float">
            <text:p>0,00175740740740741000</text:p>
          </table:table-cell>
          <table:table-cell table:formula="of:=[.D586]-[.D58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6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76041666666667" calcext:value-type="float">
            <text:p>0,00176041666666667000</text:p>
          </table:table-cell>
          <table:table-cell table:formula="of:=[.D587]-[.D58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6" office:value-type="float" office:value="15236" calcext:value-type="float">
            <text:p>1523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76342592592593" calcext:value-type="float">
            <text:p>0,00176342592592593000</text:p>
          </table:table-cell>
          <table:table-cell table:formula="of:=[.D588]-[.D58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6" office:value-type="float" office:value="15262" calcext:value-type="float">
            <text:p>15262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76643518518519" calcext:value-type="float">
            <text:p>0,00176643518518519000</text:p>
          </table:table-cell>
          <table:table-cell table:formula="of:=[.D589]-[.D58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6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76944444444444" calcext:value-type="float">
            <text:p>0,00176944444444444000</text:p>
          </table:table-cell>
          <table:table-cell table:formula="of:=[.D590]-[.D58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6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7724537037037" calcext:value-type="float">
            <text:p>0,00177245370370370000</text:p>
          </table:table-cell>
          <table:table-cell table:formula="of:=[.D591]-[.D59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6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77546296296296" calcext:value-type="float">
            <text:p>0,00177546296296296000</text:p>
          </table:table-cell>
          <table:table-cell table:formula="of:=[.D592]-[.D59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6" office:value-type="float" office:value="15366" calcext:value-type="float">
            <text:p>15366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77847222222222" calcext:value-type="float">
            <text:p>0,00177847222222222000</text:p>
          </table:table-cell>
          <table:table-cell table:formula="of:=[.D593]-[.D59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6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78148148148148" calcext:value-type="float">
            <text:p>0,00178148148148148000</text:p>
          </table:table-cell>
          <table:table-cell table:formula="of:=[.D594]-[.D59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6" office:value-type="float" office:value="15418" calcext:value-type="float">
            <text:p>15418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78449074074074" calcext:value-type="float">
            <text:p>0,00178449074074074000</text:p>
          </table:table-cell>
          <table:table-cell table:formula="of:=[.D595]-[.D59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6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7875" calcext:value-type="float">
            <text:p>0,00178750000000000000</text:p>
          </table:table-cell>
          <table:table-cell table:formula="of:=[.D596]-[.D59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6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79050925925926" calcext:value-type="float">
            <text:p>0,00179050925925926000</text:p>
          </table:table-cell>
          <table:table-cell table:formula="of:=[.D597]-[.D59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6" office:value-type="float" office:value="15496" calcext:value-type="float">
            <text:p>1549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79351851851852" calcext:value-type="float">
            <text:p>0,00179351851851852000</text:p>
          </table:table-cell>
          <table:table-cell table:formula="of:=[.D598]-[.D59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6" office:value-type="float" office:value="15522" calcext:value-type="float">
            <text:p>15522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79652777777778" calcext:value-type="float">
            <text:p>0,00179652777777778000</text:p>
          </table:table-cell>
          <table:table-cell table:formula="of:=[.D599]-[.D59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6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79953703703704" calcext:value-type="float">
            <text:p>0,00179953703703704000</text:p>
          </table:table-cell>
          <table:table-cell table:formula="of:=[.D600]-[.D59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6" office:value-type="float" office:value="15574" calcext:value-type="float">
            <text:p>15574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8025462962963" calcext:value-type="float">
            <text:p>0,00180254629629630000</text:p>
          </table:table-cell>
          <table:table-cell table:formula="of:=[.D601]-[.D60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6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80555555555556" calcext:value-type="float">
            <text:p>0,00180555555555556000</text:p>
          </table:table-cell>
          <table:table-cell table:formula="of:=[.D602]-[.D60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6" office:value-type="float" office:value="15626" calcext:value-type="float">
            <text:p>15626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80856481481481" calcext:value-type="float">
            <text:p>0,00180856481481481000</text:p>
          </table:table-cell>
          <table:table-cell table:formula="of:=[.D603]-[.D60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6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81157407407407" calcext:value-type="float">
            <text:p>0,00181157407407407000</text:p>
          </table:table-cell>
          <table:table-cell table:formula="of:=[.D604]-[.D60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6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81458333333333" calcext:value-type="float">
            <text:p>0,00181458333333333000</text:p>
          </table:table-cell>
          <table:table-cell table:formula="of:=[.D605]-[.D60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6" office:value-type="float" office:value="15704" calcext:value-type="float">
            <text:p>1570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81759259259259" calcext:value-type="float">
            <text:p>0,00181759259259259000</text:p>
          </table:table-cell>
          <table:table-cell table:formula="of:=[.D606]-[.D60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6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82060185185185" calcext:value-type="float">
            <text:p>0,00182060185185185000</text:p>
          </table:table-cell>
          <table:table-cell table:formula="of:=[.D607]-[.D60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6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82361111111111" calcext:value-type="float">
            <text:p>0,00182361111111111000</text:p>
          </table:table-cell>
          <table:table-cell table:formula="of:=[.D608]-[.D60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6" office:value-type="float" office:value="15782" calcext:value-type="float">
            <text:p>15782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82662037037037" calcext:value-type="float">
            <text:p>0,00182662037037037000</text:p>
          </table:table-cell>
          <table:table-cell table:formula="of:=[.D609]-[.D60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6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82962962962963" calcext:value-type="float">
            <text:p>0,00182962962962963000</text:p>
          </table:table-cell>
          <table:table-cell table:formula="of:=[.D610]-[.D60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6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83263888888889" calcext:value-type="float">
            <text:p>0,00183263888888889000</text:p>
          </table:table-cell>
          <table:table-cell table:formula="of:=[.D611]-[.D61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6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83564814814815" calcext:value-type="float">
            <text:p>0,00183564814814815000</text:p>
          </table:table-cell>
          <table:table-cell table:formula="of:=[.D612]-[.D61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6" office:value-type="float" office:value="15886" calcext:value-type="float">
            <text:p>15886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83865740740741" calcext:value-type="float">
            <text:p>0,00183865740740741000</text:p>
          </table:table-cell>
          <table:table-cell table:formula="of:=[.D613]-[.D61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6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84166666666667" calcext:value-type="float">
            <text:p>0,00184166666666667000</text:p>
          </table:table-cell>
          <table:table-cell table:formula="of:=[.D614]-[.D61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6" office:value-type="float" office:value="15938" calcext:value-type="float">
            <text:p>15938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84467592592593" calcext:value-type="float">
            <text:p>0,00184467592592593000</text:p>
          </table:table-cell>
          <table:table-cell table:formula="of:=[.D615]-[.D61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6" office:value-type="float" office:value="15964" calcext:value-type="float">
            <text:p>1596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84768518518519" calcext:value-type="float">
            <text:p>0,00184768518518519000</text:p>
          </table:table-cell>
          <table:table-cell table:formula="of:=[.D616]-[.D61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6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85069444444444" calcext:value-type="float">
            <text:p>0,00185069444444444000</text:p>
          </table:table-cell>
          <table:table-cell table:formula="of:=[.D617]-[.D61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6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8537037037037" calcext:value-type="float">
            <text:p>0,00185370370370370000</text:p>
          </table:table-cell>
          <table:table-cell table:formula="of:=[.D618]-[.D61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6" office:value-type="float" office:value="16042" calcext:value-type="float">
            <text:p>16042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85671296296296" calcext:value-type="float">
            <text:p>0,00185671296296296000</text:p>
          </table:table-cell>
          <table:table-cell table:formula="of:=[.D619]-[.D61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6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85972222222222" calcext:value-type="float">
            <text:p>0,00185972222222222000</text:p>
          </table:table-cell>
          <table:table-cell table:formula="of:=[.D620]-[.D61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6" office:value-type="float" office:value="16094" calcext:value-type="float">
            <text:p>16094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86273148148148" calcext:value-type="float">
            <text:p>0,00186273148148148000</text:p>
          </table:table-cell>
          <table:table-cell table:formula="of:=[.D621]-[.D62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6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86574074074074" calcext:value-type="float">
            <text:p>0,00186574074074074000</text:p>
          </table:table-cell>
          <table:table-cell table:formula="of:=[.D622]-[.D62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6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86875" calcext:value-type="float">
            <text:p>0,00186875000000000000</text:p>
          </table:table-cell>
          <table:table-cell table:formula="of:=[.D623]-[.D62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6" office:value-type="float" office:value="16172" calcext:value-type="float">
            <text:p>1617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87175925925926" calcext:value-type="float">
            <text:p>0,00187175925925926000</text:p>
          </table:table-cell>
          <table:table-cell table:formula="of:=[.D624]-[.D62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6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87476851851852" calcext:value-type="float">
            <text:p>0,00187476851851852000</text:p>
          </table:table-cell>
          <table:table-cell table:formula="of:=[.D625]-[.D62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6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87777777777778" calcext:value-type="float">
            <text:p>0,00187777777777778000</text:p>
          </table:table-cell>
          <table:table-cell table:formula="of:=[.D626]-[.D62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6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88078703703704" calcext:value-type="float">
            <text:p>0,00188078703703704000</text:p>
          </table:table-cell>
          <table:table-cell table:formula="of:=[.D627]-[.D62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6" office:value-type="float" office:value="16276" calcext:value-type="float">
            <text:p>1627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8837962962963" calcext:value-type="float">
            <text:p>0,00188379629629630000</text:p>
          </table:table-cell>
          <table:table-cell table:formula="of:=[.D628]-[.D62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6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88680555555556" calcext:value-type="float">
            <text:p>0,00188680555555556000</text:p>
          </table:table-cell>
          <table:table-cell table:formula="of:=[.D629]-[.D62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6" office:value-type="float" office:value="16328" calcext:value-type="float">
            <text:p>1632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88981481481481" calcext:value-type="float">
            <text:p>0,00188981481481481000</text:p>
          </table:table-cell>
          <table:table-cell table:formula="of:=[.D630]-[.D62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6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89282407407407" calcext:value-type="float">
            <text:p>0,00189282407407407000</text:p>
          </table:table-cell>
          <table:table-cell table:formula="of:=[.D631]-[.D63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6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89583333333333" calcext:value-type="float">
            <text:p>0,00189583333333333000</text:p>
          </table:table-cell>
          <table:table-cell table:formula="of:=[.D632]-[.D63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6" office:value-type="float" office:value="16406" calcext:value-type="float">
            <text:p>16406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89884259259259" calcext:value-type="float">
            <text:p>0,00189884259259259000</text:p>
          </table:table-cell>
          <table:table-cell table:formula="of:=[.D633]-[.D63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6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90185185185185" calcext:value-type="float">
            <text:p>0,00190185185185185000</text:p>
          </table:table-cell>
          <table:table-cell table:formula="of:=[.D634]-[.D63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6" office:value-type="float" office:value="16458" calcext:value-type="float">
            <text:p>16458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90486111111111" calcext:value-type="float">
            <text:p>0,00190486111111111000</text:p>
          </table:table-cell>
          <table:table-cell table:formula="of:=[.D635]-[.D63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6" office:value-type="float" office:value="16484" calcext:value-type="float">
            <text:p>1648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90787037037037" calcext:value-type="float">
            <text:p>0,00190787037037037000</text:p>
          </table:table-cell>
          <table:table-cell table:formula="of:=[.D636]-[.D63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6" office:value-type="float" office:value="16510" calcext:value-type="float">
            <text:p>1651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91087962962963" calcext:value-type="float">
            <text:p>0,00191087962962963000</text:p>
          </table:table-cell>
          <table:table-cell table:formula="of:=[.D637]-[.D63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6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91388888888889" calcext:value-type="float">
            <text:p>0,00191388888888889000</text:p>
          </table:table-cell>
          <table:table-cell table:formula="of:=[.D638]-[.D63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6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91689814814815" calcext:value-type="float">
            <text:p>0,00191689814814815000</text:p>
          </table:table-cell>
          <table:table-cell table:formula="of:=[.D639]-[.D63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6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91990740740741" calcext:value-type="float">
            <text:p>0,00191990740740741000</text:p>
          </table:table-cell>
          <table:table-cell table:formula="of:=[.D640]-[.D63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6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92291666666667" calcext:value-type="float">
            <text:p>0,00192291666666667000</text:p>
          </table:table-cell>
          <table:table-cell table:formula="of:=[.D641]-[.D64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6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92592592592593" calcext:value-type="float">
            <text:p>0,00192592592592593000</text:p>
          </table:table-cell>
          <table:table-cell table:formula="of:=[.D642]-[.D641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6" office:value-type="float" office:value="16666" calcext:value-type="float">
            <text:p>16666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92893518518519" calcext:value-type="float">
            <text:p>0,00192893518518519000</text:p>
          </table:table-cell>
          <table:table-cell table:formula="of:=[.D643]-[.D642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6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93194444444444" calcext:value-type="float">
            <text:p>0,00193194444444444000</text:p>
          </table:table-cell>
          <table:table-cell table:formula="of:=[.D644]-[.D643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6" office:value-type="float" office:value="16718" calcext:value-type="float">
            <text:p>16718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9349537037037" calcext:value-type="float">
            <text:p>0,00193495370370370000</text:p>
          </table:table-cell>
          <table:table-cell table:formula="of:=[.D645]-[.D644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6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93796296296296" calcext:value-type="float">
            <text:p>0,00193796296296296000</text:p>
          </table:table-cell>
          <table:table-cell table:formula="of:=[.D646]-[.D645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6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94097222222222" calcext:value-type="float">
            <text:p>0,00194097222222222000</text:p>
          </table:table-cell>
          <table:table-cell table:formula="of:=[.D647]-[.D646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6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94398148148148" calcext:value-type="float">
            <text:p>0,00194398148148148000</text:p>
          </table:table-cell>
          <table:table-cell table:formula="of:=[.D648]-[.D647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6" office:value-type="float" office:value="16822" calcext:value-type="float">
            <text:p>16822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94699074074074" calcext:value-type="float">
            <text:p>0,00194699074074074000</text:p>
          </table:table-cell>
          <table:table-cell table:formula="of:=[.D649]-[.D648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6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95" calcext:value-type="float">
            <text:p>0,00195000000000000000</text:p>
          </table:table-cell>
          <table:table-cell table:formula="of:=[.D650]-[.D649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6" office:value-type="float" office:value="16874" calcext:value-type="float">
            <text:p>16874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95300925925926" calcext:value-type="float">
            <text:p>0,00195300925925926000</text:p>
          </table:table-cell>
          <table:table-cell table:formula="of:=[.D651]-[.D650]" office:value-type="float" office:value="0.00000300925925925924" calcext:value-type="float">
            <text:p>0,000003009259259259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6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95601851851852" calcext:value-type="float">
            <text:p>0,00195601851851852000</text:p>
          </table:table-cell>
          <table:table-cell table:formula="of:=[.D652]-[.D65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6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95902777777778" calcext:value-type="float">
            <text:p>0,00195902777777778000</text:p>
          </table:table-cell>
          <table:table-cell table:formula="of:=[.D653]-[.D65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6" office:value-type="float" office:value="16952" calcext:value-type="float">
            <text:p>1695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96203703703704" calcext:value-type="float">
            <text:p>0,00196203703703704000</text:p>
          </table:table-cell>
          <table:table-cell table:formula="of:=[.D654]-[.D65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6" office:value-type="float" office:value="16978" calcext:value-type="float">
            <text:p>16978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9650462962963" calcext:value-type="float">
            <text:p>0,00196504629629630000</text:p>
          </table:table-cell>
          <table:table-cell table:formula="of:=[.D655]-[.D65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6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96805555555556" calcext:value-type="float">
            <text:p>0,00196805555555556000</text:p>
          </table:table-cell>
          <table:table-cell table:formula="of:=[.D656]-[.D65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6" office:value-type="float" office:value="17030" calcext:value-type="float">
            <text:p>1703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97106481481482" calcext:value-type="float">
            <text:p>0,00197106481481482000</text:p>
          </table:table-cell>
          <table:table-cell table:formula="of:=[.D657]-[.D65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6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97407407407407" calcext:value-type="float">
            <text:p>0,00197407407407407000</text:p>
          </table:table-cell>
          <table:table-cell table:formula="of:=[.D658]-[.D65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6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97708333333333" calcext:value-type="float">
            <text:p>0,00197708333333333000</text:p>
          </table:table-cell>
          <table:table-cell table:formula="of:=[.D659]-[.D65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6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98009259259259" calcext:value-type="float">
            <text:p>0,00198009259259259000</text:p>
          </table:table-cell>
          <table:table-cell table:formula="of:=[.D660]-[.D65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6" office:value-type="float" office:value="17134" calcext:value-type="float">
            <text:p>17134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98310185185185" calcext:value-type="float">
            <text:p>0,00198310185185185000</text:p>
          </table:table-cell>
          <table:table-cell table:formula="of:=[.D661]-[.D66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6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98611111111111" calcext:value-type="float">
            <text:p>0,00198611111111111000</text:p>
          </table:table-cell>
          <table:table-cell table:formula="of:=[.D662]-[.D66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6" office:value-type="float" office:value="17186" calcext:value-type="float">
            <text:p>17186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98912037037037" calcext:value-type="float">
            <text:p>0,00198912037037037000</text:p>
          </table:table-cell>
          <table:table-cell table:formula="of:=[.D663]-[.D66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6" office:value-type="float" office:value="17212" calcext:value-type="float">
            <text:p>1721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99212962962963" calcext:value-type="float">
            <text:p>0,00199212962962963000</text:p>
          </table:table-cell>
          <table:table-cell table:formula="of:=[.D664]-[.D66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6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99513888888889" calcext:value-type="float">
            <text:p>0,00199513888888889000</text:p>
          </table:table-cell>
          <table:table-cell table:formula="of:=[.D665]-[.D66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6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99814814814815" calcext:value-type="float">
            <text:p>0,00199814814814815000</text:p>
          </table:table-cell>
          <table:table-cell table:formula="of:=[.D666]-[.D66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6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00115740740741" calcext:value-type="float">
            <text:p>0,00200115740740741000</text:p>
          </table:table-cell>
          <table:table-cell table:formula="of:=[.D667]-[.D66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6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00416666666667" calcext:value-type="float">
            <text:p>0,00200416666666667000</text:p>
          </table:table-cell>
          <table:table-cell table:formula="of:=[.D668]-[.D66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6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00717592592593" calcext:value-type="float">
            <text:p>0,00200717592592593000</text:p>
          </table:table-cell>
          <table:table-cell table:formula="of:=[.D669]-[.D66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6" office:value-type="float" office:value="17368" calcext:value-type="float">
            <text:p>17368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01018518518519" calcext:value-type="float">
            <text:p>0,00201018518518519000</text:p>
          </table:table-cell>
          <table:table-cell table:formula="of:=[.D670]-[.D66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6" office:value-type="float" office:value="17394" calcext:value-type="float">
            <text:p>17394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01319444444444" calcext:value-type="float">
            <text:p>0,00201319444444444000</text:p>
          </table:table-cell>
          <table:table-cell table:formula="of:=[.D671]-[.D67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6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0162037037037" calcext:value-type="float">
            <text:p>0,00201620370370370000</text:p>
          </table:table-cell>
          <table:table-cell table:formula="of:=[.D672]-[.D67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6" office:value-type="float" office:value="17446" calcext:value-type="float">
            <text:p>17446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01921296296296" calcext:value-type="float">
            <text:p>0,00201921296296296000</text:p>
          </table:table-cell>
          <table:table-cell table:formula="of:=[.D673]-[.D67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6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02222222222222" calcext:value-type="float">
            <text:p>0,00202222222222222000</text:p>
          </table:table-cell>
          <table:table-cell table:formula="of:=[.D674]-[.D67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6" office:value-type="float" office:value="17498" calcext:value-type="float">
            <text:p>17498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02523148148148" calcext:value-type="float">
            <text:p>0,00202523148148148000</text:p>
          </table:table-cell>
          <table:table-cell table:formula="of:=[.D675]-[.D67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6" office:value-type="float" office:value="17524" calcext:value-type="float">
            <text:p>17524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02824074074074" calcext:value-type="float">
            <text:p>0,00202824074074074000</text:p>
          </table:table-cell>
          <table:table-cell table:formula="of:=[.D676]-[.D67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6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03125" calcext:value-type="float">
            <text:p>0,00203125000000000000</text:p>
          </table:table-cell>
          <table:table-cell table:formula="of:=[.D677]-[.D67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6" office:value-type="float" office:value="17576" calcext:value-type="float">
            <text:p>17576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03425925925926" calcext:value-type="float">
            <text:p>0,00203425925925926000</text:p>
          </table:table-cell>
          <table:table-cell table:formula="of:=[.D678]-[.D67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6" office:value-type="float" office:value="17602" calcext:value-type="float">
            <text:p>17602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03726851851852" calcext:value-type="float">
            <text:p>0,00203726851851852000</text:p>
          </table:table-cell>
          <table:table-cell table:formula="of:=[.D679]-[.D67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6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04027777777778" calcext:value-type="float">
            <text:p>0,00204027777777778000</text:p>
          </table:table-cell>
          <table:table-cell table:formula="of:=[.D680]-[.D67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6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04328703703704" calcext:value-type="float">
            <text:p>0,00204328703703704000</text:p>
          </table:table-cell>
          <table:table-cell table:formula="of:=[.D681]-[.D68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6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0462962962963" calcext:value-type="float">
            <text:p>0,00204629629629630000</text:p>
          </table:table-cell>
          <table:table-cell table:formula="of:=[.D682]-[.D68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6" office:value-type="float" office:value="17706" calcext:value-type="float">
            <text:p>17706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04930555555556" calcext:value-type="float">
            <text:p>0,00204930555555556000</text:p>
          </table:table-cell>
          <table:table-cell table:formula="of:=[.D683]-[.D68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6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05231481481482" calcext:value-type="float">
            <text:p>0,00205231481481482000</text:p>
          </table:table-cell>
          <table:table-cell table:formula="of:=[.D684]-[.D68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6" office:value-type="float" office:value="17758" calcext:value-type="float">
            <text:p>17758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05532407407407" calcext:value-type="float">
            <text:p>0,00205532407407407000</text:p>
          </table:table-cell>
          <table:table-cell table:formula="of:=[.D685]-[.D68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6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05833333333333" calcext:value-type="float">
            <text:p>0,00205833333333333000</text:p>
          </table:table-cell>
          <table:table-cell table:formula="of:=[.D686]-[.D68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6" office:value-type="float" office:value="17810" calcext:value-type="float">
            <text:p>1781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06134259259259" calcext:value-type="float">
            <text:p>0,00206134259259259000</text:p>
          </table:table-cell>
          <table:table-cell table:formula="of:=[.D687]-[.D68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6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06435185185185" calcext:value-type="float">
            <text:p>0,00206435185185185000</text:p>
          </table:table-cell>
          <table:table-cell table:formula="of:=[.D688]-[.D68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6" office:value-type="float" office:value="17862" calcext:value-type="float">
            <text:p>17862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06736111111111" calcext:value-type="float">
            <text:p>0,00206736111111111000</text:p>
          </table:table-cell>
          <table:table-cell table:formula="of:=[.D689]-[.D68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6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07037037037037" calcext:value-type="float">
            <text:p>0,00207037037037037000</text:p>
          </table:table-cell>
          <table:table-cell table:formula="of:=[.D690]-[.D68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6" office:value-type="float" office:value="17914" calcext:value-type="float">
            <text:p>17914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07337962962963" calcext:value-type="float">
            <text:p>0,00207337962962963000</text:p>
          </table:table-cell>
          <table:table-cell table:formula="of:=[.D691]-[.D69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6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07638888888889" calcext:value-type="float">
            <text:p>0,00207638888888889000</text:p>
          </table:table-cell>
          <table:table-cell table:formula="of:=[.D692]-[.D69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6" office:value-type="float" office:value="17966" calcext:value-type="float">
            <text:p>17966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07939814814815" calcext:value-type="float">
            <text:p>0,00207939814814815000</text:p>
          </table:table-cell>
          <table:table-cell table:formula="of:=[.D693]-[.D69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6" office:value-type="float" office:value="17992" calcext:value-type="float">
            <text:p>17992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08240740740741" calcext:value-type="float">
            <text:p>0,00208240740740741000</text:p>
          </table:table-cell>
          <table:table-cell table:formula="of:=[.D694]-[.D69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6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08541666666667" calcext:value-type="float">
            <text:p>0,00208541666666667000</text:p>
          </table:table-cell>
          <table:table-cell table:formula="of:=[.D695]-[.D69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6" office:value-type="float" office:value="18044" calcext:value-type="float">
            <text:p>18044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08842592592593" calcext:value-type="float">
            <text:p>0,00208842592592593000</text:p>
          </table:table-cell>
          <table:table-cell table:formula="of:=[.D696]-[.D69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6" office:value-type="float" office:value="18070" calcext:value-type="float">
            <text:p>1807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09143518518519" calcext:value-type="float">
            <text:p>0,00209143518518519000</text:p>
          </table:table-cell>
          <table:table-cell table:formula="of:=[.D697]-[.D69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6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09444444444444" calcext:value-type="float">
            <text:p>0,00209444444444444000</text:p>
          </table:table-cell>
          <table:table-cell table:formula="of:=[.D698]-[.D69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6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0974537037037" calcext:value-type="float">
            <text:p>0,00209745370370370000</text:p>
          </table:table-cell>
          <table:table-cell table:formula="of:=[.D699]-[.D69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6" office:value-type="float" office:value="18148" calcext:value-type="float">
            <text:p>18148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10046296296296" calcext:value-type="float">
            <text:p>0,00210046296296296000</text:p>
          </table:table-cell>
          <table:table-cell table:formula="of:=[.D700]-[.D69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6" office:value-type="float" office:value="18174" calcext:value-type="float">
            <text:p>18174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10347222222222" calcext:value-type="float">
            <text:p>0,00210347222222222000</text:p>
          </table:table-cell>
          <table:table-cell table:formula="of:=[.D701]-[.D70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6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10648148148148" calcext:value-type="float">
            <text:p>0,00210648148148148000</text:p>
          </table:table-cell>
          <table:table-cell table:formula="of:=[.D702]-[.D70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6" office:value-type="float" office:value="18226" calcext:value-type="float">
            <text:p>18226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10949074074074" calcext:value-type="float">
            <text:p>0,00210949074074074000</text:p>
          </table:table-cell>
          <table:table-cell table:formula="of:=[.D703]-[.D70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6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1125" calcext:value-type="float">
            <text:p>0,00211250000000000000</text:p>
          </table:table-cell>
          <table:table-cell table:formula="of:=[.D704]-[.D70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6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11550925925926" calcext:value-type="float">
            <text:p>0,00211550925925926000</text:p>
          </table:table-cell>
          <table:table-cell table:formula="of:=[.D705]-[.D70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6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11851851851852" calcext:value-type="float">
            <text:p>0,00211851851851852000</text:p>
          </table:table-cell>
          <table:table-cell table:formula="of:=[.D706]-[.D70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6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12152777777778" calcext:value-type="float">
            <text:p>0,00212152777777778000</text:p>
          </table:table-cell>
          <table:table-cell table:formula="of:=[.D707]-[.D70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6" office:value-type="float" office:value="18356" calcext:value-type="float">
            <text:p>18356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12453703703704" calcext:value-type="float">
            <text:p>0,00212453703703704000</text:p>
          </table:table-cell>
          <table:table-cell table:formula="of:=[.D708]-[.D70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6" office:value-type="float" office:value="18382" calcext:value-type="float">
            <text:p>18382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1275462962963" calcext:value-type="float">
            <text:p>0,00212754629629630000</text:p>
          </table:table-cell>
          <table:table-cell table:formula="of:=[.D709]-[.D70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6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13055555555556" calcext:value-type="float">
            <text:p>0,00213055555555556000</text:p>
          </table:table-cell>
          <table:table-cell table:formula="of:=[.D710]-[.D70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6" office:value-type="float" office:value="18434" calcext:value-type="float">
            <text:p>18434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13356481481481" calcext:value-type="float">
            <text:p>0,00213356481481481000</text:p>
          </table:table-cell>
          <table:table-cell table:formula="of:=[.D711]-[.D71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6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13657407407407" calcext:value-type="float">
            <text:p>0,00213657407407407000</text:p>
          </table:table-cell>
          <table:table-cell table:formula="of:=[.D712]-[.D71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6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13958333333333" calcext:value-type="float">
            <text:p>0,00213958333333333000</text:p>
          </table:table-cell>
          <table:table-cell table:formula="of:=[.D713]-[.D71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6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14259259259259" calcext:value-type="float">
            <text:p>0,00214259259259259000</text:p>
          </table:table-cell>
          <table:table-cell table:formula="of:=[.D714]-[.D71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6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14560185185185" calcext:value-type="float">
            <text:p>0,00214560185185185000</text:p>
          </table:table-cell>
          <table:table-cell table:formula="of:=[.D715]-[.D71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6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14861111111111" calcext:value-type="float">
            <text:p>0,00214861111111111000</text:p>
          </table:table-cell>
          <table:table-cell table:formula="of:=[.D716]-[.D71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6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15162037037037" calcext:value-type="float">
            <text:p>0,00215162037037037000</text:p>
          </table:table-cell>
          <table:table-cell table:formula="of:=[.D717]-[.D71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6" office:value-type="float" office:value="18616" calcext:value-type="float">
            <text:p>18616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15462962962963" calcext:value-type="float">
            <text:p>0,00215462962962963000</text:p>
          </table:table-cell>
          <table:table-cell table:formula="of:=[.D718]-[.D71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6" office:value-type="float" office:value="18642" calcext:value-type="float">
            <text:p>18642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15763888888889" calcext:value-type="float">
            <text:p>0,00215763888888889000</text:p>
          </table:table-cell>
          <table:table-cell table:formula="of:=[.D719]-[.D71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6" office:value-type="float" office:value="18668" calcext:value-type="float">
            <text:p>18668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16064814814815" calcext:value-type="float">
            <text:p>0,00216064814814815000</text:p>
          </table:table-cell>
          <table:table-cell table:formula="of:=[.D720]-[.D71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6" office:value-type="float" office:value="18694" calcext:value-type="float">
            <text:p>18694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16365740740741" calcext:value-type="float">
            <text:p>0,00216365740740741000</text:p>
          </table:table-cell>
          <table:table-cell table:formula="of:=[.D721]-[.D72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6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16666666666667" calcext:value-type="float">
            <text:p>0,00216666666666667000</text:p>
          </table:table-cell>
          <table:table-cell table:formula="of:=[.D722]-[.D72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6" office:value-type="float" office:value="18746" calcext:value-type="float">
            <text:p>18746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16967592592593" calcext:value-type="float">
            <text:p>0,00216967592592593000</text:p>
          </table:table-cell>
          <table:table-cell table:formula="of:=[.D723]-[.D72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6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17268518518519" calcext:value-type="float">
            <text:p>0,00217268518518519000</text:p>
          </table:table-cell>
          <table:table-cell table:formula="of:=[.D724]-[.D72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6" office:value-type="float" office:value="18798" calcext:value-type="float">
            <text:p>18798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17569444444444" calcext:value-type="float">
            <text:p>0,00217569444444444000</text:p>
          </table:table-cell>
          <table:table-cell table:formula="of:=[.D725]-[.D72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6" office:value-type="float" office:value="18824" calcext:value-type="float">
            <text:p>18824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1787037037037" calcext:value-type="float">
            <text:p>0,00217870370370370000</text:p>
          </table:table-cell>
          <table:table-cell table:formula="of:=[.D726]-[.D72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6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18171296296296" calcext:value-type="float">
            <text:p>0,00218171296296296000</text:p>
          </table:table-cell>
          <table:table-cell table:formula="of:=[.D727]-[.D72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6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18472222222222" calcext:value-type="float">
            <text:p>0,00218472222222222000</text:p>
          </table:table-cell>
          <table:table-cell table:formula="of:=[.D728]-[.D72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6" office:value-type="float" office:value="18902" calcext:value-type="float">
            <text:p>18902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18773148148148" calcext:value-type="float">
            <text:p>0,00218773148148148000</text:p>
          </table:table-cell>
          <table:table-cell table:formula="of:=[.D729]-[.D72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6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19074074074074" calcext:value-type="float">
            <text:p>0,00219074074074074000</text:p>
          </table:table-cell>
          <table:table-cell table:formula="of:=[.D730]-[.D72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6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19375" calcext:value-type="float">
            <text:p>0,00219375000000000000</text:p>
          </table:table-cell>
          <table:table-cell table:formula="of:=[.D731]-[.D73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6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19675925925926" calcext:value-type="float">
            <text:p>0,00219675925925926000</text:p>
          </table:table-cell>
          <table:table-cell table:formula="of:=[.D732]-[.D73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6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19976851851852" calcext:value-type="float">
            <text:p>0,00219976851851852000</text:p>
          </table:table-cell>
          <table:table-cell table:formula="of:=[.D733]-[.D73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6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20277777777778" calcext:value-type="float">
            <text:p>0,00220277777777778000</text:p>
          </table:table-cell>
          <table:table-cell table:formula="of:=[.D734]-[.D73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6" office:value-type="float" office:value="19058" calcext:value-type="float">
            <text:p>19058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20578703703704" calcext:value-type="float">
            <text:p>0,00220578703703704000</text:p>
          </table:table-cell>
          <table:table-cell table:formula="of:=[.D735]-[.D73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6" office:value-type="float" office:value="19084" calcext:value-type="float">
            <text:p>19084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2087962962963" calcext:value-type="float">
            <text:p>0,00220879629629630000</text:p>
          </table:table-cell>
          <table:table-cell table:formula="of:=[.D736]-[.D73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6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21180555555556" calcext:value-type="float">
            <text:p>0,00221180555555556000</text:p>
          </table:table-cell>
          <table:table-cell table:formula="of:=[.D737]-[.D73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6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21481481481482" calcext:value-type="float">
            <text:p>0,00221481481481482000</text:p>
          </table:table-cell>
          <table:table-cell table:formula="of:=[.D738]-[.D73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6" office:value-type="float" office:value="19162" calcext:value-type="float">
            <text:p>19162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21782407407407" calcext:value-type="float">
            <text:p>0,00221782407407407000</text:p>
          </table:table-cell>
          <table:table-cell table:formula="of:=[.D739]-[.D73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6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22083333333333" calcext:value-type="float">
            <text:p>0,00222083333333333000</text:p>
          </table:table-cell>
          <table:table-cell table:formula="of:=[.D740]-[.D73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6" office:value-type="float" office:value="19214" calcext:value-type="float">
            <text:p>19214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22384259259259" calcext:value-type="float">
            <text:p>0,00222384259259259000</text:p>
          </table:table-cell>
          <table:table-cell table:formula="of:=[.D741]-[.D74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6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22685185185185" calcext:value-type="float">
            <text:p>0,00222685185185185000</text:p>
          </table:table-cell>
          <table:table-cell table:formula="of:=[.D742]-[.D74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6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22986111111111" calcext:value-type="float">
            <text:p>0,00222986111111111000</text:p>
          </table:table-cell>
          <table:table-cell table:formula="of:=[.D743]-[.D74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6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23287037037037" calcext:value-type="float">
            <text:p>0,00223287037037037000</text:p>
          </table:table-cell>
          <table:table-cell table:formula="of:=[.D744]-[.D74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6" office:value-type="float" office:value="19318" calcext:value-type="float">
            <text:p>19318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23587962962963" calcext:value-type="float">
            <text:p>0,00223587962962963000</text:p>
          </table:table-cell>
          <table:table-cell table:formula="of:=[.D745]-[.D74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6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23888888888889" calcext:value-type="float">
            <text:p>0,00223888888888889000</text:p>
          </table:table-cell>
          <table:table-cell table:formula="of:=[.D746]-[.D74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6" office:value-type="float" office:value="19370" calcext:value-type="float">
            <text:p>1937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24189814814815" calcext:value-type="float">
            <text:p>0,00224189814814815000</text:p>
          </table:table-cell>
          <table:table-cell table:formula="of:=[.D747]-[.D74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6" office:value-type="float" office:value="19396" calcext:value-type="float">
            <text:p>19396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24490740740741" calcext:value-type="float">
            <text:p>0,00224490740740741000</text:p>
          </table:table-cell>
          <table:table-cell table:formula="of:=[.D748]-[.D74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6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24791666666667" calcext:value-type="float">
            <text:p>0,00224791666666667000</text:p>
          </table:table-cell>
          <table:table-cell table:formula="of:=[.D749]-[.D74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6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25092592592593" calcext:value-type="float">
            <text:p>0,00225092592592593000</text:p>
          </table:table-cell>
          <table:table-cell table:formula="of:=[.D750]-[.D74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6" office:value-type="float" office:value="19474" calcext:value-type="float">
            <text:p>19474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25393518518519" calcext:value-type="float">
            <text:p>0,00225393518518519000</text:p>
          </table:table-cell>
          <table:table-cell table:formula="of:=[.D751]-[.D75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6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25694444444444" calcext:value-type="float">
            <text:p>0,00225694444444444000</text:p>
          </table:table-cell>
          <table:table-cell table:formula="of:=[.D752]-[.D75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6" office:value-type="float" office:value="19526" calcext:value-type="float">
            <text:p>19526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2599537037037" calcext:value-type="float">
            <text:p>0,00225995370370370000</text:p>
          </table:table-cell>
          <table:table-cell table:formula="of:=[.D753]-[.D75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6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26296296296296" calcext:value-type="float">
            <text:p>0,00226296296296296000</text:p>
          </table:table-cell>
          <table:table-cell table:formula="of:=[.D754]-[.D75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6" office:value-type="float" office:value="19578" calcext:value-type="float">
            <text:p>19578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26597222222222" calcext:value-type="float">
            <text:p>0,00226597222222222000</text:p>
          </table:table-cell>
          <table:table-cell table:formula="of:=[.D755]-[.D75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6" office:value-type="float" office:value="19604" calcext:value-type="float">
            <text:p>19604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26898148148148" calcext:value-type="float">
            <text:p>0,00226898148148148000</text:p>
          </table:table-cell>
          <table:table-cell table:formula="of:=[.D756]-[.D75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6" office:value-type="float" office:value="19630" calcext:value-type="float">
            <text:p>1963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27199074074074" calcext:value-type="float">
            <text:p>0,00227199074074074000</text:p>
          </table:table-cell>
          <table:table-cell table:formula="of:=[.D757]-[.D75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6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275" calcext:value-type="float">
            <text:p>0,00227500000000000000</text:p>
          </table:table-cell>
          <table:table-cell table:formula="of:=[.D758]-[.D75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6" office:value-type="float" office:value="19682" calcext:value-type="float">
            <text:p>19682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27800925925926" calcext:value-type="float">
            <text:p>0,00227800925925926000</text:p>
          </table:table-cell>
          <table:table-cell table:formula="of:=[.D759]-[.D75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6" office:value-type="float" office:value="19708" calcext:value-type="float">
            <text:p>19708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28101851851852" calcext:value-type="float">
            <text:p>0,00228101851851852000</text:p>
          </table:table-cell>
          <table:table-cell table:formula="of:=[.D760]-[.D75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6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28402777777778" calcext:value-type="float">
            <text:p>0,00228402777777778000</text:p>
          </table:table-cell>
          <table:table-cell table:formula="of:=[.D761]-[.D76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6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28703703703704" calcext:value-type="float">
            <text:p>0,00228703703703704000</text:p>
          </table:table-cell>
          <table:table-cell table:formula="of:=[.D762]-[.D76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6" office:value-type="float" office:value="19786" calcext:value-type="float">
            <text:p>19786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2900462962963" calcext:value-type="float">
            <text:p>0,00229004629629630000</text:p>
          </table:table-cell>
          <table:table-cell table:formula="of:=[.D763]-[.D76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6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29305555555556" calcext:value-type="float">
            <text:p>0,00229305555555556000</text:p>
          </table:table-cell>
          <table:table-cell table:formula="of:=[.D764]-[.D76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6" office:value-type="float" office:value="19838" calcext:value-type="float">
            <text:p>19838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29606481481482" calcext:value-type="float">
            <text:p>0,00229606481481482000</text:p>
          </table:table-cell>
          <table:table-cell table:formula="of:=[.D765]-[.D76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6" office:value-type="float" office:value="19864" calcext:value-type="float">
            <text:p>19864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29907407407407" calcext:value-type="float">
            <text:p>0,00229907407407407000</text:p>
          </table:table-cell>
          <table:table-cell table:formula="of:=[.D766]-[.D76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6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30208333333333" calcext:value-type="float">
            <text:p>0,00230208333333333000</text:p>
          </table:table-cell>
          <table:table-cell table:formula="of:=[.D767]-[.D76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6" office:value-type="float" office:value="19916" calcext:value-type="float">
            <text:p>19916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30509259259259" calcext:value-type="float">
            <text:p>0,00230509259259259000</text:p>
          </table:table-cell>
          <table:table-cell table:formula="of:=[.D768]-[.D76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6" office:value-type="float" office:value="19942" calcext:value-type="float">
            <text:p>19942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30810185185185" calcext:value-type="float">
            <text:p>0,00230810185185185000</text:p>
          </table:table-cell>
          <table:table-cell table:formula="of:=[.D769]-[.D76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6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31111111111111" calcext:value-type="float">
            <text:p>0,00231111111111111000</text:p>
          </table:table-cell>
          <table:table-cell table:formula="of:=[.D770]-[.D76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6" office:value-type="float" office:value="19994" calcext:value-type="float">
            <text:p>19994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31412037037037" calcext:value-type="float">
            <text:p>0,00231412037037037000</text:p>
          </table:table-cell>
          <table:table-cell table:formula="of:=[.D771]-[.D77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6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31712962962963" calcext:value-type="float">
            <text:p>0,00231712962962963000</text:p>
          </table:table-cell>
          <table:table-cell table:formula="of:=[.D772]-[.D77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6" office:value-type="float" office:value="20046" calcext:value-type="float">
            <text:p>20046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32013888888889" calcext:value-type="float">
            <text:p>0,00232013888888889000</text:p>
          </table:table-cell>
          <table:table-cell table:formula="of:=[.D773]-[.D77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6" office:value-type="float" office:value="20072" calcext:value-type="float">
            <text:p>20072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32314814814815" calcext:value-type="float">
            <text:p>0,00232314814814815000</text:p>
          </table:table-cell>
          <table:table-cell table:formula="of:=[.D774]-[.D77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6" office:value-type="float" office:value="20098" calcext:value-type="float">
            <text:p>20098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32615740740741" calcext:value-type="float">
            <text:p>0,00232615740740741000</text:p>
          </table:table-cell>
          <table:table-cell table:formula="of:=[.D775]-[.D77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6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32916666666667" calcext:value-type="float">
            <text:p>0,00232916666666667000</text:p>
          </table:table-cell>
          <table:table-cell table:formula="of:=[.D776]-[.D77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6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33217592592593" calcext:value-type="float">
            <text:p>0,00233217592592593000</text:p>
          </table:table-cell>
          <table:table-cell table:formula="of:=[.D777]-[.D77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6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33518518518519" calcext:value-type="float">
            <text:p>0,00233518518518519000</text:p>
          </table:table-cell>
          <table:table-cell table:formula="of:=[.D778]-[.D77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6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33819444444444" calcext:value-type="float">
            <text:p>0,00233819444444444000</text:p>
          </table:table-cell>
          <table:table-cell table:formula="of:=[.D779]-[.D77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6" office:value-type="float" office:value="20228" calcext:value-type="float">
            <text:p>20228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3412037037037" calcext:value-type="float">
            <text:p>0,00234120370370370000</text:p>
          </table:table-cell>
          <table:table-cell table:formula="of:=[.D780]-[.D77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6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34421296296296" calcext:value-type="float">
            <text:p>0,00234421296296296000</text:p>
          </table:table-cell>
          <table:table-cell table:formula="of:=[.D781]-[.D78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6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34722222222222" calcext:value-type="float">
            <text:p>0,00234722222222222000</text:p>
          </table:table-cell>
          <table:table-cell table:formula="of:=[.D782]-[.D78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6" office:value-type="float" office:value="20306" calcext:value-type="float">
            <text:p>20306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35023148148148" calcext:value-type="float">
            <text:p>0,00235023148148148000</text:p>
          </table:table-cell>
          <table:table-cell table:formula="of:=[.D783]-[.D78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6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35324074074074" calcext:value-type="float">
            <text:p>0,00235324074074074000</text:p>
          </table:table-cell>
          <table:table-cell table:formula="of:=[.D784]-[.D78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6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35625" calcext:value-type="float">
            <text:p>0,00235625000000000000</text:p>
          </table:table-cell>
          <table:table-cell table:formula="of:=[.D785]-[.D78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6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35925925925926" calcext:value-type="float">
            <text:p>0,00235925925925926000</text:p>
          </table:table-cell>
          <table:table-cell table:formula="of:=[.D786]-[.D78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6" office:value-type="float" office:value="20410" calcext:value-type="float">
            <text:p>2041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36226851851852" calcext:value-type="float">
            <text:p>0,00236226851851852000</text:p>
          </table:table-cell>
          <table:table-cell table:formula="of:=[.D787]-[.D78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6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36527777777778" calcext:value-type="float">
            <text:p>0,00236527777777778000</text:p>
          </table:table-cell>
          <table:table-cell table:formula="of:=[.D788]-[.D78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6" office:value-type="float" office:value="20462" calcext:value-type="float">
            <text:p>20462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36828703703704" calcext:value-type="float">
            <text:p>0,00236828703703704000</text:p>
          </table:table-cell>
          <table:table-cell table:formula="of:=[.D789]-[.D78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6" office:value-type="float" office:value="20488" calcext:value-type="float">
            <text:p>20488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3712962962963" calcext:value-type="float">
            <text:p>0,00237129629629630000</text:p>
          </table:table-cell>
          <table:table-cell table:formula="of:=[.D790]-[.D78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6" office:value-type="float" office:value="20514" calcext:value-type="float">
            <text:p>20514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37430555555556" calcext:value-type="float">
            <text:p>0,00237430555555556000</text:p>
          </table:table-cell>
          <table:table-cell table:formula="of:=[.D791]-[.D79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6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37731481481481" calcext:value-type="float">
            <text:p>0,00237731481481481000</text:p>
          </table:table-cell>
          <table:table-cell table:formula="of:=[.D792]-[.D79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6" office:value-type="float" office:value="20566" calcext:value-type="float">
            <text:p>20566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38032407407407" calcext:value-type="float">
            <text:p>0,00238032407407407000</text:p>
          </table:table-cell>
          <table:table-cell table:formula="of:=[.D793]-[.D79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6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38333333333333" calcext:value-type="float">
            <text:p>0,00238333333333333000</text:p>
          </table:table-cell>
          <table:table-cell table:formula="of:=[.D794]-[.D79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6" office:value-type="float" office:value="20618" calcext:value-type="float">
            <text:p>20618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38634259259259" calcext:value-type="float">
            <text:p>0,00238634259259259000</text:p>
          </table:table-cell>
          <table:table-cell table:formula="of:=[.D795]-[.D79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6" office:value-type="float" office:value="20644" calcext:value-type="float">
            <text:p>20644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38935185185185" calcext:value-type="float">
            <text:p>0,00238935185185185000</text:p>
          </table:table-cell>
          <table:table-cell table:formula="of:=[.D796]-[.D79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6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39236111111111" calcext:value-type="float">
            <text:p>0,00239236111111111000</text:p>
          </table:table-cell>
          <table:table-cell table:formula="of:=[.D797]-[.D79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6" office:value-type="float" office:value="20696" calcext:value-type="float">
            <text:p>20696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39537037037037" calcext:value-type="float">
            <text:p>0,00239537037037037000</text:p>
          </table:table-cell>
          <table:table-cell table:formula="of:=[.D798]-[.D79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6" office:value-type="float" office:value="20722" calcext:value-type="float">
            <text:p>20722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39837962962963" calcext:value-type="float">
            <text:p>0,00239837962962963000</text:p>
          </table:table-cell>
          <table:table-cell table:formula="of:=[.D799]-[.D79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6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40138888888889" calcext:value-type="float">
            <text:p>0,00240138888888889000</text:p>
          </table:table-cell>
          <table:table-cell table:formula="of:=[.D800]-[.D79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6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40439814814815" calcext:value-type="float">
            <text:p>0,00240439814814815000</text:p>
          </table:table-cell>
          <table:table-cell table:formula="of:=[.D801]-[.D80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6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40740740740741" calcext:value-type="float">
            <text:p>0,00240740740740741000</text:p>
          </table:table-cell>
          <table:table-cell table:formula="of:=[.D802]-[.D80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6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41041666666667" calcext:value-type="float">
            <text:p>0,00241041666666667000</text:p>
          </table:table-cell>
          <table:table-cell table:formula="of:=[.D803]-[.D80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6" office:value-type="float" office:value="20852" calcext:value-type="float">
            <text:p>20852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41342592592593" calcext:value-type="float">
            <text:p>0,00241342592592593000</text:p>
          </table:table-cell>
          <table:table-cell table:formula="of:=[.D804]-[.D80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6" office:value-type="float" office:value="20878" calcext:value-type="float">
            <text:p>20878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41643518518519" calcext:value-type="float">
            <text:p>0,00241643518518519000</text:p>
          </table:table-cell>
          <table:table-cell table:formula="of:=[.D805]-[.D80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6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41944444444444" calcext:value-type="float">
            <text:p>0,00241944444444444000</text:p>
          </table:table-cell>
          <table:table-cell table:formula="of:=[.D806]-[.D80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6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4224537037037" calcext:value-type="float">
            <text:p>0,00242245370370370000</text:p>
          </table:table-cell>
          <table:table-cell table:formula="of:=[.D807]-[.D80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6" office:value-type="float" office:value="20956" calcext:value-type="float">
            <text:p>20956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42546296296296" calcext:value-type="float">
            <text:p>0,00242546296296296000</text:p>
          </table:table-cell>
          <table:table-cell table:formula="of:=[.D808]-[.D80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6" office:value-type="float" office:value="20982" calcext:value-type="float">
            <text:p>20982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42847222222222" calcext:value-type="float">
            <text:p>0,00242847222222222000</text:p>
          </table:table-cell>
          <table:table-cell table:formula="of:=[.D809]-[.D80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6" office:value-type="float" office:value="21008" calcext:value-type="float">
            <text:p>21008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43148148148148" calcext:value-type="float">
            <text:p>0,00243148148148148000</text:p>
          </table:table-cell>
          <table:table-cell table:formula="of:=[.D810]-[.D80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6" office:value-type="float" office:value="21034" calcext:value-type="float">
            <text:p>21034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43449074074074" calcext:value-type="float">
            <text:p>0,00243449074074074000</text:p>
          </table:table-cell>
          <table:table-cell table:formula="of:=[.D811]-[.D81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6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4375" calcext:value-type="float">
            <text:p>0,00243750000000000000</text:p>
          </table:table-cell>
          <table:table-cell table:formula="of:=[.D812]-[.D81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6" office:value-type="float" office:value="21086" calcext:value-type="float">
            <text:p>21086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44050925925926" calcext:value-type="float">
            <text:p>0,00244050925925926000</text:p>
          </table:table-cell>
          <table:table-cell table:formula="of:=[.D813]-[.D81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6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44351851851852" calcext:value-type="float">
            <text:p>0,00244351851851852000</text:p>
          </table:table-cell>
          <table:table-cell table:formula="of:=[.D814]-[.D81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6" office:value-type="float" office:value="21138" calcext:value-type="float">
            <text:p>21138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44652777777778" calcext:value-type="float">
            <text:p>0,00244652777777778000</text:p>
          </table:table-cell>
          <table:table-cell table:formula="of:=[.D815]-[.D81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6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44953703703704" calcext:value-type="float">
            <text:p>0,00244953703703704000</text:p>
          </table:table-cell>
          <table:table-cell table:formula="of:=[.D816]-[.D81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6" office:value-type="float" office:value="21190" calcext:value-type="float">
            <text:p>2119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4525462962963" calcext:value-type="float">
            <text:p>0,00245254629629630000</text:p>
          </table:table-cell>
          <table:table-cell table:formula="of:=[.D817]-[.D81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6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45555555555556" calcext:value-type="float">
            <text:p>0,00245555555555556000</text:p>
          </table:table-cell>
          <table:table-cell table:formula="of:=[.D818]-[.D81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6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45856481481482" calcext:value-type="float">
            <text:p>0,00245856481481482000</text:p>
          </table:table-cell>
          <table:table-cell table:formula="of:=[.D819]-[.D81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6" office:value-type="float" office:value="21268" calcext:value-type="float">
            <text:p>21268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46157407407407" calcext:value-type="float">
            <text:p>0,00246157407407407000</text:p>
          </table:table-cell>
          <table:table-cell table:formula="of:=[.D820]-[.D81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6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46458333333333" calcext:value-type="float">
            <text:p>0,00246458333333333000</text:p>
          </table:table-cell>
          <table:table-cell table:formula="of:=[.D821]-[.D82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6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46759259259259" calcext:value-type="float">
            <text:p>0,00246759259259259000</text:p>
          </table:table-cell>
          <table:table-cell table:formula="of:=[.D822]-[.D82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6" office:value-type="float" office:value="21346" calcext:value-type="float">
            <text:p>21346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47060185185185" calcext:value-type="float">
            <text:p>0,00247060185185185000</text:p>
          </table:table-cell>
          <table:table-cell table:formula="of:=[.D823]-[.D82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6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47361111111111" calcext:value-type="float">
            <text:p>0,00247361111111111000</text:p>
          </table:table-cell>
          <table:table-cell table:formula="of:=[.D824]-[.D82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6" office:value-type="float" office:value="21398" calcext:value-type="float">
            <text:p>21398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47662037037037" calcext:value-type="float">
            <text:p>0,00247662037037037000</text:p>
          </table:table-cell>
          <table:table-cell table:formula="of:=[.D825]-[.D82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6" office:value-type="float" office:value="21424" calcext:value-type="float">
            <text:p>21424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47962962962963" calcext:value-type="float">
            <text:p>0,00247962962962963000</text:p>
          </table:table-cell>
          <table:table-cell table:formula="of:=[.D826]-[.D82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6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48263888888889" calcext:value-type="float">
            <text:p>0,00248263888888889000</text:p>
          </table:table-cell>
          <table:table-cell table:formula="of:=[.D827]-[.D82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6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48564814814815" calcext:value-type="float">
            <text:p>0,00248564814814815000</text:p>
          </table:table-cell>
          <table:table-cell table:formula="of:=[.D828]-[.D82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6" office:value-type="float" office:value="21502" calcext:value-type="float">
            <text:p>21502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48865740740741" calcext:value-type="float">
            <text:p>0,00248865740740741000</text:p>
          </table:table-cell>
          <table:table-cell table:formula="of:=[.D829]-[.D82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6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49166666666667" calcext:value-type="float">
            <text:p>0,00249166666666667000</text:p>
          </table:table-cell>
          <table:table-cell table:formula="of:=[.D830]-[.D82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6" office:value-type="float" office:value="21554" calcext:value-type="float">
            <text:p>21554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49467592592593" calcext:value-type="float">
            <text:p>0,00249467592592593000</text:p>
          </table:table-cell>
          <table:table-cell table:formula="of:=[.D831]-[.D83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6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49768518518519" calcext:value-type="float">
            <text:p>0,00249768518518519000</text:p>
          </table:table-cell>
          <table:table-cell table:formula="of:=[.D832]-[.D83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6" office:value-type="float" office:value="21606" calcext:value-type="float">
            <text:p>21606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50069444444444" calcext:value-type="float">
            <text:p>0,00250069444444444000</text:p>
          </table:table-cell>
          <table:table-cell table:formula="of:=[.D833]-[.D83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6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5037037037037" calcext:value-type="float">
            <text:p>0,00250370370370370000</text:p>
          </table:table-cell>
          <table:table-cell table:formula="of:=[.D834]-[.D83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6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50671296296296" calcext:value-type="float">
            <text:p>0,00250671296296296000</text:p>
          </table:table-cell>
          <table:table-cell table:formula="of:=[.D835]-[.D83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6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50972222222222" calcext:value-type="float">
            <text:p>0,00250972222222222000</text:p>
          </table:table-cell>
          <table:table-cell table:formula="of:=[.D836]-[.D83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6" office:value-type="float" office:value="21710" calcext:value-type="float">
            <text:p>2171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51273148148148" calcext:value-type="float">
            <text:p>0,00251273148148148000</text:p>
          </table:table-cell>
          <table:table-cell table:formula="of:=[.D837]-[.D83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6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51574074074074" calcext:value-type="float">
            <text:p>0,00251574074074074000</text:p>
          </table:table-cell>
          <table:table-cell table:formula="of:=[.D838]-[.D83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6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51875" calcext:value-type="float">
            <text:p>0,00251875000000000000</text:p>
          </table:table-cell>
          <table:table-cell table:formula="of:=[.D839]-[.D83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6" office:value-type="float" office:value="21788" calcext:value-type="float">
            <text:p>21788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52175925925926" calcext:value-type="float">
            <text:p>0,00252175925925926000</text:p>
          </table:table-cell>
          <table:table-cell table:formula="of:=[.D840]-[.D83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6" office:value-type="float" office:value="21814" calcext:value-type="float">
            <text:p>21814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52476851851852" calcext:value-type="float">
            <text:p>0,00252476851851852000</text:p>
          </table:table-cell>
          <table:table-cell table:formula="of:=[.D841]-[.D84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6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52777777777778" calcext:value-type="float">
            <text:p>0,00252777777777778000</text:p>
          </table:table-cell>
          <table:table-cell table:formula="of:=[.D842]-[.D84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6" office:value-type="float" office:value="21866" calcext:value-type="float">
            <text:p>21866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53078703703704" calcext:value-type="float">
            <text:p>0,00253078703703704000</text:p>
          </table:table-cell>
          <table:table-cell table:formula="of:=[.D843]-[.D84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6" office:value-type="float" office:value="21892" calcext:value-type="float">
            <text:p>21892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5337962962963" calcext:value-type="float">
            <text:p>0,00253379629629630000</text:p>
          </table:table-cell>
          <table:table-cell table:formula="of:=[.D844]-[.D84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6" office:value-type="float" office:value="21918" calcext:value-type="float">
            <text:p>21918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53680555555556" calcext:value-type="float">
            <text:p>0,00253680555555556000</text:p>
          </table:table-cell>
          <table:table-cell table:formula="of:=[.D845]-[.D84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6" office:value-type="float" office:value="21944" calcext:value-type="float">
            <text:p>21944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53981481481481" calcext:value-type="float">
            <text:p>0,00253981481481481000</text:p>
          </table:table-cell>
          <table:table-cell table:formula="of:=[.D846]-[.D84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6" office:value-type="float" office:value="21970" calcext:value-type="float">
            <text:p>2197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54282407407407" calcext:value-type="float">
            <text:p>0,00254282407407407000</text:p>
          </table:table-cell>
          <table:table-cell table:formula="of:=[.D847]-[.D84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6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54583333333333" calcext:value-type="float">
            <text:p>0,00254583333333333000</text:p>
          </table:table-cell>
          <table:table-cell table:formula="of:=[.D848]-[.D84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6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54884259259259" calcext:value-type="float">
            <text:p>0,00254884259259259000</text:p>
          </table:table-cell>
          <table:table-cell table:formula="of:=[.D849]-[.D84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6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55185185185185" calcext:value-type="float">
            <text:p>0,00255185185185185000</text:p>
          </table:table-cell>
          <table:table-cell table:formula="of:=[.D850]-[.D84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6" office:value-type="float" office:value="22074" calcext:value-type="float">
            <text:p>22074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55486111111111" calcext:value-type="float">
            <text:p>0,00255486111111111000</text:p>
          </table:table-cell>
          <table:table-cell table:formula="of:=[.D851]-[.D85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6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55787037037037" calcext:value-type="float">
            <text:p>0,00255787037037037000</text:p>
          </table:table-cell>
          <table:table-cell table:formula="of:=[.D852]-[.D85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6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56087962962963" calcext:value-type="float">
            <text:p>0,00256087962962963000</text:p>
          </table:table-cell>
          <table:table-cell table:formula="of:=[.D853]-[.D85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6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56388888888889" calcext:value-type="float">
            <text:p>0,00256388888888889000</text:p>
          </table:table-cell>
          <table:table-cell table:formula="of:=[.D854]-[.D85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6" office:value-type="float" office:value="22178" calcext:value-type="float">
            <text:p>22178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56689814814815" calcext:value-type="float">
            <text:p>0,00256689814814815000</text:p>
          </table:table-cell>
          <table:table-cell table:formula="of:=[.D855]-[.D85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6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56990740740741" calcext:value-type="float">
            <text:p>0,00256990740740741000</text:p>
          </table:table-cell>
          <table:table-cell table:formula="of:=[.D856]-[.D85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6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57291666666667" calcext:value-type="float">
            <text:p>0,00257291666666667000</text:p>
          </table:table-cell>
          <table:table-cell table:formula="of:=[.D857]-[.D85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6" office:value-type="float" office:value="22256" calcext:value-type="float">
            <text:p>22256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57592592592593" calcext:value-type="float">
            <text:p>0,00257592592592593000</text:p>
          </table:table-cell>
          <table:table-cell table:formula="of:=[.D858]-[.D85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6" office:value-type="float" office:value="22282" calcext:value-type="float">
            <text:p>22282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57893518518519" calcext:value-type="float">
            <text:p>0,00257893518518519000</text:p>
          </table:table-cell>
          <table:table-cell table:formula="of:=[.D859]-[.D85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6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58194444444444" calcext:value-type="float">
            <text:p>0,00258194444444444000</text:p>
          </table:table-cell>
          <table:table-cell table:formula="of:=[.D860]-[.D85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6" office:value-type="float" office:value="22334" calcext:value-type="float">
            <text:p>22334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5849537037037" calcext:value-type="float">
            <text:p>0,00258495370370370000</text:p>
          </table:table-cell>
          <table:table-cell table:formula="of:=[.D861]-[.D86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6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58796296296296" calcext:value-type="float">
            <text:p>0,00258796296296296000</text:p>
          </table:table-cell>
          <table:table-cell table:formula="of:=[.D862]-[.D86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6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59097222222222" calcext:value-type="float">
            <text:p>0,00259097222222222000</text:p>
          </table:table-cell>
          <table:table-cell table:formula="of:=[.D863]-[.D86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6" office:value-type="float" office:value="22412" calcext:value-type="float">
            <text:p>22412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59398148148148" calcext:value-type="float">
            <text:p>0,00259398148148148000</text:p>
          </table:table-cell>
          <table:table-cell table:formula="of:=[.D864]-[.D86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6" office:value-type="float" office:value="22438" calcext:value-type="float">
            <text:p>22438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59699074074074" calcext:value-type="float">
            <text:p>0,00259699074074074000</text:p>
          </table:table-cell>
          <table:table-cell table:formula="of:=[.D865]-[.D86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6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6" calcext:value-type="float">
            <text:p>0,00260000000000000000</text:p>
          </table:table-cell>
          <table:table-cell table:formula="of:=[.D866]-[.D86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6" office:value-type="float" office:value="22490" calcext:value-type="float">
            <text:p>2249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60300925925926" calcext:value-type="float">
            <text:p>0,00260300925925926000</text:p>
          </table:table-cell>
          <table:table-cell table:formula="of:=[.D867]-[.D86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6" office:value-type="float" office:value="22516" calcext:value-type="float">
            <text:p>22516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60601851851852" calcext:value-type="float">
            <text:p>0,00260601851851852000</text:p>
          </table:table-cell>
          <table:table-cell table:formula="of:=[.D868]-[.D86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6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60902777777778" calcext:value-type="float">
            <text:p>0,00260902777777778000</text:p>
          </table:table-cell>
          <table:table-cell table:formula="of:=[.D869]-[.D86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6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61203703703704" calcext:value-type="float">
            <text:p>0,00261203703703704000</text:p>
          </table:table-cell>
          <table:table-cell table:formula="of:=[.D870]-[.D86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6" office:value-type="float" office:value="22594" calcext:value-type="float">
            <text:p>22594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6150462962963" calcext:value-type="float">
            <text:p>0,00261504629629630000</text:p>
          </table:table-cell>
          <table:table-cell table:formula="of:=[.D871]-[.D87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6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61805555555556" calcext:value-type="float">
            <text:p>0,00261805555555556000</text:p>
          </table:table-cell>
          <table:table-cell table:formula="of:=[.D872]-[.D87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6" office:value-type="float" office:value="22646" calcext:value-type="float">
            <text:p>22646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62106481481482" calcext:value-type="float">
            <text:p>0,00262106481481482000</text:p>
          </table:table-cell>
          <table:table-cell table:formula="of:=[.D873]-[.D87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6" office:value-type="float" office:value="22672" calcext:value-type="float">
            <text:p>22672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62407407407407" calcext:value-type="float">
            <text:p>0,00262407407407407000</text:p>
          </table:table-cell>
          <table:table-cell table:formula="of:=[.D874]-[.D87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6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62708333333333" calcext:value-type="float">
            <text:p>0,00262708333333333000</text:p>
          </table:table-cell>
          <table:table-cell table:formula="of:=[.D875]-[.D87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6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63009259259259" calcext:value-type="float">
            <text:p>0,00263009259259259000</text:p>
          </table:table-cell>
          <table:table-cell table:formula="of:=[.D876]-[.D87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6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63310185185185" calcext:value-type="float">
            <text:p>0,00263310185185185000</text:p>
          </table:table-cell>
          <table:table-cell table:formula="of:=[.D877]-[.D87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6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63611111111111" calcext:value-type="float">
            <text:p>0,00263611111111111000</text:p>
          </table:table-cell>
          <table:table-cell table:formula="of:=[.D878]-[.D87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6" office:value-type="float" office:value="22802" calcext:value-type="float">
            <text:p>22802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63912037037037" calcext:value-type="float">
            <text:p>0,00263912037037037000</text:p>
          </table:table-cell>
          <table:table-cell table:formula="of:=[.D879]-[.D87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6" office:value-type="float" office:value="22828" calcext:value-type="float">
            <text:p>22828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64212962962963" calcext:value-type="float">
            <text:p>0,00264212962962963000</text:p>
          </table:table-cell>
          <table:table-cell table:formula="of:=[.D880]-[.D87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6" office:value-type="float" office:value="22854" calcext:value-type="float">
            <text:p>22854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64513888888889" calcext:value-type="float">
            <text:p>0,00264513888888889000</text:p>
          </table:table-cell>
          <table:table-cell table:formula="of:=[.D881]-[.D88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6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64814814814815" calcext:value-type="float">
            <text:p>0,00264814814814815000</text:p>
          </table:table-cell>
          <table:table-cell table:formula="of:=[.D882]-[.D88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6" office:value-type="float" office:value="22906" calcext:value-type="float">
            <text:p>22906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65115740740741" calcext:value-type="float">
            <text:p>0,00265115740740741000</text:p>
          </table:table-cell>
          <table:table-cell table:formula="of:=[.D883]-[.D88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6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65416666666667" calcext:value-type="float">
            <text:p>0,00265416666666667000</text:p>
          </table:table-cell>
          <table:table-cell table:formula="of:=[.D884]-[.D88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6" office:value-type="float" office:value="22958" calcext:value-type="float">
            <text:p>22958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65717592592593" calcext:value-type="float">
            <text:p>0,00265717592592593000</text:p>
          </table:table-cell>
          <table:table-cell table:formula="of:=[.D885]-[.D88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6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66018518518519" calcext:value-type="float">
            <text:p>0,00266018518518519000</text:p>
          </table:table-cell>
          <table:table-cell table:formula="of:=[.D886]-[.D88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6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66319444444444" calcext:value-type="float">
            <text:p>0,00266319444444444000</text:p>
          </table:table-cell>
          <table:table-cell table:formula="of:=[.D887]-[.D88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6" office:value-type="float" office:value="23036" calcext:value-type="float">
            <text:p>23036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6662037037037" calcext:value-type="float">
            <text:p>0,00266620370370370000</text:p>
          </table:table-cell>
          <table:table-cell table:formula="of:=[.D888]-[.D88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6" office:value-type="float" office:value="23062" calcext:value-type="float">
            <text:p>23062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66921296296296" calcext:value-type="float">
            <text:p>0,00266921296296296000</text:p>
          </table:table-cell>
          <table:table-cell table:formula="of:=[.D889]-[.D88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6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67222222222222" calcext:value-type="float">
            <text:p>0,00267222222222222000</text:p>
          </table:table-cell>
          <table:table-cell table:formula="of:=[.D890]-[.D88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6" office:value-type="float" office:value="23114" calcext:value-type="float">
            <text:p>23114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67523148148148" calcext:value-type="float">
            <text:p>0,00267523148148148000</text:p>
          </table:table-cell>
          <table:table-cell table:formula="of:=[.D891]-[.D89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6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67824074074074" calcext:value-type="float">
            <text:p>0,00267824074074074000</text:p>
          </table:table-cell>
          <table:table-cell table:formula="of:=[.D892]-[.D89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6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68125" calcext:value-type="float">
            <text:p>0,00268125000000000000</text:p>
          </table:table-cell>
          <table:table-cell table:formula="of:=[.D893]-[.D89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6" office:value-type="float" office:value="23192" calcext:value-type="float">
            <text:p>23192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68425925925926" calcext:value-type="float">
            <text:p>0,00268425925925926000</text:p>
          </table:table-cell>
          <table:table-cell table:formula="of:=[.D894]-[.D89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6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68726851851852" calcext:value-type="float">
            <text:p>0,00268726851851852000</text:p>
          </table:table-cell>
          <table:table-cell table:formula="of:=[.D895]-[.D89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6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69027777777778" calcext:value-type="float">
            <text:p>0,00269027777777778000</text:p>
          </table:table-cell>
          <table:table-cell table:formula="of:=[.D896]-[.D89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6" office:value-type="float" office:value="23270" calcext:value-type="float">
            <text:p>2327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69328703703704" calcext:value-type="float">
            <text:p>0,00269328703703704000</text:p>
          </table:table-cell>
          <table:table-cell table:formula="of:=[.D897]-[.D89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6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6962962962963" calcext:value-type="float">
            <text:p>0,00269629629629630000</text:p>
          </table:table-cell>
          <table:table-cell table:formula="of:=[.D898]-[.D897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6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69930555555556" calcext:value-type="float">
            <text:p>0,00269930555555556000</text:p>
          </table:table-cell>
          <table:table-cell table:formula="of:=[.D899]-[.D89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6" office:value-type="float" office:value="23348" calcext:value-type="float">
            <text:p>23348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70231481481482" calcext:value-type="float">
            <text:p>0,00270231481481482000</text:p>
          </table:table-cell>
          <table:table-cell table:formula="of:=[.D900]-[.D89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6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70532407407407" calcext:value-type="float">
            <text:p>0,00270532407407407000</text:p>
          </table:table-cell>
          <table:table-cell table:formula="of:=[.D901]-[.D90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6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70833333333333" calcext:value-type="float">
            <text:p>0,00270833333333333000</text:p>
          </table:table-cell>
          <table:table-cell table:formula="of:=[.D902]-[.D90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6" office:value-type="float" office:value="23426" calcext:value-type="float">
            <text:p>23426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71134259259259" calcext:value-type="float">
            <text:p>0,00271134259259259000</text:p>
          </table:table-cell>
          <table:table-cell table:formula="of:=[.D903]-[.D90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6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71435185185185" calcext:value-type="float">
            <text:p>0,00271435185185185000</text:p>
          </table:table-cell>
          <table:table-cell table:formula="of:=[.D904]-[.D90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6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71736111111111" calcext:value-type="float">
            <text:p>0,00271736111111111000</text:p>
          </table:table-cell>
          <table:table-cell table:formula="of:=[.D905]-[.D904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6" office:value-type="float" office:value="23504" calcext:value-type="float">
            <text:p>23504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72037037037037" calcext:value-type="float">
            <text:p>0,00272037037037037000</text:p>
          </table:table-cell>
          <table:table-cell table:formula="of:=[.D906]-[.D905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6" office:value-type="float" office:value="23530" calcext:value-type="float">
            <text:p>2353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72337962962963" calcext:value-type="float">
            <text:p>0,00272337962962963000</text:p>
          </table:table-cell>
          <table:table-cell table:formula="of:=[.D907]-[.D906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6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72638888888889" calcext:value-type="float">
            <text:p>0,00272638888888889000</text:p>
          </table:table-cell>
          <table:table-cell table:formula="of:=[.D908]-[.D90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6" office:value-type="float" office:value="23582" calcext:value-type="float">
            <text:p>23582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72939814814815" calcext:value-type="float">
            <text:p>0,00272939814814815000</text:p>
          </table:table-cell>
          <table:table-cell table:formula="of:=[.D909]-[.D908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6" office:value-type="float" office:value="23608" calcext:value-type="float">
            <text:p>23608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73240740740741" calcext:value-type="float">
            <text:p>0,00273240740740741000</text:p>
          </table:table-cell>
          <table:table-cell table:formula="of:=[.D910]-[.D909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6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73541666666667" calcext:value-type="float">
            <text:p>0,00273541666666667000</text:p>
          </table:table-cell>
          <table:table-cell table:formula="of:=[.D911]-[.D910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6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73842592592593" calcext:value-type="float">
            <text:p>0,00273842592592593000</text:p>
          </table:table-cell>
          <table:table-cell table:formula="of:=[.D912]-[.D911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6" office:value-type="float" office:value="23686" calcext:value-type="float">
            <text:p>23686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74143518518519" calcext:value-type="float">
            <text:p>0,00274143518518519000</text:p>
          </table:table-cell>
          <table:table-cell table:formula="of:=[.D913]-[.D912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6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74444444444444" calcext:value-type="float">
            <text:p>0,00274444444444444000</text:p>
          </table:table-cell>
          <table:table-cell table:formula="of:=[.D914]-[.D913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6" office:value-type="float" office:value="23738" calcext:value-type="float">
            <text:p>23738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7474537037037" calcext:value-type="float">
            <text:p>0,00274745370370370000</text:p>
          </table:table-cell>
          <table:table-cell table:formula="of:=[.D915]-[.D914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6" office:value-type="float" office:value="23764" calcext:value-type="float">
            <text:p>23764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75046296296296" calcext:value-type="float">
            <text:p>0,00275046296296296000</text:p>
          </table:table-cell>
          <table:table-cell table:formula="of:=[.D916]-[.D915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6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75347222222222" calcext:value-type="float">
            <text:p>0,00275347222222222000</text:p>
          </table:table-cell>
          <table:table-cell table:formula="of:=[.D917]-[.D916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6" office:value-type="float" office:value="23816" calcext:value-type="float">
            <text:p>23816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75648148148148" calcext:value-type="float">
            <text:p>0,00275648148148148000</text:p>
          </table:table-cell>
          <table:table-cell table:formula="of:=[.D918]-[.D917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6" office:value-type="float" office:value="23842" calcext:value-type="float">
            <text:p>23842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75949074074074" calcext:value-type="float">
            <text:p>0,00275949074074074000</text:p>
          </table:table-cell>
          <table:table-cell table:formula="of:=[.D919]-[.D918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6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7625" calcext:value-type="float">
            <text:p>0,00276250000000000000</text:p>
          </table:table-cell>
          <table:table-cell table:formula="of:=[.D920]-[.D919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6" office:value-type="float" office:value="23894" calcext:value-type="float">
            <text:p>23894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76550925925926" calcext:value-type="float">
            <text:p>0,00276550925925926000</text:p>
          </table:table-cell>
          <table:table-cell table:formula="of:=[.D921]-[.D920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6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76851851851852" calcext:value-type="float">
            <text:p>0,00276851851851852000</text:p>
          </table:table-cell>
          <table:table-cell table:formula="of:=[.D922]-[.D921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6" office:value-type="float" office:value="23946" calcext:value-type="float">
            <text:p>23946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77152777777778" calcext:value-type="float">
            <text:p>0,00277152777777778000</text:p>
          </table:table-cell>
          <table:table-cell table:formula="of:=[.D923]-[.D922]" office:value-type="float" office:value="0.00000300925925925946" calcext:value-type="float">
            <text:p>0,0000030092592592594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6" office:value-type="float" office:value="23972" calcext:value-type="float">
            <text:p>23972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77453703703704" calcext:value-type="float">
            <text:p>0,00277453703703704000</text:p>
          </table:table-cell>
          <table:table-cell table:formula="of:=[.D924]-[.D923]" office:value-type="float" office:value="0.00000300925925925902" calcext:value-type="float">
            <text:p>0,000003009259259259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6" office:value-type="float" office:value="23998" calcext:value-type="float">
            <text:p>23998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7775462962963" calcext:value-type="float">
            <text:p>0,00277754629629630000</text:p>
          </table:table-cell>
          <table:table-cell table:formula="of:=#REF!-[.D924]" office:value-type="string" office:string-value="" calcext:value-type="error">
            <text:p>#REF!</text:p>
          </table:table-cell>
        </table:table-row>
        <table:table-row table:style-name="ro1" table:number-rows-repeated="10476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3:49.934853983</meta:creation-date>
    <dc:date>2026-05-17T15:53:56.172591352</dc:date>
    <meta:editing-duration>PT7S</meta:editing-duration>
    <meta:editing-cycles>1</meta:editing-cycles>
    <meta:document-statistic meta:table-count="1" meta:cell-count="4620" meta:object-count="0"/>
    <meta:generator>LibreOffice/24.2.7.2$Linux_X86_64 LibreOffice_project/420$Build-2</meta:generator>
  </office:meta>
</office:document-meta>
</file>