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83796296296296" calcext:value-type="float">
            <text:p>0,00000983796296296296</text:p>
          </table:table-cell>
          <table:table-cell table:formula="of:=[.D3]-[.D2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5" office:value-type="float" office:value="170" calcext:value-type="float">
            <text:p>17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96759259259259" calcext:value-type="float">
            <text:p>0,00001967592592592590</text:p>
          </table:table-cell>
          <table:table-cell table:formula="of:=[.D4]-[.D3]" office:value-type="float" office:value="0.00000983796296296296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5" office:value-type="float" office:value="255" calcext:value-type="float">
            <text:p>25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95138888888889" calcext:value-type="float">
            <text:p>0,00002951388888888890</text:p>
          </table:table-cell>
          <table:table-cell table:formula="of:=[.D5]-[.D4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5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93518518518519" calcext:value-type="float">
            <text:p>0,00003935185185185190</text:p>
          </table:table-cell>
          <table:table-cell table:formula="of:=[.D6]-[.D5]" office:value-type="float" office:value="0.00000983796296296296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5" office:value-type="float" office:value="425" calcext:value-type="float">
            <text:p>42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91898148148148" calcext:value-type="float">
            <text:p>0,00004918981481481480</text:p>
          </table:table-cell>
          <table:table-cell table:formula="of:=[.D7]-[.D6]" office:value-type="float" office:value="0.00000983796296296296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5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90277777777778" calcext:value-type="float">
            <text:p>0,00005902777777777780</text:p>
          </table:table-cell>
          <table:table-cell table:formula="of:=[.D8]-[.D7]" office:value-type="float" office:value="0.00000983796296296296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5" office:value-type="float" office:value="595" calcext:value-type="float">
            <text:p>59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88657407407407" calcext:value-type="float">
            <text:p>0,00006886574074074070</text:p>
          </table:table-cell>
          <table:table-cell table:formula="of:=[.D9]-[.D8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5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87037037037037" calcext:value-type="float">
            <text:p>0,00007870370370370370</text:p>
          </table:table-cell>
          <table:table-cell table:formula="of:=[.D10]-[.D9]" office:value-type="float" office:value="0.00000983796296296297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5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85416666666667" calcext:value-type="float">
            <text:p>0,00008854166666666670</text:p>
          </table:table-cell>
          <table:table-cell table:formula="of:=[.D11]-[.D10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5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83796296296296" calcext:value-type="float">
            <text:p>0,00009837962962962960</text:p>
          </table:table-cell>
          <table:table-cell table:formula="of:=[.D12]-[.D11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5" office:value-type="float" office:value="935" calcext:value-type="float">
            <text:p>93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8217592592593" calcext:value-type="float">
            <text:p>0,00010821759259259300</text:p>
          </table:table-cell>
          <table:table-cell table:formula="of:=[.D13]-[.D12]" office:value-type="float" office:value="0.00000983796296296297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5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8055555555556" calcext:value-type="float">
            <text:p>0,00011805555555555600</text:p>
          </table:table-cell>
          <table:table-cell table:formula="of:=[.D14]-[.D13]" office:value-type="float" office:value="0.00000983796296296297" calcext:value-type="float">
            <text:p>0,0000098379629629629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5" office:value-type="float" office:value="1105" calcext:value-type="float">
            <text:p>110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7893518518519" calcext:value-type="float">
            <text:p>0,00012789351851851900</text:p>
          </table:table-cell>
          <table:table-cell table:formula="of:=[.D15]-[.D14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5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7731481481482" calcext:value-type="float">
            <text:p>0,00013773148148148200</text:p>
          </table:table-cell>
          <table:table-cell table:formula="of:=[.D16]-[.D15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5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7569444444444" calcext:value-type="float">
            <text:p>0,00014756944444444400</text:p>
          </table:table-cell>
          <table:table-cell table:formula="of:=[.D17]-[.D16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5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7407407407407" calcext:value-type="float">
            <text:p>0,00015740740740740700</text:p>
          </table:table-cell>
          <table:table-cell table:formula="of:=[.D18]-[.D17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5" office:value-type="float" office:value="1445" calcext:value-type="float">
            <text:p>144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6724537037037" calcext:value-type="float">
            <text:p>0,00016724537037037000</text:p>
          </table:table-cell>
          <table:table-cell table:formula="of:=[.D19]-[.D18]" office:value-type="float" office:value="0.00000983796296296299" calcext:value-type="float">
            <text:p>0,0000098379629629629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5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77083333333333" calcext:value-type="float">
            <text:p>0,00017708333333333300</text:p>
          </table:table-cell>
          <table:table-cell table:formula="of:=[.D20]-[.D19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5" office:value-type="float" office:value="1615" calcext:value-type="float">
            <text:p>161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86921296296296" calcext:value-type="float">
            <text:p>0,00018692129629629600</text:p>
          </table:table-cell>
          <table:table-cell table:formula="of:=[.D21]-[.D20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5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96759259259259" calcext:value-type="float">
            <text:p>0,00019675925925925900</text:p>
          </table:table-cell>
          <table:table-cell table:formula="of:=[.D22]-[.D21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5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06597222222222" calcext:value-type="float">
            <text:p>0,00020659722222222200</text:p>
          </table:table-cell>
          <table:table-cell table:formula="of:=[.D23]-[.D22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5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16435185185185" calcext:value-type="float">
            <text:p>0,00021643518518518500</text:p>
          </table:table-cell>
          <table:table-cell table:formula="of:=[.D24]-[.D23]" office:value-type="float" office:value="0.00000983796296296299" calcext:value-type="float">
            <text:p>0,0000098379629629629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5" office:value-type="float" office:value="1955" calcext:value-type="float">
            <text:p>195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26273148148148" calcext:value-type="float">
            <text:p>0,00022627314814814800</text:p>
          </table:table-cell>
          <table:table-cell table:formula="of:=[.D25]-[.D24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5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36111111111111" calcext:value-type="float">
            <text:p>0,00023611111111111100</text:p>
          </table:table-cell>
          <table:table-cell table:formula="of:=[.D26]-[.D25]" office:value-type="float" office:value="0.00000983796296296293" calcext:value-type="float">
            <text:p>0,000009837962962962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5" office:value-type="float" office:value="2125" calcext:value-type="float">
            <text:p>21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45949074074074" calcext:value-type="float">
            <text:p>0,00024594907407407400</text:p>
          </table:table-cell>
          <table:table-cell table:formula="of:=[.D27]-[.D2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5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55787037037037" calcext:value-type="float">
            <text:p>0,00025578703703703700</text:p>
          </table:table-cell>
          <table:table-cell table:formula="of:=[.D28]-[.D27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5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65625" calcext:value-type="float">
            <text:p>0,00026562500000000000</text:p>
          </table:table-cell>
          <table:table-cell table:formula="of:=[.D29]-[.D28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5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75462962962963" calcext:value-type="float">
            <text:p>0,00027546296296296300</text:p>
          </table:table-cell>
          <table:table-cell table:formula="of:=[.D30]-[.D29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5" office:value-type="float" office:value="2465" calcext:value-type="float">
            <text:p>246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85300925925926" calcext:value-type="float">
            <text:p>0,00028530092592592600</text:p>
          </table:table-cell>
          <table:table-cell table:formula="of:=[.D31]-[.D30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5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95138888888889" calcext:value-type="float">
            <text:p>0,00029513888888888900</text:p>
          </table:table-cell>
          <table:table-cell table:formula="of:=[.D32]-[.D31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5" office:value-type="float" office:value="2635" calcext:value-type="float">
            <text:p>263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04976851851852" calcext:value-type="float">
            <text:p>0,00030497685185185200</text:p>
          </table:table-cell>
          <table:table-cell table:formula="of:=[.D33]-[.D32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5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14814814814815" calcext:value-type="float">
            <text:p>0,00031481481481481500</text:p>
          </table:table-cell>
          <table:table-cell table:formula="of:=[.D34]-[.D33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5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24652777777778" calcext:value-type="float">
            <text:p>0,00032465277777777800</text:p>
          </table:table-cell>
          <table:table-cell table:formula="of:=[.D35]-[.D34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5" office:value-type="float" office:value="2890" calcext:value-type="float">
            <text:p>289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34490740740741" calcext:value-type="float">
            <text:p>0,00033449074074074100</text:p>
          </table:table-cell>
          <table:table-cell table:formula="of:=[.D36]-[.D35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5" office:value-type="float" office:value="2975" calcext:value-type="float">
            <text:p>297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44328703703704" calcext:value-type="float">
            <text:p>0,00034432870370370400</text:p>
          </table:table-cell>
          <table:table-cell table:formula="of:=[.D37]-[.D3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5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54166666666667" calcext:value-type="float">
            <text:p>0,00035416666666666700</text:p>
          </table:table-cell>
          <table:table-cell table:formula="of:=[.D38]-[.D37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5" office:value-type="float" office:value="3145" calcext:value-type="float">
            <text:p>314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6400462962963" calcext:value-type="float">
            <text:p>0,00036400462962963000</text:p>
          </table:table-cell>
          <table:table-cell table:formula="of:=[.D39]-[.D38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5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73842592592593" calcext:value-type="float">
            <text:p>0,00037384259259259300</text:p>
          </table:table-cell>
          <table:table-cell table:formula="of:=[.D40]-[.D39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5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83680555555556" calcext:value-type="float">
            <text:p>0,00038368055555555600</text:p>
          </table:table-cell>
          <table:table-cell table:formula="of:=[.D41]-[.D40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5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93518518518519" calcext:value-type="float">
            <text:p>0,00039351851851851900</text:p>
          </table:table-cell>
          <table:table-cell table:formula="of:=[.D42]-[.D41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5" office:value-type="float" office:value="3485" calcext:value-type="float">
            <text:p>348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03356481481482" calcext:value-type="float">
            <text:p>0,00040335648148148200</text:p>
          </table:table-cell>
          <table:table-cell table:formula="of:=[.D43]-[.D42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5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13194444444444" calcext:value-type="float">
            <text:p>0,00041319444444444400</text:p>
          </table:table-cell>
          <table:table-cell table:formula="of:=[.D44]-[.D43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5" office:value-type="float" office:value="3655" calcext:value-type="float">
            <text:p>365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23032407407407" calcext:value-type="float">
            <text:p>0,00042303240740740700</text:p>
          </table:table-cell>
          <table:table-cell table:formula="of:=[.D45]-[.D44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5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3287037037037" calcext:value-type="float">
            <text:p>0,00043287037037037000</text:p>
          </table:table-cell>
          <table:table-cell table:formula="of:=[.D46]-[.D45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5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42708333333333" calcext:value-type="float">
            <text:p>0,00044270833333333300</text:p>
          </table:table-cell>
          <table:table-cell table:formula="of:=[.D47]-[.D4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5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52546296296296" calcext:value-type="float">
            <text:p>0,00045254629629629600</text:p>
          </table:table-cell>
          <table:table-cell table:formula="of:=[.D48]-[.D47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5" office:value-type="float" office:value="3995" calcext:value-type="float">
            <text:p>399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62384259259259" calcext:value-type="float">
            <text:p>0,00046238425925925900</text:p>
          </table:table-cell>
          <table:table-cell table:formula="of:=[.D49]-[.D48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5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72222222222222" calcext:value-type="float">
            <text:p>0,00047222222222222200</text:p>
          </table:table-cell>
          <table:table-cell table:formula="of:=[.D50]-[.D49]" office:value-type="float" office:value="0.00000983796296296296" calcext:value-type="float">
            <text:p>0,0000098379629629629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5" office:value-type="float" office:value="4165" calcext:value-type="float">
            <text:p>416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82060185185185" calcext:value-type="float">
            <text:p>0,00048206018518518500</text:p>
          </table:table-cell>
          <table:table-cell table:formula="of:=[.D51]-[.D50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5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91898148148148" calcext:value-type="float">
            <text:p>0,00049189814814814800</text:p>
          </table:table-cell>
          <table:table-cell table:formula="of:=[.D52]-[.D5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5" office:value-type="float" office:value="4335" calcext:value-type="float">
            <text:p>433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01736111111111" calcext:value-type="float">
            <text:p>0,00050173611111111100</text:p>
          </table:table-cell>
          <table:table-cell table:formula="of:=[.D53]-[.D5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5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11574074074074" calcext:value-type="float">
            <text:p>0,00051157407407407400</text:p>
          </table:table-cell>
          <table:table-cell table:formula="of:=[.D54]-[.D53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5" office:value-type="float" office:value="4505" calcext:value-type="float">
            <text:p>450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21412037037037" calcext:value-type="float">
            <text:p>0,00052141203703703700</text:p>
          </table:table-cell>
          <table:table-cell table:formula="of:=[.D55]-[.D5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5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3125" calcext:value-type="float">
            <text:p>0,00053125000000000000</text:p>
          </table:table-cell>
          <table:table-cell table:formula="of:=[.D56]-[.D55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5" office:value-type="float" office:value="4675" calcext:value-type="float">
            <text:p>467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41087962962963" calcext:value-type="float">
            <text:p>0,00054108796296296300</text:p>
          </table:table-cell>
          <table:table-cell table:formula="of:=[.D57]-[.D5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5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50925925925926" calcext:value-type="float">
            <text:p>0,00055092592592592600</text:p>
          </table:table-cell>
          <table:table-cell table:formula="of:=[.D58]-[.D57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5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60763888888889" calcext:value-type="float">
            <text:p>0,00056076388888888900</text:p>
          </table:table-cell>
          <table:table-cell table:formula="of:=[.D59]-[.D5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5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70601851851852" calcext:value-type="float">
            <text:p>0,00057060185185185200</text:p>
          </table:table-cell>
          <table:table-cell table:formula="of:=[.D60]-[.D59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5" office:value-type="float" office:value="5015" calcext:value-type="float">
            <text:p>501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80439814814815" calcext:value-type="float">
            <text:p>0,00058043981481481500</text:p>
          </table:table-cell>
          <table:table-cell table:formula="of:=[.D61]-[.D6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5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90277777777778" calcext:value-type="float">
            <text:p>0,00059027777777777800</text:p>
          </table:table-cell>
          <table:table-cell table:formula="of:=[.D62]-[.D61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5" office:value-type="float" office:value="5185" calcext:value-type="float">
            <text:p>518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00115740740741" calcext:value-type="float">
            <text:p>0,00060011574074074100</text:p>
          </table:table-cell>
          <table:table-cell table:formula="of:=[.D63]-[.D6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5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09953703703704" calcext:value-type="float">
            <text:p>0,00060995370370370400</text:p>
          </table:table-cell>
          <table:table-cell table:formula="of:=[.D64]-[.D6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5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19791666666667" calcext:value-type="float">
            <text:p>0,00061979166666666700</text:p>
          </table:table-cell>
          <table:table-cell table:formula="of:=[.D65]-[.D64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5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2962962962963" calcext:value-type="float">
            <text:p>0,00062962962962963000</text:p>
          </table:table-cell>
          <table:table-cell table:formula="of:=[.D66]-[.D6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5" office:value-type="float" office:value="5525" calcext:value-type="float">
            <text:p>552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39467592592593" calcext:value-type="float">
            <text:p>0,00063946759259259300</text:p>
          </table:table-cell>
          <table:table-cell table:formula="of:=[.D67]-[.D66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5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49305555555556" calcext:value-type="float">
            <text:p>0,00064930555555555600</text:p>
          </table:table-cell>
          <table:table-cell table:formula="of:=[.D68]-[.D6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5" office:value-type="float" office:value="5695" calcext:value-type="float">
            <text:p>569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59143518518519" calcext:value-type="float">
            <text:p>0,00065914351851851900</text:p>
          </table:table-cell>
          <table:table-cell table:formula="of:=[.D69]-[.D68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5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68981481481481" calcext:value-type="float">
            <text:p>0,00066898148148148100</text:p>
          </table:table-cell>
          <table:table-cell table:formula="of:=[.D70]-[.D6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5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78819444444445" calcext:value-type="float">
            <text:p>0,00067881944444444500</text:p>
          </table:table-cell>
          <table:table-cell table:formula="of:=[.D71]-[.D70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5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88657407407407" calcext:value-type="float">
            <text:p>0,00068865740740740700</text:p>
          </table:table-cell>
          <table:table-cell table:formula="of:=[.D72]-[.D7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5" office:value-type="float" office:value="6035" calcext:value-type="float">
            <text:p>603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9849537037037" calcext:value-type="float">
            <text:p>0,00069849537037037000</text:p>
          </table:table-cell>
          <table:table-cell table:formula="of:=[.D73]-[.D7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5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08333333333333" calcext:value-type="float">
            <text:p>0,00070833333333333300</text:p>
          </table:table-cell>
          <table:table-cell table:formula="of:=[.D74]-[.D73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5" office:value-type="float" office:value="6205" calcext:value-type="float">
            <text:p>620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18171296296296" calcext:value-type="float">
            <text:p>0,00071817129629629600</text:p>
          </table:table-cell>
          <table:table-cell table:formula="of:=[.D75]-[.D7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5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28009259259259" calcext:value-type="float">
            <text:p>0,00072800925925925900</text:p>
          </table:table-cell>
          <table:table-cell table:formula="of:=[.D76]-[.D75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5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37847222222222" calcext:value-type="float">
            <text:p>0,00073784722222222200</text:p>
          </table:table-cell>
          <table:table-cell table:formula="of:=[.D77]-[.D7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5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47685185185185" calcext:value-type="float">
            <text:p>0,00074768518518518500</text:p>
          </table:table-cell>
          <table:table-cell table:formula="of:=[.D78]-[.D77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5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57523148148148" calcext:value-type="float">
            <text:p>0,00075752314814814800</text:p>
          </table:table-cell>
          <table:table-cell table:formula="of:=[.D79]-[.D7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5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67361111111111" calcext:value-type="float">
            <text:p>0,00076736111111111100</text:p>
          </table:table-cell>
          <table:table-cell table:formula="of:=[.D80]-[.D79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5" office:value-type="float" office:value="6715" calcext:value-type="float">
            <text:p>671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77199074074074" calcext:value-type="float">
            <text:p>0,00077719907407407400</text:p>
          </table:table-cell>
          <table:table-cell table:formula="of:=[.D81]-[.D8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5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87037037037037" calcext:value-type="float">
            <text:p>0,00078703703703703700</text:p>
          </table:table-cell>
          <table:table-cell table:formula="of:=[.D82]-[.D81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5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96875" calcext:value-type="float">
            <text:p>0,00079687500000000000</text:p>
          </table:table-cell>
          <table:table-cell table:formula="of:=[.D83]-[.D8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5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06712962962963" calcext:value-type="float">
            <text:p>0,00080671296296296300</text:p>
          </table:table-cell>
          <table:table-cell table:formula="of:=[.D84]-[.D8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5" office:value-type="float" office:value="7055" calcext:value-type="float">
            <text:p>705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16550925925926" calcext:value-type="float">
            <text:p>0,00081655092592592600</text:p>
          </table:table-cell>
          <table:table-cell table:formula="of:=[.D85]-[.D84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5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26388888888889" calcext:value-type="float">
            <text:p>0,00082638888888888900</text:p>
          </table:table-cell>
          <table:table-cell table:formula="of:=[.D86]-[.D8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5" office:value-type="float" office:value="7225" calcext:value-type="float">
            <text:p>722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36226851851852" calcext:value-type="float">
            <text:p>0,00083622685185185200</text:p>
          </table:table-cell>
          <table:table-cell table:formula="of:=[.D87]-[.D86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5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46064814814815" calcext:value-type="float">
            <text:p>0,00084606481481481500</text:p>
          </table:table-cell>
          <table:table-cell table:formula="of:=[.D88]-[.D8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5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55902777777778" calcext:value-type="float">
            <text:p>0,00085590277777777800</text:p>
          </table:table-cell>
          <table:table-cell table:formula="of:=[.D89]-[.D88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5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65740740740741" calcext:value-type="float">
            <text:p>0,00086574074074074100</text:p>
          </table:table-cell>
          <table:table-cell table:formula="of:=[.D90]-[.D8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5" office:value-type="float" office:value="7565" calcext:value-type="float">
            <text:p>756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75578703703704" calcext:value-type="float">
            <text:p>0,00087557870370370400</text:p>
          </table:table-cell>
          <table:table-cell table:formula="of:=[.D91]-[.D90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5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85416666666667" calcext:value-type="float">
            <text:p>0,00088541666666666700</text:p>
          </table:table-cell>
          <table:table-cell table:formula="of:=[.D92]-[.D9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5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9525462962963" calcext:value-type="float">
            <text:p>0,00089525462962963000</text:p>
          </table:table-cell>
          <table:table-cell table:formula="of:=[.D93]-[.D9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5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05092592592593" calcext:value-type="float">
            <text:p>0,00090509259259259300</text:p>
          </table:table-cell>
          <table:table-cell table:formula="of:=[.D94]-[.D93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5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14930555555556" calcext:value-type="float">
            <text:p>0,00091493055555555600</text:p>
          </table:table-cell>
          <table:table-cell table:formula="of:=[.D95]-[.D9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5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24768518518519" calcext:value-type="float">
            <text:p>0,00092476851851851900</text:p>
          </table:table-cell>
          <table:table-cell table:formula="of:=[.D96]-[.D95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5" office:value-type="float" office:value="8075" calcext:value-type="float">
            <text:p>807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34606481481482" calcext:value-type="float">
            <text:p>0,00093460648148148200</text:p>
          </table:table-cell>
          <table:table-cell table:formula="of:=[.D97]-[.D9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5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44444444444445" calcext:value-type="float">
            <text:p>0,00094444444444444500</text:p>
          </table:table-cell>
          <table:table-cell table:formula="of:=[.D98]-[.D97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5" office:value-type="float" office:value="8245" calcext:value-type="float">
            <text:p>824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54282407407407" calcext:value-type="float">
            <text:p>0,00095428240740740700</text:p>
          </table:table-cell>
          <table:table-cell table:formula="of:=[.D99]-[.D9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5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6412037037037" calcext:value-type="float">
            <text:p>0,00096412037037037000</text:p>
          </table:table-cell>
          <table:table-cell table:formula="of:=[.D100]-[.D99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5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73958333333333" calcext:value-type="float">
            <text:p>0,00097395833333333300</text:p>
          </table:table-cell>
          <table:table-cell table:formula="of:=[.D101]-[.D100]" office:value-type="float" office:value="0.0000098379629629629" calcext:value-type="float">
            <text:p>0,0000098379629629629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5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83796296296296" calcext:value-type="float">
            <text:p>0,00098379629629629600</text:p>
          </table:table-cell>
          <table:table-cell table:formula="of:=[.D102]-[.D10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5" office:value-type="float" office:value="8585" calcext:value-type="float">
            <text:p>858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93634259259259" calcext:value-type="float">
            <text:p>0,00099363425925925900</text:p>
          </table:table-cell>
          <table:table-cell table:formula="of:=[.D103]-[.D10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5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0347222222222" calcext:value-type="float">
            <text:p>0,00100347222222222000</text:p>
          </table:table-cell>
          <table:table-cell table:formula="of:=[.D104]-[.D10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5" office:value-type="float" office:value="8755" calcext:value-type="float">
            <text:p>875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1331018518519" calcext:value-type="float">
            <text:p>0,00101331018518519000</text:p>
          </table:table-cell>
          <table:table-cell table:formula="of:=[.D105]-[.D10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5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2314814814815" calcext:value-type="float">
            <text:p>0,00102314814814815000</text:p>
          </table:table-cell>
          <table:table-cell table:formula="of:=[.D106]-[.D10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5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3298611111111" calcext:value-type="float">
            <text:p>0,00103298611111111000</text:p>
          </table:table-cell>
          <table:table-cell table:formula="of:=[.D107]-[.D10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5" office:value-type="float" office:value="9010" calcext:value-type="float">
            <text:p>901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4282407407407" calcext:value-type="float">
            <text:p>0,00104282407407407000</text:p>
          </table:table-cell>
          <table:table-cell table:formula="of:=[.D108]-[.D10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5" office:value-type="float" office:value="9095" calcext:value-type="float">
            <text:p>909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5266203703704" calcext:value-type="float">
            <text:p>0,00105266203703704000</text:p>
          </table:table-cell>
          <table:table-cell table:formula="of:=[.D109]-[.D10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5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625" calcext:value-type="float">
            <text:p>0,00106250000000000000</text:p>
          </table:table-cell>
          <table:table-cell table:formula="of:=[.D110]-[.D10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5" office:value-type="float" office:value="9265" calcext:value-type="float">
            <text:p>926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7233796296296" calcext:value-type="float">
            <text:p>0,00107233796296296000</text:p>
          </table:table-cell>
          <table:table-cell table:formula="of:=[.D111]-[.D11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5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8217592592593" calcext:value-type="float">
            <text:p>0,00108217592592593000</text:p>
          </table:table-cell>
          <table:table-cell table:formula="of:=[.D112]-[.D11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5" office:value-type="float" office:value="9435" calcext:value-type="float">
            <text:p>943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9201388888889" calcext:value-type="float">
            <text:p>0,00109201388888889000</text:p>
          </table:table-cell>
          <table:table-cell table:formula="of:=[.D113]-[.D11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5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0185185185185" calcext:value-type="float">
            <text:p>0,00110185185185185000</text:p>
          </table:table-cell>
          <table:table-cell table:formula="of:=[.D114]-[.D11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5" office:value-type="float" office:value="9605" calcext:value-type="float">
            <text:p>960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1168981481482" calcext:value-type="float">
            <text:p>0,00111168981481482000</text:p>
          </table:table-cell>
          <table:table-cell table:formula="of:=[.D115]-[.D11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5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2152777777778" calcext:value-type="float">
            <text:p>0,00112152777777778000</text:p>
          </table:table-cell>
          <table:table-cell table:formula="of:=[.D116]-[.D11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5" office:value-type="float" office:value="9775" calcext:value-type="float">
            <text:p>977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3136574074074" calcext:value-type="float">
            <text:p>0,00113136574074074000</text:p>
          </table:table-cell>
          <table:table-cell table:formula="of:=[.D117]-[.D11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5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412037037037" calcext:value-type="float">
            <text:p>0,00114120370370370000</text:p>
          </table:table-cell>
          <table:table-cell table:formula="of:=[.D118]-[.D11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5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5104166666667" calcext:value-type="float">
            <text:p>0,00115104166666667000</text:p>
          </table:table-cell>
          <table:table-cell table:formula="of:=[.D119]-[.D11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5" office:value-type="float" office:value="10030" calcext:value-type="float">
            <text:p>1003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6087962962963" calcext:value-type="float">
            <text:p>0,00116087962962963000</text:p>
          </table:table-cell>
          <table:table-cell table:formula="of:=[.D120]-[.D11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5" office:value-type="float" office:value="10115" calcext:value-type="float">
            <text:p>1011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7071759259259" calcext:value-type="float">
            <text:p>0,00117071759259259000</text:p>
          </table:table-cell>
          <table:table-cell table:formula="of:=[.D121]-[.D12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5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8055555555556" calcext:value-type="float">
            <text:p>0,00118055555555556000</text:p>
          </table:table-cell>
          <table:table-cell table:formula="of:=[.D122]-[.D12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5" office:value-type="float" office:value="10285" calcext:value-type="float">
            <text:p>1028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9039351851852" calcext:value-type="float">
            <text:p>0,00119039351851852000</text:p>
          </table:table-cell>
          <table:table-cell table:formula="of:=[.D123]-[.D12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5" office:value-type="float" office:value="10370" calcext:value-type="float">
            <text:p>1037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0023148148148" calcext:value-type="float">
            <text:p>0,00120023148148148000</text:p>
          </table:table-cell>
          <table:table-cell table:formula="of:=[.D124]-[.D12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5" office:value-type="float" office:value="10455" calcext:value-type="float">
            <text:p>1045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1006944444444" calcext:value-type="float">
            <text:p>0,00121006944444444000</text:p>
          </table:table-cell>
          <table:table-cell table:formula="of:=[.D125]-[.D12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5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1990740740741" calcext:value-type="float">
            <text:p>0,00121990740740741000</text:p>
          </table:table-cell>
          <table:table-cell table:formula="of:=[.D126]-[.D12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5" office:value-type="float" office:value="10625" calcext:value-type="float">
            <text:p>10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2974537037037" calcext:value-type="float">
            <text:p>0,00122974537037037000</text:p>
          </table:table-cell>
          <table:table-cell table:formula="of:=[.D127]-[.D12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5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3958333333333" calcext:value-type="float">
            <text:p>0,00123958333333333000</text:p>
          </table:table-cell>
          <table:table-cell table:formula="of:=[.D128]-[.D12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5" office:value-type="float" office:value="10795" calcext:value-type="float">
            <text:p>1079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494212962963" calcext:value-type="float">
            <text:p>0,00124942129629630000</text:p>
          </table:table-cell>
          <table:table-cell table:formula="of:=[.D129]-[.D12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5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5925925925926" calcext:value-type="float">
            <text:p>0,00125925925925926000</text:p>
          </table:table-cell>
          <table:table-cell table:formula="of:=[.D130]-[.D12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5" office:value-type="float" office:value="10965" calcext:value-type="float">
            <text:p>1096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6909722222222" calcext:value-type="float">
            <text:p>0,00126909722222222000</text:p>
          </table:table-cell>
          <table:table-cell table:formula="of:=[.D131]-[.D13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5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7893518518519" calcext:value-type="float">
            <text:p>0,00127893518518519000</text:p>
          </table:table-cell>
          <table:table-cell table:formula="of:=[.D132]-[.D13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5" office:value-type="float" office:value="11135" calcext:value-type="float">
            <text:p>1113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8877314814815" calcext:value-type="float">
            <text:p>0,00128877314814815000</text:p>
          </table:table-cell>
          <table:table-cell table:formula="of:=[.D133]-[.D13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5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9861111111111" calcext:value-type="float">
            <text:p>0,00129861111111111000</text:p>
          </table:table-cell>
          <table:table-cell table:formula="of:=[.D134]-[.D13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5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0844907407407" calcext:value-type="float">
            <text:p>0,00130844907407407000</text:p>
          </table:table-cell>
          <table:table-cell table:formula="of:=[.D135]-[.D13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5" office:value-type="float" office:value="11390" calcext:value-type="float">
            <text:p>1139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1828703703704" calcext:value-type="float">
            <text:p>0,00131828703703704000</text:p>
          </table:table-cell>
          <table:table-cell table:formula="of:=[.D136]-[.D13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5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28125" calcext:value-type="float">
            <text:p>0,00132812500000000000</text:p>
          </table:table-cell>
          <table:table-cell table:formula="of:=[.D137]-[.D13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5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3796296296296" calcext:value-type="float">
            <text:p>0,00133796296296296000</text:p>
          </table:table-cell>
          <table:table-cell table:formula="of:=[.D138]-[.D13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5" office:value-type="float" office:value="11645" calcext:value-type="float">
            <text:p>1164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4780092592593" calcext:value-type="float">
            <text:p>0,00134780092592593000</text:p>
          </table:table-cell>
          <table:table-cell table:formula="of:=[.D139]-[.D13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5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5763888888889" calcext:value-type="float">
            <text:p>0,00135763888888889000</text:p>
          </table:table-cell>
          <table:table-cell table:formula="of:=[.D140]-[.D13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5" office:value-type="float" office:value="11815" calcext:value-type="float">
            <text:p>1181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6747685185185" calcext:value-type="float">
            <text:p>0,00136747685185185000</text:p>
          </table:table-cell>
          <table:table-cell table:formula="of:=[.D141]-[.D14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5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7731481481481" calcext:value-type="float">
            <text:p>0,00137731481481481000</text:p>
          </table:table-cell>
          <table:table-cell table:formula="of:=[.D142]-[.D14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5" office:value-type="float" office:value="11985" calcext:value-type="float">
            <text:p>1198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8715277777778" calcext:value-type="float">
            <text:p>0,00138715277777778000</text:p>
          </table:table-cell>
          <table:table-cell table:formula="of:=[.D143]-[.D14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5" office:value-type="float" office:value="12070" calcext:value-type="float">
            <text:p>1207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9699074074074" calcext:value-type="float">
            <text:p>0,00139699074074074000</text:p>
          </table:table-cell>
          <table:table-cell table:formula="of:=[.D144]-[.D14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5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068287037037" calcext:value-type="float">
            <text:p>0,00140682870370370000</text:p>
          </table:table-cell>
          <table:table-cell table:formula="of:=[.D145]-[.D14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5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1666666666667" calcext:value-type="float">
            <text:p>0,00141666666666667000</text:p>
          </table:table-cell>
          <table:table-cell table:formula="of:=[.D146]-[.D14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5" office:value-type="float" office:value="12325" calcext:value-type="float">
            <text:p>1232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2650462962963" calcext:value-type="float">
            <text:p>0,00142650462962963000</text:p>
          </table:table-cell>
          <table:table-cell table:formula="of:=[.D147]-[.D14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5" office:value-type="float" office:value="12410" calcext:value-type="float">
            <text:p>1241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3634259259259" calcext:value-type="float">
            <text:p>0,00143634259259259000</text:p>
          </table:table-cell>
          <table:table-cell table:formula="of:=[.D148]-[.D14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5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4618055555556" calcext:value-type="float">
            <text:p>0,00144618055555556000</text:p>
          </table:table-cell>
          <table:table-cell table:formula="of:=[.D149]-[.D14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5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5601851851852" calcext:value-type="float">
            <text:p>0,00145601851851852000</text:p>
          </table:table-cell>
          <table:table-cell table:formula="of:=[.D150]-[.D14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5" office:value-type="float" office:value="12665" calcext:value-type="float">
            <text:p>1266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46585648148148" calcext:value-type="float">
            <text:p>0,00146585648148148000</text:p>
          </table:table-cell>
          <table:table-cell table:formula="of:=[.D151]-[.D15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5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7569444444444" calcext:value-type="float">
            <text:p>0,00147569444444444000</text:p>
          </table:table-cell>
          <table:table-cell table:formula="of:=[.D152]-[.D15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5" office:value-type="float" office:value="12835" calcext:value-type="float">
            <text:p>1283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48553240740741" calcext:value-type="float">
            <text:p>0,00148553240740741000</text:p>
          </table:table-cell>
          <table:table-cell table:formula="of:=[.D153]-[.D15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5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9537037037037" calcext:value-type="float">
            <text:p>0,00149537037037037000</text:p>
          </table:table-cell>
          <table:table-cell table:formula="of:=[.D154]-[.D15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5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0520833333333" calcext:value-type="float">
            <text:p>0,00150520833333333000</text:p>
          </table:table-cell>
          <table:table-cell table:formula="of:=[.D155]-[.D15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5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5150462962963" calcext:value-type="float">
            <text:p>0,00151504629629630000</text:p>
          </table:table-cell>
          <table:table-cell table:formula="of:=[.D156]-[.D15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5" office:value-type="float" office:value="13175" calcext:value-type="float">
            <text:p>1317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2488425925926" calcext:value-type="float">
            <text:p>0,00152488425925926000</text:p>
          </table:table-cell>
          <table:table-cell table:formula="of:=[.D157]-[.D15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5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53472222222222" calcext:value-type="float">
            <text:p>0,00153472222222222000</text:p>
          </table:table-cell>
          <table:table-cell table:formula="of:=[.D158]-[.D15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5" office:value-type="float" office:value="13345" calcext:value-type="float">
            <text:p>1334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4456018518519" calcext:value-type="float">
            <text:p>0,00154456018518519000</text:p>
          </table:table-cell>
          <table:table-cell table:formula="of:=[.D159]-[.D15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5" office:value-type="float" office:value="13430" calcext:value-type="float">
            <text:p>1343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55439814814815" calcext:value-type="float">
            <text:p>0,00155439814814815000</text:p>
          </table:table-cell>
          <table:table-cell table:formula="of:=[.D160]-[.D15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5" office:value-type="float" office:value="13515" calcext:value-type="float">
            <text:p>1351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56423611111111" calcext:value-type="float">
            <text:p>0,00156423611111111000</text:p>
          </table:table-cell>
          <table:table-cell table:formula="of:=[.D161]-[.D16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5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7407407407407" calcext:value-type="float">
            <text:p>0,00157407407407407000</text:p>
          </table:table-cell>
          <table:table-cell table:formula="of:=[.D162]-[.D16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5" office:value-type="float" office:value="13685" calcext:value-type="float">
            <text:p>1368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58391203703704" calcext:value-type="float">
            <text:p>0,00158391203703704000</text:p>
          </table:table-cell>
          <table:table-cell table:formula="of:=[.D163]-[.D16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5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9375" calcext:value-type="float">
            <text:p>0,00159375000000000000</text:p>
          </table:table-cell>
          <table:table-cell table:formula="of:=[.D164]-[.D16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5" office:value-type="float" office:value="13855" calcext:value-type="float">
            <text:p>1385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0358796296296" calcext:value-type="float">
            <text:p>0,00160358796296296000</text:p>
          </table:table-cell>
          <table:table-cell table:formula="of:=[.D165]-[.D16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5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61342592592593" calcext:value-type="float">
            <text:p>0,00161342592592593000</text:p>
          </table:table-cell>
          <table:table-cell table:formula="of:=[.D166]-[.D16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5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2326388888889" calcext:value-type="float">
            <text:p>0,00162326388888889000</text:p>
          </table:table-cell>
          <table:table-cell table:formula="of:=[.D167]-[.D16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5" office:value-type="float" office:value="14110" calcext:value-type="float">
            <text:p>1411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63310185185185" calcext:value-type="float">
            <text:p>0,00163310185185185000</text:p>
          </table:table-cell>
          <table:table-cell table:formula="of:=[.D168]-[.D16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5" office:value-type="float" office:value="14195" calcext:value-type="float">
            <text:p>1419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64293981481481" calcext:value-type="float">
            <text:p>0,00164293981481481000</text:p>
          </table:table-cell>
          <table:table-cell table:formula="of:=[.D169]-[.D16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5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65277777777778" calcext:value-type="float">
            <text:p>0,00165277777777778000</text:p>
          </table:table-cell>
          <table:table-cell table:formula="of:=[.D170]-[.D16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5" office:value-type="float" office:value="14365" calcext:value-type="float">
            <text:p>1436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66261574074074" calcext:value-type="float">
            <text:p>0,00166261574074074000</text:p>
          </table:table-cell>
          <table:table-cell table:formula="of:=[.D171]-[.D17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5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6724537037037" calcext:value-type="float">
            <text:p>0,00167245370370370000</text:p>
          </table:table-cell>
          <table:table-cell table:formula="of:=[.D172]-[.D17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5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68229166666667" calcext:value-type="float">
            <text:p>0,00168229166666667000</text:p>
          </table:table-cell>
          <table:table-cell table:formula="of:=[.D173]-[.D17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5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69212962962963" calcext:value-type="float">
            <text:p>0,00169212962962963000</text:p>
          </table:table-cell>
          <table:table-cell table:formula="of:=[.D174]-[.D17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5" office:value-type="float" office:value="14705" calcext:value-type="float">
            <text:p>1470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70196759259259" calcext:value-type="float">
            <text:p>0,00170196759259259000</text:p>
          </table:table-cell>
          <table:table-cell table:formula="of:=[.D175]-[.D17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5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71180555555556" calcext:value-type="float">
            <text:p>0,00171180555555556000</text:p>
          </table:table-cell>
          <table:table-cell table:formula="of:=[.D176]-[.D17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5" office:value-type="float" office:value="14875" calcext:value-type="float">
            <text:p>148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72164351851852" calcext:value-type="float">
            <text:p>0,00172164351851852000</text:p>
          </table:table-cell>
          <table:table-cell table:formula="of:=[.D177]-[.D17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5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73148148148148" calcext:value-type="float">
            <text:p>0,00173148148148148000</text:p>
          </table:table-cell>
          <table:table-cell table:formula="of:=[.D178]-[.D17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5" office:value-type="float" office:value="15045" calcext:value-type="float">
            <text:p>1504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74131944444444" calcext:value-type="float">
            <text:p>0,00174131944444444000</text:p>
          </table:table-cell>
          <table:table-cell table:formula="of:=[.D179]-[.D17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5" office:value-type="float" office:value="15130" calcext:value-type="float">
            <text:p>1513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75115740740741" calcext:value-type="float">
            <text:p>0,00175115740740741000</text:p>
          </table:table-cell>
          <table:table-cell table:formula="of:=[.D180]-[.D17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5" office:value-type="float" office:value="15215" calcext:value-type="float">
            <text:p>1521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76099537037037" calcext:value-type="float">
            <text:p>0,00176099537037037000</text:p>
          </table:table-cell>
          <table:table-cell table:formula="of:=[.D181]-[.D18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5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77083333333333" calcext:value-type="float">
            <text:p>0,00177083333333333000</text:p>
          </table:table-cell>
          <table:table-cell table:formula="of:=[.D182]-[.D18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5" office:value-type="float" office:value="15385" calcext:value-type="float">
            <text:p>1538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7806712962963" calcext:value-type="float">
            <text:p>0,00178067129629630000</text:p>
          </table:table-cell>
          <table:table-cell table:formula="of:=[.D183]-[.D18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5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79050925925926" calcext:value-type="float">
            <text:p>0,00179050925925926000</text:p>
          </table:table-cell>
          <table:table-cell table:formula="of:=[.D184]-[.D183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5" office:value-type="float" office:value="15555" calcext:value-type="float">
            <text:p>1555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80034722222222" calcext:value-type="float">
            <text:p>0,00180034722222222000</text:p>
          </table:table-cell>
          <table:table-cell table:formula="of:=[.D185]-[.D18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5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81018518518519" calcext:value-type="float">
            <text:p>0,00181018518518519000</text:p>
          </table:table-cell>
          <table:table-cell table:formula="of:=[.D186]-[.D18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5" office:value-type="float" office:value="15725" calcext:value-type="float">
            <text:p>1572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82002314814815" calcext:value-type="float">
            <text:p>0,00182002314814815000</text:p>
          </table:table-cell>
          <table:table-cell table:formula="of:=[.D187]-[.D18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5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82986111111111" calcext:value-type="float">
            <text:p>0,00182986111111111000</text:p>
          </table:table-cell>
          <table:table-cell table:formula="of:=[.D188]-[.D18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5" office:value-type="float" office:value="15895" calcext:value-type="float">
            <text:p>1589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83969907407407" calcext:value-type="float">
            <text:p>0,00183969907407407000</text:p>
          </table:table-cell>
          <table:table-cell table:formula="of:=[.D189]-[.D188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5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84953703703704" calcext:value-type="float">
            <text:p>0,00184953703703704000</text:p>
          </table:table-cell>
          <table:table-cell table:formula="of:=[.D190]-[.D18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5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859375" calcext:value-type="float">
            <text:p>0,00185937500000000000</text:p>
          </table:table-cell>
          <table:table-cell table:formula="of:=[.D191]-[.D190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5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86921296296296" calcext:value-type="float">
            <text:p>0,00186921296296296000</text:p>
          </table:table-cell>
          <table:table-cell table:formula="of:=[.D192]-[.D191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5" office:value-type="float" office:value="16235" calcext:value-type="float">
            <text:p>1623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87905092592593" calcext:value-type="float">
            <text:p>0,00187905092592593000</text:p>
          </table:table-cell>
          <table:table-cell table:formula="of:=[.D193]-[.D192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5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88888888888889" calcext:value-type="float">
            <text:p>0,00188888888888889000</text:p>
          </table:table-cell>
          <table:table-cell table:formula="of:=[.D194]-[.D19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5" office:value-type="float" office:value="16405" calcext:value-type="float">
            <text:p>1640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89872685185185" calcext:value-type="float">
            <text:p>0,00189872685185185000</text:p>
          </table:table-cell>
          <table:table-cell table:formula="of:=[.D195]-[.D194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5" office:value-type="float" office:value="16490" calcext:value-type="float">
            <text:p>1649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90856481481481" calcext:value-type="float">
            <text:p>0,00190856481481481000</text:p>
          </table:table-cell>
          <table:table-cell table:formula="of:=[.D196]-[.D195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5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91840277777778" calcext:value-type="float">
            <text:p>0,00191840277777778000</text:p>
          </table:table-cell>
          <table:table-cell table:formula="of:=[.D197]-[.D196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5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92824074074074" calcext:value-type="float">
            <text:p>0,00192824074074074000</text:p>
          </table:table-cell>
          <table:table-cell table:formula="of:=[.D198]-[.D197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5" office:value-type="float" office:value="16745" calcext:value-type="float">
            <text:p>1674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9380787037037" calcext:value-type="float">
            <text:p>0,00193807870370370000</text:p>
          </table:table-cell>
          <table:table-cell table:formula="of:=[.D199]-[.D19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5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94791666666667" calcext:value-type="float">
            <text:p>0,00194791666666667000</text:p>
          </table:table-cell>
          <table:table-cell table:formula="of:=[.D200]-[.D199]" office:value-type="float" office:value="0.00000983796296296301" calcext:value-type="float">
            <text:p>0,0000098379629629630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5" office:value-type="float" office:value="16915" calcext:value-type="float">
            <text:p>1691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95775462962963" calcext:value-type="float">
            <text:p>0,00195775462962963000</text:p>
          </table:table-cell>
          <table:table-cell table:formula="of:=[.D201]-[.D20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5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96759259259259" calcext:value-type="float">
            <text:p>0,00196759259259259000</text:p>
          </table:table-cell>
          <table:table-cell table:formula="of:=[.D202]-[.D201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5" office:value-type="float" office:value="17085" calcext:value-type="float">
            <text:p>1708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97743055555556" calcext:value-type="float">
            <text:p>0,00197743055555556000</text:p>
          </table:table-cell>
          <table:table-cell table:formula="of:=[.D203]-[.D20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5" office:value-type="float" office:value="17170" calcext:value-type="float">
            <text:p>1717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98726851851852" calcext:value-type="float">
            <text:p>0,00198726851851852000</text:p>
          </table:table-cell>
          <table:table-cell table:formula="of:=[.D204]-[.D203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5" office:value-type="float" office:value="17255" calcext:value-type="float">
            <text:p>1725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99710648148148" calcext:value-type="float">
            <text:p>0,00199710648148148000</text:p>
          </table:table-cell>
          <table:table-cell table:formula="of:=[.D205]-[.D20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5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00694444444444" calcext:value-type="float">
            <text:p>0,00200694444444444000</text:p>
          </table:table-cell>
          <table:table-cell table:formula="of:=[.D206]-[.D20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5" office:value-type="float" office:value="17425" calcext:value-type="float">
            <text:p>1742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01678240740741" calcext:value-type="float">
            <text:p>0,00201678240740741000</text:p>
          </table:table-cell>
          <table:table-cell table:formula="of:=[.D207]-[.D206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5" office:value-type="float" office:value="17510" calcext:value-type="float">
            <text:p>1751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02662037037037" calcext:value-type="float">
            <text:p>0,00202662037037037000</text:p>
          </table:table-cell>
          <table:table-cell table:formula="of:=[.D208]-[.D20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5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03645833333333" calcext:value-type="float">
            <text:p>0,00203645833333333000</text:p>
          </table:table-cell>
          <table:table-cell table:formula="of:=[.D209]-[.D208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5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0462962962963" calcext:value-type="float">
            <text:p>0,00204629629629630000</text:p>
          </table:table-cell>
          <table:table-cell table:formula="of:=[.D210]-[.D20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5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05613425925926" calcext:value-type="float">
            <text:p>0,00205613425925926000</text:p>
          </table:table-cell>
          <table:table-cell table:formula="of:=[.D211]-[.D21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5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06597222222222" calcext:value-type="float">
            <text:p>0,00206597222222222000</text:p>
          </table:table-cell>
          <table:table-cell table:formula="of:=[.D212]-[.D211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5" office:value-type="float" office:value="17935" calcext:value-type="float">
            <text:p>1793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07581018518519" calcext:value-type="float">
            <text:p>0,00207581018518519000</text:p>
          </table:table-cell>
          <table:table-cell table:formula="of:=[.D213]-[.D21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5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08564814814815" calcext:value-type="float">
            <text:p>0,00208564814814815000</text:p>
          </table:table-cell>
          <table:table-cell table:formula="of:=[.D214]-[.D21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5" office:value-type="float" office:value="18105" calcext:value-type="float">
            <text:p>1810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09548611111111" calcext:value-type="float">
            <text:p>0,00209548611111111000</text:p>
          </table:table-cell>
          <table:table-cell table:formula="of:=[.D215]-[.D214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5" office:value-type="float" office:value="18190" calcext:value-type="float">
            <text:p>1819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10532407407407" calcext:value-type="float">
            <text:p>0,00210532407407407000</text:p>
          </table:table-cell>
          <table:table-cell table:formula="of:=[.D216]-[.D21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5" office:value-type="float" office:value="18275" calcext:value-type="float">
            <text:p>1827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11516203703704" calcext:value-type="float">
            <text:p>0,00211516203703704000</text:p>
          </table:table-cell>
          <table:table-cell table:formula="of:=[.D217]-[.D216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5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125" calcext:value-type="float">
            <text:p>0,00212500000000000000</text:p>
          </table:table-cell>
          <table:table-cell table:formula="of:=[.D218]-[.D21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5" office:value-type="float" office:value="18445" calcext:value-type="float">
            <text:p>1844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13483796296296" calcext:value-type="float">
            <text:p>0,00213483796296296000</text:p>
          </table:table-cell>
          <table:table-cell table:formula="of:=[.D219]-[.D21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5" office:value-type="float" office:value="18530" calcext:value-type="float">
            <text:p>1853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14467592592593" calcext:value-type="float">
            <text:p>0,00214467592592593000</text:p>
          </table:table-cell>
          <table:table-cell table:formula="of:=[.D220]-[.D219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5" office:value-type="float" office:value="18615" calcext:value-type="float">
            <text:p>1861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15451388888889" calcext:value-type="float">
            <text:p>0,00215451388888889000</text:p>
          </table:table-cell>
          <table:table-cell table:formula="of:=[.D221]-[.D22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5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16435185185185" calcext:value-type="float">
            <text:p>0,00216435185185185000</text:p>
          </table:table-cell>
          <table:table-cell table:formula="of:=[.D222]-[.D221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5" office:value-type="float" office:value="18785" calcext:value-type="float">
            <text:p>1878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17418981481482" calcext:value-type="float">
            <text:p>0,00217418981481482000</text:p>
          </table:table-cell>
          <table:table-cell table:formula="of:=[.D223]-[.D22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5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18402777777778" calcext:value-type="float">
            <text:p>0,00218402777777778000</text:p>
          </table:table-cell>
          <table:table-cell table:formula="of:=[.D224]-[.D22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5" office:value-type="float" office:value="18955" calcext:value-type="float">
            <text:p>1895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19386574074074" calcext:value-type="float">
            <text:p>0,00219386574074074000</text:p>
          </table:table-cell>
          <table:table-cell table:formula="of:=[.D225]-[.D224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5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2037037037037" calcext:value-type="float">
            <text:p>0,00220370370370370000</text:p>
          </table:table-cell>
          <table:table-cell table:formula="of:=[.D226]-[.D22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5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21354166666667" calcext:value-type="float">
            <text:p>0,00221354166666667000</text:p>
          </table:table-cell>
          <table:table-cell table:formula="of:=[.D227]-[.D226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5" office:value-type="float" office:value="19210" calcext:value-type="float">
            <text:p>1921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22337962962963" calcext:value-type="float">
            <text:p>0,00222337962962963000</text:p>
          </table:table-cell>
          <table:table-cell table:formula="of:=[.D228]-[.D22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5" office:value-type="float" office:value="19295" calcext:value-type="float">
            <text:p>1929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23321759259259" calcext:value-type="float">
            <text:p>0,00223321759259259000</text:p>
          </table:table-cell>
          <table:table-cell table:formula="of:=[.D229]-[.D22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5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24305555555556" calcext:value-type="float">
            <text:p>0,00224305555555556000</text:p>
          </table:table-cell>
          <table:table-cell table:formula="of:=[.D230]-[.D229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5" office:value-type="float" office:value="19465" calcext:value-type="float">
            <text:p>1946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25289351851852" calcext:value-type="float">
            <text:p>0,00225289351851852000</text:p>
          </table:table-cell>
          <table:table-cell table:formula="of:=[.D231]-[.D23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5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26273148148148" calcext:value-type="float">
            <text:p>0,00226273148148148000</text:p>
          </table:table-cell>
          <table:table-cell table:formula="of:=[.D232]-[.D23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5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27256944444444" calcext:value-type="float">
            <text:p>0,00227256944444444000</text:p>
          </table:table-cell>
          <table:table-cell table:formula="of:=[.D233]-[.D232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5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28240740740741" calcext:value-type="float">
            <text:p>0,00228240740740741000</text:p>
          </table:table-cell>
          <table:table-cell table:formula="of:=[.D234]-[.D23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5" office:value-type="float" office:value="19805" calcext:value-type="float">
            <text:p>1980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29224537037037" calcext:value-type="float">
            <text:p>0,00229224537037037000</text:p>
          </table:table-cell>
          <table:table-cell table:formula="of:=[.D235]-[.D234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5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30208333333333" calcext:value-type="float">
            <text:p>0,00230208333333333000</text:p>
          </table:table-cell>
          <table:table-cell table:formula="of:=[.D236]-[.D23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5" office:value-type="float" office:value="19975" calcext:value-type="float">
            <text:p>1997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3119212962963" calcext:value-type="float">
            <text:p>0,00231192129629630000</text:p>
          </table:table-cell>
          <table:table-cell table:formula="of:=[.D237]-[.D23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5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32175925925926" calcext:value-type="float">
            <text:p>0,00232175925925926000</text:p>
          </table:table-cell>
          <table:table-cell table:formula="of:=[.D238]-[.D237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5" office:value-type="float" office:value="20145" calcext:value-type="float">
            <text:p>2014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33159722222222" calcext:value-type="float">
            <text:p>0,00233159722222222000</text:p>
          </table:table-cell>
          <table:table-cell table:formula="of:=[.D239]-[.D23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5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34143518518519" calcext:value-type="float">
            <text:p>0,00234143518518519000</text:p>
          </table:table-cell>
          <table:table-cell table:formula="of:=[.D240]-[.D239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5" office:value-type="float" office:value="20315" calcext:value-type="float">
            <text:p>2031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35127314814815" calcext:value-type="float">
            <text:p>0,00235127314814815000</text:p>
          </table:table-cell>
          <table:table-cell table:formula="of:=[.D241]-[.D24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5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36111111111111" calcext:value-type="float">
            <text:p>0,00236111111111111000</text:p>
          </table:table-cell>
          <table:table-cell table:formula="of:=[.D242]-[.D24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5" office:value-type="float" office:value="20485" calcext:value-type="float">
            <text:p>2048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37094907407407" calcext:value-type="float">
            <text:p>0,00237094907407407000</text:p>
          </table:table-cell>
          <table:table-cell table:formula="of:=[.D243]-[.D242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5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38078703703704" calcext:value-type="float">
            <text:p>0,00238078703703704000</text:p>
          </table:table-cell>
          <table:table-cell table:formula="of:=[.D244]-[.D24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5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390625" calcext:value-type="float">
            <text:p>0,00239062500000000000</text:p>
          </table:table-cell>
          <table:table-cell table:formula="of:=[.D245]-[.D24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5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40046296296296" calcext:value-type="float">
            <text:p>0,00240046296296296000</text:p>
          </table:table-cell>
          <table:table-cell table:formula="of:=[.D246]-[.D245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5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41030092592593" calcext:value-type="float">
            <text:p>0,00241030092592593000</text:p>
          </table:table-cell>
          <table:table-cell table:formula="of:=[.D247]-[.D24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5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42013888888889" calcext:value-type="float">
            <text:p>0,00242013888888889000</text:p>
          </table:table-cell>
          <table:table-cell table:formula="of:=[.D248]-[.D247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5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42997685185185" calcext:value-type="float">
            <text:p>0,00242997685185185000</text:p>
          </table:table-cell>
          <table:table-cell table:formula="of:=[.D249]-[.D24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5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43981481481482" calcext:value-type="float">
            <text:p>0,00243981481481482000</text:p>
          </table:table-cell>
          <table:table-cell table:formula="of:=[.D250]-[.D24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5" office:value-type="float" office:value="21165" calcext:value-type="float">
            <text:p>2116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44965277777778" calcext:value-type="float">
            <text:p>0,00244965277777778000</text:p>
          </table:table-cell>
          <table:table-cell table:formula="of:=[.D251]-[.D250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5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45949074074074" calcext:value-type="float">
            <text:p>0,00245949074074074000</text:p>
          </table:table-cell>
          <table:table-cell table:formula="of:=[.D252]-[.D25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5" office:value-type="float" office:value="21335" calcext:value-type="float">
            <text:p>2133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4693287037037" calcext:value-type="float">
            <text:p>0,00246932870370370000</text:p>
          </table:table-cell>
          <table:table-cell table:formula="of:=[.D253]-[.D252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5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47916666666667" calcext:value-type="float">
            <text:p>0,00247916666666667000</text:p>
          </table:table-cell>
          <table:table-cell table:formula="of:=[.D254]-[.D253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5" office:value-type="float" office:value="21505" calcext:value-type="float">
            <text:p>2150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48900462962963" calcext:value-type="float">
            <text:p>0,00248900462962963000</text:p>
          </table:table-cell>
          <table:table-cell table:formula="of:=[.D255]-[.D25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5" office:value-type="float" office:value="21590" calcext:value-type="float">
            <text:p>2159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49884259259259" calcext:value-type="float">
            <text:p>0,00249884259259259000</text:p>
          </table:table-cell>
          <table:table-cell table:formula="of:=[.D256]-[.D255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5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50868055555556" calcext:value-type="float">
            <text:p>0,00250868055555556000</text:p>
          </table:table-cell>
          <table:table-cell table:formula="of:=[.D257]-[.D25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5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51851851851852" calcext:value-type="float">
            <text:p>0,00251851851851852000</text:p>
          </table:table-cell>
          <table:table-cell table:formula="of:=[.D258]-[.D257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5" office:value-type="float" office:value="21845" calcext:value-type="float">
            <text:p>2184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52835648148148" calcext:value-type="float">
            <text:p>0,00252835648148148000</text:p>
          </table:table-cell>
          <table:table-cell table:formula="of:=[.D259]-[.D258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5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53819444444444" calcext:value-type="float">
            <text:p>0,00253819444444444000</text:p>
          </table:table-cell>
          <table:table-cell table:formula="of:=[.D260]-[.D25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5" office:value-type="float" office:value="22015" calcext:value-type="float">
            <text:p>2201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54803240740741" calcext:value-type="float">
            <text:p>0,00254803240740741000</text:p>
          </table:table-cell>
          <table:table-cell table:formula="of:=[.D261]-[.D260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5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55787037037037" calcext:value-type="float">
            <text:p>0,00255787037037037000</text:p>
          </table:table-cell>
          <table:table-cell table:formula="of:=[.D262]-[.D26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5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56770833333333" calcext:value-type="float">
            <text:p>0,00256770833333333000</text:p>
          </table:table-cell>
          <table:table-cell table:formula="of:=[.D263]-[.D26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5" office:value-type="float" office:value="22270" calcext:value-type="float">
            <text:p>2227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5775462962963" calcext:value-type="float">
            <text:p>0,00257754629629630000</text:p>
          </table:table-cell>
          <table:table-cell table:formula="of:=[.D264]-[.D263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5" office:value-type="float" office:value="22355" calcext:value-type="float">
            <text:p>2235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58738425925926" calcext:value-type="float">
            <text:p>0,00258738425925926000</text:p>
          </table:table-cell>
          <table:table-cell table:formula="of:=[.D265]-[.D26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5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59722222222222" calcext:value-type="float">
            <text:p>0,00259722222222222000</text:p>
          </table:table-cell>
          <table:table-cell table:formula="of:=[.D266]-[.D265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5" office:value-type="float" office:value="22525" calcext:value-type="float">
            <text:p>2252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60706018518519" calcext:value-type="float">
            <text:p>0,00260706018518519000</text:p>
          </table:table-cell>
          <table:table-cell table:formula="of:=[.D267]-[.D266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5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61689814814815" calcext:value-type="float">
            <text:p>0,00261689814814815000</text:p>
          </table:table-cell>
          <table:table-cell table:formula="of:=[.D268]-[.D26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5" office:value-type="float" office:value="22695" calcext:value-type="float">
            <text:p>2269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62673611111111" calcext:value-type="float">
            <text:p>0,00262673611111111000</text:p>
          </table:table-cell>
          <table:table-cell table:formula="of:=[.D269]-[.D268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5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63657407407407" calcext:value-type="float">
            <text:p>0,00263657407407407000</text:p>
          </table:table-cell>
          <table:table-cell table:formula="of:=[.D270]-[.D26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5" office:value-type="float" office:value="22865" calcext:value-type="float">
            <text:p>2286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64641203703704" calcext:value-type="float">
            <text:p>0,00264641203703704000</text:p>
          </table:table-cell>
          <table:table-cell table:formula="of:=[.D271]-[.D270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5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65625" calcext:value-type="float">
            <text:p>0,00265625000000000000</text:p>
          </table:table-cell>
          <table:table-cell table:formula="of:=[.D272]-[.D271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5" office:value-type="float" office:value="23035" calcext:value-type="float">
            <text:p>2303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66608796296296" calcext:value-type="float">
            <text:p>0,00266608796296296000</text:p>
          </table:table-cell>
          <table:table-cell table:formula="of:=[.D273]-[.D27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5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67592592592593" calcext:value-type="float">
            <text:p>0,00267592592592593000</text:p>
          </table:table-cell>
          <table:table-cell table:formula="of:=[.D274]-[.D273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5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68576388888889" calcext:value-type="float">
            <text:p>0,00268576388888889000</text:p>
          </table:table-cell>
          <table:table-cell table:formula="of:=[.D275]-[.D274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5" office:value-type="float" office:value="23290" calcext:value-type="float">
            <text:p>2329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69560185185185" calcext:value-type="float">
            <text:p>0,00269560185185185000</text:p>
          </table:table-cell>
          <table:table-cell table:formula="of:=[.D276]-[.D275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5" office:value-type="float" office:value="23375" calcext:value-type="float">
            <text:p>233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70543981481481" calcext:value-type="float">
            <text:p>0,00270543981481481000</text:p>
          </table:table-cell>
          <table:table-cell table:formula="of:=[.D277]-[.D276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5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71527777777778" calcext:value-type="float">
            <text:p>0,00271527777777778000</text:p>
          </table:table-cell>
          <table:table-cell table:formula="of:=[.D278]-[.D277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5" office:value-type="float" office:value="23545" calcext:value-type="float">
            <text:p>2354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72511574074074" calcext:value-type="float">
            <text:p>0,00272511574074074000</text:p>
          </table:table-cell>
          <table:table-cell table:formula="of:=[.D279]-[.D278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5" office:value-type="float" office:value="23630" calcext:value-type="float">
            <text:p>2363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7349537037037" calcext:value-type="float">
            <text:p>0,00273495370370370000</text:p>
          </table:table-cell>
          <table:table-cell table:formula="of:=[.D280]-[.D279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5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74479166666667" calcext:value-type="float">
            <text:p>0,00274479166666667000</text:p>
          </table:table-cell>
          <table:table-cell table:formula="of:=[.D281]-[.D280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5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75462962962963" calcext:value-type="float">
            <text:p>0,00275462962962963000</text:p>
          </table:table-cell>
          <table:table-cell table:formula="of:=[.D282]-[.D281]" office:value-type="float" office:value="0.00000983796296296323" calcext:value-type="float">
            <text:p>0,00000983796296296323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5" office:value-type="float" office:value="23885" calcext:value-type="float">
            <text:p>2388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76446759259259" calcext:value-type="float">
            <text:p>0,00276446759259259000</text:p>
          </table:table-cell>
          <table:table-cell table:formula="of:=[.D283]-[.D282]" office:value-type="float" office:value="0.0000098379629629628" calcext:value-type="float">
            <text:p>0,0000098379629629628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5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77430555555556" calcext:value-type="float">
            <text:p>0,00277430555555556000</text:p>
          </table:table-cell>
          <table:table-cell table:formula="of:=#REF!-[.D283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9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11:29.106156109</meta:creation-date>
    <dc:date>2026-05-17T19:11:40.349750988</dc:date>
    <meta:editing-duration>PT12S</meta:editing-duration>
    <meta:editing-cycles>1</meta:editing-cycles>
    <meta:document-statistic meta:table-count="1" meta:cell-count="1415" meta:object-count="0"/>
    <meta:generator>LibreOffice/24.2.7.2$Linux_X86_64 LibreOffice_project/420$Build-2</meta:generator>
  </office:meta>
</office:document-meta>
</file>