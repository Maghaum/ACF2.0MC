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75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674cm"/>
    </style:style>
    <style:style style:name="co4" style:family="table-column">
      <style:table-column-properties fo:break-before="auto" style:column-width="4.95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" style:family="table-cell" style:parent-style-name="Default" style:data-style-name="N135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35">
      <style:table-cell-properties style:text-align-source="fix" style:repeat-content="false" fo:background-color="transparent"/>
      <style:paragraph-properties fo:text-align="center" fo:margin-left="0cm"/>
    </style:style>
    <style:style style:name="T1" style:family="text">
      <style:text-properties fo:language="pt" fo:country="BR"/>
    </style:style>
  </office:automatic-styles>
  <office:body>
    <office:spreadsheet>
      <table:calculation-settings table:automatic-find-labels="false" table:use-regular-expressions="false" table:use-wildcards="true"/>
      <table:table table:name="53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4"/>
        <table:table-column table:style-name="co2" table:number-columns-repeated="16379" table:default-cell-style-name="ce2"/>
        <table:table-row table:style-name="ro1">
          <table:table-cell table:style-name="ce1" office:value-type="string" calcext:value-type="string">
            <text:p>Naturais</text:p>
          </table:table-cell>
          <table:table-cell table:style-name="ce1" office:value-type="string" calcext:value-type="string">
            <text:p>B + 53</text:p>
          </table:table-cell>
          <table:table-cell table:style-name="ce1" office:value-type="string" calcext:value-type="string">
            <text:p><text:span text:style-name="T1">Ciclo</text:span> Perfeito</text:p>
          </table:table-cell>
          <table:table-cell table:style-name="ce3" office:value-type="string" calcext:value-type="string">
            <text:p>B / C</text:p>
          </table:table-cell>
          <table:table-cell table:style-name="ce3" office:value-type="string" calcext:value-type="string">
            <text:p>D posterior – D atual</text:p>
          </table:table-cell>
          <table:table-cell table:number-columns-repeated="1637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8640000" calcext:value-type="float">
            <text:p>8640000</text:p>
          </table:table-cell>
          <table:table-cell table:formula="of:=[.B2]/[.C2]" office:value-type="float" office:value="0.00000613425925925926" calcext:value-type="float">
            <text:p>0,00000613425925925926</text:p>
          </table:table-cell>
          <table:table-cell table:formula="of:=[.D3]-[.D2]" office:value-type="float" office:value="0.00000613425925925926" calcext:value-type="float">
            <text:p>0,00000613425925925926</text:p>
          </table:table-cell>
          <table:table-cell table:number-columns-repeated="16379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2]+53" office:value-type="float" office:value="106" calcext:value-type="float">
            <text:p>106</text:p>
          </table:table-cell>
          <table:table-cell office:value-type="float" office:value="8640000" calcext:value-type="float">
            <text:p>8640000</text:p>
          </table:table-cell>
          <table:table-cell table:formula="of:=[.B3]/[.C3]" office:value-type="float" office:value="0.0000122685185185185" calcext:value-type="float">
            <text:p>0,00001226851851851850</text:p>
          </table:table-cell>
          <table:table-cell table:formula="of:=[.D4]-[.D3]" office:value-type="float" office:value="0.00000613425925925926" calcext:value-type="float">
            <text:p>0,00000613425925925926</text:p>
          </table:table-cell>
          <table:table-cell table:number-columns-repeated="16379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3]+53" office:value-type="float" office:value="159" calcext:value-type="float">
            <text:p>159</text:p>
          </table:table-cell>
          <table:table-cell office:value-type="float" office:value="8640000" calcext:value-type="float">
            <text:p>8640000</text:p>
          </table:table-cell>
          <table:table-cell table:formula="of:=[.B4]/[.C4]" office:value-type="float" office:value="0.0000184027777777778" calcext:value-type="float">
            <text:p>0,00001840277777777780</text:p>
          </table:table-cell>
          <table:table-cell table:formula="of:=[.D5]-[.D4]" office:value-type="float" office:value="0.00000613425925925926" calcext:value-type="float">
            <text:p>0,00000613425925925926</text:p>
          </table:table-cell>
          <table:table-cell table:number-columns-repeated="16379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4]+53" office:value-type="float" office:value="212" calcext:value-type="float">
            <text:p>212</text:p>
          </table:table-cell>
          <table:table-cell office:value-type="float" office:value="8640000" calcext:value-type="float">
            <text:p>8640000</text:p>
          </table:table-cell>
          <table:table-cell table:formula="of:=[.B5]/[.C5]" office:value-type="float" office:value="0.000024537037037037" calcext:value-type="float">
            <text:p>0,00002453703703703700</text:p>
          </table:table-cell>
          <table:table-cell table:formula="of:=[.D6]-[.D5]" office:value-type="float" office:value="0.00000613425925925926" calcext:value-type="float">
            <text:p>0,00000613425925925926</text:p>
          </table:table-cell>
          <table:table-cell table:number-columns-repeated="16379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5]+53" office:value-type="float" office:value="265" calcext:value-type="float">
            <text:p>265</text:p>
          </table:table-cell>
          <table:table-cell office:value-type="float" office:value="8640000" calcext:value-type="float">
            <text:p>8640000</text:p>
          </table:table-cell>
          <table:table-cell table:formula="of:=[.B6]/[.C6]" office:value-type="float" office:value="0.0000306712962962963" calcext:value-type="float">
            <text:p>0,00003067129629629630</text:p>
          </table:table-cell>
          <table:table-cell table:formula="of:=[.D7]-[.D6]" office:value-type="float" office:value="0.00000613425925925926" calcext:value-type="float">
            <text:p>0,00000613425925925926</text:p>
          </table:table-cell>
          <table:table-cell table:number-columns-repeated="16379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6]+53" office:value-type="float" office:value="318" calcext:value-type="float">
            <text:p>318</text:p>
          </table:table-cell>
          <table:table-cell office:value-type="float" office:value="8640000" calcext:value-type="float">
            <text:p>8640000</text:p>
          </table:table-cell>
          <table:table-cell table:formula="of:=[.B7]/[.C7]" office:value-type="float" office:value="0.0000368055555555556" calcext:value-type="float">
            <text:p>0,00003680555555555560</text:p>
          </table:table-cell>
          <table:table-cell table:formula="of:=[.D8]-[.D7]" office:value-type="float" office:value="0.00000613425925925926" calcext:value-type="float">
            <text:p>0,00000613425925925926</text:p>
          </table:table-cell>
          <table:table-cell table:number-columns-repeated="16379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7]+53" office:value-type="float" office:value="371" calcext:value-type="float">
            <text:p>371</text:p>
          </table:table-cell>
          <table:table-cell office:value-type="float" office:value="8640000" calcext:value-type="float">
            <text:p>8640000</text:p>
          </table:table-cell>
          <table:table-cell table:formula="of:=[.B8]/[.C8]" office:value-type="float" office:value="0.0000429398148148148" calcext:value-type="float">
            <text:p>0,00004293981481481480</text:p>
          </table:table-cell>
          <table:table-cell table:formula="of:=[.D9]-[.D8]" office:value-type="float" office:value="0.00000613425925925926" calcext:value-type="float">
            <text:p>0,00000613425925925926</text:p>
          </table:table-cell>
          <table:table-cell table:number-columns-repeated="16379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8]+53" office:value-type="float" office:value="424" calcext:value-type="float">
            <text:p>424</text:p>
          </table:table-cell>
          <table:table-cell office:value-type="float" office:value="8640000" calcext:value-type="float">
            <text:p>8640000</text:p>
          </table:table-cell>
          <table:table-cell table:formula="of:=[.B9]/[.C9]" office:value-type="float" office:value="0.0000490740740740741" calcext:value-type="float">
            <text:p>0,00004907407407407410</text:p>
          </table:table-cell>
          <table:table-cell table:formula="of:=[.D10]-[.D9]" office:value-type="float" office:value="0.00000613425925925926" calcext:value-type="float">
            <text:p>0,00000613425925925926</text:p>
          </table:table-cell>
          <table:table-cell table:number-columns-repeated="16379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9]+53" office:value-type="float" office:value="477" calcext:value-type="float">
            <text:p>477</text:p>
          </table:table-cell>
          <table:table-cell office:value-type="float" office:value="8640000" calcext:value-type="float">
            <text:p>8640000</text:p>
          </table:table-cell>
          <table:table-cell table:formula="of:=[.B10]/[.C10]" office:value-type="float" office:value="0.0000552083333333333" calcext:value-type="float">
            <text:p>0,00005520833333333330</text:p>
          </table:table-cell>
          <table:table-cell table:formula="of:=[.D11]-[.D10]" office:value-type="float" office:value="0.00000613425925925926" calcext:value-type="float">
            <text:p>0,00000613425925925926</text:p>
          </table:table-cell>
          <table:table-cell table:number-columns-repeated="16379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0]+53" office:value-type="float" office:value="530" calcext:value-type="float">
            <text:p>530</text:p>
          </table:table-cell>
          <table:table-cell office:value-type="float" office:value="8640000" calcext:value-type="float">
            <text:p>8640000</text:p>
          </table:table-cell>
          <table:table-cell table:formula="of:=[.B11]/[.C11]" office:value-type="float" office:value="0.0000613425925925926" calcext:value-type="float">
            <text:p>0,00006134259259259260</text:p>
          </table:table-cell>
          <table:table-cell table:formula="of:=[.D12]-[.D11]" office:value-type="float" office:value="0.00000613425925925926" calcext:value-type="float">
            <text:p>0,00000613425925925926</text:p>
          </table:table-cell>
          <table:table-cell table:number-columns-repeated="16379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1]+53" office:value-type="float" office:value="583" calcext:value-type="float">
            <text:p>583</text:p>
          </table:table-cell>
          <table:table-cell office:value-type="float" office:value="8640000" calcext:value-type="float">
            <text:p>8640000</text:p>
          </table:table-cell>
          <table:table-cell table:formula="of:=[.B12]/[.C12]" office:value-type="float" office:value="0.0000674768518518519" calcext:value-type="float">
            <text:p>0,00006747685185185190</text:p>
          </table:table-cell>
          <table:table-cell table:formula="of:=[.D13]-[.D12]" office:value-type="float" office:value="0.00000613425925925926" calcext:value-type="float">
            <text:p>0,00000613425925925926</text:p>
          </table:table-cell>
          <table:table-cell table:number-columns-repeated="16379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2]+53" office:value-type="float" office:value="636" calcext:value-type="float">
            <text:p>636</text:p>
          </table:table-cell>
          <table:table-cell office:value-type="float" office:value="8640000" calcext:value-type="float">
            <text:p>8640000</text:p>
          </table:table-cell>
          <table:table-cell table:formula="of:=[.B13]/[.C13]" office:value-type="float" office:value="0.0000736111111111111" calcext:value-type="float">
            <text:p>0,00007361111111111110</text:p>
          </table:table-cell>
          <table:table-cell table:formula="of:=[.D14]-[.D13]" office:value-type="float" office:value="0.00000613425925925926" calcext:value-type="float">
            <text:p>0,00000613425925925926</text:p>
          </table:table-cell>
          <table:table-cell table:number-columns-repeated="16379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3]+53" office:value-type="float" office:value="689" calcext:value-type="float">
            <text:p>689</text:p>
          </table:table-cell>
          <table:table-cell office:value-type="float" office:value="8640000" calcext:value-type="float">
            <text:p>8640000</text:p>
          </table:table-cell>
          <table:table-cell table:formula="of:=[.B14]/[.C14]" office:value-type="float" office:value="0.0000797453703703704" calcext:value-type="float">
            <text:p>0,00007974537037037040</text:p>
          </table:table-cell>
          <table:table-cell table:formula="of:=[.D15]-[.D14]" office:value-type="float" office:value="0.00000613425925925925" calcext:value-type="float">
            <text:p>0,00000613425925925925</text:p>
          </table:table-cell>
          <table:table-cell table:number-columns-repeated="16379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4]+53" office:value-type="float" office:value="742" calcext:value-type="float">
            <text:p>742</text:p>
          </table:table-cell>
          <table:table-cell office:value-type="float" office:value="8640000" calcext:value-type="float">
            <text:p>8640000</text:p>
          </table:table-cell>
          <table:table-cell table:formula="of:=[.B15]/[.C15]" office:value-type="float" office:value="0.0000858796296296296" calcext:value-type="float">
            <text:p>0,00008587962962962960</text:p>
          </table:table-cell>
          <table:table-cell table:formula="of:=[.D16]-[.D15]" office:value-type="float" office:value="0.00000613425925925926" calcext:value-type="float">
            <text:p>0,00000613425925925926</text:p>
          </table:table-cell>
          <table:table-cell table:number-columns-repeated="16379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5]+53" office:value-type="float" office:value="795" calcext:value-type="float">
            <text:p>795</text:p>
          </table:table-cell>
          <table:table-cell office:value-type="float" office:value="8640000" calcext:value-type="float">
            <text:p>8640000</text:p>
          </table:table-cell>
          <table:table-cell table:formula="of:=[.B16]/[.C16]" office:value-type="float" office:value="0.0000920138888888889" calcext:value-type="float">
            <text:p>0,00009201388888888890</text:p>
          </table:table-cell>
          <table:table-cell table:formula="of:=[.D17]-[.D16]" office:value-type="float" office:value="0.00000613425925925926" calcext:value-type="float">
            <text:p>0,00000613425925925926</text:p>
          </table:table-cell>
          <table:table-cell table:number-columns-repeated="16379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6]+53" office:value-type="float" office:value="848" calcext:value-type="float">
            <text:p>848</text:p>
          </table:table-cell>
          <table:table-cell office:value-type="float" office:value="8640000" calcext:value-type="float">
            <text:p>8640000</text:p>
          </table:table-cell>
          <table:table-cell table:formula="of:=[.B17]/[.C17]" office:value-type="float" office:value="0.0000981481481481482" calcext:value-type="float">
            <text:p>0,00009814814814814820</text:p>
          </table:table-cell>
          <table:table-cell table:formula="of:=[.D18]-[.D17]" office:value-type="float" office:value="0.00000613425925925926" calcext:value-type="float">
            <text:p>0,00000613425925925926</text:p>
          </table:table-cell>
          <table:table-cell table:number-columns-repeated="16379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7]+53" office:value-type="float" office:value="901" calcext:value-type="float">
            <text:p>901</text:p>
          </table:table-cell>
          <table:table-cell office:value-type="float" office:value="8640000" calcext:value-type="float">
            <text:p>8640000</text:p>
          </table:table-cell>
          <table:table-cell table:formula="of:=[.B18]/[.C18]" office:value-type="float" office:value="0.000104282407407407" calcext:value-type="float">
            <text:p>0,00010428240740740700</text:p>
          </table:table-cell>
          <table:table-cell table:formula="of:=[.D19]-[.D18]" office:value-type="float" office:value="0.00000613425925925925" calcext:value-type="float">
            <text:p>0,00000613425925925925</text:p>
          </table:table-cell>
          <table:table-cell table:number-columns-repeated="16379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18]+53" office:value-type="float" office:value="954" calcext:value-type="float">
            <text:p>954</text:p>
          </table:table-cell>
          <table:table-cell office:value-type="float" office:value="8640000" calcext:value-type="float">
            <text:p>8640000</text:p>
          </table:table-cell>
          <table:table-cell table:formula="of:=[.B19]/[.C19]" office:value-type="float" office:value="0.000110416666666667" calcext:value-type="float">
            <text:p>0,00011041666666666700</text:p>
          </table:table-cell>
          <table:table-cell table:formula="of:=[.D20]-[.D19]" office:value-type="float" office:value="0.00000613425925925926" calcext:value-type="float">
            <text:p>0,00000613425925925926</text:p>
          </table:table-cell>
          <table:table-cell table:number-columns-repeated="16379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19]+53" office:value-type="float" office:value="1007" calcext:value-type="float">
            <text:p>1007</text:p>
          </table:table-cell>
          <table:table-cell office:value-type="float" office:value="8640000" calcext:value-type="float">
            <text:p>8640000</text:p>
          </table:table-cell>
          <table:table-cell table:formula="of:=[.B20]/[.C20]" office:value-type="float" office:value="0.000116550925925926" calcext:value-type="float">
            <text:p>0,00011655092592592600</text:p>
          </table:table-cell>
          <table:table-cell table:formula="of:=[.D21]-[.D20]" office:value-type="float" office:value="0.00000613425925925925" calcext:value-type="float">
            <text:p>0,00000613425925925925</text:p>
          </table:table-cell>
          <table:table-cell table:number-columns-repeated="16379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20]+53" office:value-type="float" office:value="1060" calcext:value-type="float">
            <text:p>1060</text:p>
          </table:table-cell>
          <table:table-cell office:value-type="float" office:value="8640000" calcext:value-type="float">
            <text:p>8640000</text:p>
          </table:table-cell>
          <table:table-cell table:formula="of:=[.B21]/[.C21]" office:value-type="float" office:value="0.000122685185185185" calcext:value-type="float">
            <text:p>0,00012268518518518500</text:p>
          </table:table-cell>
          <table:table-cell table:formula="of:=[.D22]-[.D21]" office:value-type="float" office:value="0.00000613425925925928" calcext:value-type="float">
            <text:p>0,00000613425925925928</text:p>
          </table:table-cell>
          <table:table-cell table:number-columns-repeated="16379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21]+53" office:value-type="float" office:value="1113" calcext:value-type="float">
            <text:p>1113</text:p>
          </table:table-cell>
          <table:table-cell office:value-type="float" office:value="8640000" calcext:value-type="float">
            <text:p>8640000</text:p>
          </table:table-cell>
          <table:table-cell table:formula="of:=[.B22]/[.C22]" office:value-type="float" office:value="0.000128819444444444" calcext:value-type="float">
            <text:p>0,00012881944444444400</text:p>
          </table:table-cell>
          <table:table-cell table:formula="of:=[.D23]-[.D22]" office:value-type="float" office:value="0.00000613425925925925" calcext:value-type="float">
            <text:p>0,00000613425925925925</text:p>
          </table:table-cell>
          <table:table-cell table:number-columns-repeated="16379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22]+53" office:value-type="float" office:value="1166" calcext:value-type="float">
            <text:p>1166</text:p>
          </table:table-cell>
          <table:table-cell office:value-type="float" office:value="8640000" calcext:value-type="float">
            <text:p>8640000</text:p>
          </table:table-cell>
          <table:table-cell table:formula="of:=[.B23]/[.C23]" office:value-type="float" office:value="0.000134953703703704" calcext:value-type="float">
            <text:p>0,00013495370370370400</text:p>
          </table:table-cell>
          <table:table-cell table:formula="of:=[.D24]-[.D23]" office:value-type="float" office:value="0.00000613425925925925" calcext:value-type="float">
            <text:p>0,00000613425925925925</text:p>
          </table:table-cell>
          <table:table-cell table:number-columns-repeated="16379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23]+53" office:value-type="float" office:value="1219" calcext:value-type="float">
            <text:p>1219</text:p>
          </table:table-cell>
          <table:table-cell office:value-type="float" office:value="8640000" calcext:value-type="float">
            <text:p>8640000</text:p>
          </table:table-cell>
          <table:table-cell table:formula="of:=[.B24]/[.C24]" office:value-type="float" office:value="0.000141087962962963" calcext:value-type="float">
            <text:p>0,00014108796296296300</text:p>
          </table:table-cell>
          <table:table-cell table:formula="of:=[.D25]-[.D24]" office:value-type="float" office:value="0.00000613425925925928" calcext:value-type="float">
            <text:p>0,00000613425925925928</text:p>
          </table:table-cell>
          <table:table-cell table:number-columns-repeated="16379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24]+53" office:value-type="float" office:value="1272" calcext:value-type="float">
            <text:p>1272</text:p>
          </table:table-cell>
          <table:table-cell office:value-type="float" office:value="8640000" calcext:value-type="float">
            <text:p>8640000</text:p>
          </table:table-cell>
          <table:table-cell table:formula="of:=[.B25]/[.C25]" office:value-type="float" office:value="0.000147222222222222" calcext:value-type="float">
            <text:p>0,00014722222222222200</text:p>
          </table:table-cell>
          <table:table-cell table:formula="of:=[.D26]-[.D25]" office:value-type="float" office:value="0.00000613425925925925" calcext:value-type="float">
            <text:p>0,00000613425925925925</text:p>
          </table:table-cell>
          <table:table-cell table:number-columns-repeated="16379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25]+53" office:value-type="float" office:value="1325" calcext:value-type="float">
            <text:p>1325</text:p>
          </table:table-cell>
          <table:table-cell office:value-type="float" office:value="8640000" calcext:value-type="float">
            <text:p>8640000</text:p>
          </table:table-cell>
          <table:table-cell table:formula="of:=[.B26]/[.C26]" office:value-type="float" office:value="0.000153356481481481" calcext:value-type="float">
            <text:p>0,00015335648148148100</text:p>
          </table:table-cell>
          <table:table-cell table:formula="of:=[.D27]-[.D26]" office:value-type="float" office:value="0.00000613425925925928" calcext:value-type="float">
            <text:p>0,00000613425925925928</text:p>
          </table:table-cell>
          <table:table-cell table:number-columns-repeated="16379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26]+53" office:value-type="float" office:value="1378" calcext:value-type="float">
            <text:p>1378</text:p>
          </table:table-cell>
          <table:table-cell office:value-type="float" office:value="8640000" calcext:value-type="float">
            <text:p>8640000</text:p>
          </table:table-cell>
          <table:table-cell table:formula="of:=[.B27]/[.C27]" office:value-type="float" office:value="0.000159490740740741" calcext:value-type="float">
            <text:p>0,00015949074074074100</text:p>
          </table:table-cell>
          <table:table-cell table:formula="of:=[.D28]-[.D27]" office:value-type="float" office:value="0.00000613425925925925" calcext:value-type="float">
            <text:p>0,00000613425925925925</text:p>
          </table:table-cell>
          <table:table-cell table:number-columns-repeated="16379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27]+53" office:value-type="float" office:value="1431" calcext:value-type="float">
            <text:p>1431</text:p>
          </table:table-cell>
          <table:table-cell office:value-type="float" office:value="8640000" calcext:value-type="float">
            <text:p>8640000</text:p>
          </table:table-cell>
          <table:table-cell table:formula="of:=[.B28]/[.C28]" office:value-type="float" office:value="0.000165625" calcext:value-type="float">
            <text:p>0,00016562500000000000</text:p>
          </table:table-cell>
          <table:table-cell table:formula="of:=[.D29]-[.D28]" office:value-type="float" office:value="0.00000613425925925925" calcext:value-type="float">
            <text:p>0,00000613425925925925</text:p>
          </table:table-cell>
          <table:table-cell table:number-columns-repeated="16379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28]+53" office:value-type="float" office:value="1484" calcext:value-type="float">
            <text:p>1484</text:p>
          </table:table-cell>
          <table:table-cell office:value-type="float" office:value="8640000" calcext:value-type="float">
            <text:p>8640000</text:p>
          </table:table-cell>
          <table:table-cell table:formula="of:=[.B29]/[.C29]" office:value-type="float" office:value="0.000171759259259259" calcext:value-type="float">
            <text:p>0,00017175925925925900</text:p>
          </table:table-cell>
          <table:table-cell table:formula="of:=[.D30]-[.D29]" office:value-type="float" office:value="0.00000613425925925928" calcext:value-type="float">
            <text:p>0,00000613425925925928</text:p>
          </table:table-cell>
          <table:table-cell table:number-columns-repeated="16379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29]+53" office:value-type="float" office:value="1537" calcext:value-type="float">
            <text:p>1537</text:p>
          </table:table-cell>
          <table:table-cell office:value-type="float" office:value="8640000" calcext:value-type="float">
            <text:p>8640000</text:p>
          </table:table-cell>
          <table:table-cell table:formula="of:=[.B30]/[.C30]" office:value-type="float" office:value="0.000177893518518519" calcext:value-type="float">
            <text:p>0,00017789351851851900</text:p>
          </table:table-cell>
          <table:table-cell table:formula="of:=[.D31]-[.D30]" office:value-type="float" office:value="0.00000613425925925925" calcext:value-type="float">
            <text:p>0,00000613425925925925</text:p>
          </table:table-cell>
          <table:table-cell table:number-columns-repeated="16379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30]+53" office:value-type="float" office:value="1590" calcext:value-type="float">
            <text:p>1590</text:p>
          </table:table-cell>
          <table:table-cell office:value-type="float" office:value="8640000" calcext:value-type="float">
            <text:p>8640000</text:p>
          </table:table-cell>
          <table:table-cell table:formula="of:=[.B31]/[.C31]" office:value-type="float" office:value="0.000184027777777778" calcext:value-type="float">
            <text:p>0,00018402777777777800</text:p>
          </table:table-cell>
          <table:table-cell table:formula="of:=[.D32]-[.D31]" office:value-type="float" office:value="0.00000613425925925925" calcext:value-type="float">
            <text:p>0,00000613425925925925</text:p>
          </table:table-cell>
          <table:table-cell table:number-columns-repeated="16379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31]+53" office:value-type="float" office:value="1643" calcext:value-type="float">
            <text:p>1643</text:p>
          </table:table-cell>
          <table:table-cell office:value-type="float" office:value="8640000" calcext:value-type="float">
            <text:p>8640000</text:p>
          </table:table-cell>
          <table:table-cell table:formula="of:=[.B32]/[.C32]" office:value-type="float" office:value="0.000190162037037037" calcext:value-type="float">
            <text:p>0,00019016203703703700</text:p>
          </table:table-cell>
          <table:table-cell table:formula="of:=[.D33]-[.D32]" office:value-type="float" office:value="0.00000613425925925928" calcext:value-type="float">
            <text:p>0,00000613425925925928</text:p>
          </table:table-cell>
          <table:table-cell table:number-columns-repeated="16379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32]+53" office:value-type="float" office:value="1696" calcext:value-type="float">
            <text:p>1696</text:p>
          </table:table-cell>
          <table:table-cell office:value-type="float" office:value="8640000" calcext:value-type="float">
            <text:p>8640000</text:p>
          </table:table-cell>
          <table:table-cell table:formula="of:=[.B33]/[.C33]" office:value-type="float" office:value="0.000196296296296296" calcext:value-type="float">
            <text:p>0,00019629629629629600</text:p>
          </table:table-cell>
          <table:table-cell table:formula="of:=[.D34]-[.D33]" office:value-type="float" office:value="0.00000613425925925925" calcext:value-type="float">
            <text:p>0,00000613425925925925</text:p>
          </table:table-cell>
          <table:table-cell table:number-columns-repeated="16379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33]+53" office:value-type="float" office:value="1749" calcext:value-type="float">
            <text:p>1749</text:p>
          </table:table-cell>
          <table:table-cell office:value-type="float" office:value="8640000" calcext:value-type="float">
            <text:p>8640000</text:p>
          </table:table-cell>
          <table:table-cell table:formula="of:=[.B34]/[.C34]" office:value-type="float" office:value="0.000202430555555556" calcext:value-type="float">
            <text:p>0,00020243055555555600</text:p>
          </table:table-cell>
          <table:table-cell table:formula="of:=[.D35]-[.D34]" office:value-type="float" office:value="0.00000613425925925928" calcext:value-type="float">
            <text:p>0,00000613425925925928</text:p>
          </table:table-cell>
          <table:table-cell table:number-columns-repeated="16379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34]+53" office:value-type="float" office:value="1802" calcext:value-type="float">
            <text:p>1802</text:p>
          </table:table-cell>
          <table:table-cell office:value-type="float" office:value="8640000" calcext:value-type="float">
            <text:p>8640000</text:p>
          </table:table-cell>
          <table:table-cell table:formula="of:=[.B35]/[.C35]" office:value-type="float" office:value="0.000208564814814815" calcext:value-type="float">
            <text:p>0,00020856481481481500</text:p>
          </table:table-cell>
          <table:table-cell table:formula="of:=[.D36]-[.D35]" office:value-type="float" office:value="0.00000613425925925925" calcext:value-type="float">
            <text:p>0,00000613425925925925</text:p>
          </table:table-cell>
          <table:table-cell table:number-columns-repeated="16379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35]+53" office:value-type="float" office:value="1855" calcext:value-type="float">
            <text:p>1855</text:p>
          </table:table-cell>
          <table:table-cell office:value-type="float" office:value="8640000" calcext:value-type="float">
            <text:p>8640000</text:p>
          </table:table-cell>
          <table:table-cell table:formula="of:=[.B36]/[.C36]" office:value-type="float" office:value="0.000214699074074074" calcext:value-type="float">
            <text:p>0,00021469907407407400</text:p>
          </table:table-cell>
          <table:table-cell table:formula="of:=[.D37]-[.D36]" office:value-type="float" office:value="0.00000613425925925925" calcext:value-type="float">
            <text:p>0,00000613425925925925</text:p>
          </table:table-cell>
          <table:table-cell table:number-columns-repeated="16379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36]+53" office:value-type="float" office:value="1908" calcext:value-type="float">
            <text:p>1908</text:p>
          </table:table-cell>
          <table:table-cell office:value-type="float" office:value="8640000" calcext:value-type="float">
            <text:p>8640000</text:p>
          </table:table-cell>
          <table:table-cell table:formula="of:=[.B37]/[.C37]" office:value-type="float" office:value="0.000220833333333333" calcext:value-type="float">
            <text:p>0,00022083333333333300</text:p>
          </table:table-cell>
          <table:table-cell table:formula="of:=[.D38]-[.D37]" office:value-type="float" office:value="0.00000613425925925928" calcext:value-type="float">
            <text:p>0,00000613425925925928</text:p>
          </table:table-cell>
          <table:table-cell table:number-columns-repeated="16379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37]+53" office:value-type="float" office:value="1961" calcext:value-type="float">
            <text:p>1961</text:p>
          </table:table-cell>
          <table:table-cell office:value-type="float" office:value="8640000" calcext:value-type="float">
            <text:p>8640000</text:p>
          </table:table-cell>
          <table:table-cell table:formula="of:=[.B38]/[.C38]" office:value-type="float" office:value="0.000226967592592593" calcext:value-type="float">
            <text:p>0,00022696759259259300</text:p>
          </table:table-cell>
          <table:table-cell table:formula="of:=[.D39]-[.D38]" office:value-type="float" office:value="0.00000613425925925925" calcext:value-type="float">
            <text:p>0,00000613425925925925</text:p>
          </table:table-cell>
          <table:table-cell table:number-columns-repeated="16379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38]+53" office:value-type="float" office:value="2014" calcext:value-type="float">
            <text:p>2014</text:p>
          </table:table-cell>
          <table:table-cell office:value-type="float" office:value="8640000" calcext:value-type="float">
            <text:p>8640000</text:p>
          </table:table-cell>
          <table:table-cell table:formula="of:=[.B39]/[.C39]" office:value-type="float" office:value="0.000233101851851852" calcext:value-type="float">
            <text:p>0,00023310185185185200</text:p>
          </table:table-cell>
          <table:table-cell table:formula="of:=[.D40]-[.D39]" office:value-type="float" office:value="0.00000613425925925925" calcext:value-type="float">
            <text:p>0,00000613425925925925</text:p>
          </table:table-cell>
          <table:table-cell table:number-columns-repeated="16379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39]+53" office:value-type="float" office:value="2067" calcext:value-type="float">
            <text:p>2067</text:p>
          </table:table-cell>
          <table:table-cell office:value-type="float" office:value="8640000" calcext:value-type="float">
            <text:p>8640000</text:p>
          </table:table-cell>
          <table:table-cell table:formula="of:=[.B40]/[.C40]" office:value-type="float" office:value="0.000239236111111111" calcext:value-type="float">
            <text:p>0,00023923611111111100</text:p>
          </table:table-cell>
          <table:table-cell table:formula="of:=[.D41]-[.D40]" office:value-type="float" office:value="0.00000613425925925925" calcext:value-type="float">
            <text:p>0,00000613425925925925</text:p>
          </table:table-cell>
          <table:table-cell table:number-columns-repeated="16379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40]+53" office:value-type="float" office:value="2120" calcext:value-type="float">
            <text:p>2120</text:p>
          </table:table-cell>
          <table:table-cell office:value-type="float" office:value="8640000" calcext:value-type="float">
            <text:p>8640000</text:p>
          </table:table-cell>
          <table:table-cell table:formula="of:=[.B41]/[.C41]" office:value-type="float" office:value="0.00024537037037037" calcext:value-type="float">
            <text:p>0,00024537037037037000</text:p>
          </table:table-cell>
          <table:table-cell table:formula="of:=[.D42]-[.D41]" office:value-type="float" office:value="0.00000613425925925928" calcext:value-type="float">
            <text:p>0,00000613425925925928</text:p>
          </table:table-cell>
          <table:table-cell table:number-columns-repeated="16379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41]+53" office:value-type="float" office:value="2173" calcext:value-type="float">
            <text:p>2173</text:p>
          </table:table-cell>
          <table:table-cell office:value-type="float" office:value="8640000" calcext:value-type="float">
            <text:p>8640000</text:p>
          </table:table-cell>
          <table:table-cell table:formula="of:=[.B42]/[.C42]" office:value-type="float" office:value="0.00025150462962963" calcext:value-type="float">
            <text:p>0,00025150462962963000</text:p>
          </table:table-cell>
          <table:table-cell table:formula="of:=[.D43]-[.D42]" office:value-type="float" office:value="0.00000613425925925928" calcext:value-type="float">
            <text:p>0,00000613425925925928</text:p>
          </table:table-cell>
          <table:table-cell table:number-columns-repeated="16379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42]+53" office:value-type="float" office:value="2226" calcext:value-type="float">
            <text:p>2226</text:p>
          </table:table-cell>
          <table:table-cell office:value-type="float" office:value="8640000" calcext:value-type="float">
            <text:p>8640000</text:p>
          </table:table-cell>
          <table:table-cell table:formula="of:=[.B43]/[.C43]" office:value-type="float" office:value="0.000257638888888889" calcext:value-type="float">
            <text:p>0,00025763888888888900</text:p>
          </table:table-cell>
          <table:table-cell table:formula="of:=[.D44]-[.D43]" office:value-type="float" office:value="0.00000613425925925922" calcext:value-type="float">
            <text:p>0,00000613425925925922</text:p>
          </table:table-cell>
          <table:table-cell table:number-columns-repeated="16379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43]+53" office:value-type="float" office:value="2279" calcext:value-type="float">
            <text:p>2279</text:p>
          </table:table-cell>
          <table:table-cell office:value-type="float" office:value="8640000" calcext:value-type="float">
            <text:p>8640000</text:p>
          </table:table-cell>
          <table:table-cell table:formula="of:=[.B44]/[.C44]" office:value-type="float" office:value="0.000263773148148148" calcext:value-type="float">
            <text:p>0,00026377314814814800</text:p>
          </table:table-cell>
          <table:table-cell table:formula="of:=[.D45]-[.D44]" office:value-type="float" office:value="0.00000613425925925928" calcext:value-type="float">
            <text:p>0,00000613425925925928</text:p>
          </table:table-cell>
          <table:table-cell table:number-columns-repeated="16379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44]+53" office:value-type="float" office:value="2332" calcext:value-type="float">
            <text:p>2332</text:p>
          </table:table-cell>
          <table:table-cell office:value-type="float" office:value="8640000" calcext:value-type="float">
            <text:p>8640000</text:p>
          </table:table-cell>
          <table:table-cell table:formula="of:=[.B45]/[.C45]" office:value-type="float" office:value="0.000269907407407407" calcext:value-type="float">
            <text:p>0,00026990740740740700</text:p>
          </table:table-cell>
          <table:table-cell table:formula="of:=[.D46]-[.D45]" office:value-type="float" office:value="0.00000613425925925928" calcext:value-type="float">
            <text:p>0,00000613425925925928</text:p>
          </table:table-cell>
          <table:table-cell table:number-columns-repeated="16379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45]+53" office:value-type="float" office:value="2385" calcext:value-type="float">
            <text:p>2385</text:p>
          </table:table-cell>
          <table:table-cell office:value-type="float" office:value="8640000" calcext:value-type="float">
            <text:p>8640000</text:p>
          </table:table-cell>
          <table:table-cell table:formula="of:=[.B46]/[.C46]" office:value-type="float" office:value="0.000276041666666667" calcext:value-type="float">
            <text:p>0,00027604166666666700</text:p>
          </table:table-cell>
          <table:table-cell table:formula="of:=[.D47]-[.D46]" office:value-type="float" office:value="0.00000613425925925922" calcext:value-type="float">
            <text:p>0,00000613425925925922</text:p>
          </table:table-cell>
          <table:table-cell table:number-columns-repeated="16379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46]+53" office:value-type="float" office:value="2438" calcext:value-type="float">
            <text:p>2438</text:p>
          </table:table-cell>
          <table:table-cell office:value-type="float" office:value="8640000" calcext:value-type="float">
            <text:p>8640000</text:p>
          </table:table-cell>
          <table:table-cell table:formula="of:=[.B47]/[.C47]" office:value-type="float" office:value="0.000282175925925926" calcext:value-type="float">
            <text:p>0,00028217592592592600</text:p>
          </table:table-cell>
          <table:table-cell table:formula="of:=[.D48]-[.D47]" office:value-type="float" office:value="0.00000613425925925928" calcext:value-type="float">
            <text:p>0,00000613425925925928</text:p>
          </table:table-cell>
          <table:table-cell table:number-columns-repeated="16379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47]+53" office:value-type="float" office:value="2491" calcext:value-type="float">
            <text:p>2491</text:p>
          </table:table-cell>
          <table:table-cell office:value-type="float" office:value="8640000" calcext:value-type="float">
            <text:p>8640000</text:p>
          </table:table-cell>
          <table:table-cell table:formula="of:=[.B48]/[.C48]" office:value-type="float" office:value="0.000288310185185185" calcext:value-type="float">
            <text:p>0,00028831018518518500</text:p>
          </table:table-cell>
          <table:table-cell table:formula="of:=[.D49]-[.D48]" office:value-type="float" office:value="0.00000613425925925928" calcext:value-type="float">
            <text:p>0,00000613425925925928</text:p>
          </table:table-cell>
          <table:table-cell table:number-columns-repeated="16379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48]+53" office:value-type="float" office:value="2544" calcext:value-type="float">
            <text:p>2544</text:p>
          </table:table-cell>
          <table:table-cell office:value-type="float" office:value="8640000" calcext:value-type="float">
            <text:p>8640000</text:p>
          </table:table-cell>
          <table:table-cell table:formula="of:=[.B49]/[.C49]" office:value-type="float" office:value="0.000294444444444444" calcext:value-type="float">
            <text:p>0,00029444444444444400</text:p>
          </table:table-cell>
          <table:table-cell table:formula="of:=[.D50]-[.D49]" office:value-type="float" office:value="0.00000613425925925928" calcext:value-type="float">
            <text:p>0,00000613425925925928</text:p>
          </table:table-cell>
          <table:table-cell table:number-columns-repeated="16379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49]+53" office:value-type="float" office:value="2597" calcext:value-type="float">
            <text:p>2597</text:p>
          </table:table-cell>
          <table:table-cell office:value-type="float" office:value="8640000" calcext:value-type="float">
            <text:p>8640000</text:p>
          </table:table-cell>
          <table:table-cell table:formula="of:=[.B50]/[.C50]" office:value-type="float" office:value="0.000300578703703704" calcext:value-type="float">
            <text:p>0,00030057870370370400</text:p>
          </table:table-cell>
          <table:table-cell table:formula="of:=[.D51]-[.D50]" office:value-type="float" office:value="0.00000613425925925922" calcext:value-type="float">
            <text:p>0,00000613425925925922</text:p>
          </table:table-cell>
          <table:table-cell table:number-columns-repeated="16379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50]+53" office:value-type="float" office:value="2650" calcext:value-type="float">
            <text:p>2650</text:p>
          </table:table-cell>
          <table:table-cell office:value-type="float" office:value="8640000" calcext:value-type="float">
            <text:p>8640000</text:p>
          </table:table-cell>
          <table:table-cell table:formula="of:=[.B51]/[.C51]" office:value-type="float" office:value="0.000306712962962963" calcext:value-type="float">
            <text:p>0,00030671296296296300</text:p>
          </table:table-cell>
          <table:table-cell table:formula="of:=[.D52]-[.D51]" office:value-type="float" office:value="0.00000613425925925928" calcext:value-type="float">
            <text:p>0,00000613425925925928</text:p>
          </table:table-cell>
          <table:table-cell table:number-columns-repeated="16379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B51]+53" office:value-type="float" office:value="2703" calcext:value-type="float">
            <text:p>2703</text:p>
          </table:table-cell>
          <table:table-cell office:value-type="float" office:value="8640000" calcext:value-type="float">
            <text:p>8640000</text:p>
          </table:table-cell>
          <table:table-cell table:formula="of:=[.B52]/[.C52]" office:value-type="float" office:value="0.000312847222222222" calcext:value-type="float">
            <text:p>0,00031284722222222200</text:p>
          </table:table-cell>
          <table:table-cell table:formula="of:=[.D53]-[.D52]" office:value-type="float" office:value="0.00000613425925925928" calcext:value-type="float">
            <text:p>0,00000613425925925928</text:p>
          </table:table-cell>
          <table:table-cell table:number-columns-repeated="16379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B52]+53" office:value-type="float" office:value="2756" calcext:value-type="float">
            <text:p>2756</text:p>
          </table:table-cell>
          <table:table-cell office:value-type="float" office:value="8640000" calcext:value-type="float">
            <text:p>8640000</text:p>
          </table:table-cell>
          <table:table-cell table:formula="of:=[.B53]/[.C53]" office:value-type="float" office:value="0.000318981481481482" calcext:value-type="float">
            <text:p>0,00031898148148148200</text:p>
          </table:table-cell>
          <table:table-cell table:formula="of:=[.D54]-[.D53]" office:value-type="float" office:value="0.00000613425925925922" calcext:value-type="float">
            <text:p>0,00000613425925925922</text:p>
          </table:table-cell>
          <table:table-cell table:number-columns-repeated="16379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B53]+53" office:value-type="float" office:value="2809" calcext:value-type="float">
            <text:p>2809</text:p>
          </table:table-cell>
          <table:table-cell office:value-type="float" office:value="8640000" calcext:value-type="float">
            <text:p>8640000</text:p>
          </table:table-cell>
          <table:table-cell table:formula="of:=[.B54]/[.C54]" office:value-type="float" office:value="0.000325115740740741" calcext:value-type="float">
            <text:p>0,00032511574074074100</text:p>
          </table:table-cell>
          <table:table-cell table:formula="of:=[.D55]-[.D54]" office:value-type="float" office:value="0.00000613425925925928" calcext:value-type="float">
            <text:p>0,00000613425925925928</text:p>
          </table:table-cell>
          <table:table-cell table:number-columns-repeated="16379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B54]+53" office:value-type="float" office:value="2862" calcext:value-type="float">
            <text:p>2862</text:p>
          </table:table-cell>
          <table:table-cell office:value-type="float" office:value="8640000" calcext:value-type="float">
            <text:p>8640000</text:p>
          </table:table-cell>
          <table:table-cell table:formula="of:=[.B55]/[.C55]" office:value-type="float" office:value="0.00033125" calcext:value-type="float">
            <text:p>0,00033125000000000000</text:p>
          </table:table-cell>
          <table:table-cell table:formula="of:=[.D56]-[.D55]" office:value-type="float" office:value="0.00000613425925925928" calcext:value-type="float">
            <text:p>0,00000613425925925928</text:p>
          </table:table-cell>
          <table:table-cell table:number-columns-repeated="16379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B55]+53" office:value-type="float" office:value="2915" calcext:value-type="float">
            <text:p>2915</text:p>
          </table:table-cell>
          <table:table-cell office:value-type="float" office:value="8640000" calcext:value-type="float">
            <text:p>8640000</text:p>
          </table:table-cell>
          <table:table-cell table:formula="of:=[.B56]/[.C56]" office:value-type="float" office:value="0.000337384259259259" calcext:value-type="float">
            <text:p>0,00033738425925925900</text:p>
          </table:table-cell>
          <table:table-cell table:formula="of:=[.D57]-[.D56]" office:value-type="float" office:value="0.00000613425925925922" calcext:value-type="float">
            <text:p>0,00000613425925925922</text:p>
          </table:table-cell>
          <table:table-cell table:number-columns-repeated="16379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B56]+53" office:value-type="float" office:value="2968" calcext:value-type="float">
            <text:p>2968</text:p>
          </table:table-cell>
          <table:table-cell office:value-type="float" office:value="8640000" calcext:value-type="float">
            <text:p>8640000</text:p>
          </table:table-cell>
          <table:table-cell table:formula="of:=[.B57]/[.C57]" office:value-type="float" office:value="0.000343518518518519" calcext:value-type="float">
            <text:p>0,00034351851851851900</text:p>
          </table:table-cell>
          <table:table-cell table:formula="of:=[.D58]-[.D57]" office:value-type="float" office:value="0.00000613425925925928" calcext:value-type="float">
            <text:p>0,00000613425925925928</text:p>
          </table:table-cell>
          <table:table-cell table:number-columns-repeated="16379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B57]+53" office:value-type="float" office:value="3021" calcext:value-type="float">
            <text:p>3021</text:p>
          </table:table-cell>
          <table:table-cell office:value-type="float" office:value="8640000" calcext:value-type="float">
            <text:p>8640000</text:p>
          </table:table-cell>
          <table:table-cell table:formula="of:=[.B58]/[.C58]" office:value-type="float" office:value="0.000349652777777778" calcext:value-type="float">
            <text:p>0,00034965277777777800</text:p>
          </table:table-cell>
          <table:table-cell table:formula="of:=[.D59]-[.D58]" office:value-type="float" office:value="0.00000613425925925928" calcext:value-type="float">
            <text:p>0,00000613425925925928</text:p>
          </table:table-cell>
          <table:table-cell table:number-columns-repeated="16379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B58]+53" office:value-type="float" office:value="3074" calcext:value-type="float">
            <text:p>3074</text:p>
          </table:table-cell>
          <table:table-cell office:value-type="float" office:value="8640000" calcext:value-type="float">
            <text:p>8640000</text:p>
          </table:table-cell>
          <table:table-cell table:formula="of:=[.B59]/[.C59]" office:value-type="float" office:value="0.000355787037037037" calcext:value-type="float">
            <text:p>0,00035578703703703700</text:p>
          </table:table-cell>
          <table:table-cell table:formula="of:=[.D60]-[.D59]" office:value-type="float" office:value="0.00000613425925925922" calcext:value-type="float">
            <text:p>0,00000613425925925922</text:p>
          </table:table-cell>
          <table:table-cell table:number-columns-repeated="16379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B59]+53" office:value-type="float" office:value="3127" calcext:value-type="float">
            <text:p>3127</text:p>
          </table:table-cell>
          <table:table-cell office:value-type="float" office:value="8640000" calcext:value-type="float">
            <text:p>8640000</text:p>
          </table:table-cell>
          <table:table-cell table:formula="of:=[.B60]/[.C60]" office:value-type="float" office:value="0.000361921296296296" calcext:value-type="float">
            <text:p>0,00036192129629629600</text:p>
          </table:table-cell>
          <table:table-cell table:formula="of:=[.D61]-[.D60]" office:value-type="float" office:value="0.00000613425925925928" calcext:value-type="float">
            <text:p>0,00000613425925925928</text:p>
          </table:table-cell>
          <table:table-cell table:number-columns-repeated="16379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B60]+53" office:value-type="float" office:value="3180" calcext:value-type="float">
            <text:p>3180</text:p>
          </table:table-cell>
          <table:table-cell office:value-type="float" office:value="8640000" calcext:value-type="float">
            <text:p>8640000</text:p>
          </table:table-cell>
          <table:table-cell table:formula="of:=[.B61]/[.C61]" office:value-type="float" office:value="0.000368055555555556" calcext:value-type="float">
            <text:p>0,00036805555555555600</text:p>
          </table:table-cell>
          <table:table-cell table:formula="of:=[.D62]-[.D61]" office:value-type="float" office:value="0.00000613425925925928" calcext:value-type="float">
            <text:p>0,00000613425925925928</text:p>
          </table:table-cell>
          <table:table-cell table:number-columns-repeated="16379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B61]+53" office:value-type="float" office:value="3233" calcext:value-type="float">
            <text:p>3233</text:p>
          </table:table-cell>
          <table:table-cell office:value-type="float" office:value="8640000" calcext:value-type="float">
            <text:p>8640000</text:p>
          </table:table-cell>
          <table:table-cell table:formula="of:=[.B62]/[.C62]" office:value-type="float" office:value="0.000374189814814815" calcext:value-type="float">
            <text:p>0,00037418981481481500</text:p>
          </table:table-cell>
          <table:table-cell table:formula="of:=[.D63]-[.D62]" office:value-type="float" office:value="0.00000613425925925922" calcext:value-type="float">
            <text:p>0,00000613425925925922</text:p>
          </table:table-cell>
          <table:table-cell table:number-columns-repeated="16379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B62]+53" office:value-type="float" office:value="3286" calcext:value-type="float">
            <text:p>3286</text:p>
          </table:table-cell>
          <table:table-cell office:value-type="float" office:value="8640000" calcext:value-type="float">
            <text:p>8640000</text:p>
          </table:table-cell>
          <table:table-cell table:formula="of:=[.B63]/[.C63]" office:value-type="float" office:value="0.000380324074074074" calcext:value-type="float">
            <text:p>0,00038032407407407400</text:p>
          </table:table-cell>
          <table:table-cell table:formula="of:=[.D64]-[.D63]" office:value-type="float" office:value="0.00000613425925925928" calcext:value-type="float">
            <text:p>0,00000613425925925928</text:p>
          </table:table-cell>
          <table:table-cell table:number-columns-repeated="16379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B63]+53" office:value-type="float" office:value="3339" calcext:value-type="float">
            <text:p>3339</text:p>
          </table:table-cell>
          <table:table-cell office:value-type="float" office:value="8640000" calcext:value-type="float">
            <text:p>8640000</text:p>
          </table:table-cell>
          <table:table-cell table:formula="of:=[.B64]/[.C64]" office:value-type="float" office:value="0.000386458333333333" calcext:value-type="float">
            <text:p>0,00038645833333333300</text:p>
          </table:table-cell>
          <table:table-cell table:formula="of:=[.D65]-[.D64]" office:value-type="float" office:value="0.00000613425925925928" calcext:value-type="float">
            <text:p>0,00000613425925925928</text:p>
          </table:table-cell>
          <table:table-cell table:number-columns-repeated="16379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B64]+53" office:value-type="float" office:value="3392" calcext:value-type="float">
            <text:p>3392</text:p>
          </table:table-cell>
          <table:table-cell office:value-type="float" office:value="8640000" calcext:value-type="float">
            <text:p>8640000</text:p>
          </table:table-cell>
          <table:table-cell table:formula="of:=[.B65]/[.C65]" office:value-type="float" office:value="0.000392592592592593" calcext:value-type="float">
            <text:p>0,00039259259259259300</text:p>
          </table:table-cell>
          <table:table-cell table:formula="of:=[.D66]-[.D65]" office:value-type="float" office:value="0.00000613425925925928" calcext:value-type="float">
            <text:p>0,00000613425925925928</text:p>
          </table:table-cell>
          <table:table-cell table:number-columns-repeated="16379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B65]+53" office:value-type="float" office:value="3445" calcext:value-type="float">
            <text:p>3445</text:p>
          </table:table-cell>
          <table:table-cell office:value-type="float" office:value="8640000" calcext:value-type="float">
            <text:p>8640000</text:p>
          </table:table-cell>
          <table:table-cell table:formula="of:=[.B66]/[.C66]" office:value-type="float" office:value="0.000398726851851852" calcext:value-type="float">
            <text:p>0,00039872685185185200</text:p>
          </table:table-cell>
          <table:table-cell table:formula="of:=[.D67]-[.D66]" office:value-type="float" office:value="0.00000613425925925922" calcext:value-type="float">
            <text:p>0,00000613425925925922</text:p>
          </table:table-cell>
          <table:table-cell table:number-columns-repeated="16379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B66]+53" office:value-type="float" office:value="3498" calcext:value-type="float">
            <text:p>3498</text:p>
          </table:table-cell>
          <table:table-cell office:value-type="float" office:value="8640000" calcext:value-type="float">
            <text:p>8640000</text:p>
          </table:table-cell>
          <table:table-cell table:formula="of:=[.B67]/[.C67]" office:value-type="float" office:value="0.000404861111111111" calcext:value-type="float">
            <text:p>0,00040486111111111100</text:p>
          </table:table-cell>
          <table:table-cell table:formula="of:=[.D68]-[.D67]" office:value-type="float" office:value="0.00000613425925925928" calcext:value-type="float">
            <text:p>0,00000613425925925928</text:p>
          </table:table-cell>
          <table:table-cell table:number-columns-repeated="16379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B67]+53" office:value-type="float" office:value="3551" calcext:value-type="float">
            <text:p>3551</text:p>
          </table:table-cell>
          <table:table-cell office:value-type="float" office:value="8640000" calcext:value-type="float">
            <text:p>8640000</text:p>
          </table:table-cell>
          <table:table-cell table:formula="of:=[.B68]/[.C68]" office:value-type="float" office:value="0.00041099537037037" calcext:value-type="float">
            <text:p>0,00041099537037037000</text:p>
          </table:table-cell>
          <table:table-cell table:formula="of:=[.D69]-[.D68]" office:value-type="float" office:value="0.00000613425925925928" calcext:value-type="float">
            <text:p>0,00000613425925925928</text:p>
          </table:table-cell>
          <table:table-cell table:number-columns-repeated="16379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B68]+53" office:value-type="float" office:value="3604" calcext:value-type="float">
            <text:p>3604</text:p>
          </table:table-cell>
          <table:table-cell office:value-type="float" office:value="8640000" calcext:value-type="float">
            <text:p>8640000</text:p>
          </table:table-cell>
          <table:table-cell table:formula="of:=[.B69]/[.C69]" office:value-type="float" office:value="0.00041712962962963" calcext:value-type="float">
            <text:p>0,00041712962962963000</text:p>
          </table:table-cell>
          <table:table-cell table:formula="of:=[.D70]-[.D69]" office:value-type="float" office:value="0.00000613425925925922" calcext:value-type="float">
            <text:p>0,00000613425925925922</text:p>
          </table:table-cell>
          <table:table-cell table:number-columns-repeated="16379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B69]+53" office:value-type="float" office:value="3657" calcext:value-type="float">
            <text:p>3657</text:p>
          </table:table-cell>
          <table:table-cell office:value-type="float" office:value="8640000" calcext:value-type="float">
            <text:p>8640000</text:p>
          </table:table-cell>
          <table:table-cell table:formula="of:=[.B70]/[.C70]" office:value-type="float" office:value="0.000423263888888889" calcext:value-type="float">
            <text:p>0,00042326388888888900</text:p>
          </table:table-cell>
          <table:table-cell table:formula="of:=[.D71]-[.D70]" office:value-type="float" office:value="0.00000613425925925928" calcext:value-type="float">
            <text:p>0,00000613425925925928</text:p>
          </table:table-cell>
          <table:table-cell table:number-columns-repeated="16379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B70]+53" office:value-type="float" office:value="3710" calcext:value-type="float">
            <text:p>3710</text:p>
          </table:table-cell>
          <table:table-cell office:value-type="float" office:value="8640000" calcext:value-type="float">
            <text:p>8640000</text:p>
          </table:table-cell>
          <table:table-cell table:formula="of:=[.B71]/[.C71]" office:value-type="float" office:value="0.000429398148148148" calcext:value-type="float">
            <text:p>0,00042939814814814800</text:p>
          </table:table-cell>
          <table:table-cell table:formula="of:=[.D72]-[.D71]" office:value-type="float" office:value="0.00000613425925925928" calcext:value-type="float">
            <text:p>0,00000613425925925928</text:p>
          </table:table-cell>
          <table:table-cell table:number-columns-repeated="16379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B71]+53" office:value-type="float" office:value="3763" calcext:value-type="float">
            <text:p>3763</text:p>
          </table:table-cell>
          <table:table-cell office:value-type="float" office:value="8640000" calcext:value-type="float">
            <text:p>8640000</text:p>
          </table:table-cell>
          <table:table-cell table:formula="of:=[.B72]/[.C72]" office:value-type="float" office:value="0.000435532407407407" calcext:value-type="float">
            <text:p>0,00043553240740740700</text:p>
          </table:table-cell>
          <table:table-cell table:formula="of:=[.D73]-[.D72]" office:value-type="float" office:value="0.00000613425925925922" calcext:value-type="float">
            <text:p>0,00000613425925925922</text:p>
          </table:table-cell>
          <table:table-cell table:number-columns-repeated="16379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B72]+53" office:value-type="float" office:value="3816" calcext:value-type="float">
            <text:p>3816</text:p>
          </table:table-cell>
          <table:table-cell office:value-type="float" office:value="8640000" calcext:value-type="float">
            <text:p>8640000</text:p>
          </table:table-cell>
          <table:table-cell table:formula="of:=[.B73]/[.C73]" office:value-type="float" office:value="0.000441666666666667" calcext:value-type="float">
            <text:p>0,00044166666666666700</text:p>
          </table:table-cell>
          <table:table-cell table:formula="of:=[.D74]-[.D73]" office:value-type="float" office:value="0.00000613425925925928" calcext:value-type="float">
            <text:p>0,00000613425925925928</text:p>
          </table:table-cell>
          <table:table-cell table:number-columns-repeated="16379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B73]+53" office:value-type="float" office:value="3869" calcext:value-type="float">
            <text:p>3869</text:p>
          </table:table-cell>
          <table:table-cell office:value-type="float" office:value="8640000" calcext:value-type="float">
            <text:p>8640000</text:p>
          </table:table-cell>
          <table:table-cell table:formula="of:=[.B74]/[.C74]" office:value-type="float" office:value="0.000447800925925926" calcext:value-type="float">
            <text:p>0,00044780092592592600</text:p>
          </table:table-cell>
          <table:table-cell table:formula="of:=[.D75]-[.D74]" office:value-type="float" office:value="0.00000613425925925928" calcext:value-type="float">
            <text:p>0,00000613425925925928</text:p>
          </table:table-cell>
          <table:table-cell table:number-columns-repeated="16379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B74]+53" office:value-type="float" office:value="3922" calcext:value-type="float">
            <text:p>3922</text:p>
          </table:table-cell>
          <table:table-cell office:value-type="float" office:value="8640000" calcext:value-type="float">
            <text:p>8640000</text:p>
          </table:table-cell>
          <table:table-cell table:formula="of:=[.B75]/[.C75]" office:value-type="float" office:value="0.000453935185185185" calcext:value-type="float">
            <text:p>0,00045393518518518500</text:p>
          </table:table-cell>
          <table:table-cell table:formula="of:=[.D76]-[.D75]" office:value-type="float" office:value="0.00000613425925925922" calcext:value-type="float">
            <text:p>0,00000613425925925922</text:p>
          </table:table-cell>
          <table:table-cell table:number-columns-repeated="16379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B75]+53" office:value-type="float" office:value="3975" calcext:value-type="float">
            <text:p>3975</text:p>
          </table:table-cell>
          <table:table-cell office:value-type="float" office:value="8640000" calcext:value-type="float">
            <text:p>8640000</text:p>
          </table:table-cell>
          <table:table-cell table:formula="of:=[.B76]/[.C76]" office:value-type="float" office:value="0.000460069444444444" calcext:value-type="float">
            <text:p>0,00046006944444444400</text:p>
          </table:table-cell>
          <table:table-cell table:formula="of:=[.D77]-[.D76]" office:value-type="float" office:value="0.00000613425925925928" calcext:value-type="float">
            <text:p>0,00000613425925925928</text:p>
          </table:table-cell>
          <table:table-cell table:number-columns-repeated="16379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B76]+53" office:value-type="float" office:value="4028" calcext:value-type="float">
            <text:p>4028</text:p>
          </table:table-cell>
          <table:table-cell office:value-type="float" office:value="8640000" calcext:value-type="float">
            <text:p>8640000</text:p>
          </table:table-cell>
          <table:table-cell table:formula="of:=[.B77]/[.C77]" office:value-type="float" office:value="0.000466203703703704" calcext:value-type="float">
            <text:p>0,00046620370370370400</text:p>
          </table:table-cell>
          <table:table-cell table:formula="of:=[.D78]-[.D77]" office:value-type="float" office:value="0.00000613425925925928" calcext:value-type="float">
            <text:p>0,00000613425925925928</text:p>
          </table:table-cell>
          <table:table-cell table:number-columns-repeated="16379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B77]+53" office:value-type="float" office:value="4081" calcext:value-type="float">
            <text:p>4081</text:p>
          </table:table-cell>
          <table:table-cell office:value-type="float" office:value="8640000" calcext:value-type="float">
            <text:p>8640000</text:p>
          </table:table-cell>
          <table:table-cell table:formula="of:=[.B78]/[.C78]" office:value-type="float" office:value="0.000472337962962963" calcext:value-type="float">
            <text:p>0,00047233796296296300</text:p>
          </table:table-cell>
          <table:table-cell table:formula="of:=[.D79]-[.D78]" office:value-type="float" office:value="0.00000613425925925922" calcext:value-type="float">
            <text:p>0,00000613425925925922</text:p>
          </table:table-cell>
          <table:table-cell table:number-columns-repeated="16379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B78]+53" office:value-type="float" office:value="4134" calcext:value-type="float">
            <text:p>4134</text:p>
          </table:table-cell>
          <table:table-cell office:value-type="float" office:value="8640000" calcext:value-type="float">
            <text:p>8640000</text:p>
          </table:table-cell>
          <table:table-cell table:formula="of:=[.B79]/[.C79]" office:value-type="float" office:value="0.000478472222222222" calcext:value-type="float">
            <text:p>0,00047847222222222200</text:p>
          </table:table-cell>
          <table:table-cell table:formula="of:=[.D80]-[.D79]" office:value-type="float" office:value="0.00000613425925925928" calcext:value-type="float">
            <text:p>0,00000613425925925928</text:p>
          </table:table-cell>
          <table:table-cell table:number-columns-repeated="16379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B79]+53" office:value-type="float" office:value="4187" calcext:value-type="float">
            <text:p>4187</text:p>
          </table:table-cell>
          <table:table-cell office:value-type="float" office:value="8640000" calcext:value-type="float">
            <text:p>8640000</text:p>
          </table:table-cell>
          <table:table-cell table:formula="of:=[.B80]/[.C80]" office:value-type="float" office:value="0.000484606481481482" calcext:value-type="float">
            <text:p>0,00048460648148148100</text:p>
          </table:table-cell>
          <table:table-cell table:formula="of:=[.D81]-[.D80]" office:value-type="float" office:value="0.00000613425925925922" calcext:value-type="float">
            <text:p>0,00000613425925925922</text:p>
          </table:table-cell>
          <table:table-cell table:number-columns-repeated="16379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B80]+53" office:value-type="float" office:value="4240" calcext:value-type="float">
            <text:p>4240</text:p>
          </table:table-cell>
          <table:table-cell office:value-type="float" office:value="8640000" calcext:value-type="float">
            <text:p>8640000</text:p>
          </table:table-cell>
          <table:table-cell table:formula="of:=[.B81]/[.C81]" office:value-type="float" office:value="0.000490740740740741" calcext:value-type="float">
            <text:p>0,00049074074074074100</text:p>
          </table:table-cell>
          <table:table-cell table:formula="of:=[.D82]-[.D81]" office:value-type="float" office:value="0.00000613425925925933" calcext:value-type="float">
            <text:p>0,00000613425925925933</text:p>
          </table:table-cell>
          <table:table-cell table:number-columns-repeated="16379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B81]+53" office:value-type="float" office:value="4293" calcext:value-type="float">
            <text:p>4293</text:p>
          </table:table-cell>
          <table:table-cell office:value-type="float" office:value="8640000" calcext:value-type="float">
            <text:p>8640000</text:p>
          </table:table-cell>
          <table:table-cell table:formula="of:=[.B82]/[.C82]" office:value-type="float" office:value="0.000496875" calcext:value-type="float">
            <text:p>0,00049687500000000000</text:p>
          </table:table-cell>
          <table:table-cell table:formula="of:=[.D83]-[.D82]" office:value-type="float" office:value="0.00000613425925925922" calcext:value-type="float">
            <text:p>0,00000613425925925922</text:p>
          </table:table-cell>
          <table:table-cell table:number-columns-repeated="16379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B82]+53" office:value-type="float" office:value="4346" calcext:value-type="float">
            <text:p>4346</text:p>
          </table:table-cell>
          <table:table-cell office:value-type="float" office:value="8640000" calcext:value-type="float">
            <text:p>8640000</text:p>
          </table:table-cell>
          <table:table-cell table:formula="of:=[.B83]/[.C83]" office:value-type="float" office:value="0.000503009259259259" calcext:value-type="float">
            <text:p>0,00050300925925925900</text:p>
          </table:table-cell>
          <table:table-cell table:formula="of:=[.D84]-[.D83]" office:value-type="float" office:value="0.00000613425925925922" calcext:value-type="float">
            <text:p>0,00000613425925925922</text:p>
          </table:table-cell>
          <table:table-cell table:number-columns-repeated="16379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B83]+53" office:value-type="float" office:value="4399" calcext:value-type="float">
            <text:p>4399</text:p>
          </table:table-cell>
          <table:table-cell office:value-type="float" office:value="8640000" calcext:value-type="float">
            <text:p>8640000</text:p>
          </table:table-cell>
          <table:table-cell table:formula="of:=[.B84]/[.C84]" office:value-type="float" office:value="0.000509143518518519" calcext:value-type="float">
            <text:p>0,00050914351851851900</text:p>
          </table:table-cell>
          <table:table-cell table:formula="of:=[.D85]-[.D84]" office:value-type="float" office:value="0.00000613425925925933" calcext:value-type="float">
            <text:p>0,00000613425925925933</text:p>
          </table:table-cell>
          <table:table-cell table:number-columns-repeated="16379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B84]+53" office:value-type="float" office:value="4452" calcext:value-type="float">
            <text:p>4452</text:p>
          </table:table-cell>
          <table:table-cell office:value-type="float" office:value="8640000" calcext:value-type="float">
            <text:p>8640000</text:p>
          </table:table-cell>
          <table:table-cell table:formula="of:=[.B85]/[.C85]" office:value-type="float" office:value="0.000515277777777778" calcext:value-type="float">
            <text:p>0,00051527777777777800</text:p>
          </table:table-cell>
          <table:table-cell table:formula="of:=[.D86]-[.D85]" office:value-type="float" office:value="0.00000613425925925922" calcext:value-type="float">
            <text:p>0,00000613425925925922</text:p>
          </table:table-cell>
          <table:table-cell table:number-columns-repeated="16379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B85]+53" office:value-type="float" office:value="4505" calcext:value-type="float">
            <text:p>4505</text:p>
          </table:table-cell>
          <table:table-cell office:value-type="float" office:value="8640000" calcext:value-type="float">
            <text:p>8640000</text:p>
          </table:table-cell>
          <table:table-cell table:formula="of:=[.B86]/[.C86]" office:value-type="float" office:value="0.000521412037037037" calcext:value-type="float">
            <text:p>0,00052141203703703700</text:p>
          </table:table-cell>
          <table:table-cell table:formula="of:=[.D87]-[.D86]" office:value-type="float" office:value="0.00000613425925925922" calcext:value-type="float">
            <text:p>0,00000613425925925922</text:p>
          </table:table-cell>
          <table:table-cell table:number-columns-repeated="16379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B86]+53" office:value-type="float" office:value="4558" calcext:value-type="float">
            <text:p>4558</text:p>
          </table:table-cell>
          <table:table-cell office:value-type="float" office:value="8640000" calcext:value-type="float">
            <text:p>8640000</text:p>
          </table:table-cell>
          <table:table-cell table:formula="of:=[.B87]/[.C87]" office:value-type="float" office:value="0.000527546296296296" calcext:value-type="float">
            <text:p>0,00052754629629629600</text:p>
          </table:table-cell>
          <table:table-cell table:formula="of:=[.D88]-[.D87]" office:value-type="float" office:value="0.00000613425925925933" calcext:value-type="float">
            <text:p>0,00000613425925925933</text:p>
          </table:table-cell>
          <table:table-cell table:number-columns-repeated="16379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B87]+53" office:value-type="float" office:value="4611" calcext:value-type="float">
            <text:p>4611</text:p>
          </table:table-cell>
          <table:table-cell office:value-type="float" office:value="8640000" calcext:value-type="float">
            <text:p>8640000</text:p>
          </table:table-cell>
          <table:table-cell table:formula="of:=[.B88]/[.C88]" office:value-type="float" office:value="0.000533680555555556" calcext:value-type="float">
            <text:p>0,00053368055555555600</text:p>
          </table:table-cell>
          <table:table-cell table:formula="of:=[.D89]-[.D88]" office:value-type="float" office:value="0.00000613425925925922" calcext:value-type="float">
            <text:p>0,00000613425925925922</text:p>
          </table:table-cell>
          <table:table-cell table:number-columns-repeated="16379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B88]+53" office:value-type="float" office:value="4664" calcext:value-type="float">
            <text:p>4664</text:p>
          </table:table-cell>
          <table:table-cell office:value-type="float" office:value="8640000" calcext:value-type="float">
            <text:p>8640000</text:p>
          </table:table-cell>
          <table:table-cell table:formula="of:=[.B89]/[.C89]" office:value-type="float" office:value="0.000539814814814815" calcext:value-type="float">
            <text:p>0,00053981481481481500</text:p>
          </table:table-cell>
          <table:table-cell table:formula="of:=[.D90]-[.D89]" office:value-type="float" office:value="0.00000613425925925922" calcext:value-type="float">
            <text:p>0,00000613425925925922</text:p>
          </table:table-cell>
          <table:table-cell table:number-columns-repeated="16379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B89]+53" office:value-type="float" office:value="4717" calcext:value-type="float">
            <text:p>4717</text:p>
          </table:table-cell>
          <table:table-cell office:value-type="float" office:value="8640000" calcext:value-type="float">
            <text:p>8640000</text:p>
          </table:table-cell>
          <table:table-cell table:formula="of:=[.B90]/[.C90]" office:value-type="float" office:value="0.000545949074074074" calcext:value-type="float">
            <text:p>0,00054594907407407400</text:p>
          </table:table-cell>
          <table:table-cell table:formula="of:=[.D91]-[.D90]" office:value-type="float" office:value="0.00000613425925925933" calcext:value-type="float">
            <text:p>0,00000613425925925933</text:p>
          </table:table-cell>
          <table:table-cell table:number-columns-repeated="16379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B90]+53" office:value-type="float" office:value="4770" calcext:value-type="float">
            <text:p>4770</text:p>
          </table:table-cell>
          <table:table-cell office:value-type="float" office:value="8640000" calcext:value-type="float">
            <text:p>8640000</text:p>
          </table:table-cell>
          <table:table-cell table:formula="of:=[.B91]/[.C91]" office:value-type="float" office:value="0.000552083333333333" calcext:value-type="float">
            <text:p>0,00055208333333333300</text:p>
          </table:table-cell>
          <table:table-cell table:formula="of:=[.D92]-[.D91]" office:value-type="float" office:value="0.00000613425925925922" calcext:value-type="float">
            <text:p>0,00000613425925925922</text:p>
          </table:table-cell>
          <table:table-cell table:number-columns-repeated="16379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B91]+53" office:value-type="float" office:value="4823" calcext:value-type="float">
            <text:p>4823</text:p>
          </table:table-cell>
          <table:table-cell office:value-type="float" office:value="8640000" calcext:value-type="float">
            <text:p>8640000</text:p>
          </table:table-cell>
          <table:table-cell table:formula="of:=[.B92]/[.C92]" office:value-type="float" office:value="0.000558217592592593" calcext:value-type="float">
            <text:p>0,00055821759259259300</text:p>
          </table:table-cell>
          <table:table-cell table:formula="of:=[.D93]-[.D92]" office:value-type="float" office:value="0.00000613425925925922" calcext:value-type="float">
            <text:p>0,00000613425925925922</text:p>
          </table:table-cell>
          <table:table-cell table:number-columns-repeated="16379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B92]+53" office:value-type="float" office:value="4876" calcext:value-type="float">
            <text:p>4876</text:p>
          </table:table-cell>
          <table:table-cell office:value-type="float" office:value="8640000" calcext:value-type="float">
            <text:p>8640000</text:p>
          </table:table-cell>
          <table:table-cell table:formula="of:=[.B93]/[.C93]" office:value-type="float" office:value="0.000564351851851852" calcext:value-type="float">
            <text:p>0,00056435185185185200</text:p>
          </table:table-cell>
          <table:table-cell table:formula="of:=[.D94]-[.D93]" office:value-type="float" office:value="0.00000613425925925933" calcext:value-type="float">
            <text:p>0,00000613425925925933</text:p>
          </table:table-cell>
          <table:table-cell table:number-columns-repeated="16379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B93]+53" office:value-type="float" office:value="4929" calcext:value-type="float">
            <text:p>4929</text:p>
          </table:table-cell>
          <table:table-cell office:value-type="float" office:value="8640000" calcext:value-type="float">
            <text:p>8640000</text:p>
          </table:table-cell>
          <table:table-cell table:formula="of:=[.B94]/[.C94]" office:value-type="float" office:value="0.000570486111111111" calcext:value-type="float">
            <text:p>0,00057048611111111100</text:p>
          </table:table-cell>
          <table:table-cell table:formula="of:=[.D95]-[.D94]" office:value-type="float" office:value="0.00000613425925925922" calcext:value-type="float">
            <text:p>0,00000613425925925922</text:p>
          </table:table-cell>
          <table:table-cell table:number-columns-repeated="16379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B94]+53" office:value-type="float" office:value="4982" calcext:value-type="float">
            <text:p>4982</text:p>
          </table:table-cell>
          <table:table-cell office:value-type="float" office:value="8640000" calcext:value-type="float">
            <text:p>8640000</text:p>
          </table:table-cell>
          <table:table-cell table:formula="of:=[.B95]/[.C95]" office:value-type="float" office:value="0.00057662037037037" calcext:value-type="float">
            <text:p>0,00057662037037037000</text:p>
          </table:table-cell>
          <table:table-cell table:formula="of:=[.D96]-[.D95]" office:value-type="float" office:value="0.00000613425925925933" calcext:value-type="float">
            <text:p>0,00000613425925925933</text:p>
          </table:table-cell>
          <table:table-cell table:number-columns-repeated="16379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B95]+53" office:value-type="float" office:value="5035" calcext:value-type="float">
            <text:p>5035</text:p>
          </table:table-cell>
          <table:table-cell office:value-type="float" office:value="8640000" calcext:value-type="float">
            <text:p>8640000</text:p>
          </table:table-cell>
          <table:table-cell table:formula="of:=[.B96]/[.C96]" office:value-type="float" office:value="0.00058275462962963" calcext:value-type="float">
            <text:p>0,00058275462962963000</text:p>
          </table:table-cell>
          <table:table-cell table:formula="of:=[.D97]-[.D96]" office:value-type="float" office:value="0.00000613425925925922" calcext:value-type="float">
            <text:p>0,00000613425925925922</text:p>
          </table:table-cell>
          <table:table-cell table:number-columns-repeated="16379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B96]+53" office:value-type="float" office:value="5088" calcext:value-type="float">
            <text:p>5088</text:p>
          </table:table-cell>
          <table:table-cell office:value-type="float" office:value="8640000" calcext:value-type="float">
            <text:p>8640000</text:p>
          </table:table-cell>
          <table:table-cell table:formula="of:=[.B97]/[.C97]" office:value-type="float" office:value="0.000588888888888889" calcext:value-type="float">
            <text:p>0,00058888888888888900</text:p>
          </table:table-cell>
          <table:table-cell table:formula="of:=[.D98]-[.D97]" office:value-type="float" office:value="0.00000613425925925922" calcext:value-type="float">
            <text:p>0,00000613425925925922</text:p>
          </table:table-cell>
          <table:table-cell table:number-columns-repeated="16379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B97]+53" office:value-type="float" office:value="5141" calcext:value-type="float">
            <text:p>5141</text:p>
          </table:table-cell>
          <table:table-cell office:value-type="float" office:value="8640000" calcext:value-type="float">
            <text:p>8640000</text:p>
          </table:table-cell>
          <table:table-cell table:formula="of:=[.B98]/[.C98]" office:value-type="float" office:value="0.000595023148148148" calcext:value-type="float">
            <text:p>0,00059502314814814800</text:p>
          </table:table-cell>
          <table:table-cell table:formula="of:=[.D99]-[.D98]" office:value-type="float" office:value="0.00000613425925925933" calcext:value-type="float">
            <text:p>0,00000613425925925933</text:p>
          </table:table-cell>
          <table:table-cell table:number-columns-repeated="16379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B98]+53" office:value-type="float" office:value="5194" calcext:value-type="float">
            <text:p>5194</text:p>
          </table:table-cell>
          <table:table-cell office:value-type="float" office:value="8640000" calcext:value-type="float">
            <text:p>8640000</text:p>
          </table:table-cell>
          <table:table-cell table:formula="of:=[.B99]/[.C99]" office:value-type="float" office:value="0.000601157407407408" calcext:value-type="float">
            <text:p>0,00060115740740740800</text:p>
          </table:table-cell>
          <table:table-cell table:formula="of:=[.D100]-[.D99]" office:value-type="float" office:value="0.00000613425925925922" calcext:value-type="float">
            <text:p>0,00000613425925925922</text:p>
          </table:table-cell>
          <table:table-cell table:number-columns-repeated="16379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B99]+53" office:value-type="float" office:value="5247" calcext:value-type="float">
            <text:p>5247</text:p>
          </table:table-cell>
          <table:table-cell office:value-type="float" office:value="8640000" calcext:value-type="float">
            <text:p>8640000</text:p>
          </table:table-cell>
          <table:table-cell table:formula="of:=[.B100]/[.C100]" office:value-type="float" office:value="0.000607291666666667" calcext:value-type="float">
            <text:p>0,00060729166666666700</text:p>
          </table:table-cell>
          <table:table-cell table:formula="of:=[.D101]-[.D100]" office:value-type="float" office:value="0.00000613425925925922" calcext:value-type="float">
            <text:p>0,00000613425925925922</text:p>
          </table:table-cell>
          <table:table-cell table:number-columns-repeated="16379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B100]+53" office:value-type="float" office:value="5300" calcext:value-type="float">
            <text:p>5300</text:p>
          </table:table-cell>
          <table:table-cell office:value-type="float" office:value="8640000" calcext:value-type="float">
            <text:p>8640000</text:p>
          </table:table-cell>
          <table:table-cell table:formula="of:=[.B101]/[.C101]" office:value-type="float" office:value="0.000613425925925926" calcext:value-type="float">
            <text:p>0,00061342592592592600</text:p>
          </table:table-cell>
          <table:table-cell table:formula="of:=[.D102]-[.D101]" office:value-type="float" office:value="0.00000613425925925933" calcext:value-type="float">
            <text:p>0,00000613425925925933</text:p>
          </table:table-cell>
          <table:table-cell table:number-columns-repeated="16379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B101]+53" office:value-type="float" office:value="5353" calcext:value-type="float">
            <text:p>5353</text:p>
          </table:table-cell>
          <table:table-cell office:value-type="float" office:value="8640000" calcext:value-type="float">
            <text:p>8640000</text:p>
          </table:table-cell>
          <table:table-cell table:formula="of:=[.B102]/[.C102]" office:value-type="float" office:value="0.000619560185185185" calcext:value-type="float">
            <text:p>0,00061956018518518500</text:p>
          </table:table-cell>
          <table:table-cell table:formula="of:=[.D103]-[.D102]" office:value-type="float" office:value="0.00000613425925925922" calcext:value-type="float">
            <text:p>0,00000613425925925922</text:p>
          </table:table-cell>
          <table:table-cell table:number-columns-repeated="16379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B102]+53" office:value-type="float" office:value="5406" calcext:value-type="float">
            <text:p>5406</text:p>
          </table:table-cell>
          <table:table-cell office:value-type="float" office:value="8640000" calcext:value-type="float">
            <text:p>8640000</text:p>
          </table:table-cell>
          <table:table-cell table:formula="of:=[.B103]/[.C103]" office:value-type="float" office:value="0.000625694444444445" calcext:value-type="float">
            <text:p>0,00062569444444444500</text:p>
          </table:table-cell>
          <table:table-cell table:formula="of:=[.D104]-[.D103]" office:value-type="float" office:value="0.00000613425925925922" calcext:value-type="float">
            <text:p>0,00000613425925925922</text:p>
          </table:table-cell>
          <table:table-cell table:number-columns-repeated="16379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B103]+53" office:value-type="float" office:value="5459" calcext:value-type="float">
            <text:p>5459</text:p>
          </table:table-cell>
          <table:table-cell office:value-type="float" office:value="8640000" calcext:value-type="float">
            <text:p>8640000</text:p>
          </table:table-cell>
          <table:table-cell table:formula="of:=[.B104]/[.C104]" office:value-type="float" office:value="0.000631828703703704" calcext:value-type="float">
            <text:p>0,00063182870370370400</text:p>
          </table:table-cell>
          <table:table-cell table:formula="of:=[.D105]-[.D104]" office:value-type="float" office:value="0.00000613425925925933" calcext:value-type="float">
            <text:p>0,00000613425925925933</text:p>
          </table:table-cell>
          <table:table-cell table:number-columns-repeated="16379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B104]+53" office:value-type="float" office:value="5512" calcext:value-type="float">
            <text:p>5512</text:p>
          </table:table-cell>
          <table:table-cell office:value-type="float" office:value="8640000" calcext:value-type="float">
            <text:p>8640000</text:p>
          </table:table-cell>
          <table:table-cell table:formula="of:=[.B105]/[.C105]" office:value-type="float" office:value="0.000637962962962963" calcext:value-type="float">
            <text:p>0,00063796296296296300</text:p>
          </table:table-cell>
          <table:table-cell table:formula="of:=[.D106]-[.D105]" office:value-type="float" office:value="0.00000613425925925922" calcext:value-type="float">
            <text:p>0,00000613425925925922</text:p>
          </table:table-cell>
          <table:table-cell table:number-columns-repeated="16379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B105]+53" office:value-type="float" office:value="5565" calcext:value-type="float">
            <text:p>5565</text:p>
          </table:table-cell>
          <table:table-cell office:value-type="float" office:value="8640000" calcext:value-type="float">
            <text:p>8640000</text:p>
          </table:table-cell>
          <table:table-cell table:formula="of:=[.B106]/[.C106]" office:value-type="float" office:value="0.000644097222222222" calcext:value-type="float">
            <text:p>0,00064409722222222200</text:p>
          </table:table-cell>
          <table:table-cell table:formula="of:=[.D107]-[.D106]" office:value-type="float" office:value="0.00000613425925925922" calcext:value-type="float">
            <text:p>0,00000613425925925922</text:p>
          </table:table-cell>
          <table:table-cell table:number-columns-repeated="16379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B106]+53" office:value-type="float" office:value="5618" calcext:value-type="float">
            <text:p>5618</text:p>
          </table:table-cell>
          <table:table-cell office:value-type="float" office:value="8640000" calcext:value-type="float">
            <text:p>8640000</text:p>
          </table:table-cell>
          <table:table-cell table:formula="of:=[.B107]/[.C107]" office:value-type="float" office:value="0.000650231481481482" calcext:value-type="float">
            <text:p>0,00065023148148148200</text:p>
          </table:table-cell>
          <table:table-cell table:formula="of:=[.D108]-[.D107]" office:value-type="float" office:value="0.00000613425925925933" calcext:value-type="float">
            <text:p>0,00000613425925925933</text:p>
          </table:table-cell>
          <table:table-cell table:number-columns-repeated="16379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B107]+53" office:value-type="float" office:value="5671" calcext:value-type="float">
            <text:p>5671</text:p>
          </table:table-cell>
          <table:table-cell office:value-type="float" office:value="8640000" calcext:value-type="float">
            <text:p>8640000</text:p>
          </table:table-cell>
          <table:table-cell table:formula="of:=[.B108]/[.C108]" office:value-type="float" office:value="0.000656365740740741" calcext:value-type="float">
            <text:p>0,00065636574074074100</text:p>
          </table:table-cell>
          <table:table-cell table:formula="of:=[.D109]-[.D108]" office:value-type="float" office:value="0.00000613425925925922" calcext:value-type="float">
            <text:p>0,00000613425925925922</text:p>
          </table:table-cell>
          <table:table-cell table:number-columns-repeated="16379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B108]+53" office:value-type="float" office:value="5724" calcext:value-type="float">
            <text:p>5724</text:p>
          </table:table-cell>
          <table:table-cell office:value-type="float" office:value="8640000" calcext:value-type="float">
            <text:p>8640000</text:p>
          </table:table-cell>
          <table:table-cell table:formula="of:=[.B109]/[.C109]" office:value-type="float" office:value="0.0006625" calcext:value-type="float">
            <text:p>0,00066250000000000000</text:p>
          </table:table-cell>
          <table:table-cell table:formula="of:=[.D110]-[.D109]" office:value-type="float" office:value="0.00000613425925925922" calcext:value-type="float">
            <text:p>0,00000613425925925922</text:p>
          </table:table-cell>
          <table:table-cell table:number-columns-repeated="16379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B109]+53" office:value-type="float" office:value="5777" calcext:value-type="float">
            <text:p>5777</text:p>
          </table:table-cell>
          <table:table-cell office:value-type="float" office:value="8640000" calcext:value-type="float">
            <text:p>8640000</text:p>
          </table:table-cell>
          <table:table-cell table:formula="of:=[.B110]/[.C110]" office:value-type="float" office:value="0.000668634259259259" calcext:value-type="float">
            <text:p>0,00066863425925925900</text:p>
          </table:table-cell>
          <table:table-cell table:formula="of:=[.D111]-[.D110]" office:value-type="float" office:value="0.00000613425925925933" calcext:value-type="float">
            <text:p>0,00000613425925925933</text:p>
          </table:table-cell>
          <table:table-cell table:number-columns-repeated="16379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B110]+53" office:value-type="float" office:value="5830" calcext:value-type="float">
            <text:p>5830</text:p>
          </table:table-cell>
          <table:table-cell office:value-type="float" office:value="8640000" calcext:value-type="float">
            <text:p>8640000</text:p>
          </table:table-cell>
          <table:table-cell table:formula="of:=[.B111]/[.C111]" office:value-type="float" office:value="0.000674768518518519" calcext:value-type="float">
            <text:p>0,00067476851851851900</text:p>
          </table:table-cell>
          <table:table-cell table:formula="of:=[.D112]-[.D111]" office:value-type="float" office:value="0.00000613425925925922" calcext:value-type="float">
            <text:p>0,00000613425925925922</text:p>
          </table:table-cell>
          <table:table-cell table:number-columns-repeated="16379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B111]+53" office:value-type="float" office:value="5883" calcext:value-type="float">
            <text:p>5883</text:p>
          </table:table-cell>
          <table:table-cell office:value-type="float" office:value="8640000" calcext:value-type="float">
            <text:p>8640000</text:p>
          </table:table-cell>
          <table:table-cell table:formula="of:=[.B112]/[.C112]" office:value-type="float" office:value="0.000680902777777778" calcext:value-type="float">
            <text:p>0,00068090277777777800</text:p>
          </table:table-cell>
          <table:table-cell table:formula="of:=[.D113]-[.D112]" office:value-type="float" office:value="0.00000613425925925922" calcext:value-type="float">
            <text:p>0,00000613425925925922</text:p>
          </table:table-cell>
          <table:table-cell table:number-columns-repeated="16379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B112]+53" office:value-type="float" office:value="5936" calcext:value-type="float">
            <text:p>5936</text:p>
          </table:table-cell>
          <table:table-cell office:value-type="float" office:value="8640000" calcext:value-type="float">
            <text:p>8640000</text:p>
          </table:table-cell>
          <table:table-cell table:formula="of:=[.B113]/[.C113]" office:value-type="float" office:value="0.000687037037037037" calcext:value-type="float">
            <text:p>0,00068703703703703700</text:p>
          </table:table-cell>
          <table:table-cell table:formula="of:=[.D114]-[.D113]" office:value-type="float" office:value="0.00000613425925925933" calcext:value-type="float">
            <text:p>0,00000613425925925933</text:p>
          </table:table-cell>
          <table:table-cell table:number-columns-repeated="16379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B113]+53" office:value-type="float" office:value="5989" calcext:value-type="float">
            <text:p>5989</text:p>
          </table:table-cell>
          <table:table-cell office:value-type="float" office:value="8640000" calcext:value-type="float">
            <text:p>8640000</text:p>
          </table:table-cell>
          <table:table-cell table:formula="of:=[.B114]/[.C114]" office:value-type="float" office:value="0.000693171296296296" calcext:value-type="float">
            <text:p>0,00069317129629629600</text:p>
          </table:table-cell>
          <table:table-cell table:formula="of:=[.D115]-[.D114]" office:value-type="float" office:value="0.00000613425925925922" calcext:value-type="float">
            <text:p>0,00000613425925925922</text:p>
          </table:table-cell>
          <table:table-cell table:number-columns-repeated="16379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B114]+53" office:value-type="float" office:value="6042" calcext:value-type="float">
            <text:p>6042</text:p>
          </table:table-cell>
          <table:table-cell office:value-type="float" office:value="8640000" calcext:value-type="float">
            <text:p>8640000</text:p>
          </table:table-cell>
          <table:table-cell table:formula="of:=[.B115]/[.C115]" office:value-type="float" office:value="0.000699305555555556" calcext:value-type="float">
            <text:p>0,00069930555555555600</text:p>
          </table:table-cell>
          <table:table-cell table:formula="of:=[.D116]-[.D115]" office:value-type="float" office:value="0.00000613425925925922" calcext:value-type="float">
            <text:p>0,00000613425925925922</text:p>
          </table:table-cell>
          <table:table-cell table:number-columns-repeated="16379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B115]+53" office:value-type="float" office:value="6095" calcext:value-type="float">
            <text:p>6095</text:p>
          </table:table-cell>
          <table:table-cell office:value-type="float" office:value="8640000" calcext:value-type="float">
            <text:p>8640000</text:p>
          </table:table-cell>
          <table:table-cell table:formula="of:=[.B116]/[.C116]" office:value-type="float" office:value="0.000705439814814815" calcext:value-type="float">
            <text:p>0,00070543981481481500</text:p>
          </table:table-cell>
          <table:table-cell table:formula="of:=[.D117]-[.D116]" office:value-type="float" office:value="0.00000613425925925933" calcext:value-type="float">
            <text:p>0,00000613425925925933</text:p>
          </table:table-cell>
          <table:table-cell table:number-columns-repeated="16379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B116]+53" office:value-type="float" office:value="6148" calcext:value-type="float">
            <text:p>6148</text:p>
          </table:table-cell>
          <table:table-cell office:value-type="float" office:value="8640000" calcext:value-type="float">
            <text:p>8640000</text:p>
          </table:table-cell>
          <table:table-cell table:formula="of:=[.B117]/[.C117]" office:value-type="float" office:value="0.000711574074074074" calcext:value-type="float">
            <text:p>0,00071157407407407400</text:p>
          </table:table-cell>
          <table:table-cell table:formula="of:=[.D118]-[.D117]" office:value-type="float" office:value="0.00000613425925925922" calcext:value-type="float">
            <text:p>0,00000613425925925922</text:p>
          </table:table-cell>
          <table:table-cell table:number-columns-repeated="16379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B117]+53" office:value-type="float" office:value="6201" calcext:value-type="float">
            <text:p>6201</text:p>
          </table:table-cell>
          <table:table-cell office:value-type="float" office:value="8640000" calcext:value-type="float">
            <text:p>8640000</text:p>
          </table:table-cell>
          <table:table-cell table:formula="of:=[.B118]/[.C118]" office:value-type="float" office:value="0.000717708333333333" calcext:value-type="float">
            <text:p>0,00071770833333333300</text:p>
          </table:table-cell>
          <table:table-cell table:formula="of:=[.D119]-[.D118]" office:value-type="float" office:value="0.00000613425925925922" calcext:value-type="float">
            <text:p>0,00000613425925925922</text:p>
          </table:table-cell>
          <table:table-cell table:number-columns-repeated="16379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B118]+53" office:value-type="float" office:value="6254" calcext:value-type="float">
            <text:p>6254</text:p>
          </table:table-cell>
          <table:table-cell office:value-type="float" office:value="8640000" calcext:value-type="float">
            <text:p>8640000</text:p>
          </table:table-cell>
          <table:table-cell table:formula="of:=[.B119]/[.C119]" office:value-type="float" office:value="0.000723842592592593" calcext:value-type="float">
            <text:p>0,00072384259259259200</text:p>
          </table:table-cell>
          <table:table-cell table:formula="of:=[.D120]-[.D119]" office:value-type="float" office:value="0.00000613425925925933" calcext:value-type="float">
            <text:p>0,00000613425925925933</text:p>
          </table:table-cell>
          <table:table-cell table:number-columns-repeated="16379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B119]+53" office:value-type="float" office:value="6307" calcext:value-type="float">
            <text:p>6307</text:p>
          </table:table-cell>
          <table:table-cell office:value-type="float" office:value="8640000" calcext:value-type="float">
            <text:p>8640000</text:p>
          </table:table-cell>
          <table:table-cell table:formula="of:=[.B120]/[.C120]" office:value-type="float" office:value="0.000729976851851852" calcext:value-type="float">
            <text:p>0,00072997685185185200</text:p>
          </table:table-cell>
          <table:table-cell table:formula="of:=[.D121]-[.D120]" office:value-type="float" office:value="0.00000613425925925922" calcext:value-type="float">
            <text:p>0,00000613425925925922</text:p>
          </table:table-cell>
          <table:table-cell table:number-columns-repeated="16379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B120]+53" office:value-type="float" office:value="6360" calcext:value-type="float">
            <text:p>6360</text:p>
          </table:table-cell>
          <table:table-cell office:value-type="float" office:value="8640000" calcext:value-type="float">
            <text:p>8640000</text:p>
          </table:table-cell>
          <table:table-cell table:formula="of:=[.B121]/[.C121]" office:value-type="float" office:value="0.000736111111111111" calcext:value-type="float">
            <text:p>0,00073611111111111100</text:p>
          </table:table-cell>
          <table:table-cell table:formula="of:=[.D122]-[.D121]" office:value-type="float" office:value="0.00000613425925925922" calcext:value-type="float">
            <text:p>0,00000613425925925922</text:p>
          </table:table-cell>
          <table:table-cell table:number-columns-repeated="16379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B121]+53" office:value-type="float" office:value="6413" calcext:value-type="float">
            <text:p>6413</text:p>
          </table:table-cell>
          <table:table-cell office:value-type="float" office:value="8640000" calcext:value-type="float">
            <text:p>8640000</text:p>
          </table:table-cell>
          <table:table-cell table:formula="of:=[.B122]/[.C122]" office:value-type="float" office:value="0.00074224537037037" calcext:value-type="float">
            <text:p>0,00074224537037037000</text:p>
          </table:table-cell>
          <table:table-cell table:formula="of:=[.D123]-[.D122]" office:value-type="float" office:value="0.00000613425925925933" calcext:value-type="float">
            <text:p>0,00000613425925925933</text:p>
          </table:table-cell>
          <table:table-cell table:number-columns-repeated="16379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B122]+53" office:value-type="float" office:value="6466" calcext:value-type="float">
            <text:p>6466</text:p>
          </table:table-cell>
          <table:table-cell office:value-type="float" office:value="8640000" calcext:value-type="float">
            <text:p>8640000</text:p>
          </table:table-cell>
          <table:table-cell table:formula="of:=[.B123]/[.C123]" office:value-type="float" office:value="0.00074837962962963" calcext:value-type="float">
            <text:p>0,00074837962962963000</text:p>
          </table:table-cell>
          <table:table-cell table:formula="of:=[.D124]-[.D123]" office:value-type="float" office:value="0.00000613425925925922" calcext:value-type="float">
            <text:p>0,00000613425925925922</text:p>
          </table:table-cell>
          <table:table-cell table:number-columns-repeated="16379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B123]+53" office:value-type="float" office:value="6519" calcext:value-type="float">
            <text:p>6519</text:p>
          </table:table-cell>
          <table:table-cell office:value-type="float" office:value="8640000" calcext:value-type="float">
            <text:p>8640000</text:p>
          </table:table-cell>
          <table:table-cell table:formula="of:=[.B124]/[.C124]" office:value-type="float" office:value="0.000754513888888889" calcext:value-type="float">
            <text:p>0,00075451388888888900</text:p>
          </table:table-cell>
          <table:table-cell table:formula="of:=[.D125]-[.D124]" office:value-type="float" office:value="0.00000613425925925922" calcext:value-type="float">
            <text:p>0,00000613425925925922</text:p>
          </table:table-cell>
          <table:table-cell table:number-columns-repeated="16379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B124]+53" office:value-type="float" office:value="6572" calcext:value-type="float">
            <text:p>6572</text:p>
          </table:table-cell>
          <table:table-cell office:value-type="float" office:value="8640000" calcext:value-type="float">
            <text:p>8640000</text:p>
          </table:table-cell>
          <table:table-cell table:formula="of:=[.B125]/[.C125]" office:value-type="float" office:value="0.000760648148148148" calcext:value-type="float">
            <text:p>0,00076064814814814800</text:p>
          </table:table-cell>
          <table:table-cell table:formula="of:=[.D126]-[.D125]" office:value-type="float" office:value="0.00000613425925925933" calcext:value-type="float">
            <text:p>0,00000613425925925933</text:p>
          </table:table-cell>
          <table:table-cell table:number-columns-repeated="16379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B125]+53" office:value-type="float" office:value="6625" calcext:value-type="float">
            <text:p>6625</text:p>
          </table:table-cell>
          <table:table-cell office:value-type="float" office:value="8640000" calcext:value-type="float">
            <text:p>8640000</text:p>
          </table:table-cell>
          <table:table-cell table:formula="of:=[.B126]/[.C126]" office:value-type="float" office:value="0.000766782407407407" calcext:value-type="float">
            <text:p>0,00076678240740740700</text:p>
          </table:table-cell>
          <table:table-cell table:formula="of:=[.D127]-[.D126]" office:value-type="float" office:value="0.00000613425925925922" calcext:value-type="float">
            <text:p>0,00000613425925925922</text:p>
          </table:table-cell>
          <table:table-cell table:number-columns-repeated="16379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B126]+53" office:value-type="float" office:value="6678" calcext:value-type="float">
            <text:p>6678</text:p>
          </table:table-cell>
          <table:table-cell office:value-type="float" office:value="8640000" calcext:value-type="float">
            <text:p>8640000</text:p>
          </table:table-cell>
          <table:table-cell table:formula="of:=[.B127]/[.C127]" office:value-type="float" office:value="0.000772916666666667" calcext:value-type="float">
            <text:p>0,00077291666666666700</text:p>
          </table:table-cell>
          <table:table-cell table:formula="of:=[.D128]-[.D127]" office:value-type="float" office:value="0.00000613425925925922" calcext:value-type="float">
            <text:p>0,00000613425925925922</text:p>
          </table:table-cell>
          <table:table-cell table:number-columns-repeated="16379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B127]+53" office:value-type="float" office:value="6731" calcext:value-type="float">
            <text:p>6731</text:p>
          </table:table-cell>
          <table:table-cell office:value-type="float" office:value="8640000" calcext:value-type="float">
            <text:p>8640000</text:p>
          </table:table-cell>
          <table:table-cell table:formula="of:=[.B128]/[.C128]" office:value-type="float" office:value="0.000779050925925926" calcext:value-type="float">
            <text:p>0,00077905092592592600</text:p>
          </table:table-cell>
          <table:table-cell table:formula="of:=[.D129]-[.D128]" office:value-type="float" office:value="0.00000613425925925933" calcext:value-type="float">
            <text:p>0,00000613425925925933</text:p>
          </table:table-cell>
          <table:table-cell table:number-columns-repeated="16379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B128]+53" office:value-type="float" office:value="6784" calcext:value-type="float">
            <text:p>6784</text:p>
          </table:table-cell>
          <table:table-cell office:value-type="float" office:value="8640000" calcext:value-type="float">
            <text:p>8640000</text:p>
          </table:table-cell>
          <table:table-cell table:formula="of:=[.B129]/[.C129]" office:value-type="float" office:value="0.000785185185185185" calcext:value-type="float">
            <text:p>0,00078518518518518500</text:p>
          </table:table-cell>
          <table:table-cell table:formula="of:=[.D130]-[.D129]" office:value-type="float" office:value="0.00000613425925925922" calcext:value-type="float">
            <text:p>0,00000613425925925922</text:p>
          </table:table-cell>
          <table:table-cell table:number-columns-repeated="16379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.B129]+53" office:value-type="float" office:value="6837" calcext:value-type="float">
            <text:p>6837</text:p>
          </table:table-cell>
          <table:table-cell office:value-type="float" office:value="8640000" calcext:value-type="float">
            <text:p>8640000</text:p>
          </table:table-cell>
          <table:table-cell table:formula="of:=[.B130]/[.C130]" office:value-type="float" office:value="0.000791319444444444" calcext:value-type="float">
            <text:p>0,00079131944444444400</text:p>
          </table:table-cell>
          <table:table-cell table:formula="of:=[.D131]-[.D130]" office:value-type="float" office:value="0.00000613425925925933" calcext:value-type="float">
            <text:p>0,00000613425925925933</text:p>
          </table:table-cell>
          <table:table-cell table:number-columns-repeated="16379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B130]+53" office:value-type="float" office:value="6890" calcext:value-type="float">
            <text:p>6890</text:p>
          </table:table-cell>
          <table:table-cell office:value-type="float" office:value="8640000" calcext:value-type="float">
            <text:p>8640000</text:p>
          </table:table-cell>
          <table:table-cell table:formula="of:=[.B131]/[.C131]" office:value-type="float" office:value="0.000797453703703704" calcext:value-type="float">
            <text:p>0,00079745370370370400</text:p>
          </table:table-cell>
          <table:table-cell table:formula="of:=[.D132]-[.D131]" office:value-type="float" office:value="0.00000613425925925922" calcext:value-type="float">
            <text:p>0,00000613425925925922</text:p>
          </table:table-cell>
          <table:table-cell table:number-columns-repeated="16379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B131]+53" office:value-type="float" office:value="6943" calcext:value-type="float">
            <text:p>6943</text:p>
          </table:table-cell>
          <table:table-cell office:value-type="float" office:value="8640000" calcext:value-type="float">
            <text:p>8640000</text:p>
          </table:table-cell>
          <table:table-cell table:formula="of:=[.B132]/[.C132]" office:value-type="float" office:value="0.000803587962962963" calcext:value-type="float">
            <text:p>0,00080358796296296300</text:p>
          </table:table-cell>
          <table:table-cell table:formula="of:=[.D133]-[.D132]" office:value-type="float" office:value="0.00000613425925925922" calcext:value-type="float">
            <text:p>0,00000613425925925922</text:p>
          </table:table-cell>
          <table:table-cell table:number-columns-repeated="16379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.B132]+53" office:value-type="float" office:value="6996" calcext:value-type="float">
            <text:p>6996</text:p>
          </table:table-cell>
          <table:table-cell office:value-type="float" office:value="8640000" calcext:value-type="float">
            <text:p>8640000</text:p>
          </table:table-cell>
          <table:table-cell table:formula="of:=[.B133]/[.C133]" office:value-type="float" office:value="0.000809722222222222" calcext:value-type="float">
            <text:p>0,00080972222222222200</text:p>
          </table:table-cell>
          <table:table-cell table:formula="of:=[.D134]-[.D133]" office:value-type="float" office:value="0.00000613425925925933" calcext:value-type="float">
            <text:p>0,00000613425925925933</text:p>
          </table:table-cell>
          <table:table-cell table:number-columns-repeated="16379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.B133]+53" office:value-type="float" office:value="7049" calcext:value-type="float">
            <text:p>7049</text:p>
          </table:table-cell>
          <table:table-cell office:value-type="float" office:value="8640000" calcext:value-type="float">
            <text:p>8640000</text:p>
          </table:table-cell>
          <table:table-cell table:formula="of:=[.B134]/[.C134]" office:value-type="float" office:value="0.000815856481481482" calcext:value-type="float">
            <text:p>0,00081585648148148200</text:p>
          </table:table-cell>
          <table:table-cell table:formula="of:=[.D135]-[.D134]" office:value-type="float" office:value="0.00000613425925925922" calcext:value-type="float">
            <text:p>0,00000613425925925922</text:p>
          </table:table-cell>
          <table:table-cell table:number-columns-repeated="16379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B134]+53" office:value-type="float" office:value="7102" calcext:value-type="float">
            <text:p>7102</text:p>
          </table:table-cell>
          <table:table-cell office:value-type="float" office:value="8640000" calcext:value-type="float">
            <text:p>8640000</text:p>
          </table:table-cell>
          <table:table-cell table:formula="of:=[.B135]/[.C135]" office:value-type="float" office:value="0.000821990740740741" calcext:value-type="float">
            <text:p>0,00082199074074074100</text:p>
          </table:table-cell>
          <table:table-cell table:formula="of:=[.D136]-[.D135]" office:value-type="float" office:value="0.00000613425925925922" calcext:value-type="float">
            <text:p>0,00000613425925925922</text:p>
          </table:table-cell>
          <table:table-cell table:number-columns-repeated="16379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B135]+53" office:value-type="float" office:value="7155" calcext:value-type="float">
            <text:p>7155</text:p>
          </table:table-cell>
          <table:table-cell office:value-type="float" office:value="8640000" calcext:value-type="float">
            <text:p>8640000</text:p>
          </table:table-cell>
          <table:table-cell table:formula="of:=[.B136]/[.C136]" office:value-type="float" office:value="0.000828125" calcext:value-type="float">
            <text:p>0,00082812500000000000</text:p>
          </table:table-cell>
          <table:table-cell table:formula="of:=[.D137]-[.D136]" office:value-type="float" office:value="0.00000613425925925933" calcext:value-type="float">
            <text:p>0,00000613425925925933</text:p>
          </table:table-cell>
          <table:table-cell table:number-columns-repeated="16379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.B136]+53" office:value-type="float" office:value="7208" calcext:value-type="float">
            <text:p>7208</text:p>
          </table:table-cell>
          <table:table-cell office:value-type="float" office:value="8640000" calcext:value-type="float">
            <text:p>8640000</text:p>
          </table:table-cell>
          <table:table-cell table:formula="of:=[.B137]/[.C137]" office:value-type="float" office:value="0.000834259259259259" calcext:value-type="float">
            <text:p>0,00083425925925925900</text:p>
          </table:table-cell>
          <table:table-cell table:formula="of:=[.D138]-[.D137]" office:value-type="float" office:value="0.00000613425925925922" calcext:value-type="float">
            <text:p>0,00000613425925925922</text:p>
          </table:table-cell>
          <table:table-cell table:number-columns-repeated="16379"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.B137]+53" office:value-type="float" office:value="7261" calcext:value-type="float">
            <text:p>7261</text:p>
          </table:table-cell>
          <table:table-cell office:value-type="float" office:value="8640000" calcext:value-type="float">
            <text:p>8640000</text:p>
          </table:table-cell>
          <table:table-cell table:formula="of:=[.B138]/[.C138]" office:value-type="float" office:value="0.000840393518518519" calcext:value-type="float">
            <text:p>0,00084039351851851900</text:p>
          </table:table-cell>
          <table:table-cell table:formula="of:=[.D139]-[.D138]" office:value-type="float" office:value="0.00000613425925925922" calcext:value-type="float">
            <text:p>0,00000613425925925922</text:p>
          </table:table-cell>
          <table:table-cell table:number-columns-repeated="16379"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B138]+53" office:value-type="float" office:value="7314" calcext:value-type="float">
            <text:p>7314</text:p>
          </table:table-cell>
          <table:table-cell office:value-type="float" office:value="8640000" calcext:value-type="float">
            <text:p>8640000</text:p>
          </table:table-cell>
          <table:table-cell table:formula="of:=[.B139]/[.C139]" office:value-type="float" office:value="0.000846527777777778" calcext:value-type="float">
            <text:p>0,00084652777777777800</text:p>
          </table:table-cell>
          <table:table-cell table:formula="of:=[.D140]-[.D139]" office:value-type="float" office:value="0.00000613425925925933" calcext:value-type="float">
            <text:p>0,00000613425925925933</text:p>
          </table:table-cell>
          <table:table-cell table:number-columns-repeated="16379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.B139]+53" office:value-type="float" office:value="7367" calcext:value-type="float">
            <text:p>7367</text:p>
          </table:table-cell>
          <table:table-cell office:value-type="float" office:value="8640000" calcext:value-type="float">
            <text:p>8640000</text:p>
          </table:table-cell>
          <table:table-cell table:formula="of:=[.B140]/[.C140]" office:value-type="float" office:value="0.000852662037037037" calcext:value-type="float">
            <text:p>0,00085266203703703700</text:p>
          </table:table-cell>
          <table:table-cell table:formula="of:=[.D141]-[.D140]" office:value-type="float" office:value="0.00000613425925925922" calcext:value-type="float">
            <text:p>0,00000613425925925922</text:p>
          </table:table-cell>
          <table:table-cell table:number-columns-repeated="16379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B140]+53" office:value-type="float" office:value="7420" calcext:value-type="float">
            <text:p>7420</text:p>
          </table:table-cell>
          <table:table-cell office:value-type="float" office:value="8640000" calcext:value-type="float">
            <text:p>8640000</text:p>
          </table:table-cell>
          <table:table-cell table:formula="of:=[.B141]/[.C141]" office:value-type="float" office:value="0.000858796296296296" calcext:value-type="float">
            <text:p>0,00085879629629629600</text:p>
          </table:table-cell>
          <table:table-cell table:formula="of:=[.D142]-[.D141]" office:value-type="float" office:value="0.00000613425925925922" calcext:value-type="float">
            <text:p>0,00000613425925925922</text:p>
          </table:table-cell>
          <table:table-cell table:number-columns-repeated="16379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B141]+53" office:value-type="float" office:value="7473" calcext:value-type="float">
            <text:p>7473</text:p>
          </table:table-cell>
          <table:table-cell office:value-type="float" office:value="8640000" calcext:value-type="float">
            <text:p>8640000</text:p>
          </table:table-cell>
          <table:table-cell table:formula="of:=[.B142]/[.C142]" office:value-type="float" office:value="0.000864930555555556" calcext:value-type="float">
            <text:p>0,00086493055555555600</text:p>
          </table:table-cell>
          <table:table-cell table:formula="of:=[.D143]-[.D142]" office:value-type="float" office:value="0.00000613425925925933" calcext:value-type="float">
            <text:p>0,00000613425925925933</text:p>
          </table:table-cell>
          <table:table-cell table:number-columns-repeated="16379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B142]+53" office:value-type="float" office:value="7526" calcext:value-type="float">
            <text:p>7526</text:p>
          </table:table-cell>
          <table:table-cell office:value-type="float" office:value="8640000" calcext:value-type="float">
            <text:p>8640000</text:p>
          </table:table-cell>
          <table:table-cell table:formula="of:=[.B143]/[.C143]" office:value-type="float" office:value="0.000871064814814815" calcext:value-type="float">
            <text:p>0,00087106481481481500</text:p>
          </table:table-cell>
          <table:table-cell table:formula="of:=[.D144]-[.D143]" office:value-type="float" office:value="0.00000613425925925922" calcext:value-type="float">
            <text:p>0,00000613425925925922</text:p>
          </table:table-cell>
          <table:table-cell table:number-columns-repeated="16379"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B143]+53" office:value-type="float" office:value="7579" calcext:value-type="float">
            <text:p>7579</text:p>
          </table:table-cell>
          <table:table-cell office:value-type="float" office:value="8640000" calcext:value-type="float">
            <text:p>8640000</text:p>
          </table:table-cell>
          <table:table-cell table:formula="of:=[.B144]/[.C144]" office:value-type="float" office:value="0.000877199074074074" calcext:value-type="float">
            <text:p>0,00087719907407407400</text:p>
          </table:table-cell>
          <table:table-cell table:formula="of:=[.D145]-[.D144]" office:value-type="float" office:value="0.00000613425925925922" calcext:value-type="float">
            <text:p>0,00000613425925925922</text:p>
          </table:table-cell>
          <table:table-cell table:number-columns-repeated="16379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B144]+53" office:value-type="float" office:value="7632" calcext:value-type="float">
            <text:p>7632</text:p>
          </table:table-cell>
          <table:table-cell office:value-type="float" office:value="8640000" calcext:value-type="float">
            <text:p>8640000</text:p>
          </table:table-cell>
          <table:table-cell table:formula="of:=[.B145]/[.C145]" office:value-type="float" office:value="0.000883333333333333" calcext:value-type="float">
            <text:p>0,00088333333333333300</text:p>
          </table:table-cell>
          <table:table-cell table:formula="of:=[.D146]-[.D145]" office:value-type="float" office:value="0.00000613425925925933" calcext:value-type="float">
            <text:p>0,00000613425925925933</text:p>
          </table:table-cell>
          <table:table-cell table:number-columns-repeated="16379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B145]+53" office:value-type="float" office:value="7685" calcext:value-type="float">
            <text:p>7685</text:p>
          </table:table-cell>
          <table:table-cell office:value-type="float" office:value="8640000" calcext:value-type="float">
            <text:p>8640000</text:p>
          </table:table-cell>
          <table:table-cell table:formula="of:=[.B146]/[.C146]" office:value-type="float" office:value="0.000889467592592593" calcext:value-type="float">
            <text:p>0,00088946759259259300</text:p>
          </table:table-cell>
          <table:table-cell table:formula="of:=[.D147]-[.D146]" office:value-type="float" office:value="0.00000613425925925922" calcext:value-type="float">
            <text:p>0,00000613425925925922</text:p>
          </table:table-cell>
          <table:table-cell table:number-columns-repeated="16379"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B146]+53" office:value-type="float" office:value="7738" calcext:value-type="float">
            <text:p>7738</text:p>
          </table:table-cell>
          <table:table-cell office:value-type="float" office:value="8640000" calcext:value-type="float">
            <text:p>8640000</text:p>
          </table:table-cell>
          <table:table-cell table:formula="of:=[.B147]/[.C147]" office:value-type="float" office:value="0.000895601851851852" calcext:value-type="float">
            <text:p>0,00089560185185185200</text:p>
          </table:table-cell>
          <table:table-cell table:formula="of:=[.D148]-[.D147]" office:value-type="float" office:value="0.00000613425925925922" calcext:value-type="float">
            <text:p>0,00000613425925925922</text:p>
          </table:table-cell>
          <table:table-cell table:number-columns-repeated="16379"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.B147]+53" office:value-type="float" office:value="7791" calcext:value-type="float">
            <text:p>7791</text:p>
          </table:table-cell>
          <table:table-cell office:value-type="float" office:value="8640000" calcext:value-type="float">
            <text:p>8640000</text:p>
          </table:table-cell>
          <table:table-cell table:formula="of:=[.B148]/[.C148]" office:value-type="float" office:value="0.000901736111111111" calcext:value-type="float">
            <text:p>0,00090173611111111100</text:p>
          </table:table-cell>
          <table:table-cell table:formula="of:=[.D149]-[.D148]" office:value-type="float" office:value="0.00000613425925925933" calcext:value-type="float">
            <text:p>0,00000613425925925933</text:p>
          </table:table-cell>
          <table:table-cell table:number-columns-repeated="16379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B148]+53" office:value-type="float" office:value="7844" calcext:value-type="float">
            <text:p>7844</text:p>
          </table:table-cell>
          <table:table-cell office:value-type="float" office:value="8640000" calcext:value-type="float">
            <text:p>8640000</text:p>
          </table:table-cell>
          <table:table-cell table:formula="of:=[.B149]/[.C149]" office:value-type="float" office:value="0.00090787037037037" calcext:value-type="float">
            <text:p>0,00090787037037037000</text:p>
          </table:table-cell>
          <table:table-cell table:formula="of:=[.D150]-[.D149]" office:value-type="float" office:value="0.00000613425925925922" calcext:value-type="float">
            <text:p>0,00000613425925925922</text:p>
          </table:table-cell>
          <table:table-cell table:number-columns-repeated="16379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.B149]+53" office:value-type="float" office:value="7897" calcext:value-type="float">
            <text:p>7897</text:p>
          </table:table-cell>
          <table:table-cell office:value-type="float" office:value="8640000" calcext:value-type="float">
            <text:p>8640000</text:p>
          </table:table-cell>
          <table:table-cell table:formula="of:=[.B150]/[.C150]" office:value-type="float" office:value="0.00091400462962963" calcext:value-type="float">
            <text:p>0,00091400462962963000</text:p>
          </table:table-cell>
          <table:table-cell table:formula="of:=[.D151]-[.D150]" office:value-type="float" office:value="0.00000613425925925922" calcext:value-type="float">
            <text:p>0,00000613425925925922</text:p>
          </table:table-cell>
          <table:table-cell table:number-columns-repeated="16379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B150]+53" office:value-type="float" office:value="7950" calcext:value-type="float">
            <text:p>7950</text:p>
          </table:table-cell>
          <table:table-cell office:value-type="float" office:value="8640000" calcext:value-type="float">
            <text:p>8640000</text:p>
          </table:table-cell>
          <table:table-cell table:formula="of:=[.B151]/[.C151]" office:value-type="float" office:value="0.000920138888888889" calcext:value-type="float">
            <text:p>0,00092013888888888900</text:p>
          </table:table-cell>
          <table:table-cell table:formula="of:=[.D152]-[.D151]" office:value-type="float" office:value="0.00000613425925925933" calcext:value-type="float">
            <text:p>0,00000613425925925933</text:p>
          </table:table-cell>
          <table:table-cell table:number-columns-repeated="16379"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.B151]+53" office:value-type="float" office:value="8003" calcext:value-type="float">
            <text:p>8003</text:p>
          </table:table-cell>
          <table:table-cell office:value-type="float" office:value="8640000" calcext:value-type="float">
            <text:p>8640000</text:p>
          </table:table-cell>
          <table:table-cell table:formula="of:=[.B152]/[.C152]" office:value-type="float" office:value="0.000926273148148148" calcext:value-type="float">
            <text:p>0,00092627314814814800</text:p>
          </table:table-cell>
          <table:table-cell table:formula="of:=[.D153]-[.D152]" office:value-type="float" office:value="0.00000613425925925922" calcext:value-type="float">
            <text:p>0,00000613425925925922</text:p>
          </table:table-cell>
          <table:table-cell table:number-columns-repeated="16379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.B152]+53" office:value-type="float" office:value="8056" calcext:value-type="float">
            <text:p>8056</text:p>
          </table:table-cell>
          <table:table-cell office:value-type="float" office:value="8640000" calcext:value-type="float">
            <text:p>8640000</text:p>
          </table:table-cell>
          <table:table-cell table:formula="of:=[.B153]/[.C153]" office:value-type="float" office:value="0.000932407407407407" calcext:value-type="float">
            <text:p>0,00093240740740740700</text:p>
          </table:table-cell>
          <table:table-cell table:formula="of:=[.D154]-[.D153]" office:value-type="float" office:value="0.00000613425925925922" calcext:value-type="float">
            <text:p>0,00000613425925925922</text:p>
          </table:table-cell>
          <table:table-cell table:number-columns-repeated="16379"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[.B153]+53" office:value-type="float" office:value="8109" calcext:value-type="float">
            <text:p>8109</text:p>
          </table:table-cell>
          <table:table-cell office:value-type="float" office:value="8640000" calcext:value-type="float">
            <text:p>8640000</text:p>
          </table:table-cell>
          <table:table-cell table:formula="of:=[.B154]/[.C154]" office:value-type="float" office:value="0.000938541666666667" calcext:value-type="float">
            <text:p>0,00093854166666666700</text:p>
          </table:table-cell>
          <table:table-cell table:formula="of:=[.D155]-[.D154]" office:value-type="float" office:value="0.00000613425925925933" calcext:value-type="float">
            <text:p>0,00000613425925925933</text:p>
          </table:table-cell>
          <table:table-cell table:number-columns-repeated="16379"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.B154]+53" office:value-type="float" office:value="8162" calcext:value-type="float">
            <text:p>8162</text:p>
          </table:table-cell>
          <table:table-cell office:value-type="float" office:value="8640000" calcext:value-type="float">
            <text:p>8640000</text:p>
          </table:table-cell>
          <table:table-cell table:formula="of:=[.B155]/[.C155]" office:value-type="float" office:value="0.000944675925925926" calcext:value-type="float">
            <text:p>0,00094467592592592600</text:p>
          </table:table-cell>
          <table:table-cell table:formula="of:=[.D156]-[.D155]" office:value-type="float" office:value="0.00000613425925925922" calcext:value-type="float">
            <text:p>0,00000613425925925922</text:p>
          </table:table-cell>
          <table:table-cell table:number-columns-repeated="16379"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.B155]+53" office:value-type="float" office:value="8215" calcext:value-type="float">
            <text:p>8215</text:p>
          </table:table-cell>
          <table:table-cell office:value-type="float" office:value="8640000" calcext:value-type="float">
            <text:p>8640000</text:p>
          </table:table-cell>
          <table:table-cell table:formula="of:=[.B156]/[.C156]" office:value-type="float" office:value="0.000950810185185185" calcext:value-type="float">
            <text:p>0,00095081018518518500</text:p>
          </table:table-cell>
          <table:table-cell table:formula="of:=[.D157]-[.D156]" office:value-type="float" office:value="0.00000613425925925922" calcext:value-type="float">
            <text:p>0,00000613425925925922</text:p>
          </table:table-cell>
          <table:table-cell table:number-columns-repeated="16379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[.B156]+53" office:value-type="float" office:value="8268" calcext:value-type="float">
            <text:p>8268</text:p>
          </table:table-cell>
          <table:table-cell office:value-type="float" office:value="8640000" calcext:value-type="float">
            <text:p>8640000</text:p>
          </table:table-cell>
          <table:table-cell table:formula="of:=[.B157]/[.C157]" office:value-type="float" office:value="0.000956944444444444" calcext:value-type="float">
            <text:p>0,00095694444444444500</text:p>
          </table:table-cell>
          <table:table-cell table:formula="of:=[.D158]-[.D157]" office:value-type="float" office:value="0.00000613425925925933" calcext:value-type="float">
            <text:p>0,00000613425925925933</text:p>
          </table:table-cell>
          <table:table-cell table:number-columns-repeated="16379"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[.B157]+53" office:value-type="float" office:value="8321" calcext:value-type="float">
            <text:p>8321</text:p>
          </table:table-cell>
          <table:table-cell office:value-type="float" office:value="8640000" calcext:value-type="float">
            <text:p>8640000</text:p>
          </table:table-cell>
          <table:table-cell table:formula="of:=[.B158]/[.C158]" office:value-type="float" office:value="0.000963078703703704" calcext:value-type="float">
            <text:p>0,00096307870370370400</text:p>
          </table:table-cell>
          <table:table-cell table:formula="of:=[.D159]-[.D158]" office:value-type="float" office:value="0.00000613425925925922" calcext:value-type="float">
            <text:p>0,00000613425925925922</text:p>
          </table:table-cell>
          <table:table-cell table:number-columns-repeated="16379"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[.B158]+53" office:value-type="float" office:value="8374" calcext:value-type="float">
            <text:p>8374</text:p>
          </table:table-cell>
          <table:table-cell office:value-type="float" office:value="8640000" calcext:value-type="float">
            <text:p>8640000</text:p>
          </table:table-cell>
          <table:table-cell table:formula="of:=[.B159]/[.C159]" office:value-type="float" office:value="0.000969212962962963" calcext:value-type="float">
            <text:p>0,00096921296296296300</text:p>
          </table:table-cell>
          <table:table-cell table:formula="of:=[.D160]-[.D159]" office:value-type="float" office:value="0.00000613425925925922" calcext:value-type="float">
            <text:p>0,00000613425925925922</text:p>
          </table:table-cell>
          <table:table-cell table:number-columns-repeated="16379"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[.B159]+53" office:value-type="float" office:value="8427" calcext:value-type="float">
            <text:p>8427</text:p>
          </table:table-cell>
          <table:table-cell office:value-type="float" office:value="8640000" calcext:value-type="float">
            <text:p>8640000</text:p>
          </table:table-cell>
          <table:table-cell table:formula="of:=[.B160]/[.C160]" office:value-type="float" office:value="0.000975347222222222" calcext:value-type="float">
            <text:p>0,00097534722222222200</text:p>
          </table:table-cell>
          <table:table-cell table:formula="of:=[.D161]-[.D160]" office:value-type="float" office:value="0.00000613425925925922" calcext:value-type="float">
            <text:p>0,00000613425925925922</text:p>
          </table:table-cell>
          <table:table-cell table:number-columns-repeated="16379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B160]+53" office:value-type="float" office:value="8480" calcext:value-type="float">
            <text:p>8480</text:p>
          </table:table-cell>
          <table:table-cell office:value-type="float" office:value="8640000" calcext:value-type="float">
            <text:p>8640000</text:p>
          </table:table-cell>
          <table:table-cell table:formula="of:=[.B161]/[.C161]" office:value-type="float" office:value="0.000981481481481481" calcext:value-type="float">
            <text:p>0,00098148148148148100</text:p>
          </table:table-cell>
          <table:table-cell table:formula="of:=[.D162]-[.D161]" office:value-type="float" office:value="0.00000613425925925933" calcext:value-type="float">
            <text:p>0,00000613425925925933</text:p>
          </table:table-cell>
          <table:table-cell table:number-columns-repeated="16379"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[.B161]+53" office:value-type="float" office:value="8533" calcext:value-type="float">
            <text:p>8533</text:p>
          </table:table-cell>
          <table:table-cell office:value-type="float" office:value="8640000" calcext:value-type="float">
            <text:p>8640000</text:p>
          </table:table-cell>
          <table:table-cell table:formula="of:=[.B162]/[.C162]" office:value-type="float" office:value="0.000987615740740741" calcext:value-type="float">
            <text:p>0,00098761574074074100</text:p>
          </table:table-cell>
          <table:table-cell table:formula="of:=[.D163]-[.D162]" office:value-type="float" office:value="0.00000613425925925933" calcext:value-type="float">
            <text:p>0,00000613425925925933</text:p>
          </table:table-cell>
          <table:table-cell table:number-columns-repeated="16379"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[.B162]+53" office:value-type="float" office:value="8586" calcext:value-type="float">
            <text:p>8586</text:p>
          </table:table-cell>
          <table:table-cell office:value-type="float" office:value="8640000" calcext:value-type="float">
            <text:p>8640000</text:p>
          </table:table-cell>
          <table:table-cell table:formula="of:=[.B163]/[.C163]" office:value-type="float" office:value="0.00099375" calcext:value-type="float">
            <text:p>0,00099375000000000000</text:p>
          </table:table-cell>
          <table:table-cell table:formula="of:=[.D164]-[.D163]" office:value-type="float" office:value="0.00000613425925925911" calcext:value-type="float">
            <text:p>0,00000613425925925911</text:p>
          </table:table-cell>
          <table:table-cell table:number-columns-repeated="16379"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[.B163]+53" office:value-type="float" office:value="8639" calcext:value-type="float">
            <text:p>8639</text:p>
          </table:table-cell>
          <table:table-cell office:value-type="float" office:value="8640000" calcext:value-type="float">
            <text:p>8640000</text:p>
          </table:table-cell>
          <table:table-cell table:formula="of:=[.B164]/[.C164]" office:value-type="float" office:value="0.000999884259259259" calcext:value-type="float">
            <text:p>0,00099988425925925900</text:p>
          </table:table-cell>
          <table:table-cell table:formula="of:=[.D165]-[.D164]" office:value-type="float" office:value="0.00000613425925925933" calcext:value-type="float">
            <text:p>0,00000613425925925933</text:p>
          </table:table-cell>
          <table:table-cell table:number-columns-repeated="16379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[.B164]+53" office:value-type="float" office:value="8692" calcext:value-type="float">
            <text:p>8692</text:p>
          </table:table-cell>
          <table:table-cell office:value-type="float" office:value="8640000" calcext:value-type="float">
            <text:p>8640000</text:p>
          </table:table-cell>
          <table:table-cell table:formula="of:=[.B165]/[.C165]" office:value-type="float" office:value="0.00100601851851852" calcext:value-type="float">
            <text:p>0,00100601851851852000</text:p>
          </table:table-cell>
          <table:table-cell table:formula="of:=[.D166]-[.D165]" office:value-type="float" office:value="0.00000613425925925933" calcext:value-type="float">
            <text:p>0,00000613425925925933</text:p>
          </table:table-cell>
          <table:table-cell table:number-columns-repeated="16379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.B165]+53" office:value-type="float" office:value="8745" calcext:value-type="float">
            <text:p>8745</text:p>
          </table:table-cell>
          <table:table-cell office:value-type="float" office:value="8640000" calcext:value-type="float">
            <text:p>8640000</text:p>
          </table:table-cell>
          <table:table-cell table:formula="of:=[.B166]/[.C166]" office:value-type="float" office:value="0.00101215277777778" calcext:value-type="float">
            <text:p>0,00101215277777778000</text:p>
          </table:table-cell>
          <table:table-cell table:formula="of:=[.D167]-[.D166]" office:value-type="float" office:value="0.00000613425925925911" calcext:value-type="float">
            <text:p>0,00000613425925925911</text:p>
          </table:table-cell>
          <table:table-cell table:number-columns-repeated="16379"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B166]+53" office:value-type="float" office:value="8798" calcext:value-type="float">
            <text:p>8798</text:p>
          </table:table-cell>
          <table:table-cell office:value-type="float" office:value="8640000" calcext:value-type="float">
            <text:p>8640000</text:p>
          </table:table-cell>
          <table:table-cell table:formula="of:=[.B167]/[.C167]" office:value-type="float" office:value="0.00101828703703704" calcext:value-type="float">
            <text:p>0,00101828703703704000</text:p>
          </table:table-cell>
          <table:table-cell table:formula="of:=[.D168]-[.D167]" office:value-type="float" office:value="0.00000613425925925933" calcext:value-type="float">
            <text:p>0,00000613425925925933</text:p>
          </table:table-cell>
          <table:table-cell table:number-columns-repeated="16379"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[.B167]+53" office:value-type="float" office:value="8851" calcext:value-type="float">
            <text:p>8851</text:p>
          </table:table-cell>
          <table:table-cell office:value-type="float" office:value="8640000" calcext:value-type="float">
            <text:p>8640000</text:p>
          </table:table-cell>
          <table:table-cell table:formula="of:=[.B168]/[.C168]" office:value-type="float" office:value="0.0010244212962963" calcext:value-type="float">
            <text:p>0,00102442129629630000</text:p>
          </table:table-cell>
          <table:table-cell table:formula="of:=[.D169]-[.D168]" office:value-type="float" office:value="0.00000613425925925933" calcext:value-type="float">
            <text:p>0,00000613425925925933</text:p>
          </table:table-cell>
          <table:table-cell table:number-columns-repeated="16379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[.B168]+53" office:value-type="float" office:value="8904" calcext:value-type="float">
            <text:p>8904</text:p>
          </table:table-cell>
          <table:table-cell office:value-type="float" office:value="8640000" calcext:value-type="float">
            <text:p>8640000</text:p>
          </table:table-cell>
          <table:table-cell table:formula="of:=[.B169]/[.C169]" office:value-type="float" office:value="0.00103055555555556" calcext:value-type="float">
            <text:p>0,00103055555555556000</text:p>
          </table:table-cell>
          <table:table-cell table:formula="of:=[.D170]-[.D169]" office:value-type="float" office:value="0.00000613425925925911" calcext:value-type="float">
            <text:p>0,00000613425925925911</text:p>
          </table:table-cell>
          <table:table-cell table:number-columns-repeated="16379"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[.B169]+53" office:value-type="float" office:value="8957" calcext:value-type="float">
            <text:p>8957</text:p>
          </table:table-cell>
          <table:table-cell office:value-type="float" office:value="8640000" calcext:value-type="float">
            <text:p>8640000</text:p>
          </table:table-cell>
          <table:table-cell table:formula="of:=[.B170]/[.C170]" office:value-type="float" office:value="0.00103668981481481" calcext:value-type="float">
            <text:p>0,00103668981481481000</text:p>
          </table:table-cell>
          <table:table-cell table:formula="of:=[.D171]-[.D170]" office:value-type="float" office:value="0.00000613425925925933" calcext:value-type="float">
            <text:p>0,00000613425925925933</text:p>
          </table:table-cell>
          <table:table-cell table:number-columns-repeated="16379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B170]+53" office:value-type="float" office:value="9010" calcext:value-type="float">
            <text:p>9010</text:p>
          </table:table-cell>
          <table:table-cell office:value-type="float" office:value="8640000" calcext:value-type="float">
            <text:p>8640000</text:p>
          </table:table-cell>
          <table:table-cell table:formula="of:=[.B171]/[.C171]" office:value-type="float" office:value="0.00104282407407407" calcext:value-type="float">
            <text:p>0,00104282407407407000</text:p>
          </table:table-cell>
          <table:table-cell table:formula="of:=[.D172]-[.D171]" office:value-type="float" office:value="0.00000613425925925933" calcext:value-type="float">
            <text:p>0,00000613425925925933</text:p>
          </table:table-cell>
          <table:table-cell table:number-columns-repeated="16379"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[.B171]+53" office:value-type="float" office:value="9063" calcext:value-type="float">
            <text:p>9063</text:p>
          </table:table-cell>
          <table:table-cell office:value-type="float" office:value="8640000" calcext:value-type="float">
            <text:p>8640000</text:p>
          </table:table-cell>
          <table:table-cell table:formula="of:=[.B172]/[.C172]" office:value-type="float" office:value="0.00104895833333333" calcext:value-type="float">
            <text:p>0,00104895833333333000</text:p>
          </table:table-cell>
          <table:table-cell table:formula="of:=[.D173]-[.D172]" office:value-type="float" office:value="0.00000613425925925911" calcext:value-type="float">
            <text:p>0,00000613425925925911</text:p>
          </table:table-cell>
          <table:table-cell table:number-columns-repeated="16379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[.B172]+53" office:value-type="float" office:value="9116" calcext:value-type="float">
            <text:p>9116</text:p>
          </table:table-cell>
          <table:table-cell office:value-type="float" office:value="8640000" calcext:value-type="float">
            <text:p>8640000</text:p>
          </table:table-cell>
          <table:table-cell table:formula="of:=[.B173]/[.C173]" office:value-type="float" office:value="0.00105509259259259" calcext:value-type="float">
            <text:p>0,00105509259259259000</text:p>
          </table:table-cell>
          <table:table-cell table:formula="of:=[.D174]-[.D173]" office:value-type="float" office:value="0.00000613425925925933" calcext:value-type="float">
            <text:p>0,00000613425925925933</text:p>
          </table:table-cell>
          <table:table-cell table:number-columns-repeated="16379"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[.B173]+53" office:value-type="float" office:value="9169" calcext:value-type="float">
            <text:p>9169</text:p>
          </table:table-cell>
          <table:table-cell office:value-type="float" office:value="8640000" calcext:value-type="float">
            <text:p>8640000</text:p>
          </table:table-cell>
          <table:table-cell table:formula="of:=[.B174]/[.C174]" office:value-type="float" office:value="0.00106122685185185" calcext:value-type="float">
            <text:p>0,00106122685185185000</text:p>
          </table:table-cell>
          <table:table-cell table:formula="of:=[.D175]-[.D174]" office:value-type="float" office:value="0.00000613425925925933" calcext:value-type="float">
            <text:p>0,00000613425925925933</text:p>
          </table:table-cell>
          <table:table-cell table:number-columns-repeated="16379"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[.B174]+53" office:value-type="float" office:value="9222" calcext:value-type="float">
            <text:p>9222</text:p>
          </table:table-cell>
          <table:table-cell office:value-type="float" office:value="8640000" calcext:value-type="float">
            <text:p>8640000</text:p>
          </table:table-cell>
          <table:table-cell table:formula="of:=[.B175]/[.C175]" office:value-type="float" office:value="0.00106736111111111" calcext:value-type="float">
            <text:p>0,00106736111111111000</text:p>
          </table:table-cell>
          <table:table-cell table:formula="of:=[.D176]-[.D175]" office:value-type="float" office:value="0.00000613425925925911" calcext:value-type="float">
            <text:p>0,00000613425925925911</text:p>
          </table:table-cell>
          <table:table-cell table:number-columns-repeated="16379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.B175]+53" office:value-type="float" office:value="9275" calcext:value-type="float">
            <text:p>9275</text:p>
          </table:table-cell>
          <table:table-cell office:value-type="float" office:value="8640000" calcext:value-type="float">
            <text:p>8640000</text:p>
          </table:table-cell>
          <table:table-cell table:formula="of:=[.B176]/[.C176]" office:value-type="float" office:value="0.00107349537037037" calcext:value-type="float">
            <text:p>0,00107349537037037000</text:p>
          </table:table-cell>
          <table:table-cell table:formula="of:=[.D177]-[.D176]" office:value-type="float" office:value="0.00000613425925925933" calcext:value-type="float">
            <text:p>0,00000613425925925933</text:p>
          </table:table-cell>
          <table:table-cell table:number-columns-repeated="16379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.B176]+53" office:value-type="float" office:value="9328" calcext:value-type="float">
            <text:p>9328</text:p>
          </table:table-cell>
          <table:table-cell office:value-type="float" office:value="8640000" calcext:value-type="float">
            <text:p>8640000</text:p>
          </table:table-cell>
          <table:table-cell table:formula="of:=[.B177]/[.C177]" office:value-type="float" office:value="0.00107962962962963" calcext:value-type="float">
            <text:p>0,00107962962962963000</text:p>
          </table:table-cell>
          <table:table-cell table:formula="of:=[.D178]-[.D177]" office:value-type="float" office:value="0.00000613425925925933" calcext:value-type="float">
            <text:p>0,00000613425925925933</text:p>
          </table:table-cell>
          <table:table-cell table:number-columns-repeated="16379"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[.B177]+53" office:value-type="float" office:value="9381" calcext:value-type="float">
            <text:p>9381</text:p>
          </table:table-cell>
          <table:table-cell office:value-type="float" office:value="8640000" calcext:value-type="float">
            <text:p>8640000</text:p>
          </table:table-cell>
          <table:table-cell table:formula="of:=[.B178]/[.C178]" office:value-type="float" office:value="0.00108576388888889" calcext:value-type="float">
            <text:p>0,00108576388888889000</text:p>
          </table:table-cell>
          <table:table-cell table:formula="of:=[.D179]-[.D178]" office:value-type="float" office:value="0.00000613425925925911" calcext:value-type="float">
            <text:p>0,00000613425925925911</text:p>
          </table:table-cell>
          <table:table-cell table:number-columns-repeated="16379"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[.B178]+53" office:value-type="float" office:value="9434" calcext:value-type="float">
            <text:p>9434</text:p>
          </table:table-cell>
          <table:table-cell office:value-type="float" office:value="8640000" calcext:value-type="float">
            <text:p>8640000</text:p>
          </table:table-cell>
          <table:table-cell table:formula="of:=[.B179]/[.C179]" office:value-type="float" office:value="0.00109189814814815" calcext:value-type="float">
            <text:p>0,00109189814814815000</text:p>
          </table:table-cell>
          <table:table-cell table:formula="of:=[.D180]-[.D179]" office:value-type="float" office:value="0.00000613425925925933" calcext:value-type="float">
            <text:p>0,00000613425925925933</text:p>
          </table:table-cell>
          <table:table-cell table:number-columns-repeated="16379"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[.B179]+53" office:value-type="float" office:value="9487" calcext:value-type="float">
            <text:p>9487</text:p>
          </table:table-cell>
          <table:table-cell office:value-type="float" office:value="8640000" calcext:value-type="float">
            <text:p>8640000</text:p>
          </table:table-cell>
          <table:table-cell table:formula="of:=[.B180]/[.C180]" office:value-type="float" office:value="0.00109803240740741" calcext:value-type="float">
            <text:p>0,00109803240740741000</text:p>
          </table:table-cell>
          <table:table-cell table:formula="of:=[.D181]-[.D180]" office:value-type="float" office:value="0.00000613425925925933" calcext:value-type="float">
            <text:p>0,00000613425925925933</text:p>
          </table:table-cell>
          <table:table-cell table:number-columns-repeated="16379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B180]+53" office:value-type="float" office:value="9540" calcext:value-type="float">
            <text:p>9540</text:p>
          </table:table-cell>
          <table:table-cell office:value-type="float" office:value="8640000" calcext:value-type="float">
            <text:p>8640000</text:p>
          </table:table-cell>
          <table:table-cell table:formula="of:=[.B181]/[.C181]" office:value-type="float" office:value="0.00110416666666667" calcext:value-type="float">
            <text:p>0,00110416666666667000</text:p>
          </table:table-cell>
          <table:table-cell table:formula="of:=[.D182]-[.D181]" office:value-type="float" office:value="0.00000613425925925911" calcext:value-type="float">
            <text:p>0,00000613425925925911</text:p>
          </table:table-cell>
          <table:table-cell table:number-columns-repeated="16379"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[.B181]+53" office:value-type="float" office:value="9593" calcext:value-type="float">
            <text:p>9593</text:p>
          </table:table-cell>
          <table:table-cell office:value-type="float" office:value="8640000" calcext:value-type="float">
            <text:p>8640000</text:p>
          </table:table-cell>
          <table:table-cell table:formula="of:=[.B182]/[.C182]" office:value-type="float" office:value="0.00111030092592593" calcext:value-type="float">
            <text:p>0,00111030092592593000</text:p>
          </table:table-cell>
          <table:table-cell table:formula="of:=[.D183]-[.D182]" office:value-type="float" office:value="0.00000613425925925933" calcext:value-type="float">
            <text:p>0,00000613425925925933</text:p>
          </table:table-cell>
          <table:table-cell table:number-columns-repeated="16379"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[.B182]+53" office:value-type="float" office:value="9646" calcext:value-type="float">
            <text:p>9646</text:p>
          </table:table-cell>
          <table:table-cell office:value-type="float" office:value="8640000" calcext:value-type="float">
            <text:p>8640000</text:p>
          </table:table-cell>
          <table:table-cell table:formula="of:=[.B183]/[.C183]" office:value-type="float" office:value="0.00111643518518519" calcext:value-type="float">
            <text:p>0,00111643518518519000</text:p>
          </table:table-cell>
          <table:table-cell table:formula="of:=[.D184]-[.D183]" office:value-type="float" office:value="0.00000613425925925933" calcext:value-type="float">
            <text:p>0,00000613425925925933</text:p>
          </table:table-cell>
          <table:table-cell table:number-columns-repeated="16379"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[.B183]+53" office:value-type="float" office:value="9699" calcext:value-type="float">
            <text:p>9699</text:p>
          </table:table-cell>
          <table:table-cell office:value-type="float" office:value="8640000" calcext:value-type="float">
            <text:p>8640000</text:p>
          </table:table-cell>
          <table:table-cell table:formula="of:=[.B184]/[.C184]" office:value-type="float" office:value="0.00112256944444444" calcext:value-type="float">
            <text:p>0,00112256944444444000</text:p>
          </table:table-cell>
          <table:table-cell table:formula="of:=[.D185]-[.D184]" office:value-type="float" office:value="0.00000613425925925911" calcext:value-type="float">
            <text:p>0,00000613425925925911</text:p>
          </table:table-cell>
          <table:table-cell table:number-columns-repeated="16379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[.B184]+53" office:value-type="float" office:value="9752" calcext:value-type="float">
            <text:p>9752</text:p>
          </table:table-cell>
          <table:table-cell office:value-type="float" office:value="8640000" calcext:value-type="float">
            <text:p>8640000</text:p>
          </table:table-cell>
          <table:table-cell table:formula="of:=[.B185]/[.C185]" office:value-type="float" office:value="0.0011287037037037" calcext:value-type="float">
            <text:p>0,00112870370370370000</text:p>
          </table:table-cell>
          <table:table-cell table:formula="of:=[.D186]-[.D185]" office:value-type="float" office:value="0.00000613425925925933" calcext:value-type="float">
            <text:p>0,00000613425925925933</text:p>
          </table:table-cell>
          <table:table-cell table:number-columns-repeated="16379"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[.B185]+53" office:value-type="float" office:value="9805" calcext:value-type="float">
            <text:p>9805</text:p>
          </table:table-cell>
          <table:table-cell office:value-type="float" office:value="8640000" calcext:value-type="float">
            <text:p>8640000</text:p>
          </table:table-cell>
          <table:table-cell table:formula="of:=[.B186]/[.C186]" office:value-type="float" office:value="0.00113483796296296" calcext:value-type="float">
            <text:p>0,00113483796296296000</text:p>
          </table:table-cell>
          <table:table-cell table:formula="of:=[.D187]-[.D186]" office:value-type="float" office:value="0.00000613425925925933" calcext:value-type="float">
            <text:p>0,00000613425925925933</text:p>
          </table:table-cell>
          <table:table-cell table:number-columns-repeated="16379"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[.B186]+53" office:value-type="float" office:value="9858" calcext:value-type="float">
            <text:p>9858</text:p>
          </table:table-cell>
          <table:table-cell office:value-type="float" office:value="8640000" calcext:value-type="float">
            <text:p>8640000</text:p>
          </table:table-cell>
          <table:table-cell table:formula="of:=[.B187]/[.C187]" office:value-type="float" office:value="0.00114097222222222" calcext:value-type="float">
            <text:p>0,00114097222222222000</text:p>
          </table:table-cell>
          <table:table-cell table:formula="of:=[.D188]-[.D187]" office:value-type="float" office:value="0.00000613425925925933" calcext:value-type="float">
            <text:p>0,00000613425925925933</text:p>
          </table:table-cell>
          <table:table-cell table:number-columns-repeated="16379"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[.B187]+53" office:value-type="float" office:value="9911" calcext:value-type="float">
            <text:p>9911</text:p>
          </table:table-cell>
          <table:table-cell office:value-type="float" office:value="8640000" calcext:value-type="float">
            <text:p>8640000</text:p>
          </table:table-cell>
          <table:table-cell table:formula="of:=[.B188]/[.C188]" office:value-type="float" office:value="0.00114710648148148" calcext:value-type="float">
            <text:p>0,00114710648148148000</text:p>
          </table:table-cell>
          <table:table-cell table:formula="of:=[.D189]-[.D188]" office:value-type="float" office:value="0.00000613425925925911" calcext:value-type="float">
            <text:p>0,00000613425925925911</text:p>
          </table:table-cell>
          <table:table-cell table:number-columns-repeated="16379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[.B188]+53" office:value-type="float" office:value="9964" calcext:value-type="float">
            <text:p>9964</text:p>
          </table:table-cell>
          <table:table-cell office:value-type="float" office:value="8640000" calcext:value-type="float">
            <text:p>8640000</text:p>
          </table:table-cell>
          <table:table-cell table:formula="of:=[.B189]/[.C189]" office:value-type="float" office:value="0.00115324074074074" calcext:value-type="float">
            <text:p>0,00115324074074074000</text:p>
          </table:table-cell>
          <table:table-cell table:formula="of:=[.D190]-[.D189]" office:value-type="float" office:value="0.00000613425925925933" calcext:value-type="float">
            <text:p>0,00000613425925925933</text:p>
          </table:table-cell>
          <table:table-cell table:number-columns-repeated="16379"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[.B189]+53" office:value-type="float" office:value="10017" calcext:value-type="float">
            <text:p>10017</text:p>
          </table:table-cell>
          <table:table-cell office:value-type="float" office:value="8640000" calcext:value-type="float">
            <text:p>8640000</text:p>
          </table:table-cell>
          <table:table-cell table:formula="of:=[.B190]/[.C190]" office:value-type="float" office:value="0.001159375" calcext:value-type="float">
            <text:p>0,00115937500000000000</text:p>
          </table:table-cell>
          <table:table-cell table:formula="of:=[.D191]-[.D190]" office:value-type="float" office:value="0.00000613425925925933" calcext:value-type="float">
            <text:p>0,00000613425925925933</text:p>
          </table:table-cell>
          <table:table-cell table:number-columns-repeated="16379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B190]+53" office:value-type="float" office:value="10070" calcext:value-type="float">
            <text:p>10070</text:p>
          </table:table-cell>
          <table:table-cell office:value-type="float" office:value="8640000" calcext:value-type="float">
            <text:p>8640000</text:p>
          </table:table-cell>
          <table:table-cell table:formula="of:=[.B191]/[.C191]" office:value-type="float" office:value="0.00116550925925926" calcext:value-type="float">
            <text:p>0,00116550925925926000</text:p>
          </table:table-cell>
          <table:table-cell table:formula="of:=[.D192]-[.D191]" office:value-type="float" office:value="0.00000613425925925911" calcext:value-type="float">
            <text:p>0,00000613425925925911</text:p>
          </table:table-cell>
          <table:table-cell table:number-columns-repeated="16379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[.B191]+53" office:value-type="float" office:value="10123" calcext:value-type="float">
            <text:p>10123</text:p>
          </table:table-cell>
          <table:table-cell office:value-type="float" office:value="8640000" calcext:value-type="float">
            <text:p>8640000</text:p>
          </table:table-cell>
          <table:table-cell table:formula="of:=[.B192]/[.C192]" office:value-type="float" office:value="0.00117164351851852" calcext:value-type="float">
            <text:p>0,00117164351851852000</text:p>
          </table:table-cell>
          <table:table-cell table:formula="of:=[.D193]-[.D192]" office:value-type="float" office:value="0.00000613425925925933" calcext:value-type="float">
            <text:p>0,00000613425925925933</text:p>
          </table:table-cell>
          <table:table-cell table:number-columns-repeated="16379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[.B192]+53" office:value-type="float" office:value="10176" calcext:value-type="float">
            <text:p>10176</text:p>
          </table:table-cell>
          <table:table-cell office:value-type="float" office:value="8640000" calcext:value-type="float">
            <text:p>8640000</text:p>
          </table:table-cell>
          <table:table-cell table:formula="of:=[.B193]/[.C193]" office:value-type="float" office:value="0.00117777777777778" calcext:value-type="float">
            <text:p>0,00117777777777778000</text:p>
          </table:table-cell>
          <table:table-cell table:formula="of:=[.D194]-[.D193]" office:value-type="float" office:value="0.00000613425925925933" calcext:value-type="float">
            <text:p>0,00000613425925925933</text:p>
          </table:table-cell>
          <table:table-cell table:number-columns-repeated="16379"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[.B193]+53" office:value-type="float" office:value="10229" calcext:value-type="float">
            <text:p>10229</text:p>
          </table:table-cell>
          <table:table-cell office:value-type="float" office:value="8640000" calcext:value-type="float">
            <text:p>8640000</text:p>
          </table:table-cell>
          <table:table-cell table:formula="of:=[.B194]/[.C194]" office:value-type="float" office:value="0.00118391203703704" calcext:value-type="float">
            <text:p>0,00118391203703704000</text:p>
          </table:table-cell>
          <table:table-cell table:formula="of:=[.D195]-[.D194]" office:value-type="float" office:value="0.00000613425925925911" calcext:value-type="float">
            <text:p>0,00000613425925925911</text:p>
          </table:table-cell>
          <table:table-cell table:number-columns-repeated="16379"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[.B194]+53" office:value-type="float" office:value="10282" calcext:value-type="float">
            <text:p>10282</text:p>
          </table:table-cell>
          <table:table-cell office:value-type="float" office:value="8640000" calcext:value-type="float">
            <text:p>8640000</text:p>
          </table:table-cell>
          <table:table-cell table:formula="of:=[.B195]/[.C195]" office:value-type="float" office:value="0.0011900462962963" calcext:value-type="float">
            <text:p>0,00119004629629630000</text:p>
          </table:table-cell>
          <table:table-cell table:formula="of:=[.D196]-[.D195]" office:value-type="float" office:value="0.00000613425925925933" calcext:value-type="float">
            <text:p>0,00000613425925925933</text:p>
          </table:table-cell>
          <table:table-cell table:number-columns-repeated="16379"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[.B195]+53" office:value-type="float" office:value="10335" calcext:value-type="float">
            <text:p>10335</text:p>
          </table:table-cell>
          <table:table-cell office:value-type="float" office:value="8640000" calcext:value-type="float">
            <text:p>8640000</text:p>
          </table:table-cell>
          <table:table-cell table:formula="of:=[.B196]/[.C196]" office:value-type="float" office:value="0.00119618055555556" calcext:value-type="float">
            <text:p>0,00119618055555556000</text:p>
          </table:table-cell>
          <table:table-cell table:formula="of:=[.D197]-[.D196]" office:value-type="float" office:value="0.00000613425925925933" calcext:value-type="float">
            <text:p>0,00000613425925925933</text:p>
          </table:table-cell>
          <table:table-cell table:number-columns-repeated="16379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[.B196]+53" office:value-type="float" office:value="10388" calcext:value-type="float">
            <text:p>10388</text:p>
          </table:table-cell>
          <table:table-cell office:value-type="float" office:value="8640000" calcext:value-type="float">
            <text:p>8640000</text:p>
          </table:table-cell>
          <table:table-cell table:formula="of:=[.B197]/[.C197]" office:value-type="float" office:value="0.00120231481481482" calcext:value-type="float">
            <text:p>0,00120231481481482000</text:p>
          </table:table-cell>
          <table:table-cell table:formula="of:=[.D198]-[.D197]" office:value-type="float" office:value="0.00000613425925925911" calcext:value-type="float">
            <text:p>0,00000613425925925911</text:p>
          </table:table-cell>
          <table:table-cell table:number-columns-repeated="16379"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[.B197]+53" office:value-type="float" office:value="10441" calcext:value-type="float">
            <text:p>10441</text:p>
          </table:table-cell>
          <table:table-cell office:value-type="float" office:value="8640000" calcext:value-type="float">
            <text:p>8640000</text:p>
          </table:table-cell>
          <table:table-cell table:formula="of:=[.B198]/[.C198]" office:value-type="float" office:value="0.00120844907407407" calcext:value-type="float">
            <text:p>0,00120844907407407000</text:p>
          </table:table-cell>
          <table:table-cell table:formula="of:=[.D199]-[.D198]" office:value-type="float" office:value="0.00000613425925925933" calcext:value-type="float">
            <text:p>0,00000613425925925933</text:p>
          </table:table-cell>
          <table:table-cell table:number-columns-repeated="16379"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[.B198]+53" office:value-type="float" office:value="10494" calcext:value-type="float">
            <text:p>10494</text:p>
          </table:table-cell>
          <table:table-cell office:value-type="float" office:value="8640000" calcext:value-type="float">
            <text:p>8640000</text:p>
          </table:table-cell>
          <table:table-cell table:formula="of:=[.B199]/[.C199]" office:value-type="float" office:value="0.00121458333333333" calcext:value-type="float">
            <text:p>0,00121458333333333000</text:p>
          </table:table-cell>
          <table:table-cell table:formula="of:=[.D200]-[.D199]" office:value-type="float" office:value="0.00000613425925925933" calcext:value-type="float">
            <text:p>0,00000613425925925933</text:p>
          </table:table-cell>
          <table:table-cell table:number-columns-repeated="16379"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[.B199]+53" office:value-type="float" office:value="10547" calcext:value-type="float">
            <text:p>10547</text:p>
          </table:table-cell>
          <table:table-cell office:value-type="float" office:value="8640000" calcext:value-type="float">
            <text:p>8640000</text:p>
          </table:table-cell>
          <table:table-cell table:formula="of:=[.B200]/[.C200]" office:value-type="float" office:value="0.00122071759259259" calcext:value-type="float">
            <text:p>0,00122071759259259000</text:p>
          </table:table-cell>
          <table:table-cell table:formula="of:=[.D201]-[.D200]" office:value-type="float" office:value="0.00000613425925925911" calcext:value-type="float">
            <text:p>0,00000613425925925911</text:p>
          </table:table-cell>
          <table:table-cell table:number-columns-repeated="16379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200]+53" office:value-type="float" office:value="10600" calcext:value-type="float">
            <text:p>10600</text:p>
          </table:table-cell>
          <table:table-cell office:value-type="float" office:value="8640000" calcext:value-type="float">
            <text:p>8640000</text:p>
          </table:table-cell>
          <table:table-cell table:formula="of:=[.B201]/[.C201]" office:value-type="float" office:value="0.00122685185185185" calcext:value-type="float">
            <text:p>0,00122685185185185000</text:p>
          </table:table-cell>
          <table:table-cell table:formula="of:=[.D202]-[.D201]" office:value-type="float" office:value="0.00000613425925925933" calcext:value-type="float">
            <text:p>0,00000613425925925933</text:p>
          </table:table-cell>
          <table:table-cell table:number-columns-repeated="16379"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[.B201]+53" office:value-type="float" office:value="10653" calcext:value-type="float">
            <text:p>10653</text:p>
          </table:table-cell>
          <table:table-cell office:value-type="float" office:value="8640000" calcext:value-type="float">
            <text:p>8640000</text:p>
          </table:table-cell>
          <table:table-cell table:formula="of:=[.B202]/[.C202]" office:value-type="float" office:value="0.00123298611111111" calcext:value-type="float">
            <text:p>0,00123298611111111000</text:p>
          </table:table-cell>
          <table:table-cell table:formula="of:=[.D203]-[.D202]" office:value-type="float" office:value="0.00000613425925925933" calcext:value-type="float">
            <text:p>0,00000613425925925933</text:p>
          </table:table-cell>
          <table:table-cell table:number-columns-repeated="16379"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[.B202]+53" office:value-type="float" office:value="10706" calcext:value-type="float">
            <text:p>10706</text:p>
          </table:table-cell>
          <table:table-cell office:value-type="float" office:value="8640000" calcext:value-type="float">
            <text:p>8640000</text:p>
          </table:table-cell>
          <table:table-cell table:formula="of:=[.B203]/[.C203]" office:value-type="float" office:value="0.00123912037037037" calcext:value-type="float">
            <text:p>0,00123912037037037000</text:p>
          </table:table-cell>
          <table:table-cell table:formula="of:=[.D204]-[.D203]" office:value-type="float" office:value="0.00000613425925925911" calcext:value-type="float">
            <text:p>0,00000613425925925911</text:p>
          </table:table-cell>
          <table:table-cell table:number-columns-repeated="16379"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[.B203]+53" office:value-type="float" office:value="10759" calcext:value-type="float">
            <text:p>10759</text:p>
          </table:table-cell>
          <table:table-cell office:value-type="float" office:value="8640000" calcext:value-type="float">
            <text:p>8640000</text:p>
          </table:table-cell>
          <table:table-cell table:formula="of:=[.B204]/[.C204]" office:value-type="float" office:value="0.00124525462962963" calcext:value-type="float">
            <text:p>0,00124525462962963000</text:p>
          </table:table-cell>
          <table:table-cell table:formula="of:=[.D205]-[.D204]" office:value-type="float" office:value="0.00000613425925925933" calcext:value-type="float">
            <text:p>0,00000613425925925933</text:p>
          </table:table-cell>
          <table:table-cell table:number-columns-repeated="16379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[.B204]+53" office:value-type="float" office:value="10812" calcext:value-type="float">
            <text:p>10812</text:p>
          </table:table-cell>
          <table:table-cell office:value-type="float" office:value="8640000" calcext:value-type="float">
            <text:p>8640000</text:p>
          </table:table-cell>
          <table:table-cell table:formula="of:=[.B205]/[.C205]" office:value-type="float" office:value="0.00125138888888889" calcext:value-type="float">
            <text:p>0,00125138888888889000</text:p>
          </table:table-cell>
          <table:table-cell table:formula="of:=[.D206]-[.D205]" office:value-type="float" office:value="0.00000613425925925933" calcext:value-type="float">
            <text:p>0,00000613425925925933</text:p>
          </table:table-cell>
          <table:table-cell table:number-columns-repeated="16379"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[.B205]+53" office:value-type="float" office:value="10865" calcext:value-type="float">
            <text:p>10865</text:p>
          </table:table-cell>
          <table:table-cell office:value-type="float" office:value="8640000" calcext:value-type="float">
            <text:p>8640000</text:p>
          </table:table-cell>
          <table:table-cell table:formula="of:=[.B206]/[.C206]" office:value-type="float" office:value="0.00125752314814815" calcext:value-type="float">
            <text:p>0,00125752314814815000</text:p>
          </table:table-cell>
          <table:table-cell table:formula="of:=[.D207]-[.D206]" office:value-type="float" office:value="0.00000613425925925911" calcext:value-type="float">
            <text:p>0,00000613425925925911</text:p>
          </table:table-cell>
          <table:table-cell table:number-columns-repeated="16379"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[.B206]+53" office:value-type="float" office:value="10918" calcext:value-type="float">
            <text:p>10918</text:p>
          </table:table-cell>
          <table:table-cell office:value-type="float" office:value="8640000" calcext:value-type="float">
            <text:p>8640000</text:p>
          </table:table-cell>
          <table:table-cell table:formula="of:=[.B207]/[.C207]" office:value-type="float" office:value="0.00126365740740741" calcext:value-type="float">
            <text:p>0,00126365740740741000</text:p>
          </table:table-cell>
          <table:table-cell table:formula="of:=[.D208]-[.D207]" office:value-type="float" office:value="0.00000613425925925933" calcext:value-type="float">
            <text:p>0,00000613425925925933</text:p>
          </table:table-cell>
          <table:table-cell table:number-columns-repeated="16379"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[.B207]+53" office:value-type="float" office:value="10971" calcext:value-type="float">
            <text:p>10971</text:p>
          </table:table-cell>
          <table:table-cell office:value-type="float" office:value="8640000" calcext:value-type="float">
            <text:p>8640000</text:p>
          </table:table-cell>
          <table:table-cell table:formula="of:=[.B208]/[.C208]" office:value-type="float" office:value="0.00126979166666667" calcext:value-type="float">
            <text:p>0,00126979166666667000</text:p>
          </table:table-cell>
          <table:table-cell table:formula="of:=[.D209]-[.D208]" office:value-type="float" office:value="0.00000613425925925933" calcext:value-type="float">
            <text:p>0,00000613425925925933</text:p>
          </table:table-cell>
          <table:table-cell table:number-columns-repeated="16379"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[.B208]+53" office:value-type="float" office:value="11024" calcext:value-type="float">
            <text:p>11024</text:p>
          </table:table-cell>
          <table:table-cell office:value-type="float" office:value="8640000" calcext:value-type="float">
            <text:p>8640000</text:p>
          </table:table-cell>
          <table:table-cell table:formula="of:=[.B209]/[.C209]" office:value-type="float" office:value="0.00127592592592593" calcext:value-type="float">
            <text:p>0,00127592592592593000</text:p>
          </table:table-cell>
          <table:table-cell table:formula="of:=[.D210]-[.D209]" office:value-type="float" office:value="0.00000613425925925911" calcext:value-type="float">
            <text:p>0,00000613425925925911</text:p>
          </table:table-cell>
          <table:table-cell table:number-columns-repeated="16379"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[.B209]+53" office:value-type="float" office:value="11077" calcext:value-type="float">
            <text:p>11077</text:p>
          </table:table-cell>
          <table:table-cell office:value-type="float" office:value="8640000" calcext:value-type="float">
            <text:p>8640000</text:p>
          </table:table-cell>
          <table:table-cell table:formula="of:=[.B210]/[.C210]" office:value-type="float" office:value="0.00128206018518519" calcext:value-type="float">
            <text:p>0,00128206018518519000</text:p>
          </table:table-cell>
          <table:table-cell table:formula="of:=[.D211]-[.D210]" office:value-type="float" office:value="0.00000613425925925933" calcext:value-type="float">
            <text:p>0,00000613425925925933</text:p>
          </table:table-cell>
          <table:table-cell table:number-columns-repeated="16379"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[.B210]+53" office:value-type="float" office:value="11130" calcext:value-type="float">
            <text:p>11130</text:p>
          </table:table-cell>
          <table:table-cell office:value-type="float" office:value="8640000" calcext:value-type="float">
            <text:p>8640000</text:p>
          </table:table-cell>
          <table:table-cell table:formula="of:=[.B211]/[.C211]" office:value-type="float" office:value="0.00128819444444444" calcext:value-type="float">
            <text:p>0,00128819444444444000</text:p>
          </table:table-cell>
          <table:table-cell table:formula="of:=[.D212]-[.D211]" office:value-type="float" office:value="0.00000613425925925933" calcext:value-type="float">
            <text:p>0,00000613425925925933</text:p>
          </table:table-cell>
          <table:table-cell table:number-columns-repeated="16379"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[.B211]+53" office:value-type="float" office:value="11183" calcext:value-type="float">
            <text:p>11183</text:p>
          </table:table-cell>
          <table:table-cell office:value-type="float" office:value="8640000" calcext:value-type="float">
            <text:p>8640000</text:p>
          </table:table-cell>
          <table:table-cell table:formula="of:=[.B212]/[.C212]" office:value-type="float" office:value="0.0012943287037037" calcext:value-type="float">
            <text:p>0,00129432870370370000</text:p>
          </table:table-cell>
          <table:table-cell table:formula="of:=[.D213]-[.D212]" office:value-type="float" office:value="0.00000613425925925911" calcext:value-type="float">
            <text:p>0,00000613425925925911</text:p>
          </table:table-cell>
          <table:table-cell table:number-columns-repeated="16379"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[.B212]+53" office:value-type="float" office:value="11236" calcext:value-type="float">
            <text:p>11236</text:p>
          </table:table-cell>
          <table:table-cell office:value-type="float" office:value="8640000" calcext:value-type="float">
            <text:p>8640000</text:p>
          </table:table-cell>
          <table:table-cell table:formula="of:=[.B213]/[.C213]" office:value-type="float" office:value="0.00130046296296296" calcext:value-type="float">
            <text:p>0,00130046296296296000</text:p>
          </table:table-cell>
          <table:table-cell table:formula="of:=[.D214]-[.D213]" office:value-type="float" office:value="0.00000613425925925933" calcext:value-type="float">
            <text:p>0,00000613425925925933</text:p>
          </table:table-cell>
          <table:table-cell table:number-columns-repeated="16379"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[.B213]+53" office:value-type="float" office:value="11289" calcext:value-type="float">
            <text:p>11289</text:p>
          </table:table-cell>
          <table:table-cell office:value-type="float" office:value="8640000" calcext:value-type="float">
            <text:p>8640000</text:p>
          </table:table-cell>
          <table:table-cell table:formula="of:=[.B214]/[.C214]" office:value-type="float" office:value="0.00130659722222222" calcext:value-type="float">
            <text:p>0,00130659722222222000</text:p>
          </table:table-cell>
          <table:table-cell table:formula="of:=[.D215]-[.D214]" office:value-type="float" office:value="0.00000613425925925933" calcext:value-type="float">
            <text:p>0,00000613425925925933</text:p>
          </table:table-cell>
          <table:table-cell table:number-columns-repeated="16379"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[.B214]+53" office:value-type="float" office:value="11342" calcext:value-type="float">
            <text:p>11342</text:p>
          </table:table-cell>
          <table:table-cell office:value-type="float" office:value="8640000" calcext:value-type="float">
            <text:p>8640000</text:p>
          </table:table-cell>
          <table:table-cell table:formula="of:=[.B215]/[.C215]" office:value-type="float" office:value="0.00131273148148148" calcext:value-type="float">
            <text:p>0,00131273148148148000</text:p>
          </table:table-cell>
          <table:table-cell table:formula="of:=[.D216]-[.D215]" office:value-type="float" office:value="0.00000613425925925911" calcext:value-type="float">
            <text:p>0,00000613425925925911</text:p>
          </table:table-cell>
          <table:table-cell table:number-columns-repeated="16379"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[.B215]+53" office:value-type="float" office:value="11395" calcext:value-type="float">
            <text:p>11395</text:p>
          </table:table-cell>
          <table:table-cell office:value-type="float" office:value="8640000" calcext:value-type="float">
            <text:p>8640000</text:p>
          </table:table-cell>
          <table:table-cell table:formula="of:=[.B216]/[.C216]" office:value-type="float" office:value="0.00131886574074074" calcext:value-type="float">
            <text:p>0,00131886574074074000</text:p>
          </table:table-cell>
          <table:table-cell table:formula="of:=[.D217]-[.D216]" office:value-type="float" office:value="0.00000613425925925933" calcext:value-type="float">
            <text:p>0,00000613425925925933</text:p>
          </table:table-cell>
          <table:table-cell table:number-columns-repeated="16379"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[.B216]+53" office:value-type="float" office:value="11448" calcext:value-type="float">
            <text:p>11448</text:p>
          </table:table-cell>
          <table:table-cell office:value-type="float" office:value="8640000" calcext:value-type="float">
            <text:p>8640000</text:p>
          </table:table-cell>
          <table:table-cell table:formula="of:=[.B217]/[.C217]" office:value-type="float" office:value="0.001325" calcext:value-type="float">
            <text:p>0,00132500000000000000</text:p>
          </table:table-cell>
          <table:table-cell table:formula="of:=[.D218]-[.D217]" office:value-type="float" office:value="0.00000613425925925933" calcext:value-type="float">
            <text:p>0,00000613425925925933</text:p>
          </table:table-cell>
          <table:table-cell table:number-columns-repeated="16379"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[.B217]+53" office:value-type="float" office:value="11501" calcext:value-type="float">
            <text:p>11501</text:p>
          </table:table-cell>
          <table:table-cell office:value-type="float" office:value="8640000" calcext:value-type="float">
            <text:p>8640000</text:p>
          </table:table-cell>
          <table:table-cell table:formula="of:=[.B218]/[.C218]" office:value-type="float" office:value="0.00133113425925926" calcext:value-type="float">
            <text:p>0,00133113425925926000</text:p>
          </table:table-cell>
          <table:table-cell table:formula="of:=[.D219]-[.D218]" office:value-type="float" office:value="0.00000613425925925911" calcext:value-type="float">
            <text:p>0,00000613425925925911</text:p>
          </table:table-cell>
          <table:table-cell table:number-columns-repeated="16379"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[.B218]+53" office:value-type="float" office:value="11554" calcext:value-type="float">
            <text:p>11554</text:p>
          </table:table-cell>
          <table:table-cell office:value-type="float" office:value="8640000" calcext:value-type="float">
            <text:p>8640000</text:p>
          </table:table-cell>
          <table:table-cell table:formula="of:=[.B219]/[.C219]" office:value-type="float" office:value="0.00133726851851852" calcext:value-type="float">
            <text:p>0,00133726851851852000</text:p>
          </table:table-cell>
          <table:table-cell table:formula="of:=[.D220]-[.D219]" office:value-type="float" office:value="0.00000613425925925933" calcext:value-type="float">
            <text:p>0,00000613425925925933</text:p>
          </table:table-cell>
          <table:table-cell table:number-columns-repeated="16379"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[.B219]+53" office:value-type="float" office:value="11607" calcext:value-type="float">
            <text:p>11607</text:p>
          </table:table-cell>
          <table:table-cell office:value-type="float" office:value="8640000" calcext:value-type="float">
            <text:p>8640000</text:p>
          </table:table-cell>
          <table:table-cell table:formula="of:=[.B220]/[.C220]" office:value-type="float" office:value="0.00134340277777778" calcext:value-type="float">
            <text:p>0,00134340277777778000</text:p>
          </table:table-cell>
          <table:table-cell table:formula="of:=[.D221]-[.D220]" office:value-type="float" office:value="0.00000613425925925933" calcext:value-type="float">
            <text:p>0,00000613425925925933</text:p>
          </table:table-cell>
          <table:table-cell table:number-columns-repeated="16379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[.B220]+53" office:value-type="float" office:value="11660" calcext:value-type="float">
            <text:p>11660</text:p>
          </table:table-cell>
          <table:table-cell office:value-type="float" office:value="8640000" calcext:value-type="float">
            <text:p>8640000</text:p>
          </table:table-cell>
          <table:table-cell table:formula="of:=[.B221]/[.C221]" office:value-type="float" office:value="0.00134953703703704" calcext:value-type="float">
            <text:p>0,00134953703703704000</text:p>
          </table:table-cell>
          <table:table-cell table:formula="of:=[.D222]-[.D221]" office:value-type="float" office:value="0.00000613425925925911" calcext:value-type="float">
            <text:p>0,00000613425925925911</text:p>
          </table:table-cell>
          <table:table-cell table:number-columns-repeated="16379"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[.B221]+53" office:value-type="float" office:value="11713" calcext:value-type="float">
            <text:p>11713</text:p>
          </table:table-cell>
          <table:table-cell office:value-type="float" office:value="8640000" calcext:value-type="float">
            <text:p>8640000</text:p>
          </table:table-cell>
          <table:table-cell table:formula="of:=[.B222]/[.C222]" office:value-type="float" office:value="0.0013556712962963" calcext:value-type="float">
            <text:p>0,00135567129629630000</text:p>
          </table:table-cell>
          <table:table-cell table:formula="of:=[.D223]-[.D222]" office:value-type="float" office:value="0.00000613425925925933" calcext:value-type="float">
            <text:p>0,00000613425925925933</text:p>
          </table:table-cell>
          <table:table-cell table:number-columns-repeated="16379"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[.B222]+53" office:value-type="float" office:value="11766" calcext:value-type="float">
            <text:p>11766</text:p>
          </table:table-cell>
          <table:table-cell office:value-type="float" office:value="8640000" calcext:value-type="float">
            <text:p>8640000</text:p>
          </table:table-cell>
          <table:table-cell table:formula="of:=[.B223]/[.C223]" office:value-type="float" office:value="0.00136180555555556" calcext:value-type="float">
            <text:p>0,00136180555555556000</text:p>
          </table:table-cell>
          <table:table-cell table:formula="of:=[.D224]-[.D223]" office:value-type="float" office:value="0.00000613425925925933" calcext:value-type="float">
            <text:p>0,00000613425925925933</text:p>
          </table:table-cell>
          <table:table-cell table:number-columns-repeated="16379"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[.B223]+53" office:value-type="float" office:value="11819" calcext:value-type="float">
            <text:p>11819</text:p>
          </table:table-cell>
          <table:table-cell office:value-type="float" office:value="8640000" calcext:value-type="float">
            <text:p>8640000</text:p>
          </table:table-cell>
          <table:table-cell table:formula="of:=[.B224]/[.C224]" office:value-type="float" office:value="0.00136793981481481" calcext:value-type="float">
            <text:p>0,00136793981481481000</text:p>
          </table:table-cell>
          <table:table-cell table:formula="of:=[.D225]-[.D224]" office:value-type="float" office:value="0.00000613425925925911" calcext:value-type="float">
            <text:p>0,00000613425925925911</text:p>
          </table:table-cell>
          <table:table-cell table:number-columns-repeated="16379"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[.B224]+53" office:value-type="float" office:value="11872" calcext:value-type="float">
            <text:p>11872</text:p>
          </table:table-cell>
          <table:table-cell office:value-type="float" office:value="8640000" calcext:value-type="float">
            <text:p>8640000</text:p>
          </table:table-cell>
          <table:table-cell table:formula="of:=[.B225]/[.C225]" office:value-type="float" office:value="0.00137407407407407" calcext:value-type="float">
            <text:p>0,00137407407407407000</text:p>
          </table:table-cell>
          <table:table-cell table:formula="of:=[.D226]-[.D225]" office:value-type="float" office:value="0.00000613425925925933" calcext:value-type="float">
            <text:p>0,00000613425925925933</text:p>
          </table:table-cell>
          <table:table-cell table:number-columns-repeated="16379"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[.B225]+53" office:value-type="float" office:value="11925" calcext:value-type="float">
            <text:p>11925</text:p>
          </table:table-cell>
          <table:table-cell office:value-type="float" office:value="8640000" calcext:value-type="float">
            <text:p>8640000</text:p>
          </table:table-cell>
          <table:table-cell table:formula="of:=[.B226]/[.C226]" office:value-type="float" office:value="0.00138020833333333" calcext:value-type="float">
            <text:p>0,00138020833333333000</text:p>
          </table:table-cell>
          <table:table-cell table:formula="of:=[.D227]-[.D226]" office:value-type="float" office:value="0.00000613425925925933" calcext:value-type="float">
            <text:p>0,00000613425925925933</text:p>
          </table:table-cell>
          <table:table-cell table:number-columns-repeated="16379"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[.B226]+53" office:value-type="float" office:value="11978" calcext:value-type="float">
            <text:p>11978</text:p>
          </table:table-cell>
          <table:table-cell office:value-type="float" office:value="8640000" calcext:value-type="float">
            <text:p>8640000</text:p>
          </table:table-cell>
          <table:table-cell table:formula="of:=[.B227]/[.C227]" office:value-type="float" office:value="0.00138634259259259" calcext:value-type="float">
            <text:p>0,00138634259259259000</text:p>
          </table:table-cell>
          <table:table-cell table:formula="of:=[.D228]-[.D227]" office:value-type="float" office:value="0.00000613425925925911" calcext:value-type="float">
            <text:p>0,00000613425925925911</text:p>
          </table:table-cell>
          <table:table-cell table:number-columns-repeated="16379"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[.B227]+53" office:value-type="float" office:value="12031" calcext:value-type="float">
            <text:p>12031</text:p>
          </table:table-cell>
          <table:table-cell office:value-type="float" office:value="8640000" calcext:value-type="float">
            <text:p>8640000</text:p>
          </table:table-cell>
          <table:table-cell table:formula="of:=[.B228]/[.C228]" office:value-type="float" office:value="0.00139247685185185" calcext:value-type="float">
            <text:p>0,00139247685185185000</text:p>
          </table:table-cell>
          <table:table-cell table:formula="of:=[.D229]-[.D228]" office:value-type="float" office:value="0.00000613425925925933" calcext:value-type="float">
            <text:p>0,00000613425925925933</text:p>
          </table:table-cell>
          <table:table-cell table:number-columns-repeated="16379"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[.B228]+53" office:value-type="float" office:value="12084" calcext:value-type="float">
            <text:p>12084</text:p>
          </table:table-cell>
          <table:table-cell office:value-type="float" office:value="8640000" calcext:value-type="float">
            <text:p>8640000</text:p>
          </table:table-cell>
          <table:table-cell table:formula="of:=[.B229]/[.C229]" office:value-type="float" office:value="0.00139861111111111" calcext:value-type="float">
            <text:p>0,00139861111111111000</text:p>
          </table:table-cell>
          <table:table-cell table:formula="of:=[.D230]-[.D229]" office:value-type="float" office:value="0.00000613425925925933" calcext:value-type="float">
            <text:p>0,00000613425925925933</text:p>
          </table:table-cell>
          <table:table-cell table:number-columns-repeated="16379"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[.B229]+53" office:value-type="float" office:value="12137" calcext:value-type="float">
            <text:p>12137</text:p>
          </table:table-cell>
          <table:table-cell office:value-type="float" office:value="8640000" calcext:value-type="float">
            <text:p>8640000</text:p>
          </table:table-cell>
          <table:table-cell table:formula="of:=[.B230]/[.C230]" office:value-type="float" office:value="0.00140474537037037" calcext:value-type="float">
            <text:p>0,00140474537037037000</text:p>
          </table:table-cell>
          <table:table-cell table:formula="of:=[.D231]-[.D230]" office:value-type="float" office:value="0.00000613425925925911" calcext:value-type="float">
            <text:p>0,00000613425925925911</text:p>
          </table:table-cell>
          <table:table-cell table:number-columns-repeated="16379"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[.B230]+53" office:value-type="float" office:value="12190" calcext:value-type="float">
            <text:p>12190</text:p>
          </table:table-cell>
          <table:table-cell office:value-type="float" office:value="8640000" calcext:value-type="float">
            <text:p>8640000</text:p>
          </table:table-cell>
          <table:table-cell table:formula="of:=[.B231]/[.C231]" office:value-type="float" office:value="0.00141087962962963" calcext:value-type="float">
            <text:p>0,00141087962962963000</text:p>
          </table:table-cell>
          <table:table-cell table:formula="of:=[.D232]-[.D231]" office:value-type="float" office:value="0.00000613425925925933" calcext:value-type="float">
            <text:p>0,00000613425925925933</text:p>
          </table:table-cell>
          <table:table-cell table:number-columns-repeated="16379"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[.B231]+53" office:value-type="float" office:value="12243" calcext:value-type="float">
            <text:p>12243</text:p>
          </table:table-cell>
          <table:table-cell office:value-type="float" office:value="8640000" calcext:value-type="float">
            <text:p>8640000</text:p>
          </table:table-cell>
          <table:table-cell table:formula="of:=[.B232]/[.C232]" office:value-type="float" office:value="0.00141701388888889" calcext:value-type="float">
            <text:p>0,00141701388888889000</text:p>
          </table:table-cell>
          <table:table-cell table:formula="of:=[.D233]-[.D232]" office:value-type="float" office:value="0.00000613425925925933" calcext:value-type="float">
            <text:p>0,00000613425925925933</text:p>
          </table:table-cell>
          <table:table-cell table:number-columns-repeated="16379"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[.B232]+53" office:value-type="float" office:value="12296" calcext:value-type="float">
            <text:p>12296</text:p>
          </table:table-cell>
          <table:table-cell office:value-type="float" office:value="8640000" calcext:value-type="float">
            <text:p>8640000</text:p>
          </table:table-cell>
          <table:table-cell table:formula="of:=[.B233]/[.C233]" office:value-type="float" office:value="0.00142314814814815" calcext:value-type="float">
            <text:p>0,00142314814814815000</text:p>
          </table:table-cell>
          <table:table-cell table:formula="of:=[.D234]-[.D233]" office:value-type="float" office:value="0.00000613425925925911" calcext:value-type="float">
            <text:p>0,00000613425925925911</text:p>
          </table:table-cell>
          <table:table-cell table:number-columns-repeated="16379"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[.B233]+53" office:value-type="float" office:value="12349" calcext:value-type="float">
            <text:p>12349</text:p>
          </table:table-cell>
          <table:table-cell office:value-type="float" office:value="8640000" calcext:value-type="float">
            <text:p>8640000</text:p>
          </table:table-cell>
          <table:table-cell table:formula="of:=[.B234]/[.C234]" office:value-type="float" office:value="0.00142928240740741" calcext:value-type="float">
            <text:p>0,00142928240740741000</text:p>
          </table:table-cell>
          <table:table-cell table:formula="of:=[.D235]-[.D234]" office:value-type="float" office:value="0.00000613425925925933" calcext:value-type="float">
            <text:p>0,00000613425925925933</text:p>
          </table:table-cell>
          <table:table-cell table:number-columns-repeated="16379"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[.B234]+53" office:value-type="float" office:value="12402" calcext:value-type="float">
            <text:p>12402</text:p>
          </table:table-cell>
          <table:table-cell office:value-type="float" office:value="8640000" calcext:value-type="float">
            <text:p>8640000</text:p>
          </table:table-cell>
          <table:table-cell table:formula="of:=[.B235]/[.C235]" office:value-type="float" office:value="0.00143541666666667" calcext:value-type="float">
            <text:p>0,00143541666666667000</text:p>
          </table:table-cell>
          <table:table-cell table:formula="of:=[.D236]-[.D235]" office:value-type="float" office:value="0.00000613425925925933" calcext:value-type="float">
            <text:p>0,00000613425925925933</text:p>
          </table:table-cell>
          <table:table-cell table:number-columns-repeated="16379"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[.B235]+53" office:value-type="float" office:value="12455" calcext:value-type="float">
            <text:p>12455</text:p>
          </table:table-cell>
          <table:table-cell office:value-type="float" office:value="8640000" calcext:value-type="float">
            <text:p>8640000</text:p>
          </table:table-cell>
          <table:table-cell table:formula="of:=[.B236]/[.C236]" office:value-type="float" office:value="0.00144155092592593" calcext:value-type="float">
            <text:p>0,00144155092592593000</text:p>
          </table:table-cell>
          <table:table-cell table:formula="of:=[.D237]-[.D236]" office:value-type="float" office:value="0.00000613425925925911" calcext:value-type="float">
            <text:p>0,00000613425925925911</text:p>
          </table:table-cell>
          <table:table-cell table:number-columns-repeated="16379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[.B236]+53" office:value-type="float" office:value="12508" calcext:value-type="float">
            <text:p>12508</text:p>
          </table:table-cell>
          <table:table-cell office:value-type="float" office:value="8640000" calcext:value-type="float">
            <text:p>8640000</text:p>
          </table:table-cell>
          <table:table-cell table:formula="of:=[.B237]/[.C237]" office:value-type="float" office:value="0.00144768518518519" calcext:value-type="float">
            <text:p>0,00144768518518518000</text:p>
          </table:table-cell>
          <table:table-cell table:formula="of:=[.D238]-[.D237]" office:value-type="float" office:value="0.00000613425925925933" calcext:value-type="float">
            <text:p>0,00000613425925925933</text:p>
          </table:table-cell>
          <table:table-cell table:number-columns-repeated="16379"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[.B237]+53" office:value-type="float" office:value="12561" calcext:value-type="float">
            <text:p>12561</text:p>
          </table:table-cell>
          <table:table-cell office:value-type="float" office:value="8640000" calcext:value-type="float">
            <text:p>8640000</text:p>
          </table:table-cell>
          <table:table-cell table:formula="of:=[.B238]/[.C238]" office:value-type="float" office:value="0.00145381944444444" calcext:value-type="float">
            <text:p>0,00145381944444444000</text:p>
          </table:table-cell>
          <table:table-cell table:formula="of:=[.D239]-[.D238]" office:value-type="float" office:value="0.00000613425925925933" calcext:value-type="float">
            <text:p>0,00000613425925925933</text:p>
          </table:table-cell>
          <table:table-cell table:number-columns-repeated="16379"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[.B238]+53" office:value-type="float" office:value="12614" calcext:value-type="float">
            <text:p>12614</text:p>
          </table:table-cell>
          <table:table-cell office:value-type="float" office:value="8640000" calcext:value-type="float">
            <text:p>8640000</text:p>
          </table:table-cell>
          <table:table-cell table:formula="of:=[.B239]/[.C239]" office:value-type="float" office:value="0.0014599537037037" calcext:value-type="float">
            <text:p>0,00145995370370370000</text:p>
          </table:table-cell>
          <table:table-cell table:formula="of:=[.D240]-[.D239]" office:value-type="float" office:value="0.00000613425925925911" calcext:value-type="float">
            <text:p>0,00000613425925925911</text:p>
          </table:table-cell>
          <table:table-cell table:number-columns-repeated="16379"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[.B239]+53" office:value-type="float" office:value="12667" calcext:value-type="float">
            <text:p>12667</text:p>
          </table:table-cell>
          <table:table-cell office:value-type="float" office:value="8640000" calcext:value-type="float">
            <text:p>8640000</text:p>
          </table:table-cell>
          <table:table-cell table:formula="of:=[.B240]/[.C240]" office:value-type="float" office:value="0.00146608796296296" calcext:value-type="float">
            <text:p>0,00146608796296296000</text:p>
          </table:table-cell>
          <table:table-cell table:formula="of:=[.D241]-[.D240]" office:value-type="float" office:value="0.00000613425925925933" calcext:value-type="float">
            <text:p>0,00000613425925925933</text:p>
          </table:table-cell>
          <table:table-cell table:number-columns-repeated="16379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[.B240]+53" office:value-type="float" office:value="12720" calcext:value-type="float">
            <text:p>12720</text:p>
          </table:table-cell>
          <table:table-cell office:value-type="float" office:value="8640000" calcext:value-type="float">
            <text:p>8640000</text:p>
          </table:table-cell>
          <table:table-cell table:formula="of:=[.B241]/[.C241]" office:value-type="float" office:value="0.00147222222222222" calcext:value-type="float">
            <text:p>0,00147222222222222000</text:p>
          </table:table-cell>
          <table:table-cell table:formula="of:=[.D242]-[.D241]" office:value-type="float" office:value="0.00000613425925925933" calcext:value-type="float">
            <text:p>0,00000613425925925933</text:p>
          </table:table-cell>
          <table:table-cell table:number-columns-repeated="16379"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[.B241]+53" office:value-type="float" office:value="12773" calcext:value-type="float">
            <text:p>12773</text:p>
          </table:table-cell>
          <table:table-cell office:value-type="float" office:value="8640000" calcext:value-type="float">
            <text:p>8640000</text:p>
          </table:table-cell>
          <table:table-cell table:formula="of:=[.B242]/[.C242]" office:value-type="float" office:value="0.00147835648148148" calcext:value-type="float">
            <text:p>0,00147835648148148000</text:p>
          </table:table-cell>
          <table:table-cell table:formula="of:=[.D243]-[.D242]" office:value-type="float" office:value="0.00000613425925925911" calcext:value-type="float">
            <text:p>0,00000613425925925911</text:p>
          </table:table-cell>
          <table:table-cell table:number-columns-repeated="16379"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[.B242]+53" office:value-type="float" office:value="12826" calcext:value-type="float">
            <text:p>12826</text:p>
          </table:table-cell>
          <table:table-cell office:value-type="float" office:value="8640000" calcext:value-type="float">
            <text:p>8640000</text:p>
          </table:table-cell>
          <table:table-cell table:formula="of:=[.B243]/[.C243]" office:value-type="float" office:value="0.00148449074074074" calcext:value-type="float">
            <text:p>0,00148449074074074000</text:p>
          </table:table-cell>
          <table:table-cell table:formula="of:=[.D244]-[.D243]" office:value-type="float" office:value="0.00000613425925925933" calcext:value-type="float">
            <text:p>0,00000613425925925933</text:p>
          </table:table-cell>
          <table:table-cell table:number-columns-repeated="16379"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[.B243]+53" office:value-type="float" office:value="12879" calcext:value-type="float">
            <text:p>12879</text:p>
          </table:table-cell>
          <table:table-cell office:value-type="float" office:value="8640000" calcext:value-type="float">
            <text:p>8640000</text:p>
          </table:table-cell>
          <table:table-cell table:formula="of:=[.B244]/[.C244]" office:value-type="float" office:value="0.001490625" calcext:value-type="float">
            <text:p>0,00149062500000000000</text:p>
          </table:table-cell>
          <table:table-cell table:formula="of:=[.D245]-[.D244]" office:value-type="float" office:value="0.00000613425925925933" calcext:value-type="float">
            <text:p>0,00000613425925925933</text:p>
          </table:table-cell>
          <table:table-cell table:number-columns-repeated="16379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[.B244]+53" office:value-type="float" office:value="12932" calcext:value-type="float">
            <text:p>12932</text:p>
          </table:table-cell>
          <table:table-cell office:value-type="float" office:value="8640000" calcext:value-type="float">
            <text:p>8640000</text:p>
          </table:table-cell>
          <table:table-cell table:formula="of:=[.B245]/[.C245]" office:value-type="float" office:value="0.00149675925925926" calcext:value-type="float">
            <text:p>0,00149675925925926000</text:p>
          </table:table-cell>
          <table:table-cell table:formula="of:=[.D246]-[.D245]" office:value-type="float" office:value="0.00000613425925925911" calcext:value-type="float">
            <text:p>0,00000613425925925911</text:p>
          </table:table-cell>
          <table:table-cell table:number-columns-repeated="16379"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[.B245]+53" office:value-type="float" office:value="12985" calcext:value-type="float">
            <text:p>12985</text:p>
          </table:table-cell>
          <table:table-cell office:value-type="float" office:value="8640000" calcext:value-type="float">
            <text:p>8640000</text:p>
          </table:table-cell>
          <table:table-cell table:formula="of:=[.B246]/[.C246]" office:value-type="float" office:value="0.00150289351851852" calcext:value-type="float">
            <text:p>0,00150289351851852000</text:p>
          </table:table-cell>
          <table:table-cell table:formula="of:=[.D247]-[.D246]" office:value-type="float" office:value="0.00000613425925925933" calcext:value-type="float">
            <text:p>0,00000613425925925933</text:p>
          </table:table-cell>
          <table:table-cell table:number-columns-repeated="16379"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[.B246]+53" office:value-type="float" office:value="13038" calcext:value-type="float">
            <text:p>13038</text:p>
          </table:table-cell>
          <table:table-cell office:value-type="float" office:value="8640000" calcext:value-type="float">
            <text:p>8640000</text:p>
          </table:table-cell>
          <table:table-cell table:formula="of:=[.B247]/[.C247]" office:value-type="float" office:value="0.00150902777777778" calcext:value-type="float">
            <text:p>0,00150902777777778000</text:p>
          </table:table-cell>
          <table:table-cell table:formula="of:=[.D248]-[.D247]" office:value-type="float" office:value="0.00000613425925925933" calcext:value-type="float">
            <text:p>0,00000613425925925933</text:p>
          </table:table-cell>
          <table:table-cell table:number-columns-repeated="16379"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[.B247]+53" office:value-type="float" office:value="13091" calcext:value-type="float">
            <text:p>13091</text:p>
          </table:table-cell>
          <table:table-cell office:value-type="float" office:value="8640000" calcext:value-type="float">
            <text:p>8640000</text:p>
          </table:table-cell>
          <table:table-cell table:formula="of:=[.B248]/[.C248]" office:value-type="float" office:value="0.00151516203703704" calcext:value-type="float">
            <text:p>0,00151516203703704000</text:p>
          </table:table-cell>
          <table:table-cell table:formula="of:=[.D249]-[.D248]" office:value-type="float" office:value="0.00000613425925925911" calcext:value-type="float">
            <text:p>0,00000613425925925911</text:p>
          </table:table-cell>
          <table:table-cell table:number-columns-repeated="16379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[.B248]+53" office:value-type="float" office:value="13144" calcext:value-type="float">
            <text:p>13144</text:p>
          </table:table-cell>
          <table:table-cell office:value-type="float" office:value="8640000" calcext:value-type="float">
            <text:p>8640000</text:p>
          </table:table-cell>
          <table:table-cell table:formula="of:=[.B249]/[.C249]" office:value-type="float" office:value="0.0015212962962963" calcext:value-type="float">
            <text:p>0,00152129629629630000</text:p>
          </table:table-cell>
          <table:table-cell table:formula="of:=[.D250]-[.D249]" office:value-type="float" office:value="0.00000613425925925933" calcext:value-type="float">
            <text:p>0,00000613425925925933</text:p>
          </table:table-cell>
          <table:table-cell table:number-columns-repeated="16379"/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[.B249]+53" office:value-type="float" office:value="13197" calcext:value-type="float">
            <text:p>13197</text:p>
          </table:table-cell>
          <table:table-cell office:value-type="float" office:value="8640000" calcext:value-type="float">
            <text:p>8640000</text:p>
          </table:table-cell>
          <table:table-cell table:formula="of:=[.B250]/[.C250]" office:value-type="float" office:value="0.00152743055555556" calcext:value-type="float">
            <text:p>0,00152743055555556000</text:p>
          </table:table-cell>
          <table:table-cell table:formula="of:=[.D251]-[.D250]" office:value-type="float" office:value="0.00000613425925925933" calcext:value-type="float">
            <text:p>0,00000613425925925933</text:p>
          </table:table-cell>
          <table:table-cell table:number-columns-repeated="16379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[.B250]+53" office:value-type="float" office:value="13250" calcext:value-type="float">
            <text:p>13250</text:p>
          </table:table-cell>
          <table:table-cell office:value-type="float" office:value="8640000" calcext:value-type="float">
            <text:p>8640000</text:p>
          </table:table-cell>
          <table:table-cell table:formula="of:=[.B251]/[.C251]" office:value-type="float" office:value="0.00153356481481481" calcext:value-type="float">
            <text:p>0,00153356481481481000</text:p>
          </table:table-cell>
          <table:table-cell table:formula="of:=[.D252]-[.D251]" office:value-type="float" office:value="0.00000613425925925911" calcext:value-type="float">
            <text:p>0,00000613425925925911</text:p>
          </table:table-cell>
          <table:table-cell table:number-columns-repeated="16379"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[.B251]+53" office:value-type="float" office:value="13303" calcext:value-type="float">
            <text:p>13303</text:p>
          </table:table-cell>
          <table:table-cell office:value-type="float" office:value="8640000" calcext:value-type="float">
            <text:p>8640000</text:p>
          </table:table-cell>
          <table:table-cell table:formula="of:=[.B252]/[.C252]" office:value-type="float" office:value="0.00153969907407407" calcext:value-type="float">
            <text:p>0,00153969907407407000</text:p>
          </table:table-cell>
          <table:table-cell table:formula="of:=[.D253]-[.D252]" office:value-type="float" office:value="0.00000613425925925933" calcext:value-type="float">
            <text:p>0,00000613425925925933</text:p>
          </table:table-cell>
          <table:table-cell table:number-columns-repeated="16379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[.B252]+53" office:value-type="float" office:value="13356" calcext:value-type="float">
            <text:p>13356</text:p>
          </table:table-cell>
          <table:table-cell office:value-type="float" office:value="8640000" calcext:value-type="float">
            <text:p>8640000</text:p>
          </table:table-cell>
          <table:table-cell table:formula="of:=[.B253]/[.C253]" office:value-type="float" office:value="0.00154583333333333" calcext:value-type="float">
            <text:p>0,00154583333333333000</text:p>
          </table:table-cell>
          <table:table-cell table:formula="of:=[.D254]-[.D253]" office:value-type="float" office:value="0.00000613425925925933" calcext:value-type="float">
            <text:p>0,00000613425925925933</text:p>
          </table:table-cell>
          <table:table-cell table:number-columns-repeated="16379"/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[.B253]+53" office:value-type="float" office:value="13409" calcext:value-type="float">
            <text:p>13409</text:p>
          </table:table-cell>
          <table:table-cell office:value-type="float" office:value="8640000" calcext:value-type="float">
            <text:p>8640000</text:p>
          </table:table-cell>
          <table:table-cell table:formula="of:=[.B254]/[.C254]" office:value-type="float" office:value="0.00155196759259259" calcext:value-type="float">
            <text:p>0,00155196759259259000</text:p>
          </table:table-cell>
          <table:table-cell table:formula="of:=[.D255]-[.D254]" office:value-type="float" office:value="0.00000613425925925911" calcext:value-type="float">
            <text:p>0,00000613425925925911</text:p>
          </table:table-cell>
          <table:table-cell table:number-columns-repeated="16379"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[.B254]+53" office:value-type="float" office:value="13462" calcext:value-type="float">
            <text:p>13462</text:p>
          </table:table-cell>
          <table:table-cell office:value-type="float" office:value="8640000" calcext:value-type="float">
            <text:p>8640000</text:p>
          </table:table-cell>
          <table:table-cell table:formula="of:=[.B255]/[.C255]" office:value-type="float" office:value="0.00155810185185185" calcext:value-type="float">
            <text:p>0,00155810185185185000</text:p>
          </table:table-cell>
          <table:table-cell table:formula="of:=[.D256]-[.D255]" office:value-type="float" office:value="0.00000613425925925933" calcext:value-type="float">
            <text:p>0,00000613425925925933</text:p>
          </table:table-cell>
          <table:table-cell table:number-columns-repeated="16379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[.B255]+53" office:value-type="float" office:value="13515" calcext:value-type="float">
            <text:p>13515</text:p>
          </table:table-cell>
          <table:table-cell office:value-type="float" office:value="8640000" calcext:value-type="float">
            <text:p>8640000</text:p>
          </table:table-cell>
          <table:table-cell table:formula="of:=[.B256]/[.C256]" office:value-type="float" office:value="0.00156423611111111" calcext:value-type="float">
            <text:p>0,00156423611111111000</text:p>
          </table:table-cell>
          <table:table-cell table:formula="of:=[.D257]-[.D256]" office:value-type="float" office:value="0.00000613425925925933" calcext:value-type="float">
            <text:p>0,00000613425925925933</text:p>
          </table:table-cell>
          <table:table-cell table:number-columns-repeated="16379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.B256]+53" office:value-type="float" office:value="13568" calcext:value-type="float">
            <text:p>13568</text:p>
          </table:table-cell>
          <table:table-cell office:value-type="float" office:value="8640000" calcext:value-type="float">
            <text:p>8640000</text:p>
          </table:table-cell>
          <table:table-cell table:formula="of:=[.B257]/[.C257]" office:value-type="float" office:value="0.00157037037037037" calcext:value-type="float">
            <text:p>0,00157037037037037000</text:p>
          </table:table-cell>
          <table:table-cell table:formula="of:=[.D258]-[.D257]" office:value-type="float" office:value="0.00000613425925925911" calcext:value-type="float">
            <text:p>0,00000613425925925911</text:p>
          </table:table-cell>
          <table:table-cell table:number-columns-repeated="16379"/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[.B257]+53" office:value-type="float" office:value="13621" calcext:value-type="float">
            <text:p>13621</text:p>
          </table:table-cell>
          <table:table-cell office:value-type="float" office:value="8640000" calcext:value-type="float">
            <text:p>8640000</text:p>
          </table:table-cell>
          <table:table-cell table:formula="of:=[.B258]/[.C258]" office:value-type="float" office:value="0.00157650462962963" calcext:value-type="float">
            <text:p>0,00157650462962963000</text:p>
          </table:table-cell>
          <table:table-cell table:formula="of:=[.D259]-[.D258]" office:value-type="float" office:value="0.00000613425925925933" calcext:value-type="float">
            <text:p>0,00000613425925925933</text:p>
          </table:table-cell>
          <table:table-cell table:number-columns-repeated="16379"/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[.B258]+53" office:value-type="float" office:value="13674" calcext:value-type="float">
            <text:p>13674</text:p>
          </table:table-cell>
          <table:table-cell office:value-type="float" office:value="8640000" calcext:value-type="float">
            <text:p>8640000</text:p>
          </table:table-cell>
          <table:table-cell table:formula="of:=[.B259]/[.C259]" office:value-type="float" office:value="0.00158263888888889" calcext:value-type="float">
            <text:p>0,00158263888888889000</text:p>
          </table:table-cell>
          <table:table-cell table:formula="of:=[.D260]-[.D259]" office:value-type="float" office:value="0.00000613425925925933" calcext:value-type="float">
            <text:p>0,00000613425925925933</text:p>
          </table:table-cell>
          <table:table-cell table:number-columns-repeated="16379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[.B259]+53" office:value-type="float" office:value="13727" calcext:value-type="float">
            <text:p>13727</text:p>
          </table:table-cell>
          <table:table-cell office:value-type="float" office:value="8640000" calcext:value-type="float">
            <text:p>8640000</text:p>
          </table:table-cell>
          <table:table-cell table:formula="of:=[.B260]/[.C260]" office:value-type="float" office:value="0.00158877314814815" calcext:value-type="float">
            <text:p>0,00158877314814815000</text:p>
          </table:table-cell>
          <table:table-cell table:formula="of:=[.D261]-[.D260]" office:value-type="float" office:value="0.00000613425925925933" calcext:value-type="float">
            <text:p>0,00000613425925925933</text:p>
          </table:table-cell>
          <table:table-cell table:number-columns-repeated="16379"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[.B260]+53" office:value-type="float" office:value="13780" calcext:value-type="float">
            <text:p>13780</text:p>
          </table:table-cell>
          <table:table-cell office:value-type="float" office:value="8640000" calcext:value-type="float">
            <text:p>8640000</text:p>
          </table:table-cell>
          <table:table-cell table:formula="of:=[.B261]/[.C261]" office:value-type="float" office:value="0.00159490740740741" calcext:value-type="float">
            <text:p>0,00159490740740741000</text:p>
          </table:table-cell>
          <table:table-cell table:formula="of:=[.D262]-[.D261]" office:value-type="float" office:value="0.00000613425925925911" calcext:value-type="float">
            <text:p>0,00000613425925925911</text:p>
          </table:table-cell>
          <table:table-cell table:number-columns-repeated="16379"/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[.B261]+53" office:value-type="float" office:value="13833" calcext:value-type="float">
            <text:p>13833</text:p>
          </table:table-cell>
          <table:table-cell office:value-type="float" office:value="8640000" calcext:value-type="float">
            <text:p>8640000</text:p>
          </table:table-cell>
          <table:table-cell table:formula="of:=[.B262]/[.C262]" office:value-type="float" office:value="0.00160104166666667" calcext:value-type="float">
            <text:p>0,00160104166666667000</text:p>
          </table:table-cell>
          <table:table-cell table:formula="of:=[.D263]-[.D262]" office:value-type="float" office:value="0.00000613425925925933" calcext:value-type="float">
            <text:p>0,00000613425925925933</text:p>
          </table:table-cell>
          <table:table-cell table:number-columns-repeated="16379"/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[.B262]+53" office:value-type="float" office:value="13886" calcext:value-type="float">
            <text:p>13886</text:p>
          </table:table-cell>
          <table:table-cell office:value-type="float" office:value="8640000" calcext:value-type="float">
            <text:p>8640000</text:p>
          </table:table-cell>
          <table:table-cell table:formula="of:=[.B263]/[.C263]" office:value-type="float" office:value="0.00160717592592593" calcext:value-type="float">
            <text:p>0,00160717592592593000</text:p>
          </table:table-cell>
          <table:table-cell table:formula="of:=[.D264]-[.D263]" office:value-type="float" office:value="0.00000613425925925933" calcext:value-type="float">
            <text:p>0,00000613425925925933</text:p>
          </table:table-cell>
          <table:table-cell table:number-columns-repeated="16379"/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[.B263]+53" office:value-type="float" office:value="13939" calcext:value-type="float">
            <text:p>13939</text:p>
          </table:table-cell>
          <table:table-cell office:value-type="float" office:value="8640000" calcext:value-type="float">
            <text:p>8640000</text:p>
          </table:table-cell>
          <table:table-cell table:formula="of:=[.B264]/[.C264]" office:value-type="float" office:value="0.00161331018518519" calcext:value-type="float">
            <text:p>0,00161331018518519000</text:p>
          </table:table-cell>
          <table:table-cell table:formula="of:=[.D265]-[.D264]" office:value-type="float" office:value="0.00000613425925925911" calcext:value-type="float">
            <text:p>0,00000613425925925911</text:p>
          </table:table-cell>
          <table:table-cell table:number-columns-repeated="16379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[.B264]+53" office:value-type="float" office:value="13992" calcext:value-type="float">
            <text:p>13992</text:p>
          </table:table-cell>
          <table:table-cell office:value-type="float" office:value="8640000" calcext:value-type="float">
            <text:p>8640000</text:p>
          </table:table-cell>
          <table:table-cell table:formula="of:=[.B265]/[.C265]" office:value-type="float" office:value="0.00161944444444444" calcext:value-type="float">
            <text:p>0,00161944444444444000</text:p>
          </table:table-cell>
          <table:table-cell table:formula="of:=[.D266]-[.D265]" office:value-type="float" office:value="0.00000613425925925933" calcext:value-type="float">
            <text:p>0,00000613425925925933</text:p>
          </table:table-cell>
          <table:table-cell table:number-columns-repeated="16379"/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[.B265]+53" office:value-type="float" office:value="14045" calcext:value-type="float">
            <text:p>14045</text:p>
          </table:table-cell>
          <table:table-cell office:value-type="float" office:value="8640000" calcext:value-type="float">
            <text:p>8640000</text:p>
          </table:table-cell>
          <table:table-cell table:formula="of:=[.B266]/[.C266]" office:value-type="float" office:value="0.0016255787037037" calcext:value-type="float">
            <text:p>0,00162557870370370000</text:p>
          </table:table-cell>
          <table:table-cell table:formula="of:=[.D267]-[.D266]" office:value-type="float" office:value="0.00000613425925925933" calcext:value-type="float">
            <text:p>0,00000613425925925933</text:p>
          </table:table-cell>
          <table:table-cell table:number-columns-repeated="16379"/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[.B266]+53" office:value-type="float" office:value="14098" calcext:value-type="float">
            <text:p>14098</text:p>
          </table:table-cell>
          <table:table-cell office:value-type="float" office:value="8640000" calcext:value-type="float">
            <text:p>8640000</text:p>
          </table:table-cell>
          <table:table-cell table:formula="of:=[.B267]/[.C267]" office:value-type="float" office:value="0.00163171296296296" calcext:value-type="float">
            <text:p>0,00163171296296296000</text:p>
          </table:table-cell>
          <table:table-cell table:formula="of:=[.D268]-[.D267]" office:value-type="float" office:value="0.00000613425925925911" calcext:value-type="float">
            <text:p>0,00000613425925925911</text:p>
          </table:table-cell>
          <table:table-cell table:number-columns-repeated="16379"/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[.B267]+53" office:value-type="float" office:value="14151" calcext:value-type="float">
            <text:p>14151</text:p>
          </table:table-cell>
          <table:table-cell office:value-type="float" office:value="8640000" calcext:value-type="float">
            <text:p>8640000</text:p>
          </table:table-cell>
          <table:table-cell table:formula="of:=[.B268]/[.C268]" office:value-type="float" office:value="0.00163784722222222" calcext:value-type="float">
            <text:p>0,00163784722222222000</text:p>
          </table:table-cell>
          <table:table-cell table:formula="of:=[.D269]-[.D268]" office:value-type="float" office:value="0.00000613425925925933" calcext:value-type="float">
            <text:p>0,00000613425925925933</text:p>
          </table:table-cell>
          <table:table-cell table:number-columns-repeated="16379"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[.B268]+53" office:value-type="float" office:value="14204" calcext:value-type="float">
            <text:p>14204</text:p>
          </table:table-cell>
          <table:table-cell office:value-type="float" office:value="8640000" calcext:value-type="float">
            <text:p>8640000</text:p>
          </table:table-cell>
          <table:table-cell table:formula="of:=[.B269]/[.C269]" office:value-type="float" office:value="0.00164398148148148" calcext:value-type="float">
            <text:p>0,00164398148148148000</text:p>
          </table:table-cell>
          <table:table-cell table:formula="of:=[.D270]-[.D269]" office:value-type="float" office:value="0.00000613425925925933" calcext:value-type="float">
            <text:p>0,00000613425925925933</text:p>
          </table:table-cell>
          <table:table-cell table:number-columns-repeated="16379"/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[.B269]+53" office:value-type="float" office:value="14257" calcext:value-type="float">
            <text:p>14257</text:p>
          </table:table-cell>
          <table:table-cell office:value-type="float" office:value="8640000" calcext:value-type="float">
            <text:p>8640000</text:p>
          </table:table-cell>
          <table:table-cell table:formula="of:=[.B270]/[.C270]" office:value-type="float" office:value="0.00165011574074074" calcext:value-type="float">
            <text:p>0,00165011574074074000</text:p>
          </table:table-cell>
          <table:table-cell table:formula="of:=[.D271]-[.D270]" office:value-type="float" office:value="0.00000613425925925911" calcext:value-type="float">
            <text:p>0,00000613425925925911</text:p>
          </table:table-cell>
          <table:table-cell table:number-columns-repeated="16379"/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[.B270]+53" office:value-type="float" office:value="14310" calcext:value-type="float">
            <text:p>14310</text:p>
          </table:table-cell>
          <table:table-cell office:value-type="float" office:value="8640000" calcext:value-type="float">
            <text:p>8640000</text:p>
          </table:table-cell>
          <table:table-cell table:formula="of:=[.B271]/[.C271]" office:value-type="float" office:value="0.00165625" calcext:value-type="float">
            <text:p>0,00165625000000000000</text:p>
          </table:table-cell>
          <table:table-cell table:formula="of:=[.D272]-[.D271]" office:value-type="float" office:value="0.00000613425925925933" calcext:value-type="float">
            <text:p>0,00000613425925925933</text:p>
          </table:table-cell>
          <table:table-cell table:number-columns-repeated="16379"/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[.B271]+53" office:value-type="float" office:value="14363" calcext:value-type="float">
            <text:p>14363</text:p>
          </table:table-cell>
          <table:table-cell office:value-type="float" office:value="8640000" calcext:value-type="float">
            <text:p>8640000</text:p>
          </table:table-cell>
          <table:table-cell table:formula="of:=[.B272]/[.C272]" office:value-type="float" office:value="0.00166238425925926" calcext:value-type="float">
            <text:p>0,00166238425925926000</text:p>
          </table:table-cell>
          <table:table-cell table:formula="of:=[.D273]-[.D272]" office:value-type="float" office:value="0.00000613425925925933" calcext:value-type="float">
            <text:p>0,00000613425925925933</text:p>
          </table:table-cell>
          <table:table-cell table:number-columns-repeated="16379"/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[.B272]+53" office:value-type="float" office:value="14416" calcext:value-type="float">
            <text:p>14416</text:p>
          </table:table-cell>
          <table:table-cell office:value-type="float" office:value="8640000" calcext:value-type="float">
            <text:p>8640000</text:p>
          </table:table-cell>
          <table:table-cell table:formula="of:=[.B273]/[.C273]" office:value-type="float" office:value="0.00166851851851852" calcext:value-type="float">
            <text:p>0,00166851851851852000</text:p>
          </table:table-cell>
          <table:table-cell table:formula="of:=[.D274]-[.D273]" office:value-type="float" office:value="0.00000613425925925911" calcext:value-type="float">
            <text:p>0,00000613425925925911</text:p>
          </table:table-cell>
          <table:table-cell table:number-columns-repeated="16379"/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[.B273]+53" office:value-type="float" office:value="14469" calcext:value-type="float">
            <text:p>14469</text:p>
          </table:table-cell>
          <table:table-cell office:value-type="float" office:value="8640000" calcext:value-type="float">
            <text:p>8640000</text:p>
          </table:table-cell>
          <table:table-cell table:formula="of:=[.B274]/[.C274]" office:value-type="float" office:value="0.00167465277777778" calcext:value-type="float">
            <text:p>0,00167465277777778000</text:p>
          </table:table-cell>
          <table:table-cell table:formula="of:=[.D275]-[.D274]" office:value-type="float" office:value="0.00000613425925925933" calcext:value-type="float">
            <text:p>0,00000613425925925933</text:p>
          </table:table-cell>
          <table:table-cell table:number-columns-repeated="16379"/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[.B274]+53" office:value-type="float" office:value="14522" calcext:value-type="float">
            <text:p>14522</text:p>
          </table:table-cell>
          <table:table-cell office:value-type="float" office:value="8640000" calcext:value-type="float">
            <text:p>8640000</text:p>
          </table:table-cell>
          <table:table-cell table:formula="of:=[.B275]/[.C275]" office:value-type="float" office:value="0.00168078703703704" calcext:value-type="float">
            <text:p>0,00168078703703704000</text:p>
          </table:table-cell>
          <table:table-cell table:formula="of:=[.D276]-[.D275]" office:value-type="float" office:value="0.00000613425925925933" calcext:value-type="float">
            <text:p>0,00000613425925925933</text:p>
          </table:table-cell>
          <table:table-cell table:number-columns-repeated="16379"/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[.B275]+53" office:value-type="float" office:value="14575" calcext:value-type="float">
            <text:p>14575</text:p>
          </table:table-cell>
          <table:table-cell office:value-type="float" office:value="8640000" calcext:value-type="float">
            <text:p>8640000</text:p>
          </table:table-cell>
          <table:table-cell table:formula="of:=[.B276]/[.C276]" office:value-type="float" office:value="0.0016869212962963" calcext:value-type="float">
            <text:p>0,00168692129629630000</text:p>
          </table:table-cell>
          <table:table-cell table:formula="of:=[.D277]-[.D276]" office:value-type="float" office:value="0.00000613425925925911" calcext:value-type="float">
            <text:p>0,00000613425925925911</text:p>
          </table:table-cell>
          <table:table-cell table:number-columns-repeated="16379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[.B276]+53" office:value-type="float" office:value="14628" calcext:value-type="float">
            <text:p>14628</text:p>
          </table:table-cell>
          <table:table-cell office:value-type="float" office:value="8640000" calcext:value-type="float">
            <text:p>8640000</text:p>
          </table:table-cell>
          <table:table-cell table:formula="of:=[.B277]/[.C277]" office:value-type="float" office:value="0.00169305555555556" calcext:value-type="float">
            <text:p>0,00169305555555556000</text:p>
          </table:table-cell>
          <table:table-cell table:formula="of:=[.D278]-[.D277]" office:value-type="float" office:value="0.00000613425925925933" calcext:value-type="float">
            <text:p>0,00000613425925925933</text:p>
          </table:table-cell>
          <table:table-cell table:number-columns-repeated="16379"/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[.B277]+53" office:value-type="float" office:value="14681" calcext:value-type="float">
            <text:p>14681</text:p>
          </table:table-cell>
          <table:table-cell office:value-type="float" office:value="8640000" calcext:value-type="float">
            <text:p>8640000</text:p>
          </table:table-cell>
          <table:table-cell table:formula="of:=[.B278]/[.C278]" office:value-type="float" office:value="0.00169918981481481" calcext:value-type="float">
            <text:p>0,00169918981481481000</text:p>
          </table:table-cell>
          <table:table-cell table:formula="of:=[.D279]-[.D278]" office:value-type="float" office:value="0.00000613425925925933" calcext:value-type="float">
            <text:p>0,00000613425925925933</text:p>
          </table:table-cell>
          <table:table-cell table:number-columns-repeated="16379"/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[.B278]+53" office:value-type="float" office:value="14734" calcext:value-type="float">
            <text:p>14734</text:p>
          </table:table-cell>
          <table:table-cell office:value-type="float" office:value="8640000" calcext:value-type="float">
            <text:p>8640000</text:p>
          </table:table-cell>
          <table:table-cell table:formula="of:=[.B279]/[.C279]" office:value-type="float" office:value="0.00170532407407407" calcext:value-type="float">
            <text:p>0,00170532407407407000</text:p>
          </table:table-cell>
          <table:table-cell table:formula="of:=[.D280]-[.D279]" office:value-type="float" office:value="0.00000613425925925911" calcext:value-type="float">
            <text:p>0,00000613425925925911</text:p>
          </table:table-cell>
          <table:table-cell table:number-columns-repeated="16379"/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[.B279]+53" office:value-type="float" office:value="14787" calcext:value-type="float">
            <text:p>14787</text:p>
          </table:table-cell>
          <table:table-cell office:value-type="float" office:value="8640000" calcext:value-type="float">
            <text:p>8640000</text:p>
          </table:table-cell>
          <table:table-cell table:formula="of:=[.B280]/[.C280]" office:value-type="float" office:value="0.00171145833333333" calcext:value-type="float">
            <text:p>0,00171145833333333000</text:p>
          </table:table-cell>
          <table:table-cell table:formula="of:=[.D281]-[.D280]" office:value-type="float" office:value="0.00000613425925925933" calcext:value-type="float">
            <text:p>0,00000613425925925933</text:p>
          </table:table-cell>
          <table:table-cell table:number-columns-repeated="16379"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[.B280]+53" office:value-type="float" office:value="14840" calcext:value-type="float">
            <text:p>14840</text:p>
          </table:table-cell>
          <table:table-cell office:value-type="float" office:value="8640000" calcext:value-type="float">
            <text:p>8640000</text:p>
          </table:table-cell>
          <table:table-cell table:formula="of:=[.B281]/[.C281]" office:value-type="float" office:value="0.00171759259259259" calcext:value-type="float">
            <text:p>0,00171759259259259000</text:p>
          </table:table-cell>
          <table:table-cell table:formula="of:=[.D282]-[.D281]" office:value-type="float" office:value="0.00000613425925925933" calcext:value-type="float">
            <text:p>0,00000613425925925933</text:p>
          </table:table-cell>
          <table:table-cell table:number-columns-repeated="16379"/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[.B281]+53" office:value-type="float" office:value="14893" calcext:value-type="float">
            <text:p>14893</text:p>
          </table:table-cell>
          <table:table-cell office:value-type="float" office:value="8640000" calcext:value-type="float">
            <text:p>8640000</text:p>
          </table:table-cell>
          <table:table-cell table:formula="of:=[.B282]/[.C282]" office:value-type="float" office:value="0.00172372685185185" calcext:value-type="float">
            <text:p>0,00172372685185185000</text:p>
          </table:table-cell>
          <table:table-cell table:formula="of:=[.D283]-[.D282]" office:value-type="float" office:value="0.00000613425925925911" calcext:value-type="float">
            <text:p>0,00000613425925925911</text:p>
          </table:table-cell>
          <table:table-cell table:number-columns-repeated="16379"/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[.B282]+53" office:value-type="float" office:value="14946" calcext:value-type="float">
            <text:p>14946</text:p>
          </table:table-cell>
          <table:table-cell office:value-type="float" office:value="8640000" calcext:value-type="float">
            <text:p>8640000</text:p>
          </table:table-cell>
          <table:table-cell table:formula="of:=[.B283]/[.C283]" office:value-type="float" office:value="0.00172986111111111" calcext:value-type="float">
            <text:p>0,00172986111111111000</text:p>
          </table:table-cell>
          <table:table-cell table:formula="of:=[.D284]-[.D283]" office:value-type="float" office:value="0.00000613425925925933" calcext:value-type="float">
            <text:p>0,00000613425925925933</text:p>
          </table:table-cell>
          <table:table-cell table:number-columns-repeated="16379"/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[.B283]+53" office:value-type="float" office:value="14999" calcext:value-type="float">
            <text:p>14999</text:p>
          </table:table-cell>
          <table:table-cell office:value-type="float" office:value="8640000" calcext:value-type="float">
            <text:p>8640000</text:p>
          </table:table-cell>
          <table:table-cell table:formula="of:=[.B284]/[.C284]" office:value-type="float" office:value="0.00173599537037037" calcext:value-type="float">
            <text:p>0,00173599537037037000</text:p>
          </table:table-cell>
          <table:table-cell table:formula="of:=[.D285]-[.D284]" office:value-type="float" office:value="0.00000613425925925933" calcext:value-type="float">
            <text:p>0,00000613425925925933</text:p>
          </table:table-cell>
          <table:table-cell table:number-columns-repeated="16379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[.B284]+53" office:value-type="float" office:value="15052" calcext:value-type="float">
            <text:p>15052</text:p>
          </table:table-cell>
          <table:table-cell office:value-type="float" office:value="8640000" calcext:value-type="float">
            <text:p>8640000</text:p>
          </table:table-cell>
          <table:table-cell table:formula="of:=[.B285]/[.C285]" office:value-type="float" office:value="0.00174212962962963" calcext:value-type="float">
            <text:p>0,00174212962962963000</text:p>
          </table:table-cell>
          <table:table-cell table:formula="of:=[.D286]-[.D285]" office:value-type="float" office:value="0.00000613425925925911" calcext:value-type="float">
            <text:p>0,00000613425925925911</text:p>
          </table:table-cell>
          <table:table-cell table:number-columns-repeated="16379"/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[.B285]+53" office:value-type="float" office:value="15105" calcext:value-type="float">
            <text:p>15105</text:p>
          </table:table-cell>
          <table:table-cell office:value-type="float" office:value="8640000" calcext:value-type="float">
            <text:p>8640000</text:p>
          </table:table-cell>
          <table:table-cell table:formula="of:=[.B286]/[.C286]" office:value-type="float" office:value="0.00174826388888889" calcext:value-type="float">
            <text:p>0,00174826388888889000</text:p>
          </table:table-cell>
          <table:table-cell table:formula="of:=[.D287]-[.D286]" office:value-type="float" office:value="0.00000613425925925933" calcext:value-type="float">
            <text:p>0,00000613425925925933</text:p>
          </table:table-cell>
          <table:table-cell table:number-columns-repeated="16379"/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[.B286]+53" office:value-type="float" office:value="15158" calcext:value-type="float">
            <text:p>15158</text:p>
          </table:table-cell>
          <table:table-cell office:value-type="float" office:value="8640000" calcext:value-type="float">
            <text:p>8640000</text:p>
          </table:table-cell>
          <table:table-cell table:formula="of:=[.B287]/[.C287]" office:value-type="float" office:value="0.00175439814814815" calcext:value-type="float">
            <text:p>0,00175439814814815000</text:p>
          </table:table-cell>
          <table:table-cell table:formula="of:=[.D288]-[.D287]" office:value-type="float" office:value="0.00000613425925925933" calcext:value-type="float">
            <text:p>0,00000613425925925933</text:p>
          </table:table-cell>
          <table:table-cell table:number-columns-repeated="16379"/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[.B287]+53" office:value-type="float" office:value="15211" calcext:value-type="float">
            <text:p>15211</text:p>
          </table:table-cell>
          <table:table-cell office:value-type="float" office:value="8640000" calcext:value-type="float">
            <text:p>8640000</text:p>
          </table:table-cell>
          <table:table-cell table:formula="of:=[.B288]/[.C288]" office:value-type="float" office:value="0.00176053240740741" calcext:value-type="float">
            <text:p>0,00176053240740741000</text:p>
          </table:table-cell>
          <table:table-cell table:formula="of:=[.D289]-[.D288]" office:value-type="float" office:value="0.00000613425925925911" calcext:value-type="float">
            <text:p>0,00000613425925925911</text:p>
          </table:table-cell>
          <table:table-cell table:number-columns-repeated="16379"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[.B288]+53" office:value-type="float" office:value="15264" calcext:value-type="float">
            <text:p>15264</text:p>
          </table:table-cell>
          <table:table-cell office:value-type="float" office:value="8640000" calcext:value-type="float">
            <text:p>8640000</text:p>
          </table:table-cell>
          <table:table-cell table:formula="of:=[.B289]/[.C289]" office:value-type="float" office:value="0.00176666666666667" calcext:value-type="float">
            <text:p>0,00176666666666667000</text:p>
          </table:table-cell>
          <table:table-cell table:formula="of:=[.D290]-[.D289]" office:value-type="float" office:value="0.00000613425925925933" calcext:value-type="float">
            <text:p>0,00000613425925925933</text:p>
          </table:table-cell>
          <table:table-cell table:number-columns-repeated="16379"/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[.B289]+53" office:value-type="float" office:value="15317" calcext:value-type="float">
            <text:p>15317</text:p>
          </table:table-cell>
          <table:table-cell office:value-type="float" office:value="8640000" calcext:value-type="float">
            <text:p>8640000</text:p>
          </table:table-cell>
          <table:table-cell table:formula="of:=[.B290]/[.C290]" office:value-type="float" office:value="0.00177280092592593" calcext:value-type="float">
            <text:p>0,00177280092592593000</text:p>
          </table:table-cell>
          <table:table-cell table:formula="of:=[.D291]-[.D290]" office:value-type="float" office:value="0.00000613425925925933" calcext:value-type="float">
            <text:p>0,00000613425925925933</text:p>
          </table:table-cell>
          <table:table-cell table:number-columns-repeated="16379"/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[.B290]+53" office:value-type="float" office:value="15370" calcext:value-type="float">
            <text:p>15370</text:p>
          </table:table-cell>
          <table:table-cell office:value-type="float" office:value="8640000" calcext:value-type="float">
            <text:p>8640000</text:p>
          </table:table-cell>
          <table:table-cell table:formula="of:=[.B291]/[.C291]" office:value-type="float" office:value="0.00177893518518519" calcext:value-type="float">
            <text:p>0,00177893518518519000</text:p>
          </table:table-cell>
          <table:table-cell table:formula="of:=[.D292]-[.D291]" office:value-type="float" office:value="0.00000613425925925911" calcext:value-type="float">
            <text:p>0,00000613425925925911</text:p>
          </table:table-cell>
          <table:table-cell table:number-columns-repeated="16379"/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[.B291]+53" office:value-type="float" office:value="15423" calcext:value-type="float">
            <text:p>15423</text:p>
          </table:table-cell>
          <table:table-cell office:value-type="float" office:value="8640000" calcext:value-type="float">
            <text:p>8640000</text:p>
          </table:table-cell>
          <table:table-cell table:formula="of:=[.B292]/[.C292]" office:value-type="float" office:value="0.00178506944444444" calcext:value-type="float">
            <text:p>0,00178506944444444000</text:p>
          </table:table-cell>
          <table:table-cell table:formula="of:=[.D293]-[.D292]" office:value-type="float" office:value="0.00000613425925925933" calcext:value-type="float">
            <text:p>0,00000613425925925933</text:p>
          </table:table-cell>
          <table:table-cell table:number-columns-repeated="16379"/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[.B292]+53" office:value-type="float" office:value="15476" calcext:value-type="float">
            <text:p>15476</text:p>
          </table:table-cell>
          <table:table-cell office:value-type="float" office:value="8640000" calcext:value-type="float">
            <text:p>8640000</text:p>
          </table:table-cell>
          <table:table-cell table:formula="of:=[.B293]/[.C293]" office:value-type="float" office:value="0.0017912037037037" calcext:value-type="float">
            <text:p>0,00179120370370370000</text:p>
          </table:table-cell>
          <table:table-cell table:formula="of:=[.D294]-[.D293]" office:value-type="float" office:value="0.00000613425925925933" calcext:value-type="float">
            <text:p>0,00000613425925925933</text:p>
          </table:table-cell>
          <table:table-cell table:number-columns-repeated="16379"/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[.B293]+53" office:value-type="float" office:value="15529" calcext:value-type="float">
            <text:p>15529</text:p>
          </table:table-cell>
          <table:table-cell office:value-type="float" office:value="8640000" calcext:value-type="float">
            <text:p>8640000</text:p>
          </table:table-cell>
          <table:table-cell table:formula="of:=[.B294]/[.C294]" office:value-type="float" office:value="0.00179733796296296" calcext:value-type="float">
            <text:p>0,00179733796296296000</text:p>
          </table:table-cell>
          <table:table-cell table:formula="of:=[.D295]-[.D294]" office:value-type="float" office:value="0.00000613425925925911" calcext:value-type="float">
            <text:p>0,00000613425925925911</text:p>
          </table:table-cell>
          <table:table-cell table:number-columns-repeated="16379"/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[.B294]+53" office:value-type="float" office:value="15582" calcext:value-type="float">
            <text:p>15582</text:p>
          </table:table-cell>
          <table:table-cell office:value-type="float" office:value="8640000" calcext:value-type="float">
            <text:p>8640000</text:p>
          </table:table-cell>
          <table:table-cell table:formula="of:=[.B295]/[.C295]" office:value-type="float" office:value="0.00180347222222222" calcext:value-type="float">
            <text:p>0,00180347222222222000</text:p>
          </table:table-cell>
          <table:table-cell table:formula="of:=[.D296]-[.D295]" office:value-type="float" office:value="0.00000613425925925933" calcext:value-type="float">
            <text:p>0,00000613425925925933</text:p>
          </table:table-cell>
          <table:table-cell table:number-columns-repeated="16379"/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[.B295]+53" office:value-type="float" office:value="15635" calcext:value-type="float">
            <text:p>15635</text:p>
          </table:table-cell>
          <table:table-cell office:value-type="float" office:value="8640000" calcext:value-type="float">
            <text:p>8640000</text:p>
          </table:table-cell>
          <table:table-cell table:formula="of:=[.B296]/[.C296]" office:value-type="float" office:value="0.00180960648148148" calcext:value-type="float">
            <text:p>0,00180960648148148000</text:p>
          </table:table-cell>
          <table:table-cell table:formula="of:=[.D297]-[.D296]" office:value-type="float" office:value="0.00000613425925925933" calcext:value-type="float">
            <text:p>0,00000613425925925933</text:p>
          </table:table-cell>
          <table:table-cell table:number-columns-repeated="16379"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[.B296]+53" office:value-type="float" office:value="15688" calcext:value-type="float">
            <text:p>15688</text:p>
          </table:table-cell>
          <table:table-cell office:value-type="float" office:value="8640000" calcext:value-type="float">
            <text:p>8640000</text:p>
          </table:table-cell>
          <table:table-cell table:formula="of:=[.B297]/[.C297]" office:value-type="float" office:value="0.00181574074074074" calcext:value-type="float">
            <text:p>0,00181574074074074000</text:p>
          </table:table-cell>
          <table:table-cell table:formula="of:=[.D298]-[.D297]" office:value-type="float" office:value="0.00000613425925925911" calcext:value-type="float">
            <text:p>0,00000613425925925911</text:p>
          </table:table-cell>
          <table:table-cell table:number-columns-repeated="16379"/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[.B297]+53" office:value-type="float" office:value="15741" calcext:value-type="float">
            <text:p>15741</text:p>
          </table:table-cell>
          <table:table-cell office:value-type="float" office:value="8640000" calcext:value-type="float">
            <text:p>8640000</text:p>
          </table:table-cell>
          <table:table-cell table:formula="of:=[.B298]/[.C298]" office:value-type="float" office:value="0.001821875" calcext:value-type="float">
            <text:p>0,00182187500000000000</text:p>
          </table:table-cell>
          <table:table-cell table:formula="of:=[.D299]-[.D298]" office:value-type="float" office:value="0.00000613425925925933" calcext:value-type="float">
            <text:p>0,00000613425925925933</text:p>
          </table:table-cell>
          <table:table-cell table:number-columns-repeated="16379"/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[.B298]+53" office:value-type="float" office:value="15794" calcext:value-type="float">
            <text:p>15794</text:p>
          </table:table-cell>
          <table:table-cell office:value-type="float" office:value="8640000" calcext:value-type="float">
            <text:p>8640000</text:p>
          </table:table-cell>
          <table:table-cell table:formula="of:=[.B299]/[.C299]" office:value-type="float" office:value="0.00182800925925926" calcext:value-type="float">
            <text:p>0,00182800925925926000</text:p>
          </table:table-cell>
          <table:table-cell table:formula="of:=[.D300]-[.D299]" office:value-type="float" office:value="0.00000613425925925933" calcext:value-type="float">
            <text:p>0,00000613425925925933</text:p>
          </table:table-cell>
          <table:table-cell table:number-columns-repeated="16379"/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[.B299]+53" office:value-type="float" office:value="15847" calcext:value-type="float">
            <text:p>15847</text:p>
          </table:table-cell>
          <table:table-cell office:value-type="float" office:value="8640000" calcext:value-type="float">
            <text:p>8640000</text:p>
          </table:table-cell>
          <table:table-cell table:formula="of:=[.B300]/[.C300]" office:value-type="float" office:value="0.00183414351851852" calcext:value-type="float">
            <text:p>0,00183414351851852000</text:p>
          </table:table-cell>
          <table:table-cell table:formula="of:=[.D301]-[.D300]" office:value-type="float" office:value="0.00000613425925925911" calcext:value-type="float">
            <text:p>0,00000613425925925911</text:p>
          </table:table-cell>
          <table:table-cell table:number-columns-repeated="16379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[.B300]+53" office:value-type="float" office:value="15900" calcext:value-type="float">
            <text:p>15900</text:p>
          </table:table-cell>
          <table:table-cell office:value-type="float" office:value="8640000" calcext:value-type="float">
            <text:p>8640000</text:p>
          </table:table-cell>
          <table:table-cell table:formula="of:=[.B301]/[.C301]" office:value-type="float" office:value="0.00184027777777778" calcext:value-type="float">
            <text:p>0,00184027777777778000</text:p>
          </table:table-cell>
          <table:table-cell table:formula="of:=[.D302]-[.D301]" office:value-type="float" office:value="0.00000613425925925933" calcext:value-type="float">
            <text:p>0,00000613425925925933</text:p>
          </table:table-cell>
          <table:table-cell table:number-columns-repeated="16379"/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[.B301]+53" office:value-type="float" office:value="15953" calcext:value-type="float">
            <text:p>15953</text:p>
          </table:table-cell>
          <table:table-cell office:value-type="float" office:value="8640000" calcext:value-type="float">
            <text:p>8640000</text:p>
          </table:table-cell>
          <table:table-cell table:formula="of:=[.B302]/[.C302]" office:value-type="float" office:value="0.00184641203703704" calcext:value-type="float">
            <text:p>0,00184641203703704000</text:p>
          </table:table-cell>
          <table:table-cell table:formula="of:=[.D303]-[.D302]" office:value-type="float" office:value="0.00000613425925925933" calcext:value-type="float">
            <text:p>0,00000613425925925933</text:p>
          </table:table-cell>
          <table:table-cell table:number-columns-repeated="16379"/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[.B302]+53" office:value-type="float" office:value="16006" calcext:value-type="float">
            <text:p>16006</text:p>
          </table:table-cell>
          <table:table-cell office:value-type="float" office:value="8640000" calcext:value-type="float">
            <text:p>8640000</text:p>
          </table:table-cell>
          <table:table-cell table:formula="of:=[.B303]/[.C303]" office:value-type="float" office:value="0.0018525462962963" calcext:value-type="float">
            <text:p>0,00185254629629630000</text:p>
          </table:table-cell>
          <table:table-cell table:formula="of:=[.D304]-[.D303]" office:value-type="float" office:value="0.00000613425925925911" calcext:value-type="float">
            <text:p>0,00000613425925925911</text:p>
          </table:table-cell>
          <table:table-cell table:number-columns-repeated="16379"/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[.B303]+53" office:value-type="float" office:value="16059" calcext:value-type="float">
            <text:p>16059</text:p>
          </table:table-cell>
          <table:table-cell office:value-type="float" office:value="8640000" calcext:value-type="float">
            <text:p>8640000</text:p>
          </table:table-cell>
          <table:table-cell table:formula="of:=[.B304]/[.C304]" office:value-type="float" office:value="0.00185868055555556" calcext:value-type="float">
            <text:p>0,00185868055555556000</text:p>
          </table:table-cell>
          <table:table-cell table:formula="of:=[.D305]-[.D304]" office:value-type="float" office:value="0.00000613425925925933" calcext:value-type="float">
            <text:p>0,00000613425925925933</text:p>
          </table:table-cell>
          <table:table-cell table:number-columns-repeated="16379"/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[.B304]+53" office:value-type="float" office:value="16112" calcext:value-type="float">
            <text:p>16112</text:p>
          </table:table-cell>
          <table:table-cell office:value-type="float" office:value="8640000" calcext:value-type="float">
            <text:p>8640000</text:p>
          </table:table-cell>
          <table:table-cell table:formula="of:=[.B305]/[.C305]" office:value-type="float" office:value="0.00186481481481481" calcext:value-type="float">
            <text:p>0,00186481481481481000</text:p>
          </table:table-cell>
          <table:table-cell table:formula="of:=[.D306]-[.D305]" office:value-type="float" office:value="0.00000613425925925933" calcext:value-type="float">
            <text:p>0,00000613425925925933</text:p>
          </table:table-cell>
          <table:table-cell table:number-columns-repeated="16379"/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[.B305]+53" office:value-type="float" office:value="16165" calcext:value-type="float">
            <text:p>16165</text:p>
          </table:table-cell>
          <table:table-cell office:value-type="float" office:value="8640000" calcext:value-type="float">
            <text:p>8640000</text:p>
          </table:table-cell>
          <table:table-cell table:formula="of:=[.B306]/[.C306]" office:value-type="float" office:value="0.00187094907407407" calcext:value-type="float">
            <text:p>0,00187094907407407000</text:p>
          </table:table-cell>
          <table:table-cell table:formula="of:=[.D307]-[.D306]" office:value-type="float" office:value="0.00000613425925925911" calcext:value-type="float">
            <text:p>0,00000613425925925911</text:p>
          </table:table-cell>
          <table:table-cell table:number-columns-repeated="16379"/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[.B306]+53" office:value-type="float" office:value="16218" calcext:value-type="float">
            <text:p>16218</text:p>
          </table:table-cell>
          <table:table-cell office:value-type="float" office:value="8640000" calcext:value-type="float">
            <text:p>8640000</text:p>
          </table:table-cell>
          <table:table-cell table:formula="of:=[.B307]/[.C307]" office:value-type="float" office:value="0.00187708333333333" calcext:value-type="float">
            <text:p>0,00187708333333333000</text:p>
          </table:table-cell>
          <table:table-cell table:formula="of:=[.D308]-[.D307]" office:value-type="float" office:value="0.00000613425925925933" calcext:value-type="float">
            <text:p>0,00000613425925925933</text:p>
          </table:table-cell>
          <table:table-cell table:number-columns-repeated="16379"/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[.B307]+53" office:value-type="float" office:value="16271" calcext:value-type="float">
            <text:p>16271</text:p>
          </table:table-cell>
          <table:table-cell office:value-type="float" office:value="8640000" calcext:value-type="float">
            <text:p>8640000</text:p>
          </table:table-cell>
          <table:table-cell table:formula="of:=[.B308]/[.C308]" office:value-type="float" office:value="0.00188321759259259" calcext:value-type="float">
            <text:p>0,00188321759259259000</text:p>
          </table:table-cell>
          <table:table-cell table:formula="of:=[.D309]-[.D308]" office:value-type="float" office:value="0.00000613425925925933" calcext:value-type="float">
            <text:p>0,00000613425925925933</text:p>
          </table:table-cell>
          <table:table-cell table:number-columns-repeated="16379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[.B308]+53" office:value-type="float" office:value="16324" calcext:value-type="float">
            <text:p>16324</text:p>
          </table:table-cell>
          <table:table-cell office:value-type="float" office:value="8640000" calcext:value-type="float">
            <text:p>8640000</text:p>
          </table:table-cell>
          <table:table-cell table:formula="of:=[.B309]/[.C309]" office:value-type="float" office:value="0.00188935185185185" calcext:value-type="float">
            <text:p>0,00188935185185185000</text:p>
          </table:table-cell>
          <table:table-cell table:formula="of:=[.D310]-[.D309]" office:value-type="float" office:value="0.00000613425925925911" calcext:value-type="float">
            <text:p>0,00000613425925925911</text:p>
          </table:table-cell>
          <table:table-cell table:number-columns-repeated="16379"/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[.B309]+53" office:value-type="float" office:value="16377" calcext:value-type="float">
            <text:p>16377</text:p>
          </table:table-cell>
          <table:table-cell office:value-type="float" office:value="8640000" calcext:value-type="float">
            <text:p>8640000</text:p>
          </table:table-cell>
          <table:table-cell table:formula="of:=[.B310]/[.C310]" office:value-type="float" office:value="0.00189548611111111" calcext:value-type="float">
            <text:p>0,00189548611111111000</text:p>
          </table:table-cell>
          <table:table-cell table:formula="of:=[.D311]-[.D310]" office:value-type="float" office:value="0.00000613425925925933" calcext:value-type="float">
            <text:p>0,00000613425925925933</text:p>
          </table:table-cell>
          <table:table-cell table:number-columns-repeated="16379"/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[.B310]+53" office:value-type="float" office:value="16430" calcext:value-type="float">
            <text:p>16430</text:p>
          </table:table-cell>
          <table:table-cell office:value-type="float" office:value="8640000" calcext:value-type="float">
            <text:p>8640000</text:p>
          </table:table-cell>
          <table:table-cell table:formula="of:=[.B311]/[.C311]" office:value-type="float" office:value="0.00190162037037037" calcext:value-type="float">
            <text:p>0,00190162037037037000</text:p>
          </table:table-cell>
          <table:table-cell table:formula="of:=[.D312]-[.D311]" office:value-type="float" office:value="0.00000613425925925933" calcext:value-type="float">
            <text:p>0,00000613425925925933</text:p>
          </table:table-cell>
          <table:table-cell table:number-columns-repeated="16379"/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[.B311]+53" office:value-type="float" office:value="16483" calcext:value-type="float">
            <text:p>16483</text:p>
          </table:table-cell>
          <table:table-cell office:value-type="float" office:value="8640000" calcext:value-type="float">
            <text:p>8640000</text:p>
          </table:table-cell>
          <table:table-cell table:formula="of:=[.B312]/[.C312]" office:value-type="float" office:value="0.00190775462962963" calcext:value-type="float">
            <text:p>0,00190775462962963000</text:p>
          </table:table-cell>
          <table:table-cell table:formula="of:=[.D313]-[.D312]" office:value-type="float" office:value="0.00000613425925925911" calcext:value-type="float">
            <text:p>0,00000613425925925911</text:p>
          </table:table-cell>
          <table:table-cell table:number-columns-repeated="16379"/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[.B312]+53" office:value-type="float" office:value="16536" calcext:value-type="float">
            <text:p>16536</text:p>
          </table:table-cell>
          <table:table-cell office:value-type="float" office:value="8640000" calcext:value-type="float">
            <text:p>8640000</text:p>
          </table:table-cell>
          <table:table-cell table:formula="of:=[.B313]/[.C313]" office:value-type="float" office:value="0.00191388888888889" calcext:value-type="float">
            <text:p>0,00191388888888889000</text:p>
          </table:table-cell>
          <table:table-cell table:formula="of:=[.D314]-[.D313]" office:value-type="float" office:value="0.00000613425925925933" calcext:value-type="float">
            <text:p>0,00000613425925925933</text:p>
          </table:table-cell>
          <table:table-cell table:number-columns-repeated="16379"/>
        </table:table-row>
        <table:table-row table:style-name="ro1">
          <table:table-cell office:value-type="float" office:value="313" calcext:value-type="float">
            <text:p>313</text:p>
          </table:table-cell>
          <table:table-cell table:formula="of:=[.B313]+53" office:value-type="float" office:value="16589" calcext:value-type="float">
            <text:p>16589</text:p>
          </table:table-cell>
          <table:table-cell office:value-type="float" office:value="8640000" calcext:value-type="float">
            <text:p>8640000</text:p>
          </table:table-cell>
          <table:table-cell table:formula="of:=[.B314]/[.C314]" office:value-type="float" office:value="0.00192002314814815" calcext:value-type="float">
            <text:p>0,00192002314814815000</text:p>
          </table:table-cell>
          <table:table-cell table:formula="of:=[.D315]-[.D314]" office:value-type="float" office:value="0.00000613425925925933" calcext:value-type="float">
            <text:p>0,00000613425925925933</text:p>
          </table:table-cell>
          <table:table-cell table:number-columns-repeated="16379"/>
        </table:table-row>
        <table:table-row table:style-name="ro1">
          <table:table-cell office:value-type="float" office:value="314" calcext:value-type="float">
            <text:p>314</text:p>
          </table:table-cell>
          <table:table-cell table:formula="of:=[.B314]+53" office:value-type="float" office:value="16642" calcext:value-type="float">
            <text:p>16642</text:p>
          </table:table-cell>
          <table:table-cell office:value-type="float" office:value="8640000" calcext:value-type="float">
            <text:p>8640000</text:p>
          </table:table-cell>
          <table:table-cell table:formula="of:=[.B315]/[.C315]" office:value-type="float" office:value="0.00192615740740741" calcext:value-type="float">
            <text:p>0,00192615740740741000</text:p>
          </table:table-cell>
          <table:table-cell table:formula="of:=[.D316]-[.D315]" office:value-type="float" office:value="0.00000613425925925911" calcext:value-type="float">
            <text:p>0,00000613425925925911</text:p>
          </table:table-cell>
          <table:table-cell table:number-columns-repeated="16379"/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[.B315]+53" office:value-type="float" office:value="16695" calcext:value-type="float">
            <text:p>16695</text:p>
          </table:table-cell>
          <table:table-cell office:value-type="float" office:value="8640000" calcext:value-type="float">
            <text:p>8640000</text:p>
          </table:table-cell>
          <table:table-cell table:formula="of:=[.B316]/[.C316]" office:value-type="float" office:value="0.00193229166666667" calcext:value-type="float">
            <text:p>0,00193229166666667000</text:p>
          </table:table-cell>
          <table:table-cell table:formula="of:=[.D317]-[.D316]" office:value-type="float" office:value="0.00000613425925925933" calcext:value-type="float">
            <text:p>0,00000613425925925933</text:p>
          </table:table-cell>
          <table:table-cell table:number-columns-repeated="16379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[.B316]+53" office:value-type="float" office:value="16748" calcext:value-type="float">
            <text:p>16748</text:p>
          </table:table-cell>
          <table:table-cell office:value-type="float" office:value="8640000" calcext:value-type="float">
            <text:p>8640000</text:p>
          </table:table-cell>
          <table:table-cell table:formula="of:=[.B317]/[.C317]" office:value-type="float" office:value="0.00193842592592593" calcext:value-type="float">
            <text:p>0,00193842592592593000</text:p>
          </table:table-cell>
          <table:table-cell table:formula="of:=[.D318]-[.D317]" office:value-type="float" office:value="0.00000613425925925933" calcext:value-type="float">
            <text:p>0,00000613425925925933</text:p>
          </table:table-cell>
          <table:table-cell table:number-columns-repeated="16379"/>
        </table:table-row>
        <table:table-row table:style-name="ro1">
          <table:table-cell office:value-type="float" office:value="317" calcext:value-type="float">
            <text:p>317</text:p>
          </table:table-cell>
          <table:table-cell table:formula="of:=[.B317]+53" office:value-type="float" office:value="16801" calcext:value-type="float">
            <text:p>16801</text:p>
          </table:table-cell>
          <table:table-cell office:value-type="float" office:value="8640000" calcext:value-type="float">
            <text:p>8640000</text:p>
          </table:table-cell>
          <table:table-cell table:formula="of:=[.B318]/[.C318]" office:value-type="float" office:value="0.00194456018518519" calcext:value-type="float">
            <text:p>0,00194456018518519000</text:p>
          </table:table-cell>
          <table:table-cell table:formula="of:=[.D319]-[.D318]" office:value-type="float" office:value="0.00000613425925925911" calcext:value-type="float">
            <text:p>0,00000613425925925911</text:p>
          </table:table-cell>
          <table:table-cell table:number-columns-repeated="16379"/>
        </table:table-row>
        <table:table-row table:style-name="ro1">
          <table:table-cell office:value-type="float" office:value="318" calcext:value-type="float">
            <text:p>318</text:p>
          </table:table-cell>
          <table:table-cell table:formula="of:=[.B318]+53" office:value-type="float" office:value="16854" calcext:value-type="float">
            <text:p>16854</text:p>
          </table:table-cell>
          <table:table-cell office:value-type="float" office:value="8640000" calcext:value-type="float">
            <text:p>8640000</text:p>
          </table:table-cell>
          <table:table-cell table:formula="of:=[.B319]/[.C319]" office:value-type="float" office:value="0.00195069444444444" calcext:value-type="float">
            <text:p>0,00195069444444444000</text:p>
          </table:table-cell>
          <table:table-cell table:formula="of:=[.D320]-[.D319]" office:value-type="float" office:value="0.00000613425925925933" calcext:value-type="float">
            <text:p>0,00000613425925925933</text:p>
          </table:table-cell>
          <table:table-cell table:number-columns-repeated="16379"/>
        </table:table-row>
        <table:table-row table:style-name="ro1">
          <table:table-cell office:value-type="float" office:value="319" calcext:value-type="float">
            <text:p>319</text:p>
          </table:table-cell>
          <table:table-cell table:formula="of:=[.B319]+53" office:value-type="float" office:value="16907" calcext:value-type="float">
            <text:p>16907</text:p>
          </table:table-cell>
          <table:table-cell office:value-type="float" office:value="8640000" calcext:value-type="float">
            <text:p>8640000</text:p>
          </table:table-cell>
          <table:table-cell table:formula="of:=[.B320]/[.C320]" office:value-type="float" office:value="0.0019568287037037" calcext:value-type="float">
            <text:p>0,00195682870370370000</text:p>
          </table:table-cell>
          <table:table-cell table:formula="of:=[.D321]-[.D320]" office:value-type="float" office:value="0.00000613425925925911" calcext:value-type="float">
            <text:p>0,00000613425925925911</text:p>
          </table:table-cell>
          <table:table-cell table:number-columns-repeated="16379"/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[.B320]+53" office:value-type="float" office:value="16960" calcext:value-type="float">
            <text:p>16960</text:p>
          </table:table-cell>
          <table:table-cell office:value-type="float" office:value="8640000" calcext:value-type="float">
            <text:p>8640000</text:p>
          </table:table-cell>
          <table:table-cell table:formula="of:=[.B321]/[.C321]" office:value-type="float" office:value="0.00196296296296296" calcext:value-type="float">
            <text:p>0,00196296296296296000</text:p>
          </table:table-cell>
          <table:table-cell table:formula="of:=[.D322]-[.D321]" office:value-type="float" office:value="0.00000613425925925955" calcext:value-type="float">
            <text:p>0,00000613425925925955</text:p>
          </table:table-cell>
          <table:table-cell table:number-columns-repeated="16379"/>
        </table:table-row>
        <table:table-row table:style-name="ro1">
          <table:table-cell office:value-type="float" office:value="321" calcext:value-type="float">
            <text:p>321</text:p>
          </table:table-cell>
          <table:table-cell table:formula="of:=[.B321]+53" office:value-type="float" office:value="17013" calcext:value-type="float">
            <text:p>17013</text:p>
          </table:table-cell>
          <table:table-cell office:value-type="float" office:value="8640000" calcext:value-type="float">
            <text:p>8640000</text:p>
          </table:table-cell>
          <table:table-cell table:formula="of:=[.B322]/[.C322]" office:value-type="float" office:value="0.00196909722222222" calcext:value-type="float">
            <text:p>0,00196909722222222000</text:p>
          </table:table-cell>
          <table:table-cell table:formula="of:=[.D323]-[.D322]" office:value-type="float" office:value="0.00000613425925925911" calcext:value-type="float">
            <text:p>0,00000613425925925911</text:p>
          </table:table-cell>
          <table:table-cell table:number-columns-repeated="16379"/>
        </table:table-row>
        <table:table-row table:style-name="ro1">
          <table:table-cell office:value-type="float" office:value="322" calcext:value-type="float">
            <text:p>322</text:p>
          </table:table-cell>
          <table:table-cell table:formula="of:=[.B322]+53" office:value-type="float" office:value="17066" calcext:value-type="float">
            <text:p>17066</text:p>
          </table:table-cell>
          <table:table-cell office:value-type="float" office:value="8640000" calcext:value-type="float">
            <text:p>8640000</text:p>
          </table:table-cell>
          <table:table-cell table:formula="of:=[.B323]/[.C323]" office:value-type="float" office:value="0.00197523148148148" calcext:value-type="float">
            <text:p>0,00197523148148148000</text:p>
          </table:table-cell>
          <table:table-cell table:formula="of:=[.D324]-[.D323]" office:value-type="float" office:value="0.00000613425925925911" calcext:value-type="float">
            <text:p>0,00000613425925925911</text:p>
          </table:table-cell>
          <table:table-cell table:number-columns-repeated="16379"/>
        </table:table-row>
        <table:table-row table:style-name="ro1">
          <table:table-cell office:value-type="float" office:value="323" calcext:value-type="float">
            <text:p>323</text:p>
          </table:table-cell>
          <table:table-cell table:formula="of:=[.B323]+53" office:value-type="float" office:value="17119" calcext:value-type="float">
            <text:p>17119</text:p>
          </table:table-cell>
          <table:table-cell office:value-type="float" office:value="8640000" calcext:value-type="float">
            <text:p>8640000</text:p>
          </table:table-cell>
          <table:table-cell table:formula="of:=[.B324]/[.C324]" office:value-type="float" office:value="0.00198136574074074" calcext:value-type="float">
            <text:p>0,00198136574074074000</text:p>
          </table:table-cell>
          <table:table-cell table:formula="of:=[.D325]-[.D324]" office:value-type="float" office:value="0.00000613425925925955" calcext:value-type="float">
            <text:p>0,00000613425925925955</text:p>
          </table:table-cell>
          <table:table-cell table:number-columns-repeated="16379"/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[.B324]+53" office:value-type="float" office:value="17172" calcext:value-type="float">
            <text:p>17172</text:p>
          </table:table-cell>
          <table:table-cell office:value-type="float" office:value="8640000" calcext:value-type="float">
            <text:p>8640000</text:p>
          </table:table-cell>
          <table:table-cell table:formula="of:=[.B325]/[.C325]" office:value-type="float" office:value="0.0019875" calcext:value-type="float">
            <text:p>0,00198750000000000000</text:p>
          </table:table-cell>
          <table:table-cell table:formula="of:=[.D326]-[.D325]" office:value-type="float" office:value="0.00000613425925925911" calcext:value-type="float">
            <text:p>0,00000613425925925911</text:p>
          </table:table-cell>
          <table:table-cell table:number-columns-repeated="16379"/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[.B325]+53" office:value-type="float" office:value="17225" calcext:value-type="float">
            <text:p>17225</text:p>
          </table:table-cell>
          <table:table-cell office:value-type="float" office:value="8640000" calcext:value-type="float">
            <text:p>8640000</text:p>
          </table:table-cell>
          <table:table-cell table:formula="of:=[.B326]/[.C326]" office:value-type="float" office:value="0.00199363425925926" calcext:value-type="float">
            <text:p>0,00199363425925926000</text:p>
          </table:table-cell>
          <table:table-cell table:formula="of:=[.D327]-[.D326]" office:value-type="float" office:value="0.00000613425925925911" calcext:value-type="float">
            <text:p>0,00000613425925925911</text:p>
          </table:table-cell>
          <table:table-cell table:number-columns-repeated="16379"/>
        </table:table-row>
        <table:table-row table:style-name="ro1">
          <table:table-cell office:value-type="float" office:value="326" calcext:value-type="float">
            <text:p>326</text:p>
          </table:table-cell>
          <table:table-cell table:formula="of:=[.B326]+53" office:value-type="float" office:value="17278" calcext:value-type="float">
            <text:p>17278</text:p>
          </table:table-cell>
          <table:table-cell office:value-type="float" office:value="8640000" calcext:value-type="float">
            <text:p>8640000</text:p>
          </table:table-cell>
          <table:table-cell table:formula="of:=[.B327]/[.C327]" office:value-type="float" office:value="0.00199976851851852" calcext:value-type="float">
            <text:p>0,00199976851851852000</text:p>
          </table:table-cell>
          <table:table-cell table:formula="of:=[.D328]-[.D327]" office:value-type="float" office:value="0.00000613425925925955" calcext:value-type="float">
            <text:p>0,00000613425925925955</text:p>
          </table:table-cell>
          <table:table-cell table:number-columns-repeated="16379"/>
        </table:table-row>
        <table:table-row table:style-name="ro1">
          <table:table-cell office:value-type="float" office:value="327" calcext:value-type="float">
            <text:p>327</text:p>
          </table:table-cell>
          <table:table-cell table:formula="of:=[.B327]+53" office:value-type="float" office:value="17331" calcext:value-type="float">
            <text:p>17331</text:p>
          </table:table-cell>
          <table:table-cell office:value-type="float" office:value="8640000" calcext:value-type="float">
            <text:p>8640000</text:p>
          </table:table-cell>
          <table:table-cell table:formula="of:=[.B328]/[.C328]" office:value-type="float" office:value="0.00200590277777778" calcext:value-type="float">
            <text:p>0,00200590277777778000</text:p>
          </table:table-cell>
          <table:table-cell table:formula="of:=[.D329]-[.D328]" office:value-type="float" office:value="0.00000613425925925911" calcext:value-type="float">
            <text:p>0,00000613425925925911</text:p>
          </table:table-cell>
          <table:table-cell table:number-columns-repeated="16379"/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[.B328]+53" office:value-type="float" office:value="17384" calcext:value-type="float">
            <text:p>17384</text:p>
          </table:table-cell>
          <table:table-cell office:value-type="float" office:value="8640000" calcext:value-type="float">
            <text:p>8640000</text:p>
          </table:table-cell>
          <table:table-cell table:formula="of:=[.B329]/[.C329]" office:value-type="float" office:value="0.00201203703703704" calcext:value-type="float">
            <text:p>0,00201203703703704000</text:p>
          </table:table-cell>
          <table:table-cell table:formula="of:=[.D330]-[.D329]" office:value-type="float" office:value="0.00000613425925925911" calcext:value-type="float">
            <text:p>0,00000613425925925911</text:p>
          </table:table-cell>
          <table:table-cell table:number-columns-repeated="16379"/>
        </table:table-row>
        <table:table-row table:style-name="ro1">
          <table:table-cell office:value-type="float" office:value="329" calcext:value-type="float">
            <text:p>329</text:p>
          </table:table-cell>
          <table:table-cell table:formula="of:=[.B329]+53" office:value-type="float" office:value="17437" calcext:value-type="float">
            <text:p>17437</text:p>
          </table:table-cell>
          <table:table-cell office:value-type="float" office:value="8640000" calcext:value-type="float">
            <text:p>8640000</text:p>
          </table:table-cell>
          <table:table-cell table:formula="of:=[.B330]/[.C330]" office:value-type="float" office:value="0.0020181712962963" calcext:value-type="float">
            <text:p>0,00201817129629630000</text:p>
          </table:table-cell>
          <table:table-cell table:formula="of:=[.D331]-[.D330]" office:value-type="float" office:value="0.00000613425925925955" calcext:value-type="float">
            <text:p>0,00000613425925925955</text:p>
          </table:table-cell>
          <table:table-cell table:number-columns-repeated="16379"/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[.B330]+53" office:value-type="float" office:value="17490" calcext:value-type="float">
            <text:p>17490</text:p>
          </table:table-cell>
          <table:table-cell office:value-type="float" office:value="8640000" calcext:value-type="float">
            <text:p>8640000</text:p>
          </table:table-cell>
          <table:table-cell table:formula="of:=[.B331]/[.C331]" office:value-type="float" office:value="0.00202430555555556" calcext:value-type="float">
            <text:p>0,00202430555555556000</text:p>
          </table:table-cell>
          <table:table-cell table:formula="of:=[.D332]-[.D331]" office:value-type="float" office:value="0.00000613425925925911" calcext:value-type="float">
            <text:p>0,00000613425925925911</text:p>
          </table:table-cell>
          <table:table-cell table:number-columns-repeated="16379"/>
        </table:table-row>
        <table:table-row table:style-name="ro1">
          <table:table-cell office:value-type="float" office:value="331" calcext:value-type="float">
            <text:p>331</text:p>
          </table:table-cell>
          <table:table-cell table:formula="of:=[.B331]+53" office:value-type="float" office:value="17543" calcext:value-type="float">
            <text:p>17543</text:p>
          </table:table-cell>
          <table:table-cell office:value-type="float" office:value="8640000" calcext:value-type="float">
            <text:p>8640000</text:p>
          </table:table-cell>
          <table:table-cell table:formula="of:=[.B332]/[.C332]" office:value-type="float" office:value="0.00203043981481481" calcext:value-type="float">
            <text:p>0,00203043981481481000</text:p>
          </table:table-cell>
          <table:table-cell table:formula="of:=[.D333]-[.D332]" office:value-type="float" office:value="0.00000613425925925911" calcext:value-type="float">
            <text:p>0,00000613425925925911</text:p>
          </table:table-cell>
          <table:table-cell table:number-columns-repeated="16379"/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[.B332]+53" office:value-type="float" office:value="17596" calcext:value-type="float">
            <text:p>17596</text:p>
          </table:table-cell>
          <table:table-cell office:value-type="float" office:value="8640000" calcext:value-type="float">
            <text:p>8640000</text:p>
          </table:table-cell>
          <table:table-cell table:formula="of:=[.B333]/[.C333]" office:value-type="float" office:value="0.00203657407407407" calcext:value-type="float">
            <text:p>0,00203657407407407000</text:p>
          </table:table-cell>
          <table:table-cell table:formula="of:=[.D334]-[.D333]" office:value-type="float" office:value="0.00000613425925925955" calcext:value-type="float">
            <text:p>0,00000613425925925955</text:p>
          </table:table-cell>
          <table:table-cell table:number-columns-repeated="16379"/>
        </table:table-row>
        <table:table-row table:style-name="ro1">
          <table:table-cell office:value-type="float" office:value="333" calcext:value-type="float">
            <text:p>333</text:p>
          </table:table-cell>
          <table:table-cell table:formula="of:=[.B333]+53" office:value-type="float" office:value="17649" calcext:value-type="float">
            <text:p>17649</text:p>
          </table:table-cell>
          <table:table-cell office:value-type="float" office:value="8640000" calcext:value-type="float">
            <text:p>8640000</text:p>
          </table:table-cell>
          <table:table-cell table:formula="of:=[.B334]/[.C334]" office:value-type="float" office:value="0.00204270833333333" calcext:value-type="float">
            <text:p>0,00204270833333333000</text:p>
          </table:table-cell>
          <table:table-cell table:formula="of:=[.D335]-[.D334]" office:value-type="float" office:value="0.00000613425925925911" calcext:value-type="float">
            <text:p>0,00000613425925925911</text:p>
          </table:table-cell>
          <table:table-cell table:number-columns-repeated="16379"/>
        </table:table-row>
        <table:table-row table:style-name="ro1">
          <table:table-cell office:value-type="float" office:value="334" calcext:value-type="float">
            <text:p>334</text:p>
          </table:table-cell>
          <table:table-cell table:formula="of:=[.B334]+53" office:value-type="float" office:value="17702" calcext:value-type="float">
            <text:p>17702</text:p>
          </table:table-cell>
          <table:table-cell office:value-type="float" office:value="8640000" calcext:value-type="float">
            <text:p>8640000</text:p>
          </table:table-cell>
          <table:table-cell table:formula="of:=[.B335]/[.C335]" office:value-type="float" office:value="0.00204884259259259" calcext:value-type="float">
            <text:p>0,00204884259259259000</text:p>
          </table:table-cell>
          <table:table-cell table:formula="of:=[.D336]-[.D335]" office:value-type="float" office:value="0.00000613425925925911" calcext:value-type="float">
            <text:p>0,00000613425925925911</text:p>
          </table:table-cell>
          <table:table-cell table:number-columns-repeated="16379"/>
        </table:table-row>
        <table:table-row table:style-name="ro1">
          <table:table-cell office:value-type="float" office:value="335" calcext:value-type="float">
            <text:p>335</text:p>
          </table:table-cell>
          <table:table-cell table:formula="of:=[.B335]+53" office:value-type="float" office:value="17755" calcext:value-type="float">
            <text:p>17755</text:p>
          </table:table-cell>
          <table:table-cell office:value-type="float" office:value="8640000" calcext:value-type="float">
            <text:p>8640000</text:p>
          </table:table-cell>
          <table:table-cell table:formula="of:=[.B336]/[.C336]" office:value-type="float" office:value="0.00205497685185185" calcext:value-type="float">
            <text:p>0,00205497685185185000</text:p>
          </table:table-cell>
          <table:table-cell table:formula="of:=[.D337]-[.D336]" office:value-type="float" office:value="0.00000613425925925955" calcext:value-type="float">
            <text:p>0,00000613425925925955</text:p>
          </table:table-cell>
          <table:table-cell table:number-columns-repeated="16379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[.B336]+53" office:value-type="float" office:value="17808" calcext:value-type="float">
            <text:p>17808</text:p>
          </table:table-cell>
          <table:table-cell office:value-type="float" office:value="8640000" calcext:value-type="float">
            <text:p>8640000</text:p>
          </table:table-cell>
          <table:table-cell table:formula="of:=[.B337]/[.C337]" office:value-type="float" office:value="0.00206111111111111" calcext:value-type="float">
            <text:p>0,00206111111111111000</text:p>
          </table:table-cell>
          <table:table-cell table:formula="of:=[.D338]-[.D337]" office:value-type="float" office:value="0.00000613425925925911" calcext:value-type="float">
            <text:p>0,00000613425925925911</text:p>
          </table:table-cell>
          <table:table-cell table:number-columns-repeated="16379"/>
        </table:table-row>
        <table:table-row table:style-name="ro1">
          <table:table-cell office:value-type="float" office:value="337" calcext:value-type="float">
            <text:p>337</text:p>
          </table:table-cell>
          <table:table-cell table:formula="of:=[.B337]+53" office:value-type="float" office:value="17861" calcext:value-type="float">
            <text:p>17861</text:p>
          </table:table-cell>
          <table:table-cell office:value-type="float" office:value="8640000" calcext:value-type="float">
            <text:p>8640000</text:p>
          </table:table-cell>
          <table:table-cell table:formula="of:=[.B338]/[.C338]" office:value-type="float" office:value="0.00206724537037037" calcext:value-type="float">
            <text:p>0,00206724537037037000</text:p>
          </table:table-cell>
          <table:table-cell table:formula="of:=[.D339]-[.D338]" office:value-type="float" office:value="0.00000613425925925911" calcext:value-type="float">
            <text:p>0,00000613425925925911</text:p>
          </table:table-cell>
          <table:table-cell table:number-columns-repeated="16379"/>
        </table:table-row>
        <table:table-row table:style-name="ro1">
          <table:table-cell office:value-type="float" office:value="338" calcext:value-type="float">
            <text:p>338</text:p>
          </table:table-cell>
          <table:table-cell table:formula="of:=[.B338]+53" office:value-type="float" office:value="17914" calcext:value-type="float">
            <text:p>17914</text:p>
          </table:table-cell>
          <table:table-cell office:value-type="float" office:value="8640000" calcext:value-type="float">
            <text:p>8640000</text:p>
          </table:table-cell>
          <table:table-cell table:formula="of:=[.B339]/[.C339]" office:value-type="float" office:value="0.00207337962962963" calcext:value-type="float">
            <text:p>0,00207337962962963000</text:p>
          </table:table-cell>
          <table:table-cell table:formula="of:=[.D340]-[.D339]" office:value-type="float" office:value="0.00000613425925925955" calcext:value-type="float">
            <text:p>0,00000613425925925955</text:p>
          </table:table-cell>
          <table:table-cell table:number-columns-repeated="16379"/>
        </table:table-row>
        <table:table-row table:style-name="ro1">
          <table:table-cell office:value-type="float" office:value="339" calcext:value-type="float">
            <text:p>339</text:p>
          </table:table-cell>
          <table:table-cell table:formula="of:=[.B339]+53" office:value-type="float" office:value="17967" calcext:value-type="float">
            <text:p>17967</text:p>
          </table:table-cell>
          <table:table-cell office:value-type="float" office:value="8640000" calcext:value-type="float">
            <text:p>8640000</text:p>
          </table:table-cell>
          <table:table-cell table:formula="of:=[.B340]/[.C340]" office:value-type="float" office:value="0.00207951388888889" calcext:value-type="float">
            <text:p>0,00207951388888889000</text:p>
          </table:table-cell>
          <table:table-cell table:formula="of:=[.D341]-[.D340]" office:value-type="float" office:value="0.00000613425925925911" calcext:value-type="float">
            <text:p>0,00000613425925925911</text:p>
          </table:table-cell>
          <table:table-cell table:number-columns-repeated="16379"/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[.B340]+53" office:value-type="float" office:value="18020" calcext:value-type="float">
            <text:p>18020</text:p>
          </table:table-cell>
          <table:table-cell office:value-type="float" office:value="8640000" calcext:value-type="float">
            <text:p>8640000</text:p>
          </table:table-cell>
          <table:table-cell table:formula="of:=[.B341]/[.C341]" office:value-type="float" office:value="0.00208564814814815" calcext:value-type="float">
            <text:p>0,00208564814814815000</text:p>
          </table:table-cell>
          <table:table-cell table:formula="of:=[.D342]-[.D341]" office:value-type="float" office:value="0.00000613425925925911" calcext:value-type="float">
            <text:p>0,00000613425925925911</text:p>
          </table:table-cell>
          <table:table-cell table:number-columns-repeated="16379"/>
        </table:table-row>
        <table:table-row table:style-name="ro1">
          <table:table-cell office:value-type="float" office:value="341" calcext:value-type="float">
            <text:p>341</text:p>
          </table:table-cell>
          <table:table-cell table:formula="of:=[.B341]+53" office:value-type="float" office:value="18073" calcext:value-type="float">
            <text:p>18073</text:p>
          </table:table-cell>
          <table:table-cell office:value-type="float" office:value="8640000" calcext:value-type="float">
            <text:p>8640000</text:p>
          </table:table-cell>
          <table:table-cell table:formula="of:=[.B342]/[.C342]" office:value-type="float" office:value="0.00209178240740741" calcext:value-type="float">
            <text:p>0,00209178240740741000</text:p>
          </table:table-cell>
          <table:table-cell table:formula="of:=[.D343]-[.D342]" office:value-type="float" office:value="0.00000613425925925955" calcext:value-type="float">
            <text:p>0,00000613425925925955</text:p>
          </table:table-cell>
          <table:table-cell table:number-columns-repeated="16379"/>
        </table:table-row>
        <table:table-row table:style-name="ro1">
          <table:table-cell office:value-type="float" office:value="342" calcext:value-type="float">
            <text:p>342</text:p>
          </table:table-cell>
          <table:table-cell table:formula="of:=[.B342]+53" office:value-type="float" office:value="18126" calcext:value-type="float">
            <text:p>18126</text:p>
          </table:table-cell>
          <table:table-cell office:value-type="float" office:value="8640000" calcext:value-type="float">
            <text:p>8640000</text:p>
          </table:table-cell>
          <table:table-cell table:formula="of:=[.B343]/[.C343]" office:value-type="float" office:value="0.00209791666666667" calcext:value-type="float">
            <text:p>0,00209791666666667000</text:p>
          </table:table-cell>
          <table:table-cell table:formula="of:=[.D344]-[.D343]" office:value-type="float" office:value="0.00000613425925925911" calcext:value-type="float">
            <text:p>0,00000613425925925911</text:p>
          </table:table-cell>
          <table:table-cell table:number-columns-repeated="16379"/>
        </table:table-row>
        <table:table-row table:style-name="ro1">
          <table:table-cell office:value-type="float" office:value="343" calcext:value-type="float">
            <text:p>343</text:p>
          </table:table-cell>
          <table:table-cell table:formula="of:=[.B343]+53" office:value-type="float" office:value="18179" calcext:value-type="float">
            <text:p>18179</text:p>
          </table:table-cell>
          <table:table-cell office:value-type="float" office:value="8640000" calcext:value-type="float">
            <text:p>8640000</text:p>
          </table:table-cell>
          <table:table-cell table:formula="of:=[.B344]/[.C344]" office:value-type="float" office:value="0.00210405092592593" calcext:value-type="float">
            <text:p>0,00210405092592593000</text:p>
          </table:table-cell>
          <table:table-cell table:formula="of:=[.D345]-[.D344]" office:value-type="float" office:value="0.00000613425925925911" calcext:value-type="float">
            <text:p>0,00000613425925925911</text:p>
          </table:table-cell>
          <table:table-cell table:number-columns-repeated="16379"/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[.B344]+53" office:value-type="float" office:value="18232" calcext:value-type="float">
            <text:p>18232</text:p>
          </table:table-cell>
          <table:table-cell office:value-type="float" office:value="8640000" calcext:value-type="float">
            <text:p>8640000</text:p>
          </table:table-cell>
          <table:table-cell table:formula="of:=[.B345]/[.C345]" office:value-type="float" office:value="0.00211018518518519" calcext:value-type="float">
            <text:p>0,00211018518518519000</text:p>
          </table:table-cell>
          <table:table-cell table:formula="of:=[.D346]-[.D345]" office:value-type="float" office:value="0.00000613425925925955" calcext:value-type="float">
            <text:p>0,00000613425925925955</text:p>
          </table:table-cell>
          <table:table-cell table:number-columns-repeated="16379"/>
        </table:table-row>
        <table:table-row table:style-name="ro1">
          <table:table-cell office:value-type="float" office:value="345" calcext:value-type="float">
            <text:p>345</text:p>
          </table:table-cell>
          <table:table-cell table:formula="of:=[.B345]+53" office:value-type="float" office:value="18285" calcext:value-type="float">
            <text:p>18285</text:p>
          </table:table-cell>
          <table:table-cell office:value-type="float" office:value="8640000" calcext:value-type="float">
            <text:p>8640000</text:p>
          </table:table-cell>
          <table:table-cell table:formula="of:=[.B346]/[.C346]" office:value-type="float" office:value="0.00211631944444444" calcext:value-type="float">
            <text:p>0,00211631944444444000</text:p>
          </table:table-cell>
          <table:table-cell table:formula="of:=[.D347]-[.D346]" office:value-type="float" office:value="0.00000613425925925911" calcext:value-type="float">
            <text:p>0,00000613425925925911</text:p>
          </table:table-cell>
          <table:table-cell table:number-columns-repeated="16379"/>
        </table:table-row>
        <table:table-row table:style-name="ro1">
          <table:table-cell office:value-type="float" office:value="346" calcext:value-type="float">
            <text:p>346</text:p>
          </table:table-cell>
          <table:table-cell table:formula="of:=[.B346]+53" office:value-type="float" office:value="18338" calcext:value-type="float">
            <text:p>18338</text:p>
          </table:table-cell>
          <table:table-cell office:value-type="float" office:value="8640000" calcext:value-type="float">
            <text:p>8640000</text:p>
          </table:table-cell>
          <table:table-cell table:formula="of:=[.B347]/[.C347]" office:value-type="float" office:value="0.0021224537037037" calcext:value-type="float">
            <text:p>0,00212245370370370000</text:p>
          </table:table-cell>
          <table:table-cell table:formula="of:=[.D348]-[.D347]" office:value-type="float" office:value="0.00000613425925925911" calcext:value-type="float">
            <text:p>0,00000613425925925911</text:p>
          </table:table-cell>
          <table:table-cell table:number-columns-repeated="16379"/>
        </table:table-row>
        <table:table-row table:style-name="ro1">
          <table:table-cell office:value-type="float" office:value="347" calcext:value-type="float">
            <text:p>347</text:p>
          </table:table-cell>
          <table:table-cell table:formula="of:=[.B347]+53" office:value-type="float" office:value="18391" calcext:value-type="float">
            <text:p>18391</text:p>
          </table:table-cell>
          <table:table-cell office:value-type="float" office:value="8640000" calcext:value-type="float">
            <text:p>8640000</text:p>
          </table:table-cell>
          <table:table-cell table:formula="of:=[.B348]/[.C348]" office:value-type="float" office:value="0.00212858796296296" calcext:value-type="float">
            <text:p>0,00212858796296296000</text:p>
          </table:table-cell>
          <table:table-cell table:formula="of:=[.D349]-[.D348]" office:value-type="float" office:value="0.00000613425925925955" calcext:value-type="float">
            <text:p>0,00000613425925925955</text:p>
          </table:table-cell>
          <table:table-cell table:number-columns-repeated="16379"/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[.B348]+53" office:value-type="float" office:value="18444" calcext:value-type="float">
            <text:p>18444</text:p>
          </table:table-cell>
          <table:table-cell office:value-type="float" office:value="8640000" calcext:value-type="float">
            <text:p>8640000</text:p>
          </table:table-cell>
          <table:table-cell table:formula="of:=[.B349]/[.C349]" office:value-type="float" office:value="0.00213472222222222" calcext:value-type="float">
            <text:p>0,00213472222222222000</text:p>
          </table:table-cell>
          <table:table-cell table:formula="of:=[.D350]-[.D349]" office:value-type="float" office:value="0.00000613425925925911" calcext:value-type="float">
            <text:p>0,00000613425925925911</text:p>
          </table:table-cell>
          <table:table-cell table:number-columns-repeated="16379"/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[.B349]+53" office:value-type="float" office:value="18497" calcext:value-type="float">
            <text:p>18497</text:p>
          </table:table-cell>
          <table:table-cell office:value-type="float" office:value="8640000" calcext:value-type="float">
            <text:p>8640000</text:p>
          </table:table-cell>
          <table:table-cell table:formula="of:=[.B350]/[.C350]" office:value-type="float" office:value="0.00214085648148148" calcext:value-type="float">
            <text:p>0,00214085648148148000</text:p>
          </table:table-cell>
          <table:table-cell table:formula="of:=[.D351]-[.D350]" office:value-type="float" office:value="0.00000613425925925911" calcext:value-type="float">
            <text:p>0,00000613425925925911</text:p>
          </table:table-cell>
          <table:table-cell table:number-columns-repeated="16379"/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[.B350]+53" office:value-type="float" office:value="18550" calcext:value-type="float">
            <text:p>18550</text:p>
          </table:table-cell>
          <table:table-cell office:value-type="float" office:value="8640000" calcext:value-type="float">
            <text:p>8640000</text:p>
          </table:table-cell>
          <table:table-cell table:formula="of:=[.B351]/[.C351]" office:value-type="float" office:value="0.00214699074074074" calcext:value-type="float">
            <text:p>0,00214699074074074000</text:p>
          </table:table-cell>
          <table:table-cell table:formula="of:=[.D352]-[.D351]" office:value-type="float" office:value="0.00000613425925925955" calcext:value-type="float">
            <text:p>0,00000613425925925955</text:p>
          </table:table-cell>
          <table:table-cell table:number-columns-repeated="16379"/>
        </table:table-row>
        <table:table-row table:style-name="ro1">
          <table:table-cell office:value-type="float" office:value="351" calcext:value-type="float">
            <text:p>351</text:p>
          </table:table-cell>
          <table:table-cell table:formula="of:=[.B351]+53" office:value-type="float" office:value="18603" calcext:value-type="float">
            <text:p>18603</text:p>
          </table:table-cell>
          <table:table-cell office:value-type="float" office:value="8640000" calcext:value-type="float">
            <text:p>8640000</text:p>
          </table:table-cell>
          <table:table-cell table:formula="of:=[.B352]/[.C352]" office:value-type="float" office:value="0.002153125" calcext:value-type="float">
            <text:p>0,00215312500000000000</text:p>
          </table:table-cell>
          <table:table-cell table:formula="of:=[.D353]-[.D352]" office:value-type="float" office:value="0.00000613425925925911" calcext:value-type="float">
            <text:p>0,00000613425925925911</text:p>
          </table:table-cell>
          <table:table-cell table:number-columns-repeated="16379"/>
        </table:table-row>
        <table:table-row table:style-name="ro1">
          <table:table-cell office:value-type="float" office:value="352" calcext:value-type="float">
            <text:p>352</text:p>
          </table:table-cell>
          <table:table-cell table:formula="of:=[.B352]+53" office:value-type="float" office:value="18656" calcext:value-type="float">
            <text:p>18656</text:p>
          </table:table-cell>
          <table:table-cell office:value-type="float" office:value="8640000" calcext:value-type="float">
            <text:p>8640000</text:p>
          </table:table-cell>
          <table:table-cell table:formula="of:=[.B353]/[.C353]" office:value-type="float" office:value="0.00215925925925926" calcext:value-type="float">
            <text:p>0,00215925925925926000</text:p>
          </table:table-cell>
          <table:table-cell table:formula="of:=[.D354]-[.D353]" office:value-type="float" office:value="0.00000613425925925911" calcext:value-type="float">
            <text:p>0,00000613425925925911</text:p>
          </table:table-cell>
          <table:table-cell table:number-columns-repeated="16379"/>
        </table:table-row>
        <table:table-row table:style-name="ro1">
          <table:table-cell office:value-type="float" office:value="353" calcext:value-type="float">
            <text:p>353</text:p>
          </table:table-cell>
          <table:table-cell table:formula="of:=[.B353]+53" office:value-type="float" office:value="18709" calcext:value-type="float">
            <text:p>18709</text:p>
          </table:table-cell>
          <table:table-cell office:value-type="float" office:value="8640000" calcext:value-type="float">
            <text:p>8640000</text:p>
          </table:table-cell>
          <table:table-cell table:formula="of:=[.B354]/[.C354]" office:value-type="float" office:value="0.00216539351851852" calcext:value-type="float">
            <text:p>0,00216539351851852000</text:p>
          </table:table-cell>
          <table:table-cell table:formula="of:=[.D355]-[.D354]" office:value-type="float" office:value="0.00000613425925925955" calcext:value-type="float">
            <text:p>0,00000613425925925955</text:p>
          </table:table-cell>
          <table:table-cell table:number-columns-repeated="16379"/>
        </table:table-row>
        <table:table-row table:style-name="ro1">
          <table:table-cell office:value-type="float" office:value="354" calcext:value-type="float">
            <text:p>354</text:p>
          </table:table-cell>
          <table:table-cell table:formula="of:=[.B354]+53" office:value-type="float" office:value="18762" calcext:value-type="float">
            <text:p>18762</text:p>
          </table:table-cell>
          <table:table-cell office:value-type="float" office:value="8640000" calcext:value-type="float">
            <text:p>8640000</text:p>
          </table:table-cell>
          <table:table-cell table:formula="of:=[.B355]/[.C355]" office:value-type="float" office:value="0.00217152777777778" calcext:value-type="float">
            <text:p>0,00217152777777778000</text:p>
          </table:table-cell>
          <table:table-cell table:formula="of:=[.D356]-[.D355]" office:value-type="float" office:value="0.00000613425925925911" calcext:value-type="float">
            <text:p>0,00000613425925925911</text:p>
          </table:table-cell>
          <table:table-cell table:number-columns-repeated="16379"/>
        </table:table-row>
        <table:table-row table:style-name="ro1">
          <table:table-cell office:value-type="float" office:value="355" calcext:value-type="float">
            <text:p>355</text:p>
          </table:table-cell>
          <table:table-cell table:formula="of:=[.B355]+53" office:value-type="float" office:value="18815" calcext:value-type="float">
            <text:p>18815</text:p>
          </table:table-cell>
          <table:table-cell office:value-type="float" office:value="8640000" calcext:value-type="float">
            <text:p>8640000</text:p>
          </table:table-cell>
          <table:table-cell table:formula="of:=[.B356]/[.C356]" office:value-type="float" office:value="0.00217766203703704" calcext:value-type="float">
            <text:p>0,00217766203703704000</text:p>
          </table:table-cell>
          <table:table-cell table:formula="of:=[.D357]-[.D356]" office:value-type="float" office:value="0.00000613425925925911" calcext:value-type="float">
            <text:p>0,00000613425925925911</text:p>
          </table:table-cell>
          <table:table-cell table:number-columns-repeated="16379"/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[.B356]+53" office:value-type="float" office:value="18868" calcext:value-type="float">
            <text:p>18868</text:p>
          </table:table-cell>
          <table:table-cell office:value-type="float" office:value="8640000" calcext:value-type="float">
            <text:p>8640000</text:p>
          </table:table-cell>
          <table:table-cell table:formula="of:=[.B357]/[.C357]" office:value-type="float" office:value="0.0021837962962963" calcext:value-type="float">
            <text:p>0,00218379629629630000</text:p>
          </table:table-cell>
          <table:table-cell table:formula="of:=[.D358]-[.D357]" office:value-type="float" office:value="0.00000613425925925955" calcext:value-type="float">
            <text:p>0,00000613425925925955</text:p>
          </table:table-cell>
          <table:table-cell table:number-columns-repeated="16379"/>
        </table:table-row>
        <table:table-row table:style-name="ro1">
          <table:table-cell office:value-type="float" office:value="357" calcext:value-type="float">
            <text:p>357</text:p>
          </table:table-cell>
          <table:table-cell table:formula="of:=[.B357]+53" office:value-type="float" office:value="18921" calcext:value-type="float">
            <text:p>18921</text:p>
          </table:table-cell>
          <table:table-cell office:value-type="float" office:value="8640000" calcext:value-type="float">
            <text:p>8640000</text:p>
          </table:table-cell>
          <table:table-cell table:formula="of:=[.B358]/[.C358]" office:value-type="float" office:value="0.00218993055555556" calcext:value-type="float">
            <text:p>0,00218993055555556000</text:p>
          </table:table-cell>
          <table:table-cell table:formula="of:=[.D359]-[.D358]" office:value-type="float" office:value="0.00000613425925925911" calcext:value-type="float">
            <text:p>0,00000613425925925911</text:p>
          </table:table-cell>
          <table:table-cell table:number-columns-repeated="16379"/>
        </table:table-row>
        <table:table-row table:style-name="ro1">
          <table:table-cell office:value-type="float" office:value="358" calcext:value-type="float">
            <text:p>358</text:p>
          </table:table-cell>
          <table:table-cell table:formula="of:=[.B358]+53" office:value-type="float" office:value="18974" calcext:value-type="float">
            <text:p>18974</text:p>
          </table:table-cell>
          <table:table-cell office:value-type="float" office:value="8640000" calcext:value-type="float">
            <text:p>8640000</text:p>
          </table:table-cell>
          <table:table-cell table:formula="of:=[.B359]/[.C359]" office:value-type="float" office:value="0.00219606481481481" calcext:value-type="float">
            <text:p>0,00219606481481481000</text:p>
          </table:table-cell>
          <table:table-cell table:formula="of:=[.D360]-[.D359]" office:value-type="float" office:value="0.00000613425925925911" calcext:value-type="float">
            <text:p>0,00000613425925925911</text:p>
          </table:table-cell>
          <table:table-cell table:number-columns-repeated="16379"/>
        </table:table-row>
        <table:table-row table:style-name="ro1">
          <table:table-cell office:value-type="float" office:value="359" calcext:value-type="float">
            <text:p>359</text:p>
          </table:table-cell>
          <table:table-cell table:formula="of:=[.B359]+53" office:value-type="float" office:value="19027" calcext:value-type="float">
            <text:p>19027</text:p>
          </table:table-cell>
          <table:table-cell office:value-type="float" office:value="8640000" calcext:value-type="float">
            <text:p>8640000</text:p>
          </table:table-cell>
          <table:table-cell table:formula="of:=[.B360]/[.C360]" office:value-type="float" office:value="0.00220219907407407" calcext:value-type="float">
            <text:p>0,00220219907407407000</text:p>
          </table:table-cell>
          <table:table-cell table:formula="of:=[.D361]-[.D360]" office:value-type="float" office:value="0.00000613425925925955" calcext:value-type="float">
            <text:p>0,00000613425925925955</text:p>
          </table:table-cell>
          <table:table-cell table:number-columns-repeated="16379"/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[.B360]+53" office:value-type="float" office:value="19080" calcext:value-type="float">
            <text:p>19080</text:p>
          </table:table-cell>
          <table:table-cell office:value-type="float" office:value="8640000" calcext:value-type="float">
            <text:p>8640000</text:p>
          </table:table-cell>
          <table:table-cell table:formula="of:=[.B361]/[.C361]" office:value-type="float" office:value="0.00220833333333333" calcext:value-type="float">
            <text:p>0,00220833333333333000</text:p>
          </table:table-cell>
          <table:table-cell table:formula="of:=[.D362]-[.D361]" office:value-type="float" office:value="0.00000613425925925911" calcext:value-type="float">
            <text:p>0,00000613425925925911</text:p>
          </table:table-cell>
          <table:table-cell table:number-columns-repeated="16379"/>
        </table:table-row>
        <table:table-row table:style-name="ro1">
          <table:table-cell office:value-type="float" office:value="361" calcext:value-type="float">
            <text:p>361</text:p>
          </table:table-cell>
          <table:table-cell table:formula="of:=[.B361]+53" office:value-type="float" office:value="19133" calcext:value-type="float">
            <text:p>19133</text:p>
          </table:table-cell>
          <table:table-cell office:value-type="float" office:value="8640000" calcext:value-type="float">
            <text:p>8640000</text:p>
          </table:table-cell>
          <table:table-cell table:formula="of:=[.B362]/[.C362]" office:value-type="float" office:value="0.00221446759259259" calcext:value-type="float">
            <text:p>0,00221446759259259000</text:p>
          </table:table-cell>
          <table:table-cell table:formula="of:=[.D363]-[.D362]" office:value-type="float" office:value="0.00000613425925925911" calcext:value-type="float">
            <text:p>0,00000613425925925911</text:p>
          </table:table-cell>
          <table:table-cell table:number-columns-repeated="16379"/>
        </table:table-row>
        <table:table-row table:style-name="ro1">
          <table:table-cell office:value-type="float" office:value="362" calcext:value-type="float">
            <text:p>362</text:p>
          </table:table-cell>
          <table:table-cell table:formula="of:=[.B362]+53" office:value-type="float" office:value="19186" calcext:value-type="float">
            <text:p>19186</text:p>
          </table:table-cell>
          <table:table-cell office:value-type="float" office:value="8640000" calcext:value-type="float">
            <text:p>8640000</text:p>
          </table:table-cell>
          <table:table-cell table:formula="of:=[.B363]/[.C363]" office:value-type="float" office:value="0.00222060185185185" calcext:value-type="float">
            <text:p>0,00222060185185185000</text:p>
          </table:table-cell>
          <table:table-cell table:formula="of:=[.D364]-[.D363]" office:value-type="float" office:value="0.00000613425925925955" calcext:value-type="float">
            <text:p>0,00000613425925925955</text:p>
          </table:table-cell>
          <table:table-cell table:number-columns-repeated="16379"/>
        </table:table-row>
        <table:table-row table:style-name="ro1">
          <table:table-cell office:value-type="float" office:value="363" calcext:value-type="float">
            <text:p>363</text:p>
          </table:table-cell>
          <table:table-cell table:formula="of:=[.B363]+53" office:value-type="float" office:value="19239" calcext:value-type="float">
            <text:p>19239</text:p>
          </table:table-cell>
          <table:table-cell office:value-type="float" office:value="8640000" calcext:value-type="float">
            <text:p>8640000</text:p>
          </table:table-cell>
          <table:table-cell table:formula="of:=[.B364]/[.C364]" office:value-type="float" office:value="0.00222673611111111" calcext:value-type="float">
            <text:p>0,00222673611111111000</text:p>
          </table:table-cell>
          <table:table-cell table:formula="of:=[.D365]-[.D364]" office:value-type="float" office:value="0.00000613425925925911" calcext:value-type="float">
            <text:p>0,00000613425925925911</text:p>
          </table:table-cell>
          <table:table-cell table:number-columns-repeated="16379"/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[.B364]+53" office:value-type="float" office:value="19292" calcext:value-type="float">
            <text:p>19292</text:p>
          </table:table-cell>
          <table:table-cell office:value-type="float" office:value="8640000" calcext:value-type="float">
            <text:p>8640000</text:p>
          </table:table-cell>
          <table:table-cell table:formula="of:=[.B365]/[.C365]" office:value-type="float" office:value="0.00223287037037037" calcext:value-type="float">
            <text:p>0,00223287037037037000</text:p>
          </table:table-cell>
          <table:table-cell table:formula="of:=[.D366]-[.D365]" office:value-type="float" office:value="0.00000613425925925911" calcext:value-type="float">
            <text:p>0,00000613425925925911</text:p>
          </table:table-cell>
          <table:table-cell table:number-columns-repeated="16379"/>
        </table:table-row>
        <table:table-row table:style-name="ro1">
          <table:table-cell office:value-type="float" office:value="365" calcext:value-type="float">
            <text:p>365</text:p>
          </table:table-cell>
          <table:table-cell table:formula="of:=[.B365]+53" office:value-type="float" office:value="19345" calcext:value-type="float">
            <text:p>19345</text:p>
          </table:table-cell>
          <table:table-cell office:value-type="float" office:value="8640000" calcext:value-type="float">
            <text:p>8640000</text:p>
          </table:table-cell>
          <table:table-cell table:formula="of:=[.B366]/[.C366]" office:value-type="float" office:value="0.00223900462962963" calcext:value-type="float">
            <text:p>0,00223900462962963000</text:p>
          </table:table-cell>
          <table:table-cell table:formula="of:=[.D367]-[.D366]" office:value-type="float" office:value="0.00000613425925925955" calcext:value-type="float">
            <text:p>0,00000613425925925955</text:p>
          </table:table-cell>
          <table:table-cell table:number-columns-repeated="16379"/>
        </table:table-row>
        <table:table-row table:style-name="ro1">
          <table:table-cell office:value-type="float" office:value="366" calcext:value-type="float">
            <text:p>366</text:p>
          </table:table-cell>
          <table:table-cell table:formula="of:=[.B366]+53" office:value-type="float" office:value="19398" calcext:value-type="float">
            <text:p>19398</text:p>
          </table:table-cell>
          <table:table-cell office:value-type="float" office:value="8640000" calcext:value-type="float">
            <text:p>8640000</text:p>
          </table:table-cell>
          <table:table-cell table:formula="of:=[.B367]/[.C367]" office:value-type="float" office:value="0.00224513888888889" calcext:value-type="float">
            <text:p>0,00224513888888889000</text:p>
          </table:table-cell>
          <table:table-cell table:formula="of:=[.D368]-[.D367]" office:value-type="float" office:value="0.00000613425925925911" calcext:value-type="float">
            <text:p>0,00000613425925925911</text:p>
          </table:table-cell>
          <table:table-cell table:number-columns-repeated="16379"/>
        </table:table-row>
        <table:table-row table:style-name="ro1">
          <table:table-cell office:value-type="float" office:value="367" calcext:value-type="float">
            <text:p>367</text:p>
          </table:table-cell>
          <table:table-cell table:formula="of:=[.B367]+53" office:value-type="float" office:value="19451" calcext:value-type="float">
            <text:p>19451</text:p>
          </table:table-cell>
          <table:table-cell office:value-type="float" office:value="8640000" calcext:value-type="float">
            <text:p>8640000</text:p>
          </table:table-cell>
          <table:table-cell table:formula="of:=[.B368]/[.C368]" office:value-type="float" office:value="0.00225127314814815" calcext:value-type="float">
            <text:p>0,00225127314814815000</text:p>
          </table:table-cell>
          <table:table-cell table:formula="of:=[.D369]-[.D368]" office:value-type="float" office:value="0.00000613425925925911" calcext:value-type="float">
            <text:p>0,00000613425925925911</text:p>
          </table:table-cell>
          <table:table-cell table:number-columns-repeated="16379"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[.B368]+53" office:value-type="float" office:value="19504" calcext:value-type="float">
            <text:p>19504</text:p>
          </table:table-cell>
          <table:table-cell office:value-type="float" office:value="8640000" calcext:value-type="float">
            <text:p>8640000</text:p>
          </table:table-cell>
          <table:table-cell table:formula="of:=[.B369]/[.C369]" office:value-type="float" office:value="0.00225740740740741" calcext:value-type="float">
            <text:p>0,00225740740740741000</text:p>
          </table:table-cell>
          <table:table-cell table:formula="of:=[.D370]-[.D369]" office:value-type="float" office:value="0.00000613425925925955" calcext:value-type="float">
            <text:p>0,00000613425925925955</text:p>
          </table:table-cell>
          <table:table-cell table:number-columns-repeated="16379"/>
        </table:table-row>
        <table:table-row table:style-name="ro1">
          <table:table-cell office:value-type="float" office:value="369" calcext:value-type="float">
            <text:p>369</text:p>
          </table:table-cell>
          <table:table-cell table:formula="of:=[.B369]+53" office:value-type="float" office:value="19557" calcext:value-type="float">
            <text:p>19557</text:p>
          </table:table-cell>
          <table:table-cell office:value-type="float" office:value="8640000" calcext:value-type="float">
            <text:p>8640000</text:p>
          </table:table-cell>
          <table:table-cell table:formula="of:=[.B370]/[.C370]" office:value-type="float" office:value="0.00226354166666667" calcext:value-type="float">
            <text:p>0,00226354166666667000</text:p>
          </table:table-cell>
          <table:table-cell table:formula="of:=[.D371]-[.D370]" office:value-type="float" office:value="0.00000613425925925911" calcext:value-type="float">
            <text:p>0,00000613425925925911</text:p>
          </table:table-cell>
          <table:table-cell table:number-columns-repeated="16379"/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[.B370]+53" office:value-type="float" office:value="19610" calcext:value-type="float">
            <text:p>19610</text:p>
          </table:table-cell>
          <table:table-cell office:value-type="float" office:value="8640000" calcext:value-type="float">
            <text:p>8640000</text:p>
          </table:table-cell>
          <table:table-cell table:formula="of:=[.B371]/[.C371]" office:value-type="float" office:value="0.00226967592592593" calcext:value-type="float">
            <text:p>0,00226967592592593000</text:p>
          </table:table-cell>
          <table:table-cell table:formula="of:=[.D372]-[.D371]" office:value-type="float" office:value="0.00000613425925925955" calcext:value-type="float">
            <text:p>0,00000613425925925955</text:p>
          </table:table-cell>
          <table:table-cell table:number-columns-repeated="16379"/>
        </table:table-row>
        <table:table-row table:style-name="ro1">
          <table:table-cell office:value-type="float" office:value="371" calcext:value-type="float">
            <text:p>371</text:p>
          </table:table-cell>
          <table:table-cell table:formula="of:=[.B371]+53" office:value-type="float" office:value="19663" calcext:value-type="float">
            <text:p>19663</text:p>
          </table:table-cell>
          <table:table-cell office:value-type="float" office:value="8640000" calcext:value-type="float">
            <text:p>8640000</text:p>
          </table:table-cell>
          <table:table-cell table:formula="of:=[.B372]/[.C372]" office:value-type="float" office:value="0.00227581018518519" calcext:value-type="float">
            <text:p>0,00227581018518519000</text:p>
          </table:table-cell>
          <table:table-cell table:formula="of:=[.D373]-[.D372]" office:value-type="float" office:value="0.00000613425925925911" calcext:value-type="float">
            <text:p>0,00000613425925925911</text:p>
          </table:table-cell>
          <table:table-cell table:number-columns-repeated="16379"/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[.B372]+53" office:value-type="float" office:value="19716" calcext:value-type="float">
            <text:p>19716</text:p>
          </table:table-cell>
          <table:table-cell office:value-type="float" office:value="8640000" calcext:value-type="float">
            <text:p>8640000</text:p>
          </table:table-cell>
          <table:table-cell table:formula="of:=[.B373]/[.C373]" office:value-type="float" office:value="0.00228194444444444" calcext:value-type="float">
            <text:p>0,00228194444444444000</text:p>
          </table:table-cell>
          <table:table-cell table:formula="of:=[.D374]-[.D373]" office:value-type="float" office:value="0.00000613425925925911" calcext:value-type="float">
            <text:p>0,00000613425925925911</text:p>
          </table:table-cell>
          <table:table-cell table:number-columns-repeated="16379"/>
        </table:table-row>
        <table:table-row table:style-name="ro1">
          <table:table-cell office:value-type="float" office:value="373" calcext:value-type="float">
            <text:p>373</text:p>
          </table:table-cell>
          <table:table-cell table:formula="of:=[.B373]+53" office:value-type="float" office:value="19769" calcext:value-type="float">
            <text:p>19769</text:p>
          </table:table-cell>
          <table:table-cell office:value-type="float" office:value="8640000" calcext:value-type="float">
            <text:p>8640000</text:p>
          </table:table-cell>
          <table:table-cell table:formula="of:=[.B374]/[.C374]" office:value-type="float" office:value="0.0022880787037037" calcext:value-type="float">
            <text:p>0,00228807870370370000</text:p>
          </table:table-cell>
          <table:table-cell table:formula="of:=[.D375]-[.D374]" office:value-type="float" office:value="0.00000613425925925955" calcext:value-type="float">
            <text:p>0,00000613425925925955</text:p>
          </table:table-cell>
          <table:table-cell table:number-columns-repeated="16379"/>
        </table:table-row>
        <table:table-row table:style-name="ro1">
          <table:table-cell office:value-type="float" office:value="374" calcext:value-type="float">
            <text:p>374</text:p>
          </table:table-cell>
          <table:table-cell table:formula="of:=[.B374]+53" office:value-type="float" office:value="19822" calcext:value-type="float">
            <text:p>19822</text:p>
          </table:table-cell>
          <table:table-cell office:value-type="float" office:value="8640000" calcext:value-type="float">
            <text:p>8640000</text:p>
          </table:table-cell>
          <table:table-cell table:formula="of:=[.B375]/[.C375]" office:value-type="float" office:value="0.00229421296296296" calcext:value-type="float">
            <text:p>0,00229421296296296000</text:p>
          </table:table-cell>
          <table:table-cell table:formula="of:=[.D376]-[.D375]" office:value-type="float" office:value="0.00000613425925925911" calcext:value-type="float">
            <text:p>0,00000613425925925911</text:p>
          </table:table-cell>
          <table:table-cell table:number-columns-repeated="16379"/>
        </table:table-row>
        <table:table-row table:style-name="ro1">
          <table:table-cell office:value-type="float" office:value="375" calcext:value-type="float">
            <text:p>375</text:p>
          </table:table-cell>
          <table:table-cell table:formula="of:=[.B375]+53" office:value-type="float" office:value="19875" calcext:value-type="float">
            <text:p>19875</text:p>
          </table:table-cell>
          <table:table-cell office:value-type="float" office:value="8640000" calcext:value-type="float">
            <text:p>8640000</text:p>
          </table:table-cell>
          <table:table-cell table:formula="of:=[.B376]/[.C376]" office:value-type="float" office:value="0.00230034722222222" calcext:value-type="float">
            <text:p>0,00230034722222222000</text:p>
          </table:table-cell>
          <table:table-cell table:formula="of:=[.D377]-[.D376]" office:value-type="float" office:value="0.00000613425925925911" calcext:value-type="float">
            <text:p>0,00000613425925925911</text:p>
          </table:table-cell>
          <table:table-cell table:number-columns-repeated="16379"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[.B376]+53" office:value-type="float" office:value="19928" calcext:value-type="float">
            <text:p>19928</text:p>
          </table:table-cell>
          <table:table-cell office:value-type="float" office:value="8640000" calcext:value-type="float">
            <text:p>8640000</text:p>
          </table:table-cell>
          <table:table-cell table:formula="of:=[.B377]/[.C377]" office:value-type="float" office:value="0.00230648148148148" calcext:value-type="float">
            <text:p>0,00230648148148148000</text:p>
          </table:table-cell>
          <table:table-cell table:formula="of:=[.D378]-[.D377]" office:value-type="float" office:value="0.00000613425925925955" calcext:value-type="float">
            <text:p>0,00000613425925925955</text:p>
          </table:table-cell>
          <table:table-cell table:number-columns-repeated="16379"/>
        </table:table-row>
        <table:table-row table:style-name="ro1">
          <table:table-cell office:value-type="float" office:value="377" calcext:value-type="float">
            <text:p>377</text:p>
          </table:table-cell>
          <table:table-cell table:formula="of:=[.B377]+53" office:value-type="float" office:value="19981" calcext:value-type="float">
            <text:p>19981</text:p>
          </table:table-cell>
          <table:table-cell office:value-type="float" office:value="8640000" calcext:value-type="float">
            <text:p>8640000</text:p>
          </table:table-cell>
          <table:table-cell table:formula="of:=[.B378]/[.C378]" office:value-type="float" office:value="0.00231261574074074" calcext:value-type="float">
            <text:p>0,00231261574074074000</text:p>
          </table:table-cell>
          <table:table-cell table:formula="of:=[.D379]-[.D378]" office:value-type="float" office:value="0.00000613425925925911" calcext:value-type="float">
            <text:p>0,00000613425925925911</text:p>
          </table:table-cell>
          <table:table-cell table:number-columns-repeated="16379"/>
        </table:table-row>
        <table:table-row table:style-name="ro1">
          <table:table-cell office:value-type="float" office:value="378" calcext:value-type="float">
            <text:p>378</text:p>
          </table:table-cell>
          <table:table-cell table:formula="of:=[.B378]+53" office:value-type="float" office:value="20034" calcext:value-type="float">
            <text:p>20034</text:p>
          </table:table-cell>
          <table:table-cell office:value-type="float" office:value="8640000" calcext:value-type="float">
            <text:p>8640000</text:p>
          </table:table-cell>
          <table:table-cell table:formula="of:=[.B379]/[.C379]" office:value-type="float" office:value="0.00231875" calcext:value-type="float">
            <text:p>0,00231875000000000000</text:p>
          </table:table-cell>
          <table:table-cell table:formula="of:=[.D380]-[.D379]" office:value-type="float" office:value="0.00000613425925925911" calcext:value-type="float">
            <text:p>0,00000613425925925911</text:p>
          </table:table-cell>
          <table:table-cell table:number-columns-repeated="16379"/>
        </table:table-row>
        <table:table-row table:style-name="ro1">
          <table:table-cell office:value-type="float" office:value="379" calcext:value-type="float">
            <text:p>379</text:p>
          </table:table-cell>
          <table:table-cell table:formula="of:=[.B379]+53" office:value-type="float" office:value="20087" calcext:value-type="float">
            <text:p>20087</text:p>
          </table:table-cell>
          <table:table-cell office:value-type="float" office:value="8640000" calcext:value-type="float">
            <text:p>8640000</text:p>
          </table:table-cell>
          <table:table-cell table:formula="of:=[.B380]/[.C380]" office:value-type="float" office:value="0.00232488425925926" calcext:value-type="float">
            <text:p>0,00232488425925926000</text:p>
          </table:table-cell>
          <table:table-cell table:formula="of:=[.D381]-[.D380]" office:value-type="float" office:value="0.00000613425925925955" calcext:value-type="float">
            <text:p>0,00000613425925925955</text:p>
          </table:table-cell>
          <table:table-cell table:number-columns-repeated="16379"/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[.B380]+53" office:value-type="float" office:value="20140" calcext:value-type="float">
            <text:p>20140</text:p>
          </table:table-cell>
          <table:table-cell office:value-type="float" office:value="8640000" calcext:value-type="float">
            <text:p>8640000</text:p>
          </table:table-cell>
          <table:table-cell table:formula="of:=[.B381]/[.C381]" office:value-type="float" office:value="0.00233101851851852" calcext:value-type="float">
            <text:p>0,00233101851851852000</text:p>
          </table:table-cell>
          <table:table-cell table:formula="of:=[.D382]-[.D381]" office:value-type="float" office:value="0.00000613425925925911" calcext:value-type="float">
            <text:p>0,00000613425925925911</text:p>
          </table:table-cell>
          <table:table-cell table:number-columns-repeated="16379"/>
        </table:table-row>
        <table:table-row table:style-name="ro1">
          <table:table-cell office:value-type="float" office:value="381" calcext:value-type="float">
            <text:p>381</text:p>
          </table:table-cell>
          <table:table-cell table:formula="of:=[.B381]+53" office:value-type="float" office:value="20193" calcext:value-type="float">
            <text:p>20193</text:p>
          </table:table-cell>
          <table:table-cell office:value-type="float" office:value="8640000" calcext:value-type="float">
            <text:p>8640000</text:p>
          </table:table-cell>
          <table:table-cell table:formula="of:=[.B382]/[.C382]" office:value-type="float" office:value="0.00233715277777778" calcext:value-type="float">
            <text:p>0,00233715277777778000</text:p>
          </table:table-cell>
          <table:table-cell table:formula="of:=[.D383]-[.D382]" office:value-type="float" office:value="0.00000613425925925911" calcext:value-type="float">
            <text:p>0,00000613425925925911</text:p>
          </table:table-cell>
          <table:table-cell table:number-columns-repeated="16379"/>
        </table:table-row>
        <table:table-row table:style-name="ro1">
          <table:table-cell office:value-type="float" office:value="382" calcext:value-type="float">
            <text:p>382</text:p>
          </table:table-cell>
          <table:table-cell table:formula="of:=[.B382]+53" office:value-type="float" office:value="20246" calcext:value-type="float">
            <text:p>20246</text:p>
          </table:table-cell>
          <table:table-cell office:value-type="float" office:value="8640000" calcext:value-type="float">
            <text:p>8640000</text:p>
          </table:table-cell>
          <table:table-cell table:formula="of:=[.B383]/[.C383]" office:value-type="float" office:value="0.00234328703703704" calcext:value-type="float">
            <text:p>0,00234328703703704000</text:p>
          </table:table-cell>
          <table:table-cell table:formula="of:=[.D384]-[.D383]" office:value-type="float" office:value="0.00000613425925925955" calcext:value-type="float">
            <text:p>0,00000613425925925955</text:p>
          </table:table-cell>
          <table:table-cell table:number-columns-repeated="16379"/>
        </table:table-row>
        <table:table-row table:style-name="ro1">
          <table:table-cell office:value-type="float" office:value="383" calcext:value-type="float">
            <text:p>383</text:p>
          </table:table-cell>
          <table:table-cell table:formula="of:=[.B383]+53" office:value-type="float" office:value="20299" calcext:value-type="float">
            <text:p>20299</text:p>
          </table:table-cell>
          <table:table-cell office:value-type="float" office:value="8640000" calcext:value-type="float">
            <text:p>8640000</text:p>
          </table:table-cell>
          <table:table-cell table:formula="of:=[.B384]/[.C384]" office:value-type="float" office:value="0.0023494212962963" calcext:value-type="float">
            <text:p>0,00234942129629630000</text:p>
          </table:table-cell>
          <table:table-cell table:formula="of:=[.D385]-[.D384]" office:value-type="float" office:value="0.00000613425925925911" calcext:value-type="float">
            <text:p>0,00000613425925925911</text:p>
          </table:table-cell>
          <table:table-cell table:number-columns-repeated="16379"/>
        </table:table-row>
        <table:table-row table:style-name="ro1">
          <table:table-cell office:value-type="float" office:value="384" calcext:value-type="float">
            <text:p>384</text:p>
          </table:table-cell>
          <table:table-cell table:formula="of:=[.B384]+53" office:value-type="float" office:value="20352" calcext:value-type="float">
            <text:p>20352</text:p>
          </table:table-cell>
          <table:table-cell office:value-type="float" office:value="8640000" calcext:value-type="float">
            <text:p>8640000</text:p>
          </table:table-cell>
          <table:table-cell table:formula="of:=[.B385]/[.C385]" office:value-type="float" office:value="0.00235555555555556" calcext:value-type="float">
            <text:p>0,00235555555555556000</text:p>
          </table:table-cell>
          <table:table-cell table:formula="of:=[.D386]-[.D385]" office:value-type="float" office:value="0.00000613425925925911" calcext:value-type="float">
            <text:p>0,00000613425925925911</text:p>
          </table:table-cell>
          <table:table-cell table:number-columns-repeated="16379"/>
        </table:table-row>
        <table:table-row table:style-name="ro1">
          <table:table-cell office:value-type="float" office:value="385" calcext:value-type="float">
            <text:p>385</text:p>
          </table:table-cell>
          <table:table-cell table:formula="of:=[.B385]+53" office:value-type="float" office:value="20405" calcext:value-type="float">
            <text:p>20405</text:p>
          </table:table-cell>
          <table:table-cell office:value-type="float" office:value="8640000" calcext:value-type="float">
            <text:p>8640000</text:p>
          </table:table-cell>
          <table:table-cell table:formula="of:=[.B386]/[.C386]" office:value-type="float" office:value="0.00236168981481481" calcext:value-type="float">
            <text:p>0,00236168981481481000</text:p>
          </table:table-cell>
          <table:table-cell table:formula="of:=[.D387]-[.D386]" office:value-type="float" office:value="0.00000613425925925955" calcext:value-type="float">
            <text:p>0,00000613425925925955</text:p>
          </table:table-cell>
          <table:table-cell table:number-columns-repeated="16379"/>
        </table:table-row>
        <table:table-row table:style-name="ro1">
          <table:table-cell office:value-type="float" office:value="386" calcext:value-type="float">
            <text:p>386</text:p>
          </table:table-cell>
          <table:table-cell table:formula="of:=[.B386]+53" office:value-type="float" office:value="20458" calcext:value-type="float">
            <text:p>20458</text:p>
          </table:table-cell>
          <table:table-cell office:value-type="float" office:value="8640000" calcext:value-type="float">
            <text:p>8640000</text:p>
          </table:table-cell>
          <table:table-cell table:formula="of:=[.B387]/[.C387]" office:value-type="float" office:value="0.00236782407407407" calcext:value-type="float">
            <text:p>0,00236782407407407000</text:p>
          </table:table-cell>
          <table:table-cell table:formula="of:=[.D388]-[.D387]" office:value-type="float" office:value="0.00000613425925925911" calcext:value-type="float">
            <text:p>0,00000613425925925911</text:p>
          </table:table-cell>
          <table:table-cell table:number-columns-repeated="16379"/>
        </table:table-row>
        <table:table-row table:style-name="ro1">
          <table:table-cell office:value-type="float" office:value="387" calcext:value-type="float">
            <text:p>387</text:p>
          </table:table-cell>
          <table:table-cell table:formula="of:=[.B387]+53" office:value-type="float" office:value="20511" calcext:value-type="float">
            <text:p>20511</text:p>
          </table:table-cell>
          <table:table-cell office:value-type="float" office:value="8640000" calcext:value-type="float">
            <text:p>8640000</text:p>
          </table:table-cell>
          <table:table-cell table:formula="of:=[.B388]/[.C388]" office:value-type="float" office:value="0.00237395833333333" calcext:value-type="float">
            <text:p>0,00237395833333333000</text:p>
          </table:table-cell>
          <table:table-cell table:formula="of:=[.D389]-[.D388]" office:value-type="float" office:value="0.00000613425925925911" calcext:value-type="float">
            <text:p>0,00000613425925925911</text:p>
          </table:table-cell>
          <table:table-cell table:number-columns-repeated="16379"/>
        </table:table-row>
        <table:table-row table:style-name="ro1">
          <table:table-cell office:value-type="float" office:value="388" calcext:value-type="float">
            <text:p>388</text:p>
          </table:table-cell>
          <table:table-cell table:formula="of:=[.B388]+53" office:value-type="float" office:value="20564" calcext:value-type="float">
            <text:p>20564</text:p>
          </table:table-cell>
          <table:table-cell office:value-type="float" office:value="8640000" calcext:value-type="float">
            <text:p>8640000</text:p>
          </table:table-cell>
          <table:table-cell table:formula="of:=[.B389]/[.C389]" office:value-type="float" office:value="0.00238009259259259" calcext:value-type="float">
            <text:p>0,00238009259259259000</text:p>
          </table:table-cell>
          <table:table-cell table:formula="of:=[.D390]-[.D389]" office:value-type="float" office:value="0.00000613425925925955" calcext:value-type="float">
            <text:p>0,00000613425925925955</text:p>
          </table:table-cell>
          <table:table-cell table:number-columns-repeated="16379"/>
        </table:table-row>
        <table:table-row table:style-name="ro1">
          <table:table-cell office:value-type="float" office:value="389" calcext:value-type="float">
            <text:p>389</text:p>
          </table:table-cell>
          <table:table-cell table:formula="of:=[.B389]+53" office:value-type="float" office:value="20617" calcext:value-type="float">
            <text:p>20617</text:p>
          </table:table-cell>
          <table:table-cell office:value-type="float" office:value="8640000" calcext:value-type="float">
            <text:p>8640000</text:p>
          </table:table-cell>
          <table:table-cell table:formula="of:=[.B390]/[.C390]" office:value-type="float" office:value="0.00238622685185185" calcext:value-type="float">
            <text:p>0,00238622685185185000</text:p>
          </table:table-cell>
          <table:table-cell table:formula="of:=[.D391]-[.D390]" office:value-type="float" office:value="0.00000613425925925911" calcext:value-type="float">
            <text:p>0,00000613425925925911</text:p>
          </table:table-cell>
          <table:table-cell table:number-columns-repeated="16379"/>
        </table:table-row>
        <table:table-row table:style-name="ro1">
          <table:table-cell office:value-type="float" office:value="390" calcext:value-type="float">
            <text:p>390</text:p>
          </table:table-cell>
          <table:table-cell table:formula="of:=[.B390]+53" office:value-type="float" office:value="20670" calcext:value-type="float">
            <text:p>20670</text:p>
          </table:table-cell>
          <table:table-cell office:value-type="float" office:value="8640000" calcext:value-type="float">
            <text:p>8640000</text:p>
          </table:table-cell>
          <table:table-cell table:formula="of:=[.B391]/[.C391]" office:value-type="float" office:value="0.00239236111111111" calcext:value-type="float">
            <text:p>0,00239236111111111000</text:p>
          </table:table-cell>
          <table:table-cell table:formula="of:=[.D392]-[.D391]" office:value-type="float" office:value="0.00000613425925925911" calcext:value-type="float">
            <text:p>0,00000613425925925911</text:p>
          </table:table-cell>
          <table:table-cell table:number-columns-repeated="16379"/>
        </table:table-row>
        <table:table-row table:style-name="ro1">
          <table:table-cell office:value-type="float" office:value="391" calcext:value-type="float">
            <text:p>391</text:p>
          </table:table-cell>
          <table:table-cell table:formula="of:=[.B391]+53" office:value-type="float" office:value="20723" calcext:value-type="float">
            <text:p>20723</text:p>
          </table:table-cell>
          <table:table-cell office:value-type="float" office:value="8640000" calcext:value-type="float">
            <text:p>8640000</text:p>
          </table:table-cell>
          <table:table-cell table:formula="of:=[.B392]/[.C392]" office:value-type="float" office:value="0.00239849537037037" calcext:value-type="float">
            <text:p>0,00239849537037037000</text:p>
          </table:table-cell>
          <table:table-cell table:formula="of:=[.D393]-[.D392]" office:value-type="float" office:value="0.00000613425925925955" calcext:value-type="float">
            <text:p>0,00000613425925925955</text:p>
          </table:table-cell>
          <table:table-cell table:number-columns-repeated="16379"/>
        </table:table-row>
        <table:table-row table:style-name="ro1">
          <table:table-cell office:value-type="float" office:value="392" calcext:value-type="float">
            <text:p>392</text:p>
          </table:table-cell>
          <table:table-cell table:formula="of:=[.B392]+53" office:value-type="float" office:value="20776" calcext:value-type="float">
            <text:p>20776</text:p>
          </table:table-cell>
          <table:table-cell office:value-type="float" office:value="8640000" calcext:value-type="float">
            <text:p>8640000</text:p>
          </table:table-cell>
          <table:table-cell table:formula="of:=[.B393]/[.C393]" office:value-type="float" office:value="0.00240462962962963" calcext:value-type="float">
            <text:p>0,00240462962962963000</text:p>
          </table:table-cell>
          <table:table-cell table:formula="of:=[.D394]-[.D393]" office:value-type="float" office:value="0.00000613425925925911" calcext:value-type="float">
            <text:p>0,00000613425925925911</text:p>
          </table:table-cell>
          <table:table-cell table:number-columns-repeated="16379"/>
        </table:table-row>
        <table:table-row table:style-name="ro1">
          <table:table-cell office:value-type="float" office:value="393" calcext:value-type="float">
            <text:p>393</text:p>
          </table:table-cell>
          <table:table-cell table:formula="of:=[.B393]+53" office:value-type="float" office:value="20829" calcext:value-type="float">
            <text:p>20829</text:p>
          </table:table-cell>
          <table:table-cell office:value-type="float" office:value="8640000" calcext:value-type="float">
            <text:p>8640000</text:p>
          </table:table-cell>
          <table:table-cell table:formula="of:=[.B394]/[.C394]" office:value-type="float" office:value="0.00241076388888889" calcext:value-type="float">
            <text:p>0,00241076388888889000</text:p>
          </table:table-cell>
          <table:table-cell table:formula="of:=[.D395]-[.D394]" office:value-type="float" office:value="0.00000613425925925911" calcext:value-type="float">
            <text:p>0,00000613425925925911</text:p>
          </table:table-cell>
          <table:table-cell table:number-columns-repeated="16379"/>
        </table:table-row>
        <table:table-row table:style-name="ro1">
          <table:table-cell office:value-type="float" office:value="394" calcext:value-type="float">
            <text:p>394</text:p>
          </table:table-cell>
          <table:table-cell table:formula="of:=[.B394]+53" office:value-type="float" office:value="20882" calcext:value-type="float">
            <text:p>20882</text:p>
          </table:table-cell>
          <table:table-cell office:value-type="float" office:value="8640000" calcext:value-type="float">
            <text:p>8640000</text:p>
          </table:table-cell>
          <table:table-cell table:formula="of:=[.B395]/[.C395]" office:value-type="float" office:value="0.00241689814814815" calcext:value-type="float">
            <text:p>0,00241689814814815000</text:p>
          </table:table-cell>
          <table:table-cell table:formula="of:=[.D396]-[.D395]" office:value-type="float" office:value="0.00000613425925925955" calcext:value-type="float">
            <text:p>0,00000613425925925955</text:p>
          </table:table-cell>
          <table:table-cell table:number-columns-repeated="16379"/>
        </table:table-row>
        <table:table-row table:style-name="ro1">
          <table:table-cell office:value-type="float" office:value="395" calcext:value-type="float">
            <text:p>395</text:p>
          </table:table-cell>
          <table:table-cell table:formula="of:=[.B395]+53" office:value-type="float" office:value="20935" calcext:value-type="float">
            <text:p>20935</text:p>
          </table:table-cell>
          <table:table-cell office:value-type="float" office:value="8640000" calcext:value-type="float">
            <text:p>8640000</text:p>
          </table:table-cell>
          <table:table-cell table:formula="of:=[.B396]/[.C396]" office:value-type="float" office:value="0.00242303240740741" calcext:value-type="float">
            <text:p>0,00242303240740741000</text:p>
          </table:table-cell>
          <table:table-cell table:formula="of:=[.D397]-[.D396]" office:value-type="float" office:value="0.00000613425925925911" calcext:value-type="float">
            <text:p>0,00000613425925925911</text:p>
          </table:table-cell>
          <table:table-cell table:number-columns-repeated="16379"/>
        </table:table-row>
        <table:table-row table:style-name="ro1">
          <table:table-cell office:value-type="float" office:value="396" calcext:value-type="float">
            <text:p>396</text:p>
          </table:table-cell>
          <table:table-cell table:formula="of:=[.B396]+53" office:value-type="float" office:value="20988" calcext:value-type="float">
            <text:p>20988</text:p>
          </table:table-cell>
          <table:table-cell office:value-type="float" office:value="8640000" calcext:value-type="float">
            <text:p>8640000</text:p>
          </table:table-cell>
          <table:table-cell table:formula="of:=[.B397]/[.C397]" office:value-type="float" office:value="0.00242916666666667" calcext:value-type="float">
            <text:p>0,00242916666666667000</text:p>
          </table:table-cell>
          <table:table-cell table:formula="of:=[.D398]-[.D397]" office:value-type="float" office:value="0.00000613425925925911" calcext:value-type="float">
            <text:p>0,00000613425925925911</text:p>
          </table:table-cell>
          <table:table-cell table:number-columns-repeated="16379"/>
        </table:table-row>
        <table:table-row table:style-name="ro1">
          <table:table-cell office:value-type="float" office:value="397" calcext:value-type="float">
            <text:p>397</text:p>
          </table:table-cell>
          <table:table-cell table:formula="of:=[.B397]+53" office:value-type="float" office:value="21041" calcext:value-type="float">
            <text:p>21041</text:p>
          </table:table-cell>
          <table:table-cell office:value-type="float" office:value="8640000" calcext:value-type="float">
            <text:p>8640000</text:p>
          </table:table-cell>
          <table:table-cell table:formula="of:=[.B398]/[.C398]" office:value-type="float" office:value="0.00243530092592593" calcext:value-type="float">
            <text:p>0,00243530092592593000</text:p>
          </table:table-cell>
          <table:table-cell table:formula="of:=[.D399]-[.D398]" office:value-type="float" office:value="0.00000613425925925955" calcext:value-type="float">
            <text:p>0,00000613425925925955</text:p>
          </table:table-cell>
          <table:table-cell table:number-columns-repeated="16379"/>
        </table:table-row>
        <table:table-row table:style-name="ro1">
          <table:table-cell office:value-type="float" office:value="398" calcext:value-type="float">
            <text:p>398</text:p>
          </table:table-cell>
          <table:table-cell table:formula="of:=[.B398]+53" office:value-type="float" office:value="21094" calcext:value-type="float">
            <text:p>21094</text:p>
          </table:table-cell>
          <table:table-cell office:value-type="float" office:value="8640000" calcext:value-type="float">
            <text:p>8640000</text:p>
          </table:table-cell>
          <table:table-cell table:formula="of:=[.B399]/[.C399]" office:value-type="float" office:value="0.00244143518518519" calcext:value-type="float">
            <text:p>0,00244143518518519000</text:p>
          </table:table-cell>
          <table:table-cell table:formula="of:=[.D400]-[.D399]" office:value-type="float" office:value="0.00000613425925925911" calcext:value-type="float">
            <text:p>0,00000613425925925911</text:p>
          </table:table-cell>
          <table:table-cell table:number-columns-repeated="16379"/>
        </table:table-row>
        <table:table-row table:style-name="ro1">
          <table:table-cell office:value-type="float" office:value="399" calcext:value-type="float">
            <text:p>399</text:p>
          </table:table-cell>
          <table:table-cell table:formula="of:=[.B399]+53" office:value-type="float" office:value="21147" calcext:value-type="float">
            <text:p>21147</text:p>
          </table:table-cell>
          <table:table-cell office:value-type="float" office:value="8640000" calcext:value-type="float">
            <text:p>8640000</text:p>
          </table:table-cell>
          <table:table-cell table:formula="of:=[.B400]/[.C400]" office:value-type="float" office:value="0.00244756944444444" calcext:value-type="float">
            <text:p>0,00244756944444444000</text:p>
          </table:table-cell>
          <table:table-cell table:formula="of:=[.D401]-[.D400]" office:value-type="float" office:value="0.00000613425925925911" calcext:value-type="float">
            <text:p>0,00000613425925925911</text:p>
          </table:table-cell>
          <table:table-cell table:number-columns-repeated="16379"/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[.B400]+53" office:value-type="float" office:value="21200" calcext:value-type="float">
            <text:p>21200</text:p>
          </table:table-cell>
          <table:table-cell office:value-type="float" office:value="8640000" calcext:value-type="float">
            <text:p>8640000</text:p>
          </table:table-cell>
          <table:table-cell table:formula="of:=[.B401]/[.C401]" office:value-type="float" office:value="0.0024537037037037" calcext:value-type="float">
            <text:p>0,00245370370370370000</text:p>
          </table:table-cell>
          <table:table-cell table:formula="of:=[.D402]-[.D401]" office:value-type="float" office:value="0.00000613425925925955" calcext:value-type="float">
            <text:p>0,00000613425925925955</text:p>
          </table:table-cell>
          <table:table-cell table:number-columns-repeated="16379"/>
        </table:table-row>
        <table:table-row table:style-name="ro1">
          <table:table-cell office:value-type="float" office:value="401" calcext:value-type="float">
            <text:p>401</text:p>
          </table:table-cell>
          <table:table-cell table:formula="of:=[.B401]+53" office:value-type="float" office:value="21253" calcext:value-type="float">
            <text:p>21253</text:p>
          </table:table-cell>
          <table:table-cell office:value-type="float" office:value="8640000" calcext:value-type="float">
            <text:p>8640000</text:p>
          </table:table-cell>
          <table:table-cell table:formula="of:=[.B402]/[.C402]" office:value-type="float" office:value="0.00245983796296296" calcext:value-type="float">
            <text:p>0,00245983796296296000</text:p>
          </table:table-cell>
          <table:table-cell table:formula="of:=[.D403]-[.D402]" office:value-type="float" office:value="0.00000613425925925911" calcext:value-type="float">
            <text:p>0,00000613425925925911</text:p>
          </table:table-cell>
          <table:table-cell table:number-columns-repeated="16379"/>
        </table:table-row>
        <table:table-row table:style-name="ro1">
          <table:table-cell office:value-type="float" office:value="402" calcext:value-type="float">
            <text:p>402</text:p>
          </table:table-cell>
          <table:table-cell table:formula="of:=[.B402]+53" office:value-type="float" office:value="21306" calcext:value-type="float">
            <text:p>21306</text:p>
          </table:table-cell>
          <table:table-cell office:value-type="float" office:value="8640000" calcext:value-type="float">
            <text:p>8640000</text:p>
          </table:table-cell>
          <table:table-cell table:formula="of:=[.B403]/[.C403]" office:value-type="float" office:value="0.00246597222222222" calcext:value-type="float">
            <text:p>0,00246597222222222000</text:p>
          </table:table-cell>
          <table:table-cell table:formula="of:=[.D404]-[.D403]" office:value-type="float" office:value="0.00000613425925925911" calcext:value-type="float">
            <text:p>0,00000613425925925911</text:p>
          </table:table-cell>
          <table:table-cell table:number-columns-repeated="16379"/>
        </table:table-row>
        <table:table-row table:style-name="ro1">
          <table:table-cell office:value-type="float" office:value="403" calcext:value-type="float">
            <text:p>403</text:p>
          </table:table-cell>
          <table:table-cell table:formula="of:=[.B403]+53" office:value-type="float" office:value="21359" calcext:value-type="float">
            <text:p>21359</text:p>
          </table:table-cell>
          <table:table-cell office:value-type="float" office:value="8640000" calcext:value-type="float">
            <text:p>8640000</text:p>
          </table:table-cell>
          <table:table-cell table:formula="of:=[.B404]/[.C404]" office:value-type="float" office:value="0.00247210648148148" calcext:value-type="float">
            <text:p>0,00247210648148148000</text:p>
          </table:table-cell>
          <table:table-cell table:formula="of:=[.D405]-[.D404]" office:value-type="float" office:value="0.00000613425925925955" calcext:value-type="float">
            <text:p>0,00000613425925925955</text:p>
          </table:table-cell>
          <table:table-cell table:number-columns-repeated="16379"/>
        </table:table-row>
        <table:table-row table:style-name="ro1">
          <table:table-cell office:value-type="float" office:value="404" calcext:value-type="float">
            <text:p>404</text:p>
          </table:table-cell>
          <table:table-cell table:formula="of:=[.B404]+53" office:value-type="float" office:value="21412" calcext:value-type="float">
            <text:p>21412</text:p>
          </table:table-cell>
          <table:table-cell office:value-type="float" office:value="8640000" calcext:value-type="float">
            <text:p>8640000</text:p>
          </table:table-cell>
          <table:table-cell table:formula="of:=[.B405]/[.C405]" office:value-type="float" office:value="0.00247824074074074" calcext:value-type="float">
            <text:p>0,00247824074074074000</text:p>
          </table:table-cell>
          <table:table-cell table:formula="of:=[.D406]-[.D405]" office:value-type="float" office:value="0.00000613425925925911" calcext:value-type="float">
            <text:p>0,00000613425925925911</text:p>
          </table:table-cell>
          <table:table-cell table:number-columns-repeated="16379"/>
        </table:table-row>
        <table:table-row table:style-name="ro1">
          <table:table-cell office:value-type="float" office:value="405" calcext:value-type="float">
            <text:p>405</text:p>
          </table:table-cell>
          <table:table-cell table:formula="of:=[.B405]+53" office:value-type="float" office:value="21465" calcext:value-type="float">
            <text:p>21465</text:p>
          </table:table-cell>
          <table:table-cell office:value-type="float" office:value="8640000" calcext:value-type="float">
            <text:p>8640000</text:p>
          </table:table-cell>
          <table:table-cell table:formula="of:=[.B406]/[.C406]" office:value-type="float" office:value="0.002484375" calcext:value-type="float">
            <text:p>0,00248437500000000000</text:p>
          </table:table-cell>
          <table:table-cell table:formula="of:=[.D407]-[.D406]" office:value-type="float" office:value="0.00000613425925925911" calcext:value-type="float">
            <text:p>0,00000613425925925911</text:p>
          </table:table-cell>
          <table:table-cell table:number-columns-repeated="16379"/>
        </table:table-row>
        <table:table-row table:style-name="ro1">
          <table:table-cell office:value-type="float" office:value="406" calcext:value-type="float">
            <text:p>406</text:p>
          </table:table-cell>
          <table:table-cell table:formula="of:=[.B406]+53" office:value-type="float" office:value="21518" calcext:value-type="float">
            <text:p>21518</text:p>
          </table:table-cell>
          <table:table-cell office:value-type="float" office:value="8640000" calcext:value-type="float">
            <text:p>8640000</text:p>
          </table:table-cell>
          <table:table-cell table:formula="of:=[.B407]/[.C407]" office:value-type="float" office:value="0.00249050925925926" calcext:value-type="float">
            <text:p>0,00249050925925926000</text:p>
          </table:table-cell>
          <table:table-cell table:formula="of:=[.D408]-[.D407]" office:value-type="float" office:value="0.00000613425925925955" calcext:value-type="float">
            <text:p>0,00000613425925925955</text:p>
          </table:table-cell>
          <table:table-cell table:number-columns-repeated="16379"/>
        </table:table-row>
        <table:table-row table:style-name="ro1">
          <table:table-cell office:value-type="float" office:value="407" calcext:value-type="float">
            <text:p>407</text:p>
          </table:table-cell>
          <table:table-cell table:formula="of:=[.B407]+53" office:value-type="float" office:value="21571" calcext:value-type="float">
            <text:p>21571</text:p>
          </table:table-cell>
          <table:table-cell office:value-type="float" office:value="8640000" calcext:value-type="float">
            <text:p>8640000</text:p>
          </table:table-cell>
          <table:table-cell table:formula="of:=[.B408]/[.C408]" office:value-type="float" office:value="0.00249664351851852" calcext:value-type="float">
            <text:p>0,00249664351851852000</text:p>
          </table:table-cell>
          <table:table-cell table:formula="of:=[.D409]-[.D408]" office:value-type="float" office:value="0.00000613425925925911" calcext:value-type="float">
            <text:p>0,00000613425925925911</text:p>
          </table:table-cell>
          <table:table-cell table:number-columns-repeated="16379"/>
        </table:table-row>
        <table:table-row table:style-name="ro1">
          <table:table-cell office:value-type="float" office:value="408" calcext:value-type="float">
            <text:p>408</text:p>
          </table:table-cell>
          <table:table-cell table:formula="of:=[.B408]+53" office:value-type="float" office:value="21624" calcext:value-type="float">
            <text:p>21624</text:p>
          </table:table-cell>
          <table:table-cell office:value-type="float" office:value="8640000" calcext:value-type="float">
            <text:p>8640000</text:p>
          </table:table-cell>
          <table:table-cell table:formula="of:=[.B409]/[.C409]" office:value-type="float" office:value="0.00250277777777778" calcext:value-type="float">
            <text:p>0,00250277777777778000</text:p>
          </table:table-cell>
          <table:table-cell table:formula="of:=[.D410]-[.D409]" office:value-type="float" office:value="0.00000613425925925911" calcext:value-type="float">
            <text:p>0,00000613425925925911</text:p>
          </table:table-cell>
          <table:table-cell table:number-columns-repeated="16379"/>
        </table:table-row>
        <table:table-row table:style-name="ro1">
          <table:table-cell office:value-type="float" office:value="409" calcext:value-type="float">
            <text:p>409</text:p>
          </table:table-cell>
          <table:table-cell table:formula="of:=[.B409]+53" office:value-type="float" office:value="21677" calcext:value-type="float">
            <text:p>21677</text:p>
          </table:table-cell>
          <table:table-cell office:value-type="float" office:value="8640000" calcext:value-type="float">
            <text:p>8640000</text:p>
          </table:table-cell>
          <table:table-cell table:formula="of:=[.B410]/[.C410]" office:value-type="float" office:value="0.00250891203703704" calcext:value-type="float">
            <text:p>0,00250891203703704000</text:p>
          </table:table-cell>
          <table:table-cell table:formula="of:=[.D411]-[.D410]" office:value-type="float" office:value="0.00000613425925925955" calcext:value-type="float">
            <text:p>0,00000613425925925955</text:p>
          </table:table-cell>
          <table:table-cell table:number-columns-repeated="16379"/>
        </table:table-row>
        <table:table-row table:style-name="ro1">
          <table:table-cell office:value-type="float" office:value="410" calcext:value-type="float">
            <text:p>410</text:p>
          </table:table-cell>
          <table:table-cell table:formula="of:=[.B410]+53" office:value-type="float" office:value="21730" calcext:value-type="float">
            <text:p>21730</text:p>
          </table:table-cell>
          <table:table-cell office:value-type="float" office:value="8640000" calcext:value-type="float">
            <text:p>8640000</text:p>
          </table:table-cell>
          <table:table-cell table:formula="of:=[.B411]/[.C411]" office:value-type="float" office:value="0.0025150462962963" calcext:value-type="float">
            <text:p>0,00251504629629630000</text:p>
          </table:table-cell>
          <table:table-cell table:formula="of:=[.D412]-[.D411]" office:value-type="float" office:value="0.00000613425925925911" calcext:value-type="float">
            <text:p>0,00000613425925925911</text:p>
          </table:table-cell>
          <table:table-cell table:number-columns-repeated="16379"/>
        </table:table-row>
        <table:table-row table:style-name="ro1">
          <table:table-cell office:value-type="float" office:value="411" calcext:value-type="float">
            <text:p>411</text:p>
          </table:table-cell>
          <table:table-cell table:formula="of:=[.B411]+53" office:value-type="float" office:value="21783" calcext:value-type="float">
            <text:p>21783</text:p>
          </table:table-cell>
          <table:table-cell office:value-type="float" office:value="8640000" calcext:value-type="float">
            <text:p>8640000</text:p>
          </table:table-cell>
          <table:table-cell table:formula="of:=[.B412]/[.C412]" office:value-type="float" office:value="0.00252118055555556" calcext:value-type="float">
            <text:p>0,00252118055555556000</text:p>
          </table:table-cell>
          <table:table-cell table:formula="of:=[.D413]-[.D412]" office:value-type="float" office:value="0.00000613425925925911" calcext:value-type="float">
            <text:p>0,00000613425925925911</text:p>
          </table:table-cell>
          <table:table-cell table:number-columns-repeated="16379"/>
        </table:table-row>
        <table:table-row table:style-name="ro1">
          <table:table-cell office:value-type="float" office:value="412" calcext:value-type="float">
            <text:p>412</text:p>
          </table:table-cell>
          <table:table-cell table:formula="of:=[.B412]+53" office:value-type="float" office:value="21836" calcext:value-type="float">
            <text:p>21836</text:p>
          </table:table-cell>
          <table:table-cell office:value-type="float" office:value="8640000" calcext:value-type="float">
            <text:p>8640000</text:p>
          </table:table-cell>
          <table:table-cell table:formula="of:=[.B413]/[.C413]" office:value-type="float" office:value="0.00252731481481481" calcext:value-type="float">
            <text:p>0,00252731481481481000</text:p>
          </table:table-cell>
          <table:table-cell table:formula="of:=[.D414]-[.D413]" office:value-type="float" office:value="0.00000613425925925955" calcext:value-type="float">
            <text:p>0,00000613425925925955</text:p>
          </table:table-cell>
          <table:table-cell table:number-columns-repeated="16379"/>
        </table:table-row>
        <table:table-row table:style-name="ro1">
          <table:table-cell office:value-type="float" office:value="413" calcext:value-type="float">
            <text:p>413</text:p>
          </table:table-cell>
          <table:table-cell table:formula="of:=[.B413]+53" office:value-type="float" office:value="21889" calcext:value-type="float">
            <text:p>21889</text:p>
          </table:table-cell>
          <table:table-cell office:value-type="float" office:value="8640000" calcext:value-type="float">
            <text:p>8640000</text:p>
          </table:table-cell>
          <table:table-cell table:formula="of:=[.B414]/[.C414]" office:value-type="float" office:value="0.00253344907407407" calcext:value-type="float">
            <text:p>0,00253344907407407000</text:p>
          </table:table-cell>
          <table:table-cell table:formula="of:=[.D415]-[.D414]" office:value-type="float" office:value="0.00000613425925925911" calcext:value-type="float">
            <text:p>0,00000613425925925911</text:p>
          </table:table-cell>
          <table:table-cell table:number-columns-repeated="16379"/>
        </table:table-row>
        <table:table-row table:style-name="ro1">
          <table:table-cell office:value-type="float" office:value="414" calcext:value-type="float">
            <text:p>414</text:p>
          </table:table-cell>
          <table:table-cell table:formula="of:=[.B414]+53" office:value-type="float" office:value="21942" calcext:value-type="float">
            <text:p>21942</text:p>
          </table:table-cell>
          <table:table-cell office:value-type="float" office:value="8640000" calcext:value-type="float">
            <text:p>8640000</text:p>
          </table:table-cell>
          <table:table-cell table:formula="of:=[.B415]/[.C415]" office:value-type="float" office:value="0.00253958333333333" calcext:value-type="float">
            <text:p>0,00253958333333333000</text:p>
          </table:table-cell>
          <table:table-cell table:formula="of:=[.D416]-[.D415]" office:value-type="float" office:value="0.00000613425925925911" calcext:value-type="float">
            <text:p>0,00000613425925925911</text:p>
          </table:table-cell>
          <table:table-cell table:number-columns-repeated="16379"/>
        </table:table-row>
        <table:table-row table:style-name="ro1">
          <table:table-cell office:value-type="float" office:value="415" calcext:value-type="float">
            <text:p>415</text:p>
          </table:table-cell>
          <table:table-cell table:formula="of:=[.B415]+53" office:value-type="float" office:value="21995" calcext:value-type="float">
            <text:p>21995</text:p>
          </table:table-cell>
          <table:table-cell office:value-type="float" office:value="8640000" calcext:value-type="float">
            <text:p>8640000</text:p>
          </table:table-cell>
          <table:table-cell table:formula="of:=[.B416]/[.C416]" office:value-type="float" office:value="0.00254571759259259" calcext:value-type="float">
            <text:p>0,00254571759259259000</text:p>
          </table:table-cell>
          <table:table-cell table:formula="of:=[.D417]-[.D416]" office:value-type="float" office:value="0.00000613425925925955" calcext:value-type="float">
            <text:p>0,00000613425925925955</text:p>
          </table:table-cell>
          <table:table-cell table:number-columns-repeated="16379"/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[.B416]+53" office:value-type="float" office:value="22048" calcext:value-type="float">
            <text:p>22048</text:p>
          </table:table-cell>
          <table:table-cell office:value-type="float" office:value="8640000" calcext:value-type="float">
            <text:p>8640000</text:p>
          </table:table-cell>
          <table:table-cell table:formula="of:=[.B417]/[.C417]" office:value-type="float" office:value="0.00255185185185185" calcext:value-type="float">
            <text:p>0,00255185185185185000</text:p>
          </table:table-cell>
          <table:table-cell table:formula="of:=[.D418]-[.D417]" office:value-type="float" office:value="0.00000613425925925911" calcext:value-type="float">
            <text:p>0,00000613425925925911</text:p>
          </table:table-cell>
          <table:table-cell table:number-columns-repeated="16379"/>
        </table:table-row>
        <table:table-row table:style-name="ro1">
          <table:table-cell office:value-type="float" office:value="417" calcext:value-type="float">
            <text:p>417</text:p>
          </table:table-cell>
          <table:table-cell table:formula="of:=[.B417]+53" office:value-type="float" office:value="22101" calcext:value-type="float">
            <text:p>22101</text:p>
          </table:table-cell>
          <table:table-cell office:value-type="float" office:value="8640000" calcext:value-type="float">
            <text:p>8640000</text:p>
          </table:table-cell>
          <table:table-cell table:formula="of:=[.B418]/[.C418]" office:value-type="float" office:value="0.00255798611111111" calcext:value-type="float">
            <text:p>0,00255798611111111000</text:p>
          </table:table-cell>
          <table:table-cell table:formula="of:=[.D419]-[.D418]" office:value-type="float" office:value="0.00000613425925925911" calcext:value-type="float">
            <text:p>0,00000613425925925911</text:p>
          </table:table-cell>
          <table:table-cell table:number-columns-repeated="16379"/>
        </table:table-row>
        <table:table-row table:style-name="ro1">
          <table:table-cell office:value-type="float" office:value="418" calcext:value-type="float">
            <text:p>418</text:p>
          </table:table-cell>
          <table:table-cell table:formula="of:=[.B418]+53" office:value-type="float" office:value="22154" calcext:value-type="float">
            <text:p>22154</text:p>
          </table:table-cell>
          <table:table-cell office:value-type="float" office:value="8640000" calcext:value-type="float">
            <text:p>8640000</text:p>
          </table:table-cell>
          <table:table-cell table:formula="of:=[.B419]/[.C419]" office:value-type="float" office:value="0.00256412037037037" calcext:value-type="float">
            <text:p>0,00256412037037037000</text:p>
          </table:table-cell>
          <table:table-cell table:formula="of:=[.D420]-[.D419]" office:value-type="float" office:value="0.00000613425925925955" calcext:value-type="float">
            <text:p>0,00000613425925925955</text:p>
          </table:table-cell>
          <table:table-cell table:number-columns-repeated="16379"/>
        </table:table-row>
        <table:table-row table:style-name="ro1">
          <table:table-cell office:value-type="float" office:value="419" calcext:value-type="float">
            <text:p>419</text:p>
          </table:table-cell>
          <table:table-cell table:formula="of:=[.B419]+53" office:value-type="float" office:value="22207" calcext:value-type="float">
            <text:p>22207</text:p>
          </table:table-cell>
          <table:table-cell office:value-type="float" office:value="8640000" calcext:value-type="float">
            <text:p>8640000</text:p>
          </table:table-cell>
          <table:table-cell table:formula="of:=[.B420]/[.C420]" office:value-type="float" office:value="0.00257025462962963" calcext:value-type="float">
            <text:p>0,00257025462962963000</text:p>
          </table:table-cell>
          <table:table-cell table:formula="of:=[.D421]-[.D420]" office:value-type="float" office:value="0.00000613425925925911" calcext:value-type="float">
            <text:p>0,00000613425925925911</text:p>
          </table:table-cell>
          <table:table-cell table:number-columns-repeated="16379"/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[.B420]+53" office:value-type="float" office:value="22260" calcext:value-type="float">
            <text:p>22260</text:p>
          </table:table-cell>
          <table:table-cell office:value-type="float" office:value="8640000" calcext:value-type="float">
            <text:p>8640000</text:p>
          </table:table-cell>
          <table:table-cell table:formula="of:=[.B421]/[.C421]" office:value-type="float" office:value="0.00257638888888889" calcext:value-type="float">
            <text:p>0,00257638888888889000</text:p>
          </table:table-cell>
          <table:table-cell table:formula="of:=[.D422]-[.D421]" office:value-type="float" office:value="0.00000613425925925911" calcext:value-type="float">
            <text:p>0,00000613425925925911</text:p>
          </table:table-cell>
          <table:table-cell table:number-columns-repeated="16379"/>
        </table:table-row>
        <table:table-row table:style-name="ro1">
          <table:table-cell office:value-type="float" office:value="421" calcext:value-type="float">
            <text:p>421</text:p>
          </table:table-cell>
          <table:table-cell table:formula="of:=[.B421]+53" office:value-type="float" office:value="22313" calcext:value-type="float">
            <text:p>22313</text:p>
          </table:table-cell>
          <table:table-cell office:value-type="float" office:value="8640000" calcext:value-type="float">
            <text:p>8640000</text:p>
          </table:table-cell>
          <table:table-cell table:formula="of:=[.B422]/[.C422]" office:value-type="float" office:value="0.00258252314814815" calcext:value-type="float">
            <text:p>0,00258252314814815000</text:p>
          </table:table-cell>
          <table:table-cell table:formula="of:=[.D423]-[.D422]" office:value-type="float" office:value="0.00000613425925925955" calcext:value-type="float">
            <text:p>0,00000613425925925955</text:p>
          </table:table-cell>
          <table:table-cell table:number-columns-repeated="16379"/>
        </table:table-row>
        <table:table-row table:style-name="ro1">
          <table:table-cell office:value-type="float" office:value="422" calcext:value-type="float">
            <text:p>422</text:p>
          </table:table-cell>
          <table:table-cell table:formula="of:=[.B422]+53" office:value-type="float" office:value="22366" calcext:value-type="float">
            <text:p>22366</text:p>
          </table:table-cell>
          <table:table-cell office:value-type="float" office:value="8640000" calcext:value-type="float">
            <text:p>8640000</text:p>
          </table:table-cell>
          <table:table-cell table:formula="of:=[.B423]/[.C423]" office:value-type="float" office:value="0.00258865740740741" calcext:value-type="float">
            <text:p>0,00258865740740741000</text:p>
          </table:table-cell>
          <table:table-cell table:formula="of:=[.D424]-[.D423]" office:value-type="float" office:value="0.00000613425925925911" calcext:value-type="float">
            <text:p>0,00000613425925925911</text:p>
          </table:table-cell>
          <table:table-cell table:number-columns-repeated="16379"/>
        </table:table-row>
        <table:table-row table:style-name="ro1">
          <table:table-cell office:value-type="float" office:value="423" calcext:value-type="float">
            <text:p>423</text:p>
          </table:table-cell>
          <table:table-cell table:formula="of:=[.B423]+53" office:value-type="float" office:value="22419" calcext:value-type="float">
            <text:p>22419</text:p>
          </table:table-cell>
          <table:table-cell office:value-type="float" office:value="8640000" calcext:value-type="float">
            <text:p>8640000</text:p>
          </table:table-cell>
          <table:table-cell table:formula="of:=[.B424]/[.C424]" office:value-type="float" office:value="0.00259479166666667" calcext:value-type="float">
            <text:p>0,00259479166666667000</text:p>
          </table:table-cell>
          <table:table-cell table:formula="of:=[.D425]-[.D424]" office:value-type="float" office:value="0.00000613425925925911" calcext:value-type="float">
            <text:p>0,00000613425925925911</text:p>
          </table:table-cell>
          <table:table-cell table:number-columns-repeated="16379"/>
        </table:table-row>
        <table:table-row table:style-name="ro1">
          <table:table-cell office:value-type="float" office:value="424" calcext:value-type="float">
            <text:p>424</text:p>
          </table:table-cell>
          <table:table-cell table:formula="of:=[.B424]+53" office:value-type="float" office:value="22472" calcext:value-type="float">
            <text:p>22472</text:p>
          </table:table-cell>
          <table:table-cell office:value-type="float" office:value="8640000" calcext:value-type="float">
            <text:p>8640000</text:p>
          </table:table-cell>
          <table:table-cell table:formula="of:=[.B425]/[.C425]" office:value-type="float" office:value="0.00260092592592593" calcext:value-type="float">
            <text:p>0,00260092592592593000</text:p>
          </table:table-cell>
          <table:table-cell table:formula="of:=[.D426]-[.D425]" office:value-type="float" office:value="0.00000613425925925955" calcext:value-type="float">
            <text:p>0,00000613425925925955</text:p>
          </table:table-cell>
          <table:table-cell table:number-columns-repeated="16379"/>
        </table:table-row>
        <table:table-row table:style-name="ro1">
          <table:table-cell office:value-type="float" office:value="425" calcext:value-type="float">
            <text:p>425</text:p>
          </table:table-cell>
          <table:table-cell table:formula="of:=[.B425]+53" office:value-type="float" office:value="22525" calcext:value-type="float">
            <text:p>22525</text:p>
          </table:table-cell>
          <table:table-cell office:value-type="float" office:value="8640000" calcext:value-type="float">
            <text:p>8640000</text:p>
          </table:table-cell>
          <table:table-cell table:formula="of:=[.B426]/[.C426]" office:value-type="float" office:value="0.00260706018518519" calcext:value-type="float">
            <text:p>0,00260706018518519000</text:p>
          </table:table-cell>
          <table:table-cell table:formula="of:=[.D427]-[.D426]" office:value-type="float" office:value="0.00000613425925925911" calcext:value-type="float">
            <text:p>0,00000613425925925911</text:p>
          </table:table-cell>
          <table:table-cell table:number-columns-repeated="16379"/>
        </table:table-row>
        <table:table-row table:style-name="ro1">
          <table:table-cell office:value-type="float" office:value="426" calcext:value-type="float">
            <text:p>426</text:p>
          </table:table-cell>
          <table:table-cell table:formula="of:=[.B426]+53" office:value-type="float" office:value="22578" calcext:value-type="float">
            <text:p>22578</text:p>
          </table:table-cell>
          <table:table-cell office:value-type="float" office:value="8640000" calcext:value-type="float">
            <text:p>8640000</text:p>
          </table:table-cell>
          <table:table-cell table:formula="of:=[.B427]/[.C427]" office:value-type="float" office:value="0.00261319444444444" calcext:value-type="float">
            <text:p>0,00261319444444444000</text:p>
          </table:table-cell>
          <table:table-cell table:formula="of:=[.D428]-[.D427]" office:value-type="float" office:value="0.00000613425925925911" calcext:value-type="float">
            <text:p>0,00000613425925925911</text:p>
          </table:table-cell>
          <table:table-cell table:number-columns-repeated="16379"/>
        </table:table-row>
        <table:table-row table:style-name="ro1">
          <table:table-cell office:value-type="float" office:value="427" calcext:value-type="float">
            <text:p>427</text:p>
          </table:table-cell>
          <table:table-cell table:formula="of:=[.B427]+53" office:value-type="float" office:value="22631" calcext:value-type="float">
            <text:p>22631</text:p>
          </table:table-cell>
          <table:table-cell office:value-type="float" office:value="8640000" calcext:value-type="float">
            <text:p>8640000</text:p>
          </table:table-cell>
          <table:table-cell table:formula="of:=[.B428]/[.C428]" office:value-type="float" office:value="0.0026193287037037" calcext:value-type="float">
            <text:p>0,00261932870370370000</text:p>
          </table:table-cell>
          <table:table-cell table:formula="of:=[.D429]-[.D428]" office:value-type="float" office:value="0.00000613425925925955" calcext:value-type="float">
            <text:p>0,00000613425925925955</text:p>
          </table:table-cell>
          <table:table-cell table:number-columns-repeated="16379"/>
        </table:table-row>
        <table:table-row table:style-name="ro1">
          <table:table-cell office:value-type="float" office:value="428" calcext:value-type="float">
            <text:p>428</text:p>
          </table:table-cell>
          <table:table-cell table:formula="of:=[.B428]+53" office:value-type="float" office:value="22684" calcext:value-type="float">
            <text:p>22684</text:p>
          </table:table-cell>
          <table:table-cell office:value-type="float" office:value="8640000" calcext:value-type="float">
            <text:p>8640000</text:p>
          </table:table-cell>
          <table:table-cell table:formula="of:=[.B429]/[.C429]" office:value-type="float" office:value="0.00262546296296296" calcext:value-type="float">
            <text:p>0,00262546296296296000</text:p>
          </table:table-cell>
          <table:table-cell table:formula="of:=[.D430]-[.D429]" office:value-type="float" office:value="0.00000613425925925911" calcext:value-type="float">
            <text:p>0,00000613425925925911</text:p>
          </table:table-cell>
          <table:table-cell table:number-columns-repeated="16379"/>
        </table:table-row>
        <table:table-row table:style-name="ro1">
          <table:table-cell office:value-type="float" office:value="429" calcext:value-type="float">
            <text:p>429</text:p>
          </table:table-cell>
          <table:table-cell table:formula="of:=[.B429]+53" office:value-type="float" office:value="22737" calcext:value-type="float">
            <text:p>22737</text:p>
          </table:table-cell>
          <table:table-cell office:value-type="float" office:value="8640000" calcext:value-type="float">
            <text:p>8640000</text:p>
          </table:table-cell>
          <table:table-cell table:formula="of:=[.B430]/[.C430]" office:value-type="float" office:value="0.00263159722222222" calcext:value-type="float">
            <text:p>0,00263159722222222000</text:p>
          </table:table-cell>
          <table:table-cell table:formula="of:=[.D431]-[.D430]" office:value-type="float" office:value="0.00000613425925925911" calcext:value-type="float">
            <text:p>0,00000613425925925911</text:p>
          </table:table-cell>
          <table:table-cell table:number-columns-repeated="16379"/>
        </table:table-row>
        <table:table-row table:style-name="ro1">
          <table:table-cell office:value-type="float" office:value="430" calcext:value-type="float">
            <text:p>430</text:p>
          </table:table-cell>
          <table:table-cell table:formula="of:=[.B430]+53" office:value-type="float" office:value="22790" calcext:value-type="float">
            <text:p>22790</text:p>
          </table:table-cell>
          <table:table-cell office:value-type="float" office:value="8640000" calcext:value-type="float">
            <text:p>8640000</text:p>
          </table:table-cell>
          <table:table-cell table:formula="of:=[.B431]/[.C431]" office:value-type="float" office:value="0.00263773148148148" calcext:value-type="float">
            <text:p>0,00263773148148148000</text:p>
          </table:table-cell>
          <table:table-cell table:formula="of:=[.D432]-[.D431]" office:value-type="float" office:value="0.00000613425925925955" calcext:value-type="float">
            <text:p>0,00000613425925925955</text:p>
          </table:table-cell>
          <table:table-cell table:number-columns-repeated="16379"/>
        </table:table-row>
        <table:table-row table:style-name="ro1">
          <table:table-cell office:value-type="float" office:value="431" calcext:value-type="float">
            <text:p>431</text:p>
          </table:table-cell>
          <table:table-cell table:formula="of:=[.B431]+53" office:value-type="float" office:value="22843" calcext:value-type="float">
            <text:p>22843</text:p>
          </table:table-cell>
          <table:table-cell office:value-type="float" office:value="8640000" calcext:value-type="float">
            <text:p>8640000</text:p>
          </table:table-cell>
          <table:table-cell table:formula="of:=[.B432]/[.C432]" office:value-type="float" office:value="0.00264386574074074" calcext:value-type="float">
            <text:p>0,00264386574074074000</text:p>
          </table:table-cell>
          <table:table-cell table:formula="of:=[.D433]-[.D432]" office:value-type="float" office:value="0.00000613425925925911" calcext:value-type="float">
            <text:p>0,00000613425925925911</text:p>
          </table:table-cell>
          <table:table-cell table:number-columns-repeated="16379"/>
        </table:table-row>
        <table:table-row table:style-name="ro1">
          <table:table-cell office:value-type="float" office:value="432" calcext:value-type="float">
            <text:p>432</text:p>
          </table:table-cell>
          <table:table-cell table:formula="of:=[.B432]+53" office:value-type="float" office:value="22896" calcext:value-type="float">
            <text:p>22896</text:p>
          </table:table-cell>
          <table:table-cell office:value-type="float" office:value="8640000" calcext:value-type="float">
            <text:p>8640000</text:p>
          </table:table-cell>
          <table:table-cell table:formula="of:=[.B433]/[.C433]" office:value-type="float" office:value="0.00265" calcext:value-type="float">
            <text:p>0,00265000000000000000</text:p>
          </table:table-cell>
          <table:table-cell table:formula="of:=[.D434]-[.D433]" office:value-type="float" office:value="0.00000613425925925911" calcext:value-type="float">
            <text:p>0,00000613425925925911</text:p>
          </table:table-cell>
          <table:table-cell table:number-columns-repeated="16379"/>
        </table:table-row>
        <table:table-row table:style-name="ro1">
          <table:table-cell office:value-type="float" office:value="433" calcext:value-type="float">
            <text:p>433</text:p>
          </table:table-cell>
          <table:table-cell table:formula="of:=[.B433]+53" office:value-type="float" office:value="22949" calcext:value-type="float">
            <text:p>22949</text:p>
          </table:table-cell>
          <table:table-cell office:value-type="float" office:value="8640000" calcext:value-type="float">
            <text:p>8640000</text:p>
          </table:table-cell>
          <table:table-cell table:formula="of:=[.B434]/[.C434]" office:value-type="float" office:value="0.00265613425925926" calcext:value-type="float">
            <text:p>0,00265613425925926000</text:p>
          </table:table-cell>
          <table:table-cell table:formula="of:=[.D435]-[.D434]" office:value-type="float" office:value="0.00000613425925925955" calcext:value-type="float">
            <text:p>0,00000613425925925955</text:p>
          </table:table-cell>
          <table:table-cell table:number-columns-repeated="16379"/>
        </table:table-row>
        <table:table-row table:style-name="ro1">
          <table:table-cell office:value-type="float" office:value="434" calcext:value-type="float">
            <text:p>434</text:p>
          </table:table-cell>
          <table:table-cell table:formula="of:=[.B434]+53" office:value-type="float" office:value="23002" calcext:value-type="float">
            <text:p>23002</text:p>
          </table:table-cell>
          <table:table-cell office:value-type="float" office:value="8640000" calcext:value-type="float">
            <text:p>8640000</text:p>
          </table:table-cell>
          <table:table-cell table:formula="of:=[.B435]/[.C435]" office:value-type="float" office:value="0.00266226851851852" calcext:value-type="float">
            <text:p>0,00266226851851852000</text:p>
          </table:table-cell>
          <table:table-cell table:formula="of:=[.D436]-[.D435]" office:value-type="float" office:value="0.00000613425925925911" calcext:value-type="float">
            <text:p>0,00000613425925925911</text:p>
          </table:table-cell>
          <table:table-cell table:number-columns-repeated="16379"/>
        </table:table-row>
        <table:table-row table:style-name="ro1">
          <table:table-cell office:value-type="float" office:value="435" calcext:value-type="float">
            <text:p>435</text:p>
          </table:table-cell>
          <table:table-cell table:formula="of:=[.B435]+53" office:value-type="float" office:value="23055" calcext:value-type="float">
            <text:p>23055</text:p>
          </table:table-cell>
          <table:table-cell office:value-type="float" office:value="8640000" calcext:value-type="float">
            <text:p>8640000</text:p>
          </table:table-cell>
          <table:table-cell table:formula="of:=[.B436]/[.C436]" office:value-type="float" office:value="0.00266840277777778" calcext:value-type="float">
            <text:p>0,00266840277777778000</text:p>
          </table:table-cell>
          <table:table-cell table:formula="of:=[.D437]-[.D436]" office:value-type="float" office:value="0.00000613425925925911" calcext:value-type="float">
            <text:p>0,00000613425925925911</text:p>
          </table:table-cell>
          <table:table-cell table:number-columns-repeated="16379"/>
        </table:table-row>
        <table:table-row table:style-name="ro1">
          <table:table-cell office:value-type="float" office:value="436" calcext:value-type="float">
            <text:p>436</text:p>
          </table:table-cell>
          <table:table-cell table:formula="of:=[.B436]+53" office:value-type="float" office:value="23108" calcext:value-type="float">
            <text:p>23108</text:p>
          </table:table-cell>
          <table:table-cell office:value-type="float" office:value="8640000" calcext:value-type="float">
            <text:p>8640000</text:p>
          </table:table-cell>
          <table:table-cell table:formula="of:=[.B437]/[.C437]" office:value-type="float" office:value="0.00267453703703704" calcext:value-type="float">
            <text:p>0,00267453703703704000</text:p>
          </table:table-cell>
          <table:table-cell table:formula="of:=[.D438]-[.D437]" office:value-type="float" office:value="0.00000613425925925955" calcext:value-type="float">
            <text:p>0,00000613425925925955</text:p>
          </table:table-cell>
          <table:table-cell table:number-columns-repeated="16379"/>
        </table:table-row>
        <table:table-row table:style-name="ro1">
          <table:table-cell office:value-type="float" office:value="437" calcext:value-type="float">
            <text:p>437</text:p>
          </table:table-cell>
          <table:table-cell table:formula="of:=[.B437]+53" office:value-type="float" office:value="23161" calcext:value-type="float">
            <text:p>23161</text:p>
          </table:table-cell>
          <table:table-cell office:value-type="float" office:value="8640000" calcext:value-type="float">
            <text:p>8640000</text:p>
          </table:table-cell>
          <table:table-cell table:formula="of:=[.B438]/[.C438]" office:value-type="float" office:value="0.0026806712962963" calcext:value-type="float">
            <text:p>0,00268067129629630000</text:p>
          </table:table-cell>
          <table:table-cell table:formula="of:=[.D439]-[.D438]" office:value-type="float" office:value="0.00000613425925925911" calcext:value-type="float">
            <text:p>0,00000613425925925911</text:p>
          </table:table-cell>
          <table:table-cell table:number-columns-repeated="16379"/>
        </table:table-row>
        <table:table-row table:style-name="ro1">
          <table:table-cell office:value-type="float" office:value="438" calcext:value-type="float">
            <text:p>438</text:p>
          </table:table-cell>
          <table:table-cell table:formula="of:=[.B438]+53" office:value-type="float" office:value="23214" calcext:value-type="float">
            <text:p>23214</text:p>
          </table:table-cell>
          <table:table-cell office:value-type="float" office:value="8640000" calcext:value-type="float">
            <text:p>8640000</text:p>
          </table:table-cell>
          <table:table-cell table:formula="of:=[.B439]/[.C439]" office:value-type="float" office:value="0.00268680555555556" calcext:value-type="float">
            <text:p>0,00268680555555556000</text:p>
          </table:table-cell>
          <table:table-cell table:formula="of:=[.D440]-[.D439]" office:value-type="float" office:value="0.00000613425925925911" calcext:value-type="float">
            <text:p>0,00000613425925925911</text:p>
          </table:table-cell>
          <table:table-cell table:number-columns-repeated="16379"/>
        </table:table-row>
        <table:table-row table:style-name="ro1">
          <table:table-cell office:value-type="float" office:value="439" calcext:value-type="float">
            <text:p>439</text:p>
          </table:table-cell>
          <table:table-cell table:formula="of:=[.B439]+53" office:value-type="float" office:value="23267" calcext:value-type="float">
            <text:p>23267</text:p>
          </table:table-cell>
          <table:table-cell office:value-type="float" office:value="8640000" calcext:value-type="float">
            <text:p>8640000</text:p>
          </table:table-cell>
          <table:table-cell table:formula="of:=[.B440]/[.C440]" office:value-type="float" office:value="0.00269293981481481" calcext:value-type="float">
            <text:p>0,00269293981481481000</text:p>
          </table:table-cell>
          <table:table-cell table:formula="of:=[.D441]-[.D440]" office:value-type="float" office:value="0.00000613425925925955" calcext:value-type="float">
            <text:p>0,00000613425925925955</text:p>
          </table:table-cell>
          <table:table-cell table:number-columns-repeated="16379"/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[.B440]+53" office:value-type="float" office:value="23320" calcext:value-type="float">
            <text:p>23320</text:p>
          </table:table-cell>
          <table:table-cell office:value-type="float" office:value="8640000" calcext:value-type="float">
            <text:p>8640000</text:p>
          </table:table-cell>
          <table:table-cell table:formula="of:=[.B441]/[.C441]" office:value-type="float" office:value="0.00269907407407407" calcext:value-type="float">
            <text:p>0,00269907407407407000</text:p>
          </table:table-cell>
          <table:table-cell table:formula="of:=[.D442]-[.D441]" office:value-type="float" office:value="0.00000613425925925911" calcext:value-type="float">
            <text:p>0,00000613425925925911</text:p>
          </table:table-cell>
          <table:table-cell table:number-columns-repeated="16379"/>
        </table:table-row>
        <table:table-row table:style-name="ro1">
          <table:table-cell office:value-type="float" office:value="441" calcext:value-type="float">
            <text:p>441</text:p>
          </table:table-cell>
          <table:table-cell table:formula="of:=[.B441]+53" office:value-type="float" office:value="23373" calcext:value-type="float">
            <text:p>23373</text:p>
          </table:table-cell>
          <table:table-cell office:value-type="float" office:value="8640000" calcext:value-type="float">
            <text:p>8640000</text:p>
          </table:table-cell>
          <table:table-cell table:formula="of:=[.B442]/[.C442]" office:value-type="float" office:value="0.00270520833333333" calcext:value-type="float">
            <text:p>0,00270520833333333000</text:p>
          </table:table-cell>
          <table:table-cell table:formula="of:=[.D443]-[.D442]" office:value-type="float" office:value="0.00000613425925925911" calcext:value-type="float">
            <text:p>0,00000613425925925911</text:p>
          </table:table-cell>
          <table:table-cell table:number-columns-repeated="16379"/>
        </table:table-row>
        <table:table-row table:style-name="ro1">
          <table:table-cell office:value-type="float" office:value="442" calcext:value-type="float">
            <text:p>442</text:p>
          </table:table-cell>
          <table:table-cell table:formula="of:=[.B442]+53" office:value-type="float" office:value="23426" calcext:value-type="float">
            <text:p>23426</text:p>
          </table:table-cell>
          <table:table-cell office:value-type="float" office:value="8640000" calcext:value-type="float">
            <text:p>8640000</text:p>
          </table:table-cell>
          <table:table-cell table:formula="of:=[.B443]/[.C443]" office:value-type="float" office:value="0.00271134259259259" calcext:value-type="float">
            <text:p>0,00271134259259259000</text:p>
          </table:table-cell>
          <table:table-cell table:formula="of:=[.D444]-[.D443]" office:value-type="float" office:value="0.00000613425925925955" calcext:value-type="float">
            <text:p>0,00000613425925925955</text:p>
          </table:table-cell>
          <table:table-cell table:number-columns-repeated="16379"/>
        </table:table-row>
        <table:table-row table:style-name="ro1">
          <table:table-cell office:value-type="float" office:value="443" calcext:value-type="float">
            <text:p>443</text:p>
          </table:table-cell>
          <table:table-cell table:formula="of:=[.B443]+53" office:value-type="float" office:value="23479" calcext:value-type="float">
            <text:p>23479</text:p>
          </table:table-cell>
          <table:table-cell office:value-type="float" office:value="8640000" calcext:value-type="float">
            <text:p>8640000</text:p>
          </table:table-cell>
          <table:table-cell table:formula="of:=[.B444]/[.C444]" office:value-type="float" office:value="0.00271747685185185" calcext:value-type="float">
            <text:p>0,00271747685185185000</text:p>
          </table:table-cell>
          <table:table-cell table:formula="of:=[.D445]-[.D444]" office:value-type="float" office:value="0.00000613425925925911" calcext:value-type="float">
            <text:p>0,00000613425925925911</text:p>
          </table:table-cell>
          <table:table-cell table:number-columns-repeated="16379"/>
        </table:table-row>
        <table:table-row table:style-name="ro1">
          <table:table-cell office:value-type="float" office:value="444" calcext:value-type="float">
            <text:p>444</text:p>
          </table:table-cell>
          <table:table-cell table:formula="of:=[.B444]+53" office:value-type="float" office:value="23532" calcext:value-type="float">
            <text:p>23532</text:p>
          </table:table-cell>
          <table:table-cell office:value-type="float" office:value="8640000" calcext:value-type="float">
            <text:p>8640000</text:p>
          </table:table-cell>
          <table:table-cell table:formula="of:=[.B445]/[.C445]" office:value-type="float" office:value="0.00272361111111111" calcext:value-type="float">
            <text:p>0,00272361111111111000</text:p>
          </table:table-cell>
          <table:table-cell table:formula="of:=[.D446]-[.D445]" office:value-type="float" office:value="0.00000613425925925911" calcext:value-type="float">
            <text:p>0,00000613425925925911</text:p>
          </table:table-cell>
          <table:table-cell table:number-columns-repeated="16379"/>
        </table:table-row>
        <table:table-row table:style-name="ro1">
          <table:table-cell office:value-type="float" office:value="445" calcext:value-type="float">
            <text:p>445</text:p>
          </table:table-cell>
          <table:table-cell table:formula="of:=[.B445]+53" office:value-type="float" office:value="23585" calcext:value-type="float">
            <text:p>23585</text:p>
          </table:table-cell>
          <table:table-cell office:value-type="float" office:value="8640000" calcext:value-type="float">
            <text:p>8640000</text:p>
          </table:table-cell>
          <table:table-cell table:formula="of:=[.B446]/[.C446]" office:value-type="float" office:value="0.00272974537037037" calcext:value-type="float">
            <text:p>0,00272974537037037000</text:p>
          </table:table-cell>
          <table:table-cell table:formula="of:=[.D447]-[.D446]" office:value-type="float" office:value="0.00000613425925925955" calcext:value-type="float">
            <text:p>0,00000613425925925955</text:p>
          </table:table-cell>
          <table:table-cell table:number-columns-repeated="16379"/>
        </table:table-row>
        <table:table-row table:style-name="ro1">
          <table:table-cell office:value-type="float" office:value="446" calcext:value-type="float">
            <text:p>446</text:p>
          </table:table-cell>
          <table:table-cell table:formula="of:=[.B446]+53" office:value-type="float" office:value="23638" calcext:value-type="float">
            <text:p>23638</text:p>
          </table:table-cell>
          <table:table-cell office:value-type="float" office:value="8640000" calcext:value-type="float">
            <text:p>8640000</text:p>
          </table:table-cell>
          <table:table-cell table:formula="of:=[.B447]/[.C447]" office:value-type="float" office:value="0.00273587962962963" calcext:value-type="float">
            <text:p>0,00273587962962963000</text:p>
          </table:table-cell>
          <table:table-cell table:formula="of:=[.D448]-[.D447]" office:value-type="float" office:value="0.00000613425925925911" calcext:value-type="float">
            <text:p>0,00000613425925925911</text:p>
          </table:table-cell>
          <table:table-cell table:number-columns-repeated="16379"/>
        </table:table-row>
        <table:table-row table:style-name="ro1">
          <table:table-cell office:value-type="float" office:value="447" calcext:value-type="float">
            <text:p>447</text:p>
          </table:table-cell>
          <table:table-cell table:formula="of:=[.B447]+53" office:value-type="float" office:value="23691" calcext:value-type="float">
            <text:p>23691</text:p>
          </table:table-cell>
          <table:table-cell office:value-type="float" office:value="8640000" calcext:value-type="float">
            <text:p>8640000</text:p>
          </table:table-cell>
          <table:table-cell table:formula="of:=[.B448]/[.C448]" office:value-type="float" office:value="0.00274201388888889" calcext:value-type="float">
            <text:p>0,00274201388888889000</text:p>
          </table:table-cell>
          <table:table-cell table:formula="of:=[.D449]-[.D448]" office:value-type="float" office:value="0.00000613425925925911" calcext:value-type="float">
            <text:p>0,00000613425925925911</text:p>
          </table:table-cell>
          <table:table-cell table:number-columns-repeated="16379"/>
        </table:table-row>
        <table:table-row table:style-name="ro1">
          <table:table-cell office:value-type="float" office:value="448" calcext:value-type="float">
            <text:p>448</text:p>
          </table:table-cell>
          <table:table-cell table:formula="of:=[.B448]+53" office:value-type="float" office:value="23744" calcext:value-type="float">
            <text:p>23744</text:p>
          </table:table-cell>
          <table:table-cell office:value-type="float" office:value="8640000" calcext:value-type="float">
            <text:p>8640000</text:p>
          </table:table-cell>
          <table:table-cell table:formula="of:=[.B449]/[.C449]" office:value-type="float" office:value="0.00274814814814815" calcext:value-type="float">
            <text:p>0,00274814814814815000</text:p>
          </table:table-cell>
          <table:table-cell table:formula="of:=[.D450]-[.D449]" office:value-type="float" office:value="0.00000613425925925955" calcext:value-type="float">
            <text:p>0,00000613425925925955</text:p>
          </table:table-cell>
          <table:table-cell table:number-columns-repeated="16379"/>
        </table:table-row>
        <table:table-row table:style-name="ro1">
          <table:table-cell office:value-type="float" office:value="449" calcext:value-type="float">
            <text:p>449</text:p>
          </table:table-cell>
          <table:table-cell table:formula="of:=[.B449]+53" office:value-type="float" office:value="23797" calcext:value-type="float">
            <text:p>23797</text:p>
          </table:table-cell>
          <table:table-cell office:value-type="float" office:value="8640000" calcext:value-type="float">
            <text:p>8640000</text:p>
          </table:table-cell>
          <table:table-cell table:formula="of:=[.B450]/[.C450]" office:value-type="float" office:value="0.00275428240740741" calcext:value-type="float">
            <text:p>0,00275428240740741000</text:p>
          </table:table-cell>
          <table:table-cell table:formula="of:=[.D451]-[.D450]" office:value-type="float" office:value="0.00000613425925925911" calcext:value-type="float">
            <text:p>0,00000613425925925911</text:p>
          </table:table-cell>
          <table:table-cell table:number-columns-repeated="16379"/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[.B450]+53" office:value-type="float" office:value="23850" calcext:value-type="float">
            <text:p>23850</text:p>
          </table:table-cell>
          <table:table-cell office:value-type="float" office:value="8640000" calcext:value-type="float">
            <text:p>8640000</text:p>
          </table:table-cell>
          <table:table-cell table:formula="of:=[.B451]/[.C451]" office:value-type="float" office:value="0.00276041666666667" calcext:value-type="float">
            <text:p>0,00276041666666667000</text:p>
          </table:table-cell>
          <table:table-cell table:formula="of:=[.D452]-[.D451]" office:value-type="float" office:value="0.00000613425925925911" calcext:value-type="float">
            <text:p>0,00000613425925925911</text:p>
          </table:table-cell>
          <table:table-cell table:number-columns-repeated="16379"/>
        </table:table-row>
        <table:table-row table:style-name="ro1">
          <table:table-cell office:value-type="float" office:value="451" calcext:value-type="float">
            <text:p>451</text:p>
          </table:table-cell>
          <table:table-cell table:formula="of:=[.B451]+53" office:value-type="float" office:value="23903" calcext:value-type="float">
            <text:p>23903</text:p>
          </table:table-cell>
          <table:table-cell office:value-type="float" office:value="8640000" calcext:value-type="float">
            <text:p>8640000</text:p>
          </table:table-cell>
          <table:table-cell table:formula="of:=[.B452]/[.C452]" office:value-type="float" office:value="0.00276655092592593" calcext:value-type="float">
            <text:p>0,00276655092592593000</text:p>
          </table:table-cell>
          <table:table-cell table:formula="of:=[.D453]-[.D452]" office:value-type="float" office:value="0.00000613425925925955" calcext:value-type="float">
            <text:p>0,00000613425925925955</text:p>
          </table:table-cell>
          <table:table-cell table:number-columns-repeated="16379"/>
        </table:table-row>
        <table:table-row table:style-name="ro1">
          <table:table-cell office:value-type="float" office:value="452" calcext:value-type="float">
            <text:p>452</text:p>
          </table:table-cell>
          <table:table-cell table:formula="of:=[.B452]+53" office:value-type="float" office:value="23956" calcext:value-type="float">
            <text:p>23956</text:p>
          </table:table-cell>
          <table:table-cell office:value-type="float" office:value="8640000" calcext:value-type="float">
            <text:p>8640000</text:p>
          </table:table-cell>
          <table:table-cell table:formula="of:=[.B453]/[.C453]" office:value-type="float" office:value="0.00277268518518519" calcext:value-type="float">
            <text:p>0,00277268518518519000</text:p>
          </table:table-cell>
          <table:table-cell table:formula="of:=#REF!-[.D453]" office:value-type="string" office:string-value="" calcext:value-type="error">
            <text:p>#REF!</text:p>
          </table:table-cell>
          <table:table-cell table:number-columns-repeated="16379"/>
        </table:table-row>
        <table:table-row table:style-name="ro1" table:number-rows-repeated="1048122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15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16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17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18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19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20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21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22">
      <number:number number:decimal-places="4" number:min-decimal-places="4" number:min-integer-digits="1"/>
    </number:number-style>
    <number:number-style style:name="N123">
      <number:scientific-number number:decimal-places="14" number:min-decimal-places="14" number:min-integer-digits="1" number:min-exponent-digits="2" number:exponent-interval="1" number:forced-exponent-sign="true"/>
    </number:number-style>
    <number:number-style style:name="N124">
      <number:scientific-number number:decimal-places="16" number:min-decimal-places="16" number:min-integer-digits="1" number:min-exponent-digits="2" number:exponent-interval="1" number:forced-exponent-sign="true"/>
    </number:number-style>
    <number:number-style style:name="N125">
      <number:scientific-number number:decimal-places="15" number:min-decimal-places="15" number:min-integer-digits="1" number:min-exponent-digits="2" number:exponent-interval="1" number:forced-exponent-sign="true"/>
    </number:number-style>
    <number:number-style style:name="N126">
      <number:number number:decimal-places="17" number:min-decimal-places="17" number:min-integer-digits="1"/>
    </number:number-style>
    <number:number-style style:name="N127">
      <number:number number:decimal-places="3" number:min-decimal-places="3" number:min-integer-digits="1"/>
    </number:number-style>
    <number:number-style style:name="N128">
      <number:number number:decimal-places="1" number:min-decimal-places="1" number:min-integer-digits="1"/>
    </number:number-style>
    <number:number-style style:name="N129">
      <number:scientific-number number:decimal-places="13" number:min-decimal-places="13" number:min-integer-digits="1" number:min-exponent-digits="2" number:exponent-interval="1" number:forced-exponent-sign="true"/>
    </number:number-style>
    <number:number-style style:name="N130">
      <number:scientific-number number:decimal-places="12" number:min-decimal-places="12" number:min-integer-digits="1" number:min-exponent-digits="2" number:exponent-interval="1" number:forced-exponent-sign="true"/>
    </number:number-style>
    <number:number-style style:name="N131">
      <number:scientific-number number:decimal-places="11" number:min-decimal-places="11" number:min-integer-digits="1" number:min-exponent-digits="2" number:exponent-interval="1" number:forced-exponent-sign="true"/>
    </number:number-style>
    <number:number-style style:name="N132">
      <number:number number:decimal-places="12" number:min-decimal-places="12" number:min-integer-digits="1"/>
    </number:number-style>
    <number:number-style style:name="N133">
      <number:number number:decimal-places="18" number:min-decimal-places="18" number:min-integer-digits="1"/>
    </number:number-style>
    <number:number-style style:name="N134">
      <number:number number:decimal-places="19" number:min-decimal-places="19" number:min-integer-digits="1"/>
    </number:number-style>
    <number:number-style style:name="N135">
      <number:number number:decimal-places="20" number:min-decimal-places="20" number:min-integer-digits="1"/>
    </number:number-style>
    <number:number-style style:name="N136">
      <number:number number:decimal-places="16" number:min-decimal-places="16" number:min-integer-digits="1"/>
    </number:number-style>
    <number:number-style style:name="N137">
      <number:number number:decimal-places="15" number:min-decimal-places="15" number:min-integer-digits="1"/>
    </number:number-style>
    <number:number-style style:name="N138">
      <number:number number:decimal-places="14" number:min-decimal-places="14" number:min-integer-digits="1"/>
    </number:number-style>
    <number:number-style style:name="N139">
      <number:number number:decimal-places="5" number:min-decimal-places="5" number:min-integer-digits="1"/>
    </number:number-style>
    <number:number-style style:name="N140">
      <number:number number:decimal-places="6" number:min-decimal-places="6" number:min-integer-digits="1"/>
    </number:number-style>
    <number:number-style style:name="N141">
      <number:number number:decimal-places="7" number:min-decimal-places="7" number:min-integer-digits="1"/>
    </number:number-style>
    <number:number-style style:name="N142">
      <number:number number:decimal-places="8" number:min-decimal-places="8" number:min-integer-digits="1"/>
    </number:number-style>
    <number:number-style style:name="N143">
      <number:number number:decimal-places="9" number:min-decimal-places="9" number:min-integer-digits="1"/>
    </number:number-style>
    <number:number-style style:name="N144">
      <number:number number:decimal-places="10" number:min-decimal-places="10" number:min-integer-digits="1"/>
    </number:number-style>
    <number:number-style style:name="N145">
      <number:number number:decimal-places="11" number:min-decimal-places="11" number:min-integer-digits="1"/>
    </number:number-style>
    <number:number-style style:name="N146">
      <number:number number:decimal-places="4" number:min-decimal-places="4" number:min-integer-digits="1" number:grouping="true"/>
    </number:number-style>
    <number:number-style style:name="N147">
      <number:number number:decimal-places="1" number:min-decimal-places="1" number:min-integer-digits="1" number:grouping="true"/>
    </number:number-style>
    <number:number-style style:name="N148">
      <number:number number:decimal-places="3" number:min-decimal-places="3" number:min-integer-digits="1" number:grouping="true"/>
    </number:number-style>
    <number:number-style style:name="N149">
      <number:scientific-number number:decimal-places="18" number:min-decimal-places="18" number:min-integer-digits="1" number:min-exponent-digits="2" number:exponent-interval="1" number:forced-exponent-sign="true"/>
    </number:number-style>
    <number:number-style style:name="N150">
      <number:scientific-number number:decimal-places="17" number:min-decimal-places="17" number:min-integer-digits="1" number:min-exponent-digits="2" number:exponent-interval="1" number:forced-exponent-sign="true"/>
    </number:number-style>
    <number:number-style style:name="N151">
      <number:number number:decimal-places="13" number:min-decimal-places="1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7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17T18:08:04.196370504</meta:creation-date>
    <dc:date>2026-05-17T18:08:26.744358975</dc:date>
    <meta:editing-duration>PT24S</meta:editing-duration>
    <meta:editing-cycles>1</meta:editing-cycles>
    <meta:document-statistic meta:table-count="1" meta:cell-count="2265" meta:object-count="0"/>
    <meta:generator>LibreOffice/24.2.7.2$Linux_X86_64 LibreOffice_project/420$Build-2</meta:generator>
  </office:meta>
</office:document-meta>
</file>