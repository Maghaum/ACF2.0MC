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77777777777778" calcext:value-type="float">
            <text:p>0,00000277777777777778</text:p>
          </table:table-cell>
          <table:table-cell table:formula="of:=[.D3]-[.D2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4" office:value-type="float" office:value="48" calcext:value-type="float">
            <text:p>4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555555555555556" calcext:value-type="float">
            <text:p>0,00000555555555555556</text:p>
          </table:table-cell>
          <table:table-cell table:formula="of:=[.D4]-[.D3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4"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833333333333333" calcext:value-type="float">
            <text:p>0,00000833333333333333</text:p>
          </table:table-cell>
          <table:table-cell table:formula="of:=[.D5]-[.D4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4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11111111111111" calcext:value-type="float">
            <text:p>0,00001111111111111110</text:p>
          </table:table-cell>
          <table:table-cell table:formula="of:=[.D6]-[.D5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4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38888888888889" calcext:value-type="float">
            <text:p>0,00001388888888888890</text:p>
          </table:table-cell>
          <table:table-cell table:formula="of:=[.D7]-[.D6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4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66666666666667" calcext:value-type="float">
            <text:p>0,00001666666666666670</text:p>
          </table:table-cell>
          <table:table-cell table:formula="of:=[.D8]-[.D7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4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94444444444444" calcext:value-type="float">
            <text:p>0,00001944444444444450</text:p>
          </table:table-cell>
          <table:table-cell table:formula="of:=[.D9]-[.D8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4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22222222222222" calcext:value-type="float">
            <text:p>0,00002222222222222220</text:p>
          </table:table-cell>
          <table:table-cell table:formula="of:=[.D10]-[.D9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4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5" calcext:value-type="float">
            <text:p>0,00002500000000000000</text:p>
          </table:table-cell>
          <table:table-cell table:formula="of:=[.D11]-[.D10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4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77777777777778" calcext:value-type="float">
            <text:p>0,00002777777777777780</text:p>
          </table:table-cell>
          <table:table-cell table:formula="of:=[.D12]-[.D11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4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05555555555556" calcext:value-type="float">
            <text:p>0,00003055555555555560</text:p>
          </table:table-cell>
          <table:table-cell table:formula="of:=[.D13]-[.D12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4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33333333333333" calcext:value-type="float">
            <text:p>0,00003333333333333330</text:p>
          </table:table-cell>
          <table:table-cell table:formula="of:=[.D14]-[.D13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4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61111111111111" calcext:value-type="float">
            <text:p>0,00003611111111111110</text:p>
          </table:table-cell>
          <table:table-cell table:formula="of:=[.D15]-[.D14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4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88888888888889" calcext:value-type="float">
            <text:p>0,00003888888888888890</text:p>
          </table:table-cell>
          <table:table-cell table:formula="of:=[.D16]-[.D15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4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416666666666667" calcext:value-type="float">
            <text:p>0,00004166666666666670</text:p>
          </table:table-cell>
          <table:table-cell table:formula="of:=[.D17]-[.D16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4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444444444444444" calcext:value-type="float">
            <text:p>0,00004444444444444450</text:p>
          </table:table-cell>
          <table:table-cell table:formula="of:=[.D18]-[.D17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4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472222222222222" calcext:value-type="float">
            <text:p>0,00004722222222222220</text:p>
          </table:table-cell>
          <table:table-cell table:formula="of:=[.D19]-[.D18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4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5" calcext:value-type="float">
            <text:p>0,00005000000000000000</text:p>
          </table:table-cell>
          <table:table-cell table:formula="of:=[.D20]-[.D19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4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527777777777778" calcext:value-type="float">
            <text:p>0,00005277777777777780</text:p>
          </table:table-cell>
          <table:table-cell table:formula="of:=[.D21]-[.D20]" office:value-type="float" office:value="0.00000277777777777778" calcext:value-type="float">
            <text:p>0,0000027777777777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4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555555555555556" calcext:value-type="float">
            <text:p>0,00005555555555555560</text:p>
          </table:table-cell>
          <table:table-cell table:formula="of:=[.D22]-[.D21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4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583333333333333" calcext:value-type="float">
            <text:p>0,00005833333333333330</text:p>
          </table:table-cell>
          <table:table-cell table:formula="of:=[.D23]-[.D22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4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611111111111111" calcext:value-type="float">
            <text:p>0,00006111111111111110</text:p>
          </table:table-cell>
          <table:table-cell table:formula="of:=[.D24]-[.D23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4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638888888888889" calcext:value-type="float">
            <text:p>0,00006388888888888890</text:p>
          </table:table-cell>
          <table:table-cell table:formula="of:=[.D25]-[.D24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4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666666666666667" calcext:value-type="float">
            <text:p>0,00006666666666666670</text:p>
          </table:table-cell>
          <table:table-cell table:formula="of:=[.D26]-[.D25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4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694444444444444" calcext:value-type="float">
            <text:p>0,00006944444444444440</text:p>
          </table:table-cell>
          <table:table-cell table:formula="of:=[.D27]-[.D26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4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722222222222222" calcext:value-type="float">
            <text:p>0,00007222222222222220</text:p>
          </table:table-cell>
          <table:table-cell table:formula="of:=[.D28]-[.D27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4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75" calcext:value-type="float">
            <text:p>0,00007500000000000000</text:p>
          </table:table-cell>
          <table:table-cell table:formula="of:=[.D29]-[.D28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4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777777777777778" calcext:value-type="float">
            <text:p>0,00007777777777777780</text:p>
          </table:table-cell>
          <table:table-cell table:formula="of:=[.D30]-[.D29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4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805555555555556" calcext:value-type="float">
            <text:p>0,00008055555555555560</text:p>
          </table:table-cell>
          <table:table-cell table:formula="of:=[.D31]-[.D30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4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833333333333333" calcext:value-type="float">
            <text:p>0,00008333333333333330</text:p>
          </table:table-cell>
          <table:table-cell table:formula="of:=[.D32]-[.D31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4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861111111111111" calcext:value-type="float">
            <text:p>0,00008611111111111110</text:p>
          </table:table-cell>
          <table:table-cell table:formula="of:=[.D33]-[.D32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4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888888888888889" calcext:value-type="float">
            <text:p>0,00008888888888888890</text:p>
          </table:table-cell>
          <table:table-cell table:formula="of:=[.D34]-[.D33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4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916666666666667" calcext:value-type="float">
            <text:p>0,00009166666666666670</text:p>
          </table:table-cell>
          <table:table-cell table:formula="of:=[.D35]-[.D34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4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944444444444444" calcext:value-type="float">
            <text:p>0,00009444444444444440</text:p>
          </table:table-cell>
          <table:table-cell table:formula="of:=[.D36]-[.D35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4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972222222222222" calcext:value-type="float">
            <text:p>0,00009722222222222220</text:p>
          </table:table-cell>
          <table:table-cell table:formula="of:=[.D37]-[.D36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4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" calcext:value-type="float">
            <text:p>0,00010000000000000000</text:p>
          </table:table-cell>
          <table:table-cell table:formula="of:=[.D38]-[.D37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4" office:value-type="float" office:value="888" calcext:value-type="float">
            <text:p>88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02777777777778" calcext:value-type="float">
            <text:p>0,00010277777777777800</text:p>
          </table:table-cell>
          <table:table-cell table:formula="of:=[.D39]-[.D38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4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05555555555556" calcext:value-type="float">
            <text:p>0,00010555555555555600</text:p>
          </table:table-cell>
          <table:table-cell table:formula="of:=[.D40]-[.D39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4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08333333333333" calcext:value-type="float">
            <text:p>0,00010833333333333300</text:p>
          </table:table-cell>
          <table:table-cell table:formula="of:=[.D41]-[.D40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4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11111111111111" calcext:value-type="float">
            <text:p>0,00011111111111111100</text:p>
          </table:table-cell>
          <table:table-cell table:formula="of:=[.D42]-[.D41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4" office:value-type="float" office:value="984" calcext:value-type="float">
            <text:p>98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13888888888889" calcext:value-type="float">
            <text:p>0,00011388888888888900</text:p>
          </table:table-cell>
          <table:table-cell table:formula="of:=[.D43]-[.D42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4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16666666666667" calcext:value-type="float">
            <text:p>0,00011666666666666700</text:p>
          </table:table-cell>
          <table:table-cell table:formula="of:=[.D44]-[.D43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4" office:value-type="float" office:value="1032" calcext:value-type="float">
            <text:p>103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19444444444444" calcext:value-type="float">
            <text:p>0,00011944444444444400</text:p>
          </table:table-cell>
          <table:table-cell table:formula="of:=[.D45]-[.D44]" office:value-type="float" office:value="0.00000277777777777777" calcext:value-type="float">
            <text:p>0,000002777777777777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4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22222222222222" calcext:value-type="float">
            <text:p>0,00012222222222222200</text:p>
          </table:table-cell>
          <table:table-cell table:formula="of:=[.D46]-[.D45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4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25" calcext:value-type="float">
            <text:p>0,00012500000000000000</text:p>
          </table:table-cell>
          <table:table-cell table:formula="of:=[.D47]-[.D46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4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27777777777778" calcext:value-type="float">
            <text:p>0,00012777777777777800</text:p>
          </table:table-cell>
          <table:table-cell table:formula="of:=[.D48]-[.D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4" office:value-type="float" office:value="1128" calcext:value-type="float">
            <text:p>112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30555555555556" calcext:value-type="float">
            <text:p>0,00013055555555555600</text:p>
          </table:table-cell>
          <table:table-cell table:formula="of:=[.D49]-[.D48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4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33333333333333" calcext:value-type="float">
            <text:p>0,00013333333333333300</text:p>
          </table:table-cell>
          <table:table-cell table:formula="of:=[.D50]-[.D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4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36111111111111" calcext:value-type="float">
            <text:p>0,00013611111111111100</text:p>
          </table:table-cell>
          <table:table-cell table:formula="of:=[.D51]-[.D50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4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38888888888889" calcext:value-type="float">
            <text:p>0,00013888888888888900</text:p>
          </table:table-cell>
          <table:table-cell table:formula="of:=[.D52]-[.D51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4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41666666666667" calcext:value-type="float">
            <text:p>0,00014166666666666700</text:p>
          </table:table-cell>
          <table:table-cell table:formula="of:=[.D53]-[.D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4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44444444444444" calcext:value-type="float">
            <text:p>0,00014444444444444400</text:p>
          </table:table-cell>
          <table:table-cell table:formula="of:=[.D54]-[.D53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4" office:value-type="float" office:value="1272" calcext:value-type="float">
            <text:p>127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47222222222222" calcext:value-type="float">
            <text:p>0,00014722222222222200</text:p>
          </table:table-cell>
          <table:table-cell table:formula="of:=[.D55]-[.D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4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5" calcext:value-type="float">
            <text:p>0,00015000000000000000</text:p>
          </table:table-cell>
          <table:table-cell table:formula="of:=[.D56]-[.D55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4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52777777777778" calcext:value-type="float">
            <text:p>0,00015277777777777800</text:p>
          </table:table-cell>
          <table:table-cell table:formula="of:=[.D57]-[.D56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4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55555555555556" calcext:value-type="float">
            <text:p>0,00015555555555555600</text:p>
          </table:table-cell>
          <table:table-cell table:formula="of:=[.D58]-[.D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4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58333333333333" calcext:value-type="float">
            <text:p>0,00015833333333333300</text:p>
          </table:table-cell>
          <table:table-cell table:formula="of:=[.D59]-[.D58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4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61111111111111" calcext:value-type="float">
            <text:p>0,00016111111111111100</text:p>
          </table:table-cell>
          <table:table-cell table:formula="of:=[.D60]-[.D59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4" office:value-type="float" office:value="1416" calcext:value-type="float">
            <text:p>141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63888888888889" calcext:value-type="float">
            <text:p>0,00016388888888888900</text:p>
          </table:table-cell>
          <table:table-cell table:formula="of:=[.D61]-[.D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4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66666666666667" calcext:value-type="float">
            <text:p>0,00016666666666666700</text:p>
          </table:table-cell>
          <table:table-cell table:formula="of:=[.D62]-[.D61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4" office:value-type="float" office:value="1464" calcext:value-type="float">
            <text:p>146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69444444444444" calcext:value-type="float">
            <text:p>0,00016944444444444400</text:p>
          </table:table-cell>
          <table:table-cell table:formula="of:=[.D63]-[.D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4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72222222222222" calcext:value-type="float">
            <text:p>0,00017222222222222200</text:p>
          </table:table-cell>
          <table:table-cell table:formula="of:=[.D64]-[.D63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4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75" calcext:value-type="float">
            <text:p>0,00017500000000000000</text:p>
          </table:table-cell>
          <table:table-cell table:formula="of:=[.D65]-[.D64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4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77777777777778" calcext:value-type="float">
            <text:p>0,00017777777777777800</text:p>
          </table:table-cell>
          <table:table-cell table:formula="of:=[.D66]-[.D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4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80555555555556" calcext:value-type="float">
            <text:p>0,00018055555555555600</text:p>
          </table:table-cell>
          <table:table-cell table:formula="of:=[.D67]-[.D66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4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83333333333333" calcext:value-type="float">
            <text:p>0,00018333333333333300</text:p>
          </table:table-cell>
          <table:table-cell table:formula="of:=[.D68]-[.D67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4" office:value-type="float" office:value="1608" calcext:value-type="float">
            <text:p>160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86111111111111" calcext:value-type="float">
            <text:p>0,00018611111111111100</text:p>
          </table:table-cell>
          <table:table-cell table:formula="of:=[.D69]-[.D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4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88888888888889" calcext:value-type="float">
            <text:p>0,00018888888888888900</text:p>
          </table:table-cell>
          <table:table-cell table:formula="of:=[.D70]-[.D69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4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91666666666667" calcext:value-type="float">
            <text:p>0,00019166666666666700</text:p>
          </table:table-cell>
          <table:table-cell table:formula="of:=[.D71]-[.D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4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94444444444444" calcext:value-type="float">
            <text:p>0,00019444444444444400</text:p>
          </table:table-cell>
          <table:table-cell table:formula="of:=[.D72]-[.D71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4" office:value-type="float" office:value="1704" calcext:value-type="float">
            <text:p>170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97222222222222" calcext:value-type="float">
            <text:p>0,00019722222222222200</text:p>
          </table:table-cell>
          <table:table-cell table:formula="of:=[.D73]-[.D72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4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" calcext:value-type="float">
            <text:p>0,00020000000000000000</text:p>
          </table:table-cell>
          <table:table-cell table:formula="of:=[.D74]-[.D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4" office:value-type="float" office:value="1752" calcext:value-type="float">
            <text:p>175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02777777777778" calcext:value-type="float">
            <text:p>0,00020277777777777800</text:p>
          </table:table-cell>
          <table:table-cell table:formula="of:=[.D75]-[.D74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4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05555555555556" calcext:value-type="float">
            <text:p>0,00020555555555555600</text:p>
          </table:table-cell>
          <table:table-cell table:formula="of:=[.D76]-[.D75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4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08333333333333" calcext:value-type="float">
            <text:p>0,00020833333333333300</text:p>
          </table:table-cell>
          <table:table-cell table:formula="of:=[.D77]-[.D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4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11111111111111" calcext:value-type="float">
            <text:p>0,00021111111111111100</text:p>
          </table:table-cell>
          <table:table-cell table:formula="of:=[.D78]-[.D77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4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13888888888889" calcext:value-type="float">
            <text:p>0,00021388888888888900</text:p>
          </table:table-cell>
          <table:table-cell table:formula="of:=[.D79]-[.D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4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16666666666667" calcext:value-type="float">
            <text:p>0,00021666666666666700</text:p>
          </table:table-cell>
          <table:table-cell table:formula="of:=[.D80]-[.D79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4" office:value-type="float" office:value="1896" calcext:value-type="float">
            <text:p>189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19444444444444" calcext:value-type="float">
            <text:p>0,00021944444444444400</text:p>
          </table:table-cell>
          <table:table-cell table:formula="of:=[.D81]-[.D80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4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22222222222222" calcext:value-type="float">
            <text:p>0,00022222222222222200</text:p>
          </table:table-cell>
          <table:table-cell table:formula="of:=[.D82]-[.D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4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25" calcext:value-type="float">
            <text:p>0,00022500000000000000</text:p>
          </table:table-cell>
          <table:table-cell table:formula="of:=[.D83]-[.D82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4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27777777777778" calcext:value-type="float">
            <text:p>0,00022777777777777800</text:p>
          </table:table-cell>
          <table:table-cell table:formula="of:=[.D84]-[.D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4" office:value-type="float" office:value="1992" calcext:value-type="float">
            <text:p>199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30555555555556" calcext:value-type="float">
            <text:p>0,00023055555555555600</text:p>
          </table:table-cell>
          <table:table-cell table:formula="of:=[.D85]-[.D84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4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33333333333333" calcext:value-type="float">
            <text:p>0,00023333333333333300</text:p>
          </table:table-cell>
          <table:table-cell table:formula="of:=[.D86]-[.D85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4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36111111111111" calcext:value-type="float">
            <text:p>0,00023611111111111100</text:p>
          </table:table-cell>
          <table:table-cell table:formula="of:=[.D87]-[.D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4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38888888888889" calcext:value-type="float">
            <text:p>0,00023888888888888900</text:p>
          </table:table-cell>
          <table:table-cell table:formula="of:=[.D88]-[.D87]" office:value-type="float" office:value="0.00000277777777777779" calcext:value-type="float">
            <text:p>0,000002777777777777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4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41666666666667" calcext:value-type="float">
            <text:p>0,00024166666666666700</text:p>
          </table:table-cell>
          <table:table-cell table:formula="of:=[.D89]-[.D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4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44444444444444" calcext:value-type="float">
            <text:p>0,00024444444444444400</text:p>
          </table:table-cell>
          <table:table-cell table:formula="of:=[.D90]-[.D89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4" office:value-type="float" office:value="2136" calcext:value-type="float">
            <text:p>213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47222222222222" calcext:value-type="float">
            <text:p>0,00024722222222222200</text:p>
          </table:table-cell>
          <table:table-cell table:formula="of:=[.D91]-[.D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4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5" calcext:value-type="float">
            <text:p>0,00025000000000000000</text:p>
          </table:table-cell>
          <table:table-cell table:formula="of:=[.D92]-[.D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4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52777777777778" calcext:value-type="float">
            <text:p>0,00025277777777777800</text:p>
          </table:table-cell>
          <table:table-cell table:formula="of:=[.D93]-[.D92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4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55555555555556" calcext:value-type="float">
            <text:p>0,00025555555555555600</text:p>
          </table:table-cell>
          <table:table-cell table:formula="of:=[.D94]-[.D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4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58333333333333" calcext:value-type="float">
            <text:p>0,00025833333333333300</text:p>
          </table:table-cell>
          <table:table-cell table:formula="of:=[.D95]-[.D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4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61111111111111" calcext:value-type="float">
            <text:p>0,00026111111111111100</text:p>
          </table:table-cell>
          <table:table-cell table:formula="of:=[.D96]-[.D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4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63888888888889" calcext:value-type="float">
            <text:p>0,00026388888888888900</text:p>
          </table:table-cell>
          <table:table-cell table:formula="of:=[.D97]-[.D96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4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66666666666667" calcext:value-type="float">
            <text:p>0,00026666666666666700</text:p>
          </table:table-cell>
          <table:table-cell table:formula="of:=[.D98]-[.D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4" office:value-type="float" office:value="2328" calcext:value-type="float">
            <text:p>232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69444444444444" calcext:value-type="float">
            <text:p>0,00026944444444444400</text:p>
          </table:table-cell>
          <table:table-cell table:formula="of:=[.D99]-[.D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4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72222222222222" calcext:value-type="float">
            <text:p>0,00027222222222222200</text:p>
          </table:table-cell>
          <table:table-cell table:formula="of:=[.D100]-[.D99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4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75" calcext:value-type="float">
            <text:p>0,00027500000000000000</text:p>
          </table:table-cell>
          <table:table-cell table:formula="of:=[.D101]-[.D1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4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77777777777778" calcext:value-type="float">
            <text:p>0,00027777777777777800</text:p>
          </table:table-cell>
          <table:table-cell table:formula="of:=[.D102]-[.D1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4" office:value-type="float" office:value="2424" calcext:value-type="float">
            <text:p>242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80555555555556" calcext:value-type="float">
            <text:p>0,00028055555555555600</text:p>
          </table:table-cell>
          <table:table-cell table:formula="of:=[.D103]-[.D102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4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83333333333333" calcext:value-type="float">
            <text:p>0,00028333333333333300</text:p>
          </table:table-cell>
          <table:table-cell table:formula="of:=[.D104]-[.D1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4" office:value-type="float" office:value="2472" calcext:value-type="float">
            <text:p>247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86111111111111" calcext:value-type="float">
            <text:p>0,00028611111111111100</text:p>
          </table:table-cell>
          <table:table-cell table:formula="of:=[.D105]-[.D1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4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88888888888889" calcext:value-type="float">
            <text:p>0,00028888888888888900</text:p>
          </table:table-cell>
          <table:table-cell table:formula="of:=[.D106]-[.D105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4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91666666666667" calcext:value-type="float">
            <text:p>0,00029166666666666700</text:p>
          </table:table-cell>
          <table:table-cell table:formula="of:=[.D107]-[.D1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4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94444444444444" calcext:value-type="float">
            <text:p>0,00029444444444444400</text:p>
          </table:table-cell>
          <table:table-cell table:formula="of:=[.D108]-[.D1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4" office:value-type="float" office:value="2568" calcext:value-type="float">
            <text:p>256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97222222222222" calcext:value-type="float">
            <text:p>0,00029722222222222200</text:p>
          </table:table-cell>
          <table:table-cell table:formula="of:=[.D109]-[.D1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4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" calcext:value-type="float">
            <text:p>0,00030000000000000000</text:p>
          </table:table-cell>
          <table:table-cell table:formula="of:=[.D110]-[.D109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4" office:value-type="float" office:value="2616" calcext:value-type="float">
            <text:p>261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02777777777778" calcext:value-type="float">
            <text:p>0,00030277777777777800</text:p>
          </table:table-cell>
          <table:table-cell table:formula="of:=[.D111]-[.D1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4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05555555555556" calcext:value-type="float">
            <text:p>0,00030555555555555600</text:p>
          </table:table-cell>
          <table:table-cell table:formula="of:=[.D112]-[.D1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4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08333333333333" calcext:value-type="float">
            <text:p>0,00030833333333333300</text:p>
          </table:table-cell>
          <table:table-cell table:formula="of:=[.D113]-[.D112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4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11111111111111" calcext:value-type="float">
            <text:p>0,00031111111111111100</text:p>
          </table:table-cell>
          <table:table-cell table:formula="of:=[.D114]-[.D1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4" office:value-type="float" office:value="2712" calcext:value-type="float">
            <text:p>271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13888888888889" calcext:value-type="float">
            <text:p>0,00031388888888888900</text:p>
          </table:table-cell>
          <table:table-cell table:formula="of:=[.D115]-[.D1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4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16666666666667" calcext:value-type="float">
            <text:p>0,00031666666666666700</text:p>
          </table:table-cell>
          <table:table-cell table:formula="of:=[.D116]-[.D115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4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19444444444444" calcext:value-type="float">
            <text:p>0,00031944444444444400</text:p>
          </table:table-cell>
          <table:table-cell table:formula="of:=[.D117]-[.D1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4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22222222222222" calcext:value-type="float">
            <text:p>0,00032222222222222200</text:p>
          </table:table-cell>
          <table:table-cell table:formula="of:=[.D118]-[.D1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4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25" calcext:value-type="float">
            <text:p>0,00032500000000000000</text:p>
          </table:table-cell>
          <table:table-cell table:formula="of:=[.D119]-[.D118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4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27777777777778" calcext:value-type="float">
            <text:p>0,00032777777777777800</text:p>
          </table:table-cell>
          <table:table-cell table:formula="of:=[.D120]-[.D1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4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30555555555556" calcext:value-type="float">
            <text:p>0,00033055555555555600</text:p>
          </table:table-cell>
          <table:table-cell table:formula="of:=[.D121]-[.D1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4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33333333333333" calcext:value-type="float">
            <text:p>0,00033333333333333300</text:p>
          </table:table-cell>
          <table:table-cell table:formula="of:=[.D122]-[.D121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4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36111111111111" calcext:value-type="float">
            <text:p>0,00033611111111111100</text:p>
          </table:table-cell>
          <table:table-cell table:formula="of:=[.D123]-[.D1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4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38888888888889" calcext:value-type="float">
            <text:p>0,00033888888888888900</text:p>
          </table:table-cell>
          <table:table-cell table:formula="of:=[.D124]-[.D1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4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41666666666667" calcext:value-type="float">
            <text:p>0,00034166666666666700</text:p>
          </table:table-cell>
          <table:table-cell table:formula="of:=[.D125]-[.D1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4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44444444444444" calcext:value-type="float">
            <text:p>0,00034444444444444400</text:p>
          </table:table-cell>
          <table:table-cell table:formula="of:=[.D126]-[.D125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4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47222222222222" calcext:value-type="float">
            <text:p>0,00034722222222222200</text:p>
          </table:table-cell>
          <table:table-cell table:formula="of:=[.D127]-[.D1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4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5" calcext:value-type="float">
            <text:p>0,00035000000000000000</text:p>
          </table:table-cell>
          <table:table-cell table:formula="of:=[.D128]-[.D1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4" office:value-type="float" office:value="3048" calcext:value-type="float">
            <text:p>304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52777777777778" calcext:value-type="float">
            <text:p>0,00035277777777777800</text:p>
          </table:table-cell>
          <table:table-cell table:formula="of:=[.D129]-[.D128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4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55555555555556" calcext:value-type="float">
            <text:p>0,00035555555555555600</text:p>
          </table:table-cell>
          <table:table-cell table:formula="of:=[.D130]-[.D1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4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58333333333333" calcext:value-type="float">
            <text:p>0,00035833333333333300</text:p>
          </table:table-cell>
          <table:table-cell table:formula="of:=[.D131]-[.D1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4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61111111111111" calcext:value-type="float">
            <text:p>0,00036111111111111100</text:p>
          </table:table-cell>
          <table:table-cell table:formula="of:=[.D132]-[.D131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4" office:value-type="float" office:value="3144" calcext:value-type="float">
            <text:p>314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63888888888889" calcext:value-type="float">
            <text:p>0,00036388888888888900</text:p>
          </table:table-cell>
          <table:table-cell table:formula="of:=[.D133]-[.D1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4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66666666666667" calcext:value-type="float">
            <text:p>0,00036666666666666700</text:p>
          </table:table-cell>
          <table:table-cell table:formula="of:=[.D134]-[.D1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4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69444444444444" calcext:value-type="float">
            <text:p>0,00036944444444444400</text:p>
          </table:table-cell>
          <table:table-cell table:formula="of:=[.D135]-[.D134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4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72222222222222" calcext:value-type="float">
            <text:p>0,00037222222222222200</text:p>
          </table:table-cell>
          <table:table-cell table:formula="of:=[.D136]-[.D1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4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75" calcext:value-type="float">
            <text:p>0,00037500000000000000</text:p>
          </table:table-cell>
          <table:table-cell table:formula="of:=[.D137]-[.D1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4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77777777777778" calcext:value-type="float">
            <text:p>0,00037777777777777800</text:p>
          </table:table-cell>
          <table:table-cell table:formula="of:=[.D138]-[.D1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4" office:value-type="float" office:value="3288" calcext:value-type="float">
            <text:p>328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80555555555556" calcext:value-type="float">
            <text:p>0,00038055555555555600</text:p>
          </table:table-cell>
          <table:table-cell table:formula="of:=[.D139]-[.D138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4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83333333333333" calcext:value-type="float">
            <text:p>0,00038333333333333300</text:p>
          </table:table-cell>
          <table:table-cell table:formula="of:=[.D140]-[.D1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4" office:value-type="float" office:value="3336" calcext:value-type="float">
            <text:p>333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86111111111111" calcext:value-type="float">
            <text:p>0,00038611111111111100</text:p>
          </table:table-cell>
          <table:table-cell table:formula="of:=[.D141]-[.D1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4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88888888888889" calcext:value-type="float">
            <text:p>0,00038888888888888900</text:p>
          </table:table-cell>
          <table:table-cell table:formula="of:=[.D142]-[.D141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4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91666666666667" calcext:value-type="float">
            <text:p>0,00039166666666666700</text:p>
          </table:table-cell>
          <table:table-cell table:formula="of:=[.D143]-[.D1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4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94444444444444" calcext:value-type="float">
            <text:p>0,00039444444444444500</text:p>
          </table:table-cell>
          <table:table-cell table:formula="of:=[.D144]-[.D1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4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97222222222222" calcext:value-type="float">
            <text:p>0,00039722222222222200</text:p>
          </table:table-cell>
          <table:table-cell table:formula="of:=[.D145]-[.D144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4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" calcext:value-type="float">
            <text:p>0,00040000000000000000</text:p>
          </table:table-cell>
          <table:table-cell table:formula="of:=[.D146]-[.D1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4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02777777777778" calcext:value-type="float">
            <text:p>0,00040277777777777800</text:p>
          </table:table-cell>
          <table:table-cell table:formula="of:=[.D147]-[.D1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4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05555555555556" calcext:value-type="float">
            <text:p>0,00040555555555555600</text:p>
          </table:table-cell>
          <table:table-cell table:formula="of:=[.D148]-[.D147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4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08333333333333" calcext:value-type="float">
            <text:p>0,00040833333333333300</text:p>
          </table:table-cell>
          <table:table-cell table:formula="of:=[.D149]-[.D1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4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11111111111111" calcext:value-type="float">
            <text:p>0,00041111111111111100</text:p>
          </table:table-cell>
          <table:table-cell table:formula="of:=[.D150]-[.D1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4" office:value-type="float" office:value="3576" calcext:value-type="float">
            <text:p>357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413888888888889" calcext:value-type="float">
            <text:p>0,00041388888888888900</text:p>
          </table:table-cell>
          <table:table-cell table:formula="of:=[.D151]-[.D150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4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416666666666667" calcext:value-type="float">
            <text:p>0,00041666666666666700</text:p>
          </table:table-cell>
          <table:table-cell table:formula="of:=[.D152]-[.D1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4" office:value-type="float" office:value="3624" calcext:value-type="float">
            <text:p>362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19444444444444" calcext:value-type="float">
            <text:p>0,00041944444444444400</text:p>
          </table:table-cell>
          <table:table-cell table:formula="of:=[.D153]-[.D1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4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22222222222222" calcext:value-type="float">
            <text:p>0,00042222222222222200</text:p>
          </table:table-cell>
          <table:table-cell table:formula="of:=[.D154]-[.D1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4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25" calcext:value-type="float">
            <text:p>0,00042500000000000000</text:p>
          </table:table-cell>
          <table:table-cell table:formula="of:=[.D155]-[.D154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4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27777777777778" calcext:value-type="float">
            <text:p>0,00042777777777777800</text:p>
          </table:table-cell>
          <table:table-cell table:formula="of:=[.D156]-[.D1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4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430555555555556" calcext:value-type="float">
            <text:p>0,00043055555555555600</text:p>
          </table:table-cell>
          <table:table-cell table:formula="of:=[.D157]-[.D1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4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433333333333333" calcext:value-type="float">
            <text:p>0,00043333333333333300</text:p>
          </table:table-cell>
          <table:table-cell table:formula="of:=[.D158]-[.D157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4" office:value-type="float" office:value="3768" calcext:value-type="float">
            <text:p>376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436111111111111" calcext:value-type="float">
            <text:p>0,00043611111111111100</text:p>
          </table:table-cell>
          <table:table-cell table:formula="of:=[.D159]-[.D1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4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38888888888889" calcext:value-type="float">
            <text:p>0,00043888888888888900</text:p>
          </table:table-cell>
          <table:table-cell table:formula="of:=[.D160]-[.D1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4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41666666666667" calcext:value-type="float">
            <text:p>0,00044166666666666700</text:p>
          </table:table-cell>
          <table:table-cell table:formula="of:=[.D161]-[.D160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4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444444444444444" calcext:value-type="float">
            <text:p>0,00044444444444444400</text:p>
          </table:table-cell>
          <table:table-cell table:formula="of:=[.D162]-[.D1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4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447222222222222" calcext:value-type="float">
            <text:p>0,00044722222222222200</text:p>
          </table:table-cell>
          <table:table-cell table:formula="of:=[.D163]-[.D1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4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45" calcext:value-type="float">
            <text:p>0,00045000000000000000</text:p>
          </table:table-cell>
          <table:table-cell table:formula="of:=[.D164]-[.D163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4" office:value-type="float" office:value="3912" calcext:value-type="float">
            <text:p>391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452777777777778" calcext:value-type="float">
            <text:p>0,00045277777777777800</text:p>
          </table:table-cell>
          <table:table-cell table:formula="of:=[.D165]-[.D1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4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455555555555556" calcext:value-type="float">
            <text:p>0,00045555555555555600</text:p>
          </table:table-cell>
          <table:table-cell table:formula="of:=[.D166]-[.D1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4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58333333333333" calcext:value-type="float">
            <text:p>0,00045833333333333300</text:p>
          </table:table-cell>
          <table:table-cell table:formula="of:=[.D167]-[.D1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4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61111111111111" calcext:value-type="float">
            <text:p>0,00046111111111111100</text:p>
          </table:table-cell>
          <table:table-cell table:formula="of:=[.D168]-[.D167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4" office:value-type="float" office:value="4008" calcext:value-type="float">
            <text:p>400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463888888888889" calcext:value-type="float">
            <text:p>0,00046388888888888900</text:p>
          </table:table-cell>
          <table:table-cell table:formula="of:=[.D169]-[.D1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4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466666666666667" calcext:value-type="float">
            <text:p>0,00046666666666666700</text:p>
          </table:table-cell>
          <table:table-cell table:formula="of:=[.D170]-[.D1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4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469444444444444" calcext:value-type="float">
            <text:p>0,00046944444444444400</text:p>
          </table:table-cell>
          <table:table-cell table:formula="of:=[.D171]-[.D170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4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472222222222222" calcext:value-type="float">
            <text:p>0,00047222222222222200</text:p>
          </table:table-cell>
          <table:table-cell table:formula="of:=[.D172]-[.D1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4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475" calcext:value-type="float">
            <text:p>0,00047500000000000000</text:p>
          </table:table-cell>
          <table:table-cell table:formula="of:=[.D173]-[.D1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4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477777777777778" calcext:value-type="float">
            <text:p>0,00047777777777777800</text:p>
          </table:table-cell>
          <table:table-cell table:formula="of:=[.D174]-[.D173]" office:value-type="float" office:value="0.00000277777777777782" calcext:value-type="float">
            <text:p>0,000002777777777777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4" office:value-type="float" office:value="4152" calcext:value-type="float">
            <text:p>415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480555555555556" calcext:value-type="float">
            <text:p>0,00048055555555555600</text:p>
          </table:table-cell>
          <table:table-cell table:formula="of:=[.D175]-[.D1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4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483333333333333" calcext:value-type="float">
            <text:p>0,00048333333333333300</text:p>
          </table:table-cell>
          <table:table-cell table:formula="of:=[.D176]-[.D1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4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486111111111111" calcext:value-type="float">
            <text:p>0,00048611111111111100</text:p>
          </table:table-cell>
          <table:table-cell table:formula="of:=[.D177]-[.D1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4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488888888888889" calcext:value-type="float">
            <text:p>0,00048888888888888900</text:p>
          </table:table-cell>
          <table:table-cell table:formula="of:=[.D178]-[.D1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4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491666666666667" calcext:value-type="float">
            <text:p>0,00049166666666666700</text:p>
          </table:table-cell>
          <table:table-cell table:formula="of:=[.D179]-[.D178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4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494444444444445" calcext:value-type="float">
            <text:p>0,00049444444444444500</text:p>
          </table:table-cell>
          <table:table-cell table:formula="of:=[.D180]-[.D1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4" office:value-type="float" office:value="4296" calcext:value-type="float">
            <text:p>429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497222222222222" calcext:value-type="float">
            <text:p>0,00049722222222222200</text:p>
          </table:table-cell>
          <table:table-cell table:formula="of:=[.D181]-[.D1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4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5" calcext:value-type="float">
            <text:p>0,00050000000000000000</text:p>
          </table:table-cell>
          <table:table-cell table:formula="of:=[.D182]-[.D1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4" office:value-type="float" office:value="4344" calcext:value-type="float">
            <text:p>434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502777777777778" calcext:value-type="float">
            <text:p>0,00050277777777777800</text:p>
          </table:table-cell>
          <table:table-cell table:formula="of:=[.D183]-[.D1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4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505555555555556" calcext:value-type="float">
            <text:p>0,00050555555555555600</text:p>
          </table:table-cell>
          <table:table-cell table:formula="of:=[.D184]-[.D1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4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508333333333333" calcext:value-type="float">
            <text:p>0,00050833333333333300</text:p>
          </table:table-cell>
          <table:table-cell table:formula="of:=[.D185]-[.D184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4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511111111111111" calcext:value-type="float">
            <text:p>0,00051111111111111100</text:p>
          </table:table-cell>
          <table:table-cell table:formula="of:=[.D186]-[.D1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4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513888888888889" calcext:value-type="float">
            <text:p>0,00051388888888888900</text:p>
          </table:table-cell>
          <table:table-cell table:formula="of:=[.D187]-[.D1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4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516666666666667" calcext:value-type="float">
            <text:p>0,00051666666666666700</text:p>
          </table:table-cell>
          <table:table-cell table:formula="of:=[.D188]-[.D1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4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519444444444444" calcext:value-type="float">
            <text:p>0,00051944444444444400</text:p>
          </table:table-cell>
          <table:table-cell table:formula="of:=[.D189]-[.D1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4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522222222222222" calcext:value-type="float">
            <text:p>0,00052222222222222200</text:p>
          </table:table-cell>
          <table:table-cell table:formula="of:=[.D190]-[.D1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4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525" calcext:value-type="float">
            <text:p>0,00052500000000000000</text:p>
          </table:table-cell>
          <table:table-cell table:formula="of:=[.D191]-[.D1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4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527777777777778" calcext:value-type="float">
            <text:p>0,00052777777777777800</text:p>
          </table:table-cell>
          <table:table-cell table:formula="of:=[.D192]-[.D191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4" office:value-type="float" office:value="4584" calcext:value-type="float">
            <text:p>458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530555555555556" calcext:value-type="float">
            <text:p>0,00053055555555555600</text:p>
          </table:table-cell>
          <table:table-cell table:formula="of:=[.D193]-[.D1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4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533333333333333" calcext:value-type="float">
            <text:p>0,00053333333333333300</text:p>
          </table:table-cell>
          <table:table-cell table:formula="of:=[.D194]-[.D1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4" office:value-type="float" office:value="4632" calcext:value-type="float">
            <text:p>463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536111111111111" calcext:value-type="float">
            <text:p>0,00053611111111111100</text:p>
          </table:table-cell>
          <table:table-cell table:formula="of:=[.D195]-[.D1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4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538888888888889" calcext:value-type="float">
            <text:p>0,00053888888888888900</text:p>
          </table:table-cell>
          <table:table-cell table:formula="of:=[.D196]-[.D1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4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541666666666667" calcext:value-type="float">
            <text:p>0,00054166666666666700</text:p>
          </table:table-cell>
          <table:table-cell table:formula="of:=[.D197]-[.D1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4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544444444444444" calcext:value-type="float">
            <text:p>0,00054444444444444400</text:p>
          </table:table-cell>
          <table:table-cell table:formula="of:=[.D198]-[.D197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4" office:value-type="float" office:value="4728" calcext:value-type="float">
            <text:p>472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547222222222222" calcext:value-type="float">
            <text:p>0,00054722222222222200</text:p>
          </table:table-cell>
          <table:table-cell table:formula="of:=[.D199]-[.D1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4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55" calcext:value-type="float">
            <text:p>0,00055000000000000000</text:p>
          </table:table-cell>
          <table:table-cell table:formula="of:=[.D200]-[.D1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4" office:value-type="float" office:value="4776" calcext:value-type="float">
            <text:p>477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552777777777778" calcext:value-type="float">
            <text:p>0,00055277777777777800</text:p>
          </table:table-cell>
          <table:table-cell table:formula="of:=[.D201]-[.D2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4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555555555555556" calcext:value-type="float">
            <text:p>0,00055555555555555600</text:p>
          </table:table-cell>
          <table:table-cell table:formula="of:=[.D202]-[.D2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4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558333333333333" calcext:value-type="float">
            <text:p>0,00055833333333333300</text:p>
          </table:table-cell>
          <table:table-cell table:formula="of:=[.D203]-[.D2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4" office:value-type="float" office:value="4848" calcext:value-type="float">
            <text:p>484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561111111111111" calcext:value-type="float">
            <text:p>0,00056111111111111100</text:p>
          </table:table-cell>
          <table:table-cell table:formula="of:=[.D204]-[.D2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4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563888888888889" calcext:value-type="float">
            <text:p>0,00056388888888888900</text:p>
          </table:table-cell>
          <table:table-cell table:formula="of:=[.D205]-[.D204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4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566666666666667" calcext:value-type="float">
            <text:p>0,00056666666666666700</text:p>
          </table:table-cell>
          <table:table-cell table:formula="of:=[.D206]-[.D2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4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569444444444445" calcext:value-type="float">
            <text:p>0,00056944444444444500</text:p>
          </table:table-cell>
          <table:table-cell table:formula="of:=[.D207]-[.D2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4" office:value-type="float" office:value="4944" calcext:value-type="float">
            <text:p>494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572222222222222" calcext:value-type="float">
            <text:p>0,00057222222222222200</text:p>
          </table:table-cell>
          <table:table-cell table:formula="of:=[.D208]-[.D2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4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575" calcext:value-type="float">
            <text:p>0,00057500000000000000</text:p>
          </table:table-cell>
          <table:table-cell table:formula="of:=[.D209]-[.D2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4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577777777777778" calcext:value-type="float">
            <text:p>0,00057777777777777800</text:p>
          </table:table-cell>
          <table:table-cell table:formula="of:=[.D210]-[.D2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4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580555555555556" calcext:value-type="float">
            <text:p>0,00058055555555555600</text:p>
          </table:table-cell>
          <table:table-cell table:formula="of:=[.D211]-[.D210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4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583333333333333" calcext:value-type="float">
            <text:p>0,00058333333333333300</text:p>
          </table:table-cell>
          <table:table-cell table:formula="of:=[.D212]-[.D2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4" office:value-type="float" office:value="5064" calcext:value-type="float">
            <text:p>506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586111111111111" calcext:value-type="float">
            <text:p>0,00058611111111111100</text:p>
          </table:table-cell>
          <table:table-cell table:formula="of:=[.D213]-[.D2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4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588888888888889" calcext:value-type="float">
            <text:p>0,00058888888888888900</text:p>
          </table:table-cell>
          <table:table-cell table:formula="of:=[.D214]-[.D2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4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591666666666667" calcext:value-type="float">
            <text:p>0,00059166666666666700</text:p>
          </table:table-cell>
          <table:table-cell table:formula="of:=[.D215]-[.D2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4" office:value-type="float" office:value="5136" calcext:value-type="float">
            <text:p>513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594444444444444" calcext:value-type="float">
            <text:p>0,00059444444444444400</text:p>
          </table:table-cell>
          <table:table-cell table:formula="of:=[.D216]-[.D2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4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597222222222222" calcext:value-type="float">
            <text:p>0,00059722222222222200</text:p>
          </table:table-cell>
          <table:table-cell table:formula="of:=[.D217]-[.D2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4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6" calcext:value-type="float">
            <text:p>0,00060000000000000000</text:p>
          </table:table-cell>
          <table:table-cell table:formula="of:=[.D218]-[.D217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4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602777777777778" calcext:value-type="float">
            <text:p>0,00060277777777777800</text:p>
          </table:table-cell>
          <table:table-cell table:formula="of:=[.D219]-[.D2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4" office:value-type="float" office:value="5232" calcext:value-type="float">
            <text:p>523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605555555555556" calcext:value-type="float">
            <text:p>0,00060555555555555600</text:p>
          </table:table-cell>
          <table:table-cell table:formula="of:=[.D220]-[.D2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4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608333333333333" calcext:value-type="float">
            <text:p>0,00060833333333333300</text:p>
          </table:table-cell>
          <table:table-cell table:formula="of:=[.D221]-[.D2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4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611111111111111" calcext:value-type="float">
            <text:p>0,00061111111111111100</text:p>
          </table:table-cell>
          <table:table-cell table:formula="of:=[.D222]-[.D2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4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613888888888889" calcext:value-type="float">
            <text:p>0,00061388888888888900</text:p>
          </table:table-cell>
          <table:table-cell table:formula="of:=[.D223]-[.D2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4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616666666666667" calcext:value-type="float">
            <text:p>0,00061666666666666700</text:p>
          </table:table-cell>
          <table:table-cell table:formula="of:=[.D224]-[.D223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4" office:value-type="float" office:value="5352" calcext:value-type="float">
            <text:p>535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619444444444445" calcext:value-type="float">
            <text:p>0,00061944444444444500</text:p>
          </table:table-cell>
          <table:table-cell table:formula="of:=[.D225]-[.D2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4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622222222222222" calcext:value-type="float">
            <text:p>0,00062222222222222200</text:p>
          </table:table-cell>
          <table:table-cell table:formula="of:=[.D226]-[.D2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4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625" calcext:value-type="float">
            <text:p>0,00062500000000000000</text:p>
          </table:table-cell>
          <table:table-cell table:formula="of:=[.D227]-[.D2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4" office:value-type="float" office:value="5424" calcext:value-type="float">
            <text:p>542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627777777777778" calcext:value-type="float">
            <text:p>0,00062777777777777800</text:p>
          </table:table-cell>
          <table:table-cell table:formula="of:=[.D228]-[.D2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4" office:value-type="float" office:value="5448" calcext:value-type="float">
            <text:p>544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630555555555556" calcext:value-type="float">
            <text:p>0,00063055555555555600</text:p>
          </table:table-cell>
          <table:table-cell table:formula="of:=[.D229]-[.D2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4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633333333333333" calcext:value-type="float">
            <text:p>0,00063333333333333300</text:p>
          </table:table-cell>
          <table:table-cell table:formula="of:=[.D230]-[.D229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4" office:value-type="float" office:value="5496" calcext:value-type="float">
            <text:p>549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636111111111111" calcext:value-type="float">
            <text:p>0,00063611111111111100</text:p>
          </table:table-cell>
          <table:table-cell table:formula="of:=[.D231]-[.D2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4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638888888888889" calcext:value-type="float">
            <text:p>0,00063888888888888900</text:p>
          </table:table-cell>
          <table:table-cell table:formula="of:=[.D232]-[.D2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4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641666666666667" calcext:value-type="float">
            <text:p>0,00064166666666666700</text:p>
          </table:table-cell>
          <table:table-cell table:formula="of:=[.D233]-[.D2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4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644444444444444" calcext:value-type="float">
            <text:p>0,00064444444444444400</text:p>
          </table:table-cell>
          <table:table-cell table:formula="of:=[.D234]-[.D2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4" office:value-type="float" office:value="5592" calcext:value-type="float">
            <text:p>559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647222222222222" calcext:value-type="float">
            <text:p>0,00064722222222222200</text:p>
          </table:table-cell>
          <table:table-cell table:formula="of:=[.D235]-[.D2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4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65" calcext:value-type="float">
            <text:p>0,00065000000000000000</text:p>
          </table:table-cell>
          <table:table-cell table:formula="of:=[.D236]-[.D2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4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652777777777778" calcext:value-type="float">
            <text:p>0,00065277777777777800</text:p>
          </table:table-cell>
          <table:table-cell table:formula="of:=[.D237]-[.D236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4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655555555555556" calcext:value-type="float">
            <text:p>0,00065555555555555600</text:p>
          </table:table-cell>
          <table:table-cell table:formula="of:=[.D238]-[.D2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4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658333333333333" calcext:value-type="float">
            <text:p>0,00065833333333333300</text:p>
          </table:table-cell>
          <table:table-cell table:formula="of:=[.D239]-[.D2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4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661111111111111" calcext:value-type="float">
            <text:p>0,00066111111111111100</text:p>
          </table:table-cell>
          <table:table-cell table:formula="of:=[.D240]-[.D2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4" office:value-type="float" office:value="5736" calcext:value-type="float">
            <text:p>573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663888888888889" calcext:value-type="float">
            <text:p>0,00066388888888888900</text:p>
          </table:table-cell>
          <table:table-cell table:formula="of:=[.D241]-[.D2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4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666666666666667" calcext:value-type="float">
            <text:p>0,00066666666666666700</text:p>
          </table:table-cell>
          <table:table-cell table:formula="of:=[.D242]-[.D2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4" office:value-type="float" office:value="5784" calcext:value-type="float">
            <text:p>578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669444444444444" calcext:value-type="float">
            <text:p>0,00066944444444444400</text:p>
          </table:table-cell>
          <table:table-cell table:formula="of:=[.D243]-[.D242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4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672222222222222" calcext:value-type="float">
            <text:p>0,00067222222222222200</text:p>
          </table:table-cell>
          <table:table-cell table:formula="of:=[.D244]-[.D2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4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675" calcext:value-type="float">
            <text:p>0,00067500000000000000</text:p>
          </table:table-cell>
          <table:table-cell table:formula="of:=[.D245]-[.D2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4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677777777777778" calcext:value-type="float">
            <text:p>0,00067777777777777800</text:p>
          </table:table-cell>
          <table:table-cell table:formula="of:=[.D246]-[.D2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4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680555555555556" calcext:value-type="float">
            <text:p>0,00068055555555555600</text:p>
          </table:table-cell>
          <table:table-cell table:formula="of:=[.D247]-[.D2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4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683333333333333" calcext:value-type="float">
            <text:p>0,00068333333333333300</text:p>
          </table:table-cell>
          <table:table-cell table:formula="of:=[.D248]-[.D2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4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686111111111111" calcext:value-type="float">
            <text:p>0,00068611111111111100</text:p>
          </table:table-cell>
          <table:table-cell table:formula="of:=[.D249]-[.D2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4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688888888888889" calcext:value-type="float">
            <text:p>0,00068888888888888900</text:p>
          </table:table-cell>
          <table:table-cell table:formula="of:=[.D250]-[.D249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4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691666666666667" calcext:value-type="float">
            <text:p>0,00069166666666666700</text:p>
          </table:table-cell>
          <table:table-cell table:formula="of:=[.D251]-[.D2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4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694444444444445" calcext:value-type="float">
            <text:p>0,00069444444444444500</text:p>
          </table:table-cell>
          <table:table-cell table:formula="of:=[.D252]-[.D2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4" office:value-type="float" office:value="6024" calcext:value-type="float">
            <text:p>602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697222222222222" calcext:value-type="float">
            <text:p>0,00069722222222222200</text:p>
          </table:table-cell>
          <table:table-cell table:formula="of:=[.D253]-[.D2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4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7" calcext:value-type="float">
            <text:p>0,00070000000000000000</text:p>
          </table:table-cell>
          <table:table-cell table:formula="of:=[.D254]-[.D2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4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702777777777778" calcext:value-type="float">
            <text:p>0,00070277777777777800</text:p>
          </table:table-cell>
          <table:table-cell table:formula="of:=[.D255]-[.D2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4" office:value-type="float" office:value="6096" calcext:value-type="float">
            <text:p>609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705555555555556" calcext:value-type="float">
            <text:p>0,00070555555555555600</text:p>
          </table:table-cell>
          <table:table-cell table:formula="of:=[.D256]-[.D255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4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708333333333333" calcext:value-type="float">
            <text:p>0,00070833333333333300</text:p>
          </table:table-cell>
          <table:table-cell table:formula="of:=[.D257]-[.D2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4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711111111111111" calcext:value-type="float">
            <text:p>0,00071111111111111100</text:p>
          </table:table-cell>
          <table:table-cell table:formula="of:=[.D258]-[.D2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4" office:value-type="float" office:value="6168" calcext:value-type="float">
            <text:p>616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713888888888889" calcext:value-type="float">
            <text:p>0,00071388888888888900</text:p>
          </table:table-cell>
          <table:table-cell table:formula="of:=[.D259]-[.D2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4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716666666666667" calcext:value-type="float">
            <text:p>0,00071666666666666700</text:p>
          </table:table-cell>
          <table:table-cell table:formula="of:=[.D260]-[.D2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4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719444444444444" calcext:value-type="float">
            <text:p>0,00071944444444444400</text:p>
          </table:table-cell>
          <table:table-cell table:formula="of:=[.D261]-[.D2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4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722222222222222" calcext:value-type="float">
            <text:p>0,00072222222222222200</text:p>
          </table:table-cell>
          <table:table-cell table:formula="of:=[.D262]-[.D2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4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725" calcext:value-type="float">
            <text:p>0,00072500000000000000</text:p>
          </table:table-cell>
          <table:table-cell table:formula="of:=[.D263]-[.D262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4" office:value-type="float" office:value="6288" calcext:value-type="float">
            <text:p>628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727777777777778" calcext:value-type="float">
            <text:p>0,00072777777777777800</text:p>
          </table:table-cell>
          <table:table-cell table:formula="of:=[.D264]-[.D2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4" office:value-type="float" office:value="6312" calcext:value-type="float">
            <text:p>631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730555555555556" calcext:value-type="float">
            <text:p>0,00073055555555555600</text:p>
          </table:table-cell>
          <table:table-cell table:formula="of:=[.D265]-[.D2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4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733333333333333" calcext:value-type="float">
            <text:p>0,00073333333333333300</text:p>
          </table:table-cell>
          <table:table-cell table:formula="of:=[.D266]-[.D2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4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736111111111111" calcext:value-type="float">
            <text:p>0,00073611111111111100</text:p>
          </table:table-cell>
          <table:table-cell table:formula="of:=[.D267]-[.D2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4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738888888888889" calcext:value-type="float">
            <text:p>0,00073888888888888900</text:p>
          </table:table-cell>
          <table:table-cell table:formula="of:=[.D268]-[.D2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4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741666666666667" calcext:value-type="float">
            <text:p>0,00074166666666666700</text:p>
          </table:table-cell>
          <table:table-cell table:formula="of:=[.D269]-[.D268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4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744444444444445" calcext:value-type="float">
            <text:p>0,00074444444444444500</text:p>
          </table:table-cell>
          <table:table-cell table:formula="of:=[.D270]-[.D2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4" office:value-type="float" office:value="6456" calcext:value-type="float">
            <text:p>645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747222222222222" calcext:value-type="float">
            <text:p>0,00074722222222222200</text:p>
          </table:table-cell>
          <table:table-cell table:formula="of:=[.D271]-[.D2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4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75" calcext:value-type="float">
            <text:p>0,00075000000000000000</text:p>
          </table:table-cell>
          <table:table-cell table:formula="of:=[.D272]-[.D2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4" office:value-type="float" office:value="6504" calcext:value-type="float">
            <text:p>650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752777777777778" calcext:value-type="float">
            <text:p>0,00075277777777777800</text:p>
          </table:table-cell>
          <table:table-cell table:formula="of:=[.D273]-[.D2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4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755555555555556" calcext:value-type="float">
            <text:p>0,00075555555555555600</text:p>
          </table:table-cell>
          <table:table-cell table:formula="of:=[.D274]-[.D2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4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758333333333333" calcext:value-type="float">
            <text:p>0,00075833333333333300</text:p>
          </table:table-cell>
          <table:table-cell table:formula="of:=[.D275]-[.D2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4" office:value-type="float" office:value="6576" calcext:value-type="float">
            <text:p>657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761111111111111" calcext:value-type="float">
            <text:p>0,00076111111111111100</text:p>
          </table:table-cell>
          <table:table-cell table:formula="of:=[.D276]-[.D275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4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763888888888889" calcext:value-type="float">
            <text:p>0,00076388888888888900</text:p>
          </table:table-cell>
          <table:table-cell table:formula="of:=[.D277]-[.D2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4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766666666666667" calcext:value-type="float">
            <text:p>0,00076666666666666700</text:p>
          </table:table-cell>
          <table:table-cell table:formula="of:=[.D278]-[.D2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4" office:value-type="float" office:value="6648" calcext:value-type="float">
            <text:p>664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769444444444445" calcext:value-type="float">
            <text:p>0,00076944444444444500</text:p>
          </table:table-cell>
          <table:table-cell table:formula="of:=[.D279]-[.D2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4" office:value-type="float" office:value="6672" calcext:value-type="float">
            <text:p>667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772222222222222" calcext:value-type="float">
            <text:p>0,00077222222222222200</text:p>
          </table:table-cell>
          <table:table-cell table:formula="of:=[.D280]-[.D2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4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775" calcext:value-type="float">
            <text:p>0,00077500000000000000</text:p>
          </table:table-cell>
          <table:table-cell table:formula="of:=[.D281]-[.D2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4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777777777777778" calcext:value-type="float">
            <text:p>0,00077777777777777800</text:p>
          </table:table-cell>
          <table:table-cell table:formula="of:=[.D282]-[.D281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4" office:value-type="float" office:value="6744" calcext:value-type="float">
            <text:p>674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780555555555556" calcext:value-type="float">
            <text:p>0,00078055555555555600</text:p>
          </table:table-cell>
          <table:table-cell table:formula="of:=[.D283]-[.D2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4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783333333333333" calcext:value-type="float">
            <text:p>0,00078333333333333400</text:p>
          </table:table-cell>
          <table:table-cell table:formula="of:=[.D284]-[.D2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4" office:value-type="float" office:value="6792" calcext:value-type="float">
            <text:p>679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786111111111111" calcext:value-type="float">
            <text:p>0,00078611111111111100</text:p>
          </table:table-cell>
          <table:table-cell table:formula="of:=[.D285]-[.D2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4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788888888888889" calcext:value-type="float">
            <text:p>0,00078888888888888900</text:p>
          </table:table-cell>
          <table:table-cell table:formula="of:=[.D286]-[.D2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4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791666666666667" calcext:value-type="float">
            <text:p>0,00079166666666666700</text:p>
          </table:table-cell>
          <table:table-cell table:formula="of:=[.D287]-[.D2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4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794444444444444" calcext:value-type="float">
            <text:p>0,00079444444444444500</text:p>
          </table:table-cell>
          <table:table-cell table:formula="of:=[.D288]-[.D2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4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797222222222222" calcext:value-type="float">
            <text:p>0,00079722222222222200</text:p>
          </table:table-cell>
          <table:table-cell table:formula="of:=[.D289]-[.D288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4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8" calcext:value-type="float">
            <text:p>0,00080000000000000000</text:p>
          </table:table-cell>
          <table:table-cell table:formula="of:=[.D290]-[.D2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4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802777777777778" calcext:value-type="float">
            <text:p>0,00080277777777777800</text:p>
          </table:table-cell>
          <table:table-cell table:formula="of:=[.D291]-[.D2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4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805555555555556" calcext:value-type="float">
            <text:p>0,00080555555555555600</text:p>
          </table:table-cell>
          <table:table-cell table:formula="of:=[.D292]-[.D2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4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808333333333333" calcext:value-type="float">
            <text:p>0,00080833333333333300</text:p>
          </table:table-cell>
          <table:table-cell table:formula="of:=[.D293]-[.D2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4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811111111111111" calcext:value-type="float">
            <text:p>0,00081111111111111100</text:p>
          </table:table-cell>
          <table:table-cell table:formula="of:=[.D294]-[.D2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4" office:value-type="float" office:value="7032" calcext:value-type="float">
            <text:p>703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813888888888889" calcext:value-type="float">
            <text:p>0,00081388888888888900</text:p>
          </table:table-cell>
          <table:table-cell table:formula="of:=[.D295]-[.D294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4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816666666666667" calcext:value-type="float">
            <text:p>0,00081666666666666700</text:p>
          </table:table-cell>
          <table:table-cell table:formula="of:=[.D296]-[.D2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4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819444444444445" calcext:value-type="float">
            <text:p>0,00081944444444444500</text:p>
          </table:table-cell>
          <table:table-cell table:formula="of:=[.D297]-[.D2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4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822222222222222" calcext:value-type="float">
            <text:p>0,00082222222222222200</text:p>
          </table:table-cell>
          <table:table-cell table:formula="of:=[.D298]-[.D2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4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825" calcext:value-type="float">
            <text:p>0,00082500000000000000</text:p>
          </table:table-cell>
          <table:table-cell table:formula="of:=[.D299]-[.D2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4" office:value-type="float" office:value="7152" calcext:value-type="float">
            <text:p>715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827777777777778" calcext:value-type="float">
            <text:p>0,00082777777777777800</text:p>
          </table:table-cell>
          <table:table-cell table:formula="of:=[.D300]-[.D2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4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830555555555556" calcext:value-type="float">
            <text:p>0,00083055555555555600</text:p>
          </table:table-cell>
          <table:table-cell table:formula="of:=[.D301]-[.D300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4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833333333333333" calcext:value-type="float">
            <text:p>0,00083333333333333300</text:p>
          </table:table-cell>
          <table:table-cell table:formula="of:=[.D302]-[.D3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4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836111111111111" calcext:value-type="float">
            <text:p>0,00083611111111111100</text:p>
          </table:table-cell>
          <table:table-cell table:formula="of:=[.D303]-[.D3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4" office:value-type="float" office:value="7248" calcext:value-type="float">
            <text:p>724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838888888888889" calcext:value-type="float">
            <text:p>0,00083888888888888900</text:p>
          </table:table-cell>
          <table:table-cell table:formula="of:=[.D304]-[.D3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4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841666666666667" calcext:value-type="float">
            <text:p>0,00084166666666666700</text:p>
          </table:table-cell>
          <table:table-cell table:formula="of:=[.D305]-[.D3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4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844444444444444" calcext:value-type="float">
            <text:p>0,00084444444444444400</text:p>
          </table:table-cell>
          <table:table-cell table:formula="of:=[.D306]-[.D3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4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847222222222222" calcext:value-type="float">
            <text:p>0,00084722222222222200</text:p>
          </table:table-cell>
          <table:table-cell table:formula="of:=[.D307]-[.D3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4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85" calcext:value-type="float">
            <text:p>0,00085000000000000000</text:p>
          </table:table-cell>
          <table:table-cell table:formula="of:=[.D308]-[.D307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4" office:value-type="float" office:value="7368" calcext:value-type="float">
            <text:p>736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852777777777778" calcext:value-type="float">
            <text:p>0,00085277777777777800</text:p>
          </table:table-cell>
          <table:table-cell table:formula="of:=[.D309]-[.D3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4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855555555555556" calcext:value-type="float">
            <text:p>0,00085555555555555600</text:p>
          </table:table-cell>
          <table:table-cell table:formula="of:=[.D310]-[.D3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4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858333333333333" calcext:value-type="float">
            <text:p>0,00085833333333333300</text:p>
          </table:table-cell>
          <table:table-cell table:formula="of:=[.D311]-[.D3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4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861111111111111" calcext:value-type="float">
            <text:p>0,00086111111111111100</text:p>
          </table:table-cell>
          <table:table-cell table:formula="of:=[.D312]-[.D3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4" office:value-type="float" office:value="7464" calcext:value-type="float">
            <text:p>746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863888888888889" calcext:value-type="float">
            <text:p>0,00086388888888888900</text:p>
          </table:table-cell>
          <table:table-cell table:formula="of:=[.D313]-[.D3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4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866666666666667" calcext:value-type="float">
            <text:p>0,00086666666666666700</text:p>
          </table:table-cell>
          <table:table-cell table:formula="of:=[.D314]-[.D313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4" office:value-type="float" office:value="7512" calcext:value-type="float">
            <text:p>751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869444444444445" calcext:value-type="float">
            <text:p>0,00086944444444444500</text:p>
          </table:table-cell>
          <table:table-cell table:formula="of:=[.D315]-[.D3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4" office:value-type="float" office:value="7536" calcext:value-type="float">
            <text:p>753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872222222222222" calcext:value-type="float">
            <text:p>0,00087222222222222200</text:p>
          </table:table-cell>
          <table:table-cell table:formula="of:=[.D316]-[.D3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4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875" calcext:value-type="float">
            <text:p>0,00087500000000000000</text:p>
          </table:table-cell>
          <table:table-cell table:formula="of:=[.D317]-[.D3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4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877777777777778" calcext:value-type="float">
            <text:p>0,00087777777777777800</text:p>
          </table:table-cell>
          <table:table-cell table:formula="of:=[.D318]-[.D3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4" office:value-type="float" office:value="7608" calcext:value-type="float">
            <text:p>760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880555555555556" calcext:value-type="float">
            <text:p>0,00088055555555555600</text:p>
          </table:table-cell>
          <table:table-cell table:formula="of:=[.D319]-[.D3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4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883333333333333" calcext:value-type="float">
            <text:p>0,00088333333333333300</text:p>
          </table:table-cell>
          <table:table-cell table:formula="of:=[.D320]-[.D3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4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886111111111111" calcext:value-type="float">
            <text:p>0,00088611111111111100</text:p>
          </table:table-cell>
          <table:table-cell table:formula="of:=[.D321]-[.D320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4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888888888888889" calcext:value-type="float">
            <text:p>0,00088888888888888900</text:p>
          </table:table-cell>
          <table:table-cell table:formula="of:=[.D322]-[.D3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4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891666666666667" calcext:value-type="float">
            <text:p>0,00089166666666666700</text:p>
          </table:table-cell>
          <table:table-cell table:formula="of:=[.D323]-[.D3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4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894444444444445" calcext:value-type="float">
            <text:p>0,00089444444444444500</text:p>
          </table:table-cell>
          <table:table-cell table:formula="of:=[.D324]-[.D3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4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897222222222222" calcext:value-type="float">
            <text:p>0,00089722222222222200</text:p>
          </table:table-cell>
          <table:table-cell table:formula="of:=[.D325]-[.D3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4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9" calcext:value-type="float">
            <text:p>0,00090000000000000000</text:p>
          </table:table-cell>
          <table:table-cell table:formula="of:=[.D326]-[.D3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4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902777777777778" calcext:value-type="float">
            <text:p>0,00090277777777777800</text:p>
          </table:table-cell>
          <table:table-cell table:formula="of:=[.D327]-[.D326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4" office:value-type="float" office:value="7824" calcext:value-type="float">
            <text:p>782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905555555555556" calcext:value-type="float">
            <text:p>0,00090555555555555600</text:p>
          </table:table-cell>
          <table:table-cell table:formula="of:=[.D328]-[.D3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4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908333333333333" calcext:value-type="float">
            <text:p>0,00090833333333333400</text:p>
          </table:table-cell>
          <table:table-cell table:formula="of:=[.D329]-[.D3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4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911111111111111" calcext:value-type="float">
            <text:p>0,00091111111111111100</text:p>
          </table:table-cell>
          <table:table-cell table:formula="of:=[.D330]-[.D3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4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913888888888889" calcext:value-type="float">
            <text:p>0,00091388888888888900</text:p>
          </table:table-cell>
          <table:table-cell table:formula="of:=[.D331]-[.D3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4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916666666666667" calcext:value-type="float">
            <text:p>0,00091666666666666700</text:p>
          </table:table-cell>
          <table:table-cell table:formula="of:=[.D332]-[.D3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4" office:value-type="float" office:value="7944" calcext:value-type="float">
            <text:p>794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919444444444444" calcext:value-type="float">
            <text:p>0,00091944444444444500</text:p>
          </table:table-cell>
          <table:table-cell table:formula="of:=[.D333]-[.D3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4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922222222222222" calcext:value-type="float">
            <text:p>0,00092222222222222200</text:p>
          </table:table-cell>
          <table:table-cell table:formula="of:=[.D334]-[.D333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4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925" calcext:value-type="float">
            <text:p>0,00092500000000000000</text:p>
          </table:table-cell>
          <table:table-cell table:formula="of:=[.D335]-[.D3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4" office:value-type="float" office:value="8016" calcext:value-type="float">
            <text:p>801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927777777777778" calcext:value-type="float">
            <text:p>0,00092777777777777800</text:p>
          </table:table-cell>
          <table:table-cell table:formula="of:=[.D336]-[.D3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4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930555555555556" calcext:value-type="float">
            <text:p>0,00093055555555555600</text:p>
          </table:table-cell>
          <table:table-cell table:formula="of:=[.D337]-[.D3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4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933333333333333" calcext:value-type="float">
            <text:p>0,00093333333333333300</text:p>
          </table:table-cell>
          <table:table-cell table:formula="of:=[.D338]-[.D3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4" office:value-type="float" office:value="8088" calcext:value-type="float">
            <text:p>808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936111111111111" calcext:value-type="float">
            <text:p>0,00093611111111111100</text:p>
          </table:table-cell>
          <table:table-cell table:formula="of:=[.D339]-[.D3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4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938888888888889" calcext:value-type="float">
            <text:p>0,00093888888888888900</text:p>
          </table:table-cell>
          <table:table-cell table:formula="of:=[.D340]-[.D339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4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941666666666667" calcext:value-type="float">
            <text:p>0,00094166666666666700</text:p>
          </table:table-cell>
          <table:table-cell table:formula="of:=[.D341]-[.D3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4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944444444444445" calcext:value-type="float">
            <text:p>0,00094444444444444500</text:p>
          </table:table-cell>
          <table:table-cell table:formula="of:=[.D342]-[.D3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4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947222222222222" calcext:value-type="float">
            <text:p>0,00094722222222222200</text:p>
          </table:table-cell>
          <table:table-cell table:formula="of:=[.D343]-[.D3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4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95" calcext:value-type="float">
            <text:p>0,00095000000000000000</text:p>
          </table:table-cell>
          <table:table-cell table:formula="of:=[.D344]-[.D3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4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952777777777778" calcext:value-type="float">
            <text:p>0,00095277777777777800</text:p>
          </table:table-cell>
          <table:table-cell table:formula="of:=[.D345]-[.D3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4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955555555555556" calcext:value-type="float">
            <text:p>0,00095555555555555600</text:p>
          </table:table-cell>
          <table:table-cell table:formula="of:=[.D346]-[.D3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4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958333333333333" calcext:value-type="float">
            <text:p>0,00095833333333333300</text:p>
          </table:table-cell>
          <table:table-cell table:formula="of:=[.D347]-[.D346]" office:value-type="float" office:value="0.00000277777777777787" calcext:value-type="float">
            <text:p>0,000002777777777777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4" office:value-type="float" office:value="8304" calcext:value-type="float">
            <text:p>830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961111111111111" calcext:value-type="float">
            <text:p>0,00096111111111111100</text:p>
          </table:table-cell>
          <table:table-cell table:formula="of:=[.D348]-[.D3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4" office:value-type="float" office:value="8328" calcext:value-type="float">
            <text:p>832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963888888888889" calcext:value-type="float">
            <text:p>0,00096388888888888900</text:p>
          </table:table-cell>
          <table:table-cell table:formula="of:=[.D349]-[.D3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4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966666666666667" calcext:value-type="float">
            <text:p>0,00096666666666666700</text:p>
          </table:table-cell>
          <table:table-cell table:formula="of:=[.D350]-[.D3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4" office:value-type="float" office:value="8376" calcext:value-type="float">
            <text:p>837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969444444444444" calcext:value-type="float">
            <text:p>0,00096944444444444400</text:p>
          </table:table-cell>
          <table:table-cell table:formula="of:=[.D351]-[.D3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4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972222222222222" calcext:value-type="float">
            <text:p>0,00097222222222222200</text:p>
          </table:table-cell>
          <table:table-cell table:formula="of:=[.D352]-[.D3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4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975" calcext:value-type="float">
            <text:p>0,00097500000000000000</text:p>
          </table:table-cell>
          <table:table-cell table:formula="of:=[.D353]-[.D3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4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977777777777778" calcext:value-type="float">
            <text:p>0,00097777777777777800</text:p>
          </table:table-cell>
          <table:table-cell table:formula="of:=[.D354]-[.D3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4" office:value-type="float" office:value="8472" calcext:value-type="float">
            <text:p>847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980555555555556" calcext:value-type="float">
            <text:p>0,00098055555555555600</text:p>
          </table:table-cell>
          <table:table-cell table:formula="of:=[.D355]-[.D3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4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983333333333333" calcext:value-type="float">
            <text:p>0,00098333333333333300</text:p>
          </table:table-cell>
          <table:table-cell table:formula="of:=[.D356]-[.D355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4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986111111111111" calcext:value-type="float">
            <text:p>0,00098611111111111100</text:p>
          </table:table-cell>
          <table:table-cell table:formula="of:=[.D357]-[.D3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4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988888888888889" calcext:value-type="float">
            <text:p>0,00098888888888888900</text:p>
          </table:table-cell>
          <table:table-cell table:formula="of:=[.D358]-[.D3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4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991666666666667" calcext:value-type="float">
            <text:p>0,00099166666666666700</text:p>
          </table:table-cell>
          <table:table-cell table:formula="of:=[.D359]-[.D3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4" office:value-type="float" office:value="8592" calcext:value-type="float">
            <text:p>859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994444444444445" calcext:value-type="float">
            <text:p>0,00099444444444444500</text:p>
          </table:table-cell>
          <table:table-cell table:formula="of:=[.D360]-[.D3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4" office:value-type="float" office:value="8616" calcext:value-type="float">
            <text:p>861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997222222222222" calcext:value-type="float">
            <text:p>0,00099722222222222200</text:p>
          </table:table-cell>
          <table:table-cell table:formula="of:=[.D361]-[.D3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4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" calcext:value-type="float">
            <text:p>0,00100000000000000000</text:p>
          </table:table-cell>
          <table:table-cell table:formula="of:=[.D362]-[.D3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4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00277777777778" calcext:value-type="float">
            <text:p>0,00100277777777778000</text:p>
          </table:table-cell>
          <table:table-cell table:formula="of:=[.D363]-[.D3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4" office:value-type="float" office:value="8688" calcext:value-type="float">
            <text:p>868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00555555555556" calcext:value-type="float">
            <text:p>0,00100555555555556000</text:p>
          </table:table-cell>
          <table:table-cell table:formula="of:=[.D364]-[.D3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4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00833333333333" calcext:value-type="float">
            <text:p>0,00100833333333333000</text:p>
          </table:table-cell>
          <table:table-cell table:formula="of:=[.D365]-[.D3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4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01111111111111" calcext:value-type="float">
            <text:p>0,00101111111111111000</text:p>
          </table:table-cell>
          <table:table-cell table:formula="of:=[.D366]-[.D3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4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01388888888889" calcext:value-type="float">
            <text:p>0,00101388888888889000</text:p>
          </table:table-cell>
          <table:table-cell table:formula="of:=[.D367]-[.D3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4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01666666666667" calcext:value-type="float">
            <text:p>0,00101666666666667000</text:p>
          </table:table-cell>
          <table:table-cell table:formula="of:=[.D368]-[.D3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4" office:value-type="float" office:value="8808" calcext:value-type="float">
            <text:p>880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01944444444444" calcext:value-type="float">
            <text:p>0,00101944444444444000</text:p>
          </table:table-cell>
          <table:table-cell table:formula="of:=[.D369]-[.D368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4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02222222222222" calcext:value-type="float">
            <text:p>0,00102222222222222000</text:p>
          </table:table-cell>
          <table:table-cell table:formula="of:=[.D370]-[.D3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4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025" calcext:value-type="float">
            <text:p>0,00102500000000000000</text:p>
          </table:table-cell>
          <table:table-cell table:formula="of:=[.D371]-[.D3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4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02777777777778" calcext:value-type="float">
            <text:p>0,00102777777777778000</text:p>
          </table:table-cell>
          <table:table-cell table:formula="of:=[.D372]-[.D3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4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03055555555556" calcext:value-type="float">
            <text:p>0,00103055555555556000</text:p>
          </table:table-cell>
          <table:table-cell table:formula="of:=[.D373]-[.D3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4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03333333333333" calcext:value-type="float">
            <text:p>0,00103333333333333000</text:p>
          </table:table-cell>
          <table:table-cell table:formula="of:=[.D374]-[.D3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4" office:value-type="float" office:value="8952" calcext:value-type="float">
            <text:p>895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03611111111111" calcext:value-type="float">
            <text:p>0,00103611111111111000</text:p>
          </table:table-cell>
          <table:table-cell table:formula="of:=[.D375]-[.D3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4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03888888888889" calcext:value-type="float">
            <text:p>0,00103888888888889000</text:p>
          </table:table-cell>
          <table:table-cell table:formula="of:=[.D376]-[.D3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4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04166666666667" calcext:value-type="float">
            <text:p>0,00104166666666667000</text:p>
          </table:table-cell>
          <table:table-cell table:formula="of:=[.D377]-[.D3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4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04444444444444" calcext:value-type="float">
            <text:p>0,00104444444444444000</text:p>
          </table:table-cell>
          <table:table-cell table:formula="of:=[.D378]-[.D3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4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04722222222222" calcext:value-type="float">
            <text:p>0,00104722222222222000</text:p>
          </table:table-cell>
          <table:table-cell table:formula="of:=[.D379]-[.D3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4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05" calcext:value-type="float">
            <text:p>0,00105000000000000000</text:p>
          </table:table-cell>
          <table:table-cell table:formula="of:=[.D380]-[.D3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4" office:value-type="float" office:value="9096" calcext:value-type="float">
            <text:p>9096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05277777777778" calcext:value-type="float">
            <text:p>0,00105277777777778000</text:p>
          </table:table-cell>
          <table:table-cell table:formula="of:=[.D381]-[.D3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4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05555555555556" calcext:value-type="float">
            <text:p>0,00105555555555556000</text:p>
          </table:table-cell>
          <table:table-cell table:formula="of:=[.D382]-[.D381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4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05833333333333" calcext:value-type="float">
            <text:p>0,00105833333333333000</text:p>
          </table:table-cell>
          <table:table-cell table:formula="of:=[.D383]-[.D3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4" office:value-type="float" office:value="9168" calcext:value-type="float">
            <text:p>916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06111111111111" calcext:value-type="float">
            <text:p>0,00106111111111111000</text:p>
          </table:table-cell>
          <table:table-cell table:formula="of:=[.D384]-[.D3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4" office:value-type="float" office:value="9192" calcext:value-type="float">
            <text:p>9192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06388888888889" calcext:value-type="float">
            <text:p>0,00106388888888889000</text:p>
          </table:table-cell>
          <table:table-cell table:formula="of:=[.D385]-[.D3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4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06666666666667" calcext:value-type="float">
            <text:p>0,00106666666666667000</text:p>
          </table:table-cell>
          <table:table-cell table:formula="of:=[.D386]-[.D3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4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06944444444444" calcext:value-type="float">
            <text:p>0,00106944444444444000</text:p>
          </table:table-cell>
          <table:table-cell table:formula="of:=[.D387]-[.D3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4" office:value-type="float" office:value="9264" calcext:value-type="float">
            <text:p>926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07222222222222" calcext:value-type="float">
            <text:p>0,00107222222222222000</text:p>
          </table:table-cell>
          <table:table-cell table:formula="of:=[.D388]-[.D3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4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075" calcext:value-type="float">
            <text:p>0,00107500000000000000</text:p>
          </table:table-cell>
          <table:table-cell table:formula="of:=[.D389]-[.D3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4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07777777777778" calcext:value-type="float">
            <text:p>0,00107777777777778000</text:p>
          </table:table-cell>
          <table:table-cell table:formula="of:=[.D390]-[.D3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4" office:value-type="float" office:value="9336" calcext:value-type="float">
            <text:p>9336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08055555555556" calcext:value-type="float">
            <text:p>0,00108055555555556000</text:p>
          </table:table-cell>
          <table:table-cell table:formula="of:=[.D391]-[.D3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4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08333333333333" calcext:value-type="float">
            <text:p>0,00108333333333333000</text:p>
          </table:table-cell>
          <table:table-cell table:formula="of:=[.D392]-[.D3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4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08611111111111" calcext:value-type="float">
            <text:p>0,00108611111111111000</text:p>
          </table:table-cell>
          <table:table-cell table:formula="of:=[.D393]-[.D3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4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08888888888889" calcext:value-type="float">
            <text:p>0,00108888888888889000</text:p>
          </table:table-cell>
          <table:table-cell table:formula="of:=[.D394]-[.D3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4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09166666666667" calcext:value-type="float">
            <text:p>0,00109166666666667000</text:p>
          </table:table-cell>
          <table:table-cell table:formula="of:=[.D395]-[.D394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4" office:value-type="float" office:value="9456" calcext:value-type="float">
            <text:p>945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09444444444444" calcext:value-type="float">
            <text:p>0,00109444444444444000</text:p>
          </table:table-cell>
          <table:table-cell table:formula="of:=[.D396]-[.D3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4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09722222222222" calcext:value-type="float">
            <text:p>0,00109722222222222000</text:p>
          </table:table-cell>
          <table:table-cell table:formula="of:=[.D397]-[.D3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4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1" calcext:value-type="float">
            <text:p>0,00110000000000000000</text:p>
          </table:table-cell>
          <table:table-cell table:formula="of:=[.D398]-[.D3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4" office:value-type="float" office:value="9528" calcext:value-type="float">
            <text:p>9528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10277777777778" calcext:value-type="float">
            <text:p>0,00110277777777778000</text:p>
          </table:table-cell>
          <table:table-cell table:formula="of:=[.D399]-[.D3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4" office:value-type="float" office:value="9552" calcext:value-type="float">
            <text:p>955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10555555555556" calcext:value-type="float">
            <text:p>0,00110555555555556000</text:p>
          </table:table-cell>
          <table:table-cell table:formula="of:=[.D400]-[.D3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4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10833333333333" calcext:value-type="float">
            <text:p>0,00110833333333333000</text:p>
          </table:table-cell>
          <table:table-cell table:formula="of:=[.D401]-[.D4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4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11111111111111" calcext:value-type="float">
            <text:p>0,00111111111111111000</text:p>
          </table:table-cell>
          <table:table-cell table:formula="of:=[.D402]-[.D4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4" office:value-type="float" office:value="9624" calcext:value-type="float">
            <text:p>9624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11388888888889" calcext:value-type="float">
            <text:p>0,00111388888888889000</text:p>
          </table:table-cell>
          <table:table-cell table:formula="of:=[.D403]-[.D4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4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11666666666667" calcext:value-type="float">
            <text:p>0,00111666666666667000</text:p>
          </table:table-cell>
          <table:table-cell table:formula="of:=[.D404]-[.D4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4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11944444444444" calcext:value-type="float">
            <text:p>0,00111944444444444000</text:p>
          </table:table-cell>
          <table:table-cell table:formula="of:=[.D405]-[.D4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4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12222222222222" calcext:value-type="float">
            <text:p>0,00112222222222222000</text:p>
          </table:table-cell>
          <table:table-cell table:formula="of:=[.D406]-[.D4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4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125" calcext:value-type="float">
            <text:p>0,00112500000000000000</text:p>
          </table:table-cell>
          <table:table-cell table:formula="of:=[.D407]-[.D4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4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12777777777778" calcext:value-type="float">
            <text:p>0,00112777777777778000</text:p>
          </table:table-cell>
          <table:table-cell table:formula="of:=[.D408]-[.D407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4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13055555555556" calcext:value-type="float">
            <text:p>0,00113055555555556000</text:p>
          </table:table-cell>
          <table:table-cell table:formula="of:=[.D409]-[.D4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4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13333333333333" calcext:value-type="float">
            <text:p>0,00113333333333333000</text:p>
          </table:table-cell>
          <table:table-cell table:formula="of:=[.D410]-[.D4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4" office:value-type="float" office:value="9816" calcext:value-type="float">
            <text:p>9816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13611111111111" calcext:value-type="float">
            <text:p>0,00113611111111111000</text:p>
          </table:table-cell>
          <table:table-cell table:formula="of:=[.D411]-[.D4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4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13888888888889" calcext:value-type="float">
            <text:p>0,00113888888888889000</text:p>
          </table:table-cell>
          <table:table-cell table:formula="of:=[.D412]-[.D4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4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14166666666667" calcext:value-type="float">
            <text:p>0,00114166666666667000</text:p>
          </table:table-cell>
          <table:table-cell table:formula="of:=[.D413]-[.D4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4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14444444444444" calcext:value-type="float">
            <text:p>0,00114444444444444000</text:p>
          </table:table-cell>
          <table:table-cell table:formula="of:=[.D414]-[.D4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4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14722222222222" calcext:value-type="float">
            <text:p>0,00114722222222222000</text:p>
          </table:table-cell>
          <table:table-cell table:formula="of:=[.D415]-[.D4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4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15" calcext:value-type="float">
            <text:p>0,00115000000000000000</text:p>
          </table:table-cell>
          <table:table-cell table:formula="of:=[.D416]-[.D4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4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15277777777778" calcext:value-type="float">
            <text:p>0,00115277777777778000</text:p>
          </table:table-cell>
          <table:table-cell table:formula="of:=[.D417]-[.D4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4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15555555555556" calcext:value-type="float">
            <text:p>0,00115555555555556000</text:p>
          </table:table-cell>
          <table:table-cell table:formula="of:=[.D418]-[.D4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4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15833333333333" calcext:value-type="float">
            <text:p>0,00115833333333333000</text:p>
          </table:table-cell>
          <table:table-cell table:formula="of:=[.D419]-[.D4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4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16111111111111" calcext:value-type="float">
            <text:p>0,00116111111111111000</text:p>
          </table:table-cell>
          <table:table-cell table:formula="of:=[.D420]-[.D4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4" office:value-type="float" office:value="10056" calcext:value-type="float">
            <text:p>10056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16388888888889" calcext:value-type="float">
            <text:p>0,00116388888888889000</text:p>
          </table:table-cell>
          <table:table-cell table:formula="of:=[.D421]-[.D420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4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16666666666667" calcext:value-type="float">
            <text:p>0,00116666666666667000</text:p>
          </table:table-cell>
          <table:table-cell table:formula="of:=[.D422]-[.D4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4" office:value-type="float" office:value="10104" calcext:value-type="float">
            <text:p>10104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16944444444444" calcext:value-type="float">
            <text:p>0,00116944444444444000</text:p>
          </table:table-cell>
          <table:table-cell table:formula="of:=[.D423]-[.D4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4" office:value-type="float" office:value="10128" calcext:value-type="float">
            <text:p>1012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17222222222222" calcext:value-type="float">
            <text:p>0,00117222222222222000</text:p>
          </table:table-cell>
          <table:table-cell table:formula="of:=[.D424]-[.D4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4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175" calcext:value-type="float">
            <text:p>0,00117500000000000000</text:p>
          </table:table-cell>
          <table:table-cell table:formula="of:=[.D425]-[.D4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4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17777777777778" calcext:value-type="float">
            <text:p>0,00117777777777778000</text:p>
          </table:table-cell>
          <table:table-cell table:formula="of:=[.D426]-[.D4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4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18055555555556" calcext:value-type="float">
            <text:p>0,00118055555555556000</text:p>
          </table:table-cell>
          <table:table-cell table:formula="of:=[.D427]-[.D4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4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18333333333333" calcext:value-type="float">
            <text:p>0,00118333333333333000</text:p>
          </table:table-cell>
          <table:table-cell table:formula="of:=[.D428]-[.D4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4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18611111111111" calcext:value-type="float">
            <text:p>0,00118611111111111000</text:p>
          </table:table-cell>
          <table:table-cell table:formula="of:=[.D429]-[.D4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4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18888888888889" calcext:value-type="float">
            <text:p>0,00118888888888889000</text:p>
          </table:table-cell>
          <table:table-cell table:formula="of:=[.D430]-[.D4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4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19166666666667" calcext:value-type="float">
            <text:p>0,00119166666666667000</text:p>
          </table:table-cell>
          <table:table-cell table:formula="of:=[.D431]-[.D4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4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19444444444444" calcext:value-type="float">
            <text:p>0,00119444444444444000</text:p>
          </table:table-cell>
          <table:table-cell table:formula="of:=[.D432]-[.D4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4" office:value-type="float" office:value="10344" calcext:value-type="float">
            <text:p>10344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19722222222222" calcext:value-type="float">
            <text:p>0,00119722222222222000</text:p>
          </table:table-cell>
          <table:table-cell table:formula="of:=[.D433]-[.D4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4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2" calcext:value-type="float">
            <text:p>0,00120000000000000000</text:p>
          </table:table-cell>
          <table:table-cell table:formula="of:=[.D434]-[.D433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4" office:value-type="float" office:value="10392" calcext:value-type="float">
            <text:p>10392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20277777777778" calcext:value-type="float">
            <text:p>0,00120277777777778000</text:p>
          </table:table-cell>
          <table:table-cell table:formula="of:=[.D435]-[.D4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4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20555555555556" calcext:value-type="float">
            <text:p>0,00120555555555556000</text:p>
          </table:table-cell>
          <table:table-cell table:formula="of:=[.D436]-[.D4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4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20833333333333" calcext:value-type="float">
            <text:p>0,00120833333333333000</text:p>
          </table:table-cell>
          <table:table-cell table:formula="of:=[.D437]-[.D4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4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21111111111111" calcext:value-type="float">
            <text:p>0,00121111111111111000</text:p>
          </table:table-cell>
          <table:table-cell table:formula="of:=[.D438]-[.D4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4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21388888888889" calcext:value-type="float">
            <text:p>0,00121388888888889000</text:p>
          </table:table-cell>
          <table:table-cell table:formula="of:=[.D439]-[.D4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4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21666666666667" calcext:value-type="float">
            <text:p>0,00121666666666667000</text:p>
          </table:table-cell>
          <table:table-cell table:formula="of:=[.D440]-[.D4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4" office:value-type="float" office:value="10536" calcext:value-type="float">
            <text:p>10536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21944444444444" calcext:value-type="float">
            <text:p>0,00121944444444444000</text:p>
          </table:table-cell>
          <table:table-cell table:formula="of:=[.D441]-[.D4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4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22222222222222" calcext:value-type="float">
            <text:p>0,00122222222222222000</text:p>
          </table:table-cell>
          <table:table-cell table:formula="of:=[.D442]-[.D4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4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225" calcext:value-type="float">
            <text:p>0,00122500000000000000</text:p>
          </table:table-cell>
          <table:table-cell table:formula="of:=[.D443]-[.D4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4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22777777777778" calcext:value-type="float">
            <text:p>0,00122777777777778000</text:p>
          </table:table-cell>
          <table:table-cell table:formula="of:=[.D444]-[.D4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4" office:value-type="float" office:value="10632" calcext:value-type="float">
            <text:p>10632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23055555555556" calcext:value-type="float">
            <text:p>0,00123055555555556000</text:p>
          </table:table-cell>
          <table:table-cell table:formula="of:=[.D445]-[.D4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4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23333333333333" calcext:value-type="float">
            <text:p>0,00123333333333333000</text:p>
          </table:table-cell>
          <table:table-cell table:formula="of:=[.D446]-[.D4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4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23611111111111" calcext:value-type="float">
            <text:p>0,00123611111111111000</text:p>
          </table:table-cell>
          <table:table-cell table:formula="of:=[.D447]-[.D446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4" office:value-type="float" office:value="10704" calcext:value-type="float">
            <text:p>1070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23888888888889" calcext:value-type="float">
            <text:p>0,00123888888888889000</text:p>
          </table:table-cell>
          <table:table-cell table:formula="of:=[.D448]-[.D4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4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24166666666667" calcext:value-type="float">
            <text:p>0,00124166666666667000</text:p>
          </table:table-cell>
          <table:table-cell table:formula="of:=[.D449]-[.D4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4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24444444444444" calcext:value-type="float">
            <text:p>0,00124444444444444000</text:p>
          </table:table-cell>
          <table:table-cell table:formula="of:=[.D450]-[.D4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4" office:value-type="float" office:value="10776" calcext:value-type="float">
            <text:p>10776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24722222222222" calcext:value-type="float">
            <text:p>0,00124722222222222000</text:p>
          </table:table-cell>
          <table:table-cell table:formula="of:=[.D451]-[.D4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4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25" calcext:value-type="float">
            <text:p>0,00125000000000000000</text:p>
          </table:table-cell>
          <table:table-cell table:formula="of:=[.D452]-[.D4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4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25277777777778" calcext:value-type="float">
            <text:p>0,00125277777777778000</text:p>
          </table:table-cell>
          <table:table-cell table:formula="of:=[.D453]-[.D4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4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25555555555556" calcext:value-type="float">
            <text:p>0,00125555555555556000</text:p>
          </table:table-cell>
          <table:table-cell table:formula="of:=[.D454]-[.D4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4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25833333333333" calcext:value-type="float">
            <text:p>0,00125833333333333000</text:p>
          </table:table-cell>
          <table:table-cell table:formula="of:=[.D455]-[.D4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4" office:value-type="float" office:value="10896" calcext:value-type="float">
            <text:p>1089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26111111111111" calcext:value-type="float">
            <text:p>0,00126111111111111000</text:p>
          </table:table-cell>
          <table:table-cell table:formula="of:=[.D456]-[.D4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4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26388888888889" calcext:value-type="float">
            <text:p>0,00126388888888889000</text:p>
          </table:table-cell>
          <table:table-cell table:formula="of:=[.D457]-[.D4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4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26666666666667" calcext:value-type="float">
            <text:p>0,00126666666666667000</text:p>
          </table:table-cell>
          <table:table-cell table:formula="of:=[.D458]-[.D4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4" office:value-type="float" office:value="10968" calcext:value-type="float">
            <text:p>10968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26944444444444" calcext:value-type="float">
            <text:p>0,00126944444444444000</text:p>
          </table:table-cell>
          <table:table-cell table:formula="of:=[.D459]-[.D458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4" office:value-type="float" office:value="10992" calcext:value-type="float">
            <text:p>1099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27222222222222" calcext:value-type="float">
            <text:p>0,00127222222222222000</text:p>
          </table:table-cell>
          <table:table-cell table:formula="of:=[.D460]-[.D4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4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275" calcext:value-type="float">
            <text:p>0,00127500000000000000</text:p>
          </table:table-cell>
          <table:table-cell table:formula="of:=[.D461]-[.D4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4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27777777777778" calcext:value-type="float">
            <text:p>0,00127777777777778000</text:p>
          </table:table-cell>
          <table:table-cell table:formula="of:=[.D462]-[.D4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4" office:value-type="float" office:value="11064" calcext:value-type="float">
            <text:p>11064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28055555555556" calcext:value-type="float">
            <text:p>0,00128055555555556000</text:p>
          </table:table-cell>
          <table:table-cell table:formula="of:=[.D463]-[.D4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4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28333333333333" calcext:value-type="float">
            <text:p>0,00128333333333333000</text:p>
          </table:table-cell>
          <table:table-cell table:formula="of:=[.D464]-[.D4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4" office:value-type="float" office:value="11112" calcext:value-type="float">
            <text:p>11112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28611111111111" calcext:value-type="float">
            <text:p>0,00128611111111111000</text:p>
          </table:table-cell>
          <table:table-cell table:formula="of:=[.D465]-[.D4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4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28888888888889" calcext:value-type="float">
            <text:p>0,00128888888888889000</text:p>
          </table:table-cell>
          <table:table-cell table:formula="of:=[.D466]-[.D4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4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29166666666667" calcext:value-type="float">
            <text:p>0,00129166666666667000</text:p>
          </table:table-cell>
          <table:table-cell table:formula="of:=[.D467]-[.D4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4" office:value-type="float" office:value="11184" calcext:value-type="float">
            <text:p>1118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29444444444444" calcext:value-type="float">
            <text:p>0,00129444444444444000</text:p>
          </table:table-cell>
          <table:table-cell table:formula="of:=[.D468]-[.D4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4" office:value-type="float" office:value="11208" calcext:value-type="float">
            <text:p>11208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29722222222222" calcext:value-type="float">
            <text:p>0,00129722222222222000</text:p>
          </table:table-cell>
          <table:table-cell table:formula="of:=[.D469]-[.D4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4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3" calcext:value-type="float">
            <text:p>0,00130000000000000000</text:p>
          </table:table-cell>
          <table:table-cell table:formula="of:=[.D470]-[.D4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4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30277777777778" calcext:value-type="float">
            <text:p>0,00130277777777778000</text:p>
          </table:table-cell>
          <table:table-cell table:formula="of:=[.D471]-[.D4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4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30555555555556" calcext:value-type="float">
            <text:p>0,00130555555555556000</text:p>
          </table:table-cell>
          <table:table-cell table:formula="of:=[.D472]-[.D471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4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30833333333333" calcext:value-type="float">
            <text:p>0,00130833333333333000</text:p>
          </table:table-cell>
          <table:table-cell table:formula="of:=[.D473]-[.D4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4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31111111111111" calcext:value-type="float">
            <text:p>0,00131111111111111000</text:p>
          </table:table-cell>
          <table:table-cell table:formula="of:=[.D474]-[.D4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4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31388888888889" calcext:value-type="float">
            <text:p>0,00131388888888889000</text:p>
          </table:table-cell>
          <table:table-cell table:formula="of:=[.D475]-[.D4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4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31666666666667" calcext:value-type="float">
            <text:p>0,00131666666666667000</text:p>
          </table:table-cell>
          <table:table-cell table:formula="of:=[.D476]-[.D4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4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31944444444444" calcext:value-type="float">
            <text:p>0,00131944444444444000</text:p>
          </table:table-cell>
          <table:table-cell table:formula="of:=[.D477]-[.D4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4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32222222222222" calcext:value-type="float">
            <text:p>0,00132222222222222000</text:p>
          </table:table-cell>
          <table:table-cell table:formula="of:=[.D478]-[.D4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4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325" calcext:value-type="float">
            <text:p>0,00132500000000000000</text:p>
          </table:table-cell>
          <table:table-cell table:formula="of:=[.D479]-[.D4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4" office:value-type="float" office:value="11472" calcext:value-type="float">
            <text:p>1147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32777777777778" calcext:value-type="float">
            <text:p>0,00132777777777778000</text:p>
          </table:table-cell>
          <table:table-cell table:formula="of:=[.D480]-[.D4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4" office:value-type="float" office:value="11496" calcext:value-type="float">
            <text:p>11496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33055555555556" calcext:value-type="float">
            <text:p>0,00133055555555556000</text:p>
          </table:table-cell>
          <table:table-cell table:formula="of:=[.D481]-[.D4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4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33333333333333" calcext:value-type="float">
            <text:p>0,00133333333333333000</text:p>
          </table:table-cell>
          <table:table-cell table:formula="of:=[.D482]-[.D4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4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33611111111111" calcext:value-type="float">
            <text:p>0,00133611111111111000</text:p>
          </table:table-cell>
          <table:table-cell table:formula="of:=[.D483]-[.D4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4" office:value-type="float" office:value="11568" calcext:value-type="float">
            <text:p>1156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33888888888889" calcext:value-type="float">
            <text:p>0,00133888888888889000</text:p>
          </table:table-cell>
          <table:table-cell table:formula="of:=[.D484]-[.D4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4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34166666666667" calcext:value-type="float">
            <text:p>0,00134166666666667000</text:p>
          </table:table-cell>
          <table:table-cell table:formula="of:=[.D485]-[.D484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4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34444444444444" calcext:value-type="float">
            <text:p>0,00134444444444444000</text:p>
          </table:table-cell>
          <table:table-cell table:formula="of:=[.D486]-[.D4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4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34722222222222" calcext:value-type="float">
            <text:p>0,00134722222222222000</text:p>
          </table:table-cell>
          <table:table-cell table:formula="of:=[.D487]-[.D4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4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35" calcext:value-type="float">
            <text:p>0,00135000000000000000</text:p>
          </table:table-cell>
          <table:table-cell table:formula="of:=[.D488]-[.D4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4" office:value-type="float" office:value="11688" calcext:value-type="float">
            <text:p>11688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35277777777778" calcext:value-type="float">
            <text:p>0,00135277777777778000</text:p>
          </table:table-cell>
          <table:table-cell table:formula="of:=[.D489]-[.D4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4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35555555555556" calcext:value-type="float">
            <text:p>0,00135555555555556000</text:p>
          </table:table-cell>
          <table:table-cell table:formula="of:=[.D490]-[.D4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4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35833333333333" calcext:value-type="float">
            <text:p>0,00135833333333333000</text:p>
          </table:table-cell>
          <table:table-cell table:formula="of:=[.D491]-[.D4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4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36111111111111" calcext:value-type="float">
            <text:p>0,00136111111111111000</text:p>
          </table:table-cell>
          <table:table-cell table:formula="of:=[.D492]-[.D4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4" office:value-type="float" office:value="11784" calcext:value-type="float">
            <text:p>11784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36388888888889" calcext:value-type="float">
            <text:p>0,00136388888888889000</text:p>
          </table:table-cell>
          <table:table-cell table:formula="of:=[.D493]-[.D4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4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36666666666667" calcext:value-type="float">
            <text:p>0,00136666666666667000</text:p>
          </table:table-cell>
          <table:table-cell table:formula="of:=[.D494]-[.D4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4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36944444444444" calcext:value-type="float">
            <text:p>0,00136944444444444000</text:p>
          </table:table-cell>
          <table:table-cell table:formula="of:=[.D495]-[.D4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4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37222222222222" calcext:value-type="float">
            <text:p>0,00137222222222222000</text:p>
          </table:table-cell>
          <table:table-cell table:formula="of:=[.D496]-[.D4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4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375" calcext:value-type="float">
            <text:p>0,00137500000000000000</text:p>
          </table:table-cell>
          <table:table-cell table:formula="of:=[.D497]-[.D4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4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37777777777778" calcext:value-type="float">
            <text:p>0,00137777777777778000</text:p>
          </table:table-cell>
          <table:table-cell table:formula="of:=[.D498]-[.D497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4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38055555555556" calcext:value-type="float">
            <text:p>0,00138055555555556000</text:p>
          </table:table-cell>
          <table:table-cell table:formula="of:=[.D499]-[.D4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4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38333333333333" calcext:value-type="float">
            <text:p>0,00138333333333333000</text:p>
          </table:table-cell>
          <table:table-cell table:formula="of:=[.D500]-[.D4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4" office:value-type="float" office:value="11976" calcext:value-type="float">
            <text:p>11976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38611111111111" calcext:value-type="float">
            <text:p>0,00138611111111111000</text:p>
          </table:table-cell>
          <table:table-cell table:formula="of:=[.D501]-[.D5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4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38888888888889" calcext:value-type="float">
            <text:p>0,00138888888888889000</text:p>
          </table:table-cell>
          <table:table-cell table:formula="of:=[.D502]-[.D5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4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39166666666667" calcext:value-type="float">
            <text:p>0,00139166666666667000</text:p>
          </table:table-cell>
          <table:table-cell table:formula="of:=[.D503]-[.D5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4" office:value-type="float" office:value="12048" calcext:value-type="float">
            <text:p>1204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39444444444444" calcext:value-type="float">
            <text:p>0,00139444444444444000</text:p>
          </table:table-cell>
          <table:table-cell table:formula="of:=[.D504]-[.D5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4" office:value-type="float" office:value="12072" calcext:value-type="float">
            <text:p>12072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39722222222222" calcext:value-type="float">
            <text:p>0,00139722222222222000</text:p>
          </table:table-cell>
          <table:table-cell table:formula="of:=[.D505]-[.D5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4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4" calcext:value-type="float">
            <text:p>0,00140000000000000000</text:p>
          </table:table-cell>
          <table:table-cell table:formula="of:=[.D506]-[.D5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4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40277777777778" calcext:value-type="float">
            <text:p>0,00140277777777778000</text:p>
          </table:table-cell>
          <table:table-cell table:formula="of:=[.D507]-[.D5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4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40555555555556" calcext:value-type="float">
            <text:p>0,00140555555555556000</text:p>
          </table:table-cell>
          <table:table-cell table:formula="of:=[.D508]-[.D5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4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40833333333333" calcext:value-type="float">
            <text:p>0,00140833333333333000</text:p>
          </table:table-cell>
          <table:table-cell table:formula="of:=[.D509]-[.D5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4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41111111111111" calcext:value-type="float">
            <text:p>0,00141111111111111000</text:p>
          </table:table-cell>
          <table:table-cell table:formula="of:=[.D510]-[.D5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4" office:value-type="float" office:value="12216" calcext:value-type="float">
            <text:p>12216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41388888888889" calcext:value-type="float">
            <text:p>0,00141388888888889000</text:p>
          </table:table-cell>
          <table:table-cell table:formula="of:=[.D511]-[.D510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4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41666666666667" calcext:value-type="float">
            <text:p>0,00141666666666667000</text:p>
          </table:table-cell>
          <table:table-cell table:formula="of:=[.D512]-[.D5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4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41944444444444" calcext:value-type="float">
            <text:p>0,00141944444444444000</text:p>
          </table:table-cell>
          <table:table-cell table:formula="of:=[.D513]-[.D5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4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42222222222222" calcext:value-type="float">
            <text:p>0,00142222222222222000</text:p>
          </table:table-cell>
          <table:table-cell table:formula="of:=[.D514]-[.D5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4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425" calcext:value-type="float">
            <text:p>0,00142500000000000000</text:p>
          </table:table-cell>
          <table:table-cell table:formula="of:=[.D515]-[.D5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4" office:value-type="float" office:value="12336" calcext:value-type="float">
            <text:p>1233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42777777777778" calcext:value-type="float">
            <text:p>0,00142777777777778000</text:p>
          </table:table-cell>
          <table:table-cell table:formula="of:=[.D516]-[.D5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4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43055555555556" calcext:value-type="float">
            <text:p>0,00143055555555556000</text:p>
          </table:table-cell>
          <table:table-cell table:formula="of:=[.D517]-[.D5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4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43333333333333" calcext:value-type="float">
            <text:p>0,00143333333333333000</text:p>
          </table:table-cell>
          <table:table-cell table:formula="of:=[.D518]-[.D5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4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43611111111111" calcext:value-type="float">
            <text:p>0,00143611111111111000</text:p>
          </table:table-cell>
          <table:table-cell table:formula="of:=[.D519]-[.D5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4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43888888888889" calcext:value-type="float">
            <text:p>0,00143888888888889000</text:p>
          </table:table-cell>
          <table:table-cell table:formula="of:=[.D520]-[.D5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4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44166666666667" calcext:value-type="float">
            <text:p>0,00144166666666667000</text:p>
          </table:table-cell>
          <table:table-cell table:formula="of:=[.D521]-[.D5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4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44444444444444" calcext:value-type="float">
            <text:p>0,00144444444444444000</text:p>
          </table:table-cell>
          <table:table-cell table:formula="of:=[.D522]-[.D5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4" office:value-type="float" office:value="12504" calcext:value-type="float">
            <text:p>12504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44722222222222" calcext:value-type="float">
            <text:p>0,00144722222222222000</text:p>
          </table:table-cell>
          <table:table-cell table:formula="of:=[.D523]-[.D5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4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45" calcext:value-type="float">
            <text:p>0,00145000000000000000</text:p>
          </table:table-cell>
          <table:table-cell table:formula="of:=[.D524]-[.D523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4" office:value-type="float" office:value="12552" calcext:value-type="float">
            <text:p>12552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45277777777778" calcext:value-type="float">
            <text:p>0,00145277777777778000</text:p>
          </table:table-cell>
          <table:table-cell table:formula="of:=[.D525]-[.D5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4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45555555555556" calcext:value-type="float">
            <text:p>0,00145555555555556000</text:p>
          </table:table-cell>
          <table:table-cell table:formula="of:=[.D526]-[.D5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4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45833333333333" calcext:value-type="float">
            <text:p>0,00145833333333333000</text:p>
          </table:table-cell>
          <table:table-cell table:formula="of:=[.D527]-[.D5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4" office:value-type="float" office:value="12624" calcext:value-type="float">
            <text:p>1262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46111111111111" calcext:value-type="float">
            <text:p>0,00146111111111111000</text:p>
          </table:table-cell>
          <table:table-cell table:formula="of:=[.D528]-[.D5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4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46388888888889" calcext:value-type="float">
            <text:p>0,00146388888888889000</text:p>
          </table:table-cell>
          <table:table-cell table:formula="of:=[.D529]-[.D5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4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46666666666667" calcext:value-type="float">
            <text:p>0,00146666666666667000</text:p>
          </table:table-cell>
          <table:table-cell table:formula="of:=[.D530]-[.D5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4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46944444444444" calcext:value-type="float">
            <text:p>0,00146944444444444000</text:p>
          </table:table-cell>
          <table:table-cell table:formula="of:=[.D531]-[.D5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4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47222222222222" calcext:value-type="float">
            <text:p>0,00147222222222222000</text:p>
          </table:table-cell>
          <table:table-cell table:formula="of:=[.D532]-[.D5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4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475" calcext:value-type="float">
            <text:p>0,00147500000000000000</text:p>
          </table:table-cell>
          <table:table-cell table:formula="of:=[.D533]-[.D5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4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47777777777778" calcext:value-type="float">
            <text:p>0,00147777777777778000</text:p>
          </table:table-cell>
          <table:table-cell table:formula="of:=[.D534]-[.D5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4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48055555555556" calcext:value-type="float">
            <text:p>0,00148055555555556000</text:p>
          </table:table-cell>
          <table:table-cell table:formula="of:=[.D535]-[.D5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4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48333333333333" calcext:value-type="float">
            <text:p>0,00148333333333333000</text:p>
          </table:table-cell>
          <table:table-cell table:formula="of:=[.D536]-[.D5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4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48611111111111" calcext:value-type="float">
            <text:p>0,00148611111111111000</text:p>
          </table:table-cell>
          <table:table-cell table:formula="of:=[.D537]-[.D536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4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48888888888889" calcext:value-type="float">
            <text:p>0,00148888888888889000</text:p>
          </table:table-cell>
          <table:table-cell table:formula="of:=[.D538]-[.D5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4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49166666666667" calcext:value-type="float">
            <text:p>0,00149166666666667000</text:p>
          </table:table-cell>
          <table:table-cell table:formula="of:=[.D539]-[.D5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4" office:value-type="float" office:value="12912" calcext:value-type="float">
            <text:p>1291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49444444444444" calcext:value-type="float">
            <text:p>0,00149444444444444000</text:p>
          </table:table-cell>
          <table:table-cell table:formula="of:=[.D540]-[.D5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4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49722222222222" calcext:value-type="float">
            <text:p>0,00149722222222222000</text:p>
          </table:table-cell>
          <table:table-cell table:formula="of:=[.D541]-[.D5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4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5" calcext:value-type="float">
            <text:p>0,00150000000000000000</text:p>
          </table:table-cell>
          <table:table-cell table:formula="of:=[.D542]-[.D5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4" office:value-type="float" office:value="12984" calcext:value-type="float">
            <text:p>12984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50277777777778" calcext:value-type="float">
            <text:p>0,00150277777777778000</text:p>
          </table:table-cell>
          <table:table-cell table:formula="of:=[.D543]-[.D5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4" office:value-type="float" office:value="13008" calcext:value-type="float">
            <text:p>1300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50555555555556" calcext:value-type="float">
            <text:p>0,00150555555555556000</text:p>
          </table:table-cell>
          <table:table-cell table:formula="of:=[.D544]-[.D5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4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50833333333333" calcext:value-type="float">
            <text:p>0,00150833333333333000</text:p>
          </table:table-cell>
          <table:table-cell table:formula="of:=[.D545]-[.D5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4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51111111111111" calcext:value-type="float">
            <text:p>0,00151111111111111000</text:p>
          </table:table-cell>
          <table:table-cell table:formula="of:=[.D546]-[.D5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4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51388888888889" calcext:value-type="float">
            <text:p>0,00151388888888889000</text:p>
          </table:table-cell>
          <table:table-cell table:formula="of:=[.D547]-[.D5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4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51666666666667" calcext:value-type="float">
            <text:p>0,00151666666666667000</text:p>
          </table:table-cell>
          <table:table-cell table:formula="of:=[.D548]-[.D5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4" office:value-type="float" office:value="13128" calcext:value-type="float">
            <text:p>13128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51944444444444" calcext:value-type="float">
            <text:p>0,00151944444444444000</text:p>
          </table:table-cell>
          <table:table-cell table:formula="of:=[.D549]-[.D5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4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52222222222222" calcext:value-type="float">
            <text:p>0,00152222222222222000</text:p>
          </table:table-cell>
          <table:table-cell table:formula="of:=[.D550]-[.D549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4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525" calcext:value-type="float">
            <text:p>0,00152500000000000000</text:p>
          </table:table-cell>
          <table:table-cell table:formula="of:=[.D551]-[.D5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4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52777777777778" calcext:value-type="float">
            <text:p>0,00152777777777778000</text:p>
          </table:table-cell>
          <table:table-cell table:formula="of:=[.D552]-[.D5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4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53055555555556" calcext:value-type="float">
            <text:p>0,00153055555555556000</text:p>
          </table:table-cell>
          <table:table-cell table:formula="of:=[.D553]-[.D5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4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53333333333333" calcext:value-type="float">
            <text:p>0,00153333333333333000</text:p>
          </table:table-cell>
          <table:table-cell table:formula="of:=[.D554]-[.D5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4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53611111111111" calcext:value-type="float">
            <text:p>0,00153611111111111000</text:p>
          </table:table-cell>
          <table:table-cell table:formula="of:=[.D555]-[.D5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4" office:value-type="float" office:value="13296" calcext:value-type="float">
            <text:p>1329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53888888888889" calcext:value-type="float">
            <text:p>0,00153888888888889000</text:p>
          </table:table-cell>
          <table:table-cell table:formula="of:=[.D556]-[.D5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4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54166666666667" calcext:value-type="float">
            <text:p>0,00154166666666667000</text:p>
          </table:table-cell>
          <table:table-cell table:formula="of:=[.D557]-[.D5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4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54444444444444" calcext:value-type="float">
            <text:p>0,00154444444444444000</text:p>
          </table:table-cell>
          <table:table-cell table:formula="of:=[.D558]-[.D5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4" office:value-type="float" office:value="13368" calcext:value-type="float">
            <text:p>13368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54722222222222" calcext:value-type="float">
            <text:p>0,00154722222222222000</text:p>
          </table:table-cell>
          <table:table-cell table:formula="of:=[.D559]-[.D5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4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55" calcext:value-type="float">
            <text:p>0,00155000000000000000</text:p>
          </table:table-cell>
          <table:table-cell table:formula="of:=[.D560]-[.D5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4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55277777777778" calcext:value-type="float">
            <text:p>0,00155277777777778000</text:p>
          </table:table-cell>
          <table:table-cell table:formula="of:=[.D561]-[.D5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4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55555555555556" calcext:value-type="float">
            <text:p>0,00155555555555556000</text:p>
          </table:table-cell>
          <table:table-cell table:formula="of:=[.D562]-[.D5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4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55833333333333" calcext:value-type="float">
            <text:p>0,00155833333333333000</text:p>
          </table:table-cell>
          <table:table-cell table:formula="of:=[.D563]-[.D562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4" office:value-type="float" office:value="13488" calcext:value-type="float">
            <text:p>1348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56111111111111" calcext:value-type="float">
            <text:p>0,00156111111111111000</text:p>
          </table:table-cell>
          <table:table-cell table:formula="of:=[.D564]-[.D5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4" office:value-type="float" office:value="13512" calcext:value-type="float">
            <text:p>13512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56388888888889" calcext:value-type="float">
            <text:p>0,00156388888888889000</text:p>
          </table:table-cell>
          <table:table-cell table:formula="of:=[.D565]-[.D5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4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56666666666667" calcext:value-type="float">
            <text:p>0,00156666666666667000</text:p>
          </table:table-cell>
          <table:table-cell table:formula="of:=[.D566]-[.D5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4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56944444444444" calcext:value-type="float">
            <text:p>0,00156944444444444000</text:p>
          </table:table-cell>
          <table:table-cell table:formula="of:=[.D567]-[.D5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4" office:value-type="float" office:value="13584" calcext:value-type="float">
            <text:p>1358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57222222222222" calcext:value-type="float">
            <text:p>0,00157222222222222000</text:p>
          </table:table-cell>
          <table:table-cell table:formula="of:=[.D568]-[.D5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4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575" calcext:value-type="float">
            <text:p>0,00157500000000000000</text:p>
          </table:table-cell>
          <table:table-cell table:formula="of:=[.D569]-[.D5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4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57777777777778" calcext:value-type="float">
            <text:p>0,00157777777777778000</text:p>
          </table:table-cell>
          <table:table-cell table:formula="of:=[.D570]-[.D5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4" office:value-type="float" office:value="13656" calcext:value-type="float">
            <text:p>13656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58055555555556" calcext:value-type="float">
            <text:p>0,00158055555555556000</text:p>
          </table:table-cell>
          <table:table-cell table:formula="of:=[.D571]-[.D5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4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58333333333333" calcext:value-type="float">
            <text:p>0,00158333333333333000</text:p>
          </table:table-cell>
          <table:table-cell table:formula="of:=[.D572]-[.D5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4" office:value-type="float" office:value="13704" calcext:value-type="float">
            <text:p>13704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58611111111111" calcext:value-type="float">
            <text:p>0,00158611111111111000</text:p>
          </table:table-cell>
          <table:table-cell table:formula="of:=[.D573]-[.D5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4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58888888888889" calcext:value-type="float">
            <text:p>0,00158888888888889000</text:p>
          </table:table-cell>
          <table:table-cell table:formula="of:=[.D574]-[.D5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4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59166666666667" calcext:value-type="float">
            <text:p>0,00159166666666667000</text:p>
          </table:table-cell>
          <table:table-cell table:formula="of:=[.D575]-[.D5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4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59444444444444" calcext:value-type="float">
            <text:p>0,00159444444444444000</text:p>
          </table:table-cell>
          <table:table-cell table:formula="of:=[.D576]-[.D575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4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59722222222222" calcext:value-type="float">
            <text:p>0,00159722222222222000</text:p>
          </table:table-cell>
          <table:table-cell table:formula="of:=[.D577]-[.D5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4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6" calcext:value-type="float">
            <text:p>0,00160000000000000000</text:p>
          </table:table-cell>
          <table:table-cell table:formula="of:=[.D578]-[.D5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4" office:value-type="float" office:value="13848" calcext:value-type="float">
            <text:p>13848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60277777777778" calcext:value-type="float">
            <text:p>0,00160277777777778000</text:p>
          </table:table-cell>
          <table:table-cell table:formula="of:=[.D579]-[.D5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4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60555555555556" calcext:value-type="float">
            <text:p>0,00160555555555556000</text:p>
          </table:table-cell>
          <table:table-cell table:formula="of:=[.D580]-[.D5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4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60833333333333" calcext:value-type="float">
            <text:p>0,00160833333333333000</text:p>
          </table:table-cell>
          <table:table-cell table:formula="of:=[.D581]-[.D5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4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61111111111111" calcext:value-type="float">
            <text:p>0,00161111111111111000</text:p>
          </table:table-cell>
          <table:table-cell table:formula="of:=[.D582]-[.D5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4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61388888888889" calcext:value-type="float">
            <text:p>0,00161388888888889000</text:p>
          </table:table-cell>
          <table:table-cell table:formula="of:=[.D583]-[.D5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4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61666666666667" calcext:value-type="float">
            <text:p>0,00161666666666667000</text:p>
          </table:table-cell>
          <table:table-cell table:formula="of:=[.D584]-[.D5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4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61944444444444" calcext:value-type="float">
            <text:p>0,00161944444444444000</text:p>
          </table:table-cell>
          <table:table-cell table:formula="of:=[.D585]-[.D5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4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62222222222222" calcext:value-type="float">
            <text:p>0,00162222222222222000</text:p>
          </table:table-cell>
          <table:table-cell table:formula="of:=[.D586]-[.D5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4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625" calcext:value-type="float">
            <text:p>0,00162500000000000000</text:p>
          </table:table-cell>
          <table:table-cell table:formula="of:=[.D587]-[.D5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4" office:value-type="float" office:value="14064" calcext:value-type="float">
            <text:p>1406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62777777777778" calcext:value-type="float">
            <text:p>0,00162777777777778000</text:p>
          </table:table-cell>
          <table:table-cell table:formula="of:=[.D588]-[.D5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4" office:value-type="float" office:value="14088" calcext:value-type="float">
            <text:p>14088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63055555555556" calcext:value-type="float">
            <text:p>0,00163055555555556000</text:p>
          </table:table-cell>
          <table:table-cell table:formula="of:=[.D589]-[.D588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4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63333333333333" calcext:value-type="float">
            <text:p>0,00163333333333333000</text:p>
          </table:table-cell>
          <table:table-cell table:formula="of:=[.D590]-[.D5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4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63611111111111" calcext:value-type="float">
            <text:p>0,00163611111111111000</text:p>
          </table:table-cell>
          <table:table-cell table:formula="of:=[.D591]-[.D5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4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63888888888889" calcext:value-type="float">
            <text:p>0,00163888888888889000</text:p>
          </table:table-cell>
          <table:table-cell table:formula="of:=[.D592]-[.D5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4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64166666666667" calcext:value-type="float">
            <text:p>0,00164166666666667000</text:p>
          </table:table-cell>
          <table:table-cell table:formula="of:=[.D593]-[.D5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4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64444444444444" calcext:value-type="float">
            <text:p>0,00164444444444444000</text:p>
          </table:table-cell>
          <table:table-cell table:formula="of:=[.D594]-[.D5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4" office:value-type="float" office:value="14232" calcext:value-type="float">
            <text:p>14232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64722222222222" calcext:value-type="float">
            <text:p>0,00164722222222222000</text:p>
          </table:table-cell>
          <table:table-cell table:formula="of:=[.D595]-[.D5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4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65" calcext:value-type="float">
            <text:p>0,00165000000000000000</text:p>
          </table:table-cell>
          <table:table-cell table:formula="of:=[.D596]-[.D5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4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65277777777778" calcext:value-type="float">
            <text:p>0,00165277777777778000</text:p>
          </table:table-cell>
          <table:table-cell table:formula="of:=[.D597]-[.D5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4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65555555555556" calcext:value-type="float">
            <text:p>0,00165555555555556000</text:p>
          </table:table-cell>
          <table:table-cell table:formula="of:=[.D598]-[.D5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4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65833333333333" calcext:value-type="float">
            <text:p>0,00165833333333333000</text:p>
          </table:table-cell>
          <table:table-cell table:formula="of:=[.D599]-[.D5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4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66111111111111" calcext:value-type="float">
            <text:p>0,00166111111111111000</text:p>
          </table:table-cell>
          <table:table-cell table:formula="of:=[.D600]-[.D5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4" office:value-type="float" office:value="14376" calcext:value-type="float">
            <text:p>14376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66388888888889" calcext:value-type="float">
            <text:p>0,00166388888888889000</text:p>
          </table:table-cell>
          <table:table-cell table:formula="of:=[.D601]-[.D600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4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66666666666667" calcext:value-type="float">
            <text:p>0,00166666666666667000</text:p>
          </table:table-cell>
          <table:table-cell table:formula="of:=[.D602]-[.D6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4" office:value-type="float" office:value="14424" calcext:value-type="float">
            <text:p>14424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66944444444444" calcext:value-type="float">
            <text:p>0,00166944444444444000</text:p>
          </table:table-cell>
          <table:table-cell table:formula="of:=[.D603]-[.D6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4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67222222222222" calcext:value-type="float">
            <text:p>0,00167222222222222000</text:p>
          </table:table-cell>
          <table:table-cell table:formula="of:=[.D604]-[.D6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4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675" calcext:value-type="float">
            <text:p>0,00167500000000000000</text:p>
          </table:table-cell>
          <table:table-cell table:formula="of:=[.D605]-[.D6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4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67777777777778" calcext:value-type="float">
            <text:p>0,00167777777777778000</text:p>
          </table:table-cell>
          <table:table-cell table:formula="of:=[.D606]-[.D6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4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68055555555556" calcext:value-type="float">
            <text:p>0,00168055555555556000</text:p>
          </table:table-cell>
          <table:table-cell table:formula="of:=[.D607]-[.D6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4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68333333333333" calcext:value-type="float">
            <text:p>0,00168333333333333000</text:p>
          </table:table-cell>
          <table:table-cell table:formula="of:=[.D608]-[.D6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4" office:value-type="float" office:value="14568" calcext:value-type="float">
            <text:p>14568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68611111111111" calcext:value-type="float">
            <text:p>0,00168611111111111000</text:p>
          </table:table-cell>
          <table:table-cell table:formula="of:=[.D609]-[.D6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4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68888888888889" calcext:value-type="float">
            <text:p>0,00168888888888889000</text:p>
          </table:table-cell>
          <table:table-cell table:formula="of:=[.D610]-[.D6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4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69166666666667" calcext:value-type="float">
            <text:p>0,00169166666666667000</text:p>
          </table:table-cell>
          <table:table-cell table:formula="of:=[.D611]-[.D6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4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69444444444444" calcext:value-type="float">
            <text:p>0,00169444444444444000</text:p>
          </table:table-cell>
          <table:table-cell table:formula="of:=[.D612]-[.D6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4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69722222222222" calcext:value-type="float">
            <text:p>0,00169722222222222000</text:p>
          </table:table-cell>
          <table:table-cell table:formula="of:=[.D613]-[.D6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4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7" calcext:value-type="float">
            <text:p>0,00170000000000000000</text:p>
          </table:table-cell>
          <table:table-cell table:formula="of:=[.D614]-[.D613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4" office:value-type="float" office:value="14712" calcext:value-type="float">
            <text:p>14712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70277777777778" calcext:value-type="float">
            <text:p>0,00170277777777778000</text:p>
          </table:table-cell>
          <table:table-cell table:formula="of:=[.D615]-[.D6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4" office:value-type="float" office:value="14736" calcext:value-type="float">
            <text:p>1473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70555555555556" calcext:value-type="float">
            <text:p>0,00170555555555556000</text:p>
          </table:table-cell>
          <table:table-cell table:formula="of:=[.D616]-[.D6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4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70833333333333" calcext:value-type="float">
            <text:p>0,00170833333333333000</text:p>
          </table:table-cell>
          <table:table-cell table:formula="of:=[.D617]-[.D6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4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71111111111111" calcext:value-type="float">
            <text:p>0,00171111111111111000</text:p>
          </table:table-cell>
          <table:table-cell table:formula="of:=[.D618]-[.D6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4" office:value-type="float" office:value="14808" calcext:value-type="float">
            <text:p>14808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71388888888889" calcext:value-type="float">
            <text:p>0,00171388888888889000</text:p>
          </table:table-cell>
          <table:table-cell table:formula="of:=[.D619]-[.D6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4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71666666666667" calcext:value-type="float">
            <text:p>0,00171666666666667000</text:p>
          </table:table-cell>
          <table:table-cell table:formula="of:=[.D620]-[.D6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4" office:value-type="float" office:value="14856" calcext:value-type="float">
            <text:p>14856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71944444444444" calcext:value-type="float">
            <text:p>0,00171944444444444000</text:p>
          </table:table-cell>
          <table:table-cell table:formula="of:=[.D621]-[.D6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4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72222222222222" calcext:value-type="float">
            <text:p>0,00172222222222222000</text:p>
          </table:table-cell>
          <table:table-cell table:formula="of:=[.D622]-[.D6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4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725" calcext:value-type="float">
            <text:p>0,00172500000000000000</text:p>
          </table:table-cell>
          <table:table-cell table:formula="of:=[.D623]-[.D6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4" office:value-type="float" office:value="14928" calcext:value-type="float">
            <text:p>1492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72777777777778" calcext:value-type="float">
            <text:p>0,00172777777777778000</text:p>
          </table:table-cell>
          <table:table-cell table:formula="of:=[.D624]-[.D6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4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73055555555556" calcext:value-type="float">
            <text:p>0,00173055555555556000</text:p>
          </table:table-cell>
          <table:table-cell table:formula="of:=[.D625]-[.D6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4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73333333333333" calcext:value-type="float">
            <text:p>0,00173333333333333000</text:p>
          </table:table-cell>
          <table:table-cell table:formula="of:=[.D626]-[.D6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4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73611111111111" calcext:value-type="float">
            <text:p>0,00173611111111111000</text:p>
          </table:table-cell>
          <table:table-cell table:formula="of:=[.D627]-[.D626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4" office:value-type="float" office:value="15024" calcext:value-type="float">
            <text:p>1502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73888888888889" calcext:value-type="float">
            <text:p>0,00173888888888889000</text:p>
          </table:table-cell>
          <table:table-cell table:formula="of:=[.D628]-[.D6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4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74166666666667" calcext:value-type="float">
            <text:p>0,00174166666666667000</text:p>
          </table:table-cell>
          <table:table-cell table:formula="of:=[.D629]-[.D6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4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74444444444444" calcext:value-type="float">
            <text:p>0,00174444444444444000</text:p>
          </table:table-cell>
          <table:table-cell table:formula="of:=[.D630]-[.D6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4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74722222222222" calcext:value-type="float">
            <text:p>0,00174722222222222000</text:p>
          </table:table-cell>
          <table:table-cell table:formula="of:=[.D631]-[.D6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4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75" calcext:value-type="float">
            <text:p>0,00175000000000000000</text:p>
          </table:table-cell>
          <table:table-cell table:formula="of:=[.D632]-[.D6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4" office:value-type="float" office:value="15144" calcext:value-type="float">
            <text:p>15144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75277777777778" calcext:value-type="float">
            <text:p>0,00175277777777778000</text:p>
          </table:table-cell>
          <table:table-cell table:formula="of:=[.D633]-[.D6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4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75555555555556" calcext:value-type="float">
            <text:p>0,00175555555555556000</text:p>
          </table:table-cell>
          <table:table-cell table:formula="of:=[.D634]-[.D6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4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75833333333333" calcext:value-type="float">
            <text:p>0,00175833333333333000</text:p>
          </table:table-cell>
          <table:table-cell table:formula="of:=[.D635]-[.D6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4" office:value-type="float" office:value="15216" calcext:value-type="float">
            <text:p>1521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76111111111111" calcext:value-type="float">
            <text:p>0,00176111111111111000</text:p>
          </table:table-cell>
          <table:table-cell table:formula="of:=[.D636]-[.D6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4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76388888888889" calcext:value-type="float">
            <text:p>0,00176388888888889000</text:p>
          </table:table-cell>
          <table:table-cell table:formula="of:=[.D637]-[.D6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4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76666666666667" calcext:value-type="float">
            <text:p>0,00176666666666667000</text:p>
          </table:table-cell>
          <table:table-cell table:formula="of:=[.D638]-[.D6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4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76944444444444" calcext:value-type="float">
            <text:p>0,00176944444444444000</text:p>
          </table:table-cell>
          <table:table-cell table:formula="of:=[.D639]-[.D6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4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77222222222222" calcext:value-type="float">
            <text:p>0,00177222222222222000</text:p>
          </table:table-cell>
          <table:table-cell table:formula="of:=[.D640]-[.D639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4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775" calcext:value-type="float">
            <text:p>0,00177500000000000000</text:p>
          </table:table-cell>
          <table:table-cell table:formula="of:=[.D641]-[.D6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4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77777777777778" calcext:value-type="float">
            <text:p>0,00177777777777778000</text:p>
          </table:table-cell>
          <table:table-cell table:formula="of:=[.D642]-[.D6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4" office:value-type="float" office:value="15384" calcext:value-type="float">
            <text:p>15384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78055555555556" calcext:value-type="float">
            <text:p>0,00178055555555556000</text:p>
          </table:table-cell>
          <table:table-cell table:formula="of:=[.D643]-[.D6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4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78333333333333" calcext:value-type="float">
            <text:p>0,00178333333333333000</text:p>
          </table:table-cell>
          <table:table-cell table:formula="of:=[.D644]-[.D6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4" office:value-type="float" office:value="15432" calcext:value-type="float">
            <text:p>15432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78611111111111" calcext:value-type="float">
            <text:p>0,00178611111111111000</text:p>
          </table:table-cell>
          <table:table-cell table:formula="of:=[.D645]-[.D6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4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78888888888889" calcext:value-type="float">
            <text:p>0,00178888888888889000</text:p>
          </table:table-cell>
          <table:table-cell table:formula="of:=[.D646]-[.D6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4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79166666666667" calcext:value-type="float">
            <text:p>0,00179166666666667000</text:p>
          </table:table-cell>
          <table:table-cell table:formula="of:=[.D647]-[.D6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4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79444444444444" calcext:value-type="float">
            <text:p>0,00179444444444444000</text:p>
          </table:table-cell>
          <table:table-cell table:formula="of:=[.D648]-[.D6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4" office:value-type="float" office:value="15528" calcext:value-type="float">
            <text:p>15528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79722222222222" calcext:value-type="float">
            <text:p>0,00179722222222222000</text:p>
          </table:table-cell>
          <table:table-cell table:formula="of:=[.D649]-[.D6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4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8" calcext:value-type="float">
            <text:p>0,00180000000000000000</text:p>
          </table:table-cell>
          <table:table-cell table:formula="of:=[.D650]-[.D6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4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80277777777778" calcext:value-type="float">
            <text:p>0,00180277777777778000</text:p>
          </table:table-cell>
          <table:table-cell table:formula="of:=[.D651]-[.D6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4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80555555555556" calcext:value-type="float">
            <text:p>0,00180555555555556000</text:p>
          </table:table-cell>
          <table:table-cell table:formula="of:=[.D652]-[.D6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4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80833333333333" calcext:value-type="float">
            <text:p>0,00180833333333333000</text:p>
          </table:table-cell>
          <table:table-cell table:formula="of:=[.D653]-[.D652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4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81111111111111" calcext:value-type="float">
            <text:p>0,00181111111111111000</text:p>
          </table:table-cell>
          <table:table-cell table:formula="of:=[.D654]-[.D6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4" office:value-type="float" office:value="15672" calcext:value-type="float">
            <text:p>15672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81388888888889" calcext:value-type="float">
            <text:p>0,00181388888888889000</text:p>
          </table:table-cell>
          <table:table-cell table:formula="of:=[.D655]-[.D6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4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81666666666667" calcext:value-type="float">
            <text:p>0,00181666666666667000</text:p>
          </table:table-cell>
          <table:table-cell table:formula="of:=[.D656]-[.D6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4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81944444444444" calcext:value-type="float">
            <text:p>0,00181944444444444000</text:p>
          </table:table-cell>
          <table:table-cell table:formula="of:=[.D657]-[.D6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4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82222222222222" calcext:value-type="float">
            <text:p>0,00182222222222222000</text:p>
          </table:table-cell>
          <table:table-cell table:formula="of:=[.D658]-[.D6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4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825" calcext:value-type="float">
            <text:p>0,00182500000000000000</text:p>
          </table:table-cell>
          <table:table-cell table:formula="of:=[.D659]-[.D6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4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82777777777778" calcext:value-type="float">
            <text:p>0,00182777777777778000</text:p>
          </table:table-cell>
          <table:table-cell table:formula="of:=[.D660]-[.D6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4" office:value-type="float" office:value="15816" calcext:value-type="float">
            <text:p>15816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83055555555556" calcext:value-type="float">
            <text:p>0,00183055555555556000</text:p>
          </table:table-cell>
          <table:table-cell table:formula="of:=[.D661]-[.D6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4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83333333333333" calcext:value-type="float">
            <text:p>0,00183333333333333000</text:p>
          </table:table-cell>
          <table:table-cell table:formula="of:=[.D662]-[.D6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4" office:value-type="float" office:value="15864" calcext:value-type="float">
            <text:p>15864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83611111111111" calcext:value-type="float">
            <text:p>0,00183611111111111000</text:p>
          </table:table-cell>
          <table:table-cell table:formula="of:=[.D663]-[.D6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4" office:value-type="float" office:value="15888" calcext:value-type="float">
            <text:p>1588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83888888888889" calcext:value-type="float">
            <text:p>0,00183888888888889000</text:p>
          </table:table-cell>
          <table:table-cell table:formula="of:=[.D664]-[.D6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4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84166666666667" calcext:value-type="float">
            <text:p>0,00184166666666667000</text:p>
          </table:table-cell>
          <table:table-cell table:formula="of:=[.D665]-[.D6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4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84444444444444" calcext:value-type="float">
            <text:p>0,00184444444444444000</text:p>
          </table:table-cell>
          <table:table-cell table:formula="of:=[.D666]-[.D665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4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84722222222222" calcext:value-type="float">
            <text:p>0,00184722222222222000</text:p>
          </table:table-cell>
          <table:table-cell table:formula="of:=[.D667]-[.D6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4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85" calcext:value-type="float">
            <text:p>0,00185000000000000000</text:p>
          </table:table-cell>
          <table:table-cell table:formula="of:=[.D668]-[.D6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4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85277777777778" calcext:value-type="float">
            <text:p>0,00185277777777778000</text:p>
          </table:table-cell>
          <table:table-cell table:formula="of:=[.D669]-[.D6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4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85555555555556" calcext:value-type="float">
            <text:p>0,00185555555555556000</text:p>
          </table:table-cell>
          <table:table-cell table:formula="of:=[.D670]-[.D6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4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85833333333333" calcext:value-type="float">
            <text:p>0,00185833333333333000</text:p>
          </table:table-cell>
          <table:table-cell table:formula="of:=[.D671]-[.D6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4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86111111111111" calcext:value-type="float">
            <text:p>0,00186111111111111000</text:p>
          </table:table-cell>
          <table:table-cell table:formula="of:=[.D672]-[.D6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4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86388888888889" calcext:value-type="float">
            <text:p>0,00186388888888889000</text:p>
          </table:table-cell>
          <table:table-cell table:formula="of:=[.D673]-[.D6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4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86666666666667" calcext:value-type="float">
            <text:p>0,00186666666666667000</text:p>
          </table:table-cell>
          <table:table-cell table:formula="of:=[.D674]-[.D6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4" office:value-type="float" office:value="16152" calcext:value-type="float">
            <text:p>16152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86944444444444" calcext:value-type="float">
            <text:p>0,00186944444444444000</text:p>
          </table:table-cell>
          <table:table-cell table:formula="of:=[.D675]-[.D6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4" office:value-type="float" office:value="16176" calcext:value-type="float">
            <text:p>1617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87222222222222" calcext:value-type="float">
            <text:p>0,00187222222222222000</text:p>
          </table:table-cell>
          <table:table-cell table:formula="of:=[.D676]-[.D6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4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875" calcext:value-type="float">
            <text:p>0,00187500000000000000</text:p>
          </table:table-cell>
          <table:table-cell table:formula="of:=[.D677]-[.D6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4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87777777777778" calcext:value-type="float">
            <text:p>0,00187777777777778000</text:p>
          </table:table-cell>
          <table:table-cell table:formula="of:=[.D678]-[.D6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4" office:value-type="float" office:value="16248" calcext:value-type="float">
            <text:p>16248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88055555555556" calcext:value-type="float">
            <text:p>0,00188055555555556000</text:p>
          </table:table-cell>
          <table:table-cell table:formula="of:=[.D679]-[.D678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4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88333333333333" calcext:value-type="float">
            <text:p>0,00188333333333333000</text:p>
          </table:table-cell>
          <table:table-cell table:formula="of:=[.D680]-[.D6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4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88611111111111" calcext:value-type="float">
            <text:p>0,00188611111111111000</text:p>
          </table:table-cell>
          <table:table-cell table:formula="of:=[.D681]-[.D6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4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88888888888889" calcext:value-type="float">
            <text:p>0,00188888888888889000</text:p>
          </table:table-cell>
          <table:table-cell table:formula="of:=[.D682]-[.D6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4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89166666666667" calcext:value-type="float">
            <text:p>0,00189166666666667000</text:p>
          </table:table-cell>
          <table:table-cell table:formula="of:=[.D683]-[.D6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4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89444444444444" calcext:value-type="float">
            <text:p>0,00189444444444444000</text:p>
          </table:table-cell>
          <table:table-cell table:formula="of:=[.D684]-[.D6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4" office:value-type="float" office:value="16392" calcext:value-type="float">
            <text:p>16392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89722222222222" calcext:value-type="float">
            <text:p>0,00189722222222222000</text:p>
          </table:table-cell>
          <table:table-cell table:formula="of:=[.D685]-[.D6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4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9" calcext:value-type="float">
            <text:p>0,00190000000000000000</text:p>
          </table:table-cell>
          <table:table-cell table:formula="of:=[.D686]-[.D6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4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90277777777778" calcext:value-type="float">
            <text:p>0,00190277777777778000</text:p>
          </table:table-cell>
          <table:table-cell table:formula="of:=[.D687]-[.D6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4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90555555555556" calcext:value-type="float">
            <text:p>0,00190555555555556000</text:p>
          </table:table-cell>
          <table:table-cell table:formula="of:=[.D688]-[.D6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4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90833333333333" calcext:value-type="float">
            <text:p>0,00190833333333333000</text:p>
          </table:table-cell>
          <table:table-cell table:formula="of:=[.D689]-[.D6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4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91111111111111" calcext:value-type="float">
            <text:p>0,00191111111111111000</text:p>
          </table:table-cell>
          <table:table-cell table:formula="of:=[.D690]-[.D6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4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91388888888889" calcext:value-type="float">
            <text:p>0,00191388888888889000</text:p>
          </table:table-cell>
          <table:table-cell table:formula="of:=[.D691]-[.D6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4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91666666666667" calcext:value-type="float">
            <text:p>0,00191666666666667000</text:p>
          </table:table-cell>
          <table:table-cell table:formula="of:=[.D692]-[.D691]" office:value-type="float" office:value="0.00000277777777777798" calcext:value-type="float">
            <text:p>0,0000027777777777779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4" office:value-type="float" office:value="16584" calcext:value-type="float">
            <text:p>16584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91944444444444" calcext:value-type="float">
            <text:p>0,00191944444444444000</text:p>
          </table:table-cell>
          <table:table-cell table:formula="of:=[.D693]-[.D6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4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92222222222222" calcext:value-type="float">
            <text:p>0,00192222222222222000</text:p>
          </table:table-cell>
          <table:table-cell table:formula="of:=[.D694]-[.D6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4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925" calcext:value-type="float">
            <text:p>0,00192500000000000000</text:p>
          </table:table-cell>
          <table:table-cell table:formula="of:=[.D695]-[.D6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4" office:value-type="float" office:value="16656" calcext:value-type="float">
            <text:p>1665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92777777777778" calcext:value-type="float">
            <text:p>0,00192777777777778000</text:p>
          </table:table-cell>
          <table:table-cell table:formula="of:=[.D696]-[.D6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4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93055555555556" calcext:value-type="float">
            <text:p>0,00193055555555556000</text:p>
          </table:table-cell>
          <table:table-cell table:formula="of:=[.D697]-[.D6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4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93333333333333" calcext:value-type="float">
            <text:p>0,00193333333333333000</text:p>
          </table:table-cell>
          <table:table-cell table:formula="of:=[.D698]-[.D6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4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93611111111111" calcext:value-type="float">
            <text:p>0,00193611111111111000</text:p>
          </table:table-cell>
          <table:table-cell table:formula="of:=[.D699]-[.D6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4" office:value-type="float" office:value="16752" calcext:value-type="float">
            <text:p>1675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93888888888889" calcext:value-type="float">
            <text:p>0,00193888888888889000</text:p>
          </table:table-cell>
          <table:table-cell table:formula="of:=[.D700]-[.D6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4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94166666666667" calcext:value-type="float">
            <text:p>0,00194166666666667000</text:p>
          </table:table-cell>
          <table:table-cell table:formula="of:=[.D701]-[.D7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4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94444444444444" calcext:value-type="float">
            <text:p>0,00194444444444444000</text:p>
          </table:table-cell>
          <table:table-cell table:formula="of:=[.D702]-[.D7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4" office:value-type="float" office:value="16824" calcext:value-type="float">
            <text:p>16824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94722222222222" calcext:value-type="float">
            <text:p>0,00194722222222222000</text:p>
          </table:table-cell>
          <table:table-cell table:formula="of:=[.D703]-[.D7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4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95" calcext:value-type="float">
            <text:p>0,00195000000000000000</text:p>
          </table:table-cell>
          <table:table-cell table:formula="of:=[.D704]-[.D7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4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95277777777778" calcext:value-type="float">
            <text:p>0,00195277777777778000</text:p>
          </table:table-cell>
          <table:table-cell table:formula="of:=[.D705]-[.D7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4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95555555555556" calcext:value-type="float">
            <text:p>0,00195555555555556000</text:p>
          </table:table-cell>
          <table:table-cell table:formula="of:=[.D706]-[.D7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4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95833333333333" calcext:value-type="float">
            <text:p>0,00195833333333333000</text:p>
          </table:table-cell>
          <table:table-cell table:formula="of:=[.D707]-[.D7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4" office:value-type="float" office:value="16944" calcext:value-type="float">
            <text:p>16944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96111111111111" calcext:value-type="float">
            <text:p>0,00196111111111111000</text:p>
          </table:table-cell>
          <table:table-cell table:formula="of:=[.D708]-[.D7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4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96388888888889" calcext:value-type="float">
            <text:p>0,00196388888888889000</text:p>
          </table:table-cell>
          <table:table-cell table:formula="of:=[.D709]-[.D7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4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96666666666667" calcext:value-type="float">
            <text:p>0,00196666666666667000</text:p>
          </table:table-cell>
          <table:table-cell table:formula="of:=[.D710]-[.D7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4" office:value-type="float" office:value="17016" calcext:value-type="float">
            <text:p>17016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96944444444444" calcext:value-type="float">
            <text:p>0,00196944444444444000</text:p>
          </table:table-cell>
          <table:table-cell table:formula="of:=[.D711]-[.D710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4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97222222222222" calcext:value-type="float">
            <text:p>0,00197222222222222000</text:p>
          </table:table-cell>
          <table:table-cell table:formula="of:=[.D712]-[.D7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4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975" calcext:value-type="float">
            <text:p>0,00197500000000000000</text:p>
          </table:table-cell>
          <table:table-cell table:formula="of:=[.D713]-[.D7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4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97777777777778" calcext:value-type="float">
            <text:p>0,00197777777777778000</text:p>
          </table:table-cell>
          <table:table-cell table:formula="of:=[.D714]-[.D7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4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98055555555556" calcext:value-type="float">
            <text:p>0,00198055555555556000</text:p>
          </table:table-cell>
          <table:table-cell table:formula="of:=[.D715]-[.D7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4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98333333333333" calcext:value-type="float">
            <text:p>0,00198333333333333000</text:p>
          </table:table-cell>
          <table:table-cell table:formula="of:=[.D716]-[.D7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4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98611111111111" calcext:value-type="float">
            <text:p>0,00198611111111111000</text:p>
          </table:table-cell>
          <table:table-cell table:formula="of:=[.D717]-[.D7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4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98888888888889" calcext:value-type="float">
            <text:p>0,00198888888888889000</text:p>
          </table:table-cell>
          <table:table-cell table:formula="of:=[.D718]-[.D7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4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99166666666667" calcext:value-type="float">
            <text:p>0,00199166666666667000</text:p>
          </table:table-cell>
          <table:table-cell table:formula="of:=[.D719]-[.D7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4" office:value-type="float" office:value="17232" calcext:value-type="float">
            <text:p>17232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99444444444444" calcext:value-type="float">
            <text:p>0,00199444444444444000</text:p>
          </table:table-cell>
          <table:table-cell table:formula="of:=[.D720]-[.D7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4" office:value-type="float" office:value="17256" calcext:value-type="float">
            <text:p>17256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99722222222222" calcext:value-type="float">
            <text:p>0,00199722222222222000</text:p>
          </table:table-cell>
          <table:table-cell table:formula="of:=[.D721]-[.D7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4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" calcext:value-type="float">
            <text:p>0,00200000000000000000</text:p>
          </table:table-cell>
          <table:table-cell table:formula="of:=[.D722]-[.D7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4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00277777777778" calcext:value-type="float">
            <text:p>0,00200277777777778000</text:p>
          </table:table-cell>
          <table:table-cell table:formula="of:=[.D723]-[.D7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4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00555555555556" calcext:value-type="float">
            <text:p>0,00200555555555556000</text:p>
          </table:table-cell>
          <table:table-cell table:formula="of:=[.D724]-[.D7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4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00833333333333" calcext:value-type="float">
            <text:p>0,00200833333333333000</text:p>
          </table:table-cell>
          <table:table-cell table:formula="of:=[.D725]-[.D7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4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01111111111111" calcext:value-type="float">
            <text:p>0,00201111111111111000</text:p>
          </table:table-cell>
          <table:table-cell table:formula="of:=[.D726]-[.D7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4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01388888888889" calcext:value-type="float">
            <text:p>0,00201388888888889000</text:p>
          </table:table-cell>
          <table:table-cell table:formula="of:=[.D727]-[.D7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4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01666666666667" calcext:value-type="float">
            <text:p>0,00201666666666667000</text:p>
          </table:table-cell>
          <table:table-cell table:formula="of:=[.D728]-[.D7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4" office:value-type="float" office:value="17448" calcext:value-type="float">
            <text:p>17448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01944444444444" calcext:value-type="float">
            <text:p>0,00201944444444444000</text:p>
          </table:table-cell>
          <table:table-cell table:formula="of:=[.D729]-[.D7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4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02222222222222" calcext:value-type="float">
            <text:p>0,00202222222222222000</text:p>
          </table:table-cell>
          <table:table-cell table:formula="of:=[.D730]-[.D7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4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025" calcext:value-type="float">
            <text:p>0,00202500000000000000</text:p>
          </table:table-cell>
          <table:table-cell table:formula="of:=[.D731]-[.D7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4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02777777777778" calcext:value-type="float">
            <text:p>0,00202777777777778000</text:p>
          </table:table-cell>
          <table:table-cell table:formula="of:=[.D732]-[.D7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4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03055555555556" calcext:value-type="float">
            <text:p>0,00203055555555556000</text:p>
          </table:table-cell>
          <table:table-cell table:formula="of:=[.D733]-[.D7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4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03333333333333" calcext:value-type="float">
            <text:p>0,00203333333333333000</text:p>
          </table:table-cell>
          <table:table-cell table:formula="of:=[.D734]-[.D7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4" office:value-type="float" office:value="17592" calcext:value-type="float">
            <text:p>17592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03611111111111" calcext:value-type="float">
            <text:p>0,00203611111111111000</text:p>
          </table:table-cell>
          <table:table-cell table:formula="of:=[.D735]-[.D7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4" office:value-type="float" office:value="17616" calcext:value-type="float">
            <text:p>17616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03888888888889" calcext:value-type="float">
            <text:p>0,00203888888888889000</text:p>
          </table:table-cell>
          <table:table-cell table:formula="of:=[.D736]-[.D7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4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04166666666667" calcext:value-type="float">
            <text:p>0,00204166666666667000</text:p>
          </table:table-cell>
          <table:table-cell table:formula="of:=[.D737]-[.D736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4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04444444444444" calcext:value-type="float">
            <text:p>0,00204444444444444000</text:p>
          </table:table-cell>
          <table:table-cell table:formula="of:=[.D738]-[.D7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4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04722222222222" calcext:value-type="float">
            <text:p>0,00204722222222222000</text:p>
          </table:table-cell>
          <table:table-cell table:formula="of:=[.D739]-[.D7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4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05" calcext:value-type="float">
            <text:p>0,00205000000000000000</text:p>
          </table:table-cell>
          <table:table-cell table:formula="of:=[.D740]-[.D7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4" office:value-type="float" office:value="17736" calcext:value-type="float">
            <text:p>17736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05277777777778" calcext:value-type="float">
            <text:p>0,00205277777777778000</text:p>
          </table:table-cell>
          <table:table-cell table:formula="of:=[.D741]-[.D7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4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05555555555556" calcext:value-type="float">
            <text:p>0,00205555555555556000</text:p>
          </table:table-cell>
          <table:table-cell table:formula="of:=[.D742]-[.D7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4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05833333333333" calcext:value-type="float">
            <text:p>0,00205833333333333000</text:p>
          </table:table-cell>
          <table:table-cell table:formula="of:=[.D743]-[.D7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4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06111111111111" calcext:value-type="float">
            <text:p>0,00206111111111111000</text:p>
          </table:table-cell>
          <table:table-cell table:formula="of:=[.D744]-[.D7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4" office:value-type="float" office:value="17832" calcext:value-type="float">
            <text:p>17832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06388888888889" calcext:value-type="float">
            <text:p>0,00206388888888889000</text:p>
          </table:table-cell>
          <table:table-cell table:formula="of:=[.D745]-[.D7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4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06666666666667" calcext:value-type="float">
            <text:p>0,00206666666666667000</text:p>
          </table:table-cell>
          <table:table-cell table:formula="of:=[.D746]-[.D7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4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06944444444444" calcext:value-type="float">
            <text:p>0,00206944444444444000</text:p>
          </table:table-cell>
          <table:table-cell table:formula="of:=[.D747]-[.D7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4" office:value-type="float" office:value="17904" calcext:value-type="float">
            <text:p>17904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07222222222222" calcext:value-type="float">
            <text:p>0,00207222222222222000</text:p>
          </table:table-cell>
          <table:table-cell table:formula="of:=[.D748]-[.D7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4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075" calcext:value-type="float">
            <text:p>0,00207500000000000000</text:p>
          </table:table-cell>
          <table:table-cell table:formula="of:=[.D749]-[.D7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4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07777777777778" calcext:value-type="float">
            <text:p>0,00207777777777778000</text:p>
          </table:table-cell>
          <table:table-cell table:formula="of:=[.D750]-[.D7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4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08055555555556" calcext:value-type="float">
            <text:p>0,00208055555555556000</text:p>
          </table:table-cell>
          <table:table-cell table:formula="of:=[.D751]-[.D7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4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08333333333333" calcext:value-type="float">
            <text:p>0,00208333333333333000</text:p>
          </table:table-cell>
          <table:table-cell table:formula="of:=[.D752]-[.D7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4" office:value-type="float" office:value="18024" calcext:value-type="float">
            <text:p>18024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08611111111111" calcext:value-type="float">
            <text:p>0,00208611111111111000</text:p>
          </table:table-cell>
          <table:table-cell table:formula="of:=[.D753]-[.D7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4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08888888888889" calcext:value-type="float">
            <text:p>0,00208888888888889000</text:p>
          </table:table-cell>
          <table:table-cell table:formula="of:=[.D754]-[.D7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4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09166666666667" calcext:value-type="float">
            <text:p>0,00209166666666667000</text:p>
          </table:table-cell>
          <table:table-cell table:formula="of:=[.D755]-[.D7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4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09444444444444" calcext:value-type="float">
            <text:p>0,00209444444444444000</text:p>
          </table:table-cell>
          <table:table-cell table:formula="of:=[.D756]-[.D7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4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09722222222222" calcext:value-type="float">
            <text:p>0,00209722222222222000</text:p>
          </table:table-cell>
          <table:table-cell table:formula="of:=[.D757]-[.D7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4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1" calcext:value-type="float">
            <text:p>0,00210000000000000000</text:p>
          </table:table-cell>
          <table:table-cell table:formula="of:=[.D758]-[.D7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4" office:value-type="float" office:value="18168" calcext:value-type="float">
            <text:p>18168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10277777777778" calcext:value-type="float">
            <text:p>0,00210277777777778000</text:p>
          </table:table-cell>
          <table:table-cell table:formula="of:=[.D759]-[.D7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4" office:value-type="float" office:value="18192" calcext:value-type="float">
            <text:p>18192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10555555555556" calcext:value-type="float">
            <text:p>0,00210555555555556000</text:p>
          </table:table-cell>
          <table:table-cell table:formula="of:=[.D760]-[.D7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4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10833333333333" calcext:value-type="float">
            <text:p>0,00210833333333333000</text:p>
          </table:table-cell>
          <table:table-cell table:formula="of:=[.D761]-[.D7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4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11111111111111" calcext:value-type="float">
            <text:p>0,00211111111111111000</text:p>
          </table:table-cell>
          <table:table-cell table:formula="of:=[.D762]-[.D7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4" office:value-type="float" office:value="18264" calcext:value-type="float">
            <text:p>18264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11388888888889" calcext:value-type="float">
            <text:p>0,00211388888888889000</text:p>
          </table:table-cell>
          <table:table-cell table:formula="of:=[.D763]-[.D762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4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11666666666667" calcext:value-type="float">
            <text:p>0,00211666666666667000</text:p>
          </table:table-cell>
          <table:table-cell table:formula="of:=[.D764]-[.D7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4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11944444444444" calcext:value-type="float">
            <text:p>0,00211944444444444000</text:p>
          </table:table-cell>
          <table:table-cell table:formula="of:=[.D765]-[.D7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4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12222222222222" calcext:value-type="float">
            <text:p>0,00212222222222222000</text:p>
          </table:table-cell>
          <table:table-cell table:formula="of:=[.D766]-[.D7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4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125" calcext:value-type="float">
            <text:p>0,00212500000000000000</text:p>
          </table:table-cell>
          <table:table-cell table:formula="of:=[.D767]-[.D7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4" office:value-type="float" office:value="18384" calcext:value-type="float">
            <text:p>18384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12777777777778" calcext:value-type="float">
            <text:p>0,00212777777777778000</text:p>
          </table:table-cell>
          <table:table-cell table:formula="of:=[.D768]-[.D7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4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13055555555556" calcext:value-type="float">
            <text:p>0,00213055555555556000</text:p>
          </table:table-cell>
          <table:table-cell table:formula="of:=[.D769]-[.D7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4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13333333333333" calcext:value-type="float">
            <text:p>0,00213333333333333000</text:p>
          </table:table-cell>
          <table:table-cell table:formula="of:=[.D770]-[.D7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4" office:value-type="float" office:value="18456" calcext:value-type="float">
            <text:p>18456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13611111111111" calcext:value-type="float">
            <text:p>0,00213611111111111000</text:p>
          </table:table-cell>
          <table:table-cell table:formula="of:=[.D771]-[.D7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4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13888888888889" calcext:value-type="float">
            <text:p>0,00213888888888889000</text:p>
          </table:table-cell>
          <table:table-cell table:formula="of:=[.D772]-[.D7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4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14166666666667" calcext:value-type="float">
            <text:p>0,00214166666666667000</text:p>
          </table:table-cell>
          <table:table-cell table:formula="of:=[.D773]-[.D7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4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14444444444444" calcext:value-type="float">
            <text:p>0,00214444444444444000</text:p>
          </table:table-cell>
          <table:table-cell table:formula="of:=[.D774]-[.D7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4" office:value-type="float" office:value="18552" calcext:value-type="float">
            <text:p>18552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14722222222222" calcext:value-type="float">
            <text:p>0,00214722222222222000</text:p>
          </table:table-cell>
          <table:table-cell table:formula="of:=[.D775]-[.D7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4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15" calcext:value-type="float">
            <text:p>0,00215000000000000000</text:p>
          </table:table-cell>
          <table:table-cell table:formula="of:=[.D776]-[.D7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4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15277777777778" calcext:value-type="float">
            <text:p>0,00215277777777778000</text:p>
          </table:table-cell>
          <table:table-cell table:formula="of:=[.D777]-[.D7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4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15555555555556" calcext:value-type="float">
            <text:p>0,00215555555555556000</text:p>
          </table:table-cell>
          <table:table-cell table:formula="of:=[.D778]-[.D7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4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15833333333333" calcext:value-type="float">
            <text:p>0,00215833333333333000</text:p>
          </table:table-cell>
          <table:table-cell table:formula="of:=[.D779]-[.D7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4" office:value-type="float" office:value="18672" calcext:value-type="float">
            <text:p>18672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16111111111111" calcext:value-type="float">
            <text:p>0,00216111111111111000</text:p>
          </table:table-cell>
          <table:table-cell table:formula="of:=[.D780]-[.D7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4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16388888888889" calcext:value-type="float">
            <text:p>0,00216388888888889000</text:p>
          </table:table-cell>
          <table:table-cell table:formula="of:=[.D781]-[.D7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4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16666666666667" calcext:value-type="float">
            <text:p>0,00216666666666667000</text:p>
          </table:table-cell>
          <table:table-cell table:formula="of:=[.D782]-[.D7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4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16944444444444" calcext:value-type="float">
            <text:p>0,00216944444444444000</text:p>
          </table:table-cell>
          <table:table-cell table:formula="of:=[.D783]-[.D7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4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17222222222222" calcext:value-type="float">
            <text:p>0,00217222222222222000</text:p>
          </table:table-cell>
          <table:table-cell table:formula="of:=[.D784]-[.D7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4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175" calcext:value-type="float">
            <text:p>0,00217500000000000000</text:p>
          </table:table-cell>
          <table:table-cell table:formula="of:=[.D785]-[.D7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4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17777777777778" calcext:value-type="float">
            <text:p>0,00217777777777778000</text:p>
          </table:table-cell>
          <table:table-cell table:formula="of:=[.D786]-[.D7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4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18055555555556" calcext:value-type="float">
            <text:p>0,00218055555555556000</text:p>
          </table:table-cell>
          <table:table-cell table:formula="of:=[.D787]-[.D7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4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18333333333333" calcext:value-type="float">
            <text:p>0,00218333333333333000</text:p>
          </table:table-cell>
          <table:table-cell table:formula="of:=[.D788]-[.D787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4" office:value-type="float" office:value="18888" calcext:value-type="float">
            <text:p>18888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18611111111111" calcext:value-type="float">
            <text:p>0,00218611111111111000</text:p>
          </table:table-cell>
          <table:table-cell table:formula="of:=[.D789]-[.D7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4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18888888888889" calcext:value-type="float">
            <text:p>0,00218888888888889000</text:p>
          </table:table-cell>
          <table:table-cell table:formula="of:=[.D790]-[.D7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4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19166666666667" calcext:value-type="float">
            <text:p>0,00219166666666667000</text:p>
          </table:table-cell>
          <table:table-cell table:formula="of:=[.D791]-[.D7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4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19444444444444" calcext:value-type="float">
            <text:p>0,00219444444444444000</text:p>
          </table:table-cell>
          <table:table-cell table:formula="of:=[.D792]-[.D7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4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19722222222222" calcext:value-type="float">
            <text:p>0,00219722222222222000</text:p>
          </table:table-cell>
          <table:table-cell table:formula="of:=[.D793]-[.D7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4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2" calcext:value-type="float">
            <text:p>0,00220000000000000000</text:p>
          </table:table-cell>
          <table:table-cell table:formula="of:=[.D794]-[.D7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4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20277777777778" calcext:value-type="float">
            <text:p>0,00220277777777778000</text:p>
          </table:table-cell>
          <table:table-cell table:formula="of:=[.D795]-[.D7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4" office:value-type="float" office:value="19056" calcext:value-type="float">
            <text:p>19056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20555555555556" calcext:value-type="float">
            <text:p>0,00220555555555556000</text:p>
          </table:table-cell>
          <table:table-cell table:formula="of:=[.D796]-[.D7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4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20833333333333" calcext:value-type="float">
            <text:p>0,00220833333333333000</text:p>
          </table:table-cell>
          <table:table-cell table:formula="of:=[.D797]-[.D7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4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21111111111111" calcext:value-type="float">
            <text:p>0,00221111111111111000</text:p>
          </table:table-cell>
          <table:table-cell table:formula="of:=[.D798]-[.D7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4" office:value-type="float" office:value="19128" calcext:value-type="float">
            <text:p>19128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21388888888889" calcext:value-type="float">
            <text:p>0,00221388888888889000</text:p>
          </table:table-cell>
          <table:table-cell table:formula="of:=[.D799]-[.D7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4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21666666666667" calcext:value-type="float">
            <text:p>0,00221666666666667000</text:p>
          </table:table-cell>
          <table:table-cell table:formula="of:=[.D800]-[.D7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4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21944444444444" calcext:value-type="float">
            <text:p>0,00221944444444444000</text:p>
          </table:table-cell>
          <table:table-cell table:formula="of:=[.D801]-[.D8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4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22222222222222" calcext:value-type="float">
            <text:p>0,00222222222222222000</text:p>
          </table:table-cell>
          <table:table-cell table:formula="of:=[.D802]-[.D8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4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225" calcext:value-type="float">
            <text:p>0,00222500000000000000</text:p>
          </table:table-cell>
          <table:table-cell table:formula="of:=[.D803]-[.D8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4" office:value-type="float" office:value="19248" calcext:value-type="float">
            <text:p>19248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22777777777778" calcext:value-type="float">
            <text:p>0,00222777777777778000</text:p>
          </table:table-cell>
          <table:table-cell table:formula="of:=[.D804]-[.D8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4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23055555555556" calcext:value-type="float">
            <text:p>0,00223055555555556000</text:p>
          </table:table-cell>
          <table:table-cell table:formula="of:=[.D805]-[.D8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4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23333333333333" calcext:value-type="float">
            <text:p>0,00223333333333333000</text:p>
          </table:table-cell>
          <table:table-cell table:formula="of:=[.D806]-[.D8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4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23611111111111" calcext:value-type="float">
            <text:p>0,00223611111111111000</text:p>
          </table:table-cell>
          <table:table-cell table:formula="of:=[.D807]-[.D8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4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23888888888889" calcext:value-type="float">
            <text:p>0,00223888888888889000</text:p>
          </table:table-cell>
          <table:table-cell table:formula="of:=[.D808]-[.D8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4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24166666666667" calcext:value-type="float">
            <text:p>0,00224166666666667000</text:p>
          </table:table-cell>
          <table:table-cell table:formula="of:=[.D809]-[.D8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4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24444444444444" calcext:value-type="float">
            <text:p>0,00224444444444444000</text:p>
          </table:table-cell>
          <table:table-cell table:formula="of:=[.D810]-[.D8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4" office:value-type="float" office:value="19416" calcext:value-type="float">
            <text:p>19416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24722222222222" calcext:value-type="float">
            <text:p>0,00224722222222222000</text:p>
          </table:table-cell>
          <table:table-cell table:formula="of:=[.D811]-[.D8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4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25" calcext:value-type="float">
            <text:p>0,00225000000000000000</text:p>
          </table:table-cell>
          <table:table-cell table:formula="of:=[.D812]-[.D8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4" office:value-type="float" office:value="19464" calcext:value-type="float">
            <text:p>19464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25277777777778" calcext:value-type="float">
            <text:p>0,00225277777777778000</text:p>
          </table:table-cell>
          <table:table-cell table:formula="of:=[.D813]-[.D8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4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25555555555556" calcext:value-type="float">
            <text:p>0,00225555555555556000</text:p>
          </table:table-cell>
          <table:table-cell table:formula="of:=[.D814]-[.D813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4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25833333333333" calcext:value-type="float">
            <text:p>0,00225833333333333000</text:p>
          </table:table-cell>
          <table:table-cell table:formula="of:=[.D815]-[.D8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4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26111111111111" calcext:value-type="float">
            <text:p>0,00226111111111111000</text:p>
          </table:table-cell>
          <table:table-cell table:formula="of:=[.D816]-[.D8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4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26388888888889" calcext:value-type="float">
            <text:p>0,00226388888888889000</text:p>
          </table:table-cell>
          <table:table-cell table:formula="of:=[.D817]-[.D81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4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26666666666667" calcext:value-type="float">
            <text:p>0,00226666666666667000</text:p>
          </table:table-cell>
          <table:table-cell table:formula="of:=[.D818]-[.D8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4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26944444444444" calcext:value-type="float">
            <text:p>0,00226944444444444000</text:p>
          </table:table-cell>
          <table:table-cell table:formula="of:=[.D819]-[.D8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4" office:value-type="float" office:value="19632" calcext:value-type="float">
            <text:p>19632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27222222222222" calcext:value-type="float">
            <text:p>0,00227222222222222000</text:p>
          </table:table-cell>
          <table:table-cell table:formula="of:=[.D820]-[.D8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4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275" calcext:value-type="float">
            <text:p>0,00227500000000000000</text:p>
          </table:table-cell>
          <table:table-cell table:formula="of:=[.D821]-[.D8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4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27777777777778" calcext:value-type="float">
            <text:p>0,00227777777777778000</text:p>
          </table:table-cell>
          <table:table-cell table:formula="of:=[.D822]-[.D8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4" office:value-type="float" office:value="19704" calcext:value-type="float">
            <text:p>19704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28055555555556" calcext:value-type="float">
            <text:p>0,00228055555555556000</text:p>
          </table:table-cell>
          <table:table-cell table:formula="of:=[.D823]-[.D8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4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28333333333333" calcext:value-type="float">
            <text:p>0,00228333333333333000</text:p>
          </table:table-cell>
          <table:table-cell table:formula="of:=[.D824]-[.D8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4" office:value-type="float" office:value="19752" calcext:value-type="float">
            <text:p>19752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28611111111111" calcext:value-type="float">
            <text:p>0,00228611111111111000</text:p>
          </table:table-cell>
          <table:table-cell table:formula="of:=[.D825]-[.D8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4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28888888888889" calcext:value-type="float">
            <text:p>0,00228888888888889000</text:p>
          </table:table-cell>
          <table:table-cell table:formula="of:=[.D826]-[.D8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4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29166666666667" calcext:value-type="float">
            <text:p>0,00229166666666667000</text:p>
          </table:table-cell>
          <table:table-cell table:formula="of:=[.D827]-[.D8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4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29444444444444" calcext:value-type="float">
            <text:p>0,00229444444444444000</text:p>
          </table:table-cell>
          <table:table-cell table:formula="of:=[.D828]-[.D8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4" office:value-type="float" office:value="19848" calcext:value-type="float">
            <text:p>19848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29722222222222" calcext:value-type="float">
            <text:p>0,00229722222222222000</text:p>
          </table:table-cell>
          <table:table-cell table:formula="of:=[.D829]-[.D8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4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3" calcext:value-type="float">
            <text:p>0,00230000000000000000</text:p>
          </table:table-cell>
          <table:table-cell table:formula="of:=[.D830]-[.D8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4" office:value-type="float" office:value="19896" calcext:value-type="float">
            <text:p>19896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30277777777778" calcext:value-type="float">
            <text:p>0,00230277777777778000</text:p>
          </table:table-cell>
          <table:table-cell table:formula="of:=[.D831]-[.D8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4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30555555555556" calcext:value-type="float">
            <text:p>0,00230555555555556000</text:p>
          </table:table-cell>
          <table:table-cell table:formula="of:=[.D832]-[.D8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4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30833333333333" calcext:value-type="float">
            <text:p>0,00230833333333333000</text:p>
          </table:table-cell>
          <table:table-cell table:formula="of:=[.D833]-[.D8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4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31111111111111" calcext:value-type="float">
            <text:p>0,00231111111111111000</text:p>
          </table:table-cell>
          <table:table-cell table:formula="of:=[.D834]-[.D8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4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31388888888889" calcext:value-type="float">
            <text:p>0,00231388888888889000</text:p>
          </table:table-cell>
          <table:table-cell table:formula="of:=[.D835]-[.D8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4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31666666666667" calcext:value-type="float">
            <text:p>0,00231666666666667000</text:p>
          </table:table-cell>
          <table:table-cell table:formula="of:=[.D836]-[.D8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4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31944444444444" calcext:value-type="float">
            <text:p>0,00231944444444444000</text:p>
          </table:table-cell>
          <table:table-cell table:formula="of:=[.D837]-[.D8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4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32222222222222" calcext:value-type="float">
            <text:p>0,00232222222222222000</text:p>
          </table:table-cell>
          <table:table-cell table:formula="of:=[.D838]-[.D8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4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325" calcext:value-type="float">
            <text:p>0,00232500000000000000</text:p>
          </table:table-cell>
          <table:table-cell table:formula="of:=[.D839]-[.D8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4" office:value-type="float" office:value="20112" calcext:value-type="float">
            <text:p>20112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32777777777778" calcext:value-type="float">
            <text:p>0,00232777777777778000</text:p>
          </table:table-cell>
          <table:table-cell table:formula="of:=[.D840]-[.D839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4" office:value-type="float" office:value="20136" calcext:value-type="float">
            <text:p>20136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33055555555556" calcext:value-type="float">
            <text:p>0,00233055555555556000</text:p>
          </table:table-cell>
          <table:table-cell table:formula="of:=[.D841]-[.D8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4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33333333333333" calcext:value-type="float">
            <text:p>0,00233333333333333000</text:p>
          </table:table-cell>
          <table:table-cell table:formula="of:=[.D842]-[.D8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4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33611111111111" calcext:value-type="float">
            <text:p>0,00233611111111111000</text:p>
          </table:table-cell>
          <table:table-cell table:formula="of:=[.D843]-[.D84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4" office:value-type="float" office:value="20208" calcext:value-type="float">
            <text:p>20208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33888888888889" calcext:value-type="float">
            <text:p>0,00233888888888889000</text:p>
          </table:table-cell>
          <table:table-cell table:formula="of:=[.D844]-[.D8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4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34166666666667" calcext:value-type="float">
            <text:p>0,00234166666666667000</text:p>
          </table:table-cell>
          <table:table-cell table:formula="of:=[.D845]-[.D8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4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34444444444444" calcext:value-type="float">
            <text:p>0,00234444444444444000</text:p>
          </table:table-cell>
          <table:table-cell table:formula="of:=[.D846]-[.D8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4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34722222222222" calcext:value-type="float">
            <text:p>0,00234722222222222000</text:p>
          </table:table-cell>
          <table:table-cell table:formula="of:=[.D847]-[.D8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4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35" calcext:value-type="float">
            <text:p>0,00235000000000000000</text:p>
          </table:table-cell>
          <table:table-cell table:formula="of:=[.D848]-[.D8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4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35277777777778" calcext:value-type="float">
            <text:p>0,00235277777777778000</text:p>
          </table:table-cell>
          <table:table-cell table:formula="of:=[.D849]-[.D8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4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35555555555556" calcext:value-type="float">
            <text:p>0,00235555555555556000</text:p>
          </table:table-cell>
          <table:table-cell table:formula="of:=[.D850]-[.D8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4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35833333333333" calcext:value-type="float">
            <text:p>0,00235833333333333000</text:p>
          </table:table-cell>
          <table:table-cell table:formula="of:=[.D851]-[.D8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4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36111111111111" calcext:value-type="float">
            <text:p>0,00236111111111111000</text:p>
          </table:table-cell>
          <table:table-cell table:formula="of:=[.D852]-[.D8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4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36388888888889" calcext:value-type="float">
            <text:p>0,00236388888888889000</text:p>
          </table:table-cell>
          <table:table-cell table:formula="of:=[.D853]-[.D8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4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36666666666667" calcext:value-type="float">
            <text:p>0,00236666666666667000</text:p>
          </table:table-cell>
          <table:table-cell table:formula="of:=[.D854]-[.D8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4" office:value-type="float" office:value="20472" calcext:value-type="float">
            <text:p>20472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36944444444444" calcext:value-type="float">
            <text:p>0,00236944444444444000</text:p>
          </table:table-cell>
          <table:table-cell table:formula="of:=[.D855]-[.D8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4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37222222222222" calcext:value-type="float">
            <text:p>0,00237222222222222000</text:p>
          </table:table-cell>
          <table:table-cell table:formula="of:=[.D856]-[.D8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4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375" calcext:value-type="float">
            <text:p>0,00237500000000000000</text:p>
          </table:table-cell>
          <table:table-cell table:formula="of:=[.D857]-[.D8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4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37777777777778" calcext:value-type="float">
            <text:p>0,00237777777777778000</text:p>
          </table:table-cell>
          <table:table-cell table:formula="of:=[.D858]-[.D8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4" office:value-type="float" office:value="20568" calcext:value-type="float">
            <text:p>20568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38055555555556" calcext:value-type="float">
            <text:p>0,00238055555555556000</text:p>
          </table:table-cell>
          <table:table-cell table:formula="of:=[.D859]-[.D8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4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38333333333333" calcext:value-type="float">
            <text:p>0,00238333333333333000</text:p>
          </table:table-cell>
          <table:table-cell table:formula="of:=[.D860]-[.D8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4" office:value-type="float" office:value="20616" calcext:value-type="float">
            <text:p>20616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38611111111111" calcext:value-type="float">
            <text:p>0,00238611111111111000</text:p>
          </table:table-cell>
          <table:table-cell table:formula="of:=[.D861]-[.D8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4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38888888888889" calcext:value-type="float">
            <text:p>0,00238888888888889000</text:p>
          </table:table-cell>
          <table:table-cell table:formula="of:=[.D862]-[.D8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4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39166666666667" calcext:value-type="float">
            <text:p>0,00239166666666667000</text:p>
          </table:table-cell>
          <table:table-cell table:formula="of:=[.D863]-[.D8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4" office:value-type="float" office:value="20688" calcext:value-type="float">
            <text:p>20688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39444444444444" calcext:value-type="float">
            <text:p>0,00239444444444444000</text:p>
          </table:table-cell>
          <table:table-cell table:formula="of:=[.D864]-[.D8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4" office:value-type="float" office:value="20712" calcext:value-type="float">
            <text:p>20712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39722222222222" calcext:value-type="float">
            <text:p>0,00239722222222222000</text:p>
          </table:table-cell>
          <table:table-cell table:formula="of:=[.D865]-[.D8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4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4" calcext:value-type="float">
            <text:p>0,00240000000000000000</text:p>
          </table:table-cell>
          <table:table-cell table:formula="of:=[.D866]-[.D865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4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40277777777778" calcext:value-type="float">
            <text:p>0,00240277777777778000</text:p>
          </table:table-cell>
          <table:table-cell table:formula="of:=[.D867]-[.D8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4" office:value-type="float" office:value="20784" calcext:value-type="float">
            <text:p>20784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40555555555556" calcext:value-type="float">
            <text:p>0,00240555555555556000</text:p>
          </table:table-cell>
          <table:table-cell table:formula="of:=[.D868]-[.D8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4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40833333333333" calcext:value-type="float">
            <text:p>0,00240833333333333000</text:p>
          </table:table-cell>
          <table:table-cell table:formula="of:=[.D869]-[.D86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4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41111111111111" calcext:value-type="float">
            <text:p>0,00241111111111111000</text:p>
          </table:table-cell>
          <table:table-cell table:formula="of:=[.D870]-[.D8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4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41388888888889" calcext:value-type="float">
            <text:p>0,00241388888888889000</text:p>
          </table:table-cell>
          <table:table-cell table:formula="of:=[.D871]-[.D8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4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41666666666667" calcext:value-type="float">
            <text:p>0,00241666666666667000</text:p>
          </table:table-cell>
          <table:table-cell table:formula="of:=[.D872]-[.D8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4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41944444444444" calcext:value-type="float">
            <text:p>0,00241944444444444000</text:p>
          </table:table-cell>
          <table:table-cell table:formula="of:=[.D873]-[.D8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4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42222222222222" calcext:value-type="float">
            <text:p>0,00242222222222222000</text:p>
          </table:table-cell>
          <table:table-cell table:formula="of:=[.D874]-[.D8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4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425" calcext:value-type="float">
            <text:p>0,00242500000000000000</text:p>
          </table:table-cell>
          <table:table-cell table:formula="of:=[.D875]-[.D8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4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42777777777778" calcext:value-type="float">
            <text:p>0,00242777777777778000</text:p>
          </table:table-cell>
          <table:table-cell table:formula="of:=[.D876]-[.D8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4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43055555555556" calcext:value-type="float">
            <text:p>0,00243055555555556000</text:p>
          </table:table-cell>
          <table:table-cell table:formula="of:=[.D877]-[.D8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4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43333333333333" calcext:value-type="float">
            <text:p>0,00243333333333333000</text:p>
          </table:table-cell>
          <table:table-cell table:formula="of:=[.D878]-[.D8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4" office:value-type="float" office:value="21048" calcext:value-type="float">
            <text:p>21048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43611111111111" calcext:value-type="float">
            <text:p>0,00243611111111111000</text:p>
          </table:table-cell>
          <table:table-cell table:formula="of:=[.D879]-[.D8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4" office:value-type="float" office:value="21072" calcext:value-type="float">
            <text:p>21072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43888888888889" calcext:value-type="float">
            <text:p>0,00243888888888889000</text:p>
          </table:table-cell>
          <table:table-cell table:formula="of:=[.D880]-[.D8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4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44166666666667" calcext:value-type="float">
            <text:p>0,00244166666666667000</text:p>
          </table:table-cell>
          <table:table-cell table:formula="of:=[.D881]-[.D8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4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44444444444444" calcext:value-type="float">
            <text:p>0,00244444444444444000</text:p>
          </table:table-cell>
          <table:table-cell table:formula="of:=[.D882]-[.D8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4" office:value-type="float" office:value="21144" calcext:value-type="float">
            <text:p>21144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44722222222222" calcext:value-type="float">
            <text:p>0,00244722222222222000</text:p>
          </table:table-cell>
          <table:table-cell table:formula="of:=[.D883]-[.D8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4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45" calcext:value-type="float">
            <text:p>0,00245000000000000000</text:p>
          </table:table-cell>
          <table:table-cell table:formula="of:=[.D884]-[.D8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4" office:value-type="float" office:value="21192" calcext:value-type="float">
            <text:p>21192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45277777777778" calcext:value-type="float">
            <text:p>0,00245277777777778000</text:p>
          </table:table-cell>
          <table:table-cell table:formula="of:=[.D885]-[.D8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4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45555555555556" calcext:value-type="float">
            <text:p>0,00245555555555556000</text:p>
          </table:table-cell>
          <table:table-cell table:formula="of:=[.D886]-[.D8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4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45833333333333" calcext:value-type="float">
            <text:p>0,00245833333333333000</text:p>
          </table:table-cell>
          <table:table-cell table:formula="of:=[.D887]-[.D8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4" office:value-type="float" office:value="21264" calcext:value-type="float">
            <text:p>21264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46111111111111" calcext:value-type="float">
            <text:p>0,00246111111111111000</text:p>
          </table:table-cell>
          <table:table-cell table:formula="of:=[.D888]-[.D8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4" office:value-type="float" office:value="21288" calcext:value-type="float">
            <text:p>21288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46388888888889" calcext:value-type="float">
            <text:p>0,00246388888888889000</text:p>
          </table:table-cell>
          <table:table-cell table:formula="of:=[.D889]-[.D8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4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46666666666667" calcext:value-type="float">
            <text:p>0,00246666666666667000</text:p>
          </table:table-cell>
          <table:table-cell table:formula="of:=[.D890]-[.D8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4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46944444444444" calcext:value-type="float">
            <text:p>0,00246944444444444000</text:p>
          </table:table-cell>
          <table:table-cell table:formula="of:=[.D891]-[.D8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4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47222222222222" calcext:value-type="float">
            <text:p>0,00247222222222222000</text:p>
          </table:table-cell>
          <table:table-cell table:formula="of:=[.D892]-[.D891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4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475" calcext:value-type="float">
            <text:p>0,00247500000000000000</text:p>
          </table:table-cell>
          <table:table-cell table:formula="of:=[.D893]-[.D8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4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47777777777778" calcext:value-type="float">
            <text:p>0,00247777777777778000</text:p>
          </table:table-cell>
          <table:table-cell table:formula="of:=[.D894]-[.D8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4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48055555555556" calcext:value-type="float">
            <text:p>0,00248055555555556000</text:p>
          </table:table-cell>
          <table:table-cell table:formula="of:=[.D895]-[.D89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4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48333333333333" calcext:value-type="float">
            <text:p>0,00248333333333333000</text:p>
          </table:table-cell>
          <table:table-cell table:formula="of:=[.D896]-[.D8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4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48611111111111" calcext:value-type="float">
            <text:p>0,00248611111111111000</text:p>
          </table:table-cell>
          <table:table-cell table:formula="of:=[.D897]-[.D8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4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48888888888889" calcext:value-type="float">
            <text:p>0,00248888888888889000</text:p>
          </table:table-cell>
          <table:table-cell table:formula="of:=[.D898]-[.D8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4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49166666666667" calcext:value-type="float">
            <text:p>0,00249166666666667000</text:p>
          </table:table-cell>
          <table:table-cell table:formula="of:=[.D899]-[.D8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4" office:value-type="float" office:value="21552" calcext:value-type="float">
            <text:p>21552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49444444444444" calcext:value-type="float">
            <text:p>0,00249444444444444000</text:p>
          </table:table-cell>
          <table:table-cell table:formula="of:=[.D900]-[.D8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4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49722222222222" calcext:value-type="float">
            <text:p>0,00249722222222222000</text:p>
          </table:table-cell>
          <table:table-cell table:formula="of:=[.D901]-[.D9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4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5" calcext:value-type="float">
            <text:p>0,00250000000000000000</text:p>
          </table:table-cell>
          <table:table-cell table:formula="of:=[.D902]-[.D90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4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50277777777778" calcext:value-type="float">
            <text:p>0,00250277777777778000</text:p>
          </table:table-cell>
          <table:table-cell table:formula="of:=[.D903]-[.D90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4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50555555555556" calcext:value-type="float">
            <text:p>0,00250555555555556000</text:p>
          </table:table-cell>
          <table:table-cell table:formula="of:=[.D904]-[.D90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4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50833333333333" calcext:value-type="float">
            <text:p>0,00250833333333333000</text:p>
          </table:table-cell>
          <table:table-cell table:formula="of:=[.D905]-[.D90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4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51111111111111" calcext:value-type="float">
            <text:p>0,00251111111111111000</text:p>
          </table:table-cell>
          <table:table-cell table:formula="of:=[.D906]-[.D90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4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51388888888889" calcext:value-type="float">
            <text:p>0,00251388888888889000</text:p>
          </table:table-cell>
          <table:table-cell table:formula="of:=[.D907]-[.D90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4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51666666666667" calcext:value-type="float">
            <text:p>0,00251666666666667000</text:p>
          </table:table-cell>
          <table:table-cell table:formula="of:=[.D908]-[.D90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4" office:value-type="float" office:value="21768" calcext:value-type="float">
            <text:p>21768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51944444444444" calcext:value-type="float">
            <text:p>0,00251944444444444000</text:p>
          </table:table-cell>
          <table:table-cell table:formula="of:=[.D909]-[.D90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4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52222222222222" calcext:value-type="float">
            <text:p>0,00252222222222222000</text:p>
          </table:table-cell>
          <table:table-cell table:formula="of:=[.D910]-[.D90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4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525" calcext:value-type="float">
            <text:p>0,00252500000000000000</text:p>
          </table:table-cell>
          <table:table-cell table:formula="of:=[.D911]-[.D91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4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52777777777778" calcext:value-type="float">
            <text:p>0,00252777777777778000</text:p>
          </table:table-cell>
          <table:table-cell table:formula="of:=[.D912]-[.D91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4" office:value-type="float" office:value="21864" calcext:value-type="float">
            <text:p>21864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53055555555556" calcext:value-type="float">
            <text:p>0,00253055555555556000</text:p>
          </table:table-cell>
          <table:table-cell table:formula="of:=[.D913]-[.D91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4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53333333333333" calcext:value-type="float">
            <text:p>0,00253333333333333000</text:p>
          </table:table-cell>
          <table:table-cell table:formula="of:=[.D914]-[.D91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4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53611111111111" calcext:value-type="float">
            <text:p>0,00253611111111111000</text:p>
          </table:table-cell>
          <table:table-cell table:formula="of:=[.D915]-[.D91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4" office:value-type="float" office:value="21936" calcext:value-type="float">
            <text:p>21936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53888888888889" calcext:value-type="float">
            <text:p>0,00253888888888889000</text:p>
          </table:table-cell>
          <table:table-cell table:formula="of:=[.D916]-[.D91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4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54166666666667" calcext:value-type="float">
            <text:p>0,00254166666666667000</text:p>
          </table:table-cell>
          <table:table-cell table:formula="of:=[.D917]-[.D916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4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54444444444444" calcext:value-type="float">
            <text:p>0,00254444444444444000</text:p>
          </table:table-cell>
          <table:table-cell table:formula="of:=[.D918]-[.D91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4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54722222222222" calcext:value-type="float">
            <text:p>0,00254722222222222000</text:p>
          </table:table-cell>
          <table:table-cell table:formula="of:=[.D919]-[.D91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4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55" calcext:value-type="float">
            <text:p>0,00255000000000000000</text:p>
          </table:table-cell>
          <table:table-cell table:formula="of:=[.D920]-[.D91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4" office:value-type="float" office:value="22056" calcext:value-type="float">
            <text:p>22056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55277777777778" calcext:value-type="float">
            <text:p>0,00255277777777778000</text:p>
          </table:table-cell>
          <table:table-cell table:formula="of:=[.D921]-[.D92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4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55555555555556" calcext:value-type="float">
            <text:p>0,00255555555555556000</text:p>
          </table:table-cell>
          <table:table-cell table:formula="of:=[.D922]-[.D92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4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55833333333333" calcext:value-type="float">
            <text:p>0,00255833333333333000</text:p>
          </table:table-cell>
          <table:table-cell table:formula="of:=[.D923]-[.D92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4" office:value-type="float" office:value="22128" calcext:value-type="float">
            <text:p>22128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56111111111111" calcext:value-type="float">
            <text:p>0,00256111111111111000</text:p>
          </table:table-cell>
          <table:table-cell table:formula="of:=[.D924]-[.D92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4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56388888888889" calcext:value-type="float">
            <text:p>0,00256388888888889000</text:p>
          </table:table-cell>
          <table:table-cell table:formula="of:=[.D925]-[.D92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4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56666666666667" calcext:value-type="float">
            <text:p>0,00256666666666667000</text:p>
          </table:table-cell>
          <table:table-cell table:formula="of:=[.D926]-[.D92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4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56944444444444" calcext:value-type="float">
            <text:p>0,00256944444444444000</text:p>
          </table:table-cell>
          <table:table-cell table:formula="of:=[.D927]-[.D92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4" office:value-type="float" office:value="22224" calcext:value-type="float">
            <text:p>22224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57222222222222" calcext:value-type="float">
            <text:p>0,00257222222222222000</text:p>
          </table:table-cell>
          <table:table-cell table:formula="of:=[.D928]-[.D92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4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575" calcext:value-type="float">
            <text:p>0,00257500000000000000</text:p>
          </table:table-cell>
          <table:table-cell table:formula="of:=[.D929]-[.D92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4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57777777777778" calcext:value-type="float">
            <text:p>0,00257777777777778000</text:p>
          </table:table-cell>
          <table:table-cell table:formula="of:=[.D930]-[.D92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4" office:value-type="float" office:value="22296" calcext:value-type="float">
            <text:p>22296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58055555555556" calcext:value-type="float">
            <text:p>0,00258055555555556000</text:p>
          </table:table-cell>
          <table:table-cell table:formula="of:=[.D931]-[.D93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4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58333333333333" calcext:value-type="float">
            <text:p>0,00258333333333333000</text:p>
          </table:table-cell>
          <table:table-cell table:formula="of:=[.D932]-[.D93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4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58611111111111" calcext:value-type="float">
            <text:p>0,00258611111111111000</text:p>
          </table:table-cell>
          <table:table-cell table:formula="of:=[.D933]-[.D93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4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58888888888889" calcext:value-type="float">
            <text:p>0,00258888888888889000</text:p>
          </table:table-cell>
          <table:table-cell table:formula="of:=[.D934]-[.D93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4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59166666666667" calcext:value-type="float">
            <text:p>0,00259166666666667000</text:p>
          </table:table-cell>
          <table:table-cell table:formula="of:=[.D935]-[.D93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4" office:value-type="float" office:value="22416" calcext:value-type="float">
            <text:p>22416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59444444444444" calcext:value-type="float">
            <text:p>0,00259444444444444000</text:p>
          </table:table-cell>
          <table:table-cell table:formula="of:=[.D936]-[.D93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4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59722222222222" calcext:value-type="float">
            <text:p>0,00259722222222222000</text:p>
          </table:table-cell>
          <table:table-cell table:formula="of:=[.D937]-[.D93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4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6" calcext:value-type="float">
            <text:p>0,00260000000000000000</text:p>
          </table:table-cell>
          <table:table-cell table:formula="of:=[.D938]-[.D93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4" office:value-type="float" office:value="22488" calcext:value-type="float">
            <text:p>22488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60277777777778" calcext:value-type="float">
            <text:p>0,00260277777777778000</text:p>
          </table:table-cell>
          <table:table-cell table:formula="of:=[.D939]-[.D93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4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60555555555556" calcext:value-type="float">
            <text:p>0,00260555555555556000</text:p>
          </table:table-cell>
          <table:table-cell table:formula="of:=[.D940]-[.D93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4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60833333333333" calcext:value-type="float">
            <text:p>0,00260833333333333000</text:p>
          </table:table-cell>
          <table:table-cell table:formula="of:=[.D941]-[.D94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4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61111111111111" calcext:value-type="float">
            <text:p>0,00261111111111111000</text:p>
          </table:table-cell>
          <table:table-cell table:formula="of:=[.D942]-[.D94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4" office:value-type="float" office:value="22584" calcext:value-type="float">
            <text:p>22584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61388888888889" calcext:value-type="float">
            <text:p>0,00261388888888889000</text:p>
          </table:table-cell>
          <table:table-cell table:formula="of:=[.D943]-[.D942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4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61666666666667" calcext:value-type="float">
            <text:p>0,00261666666666667000</text:p>
          </table:table-cell>
          <table:table-cell table:formula="of:=[.D944]-[.D94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4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61944444444444" calcext:value-type="float">
            <text:p>0,00261944444444444000</text:p>
          </table:table-cell>
          <table:table-cell table:formula="of:=[.D945]-[.D94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4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62222222222222" calcext:value-type="float">
            <text:p>0,00262222222222222000</text:p>
          </table:table-cell>
          <table:table-cell table:formula="of:=[.D946]-[.D94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4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625" calcext:value-type="float">
            <text:p>0,00262500000000000000</text:p>
          </table:table-cell>
          <table:table-cell table:formula="of:=[.D947]-[.D94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4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62777777777778" calcext:value-type="float">
            <text:p>0,00262777777777778000</text:p>
          </table:table-cell>
          <table:table-cell table:formula="of:=[.D948]-[.D94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4" office:value-type="float" office:value="22728" calcext:value-type="float">
            <text:p>22728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63055555555556" calcext:value-type="float">
            <text:p>0,00263055555555556000</text:p>
          </table:table-cell>
          <table:table-cell table:formula="of:=[.D949]-[.D94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4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63333333333333" calcext:value-type="float">
            <text:p>0,00263333333333333000</text:p>
          </table:table-cell>
          <table:table-cell table:formula="of:=[.D950]-[.D94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4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63611111111111" calcext:value-type="float">
            <text:p>0,00263611111111111000</text:p>
          </table:table-cell>
          <table:table-cell table:formula="of:=[.D951]-[.D95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4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63888888888889" calcext:value-type="float">
            <text:p>0,00263888888888889000</text:p>
          </table:table-cell>
          <table:table-cell table:formula="of:=[.D952]-[.D95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4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64166666666667" calcext:value-type="float">
            <text:p>0,00264166666666667000</text:p>
          </table:table-cell>
          <table:table-cell table:formula="of:=[.D953]-[.D95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4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64444444444444" calcext:value-type="float">
            <text:p>0,00264444444444444000</text:p>
          </table:table-cell>
          <table:table-cell table:formula="of:=[.D954]-[.D95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4" office:value-type="float" office:value="22872" calcext:value-type="float">
            <text:p>22872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64722222222222" calcext:value-type="float">
            <text:p>0,00264722222222222000</text:p>
          </table:table-cell>
          <table:table-cell table:formula="of:=[.D955]-[.D95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4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65" calcext:value-type="float">
            <text:p>0,00265000000000000000</text:p>
          </table:table-cell>
          <table:table-cell table:formula="of:=[.D956]-[.D95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4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65277777777778" calcext:value-type="float">
            <text:p>0,00265277777777778000</text:p>
          </table:table-cell>
          <table:table-cell table:formula="of:=[.D957]-[.D95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4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65555555555556" calcext:value-type="float">
            <text:p>0,00265555555555556000</text:p>
          </table:table-cell>
          <table:table-cell table:formula="of:=[.D958]-[.D95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4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65833333333333" calcext:value-type="float">
            <text:p>0,00265833333333333000</text:p>
          </table:table-cell>
          <table:table-cell table:formula="of:=[.D959]-[.D95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4" office:value-type="float" office:value="22992" calcext:value-type="float">
            <text:p>22992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66111111111111" calcext:value-type="float">
            <text:p>0,00266111111111111000</text:p>
          </table:table-cell>
          <table:table-cell table:formula="of:=[.D960]-[.D95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4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66388888888889" calcext:value-type="float">
            <text:p>0,00266388888888889000</text:p>
          </table:table-cell>
          <table:table-cell table:formula="of:=[.D961]-[.D96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4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66666666666667" calcext:value-type="float">
            <text:p>0,00266666666666667000</text:p>
          </table:table-cell>
          <table:table-cell table:formula="of:=[.D962]-[.D96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24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66944444444444" calcext:value-type="float">
            <text:p>0,00266944444444444000</text:p>
          </table:table-cell>
          <table:table-cell table:formula="of:=[.D963]-[.D96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24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67222222222222" calcext:value-type="float">
            <text:p>0,00267222222222222000</text:p>
          </table:table-cell>
          <table:table-cell table:formula="of:=[.D964]-[.D96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24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675" calcext:value-type="float">
            <text:p>0,00267500000000000000</text:p>
          </table:table-cell>
          <table:table-cell table:formula="of:=[.D965]-[.D96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24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67777777777778" calcext:value-type="float">
            <text:p>0,00267777777777778000</text:p>
          </table:table-cell>
          <table:table-cell table:formula="of:=[.D966]-[.D96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24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68055555555556" calcext:value-type="float">
            <text:p>0,00268055555555556000</text:p>
          </table:table-cell>
          <table:table-cell table:formula="of:=[.D967]-[.D96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24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68333333333333" calcext:value-type="float">
            <text:p>0,00268333333333333000</text:p>
          </table:table-cell>
          <table:table-cell table:formula="of:=[.D968]-[.D96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24" office:value-type="float" office:value="23208" calcext:value-type="float">
            <text:p>23208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68611111111111" calcext:value-type="float">
            <text:p>0,00268611111111111000</text:p>
          </table:table-cell>
          <table:table-cell table:formula="of:=[.D969]-[.D968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24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68888888888889" calcext:value-type="float">
            <text:p>0,00268888888888889000</text:p>
          </table:table-cell>
          <table:table-cell table:formula="of:=[.D970]-[.D96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24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69166666666667" calcext:value-type="float">
            <text:p>0,00269166666666667000</text:p>
          </table:table-cell>
          <table:table-cell table:formula="of:=[.D971]-[.D97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24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69444444444444" calcext:value-type="float">
            <text:p>0,00269444444444444000</text:p>
          </table:table-cell>
          <table:table-cell table:formula="of:=[.D972]-[.D97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24" office:value-type="float" office:value="23304" calcext:value-type="float">
            <text:p>23304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69722222222222" calcext:value-type="float">
            <text:p>0,00269722222222222000</text:p>
          </table:table-cell>
          <table:table-cell table:formula="of:=[.D973]-[.D97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24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7" calcext:value-type="float">
            <text:p>0,00270000000000000000</text:p>
          </table:table-cell>
          <table:table-cell table:formula="of:=[.D974]-[.D97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24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70277777777778" calcext:value-type="float">
            <text:p>0,00270277777777778000</text:p>
          </table:table-cell>
          <table:table-cell table:formula="of:=[.D975]-[.D97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24" office:value-type="float" office:value="23376" calcext:value-type="float">
            <text:p>23376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70555555555556" calcext:value-type="float">
            <text:p>0,00270555555555556000</text:p>
          </table:table-cell>
          <table:table-cell table:formula="of:=[.D976]-[.D97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24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70833333333333" calcext:value-type="float">
            <text:p>0,00270833333333333000</text:p>
          </table:table-cell>
          <table:table-cell table:formula="of:=[.D977]-[.D97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24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71111111111111" calcext:value-type="float">
            <text:p>0,00271111111111111000</text:p>
          </table:table-cell>
          <table:table-cell table:formula="of:=[.D978]-[.D97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24" office:value-type="float" office:value="23448" calcext:value-type="float">
            <text:p>23448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71388888888889" calcext:value-type="float">
            <text:p>0,00271388888888889000</text:p>
          </table:table-cell>
          <table:table-cell table:formula="of:=[.D979]-[.D97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24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71666666666667" calcext:value-type="float">
            <text:p>0,00271666666666667000</text:p>
          </table:table-cell>
          <table:table-cell table:formula="of:=[.D980]-[.D97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24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71944444444444" calcext:value-type="float">
            <text:p>0,00271944444444444000</text:p>
          </table:table-cell>
          <table:table-cell table:formula="of:=[.D981]-[.D98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24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72222222222222" calcext:value-type="float">
            <text:p>0,00272222222222222000</text:p>
          </table:table-cell>
          <table:table-cell table:formula="of:=[.D982]-[.D98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24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725" calcext:value-type="float">
            <text:p>0,00272500000000000000</text:p>
          </table:table-cell>
          <table:table-cell table:formula="of:=[.D983]-[.D98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24" office:value-type="float" office:value="23568" calcext:value-type="float">
            <text:p>23568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72777777777778" calcext:value-type="float">
            <text:p>0,00272777777777778000</text:p>
          </table:table-cell>
          <table:table-cell table:formula="of:=[.D984]-[.D98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24" office:value-type="float" office:value="23592" calcext:value-type="float">
            <text:p>23592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73055555555556" calcext:value-type="float">
            <text:p>0,00273055555555556000</text:p>
          </table:table-cell>
          <table:table-cell table:formula="of:=[.D985]-[.D984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24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73333333333333" calcext:value-type="float">
            <text:p>0,00273333333333333000</text:p>
          </table:table-cell>
          <table:table-cell table:formula="of:=[.D986]-[.D98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24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73611111111111" calcext:value-type="float">
            <text:p>0,00273611111111111000</text:p>
          </table:table-cell>
          <table:table-cell table:formula="of:=[.D987]-[.D98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24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73888888888889" calcext:value-type="float">
            <text:p>0,00273888888888889000</text:p>
          </table:table-cell>
          <table:table-cell table:formula="of:=[.D988]-[.D98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24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74166666666667" calcext:value-type="float">
            <text:p>0,00274166666666667000</text:p>
          </table:table-cell>
          <table:table-cell table:formula="of:=[.D989]-[.D98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24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74444444444444" calcext:value-type="float">
            <text:p>0,00274444444444444000</text:p>
          </table:table-cell>
          <table:table-cell table:formula="of:=[.D990]-[.D98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24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74722222222222" calcext:value-type="float">
            <text:p>0,00274722222222222000</text:p>
          </table:table-cell>
          <table:table-cell table:formula="of:=[.D991]-[.D99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24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75" calcext:value-type="float">
            <text:p>0,00275000000000000000</text:p>
          </table:table-cell>
          <table:table-cell table:formula="of:=[.D992]-[.D991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24" office:value-type="float" office:value="23784" calcext:value-type="float">
            <text:p>23784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75277777777778" calcext:value-type="float">
            <text:p>0,00275277777777778000</text:p>
          </table:table-cell>
          <table:table-cell table:formula="of:=[.D993]-[.D992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24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75555555555556" calcext:value-type="float">
            <text:p>0,00275555555555556000</text:p>
          </table:table-cell>
          <table:table-cell table:formula="of:=[.D994]-[.D993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24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75833333333333" calcext:value-type="float">
            <text:p>0,00275833333333333000</text:p>
          </table:table-cell>
          <table:table-cell table:formula="of:=[.D995]-[.D994]" office:value-type="float" office:value="0.00000277777777777819" calcext:value-type="float">
            <text:p>0,0000027777777777781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24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76111111111111" calcext:value-type="float">
            <text:p>0,00276111111111111000</text:p>
          </table:table-cell>
          <table:table-cell table:formula="of:=[.D996]-[.D995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24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76388888888889" calcext:value-type="float">
            <text:p>0,00276388888888889000</text:p>
          </table:table-cell>
          <table:table-cell table:formula="of:=[.D997]-[.D996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24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76666666666667" calcext:value-type="float">
            <text:p>0,00276666666666667000</text:p>
          </table:table-cell>
          <table:table-cell table:formula="of:=[.D998]-[.D997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24" office:value-type="float" office:value="23928" calcext:value-type="float">
            <text:p>23928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76944444444444" calcext:value-type="float">
            <text:p>0,00276944444444444000</text:p>
          </table:table-cell>
          <table:table-cell table:formula="of:=[.D999]-[.D998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24" office:value-type="float" office:value="23952" calcext:value-type="float">
            <text:p>23952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77222222222222" calcext:value-type="float">
            <text:p>0,00277222222222222000</text:p>
          </table:table-cell>
          <table:table-cell table:formula="of:=[.D1000]-[.D999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24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775" calcext:value-type="float">
            <text:p>0,00277500000000000000</text:p>
          </table:table-cell>
          <table:table-cell table:formula="of:=[.D1001]-[.D1000]" office:value-type="float" office:value="0.00000277777777777776" calcext:value-type="float">
            <text:p>0,00000277777777777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24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77777777777778" calcext:value-type="float">
            <text:p>0,00277777777777778000</text:p>
          </table:table-cell>
          <table:table-cell table:formula="of:=#REF!-[.D1001]" office:value-type="string" office:string-value="" calcext:value-type="error">
            <text:p>#REF!</text:p>
          </table:table-cell>
        </table:table-row>
        <table:table-row table:style-name="ro1" table:number-rows-repeated="1047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2:47.046100470</meta:creation-date>
    <dc:date>2026-05-17T15:52:53.184208104</dc:date>
    <meta:editing-duration>PT7S</meta:editing-duration>
    <meta:editing-cycles>1</meta:editing-cycles>
    <meta:document-statistic meta:table-count="1" meta:cell-count="5005" meta:object-count="0"/>
    <meta:generator>LibreOffice/24.2.7.2$Linux_X86_64 LibreOffice_project/420$Build-2</meta:generator>
  </office:meta>
</office:document-meta>
</file>