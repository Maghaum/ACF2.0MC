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40740740740741" calcext:value-type="float">
            <text:p>0,00000740740740740741</text:p>
          </table:table-cell>
          <table:table-cell table:formula="of:=[.D3]-[.D2]" office:value-type="float" office:value="0.00000740740740740741" calcext:value-type="float">
            <text:p>0,0000074074074074074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4" office:value-type="float" office:value="128" calcext:value-type="float">
            <text:p>12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48148148148148" calcext:value-type="float">
            <text:p>0,00001481481481481480</text:p>
          </table:table-cell>
          <table:table-cell table:formula="of:=[.D4]-[.D3]" office:value-type="float" office:value="0.00000740740740740741" calcext:value-type="float">
            <text:p>0,0000074074074074074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4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22222222222222" calcext:value-type="float">
            <text:p>0,00002222222222222220</text:p>
          </table:table-cell>
          <table:table-cell table:formula="of:=[.D5]-[.D4]" office:value-type="float" office:value="0.00000740740740740741" calcext:value-type="float">
            <text:p>0,0000074074074074074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4" office:value-type="float" office:value="256" calcext:value-type="float">
            <text:p>25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96296296296296" calcext:value-type="float">
            <text:p>0,00002962962962962960</text:p>
          </table:table-cell>
          <table:table-cell table:formula="of:=[.D6]-[.D5]" office:value-type="float" office:value="0.00000740740740740741" calcext:value-type="float">
            <text:p>0,0000074074074074074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4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7037037037037" calcext:value-type="float">
            <text:p>0,00003703703703703700</text:p>
          </table:table-cell>
          <table:table-cell table:formula="of:=[.D7]-[.D6]" office:value-type="float" office:value="0.00000740740740740741" calcext:value-type="float">
            <text:p>0,0000074074074074074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4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44444444444444" calcext:value-type="float">
            <text:p>0,00004444444444444450</text:p>
          </table:table-cell>
          <table:table-cell table:formula="of:=[.D8]-[.D7]" office:value-type="float" office:value="0.0000074074074074074" calcext:value-type="float">
            <text:p>0,0000074074074074074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4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18518518518519" calcext:value-type="float">
            <text:p>0,00005185185185185190</text:p>
          </table:table-cell>
          <table:table-cell table:formula="of:=[.D9]-[.D8]" office:value-type="float" office:value="0.00000740740740740741" calcext:value-type="float">
            <text:p>0,0000074074074074074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4" office:value-type="float" office:value="512" calcext:value-type="float">
            <text:p>51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92592592592593" calcext:value-type="float">
            <text:p>0,00005925925925925930</text:p>
          </table:table-cell>
          <table:table-cell table:formula="of:=[.D10]-[.D9]" office:value-type="float" office:value="0.00000740740740740741" calcext:value-type="float">
            <text:p>0,0000074074074074074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4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66666666666667" calcext:value-type="float">
            <text:p>0,00006666666666666670</text:p>
          </table:table-cell>
          <table:table-cell table:formula="of:=[.D11]-[.D10]" office:value-type="float" office:value="0.0000074074074074074" calcext:value-type="float">
            <text:p>0,0000074074074074074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4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40740740740741" calcext:value-type="float">
            <text:p>0,00007407407407407410</text:p>
          </table:table-cell>
          <table:table-cell table:formula="of:=[.D12]-[.D11]" office:value-type="float" office:value="0.0000074074074074074" calcext:value-type="float">
            <text:p>0,0000074074074074074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4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14814814814815" calcext:value-type="float">
            <text:p>0,00008148148148148150</text:p>
          </table:table-cell>
          <table:table-cell table:formula="of:=[.D13]-[.D12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4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888888888888889" calcext:value-type="float">
            <text:p>0,00008888888888888890</text:p>
          </table:table-cell>
          <table:table-cell table:formula="of:=[.D14]-[.D13]" office:value-type="float" office:value="0.0000074074074074074" calcext:value-type="float">
            <text:p>0,0000074074074074074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4" office:value-type="float" office:value="832" calcext:value-type="float">
            <text:p>83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962962962962963" calcext:value-type="float">
            <text:p>0,00009629629629629630</text:p>
          </table:table-cell>
          <table:table-cell table:formula="of:=[.D15]-[.D14]" office:value-type="float" office:value="0.0000074074074074074" calcext:value-type="float">
            <text:p>0,0000074074074074074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4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03703703703704" calcext:value-type="float">
            <text:p>0,00010370370370370400</text:p>
          </table:table-cell>
          <table:table-cell table:formula="of:=[.D16]-[.D15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4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11111111111111" calcext:value-type="float">
            <text:p>0,00011111111111111100</text:p>
          </table:table-cell>
          <table:table-cell table:formula="of:=[.D17]-[.D16]" office:value-type="float" office:value="0.0000074074074074074" calcext:value-type="float">
            <text:p>0,0000074074074074074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4" office:value-type="float" office:value="1024" calcext:value-type="float">
            <text:p>102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18518518518519" calcext:value-type="float">
            <text:p>0,00011851851851851900</text:p>
          </table:table-cell>
          <table:table-cell table:formula="of:=[.D18]-[.D17]" office:value-type="float" office:value="0.0000074074074074074" calcext:value-type="float">
            <text:p>0,0000074074074074074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4" office:value-type="float" office:value="1088" calcext:value-type="float">
            <text:p>108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25925925925926" calcext:value-type="float">
            <text:p>0,00012592592592592600</text:p>
          </table:table-cell>
          <table:table-cell table:formula="of:=[.D19]-[.D18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4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33333333333333" calcext:value-type="float">
            <text:p>0,00013333333333333300</text:p>
          </table:table-cell>
          <table:table-cell table:formula="of:=[.D20]-[.D19]" office:value-type="float" office:value="0.00000740740740740739" calcext:value-type="float">
            <text:p>0,00000740740740740739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4" office:value-type="float" office:value="1216" calcext:value-type="float">
            <text:p>121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40740740740741" calcext:value-type="float">
            <text:p>0,00014074074074074100</text:p>
          </table:table-cell>
          <table:table-cell table:formula="of:=[.D21]-[.D20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4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48148148148148" calcext:value-type="float">
            <text:p>0,00014814814814814800</text:p>
          </table:table-cell>
          <table:table-cell table:formula="of:=[.D22]-[.D21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4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55555555555556" calcext:value-type="float">
            <text:p>0,00015555555555555600</text:p>
          </table:table-cell>
          <table:table-cell table:formula="of:=[.D23]-[.D22]" office:value-type="float" office:value="0.00000740740740740739" calcext:value-type="float">
            <text:p>0,00000740740740740739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4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62962962962963" calcext:value-type="float">
            <text:p>0,00016296296296296300</text:p>
          </table:table-cell>
          <table:table-cell table:formula="of:=[.D24]-[.D23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4" office:value-type="float" office:value="1472" calcext:value-type="float">
            <text:p>147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7037037037037" calcext:value-type="float">
            <text:p>0,00017037037037037000</text:p>
          </table:table-cell>
          <table:table-cell table:formula="of:=[.D25]-[.D24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4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77777777777778" calcext:value-type="float">
            <text:p>0,00017777777777777800</text:p>
          </table:table-cell>
          <table:table-cell table:formula="of:=[.D26]-[.D25]" office:value-type="float" office:value="0.00000740740740740739" calcext:value-type="float">
            <text:p>0,00000740740740740739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4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85185185185185" calcext:value-type="float">
            <text:p>0,00018518518518518500</text:p>
          </table:table-cell>
          <table:table-cell table:formula="of:=[.D27]-[.D26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4" office:value-type="float" office:value="1664" calcext:value-type="float">
            <text:p>166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92592592592593" calcext:value-type="float">
            <text:p>0,00019259259259259300</text:p>
          </table:table-cell>
          <table:table-cell table:formula="of:=[.D28]-[.D27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4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" calcext:value-type="float">
            <text:p>0,00020000000000000000</text:p>
          </table:table-cell>
          <table:table-cell table:formula="of:=[.D29]-[.D28]" office:value-type="float" office:value="0.00000740740740740739" calcext:value-type="float">
            <text:p>0,00000740740740740739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4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07407407407407" calcext:value-type="float">
            <text:p>0,00020740740740740700</text:p>
          </table:table-cell>
          <table:table-cell table:formula="of:=[.D30]-[.D29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4" office:value-type="float" office:value="1856" calcext:value-type="float">
            <text:p>185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14814814814815" calcext:value-type="float">
            <text:p>0,00021481481481481500</text:p>
          </table:table-cell>
          <table:table-cell table:formula="of:=[.D31]-[.D30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4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22222222222222" calcext:value-type="float">
            <text:p>0,00022222222222222200</text:p>
          </table:table-cell>
          <table:table-cell table:formula="of:=[.D32]-[.D31]" office:value-type="float" office:value="0.00000740740740740739" calcext:value-type="float">
            <text:p>0,00000740740740740739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4" office:value-type="float" office:value="1984" calcext:value-type="float">
            <text:p>198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2962962962963" calcext:value-type="float">
            <text:p>0,00022962962962963000</text:p>
          </table:table-cell>
          <table:table-cell table:formula="of:=[.D33]-[.D32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4" office:value-type="float" office:value="2048" calcext:value-type="float">
            <text:p>204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37037037037037" calcext:value-type="float">
            <text:p>0,00023703703703703700</text:p>
          </table:table-cell>
          <table:table-cell table:formula="of:=[.D34]-[.D33]" office:value-type="float" office:value="0.00000740740740740739" calcext:value-type="float">
            <text:p>0,00000740740740740739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4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44444444444444" calcext:value-type="float">
            <text:p>0,00024444444444444400</text:p>
          </table:table-cell>
          <table:table-cell table:formula="of:=[.D35]-[.D34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4" office:value-type="float" office:value="2176" calcext:value-type="float">
            <text:p>217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51851851851852" calcext:value-type="float">
            <text:p>0,00025185185185185200</text:p>
          </table:table-cell>
          <table:table-cell table:formula="of:=[.D36]-[.D35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4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59259259259259" calcext:value-type="float">
            <text:p>0,00025925925925925900</text:p>
          </table:table-cell>
          <table:table-cell table:formula="of:=[.D37]-[.D36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4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66666666666667" calcext:value-type="float">
            <text:p>0,00026666666666666700</text:p>
          </table:table-cell>
          <table:table-cell table:formula="of:=[.D38]-[.D37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4" office:value-type="float" office:value="2368" calcext:value-type="float">
            <text:p>236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74074074074074" calcext:value-type="float">
            <text:p>0,00027407407407407400</text:p>
          </table:table-cell>
          <table:table-cell table:formula="of:=[.D39]-[.D3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4" office:value-type="float" office:value="2432" calcext:value-type="float">
            <text:p>243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81481481481481" calcext:value-type="float">
            <text:p>0,00028148148148148100</text:p>
          </table:table-cell>
          <table:table-cell table:formula="of:=[.D40]-[.D39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4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88888888888889" calcext:value-type="float">
            <text:p>0,00028888888888888900</text:p>
          </table:table-cell>
          <table:table-cell table:formula="of:=[.D41]-[.D40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4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96296296296296" calcext:value-type="float">
            <text:p>0,00029629629629629600</text:p>
          </table:table-cell>
          <table:table-cell table:formula="of:=[.D42]-[.D41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4" office:value-type="float" office:value="2624" calcext:value-type="float">
            <text:p>262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03703703703704" calcext:value-type="float">
            <text:p>0,00030370370370370400</text:p>
          </table:table-cell>
          <table:table-cell table:formula="of:=[.D43]-[.D42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4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11111111111111" calcext:value-type="float">
            <text:p>0,00031111111111111100</text:p>
          </table:table-cell>
          <table:table-cell table:formula="of:=[.D44]-[.D43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4" office:value-type="float" office:value="2752" calcext:value-type="float">
            <text:p>275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18518518518519" calcext:value-type="float">
            <text:p>0,00031851851851851900</text:p>
          </table:table-cell>
          <table:table-cell table:formula="of:=[.D45]-[.D4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4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25925925925926" calcext:value-type="float">
            <text:p>0,00032592592592592600</text:p>
          </table:table-cell>
          <table:table-cell table:formula="of:=[.D46]-[.D45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4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33333333333333" calcext:value-type="float">
            <text:p>0,00033333333333333300</text:p>
          </table:table-cell>
          <table:table-cell table:formula="of:=[.D47]-[.D46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4" office:value-type="float" office:value="2944" calcext:value-type="float">
            <text:p>294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40740740740741" calcext:value-type="float">
            <text:p>0,00034074074074074100</text:p>
          </table:table-cell>
          <table:table-cell table:formula="of:=[.D48]-[.D47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4" office:value-type="float" office:value="3008" calcext:value-type="float">
            <text:p>300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48148148148148" calcext:value-type="float">
            <text:p>0,00034814814814814800</text:p>
          </table:table-cell>
          <table:table-cell table:formula="of:=[.D49]-[.D48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4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55555555555556" calcext:value-type="float">
            <text:p>0,00035555555555555600</text:p>
          </table:table-cell>
          <table:table-cell table:formula="of:=[.D50]-[.D49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4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62962962962963" calcext:value-type="float">
            <text:p>0,00036296296296296300</text:p>
          </table:table-cell>
          <table:table-cell table:formula="of:=[.D51]-[.D5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4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7037037037037" calcext:value-type="float">
            <text:p>0,00037037037037037000</text:p>
          </table:table-cell>
          <table:table-cell table:formula="of:=[.D52]-[.D51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4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77777777777778" calcext:value-type="float">
            <text:p>0,00037777777777777800</text:p>
          </table:table-cell>
          <table:table-cell table:formula="of:=[.D53]-[.D52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4" office:value-type="float" office:value="3328" calcext:value-type="float">
            <text:p>332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85185185185185" calcext:value-type="float">
            <text:p>0,00038518518518518500</text:p>
          </table:table-cell>
          <table:table-cell table:formula="of:=[.D54]-[.D53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4" office:value-type="float" office:value="3392" calcext:value-type="float">
            <text:p>339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92592592592593" calcext:value-type="float">
            <text:p>0,00039259259259259300</text:p>
          </table:table-cell>
          <table:table-cell table:formula="of:=[.D55]-[.D54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4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" calcext:value-type="float">
            <text:p>0,00040000000000000000</text:p>
          </table:table-cell>
          <table:table-cell table:formula="of:=[.D56]-[.D5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4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07407407407407" calcext:value-type="float">
            <text:p>0,00040740740740740700</text:p>
          </table:table-cell>
          <table:table-cell table:formula="of:=[.D57]-[.D56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4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14814814814815" calcext:value-type="float">
            <text:p>0,00041481481481481500</text:p>
          </table:table-cell>
          <table:table-cell table:formula="of:=[.D58]-[.D57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4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22222222222222" calcext:value-type="float">
            <text:p>0,00042222222222222200</text:p>
          </table:table-cell>
          <table:table-cell table:formula="of:=[.D59]-[.D58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4" office:value-type="float" office:value="3712" calcext:value-type="float">
            <text:p>371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2962962962963" calcext:value-type="float">
            <text:p>0,00042962962962963000</text:p>
          </table:table-cell>
          <table:table-cell table:formula="of:=[.D60]-[.D59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4" office:value-type="float" office:value="3776" calcext:value-type="float">
            <text:p>377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37037037037037" calcext:value-type="float">
            <text:p>0,00043703703703703700</text:p>
          </table:table-cell>
          <table:table-cell table:formula="of:=[.D61]-[.D60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4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44444444444444" calcext:value-type="float">
            <text:p>0,00044444444444444400</text:p>
          </table:table-cell>
          <table:table-cell table:formula="of:=[.D62]-[.D6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4" office:value-type="float" office:value="3904" calcext:value-type="float">
            <text:p>390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51851851851852" calcext:value-type="float">
            <text:p>0,00045185185185185200</text:p>
          </table:table-cell>
          <table:table-cell table:formula="of:=[.D63]-[.D62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4" office:value-type="float" office:value="3968" calcext:value-type="float">
            <text:p>396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59259259259259" calcext:value-type="float">
            <text:p>0,00045925925925925900</text:p>
          </table:table-cell>
          <table:table-cell table:formula="of:=[.D64]-[.D63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4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66666666666667" calcext:value-type="float">
            <text:p>0,00046666666666666700</text:p>
          </table:table-cell>
          <table:table-cell table:formula="of:=[.D65]-[.D64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4" office:value-type="float" office:value="4096" calcext:value-type="float">
            <text:p>409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74074074074074" calcext:value-type="float">
            <text:p>0,00047407407407407400</text:p>
          </table:table-cell>
          <table:table-cell table:formula="of:=[.D66]-[.D65]" office:value-type="float" office:value="0.00000740740740740742" calcext:value-type="float">
            <text:p>0,00000740740740740742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4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81481481481482" calcext:value-type="float">
            <text:p>0,00048148148148148200</text:p>
          </table:table-cell>
          <table:table-cell table:formula="of:=[.D67]-[.D6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4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88888888888889" calcext:value-type="float">
            <text:p>0,00048888888888888900</text:p>
          </table:table-cell>
          <table:table-cell table:formula="of:=[.D68]-[.D67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4" office:value-type="float" office:value="4288" calcext:value-type="float">
            <text:p>428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96296296296296" calcext:value-type="float">
            <text:p>0,00049629629629629600</text:p>
          </table:table-cell>
          <table:table-cell table:formula="of:=[.D69]-[.D6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4" office:value-type="float" office:value="4352" calcext:value-type="float">
            <text:p>435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03703703703704" calcext:value-type="float">
            <text:p>0,00050370370370370400</text:p>
          </table:table-cell>
          <table:table-cell table:formula="of:=[.D70]-[.D69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4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11111111111111" calcext:value-type="float">
            <text:p>0,00051111111111111100</text:p>
          </table:table-cell>
          <table:table-cell table:formula="of:=[.D71]-[.D7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4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18518518518519" calcext:value-type="float">
            <text:p>0,00051851851851851900</text:p>
          </table:table-cell>
          <table:table-cell table:formula="of:=[.D72]-[.D7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4" office:value-type="float" office:value="4544" calcext:value-type="float">
            <text:p>454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25925925925926" calcext:value-type="float">
            <text:p>0,00052592592592592600</text:p>
          </table:table-cell>
          <table:table-cell table:formula="of:=[.D73]-[.D72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4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33333333333333" calcext:value-type="float">
            <text:p>0,00053333333333333300</text:p>
          </table:table-cell>
          <table:table-cell table:formula="of:=[.D74]-[.D7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4" office:value-type="float" office:value="4672" calcext:value-type="float">
            <text:p>467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40740740740741" calcext:value-type="float">
            <text:p>0,00054074074074074100</text:p>
          </table:table-cell>
          <table:table-cell table:formula="of:=[.D75]-[.D74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4" office:value-type="float" office:value="4736" calcext:value-type="float">
            <text:p>473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48148148148148" calcext:value-type="float">
            <text:p>0,00054814814814814800</text:p>
          </table:table-cell>
          <table:table-cell table:formula="of:=[.D76]-[.D7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4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55555555555556" calcext:value-type="float">
            <text:p>0,00055555555555555600</text:p>
          </table:table-cell>
          <table:table-cell table:formula="of:=[.D77]-[.D7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4" office:value-type="float" office:value="4864" calcext:value-type="float">
            <text:p>486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62962962962963" calcext:value-type="float">
            <text:p>0,00056296296296296300</text:p>
          </table:table-cell>
          <table:table-cell table:formula="of:=[.D78]-[.D77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4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7037037037037" calcext:value-type="float">
            <text:p>0,00057037037037037000</text:p>
          </table:table-cell>
          <table:table-cell table:formula="of:=[.D79]-[.D7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4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77777777777778" calcext:value-type="float">
            <text:p>0,00057777777777777800</text:p>
          </table:table-cell>
          <table:table-cell table:formula="of:=[.D80]-[.D79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4" office:value-type="float" office:value="5056" calcext:value-type="float">
            <text:p>505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85185185185185" calcext:value-type="float">
            <text:p>0,00058518518518518500</text:p>
          </table:table-cell>
          <table:table-cell table:formula="of:=[.D81]-[.D8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4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92592592592593" calcext:value-type="float">
            <text:p>0,00059259259259259300</text:p>
          </table:table-cell>
          <table:table-cell table:formula="of:=[.D82]-[.D8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4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" calcext:value-type="float">
            <text:p>0,00060000000000000000</text:p>
          </table:table-cell>
          <table:table-cell table:formula="of:=[.D83]-[.D82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4" office:value-type="float" office:value="5248" calcext:value-type="float">
            <text:p>524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07407407407407" calcext:value-type="float">
            <text:p>0,00060740740740740700</text:p>
          </table:table-cell>
          <table:table-cell table:formula="of:=[.D84]-[.D8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4" office:value-type="float" office:value="5312" calcext:value-type="float">
            <text:p>531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14814814814815" calcext:value-type="float">
            <text:p>0,00061481481481481500</text:p>
          </table:table-cell>
          <table:table-cell table:formula="of:=[.D85]-[.D84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4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22222222222222" calcext:value-type="float">
            <text:p>0,00062222222222222200</text:p>
          </table:table-cell>
          <table:table-cell table:formula="of:=[.D86]-[.D8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4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2962962962963" calcext:value-type="float">
            <text:p>0,00062962962962963000</text:p>
          </table:table-cell>
          <table:table-cell table:formula="of:=[.D87]-[.D86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4" office:value-type="float" office:value="5504" calcext:value-type="float">
            <text:p>550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37037037037037" calcext:value-type="float">
            <text:p>0,00063703703703703700</text:p>
          </table:table-cell>
          <table:table-cell table:formula="of:=[.D88]-[.D8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4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44444444444444" calcext:value-type="float">
            <text:p>0,00064444444444444400</text:p>
          </table:table-cell>
          <table:table-cell table:formula="of:=[.D89]-[.D8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4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51851851851852" calcext:value-type="float">
            <text:p>0,00065185185185185200</text:p>
          </table:table-cell>
          <table:table-cell table:formula="of:=[.D90]-[.D89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4" office:value-type="float" office:value="5696" calcext:value-type="float">
            <text:p>569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59259259259259" calcext:value-type="float">
            <text:p>0,00065925925925925900</text:p>
          </table:table-cell>
          <table:table-cell table:formula="of:=[.D91]-[.D9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4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66666666666667" calcext:value-type="float">
            <text:p>0,00066666666666666700</text:p>
          </table:table-cell>
          <table:table-cell table:formula="of:=[.D92]-[.D91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4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74074074074074" calcext:value-type="float">
            <text:p>0,00067407407407407400</text:p>
          </table:table-cell>
          <table:table-cell table:formula="of:=[.D93]-[.D9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4" office:value-type="float" office:value="5888" calcext:value-type="float">
            <text:p>588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81481481481482" calcext:value-type="float">
            <text:p>0,00068148148148148200</text:p>
          </table:table-cell>
          <table:table-cell table:formula="of:=[.D94]-[.D9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4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88888888888889" calcext:value-type="float">
            <text:p>0,00068888888888888900</text:p>
          </table:table-cell>
          <table:table-cell table:formula="of:=[.D95]-[.D94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4" office:value-type="float" office:value="6016" calcext:value-type="float">
            <text:p>601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96296296296296" calcext:value-type="float">
            <text:p>0,00069629629629629600</text:p>
          </table:table-cell>
          <table:table-cell table:formula="of:=[.D96]-[.D9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4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03703703703704" calcext:value-type="float">
            <text:p>0,00070370370370370400</text:p>
          </table:table-cell>
          <table:table-cell table:formula="of:=[.D97]-[.D96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4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11111111111111" calcext:value-type="float">
            <text:p>0,00071111111111111100</text:p>
          </table:table-cell>
          <table:table-cell table:formula="of:=[.D98]-[.D9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4" office:value-type="float" office:value="6208" calcext:value-type="float">
            <text:p>620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18518518518519" calcext:value-type="float">
            <text:p>0,00071851851851851900</text:p>
          </table:table-cell>
          <table:table-cell table:formula="of:=[.D99]-[.D98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4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25925925925926" calcext:value-type="float">
            <text:p>0,00072592592592592600</text:p>
          </table:table-cell>
          <table:table-cell table:formula="of:=[.D100]-[.D9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4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33333333333333" calcext:value-type="float">
            <text:p>0,00073333333333333300</text:p>
          </table:table-cell>
          <table:table-cell table:formula="of:=[.D101]-[.D10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4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40740740740741" calcext:value-type="float">
            <text:p>0,00074074074074074100</text:p>
          </table:table-cell>
          <table:table-cell table:formula="of:=[.D102]-[.D101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4" office:value-type="float" office:value="6464" calcext:value-type="float">
            <text:p>646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48148148148148" calcext:value-type="float">
            <text:p>0,00074814814814814800</text:p>
          </table:table-cell>
          <table:table-cell table:formula="of:=[.D103]-[.D10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4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55555555555556" calcext:value-type="float">
            <text:p>0,00075555555555555600</text:p>
          </table:table-cell>
          <table:table-cell table:formula="of:=[.D104]-[.D103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4" office:value-type="float" office:value="6592" calcext:value-type="float">
            <text:p>659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62962962962963" calcext:value-type="float">
            <text:p>0,00076296296296296300</text:p>
          </table:table-cell>
          <table:table-cell table:formula="of:=[.D105]-[.D10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4" office:value-type="float" office:value="6656" calcext:value-type="float">
            <text:p>665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7037037037037" calcext:value-type="float">
            <text:p>0,00077037037037037000</text:p>
          </table:table-cell>
          <table:table-cell table:formula="of:=[.D106]-[.D10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4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77777777777778" calcext:value-type="float">
            <text:p>0,00077777777777777800</text:p>
          </table:table-cell>
          <table:table-cell table:formula="of:=[.D107]-[.D106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4" office:value-type="float" office:value="6784" calcext:value-type="float">
            <text:p>678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85185185185185" calcext:value-type="float">
            <text:p>0,00078518518518518500</text:p>
          </table:table-cell>
          <table:table-cell table:formula="of:=[.D108]-[.D10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4" office:value-type="float" office:value="6848" calcext:value-type="float">
            <text:p>684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92592592592593" calcext:value-type="float">
            <text:p>0,00079259259259259300</text:p>
          </table:table-cell>
          <table:table-cell table:formula="of:=[.D109]-[.D108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4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" calcext:value-type="float">
            <text:p>0,00080000000000000000</text:p>
          </table:table-cell>
          <table:table-cell table:formula="of:=[.D110]-[.D10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4" office:value-type="float" office:value="6976" calcext:value-type="float">
            <text:p>697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07407407407407" calcext:value-type="float">
            <text:p>0,00080740740740740700</text:p>
          </table:table-cell>
          <table:table-cell table:formula="of:=[.D111]-[.D11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4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14814814814815" calcext:value-type="float">
            <text:p>0,00081481481481481500</text:p>
          </table:table-cell>
          <table:table-cell table:formula="of:=[.D112]-[.D111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4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22222222222222" calcext:value-type="float">
            <text:p>0,00082222222222222200</text:p>
          </table:table-cell>
          <table:table-cell table:formula="of:=[.D113]-[.D11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4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2962962962963" calcext:value-type="float">
            <text:p>0,00082962962962963000</text:p>
          </table:table-cell>
          <table:table-cell table:formula="of:=[.D114]-[.D113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4" office:value-type="float" office:value="7232" calcext:value-type="float">
            <text:p>723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837037037037037" calcext:value-type="float">
            <text:p>0,00083703703703703700</text:p>
          </table:table-cell>
          <table:table-cell table:formula="of:=[.D115]-[.D11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4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44444444444444" calcext:value-type="float">
            <text:p>0,00084444444444444400</text:p>
          </table:table-cell>
          <table:table-cell table:formula="of:=[.D116]-[.D115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4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851851851851852" calcext:value-type="float">
            <text:p>0,00085185185185185200</text:p>
          </table:table-cell>
          <table:table-cell table:formula="of:=[.D117]-[.D11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4" office:value-type="float" office:value="7424" calcext:value-type="float">
            <text:p>742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59259259259259" calcext:value-type="float">
            <text:p>0,00085925925925925900</text:p>
          </table:table-cell>
          <table:table-cell table:formula="of:=[.D118]-[.D11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4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866666666666667" calcext:value-type="float">
            <text:p>0,00086666666666666700</text:p>
          </table:table-cell>
          <table:table-cell table:formula="of:=[.D119]-[.D118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4" office:value-type="float" office:value="7552" calcext:value-type="float">
            <text:p>755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874074074074074" calcext:value-type="float">
            <text:p>0,00087407407407407400</text:p>
          </table:table-cell>
          <table:table-cell table:formula="of:=[.D120]-[.D11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4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881481481481482" calcext:value-type="float">
            <text:p>0,00088148148148148200</text:p>
          </table:table-cell>
          <table:table-cell table:formula="of:=[.D121]-[.D120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4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888888888888889" calcext:value-type="float">
            <text:p>0,00088888888888888900</text:p>
          </table:table-cell>
          <table:table-cell table:formula="of:=[.D122]-[.D12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4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896296296296296" calcext:value-type="float">
            <text:p>0,00089629629629629600</text:p>
          </table:table-cell>
          <table:table-cell table:formula="of:=[.D123]-[.D12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4" office:value-type="float" office:value="7808" calcext:value-type="float">
            <text:p>780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903703703703704" calcext:value-type="float">
            <text:p>0,00090370370370370400</text:p>
          </table:table-cell>
          <table:table-cell table:formula="of:=[.D124]-[.D123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4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911111111111111" calcext:value-type="float">
            <text:p>0,00091111111111111100</text:p>
          </table:table-cell>
          <table:table-cell table:formula="of:=[.D125]-[.D12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4" office:value-type="float" office:value="7936" calcext:value-type="float">
            <text:p>793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918518518518519" calcext:value-type="float">
            <text:p>0,00091851851851851900</text:p>
          </table:table-cell>
          <table:table-cell table:formula="of:=[.D126]-[.D125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4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925925925925926" calcext:value-type="float">
            <text:p>0,00092592592592592600</text:p>
          </table:table-cell>
          <table:table-cell table:formula="of:=[.D127]-[.D12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4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933333333333333" calcext:value-type="float">
            <text:p>0,00093333333333333300</text:p>
          </table:table-cell>
          <table:table-cell table:formula="of:=[.D128]-[.D127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4" office:value-type="float" office:value="8128" calcext:value-type="float">
            <text:p>812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940740740740741" calcext:value-type="float">
            <text:p>0,00094074074074074100</text:p>
          </table:table-cell>
          <table:table-cell table:formula="of:=[.D129]-[.D12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4" office:value-type="float" office:value="8192" calcext:value-type="float">
            <text:p>819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948148148148148" calcext:value-type="float">
            <text:p>0,00094814814814814800</text:p>
          </table:table-cell>
          <table:table-cell table:formula="of:=[.D130]-[.D12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4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955555555555556" calcext:value-type="float">
            <text:p>0,00095555555555555600</text:p>
          </table:table-cell>
          <table:table-cell table:formula="of:=[.D131]-[.D130]" office:value-type="float" office:value="0.00000740740740740747" calcext:value-type="float">
            <text:p>0,00000740740740740747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4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962962962962963" calcext:value-type="float">
            <text:p>0,00096296296296296300</text:p>
          </table:table-cell>
          <table:table-cell table:formula="of:=[.D132]-[.D13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4" office:value-type="float" office:value="8384" calcext:value-type="float">
            <text:p>838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97037037037037" calcext:value-type="float">
            <text:p>0,00097037037037037000</text:p>
          </table:table-cell>
          <table:table-cell table:formula="of:=[.D133]-[.D13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4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977777777777778" calcext:value-type="float">
            <text:p>0,00097777777777777800</text:p>
          </table:table-cell>
          <table:table-cell table:formula="of:=[.D134]-[.D13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4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985185185185185" calcext:value-type="float">
            <text:p>0,00098518518518518500</text:p>
          </table:table-cell>
          <table:table-cell table:formula="of:=[.D135]-[.D134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4" office:value-type="float" office:value="8576" calcext:value-type="float">
            <text:p>857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992592592592593" calcext:value-type="float">
            <text:p>0,00099259259259259300</text:p>
          </table:table-cell>
          <table:table-cell table:formula="of:=[.D136]-[.D13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4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" calcext:value-type="float">
            <text:p>0,00100000000000000000</text:p>
          </table:table-cell>
          <table:table-cell table:formula="of:=[.D137]-[.D13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4" office:value-type="float" office:value="8704" calcext:value-type="float">
            <text:p>870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00740740740741" calcext:value-type="float">
            <text:p>0,00100740740740741000</text:p>
          </table:table-cell>
          <table:table-cell table:formula="of:=[.D138]-[.D13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4" office:value-type="float" office:value="8768" calcext:value-type="float">
            <text:p>876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01481481481481" calcext:value-type="float">
            <text:p>0,00101481481481481000</text:p>
          </table:table-cell>
          <table:table-cell table:formula="of:=[.D139]-[.D138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4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02222222222222" calcext:value-type="float">
            <text:p>0,00102222222222222000</text:p>
          </table:table-cell>
          <table:table-cell table:formula="of:=[.D140]-[.D13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4" office:value-type="float" office:value="8896" calcext:value-type="float">
            <text:p>889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02962962962963" calcext:value-type="float">
            <text:p>0,00102962962962963000</text:p>
          </table:table-cell>
          <table:table-cell table:formula="of:=[.D141]-[.D14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4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03703703703704" calcext:value-type="float">
            <text:p>0,00103703703703704000</text:p>
          </table:table-cell>
          <table:table-cell table:formula="of:=[.D142]-[.D14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4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04444444444444" calcext:value-type="float">
            <text:p>0,00104444444444444000</text:p>
          </table:table-cell>
          <table:table-cell table:formula="of:=[.D143]-[.D14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4" office:value-type="float" office:value="9088" calcext:value-type="float">
            <text:p>908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05185185185185" calcext:value-type="float">
            <text:p>0,00105185185185185000</text:p>
          </table:table-cell>
          <table:table-cell table:formula="of:=[.D144]-[.D143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4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05925925925926" calcext:value-type="float">
            <text:p>0,00105925925925926000</text:p>
          </table:table-cell>
          <table:table-cell table:formula="of:=[.D145]-[.D14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4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06666666666667" calcext:value-type="float">
            <text:p>0,00106666666666667000</text:p>
          </table:table-cell>
          <table:table-cell table:formula="of:=[.D146]-[.D14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4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07407407407407" calcext:value-type="float">
            <text:p>0,00107407407407407000</text:p>
          </table:table-cell>
          <table:table-cell table:formula="of:=[.D147]-[.D14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4" office:value-type="float" office:value="9344" calcext:value-type="float">
            <text:p>934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08148148148148" calcext:value-type="float">
            <text:p>0,00108148148148148000</text:p>
          </table:table-cell>
          <table:table-cell table:formula="of:=[.D148]-[.D14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4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08888888888889" calcext:value-type="float">
            <text:p>0,00108888888888889000</text:p>
          </table:table-cell>
          <table:table-cell table:formula="of:=[.D149]-[.D148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4" office:value-type="float" office:value="9472" calcext:value-type="float">
            <text:p>947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0962962962963" calcext:value-type="float">
            <text:p>0,00109629629629630000</text:p>
          </table:table-cell>
          <table:table-cell table:formula="of:=[.D150]-[.D14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4" office:value-type="float" office:value="9536" calcext:value-type="float">
            <text:p>953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1037037037037" calcext:value-type="float">
            <text:p>0,00110370370370370000</text:p>
          </table:table-cell>
          <table:table-cell table:formula="of:=[.D151]-[.D15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4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11111111111111" calcext:value-type="float">
            <text:p>0,00111111111111111000</text:p>
          </table:table-cell>
          <table:table-cell table:formula="of:=[.D152]-[.D15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4" office:value-type="float" office:value="9664" calcext:value-type="float">
            <text:p>966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11851851851852" calcext:value-type="float">
            <text:p>0,00111851851851852000</text:p>
          </table:table-cell>
          <table:table-cell table:formula="of:=[.D153]-[.D15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4" office:value-type="float" office:value="9728" calcext:value-type="float">
            <text:p>972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12592592592593" calcext:value-type="float">
            <text:p>0,00112592592592593000</text:p>
          </table:table-cell>
          <table:table-cell table:formula="of:=[.D154]-[.D153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4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13333333333333" calcext:value-type="float">
            <text:p>0,00113333333333333000</text:p>
          </table:table-cell>
          <table:table-cell table:formula="of:=[.D155]-[.D15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4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14074074074074" calcext:value-type="float">
            <text:p>0,00114074074074074000</text:p>
          </table:table-cell>
          <table:table-cell table:formula="of:=[.D156]-[.D15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4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14814814814815" calcext:value-type="float">
            <text:p>0,00114814814814815000</text:p>
          </table:table-cell>
          <table:table-cell table:formula="of:=[.D157]-[.D15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4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15555555555556" calcext:value-type="float">
            <text:p>0,00115555555555556000</text:p>
          </table:table-cell>
          <table:table-cell table:formula="of:=[.D158]-[.D15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4" office:value-type="float" office:value="10048" calcext:value-type="float">
            <text:p>1004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16296296296296" calcext:value-type="float">
            <text:p>0,00116296296296296000</text:p>
          </table:table-cell>
          <table:table-cell table:formula="of:=[.D159]-[.D158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4" office:value-type="float" office:value="10112" calcext:value-type="float">
            <text:p>1011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17037037037037" calcext:value-type="float">
            <text:p>0,00117037037037037000</text:p>
          </table:table-cell>
          <table:table-cell table:formula="of:=[.D160]-[.D15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4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17777777777778" calcext:value-type="float">
            <text:p>0,00117777777777778000</text:p>
          </table:table-cell>
          <table:table-cell table:formula="of:=[.D161]-[.D16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4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18518518518519" calcext:value-type="float">
            <text:p>0,00118518518518519000</text:p>
          </table:table-cell>
          <table:table-cell table:formula="of:=[.D162]-[.D16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4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19259259259259" calcext:value-type="float">
            <text:p>0,00119259259259259000</text:p>
          </table:table-cell>
          <table:table-cell table:formula="of:=[.D163]-[.D16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4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2" calcext:value-type="float">
            <text:p>0,00120000000000000000</text:p>
          </table:table-cell>
          <table:table-cell table:formula="of:=[.D164]-[.D163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4" office:value-type="float" office:value="10432" calcext:value-type="float">
            <text:p>1043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20740740740741" calcext:value-type="float">
            <text:p>0,00120740740740741000</text:p>
          </table:table-cell>
          <table:table-cell table:formula="of:=[.D165]-[.D16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4" office:value-type="float" office:value="10496" calcext:value-type="float">
            <text:p>1049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21481481481481" calcext:value-type="float">
            <text:p>0,00121481481481481000</text:p>
          </table:table-cell>
          <table:table-cell table:formula="of:=[.D166]-[.D16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4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22222222222222" calcext:value-type="float">
            <text:p>0,00122222222222222000</text:p>
          </table:table-cell>
          <table:table-cell table:formula="of:=[.D167]-[.D16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4" office:value-type="float" office:value="10624" calcext:value-type="float">
            <text:p>1062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22962962962963" calcext:value-type="float">
            <text:p>0,00122962962962963000</text:p>
          </table:table-cell>
          <table:table-cell table:formula="of:=[.D168]-[.D167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4" office:value-type="float" office:value="10688" calcext:value-type="float">
            <text:p>1068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23703703703704" calcext:value-type="float">
            <text:p>0,00123703703703704000</text:p>
          </table:table-cell>
          <table:table-cell table:formula="of:=[.D169]-[.D16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4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24444444444444" calcext:value-type="float">
            <text:p>0,00124444444444444000</text:p>
          </table:table-cell>
          <table:table-cell table:formula="of:=[.D170]-[.D16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4" office:value-type="float" office:value="10816" calcext:value-type="float">
            <text:p>1081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25185185185185" calcext:value-type="float">
            <text:p>0,00125185185185185000</text:p>
          </table:table-cell>
          <table:table-cell table:formula="of:=[.D171]-[.D17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4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25925925925926" calcext:value-type="float">
            <text:p>0,00125925925925926000</text:p>
          </table:table-cell>
          <table:table-cell table:formula="of:=[.D172]-[.D17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4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26666666666667" calcext:value-type="float">
            <text:p>0,00126666666666667000</text:p>
          </table:table-cell>
          <table:table-cell table:formula="of:=[.D173]-[.D172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4" office:value-type="float" office:value="11008" calcext:value-type="float">
            <text:p>1100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27407407407407" calcext:value-type="float">
            <text:p>0,00127407407407407000</text:p>
          </table:table-cell>
          <table:table-cell table:formula="of:=[.D174]-[.D17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4" office:value-type="float" office:value="11072" calcext:value-type="float">
            <text:p>1107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28148148148148" calcext:value-type="float">
            <text:p>0,00128148148148148000</text:p>
          </table:table-cell>
          <table:table-cell table:formula="of:=[.D175]-[.D17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4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28888888888889" calcext:value-type="float">
            <text:p>0,00128888888888889000</text:p>
          </table:table-cell>
          <table:table-cell table:formula="of:=[.D176]-[.D17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4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2962962962963" calcext:value-type="float">
            <text:p>0,00129629629629630000</text:p>
          </table:table-cell>
          <table:table-cell table:formula="of:=[.D177]-[.D17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4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3037037037037" calcext:value-type="float">
            <text:p>0,00130370370370370000</text:p>
          </table:table-cell>
          <table:table-cell table:formula="of:=[.D178]-[.D177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4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31111111111111" calcext:value-type="float">
            <text:p>0,00131111111111111000</text:p>
          </table:table-cell>
          <table:table-cell table:formula="of:=[.D179]-[.D17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4" office:value-type="float" office:value="11392" calcext:value-type="float">
            <text:p>1139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31851851851852" calcext:value-type="float">
            <text:p>0,00131851851851852000</text:p>
          </table:table-cell>
          <table:table-cell table:formula="of:=[.D180]-[.D17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4" office:value-type="float" office:value="11456" calcext:value-type="float">
            <text:p>1145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32592592592593" calcext:value-type="float">
            <text:p>0,00132592592592593000</text:p>
          </table:table-cell>
          <table:table-cell table:formula="of:=[.D181]-[.D18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4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33333333333333" calcext:value-type="float">
            <text:p>0,00133333333333333000</text:p>
          </table:table-cell>
          <table:table-cell table:formula="of:=[.D182]-[.D18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4" office:value-type="float" office:value="11584" calcext:value-type="float">
            <text:p>1158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34074074074074" calcext:value-type="float">
            <text:p>0,00134074074074074000</text:p>
          </table:table-cell>
          <table:table-cell table:formula="of:=[.D183]-[.D182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4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34814814814815" calcext:value-type="float">
            <text:p>0,00134814814814815000</text:p>
          </table:table-cell>
          <table:table-cell table:formula="of:=[.D184]-[.D18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4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35555555555556" calcext:value-type="float">
            <text:p>0,00135555555555556000</text:p>
          </table:table-cell>
          <table:table-cell table:formula="of:=[.D185]-[.D18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4" office:value-type="float" office:value="11776" calcext:value-type="float">
            <text:p>1177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36296296296296" calcext:value-type="float">
            <text:p>0,00136296296296296000</text:p>
          </table:table-cell>
          <table:table-cell table:formula="of:=[.D186]-[.D18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4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37037037037037" calcext:value-type="float">
            <text:p>0,00137037037037037000</text:p>
          </table:table-cell>
          <table:table-cell table:formula="of:=[.D187]-[.D18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4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37777777777778" calcext:value-type="float">
            <text:p>0,00137777777777778000</text:p>
          </table:table-cell>
          <table:table-cell table:formula="of:=[.D188]-[.D187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4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38518518518519" calcext:value-type="float">
            <text:p>0,00138518518518519000</text:p>
          </table:table-cell>
          <table:table-cell table:formula="of:=[.D189]-[.D18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4" office:value-type="float" office:value="12032" calcext:value-type="float">
            <text:p>1203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39259259259259" calcext:value-type="float">
            <text:p>0,00139259259259259000</text:p>
          </table:table-cell>
          <table:table-cell table:formula="of:=[.D190]-[.D18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4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4" calcext:value-type="float">
            <text:p>0,00140000000000000000</text:p>
          </table:table-cell>
          <table:table-cell table:formula="of:=[.D191]-[.D19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4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40740740740741" calcext:value-type="float">
            <text:p>0,00140740740740741000</text:p>
          </table:table-cell>
          <table:table-cell table:formula="of:=[.D192]-[.D19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4" office:value-type="float" office:value="12224" calcext:value-type="float">
            <text:p>1222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41481481481481" calcext:value-type="float">
            <text:p>0,00141481481481481000</text:p>
          </table:table-cell>
          <table:table-cell table:formula="of:=[.D193]-[.D192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4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42222222222222" calcext:value-type="float">
            <text:p>0,00142222222222222000</text:p>
          </table:table-cell>
          <table:table-cell table:formula="of:=[.D194]-[.D19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4" office:value-type="float" office:value="12352" calcext:value-type="float">
            <text:p>1235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42962962962963" calcext:value-type="float">
            <text:p>0,00142962962962963000</text:p>
          </table:table-cell>
          <table:table-cell table:formula="of:=[.D195]-[.D19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4" office:value-type="float" office:value="12416" calcext:value-type="float">
            <text:p>1241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43703703703704" calcext:value-type="float">
            <text:p>0,00143703703703704000</text:p>
          </table:table-cell>
          <table:table-cell table:formula="of:=[.D196]-[.D19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4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44444444444444" calcext:value-type="float">
            <text:p>0,00144444444444444000</text:p>
          </table:table-cell>
          <table:table-cell table:formula="of:=[.D197]-[.D196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4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45185185185185" calcext:value-type="float">
            <text:p>0,00145185185185185000</text:p>
          </table:table-cell>
          <table:table-cell table:formula="of:=[.D198]-[.D19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4" office:value-type="float" office:value="12608" calcext:value-type="float">
            <text:p>1260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45925925925926" calcext:value-type="float">
            <text:p>0,00145925925925926000</text:p>
          </table:table-cell>
          <table:table-cell table:formula="of:=[.D199]-[.D19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4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46666666666667" calcext:value-type="float">
            <text:p>0,00146666666666667000</text:p>
          </table:table-cell>
          <table:table-cell table:formula="of:=[.D200]-[.D19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4" office:value-type="float" office:value="12736" calcext:value-type="float">
            <text:p>1273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47407407407407" calcext:value-type="float">
            <text:p>0,00147407407407407000</text:p>
          </table:table-cell>
          <table:table-cell table:formula="of:=[.D201]-[.D20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4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48148148148148" calcext:value-type="float">
            <text:p>0,00148148148148148000</text:p>
          </table:table-cell>
          <table:table-cell table:formula="of:=[.D202]-[.D201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4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48888888888889" calcext:value-type="float">
            <text:p>0,00148888888888889000</text:p>
          </table:table-cell>
          <table:table-cell table:formula="of:=[.D203]-[.D20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4" office:value-type="float" office:value="12928" calcext:value-type="float">
            <text:p>1292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4962962962963" calcext:value-type="float">
            <text:p>0,00149629629629630000</text:p>
          </table:table-cell>
          <table:table-cell table:formula="of:=[.D204]-[.D20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4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5037037037037" calcext:value-type="float">
            <text:p>0,00150370370370370000</text:p>
          </table:table-cell>
          <table:table-cell table:formula="of:=[.D205]-[.D20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4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51111111111111" calcext:value-type="float">
            <text:p>0,00151111111111111000</text:p>
          </table:table-cell>
          <table:table-cell table:formula="of:=[.D206]-[.D20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4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51851851851852" calcext:value-type="float">
            <text:p>0,00151851851851852000</text:p>
          </table:table-cell>
          <table:table-cell table:formula="of:=[.D207]-[.D206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4" office:value-type="float" office:value="13184" calcext:value-type="float">
            <text:p>1318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52592592592593" calcext:value-type="float">
            <text:p>0,00152592592592593000</text:p>
          </table:table-cell>
          <table:table-cell table:formula="of:=[.D208]-[.D20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4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53333333333333" calcext:value-type="float">
            <text:p>0,00153333333333333000</text:p>
          </table:table-cell>
          <table:table-cell table:formula="of:=[.D209]-[.D20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4" office:value-type="float" office:value="13312" calcext:value-type="float">
            <text:p>1331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54074074074074" calcext:value-type="float">
            <text:p>0,00154074074074074000</text:p>
          </table:table-cell>
          <table:table-cell table:formula="of:=[.D210]-[.D20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4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54814814814815" calcext:value-type="float">
            <text:p>0,00154814814814815000</text:p>
          </table:table-cell>
          <table:table-cell table:formula="of:=[.D211]-[.D21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4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55555555555556" calcext:value-type="float">
            <text:p>0,00155555555555556000</text:p>
          </table:table-cell>
          <table:table-cell table:formula="of:=[.D212]-[.D211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4" office:value-type="float" office:value="13504" calcext:value-type="float">
            <text:p>1350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56296296296296" calcext:value-type="float">
            <text:p>0,00156296296296296000</text:p>
          </table:table-cell>
          <table:table-cell table:formula="of:=[.D213]-[.D21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4" office:value-type="float" office:value="13568" calcext:value-type="float">
            <text:p>1356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57037037037037" calcext:value-type="float">
            <text:p>0,00157037037037037000</text:p>
          </table:table-cell>
          <table:table-cell table:formula="of:=[.D214]-[.D21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4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57777777777778" calcext:value-type="float">
            <text:p>0,00157777777777778000</text:p>
          </table:table-cell>
          <table:table-cell table:formula="of:=[.D215]-[.D21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4" office:value-type="float" office:value="13696" calcext:value-type="float">
            <text:p>1369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58518518518519" calcext:value-type="float">
            <text:p>0,00158518518518519000</text:p>
          </table:table-cell>
          <table:table-cell table:formula="of:=[.D216]-[.D21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4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59259259259259" calcext:value-type="float">
            <text:p>0,00159259259259259000</text:p>
          </table:table-cell>
          <table:table-cell table:formula="of:=[.D217]-[.D216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4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6" calcext:value-type="float">
            <text:p>0,00160000000000000000</text:p>
          </table:table-cell>
          <table:table-cell table:formula="of:=[.D218]-[.D21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4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60740740740741" calcext:value-type="float">
            <text:p>0,00160740740740741000</text:p>
          </table:table-cell>
          <table:table-cell table:formula="of:=[.D219]-[.D21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4" office:value-type="float" office:value="13952" calcext:value-type="float">
            <text:p>1395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61481481481481" calcext:value-type="float">
            <text:p>0,00161481481481481000</text:p>
          </table:table-cell>
          <table:table-cell table:formula="of:=[.D220]-[.D21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4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62222222222222" calcext:value-type="float">
            <text:p>0,00162222222222222000</text:p>
          </table:table-cell>
          <table:table-cell table:formula="of:=[.D221]-[.D22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4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62962962962963" calcext:value-type="float">
            <text:p>0,00162962962962963000</text:p>
          </table:table-cell>
          <table:table-cell table:formula="of:=[.D222]-[.D221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4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63703703703704" calcext:value-type="float">
            <text:p>0,00163703703703704000</text:p>
          </table:table-cell>
          <table:table-cell table:formula="of:=[.D223]-[.D22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4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64444444444444" calcext:value-type="float">
            <text:p>0,00164444444444444000</text:p>
          </table:table-cell>
          <table:table-cell table:formula="of:=[.D224]-[.D22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4" office:value-type="float" office:value="14272" calcext:value-type="float">
            <text:p>1427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65185185185185" calcext:value-type="float">
            <text:p>0,00165185185185185000</text:p>
          </table:table-cell>
          <table:table-cell table:formula="of:=[.D225]-[.D22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4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65925925925926" calcext:value-type="float">
            <text:p>0,00165925925925926000</text:p>
          </table:table-cell>
          <table:table-cell table:formula="of:=[.D226]-[.D225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4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66666666666667" calcext:value-type="float">
            <text:p>0,00166666666666667000</text:p>
          </table:table-cell>
          <table:table-cell table:formula="of:=[.D227]-[.D22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4" office:value-type="float" office:value="14464" calcext:value-type="float">
            <text:p>1446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67407407407407" calcext:value-type="float">
            <text:p>0,00167407407407407000</text:p>
          </table:table-cell>
          <table:table-cell table:formula="of:=[.D228]-[.D22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4" office:value-type="float" office:value="14528" calcext:value-type="float">
            <text:p>1452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68148148148148" calcext:value-type="float">
            <text:p>0,00168148148148148000</text:p>
          </table:table-cell>
          <table:table-cell table:formula="of:=[.D229]-[.D22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4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68888888888889" calcext:value-type="float">
            <text:p>0,00168888888888889000</text:p>
          </table:table-cell>
          <table:table-cell table:formula="of:=[.D230]-[.D22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4" office:value-type="float" office:value="14656" calcext:value-type="float">
            <text:p>1465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6962962962963" calcext:value-type="float">
            <text:p>0,00169629629629630000</text:p>
          </table:table-cell>
          <table:table-cell table:formula="of:=[.D231]-[.D230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4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7037037037037" calcext:value-type="float">
            <text:p>0,00170370370370370000</text:p>
          </table:table-cell>
          <table:table-cell table:formula="of:=[.D232]-[.D23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4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71111111111111" calcext:value-type="float">
            <text:p>0,00171111111111111000</text:p>
          </table:table-cell>
          <table:table-cell table:formula="of:=[.D233]-[.D23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4" office:value-type="float" office:value="14848" calcext:value-type="float">
            <text:p>1484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71851851851852" calcext:value-type="float">
            <text:p>0,00171851851851852000</text:p>
          </table:table-cell>
          <table:table-cell table:formula="of:=[.D234]-[.D23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4" office:value-type="float" office:value="14912" calcext:value-type="float">
            <text:p>1491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72592592592593" calcext:value-type="float">
            <text:p>0,00172592592592593000</text:p>
          </table:table-cell>
          <table:table-cell table:formula="of:=[.D235]-[.D23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4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73333333333333" calcext:value-type="float">
            <text:p>0,00173333333333333000</text:p>
          </table:table-cell>
          <table:table-cell table:formula="of:=[.D236]-[.D235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4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74074074074074" calcext:value-type="float">
            <text:p>0,00174074074074074000</text:p>
          </table:table-cell>
          <table:table-cell table:formula="of:=[.D237]-[.D23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4" office:value-type="float" office:value="15104" calcext:value-type="float">
            <text:p>1510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74814814814815" calcext:value-type="float">
            <text:p>0,00174814814814815000</text:p>
          </table:table-cell>
          <table:table-cell table:formula="of:=[.D238]-[.D23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4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75555555555556" calcext:value-type="float">
            <text:p>0,00175555555555556000</text:p>
          </table:table-cell>
          <table:table-cell table:formula="of:=[.D239]-[.D23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4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76296296296296" calcext:value-type="float">
            <text:p>0,00176296296296296000</text:p>
          </table:table-cell>
          <table:table-cell table:formula="of:=[.D240]-[.D23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4" office:value-type="float" office:value="15296" calcext:value-type="float">
            <text:p>1529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77037037037037" calcext:value-type="float">
            <text:p>0,00177037037037037000</text:p>
          </table:table-cell>
          <table:table-cell table:formula="of:=[.D241]-[.D240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4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77777777777778" calcext:value-type="float">
            <text:p>0,00177777777777778000</text:p>
          </table:table-cell>
          <table:table-cell table:formula="of:=[.D242]-[.D24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4" office:value-type="float" office:value="15424" calcext:value-type="float">
            <text:p>1542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78518518518519" calcext:value-type="float">
            <text:p>0,00178518518518519000</text:p>
          </table:table-cell>
          <table:table-cell table:formula="of:=[.D243]-[.D24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4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79259259259259" calcext:value-type="float">
            <text:p>0,00179259259259259000</text:p>
          </table:table-cell>
          <table:table-cell table:formula="of:=[.D244]-[.D24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4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8" calcext:value-type="float">
            <text:p>0,00180000000000000000</text:p>
          </table:table-cell>
          <table:table-cell table:formula="of:=[.D245]-[.D24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4" office:value-type="float" office:value="15616" calcext:value-type="float">
            <text:p>1561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80740740740741" calcext:value-type="float">
            <text:p>0,00180740740740741000</text:p>
          </table:table-cell>
          <table:table-cell table:formula="of:=[.D246]-[.D245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4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81481481481482" calcext:value-type="float">
            <text:p>0,00181481481481482000</text:p>
          </table:table-cell>
          <table:table-cell table:formula="of:=[.D247]-[.D24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4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82222222222222" calcext:value-type="float">
            <text:p>0,00182222222222222000</text:p>
          </table:table-cell>
          <table:table-cell table:formula="of:=[.D248]-[.D24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4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82962962962963" calcext:value-type="float">
            <text:p>0,00182962962962963000</text:p>
          </table:table-cell>
          <table:table-cell table:formula="of:=[.D249]-[.D24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4" office:value-type="float" office:value="15872" calcext:value-type="float">
            <text:p>1587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83703703703704" calcext:value-type="float">
            <text:p>0,00183703703703704000</text:p>
          </table:table-cell>
          <table:table-cell table:formula="of:=[.D250]-[.D24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4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84444444444444" calcext:value-type="float">
            <text:p>0,00184444444444444000</text:p>
          </table:table-cell>
          <table:table-cell table:formula="of:=[.D251]-[.D250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4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85185185185185" calcext:value-type="float">
            <text:p>0,00185185185185185000</text:p>
          </table:table-cell>
          <table:table-cell table:formula="of:=[.D252]-[.D25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4" office:value-type="float" office:value="16064" calcext:value-type="float">
            <text:p>1606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85925925925926" calcext:value-type="float">
            <text:p>0,00185925925925926000</text:p>
          </table:table-cell>
          <table:table-cell table:formula="of:=[.D253]-[.D25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4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86666666666667" calcext:value-type="float">
            <text:p>0,00186666666666667000</text:p>
          </table:table-cell>
          <table:table-cell table:formula="of:=[.D254]-[.D25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4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87407407407407" calcext:value-type="float">
            <text:p>0,00187407407407407000</text:p>
          </table:table-cell>
          <table:table-cell table:formula="of:=[.D255]-[.D254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4" office:value-type="float" office:value="16256" calcext:value-type="float">
            <text:p>1625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88148148148148" calcext:value-type="float">
            <text:p>0,00188148148148148000</text:p>
          </table:table-cell>
          <table:table-cell table:formula="of:=[.D256]-[.D25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4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88888888888889" calcext:value-type="float">
            <text:p>0,00188888888888889000</text:p>
          </table:table-cell>
          <table:table-cell table:formula="of:=[.D257]-[.D25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4" office:value-type="float" office:value="16384" calcext:value-type="float">
            <text:p>1638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8962962962963" calcext:value-type="float">
            <text:p>0,00189629629629630000</text:p>
          </table:table-cell>
          <table:table-cell table:formula="of:=[.D258]-[.D25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4" office:value-type="float" office:value="16448" calcext:value-type="float">
            <text:p>1644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9037037037037" calcext:value-type="float">
            <text:p>0,00190370370370370000</text:p>
          </table:table-cell>
          <table:table-cell table:formula="of:=[.D259]-[.D25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4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91111111111111" calcext:value-type="float">
            <text:p>0,00191111111111111000</text:p>
          </table:table-cell>
          <table:table-cell table:formula="of:=[.D260]-[.D259]" office:value-type="float" office:value="0.00000740740740740758" calcext:value-type="float">
            <text:p>0,00000740740740740758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4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91851851851852" calcext:value-type="float">
            <text:p>0,00191851851851852000</text:p>
          </table:table-cell>
          <table:table-cell table:formula="of:=[.D261]-[.D26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4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92592592592593" calcext:value-type="float">
            <text:p>0,00192592592592593000</text:p>
          </table:table-cell>
          <table:table-cell table:formula="of:=[.D262]-[.D26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4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93333333333333" calcext:value-type="float">
            <text:p>0,00193333333333333000</text:p>
          </table:table-cell>
          <table:table-cell table:formula="of:=[.D263]-[.D26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4" office:value-type="float" office:value="16768" calcext:value-type="float">
            <text:p>1676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94074074074074" calcext:value-type="float">
            <text:p>0,00194074074074074000</text:p>
          </table:table-cell>
          <table:table-cell table:formula="of:=[.D264]-[.D26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4" office:value-type="float" office:value="16832" calcext:value-type="float">
            <text:p>1683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94814814814815" calcext:value-type="float">
            <text:p>0,00194814814814815000</text:p>
          </table:table-cell>
          <table:table-cell table:formula="of:=[.D265]-[.D26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4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95555555555556" calcext:value-type="float">
            <text:p>0,00195555555555556000</text:p>
          </table:table-cell>
          <table:table-cell table:formula="of:=[.D266]-[.D26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4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96296296296296" calcext:value-type="float">
            <text:p>0,00196296296296296000</text:p>
          </table:table-cell>
          <table:table-cell table:formula="of:=[.D267]-[.D26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4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97037037037037" calcext:value-type="float">
            <text:p>0,00197037037037037000</text:p>
          </table:table-cell>
          <table:table-cell table:formula="of:=[.D268]-[.D267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4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97777777777778" calcext:value-type="float">
            <text:p>0,00197777777777778000</text:p>
          </table:table-cell>
          <table:table-cell table:formula="of:=[.D269]-[.D26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4" office:value-type="float" office:value="17152" calcext:value-type="float">
            <text:p>1715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98518518518519" calcext:value-type="float">
            <text:p>0,00198518518518519000</text:p>
          </table:table-cell>
          <table:table-cell table:formula="of:=[.D270]-[.D26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4" office:value-type="float" office:value="17216" calcext:value-type="float">
            <text:p>1721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99259259259259" calcext:value-type="float">
            <text:p>0,00199259259259259000</text:p>
          </table:table-cell>
          <table:table-cell table:formula="of:=[.D271]-[.D27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4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" calcext:value-type="float">
            <text:p>0,00200000000000000000</text:p>
          </table:table-cell>
          <table:table-cell table:formula="of:=[.D272]-[.D27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4" office:value-type="float" office:value="17344" calcext:value-type="float">
            <text:p>1734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00740740740741" calcext:value-type="float">
            <text:p>0,00200740740740741000</text:p>
          </table:table-cell>
          <table:table-cell table:formula="of:=[.D273]-[.D27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4" office:value-type="float" office:value="17408" calcext:value-type="float">
            <text:p>1740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01481481481481" calcext:value-type="float">
            <text:p>0,00201481481481481000</text:p>
          </table:table-cell>
          <table:table-cell table:formula="of:=[.D274]-[.D27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4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02222222222222" calcext:value-type="float">
            <text:p>0,00202222222222222000</text:p>
          </table:table-cell>
          <table:table-cell table:formula="of:=[.D275]-[.D27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4" office:value-type="float" office:value="17536" calcext:value-type="float">
            <text:p>1753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02962962962963" calcext:value-type="float">
            <text:p>0,00202962962962963000</text:p>
          </table:table-cell>
          <table:table-cell table:formula="of:=[.D276]-[.D27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4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03703703703704" calcext:value-type="float">
            <text:p>0,00203703703703704000</text:p>
          </table:table-cell>
          <table:table-cell table:formula="of:=[.D277]-[.D276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4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04444444444444" calcext:value-type="float">
            <text:p>0,00204444444444444000</text:p>
          </table:table-cell>
          <table:table-cell table:formula="of:=[.D278]-[.D27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4" office:value-type="float" office:value="17728" calcext:value-type="float">
            <text:p>1772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05185185185185" calcext:value-type="float">
            <text:p>0,00205185185185185000</text:p>
          </table:table-cell>
          <table:table-cell table:formula="of:=[.D279]-[.D27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4" office:value-type="float" office:value="17792" calcext:value-type="float">
            <text:p>1779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05925925925926" calcext:value-type="float">
            <text:p>0,00205925925925926000</text:p>
          </table:table-cell>
          <table:table-cell table:formula="of:=[.D280]-[.D27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4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06666666666667" calcext:value-type="float">
            <text:p>0,00206666666666667000</text:p>
          </table:table-cell>
          <table:table-cell table:formula="of:=[.D281]-[.D28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4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07407407407407" calcext:value-type="float">
            <text:p>0,00207407407407407000</text:p>
          </table:table-cell>
          <table:table-cell table:formula="of:=[.D282]-[.D28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4" office:value-type="float" office:value="17984" calcext:value-type="float">
            <text:p>1798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08148148148148" calcext:value-type="float">
            <text:p>0,00208148148148148000</text:p>
          </table:table-cell>
          <table:table-cell table:formula="of:=[.D283]-[.D28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4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08888888888889" calcext:value-type="float">
            <text:p>0,00208888888888889000</text:p>
          </table:table-cell>
          <table:table-cell table:formula="of:=[.D284]-[.D28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4" office:value-type="float" office:value="18112" calcext:value-type="float">
            <text:p>1811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0962962962963" calcext:value-type="float">
            <text:p>0,00209629629629630000</text:p>
          </table:table-cell>
          <table:table-cell table:formula="of:=[.D285]-[.D28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4" office:value-type="float" office:value="18176" calcext:value-type="float">
            <text:p>1817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1037037037037" calcext:value-type="float">
            <text:p>0,00210370370370370000</text:p>
          </table:table-cell>
          <table:table-cell table:formula="of:=[.D286]-[.D28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4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11111111111111" calcext:value-type="float">
            <text:p>0,00211111111111111000</text:p>
          </table:table-cell>
          <table:table-cell table:formula="of:=[.D287]-[.D286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4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11851851851852" calcext:value-type="float">
            <text:p>0,00211851851851852000</text:p>
          </table:table-cell>
          <table:table-cell table:formula="of:=[.D288]-[.D28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4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12592592592593" calcext:value-type="float">
            <text:p>0,00212592592592593000</text:p>
          </table:table-cell>
          <table:table-cell table:formula="of:=[.D289]-[.D28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4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13333333333333" calcext:value-type="float">
            <text:p>0,00213333333333333000</text:p>
          </table:table-cell>
          <table:table-cell table:formula="of:=[.D290]-[.D28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4" office:value-type="float" office:value="18496" calcext:value-type="float">
            <text:p>18496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14074074074074" calcext:value-type="float">
            <text:p>0,00214074074074074000</text:p>
          </table:table-cell>
          <table:table-cell table:formula="of:=[.D291]-[.D29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4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14814814814815" calcext:value-type="float">
            <text:p>0,00214814814814815000</text:p>
          </table:table-cell>
          <table:table-cell table:formula="of:=[.D292]-[.D29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4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15555555555556" calcext:value-type="float">
            <text:p>0,00215555555555556000</text:p>
          </table:table-cell>
          <table:table-cell table:formula="of:=[.D293]-[.D29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4" office:value-type="float" office:value="18688" calcext:value-type="float">
            <text:p>1868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16296296296296" calcext:value-type="float">
            <text:p>0,00216296296296296000</text:p>
          </table:table-cell>
          <table:table-cell table:formula="of:=[.D294]-[.D29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4" office:value-type="float" office:value="18752" calcext:value-type="float">
            <text:p>18752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17037037037037" calcext:value-type="float">
            <text:p>0,00217037037037037000</text:p>
          </table:table-cell>
          <table:table-cell table:formula="of:=[.D295]-[.D29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4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17777777777778" calcext:value-type="float">
            <text:p>0,00217777777777778000</text:p>
          </table:table-cell>
          <table:table-cell table:formula="of:=[.D296]-[.D29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4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18518518518519" calcext:value-type="float">
            <text:p>0,00218518518518519000</text:p>
          </table:table-cell>
          <table:table-cell table:formula="of:=[.D297]-[.D296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4" office:value-type="float" office:value="18944" calcext:value-type="float">
            <text:p>1894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19259259259259" calcext:value-type="float">
            <text:p>0,00219259259259259000</text:p>
          </table:table-cell>
          <table:table-cell table:formula="of:=[.D298]-[.D29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4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2" calcext:value-type="float">
            <text:p>0,00220000000000000000</text:p>
          </table:table-cell>
          <table:table-cell table:formula="of:=[.D299]-[.D29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4" office:value-type="float" office:value="19072" calcext:value-type="float">
            <text:p>1907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20740740740741" calcext:value-type="float">
            <text:p>0,00220740740740741000</text:p>
          </table:table-cell>
          <table:table-cell table:formula="of:=[.D300]-[.D29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4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21481481481482" calcext:value-type="float">
            <text:p>0,00221481481481482000</text:p>
          </table:table-cell>
          <table:table-cell table:formula="of:=[.D301]-[.D30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4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22222222222222" calcext:value-type="float">
            <text:p>0,00222222222222222000</text:p>
          </table:table-cell>
          <table:table-cell table:formula="of:=[.D302]-[.D30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4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22962962962963" calcext:value-type="float">
            <text:p>0,00222962962962963000</text:p>
          </table:table-cell>
          <table:table-cell table:formula="of:=[.D303]-[.D30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4" office:value-type="float" office:value="19328" calcext:value-type="float">
            <text:p>1932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23703703703704" calcext:value-type="float">
            <text:p>0,00223703703703704000</text:p>
          </table:table-cell>
          <table:table-cell table:formula="of:=[.D304]-[.D30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4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24444444444444" calcext:value-type="float">
            <text:p>0,00224444444444444000</text:p>
          </table:table-cell>
          <table:table-cell table:formula="of:=[.D305]-[.D30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4" office:value-type="float" office:value="19456" calcext:value-type="float">
            <text:p>1945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25185185185185" calcext:value-type="float">
            <text:p>0,00225185185185185000</text:p>
          </table:table-cell>
          <table:table-cell table:formula="of:=[.D306]-[.D305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4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25925925925926" calcext:value-type="float">
            <text:p>0,00225925925925926000</text:p>
          </table:table-cell>
          <table:table-cell table:formula="of:=[.D307]-[.D30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4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26666666666667" calcext:value-type="float">
            <text:p>0,00226666666666667000</text:p>
          </table:table-cell>
          <table:table-cell table:formula="of:=[.D308]-[.D30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4" office:value-type="float" office:value="19648" calcext:value-type="float">
            <text:p>19648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27407407407407" calcext:value-type="float">
            <text:p>0,00227407407407407000</text:p>
          </table:table-cell>
          <table:table-cell table:formula="of:=[.D309]-[.D30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4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28148148148148" calcext:value-type="float">
            <text:p>0,00228148148148148000</text:p>
          </table:table-cell>
          <table:table-cell table:formula="of:=[.D310]-[.D30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4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28888888888889" calcext:value-type="float">
            <text:p>0,00228888888888889000</text:p>
          </table:table-cell>
          <table:table-cell table:formula="of:=[.D311]-[.D31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4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2962962962963" calcext:value-type="float">
            <text:p>0,00229629629629630000</text:p>
          </table:table-cell>
          <table:table-cell table:formula="of:=[.D312]-[.D31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4" office:value-type="float" office:value="19904" calcext:value-type="float">
            <text:p>19904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3037037037037" calcext:value-type="float">
            <text:p>0,00230370370370370000</text:p>
          </table:table-cell>
          <table:table-cell table:formula="of:=[.D313]-[.D31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4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31111111111111" calcext:value-type="float">
            <text:p>0,00231111111111111000</text:p>
          </table:table-cell>
          <table:table-cell table:formula="of:=[.D314]-[.D31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4" office:value-type="float" office:value="20032" calcext:value-type="float">
            <text:p>20032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31851851851852" calcext:value-type="float">
            <text:p>0,00231851851851852000</text:p>
          </table:table-cell>
          <table:table-cell table:formula="of:=[.D315]-[.D31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4" office:value-type="float" office:value="20096" calcext:value-type="float">
            <text:p>2009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32592592592593" calcext:value-type="float">
            <text:p>0,00232592592592593000</text:p>
          </table:table-cell>
          <table:table-cell table:formula="of:=[.D316]-[.D315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4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33333333333333" calcext:value-type="float">
            <text:p>0,00233333333333333000</text:p>
          </table:table-cell>
          <table:table-cell table:formula="of:=[.D317]-[.D31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4" office:value-type="float" office:value="20224" calcext:value-type="float">
            <text:p>2022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34074074074074" calcext:value-type="float">
            <text:p>0,00234074074074074000</text:p>
          </table:table-cell>
          <table:table-cell table:formula="of:=[.D318]-[.D31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4" office:value-type="float" office:value="20288" calcext:value-type="float">
            <text:p>20288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34814814814815" calcext:value-type="float">
            <text:p>0,00234814814814815000</text:p>
          </table:table-cell>
          <table:table-cell table:formula="of:=[.D319]-[.D31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4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35555555555556" calcext:value-type="float">
            <text:p>0,00235555555555556000</text:p>
          </table:table-cell>
          <table:table-cell table:formula="of:=[.D320]-[.D31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4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36296296296296" calcext:value-type="float">
            <text:p>0,00236296296296296000</text:p>
          </table:table-cell>
          <table:table-cell table:formula="of:=[.D321]-[.D32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4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37037037037037" calcext:value-type="float">
            <text:p>0,00237037037037037000</text:p>
          </table:table-cell>
          <table:table-cell table:formula="of:=[.D322]-[.D32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4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37777777777778" calcext:value-type="float">
            <text:p>0,00237777777777778000</text:p>
          </table:table-cell>
          <table:table-cell table:formula="of:=[.D323]-[.D32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4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38518518518519" calcext:value-type="float">
            <text:p>0,00238518518518519000</text:p>
          </table:table-cell>
          <table:table-cell table:formula="of:=[.D324]-[.D32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4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39259259259259" calcext:value-type="float">
            <text:p>0,00239259259259259000</text:p>
          </table:table-cell>
          <table:table-cell table:formula="of:=[.D325]-[.D32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4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4" calcext:value-type="float">
            <text:p>0,00240000000000000000</text:p>
          </table:table-cell>
          <table:table-cell table:formula="of:=[.D326]-[.D325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4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40740740740741" calcext:value-type="float">
            <text:p>0,00240740740740741000</text:p>
          </table:table-cell>
          <table:table-cell table:formula="of:=[.D327]-[.D32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4" office:value-type="float" office:value="20864" calcext:value-type="float">
            <text:p>2086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41481481481482" calcext:value-type="float">
            <text:p>0,00241481481481482000</text:p>
          </table:table-cell>
          <table:table-cell table:formula="of:=[.D328]-[.D32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4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42222222222222" calcext:value-type="float">
            <text:p>0,00242222222222222000</text:p>
          </table:table-cell>
          <table:table-cell table:formula="of:=[.D329]-[.D32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4" office:value-type="float" office:value="20992" calcext:value-type="float">
            <text:p>2099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42962962962963" calcext:value-type="float">
            <text:p>0,00242962962962963000</text:p>
          </table:table-cell>
          <table:table-cell table:formula="of:=[.D330]-[.D32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4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43703703703704" calcext:value-type="float">
            <text:p>0,00243703703703704000</text:p>
          </table:table-cell>
          <table:table-cell table:formula="of:=[.D331]-[.D33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4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44444444444444" calcext:value-type="float">
            <text:p>0,00244444444444444000</text:p>
          </table:table-cell>
          <table:table-cell table:formula="of:=[.D332]-[.D33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4" office:value-type="float" office:value="21184" calcext:value-type="float">
            <text:p>21184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45185185185185" calcext:value-type="float">
            <text:p>0,00245185185185185000</text:p>
          </table:table-cell>
          <table:table-cell table:formula="of:=[.D333]-[.D33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4" office:value-type="float" office:value="21248" calcext:value-type="float">
            <text:p>2124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45925925925926" calcext:value-type="float">
            <text:p>0,00245925925925926000</text:p>
          </table:table-cell>
          <table:table-cell table:formula="of:=[.D334]-[.D33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4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46666666666667" calcext:value-type="float">
            <text:p>0,00246666666666667000</text:p>
          </table:table-cell>
          <table:table-cell table:formula="of:=[.D335]-[.D334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4" office:value-type="float" office:value="21376" calcext:value-type="float">
            <text:p>2137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47407407407407" calcext:value-type="float">
            <text:p>0,00247407407407407000</text:p>
          </table:table-cell>
          <table:table-cell table:formula="of:=[.D336]-[.D33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4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48148148148148" calcext:value-type="float">
            <text:p>0,00248148148148148000</text:p>
          </table:table-cell>
          <table:table-cell table:formula="of:=[.D337]-[.D33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4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48888888888889" calcext:value-type="float">
            <text:p>0,00248888888888889000</text:p>
          </table:table-cell>
          <table:table-cell table:formula="of:=[.D338]-[.D33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4" office:value-type="float" office:value="21568" calcext:value-type="float">
            <text:p>21568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4962962962963" calcext:value-type="float">
            <text:p>0,00249629629629630000</text:p>
          </table:table-cell>
          <table:table-cell table:formula="of:=[.D339]-[.D33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4" office:value-type="float" office:value="21632" calcext:value-type="float">
            <text:p>2163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5037037037037" calcext:value-type="float">
            <text:p>0,00250370370370370000</text:p>
          </table:table-cell>
          <table:table-cell table:formula="of:=[.D340]-[.D33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4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51111111111111" calcext:value-type="float">
            <text:p>0,00251111111111111000</text:p>
          </table:table-cell>
          <table:table-cell table:formula="of:=[.D341]-[.D34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4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51851851851852" calcext:value-type="float">
            <text:p>0,00251851851851852000</text:p>
          </table:table-cell>
          <table:table-cell table:formula="of:=[.D342]-[.D34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4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52592592592593" calcext:value-type="float">
            <text:p>0,00252592592592593000</text:p>
          </table:table-cell>
          <table:table-cell table:formula="of:=[.D343]-[.D34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4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53333333333333" calcext:value-type="float">
            <text:p>0,00253333333333333000</text:p>
          </table:table-cell>
          <table:table-cell table:formula="of:=[.D344]-[.D34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4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54074074074074" calcext:value-type="float">
            <text:p>0,00254074074074074000</text:p>
          </table:table-cell>
          <table:table-cell table:formula="of:=[.D345]-[.D344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4" office:value-type="float" office:value="22016" calcext:value-type="float">
            <text:p>2201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54814814814815" calcext:value-type="float">
            <text:p>0,00254814814814815000</text:p>
          </table:table-cell>
          <table:table-cell table:formula="of:=[.D346]-[.D34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4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55555555555556" calcext:value-type="float">
            <text:p>0,00255555555555556000</text:p>
          </table:table-cell>
          <table:table-cell table:formula="of:=[.D347]-[.D34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4" office:value-type="float" office:value="22144" calcext:value-type="float">
            <text:p>2214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56296296296296" calcext:value-type="float">
            <text:p>0,00256296296296296000</text:p>
          </table:table-cell>
          <table:table-cell table:formula="of:=[.D348]-[.D34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4" office:value-type="float" office:value="22208" calcext:value-type="float">
            <text:p>22208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57037037037037" calcext:value-type="float">
            <text:p>0,00257037037037037000</text:p>
          </table:table-cell>
          <table:table-cell table:formula="of:=[.D349]-[.D34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4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57777777777778" calcext:value-type="float">
            <text:p>0,00257777777777778000</text:p>
          </table:table-cell>
          <table:table-cell table:formula="of:=[.D350]-[.D34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4" office:value-type="float" office:value="22336" calcext:value-type="float">
            <text:p>22336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58518518518519" calcext:value-type="float">
            <text:p>0,00258518518518519000</text:p>
          </table:table-cell>
          <table:table-cell table:formula="of:=[.D351]-[.D35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4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59259259259259" calcext:value-type="float">
            <text:p>0,00259259259259259000</text:p>
          </table:table-cell>
          <table:table-cell table:formula="of:=[.D352]-[.D35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4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6" calcext:value-type="float">
            <text:p>0,00260000000000000000</text:p>
          </table:table-cell>
          <table:table-cell table:formula="of:=[.D353]-[.D35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4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60740740740741" calcext:value-type="float">
            <text:p>0,00260740740740741000</text:p>
          </table:table-cell>
          <table:table-cell table:formula="of:=[.D354]-[.D353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4" office:value-type="float" office:value="22592" calcext:value-type="float">
            <text:p>22592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61481481481481" calcext:value-type="float">
            <text:p>0,00261481481481481000</text:p>
          </table:table-cell>
          <table:table-cell table:formula="of:=[.D355]-[.D354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4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62222222222222" calcext:value-type="float">
            <text:p>0,00262222222222222000</text:p>
          </table:table-cell>
          <table:table-cell table:formula="of:=[.D356]-[.D35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4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62962962962963" calcext:value-type="float">
            <text:p>0,00262962962962963000</text:p>
          </table:table-cell>
          <table:table-cell table:formula="of:=[.D357]-[.D35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4" office:value-type="float" office:value="22784" calcext:value-type="float">
            <text:p>2278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63703703703704" calcext:value-type="float">
            <text:p>0,00263703703703704000</text:p>
          </table:table-cell>
          <table:table-cell table:formula="of:=[.D358]-[.D35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4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64444444444444" calcext:value-type="float">
            <text:p>0,00264444444444444000</text:p>
          </table:table-cell>
          <table:table-cell table:formula="of:=[.D359]-[.D35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4" office:value-type="float" office:value="22912" calcext:value-type="float">
            <text:p>2291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65185185185185" calcext:value-type="float">
            <text:p>0,00265185185185185000</text:p>
          </table:table-cell>
          <table:table-cell table:formula="of:=[.D360]-[.D35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64" office:value-type="float" office:value="22976" calcext:value-type="float">
            <text:p>22976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65925925925926" calcext:value-type="float">
            <text:p>0,00265925925925926000</text:p>
          </table:table-cell>
          <table:table-cell table:formula="of:=[.D361]-[.D36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64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66666666666667" calcext:value-type="float">
            <text:p>0,00266666666666667000</text:p>
          </table:table-cell>
          <table:table-cell table:formula="of:=[.D362]-[.D36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64" office:value-type="float" office:value="23104" calcext:value-type="float">
            <text:p>23104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67407407407407" calcext:value-type="float">
            <text:p>0,00267407407407407000</text:p>
          </table:table-cell>
          <table:table-cell table:formula="of:=[.D363]-[.D36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64" office:value-type="float" office:value="23168" calcext:value-type="float">
            <text:p>2316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68148148148148" calcext:value-type="float">
            <text:p>0,00268148148148148000</text:p>
          </table:table-cell>
          <table:table-cell table:formula="of:=[.D364]-[.D363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64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68888888888889" calcext:value-type="float">
            <text:p>0,00268888888888889000</text:p>
          </table:table-cell>
          <table:table-cell table:formula="of:=[.D365]-[.D36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64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6962962962963" calcext:value-type="float">
            <text:p>0,00269629629629630000</text:p>
          </table:table-cell>
          <table:table-cell table:formula="of:=[.D366]-[.D36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64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7037037037037" calcext:value-type="float">
            <text:p>0,00270370370370370000</text:p>
          </table:table-cell>
          <table:table-cell table:formula="of:=[.D367]-[.D366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64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71111111111111" calcext:value-type="float">
            <text:p>0,00271111111111111000</text:p>
          </table:table-cell>
          <table:table-cell table:formula="of:=[.D368]-[.D367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64" office:value-type="float" office:value="23488" calcext:value-type="float">
            <text:p>23488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71851851851852" calcext:value-type="float">
            <text:p>0,00271851851851852000</text:p>
          </table:table-cell>
          <table:table-cell table:formula="of:=[.D369]-[.D368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64" office:value-type="float" office:value="23552" calcext:value-type="float">
            <text:p>2355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72592592592593" calcext:value-type="float">
            <text:p>0,00272592592592593000</text:p>
          </table:table-cell>
          <table:table-cell table:formula="of:=[.D370]-[.D369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64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73333333333333" calcext:value-type="float">
            <text:p>0,00273333333333333000</text:p>
          </table:table-cell>
          <table:table-cell table:formula="of:=[.D371]-[.D370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64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74074074074074" calcext:value-type="float">
            <text:p>0,00274074074074074000</text:p>
          </table:table-cell>
          <table:table-cell table:formula="of:=[.D372]-[.D371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64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74814814814815" calcext:value-type="float">
            <text:p>0,00274814814814815000</text:p>
          </table:table-cell>
          <table:table-cell table:formula="of:=[.D373]-[.D372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64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75555555555556" calcext:value-type="float">
            <text:p>0,00275555555555556000</text:p>
          </table:table-cell>
          <table:table-cell table:formula="of:=[.D374]-[.D373]" office:value-type="float" office:value="0.0000074074074074078" calcext:value-type="float">
            <text:p>0,00000740740740740780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64" office:value-type="float" office:value="23872" calcext:value-type="float">
            <text:p>23872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76296296296296" calcext:value-type="float">
            <text:p>0,00276296296296296000</text:p>
          </table:table-cell>
          <table:table-cell table:formula="of:=[.D375]-[.D374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64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77037037037037" calcext:value-type="float">
            <text:p>0,00277037037037037000</text:p>
          </table:table-cell>
          <table:table-cell table:formula="of:=[.D376]-[.D375]" office:value-type="float" office:value="0.00000740740740740736" calcext:value-type="float">
            <text:p>0,00000740740740740736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64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77777777777778" calcext:value-type="float">
            <text:p>0,00277777777777778000</text:p>
          </table:table-cell>
          <table:table-cell table:formula="of:=#REF!-[.D376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4:58.920813851</meta:creation-date>
    <dc:date>2026-05-17T18:25:11.199035307</dc:date>
    <meta:editing-duration>PT13S</meta:editing-duration>
    <meta:editing-cycles>1</meta:editing-cycles>
    <meta:document-statistic meta:table-count="1" meta:cell-count="1880" meta:object-count="0"/>
    <meta:generator>LibreOffice/24.2.7.2$Linux_X86_64 LibreOffice_project/420$Build-2</meta:generator>
  </office:meta>
</office:document-meta>
</file>