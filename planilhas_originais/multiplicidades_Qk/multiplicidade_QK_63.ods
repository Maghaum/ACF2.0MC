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8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6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column table:style-name="co2" table:number-columns-repeated="16379" table:default-cell-style-name="ce2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63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729166666666667" calcext:value-type="float">
            <text:p>0,00000729166666666667</text:p>
          </table:table-cell>
          <table:table-cell table:formula="of:=[.D3]-[.D2]" office:value-type="float" office:value="0.00000729166666666667" calcext:value-type="float">
            <text:p>0,00000729166666666667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63" office:value-type="float" office:value="126" calcext:value-type="float">
            <text:p>126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145833333333333" calcext:value-type="float">
            <text:p>0,00001458333333333330</text:p>
          </table:table-cell>
          <table:table-cell table:formula="of:=[.D4]-[.D3]" office:value-type="float" office:value="0.00000729166666666667" calcext:value-type="float">
            <text:p>0,00000729166666666667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63" office:value-type="float" office:value="189" calcext:value-type="float">
            <text:p>189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21875" calcext:value-type="float">
            <text:p>0,00002187500000000000</text:p>
          </table:table-cell>
          <table:table-cell table:formula="of:=[.D5]-[.D4]" office:value-type="float" office:value="0.00000729166666666667" calcext:value-type="float">
            <text:p>0,00000729166666666667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63" office:value-type="float" office:value="252" calcext:value-type="float">
            <text:p>252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291666666666667" calcext:value-type="float">
            <text:p>0,00002916666666666670</text:p>
          </table:table-cell>
          <table:table-cell table:formula="of:=[.D6]-[.D5]" office:value-type="float" office:value="0.00000729166666666667" calcext:value-type="float">
            <text:p>0,00000729166666666667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63" office:value-type="float" office:value="315" calcext:value-type="float">
            <text:p>315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364583333333333" calcext:value-type="float">
            <text:p>0,00003645833333333330</text:p>
          </table:table-cell>
          <table:table-cell table:formula="of:=[.D7]-[.D6]" office:value-type="float" office:value="0.00000729166666666666" calcext:value-type="float">
            <text:p>0,00000729166666666666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63" office:value-type="float" office:value="378" calcext:value-type="float">
            <text:p>378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4375" calcext:value-type="float">
            <text:p>0,00004375000000000000</text:p>
          </table:table-cell>
          <table:table-cell table:formula="of:=[.D8]-[.D7]" office:value-type="float" office:value="0.00000729166666666667" calcext:value-type="float">
            <text:p>0,00000729166666666667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63" office:value-type="float" office:value="441" calcext:value-type="float">
            <text:p>441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510416666666667" calcext:value-type="float">
            <text:p>0,00005104166666666670</text:p>
          </table:table-cell>
          <table:table-cell table:formula="of:=[.D9]-[.D8]" office:value-type="float" office:value="0.00000729166666666666" calcext:value-type="float">
            <text:p>0,00000729166666666666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63" office:value-type="float" office:value="504" calcext:value-type="float">
            <text:p>504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583333333333333" calcext:value-type="float">
            <text:p>0,00005833333333333330</text:p>
          </table:table-cell>
          <table:table-cell table:formula="of:=[.D10]-[.D9]" office:value-type="float" office:value="0.00000729166666666666" calcext:value-type="float">
            <text:p>0,00000729166666666666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63" office:value-type="float" office:value="567" calcext:value-type="float">
            <text:p>567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65625" calcext:value-type="float">
            <text:p>0,00006562500000000000</text:p>
          </table:table-cell>
          <table:table-cell table:formula="of:=[.D11]-[.D10]" office:value-type="float" office:value="0.00000729166666666668" calcext:value-type="float">
            <text:p>0,00000729166666666668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63" office:value-type="float" office:value="630" calcext:value-type="float">
            <text:p>63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729166666666667" calcext:value-type="float">
            <text:p>0,00007291666666666670</text:p>
          </table:table-cell>
          <table:table-cell table:formula="of:=[.D12]-[.D11]" office:value-type="float" office:value="0.00000729166666666666" calcext:value-type="float">
            <text:p>0,00000729166666666666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63" office:value-type="float" office:value="693" calcext:value-type="float">
            <text:p>693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802083333333333" calcext:value-type="float">
            <text:p>0,00008020833333333330</text:p>
          </table:table-cell>
          <table:table-cell table:formula="of:=[.D13]-[.D12]" office:value-type="float" office:value="0.00000729166666666666" calcext:value-type="float">
            <text:p>0,00000729166666666666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63" office:value-type="float" office:value="756" calcext:value-type="float">
            <text:p>756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875" calcext:value-type="float">
            <text:p>0,00008750000000000000</text:p>
          </table:table-cell>
          <table:table-cell table:formula="of:=[.D14]-[.D13]" office:value-type="float" office:value="0.00000729166666666666" calcext:value-type="float">
            <text:p>0,00000729166666666666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63" office:value-type="float" office:value="819" calcext:value-type="float">
            <text:p>819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947916666666667" calcext:value-type="float">
            <text:p>0,00009479166666666670</text:p>
          </table:table-cell>
          <table:table-cell table:formula="of:=[.D15]-[.D14]" office:value-type="float" office:value="0.00000729166666666668" calcext:value-type="float">
            <text:p>0,00000729166666666668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63" office:value-type="float" office:value="882" calcext:value-type="float">
            <text:p>882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102083333333333" calcext:value-type="float">
            <text:p>0,00010208333333333300</text:p>
          </table:table-cell>
          <table:table-cell table:formula="of:=[.D16]-[.D15]" office:value-type="float" office:value="0.00000729166666666666" calcext:value-type="float">
            <text:p>0,00000729166666666666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63" office:value-type="float" office:value="945" calcext:value-type="float">
            <text:p>945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109375" calcext:value-type="float">
            <text:p>0,00010937500000000000</text:p>
          </table:table-cell>
          <table:table-cell table:formula="of:=[.D17]-[.D16]" office:value-type="float" office:value="0.00000729166666666666" calcext:value-type="float">
            <text:p>0,00000729166666666666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63" office:value-type="float" office:value="1008" calcext:value-type="float">
            <text:p>1008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116666666666667" calcext:value-type="float">
            <text:p>0,00011666666666666700</text:p>
          </table:table-cell>
          <table:table-cell table:formula="of:=[.D18]-[.D17]" office:value-type="float" office:value="0.00000729166666666668" calcext:value-type="float">
            <text:p>0,00000729166666666668</text:p>
          </table:table-cell>
          <table:table-cell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63" office:value-type="float" office:value="1071" calcext:value-type="float">
            <text:p>1071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123958333333333" calcext:value-type="float">
            <text:p>0,00012395833333333300</text:p>
          </table:table-cell>
          <table:table-cell table:formula="of:=[.D19]-[.D18]" office:value-type="float" office:value="0.00000729166666666665" calcext:value-type="float">
            <text:p>0,00000729166666666665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63" office:value-type="float" office:value="1134" calcext:value-type="float">
            <text:p>1134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13125" calcext:value-type="float">
            <text:p>0,00013125000000000000</text:p>
          </table:table-cell>
          <table:table-cell table:formula="of:=[.D20]-[.D19]" office:value-type="float" office:value="0.00000729166666666668" calcext:value-type="float">
            <text:p>0,00000729166666666668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63" office:value-type="float" office:value="1197" calcext:value-type="float">
            <text:p>1197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138541666666667" calcext:value-type="float">
            <text:p>0,00013854166666666700</text:p>
          </table:table-cell>
          <table:table-cell table:formula="of:=[.D21]-[.D20]" office:value-type="float" office:value="0.00000729166666666668" calcext:value-type="float">
            <text:p>0,00000729166666666668</text:p>
          </table:table-cell>
          <table:table-cell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63" office:value-type="float" office:value="1260" calcext:value-type="float">
            <text:p>126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145833333333333" calcext:value-type="float">
            <text:p>0,00014583333333333300</text:p>
          </table:table-cell>
          <table:table-cell table:formula="of:=[.D22]-[.D21]" office:value-type="float" office:value="0.00000729166666666665" calcext:value-type="float">
            <text:p>0,00000729166666666665</text:p>
          </table:table-cell>
          <table:table-cell table:number-columns-repeated="1637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63" office:value-type="float" office:value="1323" calcext:value-type="float">
            <text:p>1323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153125" calcext:value-type="float">
            <text:p>0,00015312500000000000</text:p>
          </table:table-cell>
          <table:table-cell table:formula="of:=[.D23]-[.D22]" office:value-type="float" office:value="0.00000729166666666668" calcext:value-type="float">
            <text:p>0,00000729166666666668</text:p>
          </table:table-cell>
          <table:table-cell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63" office:value-type="float" office:value="1386" calcext:value-type="float">
            <text:p>1386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160416666666667" calcext:value-type="float">
            <text:p>0,00016041666666666700</text:p>
          </table:table-cell>
          <table:table-cell table:formula="of:=[.D24]-[.D23]" office:value-type="float" office:value="0.00000729166666666665" calcext:value-type="float">
            <text:p>0,00000729166666666665</text:p>
          </table:table-cell>
          <table:table-cell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63" office:value-type="float" office:value="1449" calcext:value-type="float">
            <text:p>1449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167708333333333" calcext:value-type="float">
            <text:p>0,00016770833333333300</text:p>
          </table:table-cell>
          <table:table-cell table:formula="of:=[.D25]-[.D24]" office:value-type="float" office:value="0.00000729166666666668" calcext:value-type="float">
            <text:p>0,00000729166666666668</text:p>
          </table:table-cell>
          <table:table-cell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63" office:value-type="float" office:value="1512" calcext:value-type="float">
            <text:p>1512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175" calcext:value-type="float">
            <text:p>0,00017500000000000000</text:p>
          </table:table-cell>
          <table:table-cell table:formula="of:=[.D26]-[.D25]" office:value-type="float" office:value="0.00000729166666666668" calcext:value-type="float">
            <text:p>0,00000729166666666668</text:p>
          </table:table-cell>
          <table:table-cell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63" office:value-type="float" office:value="1575" calcext:value-type="float">
            <text:p>1575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182291666666667" calcext:value-type="float">
            <text:p>0,00018229166666666700</text:p>
          </table:table-cell>
          <table:table-cell table:formula="of:=[.D27]-[.D26]" office:value-type="float" office:value="0.00000729166666666665" calcext:value-type="float">
            <text:p>0,00000729166666666665</text:p>
          </table:table-cell>
          <table:table-cell table:number-columns-repeated="1637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63" office:value-type="float" office:value="1638" calcext:value-type="float">
            <text:p>1638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189583333333333" calcext:value-type="float">
            <text:p>0,00018958333333333300</text:p>
          </table:table-cell>
          <table:table-cell table:formula="of:=[.D28]-[.D27]" office:value-type="float" office:value="0.00000729166666666668" calcext:value-type="float">
            <text:p>0,00000729166666666668</text:p>
          </table:table-cell>
          <table:table-cell table:number-columns-repeated="1637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63" office:value-type="float" office:value="1701" calcext:value-type="float">
            <text:p>1701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196875" calcext:value-type="float">
            <text:p>0,00019687500000000000</text:p>
          </table:table-cell>
          <table:table-cell table:formula="of:=[.D29]-[.D28]" office:value-type="float" office:value="0.00000729166666666668" calcext:value-type="float">
            <text:p>0,00000729166666666668</text:p>
          </table:table-cell>
          <table:table-cell table:number-columns-repeated="1637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63" office:value-type="float" office:value="1764" calcext:value-type="float">
            <text:p>1764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204166666666667" calcext:value-type="float">
            <text:p>0,00020416666666666700</text:p>
          </table:table-cell>
          <table:table-cell table:formula="of:=[.D30]-[.D29]" office:value-type="float" office:value="0.00000729166666666665" calcext:value-type="float">
            <text:p>0,00000729166666666665</text:p>
          </table:table-cell>
          <table:table-cell table:number-columns-repeated="1637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63" office:value-type="float" office:value="1827" calcext:value-type="float">
            <text:p>1827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211458333333333" calcext:value-type="float">
            <text:p>0,00021145833333333300</text:p>
          </table:table-cell>
          <table:table-cell table:formula="of:=[.D31]-[.D30]" office:value-type="float" office:value="0.00000729166666666668" calcext:value-type="float">
            <text:p>0,00000729166666666668</text:p>
          </table:table-cell>
          <table:table-cell table:number-columns-repeated="1637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63" office:value-type="float" office:value="1890" calcext:value-type="float">
            <text:p>189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21875" calcext:value-type="float">
            <text:p>0,00021875000000000000</text:p>
          </table:table-cell>
          <table:table-cell table:formula="of:=[.D32]-[.D31]" office:value-type="float" office:value="0.00000729166666666665" calcext:value-type="float">
            <text:p>0,00000729166666666665</text:p>
          </table:table-cell>
          <table:table-cell table:number-columns-repeated="1637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63" office:value-type="float" office:value="1953" calcext:value-type="float">
            <text:p>1953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226041666666667" calcext:value-type="float">
            <text:p>0,00022604166666666700</text:p>
          </table:table-cell>
          <table:table-cell table:formula="of:=[.D33]-[.D32]" office:value-type="float" office:value="0.00000729166666666668" calcext:value-type="float">
            <text:p>0,00000729166666666668</text:p>
          </table:table-cell>
          <table:table-cell table:number-columns-repeated="1637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63" office:value-type="float" office:value="2016" calcext:value-type="float">
            <text:p>2016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233333333333333" calcext:value-type="float">
            <text:p>0,00023333333333333300</text:p>
          </table:table-cell>
          <table:table-cell table:formula="of:=[.D34]-[.D33]" office:value-type="float" office:value="0.00000729166666666668" calcext:value-type="float">
            <text:p>0,00000729166666666668</text:p>
          </table:table-cell>
          <table:table-cell table:number-columns-repeated="1637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63" office:value-type="float" office:value="2079" calcext:value-type="float">
            <text:p>2079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240625" calcext:value-type="float">
            <text:p>0,00024062500000000000</text:p>
          </table:table-cell>
          <table:table-cell table:formula="of:=[.D35]-[.D34]" office:value-type="float" office:value="0.00000729166666666668" calcext:value-type="float">
            <text:p>0,00000729166666666668</text:p>
          </table:table-cell>
          <table:table-cell table:number-columns-repeated="1637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63" office:value-type="float" office:value="2142" calcext:value-type="float">
            <text:p>2142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247916666666667" calcext:value-type="float">
            <text:p>0,00024791666666666700</text:p>
          </table:table-cell>
          <table:table-cell table:formula="of:=[.D36]-[.D35]" office:value-type="float" office:value="0.00000729166666666662" calcext:value-type="float">
            <text:p>0,00000729166666666662</text:p>
          </table:table-cell>
          <table:table-cell table:number-columns-repeated="1637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63" office:value-type="float" office:value="2205" calcext:value-type="float">
            <text:p>2205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255208333333333" calcext:value-type="float">
            <text:p>0,00025520833333333300</text:p>
          </table:table-cell>
          <table:table-cell table:formula="of:=[.D37]-[.D36]" office:value-type="float" office:value="0.00000729166666666668" calcext:value-type="float">
            <text:p>0,00000729166666666668</text:p>
          </table:table-cell>
          <table:table-cell table:number-columns-repeated="1637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63" office:value-type="float" office:value="2268" calcext:value-type="float">
            <text:p>2268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2625" calcext:value-type="float">
            <text:p>0,00026250000000000000</text:p>
          </table:table-cell>
          <table:table-cell table:formula="of:=[.D38]-[.D37]" office:value-type="float" office:value="0.00000729166666666668" calcext:value-type="float">
            <text:p>0,00000729166666666668</text:p>
          </table:table-cell>
          <table:table-cell table:number-columns-repeated="1637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63" office:value-type="float" office:value="2331" calcext:value-type="float">
            <text:p>2331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269791666666667" calcext:value-type="float">
            <text:p>0,00026979166666666700</text:p>
          </table:table-cell>
          <table:table-cell table:formula="of:=[.D39]-[.D38]" office:value-type="float" office:value="0.00000729166666666668" calcext:value-type="float">
            <text:p>0,00000729166666666668</text:p>
          </table:table-cell>
          <table:table-cell table:number-columns-repeated="1637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63" office:value-type="float" office:value="2394" calcext:value-type="float">
            <text:p>2394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277083333333333" calcext:value-type="float">
            <text:p>0,00027708333333333300</text:p>
          </table:table-cell>
          <table:table-cell table:formula="of:=[.D40]-[.D39]" office:value-type="float" office:value="0.00000729166666666668" calcext:value-type="float">
            <text:p>0,00000729166666666668</text:p>
          </table:table-cell>
          <table:table-cell table:number-columns-repeated="1637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63" office:value-type="float" office:value="2457" calcext:value-type="float">
            <text:p>2457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284375" calcext:value-type="float">
            <text:p>0,00028437500000000000</text:p>
          </table:table-cell>
          <table:table-cell table:formula="of:=[.D41]-[.D40]" office:value-type="float" office:value="0.00000729166666666668" calcext:value-type="float">
            <text:p>0,00000729166666666668</text:p>
          </table:table-cell>
          <table:table-cell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63" office:value-type="float" office:value="2520" calcext:value-type="float">
            <text:p>252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291666666666667" calcext:value-type="float">
            <text:p>0,00029166666666666700</text:p>
          </table:table-cell>
          <table:table-cell table:formula="of:=[.D42]-[.D41]" office:value-type="float" office:value="0.00000729166666666662" calcext:value-type="float">
            <text:p>0,00000729166666666662</text:p>
          </table:table-cell>
          <table:table-cell table:number-columns-repeated="1637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63" office:value-type="float" office:value="2583" calcext:value-type="float">
            <text:p>2583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298958333333333" calcext:value-type="float">
            <text:p>0,00029895833333333300</text:p>
          </table:table-cell>
          <table:table-cell table:formula="of:=[.D43]-[.D42]" office:value-type="float" office:value="0.00000729166666666668" calcext:value-type="float">
            <text:p>0,00000729166666666668</text:p>
          </table:table-cell>
          <table:table-cell table:number-columns-repeated="1637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63" office:value-type="float" office:value="2646" calcext:value-type="float">
            <text:p>2646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30625" calcext:value-type="float">
            <text:p>0,00030625000000000000</text:p>
          </table:table-cell>
          <table:table-cell table:formula="of:=[.D44]-[.D43]" office:value-type="float" office:value="0.00000729166666666668" calcext:value-type="float">
            <text:p>0,00000729166666666668</text:p>
          </table:table-cell>
          <table:table-cell table:number-columns-repeated="1637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63" office:value-type="float" office:value="2709" calcext:value-type="float">
            <text:p>2709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313541666666667" calcext:value-type="float">
            <text:p>0,00031354166666666700</text:p>
          </table:table-cell>
          <table:table-cell table:formula="of:=[.D45]-[.D44]" office:value-type="float" office:value="0.00000729166666666668" calcext:value-type="float">
            <text:p>0,00000729166666666668</text:p>
          </table:table-cell>
          <table:table-cell table:number-columns-repeated="1637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63" office:value-type="float" office:value="2772" calcext:value-type="float">
            <text:p>2772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320833333333333" calcext:value-type="float">
            <text:p>0,00032083333333333300</text:p>
          </table:table-cell>
          <table:table-cell table:formula="of:=[.D46]-[.D45]" office:value-type="float" office:value="0.00000729166666666668" calcext:value-type="float">
            <text:p>0,00000729166666666668</text:p>
          </table:table-cell>
          <table:table-cell table:number-columns-repeated="1637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63" office:value-type="float" office:value="2835" calcext:value-type="float">
            <text:p>2835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328125" calcext:value-type="float">
            <text:p>0,00032812500000000000</text:p>
          </table:table-cell>
          <table:table-cell table:formula="of:=[.D47]-[.D46]" office:value-type="float" office:value="0.00000729166666666662" calcext:value-type="float">
            <text:p>0,00000729166666666662</text:p>
          </table:table-cell>
          <table:table-cell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63" office:value-type="float" office:value="2898" calcext:value-type="float">
            <text:p>2898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335416666666667" calcext:value-type="float">
            <text:p>0,00033541666666666700</text:p>
          </table:table-cell>
          <table:table-cell table:formula="of:=[.D48]-[.D47]" office:value-type="float" office:value="0.00000729166666666668" calcext:value-type="float">
            <text:p>0,00000729166666666668</text:p>
          </table:table-cell>
          <table:table-cell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63" office:value-type="float" office:value="2961" calcext:value-type="float">
            <text:p>2961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342708333333333" calcext:value-type="float">
            <text:p>0,00034270833333333300</text:p>
          </table:table-cell>
          <table:table-cell table:formula="of:=[.D49]-[.D48]" office:value-type="float" office:value="0.00000729166666666668" calcext:value-type="float">
            <text:p>0,00000729166666666668</text:p>
          </table:table-cell>
          <table:table-cell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63" office:value-type="float" office:value="3024" calcext:value-type="float">
            <text:p>3024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35" calcext:value-type="float">
            <text:p>0,00035000000000000000</text:p>
          </table:table-cell>
          <table:table-cell table:formula="of:=[.D50]-[.D49]" office:value-type="float" office:value="0.00000729166666666668" calcext:value-type="float">
            <text:p>0,00000729166666666668</text:p>
          </table:table-cell>
          <table:table-cell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63" office:value-type="float" office:value="3087" calcext:value-type="float">
            <text:p>3087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357291666666667" calcext:value-type="float">
            <text:p>0,00035729166666666700</text:p>
          </table:table-cell>
          <table:table-cell table:formula="of:=[.D51]-[.D50]" office:value-type="float" office:value="0.00000729166666666668" calcext:value-type="float">
            <text:p>0,00000729166666666668</text:p>
          </table:table-cell>
          <table:table-cell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63" office:value-type="float" office:value="3150" calcext:value-type="float">
            <text:p>315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364583333333333" calcext:value-type="float">
            <text:p>0,00036458333333333300</text:p>
          </table:table-cell>
          <table:table-cell table:formula="of:=[.D52]-[.D51]" office:value-type="float" office:value="0.00000729166666666668" calcext:value-type="float">
            <text:p>0,00000729166666666668</text:p>
          </table:table-cell>
          <table:table-cell table:number-columns-repeated="1637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63" office:value-type="float" office:value="3213" calcext:value-type="float">
            <text:p>3213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371875" calcext:value-type="float">
            <text:p>0,00037187500000000000</text:p>
          </table:table-cell>
          <table:table-cell table:formula="of:=[.D53]-[.D52]" office:value-type="float" office:value="0.00000729166666666662" calcext:value-type="float">
            <text:p>0,00000729166666666662</text:p>
          </table:table-cell>
          <table:table-cell table:number-columns-repeated="1637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63" office:value-type="float" office:value="3276" calcext:value-type="float">
            <text:p>3276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379166666666667" calcext:value-type="float">
            <text:p>0,00037916666666666700</text:p>
          </table:table-cell>
          <table:table-cell table:formula="of:=[.D54]-[.D53]" office:value-type="float" office:value="0.00000729166666666668" calcext:value-type="float">
            <text:p>0,00000729166666666668</text:p>
          </table:table-cell>
          <table:table-cell table:number-columns-repeated="1637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63" office:value-type="float" office:value="3339" calcext:value-type="float">
            <text:p>3339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386458333333333" calcext:value-type="float">
            <text:p>0,00038645833333333300</text:p>
          </table:table-cell>
          <table:table-cell table:formula="of:=[.D55]-[.D54]" office:value-type="float" office:value="0.00000729166666666668" calcext:value-type="float">
            <text:p>0,00000729166666666668</text:p>
          </table:table-cell>
          <table:table-cell table:number-columns-repeated="1637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63" office:value-type="float" office:value="3402" calcext:value-type="float">
            <text:p>3402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39375" calcext:value-type="float">
            <text:p>0,00039375000000000000</text:p>
          </table:table-cell>
          <table:table-cell table:formula="of:=[.D56]-[.D55]" office:value-type="float" office:value="0.00000729166666666668" calcext:value-type="float">
            <text:p>0,00000729166666666668</text:p>
          </table:table-cell>
          <table:table-cell table:number-columns-repeated="1637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63" office:value-type="float" office:value="3465" calcext:value-type="float">
            <text:p>3465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401041666666667" calcext:value-type="float">
            <text:p>0,00040104166666666700</text:p>
          </table:table-cell>
          <table:table-cell table:formula="of:=[.D57]-[.D56]" office:value-type="float" office:value="0.00000729166666666668" calcext:value-type="float">
            <text:p>0,00000729166666666668</text:p>
          </table:table-cell>
          <table:table-cell table:number-columns-repeated="1637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63" office:value-type="float" office:value="3528" calcext:value-type="float">
            <text:p>3528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408333333333333" calcext:value-type="float">
            <text:p>0,00040833333333333300</text:p>
          </table:table-cell>
          <table:table-cell table:formula="of:=[.D58]-[.D57]" office:value-type="float" office:value="0.00000729166666666662" calcext:value-type="float">
            <text:p>0,00000729166666666662</text:p>
          </table:table-cell>
          <table:table-cell table:number-columns-repeated="1637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63" office:value-type="float" office:value="3591" calcext:value-type="float">
            <text:p>3591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415625" calcext:value-type="float">
            <text:p>0,00041562500000000000</text:p>
          </table:table-cell>
          <table:table-cell table:formula="of:=[.D59]-[.D58]" office:value-type="float" office:value="0.00000729166666666668" calcext:value-type="float">
            <text:p>0,00000729166666666668</text:p>
          </table:table-cell>
          <table:table-cell table:number-columns-repeated="1637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63" office:value-type="float" office:value="3654" calcext:value-type="float">
            <text:p>3654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422916666666667" calcext:value-type="float">
            <text:p>0,00042291666666666700</text:p>
          </table:table-cell>
          <table:table-cell table:formula="of:=[.D60]-[.D59]" office:value-type="float" office:value="0.00000729166666666668" calcext:value-type="float">
            <text:p>0,00000729166666666668</text:p>
          </table:table-cell>
          <table:table-cell table:number-columns-repeated="1637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63" office:value-type="float" office:value="3717" calcext:value-type="float">
            <text:p>3717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430208333333333" calcext:value-type="float">
            <text:p>0,00043020833333333300</text:p>
          </table:table-cell>
          <table:table-cell table:formula="of:=[.D61]-[.D60]" office:value-type="float" office:value="0.00000729166666666668" calcext:value-type="float">
            <text:p>0,00000729166666666668</text:p>
          </table:table-cell>
          <table:table-cell table:number-columns-repeated="1637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63" office:value-type="float" office:value="3780" calcext:value-type="float">
            <text:p>378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4375" calcext:value-type="float">
            <text:p>0,00043750000000000000</text:p>
          </table:table-cell>
          <table:table-cell table:formula="of:=[.D62]-[.D61]" office:value-type="float" office:value="0.00000729166666666668" calcext:value-type="float">
            <text:p>0,00000729166666666668</text:p>
          </table:table-cell>
          <table:table-cell table:number-columns-repeated="1637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63" office:value-type="float" office:value="3843" calcext:value-type="float">
            <text:p>3843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444791666666667" calcext:value-type="float">
            <text:p>0,00044479166666666700</text:p>
          </table:table-cell>
          <table:table-cell table:formula="of:=[.D63]-[.D62]" office:value-type="float" office:value="0.00000729166666666662" calcext:value-type="float">
            <text:p>0,00000729166666666662</text:p>
          </table:table-cell>
          <table:table-cell table:number-columns-repeated="1637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63" office:value-type="float" office:value="3906" calcext:value-type="float">
            <text:p>3906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452083333333333" calcext:value-type="float">
            <text:p>0,00045208333333333300</text:p>
          </table:table-cell>
          <table:table-cell table:formula="of:=[.D64]-[.D63]" office:value-type="float" office:value="0.00000729166666666668" calcext:value-type="float">
            <text:p>0,00000729166666666668</text:p>
          </table:table-cell>
          <table:table-cell table:number-columns-repeated="1637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63" office:value-type="float" office:value="3969" calcext:value-type="float">
            <text:p>3969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459375" calcext:value-type="float">
            <text:p>0,00045937500000000000</text:p>
          </table:table-cell>
          <table:table-cell table:formula="of:=[.D65]-[.D64]" office:value-type="float" office:value="0.00000729166666666668" calcext:value-type="float">
            <text:p>0,00000729166666666668</text:p>
          </table:table-cell>
          <table:table-cell table:number-columns-repeated="1637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63" office:value-type="float" office:value="4032" calcext:value-type="float">
            <text:p>4032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466666666666667" calcext:value-type="float">
            <text:p>0,00046666666666666700</text:p>
          </table:table-cell>
          <table:table-cell table:formula="of:=[.D66]-[.D65]" office:value-type="float" office:value="0.00000729166666666668" calcext:value-type="float">
            <text:p>0,00000729166666666668</text:p>
          </table:table-cell>
          <table:table-cell table:number-columns-repeated="1637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63" office:value-type="float" office:value="4095" calcext:value-type="float">
            <text:p>4095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473958333333333" calcext:value-type="float">
            <text:p>0,00047395833333333300</text:p>
          </table:table-cell>
          <table:table-cell table:formula="of:=[.D67]-[.D66]" office:value-type="float" office:value="0.00000729166666666668" calcext:value-type="float">
            <text:p>0,00000729166666666668</text:p>
          </table:table-cell>
          <table:table-cell table:number-columns-repeated="1637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63" office:value-type="float" office:value="4158" calcext:value-type="float">
            <text:p>4158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48125" calcext:value-type="float">
            <text:p>0,00048125000000000000</text:p>
          </table:table-cell>
          <table:table-cell table:formula="of:=[.D68]-[.D67]" office:value-type="float" office:value="0.00000729166666666662" calcext:value-type="float">
            <text:p>0,00000729166666666662</text:p>
          </table:table-cell>
          <table:table-cell table:number-columns-repeated="1637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63" office:value-type="float" office:value="4221" calcext:value-type="float">
            <text:p>4221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488541666666667" calcext:value-type="float">
            <text:p>0,00048854166666666700</text:p>
          </table:table-cell>
          <table:table-cell table:formula="of:=[.D69]-[.D68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63" office:value-type="float" office:value="4284" calcext:value-type="float">
            <text:p>4284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495833333333333" calcext:value-type="float">
            <text:p>0,00049583333333333300</text:p>
          </table:table-cell>
          <table:table-cell table:formula="of:=[.D70]-[.D69]" office:value-type="float" office:value="0.00000729166666666662" calcext:value-type="float">
            <text:p>0,00000729166666666662</text:p>
          </table:table-cell>
          <table:table-cell table:number-columns-repeated="1637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63" office:value-type="float" office:value="4347" calcext:value-type="float">
            <text:p>4347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503125" calcext:value-type="float">
            <text:p>0,00050312500000000000</text:p>
          </table:table-cell>
          <table:table-cell table:formula="of:=[.D71]-[.D70]" office:value-type="float" office:value="0.00000729166666666662" calcext:value-type="float">
            <text:p>0,00000729166666666662</text:p>
          </table:table-cell>
          <table:table-cell table:number-columns-repeated="1637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63" office:value-type="float" office:value="4410" calcext:value-type="float">
            <text:p>441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510416666666667" calcext:value-type="float">
            <text:p>0,00051041666666666700</text:p>
          </table:table-cell>
          <table:table-cell table:formula="of:=[.D72]-[.D71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63" office:value-type="float" office:value="4473" calcext:value-type="float">
            <text:p>4473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517708333333333" calcext:value-type="float">
            <text:p>0,00051770833333333300</text:p>
          </table:table-cell>
          <table:table-cell table:formula="of:=[.D73]-[.D72]" office:value-type="float" office:value="0.00000729166666666662" calcext:value-type="float">
            <text:p>0,00000729166666666662</text:p>
          </table:table-cell>
          <table:table-cell table:number-columns-repeated="1637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63" office:value-type="float" office:value="4536" calcext:value-type="float">
            <text:p>4536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525" calcext:value-type="float">
            <text:p>0,00052500000000000000</text:p>
          </table:table-cell>
          <table:table-cell table:formula="of:=[.D74]-[.D73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63" office:value-type="float" office:value="4599" calcext:value-type="float">
            <text:p>4599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532291666666667" calcext:value-type="float">
            <text:p>0,00053229166666666700</text:p>
          </table:table-cell>
          <table:table-cell table:formula="of:=[.D75]-[.D74]" office:value-type="float" office:value="0.00000729166666666662" calcext:value-type="float">
            <text:p>0,00000729166666666662</text:p>
          </table:table-cell>
          <table:table-cell table:number-columns-repeated="1637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63" office:value-type="float" office:value="4662" calcext:value-type="float">
            <text:p>4662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539583333333333" calcext:value-type="float">
            <text:p>0,00053958333333333300</text:p>
          </table:table-cell>
          <table:table-cell table:formula="of:=[.D76]-[.D75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63" office:value-type="float" office:value="4725" calcext:value-type="float">
            <text:p>4725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546875" calcext:value-type="float">
            <text:p>0,00054687500000000000</text:p>
          </table:table-cell>
          <table:table-cell table:formula="of:=[.D77]-[.D76]" office:value-type="float" office:value="0.00000729166666666662" calcext:value-type="float">
            <text:p>0,00000729166666666662</text:p>
          </table:table-cell>
          <table:table-cell table:number-columns-repeated="1637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63" office:value-type="float" office:value="4788" calcext:value-type="float">
            <text:p>4788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554166666666667" calcext:value-type="float">
            <text:p>0,00055416666666666700</text:p>
          </table:table-cell>
          <table:table-cell table:formula="of:=[.D78]-[.D77]" office:value-type="float" office:value="0.00000729166666666662" calcext:value-type="float">
            <text:p>0,00000729166666666662</text:p>
          </table:table-cell>
          <table:table-cell table:number-columns-repeated="1637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63" office:value-type="float" office:value="4851" calcext:value-type="float">
            <text:p>4851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561458333333333" calcext:value-type="float">
            <text:p>0,00056145833333333300</text:p>
          </table:table-cell>
          <table:table-cell table:formula="of:=[.D79]-[.D78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63" office:value-type="float" office:value="4914" calcext:value-type="float">
            <text:p>4914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56875" calcext:value-type="float">
            <text:p>0,00056875000000000000</text:p>
          </table:table-cell>
          <table:table-cell table:formula="of:=[.D80]-[.D79]" office:value-type="float" office:value="0.00000729166666666662" calcext:value-type="float">
            <text:p>0,00000729166666666662</text:p>
          </table:table-cell>
          <table:table-cell table:number-columns-repeated="1637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63" office:value-type="float" office:value="4977" calcext:value-type="float">
            <text:p>4977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576041666666667" calcext:value-type="float">
            <text:p>0,00057604166666666700</text:p>
          </table:table-cell>
          <table:table-cell table:formula="of:=[.D81]-[.D80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63" office:value-type="float" office:value="5040" calcext:value-type="float">
            <text:p>504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583333333333333" calcext:value-type="float">
            <text:p>0,00058333333333333300</text:p>
          </table:table-cell>
          <table:table-cell table:formula="of:=[.D82]-[.D81]" office:value-type="float" office:value="0.00000729166666666662" calcext:value-type="float">
            <text:p>0,00000729166666666662</text:p>
          </table:table-cell>
          <table:table-cell table:number-columns-repeated="1637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63" office:value-type="float" office:value="5103" calcext:value-type="float">
            <text:p>5103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590625" calcext:value-type="float">
            <text:p>0,00059062500000000000</text:p>
          </table:table-cell>
          <table:table-cell table:formula="of:=[.D83]-[.D82]" office:value-type="float" office:value="0.00000729166666666662" calcext:value-type="float">
            <text:p>0,00000729166666666662</text:p>
          </table:table-cell>
          <table:table-cell table:number-columns-repeated="1637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63" office:value-type="float" office:value="5166" calcext:value-type="float">
            <text:p>5166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597916666666667" calcext:value-type="float">
            <text:p>0,00059791666666666700</text:p>
          </table:table-cell>
          <table:table-cell table:formula="of:=[.D84]-[.D83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63" office:value-type="float" office:value="5229" calcext:value-type="float">
            <text:p>5229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605208333333333" calcext:value-type="float">
            <text:p>0,00060520833333333300</text:p>
          </table:table-cell>
          <table:table-cell table:formula="of:=[.D85]-[.D84]" office:value-type="float" office:value="0.00000729166666666662" calcext:value-type="float">
            <text:p>0,00000729166666666662</text:p>
          </table:table-cell>
          <table:table-cell table:number-columns-repeated="1637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63" office:value-type="float" office:value="5292" calcext:value-type="float">
            <text:p>5292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6125" calcext:value-type="float">
            <text:p>0,00061250000000000000</text:p>
          </table:table-cell>
          <table:table-cell table:formula="of:=[.D86]-[.D85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63" office:value-type="float" office:value="5355" calcext:value-type="float">
            <text:p>5355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619791666666667" calcext:value-type="float">
            <text:p>0,00061979166666666700</text:p>
          </table:table-cell>
          <table:table-cell table:formula="of:=[.D87]-[.D86]" office:value-type="float" office:value="0.00000729166666666662" calcext:value-type="float">
            <text:p>0,00000729166666666662</text:p>
          </table:table-cell>
          <table:table-cell table:number-columns-repeated="1637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63" office:value-type="float" office:value="5418" calcext:value-type="float">
            <text:p>5418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627083333333333" calcext:value-type="float">
            <text:p>0,00062708333333333300</text:p>
          </table:table-cell>
          <table:table-cell table:formula="of:=[.D88]-[.D87]" office:value-type="float" office:value="0.00000729166666666662" calcext:value-type="float">
            <text:p>0,00000729166666666662</text:p>
          </table:table-cell>
          <table:table-cell table:number-columns-repeated="1637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63" office:value-type="float" office:value="5481" calcext:value-type="float">
            <text:p>5481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634375" calcext:value-type="float">
            <text:p>0,00063437500000000000</text:p>
          </table:table-cell>
          <table:table-cell table:formula="of:=[.D89]-[.D88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63" office:value-type="float" office:value="5544" calcext:value-type="float">
            <text:p>5544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641666666666667" calcext:value-type="float">
            <text:p>0,00064166666666666700</text:p>
          </table:table-cell>
          <table:table-cell table:formula="of:=[.D90]-[.D89]" office:value-type="float" office:value="0.00000729166666666662" calcext:value-type="float">
            <text:p>0,00000729166666666662</text:p>
          </table:table-cell>
          <table:table-cell table:number-columns-repeated="16379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63" office:value-type="float" office:value="5607" calcext:value-type="float">
            <text:p>5607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648958333333333" calcext:value-type="float">
            <text:p>0,00064895833333333300</text:p>
          </table:table-cell>
          <table:table-cell table:formula="of:=[.D91]-[.D90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63" office:value-type="float" office:value="5670" calcext:value-type="float">
            <text:p>567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65625" calcext:value-type="float">
            <text:p>0,00065625000000000000</text:p>
          </table:table-cell>
          <table:table-cell table:formula="of:=[.D92]-[.D91]" office:value-type="float" office:value="0.00000729166666666662" calcext:value-type="float">
            <text:p>0,00000729166666666662</text:p>
          </table:table-cell>
          <table:table-cell table:number-columns-repeated="16379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63" office:value-type="float" office:value="5733" calcext:value-type="float">
            <text:p>5733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663541666666667" calcext:value-type="float">
            <text:p>0,00066354166666666700</text:p>
          </table:table-cell>
          <table:table-cell table:formula="of:=[.D93]-[.D92]" office:value-type="float" office:value="0.00000729166666666662" calcext:value-type="float">
            <text:p>0,00000729166666666662</text:p>
          </table:table-cell>
          <table:table-cell table:number-columns-repeated="1637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63" office:value-type="float" office:value="5796" calcext:value-type="float">
            <text:p>5796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670833333333333" calcext:value-type="float">
            <text:p>0,00067083333333333300</text:p>
          </table:table-cell>
          <table:table-cell table:formula="of:=[.D94]-[.D93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63" office:value-type="float" office:value="5859" calcext:value-type="float">
            <text:p>5859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678125" calcext:value-type="float">
            <text:p>0,00067812500000000000</text:p>
          </table:table-cell>
          <table:table-cell table:formula="of:=[.D95]-[.D94]" office:value-type="float" office:value="0.00000729166666666662" calcext:value-type="float">
            <text:p>0,00000729166666666662</text:p>
          </table:table-cell>
          <table:table-cell table:number-columns-repeated="16379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63" office:value-type="float" office:value="5922" calcext:value-type="float">
            <text:p>5922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685416666666667" calcext:value-type="float">
            <text:p>0,00068541666666666700</text:p>
          </table:table-cell>
          <table:table-cell table:formula="of:=[.D96]-[.D95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63" office:value-type="float" office:value="5985" calcext:value-type="float">
            <text:p>5985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692708333333333" calcext:value-type="float">
            <text:p>0,00069270833333333300</text:p>
          </table:table-cell>
          <table:table-cell table:formula="of:=[.D97]-[.D96]" office:value-type="float" office:value="0.00000729166666666662" calcext:value-type="float">
            <text:p>0,00000729166666666662</text:p>
          </table:table-cell>
          <table:table-cell table:number-columns-repeated="16379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63" office:value-type="float" office:value="6048" calcext:value-type="float">
            <text:p>6048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7" calcext:value-type="float">
            <text:p>0,00070000000000000000</text:p>
          </table:table-cell>
          <table:table-cell table:formula="of:=[.D98]-[.D97]" office:value-type="float" office:value="0.00000729166666666662" calcext:value-type="float">
            <text:p>0,00000729166666666662</text:p>
          </table:table-cell>
          <table:table-cell table:number-columns-repeated="16379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63" office:value-type="float" office:value="6111" calcext:value-type="float">
            <text:p>6111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707291666666667" calcext:value-type="float">
            <text:p>0,00070729166666666700</text:p>
          </table:table-cell>
          <table:table-cell table:formula="of:=[.D99]-[.D98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63" office:value-type="float" office:value="6174" calcext:value-type="float">
            <text:p>6174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714583333333333" calcext:value-type="float">
            <text:p>0,00071458333333333300</text:p>
          </table:table-cell>
          <table:table-cell table:formula="of:=[.D100]-[.D99]" office:value-type="float" office:value="0.00000729166666666662" calcext:value-type="float">
            <text:p>0,00000729166666666662</text:p>
          </table:table-cell>
          <table:table-cell table:number-columns-repeated="16379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63" office:value-type="float" office:value="6237" calcext:value-type="float">
            <text:p>6237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721875" calcext:value-type="float">
            <text:p>0,00072187500000000000</text:p>
          </table:table-cell>
          <table:table-cell table:formula="of:=[.D101]-[.D100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63" office:value-type="float" office:value="6300" calcext:value-type="float">
            <text:p>63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729166666666667" calcext:value-type="float">
            <text:p>0,00072916666666666700</text:p>
          </table:table-cell>
          <table:table-cell table:formula="of:=[.D102]-[.D101]" office:value-type="float" office:value="0.00000729166666666662" calcext:value-type="float">
            <text:p>0,00000729166666666662</text:p>
          </table:table-cell>
          <table:table-cell table:number-columns-repeated="16379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63" office:value-type="float" office:value="6363" calcext:value-type="float">
            <text:p>6363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736458333333333" calcext:value-type="float">
            <text:p>0,00073645833333333300</text:p>
          </table:table-cell>
          <table:table-cell table:formula="of:=[.D103]-[.D102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63" office:value-type="float" office:value="6426" calcext:value-type="float">
            <text:p>6426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74375" calcext:value-type="float">
            <text:p>0,00074375000000000000</text:p>
          </table:table-cell>
          <table:table-cell table:formula="of:=[.D104]-[.D103]" office:value-type="float" office:value="0.00000729166666666662" calcext:value-type="float">
            <text:p>0,00000729166666666662</text:p>
          </table:table-cell>
          <table:table-cell table:number-columns-repeated="16379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63" office:value-type="float" office:value="6489" calcext:value-type="float">
            <text:p>6489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751041666666667" calcext:value-type="float">
            <text:p>0,00075104166666666700</text:p>
          </table:table-cell>
          <table:table-cell table:formula="of:=[.D105]-[.D104]" office:value-type="float" office:value="0.00000729166666666662" calcext:value-type="float">
            <text:p>0,00000729166666666662</text:p>
          </table:table-cell>
          <table:table-cell table:number-columns-repeated="16379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63" office:value-type="float" office:value="6552" calcext:value-type="float">
            <text:p>6552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758333333333333" calcext:value-type="float">
            <text:p>0,00075833333333333300</text:p>
          </table:table-cell>
          <table:table-cell table:formula="of:=[.D106]-[.D105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63" office:value-type="float" office:value="6615" calcext:value-type="float">
            <text:p>6615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765625" calcext:value-type="float">
            <text:p>0,00076562500000000000</text:p>
          </table:table-cell>
          <table:table-cell table:formula="of:=[.D107]-[.D106]" office:value-type="float" office:value="0.00000729166666666662" calcext:value-type="float">
            <text:p>0,00000729166666666662</text:p>
          </table:table-cell>
          <table:table-cell table:number-columns-repeated="16379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63" office:value-type="float" office:value="6678" calcext:value-type="float">
            <text:p>6678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772916666666667" calcext:value-type="float">
            <text:p>0,00077291666666666700</text:p>
          </table:table-cell>
          <table:table-cell table:formula="of:=[.D108]-[.D107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63" office:value-type="float" office:value="6741" calcext:value-type="float">
            <text:p>6741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780208333333333" calcext:value-type="float">
            <text:p>0,00078020833333333400</text:p>
          </table:table-cell>
          <table:table-cell table:formula="of:=[.D109]-[.D108]" office:value-type="float" office:value="0.00000729166666666662" calcext:value-type="float">
            <text:p>0,00000729166666666662</text:p>
          </table:table-cell>
          <table:table-cell table:number-columns-repeated="16379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63" office:value-type="float" office:value="6804" calcext:value-type="float">
            <text:p>6804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7875" calcext:value-type="float">
            <text:p>0,00078750000000000000</text:p>
          </table:table-cell>
          <table:table-cell table:formula="of:=[.D110]-[.D109]" office:value-type="float" office:value="0.00000729166666666662" calcext:value-type="float">
            <text:p>0,00000729166666666662</text:p>
          </table:table-cell>
          <table:table-cell table:number-columns-repeated="16379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63" office:value-type="float" office:value="6867" calcext:value-type="float">
            <text:p>6867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794791666666667" calcext:value-type="float">
            <text:p>0,00079479166666666700</text:p>
          </table:table-cell>
          <table:table-cell table:formula="of:=[.D111]-[.D110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63" office:value-type="float" office:value="6930" calcext:value-type="float">
            <text:p>693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802083333333333" calcext:value-type="float">
            <text:p>0,00080208333333333300</text:p>
          </table:table-cell>
          <table:table-cell table:formula="of:=[.D112]-[.D111]" office:value-type="float" office:value="0.00000729166666666662" calcext:value-type="float">
            <text:p>0,00000729166666666662</text:p>
          </table:table-cell>
          <table:table-cell table:number-columns-repeated="16379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63" office:value-type="float" office:value="6993" calcext:value-type="float">
            <text:p>6993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809375" calcext:value-type="float">
            <text:p>0,00080937500000000000</text:p>
          </table:table-cell>
          <table:table-cell table:formula="of:=[.D113]-[.D112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63" office:value-type="float" office:value="7056" calcext:value-type="float">
            <text:p>7056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816666666666667" calcext:value-type="float">
            <text:p>0,00081666666666666700</text:p>
          </table:table-cell>
          <table:table-cell table:formula="of:=[.D114]-[.D113]" office:value-type="float" office:value="0.00000729166666666662" calcext:value-type="float">
            <text:p>0,00000729166666666662</text:p>
          </table:table-cell>
          <table:table-cell table:number-columns-repeated="16379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63" office:value-type="float" office:value="7119" calcext:value-type="float">
            <text:p>7119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823958333333333" calcext:value-type="float">
            <text:p>0,00082395833333333300</text:p>
          </table:table-cell>
          <table:table-cell table:formula="of:=[.D115]-[.D114]" office:value-type="float" office:value="0.00000729166666666662" calcext:value-type="float">
            <text:p>0,00000729166666666662</text:p>
          </table:table-cell>
          <table:table-cell table:number-columns-repeated="16379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63" office:value-type="float" office:value="7182" calcext:value-type="float">
            <text:p>7182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83125" calcext:value-type="float">
            <text:p>0,00083125000000000000</text:p>
          </table:table-cell>
          <table:table-cell table:formula="of:=[.D116]-[.D115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63" office:value-type="float" office:value="7245" calcext:value-type="float">
            <text:p>7245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838541666666667" calcext:value-type="float">
            <text:p>0,00083854166666666700</text:p>
          </table:table-cell>
          <table:table-cell table:formula="of:=[.D117]-[.D116]" office:value-type="float" office:value="0.00000729166666666662" calcext:value-type="float">
            <text:p>0,00000729166666666662</text:p>
          </table:table-cell>
          <table:table-cell table:number-columns-repeated="16379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63" office:value-type="float" office:value="7308" calcext:value-type="float">
            <text:p>7308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845833333333333" calcext:value-type="float">
            <text:p>0,00084583333333333300</text:p>
          </table:table-cell>
          <table:table-cell table:formula="of:=[.D118]-[.D117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63" office:value-type="float" office:value="7371" calcext:value-type="float">
            <text:p>7371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853125" calcext:value-type="float">
            <text:p>0,00085312500000000000</text:p>
          </table:table-cell>
          <table:table-cell table:formula="of:=[.D119]-[.D118]" office:value-type="float" office:value="0.00000729166666666662" calcext:value-type="float">
            <text:p>0,00000729166666666662</text:p>
          </table:table-cell>
          <table:table-cell table:number-columns-repeated="16379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63" office:value-type="float" office:value="7434" calcext:value-type="float">
            <text:p>7434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860416666666667" calcext:value-type="float">
            <text:p>0,00086041666666666700</text:p>
          </table:table-cell>
          <table:table-cell table:formula="of:=[.D120]-[.D119]" office:value-type="float" office:value="0.00000729166666666662" calcext:value-type="float">
            <text:p>0,00000729166666666662</text:p>
          </table:table-cell>
          <table:table-cell table:number-columns-repeated="16379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63" office:value-type="float" office:value="7497" calcext:value-type="float">
            <text:p>7497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867708333333333" calcext:value-type="float">
            <text:p>0,00086770833333333300</text:p>
          </table:table-cell>
          <table:table-cell table:formula="of:=[.D121]-[.D120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63" office:value-type="float" office:value="7560" calcext:value-type="float">
            <text:p>756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875" calcext:value-type="float">
            <text:p>0,00087500000000000000</text:p>
          </table:table-cell>
          <table:table-cell table:formula="of:=[.D122]-[.D121]" office:value-type="float" office:value="0.00000729166666666662" calcext:value-type="float">
            <text:p>0,00000729166666666662</text:p>
          </table:table-cell>
          <table:table-cell table:number-columns-repeated="16379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63" office:value-type="float" office:value="7623" calcext:value-type="float">
            <text:p>7623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882291666666667" calcext:value-type="float">
            <text:p>0,00088229166666666700</text:p>
          </table:table-cell>
          <table:table-cell table:formula="of:=[.D123]-[.D122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63" office:value-type="float" office:value="7686" calcext:value-type="float">
            <text:p>7686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889583333333333" calcext:value-type="float">
            <text:p>0,00088958333333333400</text:p>
          </table:table-cell>
          <table:table-cell table:formula="of:=[.D124]-[.D123]" office:value-type="float" office:value="0.00000729166666666662" calcext:value-type="float">
            <text:p>0,00000729166666666662</text:p>
          </table:table-cell>
          <table:table-cell table:number-columns-repeated="16379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63" office:value-type="float" office:value="7749" calcext:value-type="float">
            <text:p>7749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896875" calcext:value-type="float">
            <text:p>0,00089687500000000000</text:p>
          </table:table-cell>
          <table:table-cell table:formula="of:=[.D125]-[.D124]" office:value-type="float" office:value="0.00000729166666666662" calcext:value-type="float">
            <text:p>0,00000729166666666662</text:p>
          </table:table-cell>
          <table:table-cell table:number-columns-repeated="16379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63" office:value-type="float" office:value="7812" calcext:value-type="float">
            <text:p>7812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904166666666667" calcext:value-type="float">
            <text:p>0,00090416666666666700</text:p>
          </table:table-cell>
          <table:table-cell table:formula="of:=[.D126]-[.D125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63" office:value-type="float" office:value="7875" calcext:value-type="float">
            <text:p>7875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911458333333333" calcext:value-type="float">
            <text:p>0,00091145833333333300</text:p>
          </table:table-cell>
          <table:table-cell table:formula="of:=[.D127]-[.D126]" office:value-type="float" office:value="0.00000729166666666662" calcext:value-type="float">
            <text:p>0,00000729166666666662</text:p>
          </table:table-cell>
          <table:table-cell table:number-columns-repeated="16379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63" office:value-type="float" office:value="7938" calcext:value-type="float">
            <text:p>7938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91875" calcext:value-type="float">
            <text:p>0,00091875000000000000</text:p>
          </table:table-cell>
          <table:table-cell table:formula="of:=[.D128]-[.D127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63" office:value-type="float" office:value="8001" calcext:value-type="float">
            <text:p>8001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926041666666667" calcext:value-type="float">
            <text:p>0,00092604166666666700</text:p>
          </table:table-cell>
          <table:table-cell table:formula="of:=[.D129]-[.D128]" office:value-type="float" office:value="0.00000729166666666662" calcext:value-type="float">
            <text:p>0,00000729166666666662</text:p>
          </table:table-cell>
          <table:table-cell table:number-columns-repeated="16379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63" office:value-type="float" office:value="8064" calcext:value-type="float">
            <text:p>8064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933333333333333" calcext:value-type="float">
            <text:p>0,00093333333333333300</text:p>
          </table:table-cell>
          <table:table-cell table:formula="of:=[.D130]-[.D129]" office:value-type="float" office:value="0.00000729166666666662" calcext:value-type="float">
            <text:p>0,00000729166666666662</text:p>
          </table:table-cell>
          <table:table-cell table:number-columns-repeated="16379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63" office:value-type="float" office:value="8127" calcext:value-type="float">
            <text:p>8127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940625" calcext:value-type="float">
            <text:p>0,00094062500000000000</text:p>
          </table:table-cell>
          <table:table-cell table:formula="of:=[.D131]-[.D130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63" office:value-type="float" office:value="8190" calcext:value-type="float">
            <text:p>819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947916666666667" calcext:value-type="float">
            <text:p>0,00094791666666666700</text:p>
          </table:table-cell>
          <table:table-cell table:formula="of:=[.D132]-[.D131]" office:value-type="float" office:value="0.00000729166666666662" calcext:value-type="float">
            <text:p>0,00000729166666666662</text:p>
          </table:table-cell>
          <table:table-cell table:number-columns-repeated="16379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63" office:value-type="float" office:value="8253" calcext:value-type="float">
            <text:p>8253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0955208333333333" calcext:value-type="float">
            <text:p>0,00095520833333333300</text:p>
          </table:table-cell>
          <table:table-cell table:formula="of:=[.D133]-[.D132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63" office:value-type="float" office:value="8316" calcext:value-type="float">
            <text:p>8316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09625" calcext:value-type="float">
            <text:p>0,00096250000000000000</text:p>
          </table:table-cell>
          <table:table-cell table:formula="of:=[.D134]-[.D133]" office:value-type="float" office:value="0.00000729166666666662" calcext:value-type="float">
            <text:p>0,00000729166666666662</text:p>
          </table:table-cell>
          <table:table-cell table:number-columns-repeated="16379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63" office:value-type="float" office:value="8379" calcext:value-type="float">
            <text:p>8379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0969791666666667" calcext:value-type="float">
            <text:p>0,00096979166666666700</text:p>
          </table:table-cell>
          <table:table-cell table:formula="of:=[.D135]-[.D134]" office:value-type="float" office:value="0.00000729166666666662" calcext:value-type="float">
            <text:p>0,00000729166666666662</text:p>
          </table:table-cell>
          <table:table-cell table:number-columns-repeated="16379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63" office:value-type="float" office:value="8442" calcext:value-type="float">
            <text:p>8442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0977083333333333" calcext:value-type="float">
            <text:p>0,00097708333333333300</text:p>
          </table:table-cell>
          <table:table-cell table:formula="of:=[.D136]-[.D135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63" office:value-type="float" office:value="8505" calcext:value-type="float">
            <text:p>8505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0984375" calcext:value-type="float">
            <text:p>0,00098437500000000000</text:p>
          </table:table-cell>
          <table:table-cell table:formula="of:=[.D137]-[.D136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63" office:value-type="float" office:value="8568" calcext:value-type="float">
            <text:p>8568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0991666666666667" calcext:value-type="float">
            <text:p>0,00099166666666666700</text:p>
          </table:table-cell>
          <table:table-cell table:formula="of:=[.D138]-[.D137]" office:value-type="float" office:value="0.00000729166666666651" calcext:value-type="float">
            <text:p>0,00000729166666666651</text:p>
          </table:table-cell>
          <table:table-cell table:number-columns-repeated="16379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63" office:value-type="float" office:value="8631" calcext:value-type="float">
            <text:p>8631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0998958333333333" calcext:value-type="float">
            <text:p>0,00099895833333333300</text:p>
          </table:table-cell>
          <table:table-cell table:formula="of:=[.D139]-[.D138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63" office:value-type="float" office:value="8694" calcext:value-type="float">
            <text:p>8694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100625" calcext:value-type="float">
            <text:p>0,00100625000000000000</text:p>
          </table:table-cell>
          <table:table-cell table:formula="of:=[.D140]-[.D139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63" office:value-type="float" office:value="8757" calcext:value-type="float">
            <text:p>8757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101354166666667" calcext:value-type="float">
            <text:p>0,00101354166666667000</text:p>
          </table:table-cell>
          <table:table-cell table:formula="of:=[.D141]-[.D140]" office:value-type="float" office:value="0.00000729166666666651" calcext:value-type="float">
            <text:p>0,00000729166666666651</text:p>
          </table:table-cell>
          <table:table-cell table:number-columns-repeated="16379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63" office:value-type="float" office:value="8820" calcext:value-type="float">
            <text:p>882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102083333333333" calcext:value-type="float">
            <text:p>0,00102083333333333000</text:p>
          </table:table-cell>
          <table:table-cell table:formula="of:=[.D142]-[.D141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63" office:value-type="float" office:value="8883" calcext:value-type="float">
            <text:p>8883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1028125" calcext:value-type="float">
            <text:p>0,00102812500000000000</text:p>
          </table:table-cell>
          <table:table-cell table:formula="of:=[.D143]-[.D142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63" office:value-type="float" office:value="8946" calcext:value-type="float">
            <text:p>8946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103541666666667" calcext:value-type="float">
            <text:p>0,00103541666666667000</text:p>
          </table:table-cell>
          <table:table-cell table:formula="of:=[.D144]-[.D143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63" office:value-type="float" office:value="9009" calcext:value-type="float">
            <text:p>9009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104270833333333" calcext:value-type="float">
            <text:p>0,00104270833333333000</text:p>
          </table:table-cell>
          <table:table-cell table:formula="of:=[.D145]-[.D144]" office:value-type="float" office:value="0.00000729166666666651" calcext:value-type="float">
            <text:p>0,00000729166666666651</text:p>
          </table:table-cell>
          <table:table-cell table:number-columns-repeated="16379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63" office:value-type="float" office:value="9072" calcext:value-type="float">
            <text:p>9072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105" calcext:value-type="float">
            <text:p>0,00105000000000000000</text:p>
          </table:table-cell>
          <table:table-cell table:formula="of:=[.D146]-[.D145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63" office:value-type="float" office:value="9135" calcext:value-type="float">
            <text:p>9135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105729166666667" calcext:value-type="float">
            <text:p>0,00105729166666667000</text:p>
          </table:table-cell>
          <table:table-cell table:formula="of:=[.D147]-[.D146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63" office:value-type="float" office:value="9198" calcext:value-type="float">
            <text:p>9198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106458333333333" calcext:value-type="float">
            <text:p>0,00106458333333333000</text:p>
          </table:table-cell>
          <table:table-cell table:formula="of:=[.D148]-[.D147]" office:value-type="float" office:value="0.00000729166666666651" calcext:value-type="float">
            <text:p>0,00000729166666666651</text:p>
          </table:table-cell>
          <table:table-cell table:number-columns-repeated="16379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63" office:value-type="float" office:value="9261" calcext:value-type="float">
            <text:p>9261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1071875" calcext:value-type="float">
            <text:p>0,00107187500000000000</text:p>
          </table:table-cell>
          <table:table-cell table:formula="of:=[.D149]-[.D148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63" office:value-type="float" office:value="9324" calcext:value-type="float">
            <text:p>9324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107916666666667" calcext:value-type="float">
            <text:p>0,00107916666666667000</text:p>
          </table:table-cell>
          <table:table-cell table:formula="of:=[.D150]-[.D149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63" office:value-type="float" office:value="9387" calcext:value-type="float">
            <text:p>9387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108645833333333" calcext:value-type="float">
            <text:p>0,00108645833333333000</text:p>
          </table:table-cell>
          <table:table-cell table:formula="of:=[.D151]-[.D150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63" office:value-type="float" office:value="9450" calcext:value-type="float">
            <text:p>945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109375" calcext:value-type="float">
            <text:p>0,00109375000000000000</text:p>
          </table:table-cell>
          <table:table-cell table:formula="of:=[.D152]-[.D151]" office:value-type="float" office:value="0.00000729166666666651" calcext:value-type="float">
            <text:p>0,00000729166666666651</text:p>
          </table:table-cell>
          <table:table-cell table:number-columns-repeated="16379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63" office:value-type="float" office:value="9513" calcext:value-type="float">
            <text:p>9513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110104166666667" calcext:value-type="float">
            <text:p>0,00110104166666667000</text:p>
          </table:table-cell>
          <table:table-cell table:formula="of:=[.D153]-[.D152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63" office:value-type="float" office:value="9576" calcext:value-type="float">
            <text:p>9576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110833333333333" calcext:value-type="float">
            <text:p>0,00110833333333333000</text:p>
          </table:table-cell>
          <table:table-cell table:formula="of:=[.D154]-[.D153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63" office:value-type="float" office:value="9639" calcext:value-type="float">
            <text:p>9639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1115625" calcext:value-type="float">
            <text:p>0,00111562500000000000</text:p>
          </table:table-cell>
          <table:table-cell table:formula="of:=[.D155]-[.D154]" office:value-type="float" office:value="0.00000729166666666651" calcext:value-type="float">
            <text:p>0,00000729166666666651</text:p>
          </table:table-cell>
          <table:table-cell table:number-columns-repeated="16379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63" office:value-type="float" office:value="9702" calcext:value-type="float">
            <text:p>9702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112291666666667" calcext:value-type="float">
            <text:p>0,00112291666666667000</text:p>
          </table:table-cell>
          <table:table-cell table:formula="of:=[.D156]-[.D155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63" office:value-type="float" office:value="9765" calcext:value-type="float">
            <text:p>9765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113020833333333" calcext:value-type="float">
            <text:p>0,00113020833333333000</text:p>
          </table:table-cell>
          <table:table-cell table:formula="of:=[.D157]-[.D156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63" office:value-type="float" office:value="9828" calcext:value-type="float">
            <text:p>9828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11375" calcext:value-type="float">
            <text:p>0,00113750000000000000</text:p>
          </table:table-cell>
          <table:table-cell table:formula="of:=[.D158]-[.D157]" office:value-type="float" office:value="0.00000729166666666651" calcext:value-type="float">
            <text:p>0,00000729166666666651</text:p>
          </table:table-cell>
          <table:table-cell table:number-columns-repeated="16379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63" office:value-type="float" office:value="9891" calcext:value-type="float">
            <text:p>9891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114479166666667" calcext:value-type="float">
            <text:p>0,00114479166666667000</text:p>
          </table:table-cell>
          <table:table-cell table:formula="of:=[.D159]-[.D158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63" office:value-type="float" office:value="9954" calcext:value-type="float">
            <text:p>9954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115208333333333" calcext:value-type="float">
            <text:p>0,00115208333333333000</text:p>
          </table:table-cell>
          <table:table-cell table:formula="of:=[.D160]-[.D159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63" office:value-type="float" office:value="10017" calcext:value-type="float">
            <text:p>10017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1159375" calcext:value-type="float">
            <text:p>0,00115937500000000000</text:p>
          </table:table-cell>
          <table:table-cell table:formula="of:=[.D161]-[.D160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63" office:value-type="float" office:value="10080" calcext:value-type="float">
            <text:p>1008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116666666666667" calcext:value-type="float">
            <text:p>0,00116666666666667000</text:p>
          </table:table-cell>
          <table:table-cell table:formula="of:=[.D162]-[.D161]" office:value-type="float" office:value="0.00000729166666666651" calcext:value-type="float">
            <text:p>0,00000729166666666651</text:p>
          </table:table-cell>
          <table:table-cell table:number-columns-repeated="16379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63" office:value-type="float" office:value="10143" calcext:value-type="float">
            <text:p>10143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117395833333333" calcext:value-type="float">
            <text:p>0,00117395833333333000</text:p>
          </table:table-cell>
          <table:table-cell table:formula="of:=[.D163]-[.D162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63" office:value-type="float" office:value="10206" calcext:value-type="float">
            <text:p>10206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118125" calcext:value-type="float">
            <text:p>0,00118125000000000000</text:p>
          </table:table-cell>
          <table:table-cell table:formula="of:=[.D164]-[.D163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63" office:value-type="float" office:value="10269" calcext:value-type="float">
            <text:p>10269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118854166666667" calcext:value-type="float">
            <text:p>0,00118854166666667000</text:p>
          </table:table-cell>
          <table:table-cell table:formula="of:=[.D165]-[.D164]" office:value-type="float" office:value="0.00000729166666666651" calcext:value-type="float">
            <text:p>0,00000729166666666651</text:p>
          </table:table-cell>
          <table:table-cell table:number-columns-repeated="16379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63" office:value-type="float" office:value="10332" calcext:value-type="float">
            <text:p>10332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119583333333333" calcext:value-type="float">
            <text:p>0,00119583333333333000</text:p>
          </table:table-cell>
          <table:table-cell table:formula="of:=[.D166]-[.D165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63" office:value-type="float" office:value="10395" calcext:value-type="float">
            <text:p>10395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1203125" calcext:value-type="float">
            <text:p>0,00120312500000000000</text:p>
          </table:table-cell>
          <table:table-cell table:formula="of:=[.D167]-[.D166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63" office:value-type="float" office:value="10458" calcext:value-type="float">
            <text:p>10458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121041666666667" calcext:value-type="float">
            <text:p>0,00121041666666667000</text:p>
          </table:table-cell>
          <table:table-cell table:formula="of:=[.D168]-[.D167]" office:value-type="float" office:value="0.00000729166666666651" calcext:value-type="float">
            <text:p>0,00000729166666666651</text:p>
          </table:table-cell>
          <table:table-cell table:number-columns-repeated="16379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63" office:value-type="float" office:value="10521" calcext:value-type="float">
            <text:p>10521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121770833333333" calcext:value-type="float">
            <text:p>0,00121770833333333000</text:p>
          </table:table-cell>
          <table:table-cell table:formula="of:=[.D169]-[.D168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63" office:value-type="float" office:value="10584" calcext:value-type="float">
            <text:p>10584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1225" calcext:value-type="float">
            <text:p>0,00122500000000000000</text:p>
          </table:table-cell>
          <table:table-cell table:formula="of:=[.D170]-[.D169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63" office:value-type="float" office:value="10647" calcext:value-type="float">
            <text:p>10647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123229166666667" calcext:value-type="float">
            <text:p>0,00123229166666667000</text:p>
          </table:table-cell>
          <table:table-cell table:formula="of:=[.D171]-[.D170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63" office:value-type="float" office:value="10710" calcext:value-type="float">
            <text:p>1071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123958333333333" calcext:value-type="float">
            <text:p>0,00123958333333333000</text:p>
          </table:table-cell>
          <table:table-cell table:formula="of:=[.D172]-[.D171]" office:value-type="float" office:value="0.00000729166666666651" calcext:value-type="float">
            <text:p>0,00000729166666666651</text:p>
          </table:table-cell>
          <table:table-cell table:number-columns-repeated="16379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63" office:value-type="float" office:value="10773" calcext:value-type="float">
            <text:p>10773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1246875" calcext:value-type="float">
            <text:p>0,00124687500000000000</text:p>
          </table:table-cell>
          <table:table-cell table:formula="of:=[.D173]-[.D172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63" office:value-type="float" office:value="10836" calcext:value-type="float">
            <text:p>10836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125416666666667" calcext:value-type="float">
            <text:p>0,00125416666666667000</text:p>
          </table:table-cell>
          <table:table-cell table:formula="of:=[.D174]-[.D173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63" office:value-type="float" office:value="10899" calcext:value-type="float">
            <text:p>10899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126145833333333" calcext:value-type="float">
            <text:p>0,00126145833333333000</text:p>
          </table:table-cell>
          <table:table-cell table:formula="of:=[.D175]-[.D174]" office:value-type="float" office:value="0.00000729166666666651" calcext:value-type="float">
            <text:p>0,00000729166666666651</text:p>
          </table:table-cell>
          <table:table-cell table:number-columns-repeated="16379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63" office:value-type="float" office:value="10962" calcext:value-type="float">
            <text:p>10962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126875" calcext:value-type="float">
            <text:p>0,00126875000000000000</text:p>
          </table:table-cell>
          <table:table-cell table:formula="of:=[.D176]-[.D175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63" office:value-type="float" office:value="11025" calcext:value-type="float">
            <text:p>11025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127604166666667" calcext:value-type="float">
            <text:p>0,00127604166666667000</text:p>
          </table:table-cell>
          <table:table-cell table:formula="of:=[.D177]-[.D176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63" office:value-type="float" office:value="11088" calcext:value-type="float">
            <text:p>11088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128333333333333" calcext:value-type="float">
            <text:p>0,00128333333333333000</text:p>
          </table:table-cell>
          <table:table-cell table:formula="of:=[.D178]-[.D177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63" office:value-type="float" office:value="11151" calcext:value-type="float">
            <text:p>11151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1290625" calcext:value-type="float">
            <text:p>0,00129062500000000000</text:p>
          </table:table-cell>
          <table:table-cell table:formula="of:=[.D179]-[.D178]" office:value-type="float" office:value="0.00000729166666666651" calcext:value-type="float">
            <text:p>0,00000729166666666651</text:p>
          </table:table-cell>
          <table:table-cell table:number-columns-repeated="16379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63" office:value-type="float" office:value="11214" calcext:value-type="float">
            <text:p>11214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129791666666667" calcext:value-type="float">
            <text:p>0,00129791666666667000</text:p>
          </table:table-cell>
          <table:table-cell table:formula="of:=[.D180]-[.D179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63" office:value-type="float" office:value="11277" calcext:value-type="float">
            <text:p>11277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130520833333333" calcext:value-type="float">
            <text:p>0,00130520833333333000</text:p>
          </table:table-cell>
          <table:table-cell table:formula="of:=[.D181]-[.D180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63" office:value-type="float" office:value="11340" calcext:value-type="float">
            <text:p>1134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13125" calcext:value-type="float">
            <text:p>0,00131250000000000000</text:p>
          </table:table-cell>
          <table:table-cell table:formula="of:=[.D182]-[.D181]" office:value-type="float" office:value="0.00000729166666666651" calcext:value-type="float">
            <text:p>0,00000729166666666651</text:p>
          </table:table-cell>
          <table:table-cell table:number-columns-repeated="16379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63" office:value-type="float" office:value="11403" calcext:value-type="float">
            <text:p>11403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131979166666667" calcext:value-type="float">
            <text:p>0,00131979166666667000</text:p>
          </table:table-cell>
          <table:table-cell table:formula="of:=[.D183]-[.D182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63" office:value-type="float" office:value="11466" calcext:value-type="float">
            <text:p>11466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132708333333333" calcext:value-type="float">
            <text:p>0,00132708333333333000</text:p>
          </table:table-cell>
          <table:table-cell table:formula="of:=[.D184]-[.D183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63" office:value-type="float" office:value="11529" calcext:value-type="float">
            <text:p>11529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1334375" calcext:value-type="float">
            <text:p>0,00133437500000000000</text:p>
          </table:table-cell>
          <table:table-cell table:formula="of:=[.D185]-[.D184]" office:value-type="float" office:value="0.00000729166666666651" calcext:value-type="float">
            <text:p>0,00000729166666666651</text:p>
          </table:table-cell>
          <table:table-cell table:number-columns-repeated="16379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63" office:value-type="float" office:value="11592" calcext:value-type="float">
            <text:p>11592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134166666666667" calcext:value-type="float">
            <text:p>0,00134166666666667000</text:p>
          </table:table-cell>
          <table:table-cell table:formula="of:=[.D186]-[.D185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63" office:value-type="float" office:value="11655" calcext:value-type="float">
            <text:p>11655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134895833333333" calcext:value-type="float">
            <text:p>0,00134895833333333000</text:p>
          </table:table-cell>
          <table:table-cell table:formula="of:=[.D187]-[.D186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63" office:value-type="float" office:value="11718" calcext:value-type="float">
            <text:p>11718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135625" calcext:value-type="float">
            <text:p>0,00135625000000000000</text:p>
          </table:table-cell>
          <table:table-cell table:formula="of:=[.D188]-[.D187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63" office:value-type="float" office:value="11781" calcext:value-type="float">
            <text:p>11781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136354166666667" calcext:value-type="float">
            <text:p>0,00136354166666667000</text:p>
          </table:table-cell>
          <table:table-cell table:formula="of:=[.D189]-[.D188]" office:value-type="float" office:value="0.00000729166666666651" calcext:value-type="float">
            <text:p>0,00000729166666666651</text:p>
          </table:table-cell>
          <table:table-cell table:number-columns-repeated="16379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63" office:value-type="float" office:value="11844" calcext:value-type="float">
            <text:p>11844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137083333333333" calcext:value-type="float">
            <text:p>0,00137083333333333000</text:p>
          </table:table-cell>
          <table:table-cell table:formula="of:=[.D190]-[.D189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63" office:value-type="float" office:value="11907" calcext:value-type="float">
            <text:p>11907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1378125" calcext:value-type="float">
            <text:p>0,00137812500000000000</text:p>
          </table:table-cell>
          <table:table-cell table:formula="of:=[.D191]-[.D190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63" office:value-type="float" office:value="11970" calcext:value-type="float">
            <text:p>1197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138541666666667" calcext:value-type="float">
            <text:p>0,00138541666666667000</text:p>
          </table:table-cell>
          <table:table-cell table:formula="of:=[.D192]-[.D191]" office:value-type="float" office:value="0.00000729166666666651" calcext:value-type="float">
            <text:p>0,00000729166666666651</text:p>
          </table:table-cell>
          <table:table-cell table:number-columns-repeated="16379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63" office:value-type="float" office:value="12033" calcext:value-type="float">
            <text:p>12033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139270833333333" calcext:value-type="float">
            <text:p>0,00139270833333333000</text:p>
          </table:table-cell>
          <table:table-cell table:formula="of:=[.D193]-[.D192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63" office:value-type="float" office:value="12096" calcext:value-type="float">
            <text:p>12096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14" calcext:value-type="float">
            <text:p>0,00140000000000000000</text:p>
          </table:table-cell>
          <table:table-cell table:formula="of:=[.D194]-[.D193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63" office:value-type="float" office:value="12159" calcext:value-type="float">
            <text:p>12159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140729166666667" calcext:value-type="float">
            <text:p>0,00140729166666667000</text:p>
          </table:table-cell>
          <table:table-cell table:formula="of:=[.D195]-[.D194]" office:value-type="float" office:value="0.00000729166666666651" calcext:value-type="float">
            <text:p>0,00000729166666666651</text:p>
          </table:table-cell>
          <table:table-cell table:number-columns-repeated="16379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63" office:value-type="float" office:value="12222" calcext:value-type="float">
            <text:p>12222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141458333333333" calcext:value-type="float">
            <text:p>0,00141458333333333000</text:p>
          </table:table-cell>
          <table:table-cell table:formula="of:=[.D196]-[.D195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63" office:value-type="float" office:value="12285" calcext:value-type="float">
            <text:p>12285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1421875" calcext:value-type="float">
            <text:p>0,00142187500000000000</text:p>
          </table:table-cell>
          <table:table-cell table:formula="of:=[.D197]-[.D196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63" office:value-type="float" office:value="12348" calcext:value-type="float">
            <text:p>12348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142916666666667" calcext:value-type="float">
            <text:p>0,00142916666666667000</text:p>
          </table:table-cell>
          <table:table-cell table:formula="of:=[.D198]-[.D197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63" office:value-type="float" office:value="12411" calcext:value-type="float">
            <text:p>12411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143645833333333" calcext:value-type="float">
            <text:p>0,00143645833333333000</text:p>
          </table:table-cell>
          <table:table-cell table:formula="of:=[.D199]-[.D198]" office:value-type="float" office:value="0.00000729166666666651" calcext:value-type="float">
            <text:p>0,00000729166666666651</text:p>
          </table:table-cell>
          <table:table-cell table:number-columns-repeated="16379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63" office:value-type="float" office:value="12474" calcext:value-type="float">
            <text:p>12474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144375" calcext:value-type="float">
            <text:p>0,00144375000000000000</text:p>
          </table:table-cell>
          <table:table-cell table:formula="of:=[.D200]-[.D199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63" office:value-type="float" office:value="12537" calcext:value-type="float">
            <text:p>12537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145104166666667" calcext:value-type="float">
            <text:p>0,00145104166666667000</text:p>
          </table:table-cell>
          <table:table-cell table:formula="of:=[.D201]-[.D200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63" office:value-type="float" office:value="12600" calcext:value-type="float">
            <text:p>126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145833333333333" calcext:value-type="float">
            <text:p>0,00145833333333333000</text:p>
          </table:table-cell>
          <table:table-cell table:formula="of:=[.D202]-[.D201]" office:value-type="float" office:value="0.00000729166666666651" calcext:value-type="float">
            <text:p>0,00000729166666666651</text:p>
          </table:table-cell>
          <table:table-cell table:number-columns-repeated="16379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63" office:value-type="float" office:value="12663" calcext:value-type="float">
            <text:p>12663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1465625" calcext:value-type="float">
            <text:p>0,00146562500000000000</text:p>
          </table:table-cell>
          <table:table-cell table:formula="of:=[.D203]-[.D202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63" office:value-type="float" office:value="12726" calcext:value-type="float">
            <text:p>12726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147291666666667" calcext:value-type="float">
            <text:p>0,00147291666666667000</text:p>
          </table:table-cell>
          <table:table-cell table:formula="of:=[.D204]-[.D203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63" office:value-type="float" office:value="12789" calcext:value-type="float">
            <text:p>12789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148020833333333" calcext:value-type="float">
            <text:p>0,00148020833333333000</text:p>
          </table:table-cell>
          <table:table-cell table:formula="of:=[.D205]-[.D204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63" office:value-type="float" office:value="12852" calcext:value-type="float">
            <text:p>12852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14875" calcext:value-type="float">
            <text:p>0,00148750000000000000</text:p>
          </table:table-cell>
          <table:table-cell table:formula="of:=[.D206]-[.D205]" office:value-type="float" office:value="0.00000729166666666651" calcext:value-type="float">
            <text:p>0,00000729166666666651</text:p>
          </table:table-cell>
          <table:table-cell table:number-columns-repeated="16379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63" office:value-type="float" office:value="12915" calcext:value-type="float">
            <text:p>12915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149479166666667" calcext:value-type="float">
            <text:p>0,00149479166666667000</text:p>
          </table:table-cell>
          <table:table-cell table:formula="of:=[.D207]-[.D206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63" office:value-type="float" office:value="12978" calcext:value-type="float">
            <text:p>12978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150208333333333" calcext:value-type="float">
            <text:p>0,00150208333333333000</text:p>
          </table:table-cell>
          <table:table-cell table:formula="of:=[.D208]-[.D207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63" office:value-type="float" office:value="13041" calcext:value-type="float">
            <text:p>13041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1509375" calcext:value-type="float">
            <text:p>0,00150937500000000000</text:p>
          </table:table-cell>
          <table:table-cell table:formula="of:=[.D209]-[.D208]" office:value-type="float" office:value="0.00000729166666666651" calcext:value-type="float">
            <text:p>0,00000729166666666651</text:p>
          </table:table-cell>
          <table:table-cell table:number-columns-repeated="16379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63" office:value-type="float" office:value="13104" calcext:value-type="float">
            <text:p>13104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151666666666667" calcext:value-type="float">
            <text:p>0,00151666666666667000</text:p>
          </table:table-cell>
          <table:table-cell table:formula="of:=[.D210]-[.D209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63" office:value-type="float" office:value="13167" calcext:value-type="float">
            <text:p>13167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152395833333333" calcext:value-type="float">
            <text:p>0,00152395833333333000</text:p>
          </table:table-cell>
          <table:table-cell table:formula="of:=[.D211]-[.D210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63" office:value-type="float" office:value="13230" calcext:value-type="float">
            <text:p>1323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153125" calcext:value-type="float">
            <text:p>0,00153125000000000000</text:p>
          </table:table-cell>
          <table:table-cell table:formula="of:=[.D212]-[.D211]" office:value-type="float" office:value="0.00000729166666666651" calcext:value-type="float">
            <text:p>0,00000729166666666651</text:p>
          </table:table-cell>
          <table:table-cell table:number-columns-repeated="16379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63" office:value-type="float" office:value="13293" calcext:value-type="float">
            <text:p>13293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153854166666667" calcext:value-type="float">
            <text:p>0,00153854166666667000</text:p>
          </table:table-cell>
          <table:table-cell table:formula="of:=[.D213]-[.D212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63" office:value-type="float" office:value="13356" calcext:value-type="float">
            <text:p>13356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154583333333333" calcext:value-type="float">
            <text:p>0,00154583333333333000</text:p>
          </table:table-cell>
          <table:table-cell table:formula="of:=[.D214]-[.D213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63" office:value-type="float" office:value="13419" calcext:value-type="float">
            <text:p>13419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1553125" calcext:value-type="float">
            <text:p>0,00155312500000000000</text:p>
          </table:table-cell>
          <table:table-cell table:formula="of:=[.D215]-[.D214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63" office:value-type="float" office:value="13482" calcext:value-type="float">
            <text:p>13482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156041666666667" calcext:value-type="float">
            <text:p>0,00156041666666667000</text:p>
          </table:table-cell>
          <table:table-cell table:formula="of:=[.D216]-[.D215]" office:value-type="float" office:value="0.00000729166666666651" calcext:value-type="float">
            <text:p>0,00000729166666666651</text:p>
          </table:table-cell>
          <table:table-cell table:number-columns-repeated="16379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63" office:value-type="float" office:value="13545" calcext:value-type="float">
            <text:p>13545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156770833333333" calcext:value-type="float">
            <text:p>0,00156770833333333000</text:p>
          </table:table-cell>
          <table:table-cell table:formula="of:=[.D217]-[.D216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63" office:value-type="float" office:value="13608" calcext:value-type="float">
            <text:p>13608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1575" calcext:value-type="float">
            <text:p>0,00157500000000000000</text:p>
          </table:table-cell>
          <table:table-cell table:formula="of:=[.D218]-[.D217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63" office:value-type="float" office:value="13671" calcext:value-type="float">
            <text:p>13671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158229166666667" calcext:value-type="float">
            <text:p>0,00158229166666667000</text:p>
          </table:table-cell>
          <table:table-cell table:formula="of:=[.D219]-[.D218]" office:value-type="float" office:value="0.00000729166666666651" calcext:value-type="float">
            <text:p>0,00000729166666666651</text:p>
          </table:table-cell>
          <table:table-cell table:number-columns-repeated="16379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63" office:value-type="float" office:value="13734" calcext:value-type="float">
            <text:p>13734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158958333333333" calcext:value-type="float">
            <text:p>0,00158958333333333000</text:p>
          </table:table-cell>
          <table:table-cell table:formula="of:=[.D220]-[.D219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63" office:value-type="float" office:value="13797" calcext:value-type="float">
            <text:p>13797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1596875" calcext:value-type="float">
            <text:p>0,00159687500000000000</text:p>
          </table:table-cell>
          <table:table-cell table:formula="of:=[.D221]-[.D220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63" office:value-type="float" office:value="13860" calcext:value-type="float">
            <text:p>1386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160416666666667" calcext:value-type="float">
            <text:p>0,00160416666666667000</text:p>
          </table:table-cell>
          <table:table-cell table:formula="of:=[.D222]-[.D221]" office:value-type="float" office:value="0.00000729166666666651" calcext:value-type="float">
            <text:p>0,00000729166666666651</text:p>
          </table:table-cell>
          <table:table-cell table:number-columns-repeated="16379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63" office:value-type="float" office:value="13923" calcext:value-type="float">
            <text:p>13923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161145833333333" calcext:value-type="float">
            <text:p>0,00161145833333333000</text:p>
          </table:table-cell>
          <table:table-cell table:formula="of:=[.D223]-[.D222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63" office:value-type="float" office:value="13986" calcext:value-type="float">
            <text:p>13986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161875" calcext:value-type="float">
            <text:p>0,00161875000000000000</text:p>
          </table:table-cell>
          <table:table-cell table:formula="of:=[.D224]-[.D223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63" office:value-type="float" office:value="14049" calcext:value-type="float">
            <text:p>14049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162604166666667" calcext:value-type="float">
            <text:p>0,00162604166666667000</text:p>
          </table:table-cell>
          <table:table-cell table:formula="of:=[.D225]-[.D224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63" office:value-type="float" office:value="14112" calcext:value-type="float">
            <text:p>14112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163333333333333" calcext:value-type="float">
            <text:p>0,00163333333333333000</text:p>
          </table:table-cell>
          <table:table-cell table:formula="of:=[.D226]-[.D225]" office:value-type="float" office:value="0.00000729166666666651" calcext:value-type="float">
            <text:p>0,00000729166666666651</text:p>
          </table:table-cell>
          <table:table-cell table:number-columns-repeated="16379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63" office:value-type="float" office:value="14175" calcext:value-type="float">
            <text:p>14175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1640625" calcext:value-type="float">
            <text:p>0,00164062500000000000</text:p>
          </table:table-cell>
          <table:table-cell table:formula="of:=[.D227]-[.D226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63" office:value-type="float" office:value="14238" calcext:value-type="float">
            <text:p>14238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164791666666667" calcext:value-type="float">
            <text:p>0,00164791666666667000</text:p>
          </table:table-cell>
          <table:table-cell table:formula="of:=[.D228]-[.D227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63" office:value-type="float" office:value="14301" calcext:value-type="float">
            <text:p>14301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165520833333333" calcext:value-type="float">
            <text:p>0,00165520833333333000</text:p>
          </table:table-cell>
          <table:table-cell table:formula="of:=[.D229]-[.D228]" office:value-type="float" office:value="0.00000729166666666651" calcext:value-type="float">
            <text:p>0,00000729166666666651</text:p>
          </table:table-cell>
          <table:table-cell table:number-columns-repeated="16379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63" office:value-type="float" office:value="14364" calcext:value-type="float">
            <text:p>14364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16625" calcext:value-type="float">
            <text:p>0,00166250000000000000</text:p>
          </table:table-cell>
          <table:table-cell table:formula="of:=[.D230]-[.D229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63" office:value-type="float" office:value="14427" calcext:value-type="float">
            <text:p>14427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166979166666667" calcext:value-type="float">
            <text:p>0,00166979166666667000</text:p>
          </table:table-cell>
          <table:table-cell table:formula="of:=[.D231]-[.D230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63" office:value-type="float" office:value="14490" calcext:value-type="float">
            <text:p>1449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167708333333333" calcext:value-type="float">
            <text:p>0,00167708333333333000</text:p>
          </table:table-cell>
          <table:table-cell table:formula="of:=[.D232]-[.D231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63" office:value-type="float" office:value="14553" calcext:value-type="float">
            <text:p>14553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1684375" calcext:value-type="float">
            <text:p>0,00168437500000000000</text:p>
          </table:table-cell>
          <table:table-cell table:formula="of:=[.D233]-[.D232]" office:value-type="float" office:value="0.00000729166666666651" calcext:value-type="float">
            <text:p>0,00000729166666666651</text:p>
          </table:table-cell>
          <table:table-cell table:number-columns-repeated="16379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63" office:value-type="float" office:value="14616" calcext:value-type="float">
            <text:p>14616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169166666666667" calcext:value-type="float">
            <text:p>0,00169166666666667000</text:p>
          </table:table-cell>
          <table:table-cell table:formula="of:=[.D234]-[.D233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63" office:value-type="float" office:value="14679" calcext:value-type="float">
            <text:p>14679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169895833333333" calcext:value-type="float">
            <text:p>0,00169895833333333000</text:p>
          </table:table-cell>
          <table:table-cell table:formula="of:=[.D235]-[.D234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63" office:value-type="float" office:value="14742" calcext:value-type="float">
            <text:p>14742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170625" calcext:value-type="float">
            <text:p>0,00170625000000000000</text:p>
          </table:table-cell>
          <table:table-cell table:formula="of:=[.D236]-[.D235]" office:value-type="float" office:value="0.00000729166666666651" calcext:value-type="float">
            <text:p>0,00000729166666666651</text:p>
          </table:table-cell>
          <table:table-cell table:number-columns-repeated="16379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63" office:value-type="float" office:value="14805" calcext:value-type="float">
            <text:p>14805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171354166666667" calcext:value-type="float">
            <text:p>0,00171354166666667000</text:p>
          </table:table-cell>
          <table:table-cell table:formula="of:=[.D237]-[.D236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63" office:value-type="float" office:value="14868" calcext:value-type="float">
            <text:p>14868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172083333333333" calcext:value-type="float">
            <text:p>0,00172083333333333000</text:p>
          </table:table-cell>
          <table:table-cell table:formula="of:=[.D238]-[.D237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63" office:value-type="float" office:value="14931" calcext:value-type="float">
            <text:p>14931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1728125" calcext:value-type="float">
            <text:p>0,00172812500000000000</text:p>
          </table:table-cell>
          <table:table-cell table:formula="of:=[.D239]-[.D238]" office:value-type="float" office:value="0.00000729166666666651" calcext:value-type="float">
            <text:p>0,00000729166666666651</text:p>
          </table:table-cell>
          <table:table-cell table:number-columns-repeated="16379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63" office:value-type="float" office:value="14994" calcext:value-type="float">
            <text:p>14994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173541666666667" calcext:value-type="float">
            <text:p>0,00173541666666667000</text:p>
          </table:table-cell>
          <table:table-cell table:formula="of:=[.D240]-[.D239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63" office:value-type="float" office:value="15057" calcext:value-type="float">
            <text:p>15057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174270833333333" calcext:value-type="float">
            <text:p>0,00174270833333333000</text:p>
          </table:table-cell>
          <table:table-cell table:formula="of:=[.D241]-[.D240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63" office:value-type="float" office:value="15120" calcext:value-type="float">
            <text:p>1512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175" calcext:value-type="float">
            <text:p>0,00175000000000000000</text:p>
          </table:table-cell>
          <table:table-cell table:formula="of:=[.D242]-[.D241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63" office:value-type="float" office:value="15183" calcext:value-type="float">
            <text:p>15183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175729166666667" calcext:value-type="float">
            <text:p>0,00175729166666667000</text:p>
          </table:table-cell>
          <table:table-cell table:formula="of:=[.D243]-[.D242]" office:value-type="float" office:value="0.00000729166666666651" calcext:value-type="float">
            <text:p>0,00000729166666666651</text:p>
          </table:table-cell>
          <table:table-cell table:number-columns-repeated="16379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63" office:value-type="float" office:value="15246" calcext:value-type="float">
            <text:p>15246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176458333333333" calcext:value-type="float">
            <text:p>0,00176458333333333000</text:p>
          </table:table-cell>
          <table:table-cell table:formula="of:=[.D244]-[.D243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63" office:value-type="float" office:value="15309" calcext:value-type="float">
            <text:p>15309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1771875" calcext:value-type="float">
            <text:p>0,00177187500000000000</text:p>
          </table:table-cell>
          <table:table-cell table:formula="of:=[.D245]-[.D244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63" office:value-type="float" office:value="15372" calcext:value-type="float">
            <text:p>15372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177916666666667" calcext:value-type="float">
            <text:p>0,00177916666666667000</text:p>
          </table:table-cell>
          <table:table-cell table:formula="of:=[.D246]-[.D245]" office:value-type="float" office:value="0.00000729166666666651" calcext:value-type="float">
            <text:p>0,00000729166666666651</text:p>
          </table:table-cell>
          <table:table-cell table:number-columns-repeated="16379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63" office:value-type="float" office:value="15435" calcext:value-type="float">
            <text:p>15435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178645833333333" calcext:value-type="float">
            <text:p>0,00178645833333333000</text:p>
          </table:table-cell>
          <table:table-cell table:formula="of:=[.D247]-[.D246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63" office:value-type="float" office:value="15498" calcext:value-type="float">
            <text:p>15498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179375" calcext:value-type="float">
            <text:p>0,00179375000000000000</text:p>
          </table:table-cell>
          <table:table-cell table:formula="of:=[.D248]-[.D247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63" office:value-type="float" office:value="15561" calcext:value-type="float">
            <text:p>15561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180104166666667" calcext:value-type="float">
            <text:p>0,00180104166666667000</text:p>
          </table:table-cell>
          <table:table-cell table:formula="of:=[.D249]-[.D248]" office:value-type="float" office:value="0.00000729166666666651" calcext:value-type="float">
            <text:p>0,00000729166666666651</text:p>
          </table:table-cell>
          <table:table-cell table:number-columns-repeated="16379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63" office:value-type="float" office:value="15624" calcext:value-type="float">
            <text:p>15624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180833333333333" calcext:value-type="float">
            <text:p>0,00180833333333333000</text:p>
          </table:table-cell>
          <table:table-cell table:formula="of:=[.D250]-[.D249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63" office:value-type="float" office:value="15687" calcext:value-type="float">
            <text:p>15687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1815625" calcext:value-type="float">
            <text:p>0,00181562500000000000</text:p>
          </table:table-cell>
          <table:table-cell table:formula="of:=[.D251]-[.D250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63" office:value-type="float" office:value="15750" calcext:value-type="float">
            <text:p>1575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182291666666667" calcext:value-type="float">
            <text:p>0,00182291666666667000</text:p>
          </table:table-cell>
          <table:table-cell table:formula="of:=[.D252]-[.D251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63" office:value-type="float" office:value="15813" calcext:value-type="float">
            <text:p>15813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183020833333333" calcext:value-type="float">
            <text:p>0,00183020833333333000</text:p>
          </table:table-cell>
          <table:table-cell table:formula="of:=[.D253]-[.D252]" office:value-type="float" office:value="0.00000729166666666651" calcext:value-type="float">
            <text:p>0,00000729166666666651</text:p>
          </table:table-cell>
          <table:table-cell table:number-columns-repeated="16379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63" office:value-type="float" office:value="15876" calcext:value-type="float">
            <text:p>15876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18375" calcext:value-type="float">
            <text:p>0,00183750000000000000</text:p>
          </table:table-cell>
          <table:table-cell table:formula="of:=[.D254]-[.D253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63" office:value-type="float" office:value="15939" calcext:value-type="float">
            <text:p>15939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184479166666667" calcext:value-type="float">
            <text:p>0,00184479166666667000</text:p>
          </table:table-cell>
          <table:table-cell table:formula="of:=[.D255]-[.D254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63" office:value-type="float" office:value="16002" calcext:value-type="float">
            <text:p>16002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185208333333333" calcext:value-type="float">
            <text:p>0,00185208333333333000</text:p>
          </table:table-cell>
          <table:table-cell table:formula="of:=[.D256]-[.D255]" office:value-type="float" office:value="0.00000729166666666651" calcext:value-type="float">
            <text:p>0,00000729166666666651</text:p>
          </table:table-cell>
          <table:table-cell table:number-columns-repeated="16379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63" office:value-type="float" office:value="16065" calcext:value-type="float">
            <text:p>16065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1859375" calcext:value-type="float">
            <text:p>0,00185937500000000000</text:p>
          </table:table-cell>
          <table:table-cell table:formula="of:=[.D257]-[.D256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63" office:value-type="float" office:value="16128" calcext:value-type="float">
            <text:p>16128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186666666666667" calcext:value-type="float">
            <text:p>0,00186666666666667000</text:p>
          </table:table-cell>
          <table:table-cell table:formula="of:=[.D258]-[.D257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63" office:value-type="float" office:value="16191" calcext:value-type="float">
            <text:p>16191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187395833333333" calcext:value-type="float">
            <text:p>0,00187395833333333000</text:p>
          </table:table-cell>
          <table:table-cell table:formula="of:=[.D259]-[.D258]" office:value-type="float" office:value="0.00000729166666666651" calcext:value-type="float">
            <text:p>0,00000729166666666651</text:p>
          </table:table-cell>
          <table:table-cell table:number-columns-repeated="16379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63" office:value-type="float" office:value="16254" calcext:value-type="float">
            <text:p>16254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188125" calcext:value-type="float">
            <text:p>0,00188125000000000000</text:p>
          </table:table-cell>
          <table:table-cell table:formula="of:=[.D260]-[.D259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63" office:value-type="float" office:value="16317" calcext:value-type="float">
            <text:p>16317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188854166666667" calcext:value-type="float">
            <text:p>0,00188854166666667000</text:p>
          </table:table-cell>
          <table:table-cell table:formula="of:=[.D261]-[.D260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63" office:value-type="float" office:value="16380" calcext:value-type="float">
            <text:p>1638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189583333333333" calcext:value-type="float">
            <text:p>0,00189583333333333000</text:p>
          </table:table-cell>
          <table:table-cell table:formula="of:=[.D262]-[.D261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63" office:value-type="float" office:value="16443" calcext:value-type="float">
            <text:p>16443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1903125" calcext:value-type="float">
            <text:p>0,00190312500000000000</text:p>
          </table:table-cell>
          <table:table-cell table:formula="of:=[.D263]-[.D262]" office:value-type="float" office:value="0.00000729166666666651" calcext:value-type="float">
            <text:p>0,00000729166666666651</text:p>
          </table:table-cell>
          <table:table-cell table:number-columns-repeated="16379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63" office:value-type="float" office:value="16506" calcext:value-type="float">
            <text:p>16506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191041666666667" calcext:value-type="float">
            <text:p>0,00191041666666667000</text:p>
          </table:table-cell>
          <table:table-cell table:formula="of:=[.D264]-[.D263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63" office:value-type="float" office:value="16569" calcext:value-type="float">
            <text:p>16569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191770833333333" calcext:value-type="float">
            <text:p>0,00191770833333333000</text:p>
          </table:table-cell>
          <table:table-cell table:formula="of:=[.D265]-[.D264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63" office:value-type="float" office:value="16632" calcext:value-type="float">
            <text:p>16632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1925" calcext:value-type="float">
            <text:p>0,00192500000000000000</text:p>
          </table:table-cell>
          <table:table-cell table:formula="of:=[.D266]-[.D265]" office:value-type="float" office:value="0.00000729166666666651" calcext:value-type="float">
            <text:p>0,00000729166666666651</text:p>
          </table:table-cell>
          <table:table-cell table:number-columns-repeated="16379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63" office:value-type="float" office:value="16695" calcext:value-type="float">
            <text:p>16695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193229166666667" calcext:value-type="float">
            <text:p>0,00193229166666667000</text:p>
          </table:table-cell>
          <table:table-cell table:formula="of:=[.D267]-[.D266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63" office:value-type="float" office:value="16758" calcext:value-type="float">
            <text:p>16758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193958333333333" calcext:value-type="float">
            <text:p>0,00193958333333333000</text:p>
          </table:table-cell>
          <table:table-cell table:formula="of:=[.D268]-[.D267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63" office:value-type="float" office:value="16821" calcext:value-type="float">
            <text:p>16821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1946875" calcext:value-type="float">
            <text:p>0,00194687500000000000</text:p>
          </table:table-cell>
          <table:table-cell table:formula="of:=[.D269]-[.D268]" office:value-type="float" office:value="0.00000729166666666651" calcext:value-type="float">
            <text:p>0,00000729166666666651</text:p>
          </table:table-cell>
          <table:table-cell table:number-columns-repeated="16379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63" office:value-type="float" office:value="16884" calcext:value-type="float">
            <text:p>16884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195416666666667" calcext:value-type="float">
            <text:p>0,00195416666666667000</text:p>
          </table:table-cell>
          <table:table-cell table:formula="of:=[.D270]-[.D269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63" office:value-type="float" office:value="16947" calcext:value-type="float">
            <text:p>16947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196145833333333" calcext:value-type="float">
            <text:p>0,00196145833333333000</text:p>
          </table:table-cell>
          <table:table-cell table:formula="of:=[.D271]-[.D270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63" office:value-type="float" office:value="17010" calcext:value-type="float">
            <text:p>1701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196875" calcext:value-type="float">
            <text:p>0,00196875000000000000</text:p>
          </table:table-cell>
          <table:table-cell table:formula="of:=[.D272]-[.D271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63" office:value-type="float" office:value="17073" calcext:value-type="float">
            <text:p>17073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197604166666667" calcext:value-type="float">
            <text:p>0,00197604166666667000</text:p>
          </table:table-cell>
          <table:table-cell table:formula="of:=[.D273]-[.D272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63" office:value-type="float" office:value="17136" calcext:value-type="float">
            <text:p>17136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198333333333333" calcext:value-type="float">
            <text:p>0,00198333333333333000</text:p>
          </table:table-cell>
          <table:table-cell table:formula="of:=[.D274]-[.D273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63" office:value-type="float" office:value="17199" calcext:value-type="float">
            <text:p>17199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1990625" calcext:value-type="float">
            <text:p>0,00199062500000000000</text:p>
          </table:table-cell>
          <table:table-cell table:formula="of:=[.D275]-[.D274]" office:value-type="float" office:value="0.0000072916666666663" calcext:value-type="float">
            <text:p>0,00000729166666666630</text:p>
          </table:table-cell>
          <table:table-cell table:number-columns-repeated="16379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63" office:value-type="float" office:value="17262" calcext:value-type="float">
            <text:p>17262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199791666666667" calcext:value-type="float">
            <text:p>0,00199791666666667000</text:p>
          </table:table-cell>
          <table:table-cell table:formula="of:=[.D276]-[.D275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63" office:value-type="float" office:value="17325" calcext:value-type="float">
            <text:p>17325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200520833333333" calcext:value-type="float">
            <text:p>0,00200520833333333000</text:p>
          </table:table-cell>
          <table:table-cell table:formula="of:=[.D277]-[.D276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63" office:value-type="float" office:value="17388" calcext:value-type="float">
            <text:p>17388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20125" calcext:value-type="float">
            <text:p>0,00201250000000000000</text:p>
          </table:table-cell>
          <table:table-cell table:formula="of:=[.D278]-[.D277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63" office:value-type="float" office:value="17451" calcext:value-type="float">
            <text:p>17451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201979166666667" calcext:value-type="float">
            <text:p>0,00201979166666667000</text:p>
          </table:table-cell>
          <table:table-cell table:formula="of:=[.D279]-[.D278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63" office:value-type="float" office:value="17514" calcext:value-type="float">
            <text:p>17514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202708333333333" calcext:value-type="float">
            <text:p>0,00202708333333333000</text:p>
          </table:table-cell>
          <table:table-cell table:formula="of:=[.D280]-[.D279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63" office:value-type="float" office:value="17577" calcext:value-type="float">
            <text:p>17577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2034375" calcext:value-type="float">
            <text:p>0,00203437500000000000</text:p>
          </table:table-cell>
          <table:table-cell table:formula="of:=[.D281]-[.D280]" office:value-type="float" office:value="0.0000072916666666663" calcext:value-type="float">
            <text:p>0,00000729166666666630</text:p>
          </table:table-cell>
          <table:table-cell table:number-columns-repeated="16379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63" office:value-type="float" office:value="17640" calcext:value-type="float">
            <text:p>1764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204166666666667" calcext:value-type="float">
            <text:p>0,00204166666666667000</text:p>
          </table:table-cell>
          <table:table-cell table:formula="of:=[.D282]-[.D281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63" office:value-type="float" office:value="17703" calcext:value-type="float">
            <text:p>17703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204895833333333" calcext:value-type="float">
            <text:p>0,00204895833333333000</text:p>
          </table:table-cell>
          <table:table-cell table:formula="of:=[.D283]-[.D282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63" office:value-type="float" office:value="17766" calcext:value-type="float">
            <text:p>17766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205625" calcext:value-type="float">
            <text:p>0,00205625000000000000</text:p>
          </table:table-cell>
          <table:table-cell table:formula="of:=[.D284]-[.D283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63" office:value-type="float" office:value="17829" calcext:value-type="float">
            <text:p>17829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206354166666667" calcext:value-type="float">
            <text:p>0,00206354166666667000</text:p>
          </table:table-cell>
          <table:table-cell table:formula="of:=[.D285]-[.D284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63" office:value-type="float" office:value="17892" calcext:value-type="float">
            <text:p>17892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207083333333333" calcext:value-type="float">
            <text:p>0,00207083333333333000</text:p>
          </table:table-cell>
          <table:table-cell table:formula="of:=[.D286]-[.D285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63" office:value-type="float" office:value="17955" calcext:value-type="float">
            <text:p>17955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2078125" calcext:value-type="float">
            <text:p>0,00207812500000000000</text:p>
          </table:table-cell>
          <table:table-cell table:formula="of:=[.D287]-[.D286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63" office:value-type="float" office:value="18018" calcext:value-type="float">
            <text:p>18018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208541666666667" calcext:value-type="float">
            <text:p>0,00208541666666667000</text:p>
          </table:table-cell>
          <table:table-cell table:formula="of:=[.D288]-[.D287]" office:value-type="float" office:value="0.0000072916666666663" calcext:value-type="float">
            <text:p>0,00000729166666666630</text:p>
          </table:table-cell>
          <table:table-cell table:number-columns-repeated="16379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63" office:value-type="float" office:value="18081" calcext:value-type="float">
            <text:p>18081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209270833333333" calcext:value-type="float">
            <text:p>0,00209270833333333000</text:p>
          </table:table-cell>
          <table:table-cell table:formula="of:=[.D289]-[.D288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63" office:value-type="float" office:value="18144" calcext:value-type="float">
            <text:p>18144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21" calcext:value-type="float">
            <text:p>0,00210000000000000000</text:p>
          </table:table-cell>
          <table:table-cell table:formula="of:=[.D290]-[.D289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63" office:value-type="float" office:value="18207" calcext:value-type="float">
            <text:p>18207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210729166666667" calcext:value-type="float">
            <text:p>0,00210729166666667000</text:p>
          </table:table-cell>
          <table:table-cell table:formula="of:=[.D291]-[.D290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63" office:value-type="float" office:value="18270" calcext:value-type="float">
            <text:p>1827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211458333333333" calcext:value-type="float">
            <text:p>0,00211458333333333000</text:p>
          </table:table-cell>
          <table:table-cell table:formula="of:=[.D292]-[.D291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63" office:value-type="float" office:value="18333" calcext:value-type="float">
            <text:p>18333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2121875" calcext:value-type="float">
            <text:p>0,00212187500000000000</text:p>
          </table:table-cell>
          <table:table-cell table:formula="of:=[.D293]-[.D292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63" office:value-type="float" office:value="18396" calcext:value-type="float">
            <text:p>18396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212916666666667" calcext:value-type="float">
            <text:p>0,00212916666666667000</text:p>
          </table:table-cell>
          <table:table-cell table:formula="of:=[.D294]-[.D293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63" office:value-type="float" office:value="18459" calcext:value-type="float">
            <text:p>18459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213645833333333" calcext:value-type="float">
            <text:p>0,00213645833333333000</text:p>
          </table:table-cell>
          <table:table-cell table:formula="of:=[.D295]-[.D294]" office:value-type="float" office:value="0.0000072916666666663" calcext:value-type="float">
            <text:p>0,00000729166666666630</text:p>
          </table:table-cell>
          <table:table-cell table:number-columns-repeated="16379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63" office:value-type="float" office:value="18522" calcext:value-type="float">
            <text:p>18522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214375" calcext:value-type="float">
            <text:p>0,00214375000000000000</text:p>
          </table:table-cell>
          <table:table-cell table:formula="of:=[.D296]-[.D295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63" office:value-type="float" office:value="18585" calcext:value-type="float">
            <text:p>18585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215104166666667" calcext:value-type="float">
            <text:p>0,00215104166666667000</text:p>
          </table:table-cell>
          <table:table-cell table:formula="of:=[.D297]-[.D296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63" office:value-type="float" office:value="18648" calcext:value-type="float">
            <text:p>18648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215833333333333" calcext:value-type="float">
            <text:p>0,00215833333333333000</text:p>
          </table:table-cell>
          <table:table-cell table:formula="of:=[.D298]-[.D297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63" office:value-type="float" office:value="18711" calcext:value-type="float">
            <text:p>18711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2165625" calcext:value-type="float">
            <text:p>0,00216562500000000000</text:p>
          </table:table-cell>
          <table:table-cell table:formula="of:=[.D299]-[.D298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63" office:value-type="float" office:value="18774" calcext:value-type="float">
            <text:p>18774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217291666666667" calcext:value-type="float">
            <text:p>0,00217291666666667000</text:p>
          </table:table-cell>
          <table:table-cell table:formula="of:=[.D300]-[.D299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63" office:value-type="float" office:value="18837" calcext:value-type="float">
            <text:p>18837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218020833333333" calcext:value-type="float">
            <text:p>0,00218020833333333000</text:p>
          </table:table-cell>
          <table:table-cell table:formula="of:=[.D301]-[.D300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63" office:value-type="float" office:value="18900" calcext:value-type="float">
            <text:p>189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21875" calcext:value-type="float">
            <text:p>0,00218750000000000000</text:p>
          </table:table-cell>
          <table:table-cell table:formula="of:=[.D302]-[.D301]" office:value-type="float" office:value="0.0000072916666666663" calcext:value-type="float">
            <text:p>0,00000729166666666630</text:p>
          </table:table-cell>
          <table:table-cell table:number-columns-repeated="16379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63" office:value-type="float" office:value="18963" calcext:value-type="float">
            <text:p>18963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219479166666667" calcext:value-type="float">
            <text:p>0,00219479166666667000</text:p>
          </table:table-cell>
          <table:table-cell table:formula="of:=[.D303]-[.D302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63" office:value-type="float" office:value="19026" calcext:value-type="float">
            <text:p>19026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220208333333333" calcext:value-type="float">
            <text:p>0,00220208333333333000</text:p>
          </table:table-cell>
          <table:table-cell table:formula="of:=[.D304]-[.D303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63" office:value-type="float" office:value="19089" calcext:value-type="float">
            <text:p>19089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2209375" calcext:value-type="float">
            <text:p>0,00220937500000000000</text:p>
          </table:table-cell>
          <table:table-cell table:formula="of:=[.D305]-[.D304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63" office:value-type="float" office:value="19152" calcext:value-type="float">
            <text:p>19152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221666666666667" calcext:value-type="float">
            <text:p>0,00221666666666667000</text:p>
          </table:table-cell>
          <table:table-cell table:formula="of:=[.D306]-[.D305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63" office:value-type="float" office:value="19215" calcext:value-type="float">
            <text:p>19215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222395833333333" calcext:value-type="float">
            <text:p>0,00222395833333333000</text:p>
          </table:table-cell>
          <table:table-cell table:formula="of:=[.D307]-[.D306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63" office:value-type="float" office:value="19278" calcext:value-type="float">
            <text:p>19278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223125" calcext:value-type="float">
            <text:p>0,00223125000000000000</text:p>
          </table:table-cell>
          <table:table-cell table:formula="of:=[.D308]-[.D307]" office:value-type="float" office:value="0.0000072916666666663" calcext:value-type="float">
            <text:p>0,00000729166666666630</text:p>
          </table:table-cell>
          <table:table-cell table:number-columns-repeated="16379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63" office:value-type="float" office:value="19341" calcext:value-type="float">
            <text:p>19341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223854166666667" calcext:value-type="float">
            <text:p>0,00223854166666667000</text:p>
          </table:table-cell>
          <table:table-cell table:formula="of:=[.D309]-[.D308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63" office:value-type="float" office:value="19404" calcext:value-type="float">
            <text:p>19404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224583333333333" calcext:value-type="float">
            <text:p>0,00224583333333333000</text:p>
          </table:table-cell>
          <table:table-cell table:formula="of:=[.D310]-[.D309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63" office:value-type="float" office:value="19467" calcext:value-type="float">
            <text:p>19467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2253125" calcext:value-type="float">
            <text:p>0,00225312500000000000</text:p>
          </table:table-cell>
          <table:table-cell table:formula="of:=[.D311]-[.D310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63" office:value-type="float" office:value="19530" calcext:value-type="float">
            <text:p>1953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226041666666667" calcext:value-type="float">
            <text:p>0,00226041666666667000</text:p>
          </table:table-cell>
          <table:table-cell table:formula="of:=[.D312]-[.D311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63" office:value-type="float" office:value="19593" calcext:value-type="float">
            <text:p>19593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226770833333333" calcext:value-type="float">
            <text:p>0,00226770833333333000</text:p>
          </table:table-cell>
          <table:table-cell table:formula="of:=[.D313]-[.D312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63" office:value-type="float" office:value="19656" calcext:value-type="float">
            <text:p>19656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2275" calcext:value-type="float">
            <text:p>0,00227500000000000000</text:p>
          </table:table-cell>
          <table:table-cell table:formula="of:=[.D314]-[.D313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63" office:value-type="float" office:value="19719" calcext:value-type="float">
            <text:p>19719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228229166666667" calcext:value-type="float">
            <text:p>0,00228229166666667000</text:p>
          </table:table-cell>
          <table:table-cell table:formula="of:=[.D315]-[.D314]" office:value-type="float" office:value="0.0000072916666666663" calcext:value-type="float">
            <text:p>0,00000729166666666630</text:p>
          </table:table-cell>
          <table:table-cell table:number-columns-repeated="16379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63" office:value-type="float" office:value="19782" calcext:value-type="float">
            <text:p>19782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228958333333333" calcext:value-type="float">
            <text:p>0,00228958333333333000</text:p>
          </table:table-cell>
          <table:table-cell table:formula="of:=[.D316]-[.D315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63" office:value-type="float" office:value="19845" calcext:value-type="float">
            <text:p>19845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2296875" calcext:value-type="float">
            <text:p>0,00229687500000000000</text:p>
          </table:table-cell>
          <table:table-cell table:formula="of:=[.D317]-[.D316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63" office:value-type="float" office:value="19908" calcext:value-type="float">
            <text:p>19908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230416666666667" calcext:value-type="float">
            <text:p>0,00230416666666667000</text:p>
          </table:table-cell>
          <table:table-cell table:formula="of:=[.D318]-[.D317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63" office:value-type="float" office:value="19971" calcext:value-type="float">
            <text:p>19971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231145833333333" calcext:value-type="float">
            <text:p>0,00231145833333333000</text:p>
          </table:table-cell>
          <table:table-cell table:formula="of:=[.D319]-[.D318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63" office:value-type="float" office:value="20034" calcext:value-type="float">
            <text:p>20034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231875" calcext:value-type="float">
            <text:p>0,00231875000000000000</text:p>
          </table:table-cell>
          <table:table-cell table:formula="of:=[.D320]-[.D319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63" office:value-type="float" office:value="20097" calcext:value-type="float">
            <text:p>20097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232604166666667" calcext:value-type="float">
            <text:p>0,00232604166666667000</text:p>
          </table:table-cell>
          <table:table-cell table:formula="of:=[.D321]-[.D320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63" office:value-type="float" office:value="20160" calcext:value-type="float">
            <text:p>2016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233333333333333" calcext:value-type="float">
            <text:p>0,00233333333333333000</text:p>
          </table:table-cell>
          <table:table-cell table:formula="of:=[.D322]-[.D321]" office:value-type="float" office:value="0.0000072916666666663" calcext:value-type="float">
            <text:p>0,00000729166666666630</text:p>
          </table:table-cell>
          <table:table-cell table:number-columns-repeated="16379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63" office:value-type="float" office:value="20223" calcext:value-type="float">
            <text:p>20223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2340625" calcext:value-type="float">
            <text:p>0,00234062500000000000</text:p>
          </table:table-cell>
          <table:table-cell table:formula="of:=[.D323]-[.D322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63" office:value-type="float" office:value="20286" calcext:value-type="float">
            <text:p>20286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234791666666667" calcext:value-type="float">
            <text:p>0,00234791666666667000</text:p>
          </table:table-cell>
          <table:table-cell table:formula="of:=[.D324]-[.D323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63" office:value-type="float" office:value="20349" calcext:value-type="float">
            <text:p>20349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235520833333333" calcext:value-type="float">
            <text:p>0,00235520833333333000</text:p>
          </table:table-cell>
          <table:table-cell table:formula="of:=[.D325]-[.D324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63" office:value-type="float" office:value="20412" calcext:value-type="float">
            <text:p>20412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23625" calcext:value-type="float">
            <text:p>0,00236250000000000000</text:p>
          </table:table-cell>
          <table:table-cell table:formula="of:=[.D326]-[.D325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63" office:value-type="float" office:value="20475" calcext:value-type="float">
            <text:p>20475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236979166666667" calcext:value-type="float">
            <text:p>0,00236979166666667000</text:p>
          </table:table-cell>
          <table:table-cell table:formula="of:=[.D327]-[.D326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63" office:value-type="float" office:value="20538" calcext:value-type="float">
            <text:p>20538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237708333333333" calcext:value-type="float">
            <text:p>0,00237708333333333000</text:p>
          </table:table-cell>
          <table:table-cell table:formula="of:=[.D328]-[.D327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63" office:value-type="float" office:value="20601" calcext:value-type="float">
            <text:p>20601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2384375" calcext:value-type="float">
            <text:p>0,00238437500000000000</text:p>
          </table:table-cell>
          <table:table-cell table:formula="of:=[.D329]-[.D328]" office:value-type="float" office:value="0.0000072916666666663" calcext:value-type="float">
            <text:p>0,00000729166666666630</text:p>
          </table:table-cell>
          <table:table-cell table:number-columns-repeated="16379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63" office:value-type="float" office:value="20664" calcext:value-type="float">
            <text:p>20664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239166666666667" calcext:value-type="float">
            <text:p>0,00239166666666667000</text:p>
          </table:table-cell>
          <table:table-cell table:formula="of:=[.D330]-[.D329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63" office:value-type="float" office:value="20727" calcext:value-type="float">
            <text:p>20727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239895833333333" calcext:value-type="float">
            <text:p>0,00239895833333333000</text:p>
          </table:table-cell>
          <table:table-cell table:formula="of:=[.D331]-[.D330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63" office:value-type="float" office:value="20790" calcext:value-type="float">
            <text:p>2079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240625" calcext:value-type="float">
            <text:p>0,00240625000000000000</text:p>
          </table:table-cell>
          <table:table-cell table:formula="of:=[.D332]-[.D331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63" office:value-type="float" office:value="20853" calcext:value-type="float">
            <text:p>20853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241354166666667" calcext:value-type="float">
            <text:p>0,00241354166666667000</text:p>
          </table:table-cell>
          <table:table-cell table:formula="of:=[.D333]-[.D332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63" office:value-type="float" office:value="20916" calcext:value-type="float">
            <text:p>20916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242083333333333" calcext:value-type="float">
            <text:p>0,00242083333333333000</text:p>
          </table:table-cell>
          <table:table-cell table:formula="of:=[.D334]-[.D333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63" office:value-type="float" office:value="20979" calcext:value-type="float">
            <text:p>20979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2428125" calcext:value-type="float">
            <text:p>0,00242812500000000000</text:p>
          </table:table-cell>
          <table:table-cell table:formula="of:=[.D335]-[.D334]" office:value-type="float" office:value="0.0000072916666666663" calcext:value-type="float">
            <text:p>0,00000729166666666630</text:p>
          </table:table-cell>
          <table:table-cell table:number-columns-repeated="16379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63" office:value-type="float" office:value="21042" calcext:value-type="float">
            <text:p>21042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243541666666667" calcext:value-type="float">
            <text:p>0,00243541666666667000</text:p>
          </table:table-cell>
          <table:table-cell table:formula="of:=[.D336]-[.D335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63" office:value-type="float" office:value="21105" calcext:value-type="float">
            <text:p>21105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244270833333333" calcext:value-type="float">
            <text:p>0,00244270833333333000</text:p>
          </table:table-cell>
          <table:table-cell table:formula="of:=[.D337]-[.D336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63" office:value-type="float" office:value="21168" calcext:value-type="float">
            <text:p>21168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245" calcext:value-type="float">
            <text:p>0,00245000000000000000</text:p>
          </table:table-cell>
          <table:table-cell table:formula="of:=[.D338]-[.D337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63" office:value-type="float" office:value="21231" calcext:value-type="float">
            <text:p>21231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245729166666667" calcext:value-type="float">
            <text:p>0,00245729166666667000</text:p>
          </table:table-cell>
          <table:table-cell table:formula="of:=[.D339]-[.D338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63" office:value-type="float" office:value="21294" calcext:value-type="float">
            <text:p>21294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246458333333333" calcext:value-type="float">
            <text:p>0,00246458333333333000</text:p>
          </table:table-cell>
          <table:table-cell table:formula="of:=[.D340]-[.D339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63" office:value-type="float" office:value="21357" calcext:value-type="float">
            <text:p>21357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2471875" calcext:value-type="float">
            <text:p>0,00247187500000000000</text:p>
          </table:table-cell>
          <table:table-cell table:formula="of:=[.D341]-[.D340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63" office:value-type="float" office:value="21420" calcext:value-type="float">
            <text:p>2142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247916666666667" calcext:value-type="float">
            <text:p>0,00247916666666667000</text:p>
          </table:table-cell>
          <table:table-cell table:formula="of:=[.D342]-[.D341]" office:value-type="float" office:value="0.0000072916666666663" calcext:value-type="float">
            <text:p>0,00000729166666666630</text:p>
          </table:table-cell>
          <table:table-cell table:number-columns-repeated="16379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63" office:value-type="float" office:value="21483" calcext:value-type="float">
            <text:p>21483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248645833333333" calcext:value-type="float">
            <text:p>0,00248645833333333000</text:p>
          </table:table-cell>
          <table:table-cell table:formula="of:=[.D343]-[.D342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63" office:value-type="float" office:value="21546" calcext:value-type="float">
            <text:p>21546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249375" calcext:value-type="float">
            <text:p>0,00249375000000000000</text:p>
          </table:table-cell>
          <table:table-cell table:formula="of:=[.D344]-[.D343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63" office:value-type="float" office:value="21609" calcext:value-type="float">
            <text:p>21609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250104166666667" calcext:value-type="float">
            <text:p>0,00250104166666667000</text:p>
          </table:table-cell>
          <table:table-cell table:formula="of:=[.D345]-[.D344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63" office:value-type="float" office:value="21672" calcext:value-type="float">
            <text:p>21672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250833333333333" calcext:value-type="float">
            <text:p>0,00250833333333333000</text:p>
          </table:table-cell>
          <table:table-cell table:formula="of:=[.D346]-[.D345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63" office:value-type="float" office:value="21735" calcext:value-type="float">
            <text:p>21735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2515625" calcext:value-type="float">
            <text:p>0,00251562500000000000</text:p>
          </table:table-cell>
          <table:table-cell table:formula="of:=[.D347]-[.D346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63" office:value-type="float" office:value="21798" calcext:value-type="float">
            <text:p>21798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252291666666667" calcext:value-type="float">
            <text:p>0,00252291666666667000</text:p>
          </table:table-cell>
          <table:table-cell table:formula="of:=[.D348]-[.D347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63" office:value-type="float" office:value="21861" calcext:value-type="float">
            <text:p>21861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253020833333333" calcext:value-type="float">
            <text:p>0,00253020833333333000</text:p>
          </table:table-cell>
          <table:table-cell table:formula="of:=[.D349]-[.D348]" office:value-type="float" office:value="0.0000072916666666663" calcext:value-type="float">
            <text:p>0,00000729166666666630</text:p>
          </table:table-cell>
          <table:table-cell table:number-columns-repeated="16379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63" office:value-type="float" office:value="21924" calcext:value-type="float">
            <text:p>21924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25375" calcext:value-type="float">
            <text:p>0,00253750000000000000</text:p>
          </table:table-cell>
          <table:table-cell table:formula="of:=[.D350]-[.D349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63" office:value-type="float" office:value="21987" calcext:value-type="float">
            <text:p>21987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254479166666667" calcext:value-type="float">
            <text:p>0,00254479166666667000</text:p>
          </table:table-cell>
          <table:table-cell table:formula="of:=[.D351]-[.D350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63" office:value-type="float" office:value="22050" calcext:value-type="float">
            <text:p>2205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255208333333333" calcext:value-type="float">
            <text:p>0,00255208333333333000</text:p>
          </table:table-cell>
          <table:table-cell table:formula="of:=[.D352]-[.D351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63" office:value-type="float" office:value="22113" calcext:value-type="float">
            <text:p>22113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2559375" calcext:value-type="float">
            <text:p>0,00255937500000000000</text:p>
          </table:table-cell>
          <table:table-cell table:formula="of:=[.D353]-[.D352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63" office:value-type="float" office:value="22176" calcext:value-type="float">
            <text:p>22176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256666666666667" calcext:value-type="float">
            <text:p>0,00256666666666667000</text:p>
          </table:table-cell>
          <table:table-cell table:formula="of:=[.D354]-[.D353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63" office:value-type="float" office:value="22239" calcext:value-type="float">
            <text:p>22239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257395833333333" calcext:value-type="float">
            <text:p>0,00257395833333333000</text:p>
          </table:table-cell>
          <table:table-cell table:formula="of:=[.D355]-[.D354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63" office:value-type="float" office:value="22302" calcext:value-type="float">
            <text:p>22302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258125" calcext:value-type="float">
            <text:p>0,00258125000000000000</text:p>
          </table:table-cell>
          <table:table-cell table:formula="of:=[.D356]-[.D355]" office:value-type="float" office:value="0.0000072916666666663" calcext:value-type="float">
            <text:p>0,00000729166666666630</text:p>
          </table:table-cell>
          <table:table-cell table:number-columns-repeated="16379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63" office:value-type="float" office:value="22365" calcext:value-type="float">
            <text:p>22365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258854166666667" calcext:value-type="float">
            <text:p>0,00258854166666667000</text:p>
          </table:table-cell>
          <table:table-cell table:formula="of:=[.D357]-[.D356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63" office:value-type="float" office:value="22428" calcext:value-type="float">
            <text:p>22428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259583333333333" calcext:value-type="float">
            <text:p>0,00259583333333333000</text:p>
          </table:table-cell>
          <table:table-cell table:formula="of:=[.D358]-[.D357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63" office:value-type="float" office:value="22491" calcext:value-type="float">
            <text:p>22491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2603125" calcext:value-type="float">
            <text:p>0,00260312500000000000</text:p>
          </table:table-cell>
          <table:table-cell table:formula="of:=[.D359]-[.D358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63" office:value-type="float" office:value="22554" calcext:value-type="float">
            <text:p>22554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261041666666667" calcext:value-type="float">
            <text:p>0,00261041666666667000</text:p>
          </table:table-cell>
          <table:table-cell table:formula="of:=[.D360]-[.D359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63" office:value-type="float" office:value="22617" calcext:value-type="float">
            <text:p>22617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261770833333333" calcext:value-type="float">
            <text:p>0,00261770833333333000</text:p>
          </table:table-cell>
          <table:table-cell table:formula="of:=[.D361]-[.D360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63" office:value-type="float" office:value="22680" calcext:value-type="float">
            <text:p>2268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2625" calcext:value-type="float">
            <text:p>0,00262500000000000000</text:p>
          </table:table-cell>
          <table:table-cell table:formula="of:=[.D362]-[.D361]" office:value-type="float" office:value="0.0000072916666666663" calcext:value-type="float">
            <text:p>0,00000729166666666630</text:p>
          </table:table-cell>
          <table:table-cell table:number-columns-repeated="16379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63" office:value-type="float" office:value="22743" calcext:value-type="float">
            <text:p>22743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263229166666667" calcext:value-type="float">
            <text:p>0,00263229166666667000</text:p>
          </table:table-cell>
          <table:table-cell table:formula="of:=[.D363]-[.D362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63" office:value-type="float" office:value="22806" calcext:value-type="float">
            <text:p>22806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263958333333333" calcext:value-type="float">
            <text:p>0,00263958333333333000</text:p>
          </table:table-cell>
          <table:table-cell table:formula="of:=[.D364]-[.D363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63" office:value-type="float" office:value="22869" calcext:value-type="float">
            <text:p>22869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2646875" calcext:value-type="float">
            <text:p>0,00264687500000000000</text:p>
          </table:table-cell>
          <table:table-cell table:formula="of:=[.D365]-[.D364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63" office:value-type="float" office:value="22932" calcext:value-type="float">
            <text:p>22932</text:p>
          </table:table-cell>
          <table:table-cell office:value-type="float" office:value="8640000" calcext:value-type="float">
            <text:p>8640000</text:p>
          </table:table-cell>
          <table:table-cell table:formula="of:=[.B365]/[.C365]" office:value-type="float" office:value="0.00265416666666667" calcext:value-type="float">
            <text:p>0,00265416666666667000</text:p>
          </table:table-cell>
          <table:table-cell table:formula="of:=[.D366]-[.D365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63" office:value-type="float" office:value="22995" calcext:value-type="float">
            <text:p>22995</text:p>
          </table:table-cell>
          <table:table-cell office:value-type="float" office:value="8640000" calcext:value-type="float">
            <text:p>8640000</text:p>
          </table:table-cell>
          <table:table-cell table:formula="of:=[.B366]/[.C366]" office:value-type="float" office:value="0.00266145833333333" calcext:value-type="float">
            <text:p>0,00266145833333333000</text:p>
          </table:table-cell>
          <table:table-cell table:formula="of:=[.D367]-[.D366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63" office:value-type="float" office:value="23058" calcext:value-type="float">
            <text:p>23058</text:p>
          </table:table-cell>
          <table:table-cell office:value-type="float" office:value="8640000" calcext:value-type="float">
            <text:p>8640000</text:p>
          </table:table-cell>
          <table:table-cell table:formula="of:=[.B367]/[.C367]" office:value-type="float" office:value="0.00266875" calcext:value-type="float">
            <text:p>0,00266875000000000000</text:p>
          </table:table-cell>
          <table:table-cell table:formula="of:=[.D368]-[.D367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63" office:value-type="float" office:value="23121" calcext:value-type="float">
            <text:p>23121</text:p>
          </table:table-cell>
          <table:table-cell office:value-type="float" office:value="8640000" calcext:value-type="float">
            <text:p>8640000</text:p>
          </table:table-cell>
          <table:table-cell table:formula="of:=[.B368]/[.C368]" office:value-type="float" office:value="0.00267604166666667" calcext:value-type="float">
            <text:p>0,00267604166666667000</text:p>
          </table:table-cell>
          <table:table-cell table:formula="of:=[.D369]-[.D368]" office:value-type="float" office:value="0.0000072916666666663" calcext:value-type="float">
            <text:p>0,00000729166666666630</text:p>
          </table:table-cell>
          <table:table-cell table:number-columns-repeated="16379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63" office:value-type="float" office:value="23184" calcext:value-type="float">
            <text:p>23184</text:p>
          </table:table-cell>
          <table:table-cell office:value-type="float" office:value="8640000" calcext:value-type="float">
            <text:p>8640000</text:p>
          </table:table-cell>
          <table:table-cell table:formula="of:=[.B369]/[.C369]" office:value-type="float" office:value="0.00268333333333333" calcext:value-type="float">
            <text:p>0,00268333333333333000</text:p>
          </table:table-cell>
          <table:table-cell table:formula="of:=[.D370]-[.D369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63" office:value-type="float" office:value="23247" calcext:value-type="float">
            <text:p>23247</text:p>
          </table:table-cell>
          <table:table-cell office:value-type="float" office:value="8640000" calcext:value-type="float">
            <text:p>8640000</text:p>
          </table:table-cell>
          <table:table-cell table:formula="of:=[.B370]/[.C370]" office:value-type="float" office:value="0.002690625" calcext:value-type="float">
            <text:p>0,00269062500000000000</text:p>
          </table:table-cell>
          <table:table-cell table:formula="of:=[.D371]-[.D370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+63" office:value-type="float" office:value="23310" calcext:value-type="float">
            <text:p>23310</text:p>
          </table:table-cell>
          <table:table-cell office:value-type="float" office:value="8640000" calcext:value-type="float">
            <text:p>8640000</text:p>
          </table:table-cell>
          <table:table-cell table:formula="of:=[.B371]/[.C371]" office:value-type="float" office:value="0.00269791666666667" calcext:value-type="float">
            <text:p>0,00269791666666667000</text:p>
          </table:table-cell>
          <table:table-cell table:formula="of:=[.D372]-[.D371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+63" office:value-type="float" office:value="23373" calcext:value-type="float">
            <text:p>23373</text:p>
          </table:table-cell>
          <table:table-cell office:value-type="float" office:value="8640000" calcext:value-type="float">
            <text:p>8640000</text:p>
          </table:table-cell>
          <table:table-cell table:formula="of:=[.B372]/[.C372]" office:value-type="float" office:value="0.00270520833333333" calcext:value-type="float">
            <text:p>0,00270520833333333000</text:p>
          </table:table-cell>
          <table:table-cell table:formula="of:=[.D373]-[.D372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+63" office:value-type="float" office:value="23436" calcext:value-type="float">
            <text:p>23436</text:p>
          </table:table-cell>
          <table:table-cell office:value-type="float" office:value="8640000" calcext:value-type="float">
            <text:p>8640000</text:p>
          </table:table-cell>
          <table:table-cell table:formula="of:=[.B373]/[.C373]" office:value-type="float" office:value="0.0027125" calcext:value-type="float">
            <text:p>0,00271250000000000000</text:p>
          </table:table-cell>
          <table:table-cell table:formula="of:=[.D374]-[.D373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+63" office:value-type="float" office:value="23499" calcext:value-type="float">
            <text:p>23499</text:p>
          </table:table-cell>
          <table:table-cell office:value-type="float" office:value="8640000" calcext:value-type="float">
            <text:p>8640000</text:p>
          </table:table-cell>
          <table:table-cell table:formula="of:=[.B374]/[.C374]" office:value-type="float" office:value="0.00271979166666667" calcext:value-type="float">
            <text:p>0,00271979166666667000</text:p>
          </table:table-cell>
          <table:table-cell table:formula="of:=[.D375]-[.D374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+63" office:value-type="float" office:value="23562" calcext:value-type="float">
            <text:p>23562</text:p>
          </table:table-cell>
          <table:table-cell office:value-type="float" office:value="8640000" calcext:value-type="float">
            <text:p>8640000</text:p>
          </table:table-cell>
          <table:table-cell table:formula="of:=[.B375]/[.C375]" office:value-type="float" office:value="0.00272708333333333" calcext:value-type="float">
            <text:p>0,00272708333333333000</text:p>
          </table:table-cell>
          <table:table-cell table:formula="of:=[.D376]-[.D375]" office:value-type="float" office:value="0.0000072916666666663" calcext:value-type="float">
            <text:p>0,00000729166666666630</text:p>
          </table:table-cell>
          <table:table-cell table:number-columns-repeated="16379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+63" office:value-type="float" office:value="23625" calcext:value-type="float">
            <text:p>23625</text:p>
          </table:table-cell>
          <table:table-cell office:value-type="float" office:value="8640000" calcext:value-type="float">
            <text:p>8640000</text:p>
          </table:table-cell>
          <table:table-cell table:formula="of:=[.B376]/[.C376]" office:value-type="float" office:value="0.002734375" calcext:value-type="float">
            <text:p>0,00273437500000000000</text:p>
          </table:table-cell>
          <table:table-cell table:formula="of:=[.D377]-[.D376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+63" office:value-type="float" office:value="23688" calcext:value-type="float">
            <text:p>23688</text:p>
          </table:table-cell>
          <table:table-cell office:value-type="float" office:value="8640000" calcext:value-type="float">
            <text:p>8640000</text:p>
          </table:table-cell>
          <table:table-cell table:formula="of:=[.B377]/[.C377]" office:value-type="float" office:value="0.00274166666666667" calcext:value-type="float">
            <text:p>0,00274166666666667000</text:p>
          </table:table-cell>
          <table:table-cell table:formula="of:=[.D378]-[.D377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+63" office:value-type="float" office:value="23751" calcext:value-type="float">
            <text:p>23751</text:p>
          </table:table-cell>
          <table:table-cell office:value-type="float" office:value="8640000" calcext:value-type="float">
            <text:p>8640000</text:p>
          </table:table-cell>
          <table:table-cell table:formula="of:=[.B378]/[.C378]" office:value-type="float" office:value="0.00274895833333333" calcext:value-type="float">
            <text:p>0,00274895833333333000</text:p>
          </table:table-cell>
          <table:table-cell table:formula="of:=[.D379]-[.D378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+63" office:value-type="float" office:value="23814" calcext:value-type="float">
            <text:p>23814</text:p>
          </table:table-cell>
          <table:table-cell office:value-type="float" office:value="8640000" calcext:value-type="float">
            <text:p>8640000</text:p>
          </table:table-cell>
          <table:table-cell table:formula="of:=[.B379]/[.C379]" office:value-type="float" office:value="0.00275625" calcext:value-type="float">
            <text:p>0,00275625000000000000</text:p>
          </table:table-cell>
          <table:table-cell table:formula="of:=[.D380]-[.D379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+63" office:value-type="float" office:value="23877" calcext:value-type="float">
            <text:p>23877</text:p>
          </table:table-cell>
          <table:table-cell office:value-type="float" office:value="8640000" calcext:value-type="float">
            <text:p>8640000</text:p>
          </table:table-cell>
          <table:table-cell table:formula="of:=[.B380]/[.C380]" office:value-type="float" office:value="0.00276354166666667" calcext:value-type="float">
            <text:p>0,00276354166666667000</text:p>
          </table:table-cell>
          <table:table-cell table:formula="of:=[.D381]-[.D380]" office:value-type="float" office:value="0.00000729166666666673" calcext:value-type="float">
            <text:p>0,00000729166666666673</text:p>
          </table:table-cell>
          <table:table-cell table:number-columns-repeated="16379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+63" office:value-type="float" office:value="23940" calcext:value-type="float">
            <text:p>23940</text:p>
          </table:table-cell>
          <table:table-cell office:value-type="float" office:value="8640000" calcext:value-type="float">
            <text:p>8640000</text:p>
          </table:table-cell>
          <table:table-cell table:formula="of:=[.B381]/[.C381]" office:value-type="float" office:value="0.00277083333333333" calcext:value-type="float">
            <text:p>0,00277083333333333000</text:p>
          </table:table-cell>
          <table:table-cell table:formula="of:=#REF!-[.D381]" office:value-type="string" office:string-value="" calcext:value-type="error">
            <text:p>#REF!</text:p>
          </table:table-cell>
          <table:table-cell table:number-columns-repeated="16379"/>
        </table:table-row>
        <table:table-row table:style-name="ro1" table:number-rows-repeated="104819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8:24:22.974668744</meta:creation-date>
    <dc:date>2026-05-17T18:24:29.458379795</dc:date>
    <meta:editing-duration>PT8S</meta:editing-duration>
    <meta:editing-cycles>1</meta:editing-cycles>
    <meta:document-statistic meta:table-count="1" meta:cell-count="1905" meta:object-count="0"/>
    <meta:generator>LibreOffice/24.2.7.2$Linux_X86_64 LibreOffice_project/420$Build-2</meta:generator>
  </office:meta>
</office:document-meta>
</file>