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56481481481482" calcext:value-type="float">
            <text:p>0,00000856481481481482</text:p>
          </table:table-cell>
          <table:table-cell table:formula="of:=[.D3]-[.D2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4" office:value-type="float" office:value="148" calcext:value-type="float">
            <text:p>14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71296296296296" calcext:value-type="float">
            <text:p>0,00001712962962962960</text:p>
          </table:table-cell>
          <table:table-cell table:formula="of:=[.D4]-[.D3]" office:value-type="float" office:value="0.00000856481481481481" calcext:value-type="float">
            <text:p>0,0000085648148148148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4" office:value-type="float" office:value="222" calcext:value-type="float">
            <text:p>22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56944444444444" calcext:value-type="float">
            <text:p>0,00002569444444444440</text:p>
          </table:table-cell>
          <table:table-cell table:formula="of:=[.D5]-[.D4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4" office:value-type="float" office:value="296" calcext:value-type="float">
            <text:p>29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42592592592593" calcext:value-type="float">
            <text:p>0,00003425925925925930</text:p>
          </table:table-cell>
          <table:table-cell table:formula="of:=[.D6]-[.D5]" office:value-type="float" office:value="0.00000856481481481481" calcext:value-type="float">
            <text:p>0,0000085648148148148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4" office:value-type="float" office:value="370" calcext:value-type="float">
            <text:p>37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28240740740741" calcext:value-type="float">
            <text:p>0,00004282407407407410</text:p>
          </table:table-cell>
          <table:table-cell table:formula="of:=[.D7]-[.D6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4" office:value-type="float" office:value="444" calcext:value-type="float">
            <text:p>44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13888888888889" calcext:value-type="float">
            <text:p>0,00005138888888888890</text:p>
          </table:table-cell>
          <table:table-cell table:formula="of:=[.D8]-[.D7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4" office:value-type="float" office:value="518" calcext:value-type="float">
            <text:p>51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99537037037037" calcext:value-type="float">
            <text:p>0,00005995370370370370</text:p>
          </table:table-cell>
          <table:table-cell table:formula="of:=[.D9]-[.D8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4" office:value-type="float" office:value="592" calcext:value-type="float">
            <text:p>59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85185185185185" calcext:value-type="float">
            <text:p>0,00006851851851851850</text:p>
          </table:table-cell>
          <table:table-cell table:formula="of:=[.D10]-[.D9]" office:value-type="float" office:value="0.0000085648148148148" calcext:value-type="float">
            <text:p>0,0000085648148148148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4" office:value-type="float" office:value="666" calcext:value-type="float">
            <text:p>66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70833333333333" calcext:value-type="float">
            <text:p>0,00007708333333333330</text:p>
          </table:table-cell>
          <table:table-cell table:formula="of:=[.D11]-[.D10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4" office:value-type="float" office:value="740" calcext:value-type="float">
            <text:p>7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56481481481481" calcext:value-type="float">
            <text:p>0,00008564814814814810</text:p>
          </table:table-cell>
          <table:table-cell table:formula="of:=[.D12]-[.D11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4" office:value-type="float" office:value="814" calcext:value-type="float">
            <text:p>81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4212962962963" calcext:value-type="float">
            <text:p>0,00009421296296296300</text:p>
          </table:table-cell>
          <table:table-cell table:formula="of:=[.D13]-[.D12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4" office:value-type="float" office:value="888" calcext:value-type="float">
            <text:p>88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2777777777778" calcext:value-type="float">
            <text:p>0,00010277777777777800</text:p>
          </table:table-cell>
          <table:table-cell table:formula="of:=[.D14]-[.D13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4" office:value-type="float" office:value="962" calcext:value-type="float">
            <text:p>96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11342592592593" calcext:value-type="float">
            <text:p>0,00011134259259259300</text:p>
          </table:table-cell>
          <table:table-cell table:formula="of:=[.D15]-[.D14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4" office:value-type="float" office:value="1036" calcext:value-type="float">
            <text:p>103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9907407407407" calcext:value-type="float">
            <text:p>0,00011990740740740700</text:p>
          </table:table-cell>
          <table:table-cell table:formula="of:=[.D16]-[.D15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4" office:value-type="float" office:value="1110" calcext:value-type="float">
            <text:p>111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28472222222222" calcext:value-type="float">
            <text:p>0,00012847222222222200</text:p>
          </table:table-cell>
          <table:table-cell table:formula="of:=[.D17]-[.D16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4" office:value-type="float" office:value="1184" calcext:value-type="float">
            <text:p>118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37037037037037" calcext:value-type="float">
            <text:p>0,00013703703703703700</text:p>
          </table:table-cell>
          <table:table-cell table:formula="of:=[.D18]-[.D17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4" office:value-type="float" office:value="1258" calcext:value-type="float">
            <text:p>125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45601851851852" calcext:value-type="float">
            <text:p>0,00014560185185185200</text:p>
          </table:table-cell>
          <table:table-cell table:formula="of:=[.D19]-[.D18]" office:value-type="float" office:value="0.00000856481481481479" calcext:value-type="float">
            <text:p>0,00000856481481481479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4" office:value-type="float" office:value="1332" calcext:value-type="float">
            <text:p>133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54166666666667" calcext:value-type="float">
            <text:p>0,00015416666666666700</text:p>
          </table:table-cell>
          <table:table-cell table:formula="of:=[.D20]-[.D19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4" office:value-type="float" office:value="1406" calcext:value-type="float">
            <text:p>140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62731481481481" calcext:value-type="float">
            <text:p>0,00016273148148148100</text:p>
          </table:table-cell>
          <table:table-cell table:formula="of:=[.D21]-[.D20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4" office:value-type="float" office:value="1480" calcext:value-type="float">
            <text:p>14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71296296296296" calcext:value-type="float">
            <text:p>0,00017129629629629600</text:p>
          </table:table-cell>
          <table:table-cell table:formula="of:=[.D22]-[.D21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4" office:value-type="float" office:value="1554" calcext:value-type="float">
            <text:p>155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79861111111111" calcext:value-type="float">
            <text:p>0,00017986111111111100</text:p>
          </table:table-cell>
          <table:table-cell table:formula="of:=[.D23]-[.D22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4" office:value-type="float" office:value="1628" calcext:value-type="float">
            <text:p>162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88425925925926" calcext:value-type="float">
            <text:p>0,00018842592592592600</text:p>
          </table:table-cell>
          <table:table-cell table:formula="of:=[.D24]-[.D23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4" office:value-type="float" office:value="1702" calcext:value-type="float">
            <text:p>170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96990740740741" calcext:value-type="float">
            <text:p>0,00019699074074074100</text:p>
          </table:table-cell>
          <table:table-cell table:formula="of:=[.D25]-[.D24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4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05555555555556" calcext:value-type="float">
            <text:p>0,00020555555555555600</text:p>
          </table:table-cell>
          <table:table-cell table:formula="of:=[.D26]-[.D25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4" office:value-type="float" office:value="1850" calcext:value-type="float">
            <text:p>18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1412037037037" calcext:value-type="float">
            <text:p>0,00021412037037037000</text:p>
          </table:table-cell>
          <table:table-cell table:formula="of:=[.D27]-[.D26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4" office:value-type="float" office:value="1924" calcext:value-type="float">
            <text:p>192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22685185185185" calcext:value-type="float">
            <text:p>0,00022268518518518500</text:p>
          </table:table-cell>
          <table:table-cell table:formula="of:=[.D28]-[.D27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4" office:value-type="float" office:value="1998" calcext:value-type="float">
            <text:p>199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3125" calcext:value-type="float">
            <text:p>0,00023125000000000000</text:p>
          </table:table-cell>
          <table:table-cell table:formula="of:=[.D29]-[.D28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4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39814814814815" calcext:value-type="float">
            <text:p>0,00023981481481481500</text:p>
          </table:table-cell>
          <table:table-cell table:formula="of:=[.D30]-[.D29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4" office:value-type="float" office:value="2146" calcext:value-type="float">
            <text:p>214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4837962962963" calcext:value-type="float">
            <text:p>0,00024837962962963000</text:p>
          </table:table-cell>
          <table:table-cell table:formula="of:=[.D31]-[.D30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4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56944444444444" calcext:value-type="float">
            <text:p>0,00025694444444444400</text:p>
          </table:table-cell>
          <table:table-cell table:formula="of:=[.D32]-[.D31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4" office:value-type="float" office:value="2294" calcext:value-type="float">
            <text:p>229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65509259259259" calcext:value-type="float">
            <text:p>0,00026550925925925900</text:p>
          </table:table-cell>
          <table:table-cell table:formula="of:=[.D33]-[.D32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4" office:value-type="float" office:value="2368" calcext:value-type="float">
            <text:p>236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74074074074074" calcext:value-type="float">
            <text:p>0,00027407407407407400</text:p>
          </table:table-cell>
          <table:table-cell table:formula="of:=[.D34]-[.D33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4" office:value-type="float" office:value="2442" calcext:value-type="float">
            <text:p>244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82638888888889" calcext:value-type="float">
            <text:p>0,00028263888888888900</text:p>
          </table:table-cell>
          <table:table-cell table:formula="of:=[.D35]-[.D34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4" office:value-type="float" office:value="2516" calcext:value-type="float">
            <text:p>251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91203703703704" calcext:value-type="float">
            <text:p>0,00029120370370370400</text:p>
          </table:table-cell>
          <table:table-cell table:formula="of:=[.D36]-[.D3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4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99768518518519" calcext:value-type="float">
            <text:p>0,00029976851851851900</text:p>
          </table:table-cell>
          <table:table-cell table:formula="of:=[.D37]-[.D36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4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08333333333333" calcext:value-type="float">
            <text:p>0,00030833333333333300</text:p>
          </table:table-cell>
          <table:table-cell table:formula="of:=[.D38]-[.D37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4" office:value-type="float" office:value="2738" calcext:value-type="float">
            <text:p>273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16898148148148" calcext:value-type="float">
            <text:p>0,00031689814814814800</text:p>
          </table:table-cell>
          <table:table-cell table:formula="of:=[.D39]-[.D38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4" office:value-type="float" office:value="2812" calcext:value-type="float">
            <text:p>281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25462962962963" calcext:value-type="float">
            <text:p>0,00032546296296296300</text:p>
          </table:table-cell>
          <table:table-cell table:formula="of:=[.D40]-[.D39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4" office:value-type="float" office:value="2886" calcext:value-type="float">
            <text:p>288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34027777777778" calcext:value-type="float">
            <text:p>0,00033402777777777800</text:p>
          </table:table-cell>
          <table:table-cell table:formula="of:=[.D41]-[.D40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4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42592592592593" calcext:value-type="float">
            <text:p>0,00034259259259259300</text:p>
          </table:table-cell>
          <table:table-cell table:formula="of:=[.D42]-[.D41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4" office:value-type="float" office:value="3034" calcext:value-type="float">
            <text:p>303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51157407407407" calcext:value-type="float">
            <text:p>0,00035115740740740700</text:p>
          </table:table-cell>
          <table:table-cell table:formula="of:=[.D43]-[.D42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4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59722222222222" calcext:value-type="float">
            <text:p>0,00035972222222222200</text:p>
          </table:table-cell>
          <table:table-cell table:formula="of:=[.D44]-[.D43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4" office:value-type="float" office:value="3182" calcext:value-type="float">
            <text:p>318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68287037037037" calcext:value-type="float">
            <text:p>0,00036828703703703700</text:p>
          </table:table-cell>
          <table:table-cell table:formula="of:=[.D45]-[.D44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4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76851851851852" calcext:value-type="float">
            <text:p>0,00037685185185185200</text:p>
          </table:table-cell>
          <table:table-cell table:formula="of:=[.D46]-[.D45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4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85416666666667" calcext:value-type="float">
            <text:p>0,00038541666666666700</text:p>
          </table:table-cell>
          <table:table-cell table:formula="of:=[.D47]-[.D46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4" office:value-type="float" office:value="3404" calcext:value-type="float">
            <text:p>340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93981481481482" calcext:value-type="float">
            <text:p>0,00039398148148148200</text:p>
          </table:table-cell>
          <table:table-cell table:formula="of:=[.D48]-[.D47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4" office:value-type="float" office:value="3478" calcext:value-type="float">
            <text:p>347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02546296296296" calcext:value-type="float">
            <text:p>0,00040254629629629600</text:p>
          </table:table-cell>
          <table:table-cell table:formula="of:=[.D49]-[.D48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4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11111111111111" calcext:value-type="float">
            <text:p>0,00041111111111111100</text:p>
          </table:table-cell>
          <table:table-cell table:formula="of:=[.D50]-[.D49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4" office:value-type="float" office:value="3626" calcext:value-type="float">
            <text:p>362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19675925925926" calcext:value-type="float">
            <text:p>0,00041967592592592600</text:p>
          </table:table-cell>
          <table:table-cell table:formula="of:=[.D51]-[.D50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4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28240740740741" calcext:value-type="float">
            <text:p>0,00042824074074074100</text:p>
          </table:table-cell>
          <table:table-cell table:formula="of:=[.D52]-[.D51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4" office:value-type="float" office:value="3774" calcext:value-type="float">
            <text:p>377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36805555555556" calcext:value-type="float">
            <text:p>0,00043680555555555600</text:p>
          </table:table-cell>
          <table:table-cell table:formula="of:=[.D53]-[.D52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4" office:value-type="float" office:value="3848" calcext:value-type="float">
            <text:p>384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4537037037037" calcext:value-type="float">
            <text:p>0,00044537037037037000</text:p>
          </table:table-cell>
          <table:table-cell table:formula="of:=[.D54]-[.D53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4" office:value-type="float" office:value="3922" calcext:value-type="float">
            <text:p>392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53935185185185" calcext:value-type="float">
            <text:p>0,00045393518518518500</text:p>
          </table:table-cell>
          <table:table-cell table:formula="of:=[.D55]-[.D54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4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625" calcext:value-type="float">
            <text:p>0,00046250000000000000</text:p>
          </table:table-cell>
          <table:table-cell table:formula="of:=[.D56]-[.D55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4" office:value-type="float" office:value="4070" calcext:value-type="float">
            <text:p>407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71064814814815" calcext:value-type="float">
            <text:p>0,00047106481481481500</text:p>
          </table:table-cell>
          <table:table-cell table:formula="of:=[.D57]-[.D56]" office:value-type="float" office:value="0.00000856481481481482" calcext:value-type="float">
            <text:p>0,00000856481481481482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4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7962962962963" calcext:value-type="float">
            <text:p>0,00047962962962963000</text:p>
          </table:table-cell>
          <table:table-cell table:formula="of:=[.D58]-[.D5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4" office:value-type="float" office:value="4218" calcext:value-type="float">
            <text:p>421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88194444444444" calcext:value-type="float">
            <text:p>0,00048819444444444400</text:p>
          </table:table-cell>
          <table:table-cell table:formula="of:=[.D59]-[.D58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4" office:value-type="float" office:value="4292" calcext:value-type="float">
            <text:p>429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96759259259259" calcext:value-type="float">
            <text:p>0,00049675925925925900</text:p>
          </table:table-cell>
          <table:table-cell table:formula="of:=[.D60]-[.D5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4" office:value-type="float" office:value="4366" calcext:value-type="float">
            <text:p>436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05324074074074" calcext:value-type="float">
            <text:p>0,00050532407407407400</text:p>
          </table:table-cell>
          <table:table-cell table:formula="of:=[.D61]-[.D60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4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13888888888889" calcext:value-type="float">
            <text:p>0,00051388888888888900</text:p>
          </table:table-cell>
          <table:table-cell table:formula="of:=[.D62]-[.D6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4" office:value-type="float" office:value="4514" calcext:value-type="float">
            <text:p>451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22453703703704" calcext:value-type="float">
            <text:p>0,00052245370370370400</text:p>
          </table:table-cell>
          <table:table-cell table:formula="of:=[.D63]-[.D62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4" office:value-type="float" office:value="4588" calcext:value-type="float">
            <text:p>458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31018518518519" calcext:value-type="float">
            <text:p>0,00053101851851851900</text:p>
          </table:table-cell>
          <table:table-cell table:formula="of:=[.D64]-[.D6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4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39583333333333" calcext:value-type="float">
            <text:p>0,00053958333333333300</text:p>
          </table:table-cell>
          <table:table-cell table:formula="of:=[.D65]-[.D64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4" office:value-type="float" office:value="4736" calcext:value-type="float">
            <text:p>473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48148148148148" calcext:value-type="float">
            <text:p>0,00054814814814814800</text:p>
          </table:table-cell>
          <table:table-cell table:formula="of:=[.D66]-[.D6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4" office:value-type="float" office:value="4810" calcext:value-type="float">
            <text:p>481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56712962962963" calcext:value-type="float">
            <text:p>0,00055671296296296300</text:p>
          </table:table-cell>
          <table:table-cell table:formula="of:=[.D67]-[.D66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4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65277777777778" calcext:value-type="float">
            <text:p>0,00056527777777777800</text:p>
          </table:table-cell>
          <table:table-cell table:formula="of:=[.D68]-[.D6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4" office:value-type="float" office:value="4958" calcext:value-type="float">
            <text:p>495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73842592592593" calcext:value-type="float">
            <text:p>0,00057384259259259300</text:p>
          </table:table-cell>
          <table:table-cell table:formula="of:=[.D69]-[.D68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4" office:value-type="float" office:value="5032" calcext:value-type="float">
            <text:p>503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82407407407408" calcext:value-type="float">
            <text:p>0,00058240740740740800</text:p>
          </table:table-cell>
          <table:table-cell table:formula="of:=[.D70]-[.D6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4" office:value-type="float" office:value="5106" calcext:value-type="float">
            <text:p>510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90972222222222" calcext:value-type="float">
            <text:p>0,00059097222222222200</text:p>
          </table:table-cell>
          <table:table-cell table:formula="of:=[.D71]-[.D7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4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99537037037037" calcext:value-type="float">
            <text:p>0,00059953703703703700</text:p>
          </table:table-cell>
          <table:table-cell table:formula="of:=[.D72]-[.D71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4" office:value-type="float" office:value="5254" calcext:value-type="float">
            <text:p>525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08101851851852" calcext:value-type="float">
            <text:p>0,00060810185185185200</text:p>
          </table:table-cell>
          <table:table-cell table:formula="of:=[.D73]-[.D7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4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16666666666667" calcext:value-type="float">
            <text:p>0,00061666666666666700</text:p>
          </table:table-cell>
          <table:table-cell table:formula="of:=[.D74]-[.D73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4" office:value-type="float" office:value="5402" calcext:value-type="float">
            <text:p>540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25231481481482" calcext:value-type="float">
            <text:p>0,00062523148148148200</text:p>
          </table:table-cell>
          <table:table-cell table:formula="of:=[.D75]-[.D7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4" office:value-type="float" office:value="5476" calcext:value-type="float">
            <text:p>547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33796296296296" calcext:value-type="float">
            <text:p>0,00063379629629629600</text:p>
          </table:table-cell>
          <table:table-cell table:formula="of:=[.D76]-[.D75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4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42361111111111" calcext:value-type="float">
            <text:p>0,00064236111111111100</text:p>
          </table:table-cell>
          <table:table-cell table:formula="of:=[.D77]-[.D7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4" office:value-type="float" office:value="5624" calcext:value-type="float">
            <text:p>562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50925925925926" calcext:value-type="float">
            <text:p>0,00065092592592592600</text:p>
          </table:table-cell>
          <table:table-cell table:formula="of:=[.D78]-[.D77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4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59490740740741" calcext:value-type="float">
            <text:p>0,00065949074074074100</text:p>
          </table:table-cell>
          <table:table-cell table:formula="of:=[.D79]-[.D7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4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68055555555556" calcext:value-type="float">
            <text:p>0,00066805555555555600</text:p>
          </table:table-cell>
          <table:table-cell table:formula="of:=[.D80]-[.D79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4" office:value-type="float" office:value="5846" calcext:value-type="float">
            <text:p>584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7662037037037" calcext:value-type="float">
            <text:p>0,00067662037037037000</text:p>
          </table:table-cell>
          <table:table-cell table:formula="of:=[.D81]-[.D8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4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85185185185185" calcext:value-type="float">
            <text:p>0,00068518518518518500</text:p>
          </table:table-cell>
          <table:table-cell table:formula="of:=[.D82]-[.D81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4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9375" calcext:value-type="float">
            <text:p>0,00069375000000000000</text:p>
          </table:table-cell>
          <table:table-cell table:formula="of:=[.D83]-[.D8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4" office:value-type="float" office:value="6068" calcext:value-type="float">
            <text:p>606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02314814814815" calcext:value-type="float">
            <text:p>0,00070231481481481500</text:p>
          </table:table-cell>
          <table:table-cell table:formula="of:=[.D84]-[.D83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4" office:value-type="float" office:value="6142" calcext:value-type="float">
            <text:p>614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1087962962963" calcext:value-type="float">
            <text:p>0,00071087962962963000</text:p>
          </table:table-cell>
          <table:table-cell table:formula="of:=[.D85]-[.D8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4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19444444444444" calcext:value-type="float">
            <text:p>0,00071944444444444400</text:p>
          </table:table-cell>
          <table:table-cell table:formula="of:=[.D86]-[.D85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4" office:value-type="float" office:value="6290" calcext:value-type="float">
            <text:p>629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28009259259259" calcext:value-type="float">
            <text:p>0,00072800925925925900</text:p>
          </table:table-cell>
          <table:table-cell table:formula="of:=[.D87]-[.D8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4" office:value-type="float" office:value="6364" calcext:value-type="float">
            <text:p>636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36574074074074" calcext:value-type="float">
            <text:p>0,00073657407407407400</text:p>
          </table:table-cell>
          <table:table-cell table:formula="of:=[.D88]-[.D87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4" office:value-type="float" office:value="6438" calcext:value-type="float">
            <text:p>643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45138888888889" calcext:value-type="float">
            <text:p>0,00074513888888888900</text:p>
          </table:table-cell>
          <table:table-cell table:formula="of:=[.D89]-[.D8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4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53703703703704" calcext:value-type="float">
            <text:p>0,00075370370370370400</text:p>
          </table:table-cell>
          <table:table-cell table:formula="of:=[.D90]-[.D89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4" office:value-type="float" office:value="6586" calcext:value-type="float">
            <text:p>658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62268518518519" calcext:value-type="float">
            <text:p>0,00076226851851851900</text:p>
          </table:table-cell>
          <table:table-cell table:formula="of:=[.D91]-[.D9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4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70833333333333" calcext:value-type="float">
            <text:p>0,00077083333333333300</text:p>
          </table:table-cell>
          <table:table-cell table:formula="of:=[.D92]-[.D9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4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79398148148148" calcext:value-type="float">
            <text:p>0,00077939814814814800</text:p>
          </table:table-cell>
          <table:table-cell table:formula="of:=[.D93]-[.D92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4" office:value-type="float" office:value="6808" calcext:value-type="float">
            <text:p>680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87962962962963" calcext:value-type="float">
            <text:p>0,00078796296296296300</text:p>
          </table:table-cell>
          <table:table-cell table:formula="of:=[.D94]-[.D9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4" office:value-type="float" office:value="6882" calcext:value-type="float">
            <text:p>688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96527777777778" calcext:value-type="float">
            <text:p>0,00079652777777777800</text:p>
          </table:table-cell>
          <table:table-cell table:formula="of:=[.D95]-[.D94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4" office:value-type="float" office:value="6956" calcext:value-type="float">
            <text:p>695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05092592592593" calcext:value-type="float">
            <text:p>0,00080509259259259300</text:p>
          </table:table-cell>
          <table:table-cell table:formula="of:=[.D96]-[.D9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4" office:value-type="float" office:value="7030" calcext:value-type="float">
            <text:p>703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13657407407407" calcext:value-type="float">
            <text:p>0,00081365740740740700</text:p>
          </table:table-cell>
          <table:table-cell table:formula="of:=[.D97]-[.D96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4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22222222222222" calcext:value-type="float">
            <text:p>0,00082222222222222200</text:p>
          </table:table-cell>
          <table:table-cell table:formula="of:=[.D98]-[.D9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4" office:value-type="float" office:value="7178" calcext:value-type="float">
            <text:p>717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30787037037037" calcext:value-type="float">
            <text:p>0,00083078703703703700</text:p>
          </table:table-cell>
          <table:table-cell table:formula="of:=[.D99]-[.D98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4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39351851851852" calcext:value-type="float">
            <text:p>0,00083935185185185200</text:p>
          </table:table-cell>
          <table:table-cell table:formula="of:=[.D100]-[.D9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4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47916666666667" calcext:value-type="float">
            <text:p>0,00084791666666666700</text:p>
          </table:table-cell>
          <table:table-cell table:formula="of:=[.D101]-[.D100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4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56481481481482" calcext:value-type="float">
            <text:p>0,00085648148148148200</text:p>
          </table:table-cell>
          <table:table-cell table:formula="of:=[.D102]-[.D10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4" office:value-type="float" office:value="7474" calcext:value-type="float">
            <text:p>747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65046296296296" calcext:value-type="float">
            <text:p>0,00086504629629629600</text:p>
          </table:table-cell>
          <table:table-cell table:formula="of:=[.D103]-[.D102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4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73611111111111" calcext:value-type="float">
            <text:p>0,00087361111111111100</text:p>
          </table:table-cell>
          <table:table-cell table:formula="of:=[.D104]-[.D10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4" office:value-type="float" office:value="7622" calcext:value-type="float">
            <text:p>762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82175925925926" calcext:value-type="float">
            <text:p>0,00088217592592592600</text:p>
          </table:table-cell>
          <table:table-cell table:formula="of:=[.D105]-[.D104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4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90740740740741" calcext:value-type="float">
            <text:p>0,00089074074074074100</text:p>
          </table:table-cell>
          <table:table-cell table:formula="of:=[.D106]-[.D10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4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99305555555556" calcext:value-type="float">
            <text:p>0,00089930555555555600</text:p>
          </table:table-cell>
          <table:table-cell table:formula="of:=[.D107]-[.D106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4" office:value-type="float" office:value="7844" calcext:value-type="float">
            <text:p>784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0787037037037" calcext:value-type="float">
            <text:p>0,00090787037037037000</text:p>
          </table:table-cell>
          <table:table-cell table:formula="of:=[.D108]-[.D10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4" office:value-type="float" office:value="7918" calcext:value-type="float">
            <text:p>791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16435185185185" calcext:value-type="float">
            <text:p>0,00091643518518518500</text:p>
          </table:table-cell>
          <table:table-cell table:formula="of:=[.D109]-[.D108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4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25" calcext:value-type="float">
            <text:p>0,00092500000000000000</text:p>
          </table:table-cell>
          <table:table-cell table:formula="of:=[.D110]-[.D10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4" office:value-type="float" office:value="8066" calcext:value-type="float">
            <text:p>806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33564814814815" calcext:value-type="float">
            <text:p>0,00093356481481481500</text:p>
          </table:table-cell>
          <table:table-cell table:formula="of:=[.D111]-[.D110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4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4212962962963" calcext:value-type="float">
            <text:p>0,00094212962962963000</text:p>
          </table:table-cell>
          <table:table-cell table:formula="of:=[.D112]-[.D11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4" office:value-type="float" office:value="8214" calcext:value-type="float">
            <text:p>821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50694444444444" calcext:value-type="float">
            <text:p>0,00095069444444444400</text:p>
          </table:table-cell>
          <table:table-cell table:formula="of:=[.D113]-[.D112]" office:value-type="float" office:value="0.00000856481481481487" calcext:value-type="float">
            <text:p>0,00000856481481481487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4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59259259259259" calcext:value-type="float">
            <text:p>0,00095925925925925900</text:p>
          </table:table-cell>
          <table:table-cell table:formula="of:=[.D114]-[.D11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4" office:value-type="float" office:value="8362" calcext:value-type="float">
            <text:p>836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67824074074074" calcext:value-type="float">
            <text:p>0,00096782407407407400</text:p>
          </table:table-cell>
          <table:table-cell table:formula="of:=[.D115]-[.D11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4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76388888888889" calcext:value-type="float">
            <text:p>0,00097638888888888900</text:p>
          </table:table-cell>
          <table:table-cell table:formula="of:=[.D116]-[.D11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4" office:value-type="float" office:value="8510" calcext:value-type="float">
            <text:p>851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84953703703704" calcext:value-type="float">
            <text:p>0,00098495370370370400</text:p>
          </table:table-cell>
          <table:table-cell table:formula="of:=[.D117]-[.D11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4" office:value-type="float" office:value="8584" calcext:value-type="float">
            <text:p>858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93518518518519" calcext:value-type="float">
            <text:p>0,00099351851851851900</text:p>
          </table:table-cell>
          <table:table-cell table:formula="of:=[.D118]-[.D11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4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0208333333333" calcext:value-type="float">
            <text:p>0,00100208333333333000</text:p>
          </table:table-cell>
          <table:table-cell table:formula="of:=[.D119]-[.D11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4" office:value-type="float" office:value="8732" calcext:value-type="float">
            <text:p>873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1064814814815" calcext:value-type="float">
            <text:p>0,00101064814814815000</text:p>
          </table:table-cell>
          <table:table-cell table:formula="of:=[.D120]-[.D11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4" office:value-type="float" office:value="8806" calcext:value-type="float">
            <text:p>880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1921296296296" calcext:value-type="float">
            <text:p>0,00101921296296296000</text:p>
          </table:table-cell>
          <table:table-cell table:formula="of:=[.D121]-[.D12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4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2777777777778" calcext:value-type="float">
            <text:p>0,00102777777777778000</text:p>
          </table:table-cell>
          <table:table-cell table:formula="of:=[.D122]-[.D12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4" office:value-type="float" office:value="8954" calcext:value-type="float">
            <text:p>895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3634259259259" calcext:value-type="float">
            <text:p>0,00103634259259259000</text:p>
          </table:table-cell>
          <table:table-cell table:formula="of:=[.D123]-[.D12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4" office:value-type="float" office:value="9028" calcext:value-type="float">
            <text:p>902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4490740740741" calcext:value-type="float">
            <text:p>0,00104490740740741000</text:p>
          </table:table-cell>
          <table:table-cell table:formula="of:=[.D124]-[.D12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4" office:value-type="float" office:value="9102" calcext:value-type="float">
            <text:p>910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5347222222222" calcext:value-type="float">
            <text:p>0,00105347222222222000</text:p>
          </table:table-cell>
          <table:table-cell table:formula="of:=[.D125]-[.D12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4" office:value-type="float" office:value="9176" calcext:value-type="float">
            <text:p>917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6203703703704" calcext:value-type="float">
            <text:p>0,00106203703703704000</text:p>
          </table:table-cell>
          <table:table-cell table:formula="of:=[.D126]-[.D12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4" office:value-type="float" office:value="9250" calcext:value-type="float">
            <text:p>9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7060185185185" calcext:value-type="float">
            <text:p>0,00107060185185185000</text:p>
          </table:table-cell>
          <table:table-cell table:formula="of:=[.D127]-[.D12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4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7916666666667" calcext:value-type="float">
            <text:p>0,00107916666666667000</text:p>
          </table:table-cell>
          <table:table-cell table:formula="of:=[.D128]-[.D12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4" office:value-type="float" office:value="9398" calcext:value-type="float">
            <text:p>939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08773148148148" calcext:value-type="float">
            <text:p>0,00108773148148148000</text:p>
          </table:table-cell>
          <table:table-cell table:formula="of:=[.D129]-[.D12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4" office:value-type="float" office:value="9472" calcext:value-type="float">
            <text:p>947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962962962963" calcext:value-type="float">
            <text:p>0,00109629629629630000</text:p>
          </table:table-cell>
          <table:table-cell table:formula="of:=[.D130]-[.D12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4" office:value-type="float" office:value="9546" calcext:value-type="float">
            <text:p>954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0486111111111" calcext:value-type="float">
            <text:p>0,00110486111111111000</text:p>
          </table:table-cell>
          <table:table-cell table:formula="of:=[.D131]-[.D13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4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11342592592593" calcext:value-type="float">
            <text:p>0,00111342592592593000</text:p>
          </table:table-cell>
          <table:table-cell table:formula="of:=[.D132]-[.D13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4" office:value-type="float" office:value="9694" calcext:value-type="float">
            <text:p>969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2199074074074" calcext:value-type="float">
            <text:p>0,00112199074074074000</text:p>
          </table:table-cell>
          <table:table-cell table:formula="of:=[.D133]-[.D13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4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3055555555556" calcext:value-type="float">
            <text:p>0,00113055555555556000</text:p>
          </table:table-cell>
          <table:table-cell table:formula="of:=[.D134]-[.D13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4" office:value-type="float" office:value="9842" calcext:value-type="float">
            <text:p>984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13912037037037" calcext:value-type="float">
            <text:p>0,00113912037037037000</text:p>
          </table:table-cell>
          <table:table-cell table:formula="of:=[.D135]-[.D13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4" office:value-type="float" office:value="9916" calcext:value-type="float">
            <text:p>991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4768518518519" calcext:value-type="float">
            <text:p>0,00114768518518519000</text:p>
          </table:table-cell>
          <table:table-cell table:formula="of:=[.D136]-[.D13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4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15625" calcext:value-type="float">
            <text:p>0,00115625000000000000</text:p>
          </table:table-cell>
          <table:table-cell table:formula="of:=[.D137]-[.D13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4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6481481481482" calcext:value-type="float">
            <text:p>0,00116481481481482000</text:p>
          </table:table-cell>
          <table:table-cell table:formula="of:=[.D138]-[.D13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4" office:value-type="float" office:value="10138" calcext:value-type="float">
            <text:p>1013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17337962962963" calcext:value-type="float">
            <text:p>0,00117337962962963000</text:p>
          </table:table-cell>
          <table:table-cell table:formula="of:=[.D139]-[.D13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4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8194444444444" calcext:value-type="float">
            <text:p>0,00118194444444444000</text:p>
          </table:table-cell>
          <table:table-cell table:formula="of:=[.D140]-[.D13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4" office:value-type="float" office:value="10286" calcext:value-type="float">
            <text:p>1028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19050925925926" calcext:value-type="float">
            <text:p>0,00119050925925926000</text:p>
          </table:table-cell>
          <table:table-cell table:formula="of:=[.D141]-[.D14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4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9907407407407" calcext:value-type="float">
            <text:p>0,00119907407407407000</text:p>
          </table:table-cell>
          <table:table-cell table:formula="of:=[.D142]-[.D14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4" office:value-type="float" office:value="10434" calcext:value-type="float">
            <text:p>1043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20763888888889" calcext:value-type="float">
            <text:p>0,00120763888888889000</text:p>
          </table:table-cell>
          <table:table-cell table:formula="of:=[.D143]-[.D14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4" office:value-type="float" office:value="10508" calcext:value-type="float">
            <text:p>1050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2162037037037" calcext:value-type="float">
            <text:p>0,00121620370370370000</text:p>
          </table:table-cell>
          <table:table-cell table:formula="of:=[.D144]-[.D14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4" office:value-type="float" office:value="10582" calcext:value-type="float">
            <text:p>1058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22476851851852" calcext:value-type="float">
            <text:p>0,00122476851851852000</text:p>
          </table:table-cell>
          <table:table-cell table:formula="of:=[.D145]-[.D14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4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23333333333333" calcext:value-type="float">
            <text:p>0,00123333333333333000</text:p>
          </table:table-cell>
          <table:table-cell table:formula="of:=[.D146]-[.D14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4" office:value-type="float" office:value="10730" calcext:value-type="float">
            <text:p>1073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24189814814815" calcext:value-type="float">
            <text:p>0,00124189814814815000</text:p>
          </table:table-cell>
          <table:table-cell table:formula="of:=[.D147]-[.D14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4" office:value-type="float" office:value="10804" calcext:value-type="float">
            <text:p>1080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25046296296296" calcext:value-type="float">
            <text:p>0,00125046296296296000</text:p>
          </table:table-cell>
          <table:table-cell table:formula="of:=[.D148]-[.D14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4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25902777777778" calcext:value-type="float">
            <text:p>0,00125902777777778000</text:p>
          </table:table-cell>
          <table:table-cell table:formula="of:=[.D149]-[.D14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4" office:value-type="float" office:value="10952" calcext:value-type="float">
            <text:p>1095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26759259259259" calcext:value-type="float">
            <text:p>0,00126759259259259000</text:p>
          </table:table-cell>
          <table:table-cell table:formula="of:=[.D150]-[.D14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4" office:value-type="float" office:value="11026" calcext:value-type="float">
            <text:p>1102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27615740740741" calcext:value-type="float">
            <text:p>0,00127615740740741000</text:p>
          </table:table-cell>
          <table:table-cell table:formula="of:=[.D151]-[.D15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4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28472222222222" calcext:value-type="float">
            <text:p>0,00128472222222222000</text:p>
          </table:table-cell>
          <table:table-cell table:formula="of:=[.D152]-[.D15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4" office:value-type="float" office:value="11174" calcext:value-type="float">
            <text:p>1117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29328703703704" calcext:value-type="float">
            <text:p>0,00129328703703704000</text:p>
          </table:table-cell>
          <table:table-cell table:formula="of:=[.D153]-[.D15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4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30185185185185" calcext:value-type="float">
            <text:p>0,00130185185185185000</text:p>
          </table:table-cell>
          <table:table-cell table:formula="of:=[.D154]-[.D15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4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31041666666667" calcext:value-type="float">
            <text:p>0,00131041666666667000</text:p>
          </table:table-cell>
          <table:table-cell table:formula="of:=[.D155]-[.D15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4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31898148148148" calcext:value-type="float">
            <text:p>0,00131898148148148000</text:p>
          </table:table-cell>
          <table:table-cell table:formula="of:=[.D156]-[.D15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4" office:value-type="float" office:value="11470" calcext:value-type="float">
            <text:p>1147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3275462962963" calcext:value-type="float">
            <text:p>0,00132754629629630000</text:p>
          </table:table-cell>
          <table:table-cell table:formula="of:=[.D157]-[.D15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4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33611111111111" calcext:value-type="float">
            <text:p>0,00133611111111111000</text:p>
          </table:table-cell>
          <table:table-cell table:formula="of:=[.D158]-[.D15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4" office:value-type="float" office:value="11618" calcext:value-type="float">
            <text:p>1161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34467592592593" calcext:value-type="float">
            <text:p>0,00134467592592593000</text:p>
          </table:table-cell>
          <table:table-cell table:formula="of:=[.D159]-[.D15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4" office:value-type="float" office:value="11692" calcext:value-type="float">
            <text:p>1169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35324074074074" calcext:value-type="float">
            <text:p>0,00135324074074074000</text:p>
          </table:table-cell>
          <table:table-cell table:formula="of:=[.D160]-[.D15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4" office:value-type="float" office:value="11766" calcext:value-type="float">
            <text:p>1176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36180555555556" calcext:value-type="float">
            <text:p>0,00136180555555556000</text:p>
          </table:table-cell>
          <table:table-cell table:formula="of:=[.D161]-[.D16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4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37037037037037" calcext:value-type="float">
            <text:p>0,00137037037037037000</text:p>
          </table:table-cell>
          <table:table-cell table:formula="of:=[.D162]-[.D16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4" office:value-type="float" office:value="11914" calcext:value-type="float">
            <text:p>1191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37893518518519" calcext:value-type="float">
            <text:p>0,00137893518518519000</text:p>
          </table:table-cell>
          <table:table-cell table:formula="of:=[.D163]-[.D16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4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3875" calcext:value-type="float">
            <text:p>0,00138750000000000000</text:p>
          </table:table-cell>
          <table:table-cell table:formula="of:=[.D164]-[.D16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4" office:value-type="float" office:value="12062" calcext:value-type="float">
            <text:p>1206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39606481481481" calcext:value-type="float">
            <text:p>0,00139606481481481000</text:p>
          </table:table-cell>
          <table:table-cell table:formula="of:=[.D165]-[.D16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4" office:value-type="float" office:value="12136" calcext:value-type="float">
            <text:p>1213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40462962962963" calcext:value-type="float">
            <text:p>0,00140462962962963000</text:p>
          </table:table-cell>
          <table:table-cell table:formula="of:=[.D166]-[.D16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4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41319444444444" calcext:value-type="float">
            <text:p>0,00141319444444444000</text:p>
          </table:table-cell>
          <table:table-cell table:formula="of:=[.D167]-[.D16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4" office:value-type="float" office:value="12284" calcext:value-type="float">
            <text:p>1228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42175925925926" calcext:value-type="float">
            <text:p>0,00142175925925926000</text:p>
          </table:table-cell>
          <table:table-cell table:formula="of:=[.D168]-[.D16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4" office:value-type="float" office:value="12358" calcext:value-type="float">
            <text:p>1235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43032407407407" calcext:value-type="float">
            <text:p>0,00143032407407407000</text:p>
          </table:table-cell>
          <table:table-cell table:formula="of:=[.D169]-[.D16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4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43888888888889" calcext:value-type="float">
            <text:p>0,00143888888888889000</text:p>
          </table:table-cell>
          <table:table-cell table:formula="of:=[.D170]-[.D16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4" office:value-type="float" office:value="12506" calcext:value-type="float">
            <text:p>1250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4474537037037" calcext:value-type="float">
            <text:p>0,00144745370370370000</text:p>
          </table:table-cell>
          <table:table-cell table:formula="of:=[.D171]-[.D17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4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45601851851852" calcext:value-type="float">
            <text:p>0,00145601851851852000</text:p>
          </table:table-cell>
          <table:table-cell table:formula="of:=[.D172]-[.D17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4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46458333333333" calcext:value-type="float">
            <text:p>0,00146458333333333000</text:p>
          </table:table-cell>
          <table:table-cell table:formula="of:=[.D173]-[.D17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4" office:value-type="float" office:value="12728" calcext:value-type="float">
            <text:p>1272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47314814814815" calcext:value-type="float">
            <text:p>0,00147314814814815000</text:p>
          </table:table-cell>
          <table:table-cell table:formula="of:=[.D174]-[.D17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4" office:value-type="float" office:value="12802" calcext:value-type="float">
            <text:p>1280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48171296296296" calcext:value-type="float">
            <text:p>0,00148171296296296000</text:p>
          </table:table-cell>
          <table:table-cell table:formula="of:=[.D175]-[.D17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4" office:value-type="float" office:value="12876" calcext:value-type="float">
            <text:p>1287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49027777777778" calcext:value-type="float">
            <text:p>0,00149027777777778000</text:p>
          </table:table-cell>
          <table:table-cell table:formula="of:=[.D176]-[.D17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4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49884259259259" calcext:value-type="float">
            <text:p>0,00149884259259259000</text:p>
          </table:table-cell>
          <table:table-cell table:formula="of:=[.D177]-[.D17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4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50740740740741" calcext:value-type="float">
            <text:p>0,00150740740740741000</text:p>
          </table:table-cell>
          <table:table-cell table:formula="of:=[.D178]-[.D17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4" office:value-type="float" office:value="13098" calcext:value-type="float">
            <text:p>1309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51597222222222" calcext:value-type="float">
            <text:p>0,00151597222222222000</text:p>
          </table:table-cell>
          <table:table-cell table:formula="of:=[.D179]-[.D17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4" office:value-type="float" office:value="13172" calcext:value-type="float">
            <text:p>1317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52453703703704" calcext:value-type="float">
            <text:p>0,00152453703703704000</text:p>
          </table:table-cell>
          <table:table-cell table:formula="of:=[.D180]-[.D17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4" office:value-type="float" office:value="13246" calcext:value-type="float">
            <text:p>1324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53310185185185" calcext:value-type="float">
            <text:p>0,00153310185185185000</text:p>
          </table:table-cell>
          <table:table-cell table:formula="of:=[.D181]-[.D18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4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54166666666667" calcext:value-type="float">
            <text:p>0,00154166666666667000</text:p>
          </table:table-cell>
          <table:table-cell table:formula="of:=[.D182]-[.D18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4" office:value-type="float" office:value="13394" calcext:value-type="float">
            <text:p>1339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55023148148148" calcext:value-type="float">
            <text:p>0,00155023148148148000</text:p>
          </table:table-cell>
          <table:table-cell table:formula="of:=[.D183]-[.D18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4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5587962962963" calcext:value-type="float">
            <text:p>0,00155879629629630000</text:p>
          </table:table-cell>
          <table:table-cell table:formula="of:=[.D184]-[.D18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4" office:value-type="float" office:value="13542" calcext:value-type="float">
            <text:p>1354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56736111111111" calcext:value-type="float">
            <text:p>0,00156736111111111000</text:p>
          </table:table-cell>
          <table:table-cell table:formula="of:=[.D185]-[.D18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4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57592592592593" calcext:value-type="float">
            <text:p>0,00157592592592593000</text:p>
          </table:table-cell>
          <table:table-cell table:formula="of:=[.D186]-[.D18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4" office:value-type="float" office:value="13690" calcext:value-type="float">
            <text:p>1369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58449074074074" calcext:value-type="float">
            <text:p>0,00158449074074074000</text:p>
          </table:table-cell>
          <table:table-cell table:formula="of:=[.D187]-[.D18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4" office:value-type="float" office:value="13764" calcext:value-type="float">
            <text:p>1376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59305555555556" calcext:value-type="float">
            <text:p>0,00159305555555556000</text:p>
          </table:table-cell>
          <table:table-cell table:formula="of:=[.D188]-[.D18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4" office:value-type="float" office:value="13838" calcext:value-type="float">
            <text:p>1383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60162037037037" calcext:value-type="float">
            <text:p>0,00160162037037037000</text:p>
          </table:table-cell>
          <table:table-cell table:formula="of:=[.D189]-[.D18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4" office:value-type="float" office:value="13912" calcext:value-type="float">
            <text:p>1391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61018518518519" calcext:value-type="float">
            <text:p>0,00161018518518519000</text:p>
          </table:table-cell>
          <table:table-cell table:formula="of:=[.D190]-[.D18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4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61875" calcext:value-type="float">
            <text:p>0,00161875000000000000</text:p>
          </table:table-cell>
          <table:table-cell table:formula="of:=[.D191]-[.D19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4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62731481481481" calcext:value-type="float">
            <text:p>0,00162731481481481000</text:p>
          </table:table-cell>
          <table:table-cell table:formula="of:=[.D192]-[.D19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4" office:value-type="float" office:value="14134" calcext:value-type="float">
            <text:p>1413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63587962962963" calcext:value-type="float">
            <text:p>0,00163587962962963000</text:p>
          </table:table-cell>
          <table:table-cell table:formula="of:=[.D193]-[.D19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4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64444444444444" calcext:value-type="float">
            <text:p>0,00164444444444444000</text:p>
          </table:table-cell>
          <table:table-cell table:formula="of:=[.D194]-[.D19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4" office:value-type="float" office:value="14282" calcext:value-type="float">
            <text:p>1428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65300925925926" calcext:value-type="float">
            <text:p>0,00165300925925926000</text:p>
          </table:table-cell>
          <table:table-cell table:formula="of:=[.D195]-[.D19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4" office:value-type="float" office:value="14356" calcext:value-type="float">
            <text:p>1435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66157407407407" calcext:value-type="float">
            <text:p>0,00166157407407407000</text:p>
          </table:table-cell>
          <table:table-cell table:formula="of:=[.D196]-[.D19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4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67013888888889" calcext:value-type="float">
            <text:p>0,00167013888888889000</text:p>
          </table:table-cell>
          <table:table-cell table:formula="of:=[.D197]-[.D19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4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6787037037037" calcext:value-type="float">
            <text:p>0,00167870370370370000</text:p>
          </table:table-cell>
          <table:table-cell table:formula="of:=[.D198]-[.D19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4" office:value-type="float" office:value="14578" calcext:value-type="float">
            <text:p>1457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68726851851852" calcext:value-type="float">
            <text:p>0,00168726851851852000</text:p>
          </table:table-cell>
          <table:table-cell table:formula="of:=[.D199]-[.D19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4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69583333333333" calcext:value-type="float">
            <text:p>0,00169583333333333000</text:p>
          </table:table-cell>
          <table:table-cell table:formula="of:=[.D200]-[.D19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4" office:value-type="float" office:value="14726" calcext:value-type="float">
            <text:p>1472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70439814814815" calcext:value-type="float">
            <text:p>0,00170439814814815000</text:p>
          </table:table-cell>
          <table:table-cell table:formula="of:=[.D201]-[.D20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4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71296296296296" calcext:value-type="float">
            <text:p>0,00171296296296296000</text:p>
          </table:table-cell>
          <table:table-cell table:formula="of:=[.D202]-[.D20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4" office:value-type="float" office:value="14874" calcext:value-type="float">
            <text:p>1487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72152777777778" calcext:value-type="float">
            <text:p>0,00172152777777778000</text:p>
          </table:table-cell>
          <table:table-cell table:formula="of:=[.D203]-[.D20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4" office:value-type="float" office:value="14948" calcext:value-type="float">
            <text:p>1494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73009259259259" calcext:value-type="float">
            <text:p>0,00173009259259259000</text:p>
          </table:table-cell>
          <table:table-cell table:formula="of:=[.D204]-[.D20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4" office:value-type="float" office:value="15022" calcext:value-type="float">
            <text:p>1502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73865740740741" calcext:value-type="float">
            <text:p>0,00173865740740741000</text:p>
          </table:table-cell>
          <table:table-cell table:formula="of:=[.D205]-[.D20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4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74722222222222" calcext:value-type="float">
            <text:p>0,00174722222222222000</text:p>
          </table:table-cell>
          <table:table-cell table:formula="of:=[.D206]-[.D20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4" office:value-type="float" office:value="15170" calcext:value-type="float">
            <text:p>1517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75578703703704" calcext:value-type="float">
            <text:p>0,00175578703703704000</text:p>
          </table:table-cell>
          <table:table-cell table:formula="of:=[.D207]-[.D20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4" office:value-type="float" office:value="15244" calcext:value-type="float">
            <text:p>1524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76435185185185" calcext:value-type="float">
            <text:p>0,00176435185185185000</text:p>
          </table:table-cell>
          <table:table-cell table:formula="of:=[.D208]-[.D20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4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77291666666667" calcext:value-type="float">
            <text:p>0,00177291666666667000</text:p>
          </table:table-cell>
          <table:table-cell table:formula="of:=[.D209]-[.D20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4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78148148148148" calcext:value-type="float">
            <text:p>0,00178148148148148000</text:p>
          </table:table-cell>
          <table:table-cell table:formula="of:=[.D210]-[.D20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4" office:value-type="float" office:value="15466" calcext:value-type="float">
            <text:p>1546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7900462962963" calcext:value-type="float">
            <text:p>0,00179004629629630000</text:p>
          </table:table-cell>
          <table:table-cell table:formula="of:=[.D211]-[.D210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4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79861111111111" calcext:value-type="float">
            <text:p>0,00179861111111111000</text:p>
          </table:table-cell>
          <table:table-cell table:formula="of:=[.D212]-[.D21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4" office:value-type="float" office:value="15614" calcext:value-type="float">
            <text:p>1561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80717592592593" calcext:value-type="float">
            <text:p>0,00180717592592593000</text:p>
          </table:table-cell>
          <table:table-cell table:formula="of:=[.D213]-[.D21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4" office:value-type="float" office:value="15688" calcext:value-type="float">
            <text:p>1568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81574074074074" calcext:value-type="float">
            <text:p>0,00181574074074074000</text:p>
          </table:table-cell>
          <table:table-cell table:formula="of:=[.D214]-[.D21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4" office:value-type="float" office:value="15762" calcext:value-type="float">
            <text:p>1576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82430555555556" calcext:value-type="float">
            <text:p>0,00182430555555556000</text:p>
          </table:table-cell>
          <table:table-cell table:formula="of:=[.D215]-[.D214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4" office:value-type="float" office:value="15836" calcext:value-type="float">
            <text:p>1583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83287037037037" calcext:value-type="float">
            <text:p>0,00183287037037037000</text:p>
          </table:table-cell>
          <table:table-cell table:formula="of:=[.D216]-[.D21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4" office:value-type="float" office:value="15910" calcext:value-type="float">
            <text:p>1591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84143518518519" calcext:value-type="float">
            <text:p>0,00184143518518519000</text:p>
          </table:table-cell>
          <table:table-cell table:formula="of:=[.D217]-[.D21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4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85" calcext:value-type="float">
            <text:p>0,00185000000000000000</text:p>
          </table:table-cell>
          <table:table-cell table:formula="of:=[.D218]-[.D21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4" office:value-type="float" office:value="16058" calcext:value-type="float">
            <text:p>1605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85856481481481" calcext:value-type="float">
            <text:p>0,00185856481481481000</text:p>
          </table:table-cell>
          <table:table-cell table:formula="of:=[.D219]-[.D21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4" office:value-type="float" office:value="16132" calcext:value-type="float">
            <text:p>1613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86712962962963" calcext:value-type="float">
            <text:p>0,00186712962962963000</text:p>
          </table:table-cell>
          <table:table-cell table:formula="of:=[.D220]-[.D219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4" office:value-type="float" office:value="16206" calcext:value-type="float">
            <text:p>1620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87569444444444" calcext:value-type="float">
            <text:p>0,00187569444444444000</text:p>
          </table:table-cell>
          <table:table-cell table:formula="of:=[.D221]-[.D22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4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88425925925926" calcext:value-type="float">
            <text:p>0,00188425925925926000</text:p>
          </table:table-cell>
          <table:table-cell table:formula="of:=[.D222]-[.D221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4" office:value-type="float" office:value="16354" calcext:value-type="float">
            <text:p>1635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89282407407407" calcext:value-type="float">
            <text:p>0,00189282407407407000</text:p>
          </table:table-cell>
          <table:table-cell table:formula="of:=[.D223]-[.D222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4" office:value-type="float" office:value="16428" calcext:value-type="float">
            <text:p>1642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90138888888889" calcext:value-type="float">
            <text:p>0,00190138888888889000</text:p>
          </table:table-cell>
          <table:table-cell table:formula="of:=[.D224]-[.D223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4" office:value-type="float" office:value="16502" calcext:value-type="float">
            <text:p>1650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9099537037037" calcext:value-type="float">
            <text:p>0,00190995370370370000</text:p>
          </table:table-cell>
          <table:table-cell table:formula="of:=[.D225]-[.D22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4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91851851851852" calcext:value-type="float">
            <text:p>0,00191851851851852000</text:p>
          </table:table-cell>
          <table:table-cell table:formula="of:=[.D226]-[.D225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4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92708333333333" calcext:value-type="float">
            <text:p>0,00192708333333333000</text:p>
          </table:table-cell>
          <table:table-cell table:formula="of:=[.D227]-[.D226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4" office:value-type="float" office:value="16724" calcext:value-type="float">
            <text:p>1672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93564814814815" calcext:value-type="float">
            <text:p>0,00193564814814815000</text:p>
          </table:table-cell>
          <table:table-cell table:formula="of:=[.D228]-[.D227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4" office:value-type="float" office:value="16798" calcext:value-type="float">
            <text:p>1679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94421296296296" calcext:value-type="float">
            <text:p>0,00194421296296296000</text:p>
          </table:table-cell>
          <table:table-cell table:formula="of:=[.D229]-[.D228]" office:value-type="float" office:value="0.00000856481481481476" calcext:value-type="float">
            <text:p>0,00000856481481481476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4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95277777777778" calcext:value-type="float">
            <text:p>0,00195277777777778000</text:p>
          </table:table-cell>
          <table:table-cell table:formula="of:=[.D230]-[.D22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4" office:value-type="float" office:value="16946" calcext:value-type="float">
            <text:p>1694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96134259259259" calcext:value-type="float">
            <text:p>0,00196134259259259000</text:p>
          </table:table-cell>
          <table:table-cell table:formula="of:=[.D231]-[.D230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4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96990740740741" calcext:value-type="float">
            <text:p>0,00196990740740741000</text:p>
          </table:table-cell>
          <table:table-cell table:formula="of:=[.D232]-[.D23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4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97847222222222" calcext:value-type="float">
            <text:p>0,00197847222222222000</text:p>
          </table:table-cell>
          <table:table-cell table:formula="of:=[.D233]-[.D23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4" office:value-type="float" office:value="17168" calcext:value-type="float">
            <text:p>1716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98703703703704" calcext:value-type="float">
            <text:p>0,00198703703703704000</text:p>
          </table:table-cell>
          <table:table-cell table:formula="of:=[.D234]-[.D233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4" office:value-type="float" office:value="17242" calcext:value-type="float">
            <text:p>1724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99560185185185" calcext:value-type="float">
            <text:p>0,00199560185185185000</text:p>
          </table:table-cell>
          <table:table-cell table:formula="of:=[.D235]-[.D23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4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00416666666667" calcext:value-type="float">
            <text:p>0,00200416666666667000</text:p>
          </table:table-cell>
          <table:table-cell table:formula="of:=[.D236]-[.D23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4" office:value-type="float" office:value="17390" calcext:value-type="float">
            <text:p>1739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01273148148148" calcext:value-type="float">
            <text:p>0,00201273148148148000</text:p>
          </table:table-cell>
          <table:table-cell table:formula="of:=[.D237]-[.D236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4" office:value-type="float" office:value="17464" calcext:value-type="float">
            <text:p>1746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0212962962963" calcext:value-type="float">
            <text:p>0,00202129629629630000</text:p>
          </table:table-cell>
          <table:table-cell table:formula="of:=[.D238]-[.D23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4" office:value-type="float" office:value="17538" calcext:value-type="float">
            <text:p>1753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02986111111111" calcext:value-type="float">
            <text:p>0,00202986111111111000</text:p>
          </table:table-cell>
          <table:table-cell table:formula="of:=[.D239]-[.D238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4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03842592592593" calcext:value-type="float">
            <text:p>0,00203842592592593000</text:p>
          </table:table-cell>
          <table:table-cell table:formula="of:=[.D240]-[.D23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4" office:value-type="float" office:value="17686" calcext:value-type="float">
            <text:p>1768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04699074074074" calcext:value-type="float">
            <text:p>0,00204699074074074000</text:p>
          </table:table-cell>
          <table:table-cell table:formula="of:=[.D241]-[.D24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4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05555555555556" calcext:value-type="float">
            <text:p>0,00205555555555556000</text:p>
          </table:table-cell>
          <table:table-cell table:formula="of:=[.D242]-[.D241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4" office:value-type="float" office:value="17834" calcext:value-type="float">
            <text:p>1783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06412037037037" calcext:value-type="float">
            <text:p>0,00206412037037037000</text:p>
          </table:table-cell>
          <table:table-cell table:formula="of:=[.D243]-[.D24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4" office:value-type="float" office:value="17908" calcext:value-type="float">
            <text:p>1790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07268518518519" calcext:value-type="float">
            <text:p>0,00207268518518519000</text:p>
          </table:table-cell>
          <table:table-cell table:formula="of:=[.D244]-[.D24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4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08125" calcext:value-type="float">
            <text:p>0,00208125000000000000</text:p>
          </table:table-cell>
          <table:table-cell table:formula="of:=[.D245]-[.D244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4" office:value-type="float" office:value="18056" calcext:value-type="float">
            <text:p>1805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08981481481481" calcext:value-type="float">
            <text:p>0,00208981481481481000</text:p>
          </table:table-cell>
          <table:table-cell table:formula="of:=[.D246]-[.D24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4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09837962962963" calcext:value-type="float">
            <text:p>0,00209837962962963000</text:p>
          </table:table-cell>
          <table:table-cell table:formula="of:=[.D247]-[.D246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4" office:value-type="float" office:value="18204" calcext:value-type="float">
            <text:p>1820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10694444444444" calcext:value-type="float">
            <text:p>0,00210694444444444000</text:p>
          </table:table-cell>
          <table:table-cell table:formula="of:=[.D248]-[.D24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4" office:value-type="float" office:value="18278" calcext:value-type="float">
            <text:p>1827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11550925925926" calcext:value-type="float">
            <text:p>0,00211550925925926000</text:p>
          </table:table-cell>
          <table:table-cell table:formula="of:=[.D249]-[.D24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4" office:value-type="float" office:value="18352" calcext:value-type="float">
            <text:p>1835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12407407407407" calcext:value-type="float">
            <text:p>0,00212407407407407000</text:p>
          </table:table-cell>
          <table:table-cell table:formula="of:=[.D250]-[.D249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4" office:value-type="float" office:value="18426" calcext:value-type="float">
            <text:p>1842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13263888888889" calcext:value-type="float">
            <text:p>0,00213263888888889000</text:p>
          </table:table-cell>
          <table:table-cell table:formula="of:=[.D251]-[.D25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4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1412037037037" calcext:value-type="float">
            <text:p>0,00214120370370370000</text:p>
          </table:table-cell>
          <table:table-cell table:formula="of:=[.D252]-[.D251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4" office:value-type="float" office:value="18574" calcext:value-type="float">
            <text:p>1857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14976851851852" calcext:value-type="float">
            <text:p>0,00214976851851852000</text:p>
          </table:table-cell>
          <table:table-cell table:formula="of:=[.D253]-[.D25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4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15833333333333" calcext:value-type="float">
            <text:p>0,00215833333333333000</text:p>
          </table:table-cell>
          <table:table-cell table:formula="of:=[.D254]-[.D25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4" office:value-type="float" office:value="18722" calcext:value-type="float">
            <text:p>1872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16689814814815" calcext:value-type="float">
            <text:p>0,00216689814814815000</text:p>
          </table:table-cell>
          <table:table-cell table:formula="of:=[.D255]-[.D254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4" office:value-type="float" office:value="18796" calcext:value-type="float">
            <text:p>1879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17546296296296" calcext:value-type="float">
            <text:p>0,00217546296296296000</text:p>
          </table:table-cell>
          <table:table-cell table:formula="of:=[.D256]-[.D25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4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18402777777778" calcext:value-type="float">
            <text:p>0,00218402777777778000</text:p>
          </table:table-cell>
          <table:table-cell table:formula="of:=[.D257]-[.D25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4" office:value-type="float" office:value="18944" calcext:value-type="float">
            <text:p>1894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19259259259259" calcext:value-type="float">
            <text:p>0,00219259259259259000</text:p>
          </table:table-cell>
          <table:table-cell table:formula="of:=[.D258]-[.D257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4" office:value-type="float" office:value="19018" calcext:value-type="float">
            <text:p>1901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20115740740741" calcext:value-type="float">
            <text:p>0,00220115740740741000</text:p>
          </table:table-cell>
          <table:table-cell table:formula="of:=[.D259]-[.D25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4" office:value-type="float" office:value="19092" calcext:value-type="float">
            <text:p>1909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20972222222222" calcext:value-type="float">
            <text:p>0,00220972222222222000</text:p>
          </table:table-cell>
          <table:table-cell table:formula="of:=[.D260]-[.D259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4" office:value-type="float" office:value="19166" calcext:value-type="float">
            <text:p>1916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21828703703704" calcext:value-type="float">
            <text:p>0,00221828703703704000</text:p>
          </table:table-cell>
          <table:table-cell table:formula="of:=[.D261]-[.D26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4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22685185185185" calcext:value-type="float">
            <text:p>0,00222685185185185000</text:p>
          </table:table-cell>
          <table:table-cell table:formula="of:=[.D262]-[.D26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4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23541666666667" calcext:value-type="float">
            <text:p>0,00223541666666667000</text:p>
          </table:table-cell>
          <table:table-cell table:formula="of:=[.D263]-[.D262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4" office:value-type="float" office:value="19388" calcext:value-type="float">
            <text:p>1938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24398148148148" calcext:value-type="float">
            <text:p>0,00224398148148148000</text:p>
          </table:table-cell>
          <table:table-cell table:formula="of:=[.D264]-[.D26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4" office:value-type="float" office:value="19462" calcext:value-type="float">
            <text:p>1946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2525462962963" calcext:value-type="float">
            <text:p>0,00225254629629630000</text:p>
          </table:table-cell>
          <table:table-cell table:formula="of:=[.D265]-[.D26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4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26111111111111" calcext:value-type="float">
            <text:p>0,00226111111111111000</text:p>
          </table:table-cell>
          <table:table-cell table:formula="of:=[.D266]-[.D265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4" office:value-type="float" office:value="19610" calcext:value-type="float">
            <text:p>1961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26967592592593" calcext:value-type="float">
            <text:p>0,00226967592592593000</text:p>
          </table:table-cell>
          <table:table-cell table:formula="of:=[.D267]-[.D26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4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27824074074074" calcext:value-type="float">
            <text:p>0,00227824074074074000</text:p>
          </table:table-cell>
          <table:table-cell table:formula="of:=[.D268]-[.D267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4" office:value-type="float" office:value="19758" calcext:value-type="float">
            <text:p>1975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28680555555556" calcext:value-type="float">
            <text:p>0,00228680555555556000</text:p>
          </table:table-cell>
          <table:table-cell table:formula="of:=[.D269]-[.D26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4" office:value-type="float" office:value="19832" calcext:value-type="float">
            <text:p>1983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29537037037037" calcext:value-type="float">
            <text:p>0,00229537037037037000</text:p>
          </table:table-cell>
          <table:table-cell table:formula="of:=[.D270]-[.D26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4" office:value-type="float" office:value="19906" calcext:value-type="float">
            <text:p>1990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30393518518519" calcext:value-type="float">
            <text:p>0,00230393518518519000</text:p>
          </table:table-cell>
          <table:table-cell table:formula="of:=[.D271]-[.D270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4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3125" calcext:value-type="float">
            <text:p>0,00231250000000000000</text:p>
          </table:table-cell>
          <table:table-cell table:formula="of:=[.D272]-[.D27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4" office:value-type="float" office:value="20054" calcext:value-type="float">
            <text:p>2005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32106481481482" calcext:value-type="float">
            <text:p>0,00232106481481482000</text:p>
          </table:table-cell>
          <table:table-cell table:formula="of:=[.D273]-[.D27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4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32962962962963" calcext:value-type="float">
            <text:p>0,00232962962962963000</text:p>
          </table:table-cell>
          <table:table-cell table:formula="of:=[.D274]-[.D273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4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33819444444444" calcext:value-type="float">
            <text:p>0,00233819444444444000</text:p>
          </table:table-cell>
          <table:table-cell table:formula="of:=[.D275]-[.D27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4" office:value-type="float" office:value="20276" calcext:value-type="float">
            <text:p>2027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34675925925926" calcext:value-type="float">
            <text:p>0,00234675925925926000</text:p>
          </table:table-cell>
          <table:table-cell table:formula="of:=[.D276]-[.D275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4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35532407407407" calcext:value-type="float">
            <text:p>0,00235532407407407000</text:p>
          </table:table-cell>
          <table:table-cell table:formula="of:=[.D277]-[.D27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4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36388888888889" calcext:value-type="float">
            <text:p>0,00236388888888889000</text:p>
          </table:table-cell>
          <table:table-cell table:formula="of:=[.D278]-[.D27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4" office:value-type="float" office:value="20498" calcext:value-type="float">
            <text:p>2049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3724537037037" calcext:value-type="float">
            <text:p>0,00237245370370370000</text:p>
          </table:table-cell>
          <table:table-cell table:formula="of:=[.D279]-[.D278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4" office:value-type="float" office:value="20572" calcext:value-type="float">
            <text:p>2057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38101851851852" calcext:value-type="float">
            <text:p>0,00238101851851852000</text:p>
          </table:table-cell>
          <table:table-cell table:formula="of:=[.D280]-[.D27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4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38958333333333" calcext:value-type="float">
            <text:p>0,00238958333333333000</text:p>
          </table:table-cell>
          <table:table-cell table:formula="of:=[.D281]-[.D280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4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39814814814815" calcext:value-type="float">
            <text:p>0,00239814814814815000</text:p>
          </table:table-cell>
          <table:table-cell table:formula="of:=[.D282]-[.D28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4" office:value-type="float" office:value="20794" calcext:value-type="float">
            <text:p>2079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40671296296296" calcext:value-type="float">
            <text:p>0,00240671296296296000</text:p>
          </table:table-cell>
          <table:table-cell table:formula="of:=[.D283]-[.D28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4" office:value-type="float" office:value="20868" calcext:value-type="float">
            <text:p>2086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41527777777778" calcext:value-type="float">
            <text:p>0,00241527777777778000</text:p>
          </table:table-cell>
          <table:table-cell table:formula="of:=[.D284]-[.D283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4" office:value-type="float" office:value="20942" calcext:value-type="float">
            <text:p>2094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42384259259259" calcext:value-type="float">
            <text:p>0,00242384259259259000</text:p>
          </table:table-cell>
          <table:table-cell table:formula="of:=[.D285]-[.D28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4" office:value-type="float" office:value="21016" calcext:value-type="float">
            <text:p>2101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43240740740741" calcext:value-type="float">
            <text:p>0,00243240740740741000</text:p>
          </table:table-cell>
          <table:table-cell table:formula="of:=[.D286]-[.D28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4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44097222222222" calcext:value-type="float">
            <text:p>0,00244097222222222000</text:p>
          </table:table-cell>
          <table:table-cell table:formula="of:=[.D287]-[.D286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4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44953703703704" calcext:value-type="float">
            <text:p>0,00244953703703704000</text:p>
          </table:table-cell>
          <table:table-cell table:formula="of:=[.D288]-[.D28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4" office:value-type="float" office:value="21238" calcext:value-type="float">
            <text:p>2123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45810185185185" calcext:value-type="float">
            <text:p>0,00245810185185185000</text:p>
          </table:table-cell>
          <table:table-cell table:formula="of:=[.D289]-[.D288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4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46666666666667" calcext:value-type="float">
            <text:p>0,00246666666666667000</text:p>
          </table:table-cell>
          <table:table-cell table:formula="of:=[.D290]-[.D28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4" office:value-type="float" office:value="21386" calcext:value-type="float">
            <text:p>2138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47523148148148" calcext:value-type="float">
            <text:p>0,00247523148148148000</text:p>
          </table:table-cell>
          <table:table-cell table:formula="of:=[.D291]-[.D29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4" office:value-type="float" office:value="21460" calcext:value-type="float">
            <text:p>214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4837962962963" calcext:value-type="float">
            <text:p>0,00248379629629630000</text:p>
          </table:table-cell>
          <table:table-cell table:formula="of:=[.D292]-[.D291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4" office:value-type="float" office:value="21534" calcext:value-type="float">
            <text:p>2153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49236111111111" calcext:value-type="float">
            <text:p>0,00249236111111111000</text:p>
          </table:table-cell>
          <table:table-cell table:formula="of:=[.D293]-[.D29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4" office:value-type="float" office:value="21608" calcext:value-type="float">
            <text:p>2160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50092592592593" calcext:value-type="float">
            <text:p>0,00250092592592593000</text:p>
          </table:table-cell>
          <table:table-cell table:formula="of:=[.D294]-[.D29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4" office:value-type="float" office:value="21682" calcext:value-type="float">
            <text:p>2168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50949074074074" calcext:value-type="float">
            <text:p>0,00250949074074074000</text:p>
          </table:table-cell>
          <table:table-cell table:formula="of:=[.D295]-[.D294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4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51805555555556" calcext:value-type="float">
            <text:p>0,00251805555555556000</text:p>
          </table:table-cell>
          <table:table-cell table:formula="of:=[.D296]-[.D29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4" office:value-type="float" office:value="21830" calcext:value-type="float">
            <text:p>2183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52662037037037" calcext:value-type="float">
            <text:p>0,00252662037037037000</text:p>
          </table:table-cell>
          <table:table-cell table:formula="of:=[.D297]-[.D296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4" office:value-type="float" office:value="21904" calcext:value-type="float">
            <text:p>2190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53518518518519" calcext:value-type="float">
            <text:p>0,00253518518518519000</text:p>
          </table:table-cell>
          <table:table-cell table:formula="of:=[.D298]-[.D297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4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54375" calcext:value-type="float">
            <text:p>0,00254375000000000000</text:p>
          </table:table-cell>
          <table:table-cell table:formula="of:=[.D299]-[.D29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4" office:value-type="float" office:value="22052" calcext:value-type="float">
            <text:p>2205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55231481481482" calcext:value-type="float">
            <text:p>0,00255231481481482000</text:p>
          </table:table-cell>
          <table:table-cell table:formula="of:=[.D300]-[.D299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4" office:value-type="float" office:value="22126" calcext:value-type="float">
            <text:p>2212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56087962962963" calcext:value-type="float">
            <text:p>0,00256087962962963000</text:p>
          </table:table-cell>
          <table:table-cell table:formula="of:=[.D301]-[.D30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4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56944444444444" calcext:value-type="float">
            <text:p>0,00256944444444444000</text:p>
          </table:table-cell>
          <table:table-cell table:formula="of:=[.D302]-[.D301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4" office:value-type="float" office:value="22274" calcext:value-type="float">
            <text:p>2227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57800925925926" calcext:value-type="float">
            <text:p>0,00257800925925926000</text:p>
          </table:table-cell>
          <table:table-cell table:formula="of:=[.D303]-[.D302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4" office:value-type="float" office:value="22348" calcext:value-type="float">
            <text:p>2234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58657407407407" calcext:value-type="float">
            <text:p>0,00258657407407407000</text:p>
          </table:table-cell>
          <table:table-cell table:formula="of:=[.D304]-[.D30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4" office:value-type="float" office:value="22422" calcext:value-type="float">
            <text:p>2242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59513888888889" calcext:value-type="float">
            <text:p>0,00259513888888889000</text:p>
          </table:table-cell>
          <table:table-cell table:formula="of:=[.D305]-[.D304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4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6037037037037" calcext:value-type="float">
            <text:p>0,00260370370370370000</text:p>
          </table:table-cell>
          <table:table-cell table:formula="of:=[.D306]-[.D305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4" office:value-type="float" office:value="22570" calcext:value-type="float">
            <text:p>2257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61226851851852" calcext:value-type="float">
            <text:p>0,00261226851851852000</text:p>
          </table:table-cell>
          <table:table-cell table:formula="of:=[.D307]-[.D30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4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62083333333333" calcext:value-type="float">
            <text:p>0,00262083333333333000</text:p>
          </table:table-cell>
          <table:table-cell table:formula="of:=[.D308]-[.D307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4" office:value-type="float" office:value="22718" calcext:value-type="float">
            <text:p>2271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62939814814815" calcext:value-type="float">
            <text:p>0,00262939814814815000</text:p>
          </table:table-cell>
          <table:table-cell table:formula="of:=[.D309]-[.D30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4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63796296296296" calcext:value-type="float">
            <text:p>0,00263796296296296000</text:p>
          </table:table-cell>
          <table:table-cell table:formula="of:=[.D310]-[.D309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4" office:value-type="float" office:value="22866" calcext:value-type="float">
            <text:p>2286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64652777777778" calcext:value-type="float">
            <text:p>0,00264652777777778000</text:p>
          </table:table-cell>
          <table:table-cell table:formula="of:=[.D311]-[.D310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4" office:value-type="float" office:value="22940" calcext:value-type="float">
            <text:p>229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65509259259259" calcext:value-type="float">
            <text:p>0,00265509259259259000</text:p>
          </table:table-cell>
          <table:table-cell table:formula="of:=[.D312]-[.D31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4" office:value-type="float" office:value="23014" calcext:value-type="float">
            <text:p>2301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66365740740741" calcext:value-type="float">
            <text:p>0,00266365740740741000</text:p>
          </table:table-cell>
          <table:table-cell table:formula="of:=[.D313]-[.D312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4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67222222222222" calcext:value-type="float">
            <text:p>0,00267222222222222000</text:p>
          </table:table-cell>
          <table:table-cell table:formula="of:=[.D314]-[.D31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4" office:value-type="float" office:value="23162" calcext:value-type="float">
            <text:p>2316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68078703703704" calcext:value-type="float">
            <text:p>0,00268078703703704000</text:p>
          </table:table-cell>
          <table:table-cell table:formula="of:=[.D315]-[.D31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4" office:value-type="float" office:value="23236" calcext:value-type="float">
            <text:p>2323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68935185185185" calcext:value-type="float">
            <text:p>0,00268935185185185000</text:p>
          </table:table-cell>
          <table:table-cell table:formula="of:=[.D316]-[.D315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4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69791666666667" calcext:value-type="float">
            <text:p>0,00269791666666667000</text:p>
          </table:table-cell>
          <table:table-cell table:formula="of:=[.D317]-[.D316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4" office:value-type="float" office:value="23384" calcext:value-type="float">
            <text:p>2338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70648148148148" calcext:value-type="float">
            <text:p>0,00270648148148148000</text:p>
          </table:table-cell>
          <table:table-cell table:formula="of:=[.D318]-[.D317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4" office:value-type="float" office:value="23458" calcext:value-type="float">
            <text:p>2345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7150462962963" calcext:value-type="float">
            <text:p>0,00271504629629630000</text:p>
          </table:table-cell>
          <table:table-cell table:formula="of:=[.D319]-[.D318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4" office:value-type="float" office:value="23532" calcext:value-type="float">
            <text:p>2353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72361111111111" calcext:value-type="float">
            <text:p>0,00272361111111111000</text:p>
          </table:table-cell>
          <table:table-cell table:formula="of:=[.D320]-[.D319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4" office:value-type="float" office:value="23606" calcext:value-type="float">
            <text:p>2360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73217592592593" calcext:value-type="float">
            <text:p>0,00273217592592593000</text:p>
          </table:table-cell>
          <table:table-cell table:formula="of:=[.D321]-[.D320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4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74074074074074" calcext:value-type="float">
            <text:p>0,00274074074074074000</text:p>
          </table:table-cell>
          <table:table-cell table:formula="of:=[.D322]-[.D321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74" office:value-type="float" office:value="23754" calcext:value-type="float">
            <text:p>2375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74930555555556" calcext:value-type="float">
            <text:p>0,00274930555555556000</text:p>
          </table:table-cell>
          <table:table-cell table:formula="of:=[.D323]-[.D322]" office:value-type="float" office:value="0.00000856481481481455" calcext:value-type="float">
            <text:p>0,00000856481481481455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74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75787037037037" calcext:value-type="float">
            <text:p>0,00275787037037037000</text:p>
          </table:table-cell>
          <table:table-cell table:formula="of:=[.D324]-[.D323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74" office:value-type="float" office:value="23902" calcext:value-type="float">
            <text:p>2390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76643518518519" calcext:value-type="float">
            <text:p>0,00276643518518519000</text:p>
          </table:table-cell>
          <table:table-cell table:formula="of:=[.D325]-[.D324]" office:value-type="float" office:value="0.00000856481481481498" calcext:value-type="float">
            <text:p>0,00000856481481481498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74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775" calcext:value-type="float">
            <text:p>0,00277500000000000000</text:p>
          </table:table-cell>
          <table:table-cell table:formula="of:=#REF!-[.D325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22:04:52.146873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48:41.058665054</meta:creation-date>
    <dc:date>2026-05-17T22:05:17.987525547</dc:date>
    <meta:editing-duration>PT1M43S</meta:editing-duration>
    <meta:editing-cycles>3</meta:editing-cycles>
    <meta:generator>LibreOffice/24.2.7.2$Linux_X86_64 LibreOffice_project/420$Build-2</meta:generator>
    <meta:document-statistic meta:table-count="1" meta:cell-count="1625" meta:object-count="0"/>
  </office:meta>
</office:document-meta>
</file>