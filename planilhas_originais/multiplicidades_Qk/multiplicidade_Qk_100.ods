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0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9"/>
        <table:table-column table:style-name="co2" table:number-columns-repeated="16379" table:default-cell-style-name="ce6"/>
        <table:table-row table:style-name="ro1">
          <table:table-cell table:style-name="ce2" office:value-type="string" calcext:value-type="string">
            <text:p>Naturais</text:p>
          </table:table-cell>
          <table:table-cell table:style-name="ce2" office:value-type="string" calcext:value-type="string">
            <text:p>B + 100</text:p>
          </table:table-cell>
          <table:table-cell table:style-name="ce2" office:value-type="string" calcext:value-type="string">
            <text:p><text:span text:style-name="T1">Ciclo</text:span> Perfeito</text:p>
          </table:table-cell>
          <table:table-cell table:style-name="ce8" office:value-type="string" calcext:value-type="string">
            <text:p>B / C</text:p>
          </table:table-cell>
          <table:table-cell table:style-name="ce8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15740740740741" calcext:value-type="float">
            <text:p>0,00001157407407407410</text:p>
          </table:table-cell>
          <table:table-cell table:formula="of:=[.D4]-[.D3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00" office:value-type="float" office:value="200" calcext:value-type="float">
            <text:p>20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31481481481481" calcext:value-type="float">
            <text:p>0,00002314814814814810</text:p>
          </table:table-cell>
          <table:table-cell table:formula="of:=[.D5]-[.D4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00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47222222222222" calcext:value-type="float">
            <text:p>0,00003472222222222220</text:p>
          </table:table-cell>
          <table:table-cell table:formula="of:=[.D6]-[.D5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00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62962962962963" calcext:value-type="float">
            <text:p>0,00004629629629629630</text:p>
          </table:table-cell>
          <table:table-cell table:formula="of:=[.D7]-[.D6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00" office:value-type="float" office:value="500" calcext:value-type="float">
            <text:p>50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78703703703704" calcext:value-type="float">
            <text:p>0,00005787037037037040</text:p>
          </table:table-cell>
          <table:table-cell table:formula="of:=[.D8]-[.D7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00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94444444444444" calcext:value-type="float">
            <text:p>0,00006944444444444440</text:p>
          </table:table-cell>
          <table:table-cell table:formula="of:=[.D9]-[.D8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00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810185185185185" calcext:value-type="float">
            <text:p>0,00008101851851851850</text:p>
          </table:table-cell>
          <table:table-cell table:formula="of:=[.D10]-[.D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00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925925925925926" calcext:value-type="float">
            <text:p>0,00009259259259259260</text:p>
          </table:table-cell>
          <table:table-cell table:formula="of:=[.D11]-[.D10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00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104166666666667" calcext:value-type="float">
            <text:p>0,00010416666666666700</text:p>
          </table:table-cell>
          <table:table-cell table:formula="of:=[.D12]-[.D11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00"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15740740740741" calcext:value-type="float">
            <text:p>0,00011574074074074100</text:p>
          </table:table-cell>
          <table:table-cell table:formula="of:=[.D13]-[.D1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00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27314814814815" calcext:value-type="float">
            <text:p>0,00012731481481481500</text:p>
          </table:table-cell>
          <table:table-cell table:formula="of:=[.D14]-[.D13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0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38888888888889" calcext:value-type="float">
            <text:p>0,00013888888888888900</text:p>
          </table:table-cell>
          <table:table-cell table:formula="of:=[.D15]-[.D14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00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50462962962963" calcext:value-type="float">
            <text:p>0,00015046296296296300</text:p>
          </table:table-cell>
          <table:table-cell table:formula="of:=[.D16]-[.D15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00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62037037037037" calcext:value-type="float">
            <text:p>0,00016203703703703700</text:p>
          </table:table-cell>
          <table:table-cell table:formula="of:=[.D17]-[.D16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00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73611111111111" calcext:value-type="float">
            <text:p>0,00017361111111111100</text:p>
          </table:table-cell>
          <table:table-cell table:formula="of:=[.D18]-[.D17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00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85185185185185" calcext:value-type="float">
            <text:p>0,00018518518518518500</text:p>
          </table:table-cell>
          <table:table-cell table:formula="of:=[.D19]-[.D18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00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96759259259259" calcext:value-type="float">
            <text:p>0,00019675925925925900</text:p>
          </table:table-cell>
          <table:table-cell table:formula="of:=[.D20]-[.D1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0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208333333333333" calcext:value-type="float">
            <text:p>0,00020833333333333300</text:p>
          </table:table-cell>
          <table:table-cell table:formula="of:=[.D21]-[.D20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00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19907407407407" calcext:value-type="float">
            <text:p>0,00021990740740740700</text:p>
          </table:table-cell>
          <table:table-cell table:formula="of:=[.D22]-[.D21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00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31481481481482" calcext:value-type="float">
            <text:p>0,00023148148148148200</text:p>
          </table:table-cell>
          <table:table-cell table:formula="of:=[.D23]-[.D2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00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43055555555556" calcext:value-type="float">
            <text:p>0,00024305555555555600</text:p>
          </table:table-cell>
          <table:table-cell table:formula="of:=[.D24]-[.D23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00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5462962962963" calcext:value-type="float">
            <text:p>0,00025462962962963000</text:p>
          </table:table-cell>
          <table:table-cell table:formula="of:=[.D25]-[.D24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00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66203703703704" calcext:value-type="float">
            <text:p>0,00026620370370370400</text:p>
          </table:table-cell>
          <table:table-cell table:formula="of:=[.D26]-[.D25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0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77777777777778" calcext:value-type="float">
            <text:p>0,00027777777777777800</text:p>
          </table:table-cell>
          <table:table-cell table:formula="of:=[.D27]-[.D26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00" office:value-type="float" office:value="2500" calcext:value-type="float">
            <text:p>25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89351851851852" calcext:value-type="float">
            <text:p>0,00028935185185185200</text:p>
          </table:table-cell>
          <table:table-cell table:formula="of:=[.D28]-[.D27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00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300925925925926" calcext:value-type="float">
            <text:p>0,00030092592592592600</text:p>
          </table:table-cell>
          <table:table-cell table:formula="of:=[.D29]-[.D28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00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3125" calcext:value-type="float">
            <text:p>0,00031250000000000000</text:p>
          </table:table-cell>
          <table:table-cell table:formula="of:=[.D30]-[.D2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00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24074074074074" calcext:value-type="float">
            <text:p>0,00032407407407407400</text:p>
          </table:table-cell>
          <table:table-cell table:formula="of:=[.D31]-[.D30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00" office:value-type="float" office:value="2900" calcext:value-type="float">
            <text:p>290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35648148148148" calcext:value-type="float">
            <text:p>0,00033564814814814800</text:p>
          </table:table-cell>
          <table:table-cell table:formula="of:=[.D32]-[.D31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00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47222222222222" calcext:value-type="float">
            <text:p>0,00034722222222222200</text:p>
          </table:table-cell>
          <table:table-cell table:formula="of:=[.D33]-[.D3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00" office:value-type="float" office:value="3100" calcext:value-type="float">
            <text:p>310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58796296296296" calcext:value-type="float">
            <text:p>0,00035879629629629600</text:p>
          </table:table-cell>
          <table:table-cell table:formula="of:=[.D34]-[.D33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00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7037037037037" calcext:value-type="float">
            <text:p>0,00037037037037037000</text:p>
          </table:table-cell>
          <table:table-cell table:formula="of:=[.D35]-[.D34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00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81944444444444" calcext:value-type="float">
            <text:p>0,00038194444444444400</text:p>
          </table:table-cell>
          <table:table-cell table:formula="of:=[.D36]-[.D35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00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93518518518519" calcext:value-type="float">
            <text:p>0,00039351851851851900</text:p>
          </table:table-cell>
          <table:table-cell table:formula="of:=[.D37]-[.D36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00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405092592592593" calcext:value-type="float">
            <text:p>0,00040509259259259300</text:p>
          </table:table-cell>
          <table:table-cell table:formula="of:=[.D38]-[.D37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0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416666666666667" calcext:value-type="float">
            <text:p>0,00041666666666666700</text:p>
          </table:table-cell>
          <table:table-cell table:formula="of:=[.D39]-[.D38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00" office:value-type="float" office:value="3700" calcext:value-type="float">
            <text:p>370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428240740740741" calcext:value-type="float">
            <text:p>0,00042824074074074100</text:p>
          </table:table-cell>
          <table:table-cell table:formula="of:=[.D40]-[.D3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00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39814814814815" calcext:value-type="float">
            <text:p>0,00043981481481481500</text:p>
          </table:table-cell>
          <table:table-cell table:formula="of:=[.D41]-[.D40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00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51388888888889" calcext:value-type="float">
            <text:p>0,00045138888888888900</text:p>
          </table:table-cell>
          <table:table-cell table:formula="of:=[.D42]-[.D41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00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62962962962963" calcext:value-type="float">
            <text:p>0,00046296296296296300</text:p>
          </table:table-cell>
          <table:table-cell table:formula="of:=[.D43]-[.D4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00" office:value-type="float" office:value="4100" calcext:value-type="float">
            <text:p>410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74537037037037" calcext:value-type="float">
            <text:p>0,00047453703703703700</text:p>
          </table:table-cell>
          <table:table-cell table:formula="of:=[.D44]-[.D43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0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86111111111111" calcext:value-type="float">
            <text:p>0,00048611111111111100</text:p>
          </table:table-cell>
          <table:table-cell table:formula="of:=[.D45]-[.D4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00" office:value-type="float" office:value="4300" calcext:value-type="float">
            <text:p>430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97685185185185" calcext:value-type="float">
            <text:p>0,00049768518518518500</text:p>
          </table:table-cell>
          <table:table-cell table:formula="of:=[.D46]-[.D45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00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509259259259259" calcext:value-type="float">
            <text:p>0,00050925925925925900</text:p>
          </table:table-cell>
          <table:table-cell table:formula="of:=[.D47]-[.D46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00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520833333333333" calcext:value-type="float">
            <text:p>0,00052083333333333300</text:p>
          </table:table-cell>
          <table:table-cell table:formula="of:=[.D48]-[.D4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00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532407407407407" calcext:value-type="float">
            <text:p>0,00053240740740740700</text:p>
          </table:table-cell>
          <table:table-cell table:formula="of:=[.D49]-[.D48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00" office:value-type="float" office:value="4700" calcext:value-type="float">
            <text:p>470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43981481481481" calcext:value-type="float">
            <text:p>0,00054398148148148100</text:p>
          </table:table-cell>
          <table:table-cell table:formula="of:=[.D50]-[.D4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0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55555555555556" calcext:value-type="float">
            <text:p>0,00055555555555555600</text:p>
          </table:table-cell>
          <table:table-cell table:formula="of:=[.D51]-[.D5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00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6712962962963" calcext:value-type="float">
            <text:p>0,00056712962962963000</text:p>
          </table:table-cell>
          <table:table-cell table:formula="of:=[.D52]-[.D51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00" office:value-type="float" office:value="5000" calcext:value-type="float">
            <text:p>50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78703703703704" calcext:value-type="float">
            <text:p>0,00057870370370370400</text:p>
          </table:table-cell>
          <table:table-cell table:formula="of:=[.D53]-[.D5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00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90277777777778" calcext:value-type="float">
            <text:p>0,00059027777777777800</text:p>
          </table:table-cell>
          <table:table-cell table:formula="of:=[.D54]-[.D5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00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601851851851852" calcext:value-type="float">
            <text:p>0,00060185185185185200</text:p>
          </table:table-cell>
          <table:table-cell table:formula="of:=[.D55]-[.D54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00" office:value-type="float" office:value="5300" calcext:value-type="float">
            <text:p>530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613425925925926" calcext:value-type="float">
            <text:p>0,00061342592592592600</text:p>
          </table:table-cell>
          <table:table-cell table:formula="of:=[.D56]-[.D55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0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625" calcext:value-type="float">
            <text:p>0,00062500000000000000</text:p>
          </table:table-cell>
          <table:table-cell table:formula="of:=[.D57]-[.D5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00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636574074074074" calcext:value-type="float">
            <text:p>0,00063657407407407400</text:p>
          </table:table-cell>
          <table:table-cell table:formula="of:=[.D58]-[.D57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00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48148148148148" calcext:value-type="float">
            <text:p>0,00064814814814814800</text:p>
          </table:table-cell>
          <table:table-cell table:formula="of:=[.D59]-[.D5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00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59722222222222" calcext:value-type="float">
            <text:p>0,00065972222222222200</text:p>
          </table:table-cell>
          <table:table-cell table:formula="of:=[.D60]-[.D5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00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71296296296296" calcext:value-type="float">
            <text:p>0,00067129629629629600</text:p>
          </table:table-cell>
          <table:table-cell table:formula="of:=[.D61]-[.D60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00" office:value-type="float" office:value="5900" calcext:value-type="float">
            <text:p>590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8287037037037" calcext:value-type="float">
            <text:p>0,00068287037037037000</text:p>
          </table:table-cell>
          <table:table-cell table:formula="of:=[.D62]-[.D6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0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94444444444445" calcext:value-type="float">
            <text:p>0,00069444444444444500</text:p>
          </table:table-cell>
          <table:table-cell table:formula="of:=[.D63]-[.D6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00" office:value-type="float" office:value="6100" calcext:value-type="float">
            <text:p>610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706018518518519" calcext:value-type="float">
            <text:p>0,00070601851851851900</text:p>
          </table:table-cell>
          <table:table-cell table:formula="of:=[.D64]-[.D63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00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717592592592593" calcext:value-type="float">
            <text:p>0,00071759259259259300</text:p>
          </table:table-cell>
          <table:table-cell table:formula="of:=[.D65]-[.D6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0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729166666666667" calcext:value-type="float">
            <text:p>0,00072916666666666700</text:p>
          </table:table-cell>
          <table:table-cell table:formula="of:=[.D66]-[.D65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00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740740740740741" calcext:value-type="float">
            <text:p>0,00074074074074074100</text:p>
          </table:table-cell>
          <table:table-cell table:formula="of:=[.D67]-[.D66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00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752314814814815" calcext:value-type="float">
            <text:p>0,00075231481481481500</text:p>
          </table:table-cell>
          <table:table-cell table:formula="of:=[.D68]-[.D6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00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63888888888889" calcext:value-type="float">
            <text:p>0,00076388888888888900</text:p>
          </table:table-cell>
          <table:table-cell table:formula="of:=[.D69]-[.D68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00" office:value-type="float" office:value="6700" calcext:value-type="float">
            <text:p>670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75462962962963" calcext:value-type="float">
            <text:p>0,00077546296296296300</text:p>
          </table:table-cell>
          <table:table-cell table:formula="of:=[.D70]-[.D6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00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87037037037037" calcext:value-type="float">
            <text:p>0,00078703703703703700</text:p>
          </table:table-cell>
          <table:table-cell table:formula="of:=[.D71]-[.D7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00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98611111111111" calcext:value-type="float">
            <text:p>0,00079861111111111100</text:p>
          </table:table-cell>
          <table:table-cell table:formula="of:=[.D72]-[.D71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00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810185185185185" calcext:value-type="float">
            <text:p>0,00081018518518518500</text:p>
          </table:table-cell>
          <table:table-cell table:formula="of:=[.D73]-[.D7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00" office:value-type="float" office:value="7100" calcext:value-type="float">
            <text:p>710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821759259259259" calcext:value-type="float">
            <text:p>0,00082175925925925900</text:p>
          </table:table-cell>
          <table:table-cell table:formula="of:=[.D74]-[.D7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0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833333333333333" calcext:value-type="float">
            <text:p>0,00083333333333333300</text:p>
          </table:table-cell>
          <table:table-cell table:formula="of:=[.D75]-[.D74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00" office:value-type="float" office:value="7300" calcext:value-type="float">
            <text:p>730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844907407407407" calcext:value-type="float">
            <text:p>0,00084490740740740700</text:p>
          </table:table-cell>
          <table:table-cell table:formula="of:=[.D76]-[.D7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00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856481481481482" calcext:value-type="float">
            <text:p>0,00085648148148148200</text:p>
          </table:table-cell>
          <table:table-cell table:formula="of:=[.D77]-[.D76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00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68055555555556" calcext:value-type="float">
            <text:p>0,00086805555555555600</text:p>
          </table:table-cell>
          <table:table-cell table:formula="of:=[.D78]-[.D77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00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7962962962963" calcext:value-type="float">
            <text:p>0,00087962962962963000</text:p>
          </table:table-cell>
          <table:table-cell table:formula="of:=[.D79]-[.D7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00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91203703703704" calcext:value-type="float">
            <text:p>0,00089120370370370400</text:p>
          </table:table-cell>
          <table:table-cell table:formula="of:=[.D80]-[.D79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00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902777777777778" calcext:value-type="float">
            <text:p>0,00090277777777777800</text:p>
          </table:table-cell>
          <table:table-cell table:formula="of:=[.D81]-[.D80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00" office:value-type="float" office:value="7900" calcext:value-type="float">
            <text:p>790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914351851851852" calcext:value-type="float">
            <text:p>0,00091435185185185200</text:p>
          </table:table-cell>
          <table:table-cell table:formula="of:=[.D82]-[.D8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00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925925925925926" calcext:value-type="float">
            <text:p>0,00092592592592592600</text:p>
          </table:table-cell>
          <table:table-cell table:formula="of:=[.D83]-[.D82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00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9375" calcext:value-type="float">
            <text:p>0,00093750000000000000</text:p>
          </table:table-cell>
          <table:table-cell table:formula="of:=[.D84]-[.D83]" office:value-type="float" office:value="0.0000115740740740741" calcext:value-type="float">
            <text:p>0,0000115740740740741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00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949074074074074" calcext:value-type="float">
            <text:p>0,00094907407407407400</text:p>
          </table:table-cell>
          <table:table-cell table:formula="of:=[.D85]-[.D8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00" office:value-type="float" office:value="8300" calcext:value-type="float">
            <text:p>830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960648148148148" calcext:value-type="float">
            <text:p>0,00096064814814814800</text:p>
          </table:table-cell>
          <table:table-cell table:formula="of:=[.D86]-[.D8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0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72222222222222" calcext:value-type="float">
            <text:p>0,00097222222222222200</text:p>
          </table:table-cell>
          <table:table-cell table:formula="of:=[.D87]-[.D86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00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83796296296296" calcext:value-type="float">
            <text:p>0,00098379629629629600</text:p>
          </table:table-cell>
          <table:table-cell table:formula="of:=[.D88]-[.D8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00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9537037037037" calcext:value-type="float">
            <text:p>0,00099537037037037000</text:p>
          </table:table-cell>
          <table:table-cell table:formula="of:=[.D89]-[.D8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00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100694444444444" calcext:value-type="float">
            <text:p>0,00100694444444444000</text:p>
          </table:table-cell>
          <table:table-cell table:formula="of:=[.D90]-[.D89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00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101851851851852" calcext:value-type="float">
            <text:p>0,00101851851851852000</text:p>
          </table:table-cell>
          <table:table-cell table:formula="of:=[.D91]-[.D9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00" office:value-type="float" office:value="8900" calcext:value-type="float">
            <text:p>890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103009259259259" calcext:value-type="float">
            <text:p>0,00103009259259259000</text:p>
          </table:table-cell>
          <table:table-cell table:formula="of:=[.D92]-[.D9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0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104166666666667" calcext:value-type="float">
            <text:p>0,00104166666666667000</text:p>
          </table:table-cell>
          <table:table-cell table:formula="of:=[.D93]-[.D92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00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105324074074074" calcext:value-type="float">
            <text:p>0,00105324074074074000</text:p>
          </table:table-cell>
          <table:table-cell table:formula="of:=[.D94]-[.D9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00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106481481481481" calcext:value-type="float">
            <text:p>0,00106481481481481000</text:p>
          </table:table-cell>
          <table:table-cell table:formula="of:=[.D95]-[.D9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00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7638888888889" calcext:value-type="float">
            <text:p>0,00107638888888889000</text:p>
          </table:table-cell>
          <table:table-cell table:formula="of:=[.D96]-[.D95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00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8796296296296" calcext:value-type="float">
            <text:p>0,00108796296296296000</text:p>
          </table:table-cell>
          <table:table-cell table:formula="of:=[.D97]-[.D9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00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9953703703704" calcext:value-type="float">
            <text:p>0,00109953703703704000</text:p>
          </table:table-cell>
          <table:table-cell table:formula="of:=[.D98]-[.D9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0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11111111111111" calcext:value-type="float">
            <text:p>0,00111111111111111000</text:p>
          </table:table-cell>
          <table:table-cell table:formula="of:=[.D99]-[.D98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00" office:value-type="float" office:value="9700" calcext:value-type="float">
            <text:p>970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12268518518519" calcext:value-type="float">
            <text:p>0,00112268518518519000</text:p>
          </table:table-cell>
          <table:table-cell table:formula="of:=[.D100]-[.D9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00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13425925925926" calcext:value-type="float">
            <text:p>0,00113425925925926000</text:p>
          </table:table-cell>
          <table:table-cell table:formula="of:=[.D101]-[.D10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00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14583333333333" calcext:value-type="float">
            <text:p>0,00114583333333333000</text:p>
          </table:table-cell>
          <table:table-cell table:formula="of:=[.D102]-[.D101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00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15740740740741" calcext:value-type="float">
            <text:p>0,00115740740740741000</text:p>
          </table:table-cell>
          <table:table-cell table:formula="of:=[.D103]-[.D10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00" office:value-type="float" office:value="10100" calcext:value-type="float">
            <text:p>1010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16898148148148" calcext:value-type="float">
            <text:p>0,00116898148148148000</text:p>
          </table:table-cell>
          <table:table-cell table:formula="of:=[.D104]-[.D10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00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18055555555556" calcext:value-type="float">
            <text:p>0,00118055555555556000</text:p>
          </table:table-cell>
          <table:table-cell table:formula="of:=[.D105]-[.D104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00" office:value-type="float" office:value="10300" calcext:value-type="float">
            <text:p>1030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9212962962963" calcext:value-type="float">
            <text:p>0,00119212962962963000</text:p>
          </table:table-cell>
          <table:table-cell table:formula="of:=[.D106]-[.D10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00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2037037037037" calcext:value-type="float">
            <text:p>0,00120370370370370000</text:p>
          </table:table-cell>
          <table:table-cell table:formula="of:=[.D107]-[.D10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00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21527777777778" calcext:value-type="float">
            <text:p>0,00121527777777778000</text:p>
          </table:table-cell>
          <table:table-cell table:formula="of:=[.D108]-[.D107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00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22685185185185" calcext:value-type="float">
            <text:p>0,00122685185185185000</text:p>
          </table:table-cell>
          <table:table-cell table:formula="of:=[.D109]-[.D10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00" office:value-type="float" office:value="10700" calcext:value-type="float">
            <text:p>1070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23842592592593" calcext:value-type="float">
            <text:p>0,00123842592592593000</text:p>
          </table:table-cell>
          <table:table-cell table:formula="of:=[.D110]-[.D10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0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25" calcext:value-type="float">
            <text:p>0,00125000000000000000</text:p>
          </table:table-cell>
          <table:table-cell table:formula="of:=[.D111]-[.D110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00" office:value-type="float" office:value="10900" calcext:value-type="float">
            <text:p>1090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26157407407407" calcext:value-type="float">
            <text:p>0,00126157407407407000</text:p>
          </table:table-cell>
          <table:table-cell table:formula="of:=[.D112]-[.D11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00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27314814814815" calcext:value-type="float">
            <text:p>0,00127314814814815000</text:p>
          </table:table-cell>
          <table:table-cell table:formula="of:=[.D113]-[.D11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00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28472222222222" calcext:value-type="float">
            <text:p>0,00128472222222222000</text:p>
          </table:table-cell>
          <table:table-cell table:formula="of:=[.D114]-[.D11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00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962962962963" calcext:value-type="float">
            <text:p>0,00129629629629630000</text:p>
          </table:table-cell>
          <table:table-cell table:formula="of:=[.D115]-[.D114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00" office:value-type="float" office:value="11300" calcext:value-type="float">
            <text:p>1130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30787037037037" calcext:value-type="float">
            <text:p>0,00130787037037037000</text:p>
          </table:table-cell>
          <table:table-cell table:formula="of:=[.D116]-[.D11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00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31944444444444" calcext:value-type="float">
            <text:p>0,00131944444444444000</text:p>
          </table:table-cell>
          <table:table-cell table:formula="of:=[.D117]-[.D11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00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33101851851852" calcext:value-type="float">
            <text:p>0,00133101851851852000</text:p>
          </table:table-cell>
          <table:table-cell table:formula="of:=[.D118]-[.D117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00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34259259259259" calcext:value-type="float">
            <text:p>0,00134259259259259000</text:p>
          </table:table-cell>
          <table:table-cell table:formula="of:=[.D119]-[.D11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00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35416666666667" calcext:value-type="float">
            <text:p>0,00135416666666667000</text:p>
          </table:table-cell>
          <table:table-cell table:formula="of:=[.D120]-[.D11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00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36574074074074" calcext:value-type="float">
            <text:p>0,00136574074074074000</text:p>
          </table:table-cell>
          <table:table-cell table:formula="of:=[.D121]-[.D120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00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37731481481481" calcext:value-type="float">
            <text:p>0,00137731481481481000</text:p>
          </table:table-cell>
          <table:table-cell table:formula="of:=[.D122]-[.D12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0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38888888888889" calcext:value-type="float">
            <text:p>0,00138888888888889000</text:p>
          </table:table-cell>
          <table:table-cell table:formula="of:=[.D123]-[.D12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00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40046296296296" calcext:value-type="float">
            <text:p>0,00140046296296296000</text:p>
          </table:table-cell>
          <table:table-cell table:formula="of:=[.D124]-[.D123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00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41203703703704" calcext:value-type="float">
            <text:p>0,00141203703703704000</text:p>
          </table:table-cell>
          <table:table-cell table:formula="of:=[.D125]-[.D12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00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42361111111111" calcext:value-type="float">
            <text:p>0,00142361111111111000</text:p>
          </table:table-cell>
          <table:table-cell table:formula="of:=[.D126]-[.D12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00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43518518518519" calcext:value-type="float">
            <text:p>0,00143518518518519000</text:p>
          </table:table-cell>
          <table:table-cell table:formula="of:=[.D127]-[.D126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00" office:value-type="float" office:value="12500" calcext:value-type="float">
            <text:p>12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44675925925926" calcext:value-type="float">
            <text:p>0,00144675925925926000</text:p>
          </table:table-cell>
          <table:table-cell table:formula="of:=[.D128]-[.D12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0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45833333333333" calcext:value-type="float">
            <text:p>0,00145833333333333000</text:p>
          </table:table-cell>
          <table:table-cell table:formula="of:=[.D129]-[.D12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00" office:value-type="float" office:value="12700" calcext:value-type="float">
            <text:p>1270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46990740740741" calcext:value-type="float">
            <text:p>0,00146990740740741000</text:p>
          </table:table-cell>
          <table:table-cell table:formula="of:=[.D130]-[.D129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00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48148148148148" calcext:value-type="float">
            <text:p>0,00148148148148148000</text:p>
          </table:table-cell>
          <table:table-cell table:formula="of:=[.D131]-[.D13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00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49305555555556" calcext:value-type="float">
            <text:p>0,00149305555555556000</text:p>
          </table:table-cell>
          <table:table-cell table:formula="of:=[.D132]-[.D13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00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50462962962963" calcext:value-type="float">
            <text:p>0,00150462962962963000</text:p>
          </table:table-cell>
          <table:table-cell table:formula="of:=[.D133]-[.D132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00" office:value-type="float" office:value="13100" calcext:value-type="float">
            <text:p>1310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5162037037037" calcext:value-type="float">
            <text:p>0,00151620370370370000</text:p>
          </table:table-cell>
          <table:table-cell table:formula="of:=[.D134]-[.D13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0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52777777777778" calcext:value-type="float">
            <text:p>0,00152777777777778000</text:p>
          </table:table-cell>
          <table:table-cell table:formula="of:=[.D135]-[.D13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00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53935185185185" calcext:value-type="float">
            <text:p>0,00153935185185185000</text:p>
          </table:table-cell>
          <table:table-cell table:formula="of:=[.D136]-[.D135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00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55092592592593" calcext:value-type="float">
            <text:p>0,00155092592592593000</text:p>
          </table:table-cell>
          <table:table-cell table:formula="of:=[.D137]-[.D13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00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5625" calcext:value-type="float">
            <text:p>0,00156250000000000000</text:p>
          </table:table-cell>
          <table:table-cell table:formula="of:=[.D138]-[.D13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00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57407407407407" calcext:value-type="float">
            <text:p>0,00157407407407407000</text:p>
          </table:table-cell>
          <table:table-cell table:formula="of:=[.D139]-[.D138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00" office:value-type="float" office:value="13700" calcext:value-type="float">
            <text:p>1370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58564814814815" calcext:value-type="float">
            <text:p>0,00158564814814815000</text:p>
          </table:table-cell>
          <table:table-cell table:formula="of:=[.D140]-[.D13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00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59722222222222" calcext:value-type="float">
            <text:p>0,00159722222222222000</text:p>
          </table:table-cell>
          <table:table-cell table:formula="of:=[.D141]-[.D14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00" office:value-type="float" office:value="13900" calcext:value-type="float">
            <text:p>1390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6087962962963" calcext:value-type="float">
            <text:p>0,00160879629629630000</text:p>
          </table:table-cell>
          <table:table-cell table:formula="of:=[.D142]-[.D141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00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62037037037037" calcext:value-type="float">
            <text:p>0,00162037037037037000</text:p>
          </table:table-cell>
          <table:table-cell table:formula="of:=[.D143]-[.D14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00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63194444444444" calcext:value-type="float">
            <text:p>0,00163194444444444000</text:p>
          </table:table-cell>
          <table:table-cell table:formula="of:=[.D144]-[.D14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00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64351851851852" calcext:value-type="float">
            <text:p>0,00164351851851852000</text:p>
          </table:table-cell>
          <table:table-cell table:formula="of:=[.D145]-[.D144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00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65509259259259" calcext:value-type="float">
            <text:p>0,00165509259259259000</text:p>
          </table:table-cell>
          <table:table-cell table:formula="of:=[.D146]-[.D14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0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66666666666667" calcext:value-type="float">
            <text:p>0,00166666666666667000</text:p>
          </table:table-cell>
          <table:table-cell table:formula="of:=[.D147]-[.D14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00" office:value-type="float" office:value="14500" calcext:value-type="float">
            <text:p>1450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67824074074074" calcext:value-type="float">
            <text:p>0,00167824074074074000</text:p>
          </table:table-cell>
          <table:table-cell table:formula="of:=[.D148]-[.D14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00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68981481481481" calcext:value-type="float">
            <text:p>0,00168981481481481000</text:p>
          </table:table-cell>
          <table:table-cell table:formula="of:=[.D149]-[.D148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00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70138888888889" calcext:value-type="float">
            <text:p>0,00170138888888889000</text:p>
          </table:table-cell>
          <table:table-cell table:formula="of:=[.D150]-[.D14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00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71296296296296" calcext:value-type="float">
            <text:p>0,00171296296296296000</text:p>
          </table:table-cell>
          <table:table-cell table:formula="of:=[.D151]-[.D15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00" office:value-type="float" office:value="14900" calcext:value-type="float">
            <text:p>1490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72453703703704" calcext:value-type="float">
            <text:p>0,00172453703703704000</text:p>
          </table:table-cell>
          <table:table-cell table:formula="of:=[.D152]-[.D151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00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73611111111111" calcext:value-type="float">
            <text:p>0,00173611111111111000</text:p>
          </table:table-cell>
          <table:table-cell table:formula="of:=[.D153]-[.D15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00" office:value-type="float" office:value="15100" calcext:value-type="float">
            <text:p>1510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74768518518519" calcext:value-type="float">
            <text:p>0,00174768518518519000</text:p>
          </table:table-cell>
          <table:table-cell table:formula="of:=[.D154]-[.D15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00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75925925925926" calcext:value-type="float">
            <text:p>0,00175925925925926000</text:p>
          </table:table-cell>
          <table:table-cell table:formula="of:=[.D155]-[.D154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00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77083333333333" calcext:value-type="float">
            <text:p>0,00177083333333333000</text:p>
          </table:table-cell>
          <table:table-cell table:formula="of:=[.D156]-[.D15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00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78240740740741" calcext:value-type="float">
            <text:p>0,00178240740740741000</text:p>
          </table:table-cell>
          <table:table-cell table:formula="of:=[.D157]-[.D15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00" office:value-type="float" office:value="15500" calcext:value-type="float">
            <text:p>1550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79398148148148" calcext:value-type="float">
            <text:p>0,00179398148148148000</text:p>
          </table:table-cell>
          <table:table-cell table:formula="of:=[.D158]-[.D157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0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80555555555556" calcext:value-type="float">
            <text:p>0,00180555555555556000</text:p>
          </table:table-cell>
          <table:table-cell table:formula="of:=[.D159]-[.D15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00" office:value-type="float" office:value="15700" calcext:value-type="float">
            <text:p>1570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81712962962963" calcext:value-type="float">
            <text:p>0,00181712962962963000</text:p>
          </table:table-cell>
          <table:table-cell table:formula="of:=[.D160]-[.D15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00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8287037037037" calcext:value-type="float">
            <text:p>0,00182870370370370000</text:p>
          </table:table-cell>
          <table:table-cell table:formula="of:=[.D161]-[.D160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00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84027777777778" calcext:value-type="float">
            <text:p>0,00184027777777778000</text:p>
          </table:table-cell>
          <table:table-cell table:formula="of:=[.D162]-[.D16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00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85185185185185" calcext:value-type="float">
            <text:p>0,00185185185185185000</text:p>
          </table:table-cell>
          <table:table-cell table:formula="of:=[.D163]-[.D16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00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86342592592593" calcext:value-type="float">
            <text:p>0,00186342592592593000</text:p>
          </table:table-cell>
          <table:table-cell table:formula="of:=[.D164]-[.D163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0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875" calcext:value-type="float">
            <text:p>0,00187500000000000000</text:p>
          </table:table-cell>
          <table:table-cell table:formula="of:=[.D165]-[.D16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00" office:value-type="float" office:value="16300" calcext:value-type="float">
            <text:p>1630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88657407407407" calcext:value-type="float">
            <text:p>0,00188657407407407000</text:p>
          </table:table-cell>
          <table:table-cell table:formula="of:=[.D166]-[.D16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00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89814814814815" calcext:value-type="float">
            <text:p>0,00189814814814815000</text:p>
          </table:table-cell>
          <table:table-cell table:formula="of:=[.D167]-[.D166]" office:value-type="float" office:value="0.0000115740740740742" calcext:value-type="float">
            <text:p>0,0000115740740740742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00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90972222222222" calcext:value-type="float">
            <text:p>0,00190972222222222000</text:p>
          </table:table-cell>
          <table:table-cell table:formula="of:=[.D168]-[.D16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00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9212962962963" calcext:value-type="float">
            <text:p>0,00192129629629630000</text:p>
          </table:table-cell>
          <table:table-cell table:formula="of:=[.D169]-[.D16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00" office:value-type="float" office:value="16700" calcext:value-type="float">
            <text:p>1670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93287037037037" calcext:value-type="float">
            <text:p>0,00193287037037037000</text:p>
          </table:table-cell>
          <table:table-cell table:formula="of:=[.D170]-[.D16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0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94444444444444" calcext:value-type="float">
            <text:p>0,00194444444444444000</text:p>
          </table:table-cell>
          <table:table-cell table:formula="of:=[.D171]-[.D17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00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95601851851852" calcext:value-type="float">
            <text:p>0,00195601851851852000</text:p>
          </table:table-cell>
          <table:table-cell table:formula="of:=[.D172]-[.D171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00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96759259259259" calcext:value-type="float">
            <text:p>0,00196759259259259000</text:p>
          </table:table-cell>
          <table:table-cell table:formula="of:=[.D173]-[.D17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00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97916666666667" calcext:value-type="float">
            <text:p>0,00197916666666667000</text:p>
          </table:table-cell>
          <table:table-cell table:formula="of:=[.D174]-[.D17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00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99074074074074" calcext:value-type="float">
            <text:p>0,00199074074074074000</text:p>
          </table:table-cell>
          <table:table-cell table:formula="of:=[.D175]-[.D17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00" office:value-type="float" office:value="17300" calcext:value-type="float">
            <text:p>1730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200231481481482" calcext:value-type="float">
            <text:p>0,00200231481481482000</text:p>
          </table:table-cell>
          <table:table-cell table:formula="of:=[.D176]-[.D17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00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201388888888889" calcext:value-type="float">
            <text:p>0,00201388888888889000</text:p>
          </table:table-cell>
          <table:table-cell table:formula="of:=[.D177]-[.D17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00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202546296296296" calcext:value-type="float">
            <text:p>0,00202546296296296000</text:p>
          </table:table-cell>
          <table:table-cell table:formula="of:=[.D178]-[.D177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00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203703703703704" calcext:value-type="float">
            <text:p>0,00203703703703704000</text:p>
          </table:table-cell>
          <table:table-cell table:formula="of:=[.D179]-[.D17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00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204861111111111" calcext:value-type="float">
            <text:p>0,00204861111111111000</text:p>
          </table:table-cell>
          <table:table-cell table:formula="of:=[.D180]-[.D17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00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206018518518519" calcext:value-type="float">
            <text:p>0,00206018518518519000</text:p>
          </table:table-cell>
          <table:table-cell table:formula="of:=[.D181]-[.D18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00" office:value-type="float" office:value="17900" calcext:value-type="float">
            <text:p>1790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207175925925926" calcext:value-type="float">
            <text:p>0,00207175925925926000</text:p>
          </table:table-cell>
          <table:table-cell table:formula="of:=[.D182]-[.D18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0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208333333333333" calcext:value-type="float">
            <text:p>0,00208333333333333000</text:p>
          </table:table-cell>
          <table:table-cell table:formula="of:=[.D183]-[.D18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00" office:value-type="float" office:value="18100" calcext:value-type="float">
            <text:p>1810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209490740740741" calcext:value-type="float">
            <text:p>0,00209490740740741000</text:p>
          </table:table-cell>
          <table:table-cell table:formula="of:=[.D184]-[.D183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00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210648148148148" calcext:value-type="float">
            <text:p>0,00210648148148148000</text:p>
          </table:table-cell>
          <table:table-cell table:formula="of:=[.D185]-[.D18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00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211805555555556" calcext:value-type="float">
            <text:p>0,00211805555555556000</text:p>
          </table:table-cell>
          <table:table-cell table:formula="of:=[.D186]-[.D18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00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212962962962963" calcext:value-type="float">
            <text:p>0,00212962962962963000</text:p>
          </table:table-cell>
          <table:table-cell table:formula="of:=[.D187]-[.D18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00" office:value-type="float" office:value="18500" calcext:value-type="float">
            <text:p>1850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21412037037037" calcext:value-type="float">
            <text:p>0,00214120370370370000</text:p>
          </table:table-cell>
          <table:table-cell table:formula="of:=[.D188]-[.D18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00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15277777777778" calcext:value-type="float">
            <text:p>0,00215277777777778000</text:p>
          </table:table-cell>
          <table:table-cell table:formula="of:=[.D189]-[.D18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00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16435185185185" calcext:value-type="float">
            <text:p>0,00216435185185185000</text:p>
          </table:table-cell>
          <table:table-cell table:formula="of:=[.D190]-[.D189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00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17592592592593" calcext:value-type="float">
            <text:p>0,00217592592592593000</text:p>
          </table:table-cell>
          <table:table-cell table:formula="of:=[.D191]-[.D19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0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1875" calcext:value-type="float">
            <text:p>0,00218750000000000000</text:p>
          </table:table-cell>
          <table:table-cell table:formula="of:=[.D192]-[.D19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00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19907407407407" calcext:value-type="float">
            <text:p>0,00219907407407407000</text:p>
          </table:table-cell>
          <table:table-cell table:formula="of:=[.D193]-[.D19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00" office:value-type="float" office:value="19100" calcext:value-type="float">
            <text:p>1910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21064814814815" calcext:value-type="float">
            <text:p>0,00221064814814815000</text:p>
          </table:table-cell>
          <table:table-cell table:formula="of:=[.D194]-[.D19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0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22222222222222" calcext:value-type="float">
            <text:p>0,00222222222222222000</text:p>
          </table:table-cell>
          <table:table-cell table:formula="of:=[.D195]-[.D19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00" office:value-type="float" office:value="19300" calcext:value-type="float">
            <text:p>1930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2337962962963" calcext:value-type="float">
            <text:p>0,00223379629629630000</text:p>
          </table:table-cell>
          <table:table-cell table:formula="of:=[.D196]-[.D19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00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24537037037037" calcext:value-type="float">
            <text:p>0,00224537037037037000</text:p>
          </table:table-cell>
          <table:table-cell table:formula="of:=[.D197]-[.D196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00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25694444444444" calcext:value-type="float">
            <text:p>0,00225694444444444000</text:p>
          </table:table-cell>
          <table:table-cell table:formula="of:=[.D198]-[.D19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00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26851851851852" calcext:value-type="float">
            <text:p>0,00226851851851852000</text:p>
          </table:table-cell>
          <table:table-cell table:formula="of:=[.D199]-[.D19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00" office:value-type="float" office:value="19700" calcext:value-type="float">
            <text:p>1970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28009259259259" calcext:value-type="float">
            <text:p>0,00228009259259259000</text:p>
          </table:table-cell>
          <table:table-cell table:formula="of:=[.D200]-[.D19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0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29166666666667" calcext:value-type="float">
            <text:p>0,00229166666666667000</text:p>
          </table:table-cell>
          <table:table-cell table:formula="of:=[.D201]-[.D20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00" office:value-type="float" office:value="19900" calcext:value-type="float">
            <text:p>1990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30324074074074" calcext:value-type="float">
            <text:p>0,00230324074074074000</text:p>
          </table:table-cell>
          <table:table-cell table:formula="of:=[.D202]-[.D20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00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31481481481481" calcext:value-type="float">
            <text:p>0,00231481481481481000</text:p>
          </table:table-cell>
          <table:table-cell table:formula="of:=[.D203]-[.D202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00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32638888888889" calcext:value-type="float">
            <text:p>0,00232638888888889000</text:p>
          </table:table-cell>
          <table:table-cell table:formula="of:=[.D204]-[.D20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00" office:value-type="float" office:value="20200" calcext:value-type="float">
            <text:p>2020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33796296296296" calcext:value-type="float">
            <text:p>0,00233796296296296000</text:p>
          </table:table-cell>
          <table:table-cell table:formula="of:=[.D205]-[.D20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00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34953703703704" calcext:value-type="float">
            <text:p>0,00234953703703704000</text:p>
          </table:table-cell>
          <table:table-cell table:formula="of:=[.D206]-[.D20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0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36111111111111" calcext:value-type="float">
            <text:p>0,00236111111111111000</text:p>
          </table:table-cell>
          <table:table-cell table:formula="of:=[.D207]-[.D20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00" office:value-type="float" office:value="20500" calcext:value-type="float">
            <text:p>2050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37268518518519" calcext:value-type="float">
            <text:p>0,00237268518518519000</text:p>
          </table:table-cell>
          <table:table-cell table:formula="of:=[.D208]-[.D20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00" office:value-type="float" office:value="20600" calcext:value-type="float">
            <text:p>2060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38425925925926" calcext:value-type="float">
            <text:p>0,00238425925925926000</text:p>
          </table:table-cell>
          <table:table-cell table:formula="of:=[.D209]-[.D208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00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39583333333333" calcext:value-type="float">
            <text:p>0,00239583333333333000</text:p>
          </table:table-cell>
          <table:table-cell table:formula="of:=[.D210]-[.D20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00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40740740740741" calcext:value-type="float">
            <text:p>0,00240740740740741000</text:p>
          </table:table-cell>
          <table:table-cell table:formula="of:=[.D211]-[.D21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00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41898148148148" calcext:value-type="float">
            <text:p>0,00241898148148148000</text:p>
          </table:table-cell>
          <table:table-cell table:formula="of:=[.D212]-[.D21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0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43055555555556" calcext:value-type="float">
            <text:p>0,00243055555555556000</text:p>
          </table:table-cell>
          <table:table-cell table:formula="of:=[.D213]-[.D21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00" office:value-type="float" office:value="21100" calcext:value-type="float">
            <text:p>2110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44212962962963" calcext:value-type="float">
            <text:p>0,00244212962962963000</text:p>
          </table:table-cell>
          <table:table-cell table:formula="of:=[.D214]-[.D21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00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4537037037037" calcext:value-type="float">
            <text:p>0,00245370370370370000</text:p>
          </table:table-cell>
          <table:table-cell table:formula="of:=[.D215]-[.D214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00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46527777777778" calcext:value-type="float">
            <text:p>0,00246527777777778000</text:p>
          </table:table-cell>
          <table:table-cell table:formula="of:=[.D216]-[.D21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00" office:value-type="float" office:value="21400" calcext:value-type="float">
            <text:p>2140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47685185185185" calcext:value-type="float">
            <text:p>0,00247685185185185000</text:p>
          </table:table-cell>
          <table:table-cell table:formula="of:=[.D217]-[.D21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00" office:value-type="float" office:value="21500" calcext:value-type="float">
            <text:p>2150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48842592592593" calcext:value-type="float">
            <text:p>0,00248842592592593000</text:p>
          </table:table-cell>
          <table:table-cell table:formula="of:=[.D218]-[.D21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0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5" calcext:value-type="float">
            <text:p>0,00250000000000000000</text:p>
          </table:table-cell>
          <table:table-cell table:formula="of:=[.D219]-[.D21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00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51157407407407" calcext:value-type="float">
            <text:p>0,00251157407407407000</text:p>
          </table:table-cell>
          <table:table-cell table:formula="of:=[.D220]-[.D21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00" office:value-type="float" office:value="21800" calcext:value-type="float">
            <text:p>2180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52314814814815" calcext:value-type="float">
            <text:p>0,00252314814814815000</text:p>
          </table:table-cell>
          <table:table-cell table:formula="of:=[.D221]-[.D220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00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53472222222222" calcext:value-type="float">
            <text:p>0,00253472222222222000</text:p>
          </table:table-cell>
          <table:table-cell table:formula="of:=[.D222]-[.D22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00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5462962962963" calcext:value-type="float">
            <text:p>0,00254629629629630000</text:p>
          </table:table-cell>
          <table:table-cell table:formula="of:=[.D223]-[.D22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00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55787037037037" calcext:value-type="float">
            <text:p>0,00255787037037037000</text:p>
          </table:table-cell>
          <table:table-cell table:formula="of:=[.D224]-[.D223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00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56944444444444" calcext:value-type="float">
            <text:p>0,00256944444444444000</text:p>
          </table:table-cell>
          <table:table-cell table:formula="of:=[.D225]-[.D22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00" office:value-type="float" office:value="22300" calcext:value-type="float">
            <text:p>2230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58101851851852" calcext:value-type="float">
            <text:p>0,00258101851851852000</text:p>
          </table:table-cell>
          <table:table-cell table:formula="of:=[.D226]-[.D22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00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59259259259259" calcext:value-type="float">
            <text:p>0,00259259259259259000</text:p>
          </table:table-cell>
          <table:table-cell table:formula="of:=[.D227]-[.D22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00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60416666666667" calcext:value-type="float">
            <text:p>0,00260416666666667000</text:p>
          </table:table-cell>
          <table:table-cell table:formula="of:=[.D228]-[.D227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00" office:value-type="float" office:value="22600" calcext:value-type="float">
            <text:p>2260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61574074074074" calcext:value-type="float">
            <text:p>0,00261574074074074000</text:p>
          </table:table-cell>
          <table:table-cell table:formula="of:=[.D229]-[.D22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00" office:value-type="float" office:value="22700" calcext:value-type="float">
            <text:p>2270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62731481481482" calcext:value-type="float">
            <text:p>0,00262731481481482000</text:p>
          </table:table-cell>
          <table:table-cell table:formula="of:=[.D230]-[.D229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0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63888888888889" calcext:value-type="float">
            <text:p>0,00263888888888889000</text:p>
          </table:table-cell>
          <table:table-cell table:formula="of:=[.D231]-[.D23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00" office:value-type="float" office:value="22900" calcext:value-type="float">
            <text:p>2290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65046296296296" calcext:value-type="float">
            <text:p>0,00265046296296296000</text:p>
          </table:table-cell>
          <table:table-cell table:formula="of:=[.D232]-[.D231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00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66203703703704" calcext:value-type="float">
            <text:p>0,00266203703703704000</text:p>
          </table:table-cell>
          <table:table-cell table:formula="of:=[.D233]-[.D232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00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67361111111111" calcext:value-type="float">
            <text:p>0,00267361111111111000</text:p>
          </table:table-cell>
          <table:table-cell table:formula="of:=[.D234]-[.D233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00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68518518518519" calcext:value-type="float">
            <text:p>0,00268518518518519000</text:p>
          </table:table-cell>
          <table:table-cell table:formula="of:=[.D235]-[.D234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00" office:value-type="float" office:value="23300" calcext:value-type="float">
            <text:p>2330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69675925925926" calcext:value-type="float">
            <text:p>0,00269675925925926000</text:p>
          </table:table-cell>
          <table:table-cell table:formula="of:=[.D236]-[.D235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0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70833333333333" calcext:value-type="float">
            <text:p>0,00270833333333333000</text:p>
          </table:table-cell>
          <table:table-cell table:formula="of:=[.D237]-[.D236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00" office:value-type="float" office:value="23500" calcext:value-type="float">
            <text:p>2350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71990740740741" calcext:value-type="float">
            <text:p>0,00271990740740741000</text:p>
          </table:table-cell>
          <table:table-cell table:formula="of:=[.D238]-[.D237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00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73148148148148" calcext:value-type="float">
            <text:p>0,00273148148148148000</text:p>
          </table:table-cell>
          <table:table-cell table:formula="of:=[.D239]-[.D238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00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74305555555556" calcext:value-type="float">
            <text:p>0,00274305555555556000</text:p>
          </table:table-cell>
          <table:table-cell table:formula="of:=[.D240]-[.D239]" office:value-type="float" office:value="0.0000115740740740744" calcext:value-type="float">
            <text:p>0,0000115740740740744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00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75462962962963" calcext:value-type="float">
            <text:p>0,00275462962962963000</text:p>
          </table:table-cell>
          <table:table-cell table:formula="of:=[.D241]-[.D240]" office:value-type="float" office:value="0.000011574074074074" calcext:value-type="float">
            <text:p>0,0000115740740740740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00" office:value-type="float" office:value="23900" calcext:value-type="float">
            <text:p>2390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7662037037037" calcext:value-type="float">
            <text:p>0,00276620370370370000</text:p>
          </table:table-cell>
          <table:table-cell table:formula="of:=[.D242]-[.D241]" office:value-type="float" office:value="-0.00277777777777778" calcext:value-type="float">
            <text:p>-0,00277777777777778000</text:p>
          </table:table-cell>
          <table:table-cell table:number-columns-repeated="16379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formula="of:=[.B240]+10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77777777777778" calcext:value-type="float">
            <text:p>0,00277777777777778000</text:p>
          </table:table-cell>
          <table:table-cell table:formula="of:=[.D243]-[.D242]" office:value-type="float" office:value="0" calcext:value-type="float">
            <text:p>0,00000000000000000000</text:p>
          </table:table-cell>
          <table:table-cell table:number-columns-repeated="16379"/>
        </table:table-row>
        <table:table-row table:style-name="ro1" table:number-rows-repeated="10483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 style:data-style-name="N2" text:time-value="22:20:24.7239895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08:59.145075544</meta:creation-date>
    <dc:date>2026-05-17T19:48:27.526348306</dc:date>
    <meta:editing-duration>PT2H46M58S</meta:editing-duration>
    <meta:editing-cycles>23</meta:editing-cycles>
    <meta:generator>LibreOffice/24.2.7.2$Linux_X86_64 LibreOffice_project/420$Build-2</meta:generator>
    <meta:document-statistic meta:table-count="1" meta:cell-count="1205" meta:object-count="0"/>
  </office:meta>
</office:document-meta>
</file>