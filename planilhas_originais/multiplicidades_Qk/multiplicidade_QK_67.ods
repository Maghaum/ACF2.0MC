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1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75462962962963" calcext:value-type="float">
            <text:p>0,00000775462962962963</text:p>
          </table:table-cell>
          <table:table-cell table:formula="of:=[.D3]-[.D2]" office:value-type="float" office:value="0.00000775462962962963" calcext:value-type="float">
            <text:p>0,00000775462962962963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7" office:value-type="float" office:value="134" calcext:value-type="float">
            <text:p>13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55092592592593" calcext:value-type="float">
            <text:p>0,00001550925925925930</text:p>
          </table:table-cell>
          <table:table-cell table:formula="of:=[.D4]-[.D3]" office:value-type="float" office:value="0.00000775462962962963" calcext:value-type="float">
            <text:p>0,00000775462962962963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7" office:value-type="float" office:value="201" calcext:value-type="float">
            <text:p>20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32638888888889" calcext:value-type="float">
            <text:p>0,00002326388888888890</text:p>
          </table:table-cell>
          <table:table-cell table:formula="of:=[.D5]-[.D4]" office:value-type="float" office:value="0.00000775462962962963" calcext:value-type="float">
            <text:p>0,00000775462962962963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7" office:value-type="float" office:value="268" calcext:value-type="float">
            <text:p>26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10185185185185" calcext:value-type="float">
            <text:p>0,00003101851851851850</text:p>
          </table:table-cell>
          <table:table-cell table:formula="of:=[.D6]-[.D5]" office:value-type="float" office:value="0.00000775462962962963" calcext:value-type="float">
            <text:p>0,00000775462962962963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7" office:value-type="float" office:value="335" calcext:value-type="float">
            <text:p>33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87731481481482" calcext:value-type="float">
            <text:p>0,00003877314814814820</text:p>
          </table:table-cell>
          <table:table-cell table:formula="of:=[.D7]-[.D6]" office:value-type="float" office:value="0.00000775462962962963" calcext:value-type="float">
            <text:p>0,00000775462962962963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7" office:value-type="float" office:value="402" calcext:value-type="float">
            <text:p>40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65277777777778" calcext:value-type="float">
            <text:p>0,00004652777777777780</text:p>
          </table:table-cell>
          <table:table-cell table:formula="of:=[.D8]-[.D7]" office:value-type="float" office:value="0.00000775462962962962" calcext:value-type="float">
            <text:p>0,0000077546296296296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7" office:value-type="float" office:value="469" calcext:value-type="float">
            <text:p>46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42824074074074" calcext:value-type="float">
            <text:p>0,00005428240740740740</text:p>
          </table:table-cell>
          <table:table-cell table:formula="of:=[.D9]-[.D8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7" office:value-type="float" office:value="536" calcext:value-type="float">
            <text:p>53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2037037037037" calcext:value-type="float">
            <text:p>0,00006203703703703700</text:p>
          </table:table-cell>
          <table:table-cell table:formula="of:=[.D10]-[.D9]" office:value-type="float" office:value="0.00000775462962962962" calcext:value-type="float">
            <text:p>0,00000775462962962962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7" office:value-type="float" office:value="603" calcext:value-type="float">
            <text:p>60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97916666666667" calcext:value-type="float">
            <text:p>0,00006979166666666670</text:p>
          </table:table-cell>
          <table:table-cell table:formula="of:=[.D11]-[.D1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7" office:value-type="float" office:value="670" calcext:value-type="float">
            <text:p>6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75462962962963" calcext:value-type="float">
            <text:p>0,00007754629629629630</text:p>
          </table:table-cell>
          <table:table-cell table:formula="of:=[.D12]-[.D11]" office:value-type="float" office:value="0.00000775462962962962" calcext:value-type="float">
            <text:p>0,0000077546296296296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7" office:value-type="float" office:value="737" calcext:value-type="float">
            <text:p>73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53009259259259" calcext:value-type="float">
            <text:p>0,00008530092592592590</text:p>
          </table:table-cell>
          <table:table-cell table:formula="of:=[.D13]-[.D1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7" office:value-type="float" office:value="804" calcext:value-type="float">
            <text:p>80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30555555555556" calcext:value-type="float">
            <text:p>0,00009305555555555560</text:p>
          </table:table-cell>
          <table:table-cell table:formula="of:=[.D14]-[.D13]" office:value-type="float" office:value="0.00000775462962962962" calcext:value-type="float">
            <text:p>0,0000077546296296296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7" office:value-type="float" office:value="871" calcext:value-type="float">
            <text:p>87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0810185185185" calcext:value-type="float">
            <text:p>0,00010081018518518500</text:p>
          </table:table-cell>
          <table:table-cell table:formula="of:=[.D15]-[.D14]" office:value-type="float" office:value="0.00000775462962962962" calcext:value-type="float">
            <text:p>0,0000077546296296296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7" office:value-type="float" office:value="938" calcext:value-type="float">
            <text:p>93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8564814814815" calcext:value-type="float">
            <text:p>0,00010856481481481500</text:p>
          </table:table-cell>
          <table:table-cell table:formula="of:=[.D16]-[.D15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7" office:value-type="float" office:value="1005" calcext:value-type="float">
            <text:p>100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6319444444444" calcext:value-type="float">
            <text:p>0,00011631944444444400</text:p>
          </table:table-cell>
          <table:table-cell table:formula="of:=[.D17]-[.D16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7" office:value-type="float" office:value="1072" calcext:value-type="float">
            <text:p>107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4074074074074" calcext:value-type="float">
            <text:p>0,00012407407407407400</text:p>
          </table:table-cell>
          <table:table-cell table:formula="of:=[.D18]-[.D17]" office:value-type="float" office:value="0.00000775462962962961" calcext:value-type="float">
            <text:p>0,00000775462962962961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7" office:value-type="float" office:value="1139" calcext:value-type="float">
            <text:p>113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31828703703704" calcext:value-type="float">
            <text:p>0,00013182870370370400</text:p>
          </table:table-cell>
          <table:table-cell table:formula="of:=[.D19]-[.D18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7" office:value-type="float" office:value="1206" calcext:value-type="float">
            <text:p>120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39583333333333" calcext:value-type="float">
            <text:p>0,00013958333333333300</text:p>
          </table:table-cell>
          <table:table-cell table:formula="of:=[.D20]-[.D19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7" office:value-type="float" office:value="1273" calcext:value-type="float">
            <text:p>127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47337962962963" calcext:value-type="float">
            <text:p>0,00014733796296296300</text:p>
          </table:table-cell>
          <table:table-cell table:formula="of:=[.D21]-[.D2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7" office:value-type="float" office:value="1340" calcext:value-type="float">
            <text:p>13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55092592592593" calcext:value-type="float">
            <text:p>0,00015509259259259300</text:p>
          </table:table-cell>
          <table:table-cell table:formula="of:=[.D22]-[.D21]" office:value-type="float" office:value="0.00000775462962962961" calcext:value-type="float">
            <text:p>0,00000775462962962961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7" office:value-type="float" office:value="1407" calcext:value-type="float">
            <text:p>140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62847222222222" calcext:value-type="float">
            <text:p>0,00016284722222222200</text:p>
          </table:table-cell>
          <table:table-cell table:formula="of:=[.D23]-[.D2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7" office:value-type="float" office:value="1474" calcext:value-type="float">
            <text:p>147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70601851851852" calcext:value-type="float">
            <text:p>0,00017060185185185200</text:p>
          </table:table-cell>
          <table:table-cell table:formula="of:=[.D24]-[.D23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7" office:value-type="float" office:value="1541" calcext:value-type="float">
            <text:p>154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78356481481482" calcext:value-type="float">
            <text:p>0,00017835648148148200</text:p>
          </table:table-cell>
          <table:table-cell table:formula="of:=[.D25]-[.D24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7" office:value-type="float" office:value="1608" calcext:value-type="float">
            <text:p>160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86111111111111" calcext:value-type="float">
            <text:p>0,00018611111111111100</text:p>
          </table:table-cell>
          <table:table-cell table:formula="of:=[.D26]-[.D25]" office:value-type="float" office:value="0.00000775462962962961" calcext:value-type="float">
            <text:p>0,00000775462962962961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7" office:value-type="float" office:value="1675" calcext:value-type="float">
            <text:p>16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93865740740741" calcext:value-type="float">
            <text:p>0,00019386574074074100</text:p>
          </table:table-cell>
          <table:table-cell table:formula="of:=[.D27]-[.D26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7" office:value-type="float" office:value="1742" calcext:value-type="float">
            <text:p>174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0162037037037" calcext:value-type="float">
            <text:p>0,00020162037037037000</text:p>
          </table:table-cell>
          <table:table-cell table:formula="of:=[.D28]-[.D27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7" office:value-type="float" office:value="1809" calcext:value-type="float">
            <text:p>180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09375" calcext:value-type="float">
            <text:p>0,00020937500000000000</text:p>
          </table:table-cell>
          <table:table-cell table:formula="of:=[.D29]-[.D28]" office:value-type="float" office:value="0.00000775462962962961" calcext:value-type="float">
            <text:p>0,00000775462962962961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7" office:value-type="float" office:value="1876" calcext:value-type="float">
            <text:p>187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1712962962963" calcext:value-type="float">
            <text:p>0,00021712962962963000</text:p>
          </table:table-cell>
          <table:table-cell table:formula="of:=[.D30]-[.D29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7" office:value-type="float" office:value="1943" calcext:value-type="float">
            <text:p>194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24884259259259" calcext:value-type="float">
            <text:p>0,00022488425925925900</text:p>
          </table:table-cell>
          <table:table-cell table:formula="of:=[.D31]-[.D3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7" office:value-type="float" office:value="2010" calcext:value-type="float">
            <text:p>20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32638888888889" calcext:value-type="float">
            <text:p>0,00023263888888888900</text:p>
          </table:table-cell>
          <table:table-cell table:formula="of:=[.D32]-[.D31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7" office:value-type="float" office:value="2077" calcext:value-type="float">
            <text:p>207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40393518518519" calcext:value-type="float">
            <text:p>0,00024039351851851900</text:p>
          </table:table-cell>
          <table:table-cell table:formula="of:=[.D33]-[.D3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7" office:value-type="float" office:value="2144" calcext:value-type="float">
            <text:p>214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48148148148148" calcext:value-type="float">
            <text:p>0,00024814814814814800</text:p>
          </table:table-cell>
          <table:table-cell table:formula="of:=[.D34]-[.D33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7" office:value-type="float" office:value="2211" calcext:value-type="float">
            <text:p>221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55902777777778" calcext:value-type="float">
            <text:p>0,00025590277777777800</text:p>
          </table:table-cell>
          <table:table-cell table:formula="of:=[.D35]-[.D34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7" office:value-type="float" office:value="2278" calcext:value-type="float">
            <text:p>227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63657407407407" calcext:value-type="float">
            <text:p>0,00026365740740740700</text:p>
          </table:table-cell>
          <table:table-cell table:formula="of:=[.D36]-[.D35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7" office:value-type="float" office:value="2345" calcext:value-type="float">
            <text:p>234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71412037037037" calcext:value-type="float">
            <text:p>0,00027141203703703700</text:p>
          </table:table-cell>
          <table:table-cell table:formula="of:=[.D37]-[.D36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7" office:value-type="float" office:value="2412" calcext:value-type="float">
            <text:p>241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79166666666667" calcext:value-type="float">
            <text:p>0,00027916666666666700</text:p>
          </table:table-cell>
          <table:table-cell table:formula="of:=[.D38]-[.D37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7" office:value-type="float" office:value="2479" calcext:value-type="float">
            <text:p>247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86921296296296" calcext:value-type="float">
            <text:p>0,00028692129629629600</text:p>
          </table:table-cell>
          <table:table-cell table:formula="of:=[.D39]-[.D38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7" office:value-type="float" office:value="2546" calcext:value-type="float">
            <text:p>254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94675925925926" calcext:value-type="float">
            <text:p>0,00029467592592592600</text:p>
          </table:table-cell>
          <table:table-cell table:formula="of:=[.D40]-[.D39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7" office:value-type="float" office:value="2613" calcext:value-type="float">
            <text:p>261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02430555555556" calcext:value-type="float">
            <text:p>0,00030243055555555600</text:p>
          </table:table-cell>
          <table:table-cell table:formula="of:=[.D41]-[.D4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7" office:value-type="float" office:value="2680" calcext:value-type="float">
            <text:p>26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10185185185185" calcext:value-type="float">
            <text:p>0,00031018518518518500</text:p>
          </table:table-cell>
          <table:table-cell table:formula="of:=[.D42]-[.D41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7" office:value-type="float" office:value="2747" calcext:value-type="float">
            <text:p>274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17939814814815" calcext:value-type="float">
            <text:p>0,00031793981481481500</text:p>
          </table:table-cell>
          <table:table-cell table:formula="of:=[.D43]-[.D4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7" office:value-type="float" office:value="2814" calcext:value-type="float">
            <text:p>281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25694444444444" calcext:value-type="float">
            <text:p>0,00032569444444444400</text:p>
          </table:table-cell>
          <table:table-cell table:formula="of:=[.D44]-[.D43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7" office:value-type="float" office:value="2881" calcext:value-type="float">
            <text:p>288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33449074074074" calcext:value-type="float">
            <text:p>0,00033344907407407400</text:p>
          </table:table-cell>
          <table:table-cell table:formula="of:=[.D45]-[.D44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7" office:value-type="float" office:value="2948" calcext:value-type="float">
            <text:p>294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41203703703704" calcext:value-type="float">
            <text:p>0,00034120370370370400</text:p>
          </table:table-cell>
          <table:table-cell table:formula="of:=[.D46]-[.D45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7" office:value-type="float" office:value="3015" calcext:value-type="float">
            <text:p>301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48958333333333" calcext:value-type="float">
            <text:p>0,00034895833333333300</text:p>
          </table:table-cell>
          <table:table-cell table:formula="of:=[.D47]-[.D46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7" office:value-type="float" office:value="3082" calcext:value-type="float">
            <text:p>308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56712962962963" calcext:value-type="float">
            <text:p>0,00035671296296296300</text:p>
          </table:table-cell>
          <table:table-cell table:formula="of:=[.D48]-[.D47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7" office:value-type="float" office:value="3149" calcext:value-type="float">
            <text:p>314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64467592592593" calcext:value-type="float">
            <text:p>0,00036446759259259300</text:p>
          </table:table-cell>
          <table:table-cell table:formula="of:=[.D49]-[.D48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7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72222222222222" calcext:value-type="float">
            <text:p>0,00037222222222222200</text:p>
          </table:table-cell>
          <table:table-cell table:formula="of:=[.D50]-[.D49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7" office:value-type="float" office:value="3283" calcext:value-type="float">
            <text:p>328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79976851851852" calcext:value-type="float">
            <text:p>0,00037997685185185200</text:p>
          </table:table-cell>
          <table:table-cell table:formula="of:=[.D51]-[.D5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7" office:value-type="float" office:value="3350" calcext:value-type="float">
            <text:p>33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87731481481481" calcext:value-type="float">
            <text:p>0,00038773148148148100</text:p>
          </table:table-cell>
          <table:table-cell table:formula="of:=[.D52]-[.D51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7" office:value-type="float" office:value="3417" calcext:value-type="float">
            <text:p>341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95486111111111" calcext:value-type="float">
            <text:p>0,00039548611111111100</text:p>
          </table:table-cell>
          <table:table-cell table:formula="of:=[.D53]-[.D5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7" office:value-type="float" office:value="3484" calcext:value-type="float">
            <text:p>348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03240740740741" calcext:value-type="float">
            <text:p>0,00040324074074074100</text:p>
          </table:table-cell>
          <table:table-cell table:formula="of:=[.D54]-[.D53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7" office:value-type="float" office:value="3551" calcext:value-type="float">
            <text:p>355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1099537037037" calcext:value-type="float">
            <text:p>0,00041099537037037000</text:p>
          </table:table-cell>
          <table:table-cell table:formula="of:=[.D55]-[.D54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7" office:value-type="float" office:value="3618" calcext:value-type="float">
            <text:p>361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1875" calcext:value-type="float">
            <text:p>0,00041875000000000000</text:p>
          </table:table-cell>
          <table:table-cell table:formula="of:=[.D56]-[.D55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7" office:value-type="float" office:value="3685" calcext:value-type="float">
            <text:p>368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2650462962963" calcext:value-type="float">
            <text:p>0,00042650462962963000</text:p>
          </table:table-cell>
          <table:table-cell table:formula="of:=[.D57]-[.D56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7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34259259259259" calcext:value-type="float">
            <text:p>0,00043425925925925900</text:p>
          </table:table-cell>
          <table:table-cell table:formula="of:=[.D58]-[.D57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7" office:value-type="float" office:value="3819" calcext:value-type="float">
            <text:p>381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42013888888889" calcext:value-type="float">
            <text:p>0,00044201388888888900</text:p>
          </table:table-cell>
          <table:table-cell table:formula="of:=[.D59]-[.D58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7" office:value-type="float" office:value="3886" calcext:value-type="float">
            <text:p>388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49768518518519" calcext:value-type="float">
            <text:p>0,00044976851851851800</text:p>
          </table:table-cell>
          <table:table-cell table:formula="of:=[.D60]-[.D59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7" office:value-type="float" office:value="3953" calcext:value-type="float">
            <text:p>395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57523148148148" calcext:value-type="float">
            <text:p>0,00045752314814814800</text:p>
          </table:table-cell>
          <table:table-cell table:formula="of:=[.D61]-[.D60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7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65277777777778" calcext:value-type="float">
            <text:p>0,00046527777777777800</text:p>
          </table:table-cell>
          <table:table-cell table:formula="of:=[.D62]-[.D61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7" office:value-type="float" office:value="4087" calcext:value-type="float">
            <text:p>408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73032407407407" calcext:value-type="float">
            <text:p>0,00047303240740740700</text:p>
          </table:table-cell>
          <table:table-cell table:formula="of:=[.D63]-[.D62]" office:value-type="float" office:value="0.00000775462962962964" calcext:value-type="float">
            <text:p>0,0000077546296296296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7" office:value-type="float" office:value="4154" calcext:value-type="float">
            <text:p>415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80787037037037" calcext:value-type="float">
            <text:p>0,00048078703703703700</text:p>
          </table:table-cell>
          <table:table-cell table:formula="of:=[.D64]-[.D63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7" office:value-type="float" office:value="4221" calcext:value-type="float">
            <text:p>422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88541666666667" calcext:value-type="float">
            <text:p>0,00048854166666666700</text:p>
          </table:table-cell>
          <table:table-cell table:formula="of:=[.D65]-[.D6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7" office:value-type="float" office:value="4288" calcext:value-type="float">
            <text:p>428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96296296296296" calcext:value-type="float">
            <text:p>0,00049629629629629600</text:p>
          </table:table-cell>
          <table:table-cell table:formula="of:=[.D66]-[.D65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7" office:value-type="float" office:value="4355" calcext:value-type="float">
            <text:p>435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04050925925926" calcext:value-type="float">
            <text:p>0,00050405092592592600</text:p>
          </table:table-cell>
          <table:table-cell table:formula="of:=[.D67]-[.D6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7" office:value-type="float" office:value="4422" calcext:value-type="float">
            <text:p>442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11805555555556" calcext:value-type="float">
            <text:p>0,00051180555555555600</text:p>
          </table:table-cell>
          <table:table-cell table:formula="of:=[.D68]-[.D67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7" office:value-type="float" office:value="4489" calcext:value-type="float">
            <text:p>448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19560185185185" calcext:value-type="float">
            <text:p>0,00051956018518518500</text:p>
          </table:table-cell>
          <table:table-cell table:formula="of:=[.D69]-[.D68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7" office:value-type="float" office:value="4556" calcext:value-type="float">
            <text:p>455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27314814814815" calcext:value-type="float">
            <text:p>0,00052731481481481500</text:p>
          </table:table-cell>
          <table:table-cell table:formula="of:=[.D70]-[.D6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7" office:value-type="float" office:value="4623" calcext:value-type="float">
            <text:p>462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35069444444445" calcext:value-type="float">
            <text:p>0,00053506944444444500</text:p>
          </table:table-cell>
          <table:table-cell table:formula="of:=[.D71]-[.D70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7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42824074074074" calcext:value-type="float">
            <text:p>0,00054282407407407400</text:p>
          </table:table-cell>
          <table:table-cell table:formula="of:=[.D72]-[.D7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7" office:value-type="float" office:value="4757" calcext:value-type="float">
            <text:p>475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50578703703704" calcext:value-type="float">
            <text:p>0,00055057870370370400</text:p>
          </table:table-cell>
          <table:table-cell table:formula="of:=[.D73]-[.D72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7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58333333333333" calcext:value-type="float">
            <text:p>0,00055833333333333300</text:p>
          </table:table-cell>
          <table:table-cell table:formula="of:=[.D74]-[.D7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7" office:value-type="float" office:value="4891" calcext:value-type="float">
            <text:p>489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66087962962963" calcext:value-type="float">
            <text:p>0,00056608796296296300</text:p>
          </table:table-cell>
          <table:table-cell table:formula="of:=[.D75]-[.D74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7" office:value-type="float" office:value="4958" calcext:value-type="float">
            <text:p>495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73842592592593" calcext:value-type="float">
            <text:p>0,00057384259259259300</text:p>
          </table:table-cell>
          <table:table-cell table:formula="of:=[.D76]-[.D75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7" office:value-type="float" office:value="5025" calcext:value-type="float">
            <text:p>50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81597222222222" calcext:value-type="float">
            <text:p>0,00058159722222222200</text:p>
          </table:table-cell>
          <table:table-cell table:formula="of:=[.D77]-[.D7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7" office:value-type="float" office:value="5092" calcext:value-type="float">
            <text:p>509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89351851851852" calcext:value-type="float">
            <text:p>0,00058935185185185200</text:p>
          </table:table-cell>
          <table:table-cell table:formula="of:=[.D78]-[.D77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7" office:value-type="float" office:value="5159" calcext:value-type="float">
            <text:p>515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97106481481481" calcext:value-type="float">
            <text:p>0,00059710648148148100</text:p>
          </table:table-cell>
          <table:table-cell table:formula="of:=[.D79]-[.D7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7" office:value-type="float" office:value="5226" calcext:value-type="float">
            <text:p>522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04861111111111" calcext:value-type="float">
            <text:p>0,00060486111111111100</text:p>
          </table:table-cell>
          <table:table-cell table:formula="of:=[.D80]-[.D79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7" office:value-type="float" office:value="5293" calcext:value-type="float">
            <text:p>529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12615740740741" calcext:value-type="float">
            <text:p>0,00061261574074074100</text:p>
          </table:table-cell>
          <table:table-cell table:formula="of:=[.D81]-[.D8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7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2037037037037" calcext:value-type="float">
            <text:p>0,00062037037037037000</text:p>
          </table:table-cell>
          <table:table-cell table:formula="of:=[.D82]-[.D81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7" office:value-type="float" office:value="5427" calcext:value-type="float">
            <text:p>542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28125" calcext:value-type="float">
            <text:p>0,00062812500000000000</text:p>
          </table:table-cell>
          <table:table-cell table:formula="of:=[.D83]-[.D82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7" office:value-type="float" office:value="5494" calcext:value-type="float">
            <text:p>549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3587962962963" calcext:value-type="float">
            <text:p>0,00063587962962963000</text:p>
          </table:table-cell>
          <table:table-cell table:formula="of:=[.D84]-[.D8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7" office:value-type="float" office:value="5561" calcext:value-type="float">
            <text:p>556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43634259259259" calcext:value-type="float">
            <text:p>0,00064363425925925900</text:p>
          </table:table-cell>
          <table:table-cell table:formula="of:=[.D85]-[.D84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7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51388888888889" calcext:value-type="float">
            <text:p>0,00065138888888888900</text:p>
          </table:table-cell>
          <table:table-cell table:formula="of:=[.D86]-[.D8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7" office:value-type="float" office:value="5695" calcext:value-type="float">
            <text:p>569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59143518518519" calcext:value-type="float">
            <text:p>0,00065914351851851900</text:p>
          </table:table-cell>
          <table:table-cell table:formula="of:=[.D87]-[.D86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7" office:value-type="float" office:value="5762" calcext:value-type="float">
            <text:p>576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66898148148148" calcext:value-type="float">
            <text:p>0,00066689814814814800</text:p>
          </table:table-cell>
          <table:table-cell table:formula="of:=[.D88]-[.D8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7" office:value-type="float" office:value="5829" calcext:value-type="float">
            <text:p>582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74652777777778" calcext:value-type="float">
            <text:p>0,00067465277777777800</text:p>
          </table:table-cell>
          <table:table-cell table:formula="of:=[.D89]-[.D88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7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82407407407407" calcext:value-type="float">
            <text:p>0,00068240740740740700</text:p>
          </table:table-cell>
          <table:table-cell table:formula="of:=[.D90]-[.D8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7" office:value-type="float" office:value="5963" calcext:value-type="float">
            <text:p>596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90162037037037" calcext:value-type="float">
            <text:p>0,00069016203703703700</text:p>
          </table:table-cell>
          <table:table-cell table:formula="of:=[.D91]-[.D90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7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97916666666667" calcext:value-type="float">
            <text:p>0,00069791666666666700</text:p>
          </table:table-cell>
          <table:table-cell table:formula="of:=[.D92]-[.D91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7" office:value-type="float" office:value="6097" calcext:value-type="float">
            <text:p>609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05671296296296" calcext:value-type="float">
            <text:p>0,00070567129629629600</text:p>
          </table:table-cell>
          <table:table-cell table:formula="of:=[.D93]-[.D9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7" office:value-type="float" office:value="6164" calcext:value-type="float">
            <text:p>616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13425925925926" calcext:value-type="float">
            <text:p>0,00071342592592592600</text:p>
          </table:table-cell>
          <table:table-cell table:formula="of:=[.D94]-[.D93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7" office:value-type="float" office:value="6231" calcext:value-type="float">
            <text:p>623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21180555555556" calcext:value-type="float">
            <text:p>0,00072118055555555600</text:p>
          </table:table-cell>
          <table:table-cell table:formula="of:=[.D95]-[.D9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7" office:value-type="float" office:value="6298" calcext:value-type="float">
            <text:p>629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28935185185185" calcext:value-type="float">
            <text:p>0,00072893518518518500</text:p>
          </table:table-cell>
          <table:table-cell table:formula="of:=[.D96]-[.D95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7" office:value-type="float" office:value="6365" calcext:value-type="float">
            <text:p>636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36689814814815" calcext:value-type="float">
            <text:p>0,00073668981481481500</text:p>
          </table:table-cell>
          <table:table-cell table:formula="of:=[.D97]-[.D9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7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44444444444445" calcext:value-type="float">
            <text:p>0,00074444444444444500</text:p>
          </table:table-cell>
          <table:table-cell table:formula="of:=[.D98]-[.D97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7" office:value-type="float" office:value="6499" calcext:value-type="float">
            <text:p>649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52199074074074" calcext:value-type="float">
            <text:p>0,00075219907407407400</text:p>
          </table:table-cell>
          <table:table-cell table:formula="of:=[.D99]-[.D98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7" office:value-type="float" office:value="6566" calcext:value-type="float">
            <text:p>656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59953703703704" calcext:value-type="float">
            <text:p>0,00075995370370370400</text:p>
          </table:table-cell>
          <table:table-cell table:formula="of:=[.D100]-[.D9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7" office:value-type="float" office:value="6633" calcext:value-type="float">
            <text:p>663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67708333333333" calcext:value-type="float">
            <text:p>0,00076770833333333300</text:p>
          </table:table-cell>
          <table:table-cell table:formula="of:=[.D101]-[.D100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7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75462962962963" calcext:value-type="float">
            <text:p>0,00077546296296296300</text:p>
          </table:table-cell>
          <table:table-cell table:formula="of:=[.D102]-[.D10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7" office:value-type="float" office:value="6767" calcext:value-type="float">
            <text:p>676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83217592592593" calcext:value-type="float">
            <text:p>0,00078321759259259300</text:p>
          </table:table-cell>
          <table:table-cell table:formula="of:=[.D103]-[.D102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7" office:value-type="float" office:value="6834" calcext:value-type="float">
            <text:p>683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90972222222222" calcext:value-type="float">
            <text:p>0,00079097222222222200</text:p>
          </table:table-cell>
          <table:table-cell table:formula="of:=[.D104]-[.D10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7" office:value-type="float" office:value="6901" calcext:value-type="float">
            <text:p>690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98726851851852" calcext:value-type="float">
            <text:p>0,00079872685185185200</text:p>
          </table:table-cell>
          <table:table-cell table:formula="of:=[.D105]-[.D104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7" office:value-type="float" office:value="6968" calcext:value-type="float">
            <text:p>696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06481481481482" calcext:value-type="float">
            <text:p>0,00080648148148148200</text:p>
          </table:table-cell>
          <table:table-cell table:formula="of:=[.D106]-[.D105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7" office:value-type="float" office:value="7035" calcext:value-type="float">
            <text:p>703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14236111111111" calcext:value-type="float">
            <text:p>0,00081423611111111100</text:p>
          </table:table-cell>
          <table:table-cell table:formula="of:=[.D107]-[.D10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7" office:value-type="float" office:value="7102" calcext:value-type="float">
            <text:p>710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21990740740741" calcext:value-type="float">
            <text:p>0,00082199074074074100</text:p>
          </table:table-cell>
          <table:table-cell table:formula="of:=[.D108]-[.D107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7" office:value-type="float" office:value="7169" calcext:value-type="float">
            <text:p>716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2974537037037" calcext:value-type="float">
            <text:p>0,00082974537037037000</text:p>
          </table:table-cell>
          <table:table-cell table:formula="of:=[.D109]-[.D10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7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375" calcext:value-type="float">
            <text:p>0,00083750000000000000</text:p>
          </table:table-cell>
          <table:table-cell table:formula="of:=[.D110]-[.D109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7" office:value-type="float" office:value="7303" calcext:value-type="float">
            <text:p>730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4525462962963" calcext:value-type="float">
            <text:p>0,00084525462962963000</text:p>
          </table:table-cell>
          <table:table-cell table:formula="of:=[.D111]-[.D11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7" office:value-type="float" office:value="7370" calcext:value-type="float">
            <text:p>73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53009259259259" calcext:value-type="float">
            <text:p>0,00085300925925925900</text:p>
          </table:table-cell>
          <table:table-cell table:formula="of:=[.D112]-[.D111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7" office:value-type="float" office:value="7437" calcext:value-type="float">
            <text:p>743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60763888888889" calcext:value-type="float">
            <text:p>0,00086076388888888900</text:p>
          </table:table-cell>
          <table:table-cell table:formula="of:=[.D113]-[.D112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7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68518518518519" calcext:value-type="float">
            <text:p>0,00086851851851851800</text:p>
          </table:table-cell>
          <table:table-cell table:formula="of:=[.D114]-[.D11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7" office:value-type="float" office:value="7571" calcext:value-type="float">
            <text:p>757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76273148148148" calcext:value-type="float">
            <text:p>0,00087627314814814800</text:p>
          </table:table-cell>
          <table:table-cell table:formula="of:=[.D115]-[.D114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7" office:value-type="float" office:value="7638" calcext:value-type="float">
            <text:p>763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84027777777778" calcext:value-type="float">
            <text:p>0,00088402777777777800</text:p>
          </table:table-cell>
          <table:table-cell table:formula="of:=[.D116]-[.D11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7" office:value-type="float" office:value="7705" calcext:value-type="float">
            <text:p>770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91782407407407" calcext:value-type="float">
            <text:p>0,00089178240740740700</text:p>
          </table:table-cell>
          <table:table-cell table:formula="of:=[.D117]-[.D116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7" office:value-type="float" office:value="7772" calcext:value-type="float">
            <text:p>777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99537037037037" calcext:value-type="float">
            <text:p>0,00089953703703703700</text:p>
          </table:table-cell>
          <table:table-cell table:formula="of:=[.D118]-[.D11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7" office:value-type="float" office:value="7839" calcext:value-type="float">
            <text:p>783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07291666666667" calcext:value-type="float">
            <text:p>0,00090729166666666700</text:p>
          </table:table-cell>
          <table:table-cell table:formula="of:=[.D119]-[.D118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7" office:value-type="float" office:value="7906" calcext:value-type="float">
            <text:p>790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15046296296296" calcext:value-type="float">
            <text:p>0,00091504629629629600</text:p>
          </table:table-cell>
          <table:table-cell table:formula="of:=[.D120]-[.D119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7" office:value-type="float" office:value="7973" calcext:value-type="float">
            <text:p>797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22800925925926" calcext:value-type="float">
            <text:p>0,00092280092592592600</text:p>
          </table:table-cell>
          <table:table-cell table:formula="of:=[.D121]-[.D12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7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30555555555556" calcext:value-type="float">
            <text:p>0,00093055555555555600</text:p>
          </table:table-cell>
          <table:table-cell table:formula="of:=[.D122]-[.D121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7" office:value-type="float" office:value="8107" calcext:value-type="float">
            <text:p>810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38310185185185" calcext:value-type="float">
            <text:p>0,00093831018518518500</text:p>
          </table:table-cell>
          <table:table-cell table:formula="of:=[.D123]-[.D12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7" office:value-type="float" office:value="8174" calcext:value-type="float">
            <text:p>817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46064814814815" calcext:value-type="float">
            <text:p>0,00094606481481481500</text:p>
          </table:table-cell>
          <table:table-cell table:formula="of:=[.D124]-[.D123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7" office:value-type="float" office:value="8241" calcext:value-type="float">
            <text:p>824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53819444444444" calcext:value-type="float">
            <text:p>0,00095381944444444500</text:p>
          </table:table-cell>
          <table:table-cell table:formula="of:=[.D125]-[.D12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7" office:value-type="float" office:value="8308" calcext:value-type="float">
            <text:p>830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61574074074074" calcext:value-type="float">
            <text:p>0,00096157407407407400</text:p>
          </table:table-cell>
          <table:table-cell table:formula="of:=[.D126]-[.D125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7" office:value-type="float" office:value="8375" calcext:value-type="float">
            <text:p>8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69328703703704" calcext:value-type="float">
            <text:p>0,00096932870370370400</text:p>
          </table:table-cell>
          <table:table-cell table:formula="of:=[.D127]-[.D126]" office:value-type="float" office:value="0.00000775462962962958" calcext:value-type="float">
            <text:p>0,0000077546296296295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7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77083333333333" calcext:value-type="float">
            <text:p>0,00097708333333333300</text:p>
          </table:table-cell>
          <table:table-cell table:formula="of:=[.D128]-[.D12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7" office:value-type="float" office:value="8509" calcext:value-type="float">
            <text:p>850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84837962962963" calcext:value-type="float">
            <text:p>0,00098483796296296300</text:p>
          </table:table-cell>
          <table:table-cell table:formula="of:=[.D129]-[.D12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7" office:value-type="float" office:value="8576" calcext:value-type="float">
            <text:p>857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92592592592593" calcext:value-type="float">
            <text:p>0,00099259259259259300</text:p>
          </table:table-cell>
          <table:table-cell table:formula="of:=[.D130]-[.D129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7" office:value-type="float" office:value="8643" calcext:value-type="float">
            <text:p>864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0034722222222" calcext:value-type="float">
            <text:p>0,00100034722222222000</text:p>
          </table:table-cell>
          <table:table-cell table:formula="of:=[.D131]-[.D13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7" office:value-type="float" office:value="8710" calcext:value-type="float">
            <text:p>87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0810185185185" calcext:value-type="float">
            <text:p>0,00100810185185185000</text:p>
          </table:table-cell>
          <table:table-cell table:formula="of:=[.D132]-[.D13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7" office:value-type="float" office:value="8777" calcext:value-type="float">
            <text:p>877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1585648148148" calcext:value-type="float">
            <text:p>0,00101585648148148000</text:p>
          </table:table-cell>
          <table:table-cell table:formula="of:=[.D133]-[.D13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7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2361111111111" calcext:value-type="float">
            <text:p>0,00102361111111111000</text:p>
          </table:table-cell>
          <table:table-cell table:formula="of:=[.D134]-[.D133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7" office:value-type="float" office:value="8911" calcext:value-type="float">
            <text:p>891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3136574074074" calcext:value-type="float">
            <text:p>0,00103136574074074000</text:p>
          </table:table-cell>
          <table:table-cell table:formula="of:=[.D135]-[.D13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7" office:value-type="float" office:value="8978" calcext:value-type="float">
            <text:p>897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3912037037037" calcext:value-type="float">
            <text:p>0,00103912037037037000</text:p>
          </table:table-cell>
          <table:table-cell table:formula="of:=[.D136]-[.D13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7" office:value-type="float" office:value="9045" calcext:value-type="float">
            <text:p>904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46875" calcext:value-type="float">
            <text:p>0,00104687500000000000</text:p>
          </table:table-cell>
          <table:table-cell table:formula="of:=[.D137]-[.D136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7" office:value-type="float" office:value="9112" calcext:value-type="float">
            <text:p>911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5462962962963" calcext:value-type="float">
            <text:p>0,00105462962962963000</text:p>
          </table:table-cell>
          <table:table-cell table:formula="of:=[.D138]-[.D13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7" office:value-type="float" office:value="9179" calcext:value-type="float">
            <text:p>917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6238425925926" calcext:value-type="float">
            <text:p>0,00106238425925926000</text:p>
          </table:table-cell>
          <table:table-cell table:formula="of:=[.D139]-[.D13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7" office:value-type="float" office:value="9246" calcext:value-type="float">
            <text:p>924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7013888888889" calcext:value-type="float">
            <text:p>0,00107013888888889000</text:p>
          </table:table-cell>
          <table:table-cell table:formula="of:=[.D140]-[.D13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7" office:value-type="float" office:value="9313" calcext:value-type="float">
            <text:p>931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7789351851852" calcext:value-type="float">
            <text:p>0,00107789351851852000</text:p>
          </table:table-cell>
          <table:table-cell table:formula="of:=[.D141]-[.D140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7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8564814814815" calcext:value-type="float">
            <text:p>0,00108564814814815000</text:p>
          </table:table-cell>
          <table:table-cell table:formula="of:=[.D142]-[.D14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7" office:value-type="float" office:value="9447" calcext:value-type="float">
            <text:p>944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9340277777778" calcext:value-type="float">
            <text:p>0,00109340277777778000</text:p>
          </table:table-cell>
          <table:table-cell table:formula="of:=[.D143]-[.D14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7" office:value-type="float" office:value="9514" calcext:value-type="float">
            <text:p>951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0115740740741" calcext:value-type="float">
            <text:p>0,00110115740740741000</text:p>
          </table:table-cell>
          <table:table-cell table:formula="of:=[.D144]-[.D143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7" office:value-type="float" office:value="9581" calcext:value-type="float">
            <text:p>958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0891203703704" calcext:value-type="float">
            <text:p>0,00110891203703704000</text:p>
          </table:table-cell>
          <table:table-cell table:formula="of:=[.D145]-[.D14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7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1666666666667" calcext:value-type="float">
            <text:p>0,00111666666666667000</text:p>
          </table:table-cell>
          <table:table-cell table:formula="of:=[.D146]-[.D14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7" office:value-type="float" office:value="9715" calcext:value-type="float">
            <text:p>971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244212962963" calcext:value-type="float">
            <text:p>0,00112442129629630000</text:p>
          </table:table-cell>
          <table:table-cell table:formula="of:=[.D147]-[.D14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7" office:value-type="float" office:value="9782" calcext:value-type="float">
            <text:p>978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3217592592593" calcext:value-type="float">
            <text:p>0,00113217592592593000</text:p>
          </table:table-cell>
          <table:table-cell table:formula="of:=[.D148]-[.D147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7" office:value-type="float" office:value="9849" calcext:value-type="float">
            <text:p>984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3993055555556" calcext:value-type="float">
            <text:p>0,00113993055555556000</text:p>
          </table:table-cell>
          <table:table-cell table:formula="of:=[.D149]-[.D14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7" office:value-type="float" office:value="9916" calcext:value-type="float">
            <text:p>991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4768518518519" calcext:value-type="float">
            <text:p>0,00114768518518519000</text:p>
          </table:table-cell>
          <table:table-cell table:formula="of:=[.D150]-[.D14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7" office:value-type="float" office:value="9983" calcext:value-type="float">
            <text:p>998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5543981481481" calcext:value-type="float">
            <text:p>0,00115543981481481000</text:p>
          </table:table-cell>
          <table:table-cell table:formula="of:=[.D151]-[.D150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7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6319444444444" calcext:value-type="float">
            <text:p>0,00116319444444444000</text:p>
          </table:table-cell>
          <table:table-cell table:formula="of:=[.D152]-[.D15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7" office:value-type="float" office:value="10117" calcext:value-type="float">
            <text:p>1011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7094907407407" calcext:value-type="float">
            <text:p>0,00117094907407407000</text:p>
          </table:table-cell>
          <table:table-cell table:formula="of:=[.D153]-[.D15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7" office:value-type="float" office:value="10184" calcext:value-type="float">
            <text:p>1018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787037037037" calcext:value-type="float">
            <text:p>0,00117870370370370000</text:p>
          </table:table-cell>
          <table:table-cell table:formula="of:=[.D154]-[.D15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7" office:value-type="float" office:value="10251" calcext:value-type="float">
            <text:p>1025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18645833333333" calcext:value-type="float">
            <text:p>0,00118645833333333000</text:p>
          </table:table-cell>
          <table:table-cell table:formula="of:=[.D155]-[.D154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7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9421296296296" calcext:value-type="float">
            <text:p>0,00119421296296296000</text:p>
          </table:table-cell>
          <table:table-cell table:formula="of:=[.D156]-[.D15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7" office:value-type="float" office:value="10385" calcext:value-type="float">
            <text:p>1038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0196759259259" calcext:value-type="float">
            <text:p>0,00120196759259259000</text:p>
          </table:table-cell>
          <table:table-cell table:formula="of:=[.D157]-[.D15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7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20972222222222" calcext:value-type="float">
            <text:p>0,00120972222222222000</text:p>
          </table:table-cell>
          <table:table-cell table:formula="of:=[.D158]-[.D157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7" office:value-type="float" office:value="10519" calcext:value-type="float">
            <text:p>1051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21747685185185" calcext:value-type="float">
            <text:p>0,00121747685185185000</text:p>
          </table:table-cell>
          <table:table-cell table:formula="of:=[.D159]-[.D15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7" office:value-type="float" office:value="10586" calcext:value-type="float">
            <text:p>1058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2523148148148" calcext:value-type="float">
            <text:p>0,00122523148148148000</text:p>
          </table:table-cell>
          <table:table-cell table:formula="of:=[.D160]-[.D15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7" office:value-type="float" office:value="10653" calcext:value-type="float">
            <text:p>1065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23298611111111" calcext:value-type="float">
            <text:p>0,00123298611111111000</text:p>
          </table:table-cell>
          <table:table-cell table:formula="of:=[.D161]-[.D16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7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4074074074074" calcext:value-type="float">
            <text:p>0,00124074074074074000</text:p>
          </table:table-cell>
          <table:table-cell table:formula="of:=[.D162]-[.D161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7" office:value-type="float" office:value="10787" calcext:value-type="float">
            <text:p>1078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24849537037037" calcext:value-type="float">
            <text:p>0,00124849537037037000</text:p>
          </table:table-cell>
          <table:table-cell table:formula="of:=[.D163]-[.D16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7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5625" calcext:value-type="float">
            <text:p>0,00125625000000000000</text:p>
          </table:table-cell>
          <table:table-cell table:formula="of:=[.D164]-[.D16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7" office:value-type="float" office:value="10921" calcext:value-type="float">
            <text:p>1092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26400462962963" calcext:value-type="float">
            <text:p>0,00126400462962963000</text:p>
          </table:table-cell>
          <table:table-cell table:formula="of:=[.D165]-[.D164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7" office:value-type="float" office:value="10988" calcext:value-type="float">
            <text:p>1098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27175925925926" calcext:value-type="float">
            <text:p>0,00127175925925926000</text:p>
          </table:table-cell>
          <table:table-cell table:formula="of:=[.D166]-[.D16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7" office:value-type="float" office:value="11055" calcext:value-type="float">
            <text:p>1105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7951388888889" calcext:value-type="float">
            <text:p>0,00127951388888889000</text:p>
          </table:table-cell>
          <table:table-cell table:formula="of:=[.D167]-[.D16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7" office:value-type="float" office:value="11122" calcext:value-type="float">
            <text:p>1112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28726851851852" calcext:value-type="float">
            <text:p>0,00128726851851852000</text:p>
          </table:table-cell>
          <table:table-cell table:formula="of:=[.D168]-[.D16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7" office:value-type="float" office:value="11189" calcext:value-type="float">
            <text:p>1118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29502314814815" calcext:value-type="float">
            <text:p>0,00129502314814815000</text:p>
          </table:table-cell>
          <table:table-cell table:formula="of:=[.D169]-[.D168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7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30277777777778" calcext:value-type="float">
            <text:p>0,00130277777777778000</text:p>
          </table:table-cell>
          <table:table-cell table:formula="of:=[.D170]-[.D16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7" office:value-type="float" office:value="11323" calcext:value-type="float">
            <text:p>1132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31053240740741" calcext:value-type="float">
            <text:p>0,00131053240740741000</text:p>
          </table:table-cell>
          <table:table-cell table:formula="of:=[.D171]-[.D17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7" office:value-type="float" office:value="11390" calcext:value-type="float">
            <text:p>113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31828703703704" calcext:value-type="float">
            <text:p>0,00131828703703704000</text:p>
          </table:table-cell>
          <table:table-cell table:formula="of:=[.D172]-[.D17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7" office:value-type="float" office:value="11457" calcext:value-type="float">
            <text:p>1145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32604166666667" calcext:value-type="float">
            <text:p>0,00132604166666667000</text:p>
          </table:table-cell>
          <table:table-cell table:formula="of:=[.D173]-[.D172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7" office:value-type="float" office:value="11524" calcext:value-type="float">
            <text:p>1152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3337962962963" calcext:value-type="float">
            <text:p>0,00133379629629630000</text:p>
          </table:table-cell>
          <table:table-cell table:formula="of:=[.D174]-[.D17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7" office:value-type="float" office:value="11591" calcext:value-type="float">
            <text:p>1159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34155092592593" calcext:value-type="float">
            <text:p>0,00134155092592593000</text:p>
          </table:table-cell>
          <table:table-cell table:formula="of:=[.D175]-[.D17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7" office:value-type="float" office:value="11658" calcext:value-type="float">
            <text:p>1165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34930555555556" calcext:value-type="float">
            <text:p>0,00134930555555556000</text:p>
          </table:table-cell>
          <table:table-cell table:formula="of:=[.D176]-[.D175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7" office:value-type="float" office:value="11725" calcext:value-type="float">
            <text:p>117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35706018518519" calcext:value-type="float">
            <text:p>0,00135706018518519000</text:p>
          </table:table-cell>
          <table:table-cell table:formula="of:=[.D177]-[.D17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7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36481481481481" calcext:value-type="float">
            <text:p>0,00136481481481481000</text:p>
          </table:table-cell>
          <table:table-cell table:formula="of:=[.D178]-[.D17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7" office:value-type="float" office:value="11859" calcext:value-type="float">
            <text:p>1185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37256944444444" calcext:value-type="float">
            <text:p>0,00137256944444444000</text:p>
          </table:table-cell>
          <table:table-cell table:formula="of:=[.D179]-[.D17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7" office:value-type="float" office:value="11926" calcext:value-type="float">
            <text:p>1192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38032407407407" calcext:value-type="float">
            <text:p>0,00138032407407407000</text:p>
          </table:table-cell>
          <table:table-cell table:formula="of:=[.D180]-[.D179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7" office:value-type="float" office:value="11993" calcext:value-type="float">
            <text:p>1199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3880787037037" calcext:value-type="float">
            <text:p>0,00138807870370370000</text:p>
          </table:table-cell>
          <table:table-cell table:formula="of:=[.D181]-[.D18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7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39583333333333" calcext:value-type="float">
            <text:p>0,00139583333333333000</text:p>
          </table:table-cell>
          <table:table-cell table:formula="of:=[.D182]-[.D18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7" office:value-type="float" office:value="12127" calcext:value-type="float">
            <text:p>1212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40358796296296" calcext:value-type="float">
            <text:p>0,00140358796296296000</text:p>
          </table:table-cell>
          <table:table-cell table:formula="of:=[.D183]-[.D182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7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41134259259259" calcext:value-type="float">
            <text:p>0,00141134259259259000</text:p>
          </table:table-cell>
          <table:table-cell table:formula="of:=[.D184]-[.D18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7" office:value-type="float" office:value="12261" calcext:value-type="float">
            <text:p>1226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41909722222222" calcext:value-type="float">
            <text:p>0,00141909722222222000</text:p>
          </table:table-cell>
          <table:table-cell table:formula="of:=[.D185]-[.D18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7" office:value-type="float" office:value="12328" calcext:value-type="float">
            <text:p>1232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42685185185185" calcext:value-type="float">
            <text:p>0,00142685185185185000</text:p>
          </table:table-cell>
          <table:table-cell table:formula="of:=[.D186]-[.D18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7" office:value-type="float" office:value="12395" calcext:value-type="float">
            <text:p>1239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43460648148148" calcext:value-type="float">
            <text:p>0,00143460648148148000</text:p>
          </table:table-cell>
          <table:table-cell table:formula="of:=[.D187]-[.D186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7" office:value-type="float" office:value="12462" calcext:value-type="float">
            <text:p>1246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44236111111111" calcext:value-type="float">
            <text:p>0,00144236111111111000</text:p>
          </table:table-cell>
          <table:table-cell table:formula="of:=[.D188]-[.D18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7" office:value-type="float" office:value="12529" calcext:value-type="float">
            <text:p>1252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45011574074074" calcext:value-type="float">
            <text:p>0,00145011574074074000</text:p>
          </table:table-cell>
          <table:table-cell table:formula="of:=[.D189]-[.D18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7" office:value-type="float" office:value="12596" calcext:value-type="float">
            <text:p>1259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45787037037037" calcext:value-type="float">
            <text:p>0,00145787037037037000</text:p>
          </table:table-cell>
          <table:table-cell table:formula="of:=[.D190]-[.D189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7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465625" calcext:value-type="float">
            <text:p>0,00146562500000000000</text:p>
          </table:table-cell>
          <table:table-cell table:formula="of:=[.D191]-[.D19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7" office:value-type="float" office:value="12730" calcext:value-type="float">
            <text:p>127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47337962962963" calcext:value-type="float">
            <text:p>0,00147337962962963000</text:p>
          </table:table-cell>
          <table:table-cell table:formula="of:=[.D192]-[.D19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7" office:value-type="float" office:value="12797" calcext:value-type="float">
            <text:p>1279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48113425925926" calcext:value-type="float">
            <text:p>0,00148113425925926000</text:p>
          </table:table-cell>
          <table:table-cell table:formula="of:=[.D193]-[.D19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7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48888888888889" calcext:value-type="float">
            <text:p>0,00148888888888889000</text:p>
          </table:table-cell>
          <table:table-cell table:formula="of:=[.D194]-[.D193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7" office:value-type="float" office:value="12931" calcext:value-type="float">
            <text:p>1293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49664351851852" calcext:value-type="float">
            <text:p>0,00149664351851852000</text:p>
          </table:table-cell>
          <table:table-cell table:formula="of:=[.D195]-[.D19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7" office:value-type="float" office:value="12998" calcext:value-type="float">
            <text:p>1299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50439814814815" calcext:value-type="float">
            <text:p>0,00150439814814815000</text:p>
          </table:table-cell>
          <table:table-cell table:formula="of:=[.D196]-[.D19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7" office:value-type="float" office:value="13065" calcext:value-type="float">
            <text:p>1306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51215277777778" calcext:value-type="float">
            <text:p>0,00151215277777778000</text:p>
          </table:table-cell>
          <table:table-cell table:formula="of:=[.D197]-[.D196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7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51990740740741" calcext:value-type="float">
            <text:p>0,00151990740740741000</text:p>
          </table:table-cell>
          <table:table-cell table:formula="of:=[.D198]-[.D19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7" office:value-type="float" office:value="13199" calcext:value-type="float">
            <text:p>1319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52766203703704" calcext:value-type="float">
            <text:p>0,00152766203703704000</text:p>
          </table:table-cell>
          <table:table-cell table:formula="of:=[.D199]-[.D19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7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53541666666667" calcext:value-type="float">
            <text:p>0,00153541666666667000</text:p>
          </table:table-cell>
          <table:table-cell table:formula="of:=[.D200]-[.D19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7" office:value-type="float" office:value="13333" calcext:value-type="float">
            <text:p>1333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5431712962963" calcext:value-type="float">
            <text:p>0,00154317129629630000</text:p>
          </table:table-cell>
          <table:table-cell table:formula="of:=[.D201]-[.D200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7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55092592592593" calcext:value-type="float">
            <text:p>0,00155092592592593000</text:p>
          </table:table-cell>
          <table:table-cell table:formula="of:=[.D202]-[.D20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7" office:value-type="float" office:value="13467" calcext:value-type="float">
            <text:p>1346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55868055555556" calcext:value-type="float">
            <text:p>0,00155868055555556000</text:p>
          </table:table-cell>
          <table:table-cell table:formula="of:=[.D203]-[.D20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7" office:value-type="float" office:value="13534" calcext:value-type="float">
            <text:p>1353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56643518518519" calcext:value-type="float">
            <text:p>0,00156643518518519000</text:p>
          </table:table-cell>
          <table:table-cell table:formula="of:=[.D204]-[.D203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7" office:value-type="float" office:value="13601" calcext:value-type="float">
            <text:p>1360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57418981481481" calcext:value-type="float">
            <text:p>0,00157418981481481000</text:p>
          </table:table-cell>
          <table:table-cell table:formula="of:=[.D205]-[.D20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7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58194444444444" calcext:value-type="float">
            <text:p>0,00158194444444444000</text:p>
          </table:table-cell>
          <table:table-cell table:formula="of:=[.D206]-[.D20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7" office:value-type="float" office:value="13735" calcext:value-type="float">
            <text:p>1373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58969907407407" calcext:value-type="float">
            <text:p>0,00158969907407407000</text:p>
          </table:table-cell>
          <table:table-cell table:formula="of:=[.D207]-[.D20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7" office:value-type="float" office:value="13802" calcext:value-type="float">
            <text:p>1380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5974537037037" calcext:value-type="float">
            <text:p>0,00159745370370370000</text:p>
          </table:table-cell>
          <table:table-cell table:formula="of:=[.D208]-[.D207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7" office:value-type="float" office:value="13869" calcext:value-type="float">
            <text:p>1386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60520833333333" calcext:value-type="float">
            <text:p>0,00160520833333333000</text:p>
          </table:table-cell>
          <table:table-cell table:formula="of:=[.D209]-[.D20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7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61296296296296" calcext:value-type="float">
            <text:p>0,00161296296296296000</text:p>
          </table:table-cell>
          <table:table-cell table:formula="of:=[.D210]-[.D20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7" office:value-type="float" office:value="14003" calcext:value-type="float">
            <text:p>1400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62071759259259" calcext:value-type="float">
            <text:p>0,00162071759259259000</text:p>
          </table:table-cell>
          <table:table-cell table:formula="of:=[.D211]-[.D210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7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62847222222222" calcext:value-type="float">
            <text:p>0,00162847222222222000</text:p>
          </table:table-cell>
          <table:table-cell table:formula="of:=[.D212]-[.D21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7" office:value-type="float" office:value="14137" calcext:value-type="float">
            <text:p>1413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63622685185185" calcext:value-type="float">
            <text:p>0,00163622685185185000</text:p>
          </table:table-cell>
          <table:table-cell table:formula="of:=[.D213]-[.D21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7" office:value-type="float" office:value="14204" calcext:value-type="float">
            <text:p>1420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64398148148148" calcext:value-type="float">
            <text:p>0,00164398148148148000</text:p>
          </table:table-cell>
          <table:table-cell table:formula="of:=[.D214]-[.D21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7" office:value-type="float" office:value="14271" calcext:value-type="float">
            <text:p>1427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65173611111111" calcext:value-type="float">
            <text:p>0,00165173611111111000</text:p>
          </table:table-cell>
          <table:table-cell table:formula="of:=[.D215]-[.D214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7" office:value-type="float" office:value="14338" calcext:value-type="float">
            <text:p>1433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65949074074074" calcext:value-type="float">
            <text:p>0,00165949074074074000</text:p>
          </table:table-cell>
          <table:table-cell table:formula="of:=[.D216]-[.D21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7" office:value-type="float" office:value="14405" calcext:value-type="float">
            <text:p>1440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66724537037037" calcext:value-type="float">
            <text:p>0,00166724537037037000</text:p>
          </table:table-cell>
          <table:table-cell table:formula="of:=[.D217]-[.D21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7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675" calcext:value-type="float">
            <text:p>0,00167500000000000000</text:p>
          </table:table-cell>
          <table:table-cell table:formula="of:=[.D218]-[.D217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7" office:value-type="float" office:value="14539" calcext:value-type="float">
            <text:p>1453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68275462962963" calcext:value-type="float">
            <text:p>0,00168275462962963000</text:p>
          </table:table-cell>
          <table:table-cell table:formula="of:=[.D219]-[.D21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7" office:value-type="float" office:value="14606" calcext:value-type="float">
            <text:p>1460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69050925925926" calcext:value-type="float">
            <text:p>0,00169050925925926000</text:p>
          </table:table-cell>
          <table:table-cell table:formula="of:=[.D220]-[.D21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7" office:value-type="float" office:value="14673" calcext:value-type="float">
            <text:p>1467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69826388888889" calcext:value-type="float">
            <text:p>0,00169826388888889000</text:p>
          </table:table-cell>
          <table:table-cell table:formula="of:=[.D221]-[.D22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7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70601851851852" calcext:value-type="float">
            <text:p>0,00170601851851852000</text:p>
          </table:table-cell>
          <table:table-cell table:formula="of:=[.D222]-[.D221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7" office:value-type="float" office:value="14807" calcext:value-type="float">
            <text:p>1480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71377314814815" calcext:value-type="float">
            <text:p>0,00171377314814815000</text:p>
          </table:table-cell>
          <table:table-cell table:formula="of:=[.D223]-[.D22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7" office:value-type="float" office:value="14874" calcext:value-type="float">
            <text:p>1487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72152777777778" calcext:value-type="float">
            <text:p>0,00172152777777778000</text:p>
          </table:table-cell>
          <table:table-cell table:formula="of:=[.D224]-[.D22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7" office:value-type="float" office:value="14941" calcext:value-type="float">
            <text:p>1494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72928240740741" calcext:value-type="float">
            <text:p>0,00172928240740741000</text:p>
          </table:table-cell>
          <table:table-cell table:formula="of:=[.D225]-[.D224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7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73703703703704" calcext:value-type="float">
            <text:p>0,00173703703703704000</text:p>
          </table:table-cell>
          <table:table-cell table:formula="of:=[.D226]-[.D22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7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74479166666667" calcext:value-type="float">
            <text:p>0,00174479166666667000</text:p>
          </table:table-cell>
          <table:table-cell table:formula="of:=[.D227]-[.D22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7" office:value-type="float" office:value="15142" calcext:value-type="float">
            <text:p>1514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7525462962963" calcext:value-type="float">
            <text:p>0,00175254629629630000</text:p>
          </table:table-cell>
          <table:table-cell table:formula="of:=[.D228]-[.D22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7" office:value-type="float" office:value="15209" calcext:value-type="float">
            <text:p>1520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76030092592593" calcext:value-type="float">
            <text:p>0,00176030092592593000</text:p>
          </table:table-cell>
          <table:table-cell table:formula="of:=[.D229]-[.D228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7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76805555555556" calcext:value-type="float">
            <text:p>0,00176805555555556000</text:p>
          </table:table-cell>
          <table:table-cell table:formula="of:=[.D230]-[.D22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7" office:value-type="float" office:value="15343" calcext:value-type="float">
            <text:p>1534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77581018518519" calcext:value-type="float">
            <text:p>0,00177581018518519000</text:p>
          </table:table-cell>
          <table:table-cell table:formula="of:=[.D231]-[.D23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7" office:value-type="float" office:value="15410" calcext:value-type="float">
            <text:p>154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78356481481481" calcext:value-type="float">
            <text:p>0,00178356481481481000</text:p>
          </table:table-cell>
          <table:table-cell table:formula="of:=[.D232]-[.D231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7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79131944444444" calcext:value-type="float">
            <text:p>0,00179131944444444000</text:p>
          </table:table-cell>
          <table:table-cell table:formula="of:=[.D233]-[.D23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7" office:value-type="float" office:value="15544" calcext:value-type="float">
            <text:p>1554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79907407407407" calcext:value-type="float">
            <text:p>0,00179907407407407000</text:p>
          </table:table-cell>
          <table:table-cell table:formula="of:=[.D234]-[.D23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7" office:value-type="float" office:value="15611" calcext:value-type="float">
            <text:p>1561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8068287037037" calcext:value-type="float">
            <text:p>0,00180682870370370000</text:p>
          </table:table-cell>
          <table:table-cell table:formula="of:=[.D235]-[.D23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7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81458333333333" calcext:value-type="float">
            <text:p>0,00181458333333333000</text:p>
          </table:table-cell>
          <table:table-cell table:formula="of:=[.D236]-[.D235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7" office:value-type="float" office:value="15745" calcext:value-type="float">
            <text:p>1574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82233796296296" calcext:value-type="float">
            <text:p>0,00182233796296296000</text:p>
          </table:table-cell>
          <table:table-cell table:formula="of:=[.D237]-[.D23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7" office:value-type="float" office:value="15812" calcext:value-type="float">
            <text:p>1581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83009259259259" calcext:value-type="float">
            <text:p>0,00183009259259259000</text:p>
          </table:table-cell>
          <table:table-cell table:formula="of:=[.D238]-[.D23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7" office:value-type="float" office:value="15879" calcext:value-type="float">
            <text:p>1587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83784722222222" calcext:value-type="float">
            <text:p>0,00183784722222222000</text:p>
          </table:table-cell>
          <table:table-cell table:formula="of:=[.D239]-[.D238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7" office:value-type="float" office:value="15946" calcext:value-type="float">
            <text:p>1594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84560185185185" calcext:value-type="float">
            <text:p>0,00184560185185185000</text:p>
          </table:table-cell>
          <table:table-cell table:formula="of:=[.D240]-[.D23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7" office:value-type="float" office:value="16013" calcext:value-type="float">
            <text:p>1601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85335648148148" calcext:value-type="float">
            <text:p>0,00185335648148148000</text:p>
          </table:table-cell>
          <table:table-cell table:formula="of:=[.D241]-[.D24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7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86111111111111" calcext:value-type="float">
            <text:p>0,00186111111111111000</text:p>
          </table:table-cell>
          <table:table-cell table:formula="of:=[.D242]-[.D24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7" office:value-type="float" office:value="16147" calcext:value-type="float">
            <text:p>1614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86886574074074" calcext:value-type="float">
            <text:p>0,00186886574074074000</text:p>
          </table:table-cell>
          <table:table-cell table:formula="of:=[.D243]-[.D242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7" office:value-type="float" office:value="16214" calcext:value-type="float">
            <text:p>1621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87662037037037" calcext:value-type="float">
            <text:p>0,00187662037037037000</text:p>
          </table:table-cell>
          <table:table-cell table:formula="of:=[.D244]-[.D24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7" office:value-type="float" office:value="16281" calcext:value-type="float">
            <text:p>1628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884375" calcext:value-type="float">
            <text:p>0,00188437500000000000</text:p>
          </table:table-cell>
          <table:table-cell table:formula="of:=[.D245]-[.D24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7" office:value-type="float" office:value="16348" calcext:value-type="float">
            <text:p>1634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89212962962963" calcext:value-type="float">
            <text:p>0,00189212962962963000</text:p>
          </table:table-cell>
          <table:table-cell table:formula="of:=[.D246]-[.D24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7" office:value-type="float" office:value="16415" calcext:value-type="float">
            <text:p>1641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89988425925926" calcext:value-type="float">
            <text:p>0,00189988425925926000</text:p>
          </table:table-cell>
          <table:table-cell table:formula="of:=[.D247]-[.D246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7" office:value-type="float" office:value="16482" calcext:value-type="float">
            <text:p>1648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90763888888889" calcext:value-type="float">
            <text:p>0,00190763888888889000</text:p>
          </table:table-cell>
          <table:table-cell table:formula="of:=[.D248]-[.D24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7" office:value-type="float" office:value="16549" calcext:value-type="float">
            <text:p>1654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91539351851852" calcext:value-type="float">
            <text:p>0,00191539351851852000</text:p>
          </table:table-cell>
          <table:table-cell table:formula="of:=[.D249]-[.D24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7" office:value-type="float" office:value="16616" calcext:value-type="float">
            <text:p>1661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92314814814815" calcext:value-type="float">
            <text:p>0,00192314814814815000</text:p>
          </table:table-cell>
          <table:table-cell table:formula="of:=[.D250]-[.D249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7" office:value-type="float" office:value="16683" calcext:value-type="float">
            <text:p>1668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93090277777778" calcext:value-type="float">
            <text:p>0,00193090277777778000</text:p>
          </table:table-cell>
          <table:table-cell table:formula="of:=[.D251]-[.D25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7" office:value-type="float" office:value="16750" calcext:value-type="float">
            <text:p>16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93865740740741" calcext:value-type="float">
            <text:p>0,00193865740740741000</text:p>
          </table:table-cell>
          <table:table-cell table:formula="of:=[.D252]-[.D25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7" office:value-type="float" office:value="16817" calcext:value-type="float">
            <text:p>1681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94641203703704" calcext:value-type="float">
            <text:p>0,00194641203703704000</text:p>
          </table:table-cell>
          <table:table-cell table:formula="of:=[.D253]-[.D252]" office:value-type="float" office:value="0.00000775462962962947" calcext:value-type="float">
            <text:p>0,00000775462962962947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7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95416666666667" calcext:value-type="float">
            <text:p>0,00195416666666667000</text:p>
          </table:table-cell>
          <table:table-cell table:formula="of:=[.D254]-[.D25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7" office:value-type="float" office:value="16951" calcext:value-type="float">
            <text:p>1695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9619212962963" calcext:value-type="float">
            <text:p>0,00196192129629630000</text:p>
          </table:table-cell>
          <table:table-cell table:formula="of:=[.D255]-[.D25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7" office:value-type="float" office:value="17018" calcext:value-type="float">
            <text:p>1701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96967592592593" calcext:value-type="float">
            <text:p>0,00196967592592593000</text:p>
          </table:table-cell>
          <table:table-cell table:formula="of:=[.D256]-[.D25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7" office:value-type="float" office:value="17085" calcext:value-type="float">
            <text:p>1708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97743055555556" calcext:value-type="float">
            <text:p>0,00197743055555556000</text:p>
          </table:table-cell>
          <table:table-cell table:formula="of:=[.D257]-[.D25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7" office:value-type="float" office:value="17152" calcext:value-type="float">
            <text:p>1715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98518518518519" calcext:value-type="float">
            <text:p>0,00198518518518519000</text:p>
          </table:table-cell>
          <table:table-cell table:formula="of:=[.D258]-[.D25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7" office:value-type="float" office:value="17219" calcext:value-type="float">
            <text:p>1721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99293981481482" calcext:value-type="float">
            <text:p>0,00199293981481482000</text:p>
          </table:table-cell>
          <table:table-cell table:formula="of:=[.D259]-[.D258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7" office:value-type="float" office:value="17286" calcext:value-type="float">
            <text:p>1728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00069444444444" calcext:value-type="float">
            <text:p>0,00200069444444444000</text:p>
          </table:table-cell>
          <table:table-cell table:formula="of:=[.D260]-[.D25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7" office:value-type="float" office:value="17353" calcext:value-type="float">
            <text:p>1735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00844907407407" calcext:value-type="float">
            <text:p>0,00200844907407407000</text:p>
          </table:table-cell>
          <table:table-cell table:formula="of:=[.D261]-[.D26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7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0162037037037" calcext:value-type="float">
            <text:p>0,00201620370370370000</text:p>
          </table:table-cell>
          <table:table-cell table:formula="of:=[.D262]-[.D26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7" office:value-type="float" office:value="17487" calcext:value-type="float">
            <text:p>1748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02395833333333" calcext:value-type="float">
            <text:p>0,00202395833333333000</text:p>
          </table:table-cell>
          <table:table-cell table:formula="of:=[.D263]-[.D26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7" office:value-type="float" office:value="17554" calcext:value-type="float">
            <text:p>1755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03171296296296" calcext:value-type="float">
            <text:p>0,00203171296296296000</text:p>
          </table:table-cell>
          <table:table-cell table:formula="of:=[.D264]-[.D26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7" office:value-type="float" office:value="17621" calcext:value-type="float">
            <text:p>1762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03946759259259" calcext:value-type="float">
            <text:p>0,00203946759259259000</text:p>
          </table:table-cell>
          <table:table-cell table:formula="of:=[.D265]-[.D26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7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04722222222222" calcext:value-type="float">
            <text:p>0,00204722222222222000</text:p>
          </table:table-cell>
          <table:table-cell table:formula="of:=[.D266]-[.D265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7" office:value-type="float" office:value="17755" calcext:value-type="float">
            <text:p>1775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05497685185185" calcext:value-type="float">
            <text:p>0,00205497685185185000</text:p>
          </table:table-cell>
          <table:table-cell table:formula="of:=[.D267]-[.D26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7" office:value-type="float" office:value="17822" calcext:value-type="float">
            <text:p>1782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06273148148148" calcext:value-type="float">
            <text:p>0,00206273148148148000</text:p>
          </table:table-cell>
          <table:table-cell table:formula="of:=[.D268]-[.D26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7" office:value-type="float" office:value="17889" calcext:value-type="float">
            <text:p>1788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07048611111111" calcext:value-type="float">
            <text:p>0,00207048611111111000</text:p>
          </table:table-cell>
          <table:table-cell table:formula="of:=[.D269]-[.D26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7" office:value-type="float" office:value="17956" calcext:value-type="float">
            <text:p>1795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07824074074074" calcext:value-type="float">
            <text:p>0,00207824074074074000</text:p>
          </table:table-cell>
          <table:table-cell table:formula="of:=[.D270]-[.D26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7" office:value-type="float" office:value="18023" calcext:value-type="float">
            <text:p>1802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08599537037037" calcext:value-type="float">
            <text:p>0,00208599537037037000</text:p>
          </table:table-cell>
          <table:table-cell table:formula="of:=[.D271]-[.D27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7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09375" calcext:value-type="float">
            <text:p>0,00209375000000000000</text:p>
          </table:table-cell>
          <table:table-cell table:formula="of:=[.D272]-[.D27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7" office:value-type="float" office:value="18157" calcext:value-type="float">
            <text:p>1815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10150462962963" calcext:value-type="float">
            <text:p>0,00210150462962963000</text:p>
          </table:table-cell>
          <table:table-cell table:formula="of:=[.D273]-[.D272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7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10925925925926" calcext:value-type="float">
            <text:p>0,00210925925925926000</text:p>
          </table:table-cell>
          <table:table-cell table:formula="of:=[.D274]-[.D27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7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11701388888889" calcext:value-type="float">
            <text:p>0,00211701388888889000</text:p>
          </table:table-cell>
          <table:table-cell table:formula="of:=[.D275]-[.D27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7" office:value-type="float" office:value="18358" calcext:value-type="float">
            <text:p>1835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12476851851852" calcext:value-type="float">
            <text:p>0,00212476851851852000</text:p>
          </table:table-cell>
          <table:table-cell table:formula="of:=[.D276]-[.D27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7" office:value-type="float" office:value="18425" calcext:value-type="float">
            <text:p>184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13252314814815" calcext:value-type="float">
            <text:p>0,00213252314814815000</text:p>
          </table:table-cell>
          <table:table-cell table:formula="of:=[.D277]-[.D27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7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14027777777778" calcext:value-type="float">
            <text:p>0,00214027777777778000</text:p>
          </table:table-cell>
          <table:table-cell table:formula="of:=[.D278]-[.D27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7" office:value-type="float" office:value="18559" calcext:value-type="float">
            <text:p>1855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14803240740741" calcext:value-type="float">
            <text:p>0,00214803240740741000</text:p>
          </table:table-cell>
          <table:table-cell table:formula="of:=[.D279]-[.D27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7" office:value-type="float" office:value="18626" calcext:value-type="float">
            <text:p>1862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15578703703704" calcext:value-type="float">
            <text:p>0,00215578703703704000</text:p>
          </table:table-cell>
          <table:table-cell table:formula="of:=[.D280]-[.D279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7" office:value-type="float" office:value="18693" calcext:value-type="float">
            <text:p>1869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16354166666667" calcext:value-type="float">
            <text:p>0,00216354166666667000</text:p>
          </table:table-cell>
          <table:table-cell table:formula="of:=[.D281]-[.D28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7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1712962962963" calcext:value-type="float">
            <text:p>0,00217129629629630000</text:p>
          </table:table-cell>
          <table:table-cell table:formula="of:=[.D282]-[.D28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7" office:value-type="float" office:value="18827" calcext:value-type="float">
            <text:p>1882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17905092592593" calcext:value-type="float">
            <text:p>0,00217905092592593000</text:p>
          </table:table-cell>
          <table:table-cell table:formula="of:=[.D283]-[.D28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7" office:value-type="float" office:value="18894" calcext:value-type="float">
            <text:p>1889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18680555555556" calcext:value-type="float">
            <text:p>0,00218680555555556000</text:p>
          </table:table-cell>
          <table:table-cell table:formula="of:=[.D284]-[.D28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7" office:value-type="float" office:value="18961" calcext:value-type="float">
            <text:p>1896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19456018518519" calcext:value-type="float">
            <text:p>0,00219456018518519000</text:p>
          </table:table-cell>
          <table:table-cell table:formula="of:=[.D285]-[.D28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7" office:value-type="float" office:value="19028" calcext:value-type="float">
            <text:p>1902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20231481481482" calcext:value-type="float">
            <text:p>0,00220231481481482000</text:p>
          </table:table-cell>
          <table:table-cell table:formula="of:=[.D286]-[.D28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7" office:value-type="float" office:value="19095" calcext:value-type="float">
            <text:p>1909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21006944444444" calcext:value-type="float">
            <text:p>0,00221006944444444000</text:p>
          </table:table-cell>
          <table:table-cell table:formula="of:=[.D287]-[.D286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7" office:value-type="float" office:value="19162" calcext:value-type="float">
            <text:p>1916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21782407407407" calcext:value-type="float">
            <text:p>0,00221782407407407000</text:p>
          </table:table-cell>
          <table:table-cell table:formula="of:=[.D288]-[.D28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7" office:value-type="float" office:value="19229" calcext:value-type="float">
            <text:p>1922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2255787037037" calcext:value-type="float">
            <text:p>0,00222557870370370000</text:p>
          </table:table-cell>
          <table:table-cell table:formula="of:=[.D289]-[.D28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7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23333333333333" calcext:value-type="float">
            <text:p>0,00223333333333333000</text:p>
          </table:table-cell>
          <table:table-cell table:formula="of:=[.D290]-[.D28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7" office:value-type="float" office:value="19363" calcext:value-type="float">
            <text:p>1936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24108796296296" calcext:value-type="float">
            <text:p>0,00224108796296296000</text:p>
          </table:table-cell>
          <table:table-cell table:formula="of:=[.D291]-[.D29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7" office:value-type="float" office:value="19430" calcext:value-type="float">
            <text:p>194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24884259259259" calcext:value-type="float">
            <text:p>0,00224884259259259000</text:p>
          </table:table-cell>
          <table:table-cell table:formula="of:=[.D292]-[.D29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7" office:value-type="float" office:value="19497" calcext:value-type="float">
            <text:p>1949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25659722222222" calcext:value-type="float">
            <text:p>0,00225659722222222000</text:p>
          </table:table-cell>
          <table:table-cell table:formula="of:=[.D293]-[.D29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7" office:value-type="float" office:value="19564" calcext:value-type="float">
            <text:p>1956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26435185185185" calcext:value-type="float">
            <text:p>0,00226435185185185000</text:p>
          </table:table-cell>
          <table:table-cell table:formula="of:=[.D294]-[.D293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7" office:value-type="float" office:value="19631" calcext:value-type="float">
            <text:p>1963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27210648148148" calcext:value-type="float">
            <text:p>0,00227210648148148000</text:p>
          </table:table-cell>
          <table:table-cell table:formula="of:=[.D295]-[.D29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7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27986111111111" calcext:value-type="float">
            <text:p>0,00227986111111111000</text:p>
          </table:table-cell>
          <table:table-cell table:formula="of:=[.D296]-[.D29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7" office:value-type="float" office:value="19765" calcext:value-type="float">
            <text:p>1976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28761574074074" calcext:value-type="float">
            <text:p>0,00228761574074074000</text:p>
          </table:table-cell>
          <table:table-cell table:formula="of:=[.D297]-[.D29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7" office:value-type="float" office:value="19832" calcext:value-type="float">
            <text:p>1983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29537037037037" calcext:value-type="float">
            <text:p>0,00229537037037037000</text:p>
          </table:table-cell>
          <table:table-cell table:formula="of:=[.D298]-[.D29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7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303125" calcext:value-type="float">
            <text:p>0,00230312500000000000</text:p>
          </table:table-cell>
          <table:table-cell table:formula="of:=[.D299]-[.D29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7" office:value-type="float" office:value="19966" calcext:value-type="float">
            <text:p>1996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31087962962963" calcext:value-type="float">
            <text:p>0,00231087962962963000</text:p>
          </table:table-cell>
          <table:table-cell table:formula="of:=[.D300]-[.D29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7" office:value-type="float" office:value="20033" calcext:value-type="float">
            <text:p>2003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31863425925926" calcext:value-type="float">
            <text:p>0,00231863425925926000</text:p>
          </table:table-cell>
          <table:table-cell table:formula="of:=[.D301]-[.D300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7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32638888888889" calcext:value-type="float">
            <text:p>0,00232638888888889000</text:p>
          </table:table-cell>
          <table:table-cell table:formula="of:=[.D302]-[.D30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7" office:value-type="float" office:value="20167" calcext:value-type="float">
            <text:p>2016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33414351851852" calcext:value-type="float">
            <text:p>0,00233414351851852000</text:p>
          </table:table-cell>
          <table:table-cell table:formula="of:=[.D303]-[.D30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7" office:value-type="float" office:value="20234" calcext:value-type="float">
            <text:p>2023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34189814814815" calcext:value-type="float">
            <text:p>0,00234189814814815000</text:p>
          </table:table-cell>
          <table:table-cell table:formula="of:=[.D304]-[.D30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7" office:value-type="float" office:value="20301" calcext:value-type="float">
            <text:p>2030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34965277777778" calcext:value-type="float">
            <text:p>0,00234965277777778000</text:p>
          </table:table-cell>
          <table:table-cell table:formula="of:=[.D305]-[.D30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7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35740740740741" calcext:value-type="float">
            <text:p>0,00235740740740741000</text:p>
          </table:table-cell>
          <table:table-cell table:formula="of:=[.D306]-[.D30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7" office:value-type="float" office:value="20435" calcext:value-type="float">
            <text:p>2043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36516203703704" calcext:value-type="float">
            <text:p>0,00236516203703704000</text:p>
          </table:table-cell>
          <table:table-cell table:formula="of:=[.D307]-[.D30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7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37291666666667" calcext:value-type="float">
            <text:p>0,00237291666666667000</text:p>
          </table:table-cell>
          <table:table-cell table:formula="of:=[.D308]-[.D307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7" office:value-type="float" office:value="20569" calcext:value-type="float">
            <text:p>2056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3806712962963" calcext:value-type="float">
            <text:p>0,00238067129629630000</text:p>
          </table:table-cell>
          <table:table-cell table:formula="of:=[.D309]-[.D30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7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38842592592593" calcext:value-type="float">
            <text:p>0,00238842592592593000</text:p>
          </table:table-cell>
          <table:table-cell table:formula="of:=[.D310]-[.D30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7" office:value-type="float" office:value="20703" calcext:value-type="float">
            <text:p>2070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39618055555556" calcext:value-type="float">
            <text:p>0,00239618055555556000</text:p>
          </table:table-cell>
          <table:table-cell table:formula="of:=[.D311]-[.D31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7" office:value-type="float" office:value="20770" calcext:value-type="float">
            <text:p>207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40393518518519" calcext:value-type="float">
            <text:p>0,00240393518518519000</text:p>
          </table:table-cell>
          <table:table-cell table:formula="of:=[.D312]-[.D31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7" office:value-type="float" office:value="20837" calcext:value-type="float">
            <text:p>2083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41168981481482" calcext:value-type="float">
            <text:p>0,00241168981481482000</text:p>
          </table:table-cell>
          <table:table-cell table:formula="of:=[.D313]-[.D31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7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41944444444444" calcext:value-type="float">
            <text:p>0,00241944444444444000</text:p>
          </table:table-cell>
          <table:table-cell table:formula="of:=[.D314]-[.D31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7" office:value-type="float" office:value="20971" calcext:value-type="float">
            <text:p>2097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42719907407407" calcext:value-type="float">
            <text:p>0,00242719907407407000</text:p>
          </table:table-cell>
          <table:table-cell table:formula="of:=[.D315]-[.D314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7" office:value-type="float" office:value="21038" calcext:value-type="float">
            <text:p>2103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4349537037037" calcext:value-type="float">
            <text:p>0,00243495370370370000</text:p>
          </table:table-cell>
          <table:table-cell table:formula="of:=[.D316]-[.D31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7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44270833333333" calcext:value-type="float">
            <text:p>0,00244270833333333000</text:p>
          </table:table-cell>
          <table:table-cell table:formula="of:=[.D317]-[.D31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7" office:value-type="float" office:value="21172" calcext:value-type="float">
            <text:p>2117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45046296296296" calcext:value-type="float">
            <text:p>0,00245046296296296000</text:p>
          </table:table-cell>
          <table:table-cell table:formula="of:=[.D318]-[.D31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7" office:value-type="float" office:value="21239" calcext:value-type="float">
            <text:p>2123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45821759259259" calcext:value-type="float">
            <text:p>0,00245821759259259000</text:p>
          </table:table-cell>
          <table:table-cell table:formula="of:=[.D319]-[.D31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7" office:value-type="float" office:value="21306" calcext:value-type="float">
            <text:p>2130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46597222222222" calcext:value-type="float">
            <text:p>0,00246597222222222000</text:p>
          </table:table-cell>
          <table:table-cell table:formula="of:=[.D320]-[.D31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7" office:value-type="float" office:value="21373" calcext:value-type="float">
            <text:p>2137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47372685185185" calcext:value-type="float">
            <text:p>0,00247372685185185000</text:p>
          </table:table-cell>
          <table:table-cell table:formula="of:=[.D321]-[.D32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7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48148148148148" calcext:value-type="float">
            <text:p>0,00248148148148148000</text:p>
          </table:table-cell>
          <table:table-cell table:formula="of:=[.D322]-[.D321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7" office:value-type="float" office:value="21507" calcext:value-type="float">
            <text:p>2150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48923611111111" calcext:value-type="float">
            <text:p>0,00248923611111111000</text:p>
          </table:table-cell>
          <table:table-cell table:formula="of:=[.D323]-[.D32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7" office:value-type="float" office:value="21574" calcext:value-type="float">
            <text:p>2157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49699074074074" calcext:value-type="float">
            <text:p>0,00249699074074074000</text:p>
          </table:table-cell>
          <table:table-cell table:formula="of:=[.D324]-[.D32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7" office:value-type="float" office:value="21641" calcext:value-type="float">
            <text:p>2164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50474537037037" calcext:value-type="float">
            <text:p>0,00250474537037037000</text:p>
          </table:table-cell>
          <table:table-cell table:formula="of:=[.D325]-[.D32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7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5125" calcext:value-type="float">
            <text:p>0,00251250000000000000</text:p>
          </table:table-cell>
          <table:table-cell table:formula="of:=[.D326]-[.D32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7" office:value-type="float" office:value="21775" calcext:value-type="float">
            <text:p>217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52025462962963" calcext:value-type="float">
            <text:p>0,00252025462962963000</text:p>
          </table:table-cell>
          <table:table-cell table:formula="of:=[.D327]-[.D32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7" office:value-type="float" office:value="21842" calcext:value-type="float">
            <text:p>2184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52800925925926" calcext:value-type="float">
            <text:p>0,00252800925925926000</text:p>
          </table:table-cell>
          <table:table-cell table:formula="of:=[.D328]-[.D32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7" office:value-type="float" office:value="21909" calcext:value-type="float">
            <text:p>2190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53576388888889" calcext:value-type="float">
            <text:p>0,00253576388888889000</text:p>
          </table:table-cell>
          <table:table-cell table:formula="of:=[.D329]-[.D328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7" office:value-type="float" office:value="21976" calcext:value-type="float">
            <text:p>2197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54351851851852" calcext:value-type="float">
            <text:p>0,00254351851851852000</text:p>
          </table:table-cell>
          <table:table-cell table:formula="of:=[.D330]-[.D32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7" office:value-type="float" office:value="22043" calcext:value-type="float">
            <text:p>2204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55127314814815" calcext:value-type="float">
            <text:p>0,00255127314814815000</text:p>
          </table:table-cell>
          <table:table-cell table:formula="of:=[.D331]-[.D33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7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55902777777778" calcext:value-type="float">
            <text:p>0,00255902777777778000</text:p>
          </table:table-cell>
          <table:table-cell table:formula="of:=[.D332]-[.D33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7" office:value-type="float" office:value="22177" calcext:value-type="float">
            <text:p>2217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56678240740741" calcext:value-type="float">
            <text:p>0,00256678240740741000</text:p>
          </table:table-cell>
          <table:table-cell table:formula="of:=[.D333]-[.D33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7" office:value-type="float" office:value="22244" calcext:value-type="float">
            <text:p>2224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57453703703704" calcext:value-type="float">
            <text:p>0,00257453703703704000</text:p>
          </table:table-cell>
          <table:table-cell table:formula="of:=[.D334]-[.D33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7" office:value-type="float" office:value="22311" calcext:value-type="float">
            <text:p>2231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58229166666667" calcext:value-type="float">
            <text:p>0,00258229166666667000</text:p>
          </table:table-cell>
          <table:table-cell table:formula="of:=[.D335]-[.D33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7" office:value-type="float" office:value="22378" calcext:value-type="float">
            <text:p>2237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5900462962963" calcext:value-type="float">
            <text:p>0,00259004629629630000</text:p>
          </table:table-cell>
          <table:table-cell table:formula="of:=[.D336]-[.D335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7" office:value-type="float" office:value="22445" calcext:value-type="float">
            <text:p>2244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59780092592593" calcext:value-type="float">
            <text:p>0,00259780092592593000</text:p>
          </table:table-cell>
          <table:table-cell table:formula="of:=[.D337]-[.D33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7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60555555555556" calcext:value-type="float">
            <text:p>0,00260555555555556000</text:p>
          </table:table-cell>
          <table:table-cell table:formula="of:=[.D338]-[.D33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7" office:value-type="float" office:value="22579" calcext:value-type="float">
            <text:p>2257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61331018518519" calcext:value-type="float">
            <text:p>0,00261331018518519000</text:p>
          </table:table-cell>
          <table:table-cell table:formula="of:=[.D339]-[.D33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7" office:value-type="float" office:value="22646" calcext:value-type="float">
            <text:p>2264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62106481481482" calcext:value-type="float">
            <text:p>0,00262106481481482000</text:p>
          </table:table-cell>
          <table:table-cell table:formula="of:=[.D340]-[.D33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7" office:value-type="float" office:value="22713" calcext:value-type="float">
            <text:p>2271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62881944444444" calcext:value-type="float">
            <text:p>0,00262881944444444000</text:p>
          </table:table-cell>
          <table:table-cell table:formula="of:=[.D341]-[.D340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7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63657407407407" calcext:value-type="float">
            <text:p>0,00263657407407407000</text:p>
          </table:table-cell>
          <table:table-cell table:formula="of:=[.D342]-[.D34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7" office:value-type="float" office:value="22847" calcext:value-type="float">
            <text:p>2284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6443287037037" calcext:value-type="float">
            <text:p>0,00264432870370370000</text:p>
          </table:table-cell>
          <table:table-cell table:formula="of:=[.D343]-[.D34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7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65208333333333" calcext:value-type="float">
            <text:p>0,00265208333333333000</text:p>
          </table:table-cell>
          <table:table-cell table:formula="of:=[.D344]-[.D343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7" office:value-type="float" office:value="22981" calcext:value-type="float">
            <text:p>2298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65983796296296" calcext:value-type="float">
            <text:p>0,00265983796296296000</text:p>
          </table:table-cell>
          <table:table-cell table:formula="of:=[.D345]-[.D34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7" office:value-type="float" office:value="23048" calcext:value-type="float">
            <text:p>2304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66759259259259" calcext:value-type="float">
            <text:p>0,00266759259259259000</text:p>
          </table:table-cell>
          <table:table-cell table:formula="of:=[.D346]-[.D34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7" office:value-type="float" office:value="23115" calcext:value-type="float">
            <text:p>2311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67534722222222" calcext:value-type="float">
            <text:p>0,00267534722222222000</text:p>
          </table:table-cell>
          <table:table-cell table:formula="of:=[.D347]-[.D34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7" office:value-type="float" office:value="23182" calcext:value-type="float">
            <text:p>2318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68310185185185" calcext:value-type="float">
            <text:p>0,00268310185185185000</text:p>
          </table:table-cell>
          <table:table-cell table:formula="of:=[.D348]-[.D347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7" office:value-type="float" office:value="23249" calcext:value-type="float">
            <text:p>2324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69085648148148" calcext:value-type="float">
            <text:p>0,00269085648148148000</text:p>
          </table:table-cell>
          <table:table-cell table:formula="of:=[.D349]-[.D34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7" office:value-type="float" office:value="23316" calcext:value-type="float">
            <text:p>2331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69861111111111" calcext:value-type="float">
            <text:p>0,00269861111111111000</text:p>
          </table:table-cell>
          <table:table-cell table:formula="of:=[.D350]-[.D349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7" office:value-type="float" office:value="23383" calcext:value-type="float">
            <text:p>2338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70636574074074" calcext:value-type="float">
            <text:p>0,00270636574074074000</text:p>
          </table:table-cell>
          <table:table-cell table:formula="of:=[.D351]-[.D350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7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71412037037037" calcext:value-type="float">
            <text:p>0,00271412037037037000</text:p>
          </table:table-cell>
          <table:table-cell table:formula="of:=[.D352]-[.D351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7" office:value-type="float" office:value="23517" calcext:value-type="float">
            <text:p>2351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721875" calcext:value-type="float">
            <text:p>0,00272187500000000000</text:p>
          </table:table-cell>
          <table:table-cell table:formula="of:=[.D353]-[.D352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7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72962962962963" calcext:value-type="float">
            <text:p>0,00272962962962963000</text:p>
          </table:table-cell>
          <table:table-cell table:formula="of:=[.D354]-[.D353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7" office:value-type="float" office:value="23651" calcext:value-type="float">
            <text:p>2365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73738425925926" calcext:value-type="float">
            <text:p>0,00273738425925926000</text:p>
          </table:table-cell>
          <table:table-cell table:formula="of:=[.D355]-[.D354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7" office:value-type="float" office:value="23718" calcext:value-type="float">
            <text:p>2371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74513888888889" calcext:value-type="float">
            <text:p>0,00274513888888889000</text:p>
          </table:table-cell>
          <table:table-cell table:formula="of:=[.D356]-[.D355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7" office:value-type="float" office:value="23785" calcext:value-type="float">
            <text:p>2378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75289351851852" calcext:value-type="float">
            <text:p>0,00275289351851852000</text:p>
          </table:table-cell>
          <table:table-cell table:formula="of:=[.D357]-[.D356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7" office:value-type="float" office:value="23852" calcext:value-type="float">
            <text:p>2385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76064814814815" calcext:value-type="float">
            <text:p>0,00276064814814815000</text:p>
          </table:table-cell>
          <table:table-cell table:formula="of:=[.D358]-[.D357]" office:value-type="float" office:value="0.00000775462962962926" calcext:value-type="float">
            <text:p>0,00000775462962962926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7" office:value-type="float" office:value="23919" calcext:value-type="float">
            <text:p>2391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76840277777778" calcext:value-type="float">
            <text:p>0,00276840277777778000</text:p>
          </table:table-cell>
          <table:table-cell table:formula="of:=[.D359]-[.D358]" office:value-type="float" office:value="0.00000775462962962969" calcext:value-type="float">
            <text:p>0,00000775462962962969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7" office:value-type="float" office:value="23986" calcext:value-type="float">
            <text:p>2398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77615740740741" calcext:value-type="float">
            <text:p>0,00277615740740741000</text:p>
          </table:table-cell>
          <table:table-cell table:formula="of:=#REF!-[.D359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8:42.592252410</meta:creation-date>
    <dc:date>2026-05-17T18:28:59.474619727</dc:date>
    <meta:editing-duration>PT18S</meta:editing-duration>
    <meta:editing-cycles>1</meta:editing-cycles>
    <meta:document-statistic meta:table-count="1" meta:cell-count="1795" meta:object-count="0"/>
    <meta:generator>LibreOffice/24.2.7.2$Linux_X86_64 LibreOffice_project/420$Build-2</meta:generator>
  </office:meta>
</office:document-meta>
</file>