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4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45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520833333333333" calcext:value-type="float">
            <text:p>0,00000520833333333333</text:p>
          </table:table-cell>
          <table:table-cell table:formula="of:=[.D3]-[.D2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45" office:value-type="float" office:value="90" calcext:value-type="float">
            <text:p>90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04166666666667" calcext:value-type="float">
            <text:p>0,00001041666666666670</text:p>
          </table:table-cell>
          <table:table-cell table:formula="of:=[.D4]-[.D3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45" office:value-type="float" office:value="135" calcext:value-type="float">
            <text:p>135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5625" calcext:value-type="float">
            <text:p>0,00001562500000000000</text:p>
          </table:table-cell>
          <table:table-cell table:formula="of:=[.D5]-[.D4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45" office:value-type="float" office:value="180" calcext:value-type="float">
            <text:p>180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08333333333333" calcext:value-type="float">
            <text:p>0,00002083333333333330</text:p>
          </table:table-cell>
          <table:table-cell table:formula="of:=[.D6]-[.D5]" office:value-type="float" office:value="0.00000520833333333334" calcext:value-type="float">
            <text:p>0,000005208333333333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45" office:value-type="float" office:value="225" calcext:value-type="float">
            <text:p>22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260416666666667" calcext:value-type="float">
            <text:p>0,00002604166666666670</text:p>
          </table:table-cell>
          <table:table-cell table:formula="of:=[.D7]-[.D6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45" office:value-type="float" office:value="270" calcext:value-type="float">
            <text:p>270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3125" calcext:value-type="float">
            <text:p>0,00003125000000000000</text:p>
          </table:table-cell>
          <table:table-cell table:formula="of:=[.D8]-[.D7]" office:value-type="float" office:value="0.00000520833333333334" calcext:value-type="float">
            <text:p>0,000005208333333333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45" office:value-type="float" office:value="315" calcext:value-type="float">
            <text:p>315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364583333333333" calcext:value-type="float">
            <text:p>0,00003645833333333330</text:p>
          </table:table-cell>
          <table:table-cell table:formula="of:=[.D9]-[.D8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45" office:value-type="float" office:value="360" calcext:value-type="float">
            <text:p>360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416666666666667" calcext:value-type="float">
            <text:p>0,00004166666666666670</text:p>
          </table:table-cell>
          <table:table-cell table:formula="of:=[.D10]-[.D9]" office:value-type="float" office:value="0.00000520833333333334" calcext:value-type="float">
            <text:p>0,000005208333333333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45" office:value-type="float" office:value="405" calcext:value-type="float">
            <text:p>405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46875" calcext:value-type="float">
            <text:p>0,00004687500000000000</text:p>
          </table:table-cell>
          <table:table-cell table:formula="of:=[.D11]-[.D10]" office:value-type="float" office:value="0.00000520833333333334" calcext:value-type="float">
            <text:p>0,000005208333333333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45" office:value-type="float" office:value="450" calcext:value-type="float">
            <text:p>45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520833333333333" calcext:value-type="float">
            <text:p>0,00005208333333333330</text:p>
          </table:table-cell>
          <table:table-cell table:formula="of:=[.D12]-[.D11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45" office:value-type="float" office:value="495" calcext:value-type="float">
            <text:p>495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572916666666667" calcext:value-type="float">
            <text:p>0,00005729166666666670</text:p>
          </table:table-cell>
          <table:table-cell table:formula="of:=[.D13]-[.D12]" office:value-type="float" office:value="0.00000520833333333334" calcext:value-type="float">
            <text:p>0,000005208333333333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45" office:value-type="float" office:value="540" calcext:value-type="float">
            <text:p>540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625" calcext:value-type="float">
            <text:p>0,00006250000000000000</text:p>
          </table:table-cell>
          <table:table-cell table:formula="of:=[.D14]-[.D13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45" office:value-type="float" office:value="585" calcext:value-type="float">
            <text:p>585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677083333333333" calcext:value-type="float">
            <text:p>0,00006770833333333330</text:p>
          </table:table-cell>
          <table:table-cell table:formula="of:=[.D15]-[.D14]" office:value-type="float" office:value="0.00000520833333333334" calcext:value-type="float">
            <text:p>0,000005208333333333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45" office:value-type="float" office:value="630" calcext:value-type="float">
            <text:p>630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729166666666667" calcext:value-type="float">
            <text:p>0,00007291666666666670</text:p>
          </table:table-cell>
          <table:table-cell table:formula="of:=[.D16]-[.D15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45" office:value-type="float" office:value="675" calcext:value-type="float">
            <text:p>67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78125" calcext:value-type="float">
            <text:p>0,00007812500000000000</text:p>
          </table:table-cell>
          <table:table-cell table:formula="of:=[.D17]-[.D16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45" office:value-type="float" office:value="720" calcext:value-type="float">
            <text:p>720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833333333333333" calcext:value-type="float">
            <text:p>0,00008333333333333330</text:p>
          </table:table-cell>
          <table:table-cell table:formula="of:=[.D18]-[.D17]" office:value-type="float" office:value="0.00000520833333333334" calcext:value-type="float">
            <text:p>0,000005208333333333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45" office:value-type="float" office:value="765" calcext:value-type="float">
            <text:p>765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885416666666667" calcext:value-type="float">
            <text:p>0,00008854166666666670</text:p>
          </table:table-cell>
          <table:table-cell table:formula="of:=[.D19]-[.D18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45" office:value-type="float" office:value="810" calcext:value-type="float">
            <text:p>810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9375" calcext:value-type="float">
            <text:p>0,00009375000000000000</text:p>
          </table:table-cell>
          <table:table-cell table:formula="of:=[.D20]-[.D19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45" office:value-type="float" office:value="855" calcext:value-type="float">
            <text:p>855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989583333333333" calcext:value-type="float">
            <text:p>0,00009895833333333330</text:p>
          </table:table-cell>
          <table:table-cell table:formula="of:=[.D21]-[.D20]" office:value-type="float" office:value="0.00000520833333333334" calcext:value-type="float">
            <text:p>0,000005208333333333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45" office:value-type="float" office:value="900" calcext:value-type="float">
            <text:p>90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04166666666667" calcext:value-type="float">
            <text:p>0,00010416666666666700</text:p>
          </table:table-cell>
          <table:table-cell table:formula="of:=[.D22]-[.D21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45" office:value-type="float" office:value="945" calcext:value-type="float">
            <text:p>945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09375" calcext:value-type="float">
            <text:p>0,00010937500000000000</text:p>
          </table:table-cell>
          <table:table-cell table:formula="of:=[.D23]-[.D22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45" office:value-type="float" office:value="990" calcext:value-type="float">
            <text:p>990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14583333333333" calcext:value-type="float">
            <text:p>0,00011458333333333300</text:p>
          </table:table-cell>
          <table:table-cell table:formula="of:=[.D24]-[.D23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45" office:value-type="float" office:value="1035" calcext:value-type="float">
            <text:p>1035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19791666666667" calcext:value-type="float">
            <text:p>0,00011979166666666700</text:p>
          </table:table-cell>
          <table:table-cell table:formula="of:=[.D25]-[.D24]" office:value-type="float" office:value="0.00000520833333333334" calcext:value-type="float">
            <text:p>0,000005208333333333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45" office:value-type="float" office:value="1080" calcext:value-type="float">
            <text:p>1080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25" calcext:value-type="float">
            <text:p>0,00012500000000000000</text:p>
          </table:table-cell>
          <table:table-cell table:formula="of:=[.D26]-[.D25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45" office:value-type="float" office:value="1125" calcext:value-type="float">
            <text:p>11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30208333333333" calcext:value-type="float">
            <text:p>0,00013020833333333300</text:p>
          </table:table-cell>
          <table:table-cell table:formula="of:=[.D27]-[.D26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45" office:value-type="float" office:value="1170" calcext:value-type="float">
            <text:p>1170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35416666666667" calcext:value-type="float">
            <text:p>0,00013541666666666700</text:p>
          </table:table-cell>
          <table:table-cell table:formula="of:=[.D28]-[.D27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45" office:value-type="float" office:value="1215" calcext:value-type="float">
            <text:p>1215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40625" calcext:value-type="float">
            <text:p>0,00014062500000000000</text:p>
          </table:table-cell>
          <table:table-cell table:formula="of:=[.D29]-[.D28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45" office:value-type="float" office:value="1260" calcext:value-type="float">
            <text:p>1260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45833333333333" calcext:value-type="float">
            <text:p>0,00014583333333333300</text:p>
          </table:table-cell>
          <table:table-cell table:formula="of:=[.D30]-[.D29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45" office:value-type="float" office:value="1305" calcext:value-type="float">
            <text:p>1305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51041666666667" calcext:value-type="float">
            <text:p>0,00015104166666666700</text:p>
          </table:table-cell>
          <table:table-cell table:formula="of:=[.D31]-[.D30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45" office:value-type="float" office:value="1350" calcext:value-type="float">
            <text:p>135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5625" calcext:value-type="float">
            <text:p>0,00015625000000000000</text:p>
          </table:table-cell>
          <table:table-cell table:formula="of:=[.D32]-[.D31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45" office:value-type="float" office:value="1395" calcext:value-type="float">
            <text:p>1395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61458333333333" calcext:value-type="float">
            <text:p>0,00016145833333333300</text:p>
          </table:table-cell>
          <table:table-cell table:formula="of:=[.D33]-[.D32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45" office:value-type="float" office:value="1440" calcext:value-type="float">
            <text:p>1440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66666666666667" calcext:value-type="float">
            <text:p>0,00016666666666666700</text:p>
          </table:table-cell>
          <table:table-cell table:formula="of:=[.D34]-[.D33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45" office:value-type="float" office:value="1485" calcext:value-type="float">
            <text:p>1485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71875" calcext:value-type="float">
            <text:p>0,00017187500000000000</text:p>
          </table:table-cell>
          <table:table-cell table:formula="of:=[.D35]-[.D34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45" office:value-type="float" office:value="1530" calcext:value-type="float">
            <text:p>1530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77083333333333" calcext:value-type="float">
            <text:p>0,00017708333333333300</text:p>
          </table:table-cell>
          <table:table-cell table:formula="of:=[.D36]-[.D35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45" office:value-type="float" office:value="1575" calcext:value-type="float">
            <text:p>157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82291666666667" calcext:value-type="float">
            <text:p>0,00018229166666666700</text:p>
          </table:table-cell>
          <table:table-cell table:formula="of:=[.D37]-[.D36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45" office:value-type="float" office:value="1620" calcext:value-type="float">
            <text:p>1620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875" calcext:value-type="float">
            <text:p>0,00018750000000000000</text:p>
          </table:table-cell>
          <table:table-cell table:formula="of:=[.D38]-[.D37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45" office:value-type="float" office:value="1665" calcext:value-type="float">
            <text:p>1665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92708333333333" calcext:value-type="float">
            <text:p>0,00019270833333333300</text:p>
          </table:table-cell>
          <table:table-cell table:formula="of:=[.D39]-[.D38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45" office:value-type="float" office:value="1710" calcext:value-type="float">
            <text:p>1710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97916666666667" calcext:value-type="float">
            <text:p>0,00019791666666666700</text:p>
          </table:table-cell>
          <table:table-cell table:formula="of:=[.D40]-[.D39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45" office:value-type="float" office:value="1755" calcext:value-type="float">
            <text:p>1755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03125" calcext:value-type="float">
            <text:p>0,00020312500000000000</text:p>
          </table:table-cell>
          <table:table-cell table:formula="of:=[.D41]-[.D40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45" office:value-type="float" office:value="1800" calcext:value-type="float">
            <text:p>180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08333333333333" calcext:value-type="float">
            <text:p>0,00020833333333333300</text:p>
          </table:table-cell>
          <table:table-cell table:formula="of:=[.D42]-[.D41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45" office:value-type="float" office:value="1845" calcext:value-type="float">
            <text:p>1845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13541666666667" calcext:value-type="float">
            <text:p>0,00021354166666666700</text:p>
          </table:table-cell>
          <table:table-cell table:formula="of:=[.D43]-[.D42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45" office:value-type="float" office:value="1890" calcext:value-type="float">
            <text:p>1890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21875" calcext:value-type="float">
            <text:p>0,00021875000000000000</text:p>
          </table:table-cell>
          <table:table-cell table:formula="of:=[.D44]-[.D43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45" office:value-type="float" office:value="1935" calcext:value-type="float">
            <text:p>1935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223958333333333" calcext:value-type="float">
            <text:p>0,00022395833333333300</text:p>
          </table:table-cell>
          <table:table-cell table:formula="of:=[.D45]-[.D44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45" office:value-type="float" office:value="1980" calcext:value-type="float">
            <text:p>1980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229166666666667" calcext:value-type="float">
            <text:p>0,00022916666666666700</text:p>
          </table:table-cell>
          <table:table-cell table:formula="of:=[.D46]-[.D45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45" office:value-type="float" office:value="2025" calcext:value-type="float">
            <text:p>202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234375" calcext:value-type="float">
            <text:p>0,00023437500000000000</text:p>
          </table:table-cell>
          <table:table-cell table:formula="of:=[.D47]-[.D46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45" office:value-type="float" office:value="2070" calcext:value-type="float">
            <text:p>2070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239583333333333" calcext:value-type="float">
            <text:p>0,00023958333333333300</text:p>
          </table:table-cell>
          <table:table-cell table:formula="of:=[.D48]-[.D47]" office:value-type="float" office:value="0.00000520833333333333" calcext:value-type="float">
            <text:p>0,00000520833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45" office:value-type="float" office:value="2115" calcext:value-type="float">
            <text:p>2115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244791666666667" calcext:value-type="float">
            <text:p>0,00024479166666666700</text:p>
          </table:table-cell>
          <table:table-cell table:formula="of:=[.D49]-[.D48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45" office:value-type="float" office:value="2160" calcext:value-type="float">
            <text:p>2160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25" calcext:value-type="float">
            <text:p>0,00025000000000000000</text:p>
          </table:table-cell>
          <table:table-cell table:formula="of:=[.D50]-[.D49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45" office:value-type="float" office:value="2205" calcext:value-type="float">
            <text:p>2205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255208333333333" calcext:value-type="float">
            <text:p>0,00025520833333333300</text:p>
          </table:table-cell>
          <table:table-cell table:formula="of:=[.D51]-[.D50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45" office:value-type="float" office:value="2250" calcext:value-type="float">
            <text:p>22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260416666666667" calcext:value-type="float">
            <text:p>0,00026041666666666700</text:p>
          </table:table-cell>
          <table:table-cell table:formula="of:=[.D52]-[.D51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45" office:value-type="float" office:value="2295" calcext:value-type="float">
            <text:p>2295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265625" calcext:value-type="float">
            <text:p>0,00026562500000000000</text:p>
          </table:table-cell>
          <table:table-cell table:formula="of:=[.D53]-[.D52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45" office:value-type="float" office:value="2340" calcext:value-type="float">
            <text:p>2340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270833333333333" calcext:value-type="float">
            <text:p>0,00027083333333333300</text:p>
          </table:table-cell>
          <table:table-cell table:formula="of:=[.D54]-[.D53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45" office:value-type="float" office:value="2385" calcext:value-type="float">
            <text:p>2385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276041666666667" calcext:value-type="float">
            <text:p>0,00027604166666666700</text:p>
          </table:table-cell>
          <table:table-cell table:formula="of:=[.D55]-[.D54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45" office:value-type="float" office:value="2430" calcext:value-type="float">
            <text:p>2430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28125" calcext:value-type="float">
            <text:p>0,00028125000000000000</text:p>
          </table:table-cell>
          <table:table-cell table:formula="of:=[.D56]-[.D55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45" office:value-type="float" office:value="2475" calcext:value-type="float">
            <text:p>247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286458333333333" calcext:value-type="float">
            <text:p>0,00028645833333333300</text:p>
          </table:table-cell>
          <table:table-cell table:formula="of:=[.D57]-[.D56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45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291666666666667" calcext:value-type="float">
            <text:p>0,00029166666666666700</text:p>
          </table:table-cell>
          <table:table-cell table:formula="of:=[.D58]-[.D57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45" office:value-type="float" office:value="2565" calcext:value-type="float">
            <text:p>2565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296875" calcext:value-type="float">
            <text:p>0,00029687500000000000</text:p>
          </table:table-cell>
          <table:table-cell table:formula="of:=[.D59]-[.D58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45" office:value-type="float" office:value="2610" calcext:value-type="float">
            <text:p>2610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302083333333333" calcext:value-type="float">
            <text:p>0,00030208333333333300</text:p>
          </table:table-cell>
          <table:table-cell table:formula="of:=[.D60]-[.D59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45" office:value-type="float" office:value="2655" calcext:value-type="float">
            <text:p>2655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307291666666667" calcext:value-type="float">
            <text:p>0,00030729166666666700</text:p>
          </table:table-cell>
          <table:table-cell table:formula="of:=[.D61]-[.D60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45" office:value-type="float" office:value="2700" calcext:value-type="float">
            <text:p>270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3125" calcext:value-type="float">
            <text:p>0,00031250000000000000</text:p>
          </table:table-cell>
          <table:table-cell table:formula="of:=[.D62]-[.D61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45" office:value-type="float" office:value="2745" calcext:value-type="float">
            <text:p>2745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317708333333333" calcext:value-type="float">
            <text:p>0,00031770833333333300</text:p>
          </table:table-cell>
          <table:table-cell table:formula="of:=[.D63]-[.D62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45" office:value-type="float" office:value="2790" calcext:value-type="float">
            <text:p>2790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322916666666667" calcext:value-type="float">
            <text:p>0,00032291666666666700</text:p>
          </table:table-cell>
          <table:table-cell table:formula="of:=[.D64]-[.D63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45" office:value-type="float" office:value="2835" calcext:value-type="float">
            <text:p>2835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328125" calcext:value-type="float">
            <text:p>0,00032812500000000000</text:p>
          </table:table-cell>
          <table:table-cell table:formula="of:=[.D65]-[.D64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45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333333333333333" calcext:value-type="float">
            <text:p>0,00033333333333333300</text:p>
          </table:table-cell>
          <table:table-cell table:formula="of:=[.D66]-[.D65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45" office:value-type="float" office:value="2925" calcext:value-type="float">
            <text:p>292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338541666666667" calcext:value-type="float">
            <text:p>0,00033854166666666700</text:p>
          </table:table-cell>
          <table:table-cell table:formula="of:=[.D67]-[.D66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45" office:value-type="float" office:value="2970" calcext:value-type="float">
            <text:p>2970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34375" calcext:value-type="float">
            <text:p>0,00034375000000000000</text:p>
          </table:table-cell>
          <table:table-cell table:formula="of:=[.D68]-[.D67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45" office:value-type="float" office:value="3015" calcext:value-type="float">
            <text:p>3015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348958333333333" calcext:value-type="float">
            <text:p>0,00034895833333333300</text:p>
          </table:table-cell>
          <table:table-cell table:formula="of:=[.D69]-[.D68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45" office:value-type="float" office:value="3060" calcext:value-type="float">
            <text:p>3060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354166666666667" calcext:value-type="float">
            <text:p>0,00035416666666666700</text:p>
          </table:table-cell>
          <table:table-cell table:formula="of:=[.D70]-[.D69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45" office:value-type="float" office:value="3105" calcext:value-type="float">
            <text:p>3105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359375" calcext:value-type="float">
            <text:p>0,00035937500000000000</text:p>
          </table:table-cell>
          <table:table-cell table:formula="of:=[.D71]-[.D70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45" office:value-type="float" office:value="3150" calcext:value-type="float">
            <text:p>315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364583333333333" calcext:value-type="float">
            <text:p>0,00036458333333333300</text:p>
          </table:table-cell>
          <table:table-cell table:formula="of:=[.D72]-[.D71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45" office:value-type="float" office:value="3195" calcext:value-type="float">
            <text:p>3195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369791666666667" calcext:value-type="float">
            <text:p>0,00036979166666666700</text:p>
          </table:table-cell>
          <table:table-cell table:formula="of:=[.D73]-[.D72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45" office:value-type="float" office:value="3240" calcext:value-type="float">
            <text:p>3240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375" calcext:value-type="float">
            <text:p>0,00037500000000000000</text:p>
          </table:table-cell>
          <table:table-cell table:formula="of:=[.D74]-[.D73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45" office:value-type="float" office:value="3285" calcext:value-type="float">
            <text:p>3285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380208333333333" calcext:value-type="float">
            <text:p>0,00038020833333333300</text:p>
          </table:table-cell>
          <table:table-cell table:formula="of:=[.D75]-[.D74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45" office:value-type="float" office:value="3330" calcext:value-type="float">
            <text:p>3330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385416666666667" calcext:value-type="float">
            <text:p>0,00038541666666666700</text:p>
          </table:table-cell>
          <table:table-cell table:formula="of:=[.D76]-[.D75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45" office:value-type="float" office:value="3375" calcext:value-type="float">
            <text:p>33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390625" calcext:value-type="float">
            <text:p>0,00039062500000000000</text:p>
          </table:table-cell>
          <table:table-cell table:formula="of:=[.D77]-[.D76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45" office:value-type="float" office:value="3420" calcext:value-type="float">
            <text:p>3420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395833333333333" calcext:value-type="float">
            <text:p>0,00039583333333333300</text:p>
          </table:table-cell>
          <table:table-cell table:formula="of:=[.D78]-[.D77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45" office:value-type="float" office:value="3465" calcext:value-type="float">
            <text:p>3465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401041666666667" calcext:value-type="float">
            <text:p>0,00040104166666666700</text:p>
          </table:table-cell>
          <table:table-cell table:formula="of:=[.D79]-[.D78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45" office:value-type="float" office:value="3510" calcext:value-type="float">
            <text:p>3510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40625" calcext:value-type="float">
            <text:p>0,00040625000000000000</text:p>
          </table:table-cell>
          <table:table-cell table:formula="of:=[.D80]-[.D79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45" office:value-type="float" office:value="3555" calcext:value-type="float">
            <text:p>3555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411458333333333" calcext:value-type="float">
            <text:p>0,00041145833333333300</text:p>
          </table:table-cell>
          <table:table-cell table:formula="of:=[.D81]-[.D80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45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416666666666667" calcext:value-type="float">
            <text:p>0,00041666666666666700</text:p>
          </table:table-cell>
          <table:table-cell table:formula="of:=[.D82]-[.D81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45" office:value-type="float" office:value="3645" calcext:value-type="float">
            <text:p>3645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421875" calcext:value-type="float">
            <text:p>0,00042187500000000000</text:p>
          </table:table-cell>
          <table:table-cell table:formula="of:=[.D83]-[.D82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45" office:value-type="float" office:value="3690" calcext:value-type="float">
            <text:p>3690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427083333333333" calcext:value-type="float">
            <text:p>0,00042708333333333300</text:p>
          </table:table-cell>
          <table:table-cell table:formula="of:=[.D84]-[.D83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45" office:value-type="float" office:value="3735" calcext:value-type="float">
            <text:p>3735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432291666666667" calcext:value-type="float">
            <text:p>0,00043229166666666700</text:p>
          </table:table-cell>
          <table:table-cell table:formula="of:=[.D85]-[.D84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45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4375" calcext:value-type="float">
            <text:p>0,00043750000000000000</text:p>
          </table:table-cell>
          <table:table-cell table:formula="of:=[.D86]-[.D85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45" office:value-type="float" office:value="3825" calcext:value-type="float">
            <text:p>382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442708333333333" calcext:value-type="float">
            <text:p>0,00044270833333333300</text:p>
          </table:table-cell>
          <table:table-cell table:formula="of:=[.D87]-[.D86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45" office:value-type="float" office:value="3870" calcext:value-type="float">
            <text:p>3870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447916666666667" calcext:value-type="float">
            <text:p>0,00044791666666666700</text:p>
          </table:table-cell>
          <table:table-cell table:formula="of:=[.D88]-[.D87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45" office:value-type="float" office:value="3915" calcext:value-type="float">
            <text:p>3915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453125" calcext:value-type="float">
            <text:p>0,00045312500000000000</text:p>
          </table:table-cell>
          <table:table-cell table:formula="of:=[.D89]-[.D88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45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458333333333333" calcext:value-type="float">
            <text:p>0,00045833333333333300</text:p>
          </table:table-cell>
          <table:table-cell table:formula="of:=[.D90]-[.D89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45" office:value-type="float" office:value="4005" calcext:value-type="float">
            <text:p>4005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463541666666667" calcext:value-type="float">
            <text:p>0,00046354166666666700</text:p>
          </table:table-cell>
          <table:table-cell table:formula="of:=[.D91]-[.D90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45" office:value-type="float" office:value="4050" calcext:value-type="float">
            <text:p>405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46875" calcext:value-type="float">
            <text:p>0,00046875000000000000</text:p>
          </table:table-cell>
          <table:table-cell table:formula="of:=[.D92]-[.D91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45" office:value-type="float" office:value="4095" calcext:value-type="float">
            <text:p>4095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473958333333333" calcext:value-type="float">
            <text:p>0,00047395833333333300</text:p>
          </table:table-cell>
          <table:table-cell table:formula="of:=[.D93]-[.D92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45" office:value-type="float" office:value="4140" calcext:value-type="float">
            <text:p>4140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479166666666667" calcext:value-type="float">
            <text:p>0,00047916666666666700</text:p>
          </table:table-cell>
          <table:table-cell table:formula="of:=[.D94]-[.D93]" office:value-type="float" office:value="0.00000520833333333336" calcext:value-type="float">
            <text:p>0,000005208333333333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45" office:value-type="float" office:value="4185" calcext:value-type="float">
            <text:p>4185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484375" calcext:value-type="float">
            <text:p>0,00048437500000000000</text:p>
          </table:table-cell>
          <table:table-cell table:formula="of:=[.D95]-[.D94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45" office:value-type="float" office:value="4230" calcext:value-type="float">
            <text:p>4230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489583333333333" calcext:value-type="float">
            <text:p>0,00048958333333333300</text:p>
          </table:table-cell>
          <table:table-cell table:formula="of:=[.D96]-[.D95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45" office:value-type="float" office:value="4275" calcext:value-type="float">
            <text:p>427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494791666666667" calcext:value-type="float">
            <text:p>0,00049479166666666700</text:p>
          </table:table-cell>
          <table:table-cell table:formula="of:=[.D97]-[.D96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45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5" calcext:value-type="float">
            <text:p>0,00050000000000000000</text:p>
          </table:table-cell>
          <table:table-cell table:formula="of:=[.D98]-[.D97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45" office:value-type="float" office:value="4365" calcext:value-type="float">
            <text:p>4365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505208333333333" calcext:value-type="float">
            <text:p>0,00050520833333333300</text:p>
          </table:table-cell>
          <table:table-cell table:formula="of:=[.D99]-[.D98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45" office:value-type="float" office:value="4410" calcext:value-type="float">
            <text:p>4410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510416666666667" calcext:value-type="float">
            <text:p>0,00051041666666666700</text:p>
          </table:table-cell>
          <table:table-cell table:formula="of:=[.D100]-[.D99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45" office:value-type="float" office:value="4455" calcext:value-type="float">
            <text:p>4455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515625" calcext:value-type="float">
            <text:p>0,00051562500000000000</text:p>
          </table:table-cell>
          <table:table-cell table:formula="of:=[.D101]-[.D100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45" office:value-type="float" office:value="4500" calcext:value-type="float">
            <text:p>45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520833333333333" calcext:value-type="float">
            <text:p>0,00052083333333333300</text:p>
          </table:table-cell>
          <table:table-cell table:formula="of:=[.D102]-[.D101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45" office:value-type="float" office:value="4545" calcext:value-type="float">
            <text:p>4545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526041666666667" calcext:value-type="float">
            <text:p>0,00052604166666666700</text:p>
          </table:table-cell>
          <table:table-cell table:formula="of:=[.D103]-[.D102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45" office:value-type="float" office:value="4590" calcext:value-type="float">
            <text:p>4590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53125" calcext:value-type="float">
            <text:p>0,00053125000000000000</text:p>
          </table:table-cell>
          <table:table-cell table:formula="of:=[.D104]-[.D103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45" office:value-type="float" office:value="4635" calcext:value-type="float">
            <text:p>4635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536458333333333" calcext:value-type="float">
            <text:p>0,00053645833333333300</text:p>
          </table:table-cell>
          <table:table-cell table:formula="of:=[.D105]-[.D104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45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541666666666667" calcext:value-type="float">
            <text:p>0,00054166666666666700</text:p>
          </table:table-cell>
          <table:table-cell table:formula="of:=[.D106]-[.D105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45" office:value-type="float" office:value="4725" calcext:value-type="float">
            <text:p>472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546875" calcext:value-type="float">
            <text:p>0,00054687500000000000</text:p>
          </table:table-cell>
          <table:table-cell table:formula="of:=[.D107]-[.D106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45" office:value-type="float" office:value="4770" calcext:value-type="float">
            <text:p>4770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552083333333333" calcext:value-type="float">
            <text:p>0,00055208333333333300</text:p>
          </table:table-cell>
          <table:table-cell table:formula="of:=[.D108]-[.D107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45" office:value-type="float" office:value="4815" calcext:value-type="float">
            <text:p>4815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557291666666667" calcext:value-type="float">
            <text:p>0,00055729166666666700</text:p>
          </table:table-cell>
          <table:table-cell table:formula="of:=[.D109]-[.D108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45" office:value-type="float" office:value="4860" calcext:value-type="float">
            <text:p>4860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5625" calcext:value-type="float">
            <text:p>0,00056250000000000000</text:p>
          </table:table-cell>
          <table:table-cell table:formula="of:=[.D110]-[.D109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45" office:value-type="float" office:value="4905" calcext:value-type="float">
            <text:p>4905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567708333333333" calcext:value-type="float">
            <text:p>0,00056770833333333300</text:p>
          </table:table-cell>
          <table:table-cell table:formula="of:=[.D111]-[.D110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45" office:value-type="float" office:value="4950" calcext:value-type="float">
            <text:p>495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572916666666667" calcext:value-type="float">
            <text:p>0,00057291666666666700</text:p>
          </table:table-cell>
          <table:table-cell table:formula="of:=[.D112]-[.D111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45" office:value-type="float" office:value="4995" calcext:value-type="float">
            <text:p>4995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578125" calcext:value-type="float">
            <text:p>0,00057812500000000000</text:p>
          </table:table-cell>
          <table:table-cell table:formula="of:=[.D113]-[.D112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45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583333333333333" calcext:value-type="float">
            <text:p>0,00058333333333333300</text:p>
          </table:table-cell>
          <table:table-cell table:formula="of:=[.D114]-[.D113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45" office:value-type="float" office:value="5085" calcext:value-type="float">
            <text:p>5085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588541666666667" calcext:value-type="float">
            <text:p>0,00058854166666666700</text:p>
          </table:table-cell>
          <table:table-cell table:formula="of:=[.D115]-[.D114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45" office:value-type="float" office:value="5130" calcext:value-type="float">
            <text:p>5130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59375" calcext:value-type="float">
            <text:p>0,00059375000000000000</text:p>
          </table:table-cell>
          <table:table-cell table:formula="of:=[.D116]-[.D115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45" office:value-type="float" office:value="5175" calcext:value-type="float">
            <text:p>517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598958333333333" calcext:value-type="float">
            <text:p>0,00059895833333333300</text:p>
          </table:table-cell>
          <table:table-cell table:formula="of:=[.D117]-[.D116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45" office:value-type="float" office:value="5220" calcext:value-type="float">
            <text:p>5220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604166666666667" calcext:value-type="float">
            <text:p>0,00060416666666666700</text:p>
          </table:table-cell>
          <table:table-cell table:formula="of:=[.D118]-[.D117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45" office:value-type="float" office:value="5265" calcext:value-type="float">
            <text:p>5265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609375" calcext:value-type="float">
            <text:p>0,00060937500000000000</text:p>
          </table:table-cell>
          <table:table-cell table:formula="of:=[.D119]-[.D118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45" office:value-type="float" office:value="5310" calcext:value-type="float">
            <text:p>5310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614583333333333" calcext:value-type="float">
            <text:p>0,00061458333333333300</text:p>
          </table:table-cell>
          <table:table-cell table:formula="of:=[.D120]-[.D119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45" office:value-type="float" office:value="5355" calcext:value-type="float">
            <text:p>5355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619791666666667" calcext:value-type="float">
            <text:p>0,00061979166666666700</text:p>
          </table:table-cell>
          <table:table-cell table:formula="of:=[.D121]-[.D120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45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625" calcext:value-type="float">
            <text:p>0,00062500000000000000</text:p>
          </table:table-cell>
          <table:table-cell table:formula="of:=[.D122]-[.D121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45" office:value-type="float" office:value="5445" calcext:value-type="float">
            <text:p>5445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630208333333333" calcext:value-type="float">
            <text:p>0,00063020833333333300</text:p>
          </table:table-cell>
          <table:table-cell table:formula="of:=[.D123]-[.D122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45" office:value-type="float" office:value="5490" calcext:value-type="float">
            <text:p>5490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635416666666667" calcext:value-type="float">
            <text:p>0,00063541666666666700</text:p>
          </table:table-cell>
          <table:table-cell table:formula="of:=[.D124]-[.D123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45" office:value-type="float" office:value="5535" calcext:value-type="float">
            <text:p>5535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640625" calcext:value-type="float">
            <text:p>0,00064062500000000000</text:p>
          </table:table-cell>
          <table:table-cell table:formula="of:=[.D125]-[.D124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45" office:value-type="float" office:value="5580" calcext:value-type="float">
            <text:p>5580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645833333333333" calcext:value-type="float">
            <text:p>0,00064583333333333300</text:p>
          </table:table-cell>
          <table:table-cell table:formula="of:=[.D126]-[.D125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45" office:value-type="float" office:value="5625" calcext:value-type="float">
            <text:p>56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651041666666667" calcext:value-type="float">
            <text:p>0,00065104166666666700</text:p>
          </table:table-cell>
          <table:table-cell table:formula="of:=[.D127]-[.D126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45" office:value-type="float" office:value="5670" calcext:value-type="float">
            <text:p>5670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65625" calcext:value-type="float">
            <text:p>0,00065625000000000000</text:p>
          </table:table-cell>
          <table:table-cell table:formula="of:=[.D128]-[.D127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45" office:value-type="float" office:value="5715" calcext:value-type="float">
            <text:p>5715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661458333333333" calcext:value-type="float">
            <text:p>0,00066145833333333300</text:p>
          </table:table-cell>
          <table:table-cell table:formula="of:=[.D129]-[.D128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45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666666666666667" calcext:value-type="float">
            <text:p>0,00066666666666666700</text:p>
          </table:table-cell>
          <table:table-cell table:formula="of:=[.D130]-[.D129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45" office:value-type="float" office:value="5805" calcext:value-type="float">
            <text:p>5805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671875" calcext:value-type="float">
            <text:p>0,00067187500000000000</text:p>
          </table:table-cell>
          <table:table-cell table:formula="of:=[.D131]-[.D130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45" office:value-type="float" office:value="5850" calcext:value-type="float">
            <text:p>585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677083333333333" calcext:value-type="float">
            <text:p>0,00067708333333333300</text:p>
          </table:table-cell>
          <table:table-cell table:formula="of:=[.D132]-[.D131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45" office:value-type="float" office:value="5895" calcext:value-type="float">
            <text:p>5895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682291666666667" calcext:value-type="float">
            <text:p>0,00068229166666666700</text:p>
          </table:table-cell>
          <table:table-cell table:formula="of:=[.D133]-[.D132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45" office:value-type="float" office:value="5940" calcext:value-type="float">
            <text:p>5940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6875" calcext:value-type="float">
            <text:p>0,00068750000000000000</text:p>
          </table:table-cell>
          <table:table-cell table:formula="of:=[.D134]-[.D133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45" office:value-type="float" office:value="5985" calcext:value-type="float">
            <text:p>5985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692708333333333" calcext:value-type="float">
            <text:p>0,00069270833333333300</text:p>
          </table:table-cell>
          <table:table-cell table:formula="of:=[.D135]-[.D134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45" office:value-type="float" office:value="6030" calcext:value-type="float">
            <text:p>6030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697916666666667" calcext:value-type="float">
            <text:p>0,00069791666666666700</text:p>
          </table:table-cell>
          <table:table-cell table:formula="of:=[.D136]-[.D135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45" office:value-type="float" office:value="6075" calcext:value-type="float">
            <text:p>607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703125" calcext:value-type="float">
            <text:p>0,00070312500000000000</text:p>
          </table:table-cell>
          <table:table-cell table:formula="of:=[.D137]-[.D136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45" office:value-type="float" office:value="6120" calcext:value-type="float">
            <text:p>6120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708333333333333" calcext:value-type="float">
            <text:p>0,00070833333333333300</text:p>
          </table:table-cell>
          <table:table-cell table:formula="of:=[.D138]-[.D137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45" office:value-type="float" office:value="6165" calcext:value-type="float">
            <text:p>6165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713541666666667" calcext:value-type="float">
            <text:p>0,00071354166666666700</text:p>
          </table:table-cell>
          <table:table-cell table:formula="of:=[.D139]-[.D138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45" office:value-type="float" office:value="6210" calcext:value-type="float">
            <text:p>6210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71875" calcext:value-type="float">
            <text:p>0,00071875000000000000</text:p>
          </table:table-cell>
          <table:table-cell table:formula="of:=[.D140]-[.D139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45" office:value-type="float" office:value="6255" calcext:value-type="float">
            <text:p>6255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723958333333333" calcext:value-type="float">
            <text:p>0,00072395833333333300</text:p>
          </table:table-cell>
          <table:table-cell table:formula="of:=[.D141]-[.D140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45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729166666666667" calcext:value-type="float">
            <text:p>0,00072916666666666700</text:p>
          </table:table-cell>
          <table:table-cell table:formula="of:=[.D142]-[.D141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45" office:value-type="float" office:value="6345" calcext:value-type="float">
            <text:p>6345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734375" calcext:value-type="float">
            <text:p>0,00073437500000000000</text:p>
          </table:table-cell>
          <table:table-cell table:formula="of:=[.D143]-[.D142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45" office:value-type="float" office:value="6390" calcext:value-type="float">
            <text:p>6390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739583333333333" calcext:value-type="float">
            <text:p>0,00073958333333333300</text:p>
          </table:table-cell>
          <table:table-cell table:formula="of:=[.D144]-[.D143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45" office:value-type="float" office:value="6435" calcext:value-type="float">
            <text:p>6435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744791666666667" calcext:value-type="float">
            <text:p>0,00074479166666666700</text:p>
          </table:table-cell>
          <table:table-cell table:formula="of:=[.D145]-[.D144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45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75" calcext:value-type="float">
            <text:p>0,00075000000000000000</text:p>
          </table:table-cell>
          <table:table-cell table:formula="of:=[.D146]-[.D145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45" office:value-type="float" office:value="6525" calcext:value-type="float">
            <text:p>652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755208333333333" calcext:value-type="float">
            <text:p>0,00075520833333333300</text:p>
          </table:table-cell>
          <table:table-cell table:formula="of:=[.D147]-[.D146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45" office:value-type="float" office:value="6570" calcext:value-type="float">
            <text:p>6570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760416666666667" calcext:value-type="float">
            <text:p>0,00076041666666666700</text:p>
          </table:table-cell>
          <table:table-cell table:formula="of:=[.D148]-[.D147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45" office:value-type="float" office:value="6615" calcext:value-type="float">
            <text:p>6615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765625" calcext:value-type="float">
            <text:p>0,00076562500000000000</text:p>
          </table:table-cell>
          <table:table-cell table:formula="of:=[.D149]-[.D148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45" office:value-type="float" office:value="6660" calcext:value-type="float">
            <text:p>6660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770833333333333" calcext:value-type="float">
            <text:p>0,00077083333333333300</text:p>
          </table:table-cell>
          <table:table-cell table:formula="of:=[.D150]-[.D149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45" office:value-type="float" office:value="6705" calcext:value-type="float">
            <text:p>6705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776041666666667" calcext:value-type="float">
            <text:p>0,00077604166666666700</text:p>
          </table:table-cell>
          <table:table-cell table:formula="of:=[.D151]-[.D150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45" office:value-type="float" office:value="6750" calcext:value-type="float">
            <text:p>67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78125" calcext:value-type="float">
            <text:p>0,00078125000000000000</text:p>
          </table:table-cell>
          <table:table-cell table:formula="of:=[.D152]-[.D151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45" office:value-type="float" office:value="6795" calcext:value-type="float">
            <text:p>6795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786458333333333" calcext:value-type="float">
            <text:p>0,00078645833333333300</text:p>
          </table:table-cell>
          <table:table-cell table:formula="of:=[.D153]-[.D152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45" office:value-type="float" office:value="6840" calcext:value-type="float">
            <text:p>6840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791666666666667" calcext:value-type="float">
            <text:p>0,00079166666666666700</text:p>
          </table:table-cell>
          <table:table-cell table:formula="of:=[.D154]-[.D153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45" office:value-type="float" office:value="6885" calcext:value-type="float">
            <text:p>6885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796875" calcext:value-type="float">
            <text:p>0,00079687500000000000</text:p>
          </table:table-cell>
          <table:table-cell table:formula="of:=[.D155]-[.D154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45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802083333333333" calcext:value-type="float">
            <text:p>0,00080208333333333300</text:p>
          </table:table-cell>
          <table:table-cell table:formula="of:=[.D156]-[.D155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45" office:value-type="float" office:value="6975" calcext:value-type="float">
            <text:p>697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807291666666667" calcext:value-type="float">
            <text:p>0,00080729166666666700</text:p>
          </table:table-cell>
          <table:table-cell table:formula="of:=[.D157]-[.D156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45" office:value-type="float" office:value="7020" calcext:value-type="float">
            <text:p>7020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8125" calcext:value-type="float">
            <text:p>0,00081250000000000000</text:p>
          </table:table-cell>
          <table:table-cell table:formula="of:=[.D158]-[.D157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45" office:value-type="float" office:value="7065" calcext:value-type="float">
            <text:p>7065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817708333333333" calcext:value-type="float">
            <text:p>0,00081770833333333400</text:p>
          </table:table-cell>
          <table:table-cell table:formula="of:=[.D159]-[.D158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45" office:value-type="float" office:value="7110" calcext:value-type="float">
            <text:p>7110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822916666666667" calcext:value-type="float">
            <text:p>0,00082291666666666700</text:p>
          </table:table-cell>
          <table:table-cell table:formula="of:=[.D160]-[.D159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45" office:value-type="float" office:value="7155" calcext:value-type="float">
            <text:p>7155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828125" calcext:value-type="float">
            <text:p>0,00082812500000000000</text:p>
          </table:table-cell>
          <table:table-cell table:formula="of:=[.D161]-[.D160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45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833333333333333" calcext:value-type="float">
            <text:p>0,00083333333333333300</text:p>
          </table:table-cell>
          <table:table-cell table:formula="of:=[.D162]-[.D161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45" office:value-type="float" office:value="7245" calcext:value-type="float">
            <text:p>7245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838541666666667" calcext:value-type="float">
            <text:p>0,00083854166666666700</text:p>
          </table:table-cell>
          <table:table-cell table:formula="of:=[.D163]-[.D162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45" office:value-type="float" office:value="7290" calcext:value-type="float">
            <text:p>7290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84375" calcext:value-type="float">
            <text:p>0,00084375000000000000</text:p>
          </table:table-cell>
          <table:table-cell table:formula="of:=[.D164]-[.D163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45" office:value-type="float" office:value="7335" calcext:value-type="float">
            <text:p>7335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848958333333333" calcext:value-type="float">
            <text:p>0,00084895833333333300</text:p>
          </table:table-cell>
          <table:table-cell table:formula="of:=[.D165]-[.D164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45" office:value-type="float" office:value="7380" calcext:value-type="float">
            <text:p>7380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854166666666667" calcext:value-type="float">
            <text:p>0,00085416666666666700</text:p>
          </table:table-cell>
          <table:table-cell table:formula="of:=[.D166]-[.D165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45" office:value-type="float" office:value="7425" calcext:value-type="float">
            <text:p>742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859375" calcext:value-type="float">
            <text:p>0,00085937500000000000</text:p>
          </table:table-cell>
          <table:table-cell table:formula="of:=[.D167]-[.D166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45" office:value-type="float" office:value="7470" calcext:value-type="float">
            <text:p>7470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864583333333333" calcext:value-type="float">
            <text:p>0,00086458333333333300</text:p>
          </table:table-cell>
          <table:table-cell table:formula="of:=[.D168]-[.D167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45" office:value-type="float" office:value="7515" calcext:value-type="float">
            <text:p>7515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869791666666667" calcext:value-type="float">
            <text:p>0,00086979166666666700</text:p>
          </table:table-cell>
          <table:table-cell table:formula="of:=[.D169]-[.D168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45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875" calcext:value-type="float">
            <text:p>0,00087500000000000000</text:p>
          </table:table-cell>
          <table:table-cell table:formula="of:=[.D170]-[.D169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45" office:value-type="float" office:value="7605" calcext:value-type="float">
            <text:p>7605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880208333333333" calcext:value-type="float">
            <text:p>0,00088020833333333300</text:p>
          </table:table-cell>
          <table:table-cell table:formula="of:=[.D171]-[.D170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45" office:value-type="float" office:value="7650" calcext:value-type="float">
            <text:p>765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885416666666667" calcext:value-type="float">
            <text:p>0,00088541666666666700</text:p>
          </table:table-cell>
          <table:table-cell table:formula="of:=[.D172]-[.D171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45" office:value-type="float" office:value="7695" calcext:value-type="float">
            <text:p>7695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890625" calcext:value-type="float">
            <text:p>0,00089062500000000000</text:p>
          </table:table-cell>
          <table:table-cell table:formula="of:=[.D173]-[.D172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45" office:value-type="float" office:value="7740" calcext:value-type="float">
            <text:p>7740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895833333333333" calcext:value-type="float">
            <text:p>0,00089583333333333300</text:p>
          </table:table-cell>
          <table:table-cell table:formula="of:=[.D174]-[.D173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45" office:value-type="float" office:value="7785" calcext:value-type="float">
            <text:p>7785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901041666666667" calcext:value-type="float">
            <text:p>0,00090104166666666700</text:p>
          </table:table-cell>
          <table:table-cell table:formula="of:=[.D175]-[.D174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45" office:value-type="float" office:value="7830" calcext:value-type="float">
            <text:p>7830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90625" calcext:value-type="float">
            <text:p>0,00090625000000000000</text:p>
          </table:table-cell>
          <table:table-cell table:formula="of:=[.D176]-[.D175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45" office:value-type="float" office:value="7875" calcext:value-type="float">
            <text:p>78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911458333333333" calcext:value-type="float">
            <text:p>0,00091145833333333300</text:p>
          </table:table-cell>
          <table:table-cell table:formula="of:=[.D177]-[.D176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45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916666666666667" calcext:value-type="float">
            <text:p>0,00091666666666666700</text:p>
          </table:table-cell>
          <table:table-cell table:formula="of:=[.D178]-[.D177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45" office:value-type="float" office:value="7965" calcext:value-type="float">
            <text:p>7965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921875" calcext:value-type="float">
            <text:p>0,00092187500000000000</text:p>
          </table:table-cell>
          <table:table-cell table:formula="of:=[.D179]-[.D178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45" office:value-type="float" office:value="8010" calcext:value-type="float">
            <text:p>8010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927083333333333" calcext:value-type="float">
            <text:p>0,00092708333333333400</text:p>
          </table:table-cell>
          <table:table-cell table:formula="of:=[.D180]-[.D179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45" office:value-type="float" office:value="8055" calcext:value-type="float">
            <text:p>8055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932291666666667" calcext:value-type="float">
            <text:p>0,00093229166666666700</text:p>
          </table:table-cell>
          <table:table-cell table:formula="of:=[.D181]-[.D180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45" office:value-type="float" office:value="8100" calcext:value-type="float">
            <text:p>810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9375" calcext:value-type="float">
            <text:p>0,00093750000000000000</text:p>
          </table:table-cell>
          <table:table-cell table:formula="of:=[.D182]-[.D181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45" office:value-type="float" office:value="8145" calcext:value-type="float">
            <text:p>8145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942708333333333" calcext:value-type="float">
            <text:p>0,00094270833333333400</text:p>
          </table:table-cell>
          <table:table-cell table:formula="of:=[.D183]-[.D182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45" office:value-type="float" office:value="8190" calcext:value-type="float">
            <text:p>8190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947916666666667" calcext:value-type="float">
            <text:p>0,00094791666666666700</text:p>
          </table:table-cell>
          <table:table-cell table:formula="of:=[.D184]-[.D183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45" office:value-type="float" office:value="8235" calcext:value-type="float">
            <text:p>8235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953125" calcext:value-type="float">
            <text:p>0,00095312500000000000</text:p>
          </table:table-cell>
          <table:table-cell table:formula="of:=[.D185]-[.D184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45" office:value-type="float" office:value="8280" calcext:value-type="float">
            <text:p>8280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958333333333333" calcext:value-type="float">
            <text:p>0,00095833333333333300</text:p>
          </table:table-cell>
          <table:table-cell table:formula="of:=[.D186]-[.D185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45" office:value-type="float" office:value="8325" calcext:value-type="float">
            <text:p>832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963541666666667" calcext:value-type="float">
            <text:p>0,00096354166666666700</text:p>
          </table:table-cell>
          <table:table-cell table:formula="of:=[.D187]-[.D186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45" office:value-type="float" office:value="8370" calcext:value-type="float">
            <text:p>8370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96875" calcext:value-type="float">
            <text:p>0,00096875000000000000</text:p>
          </table:table-cell>
          <table:table-cell table:formula="of:=[.D188]-[.D187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45" office:value-type="float" office:value="8415" calcext:value-type="float">
            <text:p>8415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973958333333333" calcext:value-type="float">
            <text:p>0,00097395833333333300</text:p>
          </table:table-cell>
          <table:table-cell table:formula="of:=[.D189]-[.D188]" office:value-type="float" office:value="0.0000052083333333333" calcext:value-type="float">
            <text:p>0,0000052083333333333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45" office:value-type="float" office:value="8460" calcext:value-type="float">
            <text:p>8460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979166666666667" calcext:value-type="float">
            <text:p>0,00097916666666666700</text:p>
          </table:table-cell>
          <table:table-cell table:formula="of:=[.D190]-[.D189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45" office:value-type="float" office:value="8505" calcext:value-type="float">
            <text:p>8505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984375" calcext:value-type="float">
            <text:p>0,00098437500000000000</text:p>
          </table:table-cell>
          <table:table-cell table:formula="of:=[.D191]-[.D190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45" office:value-type="float" office:value="8550" calcext:value-type="float">
            <text:p>855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989583333333333" calcext:value-type="float">
            <text:p>0,00098958333333333300</text:p>
          </table:table-cell>
          <table:table-cell table:formula="of:=[.D192]-[.D191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45" office:value-type="float" office:value="8595" calcext:value-type="float">
            <text:p>8595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994791666666667" calcext:value-type="float">
            <text:p>0,00099479166666666700</text:p>
          </table:table-cell>
          <table:table-cell table:formula="of:=[.D193]-[.D192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45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" calcext:value-type="float">
            <text:p>0,00100000000000000000</text:p>
          </table:table-cell>
          <table:table-cell table:formula="of:=[.D194]-[.D193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45" office:value-type="float" office:value="8685" calcext:value-type="float">
            <text:p>8685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00520833333333" calcext:value-type="float">
            <text:p>0,00100520833333333000</text:p>
          </table:table-cell>
          <table:table-cell table:formula="of:=[.D195]-[.D194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45" office:value-type="float" office:value="8730" calcext:value-type="float">
            <text:p>8730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01041666666667" calcext:value-type="float">
            <text:p>0,00101041666666667000</text:p>
          </table:table-cell>
          <table:table-cell table:formula="of:=[.D196]-[.D195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45" office:value-type="float" office:value="8775" calcext:value-type="float">
            <text:p>877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015625" calcext:value-type="float">
            <text:p>0,00101562500000000000</text:p>
          </table:table-cell>
          <table:table-cell table:formula="of:=[.D197]-[.D196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45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02083333333333" calcext:value-type="float">
            <text:p>0,00102083333333333000</text:p>
          </table:table-cell>
          <table:table-cell table:formula="of:=[.D198]-[.D197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45" office:value-type="float" office:value="8865" calcext:value-type="float">
            <text:p>8865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02604166666667" calcext:value-type="float">
            <text:p>0,00102604166666667000</text:p>
          </table:table-cell>
          <table:table-cell table:formula="of:=[.D199]-[.D198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45" office:value-type="float" office:value="8910" calcext:value-type="float">
            <text:p>8910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03125" calcext:value-type="float">
            <text:p>0,00103125000000000000</text:p>
          </table:table-cell>
          <table:table-cell table:formula="of:=[.D200]-[.D199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45" office:value-type="float" office:value="8955" calcext:value-type="float">
            <text:p>8955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03645833333333" calcext:value-type="float">
            <text:p>0,00103645833333333000</text:p>
          </table:table-cell>
          <table:table-cell table:formula="of:=[.D201]-[.D200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45" office:value-type="float" office:value="9000" calcext:value-type="float">
            <text:p>90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04166666666667" calcext:value-type="float">
            <text:p>0,00104166666666667000</text:p>
          </table:table-cell>
          <table:table-cell table:formula="of:=[.D202]-[.D201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45" office:value-type="float" office:value="9045" calcext:value-type="float">
            <text:p>9045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046875" calcext:value-type="float">
            <text:p>0,00104687500000000000</text:p>
          </table:table-cell>
          <table:table-cell table:formula="of:=[.D203]-[.D202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45" office:value-type="float" office:value="9090" calcext:value-type="float">
            <text:p>9090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05208333333333" calcext:value-type="float">
            <text:p>0,00105208333333333000</text:p>
          </table:table-cell>
          <table:table-cell table:formula="of:=[.D204]-[.D203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45" office:value-type="float" office:value="9135" calcext:value-type="float">
            <text:p>9135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05729166666667" calcext:value-type="float">
            <text:p>0,00105729166666667000</text:p>
          </table:table-cell>
          <table:table-cell table:formula="of:=[.D205]-[.D204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45" office:value-type="float" office:value="9180" calcext:value-type="float">
            <text:p>9180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0625" calcext:value-type="float">
            <text:p>0,00106250000000000000</text:p>
          </table:table-cell>
          <table:table-cell table:formula="of:=[.D206]-[.D205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45" office:value-type="float" office:value="9225" calcext:value-type="float">
            <text:p>922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06770833333333" calcext:value-type="float">
            <text:p>0,00106770833333333000</text:p>
          </table:table-cell>
          <table:table-cell table:formula="of:=[.D207]-[.D206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45" office:value-type="float" office:value="9270" calcext:value-type="float">
            <text:p>9270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07291666666667" calcext:value-type="float">
            <text:p>0,00107291666666667000</text:p>
          </table:table-cell>
          <table:table-cell table:formula="of:=[.D208]-[.D207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45" office:value-type="float" office:value="9315" calcext:value-type="float">
            <text:p>9315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078125" calcext:value-type="float">
            <text:p>0,00107812500000000000</text:p>
          </table:table-cell>
          <table:table-cell table:formula="of:=[.D209]-[.D208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45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08333333333333" calcext:value-type="float">
            <text:p>0,00108333333333333000</text:p>
          </table:table-cell>
          <table:table-cell table:formula="of:=[.D210]-[.D209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45" office:value-type="float" office:value="9405" calcext:value-type="float">
            <text:p>9405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08854166666667" calcext:value-type="float">
            <text:p>0,00108854166666667000</text:p>
          </table:table-cell>
          <table:table-cell table:formula="of:=[.D211]-[.D210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45" office:value-type="float" office:value="9450" calcext:value-type="float">
            <text:p>945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09375" calcext:value-type="float">
            <text:p>0,00109375000000000000</text:p>
          </table:table-cell>
          <table:table-cell table:formula="of:=[.D212]-[.D211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45" office:value-type="float" office:value="9495" calcext:value-type="float">
            <text:p>9495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09895833333333" calcext:value-type="float">
            <text:p>0,00109895833333333000</text:p>
          </table:table-cell>
          <table:table-cell table:formula="of:=[.D213]-[.D212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45" office:value-type="float" office:value="9540" calcext:value-type="float">
            <text:p>9540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10416666666667" calcext:value-type="float">
            <text:p>0,00110416666666667000</text:p>
          </table:table-cell>
          <table:table-cell table:formula="of:=[.D214]-[.D213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45" office:value-type="float" office:value="9585" calcext:value-type="float">
            <text:p>9585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109375" calcext:value-type="float">
            <text:p>0,00110937500000000000</text:p>
          </table:table-cell>
          <table:table-cell table:formula="of:=[.D215]-[.D214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45" office:value-type="float" office:value="9630" calcext:value-type="float">
            <text:p>9630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11458333333333" calcext:value-type="float">
            <text:p>0,00111458333333333000</text:p>
          </table:table-cell>
          <table:table-cell table:formula="of:=[.D216]-[.D215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45" office:value-type="float" office:value="9675" calcext:value-type="float">
            <text:p>967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11979166666667" calcext:value-type="float">
            <text:p>0,00111979166666667000</text:p>
          </table:table-cell>
          <table:table-cell table:formula="of:=[.D217]-[.D216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45" office:value-type="float" office:value="9720" calcext:value-type="float">
            <text:p>9720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125" calcext:value-type="float">
            <text:p>0,00112500000000000000</text:p>
          </table:table-cell>
          <table:table-cell table:formula="of:=[.D218]-[.D217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45" office:value-type="float" office:value="9765" calcext:value-type="float">
            <text:p>9765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13020833333333" calcext:value-type="float">
            <text:p>0,00113020833333333000</text:p>
          </table:table-cell>
          <table:table-cell table:formula="of:=[.D219]-[.D218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45" office:value-type="float" office:value="9810" calcext:value-type="float">
            <text:p>9810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13541666666667" calcext:value-type="float">
            <text:p>0,00113541666666667000</text:p>
          </table:table-cell>
          <table:table-cell table:formula="of:=[.D220]-[.D219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45" office:value-type="float" office:value="9855" calcext:value-type="float">
            <text:p>9855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140625" calcext:value-type="float">
            <text:p>0,00114062500000000000</text:p>
          </table:table-cell>
          <table:table-cell table:formula="of:=[.D221]-[.D220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45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14583333333333" calcext:value-type="float">
            <text:p>0,00114583333333333000</text:p>
          </table:table-cell>
          <table:table-cell table:formula="of:=[.D222]-[.D221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45" office:value-type="float" office:value="9945" calcext:value-type="float">
            <text:p>9945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15104166666667" calcext:value-type="float">
            <text:p>0,00115104166666667000</text:p>
          </table:table-cell>
          <table:table-cell table:formula="of:=[.D223]-[.D222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45" office:value-type="float" office:value="9990" calcext:value-type="float">
            <text:p>9990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15625" calcext:value-type="float">
            <text:p>0,00115625000000000000</text:p>
          </table:table-cell>
          <table:table-cell table:formula="of:=[.D224]-[.D223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45" office:value-type="float" office:value="10035" calcext:value-type="float">
            <text:p>10035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16145833333333" calcext:value-type="float">
            <text:p>0,00116145833333333000</text:p>
          </table:table-cell>
          <table:table-cell table:formula="of:=[.D225]-[.D224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45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16666666666667" calcext:value-type="float">
            <text:p>0,00116666666666667000</text:p>
          </table:table-cell>
          <table:table-cell table:formula="of:=[.D226]-[.D225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45" office:value-type="float" office:value="10125" calcext:value-type="float">
            <text:p>101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171875" calcext:value-type="float">
            <text:p>0,00117187500000000000</text:p>
          </table:table-cell>
          <table:table-cell table:formula="of:=[.D227]-[.D226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45" office:value-type="float" office:value="10170" calcext:value-type="float">
            <text:p>10170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17708333333333" calcext:value-type="float">
            <text:p>0,00117708333333333000</text:p>
          </table:table-cell>
          <table:table-cell table:formula="of:=[.D228]-[.D227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45" office:value-type="float" office:value="10215" calcext:value-type="float">
            <text:p>10215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18229166666667" calcext:value-type="float">
            <text:p>0,00118229166666667000</text:p>
          </table:table-cell>
          <table:table-cell table:formula="of:=[.D229]-[.D228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45" office:value-type="float" office:value="10260" calcext:value-type="float">
            <text:p>10260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1875" calcext:value-type="float">
            <text:p>0,00118750000000000000</text:p>
          </table:table-cell>
          <table:table-cell table:formula="of:=[.D230]-[.D229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45" office:value-type="float" office:value="10305" calcext:value-type="float">
            <text:p>10305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19270833333333" calcext:value-type="float">
            <text:p>0,00119270833333333000</text:p>
          </table:table-cell>
          <table:table-cell table:formula="of:=[.D231]-[.D230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45" office:value-type="float" office:value="10350" calcext:value-type="float">
            <text:p>1035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19791666666667" calcext:value-type="float">
            <text:p>0,00119791666666667000</text:p>
          </table:table-cell>
          <table:table-cell table:formula="of:=[.D232]-[.D231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45" office:value-type="float" office:value="10395" calcext:value-type="float">
            <text:p>10395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203125" calcext:value-type="float">
            <text:p>0,00120312500000000000</text:p>
          </table:table-cell>
          <table:table-cell table:formula="of:=[.D233]-[.D232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45" office:value-type="float" office:value="10440" calcext:value-type="float">
            <text:p>10440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20833333333333" calcext:value-type="float">
            <text:p>0,00120833333333333000</text:p>
          </table:table-cell>
          <table:table-cell table:formula="of:=[.D234]-[.D233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45" office:value-type="float" office:value="10485" calcext:value-type="float">
            <text:p>10485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21354166666667" calcext:value-type="float">
            <text:p>0,00121354166666667000</text:p>
          </table:table-cell>
          <table:table-cell table:formula="of:=[.D235]-[.D234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45" office:value-type="float" office:value="10530" calcext:value-type="float">
            <text:p>10530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21875" calcext:value-type="float">
            <text:p>0,00121875000000000000</text:p>
          </table:table-cell>
          <table:table-cell table:formula="of:=[.D236]-[.D235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45" office:value-type="float" office:value="10575" calcext:value-type="float">
            <text:p>1057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22395833333333" calcext:value-type="float">
            <text:p>0,00122395833333333000</text:p>
          </table:table-cell>
          <table:table-cell table:formula="of:=[.D237]-[.D236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45" office:value-type="float" office:value="10620" calcext:value-type="float">
            <text:p>10620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22916666666667" calcext:value-type="float">
            <text:p>0,00122916666666667000</text:p>
          </table:table-cell>
          <table:table-cell table:formula="of:=[.D238]-[.D237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45" office:value-type="float" office:value="10665" calcext:value-type="float">
            <text:p>10665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234375" calcext:value-type="float">
            <text:p>0,00123437500000000000</text:p>
          </table:table-cell>
          <table:table-cell table:formula="of:=[.D239]-[.D238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45" office:value-type="float" office:value="10710" calcext:value-type="float">
            <text:p>10710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23958333333333" calcext:value-type="float">
            <text:p>0,00123958333333333000</text:p>
          </table:table-cell>
          <table:table-cell table:formula="of:=[.D240]-[.D239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45" office:value-type="float" office:value="10755" calcext:value-type="float">
            <text:p>10755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24479166666667" calcext:value-type="float">
            <text:p>0,00124479166666667000</text:p>
          </table:table-cell>
          <table:table-cell table:formula="of:=[.D241]-[.D240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45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25" calcext:value-type="float">
            <text:p>0,00125000000000000000</text:p>
          </table:table-cell>
          <table:table-cell table:formula="of:=[.D242]-[.D241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45" office:value-type="float" office:value="10845" calcext:value-type="float">
            <text:p>10845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25520833333333" calcext:value-type="float">
            <text:p>0,00125520833333333000</text:p>
          </table:table-cell>
          <table:table-cell table:formula="of:=[.D243]-[.D242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45" office:value-type="float" office:value="10890" calcext:value-type="float">
            <text:p>10890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26041666666667" calcext:value-type="float">
            <text:p>0,00126041666666667000</text:p>
          </table:table-cell>
          <table:table-cell table:formula="of:=[.D244]-[.D243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45" office:value-type="float" office:value="10935" calcext:value-type="float">
            <text:p>10935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265625" calcext:value-type="float">
            <text:p>0,00126562500000000000</text:p>
          </table:table-cell>
          <table:table-cell table:formula="of:=[.D245]-[.D244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45" office:value-type="float" office:value="10980" calcext:value-type="float">
            <text:p>10980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27083333333333" calcext:value-type="float">
            <text:p>0,00127083333333333000</text:p>
          </table:table-cell>
          <table:table-cell table:formula="of:=[.D246]-[.D245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45" office:value-type="float" office:value="11025" calcext:value-type="float">
            <text:p>1102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27604166666667" calcext:value-type="float">
            <text:p>0,00127604166666667000</text:p>
          </table:table-cell>
          <table:table-cell table:formula="of:=[.D247]-[.D246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45" office:value-type="float" office:value="11070" calcext:value-type="float">
            <text:p>11070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28125" calcext:value-type="float">
            <text:p>0,00128125000000000000</text:p>
          </table:table-cell>
          <table:table-cell table:formula="of:=[.D248]-[.D247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45" office:value-type="float" office:value="11115" calcext:value-type="float">
            <text:p>11115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28645833333333" calcext:value-type="float">
            <text:p>0,00128645833333333000</text:p>
          </table:table-cell>
          <table:table-cell table:formula="of:=[.D249]-[.D248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45" office:value-type="float" office:value="11160" calcext:value-type="float">
            <text:p>11160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29166666666667" calcext:value-type="float">
            <text:p>0,00129166666666667000</text:p>
          </table:table-cell>
          <table:table-cell table:formula="of:=[.D250]-[.D249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45" office:value-type="float" office:value="11205" calcext:value-type="float">
            <text:p>11205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296875" calcext:value-type="float">
            <text:p>0,00129687500000000000</text:p>
          </table:table-cell>
          <table:table-cell table:formula="of:=[.D251]-[.D250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45" office:value-type="float" office:value="11250" calcext:value-type="float">
            <text:p>11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30208333333333" calcext:value-type="float">
            <text:p>0,00130208333333333000</text:p>
          </table:table-cell>
          <table:table-cell table:formula="of:=[.D252]-[.D251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45" office:value-type="float" office:value="11295" calcext:value-type="float">
            <text:p>11295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30729166666667" calcext:value-type="float">
            <text:p>0,00130729166666667000</text:p>
          </table:table-cell>
          <table:table-cell table:formula="of:=[.D253]-[.D252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45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3125" calcext:value-type="float">
            <text:p>0,00131250000000000000</text:p>
          </table:table-cell>
          <table:table-cell table:formula="of:=[.D254]-[.D253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45" office:value-type="float" office:value="11385" calcext:value-type="float">
            <text:p>11385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31770833333333" calcext:value-type="float">
            <text:p>0,00131770833333333000</text:p>
          </table:table-cell>
          <table:table-cell table:formula="of:=[.D255]-[.D254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45" office:value-type="float" office:value="11430" calcext:value-type="float">
            <text:p>11430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32291666666667" calcext:value-type="float">
            <text:p>0,00132291666666667000</text:p>
          </table:table-cell>
          <table:table-cell table:formula="of:=[.D256]-[.D255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45" office:value-type="float" office:value="11475" calcext:value-type="float">
            <text:p>1147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328125" calcext:value-type="float">
            <text:p>0,00132812500000000000</text:p>
          </table:table-cell>
          <table:table-cell table:formula="of:=[.D257]-[.D256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45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33333333333333" calcext:value-type="float">
            <text:p>0,00133333333333333000</text:p>
          </table:table-cell>
          <table:table-cell table:formula="of:=[.D258]-[.D257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45" office:value-type="float" office:value="11565" calcext:value-type="float">
            <text:p>11565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33854166666667" calcext:value-type="float">
            <text:p>0,00133854166666667000</text:p>
          </table:table-cell>
          <table:table-cell table:formula="of:=[.D259]-[.D258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45" office:value-type="float" office:value="11610" calcext:value-type="float">
            <text:p>11610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34375" calcext:value-type="float">
            <text:p>0,00134375000000000000</text:p>
          </table:table-cell>
          <table:table-cell table:formula="of:=[.D260]-[.D259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45" office:value-type="float" office:value="11655" calcext:value-type="float">
            <text:p>11655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34895833333333" calcext:value-type="float">
            <text:p>0,00134895833333333000</text:p>
          </table:table-cell>
          <table:table-cell table:formula="of:=[.D261]-[.D260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45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35416666666667" calcext:value-type="float">
            <text:p>0,00135416666666667000</text:p>
          </table:table-cell>
          <table:table-cell table:formula="of:=[.D262]-[.D261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45" office:value-type="float" office:value="11745" calcext:value-type="float">
            <text:p>11745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359375" calcext:value-type="float">
            <text:p>0,00135937500000000000</text:p>
          </table:table-cell>
          <table:table-cell table:formula="of:=[.D263]-[.D262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45" office:value-type="float" office:value="11790" calcext:value-type="float">
            <text:p>11790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36458333333333" calcext:value-type="float">
            <text:p>0,00136458333333333000</text:p>
          </table:table-cell>
          <table:table-cell table:formula="of:=[.D264]-[.D263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45" office:value-type="float" office:value="11835" calcext:value-type="float">
            <text:p>11835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36979166666667" calcext:value-type="float">
            <text:p>0,00136979166666667000</text:p>
          </table:table-cell>
          <table:table-cell table:formula="of:=[.D265]-[.D264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45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375" calcext:value-type="float">
            <text:p>0,00137500000000000000</text:p>
          </table:table-cell>
          <table:table-cell table:formula="of:=[.D266]-[.D265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45" office:value-type="float" office:value="11925" calcext:value-type="float">
            <text:p>1192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38020833333333" calcext:value-type="float">
            <text:p>0,00138020833333333000</text:p>
          </table:table-cell>
          <table:table-cell table:formula="of:=[.D267]-[.D266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45" office:value-type="float" office:value="11970" calcext:value-type="float">
            <text:p>11970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38541666666667" calcext:value-type="float">
            <text:p>0,00138541666666667000</text:p>
          </table:table-cell>
          <table:table-cell table:formula="of:=[.D268]-[.D267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45" office:value-type="float" office:value="12015" calcext:value-type="float">
            <text:p>12015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390625" calcext:value-type="float">
            <text:p>0,00139062500000000000</text:p>
          </table:table-cell>
          <table:table-cell table:formula="of:=[.D269]-[.D268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45" office:value-type="float" office:value="12060" calcext:value-type="float">
            <text:p>12060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39583333333333" calcext:value-type="float">
            <text:p>0,00139583333333333000</text:p>
          </table:table-cell>
          <table:table-cell table:formula="of:=[.D270]-[.D269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45" office:value-type="float" office:value="12105" calcext:value-type="float">
            <text:p>12105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40104166666667" calcext:value-type="float">
            <text:p>0,00140104166666667000</text:p>
          </table:table-cell>
          <table:table-cell table:formula="of:=[.D271]-[.D270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45" office:value-type="float" office:value="12150" calcext:value-type="float">
            <text:p>1215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40625" calcext:value-type="float">
            <text:p>0,00140625000000000000</text:p>
          </table:table-cell>
          <table:table-cell table:formula="of:=[.D272]-[.D271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45" office:value-type="float" office:value="12195" calcext:value-type="float">
            <text:p>12195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41145833333333" calcext:value-type="float">
            <text:p>0,00141145833333333000</text:p>
          </table:table-cell>
          <table:table-cell table:formula="of:=[.D273]-[.D272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45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41666666666667" calcext:value-type="float">
            <text:p>0,00141666666666667000</text:p>
          </table:table-cell>
          <table:table-cell table:formula="of:=[.D274]-[.D273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45" office:value-type="float" office:value="12285" calcext:value-type="float">
            <text:p>12285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421875" calcext:value-type="float">
            <text:p>0,00142187500000000000</text:p>
          </table:table-cell>
          <table:table-cell table:formula="of:=[.D275]-[.D274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45" office:value-type="float" office:value="12330" calcext:value-type="float">
            <text:p>12330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42708333333333" calcext:value-type="float">
            <text:p>0,00142708333333333000</text:p>
          </table:table-cell>
          <table:table-cell table:formula="of:=[.D276]-[.D275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45" office:value-type="float" office:value="12375" calcext:value-type="float">
            <text:p>1237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43229166666667" calcext:value-type="float">
            <text:p>0,00143229166666667000</text:p>
          </table:table-cell>
          <table:table-cell table:formula="of:=[.D277]-[.D276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45" office:value-type="float" office:value="12420" calcext:value-type="float">
            <text:p>12420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4375" calcext:value-type="float">
            <text:p>0,00143750000000000000</text:p>
          </table:table-cell>
          <table:table-cell table:formula="of:=[.D278]-[.D277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45" office:value-type="float" office:value="12465" calcext:value-type="float">
            <text:p>12465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44270833333333" calcext:value-type="float">
            <text:p>0,00144270833333333000</text:p>
          </table:table-cell>
          <table:table-cell table:formula="of:=[.D279]-[.D278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45" office:value-type="float" office:value="12510" calcext:value-type="float">
            <text:p>12510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44791666666667" calcext:value-type="float">
            <text:p>0,00144791666666667000</text:p>
          </table:table-cell>
          <table:table-cell table:formula="of:=[.D280]-[.D279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45" office:value-type="float" office:value="12555" calcext:value-type="float">
            <text:p>12555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453125" calcext:value-type="float">
            <text:p>0,00145312500000000000</text:p>
          </table:table-cell>
          <table:table-cell table:formula="of:=[.D281]-[.D280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45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45833333333333" calcext:value-type="float">
            <text:p>0,00145833333333333000</text:p>
          </table:table-cell>
          <table:table-cell table:formula="of:=[.D282]-[.D281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45" office:value-type="float" office:value="12645" calcext:value-type="float">
            <text:p>12645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46354166666667" calcext:value-type="float">
            <text:p>0,00146354166666667000</text:p>
          </table:table-cell>
          <table:table-cell table:formula="of:=[.D283]-[.D282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45" office:value-type="float" office:value="12690" calcext:value-type="float">
            <text:p>12690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46875" calcext:value-type="float">
            <text:p>0,00146875000000000000</text:p>
          </table:table-cell>
          <table:table-cell table:formula="of:=[.D284]-[.D283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45" office:value-type="float" office:value="12735" calcext:value-type="float">
            <text:p>12735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47395833333333" calcext:value-type="float">
            <text:p>0,00147395833333333000</text:p>
          </table:table-cell>
          <table:table-cell table:formula="of:=[.D285]-[.D284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45" office:value-type="float" office:value="12780" calcext:value-type="float">
            <text:p>12780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47916666666667" calcext:value-type="float">
            <text:p>0,00147916666666667000</text:p>
          </table:table-cell>
          <table:table-cell table:formula="of:=[.D286]-[.D285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45" office:value-type="float" office:value="12825" calcext:value-type="float">
            <text:p>1282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484375" calcext:value-type="float">
            <text:p>0,00148437500000000000</text:p>
          </table:table-cell>
          <table:table-cell table:formula="of:=[.D287]-[.D286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45" office:value-type="float" office:value="12870" calcext:value-type="float">
            <text:p>12870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48958333333333" calcext:value-type="float">
            <text:p>0,00148958333333333000</text:p>
          </table:table-cell>
          <table:table-cell table:formula="of:=[.D288]-[.D287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45" office:value-type="float" office:value="12915" calcext:value-type="float">
            <text:p>12915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49479166666667" calcext:value-type="float">
            <text:p>0,00149479166666667000</text:p>
          </table:table-cell>
          <table:table-cell table:formula="of:=[.D289]-[.D288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45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5" calcext:value-type="float">
            <text:p>0,00150000000000000000</text:p>
          </table:table-cell>
          <table:table-cell table:formula="of:=[.D290]-[.D289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45" office:value-type="float" office:value="13005" calcext:value-type="float">
            <text:p>13005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50520833333333" calcext:value-type="float">
            <text:p>0,00150520833333333000</text:p>
          </table:table-cell>
          <table:table-cell table:formula="of:=[.D291]-[.D290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45" office:value-type="float" office:value="13050" calcext:value-type="float">
            <text:p>1305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51041666666667" calcext:value-type="float">
            <text:p>0,00151041666666667000</text:p>
          </table:table-cell>
          <table:table-cell table:formula="of:=[.D292]-[.D291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45" office:value-type="float" office:value="13095" calcext:value-type="float">
            <text:p>13095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515625" calcext:value-type="float">
            <text:p>0,00151562500000000000</text:p>
          </table:table-cell>
          <table:table-cell table:formula="of:=[.D293]-[.D292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45" office:value-type="float" office:value="13140" calcext:value-type="float">
            <text:p>13140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52083333333333" calcext:value-type="float">
            <text:p>0,00152083333333333000</text:p>
          </table:table-cell>
          <table:table-cell table:formula="of:=[.D294]-[.D293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45" office:value-type="float" office:value="13185" calcext:value-type="float">
            <text:p>13185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52604166666667" calcext:value-type="float">
            <text:p>0,00152604166666667000</text:p>
          </table:table-cell>
          <table:table-cell table:formula="of:=[.D295]-[.D294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45" office:value-type="float" office:value="13230" calcext:value-type="float">
            <text:p>13230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53125" calcext:value-type="float">
            <text:p>0,00153125000000000000</text:p>
          </table:table-cell>
          <table:table-cell table:formula="of:=[.D296]-[.D295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45" office:value-type="float" office:value="13275" calcext:value-type="float">
            <text:p>1327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53645833333333" calcext:value-type="float">
            <text:p>0,00153645833333333000</text:p>
          </table:table-cell>
          <table:table-cell table:formula="of:=[.D297]-[.D296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45" office:value-type="float" office:value="13320" calcext:value-type="float">
            <text:p>13320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54166666666667" calcext:value-type="float">
            <text:p>0,00154166666666667000</text:p>
          </table:table-cell>
          <table:table-cell table:formula="of:=[.D298]-[.D297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45" office:value-type="float" office:value="13365" calcext:value-type="float">
            <text:p>13365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546875" calcext:value-type="float">
            <text:p>0,00154687500000000000</text:p>
          </table:table-cell>
          <table:table-cell table:formula="of:=[.D299]-[.D298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45" office:value-type="float" office:value="13410" calcext:value-type="float">
            <text:p>13410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55208333333333" calcext:value-type="float">
            <text:p>0,00155208333333333000</text:p>
          </table:table-cell>
          <table:table-cell table:formula="of:=[.D300]-[.D299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45" office:value-type="float" office:value="13455" calcext:value-type="float">
            <text:p>13455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55729166666667" calcext:value-type="float">
            <text:p>0,00155729166666667000</text:p>
          </table:table-cell>
          <table:table-cell table:formula="of:=[.D301]-[.D300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45" office:value-type="float" office:value="13500" calcext:value-type="float">
            <text:p>135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5625" calcext:value-type="float">
            <text:p>0,00156250000000000000</text:p>
          </table:table-cell>
          <table:table-cell table:formula="of:=[.D302]-[.D301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45" office:value-type="float" office:value="13545" calcext:value-type="float">
            <text:p>13545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56770833333333" calcext:value-type="float">
            <text:p>0,00156770833333333000</text:p>
          </table:table-cell>
          <table:table-cell table:formula="of:=[.D303]-[.D302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45" office:value-type="float" office:value="13590" calcext:value-type="float">
            <text:p>13590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57291666666667" calcext:value-type="float">
            <text:p>0,00157291666666667000</text:p>
          </table:table-cell>
          <table:table-cell table:formula="of:=[.D304]-[.D303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45" office:value-type="float" office:value="13635" calcext:value-type="float">
            <text:p>13635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578125" calcext:value-type="float">
            <text:p>0,00157812500000000000</text:p>
          </table:table-cell>
          <table:table-cell table:formula="of:=[.D305]-[.D304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45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58333333333333" calcext:value-type="float">
            <text:p>0,00158333333333333000</text:p>
          </table:table-cell>
          <table:table-cell table:formula="of:=[.D306]-[.D305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45" office:value-type="float" office:value="13725" calcext:value-type="float">
            <text:p>1372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58854166666667" calcext:value-type="float">
            <text:p>0,00158854166666667000</text:p>
          </table:table-cell>
          <table:table-cell table:formula="of:=[.D307]-[.D306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45" office:value-type="float" office:value="13770" calcext:value-type="float">
            <text:p>13770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59375" calcext:value-type="float">
            <text:p>0,00159375000000000000</text:p>
          </table:table-cell>
          <table:table-cell table:formula="of:=[.D308]-[.D307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45" office:value-type="float" office:value="13815" calcext:value-type="float">
            <text:p>13815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59895833333333" calcext:value-type="float">
            <text:p>0,00159895833333333000</text:p>
          </table:table-cell>
          <table:table-cell table:formula="of:=[.D309]-[.D308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45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60416666666667" calcext:value-type="float">
            <text:p>0,00160416666666667000</text:p>
          </table:table-cell>
          <table:table-cell table:formula="of:=[.D310]-[.D309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45" office:value-type="float" office:value="13905" calcext:value-type="float">
            <text:p>13905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609375" calcext:value-type="float">
            <text:p>0,00160937500000000000</text:p>
          </table:table-cell>
          <table:table-cell table:formula="of:=[.D311]-[.D310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45" office:value-type="float" office:value="13950" calcext:value-type="float">
            <text:p>1395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61458333333333" calcext:value-type="float">
            <text:p>0,00161458333333333000</text:p>
          </table:table-cell>
          <table:table-cell table:formula="of:=[.D312]-[.D311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45" office:value-type="float" office:value="13995" calcext:value-type="float">
            <text:p>13995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61979166666667" calcext:value-type="float">
            <text:p>0,00161979166666667000</text:p>
          </table:table-cell>
          <table:table-cell table:formula="of:=[.D313]-[.D312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45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625" calcext:value-type="float">
            <text:p>0,00162500000000000000</text:p>
          </table:table-cell>
          <table:table-cell table:formula="of:=[.D314]-[.D313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45" office:value-type="float" office:value="14085" calcext:value-type="float">
            <text:p>14085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63020833333333" calcext:value-type="float">
            <text:p>0,00163020833333333000</text:p>
          </table:table-cell>
          <table:table-cell table:formula="of:=[.D315]-[.D314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45" office:value-type="float" office:value="14130" calcext:value-type="float">
            <text:p>14130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63541666666667" calcext:value-type="float">
            <text:p>0,00163541666666667000</text:p>
          </table:table-cell>
          <table:table-cell table:formula="of:=[.D316]-[.D315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45" office:value-type="float" office:value="14175" calcext:value-type="float">
            <text:p>1417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640625" calcext:value-type="float">
            <text:p>0,00164062500000000000</text:p>
          </table:table-cell>
          <table:table-cell table:formula="of:=[.D317]-[.D316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45" office:value-type="float" office:value="14220" calcext:value-type="float">
            <text:p>14220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64583333333333" calcext:value-type="float">
            <text:p>0,00164583333333333000</text:p>
          </table:table-cell>
          <table:table-cell table:formula="of:=[.D318]-[.D317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45" office:value-type="float" office:value="14265" calcext:value-type="float">
            <text:p>14265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65104166666667" calcext:value-type="float">
            <text:p>0,00165104166666667000</text:p>
          </table:table-cell>
          <table:table-cell table:formula="of:=[.D319]-[.D318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45" office:value-type="float" office:value="14310" calcext:value-type="float">
            <text:p>14310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65625" calcext:value-type="float">
            <text:p>0,00165625000000000000</text:p>
          </table:table-cell>
          <table:table-cell table:formula="of:=[.D320]-[.D319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45" office:value-type="float" office:value="14355" calcext:value-type="float">
            <text:p>14355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66145833333333" calcext:value-type="float">
            <text:p>0,00166145833333333000</text:p>
          </table:table-cell>
          <table:table-cell table:formula="of:=[.D321]-[.D320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45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66666666666667" calcext:value-type="float">
            <text:p>0,00166666666666667000</text:p>
          </table:table-cell>
          <table:table-cell table:formula="of:=[.D322]-[.D321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45" office:value-type="float" office:value="14445" calcext:value-type="float">
            <text:p>14445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671875" calcext:value-type="float">
            <text:p>0,00167187500000000000</text:p>
          </table:table-cell>
          <table:table-cell table:formula="of:=[.D323]-[.D322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45" office:value-type="float" office:value="14490" calcext:value-type="float">
            <text:p>14490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67708333333333" calcext:value-type="float">
            <text:p>0,00167708333333333000</text:p>
          </table:table-cell>
          <table:table-cell table:formula="of:=[.D324]-[.D323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45" office:value-type="float" office:value="14535" calcext:value-type="float">
            <text:p>14535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68229166666667" calcext:value-type="float">
            <text:p>0,00168229166666667000</text:p>
          </table:table-cell>
          <table:table-cell table:formula="of:=[.D325]-[.D324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45" office:value-type="float" office:value="14580" calcext:value-type="float">
            <text:p>14580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6875" calcext:value-type="float">
            <text:p>0,00168750000000000000</text:p>
          </table:table-cell>
          <table:table-cell table:formula="of:=[.D326]-[.D325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45" office:value-type="float" office:value="14625" calcext:value-type="float">
            <text:p>1462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69270833333333" calcext:value-type="float">
            <text:p>0,00169270833333333000</text:p>
          </table:table-cell>
          <table:table-cell table:formula="of:=[.D327]-[.D326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45" office:value-type="float" office:value="14670" calcext:value-type="float">
            <text:p>14670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69791666666667" calcext:value-type="float">
            <text:p>0,00169791666666667000</text:p>
          </table:table-cell>
          <table:table-cell table:formula="of:=[.D328]-[.D327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45" office:value-type="float" office:value="14715" calcext:value-type="float">
            <text:p>14715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703125" calcext:value-type="float">
            <text:p>0,00170312500000000000</text:p>
          </table:table-cell>
          <table:table-cell table:formula="of:=[.D329]-[.D328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45" office:value-type="float" office:value="14760" calcext:value-type="float">
            <text:p>14760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70833333333333" calcext:value-type="float">
            <text:p>0,00170833333333333000</text:p>
          </table:table-cell>
          <table:table-cell table:formula="of:=[.D330]-[.D329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45" office:value-type="float" office:value="14805" calcext:value-type="float">
            <text:p>14805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71354166666667" calcext:value-type="float">
            <text:p>0,00171354166666667000</text:p>
          </table:table-cell>
          <table:table-cell table:formula="of:=[.D331]-[.D330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45" office:value-type="float" office:value="14850" calcext:value-type="float">
            <text:p>1485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71875" calcext:value-type="float">
            <text:p>0,00171875000000000000</text:p>
          </table:table-cell>
          <table:table-cell table:formula="of:=[.D332]-[.D331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45" office:value-type="float" office:value="14895" calcext:value-type="float">
            <text:p>14895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72395833333333" calcext:value-type="float">
            <text:p>0,00172395833333333000</text:p>
          </table:table-cell>
          <table:table-cell table:formula="of:=[.D333]-[.D332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45" office:value-type="float" office:value="14940" calcext:value-type="float">
            <text:p>14940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72916666666667" calcext:value-type="float">
            <text:p>0,00172916666666667000</text:p>
          </table:table-cell>
          <table:table-cell table:formula="of:=[.D334]-[.D333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45" office:value-type="float" office:value="14985" calcext:value-type="float">
            <text:p>14985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734375" calcext:value-type="float">
            <text:p>0,00173437500000000000</text:p>
          </table:table-cell>
          <table:table-cell table:formula="of:=[.D335]-[.D334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45" office:value-type="float" office:value="15030" calcext:value-type="float">
            <text:p>15030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73958333333333" calcext:value-type="float">
            <text:p>0,00173958333333333000</text:p>
          </table:table-cell>
          <table:table-cell table:formula="of:=[.D336]-[.D335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45" office:value-type="float" office:value="15075" calcext:value-type="float">
            <text:p>1507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74479166666667" calcext:value-type="float">
            <text:p>0,00174479166666667000</text:p>
          </table:table-cell>
          <table:table-cell table:formula="of:=[.D337]-[.D336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45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75" calcext:value-type="float">
            <text:p>0,00175000000000000000</text:p>
          </table:table-cell>
          <table:table-cell table:formula="of:=[.D338]-[.D337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45" office:value-type="float" office:value="15165" calcext:value-type="float">
            <text:p>15165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75520833333333" calcext:value-type="float">
            <text:p>0,00175520833333333000</text:p>
          </table:table-cell>
          <table:table-cell table:formula="of:=[.D339]-[.D338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45" office:value-type="float" office:value="15210" calcext:value-type="float">
            <text:p>15210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76041666666667" calcext:value-type="float">
            <text:p>0,00176041666666667000</text:p>
          </table:table-cell>
          <table:table-cell table:formula="of:=[.D340]-[.D339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45" office:value-type="float" office:value="15255" calcext:value-type="float">
            <text:p>15255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765625" calcext:value-type="float">
            <text:p>0,00176562500000000000</text:p>
          </table:table-cell>
          <table:table-cell table:formula="of:=[.D341]-[.D340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45" office:value-type="float" office:value="15300" calcext:value-type="float">
            <text:p>1530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77083333333333" calcext:value-type="float">
            <text:p>0,00177083333333333000</text:p>
          </table:table-cell>
          <table:table-cell table:formula="of:=[.D342]-[.D341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45" office:value-type="float" office:value="15345" calcext:value-type="float">
            <text:p>15345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77604166666667" calcext:value-type="float">
            <text:p>0,00177604166666667000</text:p>
          </table:table-cell>
          <table:table-cell table:formula="of:=[.D343]-[.D342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45" office:value-type="float" office:value="15390" calcext:value-type="float">
            <text:p>15390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78125" calcext:value-type="float">
            <text:p>0,00178125000000000000</text:p>
          </table:table-cell>
          <table:table-cell table:formula="of:=[.D344]-[.D343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45" office:value-type="float" office:value="15435" calcext:value-type="float">
            <text:p>15435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78645833333333" calcext:value-type="float">
            <text:p>0,00178645833333333000</text:p>
          </table:table-cell>
          <table:table-cell table:formula="of:=[.D345]-[.D344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45" office:value-type="float" office:value="15480" calcext:value-type="float">
            <text:p>15480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79166666666667" calcext:value-type="float">
            <text:p>0,00179166666666667000</text:p>
          </table:table-cell>
          <table:table-cell table:formula="of:=[.D346]-[.D345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45" office:value-type="float" office:value="15525" calcext:value-type="float">
            <text:p>1552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796875" calcext:value-type="float">
            <text:p>0,00179687500000000000</text:p>
          </table:table-cell>
          <table:table-cell table:formula="of:=[.D347]-[.D346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45" office:value-type="float" office:value="15570" calcext:value-type="float">
            <text:p>15570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80208333333333" calcext:value-type="float">
            <text:p>0,00180208333333333000</text:p>
          </table:table-cell>
          <table:table-cell table:formula="of:=[.D348]-[.D347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45" office:value-type="float" office:value="15615" calcext:value-type="float">
            <text:p>15615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80729166666667" calcext:value-type="float">
            <text:p>0,00180729166666667000</text:p>
          </table:table-cell>
          <table:table-cell table:formula="of:=[.D349]-[.D348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45" office:value-type="float" office:value="15660" calcext:value-type="float">
            <text:p>15660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8125" calcext:value-type="float">
            <text:p>0,00181250000000000000</text:p>
          </table:table-cell>
          <table:table-cell table:formula="of:=[.D350]-[.D349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45" office:value-type="float" office:value="15705" calcext:value-type="float">
            <text:p>15705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81770833333333" calcext:value-type="float">
            <text:p>0,00181770833333333000</text:p>
          </table:table-cell>
          <table:table-cell table:formula="of:=[.D351]-[.D350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45" office:value-type="float" office:value="15750" calcext:value-type="float">
            <text:p>157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82291666666667" calcext:value-type="float">
            <text:p>0,00182291666666667000</text:p>
          </table:table-cell>
          <table:table-cell table:formula="of:=[.D352]-[.D351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45" office:value-type="float" office:value="15795" calcext:value-type="float">
            <text:p>15795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828125" calcext:value-type="float">
            <text:p>0,00182812500000000000</text:p>
          </table:table-cell>
          <table:table-cell table:formula="of:=[.D353]-[.D352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45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83333333333333" calcext:value-type="float">
            <text:p>0,00183333333333333000</text:p>
          </table:table-cell>
          <table:table-cell table:formula="of:=[.D354]-[.D353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45" office:value-type="float" office:value="15885" calcext:value-type="float">
            <text:p>15885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83854166666667" calcext:value-type="float">
            <text:p>0,00183854166666667000</text:p>
          </table:table-cell>
          <table:table-cell table:formula="of:=[.D355]-[.D354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45" office:value-type="float" office:value="15930" calcext:value-type="float">
            <text:p>15930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84375" calcext:value-type="float">
            <text:p>0,00184375000000000000</text:p>
          </table:table-cell>
          <table:table-cell table:formula="of:=[.D356]-[.D355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45" office:value-type="float" office:value="15975" calcext:value-type="float">
            <text:p>1597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84895833333333" calcext:value-type="float">
            <text:p>0,00184895833333333000</text:p>
          </table:table-cell>
          <table:table-cell table:formula="of:=[.D357]-[.D356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45" office:value-type="float" office:value="16020" calcext:value-type="float">
            <text:p>16020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85416666666667" calcext:value-type="float">
            <text:p>0,00185416666666667000</text:p>
          </table:table-cell>
          <table:table-cell table:formula="of:=[.D358]-[.D357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45" office:value-type="float" office:value="16065" calcext:value-type="float">
            <text:p>16065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859375" calcext:value-type="float">
            <text:p>0,00185937500000000000</text:p>
          </table:table-cell>
          <table:table-cell table:formula="of:=[.D359]-[.D358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45" office:value-type="float" office:value="16110" calcext:value-type="float">
            <text:p>16110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86458333333333" calcext:value-type="float">
            <text:p>0,00186458333333333000</text:p>
          </table:table-cell>
          <table:table-cell table:formula="of:=[.D360]-[.D359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45" office:value-type="float" office:value="16155" calcext:value-type="float">
            <text:p>16155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86979166666667" calcext:value-type="float">
            <text:p>0,00186979166666667000</text:p>
          </table:table-cell>
          <table:table-cell table:formula="of:=[.D361]-[.D360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45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875" calcext:value-type="float">
            <text:p>0,00187500000000000000</text:p>
          </table:table-cell>
          <table:table-cell table:formula="of:=[.D362]-[.D361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45" office:value-type="float" office:value="16245" calcext:value-type="float">
            <text:p>16245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88020833333333" calcext:value-type="float">
            <text:p>0,00188020833333333000</text:p>
          </table:table-cell>
          <table:table-cell table:formula="of:=[.D363]-[.D362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45" office:value-type="float" office:value="16290" calcext:value-type="float">
            <text:p>16290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88541666666667" calcext:value-type="float">
            <text:p>0,00188541666666667000</text:p>
          </table:table-cell>
          <table:table-cell table:formula="of:=[.D364]-[.D363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45" office:value-type="float" office:value="16335" calcext:value-type="float">
            <text:p>16335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890625" calcext:value-type="float">
            <text:p>0,00189062500000000000</text:p>
          </table:table-cell>
          <table:table-cell table:formula="of:=[.D365]-[.D364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45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89583333333333" calcext:value-type="float">
            <text:p>0,00189583333333333000</text:p>
          </table:table-cell>
          <table:table-cell table:formula="of:=[.D366]-[.D365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45" office:value-type="float" office:value="16425" calcext:value-type="float">
            <text:p>1642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90104166666667" calcext:value-type="float">
            <text:p>0,00190104166666667000</text:p>
          </table:table-cell>
          <table:table-cell table:formula="of:=[.D367]-[.D366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45" office:value-type="float" office:value="16470" calcext:value-type="float">
            <text:p>16470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90625" calcext:value-type="float">
            <text:p>0,00190625000000000000</text:p>
          </table:table-cell>
          <table:table-cell table:formula="of:=[.D368]-[.D367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45" office:value-type="float" office:value="16515" calcext:value-type="float">
            <text:p>16515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91145833333333" calcext:value-type="float">
            <text:p>0,00191145833333333000</text:p>
          </table:table-cell>
          <table:table-cell table:formula="of:=[.D369]-[.D368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45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91666666666667" calcext:value-type="float">
            <text:p>0,00191666666666667000</text:p>
          </table:table-cell>
          <table:table-cell table:formula="of:=[.D370]-[.D369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45" office:value-type="float" office:value="16605" calcext:value-type="float">
            <text:p>16605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921875" calcext:value-type="float">
            <text:p>0,00192187500000000000</text:p>
          </table:table-cell>
          <table:table-cell table:formula="of:=[.D371]-[.D370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45" office:value-type="float" office:value="16650" calcext:value-type="float">
            <text:p>1665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92708333333333" calcext:value-type="float">
            <text:p>0,00192708333333333000</text:p>
          </table:table-cell>
          <table:table-cell table:formula="of:=[.D372]-[.D371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45" office:value-type="float" office:value="16695" calcext:value-type="float">
            <text:p>16695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93229166666667" calcext:value-type="float">
            <text:p>0,00193229166666667000</text:p>
          </table:table-cell>
          <table:table-cell table:formula="of:=[.D373]-[.D372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45" office:value-type="float" office:value="16740" calcext:value-type="float">
            <text:p>16740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9375" calcext:value-type="float">
            <text:p>0,00193750000000000000</text:p>
          </table:table-cell>
          <table:table-cell table:formula="of:=[.D374]-[.D373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45" office:value-type="float" office:value="16785" calcext:value-type="float">
            <text:p>16785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94270833333333" calcext:value-type="float">
            <text:p>0,00194270833333333000</text:p>
          </table:table-cell>
          <table:table-cell table:formula="of:=[.D375]-[.D374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45" office:value-type="float" office:value="16830" calcext:value-type="float">
            <text:p>16830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94791666666667" calcext:value-type="float">
            <text:p>0,00194791666666667000</text:p>
          </table:table-cell>
          <table:table-cell table:formula="of:=[.D376]-[.D375]" office:value-type="float" office:value="0.00000520833333333341" calcext:value-type="float">
            <text:p>0,0000052083333333334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45" office:value-type="float" office:value="16875" calcext:value-type="float">
            <text:p>1687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953125" calcext:value-type="float">
            <text:p>0,00195312500000000000</text:p>
          </table:table-cell>
          <table:table-cell table:formula="of:=[.D377]-[.D376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45" office:value-type="float" office:value="16920" calcext:value-type="float">
            <text:p>16920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95833333333333" calcext:value-type="float">
            <text:p>0,00195833333333333000</text:p>
          </table:table-cell>
          <table:table-cell table:formula="of:=[.D378]-[.D377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45" office:value-type="float" office:value="16965" calcext:value-type="float">
            <text:p>16965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96354166666667" calcext:value-type="float">
            <text:p>0,00196354166666667000</text:p>
          </table:table-cell>
          <table:table-cell table:formula="of:=[.D379]-[.D378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45" office:value-type="float" office:value="17010" calcext:value-type="float">
            <text:p>17010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96875" calcext:value-type="float">
            <text:p>0,00196875000000000000</text:p>
          </table:table-cell>
          <table:table-cell table:formula="of:=[.D380]-[.D379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45" office:value-type="float" office:value="17055" calcext:value-type="float">
            <text:p>17055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97395833333333" calcext:value-type="float">
            <text:p>0,00197395833333333000</text:p>
          </table:table-cell>
          <table:table-cell table:formula="of:=[.D381]-[.D380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45" office:value-type="float" office:value="17100" calcext:value-type="float">
            <text:p>1710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97916666666667" calcext:value-type="float">
            <text:p>0,00197916666666667000</text:p>
          </table:table-cell>
          <table:table-cell table:formula="of:=[.D382]-[.D381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45" office:value-type="float" office:value="17145" calcext:value-type="float">
            <text:p>17145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984375" calcext:value-type="float">
            <text:p>0,00198437500000000000</text:p>
          </table:table-cell>
          <table:table-cell table:formula="of:=[.D383]-[.D382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45" office:value-type="float" office:value="17190" calcext:value-type="float">
            <text:p>17190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98958333333333" calcext:value-type="float">
            <text:p>0,00198958333333333000</text:p>
          </table:table-cell>
          <table:table-cell table:formula="of:=[.D384]-[.D383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45" office:value-type="float" office:value="17235" calcext:value-type="float">
            <text:p>17235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99479166666667" calcext:value-type="float">
            <text:p>0,00199479166666667000</text:p>
          </table:table-cell>
          <table:table-cell table:formula="of:=[.D385]-[.D384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45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2" calcext:value-type="float">
            <text:p>0,00200000000000000000</text:p>
          </table:table-cell>
          <table:table-cell table:formula="of:=[.D386]-[.D385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45" office:value-type="float" office:value="17325" calcext:value-type="float">
            <text:p>1732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200520833333333" calcext:value-type="float">
            <text:p>0,00200520833333333000</text:p>
          </table:table-cell>
          <table:table-cell table:formula="of:=[.D387]-[.D386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45" office:value-type="float" office:value="17370" calcext:value-type="float">
            <text:p>17370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201041666666667" calcext:value-type="float">
            <text:p>0,00201041666666667000</text:p>
          </table:table-cell>
          <table:table-cell table:formula="of:=[.D388]-[.D387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45" office:value-type="float" office:value="17415" calcext:value-type="float">
            <text:p>17415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2015625" calcext:value-type="float">
            <text:p>0,00201562500000000000</text:p>
          </table:table-cell>
          <table:table-cell table:formula="of:=[.D389]-[.D388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45" office:value-type="float" office:value="17460" calcext:value-type="float">
            <text:p>17460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202083333333333" calcext:value-type="float">
            <text:p>0,00202083333333333000</text:p>
          </table:table-cell>
          <table:table-cell table:formula="of:=[.D390]-[.D389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45" office:value-type="float" office:value="17505" calcext:value-type="float">
            <text:p>17505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202604166666667" calcext:value-type="float">
            <text:p>0,00202604166666667000</text:p>
          </table:table-cell>
          <table:table-cell table:formula="of:=[.D391]-[.D390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45" office:value-type="float" office:value="17550" calcext:value-type="float">
            <text:p>1755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203125" calcext:value-type="float">
            <text:p>0,00203125000000000000</text:p>
          </table:table-cell>
          <table:table-cell table:formula="of:=[.D392]-[.D391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45" office:value-type="float" office:value="17595" calcext:value-type="float">
            <text:p>17595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203645833333333" calcext:value-type="float">
            <text:p>0,00203645833333333000</text:p>
          </table:table-cell>
          <table:table-cell table:formula="of:=[.D393]-[.D392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45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204166666666667" calcext:value-type="float">
            <text:p>0,00204166666666667000</text:p>
          </table:table-cell>
          <table:table-cell table:formula="of:=[.D394]-[.D393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45" office:value-type="float" office:value="17685" calcext:value-type="float">
            <text:p>17685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2046875" calcext:value-type="float">
            <text:p>0,00204687500000000000</text:p>
          </table:table-cell>
          <table:table-cell table:formula="of:=[.D395]-[.D394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45" office:value-type="float" office:value="17730" calcext:value-type="float">
            <text:p>17730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205208333333333" calcext:value-type="float">
            <text:p>0,00205208333333333000</text:p>
          </table:table-cell>
          <table:table-cell table:formula="of:=[.D396]-[.D395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45" office:value-type="float" office:value="17775" calcext:value-type="float">
            <text:p>1777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205729166666667" calcext:value-type="float">
            <text:p>0,00205729166666667000</text:p>
          </table:table-cell>
          <table:table-cell table:formula="of:=[.D397]-[.D396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45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20625" calcext:value-type="float">
            <text:p>0,00206250000000000000</text:p>
          </table:table-cell>
          <table:table-cell table:formula="of:=[.D398]-[.D397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45" office:value-type="float" office:value="17865" calcext:value-type="float">
            <text:p>17865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206770833333333" calcext:value-type="float">
            <text:p>0,00206770833333333000</text:p>
          </table:table-cell>
          <table:table-cell table:formula="of:=[.D399]-[.D398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45" office:value-type="float" office:value="17910" calcext:value-type="float">
            <text:p>17910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207291666666667" calcext:value-type="float">
            <text:p>0,00207291666666667000</text:p>
          </table:table-cell>
          <table:table-cell table:formula="of:=[.D400]-[.D399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45" office:value-type="float" office:value="17955" calcext:value-type="float">
            <text:p>17955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2078125" calcext:value-type="float">
            <text:p>0,00207812500000000000</text:p>
          </table:table-cell>
          <table:table-cell table:formula="of:=[.D401]-[.D400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45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208333333333333" calcext:value-type="float">
            <text:p>0,00208333333333333000</text:p>
          </table:table-cell>
          <table:table-cell table:formula="of:=[.D402]-[.D401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45" office:value-type="float" office:value="18045" calcext:value-type="float">
            <text:p>18045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208854166666667" calcext:value-type="float">
            <text:p>0,00208854166666667000</text:p>
          </table:table-cell>
          <table:table-cell table:formula="of:=[.D403]-[.D402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45" office:value-type="float" office:value="18090" calcext:value-type="float">
            <text:p>18090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209375" calcext:value-type="float">
            <text:p>0,00209375000000000000</text:p>
          </table:table-cell>
          <table:table-cell table:formula="of:=[.D404]-[.D403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45" office:value-type="float" office:value="18135" calcext:value-type="float">
            <text:p>18135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209895833333333" calcext:value-type="float">
            <text:p>0,00209895833333333000</text:p>
          </table:table-cell>
          <table:table-cell table:formula="of:=[.D405]-[.D404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45" office:value-type="float" office:value="18180" calcext:value-type="float">
            <text:p>18180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210416666666667" calcext:value-type="float">
            <text:p>0,00210416666666667000</text:p>
          </table:table-cell>
          <table:table-cell table:formula="of:=[.D406]-[.D405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45" office:value-type="float" office:value="18225" calcext:value-type="float">
            <text:p>1822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2109375" calcext:value-type="float">
            <text:p>0,00210937500000000000</text:p>
          </table:table-cell>
          <table:table-cell table:formula="of:=[.D407]-[.D406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45" office:value-type="float" office:value="18270" calcext:value-type="float">
            <text:p>18270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211458333333333" calcext:value-type="float">
            <text:p>0,00211458333333333000</text:p>
          </table:table-cell>
          <table:table-cell table:formula="of:=[.D408]-[.D407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45" office:value-type="float" office:value="18315" calcext:value-type="float">
            <text:p>18315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211979166666667" calcext:value-type="float">
            <text:p>0,00211979166666667000</text:p>
          </table:table-cell>
          <table:table-cell table:formula="of:=[.D409]-[.D408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45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2125" calcext:value-type="float">
            <text:p>0,00212500000000000000</text:p>
          </table:table-cell>
          <table:table-cell table:formula="of:=[.D410]-[.D409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45" office:value-type="float" office:value="18405" calcext:value-type="float">
            <text:p>18405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213020833333333" calcext:value-type="float">
            <text:p>0,00213020833333333000</text:p>
          </table:table-cell>
          <table:table-cell table:formula="of:=[.D411]-[.D410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45" office:value-type="float" office:value="18450" calcext:value-type="float">
            <text:p>1845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213541666666667" calcext:value-type="float">
            <text:p>0,00213541666666667000</text:p>
          </table:table-cell>
          <table:table-cell table:formula="of:=[.D412]-[.D411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45" office:value-type="float" office:value="18495" calcext:value-type="float">
            <text:p>18495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2140625" calcext:value-type="float">
            <text:p>0,00214062500000000000</text:p>
          </table:table-cell>
          <table:table-cell table:formula="of:=[.D413]-[.D412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45" office:value-type="float" office:value="18540" calcext:value-type="float">
            <text:p>18540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214583333333333" calcext:value-type="float">
            <text:p>0,00214583333333333000</text:p>
          </table:table-cell>
          <table:table-cell table:formula="of:=[.D414]-[.D413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45" office:value-type="float" office:value="18585" calcext:value-type="float">
            <text:p>18585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215104166666667" calcext:value-type="float">
            <text:p>0,00215104166666667000</text:p>
          </table:table-cell>
          <table:table-cell table:formula="of:=[.D415]-[.D414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45" office:value-type="float" office:value="18630" calcext:value-type="float">
            <text:p>18630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215625" calcext:value-type="float">
            <text:p>0,00215625000000000000</text:p>
          </table:table-cell>
          <table:table-cell table:formula="of:=[.D416]-[.D415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45" office:value-type="float" office:value="18675" calcext:value-type="float">
            <text:p>1867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216145833333333" calcext:value-type="float">
            <text:p>0,00216145833333333000</text:p>
          </table:table-cell>
          <table:table-cell table:formula="of:=[.D417]-[.D416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45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216666666666667" calcext:value-type="float">
            <text:p>0,00216666666666667000</text:p>
          </table:table-cell>
          <table:table-cell table:formula="of:=[.D418]-[.D417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45" office:value-type="float" office:value="18765" calcext:value-type="float">
            <text:p>18765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2171875" calcext:value-type="float">
            <text:p>0,00217187500000000000</text:p>
          </table:table-cell>
          <table:table-cell table:formula="of:=[.D419]-[.D418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45" office:value-type="float" office:value="18810" calcext:value-type="float">
            <text:p>18810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217708333333333" calcext:value-type="float">
            <text:p>0,00217708333333333000</text:p>
          </table:table-cell>
          <table:table-cell table:formula="of:=[.D420]-[.D419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45" office:value-type="float" office:value="18855" calcext:value-type="float">
            <text:p>18855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218229166666667" calcext:value-type="float">
            <text:p>0,00218229166666667000</text:p>
          </table:table-cell>
          <table:table-cell table:formula="of:=[.D421]-[.D420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45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21875" calcext:value-type="float">
            <text:p>0,00218750000000000000</text:p>
          </table:table-cell>
          <table:table-cell table:formula="of:=[.D422]-[.D421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45" office:value-type="float" office:value="18945" calcext:value-type="float">
            <text:p>18945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219270833333333" calcext:value-type="float">
            <text:p>0,00219270833333333000</text:p>
          </table:table-cell>
          <table:table-cell table:formula="of:=[.D423]-[.D422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45" office:value-type="float" office:value="18990" calcext:value-type="float">
            <text:p>18990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219791666666667" calcext:value-type="float">
            <text:p>0,00219791666666667000</text:p>
          </table:table-cell>
          <table:table-cell table:formula="of:=[.D424]-[.D423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45" office:value-type="float" office:value="19035" calcext:value-type="float">
            <text:p>19035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2203125" calcext:value-type="float">
            <text:p>0,00220312500000000000</text:p>
          </table:table-cell>
          <table:table-cell table:formula="of:=[.D425]-[.D424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45" office:value-type="float" office:value="19080" calcext:value-type="float">
            <text:p>19080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220833333333333" calcext:value-type="float">
            <text:p>0,00220833333333333000</text:p>
          </table:table-cell>
          <table:table-cell table:formula="of:=[.D426]-[.D425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45" office:value-type="float" office:value="19125" calcext:value-type="float">
            <text:p>1912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221354166666667" calcext:value-type="float">
            <text:p>0,00221354166666667000</text:p>
          </table:table-cell>
          <table:table-cell table:formula="of:=[.D427]-[.D426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45" office:value-type="float" office:value="19170" calcext:value-type="float">
            <text:p>19170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221875" calcext:value-type="float">
            <text:p>0,00221875000000000000</text:p>
          </table:table-cell>
          <table:table-cell table:formula="of:=[.D428]-[.D427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45" office:value-type="float" office:value="19215" calcext:value-type="float">
            <text:p>19215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222395833333333" calcext:value-type="float">
            <text:p>0,00222395833333333000</text:p>
          </table:table-cell>
          <table:table-cell table:formula="of:=[.D429]-[.D428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45" office:value-type="float" office:value="19260" calcext:value-type="float">
            <text:p>19260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222916666666667" calcext:value-type="float">
            <text:p>0,00222916666666667000</text:p>
          </table:table-cell>
          <table:table-cell table:formula="of:=[.D430]-[.D429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45" office:value-type="float" office:value="19305" calcext:value-type="float">
            <text:p>19305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2234375" calcext:value-type="float">
            <text:p>0,00223437500000000000</text:p>
          </table:table-cell>
          <table:table-cell table:formula="of:=[.D431]-[.D430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45" office:value-type="float" office:value="19350" calcext:value-type="float">
            <text:p>1935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223958333333333" calcext:value-type="float">
            <text:p>0,00223958333333333000</text:p>
          </table:table-cell>
          <table:table-cell table:formula="of:=[.D432]-[.D431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45" office:value-type="float" office:value="19395" calcext:value-type="float">
            <text:p>19395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224479166666667" calcext:value-type="float">
            <text:p>0,00224479166666667000</text:p>
          </table:table-cell>
          <table:table-cell table:formula="of:=[.D433]-[.D432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45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225" calcext:value-type="float">
            <text:p>0,00225000000000000000</text:p>
          </table:table-cell>
          <table:table-cell table:formula="of:=[.D434]-[.D433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45" office:value-type="float" office:value="19485" calcext:value-type="float">
            <text:p>19485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225520833333333" calcext:value-type="float">
            <text:p>0,00225520833333333000</text:p>
          </table:table-cell>
          <table:table-cell table:formula="of:=[.D435]-[.D434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45" office:value-type="float" office:value="19530" calcext:value-type="float">
            <text:p>19530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226041666666667" calcext:value-type="float">
            <text:p>0,00226041666666667000</text:p>
          </table:table-cell>
          <table:table-cell table:formula="of:=[.D436]-[.D435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45" office:value-type="float" office:value="19575" calcext:value-type="float">
            <text:p>1957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2265625" calcext:value-type="float">
            <text:p>0,00226562500000000000</text:p>
          </table:table-cell>
          <table:table-cell table:formula="of:=[.D437]-[.D436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45" office:value-type="float" office:value="19620" calcext:value-type="float">
            <text:p>19620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227083333333333" calcext:value-type="float">
            <text:p>0,00227083333333333000</text:p>
          </table:table-cell>
          <table:table-cell table:formula="of:=[.D438]-[.D437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45" office:value-type="float" office:value="19665" calcext:value-type="float">
            <text:p>19665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227604166666667" calcext:value-type="float">
            <text:p>0,00227604166666667000</text:p>
          </table:table-cell>
          <table:table-cell table:formula="of:=[.D439]-[.D438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45" office:value-type="float" office:value="19710" calcext:value-type="float">
            <text:p>19710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228125" calcext:value-type="float">
            <text:p>0,00228125000000000000</text:p>
          </table:table-cell>
          <table:table-cell table:formula="of:=[.D440]-[.D439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45" office:value-type="float" office:value="19755" calcext:value-type="float">
            <text:p>19755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228645833333333" calcext:value-type="float">
            <text:p>0,00228645833333333000</text:p>
          </table:table-cell>
          <table:table-cell table:formula="of:=[.D441]-[.D440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45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229166666666667" calcext:value-type="float">
            <text:p>0,00229166666666667000</text:p>
          </table:table-cell>
          <table:table-cell table:formula="of:=[.D442]-[.D441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45" office:value-type="float" office:value="19845" calcext:value-type="float">
            <text:p>19845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2296875" calcext:value-type="float">
            <text:p>0,00229687500000000000</text:p>
          </table:table-cell>
          <table:table-cell table:formula="of:=[.D443]-[.D442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45" office:value-type="float" office:value="19890" calcext:value-type="float">
            <text:p>19890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230208333333333" calcext:value-type="float">
            <text:p>0,00230208333333333000</text:p>
          </table:table-cell>
          <table:table-cell table:formula="of:=[.D444]-[.D443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45" office:value-type="float" office:value="19935" calcext:value-type="float">
            <text:p>19935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230729166666667" calcext:value-type="float">
            <text:p>0,00230729166666667000</text:p>
          </table:table-cell>
          <table:table-cell table:formula="of:=[.D445]-[.D444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45" office:value-type="float" office:value="19980" calcext:value-type="float">
            <text:p>19980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23125" calcext:value-type="float">
            <text:p>0,00231250000000000000</text:p>
          </table:table-cell>
          <table:table-cell table:formula="of:=[.D446]-[.D445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45" office:value-type="float" office:value="20025" calcext:value-type="float">
            <text:p>2002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231770833333333" calcext:value-type="float">
            <text:p>0,00231770833333333000</text:p>
          </table:table-cell>
          <table:table-cell table:formula="of:=[.D447]-[.D446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45" office:value-type="float" office:value="20070" calcext:value-type="float">
            <text:p>20070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232291666666667" calcext:value-type="float">
            <text:p>0,00232291666666667000</text:p>
          </table:table-cell>
          <table:table-cell table:formula="of:=[.D448]-[.D447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45" office:value-type="float" office:value="20115" calcext:value-type="float">
            <text:p>20115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2328125" calcext:value-type="float">
            <text:p>0,00232812500000000000</text:p>
          </table:table-cell>
          <table:table-cell table:formula="of:=[.D449]-[.D448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45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233333333333333" calcext:value-type="float">
            <text:p>0,00233333333333333000</text:p>
          </table:table-cell>
          <table:table-cell table:formula="of:=[.D450]-[.D449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45" office:value-type="float" office:value="20205" calcext:value-type="float">
            <text:p>20205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233854166666667" calcext:value-type="float">
            <text:p>0,00233854166666667000</text:p>
          </table:table-cell>
          <table:table-cell table:formula="of:=[.D451]-[.D450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45" office:value-type="float" office:value="20250" calcext:value-type="float">
            <text:p>202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234375" calcext:value-type="float">
            <text:p>0,00234375000000000000</text:p>
          </table:table-cell>
          <table:table-cell table:formula="of:=[.D452]-[.D451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45" office:value-type="float" office:value="20295" calcext:value-type="float">
            <text:p>20295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234895833333333" calcext:value-type="float">
            <text:p>0,00234895833333333000</text:p>
          </table:table-cell>
          <table:table-cell table:formula="of:=[.D453]-[.D452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45" office:value-type="float" office:value="20340" calcext:value-type="float">
            <text:p>20340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235416666666667" calcext:value-type="float">
            <text:p>0,00235416666666667000</text:p>
          </table:table-cell>
          <table:table-cell table:formula="of:=[.D454]-[.D453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45" office:value-type="float" office:value="20385" calcext:value-type="float">
            <text:p>20385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2359375" calcext:value-type="float">
            <text:p>0,00235937500000000000</text:p>
          </table:table-cell>
          <table:table-cell table:formula="of:=[.D455]-[.D454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45" office:value-type="float" office:value="20430" calcext:value-type="float">
            <text:p>20430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236458333333333" calcext:value-type="float">
            <text:p>0,00236458333333333000</text:p>
          </table:table-cell>
          <table:table-cell table:formula="of:=[.D456]-[.D455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45" office:value-type="float" office:value="20475" calcext:value-type="float">
            <text:p>2047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236979166666667" calcext:value-type="float">
            <text:p>0,00236979166666667000</text:p>
          </table:table-cell>
          <table:table-cell table:formula="of:=[.D457]-[.D456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45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2375" calcext:value-type="float">
            <text:p>0,00237500000000000000</text:p>
          </table:table-cell>
          <table:table-cell table:formula="of:=[.D458]-[.D457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45" office:value-type="float" office:value="20565" calcext:value-type="float">
            <text:p>20565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238020833333333" calcext:value-type="float">
            <text:p>0,00238020833333333000</text:p>
          </table:table-cell>
          <table:table-cell table:formula="of:=[.D459]-[.D458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45" office:value-type="float" office:value="20610" calcext:value-type="float">
            <text:p>20610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238541666666667" calcext:value-type="float">
            <text:p>0,00238541666666667000</text:p>
          </table:table-cell>
          <table:table-cell table:formula="of:=[.D460]-[.D459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45" office:value-type="float" office:value="20655" calcext:value-type="float">
            <text:p>20655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2390625" calcext:value-type="float">
            <text:p>0,00239062500000000000</text:p>
          </table:table-cell>
          <table:table-cell table:formula="of:=[.D461]-[.D460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45" office:value-type="float" office:value="20700" calcext:value-type="float">
            <text:p>2070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239583333333333" calcext:value-type="float">
            <text:p>0,00239583333333333000</text:p>
          </table:table-cell>
          <table:table-cell table:formula="of:=[.D462]-[.D461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45" office:value-type="float" office:value="20745" calcext:value-type="float">
            <text:p>20745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240104166666667" calcext:value-type="float">
            <text:p>0,00240104166666667000</text:p>
          </table:table-cell>
          <table:table-cell table:formula="of:=[.D463]-[.D462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45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240625" calcext:value-type="float">
            <text:p>0,00240625000000000000</text:p>
          </table:table-cell>
          <table:table-cell table:formula="of:=[.D464]-[.D463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45" office:value-type="float" office:value="20835" calcext:value-type="float">
            <text:p>20835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241145833333333" calcext:value-type="float">
            <text:p>0,00241145833333333000</text:p>
          </table:table-cell>
          <table:table-cell table:formula="of:=[.D465]-[.D464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45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241666666666667" calcext:value-type="float">
            <text:p>0,00241666666666667000</text:p>
          </table:table-cell>
          <table:table-cell table:formula="of:=[.D466]-[.D465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45" office:value-type="float" office:value="20925" calcext:value-type="float">
            <text:p>2092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2421875" calcext:value-type="float">
            <text:p>0,00242187500000000000</text:p>
          </table:table-cell>
          <table:table-cell table:formula="of:=[.D467]-[.D466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45" office:value-type="float" office:value="20970" calcext:value-type="float">
            <text:p>20970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242708333333333" calcext:value-type="float">
            <text:p>0,00242708333333333000</text:p>
          </table:table-cell>
          <table:table-cell table:formula="of:=[.D468]-[.D467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45" office:value-type="float" office:value="21015" calcext:value-type="float">
            <text:p>21015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243229166666667" calcext:value-type="float">
            <text:p>0,00243229166666667000</text:p>
          </table:table-cell>
          <table:table-cell table:formula="of:=[.D469]-[.D468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45" office:value-type="float" office:value="21060" calcext:value-type="float">
            <text:p>21060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24375" calcext:value-type="float">
            <text:p>0,00243750000000000000</text:p>
          </table:table-cell>
          <table:table-cell table:formula="of:=[.D470]-[.D469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45" office:value-type="float" office:value="21105" calcext:value-type="float">
            <text:p>21105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244270833333333" calcext:value-type="float">
            <text:p>0,00244270833333333000</text:p>
          </table:table-cell>
          <table:table-cell table:formula="of:=[.D471]-[.D470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45" office:value-type="float" office:value="21150" calcext:value-type="float">
            <text:p>2115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244791666666667" calcext:value-type="float">
            <text:p>0,00244791666666667000</text:p>
          </table:table-cell>
          <table:table-cell table:formula="of:=[.D472]-[.D471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45" office:value-type="float" office:value="21195" calcext:value-type="float">
            <text:p>21195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2453125" calcext:value-type="float">
            <text:p>0,00245312500000000000</text:p>
          </table:table-cell>
          <table:table-cell table:formula="of:=[.D473]-[.D472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45" office:value-type="float" office:value="21240" calcext:value-type="float">
            <text:p>21240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245833333333333" calcext:value-type="float">
            <text:p>0,00245833333333333000</text:p>
          </table:table-cell>
          <table:table-cell table:formula="of:=[.D474]-[.D473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45" office:value-type="float" office:value="21285" calcext:value-type="float">
            <text:p>21285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246354166666667" calcext:value-type="float">
            <text:p>0,00246354166666667000</text:p>
          </table:table-cell>
          <table:table-cell table:formula="of:=[.D475]-[.D474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45" office:value-type="float" office:value="21330" calcext:value-type="float">
            <text:p>21330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246875" calcext:value-type="float">
            <text:p>0,00246875000000000000</text:p>
          </table:table-cell>
          <table:table-cell table:formula="of:=[.D476]-[.D475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45" office:value-type="float" office:value="21375" calcext:value-type="float">
            <text:p>2137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247395833333333" calcext:value-type="float">
            <text:p>0,00247395833333333000</text:p>
          </table:table-cell>
          <table:table-cell table:formula="of:=[.D477]-[.D476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45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247916666666667" calcext:value-type="float">
            <text:p>0,00247916666666667000</text:p>
          </table:table-cell>
          <table:table-cell table:formula="of:=[.D478]-[.D477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45" office:value-type="float" office:value="21465" calcext:value-type="float">
            <text:p>21465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2484375" calcext:value-type="float">
            <text:p>0,00248437500000000000</text:p>
          </table:table-cell>
          <table:table-cell table:formula="of:=[.D479]-[.D478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45" office:value-type="float" office:value="21510" calcext:value-type="float">
            <text:p>21510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248958333333333" calcext:value-type="float">
            <text:p>0,00248958333333333000</text:p>
          </table:table-cell>
          <table:table-cell table:formula="of:=[.D480]-[.D479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45" office:value-type="float" office:value="21555" calcext:value-type="float">
            <text:p>21555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249479166666667" calcext:value-type="float">
            <text:p>0,00249479166666667000</text:p>
          </table:table-cell>
          <table:table-cell table:formula="of:=[.D481]-[.D480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45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25" calcext:value-type="float">
            <text:p>0,00250000000000000000</text:p>
          </table:table-cell>
          <table:table-cell table:formula="of:=[.D482]-[.D481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45" office:value-type="float" office:value="21645" calcext:value-type="float">
            <text:p>21645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250520833333333" calcext:value-type="float">
            <text:p>0,00250520833333333000</text:p>
          </table:table-cell>
          <table:table-cell table:formula="of:=[.D483]-[.D482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45" office:value-type="float" office:value="21690" calcext:value-type="float">
            <text:p>21690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251041666666667" calcext:value-type="float">
            <text:p>0,00251041666666667000</text:p>
          </table:table-cell>
          <table:table-cell table:formula="of:=[.D484]-[.D483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45" office:value-type="float" office:value="21735" calcext:value-type="float">
            <text:p>21735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2515625" calcext:value-type="float">
            <text:p>0,00251562500000000000</text:p>
          </table:table-cell>
          <table:table-cell table:formula="of:=[.D485]-[.D484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45" office:value-type="float" office:value="21780" calcext:value-type="float">
            <text:p>21780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252083333333333" calcext:value-type="float">
            <text:p>0,00252083333333333000</text:p>
          </table:table-cell>
          <table:table-cell table:formula="of:=[.D486]-[.D485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45" office:value-type="float" office:value="21825" calcext:value-type="float">
            <text:p>2182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252604166666667" calcext:value-type="float">
            <text:p>0,00252604166666667000</text:p>
          </table:table-cell>
          <table:table-cell table:formula="of:=[.D487]-[.D486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45" office:value-type="float" office:value="21870" calcext:value-type="float">
            <text:p>21870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253125" calcext:value-type="float">
            <text:p>0,00253125000000000000</text:p>
          </table:table-cell>
          <table:table-cell table:formula="of:=[.D488]-[.D487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45" office:value-type="float" office:value="21915" calcext:value-type="float">
            <text:p>21915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253645833333333" calcext:value-type="float">
            <text:p>0,00253645833333333000</text:p>
          </table:table-cell>
          <table:table-cell table:formula="of:=[.D489]-[.D488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45" office:value-type="float" office:value="21960" calcext:value-type="float">
            <text:p>21960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254166666666667" calcext:value-type="float">
            <text:p>0,00254166666666667000</text:p>
          </table:table-cell>
          <table:table-cell table:formula="of:=[.D490]-[.D489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45" office:value-type="float" office:value="22005" calcext:value-type="float">
            <text:p>22005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2546875" calcext:value-type="float">
            <text:p>0,00254687500000000000</text:p>
          </table:table-cell>
          <table:table-cell table:formula="of:=[.D491]-[.D490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45" office:value-type="float" office:value="22050" calcext:value-type="float">
            <text:p>2205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255208333333333" calcext:value-type="float">
            <text:p>0,00255208333333333000</text:p>
          </table:table-cell>
          <table:table-cell table:formula="of:=[.D492]-[.D491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45" office:value-type="float" office:value="22095" calcext:value-type="float">
            <text:p>22095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255729166666667" calcext:value-type="float">
            <text:p>0,00255729166666667000</text:p>
          </table:table-cell>
          <table:table-cell table:formula="of:=[.D493]-[.D492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45" office:value-type="float" office:value="22140" calcext:value-type="float">
            <text:p>22140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25625" calcext:value-type="float">
            <text:p>0,00256250000000000000</text:p>
          </table:table-cell>
          <table:table-cell table:formula="of:=[.D494]-[.D493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45" office:value-type="float" office:value="22185" calcext:value-type="float">
            <text:p>22185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256770833333333" calcext:value-type="float">
            <text:p>0,00256770833333333000</text:p>
          </table:table-cell>
          <table:table-cell table:formula="of:=[.D495]-[.D494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45" office:value-type="float" office:value="22230" calcext:value-type="float">
            <text:p>22230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257291666666667" calcext:value-type="float">
            <text:p>0,00257291666666667000</text:p>
          </table:table-cell>
          <table:table-cell table:formula="of:=[.D496]-[.D495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45" office:value-type="float" office:value="22275" calcext:value-type="float">
            <text:p>2227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2578125" calcext:value-type="float">
            <text:p>0,00257812500000000000</text:p>
          </table:table-cell>
          <table:table-cell table:formula="of:=[.D497]-[.D496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45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258333333333333" calcext:value-type="float">
            <text:p>0,00258333333333333000</text:p>
          </table:table-cell>
          <table:table-cell table:formula="of:=[.D498]-[.D497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45" office:value-type="float" office:value="22365" calcext:value-type="float">
            <text:p>22365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258854166666667" calcext:value-type="float">
            <text:p>0,00258854166666667000</text:p>
          </table:table-cell>
          <table:table-cell table:formula="of:=[.D499]-[.D498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45" office:value-type="float" office:value="22410" calcext:value-type="float">
            <text:p>22410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259375" calcext:value-type="float">
            <text:p>0,00259375000000000000</text:p>
          </table:table-cell>
          <table:table-cell table:formula="of:=[.D500]-[.D499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45" office:value-type="float" office:value="22455" calcext:value-type="float">
            <text:p>22455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259895833333333" calcext:value-type="float">
            <text:p>0,00259895833333333000</text:p>
          </table:table-cell>
          <table:table-cell table:formula="of:=[.D501]-[.D500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45" office:value-type="float" office:value="22500" calcext:value-type="float">
            <text:p>22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260416666666667" calcext:value-type="float">
            <text:p>0,00260416666666667000</text:p>
          </table:table-cell>
          <table:table-cell table:formula="of:=[.D502]-[.D501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45" office:value-type="float" office:value="22545" calcext:value-type="float">
            <text:p>22545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2609375" calcext:value-type="float">
            <text:p>0,00260937500000000000</text:p>
          </table:table-cell>
          <table:table-cell table:formula="of:=[.D503]-[.D502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45" office:value-type="float" office:value="22590" calcext:value-type="float">
            <text:p>22590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261458333333333" calcext:value-type="float">
            <text:p>0,00261458333333333000</text:p>
          </table:table-cell>
          <table:table-cell table:formula="of:=[.D504]-[.D503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45" office:value-type="float" office:value="22635" calcext:value-type="float">
            <text:p>22635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261979166666667" calcext:value-type="float">
            <text:p>0,00261979166666667000</text:p>
          </table:table-cell>
          <table:table-cell table:formula="of:=[.D505]-[.D504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45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2625" calcext:value-type="float">
            <text:p>0,00262500000000000000</text:p>
          </table:table-cell>
          <table:table-cell table:formula="of:=[.D506]-[.D505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45" office:value-type="float" office:value="22725" calcext:value-type="float">
            <text:p>2272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263020833333333" calcext:value-type="float">
            <text:p>0,00263020833333333000</text:p>
          </table:table-cell>
          <table:table-cell table:formula="of:=[.D507]-[.D506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45" office:value-type="float" office:value="22770" calcext:value-type="float">
            <text:p>22770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263541666666667" calcext:value-type="float">
            <text:p>0,00263541666666667000</text:p>
          </table:table-cell>
          <table:table-cell table:formula="of:=[.D508]-[.D507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45" office:value-type="float" office:value="22815" calcext:value-type="float">
            <text:p>22815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2640625" calcext:value-type="float">
            <text:p>0,00264062500000000000</text:p>
          </table:table-cell>
          <table:table-cell table:formula="of:=[.D509]-[.D508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45" office:value-type="float" office:value="22860" calcext:value-type="float">
            <text:p>22860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264583333333333" calcext:value-type="float">
            <text:p>0,00264583333333333000</text:p>
          </table:table-cell>
          <table:table-cell table:formula="of:=[.D510]-[.D509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45" office:value-type="float" office:value="22905" calcext:value-type="float">
            <text:p>22905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265104166666667" calcext:value-type="float">
            <text:p>0,00265104166666667000</text:p>
          </table:table-cell>
          <table:table-cell table:formula="of:=[.D511]-[.D510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45" office:value-type="float" office:value="22950" calcext:value-type="float">
            <text:p>2295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265625" calcext:value-type="float">
            <text:p>0,00265625000000000000</text:p>
          </table:table-cell>
          <table:table-cell table:formula="of:=[.D512]-[.D511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45" office:value-type="float" office:value="22995" calcext:value-type="float">
            <text:p>22995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266145833333333" calcext:value-type="float">
            <text:p>0,00266145833333333000</text:p>
          </table:table-cell>
          <table:table-cell table:formula="of:=[.D513]-[.D512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45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266666666666667" calcext:value-type="float">
            <text:p>0,00266666666666667000</text:p>
          </table:table-cell>
          <table:table-cell table:formula="of:=[.D514]-[.D513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45" office:value-type="float" office:value="23085" calcext:value-type="float">
            <text:p>23085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2671875" calcext:value-type="float">
            <text:p>0,00267187500000000000</text:p>
          </table:table-cell>
          <table:table-cell table:formula="of:=[.D515]-[.D514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45" office:value-type="float" office:value="23130" calcext:value-type="float">
            <text:p>23130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267708333333333" calcext:value-type="float">
            <text:p>0,00267708333333333000</text:p>
          </table:table-cell>
          <table:table-cell table:formula="of:=[.D516]-[.D515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45" office:value-type="float" office:value="23175" calcext:value-type="float">
            <text:p>23175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268229166666667" calcext:value-type="float">
            <text:p>0,00268229166666667000</text:p>
          </table:table-cell>
          <table:table-cell table:formula="of:=[.D517]-[.D516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45" office:value-type="float" office:value="23220" calcext:value-type="float">
            <text:p>23220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26875" calcext:value-type="float">
            <text:p>0,00268750000000000000</text:p>
          </table:table-cell>
          <table:table-cell table:formula="of:=[.D518]-[.D517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45" office:value-type="float" office:value="23265" calcext:value-type="float">
            <text:p>23265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269270833333333" calcext:value-type="float">
            <text:p>0,00269270833333333000</text:p>
          </table:table-cell>
          <table:table-cell table:formula="of:=[.D519]-[.D518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45" office:value-type="float" office:value="23310" calcext:value-type="float">
            <text:p>23310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269791666666667" calcext:value-type="float">
            <text:p>0,00269791666666667000</text:p>
          </table:table-cell>
          <table:table-cell table:formula="of:=[.D520]-[.D519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45" office:value-type="float" office:value="23355" calcext:value-type="float">
            <text:p>23355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2703125" calcext:value-type="float">
            <text:p>0,00270312500000000000</text:p>
          </table:table-cell>
          <table:table-cell table:formula="of:=[.D521]-[.D520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45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270833333333333" calcext:value-type="float">
            <text:p>0,00270833333333333000</text:p>
          </table:table-cell>
          <table:table-cell table:formula="of:=[.D522]-[.D521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45" office:value-type="float" office:value="23445" calcext:value-type="float">
            <text:p>23445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271354166666667" calcext:value-type="float">
            <text:p>0,00271354166666667000</text:p>
          </table:table-cell>
          <table:table-cell table:formula="of:=[.D523]-[.D522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45" office:value-type="float" office:value="23490" calcext:value-type="float">
            <text:p>23490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271875" calcext:value-type="float">
            <text:p>0,00271875000000000000</text:p>
          </table:table-cell>
          <table:table-cell table:formula="of:=[.D524]-[.D523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45" office:value-type="float" office:value="23535" calcext:value-type="float">
            <text:p>23535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272395833333333" calcext:value-type="float">
            <text:p>0,00272395833333333000</text:p>
          </table:table-cell>
          <table:table-cell table:formula="of:=[.D525]-[.D524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45" office:value-type="float" office:value="23580" calcext:value-type="float">
            <text:p>23580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272916666666667" calcext:value-type="float">
            <text:p>0,00272916666666667000</text:p>
          </table:table-cell>
          <table:table-cell table:formula="of:=[.D526]-[.D525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45" office:value-type="float" office:value="23625" calcext:value-type="float">
            <text:p>23625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2734375" calcext:value-type="float">
            <text:p>0,00273437500000000000</text:p>
          </table:table-cell>
          <table:table-cell table:formula="of:=[.D527]-[.D526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45" office:value-type="float" office:value="23670" calcext:value-type="float">
            <text:p>23670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273958333333333" calcext:value-type="float">
            <text:p>0,00273958333333333000</text:p>
          </table:table-cell>
          <table:table-cell table:formula="of:=[.D528]-[.D527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45" office:value-type="float" office:value="23715" calcext:value-type="float">
            <text:p>23715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274479166666667" calcext:value-type="float">
            <text:p>0,00274479166666667000</text:p>
          </table:table-cell>
          <table:table-cell table:formula="of:=[.D529]-[.D528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45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275" calcext:value-type="float">
            <text:p>0,00275000000000000000</text:p>
          </table:table-cell>
          <table:table-cell table:formula="of:=[.D530]-[.D529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45" office:value-type="float" office:value="23805" calcext:value-type="float">
            <text:p>23805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275520833333333" calcext:value-type="float">
            <text:p>0,00275520833333333000</text:p>
          </table:table-cell>
          <table:table-cell table:formula="of:=[.D531]-[.D530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45" office:value-type="float" office:value="23850" calcext:value-type="float">
            <text:p>2385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276041666666667" calcext:value-type="float">
            <text:p>0,00276041666666667000</text:p>
          </table:table-cell>
          <table:table-cell table:formula="of:=[.D532]-[.D531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45" office:value-type="float" office:value="23895" calcext:value-type="float">
            <text:p>23895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2765625" calcext:value-type="float">
            <text:p>0,00276562500000000000</text:p>
          </table:table-cell>
          <table:table-cell table:formula="of:=[.D533]-[.D532]" office:value-type="float" office:value="0.00000520833333333363" calcext:value-type="float">
            <text:p>0,0000052083333333336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45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277083333333333" calcext:value-type="float">
            <text:p>0,00277083333333333000</text:p>
          </table:table-cell>
          <table:table-cell table:formula="of:=[.D534]-[.D533]" office:value-type="float" office:value="0.00000520833333333319" calcext:value-type="float">
            <text:p>0,0000052083333333331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45" office:value-type="float" office:value="23985" calcext:value-type="float">
            <text:p>23985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277604166666667" calcext:value-type="float">
            <text:p>0,00277604166666667000</text:p>
          </table:table-cell>
          <table:table-cell table:formula="of:=#REF!-[.D534]" office:value-type="string" office:string-value="" calcext:value-type="error">
            <text:p>#REF!</text:p>
          </table:table-cell>
        </table:table-row>
        <table:table-row table:style-name="ro1" table:number-rows-repeated="104804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7:41:01.370254111</meta:creation-date>
    <dc:date>2026-05-17T17:41:16.147572999</dc:date>
    <meta:editing-duration>PT16S</meta:editing-duration>
    <meta:editing-cycles>1</meta:editing-cycles>
    <meta:document-statistic meta:table-count="1" meta:cell-count="2670" meta:object-count="0"/>
    <meta:generator>LibreOffice/24.2.7.2$Linux_X86_64 LibreOffice_project/420$Build-2</meta:generator>
  </office:meta>
</office:document-meta>
</file>