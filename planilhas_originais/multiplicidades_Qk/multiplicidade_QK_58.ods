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5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58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671296296296296" calcext:value-type="float">
            <text:p>0,00000671296296296296</text:p>
          </table:table-cell>
          <table:table-cell table:formula="of:=[.D3]-[.D2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58" office:value-type="float" office:value="116" calcext:value-type="float">
            <text:p>11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34259259259259" calcext:value-type="float">
            <text:p>0,00001342592592592590</text:p>
          </table:table-cell>
          <table:table-cell table:formula="of:=[.D4]-[.D3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58" office:value-type="float" office:value="174" calcext:value-type="float">
            <text:p>174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01388888888889" calcext:value-type="float">
            <text:p>0,00002013888888888890</text:p>
          </table:table-cell>
          <table:table-cell table:formula="of:=[.D5]-[.D4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58" office:value-type="float" office:value="232" calcext:value-type="float">
            <text:p>23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68518518518519" calcext:value-type="float">
            <text:p>0,00002685185185185190</text:p>
          </table:table-cell>
          <table:table-cell table:formula="of:=[.D6]-[.D5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58" office:value-type="float" office:value="290" calcext:value-type="float">
            <text:p>29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35648148148148" calcext:value-type="float">
            <text:p>0,00003356481481481480</text:p>
          </table:table-cell>
          <table:table-cell table:formula="of:=[.D7]-[.D6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58" office:value-type="float" office:value="348" calcext:value-type="float">
            <text:p>34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402777777777778" calcext:value-type="float">
            <text:p>0,00004027777777777780</text:p>
          </table:table-cell>
          <table:table-cell table:formula="of:=[.D8]-[.D7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58" office:value-type="float" office:value="406" calcext:value-type="float">
            <text:p>406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469907407407407" calcext:value-type="float">
            <text:p>0,00004699074074074070</text:p>
          </table:table-cell>
          <table:table-cell table:formula="of:=[.D9]-[.D8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58" office:value-type="float" office:value="464" calcext:value-type="float">
            <text:p>46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537037037037037" calcext:value-type="float">
            <text:p>0,00005370370370370370</text:p>
          </table:table-cell>
          <table:table-cell table:formula="of:=[.D10]-[.D9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58" office:value-type="float" office:value="522" calcext:value-type="float">
            <text:p>522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604166666666667" calcext:value-type="float">
            <text:p>0,00006041666666666670</text:p>
          </table:table-cell>
          <table:table-cell table:formula="of:=[.D11]-[.D10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58" office:value-type="float" office:value="580" calcext:value-type="float">
            <text:p>58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671296296296296" calcext:value-type="float">
            <text:p>0,00006712962962962960</text:p>
          </table:table-cell>
          <table:table-cell table:formula="of:=[.D12]-[.D11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58" office:value-type="float" office:value="638" calcext:value-type="float">
            <text:p>638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738425925925926" calcext:value-type="float">
            <text:p>0,00007384259259259260</text:p>
          </table:table-cell>
          <table:table-cell table:formula="of:=[.D13]-[.D12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58" office:value-type="float" office:value="696" calcext:value-type="float">
            <text:p>69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805555555555556" calcext:value-type="float">
            <text:p>0,00008055555555555560</text:p>
          </table:table-cell>
          <table:table-cell table:formula="of:=[.D14]-[.D13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58" office:value-type="float" office:value="754" calcext:value-type="float">
            <text:p>754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872685185185185" calcext:value-type="float">
            <text:p>0,00008726851851851850</text:p>
          </table:table-cell>
          <table:table-cell table:formula="of:=[.D15]-[.D14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58" office:value-type="float" office:value="812" calcext:value-type="float">
            <text:p>81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939814814814815" calcext:value-type="float">
            <text:p>0,00009398148148148150</text:p>
          </table:table-cell>
          <table:table-cell table:formula="of:=[.D16]-[.D15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58" office:value-type="float" office:value="870" calcext:value-type="float">
            <text:p>87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00694444444444" calcext:value-type="float">
            <text:p>0,00010069444444444400</text:p>
          </table:table-cell>
          <table:table-cell table:formula="of:=[.D17]-[.D16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58" office:value-type="float" office:value="928" calcext:value-type="float">
            <text:p>92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07407407407407" calcext:value-type="float">
            <text:p>0,00010740740740740700</text:p>
          </table:table-cell>
          <table:table-cell table:formula="of:=[.D18]-[.D17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58" office:value-type="float" office:value="986" calcext:value-type="float">
            <text:p>986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1412037037037" calcext:value-type="float">
            <text:p>0,00011412037037037000</text:p>
          </table:table-cell>
          <table:table-cell table:formula="of:=[.D19]-[.D18]" office:value-type="float" office:value="0.00000671296296296296" calcext:value-type="float">
            <text:p>0,00000671296296296296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58" office:value-type="float" office:value="1044" calcext:value-type="float">
            <text:p>104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20833333333333" calcext:value-type="float">
            <text:p>0,00012083333333333300</text:p>
          </table:table-cell>
          <table:table-cell table:formula="of:=[.D20]-[.D19]" office:value-type="float" office:value="0.00000671296296296295" calcext:value-type="float">
            <text:p>0,00000671296296296295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58" office:value-type="float" office:value="1102" calcext:value-type="float">
            <text:p>1102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27546296296296" calcext:value-type="float">
            <text:p>0,00012754629629629600</text:p>
          </table:table-cell>
          <table:table-cell table:formula="of:=[.D21]-[.D20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58" office:value-type="float" office:value="1160" calcext:value-type="float">
            <text:p>11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34259259259259" calcext:value-type="float">
            <text:p>0,00013425925925925900</text:p>
          </table:table-cell>
          <table:table-cell table:formula="of:=[.D22]-[.D21]" office:value-type="float" office:value="0.00000671296296296295" calcext:value-type="float">
            <text:p>0,00000671296296296295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58" office:value-type="float" office:value="1218" calcext:value-type="float">
            <text:p>1218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40972222222222" calcext:value-type="float">
            <text:p>0,00014097222222222200</text:p>
          </table:table-cell>
          <table:table-cell table:formula="of:=[.D23]-[.D22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58" office:value-type="float" office:value="1276" calcext:value-type="float">
            <text:p>127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47685185185185" calcext:value-type="float">
            <text:p>0,00014768518518518500</text:p>
          </table:table-cell>
          <table:table-cell table:formula="of:=[.D24]-[.D23]" office:value-type="float" office:value="0.00000671296296296295" calcext:value-type="float">
            <text:p>0,00000671296296296295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58" office:value-type="float" office:value="1334" calcext:value-type="float">
            <text:p>1334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54398148148148" calcext:value-type="float">
            <text:p>0,00015439814814814800</text:p>
          </table:table-cell>
          <table:table-cell table:formula="of:=[.D25]-[.D24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58" office:value-type="float" office:value="1392" calcext:value-type="float">
            <text:p>139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61111111111111" calcext:value-type="float">
            <text:p>0,00016111111111111100</text:p>
          </table:table-cell>
          <table:table-cell table:formula="of:=[.D26]-[.D25]" office:value-type="float" office:value="0.00000671296296296295" calcext:value-type="float">
            <text:p>0,00000671296296296295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58" office:value-type="float" office:value="1450" calcext:value-type="float">
            <text:p>14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67824074074074" calcext:value-type="float">
            <text:p>0,00016782407407407400</text:p>
          </table:table-cell>
          <table:table-cell table:formula="of:=[.D27]-[.D26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58" office:value-type="float" office:value="1508" calcext:value-type="float">
            <text:p>150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74537037037037" calcext:value-type="float">
            <text:p>0,00017453703703703700</text:p>
          </table:table-cell>
          <table:table-cell table:formula="of:=[.D28]-[.D27]" office:value-type="float" office:value="0.00000671296296296295" calcext:value-type="float">
            <text:p>0,00000671296296296295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58" office:value-type="float" office:value="1566" calcext:value-type="float">
            <text:p>1566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8125" calcext:value-type="float">
            <text:p>0,00018125000000000000</text:p>
          </table:table-cell>
          <table:table-cell table:formula="of:=[.D29]-[.D28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58" office:value-type="float" office:value="1624" calcext:value-type="float">
            <text:p>162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87962962962963" calcext:value-type="float">
            <text:p>0,00018796296296296300</text:p>
          </table:table-cell>
          <table:table-cell table:formula="of:=[.D30]-[.D29]" office:value-type="float" office:value="0.00000671296296296295" calcext:value-type="float">
            <text:p>0,00000671296296296295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58" office:value-type="float" office:value="1682" calcext:value-type="float">
            <text:p>1682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94675925925926" calcext:value-type="float">
            <text:p>0,00019467592592592600</text:p>
          </table:table-cell>
          <table:table-cell table:formula="of:=[.D31]-[.D30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58" office:value-type="float" office:value="1740" calcext:value-type="float">
            <text:p>174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01388888888889" calcext:value-type="float">
            <text:p>0,00020138888888888900</text:p>
          </table:table-cell>
          <table:table-cell table:formula="of:=[.D32]-[.D31]" office:value-type="float" office:value="0.00000671296296296295" calcext:value-type="float">
            <text:p>0,00000671296296296295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58" office:value-type="float" office:value="1798" calcext:value-type="float">
            <text:p>1798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08101851851852" calcext:value-type="float">
            <text:p>0,00020810185185185200</text:p>
          </table:table-cell>
          <table:table-cell table:formula="of:=[.D33]-[.D32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58" office:value-type="float" office:value="1856" calcext:value-type="float">
            <text:p>185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14814814814815" calcext:value-type="float">
            <text:p>0,00021481481481481500</text:p>
          </table:table-cell>
          <table:table-cell table:formula="of:=[.D34]-[.D33]" office:value-type="float" office:value="0.00000671296296296295" calcext:value-type="float">
            <text:p>0,00000671296296296295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58" office:value-type="float" office:value="1914" calcext:value-type="float">
            <text:p>1914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21527777777778" calcext:value-type="float">
            <text:p>0,00022152777777777800</text:p>
          </table:table-cell>
          <table:table-cell table:formula="of:=[.D35]-[.D34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58" office:value-type="float" office:value="1972" calcext:value-type="float">
            <text:p>197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28240740740741" calcext:value-type="float">
            <text:p>0,00022824074074074100</text:p>
          </table:table-cell>
          <table:table-cell table:formula="of:=[.D36]-[.D35]" office:value-type="float" office:value="0.00000671296296296295" calcext:value-type="float">
            <text:p>0,00000671296296296295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58" office:value-type="float" office:value="2030" calcext:value-type="float">
            <text:p>203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34953703703704" calcext:value-type="float">
            <text:p>0,00023495370370370400</text:p>
          </table:table-cell>
          <table:table-cell table:formula="of:=[.D37]-[.D36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58" office:value-type="float" office:value="2088" calcext:value-type="float">
            <text:p>208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41666666666667" calcext:value-type="float">
            <text:p>0,00024166666666666700</text:p>
          </table:table-cell>
          <table:table-cell table:formula="of:=[.D38]-[.D37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58" office:value-type="float" office:value="2146" calcext:value-type="float">
            <text:p>2146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4837962962963" calcext:value-type="float">
            <text:p>0,00024837962962963000</text:p>
          </table:table-cell>
          <table:table-cell table:formula="of:=[.D39]-[.D3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58" office:value-type="float" office:value="2204" calcext:value-type="float">
            <text:p>220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55092592592593" calcext:value-type="float">
            <text:p>0,00025509259259259300</text:p>
          </table:table-cell>
          <table:table-cell table:formula="of:=[.D40]-[.D39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58" office:value-type="float" office:value="2262" calcext:value-type="float">
            <text:p>2262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61805555555556" calcext:value-type="float">
            <text:p>0,00026180555555555600</text:p>
          </table:table-cell>
          <table:table-cell table:formula="of:=[.D41]-[.D40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58" office:value-type="float" office:value="2320" calcext:value-type="float">
            <text:p>23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68518518518519" calcext:value-type="float">
            <text:p>0,00026851851851851900</text:p>
          </table:table-cell>
          <table:table-cell table:formula="of:=[.D42]-[.D41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58" office:value-type="float" office:value="2378" calcext:value-type="float">
            <text:p>2378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75231481481482" calcext:value-type="float">
            <text:p>0,00027523148148148200</text:p>
          </table:table-cell>
          <table:table-cell table:formula="of:=[.D43]-[.D4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58" office:value-type="float" office:value="2436" calcext:value-type="float">
            <text:p>243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81944444444444" calcext:value-type="float">
            <text:p>0,00028194444444444400</text:p>
          </table:table-cell>
          <table:table-cell table:formula="of:=[.D44]-[.D43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58" office:value-type="float" office:value="2494" calcext:value-type="float">
            <text:p>2494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88657407407407" calcext:value-type="float">
            <text:p>0,00028865740740740700</text:p>
          </table:table-cell>
          <table:table-cell table:formula="of:=[.D45]-[.D44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58" office:value-type="float" office:value="2552" calcext:value-type="float">
            <text:p>255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9537037037037" calcext:value-type="float">
            <text:p>0,00029537037037037000</text:p>
          </table:table-cell>
          <table:table-cell table:formula="of:=[.D46]-[.D45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58" office:value-type="float" office:value="2610" calcext:value-type="float">
            <text:p>261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02083333333333" calcext:value-type="float">
            <text:p>0,00030208333333333300</text:p>
          </table:table-cell>
          <table:table-cell table:formula="of:=[.D47]-[.D4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58" office:value-type="float" office:value="2668" calcext:value-type="float">
            <text:p>266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08796296296296" calcext:value-type="float">
            <text:p>0,00030879629629629600</text:p>
          </table:table-cell>
          <table:table-cell table:formula="of:=[.D48]-[.D47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58" office:value-type="float" office:value="2726" calcext:value-type="float">
            <text:p>2726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15509259259259" calcext:value-type="float">
            <text:p>0,00031550925925925900</text:p>
          </table:table-cell>
          <table:table-cell table:formula="of:=[.D49]-[.D48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58" office:value-type="float" office:value="2784" calcext:value-type="float">
            <text:p>278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22222222222222" calcext:value-type="float">
            <text:p>0,00032222222222222200</text:p>
          </table:table-cell>
          <table:table-cell table:formula="of:=[.D50]-[.D49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58" office:value-type="float" office:value="2842" calcext:value-type="float">
            <text:p>2842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28935185185185" calcext:value-type="float">
            <text:p>0,00032893518518518500</text:p>
          </table:table-cell>
          <table:table-cell table:formula="of:=[.D51]-[.D5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58" office:value-type="float" office:value="2900" calcext:value-type="float">
            <text:p>29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35648148148148" calcext:value-type="float">
            <text:p>0,00033564814814814800</text:p>
          </table:table-cell>
          <table:table-cell table:formula="of:=[.D52]-[.D51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58" office:value-type="float" office:value="2958" calcext:value-type="float">
            <text:p>2958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42361111111111" calcext:value-type="float">
            <text:p>0,00034236111111111100</text:p>
          </table:table-cell>
          <table:table-cell table:formula="of:=[.D53]-[.D52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58" office:value-type="float" office:value="3016" calcext:value-type="float">
            <text:p>301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49074074074074" calcext:value-type="float">
            <text:p>0,00034907407407407400</text:p>
          </table:table-cell>
          <table:table-cell table:formula="of:=[.D54]-[.D53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58" office:value-type="float" office:value="3074" calcext:value-type="float">
            <text:p>3074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55787037037037" calcext:value-type="float">
            <text:p>0,00035578703703703700</text:p>
          </table:table-cell>
          <table:table-cell table:formula="of:=[.D55]-[.D5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58" office:value-type="float" office:value="3132" calcext:value-type="float">
            <text:p>313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3625" calcext:value-type="float">
            <text:p>0,00036250000000000000</text:p>
          </table:table-cell>
          <table:table-cell table:formula="of:=[.D56]-[.D55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58" office:value-type="float" office:value="3190" calcext:value-type="float">
            <text:p>319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369212962962963" calcext:value-type="float">
            <text:p>0,00036921296296296300</text:p>
          </table:table-cell>
          <table:table-cell table:formula="of:=[.D57]-[.D56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58" office:value-type="float" office:value="3248" calcext:value-type="float">
            <text:p>324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375925925925926" calcext:value-type="float">
            <text:p>0,00037592592592592600</text:p>
          </table:table-cell>
          <table:table-cell table:formula="of:=[.D58]-[.D57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58" office:value-type="float" office:value="3306" calcext:value-type="float">
            <text:p>3306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382638888888889" calcext:value-type="float">
            <text:p>0,00038263888888888900</text:p>
          </table:table-cell>
          <table:table-cell table:formula="of:=[.D59]-[.D5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58" office:value-type="float" office:value="3364" calcext:value-type="float">
            <text:p>336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389351851851852" calcext:value-type="float">
            <text:p>0,00038935185185185200</text:p>
          </table:table-cell>
          <table:table-cell table:formula="of:=[.D60]-[.D59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58" office:value-type="float" office:value="3422" calcext:value-type="float">
            <text:p>3422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396064814814815" calcext:value-type="float">
            <text:p>0,00039606481481481500</text:p>
          </table:table-cell>
          <table:table-cell table:formula="of:=[.D61]-[.D60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58" office:value-type="float" office:value="3480" calcext:value-type="float">
            <text:p>34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402777777777778" calcext:value-type="float">
            <text:p>0,00040277777777777800</text:p>
          </table:table-cell>
          <table:table-cell table:formula="of:=[.D62]-[.D61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58" office:value-type="float" office:value="3538" calcext:value-type="float">
            <text:p>3538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409490740740741" calcext:value-type="float">
            <text:p>0,00040949074074074100</text:p>
          </table:table-cell>
          <table:table-cell table:formula="of:=[.D63]-[.D6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58" office:value-type="float" office:value="3596" calcext:value-type="float">
            <text:p>359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416203703703704" calcext:value-type="float">
            <text:p>0,00041620370370370400</text:p>
          </table:table-cell>
          <table:table-cell table:formula="of:=[.D64]-[.D63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58" office:value-type="float" office:value="3654" calcext:value-type="float">
            <text:p>3654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422916666666667" calcext:value-type="float">
            <text:p>0,00042291666666666700</text:p>
          </table:table-cell>
          <table:table-cell table:formula="of:=[.D65]-[.D64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58" office:value-type="float" office:value="3712" calcext:value-type="float">
            <text:p>371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42962962962963" calcext:value-type="float">
            <text:p>0,00042962962962963000</text:p>
          </table:table-cell>
          <table:table-cell table:formula="of:=[.D66]-[.D65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58" office:value-type="float" office:value="3770" calcext:value-type="float">
            <text:p>377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436342592592593" calcext:value-type="float">
            <text:p>0,00043634259259259300</text:p>
          </table:table-cell>
          <table:table-cell table:formula="of:=[.D67]-[.D6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58" office:value-type="float" office:value="3828" calcext:value-type="float">
            <text:p>382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443055555555556" calcext:value-type="float">
            <text:p>0,00044305555555555600</text:p>
          </table:table-cell>
          <table:table-cell table:formula="of:=[.D68]-[.D67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58" office:value-type="float" office:value="3886" calcext:value-type="float">
            <text:p>3886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449768518518519" calcext:value-type="float">
            <text:p>0,00044976851851851800</text:p>
          </table:table-cell>
          <table:table-cell table:formula="of:=[.D69]-[.D68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58" office:value-type="float" office:value="3944" calcext:value-type="float">
            <text:p>394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456481481481482" calcext:value-type="float">
            <text:p>0,00045648148148148200</text:p>
          </table:table-cell>
          <table:table-cell table:formula="of:=[.D70]-[.D69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58" office:value-type="float" office:value="4002" calcext:value-type="float">
            <text:p>4002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463194444444444" calcext:value-type="float">
            <text:p>0,00046319444444444400</text:p>
          </table:table-cell>
          <table:table-cell table:formula="of:=[.D71]-[.D7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58" office:value-type="float" office:value="4060" calcext:value-type="float">
            <text:p>406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469907407407407" calcext:value-type="float">
            <text:p>0,00046990740740740700</text:p>
          </table:table-cell>
          <table:table-cell table:formula="of:=[.D72]-[.D71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58" office:value-type="float" office:value="4118" calcext:value-type="float">
            <text:p>4118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47662037037037" calcext:value-type="float">
            <text:p>0,00047662037037037000</text:p>
          </table:table-cell>
          <table:table-cell table:formula="of:=[.D73]-[.D72]" office:value-type="float" office:value="0.00000671296296296298" calcext:value-type="float">
            <text:p>0,00000671296296296298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58" office:value-type="float" office:value="4176" calcext:value-type="float">
            <text:p>417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483333333333333" calcext:value-type="float">
            <text:p>0,00048333333333333300</text:p>
          </table:table-cell>
          <table:table-cell table:formula="of:=[.D74]-[.D73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58" office:value-type="float" office:value="4234" calcext:value-type="float">
            <text:p>4234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490046296296296" calcext:value-type="float">
            <text:p>0,00049004629629629600</text:p>
          </table:table-cell>
          <table:table-cell table:formula="of:=[.D75]-[.D74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58" office:value-type="float" office:value="4292" calcext:value-type="float">
            <text:p>429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496759259259259" calcext:value-type="float">
            <text:p>0,00049675925925925900</text:p>
          </table:table-cell>
          <table:table-cell table:formula="of:=[.D76]-[.D75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58" office:value-type="float" office:value="4350" calcext:value-type="float">
            <text:p>43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503472222222222" calcext:value-type="float">
            <text:p>0,00050347222222222200</text:p>
          </table:table-cell>
          <table:table-cell table:formula="of:=[.D77]-[.D7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58" office:value-type="float" office:value="4408" calcext:value-type="float">
            <text:p>440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510185185185185" calcext:value-type="float">
            <text:p>0,00051018518518518500</text:p>
          </table:table-cell>
          <table:table-cell table:formula="of:=[.D78]-[.D77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58" office:value-type="float" office:value="4466" calcext:value-type="float">
            <text:p>4466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516898148148148" calcext:value-type="float">
            <text:p>0,00051689814814814800</text:p>
          </table:table-cell>
          <table:table-cell table:formula="of:=[.D79]-[.D7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58" office:value-type="float" office:value="4524" calcext:value-type="float">
            <text:p>452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523611111111111" calcext:value-type="float">
            <text:p>0,00052361111111111100</text:p>
          </table:table-cell>
          <table:table-cell table:formula="of:=[.D80]-[.D79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58" office:value-type="float" office:value="4582" calcext:value-type="float">
            <text:p>4582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530324074074074" calcext:value-type="float">
            <text:p>0,00053032407407407400</text:p>
          </table:table-cell>
          <table:table-cell table:formula="of:=[.D81]-[.D8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58" office:value-type="float" office:value="4640" calcext:value-type="float">
            <text:p>46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537037037037037" calcext:value-type="float">
            <text:p>0,00053703703703703700</text:p>
          </table:table-cell>
          <table:table-cell table:formula="of:=[.D82]-[.D81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58" office:value-type="float" office:value="4698" calcext:value-type="float">
            <text:p>4698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54375" calcext:value-type="float">
            <text:p>0,00054375000000000000</text:p>
          </table:table-cell>
          <table:table-cell table:formula="of:=[.D83]-[.D82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58" office:value-type="float" office:value="4756" calcext:value-type="float">
            <text:p>475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550462962962963" calcext:value-type="float">
            <text:p>0,00055046296296296300</text:p>
          </table:table-cell>
          <table:table-cell table:formula="of:=[.D84]-[.D83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58" office:value-type="float" office:value="4814" calcext:value-type="float">
            <text:p>4814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557175925925926" calcext:value-type="float">
            <text:p>0,00055717592592592600</text:p>
          </table:table-cell>
          <table:table-cell table:formula="of:=[.D85]-[.D8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58" office:value-type="float" office:value="4872" calcext:value-type="float">
            <text:p>487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563888888888889" calcext:value-type="float">
            <text:p>0,00056388888888888900</text:p>
          </table:table-cell>
          <table:table-cell table:formula="of:=[.D86]-[.D85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58" office:value-type="float" office:value="4930" calcext:value-type="float">
            <text:p>493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570601851851852" calcext:value-type="float">
            <text:p>0,00057060185185185200</text:p>
          </table:table-cell>
          <table:table-cell table:formula="of:=[.D87]-[.D8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58" office:value-type="float" office:value="4988" calcext:value-type="float">
            <text:p>498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577314814814815" calcext:value-type="float">
            <text:p>0,00057731481481481500</text:p>
          </table:table-cell>
          <table:table-cell table:formula="of:=[.D88]-[.D87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58" office:value-type="float" office:value="5046" calcext:value-type="float">
            <text:p>5046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584027777777778" calcext:value-type="float">
            <text:p>0,00058402777777777800</text:p>
          </table:table-cell>
          <table:table-cell table:formula="of:=[.D89]-[.D8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58" office:value-type="float" office:value="5104" calcext:value-type="float">
            <text:p>510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590740740740741" calcext:value-type="float">
            <text:p>0,00059074074074074100</text:p>
          </table:table-cell>
          <table:table-cell table:formula="of:=[.D90]-[.D89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58" office:value-type="float" office:value="5162" calcext:value-type="float">
            <text:p>5162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597453703703704" calcext:value-type="float">
            <text:p>0,00059745370370370400</text:p>
          </table:table-cell>
          <table:table-cell table:formula="of:=[.D91]-[.D90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58" office:value-type="float" office:value="5220" calcext:value-type="float">
            <text:p>522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604166666666667" calcext:value-type="float">
            <text:p>0,00060416666666666700</text:p>
          </table:table-cell>
          <table:table-cell table:formula="of:=[.D92]-[.D91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58" office:value-type="float" office:value="5278" calcext:value-type="float">
            <text:p>5278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61087962962963" calcext:value-type="float">
            <text:p>0,00061087962962963000</text:p>
          </table:table-cell>
          <table:table-cell table:formula="of:=[.D93]-[.D9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58" office:value-type="float" office:value="5336" calcext:value-type="float">
            <text:p>533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617592592592593" calcext:value-type="float">
            <text:p>0,00061759259259259300</text:p>
          </table:table-cell>
          <table:table-cell table:formula="of:=[.D94]-[.D93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58" office:value-type="float" office:value="5394" calcext:value-type="float">
            <text:p>5394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624305555555556" calcext:value-type="float">
            <text:p>0,00062430555555555600</text:p>
          </table:table-cell>
          <table:table-cell table:formula="of:=[.D95]-[.D9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58" office:value-type="float" office:value="5452" calcext:value-type="float">
            <text:p>545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631018518518519" calcext:value-type="float">
            <text:p>0,00063101851851851900</text:p>
          </table:table-cell>
          <table:table-cell table:formula="of:=[.D96]-[.D95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58" office:value-type="float" office:value="5510" calcext:value-type="float">
            <text:p>551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637731481481482" calcext:value-type="float">
            <text:p>0,00063773148148148200</text:p>
          </table:table-cell>
          <table:table-cell table:formula="of:=[.D97]-[.D9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58" office:value-type="float" office:value="5568" calcext:value-type="float">
            <text:p>556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644444444444444" calcext:value-type="float">
            <text:p>0,00064444444444444400</text:p>
          </table:table-cell>
          <table:table-cell table:formula="of:=[.D98]-[.D97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58" office:value-type="float" office:value="5626" calcext:value-type="float">
            <text:p>5626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651157407407407" calcext:value-type="float">
            <text:p>0,00065115740740740700</text:p>
          </table:table-cell>
          <table:table-cell table:formula="of:=[.D99]-[.D98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58" office:value-type="float" office:value="5684" calcext:value-type="float">
            <text:p>568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65787037037037" calcext:value-type="float">
            <text:p>0,00065787037037037000</text:p>
          </table:table-cell>
          <table:table-cell table:formula="of:=[.D100]-[.D99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58" office:value-type="float" office:value="5742" calcext:value-type="float">
            <text:p>5742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664583333333333" calcext:value-type="float">
            <text:p>0,00066458333333333300</text:p>
          </table:table-cell>
          <table:table-cell table:formula="of:=[.D101]-[.D10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58" office:value-type="float" office:value="5800" calcext:value-type="float">
            <text:p>58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671296296296296" calcext:value-type="float">
            <text:p>0,00067129629629629600</text:p>
          </table:table-cell>
          <table:table-cell table:formula="of:=[.D102]-[.D101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58" office:value-type="float" office:value="5858" calcext:value-type="float">
            <text:p>5858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678009259259259" calcext:value-type="float">
            <text:p>0,00067800925925925900</text:p>
          </table:table-cell>
          <table:table-cell table:formula="of:=[.D103]-[.D10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58" office:value-type="float" office:value="5916" calcext:value-type="float">
            <text:p>591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684722222222222" calcext:value-type="float">
            <text:p>0,00068472222222222200</text:p>
          </table:table-cell>
          <table:table-cell table:formula="of:=[.D104]-[.D103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58" office:value-type="float" office:value="5974" calcext:value-type="float">
            <text:p>5974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691435185185185" calcext:value-type="float">
            <text:p>0,00069143518518518500</text:p>
          </table:table-cell>
          <table:table-cell table:formula="of:=[.D105]-[.D10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58" office:value-type="float" office:value="6032" calcext:value-type="float">
            <text:p>603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698148148148148" calcext:value-type="float">
            <text:p>0,00069814814814814800</text:p>
          </table:table-cell>
          <table:table-cell table:formula="of:=[.D106]-[.D105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58" office:value-type="float" office:value="6090" calcext:value-type="float">
            <text:p>609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704861111111111" calcext:value-type="float">
            <text:p>0,00070486111111111100</text:p>
          </table:table-cell>
          <table:table-cell table:formula="of:=[.D107]-[.D106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58" office:value-type="float" office:value="6148" calcext:value-type="float">
            <text:p>614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711574074074074" calcext:value-type="float">
            <text:p>0,00071157407407407400</text:p>
          </table:table-cell>
          <table:table-cell table:formula="of:=[.D108]-[.D107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58" office:value-type="float" office:value="6206" calcext:value-type="float">
            <text:p>6206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718287037037037" calcext:value-type="float">
            <text:p>0,00071828703703703700</text:p>
          </table:table-cell>
          <table:table-cell table:formula="of:=[.D109]-[.D10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58" office:value-type="float" office:value="6264" calcext:value-type="float">
            <text:p>626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725" calcext:value-type="float">
            <text:p>0,00072500000000000000</text:p>
          </table:table-cell>
          <table:table-cell table:formula="of:=[.D110]-[.D109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58" office:value-type="float" office:value="6322" calcext:value-type="float">
            <text:p>6322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731712962962963" calcext:value-type="float">
            <text:p>0,00073171296296296300</text:p>
          </table:table-cell>
          <table:table-cell table:formula="of:=[.D111]-[.D11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58" office:value-type="float" office:value="6380" calcext:value-type="float">
            <text:p>638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738425925925926" calcext:value-type="float">
            <text:p>0,00073842592592592600</text:p>
          </table:table-cell>
          <table:table-cell table:formula="of:=[.D112]-[.D111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58" office:value-type="float" office:value="6438" calcext:value-type="float">
            <text:p>6438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745138888888889" calcext:value-type="float">
            <text:p>0,00074513888888888900</text:p>
          </table:table-cell>
          <table:table-cell table:formula="of:=[.D113]-[.D11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58" office:value-type="float" office:value="6496" calcext:value-type="float">
            <text:p>649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751851851851852" calcext:value-type="float">
            <text:p>0,00075185185185185200</text:p>
          </table:table-cell>
          <table:table-cell table:formula="of:=[.D114]-[.D113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58" office:value-type="float" office:value="6554" calcext:value-type="float">
            <text:p>6554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758564814814815" calcext:value-type="float">
            <text:p>0,00075856481481481500</text:p>
          </table:table-cell>
          <table:table-cell table:formula="of:=[.D115]-[.D114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58" office:value-type="float" office:value="6612" calcext:value-type="float">
            <text:p>661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765277777777778" calcext:value-type="float">
            <text:p>0,00076527777777777800</text:p>
          </table:table-cell>
          <table:table-cell table:formula="of:=[.D116]-[.D115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58" office:value-type="float" office:value="6670" calcext:value-type="float">
            <text:p>667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771990740740741" calcext:value-type="float">
            <text:p>0,00077199074074074100</text:p>
          </table:table-cell>
          <table:table-cell table:formula="of:=[.D117]-[.D11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58" office:value-type="float" office:value="6728" calcext:value-type="float">
            <text:p>672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778703703703704" calcext:value-type="float">
            <text:p>0,00077870370370370400</text:p>
          </table:table-cell>
          <table:table-cell table:formula="of:=[.D118]-[.D117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58" office:value-type="float" office:value="6786" calcext:value-type="float">
            <text:p>6786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785416666666667" calcext:value-type="float">
            <text:p>0,00078541666666666700</text:p>
          </table:table-cell>
          <table:table-cell table:formula="of:=[.D119]-[.D11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58" office:value-type="float" office:value="6844" calcext:value-type="float">
            <text:p>684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79212962962963" calcext:value-type="float">
            <text:p>0,00079212962962963000</text:p>
          </table:table-cell>
          <table:table-cell table:formula="of:=[.D120]-[.D119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58" office:value-type="float" office:value="6902" calcext:value-type="float">
            <text:p>6902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798842592592593" calcext:value-type="float">
            <text:p>0,00079884259259259300</text:p>
          </table:table-cell>
          <table:table-cell table:formula="of:=[.D121]-[.D12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58" office:value-type="float" office:value="6960" calcext:value-type="float">
            <text:p>69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805555555555556" calcext:value-type="float">
            <text:p>0,00080555555555555600</text:p>
          </table:table-cell>
          <table:table-cell table:formula="of:=[.D122]-[.D121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58" office:value-type="float" office:value="7018" calcext:value-type="float">
            <text:p>7018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812268518518519" calcext:value-type="float">
            <text:p>0,00081226851851851900</text:p>
          </table:table-cell>
          <table:table-cell table:formula="of:=[.D123]-[.D122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58" office:value-type="float" office:value="7076" calcext:value-type="float">
            <text:p>707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818981481481482" calcext:value-type="float">
            <text:p>0,00081898148148148100</text:p>
          </table:table-cell>
          <table:table-cell table:formula="of:=[.D124]-[.D123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58" office:value-type="float" office:value="7134" calcext:value-type="float">
            <text:p>7134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825694444444444" calcext:value-type="float">
            <text:p>0,00082569444444444400</text:p>
          </table:table-cell>
          <table:table-cell table:formula="of:=[.D125]-[.D12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58" office:value-type="float" office:value="7192" calcext:value-type="float">
            <text:p>719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832407407407407" calcext:value-type="float">
            <text:p>0,00083240740740740700</text:p>
          </table:table-cell>
          <table:table-cell table:formula="of:=[.D126]-[.D125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58" office:value-type="float" office:value="7250" calcext:value-type="float">
            <text:p>72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83912037037037" calcext:value-type="float">
            <text:p>0,00083912037037037000</text:p>
          </table:table-cell>
          <table:table-cell table:formula="of:=[.D127]-[.D12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58" office:value-type="float" office:value="7308" calcext:value-type="float">
            <text:p>730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845833333333333" calcext:value-type="float">
            <text:p>0,00084583333333333300</text:p>
          </table:table-cell>
          <table:table-cell table:formula="of:=[.D128]-[.D127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58" office:value-type="float" office:value="7366" calcext:value-type="float">
            <text:p>7366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852546296296296" calcext:value-type="float">
            <text:p>0,00085254629629629600</text:p>
          </table:table-cell>
          <table:table-cell table:formula="of:=[.D129]-[.D12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58" office:value-type="float" office:value="7424" calcext:value-type="float">
            <text:p>742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859259259259259" calcext:value-type="float">
            <text:p>0,00085925925925925900</text:p>
          </table:table-cell>
          <table:table-cell table:formula="of:=[.D130]-[.D129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58" office:value-type="float" office:value="7482" calcext:value-type="float">
            <text:p>7482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865972222222222" calcext:value-type="float">
            <text:p>0,00086597222222222200</text:p>
          </table:table-cell>
          <table:table-cell table:formula="of:=[.D131]-[.D130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58" office:value-type="float" office:value="7540" calcext:value-type="float">
            <text:p>754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872685185185185" calcext:value-type="float">
            <text:p>0,00087268518518518500</text:p>
          </table:table-cell>
          <table:table-cell table:formula="of:=[.D132]-[.D131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58" office:value-type="float" office:value="7598" calcext:value-type="float">
            <text:p>7598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879398148148148" calcext:value-type="float">
            <text:p>0,00087939814814814800</text:p>
          </table:table-cell>
          <table:table-cell table:formula="of:=[.D133]-[.D13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58" office:value-type="float" office:value="7656" calcext:value-type="float">
            <text:p>765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886111111111111" calcext:value-type="float">
            <text:p>0,00088611111111111100</text:p>
          </table:table-cell>
          <table:table-cell table:formula="of:=[.D134]-[.D133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58" office:value-type="float" office:value="7714" calcext:value-type="float">
            <text:p>7714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892824074074074" calcext:value-type="float">
            <text:p>0,00089282407407407400</text:p>
          </table:table-cell>
          <table:table-cell table:formula="of:=[.D135]-[.D13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58" office:value-type="float" office:value="7772" calcext:value-type="float">
            <text:p>777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899537037037037" calcext:value-type="float">
            <text:p>0,00089953703703703700</text:p>
          </table:table-cell>
          <table:table-cell table:formula="of:=[.D136]-[.D135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58" office:value-type="float" office:value="7830" calcext:value-type="float">
            <text:p>783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90625" calcext:value-type="float">
            <text:p>0,00090625000000000000</text:p>
          </table:table-cell>
          <table:table-cell table:formula="of:=[.D137]-[.D13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58" office:value-type="float" office:value="7888" calcext:value-type="float">
            <text:p>788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912962962962963" calcext:value-type="float">
            <text:p>0,00091296296296296300</text:p>
          </table:table-cell>
          <table:table-cell table:formula="of:=[.D138]-[.D137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58" office:value-type="float" office:value="7946" calcext:value-type="float">
            <text:p>7946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919675925925926" calcext:value-type="float">
            <text:p>0,00091967592592592600</text:p>
          </table:table-cell>
          <table:table-cell table:formula="of:=[.D139]-[.D138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58" office:value-type="float" office:value="8004" calcext:value-type="float">
            <text:p>800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926388888888889" calcext:value-type="float">
            <text:p>0,00092638888888888900</text:p>
          </table:table-cell>
          <table:table-cell table:formula="of:=[.D140]-[.D139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58" office:value-type="float" office:value="8062" calcext:value-type="float">
            <text:p>8062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933101851851852" calcext:value-type="float">
            <text:p>0,00093310185185185200</text:p>
          </table:table-cell>
          <table:table-cell table:formula="of:=[.D141]-[.D14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58" office:value-type="float" office:value="8120" calcext:value-type="float">
            <text:p>81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939814814814815" calcext:value-type="float">
            <text:p>0,00093981481481481500</text:p>
          </table:table-cell>
          <table:table-cell table:formula="of:=[.D142]-[.D141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58" office:value-type="float" office:value="8178" calcext:value-type="float">
            <text:p>8178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946527777777778" calcext:value-type="float">
            <text:p>0,00094652777777777800</text:p>
          </table:table-cell>
          <table:table-cell table:formula="of:=[.D143]-[.D14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58" office:value-type="float" office:value="8236" calcext:value-type="float">
            <text:p>823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953240740740741" calcext:value-type="float">
            <text:p>0,00095324074074074100</text:p>
          </table:table-cell>
          <table:table-cell table:formula="of:=[.D144]-[.D143]" office:value-type="float" office:value="0.00000671296296296303" calcext:value-type="float">
            <text:p>0,00000671296296296303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58" office:value-type="float" office:value="8294" calcext:value-type="float">
            <text:p>8294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959953703703704" calcext:value-type="float">
            <text:p>0,00095995370370370400</text:p>
          </table:table-cell>
          <table:table-cell table:formula="of:=[.D145]-[.D14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58" office:value-type="float" office:value="8352" calcext:value-type="float">
            <text:p>835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966666666666667" calcext:value-type="float">
            <text:p>0,00096666666666666700</text:p>
          </table:table-cell>
          <table:table-cell table:formula="of:=[.D146]-[.D145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58" office:value-type="float" office:value="8410" calcext:value-type="float">
            <text:p>841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97337962962963" calcext:value-type="float">
            <text:p>0,00097337962962963000</text:p>
          </table:table-cell>
          <table:table-cell table:formula="of:=[.D147]-[.D14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58" office:value-type="float" office:value="8468" calcext:value-type="float">
            <text:p>846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980092592592593" calcext:value-type="float">
            <text:p>0,00098009259259259300</text:p>
          </table:table-cell>
          <table:table-cell table:formula="of:=[.D148]-[.D147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58" office:value-type="float" office:value="8526" calcext:value-type="float">
            <text:p>8526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986805555555556" calcext:value-type="float">
            <text:p>0,00098680555555555600</text:p>
          </table:table-cell>
          <table:table-cell table:formula="of:=[.D149]-[.D14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58" office:value-type="float" office:value="8584" calcext:value-type="float">
            <text:p>858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993518518518519" calcext:value-type="float">
            <text:p>0,00099351851851851900</text:p>
          </table:table-cell>
          <table:table-cell table:formula="of:=[.D150]-[.D149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58" office:value-type="float" office:value="8642" calcext:value-type="float">
            <text:p>8642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00023148148148" calcext:value-type="float">
            <text:p>0,00100023148148148000</text:p>
          </table:table-cell>
          <table:table-cell table:formula="of:=[.D151]-[.D15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58" office:value-type="float" office:value="8700" calcext:value-type="float">
            <text:p>87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00694444444444" calcext:value-type="float">
            <text:p>0,00100694444444444000</text:p>
          </table:table-cell>
          <table:table-cell table:formula="of:=[.D152]-[.D151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58" office:value-type="float" office:value="8758" calcext:value-type="float">
            <text:p>8758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01365740740741" calcext:value-type="float">
            <text:p>0,00101365740740741000</text:p>
          </table:table-cell>
          <table:table-cell table:formula="of:=[.D153]-[.D15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58" office:value-type="float" office:value="8816" calcext:value-type="float">
            <text:p>881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02037037037037" calcext:value-type="float">
            <text:p>0,00102037037037037000</text:p>
          </table:table-cell>
          <table:table-cell table:formula="of:=[.D154]-[.D153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58" office:value-type="float" office:value="8874" calcext:value-type="float">
            <text:p>8874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02708333333333" calcext:value-type="float">
            <text:p>0,00102708333333333000</text:p>
          </table:table-cell>
          <table:table-cell table:formula="of:=[.D155]-[.D15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58" office:value-type="float" office:value="8932" calcext:value-type="float">
            <text:p>893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0337962962963" calcext:value-type="float">
            <text:p>0,00103379629629630000</text:p>
          </table:table-cell>
          <table:table-cell table:formula="of:=[.D156]-[.D155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58" office:value-type="float" office:value="8990" calcext:value-type="float">
            <text:p>899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04050925925926" calcext:value-type="float">
            <text:p>0,00104050925925926000</text:p>
          </table:table-cell>
          <table:table-cell table:formula="of:=[.D157]-[.D15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58" office:value-type="float" office:value="9048" calcext:value-type="float">
            <text:p>904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04722222222222" calcext:value-type="float">
            <text:p>0,00104722222222222000</text:p>
          </table:table-cell>
          <table:table-cell table:formula="of:=[.D158]-[.D157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58" office:value-type="float" office:value="9106" calcext:value-type="float">
            <text:p>9106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05393518518519" calcext:value-type="float">
            <text:p>0,00105393518518519000</text:p>
          </table:table-cell>
          <table:table-cell table:formula="of:=[.D159]-[.D158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58" office:value-type="float" office:value="9164" calcext:value-type="float">
            <text:p>916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06064814814815" calcext:value-type="float">
            <text:p>0,00106064814814815000</text:p>
          </table:table-cell>
          <table:table-cell table:formula="of:=[.D160]-[.D159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58" office:value-type="float" office:value="9222" calcext:value-type="float">
            <text:p>9222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06736111111111" calcext:value-type="float">
            <text:p>0,00106736111111111000</text:p>
          </table:table-cell>
          <table:table-cell table:formula="of:=[.D161]-[.D16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58" office:value-type="float" office:value="9280" calcext:value-type="float">
            <text:p>92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07407407407407" calcext:value-type="float">
            <text:p>0,00107407407407407000</text:p>
          </table:table-cell>
          <table:table-cell table:formula="of:=[.D162]-[.D161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58" office:value-type="float" office:value="9338" calcext:value-type="float">
            <text:p>9338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08078703703704" calcext:value-type="float">
            <text:p>0,00108078703703704000</text:p>
          </table:table-cell>
          <table:table-cell table:formula="of:=[.D163]-[.D16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58" office:value-type="float" office:value="9396" calcext:value-type="float">
            <text:p>939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0875" calcext:value-type="float">
            <text:p>0,00108750000000000000</text:p>
          </table:table-cell>
          <table:table-cell table:formula="of:=[.D164]-[.D163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58" office:value-type="float" office:value="9454" calcext:value-type="float">
            <text:p>9454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09421296296296" calcext:value-type="float">
            <text:p>0,00109421296296296000</text:p>
          </table:table-cell>
          <table:table-cell table:formula="of:=[.D165]-[.D16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58" office:value-type="float" office:value="9512" calcext:value-type="float">
            <text:p>951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10092592592593" calcext:value-type="float">
            <text:p>0,00110092592592593000</text:p>
          </table:table-cell>
          <table:table-cell table:formula="of:=[.D166]-[.D165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58" office:value-type="float" office:value="9570" calcext:value-type="float">
            <text:p>957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10763888888889" calcext:value-type="float">
            <text:p>0,00110763888888889000</text:p>
          </table:table-cell>
          <table:table-cell table:formula="of:=[.D167]-[.D16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58" office:value-type="float" office:value="9628" calcext:value-type="float">
            <text:p>962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11435185185185" calcext:value-type="float">
            <text:p>0,00111435185185185000</text:p>
          </table:table-cell>
          <table:table-cell table:formula="of:=[.D168]-[.D167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58" office:value-type="float" office:value="9686" calcext:value-type="float">
            <text:p>9686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12106481481481" calcext:value-type="float">
            <text:p>0,00112106481481481000</text:p>
          </table:table-cell>
          <table:table-cell table:formula="of:=[.D169]-[.D16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58" office:value-type="float" office:value="9744" calcext:value-type="float">
            <text:p>974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12777777777778" calcext:value-type="float">
            <text:p>0,00112777777777778000</text:p>
          </table:table-cell>
          <table:table-cell table:formula="of:=[.D170]-[.D169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58" office:value-type="float" office:value="9802" calcext:value-type="float">
            <text:p>9802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13449074074074" calcext:value-type="float">
            <text:p>0,00113449074074074000</text:p>
          </table:table-cell>
          <table:table-cell table:formula="of:=[.D171]-[.D17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58" office:value-type="float" office:value="9860" calcext:value-type="float">
            <text:p>986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1412037037037" calcext:value-type="float">
            <text:p>0,00114120370370370000</text:p>
          </table:table-cell>
          <table:table-cell table:formula="of:=[.D172]-[.D171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58" office:value-type="float" office:value="9918" calcext:value-type="float">
            <text:p>9918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14791666666667" calcext:value-type="float">
            <text:p>0,00114791666666667000</text:p>
          </table:table-cell>
          <table:table-cell table:formula="of:=[.D173]-[.D17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58" office:value-type="float" office:value="9976" calcext:value-type="float">
            <text:p>997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15462962962963" calcext:value-type="float">
            <text:p>0,00115462962962963000</text:p>
          </table:table-cell>
          <table:table-cell table:formula="of:=[.D174]-[.D173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58" office:value-type="float" office:value="10034" calcext:value-type="float">
            <text:p>10034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16134259259259" calcext:value-type="float">
            <text:p>0,00116134259259259000</text:p>
          </table:table-cell>
          <table:table-cell table:formula="of:=[.D175]-[.D174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58" office:value-type="float" office:value="10092" calcext:value-type="float">
            <text:p>1009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16805555555556" calcext:value-type="float">
            <text:p>0,00116805555555556000</text:p>
          </table:table-cell>
          <table:table-cell table:formula="of:=[.D176]-[.D175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58" office:value-type="float" office:value="10150" calcext:value-type="float">
            <text:p>101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17476851851852" calcext:value-type="float">
            <text:p>0,00117476851851852000</text:p>
          </table:table-cell>
          <table:table-cell table:formula="of:=[.D177]-[.D17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58" office:value-type="float" office:value="10208" calcext:value-type="float">
            <text:p>1020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18148148148148" calcext:value-type="float">
            <text:p>0,00118148148148148000</text:p>
          </table:table-cell>
          <table:table-cell table:formula="of:=[.D178]-[.D177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58" office:value-type="float" office:value="10266" calcext:value-type="float">
            <text:p>10266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18819444444444" calcext:value-type="float">
            <text:p>0,00118819444444444000</text:p>
          </table:table-cell>
          <table:table-cell table:formula="of:=[.D179]-[.D17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58" office:value-type="float" office:value="10324" calcext:value-type="float">
            <text:p>1032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19490740740741" calcext:value-type="float">
            <text:p>0,00119490740740741000</text:p>
          </table:table-cell>
          <table:table-cell table:formula="of:=[.D180]-[.D179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58" office:value-type="float" office:value="10382" calcext:value-type="float">
            <text:p>10382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20162037037037" calcext:value-type="float">
            <text:p>0,00120162037037037000</text:p>
          </table:table-cell>
          <table:table-cell table:formula="of:=[.D181]-[.D18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58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20833333333333" calcext:value-type="float">
            <text:p>0,00120833333333333000</text:p>
          </table:table-cell>
          <table:table-cell table:formula="of:=[.D182]-[.D181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58" office:value-type="float" office:value="10498" calcext:value-type="float">
            <text:p>10498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2150462962963" calcext:value-type="float">
            <text:p>0,00121504629629630000</text:p>
          </table:table-cell>
          <table:table-cell table:formula="of:=[.D183]-[.D18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58" office:value-type="float" office:value="10556" calcext:value-type="float">
            <text:p>1055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22175925925926" calcext:value-type="float">
            <text:p>0,00122175925925926000</text:p>
          </table:table-cell>
          <table:table-cell table:formula="of:=[.D184]-[.D183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58" office:value-type="float" office:value="10614" calcext:value-type="float">
            <text:p>10614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22847222222222" calcext:value-type="float">
            <text:p>0,00122847222222222000</text:p>
          </table:table-cell>
          <table:table-cell table:formula="of:=[.D185]-[.D18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58" office:value-type="float" office:value="10672" calcext:value-type="float">
            <text:p>1067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23518518518519" calcext:value-type="float">
            <text:p>0,00123518518518519000</text:p>
          </table:table-cell>
          <table:table-cell table:formula="of:=[.D186]-[.D185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58" office:value-type="float" office:value="10730" calcext:value-type="float">
            <text:p>1073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24189814814815" calcext:value-type="float">
            <text:p>0,00124189814814815000</text:p>
          </table:table-cell>
          <table:table-cell table:formula="of:=[.D187]-[.D18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58" office:value-type="float" office:value="10788" calcext:value-type="float">
            <text:p>1078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24861111111111" calcext:value-type="float">
            <text:p>0,00124861111111111000</text:p>
          </table:table-cell>
          <table:table-cell table:formula="of:=[.D188]-[.D187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58" office:value-type="float" office:value="10846" calcext:value-type="float">
            <text:p>10846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25532407407407" calcext:value-type="float">
            <text:p>0,00125532407407407000</text:p>
          </table:table-cell>
          <table:table-cell table:formula="of:=[.D189]-[.D18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58" office:value-type="float" office:value="10904" calcext:value-type="float">
            <text:p>1090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26203703703704" calcext:value-type="float">
            <text:p>0,00126203703703704000</text:p>
          </table:table-cell>
          <table:table-cell table:formula="of:=[.D190]-[.D189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58" office:value-type="float" office:value="10962" calcext:value-type="float">
            <text:p>10962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26875" calcext:value-type="float">
            <text:p>0,00126875000000000000</text:p>
          </table:table-cell>
          <table:table-cell table:formula="of:=[.D191]-[.D190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58" office:value-type="float" office:value="11020" calcext:value-type="float">
            <text:p>1102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27546296296296" calcext:value-type="float">
            <text:p>0,00127546296296296000</text:p>
          </table:table-cell>
          <table:table-cell table:formula="of:=[.D192]-[.D191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58" office:value-type="float" office:value="11078" calcext:value-type="float">
            <text:p>11078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28217592592593" calcext:value-type="float">
            <text:p>0,00128217592592593000</text:p>
          </table:table-cell>
          <table:table-cell table:formula="of:=[.D193]-[.D19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58" office:value-type="float" office:value="11136" calcext:value-type="float">
            <text:p>1113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28888888888889" calcext:value-type="float">
            <text:p>0,00128888888888889000</text:p>
          </table:table-cell>
          <table:table-cell table:formula="of:=[.D194]-[.D193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58" office:value-type="float" office:value="11194" calcext:value-type="float">
            <text:p>11194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29560185185185" calcext:value-type="float">
            <text:p>0,00129560185185185000</text:p>
          </table:table-cell>
          <table:table-cell table:formula="of:=[.D195]-[.D19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58" office:value-type="float" office:value="11252" calcext:value-type="float">
            <text:p>1125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30231481481481" calcext:value-type="float">
            <text:p>0,00130231481481481000</text:p>
          </table:table-cell>
          <table:table-cell table:formula="of:=[.D196]-[.D195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58" office:value-type="float" office:value="11310" calcext:value-type="float">
            <text:p>1131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30902777777778" calcext:value-type="float">
            <text:p>0,00130902777777778000</text:p>
          </table:table-cell>
          <table:table-cell table:formula="of:=[.D197]-[.D19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58" office:value-type="float" office:value="11368" calcext:value-type="float">
            <text:p>1136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31574074074074" calcext:value-type="float">
            <text:p>0,00131574074074074000</text:p>
          </table:table-cell>
          <table:table-cell table:formula="of:=[.D198]-[.D197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58" office:value-type="float" office:value="11426" calcext:value-type="float">
            <text:p>11426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3224537037037" calcext:value-type="float">
            <text:p>0,00132245370370370000</text:p>
          </table:table-cell>
          <table:table-cell table:formula="of:=[.D199]-[.D19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58" office:value-type="float" office:value="11484" calcext:value-type="float">
            <text:p>1148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32916666666667" calcext:value-type="float">
            <text:p>0,00132916666666667000</text:p>
          </table:table-cell>
          <table:table-cell table:formula="of:=[.D200]-[.D199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58" office:value-type="float" office:value="11542" calcext:value-type="float">
            <text:p>11542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33587962962963" calcext:value-type="float">
            <text:p>0,00133587962962963000</text:p>
          </table:table-cell>
          <table:table-cell table:formula="of:=[.D201]-[.D20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58" office:value-type="float" office:value="11600" calcext:value-type="float">
            <text:p>11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34259259259259" calcext:value-type="float">
            <text:p>0,00134259259259259000</text:p>
          </table:table-cell>
          <table:table-cell table:formula="of:=[.D202]-[.D201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58" office:value-type="float" office:value="11658" calcext:value-type="float">
            <text:p>11658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34930555555556" calcext:value-type="float">
            <text:p>0,00134930555555556000</text:p>
          </table:table-cell>
          <table:table-cell table:formula="of:=[.D203]-[.D20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58" office:value-type="float" office:value="11716" calcext:value-type="float">
            <text:p>1171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35601851851852" calcext:value-type="float">
            <text:p>0,00135601851851852000</text:p>
          </table:table-cell>
          <table:table-cell table:formula="of:=[.D204]-[.D203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58" office:value-type="float" office:value="11774" calcext:value-type="float">
            <text:p>11774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36273148148148" calcext:value-type="float">
            <text:p>0,00136273148148148000</text:p>
          </table:table-cell>
          <table:table-cell table:formula="of:=[.D205]-[.D20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58" office:value-type="float" office:value="11832" calcext:value-type="float">
            <text:p>1183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36944444444444" calcext:value-type="float">
            <text:p>0,00136944444444444000</text:p>
          </table:table-cell>
          <table:table-cell table:formula="of:=[.D206]-[.D205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58" office:value-type="float" office:value="11890" calcext:value-type="float">
            <text:p>1189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37615740740741" calcext:value-type="float">
            <text:p>0,00137615740740741000</text:p>
          </table:table-cell>
          <table:table-cell table:formula="of:=[.D207]-[.D206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58" office:value-type="float" office:value="11948" calcext:value-type="float">
            <text:p>1194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38287037037037" calcext:value-type="float">
            <text:p>0,00138287037037037000</text:p>
          </table:table-cell>
          <table:table-cell table:formula="of:=[.D208]-[.D207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58" office:value-type="float" office:value="12006" calcext:value-type="float">
            <text:p>12006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38958333333333" calcext:value-type="float">
            <text:p>0,00138958333333333000</text:p>
          </table:table-cell>
          <table:table-cell table:formula="of:=[.D209]-[.D20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58" office:value-type="float" office:value="12064" calcext:value-type="float">
            <text:p>1206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3962962962963" calcext:value-type="float">
            <text:p>0,00139629629629630000</text:p>
          </table:table-cell>
          <table:table-cell table:formula="of:=[.D210]-[.D209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58" office:value-type="float" office:value="12122" calcext:value-type="float">
            <text:p>12122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40300925925926" calcext:value-type="float">
            <text:p>0,00140300925925926000</text:p>
          </table:table-cell>
          <table:table-cell table:formula="of:=[.D211]-[.D21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58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40972222222222" calcext:value-type="float">
            <text:p>0,00140972222222222000</text:p>
          </table:table-cell>
          <table:table-cell table:formula="of:=[.D212]-[.D211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58" office:value-type="float" office:value="12238" calcext:value-type="float">
            <text:p>12238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41643518518519" calcext:value-type="float">
            <text:p>0,00141643518518519000</text:p>
          </table:table-cell>
          <table:table-cell table:formula="of:=[.D213]-[.D21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58" office:value-type="float" office:value="12296" calcext:value-type="float">
            <text:p>1229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42314814814815" calcext:value-type="float">
            <text:p>0,00142314814814815000</text:p>
          </table:table-cell>
          <table:table-cell table:formula="of:=[.D214]-[.D213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58" office:value-type="float" office:value="12354" calcext:value-type="float">
            <text:p>12354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42986111111111" calcext:value-type="float">
            <text:p>0,00142986111111111000</text:p>
          </table:table-cell>
          <table:table-cell table:formula="of:=[.D215]-[.D21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58" office:value-type="float" office:value="12412" calcext:value-type="float">
            <text:p>1241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43657407407407" calcext:value-type="float">
            <text:p>0,00143657407407407000</text:p>
          </table:table-cell>
          <table:table-cell table:formula="of:=[.D216]-[.D215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58" office:value-type="float" office:value="12470" calcext:value-type="float">
            <text:p>1247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44328703703704" calcext:value-type="float">
            <text:p>0,00144328703703704000</text:p>
          </table:table-cell>
          <table:table-cell table:formula="of:=[.D217]-[.D21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58" office:value-type="float" office:value="12528" calcext:value-type="float">
            <text:p>1252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45" calcext:value-type="float">
            <text:p>0,00145000000000000000</text:p>
          </table:table-cell>
          <table:table-cell table:formula="of:=[.D218]-[.D217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58" office:value-type="float" office:value="12586" calcext:value-type="float">
            <text:p>12586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45671296296296" calcext:value-type="float">
            <text:p>0,00145671296296296000</text:p>
          </table:table-cell>
          <table:table-cell table:formula="of:=[.D219]-[.D21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58" office:value-type="float" office:value="12644" calcext:value-type="float">
            <text:p>1264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46342592592593" calcext:value-type="float">
            <text:p>0,00146342592592593000</text:p>
          </table:table-cell>
          <table:table-cell table:formula="of:=[.D220]-[.D219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58" office:value-type="float" office:value="12702" calcext:value-type="float">
            <text:p>12702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47013888888889" calcext:value-type="float">
            <text:p>0,00147013888888889000</text:p>
          </table:table-cell>
          <table:table-cell table:formula="of:=[.D221]-[.D22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58" office:value-type="float" office:value="12760" calcext:value-type="float">
            <text:p>127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47685185185185" calcext:value-type="float">
            <text:p>0,00147685185185185000</text:p>
          </table:table-cell>
          <table:table-cell table:formula="of:=[.D222]-[.D221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58" office:value-type="float" office:value="12818" calcext:value-type="float">
            <text:p>12818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48356481481481" calcext:value-type="float">
            <text:p>0,00148356481481481000</text:p>
          </table:table-cell>
          <table:table-cell table:formula="of:=[.D223]-[.D222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58" office:value-type="float" office:value="12876" calcext:value-type="float">
            <text:p>1287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49027777777778" calcext:value-type="float">
            <text:p>0,00149027777777778000</text:p>
          </table:table-cell>
          <table:table-cell table:formula="of:=[.D224]-[.D223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58" office:value-type="float" office:value="12934" calcext:value-type="float">
            <text:p>12934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49699074074074" calcext:value-type="float">
            <text:p>0,00149699074074074000</text:p>
          </table:table-cell>
          <table:table-cell table:formula="of:=[.D225]-[.D22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58" office:value-type="float" office:value="12992" calcext:value-type="float">
            <text:p>1299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5037037037037" calcext:value-type="float">
            <text:p>0,00150370370370370000</text:p>
          </table:table-cell>
          <table:table-cell table:formula="of:=[.D226]-[.D225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58" office:value-type="float" office:value="13050" calcext:value-type="float">
            <text:p>130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51041666666667" calcext:value-type="float">
            <text:p>0,00151041666666667000</text:p>
          </table:table-cell>
          <table:table-cell table:formula="of:=[.D227]-[.D22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58" office:value-type="float" office:value="13108" calcext:value-type="float">
            <text:p>1310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51712962962963" calcext:value-type="float">
            <text:p>0,00151712962962963000</text:p>
          </table:table-cell>
          <table:table-cell table:formula="of:=[.D228]-[.D227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58" office:value-type="float" office:value="13166" calcext:value-type="float">
            <text:p>13166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52384259259259" calcext:value-type="float">
            <text:p>0,00152384259259259000</text:p>
          </table:table-cell>
          <table:table-cell table:formula="of:=[.D229]-[.D22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58" office:value-type="float" office:value="13224" calcext:value-type="float">
            <text:p>1322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53055555555556" calcext:value-type="float">
            <text:p>0,00153055555555556000</text:p>
          </table:table-cell>
          <table:table-cell table:formula="of:=[.D230]-[.D229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58" office:value-type="float" office:value="13282" calcext:value-type="float">
            <text:p>13282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53726851851852" calcext:value-type="float">
            <text:p>0,00153726851851852000</text:p>
          </table:table-cell>
          <table:table-cell table:formula="of:=[.D231]-[.D23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58" office:value-type="float" office:value="13340" calcext:value-type="float">
            <text:p>1334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54398148148148" calcext:value-type="float">
            <text:p>0,00154398148148148000</text:p>
          </table:table-cell>
          <table:table-cell table:formula="of:=[.D232]-[.D231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58" office:value-type="float" office:value="13398" calcext:value-type="float">
            <text:p>13398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55069444444444" calcext:value-type="float">
            <text:p>0,00155069444444444000</text:p>
          </table:table-cell>
          <table:table-cell table:formula="of:=[.D233]-[.D23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58" office:value-type="float" office:value="13456" calcext:value-type="float">
            <text:p>1345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55740740740741" calcext:value-type="float">
            <text:p>0,00155740740740741000</text:p>
          </table:table-cell>
          <table:table-cell table:formula="of:=[.D234]-[.D233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58" office:value-type="float" office:value="13514" calcext:value-type="float">
            <text:p>13514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56412037037037" calcext:value-type="float">
            <text:p>0,00156412037037037000</text:p>
          </table:table-cell>
          <table:table-cell table:formula="of:=[.D235]-[.D23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58" office:value-type="float" office:value="13572" calcext:value-type="float">
            <text:p>1357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57083333333333" calcext:value-type="float">
            <text:p>0,00157083333333333000</text:p>
          </table:table-cell>
          <table:table-cell table:formula="of:=[.D236]-[.D235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58" office:value-type="float" office:value="13630" calcext:value-type="float">
            <text:p>1363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5775462962963" calcext:value-type="float">
            <text:p>0,00157754629629630000</text:p>
          </table:table-cell>
          <table:table-cell table:formula="of:=[.D237]-[.D23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58" office:value-type="float" office:value="13688" calcext:value-type="float">
            <text:p>1368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58425925925926" calcext:value-type="float">
            <text:p>0,00158425925925926000</text:p>
          </table:table-cell>
          <table:table-cell table:formula="of:=[.D238]-[.D237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58" office:value-type="float" office:value="13746" calcext:value-type="float">
            <text:p>13746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59097222222222" calcext:value-type="float">
            <text:p>0,00159097222222222000</text:p>
          </table:table-cell>
          <table:table-cell table:formula="of:=[.D239]-[.D238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58" office:value-type="float" office:value="13804" calcext:value-type="float">
            <text:p>1380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59768518518519" calcext:value-type="float">
            <text:p>0,00159768518518519000</text:p>
          </table:table-cell>
          <table:table-cell table:formula="of:=[.D240]-[.D239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58" office:value-type="float" office:value="13862" calcext:value-type="float">
            <text:p>13862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60439814814815" calcext:value-type="float">
            <text:p>0,00160439814814815000</text:p>
          </table:table-cell>
          <table:table-cell table:formula="of:=[.D241]-[.D24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58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61111111111111" calcext:value-type="float">
            <text:p>0,00161111111111111000</text:p>
          </table:table-cell>
          <table:table-cell table:formula="of:=[.D242]-[.D241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58" office:value-type="float" office:value="13978" calcext:value-type="float">
            <text:p>13978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61782407407407" calcext:value-type="float">
            <text:p>0,00161782407407407000</text:p>
          </table:table-cell>
          <table:table-cell table:formula="of:=[.D243]-[.D24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58" office:value-type="float" office:value="14036" calcext:value-type="float">
            <text:p>1403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62453703703704" calcext:value-type="float">
            <text:p>0,00162453703703704000</text:p>
          </table:table-cell>
          <table:table-cell table:formula="of:=[.D244]-[.D243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58" office:value-type="float" office:value="14094" calcext:value-type="float">
            <text:p>14094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63125" calcext:value-type="float">
            <text:p>0,00163125000000000000</text:p>
          </table:table-cell>
          <table:table-cell table:formula="of:=[.D245]-[.D24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58" office:value-type="float" office:value="14152" calcext:value-type="float">
            <text:p>1415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63796296296296" calcext:value-type="float">
            <text:p>0,00163796296296296000</text:p>
          </table:table-cell>
          <table:table-cell table:formula="of:=[.D246]-[.D245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58" office:value-type="float" office:value="14210" calcext:value-type="float">
            <text:p>1421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64467592592593" calcext:value-type="float">
            <text:p>0,00164467592592593000</text:p>
          </table:table-cell>
          <table:table-cell table:formula="of:=[.D247]-[.D24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58" office:value-type="float" office:value="14268" calcext:value-type="float">
            <text:p>1426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65138888888889" calcext:value-type="float">
            <text:p>0,00165138888888889000</text:p>
          </table:table-cell>
          <table:table-cell table:formula="of:=[.D248]-[.D247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58" office:value-type="float" office:value="14326" calcext:value-type="float">
            <text:p>14326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65810185185185" calcext:value-type="float">
            <text:p>0,00165810185185185000</text:p>
          </table:table-cell>
          <table:table-cell table:formula="of:=[.D249]-[.D24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58" office:value-type="float" office:value="14384" calcext:value-type="float">
            <text:p>1438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66481481481481" calcext:value-type="float">
            <text:p>0,00166481481481481000</text:p>
          </table:table-cell>
          <table:table-cell table:formula="of:=[.D250]-[.D249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58" office:value-type="float" office:value="14442" calcext:value-type="float">
            <text:p>14442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67152777777778" calcext:value-type="float">
            <text:p>0,00167152777777778000</text:p>
          </table:table-cell>
          <table:table-cell table:formula="of:=[.D251]-[.D25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58" office:value-type="float" office:value="14500" calcext:value-type="float">
            <text:p>14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67824074074074" calcext:value-type="float">
            <text:p>0,00167824074074074000</text:p>
          </table:table-cell>
          <table:table-cell table:formula="of:=[.D252]-[.D251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58" office:value-type="float" office:value="14558" calcext:value-type="float">
            <text:p>14558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6849537037037" calcext:value-type="float">
            <text:p>0,00168495370370370000</text:p>
          </table:table-cell>
          <table:table-cell table:formula="of:=[.D253]-[.D25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58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69166666666667" calcext:value-type="float">
            <text:p>0,00169166666666667000</text:p>
          </table:table-cell>
          <table:table-cell table:formula="of:=[.D254]-[.D253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58" office:value-type="float" office:value="14674" calcext:value-type="float">
            <text:p>14674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69837962962963" calcext:value-type="float">
            <text:p>0,00169837962962963000</text:p>
          </table:table-cell>
          <table:table-cell table:formula="of:=[.D255]-[.D254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58" office:value-type="float" office:value="14732" calcext:value-type="float">
            <text:p>1473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70509259259259" calcext:value-type="float">
            <text:p>0,00170509259259259000</text:p>
          </table:table-cell>
          <table:table-cell table:formula="of:=[.D256]-[.D255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58" office:value-type="float" office:value="14790" calcext:value-type="float">
            <text:p>1479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71180555555556" calcext:value-type="float">
            <text:p>0,00171180555555556000</text:p>
          </table:table-cell>
          <table:table-cell table:formula="of:=[.D257]-[.D25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58" office:value-type="float" office:value="14848" calcext:value-type="float">
            <text:p>1484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71851851851852" calcext:value-type="float">
            <text:p>0,00171851851851852000</text:p>
          </table:table-cell>
          <table:table-cell table:formula="of:=[.D258]-[.D257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58" office:value-type="float" office:value="14906" calcext:value-type="float">
            <text:p>14906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72523148148148" calcext:value-type="float">
            <text:p>0,00172523148148148000</text:p>
          </table:table-cell>
          <table:table-cell table:formula="of:=[.D259]-[.D25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58" office:value-type="float" office:value="14964" calcext:value-type="float">
            <text:p>1496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73194444444444" calcext:value-type="float">
            <text:p>0,00173194444444444000</text:p>
          </table:table-cell>
          <table:table-cell table:formula="of:=[.D260]-[.D259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58" office:value-type="float" office:value="15022" calcext:value-type="float">
            <text:p>15022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73865740740741" calcext:value-type="float">
            <text:p>0,00173865740740741000</text:p>
          </table:table-cell>
          <table:table-cell table:formula="of:=[.D261]-[.D26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58" office:value-type="float" office:value="15080" calcext:value-type="float">
            <text:p>150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74537037037037" calcext:value-type="float">
            <text:p>0,00174537037037037000</text:p>
          </table:table-cell>
          <table:table-cell table:formula="of:=[.D262]-[.D261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58" office:value-type="float" office:value="15138" calcext:value-type="float">
            <text:p>15138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75208333333333" calcext:value-type="float">
            <text:p>0,00175208333333333000</text:p>
          </table:table-cell>
          <table:table-cell table:formula="of:=[.D263]-[.D26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58" office:value-type="float" office:value="15196" calcext:value-type="float">
            <text:p>1519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7587962962963" calcext:value-type="float">
            <text:p>0,00175879629629630000</text:p>
          </table:table-cell>
          <table:table-cell table:formula="of:=[.D264]-[.D263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58" office:value-type="float" office:value="15254" calcext:value-type="float">
            <text:p>15254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76550925925926" calcext:value-type="float">
            <text:p>0,00176550925925926000</text:p>
          </table:table-cell>
          <table:table-cell table:formula="of:=[.D265]-[.D26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58" office:value-type="float" office:value="15312" calcext:value-type="float">
            <text:p>1531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77222222222222" calcext:value-type="float">
            <text:p>0,00177222222222222000</text:p>
          </table:table-cell>
          <table:table-cell table:formula="of:=[.D266]-[.D265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58" office:value-type="float" office:value="15370" calcext:value-type="float">
            <text:p>1537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77893518518519" calcext:value-type="float">
            <text:p>0,00177893518518519000</text:p>
          </table:table-cell>
          <table:table-cell table:formula="of:=[.D267]-[.D26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58" office:value-type="float" office:value="15428" calcext:value-type="float">
            <text:p>1542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78564814814815" calcext:value-type="float">
            <text:p>0,00178564814814815000</text:p>
          </table:table-cell>
          <table:table-cell table:formula="of:=[.D268]-[.D267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58" office:value-type="float" office:value="15486" calcext:value-type="float">
            <text:p>15486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79236111111111" calcext:value-type="float">
            <text:p>0,00179236111111111000</text:p>
          </table:table-cell>
          <table:table-cell table:formula="of:=[.D269]-[.D26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58" office:value-type="float" office:value="15544" calcext:value-type="float">
            <text:p>1554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79907407407407" calcext:value-type="float">
            <text:p>0,00179907407407407000</text:p>
          </table:table-cell>
          <table:table-cell table:formula="of:=[.D270]-[.D269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58" office:value-type="float" office:value="15602" calcext:value-type="float">
            <text:p>15602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80578703703704" calcext:value-type="float">
            <text:p>0,00180578703703704000</text:p>
          </table:table-cell>
          <table:table-cell table:formula="of:=[.D271]-[.D270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58" office:value-type="float" office:value="15660" calcext:value-type="float">
            <text:p>1566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8125" calcext:value-type="float">
            <text:p>0,00181250000000000000</text:p>
          </table:table-cell>
          <table:table-cell table:formula="of:=[.D272]-[.D271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58" office:value-type="float" office:value="15718" calcext:value-type="float">
            <text:p>15718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81921296296296" calcext:value-type="float">
            <text:p>0,00181921296296296000</text:p>
          </table:table-cell>
          <table:table-cell table:formula="of:=[.D273]-[.D27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58" office:value-type="float" office:value="15776" calcext:value-type="float">
            <text:p>1577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82592592592593" calcext:value-type="float">
            <text:p>0,00182592592592593000</text:p>
          </table:table-cell>
          <table:table-cell table:formula="of:=[.D274]-[.D273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58" office:value-type="float" office:value="15834" calcext:value-type="float">
            <text:p>15834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83263888888889" calcext:value-type="float">
            <text:p>0,00183263888888889000</text:p>
          </table:table-cell>
          <table:table-cell table:formula="of:=[.D275]-[.D27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58" office:value-type="float" office:value="15892" calcext:value-type="float">
            <text:p>15892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83935185185185" calcext:value-type="float">
            <text:p>0,00183935185185185000</text:p>
          </table:table-cell>
          <table:table-cell table:formula="of:=[.D276]-[.D275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58" office:value-type="float" office:value="15950" calcext:value-type="float">
            <text:p>159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84606481481482" calcext:value-type="float">
            <text:p>0,00184606481481482000</text:p>
          </table:table-cell>
          <table:table-cell table:formula="of:=[.D277]-[.D276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58" office:value-type="float" office:value="16008" calcext:value-type="float">
            <text:p>16008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85277777777778" calcext:value-type="float">
            <text:p>0,00185277777777778000</text:p>
          </table:table-cell>
          <table:table-cell table:formula="of:=[.D278]-[.D277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58" office:value-type="float" office:value="16066" calcext:value-type="float">
            <text:p>16066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85949074074074" calcext:value-type="float">
            <text:p>0,00185949074074074000</text:p>
          </table:table-cell>
          <table:table-cell table:formula="of:=[.D279]-[.D27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58" office:value-type="float" office:value="16124" calcext:value-type="float">
            <text:p>16124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8662037037037" calcext:value-type="float">
            <text:p>0,00186620370370370000</text:p>
          </table:table-cell>
          <table:table-cell table:formula="of:=[.D280]-[.D279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58" office:value-type="float" office:value="16182" calcext:value-type="float">
            <text:p>16182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87291666666667" calcext:value-type="float">
            <text:p>0,00187291666666667000</text:p>
          </table:table-cell>
          <table:table-cell table:formula="of:=[.D281]-[.D28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58" office:value-type="float" office:value="16240" calcext:value-type="float">
            <text:p>1624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87962962962963" calcext:value-type="float">
            <text:p>0,00187962962962963000</text:p>
          </table:table-cell>
          <table:table-cell table:formula="of:=[.D282]-[.D281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58" office:value-type="float" office:value="16298" calcext:value-type="float">
            <text:p>16298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88634259259259" calcext:value-type="float">
            <text:p>0,00188634259259259000</text:p>
          </table:table-cell>
          <table:table-cell table:formula="of:=[.D283]-[.D282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58" office:value-type="float" office:value="16356" calcext:value-type="float">
            <text:p>16356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89305555555556" calcext:value-type="float">
            <text:p>0,00189305555555556000</text:p>
          </table:table-cell>
          <table:table-cell table:formula="of:=[.D284]-[.D283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58" office:value-type="float" office:value="16414" calcext:value-type="float">
            <text:p>16414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89976851851852" calcext:value-type="float">
            <text:p>0,00189976851851852000</text:p>
          </table:table-cell>
          <table:table-cell table:formula="of:=[.D285]-[.D284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58" office:value-type="float" office:value="16472" calcext:value-type="float">
            <text:p>16472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90648148148148" calcext:value-type="float">
            <text:p>0,00190648148148148000</text:p>
          </table:table-cell>
          <table:table-cell table:formula="of:=[.D286]-[.D285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58" office:value-type="float" office:value="16530" calcext:value-type="float">
            <text:p>1653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91319444444444" calcext:value-type="float">
            <text:p>0,00191319444444444000</text:p>
          </table:table-cell>
          <table:table-cell table:formula="of:=[.D287]-[.D286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58" office:value-type="float" office:value="16588" calcext:value-type="float">
            <text:p>16588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91990740740741" calcext:value-type="float">
            <text:p>0,00191990740740741000</text:p>
          </table:table-cell>
          <table:table-cell table:formula="of:=[.D288]-[.D287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58" office:value-type="float" office:value="16646" calcext:value-type="float">
            <text:p>16646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92662037037037" calcext:value-type="float">
            <text:p>0,00192662037037037000</text:p>
          </table:table-cell>
          <table:table-cell table:formula="of:=[.D289]-[.D288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58" office:value-type="float" office:value="16704" calcext:value-type="float">
            <text:p>16704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93333333333333" calcext:value-type="float">
            <text:p>0,00193333333333333000</text:p>
          </table:table-cell>
          <table:table-cell table:formula="of:=[.D290]-[.D289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58" office:value-type="float" office:value="16762" calcext:value-type="float">
            <text:p>16762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9400462962963" calcext:value-type="float">
            <text:p>0,00194004629629630000</text:p>
          </table:table-cell>
          <table:table-cell table:formula="of:=[.D291]-[.D290]" office:value-type="float" office:value="0.00000671296296296292" calcext:value-type="float">
            <text:p>0,00000671296296296292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58" office:value-type="float" office:value="16820" calcext:value-type="float">
            <text:p>1682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94675925925926" calcext:value-type="float">
            <text:p>0,00194675925925926000</text:p>
          </table:table-cell>
          <table:table-cell table:formula="of:=[.D292]-[.D291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58" office:value-type="float" office:value="16878" calcext:value-type="float">
            <text:p>16878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95347222222222" calcext:value-type="float">
            <text:p>0,00195347222222222000</text:p>
          </table:table-cell>
          <table:table-cell table:formula="of:=[.D293]-[.D292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58" office:value-type="float" office:value="16936" calcext:value-type="float">
            <text:p>16936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96018518518519" calcext:value-type="float">
            <text:p>0,00196018518518519000</text:p>
          </table:table-cell>
          <table:table-cell table:formula="of:=[.D294]-[.D293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58" office:value-type="float" office:value="16994" calcext:value-type="float">
            <text:p>16994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96689814814815" calcext:value-type="float">
            <text:p>0,00196689814814815000</text:p>
          </table:table-cell>
          <table:table-cell table:formula="of:=[.D295]-[.D294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58" office:value-type="float" office:value="17052" calcext:value-type="float">
            <text:p>17052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97361111111111" calcext:value-type="float">
            <text:p>0,00197361111111111000</text:p>
          </table:table-cell>
          <table:table-cell table:formula="of:=[.D296]-[.D295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58" office:value-type="float" office:value="17110" calcext:value-type="float">
            <text:p>1711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98032407407407" calcext:value-type="float">
            <text:p>0,00198032407407407000</text:p>
          </table:table-cell>
          <table:table-cell table:formula="of:=[.D297]-[.D296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58" office:value-type="float" office:value="17168" calcext:value-type="float">
            <text:p>17168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98703703703704" calcext:value-type="float">
            <text:p>0,00198703703703704000</text:p>
          </table:table-cell>
          <table:table-cell table:formula="of:=[.D298]-[.D297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58" office:value-type="float" office:value="17226" calcext:value-type="float">
            <text:p>17226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99375" calcext:value-type="float">
            <text:p>0,00199375000000000000</text:p>
          </table:table-cell>
          <table:table-cell table:formula="of:=[.D299]-[.D298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58" office:value-type="float" office:value="17284" calcext:value-type="float">
            <text:p>17284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00046296296296" calcext:value-type="float">
            <text:p>0,00200046296296296000</text:p>
          </table:table-cell>
          <table:table-cell table:formula="of:=[.D300]-[.D299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58" office:value-type="float" office:value="17342" calcext:value-type="float">
            <text:p>17342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00717592592593" calcext:value-type="float">
            <text:p>0,00200717592592593000</text:p>
          </table:table-cell>
          <table:table-cell table:formula="of:=[.D301]-[.D300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58" office:value-type="float" office:value="17400" calcext:value-type="float">
            <text:p>174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01388888888889" calcext:value-type="float">
            <text:p>0,00201388888888889000</text:p>
          </table:table-cell>
          <table:table-cell table:formula="of:=[.D302]-[.D301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58" office:value-type="float" office:value="17458" calcext:value-type="float">
            <text:p>17458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02060185185185" calcext:value-type="float">
            <text:p>0,00202060185185185000</text:p>
          </table:table-cell>
          <table:table-cell table:formula="of:=[.D303]-[.D302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58" office:value-type="float" office:value="17516" calcext:value-type="float">
            <text:p>17516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02731481481481" calcext:value-type="float">
            <text:p>0,00202731481481481000</text:p>
          </table:table-cell>
          <table:table-cell table:formula="of:=[.D304]-[.D303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58" office:value-type="float" office:value="17574" calcext:value-type="float">
            <text:p>17574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03402777777778" calcext:value-type="float">
            <text:p>0,00203402777777778000</text:p>
          </table:table-cell>
          <table:table-cell table:formula="of:=[.D305]-[.D304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58" office:value-type="float" office:value="17632" calcext:value-type="float">
            <text:p>17632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04074074074074" calcext:value-type="float">
            <text:p>0,00204074074074074000</text:p>
          </table:table-cell>
          <table:table-cell table:formula="of:=[.D306]-[.D305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58" office:value-type="float" office:value="17690" calcext:value-type="float">
            <text:p>1769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0474537037037" calcext:value-type="float">
            <text:p>0,00204745370370370000</text:p>
          </table:table-cell>
          <table:table-cell table:formula="of:=[.D307]-[.D306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58" office:value-type="float" office:value="17748" calcext:value-type="float">
            <text:p>17748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05416666666667" calcext:value-type="float">
            <text:p>0,00205416666666667000</text:p>
          </table:table-cell>
          <table:table-cell table:formula="of:=[.D308]-[.D307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58" office:value-type="float" office:value="17806" calcext:value-type="float">
            <text:p>17806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06087962962963" calcext:value-type="float">
            <text:p>0,00206087962962963000</text:p>
          </table:table-cell>
          <table:table-cell table:formula="of:=[.D309]-[.D308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58" office:value-type="float" office:value="17864" calcext:value-type="float">
            <text:p>17864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06759259259259" calcext:value-type="float">
            <text:p>0,00206759259259259000</text:p>
          </table:table-cell>
          <table:table-cell table:formula="of:=[.D310]-[.D309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58" office:value-type="float" office:value="17922" calcext:value-type="float">
            <text:p>17922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07430555555556" calcext:value-type="float">
            <text:p>0,00207430555555556000</text:p>
          </table:table-cell>
          <table:table-cell table:formula="of:=[.D311]-[.D310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58" office:value-type="float" office:value="17980" calcext:value-type="float">
            <text:p>1798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08101851851852" calcext:value-type="float">
            <text:p>0,00208101851851852000</text:p>
          </table:table-cell>
          <table:table-cell table:formula="of:=[.D312]-[.D311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58" office:value-type="float" office:value="18038" calcext:value-type="float">
            <text:p>18038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08773148148148" calcext:value-type="float">
            <text:p>0,00208773148148148000</text:p>
          </table:table-cell>
          <table:table-cell table:formula="of:=[.D313]-[.D312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58" office:value-type="float" office:value="18096" calcext:value-type="float">
            <text:p>18096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09444444444444" calcext:value-type="float">
            <text:p>0,00209444444444444000</text:p>
          </table:table-cell>
          <table:table-cell table:formula="of:=[.D314]-[.D313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58" office:value-type="float" office:value="18154" calcext:value-type="float">
            <text:p>18154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10115740740741" calcext:value-type="float">
            <text:p>0,00210115740740741000</text:p>
          </table:table-cell>
          <table:table-cell table:formula="of:=[.D315]-[.D314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58" office:value-type="float" office:value="18212" calcext:value-type="float">
            <text:p>18212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10787037037037" calcext:value-type="float">
            <text:p>0,00210787037037037000</text:p>
          </table:table-cell>
          <table:table-cell table:formula="of:=[.D316]-[.D315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58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11458333333333" calcext:value-type="float">
            <text:p>0,00211458333333333000</text:p>
          </table:table-cell>
          <table:table-cell table:formula="of:=[.D317]-[.D316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58" office:value-type="float" office:value="18328" calcext:value-type="float">
            <text:p>18328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1212962962963" calcext:value-type="float">
            <text:p>0,00212129629629630000</text:p>
          </table:table-cell>
          <table:table-cell table:formula="of:=[.D318]-[.D317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58" office:value-type="float" office:value="18386" calcext:value-type="float">
            <text:p>18386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12800925925926" calcext:value-type="float">
            <text:p>0,00212800925925926000</text:p>
          </table:table-cell>
          <table:table-cell table:formula="of:=[.D319]-[.D318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58" office:value-type="float" office:value="18444" calcext:value-type="float">
            <text:p>18444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13472222222222" calcext:value-type="float">
            <text:p>0,00213472222222222000</text:p>
          </table:table-cell>
          <table:table-cell table:formula="of:=[.D320]-[.D319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58" office:value-type="float" office:value="18502" calcext:value-type="float">
            <text:p>18502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14143518518519" calcext:value-type="float">
            <text:p>0,00214143518518519000</text:p>
          </table:table-cell>
          <table:table-cell table:formula="of:=[.D321]-[.D320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58" office:value-type="float" office:value="18560" calcext:value-type="float">
            <text:p>1856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14814814814815" calcext:value-type="float">
            <text:p>0,00214814814814815000</text:p>
          </table:table-cell>
          <table:table-cell table:formula="of:=[.D322]-[.D321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58" office:value-type="float" office:value="18618" calcext:value-type="float">
            <text:p>18618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15486111111111" calcext:value-type="float">
            <text:p>0,00215486111111111000</text:p>
          </table:table-cell>
          <table:table-cell table:formula="of:=[.D323]-[.D322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58" office:value-type="float" office:value="18676" calcext:value-type="float">
            <text:p>18676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16157407407407" calcext:value-type="float">
            <text:p>0,00216157407407407000</text:p>
          </table:table-cell>
          <table:table-cell table:formula="of:=[.D324]-[.D323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58" office:value-type="float" office:value="18734" calcext:value-type="float">
            <text:p>18734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16828703703704" calcext:value-type="float">
            <text:p>0,00216828703703704000</text:p>
          </table:table-cell>
          <table:table-cell table:formula="of:=[.D325]-[.D324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58" office:value-type="float" office:value="18792" calcext:value-type="float">
            <text:p>18792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175" calcext:value-type="float">
            <text:p>0,00217500000000000000</text:p>
          </table:table-cell>
          <table:table-cell table:formula="of:=[.D326]-[.D325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58" office:value-type="float" office:value="18850" calcext:value-type="float">
            <text:p>1885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18171296296296" calcext:value-type="float">
            <text:p>0,00218171296296296000</text:p>
          </table:table-cell>
          <table:table-cell table:formula="of:=[.D327]-[.D326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58" office:value-type="float" office:value="18908" calcext:value-type="float">
            <text:p>18908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18842592592593" calcext:value-type="float">
            <text:p>0,00218842592592593000</text:p>
          </table:table-cell>
          <table:table-cell table:formula="of:=[.D328]-[.D327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58" office:value-type="float" office:value="18966" calcext:value-type="float">
            <text:p>18966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19513888888889" calcext:value-type="float">
            <text:p>0,00219513888888889000</text:p>
          </table:table-cell>
          <table:table-cell table:formula="of:=[.D329]-[.D328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58" office:value-type="float" office:value="19024" calcext:value-type="float">
            <text:p>19024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20185185185185" calcext:value-type="float">
            <text:p>0,00220185185185185000</text:p>
          </table:table-cell>
          <table:table-cell table:formula="of:=[.D330]-[.D329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58" office:value-type="float" office:value="19082" calcext:value-type="float">
            <text:p>19082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20856481481481" calcext:value-type="float">
            <text:p>0,00220856481481481000</text:p>
          </table:table-cell>
          <table:table-cell table:formula="of:=[.D331]-[.D330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58" office:value-type="float" office:value="19140" calcext:value-type="float">
            <text:p>1914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21527777777778" calcext:value-type="float">
            <text:p>0,00221527777777778000</text:p>
          </table:table-cell>
          <table:table-cell table:formula="of:=[.D332]-[.D331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58" office:value-type="float" office:value="19198" calcext:value-type="float">
            <text:p>19198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22199074074074" calcext:value-type="float">
            <text:p>0,00222199074074074000</text:p>
          </table:table-cell>
          <table:table-cell table:formula="of:=[.D333]-[.D332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58" office:value-type="float" office:value="19256" calcext:value-type="float">
            <text:p>19256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2287037037037" calcext:value-type="float">
            <text:p>0,00222870370370370000</text:p>
          </table:table-cell>
          <table:table-cell table:formula="of:=[.D334]-[.D333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58" office:value-type="float" office:value="19314" calcext:value-type="float">
            <text:p>19314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23541666666667" calcext:value-type="float">
            <text:p>0,00223541666666667000</text:p>
          </table:table-cell>
          <table:table-cell table:formula="of:=[.D335]-[.D334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58" office:value-type="float" office:value="19372" calcext:value-type="float">
            <text:p>19372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24212962962963" calcext:value-type="float">
            <text:p>0,00224212962962963000</text:p>
          </table:table-cell>
          <table:table-cell table:formula="of:=[.D336]-[.D335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58" office:value-type="float" office:value="19430" calcext:value-type="float">
            <text:p>1943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24884259259259" calcext:value-type="float">
            <text:p>0,00224884259259259000</text:p>
          </table:table-cell>
          <table:table-cell table:formula="of:=[.D337]-[.D336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58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25555555555556" calcext:value-type="float">
            <text:p>0,00225555555555556000</text:p>
          </table:table-cell>
          <table:table-cell table:formula="of:=[.D338]-[.D337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58" office:value-type="float" office:value="19546" calcext:value-type="float">
            <text:p>19546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26226851851852" calcext:value-type="float">
            <text:p>0,00226226851851852000</text:p>
          </table:table-cell>
          <table:table-cell table:formula="of:=[.D339]-[.D338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58" office:value-type="float" office:value="19604" calcext:value-type="float">
            <text:p>19604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26898148148148" calcext:value-type="float">
            <text:p>0,00226898148148148000</text:p>
          </table:table-cell>
          <table:table-cell table:formula="of:=[.D340]-[.D339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58" office:value-type="float" office:value="19662" calcext:value-type="float">
            <text:p>19662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27569444444444" calcext:value-type="float">
            <text:p>0,00227569444444444000</text:p>
          </table:table-cell>
          <table:table-cell table:formula="of:=[.D341]-[.D340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58" office:value-type="float" office:value="19720" calcext:value-type="float">
            <text:p>1972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28240740740741" calcext:value-type="float">
            <text:p>0,00228240740740741000</text:p>
          </table:table-cell>
          <table:table-cell table:formula="of:=[.D342]-[.D341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58" office:value-type="float" office:value="19778" calcext:value-type="float">
            <text:p>19778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28912037037037" calcext:value-type="float">
            <text:p>0,00228912037037037000</text:p>
          </table:table-cell>
          <table:table-cell table:formula="of:=[.D343]-[.D342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58" office:value-type="float" office:value="19836" calcext:value-type="float">
            <text:p>19836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29583333333333" calcext:value-type="float">
            <text:p>0,00229583333333333000</text:p>
          </table:table-cell>
          <table:table-cell table:formula="of:=[.D344]-[.D343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58" office:value-type="float" office:value="19894" calcext:value-type="float">
            <text:p>19894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3025462962963" calcext:value-type="float">
            <text:p>0,00230254629629630000</text:p>
          </table:table-cell>
          <table:table-cell table:formula="of:=[.D345]-[.D344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58" office:value-type="float" office:value="19952" calcext:value-type="float">
            <text:p>19952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30925925925926" calcext:value-type="float">
            <text:p>0,00230925925925926000</text:p>
          </table:table-cell>
          <table:table-cell table:formula="of:=[.D346]-[.D345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58" office:value-type="float" office:value="20010" calcext:value-type="float">
            <text:p>2001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31597222222222" calcext:value-type="float">
            <text:p>0,00231597222222222000</text:p>
          </table:table-cell>
          <table:table-cell table:formula="of:=[.D347]-[.D346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58" office:value-type="float" office:value="20068" calcext:value-type="float">
            <text:p>20068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32268518518519" calcext:value-type="float">
            <text:p>0,00232268518518519000</text:p>
          </table:table-cell>
          <table:table-cell table:formula="of:=[.D348]-[.D347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58" office:value-type="float" office:value="20126" calcext:value-type="float">
            <text:p>20126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32939814814815" calcext:value-type="float">
            <text:p>0,00232939814814815000</text:p>
          </table:table-cell>
          <table:table-cell table:formula="of:=[.D349]-[.D348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58" office:value-type="float" office:value="20184" calcext:value-type="float">
            <text:p>20184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33611111111111" calcext:value-type="float">
            <text:p>0,00233611111111111000</text:p>
          </table:table-cell>
          <table:table-cell table:formula="of:=[.D350]-[.D349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58" office:value-type="float" office:value="20242" calcext:value-type="float">
            <text:p>20242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34282407407407" calcext:value-type="float">
            <text:p>0,00234282407407407000</text:p>
          </table:table-cell>
          <table:table-cell table:formula="of:=[.D351]-[.D350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58" office:value-type="float" office:value="20300" calcext:value-type="float">
            <text:p>203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34953703703704" calcext:value-type="float">
            <text:p>0,00234953703703704000</text:p>
          </table:table-cell>
          <table:table-cell table:formula="of:=[.D352]-[.D351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58" office:value-type="float" office:value="20358" calcext:value-type="float">
            <text:p>20358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35625" calcext:value-type="float">
            <text:p>0,00235625000000000000</text:p>
          </table:table-cell>
          <table:table-cell table:formula="of:=[.D353]-[.D352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58" office:value-type="float" office:value="20416" calcext:value-type="float">
            <text:p>20416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36296296296296" calcext:value-type="float">
            <text:p>0,00236296296296296000</text:p>
          </table:table-cell>
          <table:table-cell table:formula="of:=[.D354]-[.D353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58" office:value-type="float" office:value="20474" calcext:value-type="float">
            <text:p>20474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36967592592593" calcext:value-type="float">
            <text:p>0,00236967592592593000</text:p>
          </table:table-cell>
          <table:table-cell table:formula="of:=[.D355]-[.D354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58" office:value-type="float" office:value="20532" calcext:value-type="float">
            <text:p>20532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37638888888889" calcext:value-type="float">
            <text:p>0,00237638888888889000</text:p>
          </table:table-cell>
          <table:table-cell table:formula="of:=[.D356]-[.D355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58" office:value-type="float" office:value="20590" calcext:value-type="float">
            <text:p>2059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38310185185185" calcext:value-type="float">
            <text:p>0,00238310185185185000</text:p>
          </table:table-cell>
          <table:table-cell table:formula="of:=[.D357]-[.D356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58" office:value-type="float" office:value="20648" calcext:value-type="float">
            <text:p>20648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38981481481481" calcext:value-type="float">
            <text:p>0,00238981481481481000</text:p>
          </table:table-cell>
          <table:table-cell table:formula="of:=[.D358]-[.D357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58" office:value-type="float" office:value="20706" calcext:value-type="float">
            <text:p>20706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39652777777778" calcext:value-type="float">
            <text:p>0,00239652777777778000</text:p>
          </table:table-cell>
          <table:table-cell table:formula="of:=[.D359]-[.D358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58" office:value-type="float" office:value="20764" calcext:value-type="float">
            <text:p>20764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40324074074074" calcext:value-type="float">
            <text:p>0,00240324074074074000</text:p>
          </table:table-cell>
          <table:table-cell table:formula="of:=[.D360]-[.D359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58" office:value-type="float" office:value="20822" calcext:value-type="float">
            <text:p>20822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4099537037037" calcext:value-type="float">
            <text:p>0,00240995370370370000</text:p>
          </table:table-cell>
          <table:table-cell table:formula="of:=[.D361]-[.D360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58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41666666666667" calcext:value-type="float">
            <text:p>0,00241666666666667000</text:p>
          </table:table-cell>
          <table:table-cell table:formula="of:=[.D362]-[.D361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58" office:value-type="float" office:value="20938" calcext:value-type="float">
            <text:p>20938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42337962962963" calcext:value-type="float">
            <text:p>0,00242337962962963000</text:p>
          </table:table-cell>
          <table:table-cell table:formula="of:=[.D363]-[.D362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58" office:value-type="float" office:value="20996" calcext:value-type="float">
            <text:p>20996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43009259259259" calcext:value-type="float">
            <text:p>0,00243009259259259000</text:p>
          </table:table-cell>
          <table:table-cell table:formula="of:=[.D364]-[.D363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58" office:value-type="float" office:value="21054" calcext:value-type="float">
            <text:p>21054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43680555555556" calcext:value-type="float">
            <text:p>0,00243680555555556000</text:p>
          </table:table-cell>
          <table:table-cell table:formula="of:=[.D365]-[.D364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58" office:value-type="float" office:value="21112" calcext:value-type="float">
            <text:p>21112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44351851851852" calcext:value-type="float">
            <text:p>0,00244351851851852000</text:p>
          </table:table-cell>
          <table:table-cell table:formula="of:=[.D366]-[.D365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58" office:value-type="float" office:value="21170" calcext:value-type="float">
            <text:p>2117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45023148148148" calcext:value-type="float">
            <text:p>0,00245023148148148000</text:p>
          </table:table-cell>
          <table:table-cell table:formula="of:=[.D367]-[.D366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58" office:value-type="float" office:value="21228" calcext:value-type="float">
            <text:p>21228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45694444444444" calcext:value-type="float">
            <text:p>0,00245694444444444000</text:p>
          </table:table-cell>
          <table:table-cell table:formula="of:=[.D368]-[.D367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58" office:value-type="float" office:value="21286" calcext:value-type="float">
            <text:p>21286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46365740740741" calcext:value-type="float">
            <text:p>0,00246365740740741000</text:p>
          </table:table-cell>
          <table:table-cell table:formula="of:=[.D369]-[.D368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58" office:value-type="float" office:value="21344" calcext:value-type="float">
            <text:p>21344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47037037037037" calcext:value-type="float">
            <text:p>0,00247037037037037000</text:p>
          </table:table-cell>
          <table:table-cell table:formula="of:=[.D370]-[.D369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58" office:value-type="float" office:value="21402" calcext:value-type="float">
            <text:p>21402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47708333333333" calcext:value-type="float">
            <text:p>0,00247708333333333000</text:p>
          </table:table-cell>
          <table:table-cell table:formula="of:=[.D371]-[.D370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58" office:value-type="float" office:value="21460" calcext:value-type="float">
            <text:p>2146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4837962962963" calcext:value-type="float">
            <text:p>0,00248379629629630000</text:p>
          </table:table-cell>
          <table:table-cell table:formula="of:=[.D372]-[.D371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58" office:value-type="float" office:value="21518" calcext:value-type="float">
            <text:p>21518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49050925925926" calcext:value-type="float">
            <text:p>0,00249050925925926000</text:p>
          </table:table-cell>
          <table:table-cell table:formula="of:=[.D373]-[.D372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58" office:value-type="float" office:value="21576" calcext:value-type="float">
            <text:p>21576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49722222222222" calcext:value-type="float">
            <text:p>0,00249722222222222000</text:p>
          </table:table-cell>
          <table:table-cell table:formula="of:=[.D374]-[.D373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58" office:value-type="float" office:value="21634" calcext:value-type="float">
            <text:p>21634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50393518518519" calcext:value-type="float">
            <text:p>0,00250393518518519000</text:p>
          </table:table-cell>
          <table:table-cell table:formula="of:=[.D375]-[.D374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58" office:value-type="float" office:value="21692" calcext:value-type="float">
            <text:p>21692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51064814814815" calcext:value-type="float">
            <text:p>0,00251064814814815000</text:p>
          </table:table-cell>
          <table:table-cell table:formula="of:=[.D376]-[.D375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58" office:value-type="float" office:value="21750" calcext:value-type="float">
            <text:p>2175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51736111111111" calcext:value-type="float">
            <text:p>0,00251736111111111000</text:p>
          </table:table-cell>
          <table:table-cell table:formula="of:=[.D377]-[.D376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58" office:value-type="float" office:value="21808" calcext:value-type="float">
            <text:p>21808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52407407407407" calcext:value-type="float">
            <text:p>0,00252407407407407000</text:p>
          </table:table-cell>
          <table:table-cell table:formula="of:=[.D378]-[.D377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58" office:value-type="float" office:value="21866" calcext:value-type="float">
            <text:p>21866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53078703703704" calcext:value-type="float">
            <text:p>0,00253078703703704000</text:p>
          </table:table-cell>
          <table:table-cell table:formula="of:=[.D379]-[.D378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58" office:value-type="float" office:value="21924" calcext:value-type="float">
            <text:p>21924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5375" calcext:value-type="float">
            <text:p>0,00253750000000000000</text:p>
          </table:table-cell>
          <table:table-cell table:formula="of:=[.D380]-[.D379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58" office:value-type="float" office:value="21982" calcext:value-type="float">
            <text:p>21982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54421296296296" calcext:value-type="float">
            <text:p>0,00254421296296296000</text:p>
          </table:table-cell>
          <table:table-cell table:formula="of:=[.D381]-[.D380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58" office:value-type="float" office:value="22040" calcext:value-type="float">
            <text:p>2204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55092592592593" calcext:value-type="float">
            <text:p>0,00255092592592593000</text:p>
          </table:table-cell>
          <table:table-cell table:formula="of:=[.D382]-[.D381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58" office:value-type="float" office:value="22098" calcext:value-type="float">
            <text:p>22098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55763888888889" calcext:value-type="float">
            <text:p>0,00255763888888889000</text:p>
          </table:table-cell>
          <table:table-cell table:formula="of:=[.D383]-[.D382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58" office:value-type="float" office:value="22156" calcext:value-type="float">
            <text:p>22156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56435185185185" calcext:value-type="float">
            <text:p>0,00256435185185185000</text:p>
          </table:table-cell>
          <table:table-cell table:formula="of:=[.D384]-[.D383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58" office:value-type="float" office:value="22214" calcext:value-type="float">
            <text:p>22214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57106481481481" calcext:value-type="float">
            <text:p>0,00257106481481481000</text:p>
          </table:table-cell>
          <table:table-cell table:formula="of:=[.D385]-[.D384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58" office:value-type="float" office:value="22272" calcext:value-type="float">
            <text:p>22272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57777777777778" calcext:value-type="float">
            <text:p>0,00257777777777778000</text:p>
          </table:table-cell>
          <table:table-cell table:formula="of:=[.D386]-[.D385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58" office:value-type="float" office:value="22330" calcext:value-type="float">
            <text:p>2233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58449074074074" calcext:value-type="float">
            <text:p>0,00258449074074074000</text:p>
          </table:table-cell>
          <table:table-cell table:formula="of:=[.D387]-[.D386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58" office:value-type="float" office:value="22388" calcext:value-type="float">
            <text:p>22388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5912037037037" calcext:value-type="float">
            <text:p>0,00259120370370370000</text:p>
          </table:table-cell>
          <table:table-cell table:formula="of:=[.D388]-[.D387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58" office:value-type="float" office:value="22446" calcext:value-type="float">
            <text:p>22446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59791666666667" calcext:value-type="float">
            <text:p>0,00259791666666667000</text:p>
          </table:table-cell>
          <table:table-cell table:formula="of:=[.D389]-[.D388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58" office:value-type="float" office:value="22504" calcext:value-type="float">
            <text:p>22504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60462962962963" calcext:value-type="float">
            <text:p>0,00260462962962963000</text:p>
          </table:table-cell>
          <table:table-cell table:formula="of:=[.D390]-[.D389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58" office:value-type="float" office:value="22562" calcext:value-type="float">
            <text:p>22562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61134259259259" calcext:value-type="float">
            <text:p>0,00261134259259259000</text:p>
          </table:table-cell>
          <table:table-cell table:formula="of:=[.D391]-[.D390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58" office:value-type="float" office:value="22620" calcext:value-type="float">
            <text:p>2262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61805555555556" calcext:value-type="float">
            <text:p>0,00261805555555556000</text:p>
          </table:table-cell>
          <table:table-cell table:formula="of:=[.D392]-[.D391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58" office:value-type="float" office:value="22678" calcext:value-type="float">
            <text:p>22678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62476851851852" calcext:value-type="float">
            <text:p>0,00262476851851852000</text:p>
          </table:table-cell>
          <table:table-cell table:formula="of:=[.D393]-[.D392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58" office:value-type="float" office:value="22736" calcext:value-type="float">
            <text:p>22736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63148148148148" calcext:value-type="float">
            <text:p>0,00263148148148148000</text:p>
          </table:table-cell>
          <table:table-cell table:formula="of:=[.D394]-[.D393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58" office:value-type="float" office:value="22794" calcext:value-type="float">
            <text:p>22794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63819444444444" calcext:value-type="float">
            <text:p>0,00263819444444444000</text:p>
          </table:table-cell>
          <table:table-cell table:formula="of:=[.D395]-[.D394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58" office:value-type="float" office:value="22852" calcext:value-type="float">
            <text:p>22852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64490740740741" calcext:value-type="float">
            <text:p>0,00264490740740741000</text:p>
          </table:table-cell>
          <table:table-cell table:formula="of:=[.D396]-[.D395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58" office:value-type="float" office:value="22910" calcext:value-type="float">
            <text:p>2291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65162037037037" calcext:value-type="float">
            <text:p>0,00265162037037037000</text:p>
          </table:table-cell>
          <table:table-cell table:formula="of:=[.D397]-[.D396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58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65833333333333" calcext:value-type="float">
            <text:p>0,00265833333333333000</text:p>
          </table:table-cell>
          <table:table-cell table:formula="of:=[.D398]-[.D397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58" office:value-type="float" office:value="23026" calcext:value-type="float">
            <text:p>23026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6650462962963" calcext:value-type="float">
            <text:p>0,00266504629629630000</text:p>
          </table:table-cell>
          <table:table-cell table:formula="of:=[.D399]-[.D398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58" office:value-type="float" office:value="23084" calcext:value-type="float">
            <text:p>23084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67175925925926" calcext:value-type="float">
            <text:p>0,00267175925925926000</text:p>
          </table:table-cell>
          <table:table-cell table:formula="of:=[.D400]-[.D399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58" office:value-type="float" office:value="23142" calcext:value-type="float">
            <text:p>23142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67847222222222" calcext:value-type="float">
            <text:p>0,00267847222222222000</text:p>
          </table:table-cell>
          <table:table-cell table:formula="of:=[.D401]-[.D400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58" office:value-type="float" office:value="23200" calcext:value-type="float">
            <text:p>232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68518518518519" calcext:value-type="float">
            <text:p>0,00268518518518519000</text:p>
          </table:table-cell>
          <table:table-cell table:formula="of:=[.D402]-[.D401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58" office:value-type="float" office:value="23258" calcext:value-type="float">
            <text:p>23258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269189814814815" calcext:value-type="float">
            <text:p>0,00269189814814815000</text:p>
          </table:table-cell>
          <table:table-cell table:formula="of:=[.D403]-[.D402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58" office:value-type="float" office:value="23316" calcext:value-type="float">
            <text:p>23316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69861111111111" calcext:value-type="float">
            <text:p>0,00269861111111111000</text:p>
          </table:table-cell>
          <table:table-cell table:formula="of:=[.D404]-[.D403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58" office:value-type="float" office:value="23374" calcext:value-type="float">
            <text:p>23374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70532407407407" calcext:value-type="float">
            <text:p>0,00270532407407407000</text:p>
          </table:table-cell>
          <table:table-cell table:formula="of:=[.D405]-[.D404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58" office:value-type="float" office:value="23432" calcext:value-type="float">
            <text:p>23432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71203703703704" calcext:value-type="float">
            <text:p>0,00271203703703704000</text:p>
          </table:table-cell>
          <table:table-cell table:formula="of:=[.D406]-[.D405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58" office:value-type="float" office:value="23490" calcext:value-type="float">
            <text:p>2349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71875" calcext:value-type="float">
            <text:p>0,00271875000000000000</text:p>
          </table:table-cell>
          <table:table-cell table:formula="of:=[.D407]-[.D406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58" office:value-type="float" office:value="23548" calcext:value-type="float">
            <text:p>23548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72546296296296" calcext:value-type="float">
            <text:p>0,00272546296296296000</text:p>
          </table:table-cell>
          <table:table-cell table:formula="of:=[.D408]-[.D407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58" office:value-type="float" office:value="23606" calcext:value-type="float">
            <text:p>23606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273217592592593" calcext:value-type="float">
            <text:p>0,00273217592592593000</text:p>
          </table:table-cell>
          <table:table-cell table:formula="of:=[.D409]-[.D408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58" office:value-type="float" office:value="23664" calcext:value-type="float">
            <text:p>23664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273888888888889" calcext:value-type="float">
            <text:p>0,00273888888888889000</text:p>
          </table:table-cell>
          <table:table-cell table:formula="of:=[.D410]-[.D409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58" office:value-type="float" office:value="23722" calcext:value-type="float">
            <text:p>23722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274560185185185" calcext:value-type="float">
            <text:p>0,00274560185185185000</text:p>
          </table:table-cell>
          <table:table-cell table:formula="of:=[.D411]-[.D410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58" office:value-type="float" office:value="23780" calcext:value-type="float">
            <text:p>2378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275231481481481" calcext:value-type="float">
            <text:p>0,00275231481481481000</text:p>
          </table:table-cell>
          <table:table-cell table:formula="of:=[.D412]-[.D411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58" office:value-type="float" office:value="23838" calcext:value-type="float">
            <text:p>23838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275902777777778" calcext:value-type="float">
            <text:p>0,00275902777777778000</text:p>
          </table:table-cell>
          <table:table-cell table:formula="of:=[.D413]-[.D412]" office:value-type="float" office:value="0.00000671296296296314" calcext:value-type="float">
            <text:p>0,00000671296296296314</text:p>
          </table:table-cell>
          <table:table-cell table:number-columns-repeated="1637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58" office:value-type="float" office:value="23896" calcext:value-type="float">
            <text:p>23896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76574074074074" calcext:value-type="float">
            <text:p>0,00276574074074074000</text:p>
          </table:table-cell>
          <table:table-cell table:formula="of:=[.D414]-[.D413]" office:value-type="float" office:value="0.00000671296296296271" calcext:value-type="float">
            <text:p>0,00000671296296296271</text:p>
          </table:table-cell>
          <table:table-cell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58" office:value-type="float" office:value="23954" calcext:value-type="float">
            <text:p>23954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7724537037037" calcext:value-type="float">
            <text:p>0,00277245370370370000</text:p>
          </table:table-cell>
          <table:table-cell table:formula="of:=#REF!-[.D414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1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13:25.778713988</meta:creation-date>
    <dc:date>2026-05-17T18:13:36.281235673</dc:date>
    <meta:editing-duration>PT12S</meta:editing-duration>
    <meta:editing-cycles>1</meta:editing-cycles>
    <meta:document-statistic meta:table-count="1" meta:cell-count="2070" meta:object-count="0"/>
    <meta:generator>LibreOffice/24.2.7.2$Linux_X86_64 LibreOffice_project/420$Build-2</meta:generator>
  </office:meta>
</office:document-meta>
</file>