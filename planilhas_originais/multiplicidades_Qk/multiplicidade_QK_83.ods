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1.51cm"/>
    </style:style>
    <style:style style:name="co3" style:family="table-column">
      <style:table-column-properties fo:break-before="auto" style:column-width="2.7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8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5" table:number-columns-repeated="5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83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960648148148148" calcext:value-type="float">
            <text:p>0,00000960648148148148</text:p>
          </table:table-cell>
          <table:table-cell table:formula="of:=[.D3]-[.D2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83" office:value-type="float" office:value="166" calcext:value-type="float">
            <text:p>166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9212962962963" calcext:value-type="float">
            <text:p>0,00001921296296296300</text:p>
          </table:table-cell>
          <table:table-cell table:formula="of:=[.D4]-[.D3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83" office:value-type="float" office:value="249" calcext:value-type="float">
            <text:p>249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288194444444444" calcext:value-type="float">
            <text:p>0,00002881944444444450</text:p>
          </table:table-cell>
          <table:table-cell table:formula="of:=[.D5]-[.D4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83" office:value-type="float" office:value="332" calcext:value-type="float">
            <text:p>332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384259259259259" calcext:value-type="float">
            <text:p>0,00003842592592592590</text:p>
          </table:table-cell>
          <table:table-cell table:formula="of:=[.D6]-[.D5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83" office:value-type="float" office:value="415" calcext:value-type="float">
            <text:p>41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480324074074074" calcext:value-type="float">
            <text:p>0,00004803240740740740</text:p>
          </table:table-cell>
          <table:table-cell table:formula="of:=[.D7]-[.D6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83" office:value-type="float" office:value="498" calcext:value-type="float">
            <text:p>498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576388888888889" calcext:value-type="float">
            <text:p>0,00005763888888888890</text:p>
          </table:table-cell>
          <table:table-cell table:formula="of:=[.D8]-[.D7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83" office:value-type="float" office:value="581" calcext:value-type="float">
            <text:p>581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672453703703704" calcext:value-type="float">
            <text:p>0,00006724537037037040</text:p>
          </table:table-cell>
          <table:table-cell table:formula="of:=[.D9]-[.D8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83" office:value-type="float" office:value="664" calcext:value-type="float">
            <text:p>664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768518518518519" calcext:value-type="float">
            <text:p>0,00007685185185185190</text:p>
          </table:table-cell>
          <table:table-cell table:formula="of:=[.D10]-[.D9]" office:value-type="float" office:value="0.00000960648148148149" calcext:value-type="float">
            <text:p>0,0000096064814814814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83" office:value-type="float" office:value="747" calcext:value-type="float">
            <text:p>747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864583333333333" calcext:value-type="float">
            <text:p>0,00008645833333333330</text:p>
          </table:table-cell>
          <table:table-cell table:formula="of:=[.D11]-[.D10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83" office:value-type="float" office:value="830" calcext:value-type="float">
            <text:p>83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960648148148148" calcext:value-type="float">
            <text:p>0,00009606481481481480</text:p>
          </table:table-cell>
          <table:table-cell table:formula="of:=[.D12]-[.D11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83" office:value-type="float" office:value="913" calcext:value-type="float">
            <text:p>913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105671296296296" calcext:value-type="float">
            <text:p>0,00010567129629629600</text:p>
          </table:table-cell>
          <table:table-cell table:formula="of:=[.D13]-[.D12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83" office:value-type="float" office:value="996" calcext:value-type="float">
            <text:p>996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115277777777778" calcext:value-type="float">
            <text:p>0,00011527777777777800</text:p>
          </table:table-cell>
          <table:table-cell table:formula="of:=[.D14]-[.D13]" office:value-type="float" office:value="0.00000960648148148149" calcext:value-type="float">
            <text:p>0,0000096064814814814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83" office:value-type="float" office:value="1079" calcext:value-type="float">
            <text:p>1079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24884259259259" calcext:value-type="float">
            <text:p>0,00012488425925925900</text:p>
          </table:table-cell>
          <table:table-cell table:formula="of:=[.D15]-[.D14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83" office:value-type="float" office:value="1162" calcext:value-type="float">
            <text:p>1162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34490740740741" calcext:value-type="float">
            <text:p>0,00013449074074074100</text:p>
          </table:table-cell>
          <table:table-cell table:formula="of:=[.D16]-[.D15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83" office:value-type="float" office:value="1245" calcext:value-type="float">
            <text:p>124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44097222222222" calcext:value-type="float">
            <text:p>0,00014409722222222200</text:p>
          </table:table-cell>
          <table:table-cell table:formula="of:=[.D17]-[.D16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83" office:value-type="float" office:value="1328" calcext:value-type="float">
            <text:p>1328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53703703703704" calcext:value-type="float">
            <text:p>0,00015370370370370400</text:p>
          </table:table-cell>
          <table:table-cell table:formula="of:=[.D18]-[.D17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83" office:value-type="float" office:value="1411" calcext:value-type="float">
            <text:p>1411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63310185185185" calcext:value-type="float">
            <text:p>0,00016331018518518500</text:p>
          </table:table-cell>
          <table:table-cell table:formula="of:=[.D19]-[.D18]" office:value-type="float" office:value="0.00000960648148148151" calcext:value-type="float">
            <text:p>0,0000096064814814815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83" office:value-type="float" office:value="1494" calcext:value-type="float">
            <text:p>1494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72916666666667" calcext:value-type="float">
            <text:p>0,00017291666666666700</text:p>
          </table:table-cell>
          <table:table-cell table:formula="of:=[.D20]-[.D19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83" office:value-type="float" office:value="1577" calcext:value-type="float">
            <text:p>1577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82523148148148" calcext:value-type="float">
            <text:p>0,00018252314814814800</text:p>
          </table:table-cell>
          <table:table-cell table:formula="of:=[.D21]-[.D20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83" office:value-type="float" office:value="1660" calcext:value-type="float">
            <text:p>166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9212962962963" calcext:value-type="float">
            <text:p>0,00019212962962963000</text:p>
          </table:table-cell>
          <table:table-cell table:formula="of:=[.D22]-[.D21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83" office:value-type="float" office:value="1743" calcext:value-type="float">
            <text:p>1743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201736111111111" calcext:value-type="float">
            <text:p>0,00020173611111111100</text:p>
          </table:table-cell>
          <table:table-cell table:formula="of:=[.D23]-[.D22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83" office:value-type="float" office:value="1826" calcext:value-type="float">
            <text:p>1826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211342592592593" calcext:value-type="float">
            <text:p>0,00021134259259259300</text:p>
          </table:table-cell>
          <table:table-cell table:formula="of:=[.D24]-[.D23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83" office:value-type="float" office:value="1909" calcext:value-type="float">
            <text:p>1909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220949074074074" calcext:value-type="float">
            <text:p>0,00022094907407407400</text:p>
          </table:table-cell>
          <table:table-cell table:formula="of:=[.D25]-[.D24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83" office:value-type="float" office:value="1992" calcext:value-type="float">
            <text:p>1992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230555555555556" calcext:value-type="float">
            <text:p>0,00023055555555555600</text:p>
          </table:table-cell>
          <table:table-cell table:formula="of:=[.D26]-[.D25]" office:value-type="float" office:value="0.00000960648148148151" calcext:value-type="float">
            <text:p>0,0000096064814814815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83" office:value-type="float" office:value="2075" calcext:value-type="float">
            <text:p>207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240162037037037" calcext:value-type="float">
            <text:p>0,00024016203703703700</text:p>
          </table:table-cell>
          <table:table-cell table:formula="of:=[.D27]-[.D26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83" office:value-type="float" office:value="2158" calcext:value-type="float">
            <text:p>2158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49768518518519" calcext:value-type="float">
            <text:p>0,00024976851851851900</text:p>
          </table:table-cell>
          <table:table-cell table:formula="of:=[.D28]-[.D27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83" office:value-type="float" office:value="2241" calcext:value-type="float">
            <text:p>2241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259375" calcext:value-type="float">
            <text:p>0,00025937500000000000</text:p>
          </table:table-cell>
          <table:table-cell table:formula="of:=[.D29]-[.D28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83" office:value-type="float" office:value="2324" calcext:value-type="float">
            <text:p>2324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268981481481482" calcext:value-type="float">
            <text:p>0,00026898148148148200</text:p>
          </table:table-cell>
          <table:table-cell table:formula="of:=[.D30]-[.D29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83" office:value-type="float" office:value="2407" calcext:value-type="float">
            <text:p>2407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278587962962963" calcext:value-type="float">
            <text:p>0,00027858796296296300</text:p>
          </table:table-cell>
          <table:table-cell table:formula="of:=[.D31]-[.D30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83" office:value-type="float" office:value="2490" calcext:value-type="float">
            <text:p>249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288194444444444" calcext:value-type="float">
            <text:p>0,00028819444444444400</text:p>
          </table:table-cell>
          <table:table-cell table:formula="of:=[.D32]-[.D31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83" office:value-type="float" office:value="2573" calcext:value-type="float">
            <text:p>2573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297800925925926" calcext:value-type="float">
            <text:p>0,00029780092592592600</text:p>
          </table:table-cell>
          <table:table-cell table:formula="of:=[.D33]-[.D32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83" office:value-type="float" office:value="2656" calcext:value-type="float">
            <text:p>2656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307407407407407" calcext:value-type="float">
            <text:p>0,00030740740740740700</text:p>
          </table:table-cell>
          <table:table-cell table:formula="of:=[.D34]-[.D33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83" office:value-type="float" office:value="2739" calcext:value-type="float">
            <text:p>2739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317013888888889" calcext:value-type="float">
            <text:p>0,00031701388888888900</text:p>
          </table:table-cell>
          <table:table-cell table:formula="of:=[.D35]-[.D34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83" office:value-type="float" office:value="2822" calcext:value-type="float">
            <text:p>2822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32662037037037" calcext:value-type="float">
            <text:p>0,00032662037037037000</text:p>
          </table:table-cell>
          <table:table-cell table:formula="of:=[.D36]-[.D35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83" office:value-type="float" office:value="2905" calcext:value-type="float">
            <text:p>290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336226851851852" calcext:value-type="float">
            <text:p>0,00033622685185185200</text:p>
          </table:table-cell>
          <table:table-cell table:formula="of:=[.D37]-[.D36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83" office:value-type="float" office:value="2988" calcext:value-type="float">
            <text:p>2988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345833333333333" calcext:value-type="float">
            <text:p>0,00034583333333333300</text:p>
          </table:table-cell>
          <table:table-cell table:formula="of:=[.D38]-[.D37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83" office:value-type="float" office:value="3071" calcext:value-type="float">
            <text:p>3071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355439814814815" calcext:value-type="float">
            <text:p>0,00035543981481481500</text:p>
          </table:table-cell>
          <table:table-cell table:formula="of:=[.D39]-[.D38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83" office:value-type="float" office:value="3154" calcext:value-type="float">
            <text:p>3154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365046296296296" calcext:value-type="float">
            <text:p>0,00036504629629629600</text:p>
          </table:table-cell>
          <table:table-cell table:formula="of:=[.D40]-[.D39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83" office:value-type="float" office:value="3237" calcext:value-type="float">
            <text:p>3237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374652777777778" calcext:value-type="float">
            <text:p>0,00037465277777777800</text:p>
          </table:table-cell>
          <table:table-cell table:formula="of:=[.D41]-[.D40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83" office:value-type="float" office:value="3320" calcext:value-type="float">
            <text:p>332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384259259259259" calcext:value-type="float">
            <text:p>0,00038425925925925900</text:p>
          </table:table-cell>
          <table:table-cell table:formula="of:=[.D42]-[.D41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83" office:value-type="float" office:value="3403" calcext:value-type="float">
            <text:p>3403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393865740740741" calcext:value-type="float">
            <text:p>0,00039386574074074100</text:p>
          </table:table-cell>
          <table:table-cell table:formula="of:=[.D43]-[.D42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83" office:value-type="float" office:value="3486" calcext:value-type="float">
            <text:p>3486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403472222222222" calcext:value-type="float">
            <text:p>0,00040347222222222200</text:p>
          </table:table-cell>
          <table:table-cell table:formula="of:=[.D44]-[.D43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83" office:value-type="float" office:value="3569" calcext:value-type="float">
            <text:p>3569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413078703703704" calcext:value-type="float">
            <text:p>0,00041307870370370400</text:p>
          </table:table-cell>
          <table:table-cell table:formula="of:=[.D45]-[.D44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83" office:value-type="float" office:value="3652" calcext:value-type="float">
            <text:p>3652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422685185185185" calcext:value-type="float">
            <text:p>0,00042268518518518500</text:p>
          </table:table-cell>
          <table:table-cell table:formula="of:=[.D46]-[.D45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83" office:value-type="float" office:value="3735" calcext:value-type="float">
            <text:p>373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432291666666667" calcext:value-type="float">
            <text:p>0,00043229166666666700</text:p>
          </table:table-cell>
          <table:table-cell table:formula="of:=[.D47]-[.D46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83" office:value-type="float" office:value="3818" calcext:value-type="float">
            <text:p>3818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441898148148148" calcext:value-type="float">
            <text:p>0,00044189814814814800</text:p>
          </table:table-cell>
          <table:table-cell table:formula="of:=[.D48]-[.D47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83" office:value-type="float" office:value="3901" calcext:value-type="float">
            <text:p>3901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45150462962963" calcext:value-type="float">
            <text:p>0,00045150462962963000</text:p>
          </table:table-cell>
          <table:table-cell table:formula="of:=[.D49]-[.D48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83" office:value-type="float" office:value="3984" calcext:value-type="float">
            <text:p>3984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461111111111111" calcext:value-type="float">
            <text:p>0,00046111111111111100</text:p>
          </table:table-cell>
          <table:table-cell table:formula="of:=[.D50]-[.D49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83" office:value-type="float" office:value="4067" calcext:value-type="float">
            <text:p>4067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470717592592593" calcext:value-type="float">
            <text:p>0,00047071759259259300</text:p>
          </table:table-cell>
          <table:table-cell table:formula="of:=[.D51]-[.D50]" office:value-type="float" office:value="0.00000960648148148148" calcext:value-type="float">
            <text:p>0,0000096064814814814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83" office:value-type="float" office:value="4150" calcext:value-type="float">
            <text:p>41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480324074074074" calcext:value-type="float">
            <text:p>0,00048032407407407400</text:p>
          </table:table-cell>
          <table:table-cell table:formula="of:=[.D52]-[.D51]" office:value-type="float" office:value="0.00000960648148148142" calcext:value-type="float">
            <text:p>0,0000096064814814814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83" office:value-type="float" office:value="4233" calcext:value-type="float">
            <text:p>4233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489930555555556" calcext:value-type="float">
            <text:p>0,00048993055555555600</text:p>
          </table:table-cell>
          <table:table-cell table:formula="of:=[.D53]-[.D52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83" office:value-type="float" office:value="4316" calcext:value-type="float">
            <text:p>4316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499537037037037" calcext:value-type="float">
            <text:p>0,00049953703703703700</text:p>
          </table:table-cell>
          <table:table-cell table:formula="of:=[.D54]-[.D53]" office:value-type="float" office:value="0.00000960648148148142" calcext:value-type="float">
            <text:p>0,0000096064814814814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83" office:value-type="float" office:value="4399" calcext:value-type="float">
            <text:p>4399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509143518518519" calcext:value-type="float">
            <text:p>0,00050914351851851900</text:p>
          </table:table-cell>
          <table:table-cell table:formula="of:=[.D55]-[.D54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83" office:value-type="float" office:value="4482" calcext:value-type="float">
            <text:p>4482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51875" calcext:value-type="float">
            <text:p>0,00051875000000000000</text:p>
          </table:table-cell>
          <table:table-cell table:formula="of:=[.D56]-[.D55]" office:value-type="float" office:value="0.00000960648148148142" calcext:value-type="float">
            <text:p>0,00000960648148148142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83" office:value-type="float" office:value="4565" calcext:value-type="float">
            <text:p>456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528356481481481" calcext:value-type="float">
            <text:p>0,00052835648148148100</text:p>
          </table:table-cell>
          <table:table-cell table:formula="of:=[.D57]-[.D56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83" office:value-type="float" office:value="4648" calcext:value-type="float">
            <text:p>4648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537962962962963" calcext:value-type="float">
            <text:p>0,00053796296296296300</text:p>
          </table:table-cell>
          <table:table-cell table:formula="of:=[.D58]-[.D57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83" office:value-type="float" office:value="4731" calcext:value-type="float">
            <text:p>4731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547569444444445" calcext:value-type="float">
            <text:p>0,00054756944444444500</text:p>
          </table:table-cell>
          <table:table-cell table:formula="of:=[.D59]-[.D58]" office:value-type="float" office:value="0.00000960648148148142" calcext:value-type="float">
            <text:p>0,0000096064814814814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83" office:value-type="float" office:value="4814" calcext:value-type="float">
            <text:p>4814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557175925925926" calcext:value-type="float">
            <text:p>0,00055717592592592600</text:p>
          </table:table-cell>
          <table:table-cell table:formula="of:=[.D60]-[.D59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83" office:value-type="float" office:value="4897" calcext:value-type="float">
            <text:p>4897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566782407407407" calcext:value-type="float">
            <text:p>0,00056678240740740700</text:p>
          </table:table-cell>
          <table:table-cell table:formula="of:=[.D61]-[.D60]" office:value-type="float" office:value="0.00000960648148148142" calcext:value-type="float">
            <text:p>0,00000960648148148142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83" office:value-type="float" office:value="4980" calcext:value-type="float">
            <text:p>498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576388888888889" calcext:value-type="float">
            <text:p>0,00057638888888888900</text:p>
          </table:table-cell>
          <table:table-cell table:formula="of:=[.D62]-[.D61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83" office:value-type="float" office:value="5063" calcext:value-type="float">
            <text:p>5063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58599537037037" calcext:value-type="float">
            <text:p>0,00058599537037037000</text:p>
          </table:table-cell>
          <table:table-cell table:formula="of:=[.D63]-[.D62]" office:value-type="float" office:value="0.00000960648148148142" calcext:value-type="float">
            <text:p>0,00000960648148148142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83" office:value-type="float" office:value="5146" calcext:value-type="float">
            <text:p>5146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595601851851852" calcext:value-type="float">
            <text:p>0,00059560185185185200</text:p>
          </table:table-cell>
          <table:table-cell table:formula="of:=[.D64]-[.D63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83" office:value-type="float" office:value="5229" calcext:value-type="float">
            <text:p>5229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605208333333333" calcext:value-type="float">
            <text:p>0,00060520833333333300</text:p>
          </table:table-cell>
          <table:table-cell table:formula="of:=[.D65]-[.D64]" office:value-type="float" office:value="0.00000960648148148142" calcext:value-type="float">
            <text:p>0,0000096064814814814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83" office:value-type="float" office:value="5312" calcext:value-type="float">
            <text:p>5312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614814814814815" calcext:value-type="float">
            <text:p>0,00061481481481481500</text:p>
          </table:table-cell>
          <table:table-cell table:formula="of:=[.D66]-[.D65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83" office:value-type="float" office:value="5395" calcext:value-type="float">
            <text:p>539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624421296296296" calcext:value-type="float">
            <text:p>0,00062442129629629600</text:p>
          </table:table-cell>
          <table:table-cell table:formula="of:=[.D67]-[.D66]" office:value-type="float" office:value="0.00000960648148148142" calcext:value-type="float">
            <text:p>0,00000960648148148142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83" office:value-type="float" office:value="5478" calcext:value-type="float">
            <text:p>5478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634027777777778" calcext:value-type="float">
            <text:p>0,00063402777777777800</text:p>
          </table:table-cell>
          <table:table-cell table:formula="of:=[.D68]-[.D67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83" office:value-type="float" office:value="5561" calcext:value-type="float">
            <text:p>5561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643634259259259" calcext:value-type="float">
            <text:p>0,00064363425925925900</text:p>
          </table:table-cell>
          <table:table-cell table:formula="of:=[.D69]-[.D68]" office:value-type="float" office:value="0.00000960648148148142" calcext:value-type="float">
            <text:p>0,00000960648148148142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83" office:value-type="float" office:value="5644" calcext:value-type="float">
            <text:p>5644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653240740740741" calcext:value-type="float">
            <text:p>0,00065324074074074100</text:p>
          </table:table-cell>
          <table:table-cell table:formula="of:=[.D70]-[.D69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83" office:value-type="float" office:value="5727" calcext:value-type="float">
            <text:p>5727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662847222222222" calcext:value-type="float">
            <text:p>0,00066284722222222200</text:p>
          </table:table-cell>
          <table:table-cell table:formula="of:=[.D71]-[.D70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83" office:value-type="float" office:value="5810" calcext:value-type="float">
            <text:p>581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672453703703704" calcext:value-type="float">
            <text:p>0,00067245370370370400</text:p>
          </table:table-cell>
          <table:table-cell table:formula="of:=[.D72]-[.D71]" office:value-type="float" office:value="0.00000960648148148142" calcext:value-type="float">
            <text:p>0,00000960648148148142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83" office:value-type="float" office:value="5893" calcext:value-type="float">
            <text:p>5893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682060185185185" calcext:value-type="float">
            <text:p>0,00068206018518518500</text:p>
          </table:table-cell>
          <table:table-cell table:formula="of:=[.D73]-[.D72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83" office:value-type="float" office:value="5976" calcext:value-type="float">
            <text:p>5976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691666666666667" calcext:value-type="float">
            <text:p>0,00069166666666666700</text:p>
          </table:table-cell>
          <table:table-cell table:formula="of:=[.D74]-[.D73]" office:value-type="float" office:value="0.00000960648148148142" calcext:value-type="float">
            <text:p>0,0000096064814814814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83" office:value-type="float" office:value="6059" calcext:value-type="float">
            <text:p>6059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701273148148148" calcext:value-type="float">
            <text:p>0,00070127314814814800</text:p>
          </table:table-cell>
          <table:table-cell table:formula="of:=[.D75]-[.D74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83" office:value-type="float" office:value="6142" calcext:value-type="float">
            <text:p>6142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71087962962963" calcext:value-type="float">
            <text:p>0,00071087962962963000</text:p>
          </table:table-cell>
          <table:table-cell table:formula="of:=[.D76]-[.D75]" office:value-type="float" office:value="0.00000960648148148142" calcext:value-type="float">
            <text:p>0,0000096064814814814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83" office:value-type="float" office:value="6225" calcext:value-type="float">
            <text:p>622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720486111111111" calcext:value-type="float">
            <text:p>0,00072048611111111100</text:p>
          </table:table-cell>
          <table:table-cell table:formula="of:=[.D77]-[.D76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83" office:value-type="float" office:value="6308" calcext:value-type="float">
            <text:p>6308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730092592592593" calcext:value-type="float">
            <text:p>0,00073009259259259300</text:p>
          </table:table-cell>
          <table:table-cell table:formula="of:=[.D78]-[.D77]" office:value-type="float" office:value="0.00000960648148148142" calcext:value-type="float">
            <text:p>0,00000960648148148142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83" office:value-type="float" office:value="6391" calcext:value-type="float">
            <text:p>6391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739699074074074" calcext:value-type="float">
            <text:p>0,00073969907407407400</text:p>
          </table:table-cell>
          <table:table-cell table:formula="of:=[.D79]-[.D78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83" office:value-type="float" office:value="6474" calcext:value-type="float">
            <text:p>6474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749305555555556" calcext:value-type="float">
            <text:p>0,00074930555555555600</text:p>
          </table:table-cell>
          <table:table-cell table:formula="of:=[.D80]-[.D79]" office:value-type="float" office:value="0.00000960648148148142" calcext:value-type="float">
            <text:p>0,00000960648148148142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83" office:value-type="float" office:value="6557" calcext:value-type="float">
            <text:p>6557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758912037037037" calcext:value-type="float">
            <text:p>0,00075891203703703700</text:p>
          </table:table-cell>
          <table:table-cell table:formula="of:=[.D81]-[.D80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83" office:value-type="float" office:value="6640" calcext:value-type="float">
            <text:p>664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768518518518519" calcext:value-type="float">
            <text:p>0,00076851851851851900</text:p>
          </table:table-cell>
          <table:table-cell table:formula="of:=[.D82]-[.D81]" office:value-type="float" office:value="0.00000960648148148142" calcext:value-type="float">
            <text:p>0,00000960648148148142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83" office:value-type="float" office:value="6723" calcext:value-type="float">
            <text:p>6723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778125" calcext:value-type="float">
            <text:p>0,00077812500000000000</text:p>
          </table:table-cell>
          <table:table-cell table:formula="of:=[.D83]-[.D82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83" office:value-type="float" office:value="6806" calcext:value-type="float">
            <text:p>6806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787731481481482" calcext:value-type="float">
            <text:p>0,00078773148148148200</text:p>
          </table:table-cell>
          <table:table-cell table:formula="of:=[.D84]-[.D83]" office:value-type="float" office:value="0.00000960648148148142" calcext:value-type="float">
            <text:p>0,00000960648148148142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83" office:value-type="float" office:value="6889" calcext:value-type="float">
            <text:p>6889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797337962962963" calcext:value-type="float">
            <text:p>0,00079733796296296300</text:p>
          </table:table-cell>
          <table:table-cell table:formula="of:=[.D85]-[.D84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83" office:value-type="float" office:value="6972" calcext:value-type="float">
            <text:p>6972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806944444444444" calcext:value-type="float">
            <text:p>0,00080694444444444400</text:p>
          </table:table-cell>
          <table:table-cell table:formula="of:=[.D86]-[.D85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83" office:value-type="float" office:value="7055" calcext:value-type="float">
            <text:p>705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816550925925926" calcext:value-type="float">
            <text:p>0,00081655092592592600</text:p>
          </table:table-cell>
          <table:table-cell table:formula="of:=[.D87]-[.D86]" office:value-type="float" office:value="0.00000960648148148142" calcext:value-type="float">
            <text:p>0,00000960648148148142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83" office:value-type="float" office:value="7138" calcext:value-type="float">
            <text:p>7138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826157407407407" calcext:value-type="float">
            <text:p>0,00082615740740740700</text:p>
          </table:table-cell>
          <table:table-cell table:formula="of:=[.D88]-[.D87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83" office:value-type="float" office:value="7221" calcext:value-type="float">
            <text:p>7221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835763888888889" calcext:value-type="float">
            <text:p>0,00083576388888888900</text:p>
          </table:table-cell>
          <table:table-cell table:formula="of:=[.D89]-[.D88]" office:value-type="float" office:value="0.00000960648148148142" calcext:value-type="float">
            <text:p>0,00000960648148148142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83" office:value-type="float" office:value="7304" calcext:value-type="float">
            <text:p>7304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84537037037037" calcext:value-type="float">
            <text:p>0,00084537037037037000</text:p>
          </table:table-cell>
          <table:table-cell table:formula="of:=[.D90]-[.D89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83" office:value-type="float" office:value="7387" calcext:value-type="float">
            <text:p>7387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854976851851852" calcext:value-type="float">
            <text:p>0,00085497685185185200</text:p>
          </table:table-cell>
          <table:table-cell table:formula="of:=[.D91]-[.D90]" office:value-type="float" office:value="0.00000960648148148142" calcext:value-type="float">
            <text:p>0,00000960648148148142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83" office:value-type="float" office:value="7470" calcext:value-type="float">
            <text:p>747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864583333333333" calcext:value-type="float">
            <text:p>0,00086458333333333300</text:p>
          </table:table-cell>
          <table:table-cell table:formula="of:=[.D92]-[.D91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83" office:value-type="float" office:value="7553" calcext:value-type="float">
            <text:p>7553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874189814814815" calcext:value-type="float">
            <text:p>0,00087418981481481500</text:p>
          </table:table-cell>
          <table:table-cell table:formula="of:=[.D93]-[.D92]" office:value-type="float" office:value="0.00000960648148148142" calcext:value-type="float">
            <text:p>0,0000096064814814814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83" office:value-type="float" office:value="7636" calcext:value-type="float">
            <text:p>7636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883796296296296" calcext:value-type="float">
            <text:p>0,00088379629629629600</text:p>
          </table:table-cell>
          <table:table-cell table:formula="of:=[.D94]-[.D93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83" office:value-type="float" office:value="7719" calcext:value-type="float">
            <text:p>7719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893402777777778" calcext:value-type="float">
            <text:p>0,00089340277777777800</text:p>
          </table:table-cell>
          <table:table-cell table:formula="of:=[.D95]-[.D94]" office:value-type="float" office:value="0.00000960648148148142" calcext:value-type="float">
            <text:p>0,00000960648148148142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83" office:value-type="float" office:value="7802" calcext:value-type="float">
            <text:p>7802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903009259259259" calcext:value-type="float">
            <text:p>0,00090300925925925900</text:p>
          </table:table-cell>
          <table:table-cell table:formula="of:=[.D96]-[.D95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83" office:value-type="float" office:value="7885" calcext:value-type="float">
            <text:p>788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912615740740741" calcext:value-type="float">
            <text:p>0,00091261574074074100</text:p>
          </table:table-cell>
          <table:table-cell table:formula="of:=[.D97]-[.D96]" office:value-type="float" office:value="0.00000960648148148142" calcext:value-type="float">
            <text:p>0,00000960648148148142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83" office:value-type="float" office:value="7968" calcext:value-type="float">
            <text:p>7968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922222222222222" calcext:value-type="float">
            <text:p>0,00092222222222222200</text:p>
          </table:table-cell>
          <table:table-cell table:formula="of:=[.D98]-[.D97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83" office:value-type="float" office:value="8051" calcext:value-type="float">
            <text:p>8051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931828703703704" calcext:value-type="float">
            <text:p>0,00093182870370370400</text:p>
          </table:table-cell>
          <table:table-cell table:formula="of:=[.D99]-[.D98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83" office:value-type="float" office:value="8134" calcext:value-type="float">
            <text:p>8134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941435185185185" calcext:value-type="float">
            <text:p>0,00094143518518518500</text:p>
          </table:table-cell>
          <table:table-cell table:formula="of:=[.D100]-[.D99]" office:value-type="float" office:value="0.00000960648148148142" calcext:value-type="float">
            <text:p>0,00000960648148148142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83" office:value-type="float" office:value="8217" calcext:value-type="float">
            <text:p>8217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951041666666667" calcext:value-type="float">
            <text:p>0,00095104166666666700</text:p>
          </table:table-cell>
          <table:table-cell table:formula="of:=[.D101]-[.D100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83" office:value-type="float" office:value="8300" calcext:value-type="float">
            <text:p>83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960648148148148" calcext:value-type="float">
            <text:p>0,00096064814814814800</text:p>
          </table:table-cell>
          <table:table-cell table:formula="of:=[.D102]-[.D101]" office:value-type="float" office:value="0.00000960648148148142" calcext:value-type="float">
            <text:p>0,00000960648148148142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83" office:value-type="float" office:value="8383" calcext:value-type="float">
            <text:p>8383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97025462962963" calcext:value-type="float">
            <text:p>0,00097025462962963000</text:p>
          </table:table-cell>
          <table:table-cell table:formula="of:=[.D103]-[.D102]" office:value-type="float" office:value="0.00000960648148148142" calcext:value-type="float">
            <text:p>0,00000960648148148142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83" office:value-type="float" office:value="8466" calcext:value-type="float">
            <text:p>8466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979861111111111" calcext:value-type="float">
            <text:p>0,00097986111111111100</text:p>
          </table:table-cell>
          <table:table-cell table:formula="of:=[.D104]-[.D103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83" office:value-type="float" office:value="8549" calcext:value-type="float">
            <text:p>8549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989467592592593" calcext:value-type="float">
            <text:p>0,00098946759259259300</text:p>
          </table:table-cell>
          <table:table-cell table:formula="of:=[.D105]-[.D104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83" office:value-type="float" office:value="8632" calcext:value-type="float">
            <text:p>8632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999074074074074" calcext:value-type="float">
            <text:p>0,00099907407407407400</text:p>
          </table:table-cell>
          <table:table-cell table:formula="of:=[.D106]-[.D105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83" office:value-type="float" office:value="8715" calcext:value-type="float">
            <text:p>871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100868055555556" calcext:value-type="float">
            <text:p>0,00100868055555556000</text:p>
          </table:table-cell>
          <table:table-cell table:formula="of:=[.D107]-[.D106]" office:value-type="float" office:value="0.00000960648148148132" calcext:value-type="float">
            <text:p>0,00000960648148148132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83" office:value-type="float" office:value="8798" calcext:value-type="float">
            <text:p>8798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101828703703704" calcext:value-type="float">
            <text:p>0,00101828703703704000</text:p>
          </table:table-cell>
          <table:table-cell table:formula="of:=[.D108]-[.D107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83" office:value-type="float" office:value="8881" calcext:value-type="float">
            <text:p>8881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102789351851852" calcext:value-type="float">
            <text:p>0,00102789351851852000</text:p>
          </table:table-cell>
          <table:table-cell table:formula="of:=[.D109]-[.D108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83" office:value-type="float" office:value="8964" calcext:value-type="float">
            <text:p>8964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10375" calcext:value-type="float">
            <text:p>0,00103750000000000000</text:p>
          </table:table-cell>
          <table:table-cell table:formula="of:=[.D110]-[.D109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83" office:value-type="float" office:value="9047" calcext:value-type="float">
            <text:p>9047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104710648148148" calcext:value-type="float">
            <text:p>0,00104710648148148000</text:p>
          </table:table-cell>
          <table:table-cell table:formula="of:=[.D111]-[.D110]" office:value-type="float" office:value="0.00000960648148148132" calcext:value-type="float">
            <text:p>0,00000960648148148132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83" office:value-type="float" office:value="9130" calcext:value-type="float">
            <text:p>913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105671296296296" calcext:value-type="float">
            <text:p>0,00105671296296296000</text:p>
          </table:table-cell>
          <table:table-cell table:formula="of:=[.D112]-[.D111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83" office:value-type="float" office:value="9213" calcext:value-type="float">
            <text:p>9213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106631944444444" calcext:value-type="float">
            <text:p>0,00106631944444444000</text:p>
          </table:table-cell>
          <table:table-cell table:formula="of:=[.D113]-[.D112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83" office:value-type="float" office:value="9296" calcext:value-type="float">
            <text:p>9296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107592592592593" calcext:value-type="float">
            <text:p>0,00107592592592593000</text:p>
          </table:table-cell>
          <table:table-cell table:formula="of:=[.D114]-[.D113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83" office:value-type="float" office:value="9379" calcext:value-type="float">
            <text:p>9379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108553240740741" calcext:value-type="float">
            <text:p>0,00108553240740741000</text:p>
          </table:table-cell>
          <table:table-cell table:formula="of:=[.D115]-[.D114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83" office:value-type="float" office:value="9462" calcext:value-type="float">
            <text:p>9462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109513888888889" calcext:value-type="float">
            <text:p>0,00109513888888889000</text:p>
          </table:table-cell>
          <table:table-cell table:formula="of:=[.D116]-[.D115]" office:value-type="float" office:value="0.00000960648148148132" calcext:value-type="float">
            <text:p>0,00000960648148148132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83" office:value-type="float" office:value="9545" calcext:value-type="float">
            <text:p>954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110474537037037" calcext:value-type="float">
            <text:p>0,00110474537037037000</text:p>
          </table:table-cell>
          <table:table-cell table:formula="of:=[.D117]-[.D116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83" office:value-type="float" office:value="9628" calcext:value-type="float">
            <text:p>9628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111435185185185" calcext:value-type="float">
            <text:p>0,00111435185185185000</text:p>
          </table:table-cell>
          <table:table-cell table:formula="of:=[.D118]-[.D117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83" office:value-type="float" office:value="9711" calcext:value-type="float">
            <text:p>9711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112395833333333" calcext:value-type="float">
            <text:p>0,00112395833333333000</text:p>
          </table:table-cell>
          <table:table-cell table:formula="of:=[.D119]-[.D118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83" office:value-type="float" office:value="9794" calcext:value-type="float">
            <text:p>9794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113356481481482" calcext:value-type="float">
            <text:p>0,00113356481481482000</text:p>
          </table:table-cell>
          <table:table-cell table:formula="of:=[.D120]-[.D119]" office:value-type="float" office:value="0.00000960648148148132" calcext:value-type="float">
            <text:p>0,00000960648148148132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83" office:value-type="float" office:value="9877" calcext:value-type="float">
            <text:p>9877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11431712962963" calcext:value-type="float">
            <text:p>0,00114317129629630000</text:p>
          </table:table-cell>
          <table:table-cell table:formula="of:=[.D121]-[.D120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83" office:value-type="float" office:value="9960" calcext:value-type="float">
            <text:p>996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115277777777778" calcext:value-type="float">
            <text:p>0,00115277777777778000</text:p>
          </table:table-cell>
          <table:table-cell table:formula="of:=[.D122]-[.D121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83" office:value-type="float" office:value="10043" calcext:value-type="float">
            <text:p>10043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116238425925926" calcext:value-type="float">
            <text:p>0,00116238425925926000</text:p>
          </table:table-cell>
          <table:table-cell table:formula="of:=[.D123]-[.D122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83" office:value-type="float" office:value="10126" calcext:value-type="float">
            <text:p>10126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117199074074074" calcext:value-type="float">
            <text:p>0,00117199074074074000</text:p>
          </table:table-cell>
          <table:table-cell table:formula="of:=[.D124]-[.D123]" office:value-type="float" office:value="0.00000960648148148132" calcext:value-type="float">
            <text:p>0,00000960648148148132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83" office:value-type="float" office:value="10209" calcext:value-type="float">
            <text:p>10209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118159722222222" calcext:value-type="float">
            <text:p>0,00118159722222222000</text:p>
          </table:table-cell>
          <table:table-cell table:formula="of:=[.D125]-[.D124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83" office:value-type="float" office:value="10292" calcext:value-type="float">
            <text:p>10292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11912037037037" calcext:value-type="float">
            <text:p>0,00119120370370370000</text:p>
          </table:table-cell>
          <table:table-cell table:formula="of:=[.D126]-[.D125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83" office:value-type="float" office:value="10375" calcext:value-type="float">
            <text:p>1037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120081018518519" calcext:value-type="float">
            <text:p>0,00120081018518519000</text:p>
          </table:table-cell>
          <table:table-cell table:formula="of:=[.D127]-[.D126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83" office:value-type="float" office:value="10458" calcext:value-type="float">
            <text:p>10458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121041666666667" calcext:value-type="float">
            <text:p>0,00121041666666667000</text:p>
          </table:table-cell>
          <table:table-cell table:formula="of:=[.D128]-[.D127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83" office:value-type="float" office:value="10541" calcext:value-type="float">
            <text:p>10541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122002314814815" calcext:value-type="float">
            <text:p>0,00122002314814815000</text:p>
          </table:table-cell>
          <table:table-cell table:formula="of:=[.D129]-[.D128]" office:value-type="float" office:value="0.00000960648148148132" calcext:value-type="float">
            <text:p>0,00000960648148148132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83" office:value-type="float" office:value="10624" calcext:value-type="float">
            <text:p>10624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22962962962963" calcext:value-type="float">
            <text:p>0,00122962962962963000</text:p>
          </table:table-cell>
          <table:table-cell table:formula="of:=[.D130]-[.D129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83" office:value-type="float" office:value="10707" calcext:value-type="float">
            <text:p>10707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23923611111111" calcext:value-type="float">
            <text:p>0,00123923611111111000</text:p>
          </table:table-cell>
          <table:table-cell table:formula="of:=[.D131]-[.D130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83" office:value-type="float" office:value="10790" calcext:value-type="float">
            <text:p>1079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24884259259259" calcext:value-type="float">
            <text:p>0,00124884259259259000</text:p>
          </table:table-cell>
          <table:table-cell table:formula="of:=[.D132]-[.D131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83" office:value-type="float" office:value="10873" calcext:value-type="float">
            <text:p>10873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25844907407407" calcext:value-type="float">
            <text:p>0,00125844907407407000</text:p>
          </table:table-cell>
          <table:table-cell table:formula="of:=[.D133]-[.D132]" office:value-type="float" office:value="0.00000960648148148132" calcext:value-type="float">
            <text:p>0,00000960648148148132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83" office:value-type="float" office:value="10956" calcext:value-type="float">
            <text:p>10956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26805555555556" calcext:value-type="float">
            <text:p>0,00126805555555556000</text:p>
          </table:table-cell>
          <table:table-cell table:formula="of:=[.D134]-[.D133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83" office:value-type="float" office:value="11039" calcext:value-type="float">
            <text:p>11039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27766203703704" calcext:value-type="float">
            <text:p>0,00127766203703704000</text:p>
          </table:table-cell>
          <table:table-cell table:formula="of:=[.D135]-[.D134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83" office:value-type="float" office:value="11122" calcext:value-type="float">
            <text:p>11122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28726851851852" calcext:value-type="float">
            <text:p>0,00128726851851852000</text:p>
          </table:table-cell>
          <table:table-cell table:formula="of:=[.D136]-[.D135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83" office:value-type="float" office:value="11205" calcext:value-type="float">
            <text:p>1120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296875" calcext:value-type="float">
            <text:p>0,00129687500000000000</text:p>
          </table:table-cell>
          <table:table-cell table:formula="of:=[.D137]-[.D136]" office:value-type="float" office:value="0.00000960648148148132" calcext:value-type="float">
            <text:p>0,00000960648148148132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83" office:value-type="float" office:value="11288" calcext:value-type="float">
            <text:p>11288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30648148148148" calcext:value-type="float">
            <text:p>0,00130648148148148000</text:p>
          </table:table-cell>
          <table:table-cell table:formula="of:=[.D138]-[.D137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83" office:value-type="float" office:value="11371" calcext:value-type="float">
            <text:p>11371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31608796296296" calcext:value-type="float">
            <text:p>0,00131608796296296000</text:p>
          </table:table-cell>
          <table:table-cell table:formula="of:=[.D139]-[.D138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83" office:value-type="float" office:value="11454" calcext:value-type="float">
            <text:p>11454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32569444444444" calcext:value-type="float">
            <text:p>0,00132569444444444000</text:p>
          </table:table-cell>
          <table:table-cell table:formula="of:=[.D140]-[.D139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83" office:value-type="float" office:value="11537" calcext:value-type="float">
            <text:p>11537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33530092592593" calcext:value-type="float">
            <text:p>0,00133530092592593000</text:p>
          </table:table-cell>
          <table:table-cell table:formula="of:=[.D141]-[.D140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83" office:value-type="float" office:value="11620" calcext:value-type="float">
            <text:p>1162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34490740740741" calcext:value-type="float">
            <text:p>0,00134490740740741000</text:p>
          </table:table-cell>
          <table:table-cell table:formula="of:=[.D142]-[.D141]" office:value-type="float" office:value="0.00000960648148148132" calcext:value-type="float">
            <text:p>0,00000960648148148132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83" office:value-type="float" office:value="11703" calcext:value-type="float">
            <text:p>11703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35451388888889" calcext:value-type="float">
            <text:p>0,00135451388888889000</text:p>
          </table:table-cell>
          <table:table-cell table:formula="of:=[.D143]-[.D142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83" office:value-type="float" office:value="11786" calcext:value-type="float">
            <text:p>11786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36412037037037" calcext:value-type="float">
            <text:p>0,00136412037037037000</text:p>
          </table:table-cell>
          <table:table-cell table:formula="of:=[.D144]-[.D143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83" office:value-type="float" office:value="11869" calcext:value-type="float">
            <text:p>11869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37372685185185" calcext:value-type="float">
            <text:p>0,00137372685185185000</text:p>
          </table:table-cell>
          <table:table-cell table:formula="of:=[.D145]-[.D144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83" office:value-type="float" office:value="11952" calcext:value-type="float">
            <text:p>11952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38333333333333" calcext:value-type="float">
            <text:p>0,00138333333333333000</text:p>
          </table:table-cell>
          <table:table-cell table:formula="of:=[.D146]-[.D145]" office:value-type="float" office:value="0.00000960648148148132" calcext:value-type="float">
            <text:p>0,00000960648148148132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83" office:value-type="float" office:value="12035" calcext:value-type="float">
            <text:p>1203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39293981481481" calcext:value-type="float">
            <text:p>0,00139293981481481000</text:p>
          </table:table-cell>
          <table:table-cell table:formula="of:=[.D147]-[.D146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83" office:value-type="float" office:value="12118" calcext:value-type="float">
            <text:p>12118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4025462962963" calcext:value-type="float">
            <text:p>0,00140254629629630000</text:p>
          </table:table-cell>
          <table:table-cell table:formula="of:=[.D148]-[.D147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83" office:value-type="float" office:value="12201" calcext:value-type="float">
            <text:p>12201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41215277777778" calcext:value-type="float">
            <text:p>0,00141215277777778000</text:p>
          </table:table-cell>
          <table:table-cell table:formula="of:=[.D149]-[.D148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83" office:value-type="float" office:value="12284" calcext:value-type="float">
            <text:p>12284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42175925925926" calcext:value-type="float">
            <text:p>0,00142175925925926000</text:p>
          </table:table-cell>
          <table:table-cell table:formula="of:=[.D150]-[.D149]" office:value-type="float" office:value="0.00000960648148148132" calcext:value-type="float">
            <text:p>0,00000960648148148132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83" office:value-type="float" office:value="12367" calcext:value-type="float">
            <text:p>12367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43136574074074" calcext:value-type="float">
            <text:p>0,00143136574074074000</text:p>
          </table:table-cell>
          <table:table-cell table:formula="of:=[.D151]-[.D150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83" office:value-type="float" office:value="12450" calcext:value-type="float">
            <text:p>124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44097222222222" calcext:value-type="float">
            <text:p>0,00144097222222222000</text:p>
          </table:table-cell>
          <table:table-cell table:formula="of:=[.D152]-[.D151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83" office:value-type="float" office:value="12533" calcext:value-type="float">
            <text:p>12533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4505787037037" calcext:value-type="float">
            <text:p>0,00145057870370370000</text:p>
          </table:table-cell>
          <table:table-cell table:formula="of:=[.D153]-[.D152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83" office:value-type="float" office:value="12616" calcext:value-type="float">
            <text:p>12616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46018518518519" calcext:value-type="float">
            <text:p>0,00146018518518519000</text:p>
          </table:table-cell>
          <table:table-cell table:formula="of:=[.D154]-[.D153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83" office:value-type="float" office:value="12699" calcext:value-type="float">
            <text:p>12699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46979166666667" calcext:value-type="float">
            <text:p>0,00146979166666667000</text:p>
          </table:table-cell>
          <table:table-cell table:formula="of:=[.D155]-[.D154]" office:value-type="float" office:value="0.00000960648148148132" calcext:value-type="float">
            <text:p>0,00000960648148148132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83" office:value-type="float" office:value="12782" calcext:value-type="float">
            <text:p>12782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47939814814815" calcext:value-type="float">
            <text:p>0,00147939814814815000</text:p>
          </table:table-cell>
          <table:table-cell table:formula="of:=[.D156]-[.D155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83" office:value-type="float" office:value="12865" calcext:value-type="float">
            <text:p>1286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48900462962963" calcext:value-type="float">
            <text:p>0,00148900462962963000</text:p>
          </table:table-cell>
          <table:table-cell table:formula="of:=[.D157]-[.D156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83" office:value-type="float" office:value="12948" calcext:value-type="float">
            <text:p>12948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49861111111111" calcext:value-type="float">
            <text:p>0,00149861111111111000</text:p>
          </table:table-cell>
          <table:table-cell table:formula="of:=[.D158]-[.D157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83" office:value-type="float" office:value="13031" calcext:value-type="float">
            <text:p>13031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50821759259259" calcext:value-type="float">
            <text:p>0,00150821759259259000</text:p>
          </table:table-cell>
          <table:table-cell table:formula="of:=[.D159]-[.D158]" office:value-type="float" office:value="0.00000960648148148132" calcext:value-type="float">
            <text:p>0,00000960648148148132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83" office:value-type="float" office:value="13114" calcext:value-type="float">
            <text:p>13114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51782407407407" calcext:value-type="float">
            <text:p>0,00151782407407407000</text:p>
          </table:table-cell>
          <table:table-cell table:formula="of:=[.D160]-[.D159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83" office:value-type="float" office:value="13197" calcext:value-type="float">
            <text:p>13197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52743055555556" calcext:value-type="float">
            <text:p>0,00152743055555556000</text:p>
          </table:table-cell>
          <table:table-cell table:formula="of:=[.D161]-[.D160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83" office:value-type="float" office:value="13280" calcext:value-type="float">
            <text:p>1328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53703703703704" calcext:value-type="float">
            <text:p>0,00153703703703704000</text:p>
          </table:table-cell>
          <table:table-cell table:formula="of:=[.D162]-[.D161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83" office:value-type="float" office:value="13363" calcext:value-type="float">
            <text:p>13363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54664351851852" calcext:value-type="float">
            <text:p>0,00154664351851852000</text:p>
          </table:table-cell>
          <table:table-cell table:formula="of:=[.D163]-[.D162]" office:value-type="float" office:value="0.00000960648148148132" calcext:value-type="float">
            <text:p>0,00000960648148148132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83" office:value-type="float" office:value="13446" calcext:value-type="float">
            <text:p>13446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55625" calcext:value-type="float">
            <text:p>0,00155625000000000000</text:p>
          </table:table-cell>
          <table:table-cell table:formula="of:=[.D164]-[.D163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83" office:value-type="float" office:value="13529" calcext:value-type="float">
            <text:p>13529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56585648148148" calcext:value-type="float">
            <text:p>0,00156585648148148000</text:p>
          </table:table-cell>
          <table:table-cell table:formula="of:=[.D165]-[.D164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83" office:value-type="float" office:value="13612" calcext:value-type="float">
            <text:p>13612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57546296296296" calcext:value-type="float">
            <text:p>0,00157546296296296000</text:p>
          </table:table-cell>
          <table:table-cell table:formula="of:=[.D166]-[.D165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83" office:value-type="float" office:value="13695" calcext:value-type="float">
            <text:p>1369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58506944444444" calcext:value-type="float">
            <text:p>0,00158506944444444000</text:p>
          </table:table-cell>
          <table:table-cell table:formula="of:=[.D167]-[.D166]" office:value-type="float" office:value="0.00000960648148148132" calcext:value-type="float">
            <text:p>0,00000960648148148132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83" office:value-type="float" office:value="13778" calcext:value-type="float">
            <text:p>13778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59467592592593" calcext:value-type="float">
            <text:p>0,00159467592592593000</text:p>
          </table:table-cell>
          <table:table-cell table:formula="of:=[.D168]-[.D167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83" office:value-type="float" office:value="13861" calcext:value-type="float">
            <text:p>13861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60428240740741" calcext:value-type="float">
            <text:p>0,00160428240740741000</text:p>
          </table:table-cell>
          <table:table-cell table:formula="of:=[.D169]-[.D168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83" office:value-type="float" office:value="13944" calcext:value-type="float">
            <text:p>13944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61388888888889" calcext:value-type="float">
            <text:p>0,00161388888888889000</text:p>
          </table:table-cell>
          <table:table-cell table:formula="of:=[.D170]-[.D169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83" office:value-type="float" office:value="14027" calcext:value-type="float">
            <text:p>14027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62349537037037" calcext:value-type="float">
            <text:p>0,00162349537037037000</text:p>
          </table:table-cell>
          <table:table-cell table:formula="of:=[.D171]-[.D170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83" office:value-type="float" office:value="14110" calcext:value-type="float">
            <text:p>1411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63310185185185" calcext:value-type="float">
            <text:p>0,00163310185185185000</text:p>
          </table:table-cell>
          <table:table-cell table:formula="of:=[.D172]-[.D171]" office:value-type="float" office:value="0.00000960648148148132" calcext:value-type="float">
            <text:p>0,00000960648148148132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83" office:value-type="float" office:value="14193" calcext:value-type="float">
            <text:p>14193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64270833333333" calcext:value-type="float">
            <text:p>0,00164270833333333000</text:p>
          </table:table-cell>
          <table:table-cell table:formula="of:=[.D173]-[.D172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83" office:value-type="float" office:value="14276" calcext:value-type="float">
            <text:p>14276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65231481481481" calcext:value-type="float">
            <text:p>0,00165231481481481000</text:p>
          </table:table-cell>
          <table:table-cell table:formula="of:=[.D174]-[.D173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83" office:value-type="float" office:value="14359" calcext:value-type="float">
            <text:p>14359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6619212962963" calcext:value-type="float">
            <text:p>0,00166192129629630000</text:p>
          </table:table-cell>
          <table:table-cell table:formula="of:=[.D175]-[.D174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83" office:value-type="float" office:value="14442" calcext:value-type="float">
            <text:p>14442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67152777777778" calcext:value-type="float">
            <text:p>0,00167152777777778000</text:p>
          </table:table-cell>
          <table:table-cell table:formula="of:=[.D176]-[.D175]" office:value-type="float" office:value="0.00000960648148148132" calcext:value-type="float">
            <text:p>0,00000960648148148132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83" office:value-type="float" office:value="14525" calcext:value-type="float">
            <text:p>1452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68113425925926" calcext:value-type="float">
            <text:p>0,00168113425925926000</text:p>
          </table:table-cell>
          <table:table-cell table:formula="of:=[.D177]-[.D176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83" office:value-type="float" office:value="14608" calcext:value-type="float">
            <text:p>14608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69074074074074" calcext:value-type="float">
            <text:p>0,00169074074074074000</text:p>
          </table:table-cell>
          <table:table-cell table:formula="of:=[.D178]-[.D177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83" office:value-type="float" office:value="14691" calcext:value-type="float">
            <text:p>14691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70034722222222" calcext:value-type="float">
            <text:p>0,00170034722222222000</text:p>
          </table:table-cell>
          <table:table-cell table:formula="of:=[.D179]-[.D178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83" office:value-type="float" office:value="14774" calcext:value-type="float">
            <text:p>14774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7099537037037" calcext:value-type="float">
            <text:p>0,00170995370370370000</text:p>
          </table:table-cell>
          <table:table-cell table:formula="of:=[.D180]-[.D179]" office:value-type="float" office:value="0.00000960648148148132" calcext:value-type="float">
            <text:p>0,00000960648148148132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83" office:value-type="float" office:value="14857" calcext:value-type="float">
            <text:p>14857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71956018518519" calcext:value-type="float">
            <text:p>0,00171956018518518000</text:p>
          </table:table-cell>
          <table:table-cell table:formula="of:=[.D181]-[.D180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83" office:value-type="float" office:value="14940" calcext:value-type="float">
            <text:p>1494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72916666666667" calcext:value-type="float">
            <text:p>0,00172916666666667000</text:p>
          </table:table-cell>
          <table:table-cell table:formula="of:=[.D182]-[.D181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83" office:value-type="float" office:value="15023" calcext:value-type="float">
            <text:p>15023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73877314814815" calcext:value-type="float">
            <text:p>0,00173877314814815000</text:p>
          </table:table-cell>
          <table:table-cell table:formula="of:=[.D183]-[.D182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83" office:value-type="float" office:value="15106" calcext:value-type="float">
            <text:p>15106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74837962962963" calcext:value-type="float">
            <text:p>0,00174837962962963000</text:p>
          </table:table-cell>
          <table:table-cell table:formula="of:=[.D184]-[.D183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83" office:value-type="float" office:value="15189" calcext:value-type="float">
            <text:p>15189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75798611111111" calcext:value-type="float">
            <text:p>0,00175798611111111000</text:p>
          </table:table-cell>
          <table:table-cell table:formula="of:=[.D185]-[.D184]" office:value-type="float" office:value="0.00000960648148148132" calcext:value-type="float">
            <text:p>0,00000960648148148132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83" office:value-type="float" office:value="15272" calcext:value-type="float">
            <text:p>15272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76759259259259" calcext:value-type="float">
            <text:p>0,00176759259259259000</text:p>
          </table:table-cell>
          <table:table-cell table:formula="of:=[.D186]-[.D185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83" office:value-type="float" office:value="15355" calcext:value-type="float">
            <text:p>1535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77719907407407" calcext:value-type="float">
            <text:p>0,00177719907407407000</text:p>
          </table:table-cell>
          <table:table-cell table:formula="of:=[.D187]-[.D186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83" office:value-type="float" office:value="15438" calcext:value-type="float">
            <text:p>15438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78680555555556" calcext:value-type="float">
            <text:p>0,00178680555555556000</text:p>
          </table:table-cell>
          <table:table-cell table:formula="of:=[.D188]-[.D187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83" office:value-type="float" office:value="15521" calcext:value-type="float">
            <text:p>15521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79641203703704" calcext:value-type="float">
            <text:p>0,00179641203703704000</text:p>
          </table:table-cell>
          <table:table-cell table:formula="of:=[.D189]-[.D188]" office:value-type="float" office:value="0.00000960648148148132" calcext:value-type="float">
            <text:p>0,00000960648148148132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83" office:value-type="float" office:value="15604" calcext:value-type="float">
            <text:p>15604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80601851851852" calcext:value-type="float">
            <text:p>0,00180601851851852000</text:p>
          </table:table-cell>
          <table:table-cell table:formula="of:=[.D190]-[.D189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83" office:value-type="float" office:value="15687" calcext:value-type="float">
            <text:p>15687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815625" calcext:value-type="float">
            <text:p>0,00181562500000000000</text:p>
          </table:table-cell>
          <table:table-cell table:formula="of:=[.D191]-[.D190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83" office:value-type="float" office:value="15770" calcext:value-type="float">
            <text:p>1577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82523148148148" calcext:value-type="float">
            <text:p>0,00182523148148148000</text:p>
          </table:table-cell>
          <table:table-cell table:formula="of:=[.D192]-[.D191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83" office:value-type="float" office:value="15853" calcext:value-type="float">
            <text:p>15853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83483796296296" calcext:value-type="float">
            <text:p>0,00183483796296296000</text:p>
          </table:table-cell>
          <table:table-cell table:formula="of:=[.D193]-[.D192]" office:value-type="float" office:value="0.00000960648148148132" calcext:value-type="float">
            <text:p>0,00000960648148148132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83" office:value-type="float" office:value="15936" calcext:value-type="float">
            <text:p>15936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84444444444444" calcext:value-type="float">
            <text:p>0,00184444444444444000</text:p>
          </table:table-cell>
          <table:table-cell table:formula="of:=[.D194]-[.D193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83" office:value-type="float" office:value="16019" calcext:value-type="float">
            <text:p>16019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85405092592593" calcext:value-type="float">
            <text:p>0,00185405092592593000</text:p>
          </table:table-cell>
          <table:table-cell table:formula="of:=[.D195]-[.D194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83" office:value-type="float" office:value="16102" calcext:value-type="float">
            <text:p>16102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86365740740741" calcext:value-type="float">
            <text:p>0,00186365740740741000</text:p>
          </table:table-cell>
          <table:table-cell table:formula="of:=[.D196]-[.D195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83" office:value-type="float" office:value="16185" calcext:value-type="float">
            <text:p>1618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87326388888889" calcext:value-type="float">
            <text:p>0,00187326388888889000</text:p>
          </table:table-cell>
          <table:table-cell table:formula="of:=[.D197]-[.D196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83" office:value-type="float" office:value="16268" calcext:value-type="float">
            <text:p>16268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88287037037037" calcext:value-type="float">
            <text:p>0,00188287037037037000</text:p>
          </table:table-cell>
          <table:table-cell table:formula="of:=[.D198]-[.D197]" office:value-type="float" office:value="0.00000960648148148132" calcext:value-type="float">
            <text:p>0,00000960648148148132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83" office:value-type="float" office:value="16351" calcext:value-type="float">
            <text:p>16351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89247685185185" calcext:value-type="float">
            <text:p>0,00189247685185185000</text:p>
          </table:table-cell>
          <table:table-cell table:formula="of:=[.D199]-[.D198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83" office:value-type="float" office:value="16434" calcext:value-type="float">
            <text:p>16434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90208333333333" calcext:value-type="float">
            <text:p>0,00190208333333333000</text:p>
          </table:table-cell>
          <table:table-cell table:formula="of:=[.D200]-[.D199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83" office:value-type="float" office:value="16517" calcext:value-type="float">
            <text:p>16517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91168981481481" calcext:value-type="float">
            <text:p>0,00191168981481481000</text:p>
          </table:table-cell>
          <table:table-cell table:formula="of:=[.D201]-[.D200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83" office:value-type="float" office:value="16600" calcext:value-type="float">
            <text:p>166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9212962962963" calcext:value-type="float">
            <text:p>0,00192129629629630000</text:p>
          </table:table-cell>
          <table:table-cell table:formula="of:=[.D202]-[.D201]" office:value-type="float" office:value="0.00000960648148148132" calcext:value-type="float">
            <text:p>0,00000960648148148132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83" office:value-type="float" office:value="16683" calcext:value-type="float">
            <text:p>16683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93090277777778" calcext:value-type="float">
            <text:p>0,00193090277777778000</text:p>
          </table:table-cell>
          <table:table-cell table:formula="of:=[.D203]-[.D202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83" office:value-type="float" office:value="16766" calcext:value-type="float">
            <text:p>16766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94050925925926" calcext:value-type="float">
            <text:p>0,00194050925925926000</text:p>
          </table:table-cell>
          <table:table-cell table:formula="of:=[.D204]-[.D203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83" office:value-type="float" office:value="16849" calcext:value-type="float">
            <text:p>16849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95011574074074" calcext:value-type="float">
            <text:p>0,00195011574074074000</text:p>
          </table:table-cell>
          <table:table-cell table:formula="of:=[.D205]-[.D204]" office:value-type="float" office:value="0.00000960648148148132" calcext:value-type="float">
            <text:p>0,00000960648148148132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83" office:value-type="float" office:value="16932" calcext:value-type="float">
            <text:p>16932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95972222222222" calcext:value-type="float">
            <text:p>0,00195972222222222000</text:p>
          </table:table-cell>
          <table:table-cell table:formula="of:=[.D206]-[.D205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83" office:value-type="float" office:value="17015" calcext:value-type="float">
            <text:p>1701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9693287037037" calcext:value-type="float">
            <text:p>0,00196932870370370000</text:p>
          </table:table-cell>
          <table:table-cell table:formula="of:=[.D207]-[.D206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83" office:value-type="float" office:value="17098" calcext:value-type="float">
            <text:p>17098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97893518518519" calcext:value-type="float">
            <text:p>0,00197893518518519000</text:p>
          </table:table-cell>
          <table:table-cell table:formula="of:=[.D208]-[.D207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83" office:value-type="float" office:value="17181" calcext:value-type="float">
            <text:p>17181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98854166666667" calcext:value-type="float">
            <text:p>0,00198854166666667000</text:p>
          </table:table-cell>
          <table:table-cell table:formula="of:=[.D209]-[.D208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83" office:value-type="float" office:value="17264" calcext:value-type="float">
            <text:p>17264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99814814814815" calcext:value-type="float">
            <text:p>0,00199814814814815000</text:p>
          </table:table-cell>
          <table:table-cell table:formula="of:=[.D210]-[.D209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83" office:value-type="float" office:value="17347" calcext:value-type="float">
            <text:p>17347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200775462962963" calcext:value-type="float">
            <text:p>0,00200775462962963000</text:p>
          </table:table-cell>
          <table:table-cell table:formula="of:=[.D211]-[.D210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83" office:value-type="float" office:value="17430" calcext:value-type="float">
            <text:p>1743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201736111111111" calcext:value-type="float">
            <text:p>0,00201736111111111000</text:p>
          </table:table-cell>
          <table:table-cell table:formula="of:=[.D212]-[.D211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83" office:value-type="float" office:value="17513" calcext:value-type="float">
            <text:p>17513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202696759259259" calcext:value-type="float">
            <text:p>0,00202696759259259000</text:p>
          </table:table-cell>
          <table:table-cell table:formula="of:=[.D213]-[.D212]" office:value-type="float" office:value="0.0000096064814814811" calcext:value-type="float">
            <text:p>0,00000960648148148110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83" office:value-type="float" office:value="17596" calcext:value-type="float">
            <text:p>17596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203657407407407" calcext:value-type="float">
            <text:p>0,00203657407407407000</text:p>
          </table:table-cell>
          <table:table-cell table:formula="of:=[.D214]-[.D213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83" office:value-type="float" office:value="17679" calcext:value-type="float">
            <text:p>17679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204618055555556" calcext:value-type="float">
            <text:p>0,00204618055555556000</text:p>
          </table:table-cell>
          <table:table-cell table:formula="of:=[.D215]-[.D214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83" office:value-type="float" office:value="17762" calcext:value-type="float">
            <text:p>17762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205578703703704" calcext:value-type="float">
            <text:p>0,00205578703703704000</text:p>
          </table:table-cell>
          <table:table-cell table:formula="of:=[.D216]-[.D215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83" office:value-type="float" office:value="17845" calcext:value-type="float">
            <text:p>1784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206539351851852" calcext:value-type="float">
            <text:p>0,00206539351851852000</text:p>
          </table:table-cell>
          <table:table-cell table:formula="of:=[.D217]-[.D216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83" office:value-type="float" office:value="17928" calcext:value-type="float">
            <text:p>17928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2075" calcext:value-type="float">
            <text:p>0,00207500000000000000</text:p>
          </table:table-cell>
          <table:table-cell table:formula="of:=[.D218]-[.D217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83" office:value-type="float" office:value="18011" calcext:value-type="float">
            <text:p>18011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208460648148148" calcext:value-type="float">
            <text:p>0,00208460648148148000</text:p>
          </table:table-cell>
          <table:table-cell table:formula="of:=[.D219]-[.D218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83" office:value-type="float" office:value="18094" calcext:value-type="float">
            <text:p>18094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209421296296296" calcext:value-type="float">
            <text:p>0,00209421296296296000</text:p>
          </table:table-cell>
          <table:table-cell table:formula="of:=[.D220]-[.D219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83" office:value-type="float" office:value="18177" calcext:value-type="float">
            <text:p>18177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210381944444444" calcext:value-type="float">
            <text:p>0,00210381944444444000</text:p>
          </table:table-cell>
          <table:table-cell table:formula="of:=[.D221]-[.D220]" office:value-type="float" office:value="0.0000096064814814811" calcext:value-type="float">
            <text:p>0,00000960648148148110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83" office:value-type="float" office:value="18260" calcext:value-type="float">
            <text:p>1826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211342592592593" calcext:value-type="float">
            <text:p>0,00211342592592593000</text:p>
          </table:table-cell>
          <table:table-cell table:formula="of:=[.D222]-[.D221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83" office:value-type="float" office:value="18343" calcext:value-type="float">
            <text:p>18343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212303240740741" calcext:value-type="float">
            <text:p>0,00212303240740741000</text:p>
          </table:table-cell>
          <table:table-cell table:formula="of:=[.D223]-[.D222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83" office:value-type="float" office:value="18426" calcext:value-type="float">
            <text:p>18426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213263888888889" calcext:value-type="float">
            <text:p>0,00213263888888889000</text:p>
          </table:table-cell>
          <table:table-cell table:formula="of:=[.D224]-[.D223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83" office:value-type="float" office:value="18509" calcext:value-type="float">
            <text:p>18509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214224537037037" calcext:value-type="float">
            <text:p>0,00214224537037037000</text:p>
          </table:table-cell>
          <table:table-cell table:formula="of:=[.D225]-[.D224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83" office:value-type="float" office:value="18592" calcext:value-type="float">
            <text:p>18592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215185185185185" calcext:value-type="float">
            <text:p>0,00215185185185185000</text:p>
          </table:table-cell>
          <table:table-cell table:formula="of:=[.D226]-[.D225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83" office:value-type="float" office:value="18675" calcext:value-type="float">
            <text:p>1867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216145833333333" calcext:value-type="float">
            <text:p>0,00216145833333333000</text:p>
          </table:table-cell>
          <table:table-cell table:formula="of:=[.D227]-[.D226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83" office:value-type="float" office:value="18758" calcext:value-type="float">
            <text:p>18758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217106481481482" calcext:value-type="float">
            <text:p>0,00217106481481482000</text:p>
          </table:table-cell>
          <table:table-cell table:formula="of:=[.D228]-[.D227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83" office:value-type="float" office:value="18841" calcext:value-type="float">
            <text:p>18841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21806712962963" calcext:value-type="float">
            <text:p>0,00218067129629630000</text:p>
          </table:table-cell>
          <table:table-cell table:formula="of:=[.D229]-[.D228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83" office:value-type="float" office:value="18924" calcext:value-type="float">
            <text:p>18924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219027777777778" calcext:value-type="float">
            <text:p>0,00219027777777778000</text:p>
          </table:table-cell>
          <table:table-cell table:formula="of:=[.D230]-[.D229]" office:value-type="float" office:value="0.0000096064814814811" calcext:value-type="float">
            <text:p>0,00000960648148148110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83" office:value-type="float" office:value="19007" calcext:value-type="float">
            <text:p>19007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219988425925926" calcext:value-type="float">
            <text:p>0,00219988425925926000</text:p>
          </table:table-cell>
          <table:table-cell table:formula="of:=[.D231]-[.D230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83" office:value-type="float" office:value="19090" calcext:value-type="float">
            <text:p>1909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220949074074074" calcext:value-type="float">
            <text:p>0,00220949074074074000</text:p>
          </table:table-cell>
          <table:table-cell table:formula="of:=[.D232]-[.D231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83" office:value-type="float" office:value="19173" calcext:value-type="float">
            <text:p>19173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221909722222222" calcext:value-type="float">
            <text:p>0,00221909722222222000</text:p>
          </table:table-cell>
          <table:table-cell table:formula="of:=[.D233]-[.D232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83" office:value-type="float" office:value="19256" calcext:value-type="float">
            <text:p>19256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22287037037037" calcext:value-type="float">
            <text:p>0,00222870370370370000</text:p>
          </table:table-cell>
          <table:table-cell table:formula="of:=[.D234]-[.D233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83" office:value-type="float" office:value="19339" calcext:value-type="float">
            <text:p>19339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223831018518519" calcext:value-type="float">
            <text:p>0,00223831018518519000</text:p>
          </table:table-cell>
          <table:table-cell table:formula="of:=[.D235]-[.D234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83" office:value-type="float" office:value="19422" calcext:value-type="float">
            <text:p>19422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224791666666667" calcext:value-type="float">
            <text:p>0,00224791666666667000</text:p>
          </table:table-cell>
          <table:table-cell table:formula="of:=[.D236]-[.D235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83" office:value-type="float" office:value="19505" calcext:value-type="float">
            <text:p>1950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225752314814815" calcext:value-type="float">
            <text:p>0,00225752314814815000</text:p>
          </table:table-cell>
          <table:table-cell table:formula="of:=[.D237]-[.D236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83" office:value-type="float" office:value="19588" calcext:value-type="float">
            <text:p>19588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226712962962963" calcext:value-type="float">
            <text:p>0,00226712962962963000</text:p>
          </table:table-cell>
          <table:table-cell table:formula="of:=[.D238]-[.D237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83" office:value-type="float" office:value="19671" calcext:value-type="float">
            <text:p>19671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227673611111111" calcext:value-type="float">
            <text:p>0,00227673611111111000</text:p>
          </table:table-cell>
          <table:table-cell table:formula="of:=[.D239]-[.D238]" office:value-type="float" office:value="0.0000096064814814811" calcext:value-type="float">
            <text:p>0,00000960648148148110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83" office:value-type="float" office:value="19754" calcext:value-type="float">
            <text:p>19754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228634259259259" calcext:value-type="float">
            <text:p>0,00228634259259259000</text:p>
          </table:table-cell>
          <table:table-cell table:formula="of:=[.D240]-[.D239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83" office:value-type="float" office:value="19837" calcext:value-type="float">
            <text:p>19837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229594907407407" calcext:value-type="float">
            <text:p>0,00229594907407407000</text:p>
          </table:table-cell>
          <table:table-cell table:formula="of:=[.D241]-[.D240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83" office:value-type="float" office:value="19920" calcext:value-type="float">
            <text:p>1992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230555555555556" calcext:value-type="float">
            <text:p>0,00230555555555556000</text:p>
          </table:table-cell>
          <table:table-cell table:formula="of:=[.D242]-[.D241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83" office:value-type="float" office:value="20003" calcext:value-type="float">
            <text:p>20003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231516203703704" calcext:value-type="float">
            <text:p>0,00231516203703704000</text:p>
          </table:table-cell>
          <table:table-cell table:formula="of:=[.D243]-[.D242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83" office:value-type="float" office:value="20086" calcext:value-type="float">
            <text:p>20086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232476851851852" calcext:value-type="float">
            <text:p>0,00232476851851852000</text:p>
          </table:table-cell>
          <table:table-cell table:formula="of:=[.D244]-[.D243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83" office:value-type="float" office:value="20169" calcext:value-type="float">
            <text:p>20169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2334375" calcext:value-type="float">
            <text:p>0,00233437500000000000</text:p>
          </table:table-cell>
          <table:table-cell table:formula="of:=[.D245]-[.D244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83" office:value-type="float" office:value="20252" calcext:value-type="float">
            <text:p>20252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234398148148148" calcext:value-type="float">
            <text:p>0,00234398148148148000</text:p>
          </table:table-cell>
          <table:table-cell table:formula="of:=[.D246]-[.D245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83" office:value-type="float" office:value="20335" calcext:value-type="float">
            <text:p>2033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235358796296296" calcext:value-type="float">
            <text:p>0,00235358796296296000</text:p>
          </table:table-cell>
          <table:table-cell table:formula="of:=[.D247]-[.D246]" office:value-type="float" office:value="0.0000096064814814811" calcext:value-type="float">
            <text:p>0,00000960648148148110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83" office:value-type="float" office:value="20418" calcext:value-type="float">
            <text:p>20418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236319444444444" calcext:value-type="float">
            <text:p>0,00236319444444444000</text:p>
          </table:table-cell>
          <table:table-cell table:formula="of:=[.D248]-[.D247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83" office:value-type="float" office:value="20501" calcext:value-type="float">
            <text:p>20501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237280092592593" calcext:value-type="float">
            <text:p>0,00237280092592593000</text:p>
          </table:table-cell>
          <table:table-cell table:formula="of:=[.D249]-[.D248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83" office:value-type="float" office:value="20584" calcext:value-type="float">
            <text:p>20584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238240740740741" calcext:value-type="float">
            <text:p>0,00238240740740741000</text:p>
          </table:table-cell>
          <table:table-cell table:formula="of:=[.D250]-[.D249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83" office:value-type="float" office:value="20667" calcext:value-type="float">
            <text:p>20667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239201388888889" calcext:value-type="float">
            <text:p>0,00239201388888889000</text:p>
          </table:table-cell>
          <table:table-cell table:formula="of:=[.D251]-[.D250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83" office:value-type="float" office:value="20750" calcext:value-type="float">
            <text:p>207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240162037037037" calcext:value-type="float">
            <text:p>0,00240162037037037000</text:p>
          </table:table-cell>
          <table:table-cell table:formula="of:=[.D252]-[.D251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83" office:value-type="float" office:value="20833" calcext:value-type="float">
            <text:p>20833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241122685185185" calcext:value-type="float">
            <text:p>0,00241122685185185000</text:p>
          </table:table-cell>
          <table:table-cell table:formula="of:=[.D253]-[.D252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83" office:value-type="float" office:value="20916" calcext:value-type="float">
            <text:p>20916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242083333333333" calcext:value-type="float">
            <text:p>0,00242083333333333000</text:p>
          </table:table-cell>
          <table:table-cell table:formula="of:=[.D254]-[.D253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83" office:value-type="float" office:value="20999" calcext:value-type="float">
            <text:p>20999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243043981481482" calcext:value-type="float">
            <text:p>0,00243043981481482000</text:p>
          </table:table-cell>
          <table:table-cell table:formula="of:=[.D255]-[.D254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83" office:value-type="float" office:value="21082" calcext:value-type="float">
            <text:p>21082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24400462962963" calcext:value-type="float">
            <text:p>0,00244004629629630000</text:p>
          </table:table-cell>
          <table:table-cell table:formula="of:=[.D256]-[.D255]" office:value-type="float" office:value="0.0000096064814814811" calcext:value-type="float">
            <text:p>0,00000960648148148110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83" office:value-type="float" office:value="21165" calcext:value-type="float">
            <text:p>2116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244965277777778" calcext:value-type="float">
            <text:p>0,00244965277777778000</text:p>
          </table:table-cell>
          <table:table-cell table:formula="of:=[.D257]-[.D256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83" office:value-type="float" office:value="21248" calcext:value-type="float">
            <text:p>21248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245925925925926" calcext:value-type="float">
            <text:p>0,00245925925925926000</text:p>
          </table:table-cell>
          <table:table-cell table:formula="of:=[.D258]-[.D257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83" office:value-type="float" office:value="21331" calcext:value-type="float">
            <text:p>21331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246886574074074" calcext:value-type="float">
            <text:p>0,00246886574074074000</text:p>
          </table:table-cell>
          <table:table-cell table:formula="of:=[.D259]-[.D258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83" office:value-type="float" office:value="21414" calcext:value-type="float">
            <text:p>21414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247847222222222" calcext:value-type="float">
            <text:p>0,00247847222222222000</text:p>
          </table:table-cell>
          <table:table-cell table:formula="of:=[.D260]-[.D259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83" office:value-type="float" office:value="21497" calcext:value-type="float">
            <text:p>21497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24880787037037" calcext:value-type="float">
            <text:p>0,00248807870370370000</text:p>
          </table:table-cell>
          <table:table-cell table:formula="of:=[.D261]-[.D260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83" office:value-type="float" office:value="21580" calcext:value-type="float">
            <text:p>2158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249768518518519" calcext:value-type="float">
            <text:p>0,00249768518518519000</text:p>
          </table:table-cell>
          <table:table-cell table:formula="of:=[.D262]-[.D261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83" office:value-type="float" office:value="21663" calcext:value-type="float">
            <text:p>21663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250729166666667" calcext:value-type="float">
            <text:p>0,00250729166666667000</text:p>
          </table:table-cell>
          <table:table-cell table:formula="of:=[.D263]-[.D262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83" office:value-type="float" office:value="21746" calcext:value-type="float">
            <text:p>21746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251689814814815" calcext:value-type="float">
            <text:p>0,00251689814814815000</text:p>
          </table:table-cell>
          <table:table-cell table:formula="of:=[.D264]-[.D263]" office:value-type="float" office:value="0.0000096064814814811" calcext:value-type="float">
            <text:p>0,00000960648148148110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83" office:value-type="float" office:value="21829" calcext:value-type="float">
            <text:p>21829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252650462962963" calcext:value-type="float">
            <text:p>0,00252650462962963000</text:p>
          </table:table-cell>
          <table:table-cell table:formula="of:=[.D265]-[.D264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83" office:value-type="float" office:value="21912" calcext:value-type="float">
            <text:p>21912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253611111111111" calcext:value-type="float">
            <text:p>0,00253611111111111000</text:p>
          </table:table-cell>
          <table:table-cell table:formula="of:=[.D266]-[.D265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83" office:value-type="float" office:value="21995" calcext:value-type="float">
            <text:p>2199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254571759259259" calcext:value-type="float">
            <text:p>0,00254571759259259000</text:p>
          </table:table-cell>
          <table:table-cell table:formula="of:=[.D267]-[.D266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83" office:value-type="float" office:value="22078" calcext:value-type="float">
            <text:p>22078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255532407407407" calcext:value-type="float">
            <text:p>0,00255532407407407000</text:p>
          </table:table-cell>
          <table:table-cell table:formula="of:=[.D268]-[.D267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83" office:value-type="float" office:value="22161" calcext:value-type="float">
            <text:p>22161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256493055555556" calcext:value-type="float">
            <text:p>0,00256493055555556000</text:p>
          </table:table-cell>
          <table:table-cell table:formula="of:=[.D269]-[.D268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83" office:value-type="float" office:value="22244" calcext:value-type="float">
            <text:p>22244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257453703703704" calcext:value-type="float">
            <text:p>0,00257453703703704000</text:p>
          </table:table-cell>
          <table:table-cell table:formula="of:=[.D270]-[.D269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83" office:value-type="float" office:value="22327" calcext:value-type="float">
            <text:p>22327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258414351851852" calcext:value-type="float">
            <text:p>0,00258414351851852000</text:p>
          </table:table-cell>
          <table:table-cell table:formula="of:=[.D271]-[.D270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83" office:value-type="float" office:value="22410" calcext:value-type="float">
            <text:p>2241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259375" calcext:value-type="float">
            <text:p>0,00259375000000000000</text:p>
          </table:table-cell>
          <table:table-cell table:formula="of:=[.D272]-[.D271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83" office:value-type="float" office:value="22493" calcext:value-type="float">
            <text:p>22493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260335648148148" calcext:value-type="float">
            <text:p>0,00260335648148148000</text:p>
          </table:table-cell>
          <table:table-cell table:formula="of:=[.D273]-[.D272]" office:value-type="float" office:value="0.0000096064814814811" calcext:value-type="float">
            <text:p>0,00000960648148148110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83" office:value-type="float" office:value="22576" calcext:value-type="float">
            <text:p>22576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261296296296296" calcext:value-type="float">
            <text:p>0,00261296296296296000</text:p>
          </table:table-cell>
          <table:table-cell table:formula="of:=[.D274]-[.D273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83" office:value-type="float" office:value="22659" calcext:value-type="float">
            <text:p>22659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262256944444444" calcext:value-type="float">
            <text:p>0,00262256944444444000</text:p>
          </table:table-cell>
          <table:table-cell table:formula="of:=[.D275]-[.D274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83" office:value-type="float" office:value="22742" calcext:value-type="float">
            <text:p>22742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263217592592593" calcext:value-type="float">
            <text:p>0,00263217592592593000</text:p>
          </table:table-cell>
          <table:table-cell table:formula="of:=[.D276]-[.D275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83" office:value-type="float" office:value="22825" calcext:value-type="float">
            <text:p>2282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264178240740741" calcext:value-type="float">
            <text:p>0,00264178240740741000</text:p>
          </table:table-cell>
          <table:table-cell table:formula="of:=[.D277]-[.D276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83" office:value-type="float" office:value="22908" calcext:value-type="float">
            <text:p>22908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265138888888889" calcext:value-type="float">
            <text:p>0,00265138888888889000</text:p>
          </table:table-cell>
          <table:table-cell table:formula="of:=[.D278]-[.D277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83" office:value-type="float" office:value="22991" calcext:value-type="float">
            <text:p>22991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266099537037037" calcext:value-type="float">
            <text:p>0,00266099537037037000</text:p>
          </table:table-cell>
          <table:table-cell table:formula="of:=[.D279]-[.D278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83" office:value-type="float" office:value="23074" calcext:value-type="float">
            <text:p>23074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267060185185185" calcext:value-type="float">
            <text:p>0,00267060185185185000</text:p>
          </table:table-cell>
          <table:table-cell table:formula="of:=[.D280]-[.D279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83" office:value-type="float" office:value="23157" calcext:value-type="float">
            <text:p>23157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268020833333333" calcext:value-type="float">
            <text:p>0,00268020833333333000</text:p>
          </table:table-cell>
          <table:table-cell table:formula="of:=[.D281]-[.D280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83" office:value-type="float" office:value="23240" calcext:value-type="float">
            <text:p>2324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268981481481482" calcext:value-type="float">
            <text:p>0,00268981481481482000</text:p>
          </table:table-cell>
          <table:table-cell table:formula="of:=[.D282]-[.D281]" office:value-type="float" office:value="0.0000096064814814811" calcext:value-type="float">
            <text:p>0,00000960648148148110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83" office:value-type="float" office:value="23323" calcext:value-type="float">
            <text:p>23323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26994212962963" calcext:value-type="float">
            <text:p>0,00269942129629630000</text:p>
          </table:table-cell>
          <table:table-cell table:formula="of:=[.D283]-[.D282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83" office:value-type="float" office:value="23406" calcext:value-type="float">
            <text:p>23406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270902777777778" calcext:value-type="float">
            <text:p>0,00270902777777778000</text:p>
          </table:table-cell>
          <table:table-cell table:formula="of:=[.D284]-[.D283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83" office:value-type="float" office:value="23489" calcext:value-type="float">
            <text:p>23489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271863425925926" calcext:value-type="float">
            <text:p>0,00271863425925926000</text:p>
          </table:table-cell>
          <table:table-cell table:formula="of:=[.D285]-[.D284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83" office:value-type="float" office:value="23572" calcext:value-type="float">
            <text:p>23572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272824074074074" calcext:value-type="float">
            <text:p>0,00272824074074074000</text:p>
          </table:table-cell>
          <table:table-cell table:formula="of:=[.D286]-[.D285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83" office:value-type="float" office:value="23655" calcext:value-type="float">
            <text:p>2365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273784722222222" calcext:value-type="float">
            <text:p>0,00273784722222222000</text:p>
          </table:table-cell>
          <table:table-cell table:formula="of:=[.D287]-[.D286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83" office:value-type="float" office:value="23738" calcext:value-type="float">
            <text:p>23738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27474537037037" calcext:value-type="float">
            <text:p>0,00274745370370370000</text:p>
          </table:table-cell>
          <table:table-cell table:formula="of:=[.D288]-[.D287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83" office:value-type="float" office:value="23821" calcext:value-type="float">
            <text:p>23821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275706018518519" calcext:value-type="float">
            <text:p>0,00275706018518519000</text:p>
          </table:table-cell>
          <table:table-cell table:formula="of:=[.D289]-[.D288]" office:value-type="float" office:value="0.00000960648148148153" calcext:value-type="float">
            <text:p>0,00000960648148148153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83" office:value-type="float" office:value="23904" calcext:value-type="float">
            <text:p>23904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276666666666667" calcext:value-type="float">
            <text:p>0,00276666666666667000</text:p>
          </table:table-cell>
          <table:table-cell table:formula="of:=[.D290]-[.D289]" office:value-type="float" office:value="0.0000096064814814811" calcext:value-type="float">
            <text:p>0,00000960648148148110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83" office:value-type="float" office:value="23987" calcext:value-type="float">
            <text:p>23987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277627314814815" calcext:value-type="float">
            <text:p>0,00277627314814815000</text:p>
          </table:table-cell>
          <table:table-cell table:formula="of:=#REF!-[.D290]" office:value-type="string" office:string-value="" calcext:value-type="error">
            <text:p>#REF!</text:p>
          </table:table-cell>
          <table:table-cell table:number-columns-repeated="5"/>
        </table:table-row>
        <table:table-row table:style-name="ro1" table:number-rows-repeated="104828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9:06:58.785797381</meta:creation-date>
    <dc:date>2026-05-17T19:07:14.466669982</dc:date>
    <meta:editing-duration>PT17S</meta:editing-duration>
    <meta:editing-cycles>1</meta:editing-cycles>
    <meta:document-statistic meta:table-count="1" meta:cell-count="1450" meta:object-count="0"/>
    <meta:generator>LibreOffice/24.2.7.2$Linux_X86_64 LibreOffice_project/420$Build-2</meta:generator>
  </office:meta>
</office:document-meta>
</file>