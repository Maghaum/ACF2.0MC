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9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68cm"/>
    </style:style>
    <style:style style:name="co4" style:family="table-column">
      <style:table-column-properties fo:break-before="auto" style:column-width="4.9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</style:style>
    <style:style style:name="T1" style:family="text">
      <style:text-properties fo:language="pt" fo:country="BR"/>
    </style:style>
  </office:automatic-styles>
  <office:body>
    <office:spreadsheet>
      <table:calculation-settings table:automatic-find-labels="false" table:use-regular-expressions="false" table:use-wildcards="true"/>
      <table:table table:name="10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4"/>
        <table:table-row table:style-name="ro1">
          <table:table-cell table:style-name="ce1" office:value-type="string" calcext:value-type="string">
            <text:p>Naturais</text:p>
          </table:table-cell>
          <table:table-cell table:style-name="ce1" office:value-type="string" calcext:value-type="string">
            <text:p>B + 10</text:p>
          </table:table-cell>
          <table:table-cell table:style-name="ce1" office:value-type="string" calcext:value-type="string">
            <text:p><text:span text:style-name="T1">Ciclo</text:span> Perfeito</text:p>
          </table:table-cell>
          <table:table-cell table:style-name="ce3" office:value-type="string" calcext:value-type="string">
            <text:p>B / C</text:p>
          </table:table-cell>
          <table:table-cell table:style-name="ce3" office:value-type="string" calcext:value-type="string">
            <text:p>D posterior – D atu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640000" calcext:value-type="float">
            <text:p>8640000</text:p>
          </table:table-cell>
          <table:table-cell table:formula="of:=[.B2]/[.C2]" office:value-type="float" office:value="0.00000115740740740741" calcext:value-type="float">
            <text:p>0,00000115740740740741</text:p>
          </table:table-cell>
          <table:table-cell table:formula="of:=[.D3]-[.D2]" office:value-type="float" office:value="0.00000115740740740741" calcext:value-type="float">
            <text:p>0,000001157407407407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]+10" office:value-type="float" office:value="20" calcext:value-type="float">
            <text:p>20</text:p>
          </table:table-cell>
          <table:table-cell office:value-type="float" office:value="8640000" calcext:value-type="float">
            <text:p>8640000</text:p>
          </table:table-cell>
          <table:table-cell table:formula="of:=[.B3]/[.C3]" office:value-type="float" office:value="0.00000231481481481481" calcext:value-type="float">
            <text:p>0,00000231481481481481</text:p>
          </table:table-cell>
          <table:table-cell table:formula="of:=[.D4]-[.D3]" office:value-type="float" office:value="0.00000115740740740741" calcext:value-type="float">
            <text:p>0,000001157407407407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3]+10" office:value-type="float" office:value="30" calcext:value-type="float">
            <text:p>30</text:p>
          </table:table-cell>
          <table:table-cell office:value-type="float" office:value="8640000" calcext:value-type="float">
            <text:p>8640000</text:p>
          </table:table-cell>
          <table:table-cell table:formula="of:=[.B4]/[.C4]" office:value-type="float" office:value="0.00000347222222222222" calcext:value-type="float">
            <text:p>0,00000347222222222222</text:p>
          </table:table-cell>
          <table:table-cell table:formula="of:=[.D5]-[.D4]" office:value-type="float" office:value="0.00000115740740740741" calcext:value-type="float">
            <text:p>0,000001157407407407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4]+10" office:value-type="float" office:value="40" calcext:value-type="float">
            <text:p>40</text:p>
          </table:table-cell>
          <table:table-cell office:value-type="float" office:value="8640000" calcext:value-type="float">
            <text:p>8640000</text:p>
          </table:table-cell>
          <table:table-cell table:formula="of:=[.B5]/[.C5]" office:value-type="float" office:value="0.00000462962962962963" calcext:value-type="float">
            <text:p>0,00000462962962962963</text:p>
          </table:table-cell>
          <table:table-cell table:formula="of:=[.D6]-[.D5]" office:value-type="float" office:value="0.00000115740740740741" calcext:value-type="float">
            <text:p>0,0000011574074074074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5]+10" office:value-type="float" office:value="50" calcext:value-type="float">
            <text:p>50</text:p>
          </table:table-cell>
          <table:table-cell office:value-type="float" office:value="8640000" calcext:value-type="float">
            <text:p>8640000</text:p>
          </table:table-cell>
          <table:table-cell table:formula="of:=[.B6]/[.C6]" office:value-type="float" office:value="0.00000578703703703704" calcext:value-type="float">
            <text:p>0,00000578703703703704</text:p>
          </table:table-cell>
          <table:table-cell table:formula="of:=[.D7]-[.D6]" office:value-type="float" office:value="0.00000115740740740741" calcext:value-type="float">
            <text:p>0,0000011574074074074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6]+10" office:value-type="float" office:value="60" calcext:value-type="float">
            <text:p>60</text:p>
          </table:table-cell>
          <table:table-cell office:value-type="float" office:value="8640000" calcext:value-type="float">
            <text:p>8640000</text:p>
          </table:table-cell>
          <table:table-cell table:formula="of:=[.B7]/[.C7]" office:value-type="float" office:value="0.00000694444444444445" calcext:value-type="float">
            <text:p>0,00000694444444444445</text:p>
          </table:table-cell>
          <table:table-cell table:formula="of:=[.D8]-[.D7]" office:value-type="float" office:value="0.00000115740740740741" calcext:value-type="float">
            <text:p>0,0000011574074074074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7]+10" office:value-type="float" office:value="70" calcext:value-type="float">
            <text:p>70</text:p>
          </table:table-cell>
          <table:table-cell office:value-type="float" office:value="8640000" calcext:value-type="float">
            <text:p>8640000</text:p>
          </table:table-cell>
          <table:table-cell table:formula="of:=[.B8]/[.C8]" office:value-type="float" office:value="0.00000810185185185185" calcext:value-type="float">
            <text:p>0,00000810185185185185</text:p>
          </table:table-cell>
          <table:table-cell table:formula="of:=[.D9]-[.D8]" office:value-type="float" office:value="0.00000115740740740741" calcext:value-type="float">
            <text:p>0,000001157407407407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8]+10" office:value-type="float" office:value="80" calcext:value-type="float">
            <text:p>80</text:p>
          </table:table-cell>
          <table:table-cell office:value-type="float" office:value="8640000" calcext:value-type="float">
            <text:p>8640000</text:p>
          </table:table-cell>
          <table:table-cell table:formula="of:=[.B9]/[.C9]" office:value-type="float" office:value="0.00000925925925925926" calcext:value-type="float">
            <text:p>0,00000925925925925926</text:p>
          </table:table-cell>
          <table:table-cell table:formula="of:=[.D10]-[.D9]" office:value-type="float" office:value="0.00000115740740740741" calcext:value-type="float">
            <text:p>0,000001157407407407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9]+10" office:value-type="float" office:value="90" calcext:value-type="float">
            <text:p>90</text:p>
          </table:table-cell>
          <table:table-cell office:value-type="float" office:value="8640000" calcext:value-type="float">
            <text:p>8640000</text:p>
          </table:table-cell>
          <table:table-cell table:formula="of:=[.B10]/[.C10]" office:value-type="float" office:value="0.0000104166666666667" calcext:value-type="float">
            <text:p>0,00001041666666666670</text:p>
          </table:table-cell>
          <table:table-cell table:formula="of:=[.D11]-[.D10]" office:value-type="float" office:value="0.00000115740740740741" calcext:value-type="float">
            <text:p>0,0000011574074074074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0]+10" office:value-type="float" office:value="100" calcext:value-type="float">
            <text:p>100</text:p>
          </table:table-cell>
          <table:table-cell office:value-type="float" office:value="8640000" calcext:value-type="float">
            <text:p>8640000</text:p>
          </table:table-cell>
          <table:table-cell table:formula="of:=[.B11]/[.C11]" office:value-type="float" office:value="0.0000115740740740741" calcext:value-type="float">
            <text:p>0,00001157407407407410</text:p>
          </table:table-cell>
          <table:table-cell table:formula="of:=[.D12]-[.D11]" office:value-type="float" office:value="0.00000115740740740741" calcext:value-type="float">
            <text:p>0,0000011574074074074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1]+10" office:value-type="float" office:value="110" calcext:value-type="float">
            <text:p>110</text:p>
          </table:table-cell>
          <table:table-cell office:value-type="float" office:value="8640000" calcext:value-type="float">
            <text:p>8640000</text:p>
          </table:table-cell>
          <table:table-cell table:formula="of:=[.B12]/[.C12]" office:value-type="float" office:value="0.0000127314814814815" calcext:value-type="float">
            <text:p>0,00001273148148148150</text:p>
          </table:table-cell>
          <table:table-cell table:formula="of:=[.D13]-[.D12]" office:value-type="float" office:value="0.00000115740740740741" calcext:value-type="float">
            <text:p>0,0000011574074074074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2]+10" office:value-type="float" office:value="120" calcext:value-type="float">
            <text:p>120</text:p>
          </table:table-cell>
          <table:table-cell office:value-type="float" office:value="8640000" calcext:value-type="float">
            <text:p>8640000</text:p>
          </table:table-cell>
          <table:table-cell table:formula="of:=[.B13]/[.C13]" office:value-type="float" office:value="0.0000138888888888889" calcext:value-type="float">
            <text:p>0,00001388888888888890</text:p>
          </table:table-cell>
          <table:table-cell table:formula="of:=[.D14]-[.D13]" office:value-type="float" office:value="0.00000115740740740741" calcext:value-type="float">
            <text:p>0,0000011574074074074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3]+10" office:value-type="float" office:value="130" calcext:value-type="float">
            <text:p>130</text:p>
          </table:table-cell>
          <table:table-cell office:value-type="float" office:value="8640000" calcext:value-type="float">
            <text:p>8640000</text:p>
          </table:table-cell>
          <table:table-cell table:formula="of:=[.B14]/[.C14]" office:value-type="float" office:value="0.0000150462962962963" calcext:value-type="float">
            <text:p>0,00001504629629629630</text:p>
          </table:table-cell>
          <table:table-cell table:formula="of:=[.D15]-[.D14]" office:value-type="float" office:value="0.00000115740740740741" calcext:value-type="float">
            <text:p>0,0000011574074074074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4]+10" office:value-type="float" office:value="140" calcext:value-type="float">
            <text:p>140</text:p>
          </table:table-cell>
          <table:table-cell office:value-type="float" office:value="8640000" calcext:value-type="float">
            <text:p>8640000</text:p>
          </table:table-cell>
          <table:table-cell table:formula="of:=[.B15]/[.C15]" office:value-type="float" office:value="0.0000162037037037037" calcext:value-type="float">
            <text:p>0,00001620370370370370</text:p>
          </table:table-cell>
          <table:table-cell table:formula="of:=[.D16]-[.D15]" office:value-type="float" office:value="0.00000115740740740741" calcext:value-type="float">
            <text:p>0,0000011574074074074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5]+10" office:value-type="float" office:value="150" calcext:value-type="float">
            <text:p>150</text:p>
          </table:table-cell>
          <table:table-cell office:value-type="float" office:value="8640000" calcext:value-type="float">
            <text:p>8640000</text:p>
          </table:table-cell>
          <table:table-cell table:formula="of:=[.B16]/[.C16]" office:value-type="float" office:value="0.0000173611111111111" calcext:value-type="float">
            <text:p>0,00001736111111111110</text:p>
          </table:table-cell>
          <table:table-cell table:formula="of:=[.D17]-[.D16]" office:value-type="float" office:value="0.00000115740740740741" calcext:value-type="float">
            <text:p>0,0000011574074074074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6]+10" office:value-type="float" office:value="160" calcext:value-type="float">
            <text:p>160</text:p>
          </table:table-cell>
          <table:table-cell office:value-type="float" office:value="8640000" calcext:value-type="float">
            <text:p>8640000</text:p>
          </table:table-cell>
          <table:table-cell table:formula="of:=[.B17]/[.C17]" office:value-type="float" office:value="0.0000185185185185185" calcext:value-type="float">
            <text:p>0,00001851851851851850</text:p>
          </table:table-cell>
          <table:table-cell table:formula="of:=[.D18]-[.D17]" office:value-type="float" office:value="0.00000115740740740741" calcext:value-type="float">
            <text:p>0,0000011574074074074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7]+10" office:value-type="float" office:value="170" calcext:value-type="float">
            <text:p>170</text:p>
          </table:table-cell>
          <table:table-cell office:value-type="float" office:value="8640000" calcext:value-type="float">
            <text:p>8640000</text:p>
          </table:table-cell>
          <table:table-cell table:formula="of:=[.B18]/[.C18]" office:value-type="float" office:value="0.0000196759259259259" calcext:value-type="float">
            <text:p>0,00001967592592592590</text:p>
          </table:table-cell>
          <table:table-cell table:formula="of:=[.D19]-[.D18]" office:value-type="float" office:value="0.00000115740740740741" calcext:value-type="float">
            <text:p>0,0000011574074074074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8]+10" office:value-type="float" office:value="180" calcext:value-type="float">
            <text:p>180</text:p>
          </table:table-cell>
          <table:table-cell office:value-type="float" office:value="8640000" calcext:value-type="float">
            <text:p>8640000</text:p>
          </table:table-cell>
          <table:table-cell table:formula="of:=[.B19]/[.C19]" office:value-type="float" office:value="0.0000208333333333333" calcext:value-type="float">
            <text:p>0,00002083333333333330</text:p>
          </table:table-cell>
          <table:table-cell table:formula="of:=[.D20]-[.D19]" office:value-type="float" office:value="0.00000115740740740741" calcext:value-type="float">
            <text:p>0,0000011574074074074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9]+10" office:value-type="float" office:value="190" calcext:value-type="float">
            <text:p>190</text:p>
          </table:table-cell>
          <table:table-cell office:value-type="float" office:value="8640000" calcext:value-type="float">
            <text:p>8640000</text:p>
          </table:table-cell>
          <table:table-cell table:formula="of:=[.B20]/[.C20]" office:value-type="float" office:value="0.0000219907407407407" calcext:value-type="float">
            <text:p>0,00002199074074074070</text:p>
          </table:table-cell>
          <table:table-cell table:formula="of:=[.D21]-[.D20]" office:value-type="float" office:value="0.00000115740740740741" calcext:value-type="float">
            <text:p>0,0000011574074074074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0]+10" office:value-type="float" office:value="200" calcext:value-type="float">
            <text:p>200</text:p>
          </table:table-cell>
          <table:table-cell office:value-type="float" office:value="8640000" calcext:value-type="float">
            <text:p>8640000</text:p>
          </table:table-cell>
          <table:table-cell table:formula="of:=[.B21]/[.C21]" office:value-type="float" office:value="0.0000231481481481481" calcext:value-type="float">
            <text:p>0,00002314814814814820</text:p>
          </table:table-cell>
          <table:table-cell table:formula="of:=[.D22]-[.D21]" office:value-type="float" office:value="0.00000115740740740741" calcext:value-type="float">
            <text:p>0,0000011574074074074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1]+10" office:value-type="float" office:value="210" calcext:value-type="float">
            <text:p>210</text:p>
          </table:table-cell>
          <table:table-cell office:value-type="float" office:value="8640000" calcext:value-type="float">
            <text:p>8640000</text:p>
          </table:table-cell>
          <table:table-cell table:formula="of:=[.B22]/[.C22]" office:value-type="float" office:value="0.0000243055555555556" calcext:value-type="float">
            <text:p>0,00002430555555555560</text:p>
          </table:table-cell>
          <table:table-cell table:formula="of:=[.D23]-[.D22]" office:value-type="float" office:value="0.00000115740740740741" calcext:value-type="float">
            <text:p>0,0000011574074074074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2]+10" office:value-type="float" office:value="220" calcext:value-type="float">
            <text:p>220</text:p>
          </table:table-cell>
          <table:table-cell office:value-type="float" office:value="8640000" calcext:value-type="float">
            <text:p>8640000</text:p>
          </table:table-cell>
          <table:table-cell table:formula="of:=[.B23]/[.C23]" office:value-type="float" office:value="0.000025462962962963" calcext:value-type="float">
            <text:p>0,00002546296296296300</text:p>
          </table:table-cell>
          <table:table-cell table:formula="of:=[.D24]-[.D23]" office:value-type="float" office:value="0.00000115740740740741" calcext:value-type="float">
            <text:p>0,0000011574074074074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3]+10" office:value-type="float" office:value="230" calcext:value-type="float">
            <text:p>230</text:p>
          </table:table-cell>
          <table:table-cell office:value-type="float" office:value="8640000" calcext:value-type="float">
            <text:p>8640000</text:p>
          </table:table-cell>
          <table:table-cell table:formula="of:=[.B24]/[.C24]" office:value-type="float" office:value="0.0000266203703703704" calcext:value-type="float">
            <text:p>0,00002662037037037040</text:p>
          </table:table-cell>
          <table:table-cell table:formula="of:=[.D25]-[.D24]" office:value-type="float" office:value="0.00000115740740740741" calcext:value-type="float">
            <text:p>0,0000011574074074074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4]+10" office:value-type="float" office:value="240" calcext:value-type="float">
            <text:p>240</text:p>
          </table:table-cell>
          <table:table-cell office:value-type="float" office:value="8640000" calcext:value-type="float">
            <text:p>8640000</text:p>
          </table:table-cell>
          <table:table-cell table:formula="of:=[.B25]/[.C25]" office:value-type="float" office:value="0.0000277777777777778" calcext:value-type="float">
            <text:p>0,00002777777777777780</text:p>
          </table:table-cell>
          <table:table-cell table:formula="of:=[.D26]-[.D25]" office:value-type="float" office:value="0.00000115740740740741" calcext:value-type="float">
            <text:p>0,0000011574074074074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5]+10" office:value-type="float" office:value="250" calcext:value-type="float">
            <text:p>250</text:p>
          </table:table-cell>
          <table:table-cell office:value-type="float" office:value="8640000" calcext:value-type="float">
            <text:p>8640000</text:p>
          </table:table-cell>
          <table:table-cell table:formula="of:=[.B26]/[.C26]" office:value-type="float" office:value="0.0000289351851851852" calcext:value-type="float">
            <text:p>0,00002893518518518520</text:p>
          </table:table-cell>
          <table:table-cell table:formula="of:=[.D27]-[.D26]" office:value-type="float" office:value="0.00000115740740740741" calcext:value-type="float">
            <text:p>0,0000011574074074074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6]+10" office:value-type="float" office:value="260" calcext:value-type="float">
            <text:p>260</text:p>
          </table:table-cell>
          <table:table-cell office:value-type="float" office:value="8640000" calcext:value-type="float">
            <text:p>8640000</text:p>
          </table:table-cell>
          <table:table-cell table:formula="of:=[.B27]/[.C27]" office:value-type="float" office:value="0.0000300925925925926" calcext:value-type="float">
            <text:p>0,00003009259259259260</text:p>
          </table:table-cell>
          <table:table-cell table:formula="of:=[.D28]-[.D27]" office:value-type="float" office:value="0.00000115740740740741" calcext:value-type="float">
            <text:p>0,0000011574074074074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7]+10" office:value-type="float" office:value="270" calcext:value-type="float">
            <text:p>270</text:p>
          </table:table-cell>
          <table:table-cell office:value-type="float" office:value="8640000" calcext:value-type="float">
            <text:p>8640000</text:p>
          </table:table-cell>
          <table:table-cell table:formula="of:=[.B28]/[.C28]" office:value-type="float" office:value="0.00003125" calcext:value-type="float">
            <text:p>0,00003125000000000000</text:p>
          </table:table-cell>
          <table:table-cell table:formula="of:=[.D29]-[.D28]" office:value-type="float" office:value="0.00000115740740740741" calcext:value-type="float">
            <text:p>0,0000011574074074074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8]+10" office:value-type="float" office:value="280" calcext:value-type="float">
            <text:p>280</text:p>
          </table:table-cell>
          <table:table-cell office:value-type="float" office:value="8640000" calcext:value-type="float">
            <text:p>8640000</text:p>
          </table:table-cell>
          <table:table-cell table:formula="of:=[.B29]/[.C29]" office:value-type="float" office:value="0.0000324074074074074" calcext:value-type="float">
            <text:p>0,00003240740740740740</text:p>
          </table:table-cell>
          <table:table-cell table:formula="of:=[.D30]-[.D29]" office:value-type="float" office:value="0.00000115740740740741" calcext:value-type="float">
            <text:p>0,0000011574074074074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29]+10" office:value-type="float" office:value="290" calcext:value-type="float">
            <text:p>290</text:p>
          </table:table-cell>
          <table:table-cell office:value-type="float" office:value="8640000" calcext:value-type="float">
            <text:p>8640000</text:p>
          </table:table-cell>
          <table:table-cell table:formula="of:=[.B30]/[.C30]" office:value-type="float" office:value="0.0000335648148148148" calcext:value-type="float">
            <text:p>0,00003356481481481480</text:p>
          </table:table-cell>
          <table:table-cell table:formula="of:=[.D31]-[.D30]" office:value-type="float" office:value="0.00000115740740740741" calcext:value-type="float">
            <text:p>0,0000011574074074074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30]+10" office:value-type="float" office:value="300" calcext:value-type="float">
            <text:p>300</text:p>
          </table:table-cell>
          <table:table-cell office:value-type="float" office:value="8640000" calcext:value-type="float">
            <text:p>8640000</text:p>
          </table:table-cell>
          <table:table-cell table:formula="of:=[.B31]/[.C31]" office:value-type="float" office:value="0.0000347222222222222" calcext:value-type="float">
            <text:p>0,00003472222222222220</text:p>
          </table:table-cell>
          <table:table-cell table:formula="of:=[.D32]-[.D31]" office:value-type="float" office:value="0.00000115740740740741" calcext:value-type="float">
            <text:p>0,0000011574074074074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1]+10" office:value-type="float" office:value="310" calcext:value-type="float">
            <text:p>310</text:p>
          </table:table-cell>
          <table:table-cell office:value-type="float" office:value="8640000" calcext:value-type="float">
            <text:p>8640000</text:p>
          </table:table-cell>
          <table:table-cell table:formula="of:=[.B32]/[.C32]" office:value-type="float" office:value="0.0000358796296296296" calcext:value-type="float">
            <text:p>0,00003587962962962960</text:p>
          </table:table-cell>
          <table:table-cell table:formula="of:=[.D33]-[.D32]" office:value-type="float" office:value="0.00000115740740740741" calcext:value-type="float">
            <text:p>0,0000011574074074074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2]+10" office:value-type="float" office:value="320" calcext:value-type="float">
            <text:p>320</text:p>
          </table:table-cell>
          <table:table-cell office:value-type="float" office:value="8640000" calcext:value-type="float">
            <text:p>8640000</text:p>
          </table:table-cell>
          <table:table-cell table:formula="of:=[.B33]/[.C33]" office:value-type="float" office:value="0.000037037037037037" calcext:value-type="float">
            <text:p>0,00003703703703703700</text:p>
          </table:table-cell>
          <table:table-cell table:formula="of:=[.D34]-[.D33]" office:value-type="float" office:value="0.00000115740740740741" calcext:value-type="float">
            <text:p>0,0000011574074074074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3]+10" office:value-type="float" office:value="330" calcext:value-type="float">
            <text:p>330</text:p>
          </table:table-cell>
          <table:table-cell office:value-type="float" office:value="8640000" calcext:value-type="float">
            <text:p>8640000</text:p>
          </table:table-cell>
          <table:table-cell table:formula="of:=[.B34]/[.C34]" office:value-type="float" office:value="0.0000381944444444444" calcext:value-type="float">
            <text:p>0,00003819444444444450</text:p>
          </table:table-cell>
          <table:table-cell table:formula="of:=[.D35]-[.D34]" office:value-type="float" office:value="0.00000115740740740741" calcext:value-type="float">
            <text:p>0,0000011574074074074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34]+10" office:value-type="float" office:value="340" calcext:value-type="float">
            <text:p>340</text:p>
          </table:table-cell>
          <table:table-cell office:value-type="float" office:value="8640000" calcext:value-type="float">
            <text:p>8640000</text:p>
          </table:table-cell>
          <table:table-cell table:formula="of:=[.B35]/[.C35]" office:value-type="float" office:value="0.0000393518518518519" calcext:value-type="float">
            <text:p>0,00003935185185185190</text:p>
          </table:table-cell>
          <table:table-cell table:formula="of:=[.D36]-[.D35]" office:value-type="float" office:value="0.00000115740740740741" calcext:value-type="float">
            <text:p>0,0000011574074074074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5]+10" office:value-type="float" office:value="350" calcext:value-type="float">
            <text:p>350</text:p>
          </table:table-cell>
          <table:table-cell office:value-type="float" office:value="8640000" calcext:value-type="float">
            <text:p>8640000</text:p>
          </table:table-cell>
          <table:table-cell table:formula="of:=[.B36]/[.C36]" office:value-type="float" office:value="0.0000405092592592593" calcext:value-type="float">
            <text:p>0,00004050925925925930</text:p>
          </table:table-cell>
          <table:table-cell table:formula="of:=[.D37]-[.D36]" office:value-type="float" office:value="0.00000115740740740741" calcext:value-type="float">
            <text:p>0,0000011574074074074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36]+10" office:value-type="float" office:value="360" calcext:value-type="float">
            <text:p>360</text:p>
          </table:table-cell>
          <table:table-cell office:value-type="float" office:value="8640000" calcext:value-type="float">
            <text:p>8640000</text:p>
          </table:table-cell>
          <table:table-cell table:formula="of:=[.B37]/[.C37]" office:value-type="float" office:value="0.0000416666666666667" calcext:value-type="float">
            <text:p>0,00004166666666666670</text:p>
          </table:table-cell>
          <table:table-cell table:formula="of:=[.D38]-[.D37]" office:value-type="float" office:value="0.00000115740740740741" calcext:value-type="float">
            <text:p>0,0000011574074074074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7]+10" office:value-type="float" office:value="370" calcext:value-type="float">
            <text:p>370</text:p>
          </table:table-cell>
          <table:table-cell office:value-type="float" office:value="8640000" calcext:value-type="float">
            <text:p>8640000</text:p>
          </table:table-cell>
          <table:table-cell table:formula="of:=[.B38]/[.C38]" office:value-type="float" office:value="0.0000428240740740741" calcext:value-type="float">
            <text:p>0,00004282407407407410</text:p>
          </table:table-cell>
          <table:table-cell table:formula="of:=[.D39]-[.D38]" office:value-type="float" office:value="0.00000115740740740741" calcext:value-type="float">
            <text:p>0,0000011574074074074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8]+10" office:value-type="float" office:value="380" calcext:value-type="float">
            <text:p>380</text:p>
          </table:table-cell>
          <table:table-cell office:value-type="float" office:value="8640000" calcext:value-type="float">
            <text:p>8640000</text:p>
          </table:table-cell>
          <table:table-cell table:formula="of:=[.B39]/[.C39]" office:value-type="float" office:value="0.0000439814814814815" calcext:value-type="float">
            <text:p>0,00004398148148148150</text:p>
          </table:table-cell>
          <table:table-cell table:formula="of:=[.D40]-[.D39]" office:value-type="float" office:value="0.00000115740740740741" calcext:value-type="float">
            <text:p>0,0000011574074074074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39]+10" office:value-type="float" office:value="390" calcext:value-type="float">
            <text:p>390</text:p>
          </table:table-cell>
          <table:table-cell office:value-type="float" office:value="8640000" calcext:value-type="float">
            <text:p>8640000</text:p>
          </table:table-cell>
          <table:table-cell table:formula="of:=[.B40]/[.C40]" office:value-type="float" office:value="0.0000451388888888889" calcext:value-type="float">
            <text:p>0,00004513888888888890</text:p>
          </table:table-cell>
          <table:table-cell table:formula="of:=[.D41]-[.D40]" office:value-type="float" office:value="0.00000115740740740741" calcext:value-type="float">
            <text:p>0,0000011574074074074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40]+10" office:value-type="float" office:value="400" calcext:value-type="float">
            <text:p>400</text:p>
          </table:table-cell>
          <table:table-cell office:value-type="float" office:value="8640000" calcext:value-type="float">
            <text:p>8640000</text:p>
          </table:table-cell>
          <table:table-cell table:formula="of:=[.B41]/[.C41]" office:value-type="float" office:value="0.0000462962962962963" calcext:value-type="float">
            <text:p>0,00004629629629629630</text:p>
          </table:table-cell>
          <table:table-cell table:formula="of:=[.D42]-[.D41]" office:value-type="float" office:value="0.00000115740740740741" calcext:value-type="float">
            <text:p>0,0000011574074074074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1]+10" office:value-type="float" office:value="410" calcext:value-type="float">
            <text:p>410</text:p>
          </table:table-cell>
          <table:table-cell office:value-type="float" office:value="8640000" calcext:value-type="float">
            <text:p>8640000</text:p>
          </table:table-cell>
          <table:table-cell table:formula="of:=[.B42]/[.C42]" office:value-type="float" office:value="0.0000474537037037037" calcext:value-type="float">
            <text:p>0,00004745370370370370</text:p>
          </table:table-cell>
          <table:table-cell table:formula="of:=[.D43]-[.D42]" office:value-type="float" office:value="0.00000115740740740741" calcext:value-type="float">
            <text:p>0,0000011574074074074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2]+10" office:value-type="float" office:value="420" calcext:value-type="float">
            <text:p>420</text:p>
          </table:table-cell>
          <table:table-cell office:value-type="float" office:value="8640000" calcext:value-type="float">
            <text:p>8640000</text:p>
          </table:table-cell>
          <table:table-cell table:formula="of:=[.B43]/[.C43]" office:value-type="float" office:value="0.0000486111111111111" calcext:value-type="float">
            <text:p>0,00004861111111111110</text:p>
          </table:table-cell>
          <table:table-cell table:formula="of:=[.D44]-[.D43]" office:value-type="float" office:value="0.00000115740740740741" calcext:value-type="float">
            <text:p>0,0000011574074074074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3]+10" office:value-type="float" office:value="430" calcext:value-type="float">
            <text:p>430</text:p>
          </table:table-cell>
          <table:table-cell office:value-type="float" office:value="8640000" calcext:value-type="float">
            <text:p>8640000</text:p>
          </table:table-cell>
          <table:table-cell table:formula="of:=[.B44]/[.C44]" office:value-type="float" office:value="0.0000497685185185185" calcext:value-type="float">
            <text:p>0,00004976851851851850</text:p>
          </table:table-cell>
          <table:table-cell table:formula="of:=[.D45]-[.D44]" office:value-type="float" office:value="0.00000115740740740741" calcext:value-type="float">
            <text:p>0,0000011574074074074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44]+10" office:value-type="float" office:value="440" calcext:value-type="float">
            <text:p>440</text:p>
          </table:table-cell>
          <table:table-cell office:value-type="float" office:value="8640000" calcext:value-type="float">
            <text:p>8640000</text:p>
          </table:table-cell>
          <table:table-cell table:formula="of:=[.B45]/[.C45]" office:value-type="float" office:value="0.0000509259259259259" calcext:value-type="float">
            <text:p>0,00005092592592592590</text:p>
          </table:table-cell>
          <table:table-cell table:formula="of:=[.D46]-[.D45]" office:value-type="float" office:value="0.00000115740740740741" calcext:value-type="float">
            <text:p>0,0000011574074074074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45]+10" office:value-type="float" office:value="450" calcext:value-type="float">
            <text:p>450</text:p>
          </table:table-cell>
          <table:table-cell office:value-type="float" office:value="8640000" calcext:value-type="float">
            <text:p>8640000</text:p>
          </table:table-cell>
          <table:table-cell table:formula="of:=[.B46]/[.C46]" office:value-type="float" office:value="0.0000520833333333333" calcext:value-type="float">
            <text:p>0,00005208333333333330</text:p>
          </table:table-cell>
          <table:table-cell table:formula="of:=[.D47]-[.D46]" office:value-type="float" office:value="0.00000115740740740741" calcext:value-type="float">
            <text:p>0,0000011574074074074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46]+10" office:value-type="float" office:value="460" calcext:value-type="float">
            <text:p>460</text:p>
          </table:table-cell>
          <table:table-cell office:value-type="float" office:value="8640000" calcext:value-type="float">
            <text:p>8640000</text:p>
          </table:table-cell>
          <table:table-cell table:formula="of:=[.B47]/[.C47]" office:value-type="float" office:value="0.0000532407407407407" calcext:value-type="float">
            <text:p>0,00005324074074074070</text:p>
          </table:table-cell>
          <table:table-cell table:formula="of:=[.D48]-[.D47]" office:value-type="float" office:value="0.00000115740740740741" calcext:value-type="float">
            <text:p>0,0000011574074074074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47]+10" office:value-type="float" office:value="470" calcext:value-type="float">
            <text:p>470</text:p>
          </table:table-cell>
          <table:table-cell office:value-type="float" office:value="8640000" calcext:value-type="float">
            <text:p>8640000</text:p>
          </table:table-cell>
          <table:table-cell table:formula="of:=[.B48]/[.C48]" office:value-type="float" office:value="0.0000543981481481482" calcext:value-type="float">
            <text:p>0,00005439814814814820</text:p>
          </table:table-cell>
          <table:table-cell table:formula="of:=[.D49]-[.D48]" office:value-type="float" office:value="0.00000115740740740741" calcext:value-type="float">
            <text:p>0,0000011574074074074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48]+10" office:value-type="float" office:value="480" calcext:value-type="float">
            <text:p>480</text:p>
          </table:table-cell>
          <table:table-cell office:value-type="float" office:value="8640000" calcext:value-type="float">
            <text:p>8640000</text:p>
          </table:table-cell>
          <table:table-cell table:formula="of:=[.B49]/[.C49]" office:value-type="float" office:value="0.0000555555555555556" calcext:value-type="float">
            <text:p>0,00005555555555555560</text:p>
          </table:table-cell>
          <table:table-cell table:formula="of:=[.D50]-[.D49]" office:value-type="float" office:value="0.00000115740740740741" calcext:value-type="float">
            <text:p>0,0000011574074074074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49]+10" office:value-type="float" office:value="490" calcext:value-type="float">
            <text:p>490</text:p>
          </table:table-cell>
          <table:table-cell office:value-type="float" office:value="8640000" calcext:value-type="float">
            <text:p>8640000</text:p>
          </table:table-cell>
          <table:table-cell table:formula="of:=[.B50]/[.C50]" office:value-type="float" office:value="0.000056712962962963" calcext:value-type="float">
            <text:p>0,00005671296296296300</text:p>
          </table:table-cell>
          <table:table-cell table:formula="of:=[.D51]-[.D50]" office:value-type="float" office:value="0.00000115740740740741" calcext:value-type="float">
            <text:p>0,0000011574074074074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50]+10" office:value-type="float" office:value="500" calcext:value-type="float">
            <text:p>500</text:p>
          </table:table-cell>
          <table:table-cell office:value-type="float" office:value="8640000" calcext:value-type="float">
            <text:p>8640000</text:p>
          </table:table-cell>
          <table:table-cell table:formula="of:=[.B51]/[.C51]" office:value-type="float" office:value="0.0000578703703703704" calcext:value-type="float">
            <text:p>0,00005787037037037040</text:p>
          </table:table-cell>
          <table:table-cell table:formula="of:=[.D52]-[.D51]" office:value-type="float" office:value="0.00000115740740740741" calcext:value-type="float">
            <text:p>0,0000011574074074074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51]+10" office:value-type="float" office:value="510" calcext:value-type="float">
            <text:p>510</text:p>
          </table:table-cell>
          <table:table-cell office:value-type="float" office:value="8640000" calcext:value-type="float">
            <text:p>8640000</text:p>
          </table:table-cell>
          <table:table-cell table:formula="of:=[.B52]/[.C52]" office:value-type="float" office:value="0.0000590277777777778" calcext:value-type="float">
            <text:p>0,00005902777777777780</text:p>
          </table:table-cell>
          <table:table-cell table:formula="of:=[.D53]-[.D52]" office:value-type="float" office:value="0.00000115740740740741" calcext:value-type="float">
            <text:p>0,0000011574074074074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52]+10" office:value-type="float" office:value="520" calcext:value-type="float">
            <text:p>520</text:p>
          </table:table-cell>
          <table:table-cell office:value-type="float" office:value="8640000" calcext:value-type="float">
            <text:p>8640000</text:p>
          </table:table-cell>
          <table:table-cell table:formula="of:=[.B53]/[.C53]" office:value-type="float" office:value="0.0000601851851851852" calcext:value-type="float">
            <text:p>0,00006018518518518520</text:p>
          </table:table-cell>
          <table:table-cell table:formula="of:=[.D54]-[.D53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53]+10" office:value-type="float" office:value="530" calcext:value-type="float">
            <text:p>530</text:p>
          </table:table-cell>
          <table:table-cell office:value-type="float" office:value="8640000" calcext:value-type="float">
            <text:p>8640000</text:p>
          </table:table-cell>
          <table:table-cell table:formula="of:=[.B54]/[.C54]" office:value-type="float" office:value="0.0000613425925925926" calcext:value-type="float">
            <text:p>0,00006134259259259260</text:p>
          </table:table-cell>
          <table:table-cell table:formula="of:=[.D55]-[.D54]" office:value-type="float" office:value="0.00000115740740740741" calcext:value-type="float">
            <text:p>0,0000011574074074074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54]+10" office:value-type="float" office:value="540" calcext:value-type="float">
            <text:p>540</text:p>
          </table:table-cell>
          <table:table-cell office:value-type="float" office:value="8640000" calcext:value-type="float">
            <text:p>8640000</text:p>
          </table:table-cell>
          <table:table-cell table:formula="of:=[.B55]/[.C55]" office:value-type="float" office:value="0.0000625" calcext:value-type="float">
            <text:p>0,00006250000000000000</text:p>
          </table:table-cell>
          <table:table-cell table:formula="of:=[.D56]-[.D55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55]+10" office:value-type="float" office:value="550" calcext:value-type="float">
            <text:p>550</text:p>
          </table:table-cell>
          <table:table-cell office:value-type="float" office:value="8640000" calcext:value-type="float">
            <text:p>8640000</text:p>
          </table:table-cell>
          <table:table-cell table:formula="of:=[.B56]/[.C56]" office:value-type="float" office:value="0.0000636574074074074" calcext:value-type="float">
            <text:p>0,00006365740740740740</text:p>
          </table:table-cell>
          <table:table-cell table:formula="of:=[.D57]-[.D56]" office:value-type="float" office:value="0.00000115740740740741" calcext:value-type="float">
            <text:p>0,0000011574074074074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56]+10" office:value-type="float" office:value="560" calcext:value-type="float">
            <text:p>560</text:p>
          </table:table-cell>
          <table:table-cell office:value-type="float" office:value="8640000" calcext:value-type="float">
            <text:p>8640000</text:p>
          </table:table-cell>
          <table:table-cell table:formula="of:=[.B57]/[.C57]" office:value-type="float" office:value="0.0000648148148148148" calcext:value-type="float">
            <text:p>0,00006481481481481480</text:p>
          </table:table-cell>
          <table:table-cell table:formula="of:=[.D58]-[.D57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57]+10" office:value-type="float" office:value="570" calcext:value-type="float">
            <text:p>570</text:p>
          </table:table-cell>
          <table:table-cell office:value-type="float" office:value="8640000" calcext:value-type="float">
            <text:p>8640000</text:p>
          </table:table-cell>
          <table:table-cell table:formula="of:=[.B58]/[.C58]" office:value-type="float" office:value="0.0000659722222222222" calcext:value-type="float">
            <text:p>0,00006597222222222220</text:p>
          </table:table-cell>
          <table:table-cell table:formula="of:=[.D59]-[.D58]" office:value-type="float" office:value="0.00000115740740740741" calcext:value-type="float">
            <text:p>0,0000011574074074074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58]+10" office:value-type="float" office:value="580" calcext:value-type="float">
            <text:p>580</text:p>
          </table:table-cell>
          <table:table-cell office:value-type="float" office:value="8640000" calcext:value-type="float">
            <text:p>8640000</text:p>
          </table:table-cell>
          <table:table-cell table:formula="of:=[.B59]/[.C59]" office:value-type="float" office:value="0.0000671296296296296" calcext:value-type="float">
            <text:p>0,00006712962962962960</text:p>
          </table:table-cell>
          <table:table-cell table:formula="of:=[.D60]-[.D59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59]+10" office:value-type="float" office:value="590" calcext:value-type="float">
            <text:p>590</text:p>
          </table:table-cell>
          <table:table-cell office:value-type="float" office:value="8640000" calcext:value-type="float">
            <text:p>8640000</text:p>
          </table:table-cell>
          <table:table-cell table:formula="of:=[.B60]/[.C60]" office:value-type="float" office:value="0.000068287037037037" calcext:value-type="float">
            <text:p>0,00006828703703703700</text:p>
          </table:table-cell>
          <table:table-cell table:formula="of:=[.D61]-[.D60]" office:value-type="float" office:value="0.00000115740740740741" calcext:value-type="float">
            <text:p>0,0000011574074074074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60]+10" office:value-type="float" office:value="600" calcext:value-type="float">
            <text:p>600</text:p>
          </table:table-cell>
          <table:table-cell office:value-type="float" office:value="8640000" calcext:value-type="float">
            <text:p>8640000</text:p>
          </table:table-cell>
          <table:table-cell table:formula="of:=[.B61]/[.C61]" office:value-type="float" office:value="0.0000694444444444444" calcext:value-type="float">
            <text:p>0,00006944444444444440</text:p>
          </table:table-cell>
          <table:table-cell table:formula="of:=[.D62]-[.D61]" office:value-type="float" office:value="0.00000115740740740741" calcext:value-type="float">
            <text:p>0,0000011574074074074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61]+10" office:value-type="float" office:value="610" calcext:value-type="float">
            <text:p>610</text:p>
          </table:table-cell>
          <table:table-cell office:value-type="float" office:value="8640000" calcext:value-type="float">
            <text:p>8640000</text:p>
          </table:table-cell>
          <table:table-cell table:formula="of:=[.B62]/[.C62]" office:value-type="float" office:value="0.0000706018518518519" calcext:value-type="float">
            <text:p>0,00007060185185185190</text:p>
          </table:table-cell>
          <table:table-cell table:formula="of:=[.D63]-[.D62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62]+10" office:value-type="float" office:value="620" calcext:value-type="float">
            <text:p>620</text:p>
          </table:table-cell>
          <table:table-cell office:value-type="float" office:value="8640000" calcext:value-type="float">
            <text:p>8640000</text:p>
          </table:table-cell>
          <table:table-cell table:formula="of:=[.B63]/[.C63]" office:value-type="float" office:value="0.0000717592592592593" calcext:value-type="float">
            <text:p>0,00007175925925925930</text:p>
          </table:table-cell>
          <table:table-cell table:formula="of:=[.D64]-[.D63]" office:value-type="float" office:value="0.00000115740740740741" calcext:value-type="float">
            <text:p>0,0000011574074074074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63]+10" office:value-type="float" office:value="630" calcext:value-type="float">
            <text:p>630</text:p>
          </table:table-cell>
          <table:table-cell office:value-type="float" office:value="8640000" calcext:value-type="float">
            <text:p>8640000</text:p>
          </table:table-cell>
          <table:table-cell table:formula="of:=[.B64]/[.C64]" office:value-type="float" office:value="0.0000729166666666667" calcext:value-type="float">
            <text:p>0,00007291666666666670</text:p>
          </table:table-cell>
          <table:table-cell table:formula="of:=[.D65]-[.D64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64]+10" office:value-type="float" office:value="640" calcext:value-type="float">
            <text:p>640</text:p>
          </table:table-cell>
          <table:table-cell office:value-type="float" office:value="8640000" calcext:value-type="float">
            <text:p>8640000</text:p>
          </table:table-cell>
          <table:table-cell table:formula="of:=[.B65]/[.C65]" office:value-type="float" office:value="0.0000740740740740741" calcext:value-type="float">
            <text:p>0,00007407407407407410</text:p>
          </table:table-cell>
          <table:table-cell table:formula="of:=[.D66]-[.D65]" office:value-type="float" office:value="0.00000115740740740741" calcext:value-type="float">
            <text:p>0,0000011574074074074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65]+10" office:value-type="float" office:value="650" calcext:value-type="float">
            <text:p>650</text:p>
          </table:table-cell>
          <table:table-cell office:value-type="float" office:value="8640000" calcext:value-type="float">
            <text:p>8640000</text:p>
          </table:table-cell>
          <table:table-cell table:formula="of:=[.B66]/[.C66]" office:value-type="float" office:value="0.0000752314814814815" calcext:value-type="float">
            <text:p>0,00007523148148148150</text:p>
          </table:table-cell>
          <table:table-cell table:formula="of:=[.D67]-[.D66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66]+10" office:value-type="float" office:value="660" calcext:value-type="float">
            <text:p>660</text:p>
          </table:table-cell>
          <table:table-cell office:value-type="float" office:value="8640000" calcext:value-type="float">
            <text:p>8640000</text:p>
          </table:table-cell>
          <table:table-cell table:formula="of:=[.B67]/[.C67]" office:value-type="float" office:value="0.0000763888888888889" calcext:value-type="float">
            <text:p>0,00007638888888888890</text:p>
          </table:table-cell>
          <table:table-cell table:formula="of:=[.D68]-[.D67]" office:value-type="float" office:value="0.00000115740740740741" calcext:value-type="float">
            <text:p>0,0000011574074074074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67]+10" office:value-type="float" office:value="670" calcext:value-type="float">
            <text:p>670</text:p>
          </table:table-cell>
          <table:table-cell office:value-type="float" office:value="8640000" calcext:value-type="float">
            <text:p>8640000</text:p>
          </table:table-cell>
          <table:table-cell table:formula="of:=[.B68]/[.C68]" office:value-type="float" office:value="0.0000775462962962963" calcext:value-type="float">
            <text:p>0,00007754629629629630</text:p>
          </table:table-cell>
          <table:table-cell table:formula="of:=[.D69]-[.D68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68]+10" office:value-type="float" office:value="680" calcext:value-type="float">
            <text:p>680</text:p>
          </table:table-cell>
          <table:table-cell office:value-type="float" office:value="8640000" calcext:value-type="float">
            <text:p>8640000</text:p>
          </table:table-cell>
          <table:table-cell table:formula="of:=[.B69]/[.C69]" office:value-type="float" office:value="0.0000787037037037037" calcext:value-type="float">
            <text:p>0,00007870370370370370</text:p>
          </table:table-cell>
          <table:table-cell table:formula="of:=[.D70]-[.D69]" office:value-type="float" office:value="0.00000115740740740741" calcext:value-type="float">
            <text:p>0,0000011574074074074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69]+10" office:value-type="float" office:value="690" calcext:value-type="float">
            <text:p>690</text:p>
          </table:table-cell>
          <table:table-cell office:value-type="float" office:value="8640000" calcext:value-type="float">
            <text:p>8640000</text:p>
          </table:table-cell>
          <table:table-cell table:formula="of:=[.B70]/[.C70]" office:value-type="float" office:value="0.0000798611111111111" calcext:value-type="float">
            <text:p>0,00007986111111111110</text:p>
          </table:table-cell>
          <table:table-cell table:formula="of:=[.D71]-[.D70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70]+10" office:value-type="float" office:value="700" calcext:value-type="float">
            <text:p>700</text:p>
          </table:table-cell>
          <table:table-cell office:value-type="float" office:value="8640000" calcext:value-type="float">
            <text:p>8640000</text:p>
          </table:table-cell>
          <table:table-cell table:formula="of:=[.B71]/[.C71]" office:value-type="float" office:value="0.0000810185185185185" calcext:value-type="float">
            <text:p>0,00008101851851851850</text:p>
          </table:table-cell>
          <table:table-cell table:formula="of:=[.D72]-[.D71]" office:value-type="float" office:value="0.00000115740740740741" calcext:value-type="float">
            <text:p>0,0000011574074074074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71]+10" office:value-type="float" office:value="710" calcext:value-type="float">
            <text:p>710</text:p>
          </table:table-cell>
          <table:table-cell office:value-type="float" office:value="8640000" calcext:value-type="float">
            <text:p>8640000</text:p>
          </table:table-cell>
          <table:table-cell table:formula="of:=[.B72]/[.C72]" office:value-type="float" office:value="0.0000821759259259259" calcext:value-type="float">
            <text:p>0,00008217592592592590</text:p>
          </table:table-cell>
          <table:table-cell table:formula="of:=[.D73]-[.D72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72]+10" office:value-type="float" office:value="720" calcext:value-type="float">
            <text:p>720</text:p>
          </table:table-cell>
          <table:table-cell office:value-type="float" office:value="8640000" calcext:value-type="float">
            <text:p>8640000</text:p>
          </table:table-cell>
          <table:table-cell table:formula="of:=[.B73]/[.C73]" office:value-type="float" office:value="0.0000833333333333333" calcext:value-type="float">
            <text:p>0,00008333333333333330</text:p>
          </table:table-cell>
          <table:table-cell table:formula="of:=[.D74]-[.D73]" office:value-type="float" office:value="0.00000115740740740741" calcext:value-type="float">
            <text:p>0,0000011574074074074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73]+10" office:value-type="float" office:value="730" calcext:value-type="float">
            <text:p>730</text:p>
          </table:table-cell>
          <table:table-cell office:value-type="float" office:value="8640000" calcext:value-type="float">
            <text:p>8640000</text:p>
          </table:table-cell>
          <table:table-cell table:formula="of:=[.B74]/[.C74]" office:value-type="float" office:value="0.0000844907407407407" calcext:value-type="float">
            <text:p>0,00008449074074074070</text:p>
          </table:table-cell>
          <table:table-cell table:formula="of:=[.D75]-[.D74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74]+10" office:value-type="float" office:value="740" calcext:value-type="float">
            <text:p>740</text:p>
          </table:table-cell>
          <table:table-cell office:value-type="float" office:value="8640000" calcext:value-type="float">
            <text:p>8640000</text:p>
          </table:table-cell>
          <table:table-cell table:formula="of:=[.B75]/[.C75]" office:value-type="float" office:value="0.0000856481481481481" calcext:value-type="float">
            <text:p>0,00008564814814814810</text:p>
          </table:table-cell>
          <table:table-cell table:formula="of:=[.D76]-[.D75]" office:value-type="float" office:value="0.00000115740740740741" calcext:value-type="float">
            <text:p>0,0000011574074074074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75]+10" office:value-type="float" office:value="750" calcext:value-type="float">
            <text:p>750</text:p>
          </table:table-cell>
          <table:table-cell office:value-type="float" office:value="8640000" calcext:value-type="float">
            <text:p>8640000</text:p>
          </table:table-cell>
          <table:table-cell table:formula="of:=[.B76]/[.C76]" office:value-type="float" office:value="0.0000868055555555556" calcext:value-type="float">
            <text:p>0,00008680555555555560</text:p>
          </table:table-cell>
          <table:table-cell table:formula="of:=[.D77]-[.D76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76]+10" office:value-type="float" office:value="760" calcext:value-type="float">
            <text:p>760</text:p>
          </table:table-cell>
          <table:table-cell office:value-type="float" office:value="8640000" calcext:value-type="float">
            <text:p>8640000</text:p>
          </table:table-cell>
          <table:table-cell table:formula="of:=[.B77]/[.C77]" office:value-type="float" office:value="0.000087962962962963" calcext:value-type="float">
            <text:p>0,00008796296296296300</text:p>
          </table:table-cell>
          <table:table-cell table:formula="of:=[.D78]-[.D77]" office:value-type="float" office:value="0.00000115740740740741" calcext:value-type="float">
            <text:p>0,0000011574074074074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77]+10" office:value-type="float" office:value="770" calcext:value-type="float">
            <text:p>770</text:p>
          </table:table-cell>
          <table:table-cell office:value-type="float" office:value="8640000" calcext:value-type="float">
            <text:p>8640000</text:p>
          </table:table-cell>
          <table:table-cell table:formula="of:=[.B78]/[.C78]" office:value-type="float" office:value="0.0000891203703703704" calcext:value-type="float">
            <text:p>0,00008912037037037040</text:p>
          </table:table-cell>
          <table:table-cell table:formula="of:=[.D79]-[.D78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78]+10" office:value-type="float" office:value="780" calcext:value-type="float">
            <text:p>780</text:p>
          </table:table-cell>
          <table:table-cell office:value-type="float" office:value="8640000" calcext:value-type="float">
            <text:p>8640000</text:p>
          </table:table-cell>
          <table:table-cell table:formula="of:=[.B79]/[.C79]" office:value-type="float" office:value="0.0000902777777777778" calcext:value-type="float">
            <text:p>0,00009027777777777780</text:p>
          </table:table-cell>
          <table:table-cell table:formula="of:=[.D80]-[.D79]" office:value-type="float" office:value="0.00000115740740740741" calcext:value-type="float">
            <text:p>0,0000011574074074074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79]+10" office:value-type="float" office:value="790" calcext:value-type="float">
            <text:p>790</text:p>
          </table:table-cell>
          <table:table-cell office:value-type="float" office:value="8640000" calcext:value-type="float">
            <text:p>8640000</text:p>
          </table:table-cell>
          <table:table-cell table:formula="of:=[.B80]/[.C80]" office:value-type="float" office:value="0.0000914351851851852" calcext:value-type="float">
            <text:p>0,00009143518518518520</text:p>
          </table:table-cell>
          <table:table-cell table:formula="of:=[.D81]-[.D80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80]+10" office:value-type="float" office:value="800" calcext:value-type="float">
            <text:p>800</text:p>
          </table:table-cell>
          <table:table-cell office:value-type="float" office:value="8640000" calcext:value-type="float">
            <text:p>8640000</text:p>
          </table:table-cell>
          <table:table-cell table:formula="of:=[.B81]/[.C81]" office:value-type="float" office:value="0.0000925925925925926" calcext:value-type="float">
            <text:p>0,00009259259259259260</text:p>
          </table:table-cell>
          <table:table-cell table:formula="of:=[.D82]-[.D81]" office:value-type="float" office:value="0.00000115740740740741" calcext:value-type="float">
            <text:p>0,0000011574074074074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81]+10" office:value-type="float" office:value="810" calcext:value-type="float">
            <text:p>810</text:p>
          </table:table-cell>
          <table:table-cell office:value-type="float" office:value="8640000" calcext:value-type="float">
            <text:p>8640000</text:p>
          </table:table-cell>
          <table:table-cell table:formula="of:=[.B82]/[.C82]" office:value-type="float" office:value="0.00009375" calcext:value-type="float">
            <text:p>0,00009375000000000000</text:p>
          </table:table-cell>
          <table:table-cell table:formula="of:=[.D83]-[.D82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82]+10" office:value-type="float" office:value="820" calcext:value-type="float">
            <text:p>820</text:p>
          </table:table-cell>
          <table:table-cell office:value-type="float" office:value="8640000" calcext:value-type="float">
            <text:p>8640000</text:p>
          </table:table-cell>
          <table:table-cell table:formula="of:=[.B83]/[.C83]" office:value-type="float" office:value="0.0000949074074074074" calcext:value-type="float">
            <text:p>0,00009490740740740740</text:p>
          </table:table-cell>
          <table:table-cell table:formula="of:=[.D84]-[.D83]" office:value-type="float" office:value="0.00000115740740740741" calcext:value-type="float">
            <text:p>0,0000011574074074074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83]+10" office:value-type="float" office:value="830" calcext:value-type="float">
            <text:p>830</text:p>
          </table:table-cell>
          <table:table-cell office:value-type="float" office:value="8640000" calcext:value-type="float">
            <text:p>8640000</text:p>
          </table:table-cell>
          <table:table-cell table:formula="of:=[.B84]/[.C84]" office:value-type="float" office:value="0.0000960648148148148" calcext:value-type="float">
            <text:p>0,00009606481481481480</text:p>
          </table:table-cell>
          <table:table-cell table:formula="of:=[.D85]-[.D84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84]+10" office:value-type="float" office:value="840" calcext:value-type="float">
            <text:p>840</text:p>
          </table:table-cell>
          <table:table-cell office:value-type="float" office:value="8640000" calcext:value-type="float">
            <text:p>8640000</text:p>
          </table:table-cell>
          <table:table-cell table:formula="of:=[.B85]/[.C85]" office:value-type="float" office:value="0.0000972222222222222" calcext:value-type="float">
            <text:p>0,00009722222222222220</text:p>
          </table:table-cell>
          <table:table-cell table:formula="of:=[.D86]-[.D85]" office:value-type="float" office:value="0.00000115740740740741" calcext:value-type="float">
            <text:p>0,0000011574074074074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85]+10" office:value-type="float" office:value="850" calcext:value-type="float">
            <text:p>850</text:p>
          </table:table-cell>
          <table:table-cell office:value-type="float" office:value="8640000" calcext:value-type="float">
            <text:p>8640000</text:p>
          </table:table-cell>
          <table:table-cell table:formula="of:=[.B86]/[.C86]" office:value-type="float" office:value="0.0000983796296296296" calcext:value-type="float">
            <text:p>0,00009837962962962960</text:p>
          </table:table-cell>
          <table:table-cell table:formula="of:=[.D87]-[.D86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86]+10" office:value-type="float" office:value="860" calcext:value-type="float">
            <text:p>860</text:p>
          </table:table-cell>
          <table:table-cell office:value-type="float" office:value="8640000" calcext:value-type="float">
            <text:p>8640000</text:p>
          </table:table-cell>
          <table:table-cell table:formula="of:=[.B87]/[.C87]" office:value-type="float" office:value="0.000099537037037037" calcext:value-type="float">
            <text:p>0,00009953703703703700</text:p>
          </table:table-cell>
          <table:table-cell table:formula="of:=[.D88]-[.D87]" office:value-type="float" office:value="0.00000115740740740741" calcext:value-type="float">
            <text:p>0,0000011574074074074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87]+10" office:value-type="float" office:value="870" calcext:value-type="float">
            <text:p>870</text:p>
          </table:table-cell>
          <table:table-cell office:value-type="float" office:value="8640000" calcext:value-type="float">
            <text:p>8640000</text:p>
          </table:table-cell>
          <table:table-cell table:formula="of:=[.B88]/[.C88]" office:value-type="float" office:value="0.000100694444444444" calcext:value-type="float">
            <text:p>0,00010069444444444400</text:p>
          </table:table-cell>
          <table:table-cell table:formula="of:=[.D89]-[.D88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88]+10" office:value-type="float" office:value="880" calcext:value-type="float">
            <text:p>880</text:p>
          </table:table-cell>
          <table:table-cell office:value-type="float" office:value="8640000" calcext:value-type="float">
            <text:p>8640000</text:p>
          </table:table-cell>
          <table:table-cell table:formula="of:=[.B89]/[.C89]" office:value-type="float" office:value="0.000101851851851852" calcext:value-type="float">
            <text:p>0,00010185185185185200</text:p>
          </table:table-cell>
          <table:table-cell table:formula="of:=[.D90]-[.D89]" office:value-type="float" office:value="0.00000115740740740741" calcext:value-type="float">
            <text:p>0,0000011574074074074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89]+10" office:value-type="float" office:value="890" calcext:value-type="float">
            <text:p>890</text:p>
          </table:table-cell>
          <table:table-cell office:value-type="float" office:value="8640000" calcext:value-type="float">
            <text:p>8640000</text:p>
          </table:table-cell>
          <table:table-cell table:formula="of:=[.B90]/[.C90]" office:value-type="float" office:value="0.000103009259259259" calcext:value-type="float">
            <text:p>0,00010300925925925900</text:p>
          </table:table-cell>
          <table:table-cell table:formula="of:=[.D91]-[.D90]" office:value-type="float" office:value="0.00000115740740740741" calcext:value-type="float">
            <text:p>0,0000011574074074074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90]+10" office:value-type="float" office:value="900" calcext:value-type="float">
            <text:p>900</text:p>
          </table:table-cell>
          <table:table-cell office:value-type="float" office:value="8640000" calcext:value-type="float">
            <text:p>8640000</text:p>
          </table:table-cell>
          <table:table-cell table:formula="of:=[.B91]/[.C91]" office:value-type="float" office:value="0.000104166666666667" calcext:value-type="float">
            <text:p>0,00010416666666666700</text:p>
          </table:table-cell>
          <table:table-cell table:formula="of:=[.D92]-[.D91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91]+10" office:value-type="float" office:value="910" calcext:value-type="float">
            <text:p>910</text:p>
          </table:table-cell>
          <table:table-cell office:value-type="float" office:value="8640000" calcext:value-type="float">
            <text:p>8640000</text:p>
          </table:table-cell>
          <table:table-cell table:formula="of:=[.B92]/[.C92]" office:value-type="float" office:value="0.000105324074074074" calcext:value-type="float">
            <text:p>0,00010532407407407400</text:p>
          </table:table-cell>
          <table:table-cell table:formula="of:=[.D93]-[.D92]" office:value-type="float" office:value="0.00000115740740740741" calcext:value-type="float">
            <text:p>0,0000011574074074074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92]+10" office:value-type="float" office:value="920" calcext:value-type="float">
            <text:p>920</text:p>
          </table:table-cell>
          <table:table-cell office:value-type="float" office:value="8640000" calcext:value-type="float">
            <text:p>8640000</text:p>
          </table:table-cell>
          <table:table-cell table:formula="of:=[.B93]/[.C93]" office:value-type="float" office:value="0.000106481481481481" calcext:value-type="float">
            <text:p>0,00010648148148148100</text:p>
          </table:table-cell>
          <table:table-cell table:formula="of:=[.D94]-[.D93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93]+10" office:value-type="float" office:value="930" calcext:value-type="float">
            <text:p>930</text:p>
          </table:table-cell>
          <table:table-cell office:value-type="float" office:value="8640000" calcext:value-type="float">
            <text:p>8640000</text:p>
          </table:table-cell>
          <table:table-cell table:formula="of:=[.B94]/[.C94]" office:value-type="float" office:value="0.000107638888888889" calcext:value-type="float">
            <text:p>0,00010763888888888900</text:p>
          </table:table-cell>
          <table:table-cell table:formula="of:=[.D95]-[.D94]" office:value-type="float" office:value="0.00000115740740740741" calcext:value-type="float">
            <text:p>0,0000011574074074074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94]+10" office:value-type="float" office:value="940" calcext:value-type="float">
            <text:p>940</text:p>
          </table:table-cell>
          <table:table-cell office:value-type="float" office:value="8640000" calcext:value-type="float">
            <text:p>8640000</text:p>
          </table:table-cell>
          <table:table-cell table:formula="of:=[.B95]/[.C95]" office:value-type="float" office:value="0.000108796296296296" calcext:value-type="float">
            <text:p>0,00010879629629629600</text:p>
          </table:table-cell>
          <table:table-cell table:formula="of:=[.D96]-[.D95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95]+10" office:value-type="float" office:value="950" calcext:value-type="float">
            <text:p>950</text:p>
          </table:table-cell>
          <table:table-cell office:value-type="float" office:value="8640000" calcext:value-type="float">
            <text:p>8640000</text:p>
          </table:table-cell>
          <table:table-cell table:formula="of:=[.B96]/[.C96]" office:value-type="float" office:value="0.000109953703703704" calcext:value-type="float">
            <text:p>0,00010995370370370400</text:p>
          </table:table-cell>
          <table:table-cell table:formula="of:=[.D97]-[.D96]" office:value-type="float" office:value="0.00000115740740740741" calcext:value-type="float">
            <text:p>0,0000011574074074074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96]+10" office:value-type="float" office:value="960" calcext:value-type="float">
            <text:p>960</text:p>
          </table:table-cell>
          <table:table-cell office:value-type="float" office:value="8640000" calcext:value-type="float">
            <text:p>8640000</text:p>
          </table:table-cell>
          <table:table-cell table:formula="of:=[.B97]/[.C97]" office:value-type="float" office:value="0.000111111111111111" calcext:value-type="float">
            <text:p>0,00011111111111111100</text:p>
          </table:table-cell>
          <table:table-cell table:formula="of:=[.D98]-[.D97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97]+10" office:value-type="float" office:value="970" calcext:value-type="float">
            <text:p>970</text:p>
          </table:table-cell>
          <table:table-cell office:value-type="float" office:value="8640000" calcext:value-type="float">
            <text:p>8640000</text:p>
          </table:table-cell>
          <table:table-cell table:formula="of:=[.B98]/[.C98]" office:value-type="float" office:value="0.000112268518518519" calcext:value-type="float">
            <text:p>0,00011226851851851900</text:p>
          </table:table-cell>
          <table:table-cell table:formula="of:=[.D99]-[.D98]" office:value-type="float" office:value="0.00000115740740740741" calcext:value-type="float">
            <text:p>0,0000011574074074074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98]+10" office:value-type="float" office:value="980" calcext:value-type="float">
            <text:p>980</text:p>
          </table:table-cell>
          <table:table-cell office:value-type="float" office:value="8640000" calcext:value-type="float">
            <text:p>8640000</text:p>
          </table:table-cell>
          <table:table-cell table:formula="of:=[.B99]/[.C99]" office:value-type="float" office:value="0.000113425925925926" calcext:value-type="float">
            <text:p>0,00011342592592592600</text:p>
          </table:table-cell>
          <table:table-cell table:formula="of:=[.D100]-[.D99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99]+10" office:value-type="float" office:value="990" calcext:value-type="float">
            <text:p>990</text:p>
          </table:table-cell>
          <table:table-cell office:value-type="float" office:value="8640000" calcext:value-type="float">
            <text:p>8640000</text:p>
          </table:table-cell>
          <table:table-cell table:formula="of:=[.B100]/[.C100]" office:value-type="float" office:value="0.000114583333333333" calcext:value-type="float">
            <text:p>0,00011458333333333300</text:p>
          </table:table-cell>
          <table:table-cell table:formula="of:=[.D101]-[.D100]" office:value-type="float" office:value="0.00000115740740740741" calcext:value-type="float">
            <text:p>0,0000011574074074074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100]+10" office:value-type="float" office:value="1000" calcext:value-type="float">
            <text:p>1000</text:p>
          </table:table-cell>
          <table:table-cell office:value-type="float" office:value="8640000" calcext:value-type="float">
            <text:p>8640000</text:p>
          </table:table-cell>
          <table:table-cell table:formula="of:=[.B101]/[.C101]" office:value-type="float" office:value="0.000115740740740741" calcext:value-type="float">
            <text:p>0,00011574074074074100</text:p>
          </table:table-cell>
          <table:table-cell table:formula="of:=[.D102]-[.D101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B101]+10" office:value-type="float" office:value="1010" calcext:value-type="float">
            <text:p>1010</text:p>
          </table:table-cell>
          <table:table-cell office:value-type="float" office:value="8640000" calcext:value-type="float">
            <text:p>8640000</text:p>
          </table:table-cell>
          <table:table-cell table:formula="of:=[.B102]/[.C102]" office:value-type="float" office:value="0.000116898148148148" calcext:value-type="float">
            <text:p>0,00011689814814814800</text:p>
          </table:table-cell>
          <table:table-cell table:formula="of:=[.D103]-[.D102]" office:value-type="float" office:value="0.00000115740740740741" calcext:value-type="float">
            <text:p>0,0000011574074074074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B102]+10" office:value-type="float" office:value="1020" calcext:value-type="float">
            <text:p>1020</text:p>
          </table:table-cell>
          <table:table-cell office:value-type="float" office:value="8640000" calcext:value-type="float">
            <text:p>8640000</text:p>
          </table:table-cell>
          <table:table-cell table:formula="of:=[.B103]/[.C103]" office:value-type="float" office:value="0.000118055555555556" calcext:value-type="float">
            <text:p>0,00011805555555555600</text:p>
          </table:table-cell>
          <table:table-cell table:formula="of:=[.D104]-[.D103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B103]+10" office:value-type="float" office:value="1030" calcext:value-type="float">
            <text:p>1030</text:p>
          </table:table-cell>
          <table:table-cell office:value-type="float" office:value="8640000" calcext:value-type="float">
            <text:p>8640000</text:p>
          </table:table-cell>
          <table:table-cell table:formula="of:=[.B104]/[.C104]" office:value-type="float" office:value="0.000119212962962963" calcext:value-type="float">
            <text:p>0,00011921296296296300</text:p>
          </table:table-cell>
          <table:table-cell table:formula="of:=[.D105]-[.D104]" office:value-type="float" office:value="0.00000115740740740741" calcext:value-type="float">
            <text:p>0,0000011574074074074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B104]+10" office:value-type="float" office:value="1040" calcext:value-type="float">
            <text:p>1040</text:p>
          </table:table-cell>
          <table:table-cell office:value-type="float" office:value="8640000" calcext:value-type="float">
            <text:p>8640000</text:p>
          </table:table-cell>
          <table:table-cell table:formula="of:=[.B105]/[.C105]" office:value-type="float" office:value="0.00012037037037037" calcext:value-type="float">
            <text:p>0,00012037037037037000</text:p>
          </table:table-cell>
          <table:table-cell table:formula="of:=[.D106]-[.D105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B105]+10" office:value-type="float" office:value="1050" calcext:value-type="float">
            <text:p>1050</text:p>
          </table:table-cell>
          <table:table-cell office:value-type="float" office:value="8640000" calcext:value-type="float">
            <text:p>8640000</text:p>
          </table:table-cell>
          <table:table-cell table:formula="of:=[.B106]/[.C106]" office:value-type="float" office:value="0.000121527777777778" calcext:value-type="float">
            <text:p>0,00012152777777777800</text:p>
          </table:table-cell>
          <table:table-cell table:formula="of:=[.D107]-[.D106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B106]+10" office:value-type="float" office:value="1060" calcext:value-type="float">
            <text:p>1060</text:p>
          </table:table-cell>
          <table:table-cell office:value-type="float" office:value="8640000" calcext:value-type="float">
            <text:p>8640000</text:p>
          </table:table-cell>
          <table:table-cell table:formula="of:=[.B107]/[.C107]" office:value-type="float" office:value="0.000122685185185185" calcext:value-type="float">
            <text:p>0,00012268518518518500</text:p>
          </table:table-cell>
          <table:table-cell table:formula="of:=[.D108]-[.D107]" office:value-type="float" office:value="0.00000115740740740743" calcext:value-type="float">
            <text:p>0,0000011574074074074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B107]+10" office:value-type="float" office:value="1070" calcext:value-type="float">
            <text:p>1070</text:p>
          </table:table-cell>
          <table:table-cell office:value-type="float" office:value="8640000" calcext:value-type="float">
            <text:p>8640000</text:p>
          </table:table-cell>
          <table:table-cell table:formula="of:=[.B108]/[.C108]" office:value-type="float" office:value="0.000123842592592593" calcext:value-type="float">
            <text:p>0,00012384259259259300</text:p>
          </table:table-cell>
          <table:table-cell table:formula="of:=[.D109]-[.D108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B108]+10" office:value-type="float" office:value="1080" calcext:value-type="float">
            <text:p>1080</text:p>
          </table:table-cell>
          <table:table-cell office:value-type="float" office:value="8640000" calcext:value-type="float">
            <text:p>8640000</text:p>
          </table:table-cell>
          <table:table-cell table:formula="of:=[.B109]/[.C109]" office:value-type="float" office:value="0.000125" calcext:value-type="float">
            <text:p>0,00012500000000000000</text:p>
          </table:table-cell>
          <table:table-cell table:formula="of:=[.D110]-[.D109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B109]+10" office:value-type="float" office:value="1090" calcext:value-type="float">
            <text:p>1090</text:p>
          </table:table-cell>
          <table:table-cell office:value-type="float" office:value="8640000" calcext:value-type="float">
            <text:p>8640000</text:p>
          </table:table-cell>
          <table:table-cell table:formula="of:=[.B110]/[.C110]" office:value-type="float" office:value="0.000126157407407407" calcext:value-type="float">
            <text:p>0,00012615740740740700</text:p>
          </table:table-cell>
          <table:table-cell table:formula="of:=[.D111]-[.D110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B110]+10" office:value-type="float" office:value="1100" calcext:value-type="float">
            <text:p>1100</text:p>
          </table:table-cell>
          <table:table-cell office:value-type="float" office:value="8640000" calcext:value-type="float">
            <text:p>8640000</text:p>
          </table:table-cell>
          <table:table-cell table:formula="of:=[.B111]/[.C111]" office:value-type="float" office:value="0.000127314814814815" calcext:value-type="float">
            <text:p>0,00012731481481481500</text:p>
          </table:table-cell>
          <table:table-cell table:formula="of:=[.D112]-[.D111]" office:value-type="float" office:value="0.00000115740740740743" calcext:value-type="float">
            <text:p>0,0000011574074074074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B111]+10" office:value-type="float" office:value="1110" calcext:value-type="float">
            <text:p>1110</text:p>
          </table:table-cell>
          <table:table-cell office:value-type="float" office:value="8640000" calcext:value-type="float">
            <text:p>8640000</text:p>
          </table:table-cell>
          <table:table-cell table:formula="of:=[.B112]/[.C112]" office:value-type="float" office:value="0.000128472222222222" calcext:value-type="float">
            <text:p>0,00012847222222222200</text:p>
          </table:table-cell>
          <table:table-cell table:formula="of:=[.D113]-[.D112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B112]+10" office:value-type="float" office:value="1120" calcext:value-type="float">
            <text:p>1120</text:p>
          </table:table-cell>
          <table:table-cell office:value-type="float" office:value="8640000" calcext:value-type="float">
            <text:p>8640000</text:p>
          </table:table-cell>
          <table:table-cell table:formula="of:=[.B113]/[.C113]" office:value-type="float" office:value="0.00012962962962963" calcext:value-type="float">
            <text:p>0,00012962962962963000</text:p>
          </table:table-cell>
          <table:table-cell table:formula="of:=[.D114]-[.D113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B113]+10" office:value-type="float" office:value="1130" calcext:value-type="float">
            <text:p>1130</text:p>
          </table:table-cell>
          <table:table-cell office:value-type="float" office:value="8640000" calcext:value-type="float">
            <text:p>8640000</text:p>
          </table:table-cell>
          <table:table-cell table:formula="of:=[.B114]/[.C114]" office:value-type="float" office:value="0.000130787037037037" calcext:value-type="float">
            <text:p>0,00013078703703703700</text:p>
          </table:table-cell>
          <table:table-cell table:formula="of:=[.D115]-[.D114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B114]+10" office:value-type="float" office:value="1140" calcext:value-type="float">
            <text:p>1140</text:p>
          </table:table-cell>
          <table:table-cell office:value-type="float" office:value="8640000" calcext:value-type="float">
            <text:p>8640000</text:p>
          </table:table-cell>
          <table:table-cell table:formula="of:=[.B115]/[.C115]" office:value-type="float" office:value="0.000131944444444444" calcext:value-type="float">
            <text:p>0,00013194444444444400</text:p>
          </table:table-cell>
          <table:table-cell table:formula="of:=[.D116]-[.D115]" office:value-type="float" office:value="0.00000115740740740743" calcext:value-type="float">
            <text:p>0,0000011574074074074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B115]+10" office:value-type="float" office:value="1150" calcext:value-type="float">
            <text:p>1150</text:p>
          </table:table-cell>
          <table:table-cell office:value-type="float" office:value="8640000" calcext:value-type="float">
            <text:p>8640000</text:p>
          </table:table-cell>
          <table:table-cell table:formula="of:=[.B116]/[.C116]" office:value-type="float" office:value="0.000133101851851852" calcext:value-type="float">
            <text:p>0,00013310185185185200</text:p>
          </table:table-cell>
          <table:table-cell table:formula="of:=[.D117]-[.D116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B116]+10" office:value-type="float" office:value="1160" calcext:value-type="float">
            <text:p>1160</text:p>
          </table:table-cell>
          <table:table-cell office:value-type="float" office:value="8640000" calcext:value-type="float">
            <text:p>8640000</text:p>
          </table:table-cell>
          <table:table-cell table:formula="of:=[.B117]/[.C117]" office:value-type="float" office:value="0.000134259259259259" calcext:value-type="float">
            <text:p>0,00013425925925925900</text:p>
          </table:table-cell>
          <table:table-cell table:formula="of:=[.D118]-[.D117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B117]+10" office:value-type="float" office:value="1170" calcext:value-type="float">
            <text:p>1170</text:p>
          </table:table-cell>
          <table:table-cell office:value-type="float" office:value="8640000" calcext:value-type="float">
            <text:p>8640000</text:p>
          </table:table-cell>
          <table:table-cell table:formula="of:=[.B118]/[.C118]" office:value-type="float" office:value="0.000135416666666667" calcext:value-type="float">
            <text:p>0,00013541666666666700</text:p>
          </table:table-cell>
          <table:table-cell table:formula="of:=[.D119]-[.D118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B118]+10" office:value-type="float" office:value="1180" calcext:value-type="float">
            <text:p>1180</text:p>
          </table:table-cell>
          <table:table-cell office:value-type="float" office:value="8640000" calcext:value-type="float">
            <text:p>8640000</text:p>
          </table:table-cell>
          <table:table-cell table:formula="of:=[.B119]/[.C119]" office:value-type="float" office:value="0.000136574074074074" calcext:value-type="float">
            <text:p>0,00013657407407407400</text:p>
          </table:table-cell>
          <table:table-cell table:formula="of:=[.D120]-[.D119]" office:value-type="float" office:value="0.00000115740740740743" calcext:value-type="float">
            <text:p>0,0000011574074074074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B119]+10" office:value-type="float" office:value="1190" calcext:value-type="float">
            <text:p>1190</text:p>
          </table:table-cell>
          <table:table-cell office:value-type="float" office:value="8640000" calcext:value-type="float">
            <text:p>8640000</text:p>
          </table:table-cell>
          <table:table-cell table:formula="of:=[.B120]/[.C120]" office:value-type="float" office:value="0.000137731481481482" calcext:value-type="float">
            <text:p>0,00013773148148148200</text:p>
          </table:table-cell>
          <table:table-cell table:formula="of:=[.D121]-[.D120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B120]+10" office:value-type="float" office:value="1200" calcext:value-type="float">
            <text:p>1200</text:p>
          </table:table-cell>
          <table:table-cell office:value-type="float" office:value="8640000" calcext:value-type="float">
            <text:p>8640000</text:p>
          </table:table-cell>
          <table:table-cell table:formula="of:=[.B121]/[.C121]" office:value-type="float" office:value="0.000138888888888889" calcext:value-type="float">
            <text:p>0,00013888888888888900</text:p>
          </table:table-cell>
          <table:table-cell table:formula="of:=[.D122]-[.D121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B121]+10" office:value-type="float" office:value="1210" calcext:value-type="float">
            <text:p>1210</text:p>
          </table:table-cell>
          <table:table-cell office:value-type="float" office:value="8640000" calcext:value-type="float">
            <text:p>8640000</text:p>
          </table:table-cell>
          <table:table-cell table:formula="of:=[.B122]/[.C122]" office:value-type="float" office:value="0.000140046296296296" calcext:value-type="float">
            <text:p>0,00014004629629629600</text:p>
          </table:table-cell>
          <table:table-cell table:formula="of:=[.D123]-[.D122]" office:value-type="float" office:value="0.00000115740740740743" calcext:value-type="float">
            <text:p>0,0000011574074074074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B122]+10" office:value-type="float" office:value="1220" calcext:value-type="float">
            <text:p>1220</text:p>
          </table:table-cell>
          <table:table-cell office:value-type="float" office:value="8640000" calcext:value-type="float">
            <text:p>8640000</text:p>
          </table:table-cell>
          <table:table-cell table:formula="of:=[.B123]/[.C123]" office:value-type="float" office:value="0.000141203703703704" calcext:value-type="float">
            <text:p>0,00014120370370370400</text:p>
          </table:table-cell>
          <table:table-cell table:formula="of:=[.D124]-[.D123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B123]+10" office:value-type="float" office:value="1230" calcext:value-type="float">
            <text:p>1230</text:p>
          </table:table-cell>
          <table:table-cell office:value-type="float" office:value="8640000" calcext:value-type="float">
            <text:p>8640000</text:p>
          </table:table-cell>
          <table:table-cell table:formula="of:=[.B124]/[.C124]" office:value-type="float" office:value="0.000142361111111111" calcext:value-type="float">
            <text:p>0,00014236111111111100</text:p>
          </table:table-cell>
          <table:table-cell table:formula="of:=[.D125]-[.D124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B124]+10" office:value-type="float" office:value="1240" calcext:value-type="float">
            <text:p>1240</text:p>
          </table:table-cell>
          <table:table-cell office:value-type="float" office:value="8640000" calcext:value-type="float">
            <text:p>8640000</text:p>
          </table:table-cell>
          <table:table-cell table:formula="of:=[.B125]/[.C125]" office:value-type="float" office:value="0.000143518518518519" calcext:value-type="float">
            <text:p>0,00014351851851851900</text:p>
          </table:table-cell>
          <table:table-cell table:formula="of:=[.D126]-[.D125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B125]+10" office:value-type="float" office:value="1250" calcext:value-type="float">
            <text:p>1250</text:p>
          </table:table-cell>
          <table:table-cell office:value-type="float" office:value="8640000" calcext:value-type="float">
            <text:p>8640000</text:p>
          </table:table-cell>
          <table:table-cell table:formula="of:=[.B126]/[.C126]" office:value-type="float" office:value="0.000144675925925926" calcext:value-type="float">
            <text:p>0,00014467592592592600</text:p>
          </table:table-cell>
          <table:table-cell table:formula="of:=[.D127]-[.D126]" office:value-type="float" office:value="0.00000115740740740743" calcext:value-type="float">
            <text:p>0,0000011574074074074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B126]+10" office:value-type="float" office:value="1260" calcext:value-type="float">
            <text:p>1260</text:p>
          </table:table-cell>
          <table:table-cell office:value-type="float" office:value="8640000" calcext:value-type="float">
            <text:p>8640000</text:p>
          </table:table-cell>
          <table:table-cell table:formula="of:=[.B127]/[.C127]" office:value-type="float" office:value="0.000145833333333333" calcext:value-type="float">
            <text:p>0,00014583333333333300</text:p>
          </table:table-cell>
          <table:table-cell table:formula="of:=[.D128]-[.D127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B127]+10" office:value-type="float" office:value="1270" calcext:value-type="float">
            <text:p>1270</text:p>
          </table:table-cell>
          <table:table-cell office:value-type="float" office:value="8640000" calcext:value-type="float">
            <text:p>8640000</text:p>
          </table:table-cell>
          <table:table-cell table:formula="of:=[.B128]/[.C128]" office:value-type="float" office:value="0.000146990740740741" calcext:value-type="float">
            <text:p>0,00014699074074074100</text:p>
          </table:table-cell>
          <table:table-cell table:formula="of:=[.D129]-[.D128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B128]+10" office:value-type="float" office:value="1280" calcext:value-type="float">
            <text:p>1280</text:p>
          </table:table-cell>
          <table:table-cell office:value-type="float" office:value="8640000" calcext:value-type="float">
            <text:p>8640000</text:p>
          </table:table-cell>
          <table:table-cell table:formula="of:=[.B129]/[.C129]" office:value-type="float" office:value="0.000148148148148148" calcext:value-type="float">
            <text:p>0,00014814814814814800</text:p>
          </table:table-cell>
          <table:table-cell table:formula="of:=[.D130]-[.D129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B129]+10" office:value-type="float" office:value="1290" calcext:value-type="float">
            <text:p>1290</text:p>
          </table:table-cell>
          <table:table-cell office:value-type="float" office:value="8640000" calcext:value-type="float">
            <text:p>8640000</text:p>
          </table:table-cell>
          <table:table-cell table:formula="of:=[.B130]/[.C130]" office:value-type="float" office:value="0.000149305555555556" calcext:value-type="float">
            <text:p>0,00014930555555555600</text:p>
          </table:table-cell>
          <table:table-cell table:formula="of:=[.D131]-[.D130]" office:value-type="float" office:value="0.00000115740740740743" calcext:value-type="float">
            <text:p>0,0000011574074074074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B130]+10" office:value-type="float" office:value="1300" calcext:value-type="float">
            <text:p>1300</text:p>
          </table:table-cell>
          <table:table-cell office:value-type="float" office:value="8640000" calcext:value-type="float">
            <text:p>8640000</text:p>
          </table:table-cell>
          <table:table-cell table:formula="of:=[.B131]/[.C131]" office:value-type="float" office:value="0.000150462962962963" calcext:value-type="float">
            <text:p>0,00015046296296296300</text:p>
          </table:table-cell>
          <table:table-cell table:formula="of:=[.D132]-[.D131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B131]+10" office:value-type="float" office:value="1310" calcext:value-type="float">
            <text:p>1310</text:p>
          </table:table-cell>
          <table:table-cell office:value-type="float" office:value="8640000" calcext:value-type="float">
            <text:p>8640000</text:p>
          </table:table-cell>
          <table:table-cell table:formula="of:=[.B132]/[.C132]" office:value-type="float" office:value="0.00015162037037037" calcext:value-type="float">
            <text:p>0,00015162037037037000</text:p>
          </table:table-cell>
          <table:table-cell table:formula="of:=[.D133]-[.D132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B132]+10" office:value-type="float" office:value="1320" calcext:value-type="float">
            <text:p>1320</text:p>
          </table:table-cell>
          <table:table-cell office:value-type="float" office:value="8640000" calcext:value-type="float">
            <text:p>8640000</text:p>
          </table:table-cell>
          <table:table-cell table:formula="of:=[.B133]/[.C133]" office:value-type="float" office:value="0.000152777777777778" calcext:value-type="float">
            <text:p>0,00015277777777777800</text:p>
          </table:table-cell>
          <table:table-cell table:formula="of:=[.D134]-[.D133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B133]+10" office:value-type="float" office:value="1330" calcext:value-type="float">
            <text:p>1330</text:p>
          </table:table-cell>
          <table:table-cell office:value-type="float" office:value="8640000" calcext:value-type="float">
            <text:p>8640000</text:p>
          </table:table-cell>
          <table:table-cell table:formula="of:=[.B134]/[.C134]" office:value-type="float" office:value="0.000153935185185185" calcext:value-type="float">
            <text:p>0,00015393518518518500</text:p>
          </table:table-cell>
          <table:table-cell table:formula="of:=[.D135]-[.D134]" office:value-type="float" office:value="0.00000115740740740743" calcext:value-type="float">
            <text:p>0,0000011574074074074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B134]+10" office:value-type="float" office:value="1340" calcext:value-type="float">
            <text:p>1340</text:p>
          </table:table-cell>
          <table:table-cell office:value-type="float" office:value="8640000" calcext:value-type="float">
            <text:p>8640000</text:p>
          </table:table-cell>
          <table:table-cell table:formula="of:=[.B135]/[.C135]" office:value-type="float" office:value="0.000155092592592593" calcext:value-type="float">
            <text:p>0,00015509259259259300</text:p>
          </table:table-cell>
          <table:table-cell table:formula="of:=[.D136]-[.D135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B135]+10" office:value-type="float" office:value="1350" calcext:value-type="float">
            <text:p>1350</text:p>
          </table:table-cell>
          <table:table-cell office:value-type="float" office:value="8640000" calcext:value-type="float">
            <text:p>8640000</text:p>
          </table:table-cell>
          <table:table-cell table:formula="of:=[.B136]/[.C136]" office:value-type="float" office:value="0.00015625" calcext:value-type="float">
            <text:p>0,00015625000000000000</text:p>
          </table:table-cell>
          <table:table-cell table:formula="of:=[.D137]-[.D136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B136]+10" office:value-type="float" office:value="1360" calcext:value-type="float">
            <text:p>1360</text:p>
          </table:table-cell>
          <table:table-cell office:value-type="float" office:value="8640000" calcext:value-type="float">
            <text:p>8640000</text:p>
          </table:table-cell>
          <table:table-cell table:formula="of:=[.B137]/[.C137]" office:value-type="float" office:value="0.000157407407407407" calcext:value-type="float">
            <text:p>0,00015740740740740700</text:p>
          </table:table-cell>
          <table:table-cell table:formula="of:=[.D138]-[.D137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B137]+10" office:value-type="float" office:value="1370" calcext:value-type="float">
            <text:p>1370</text:p>
          </table:table-cell>
          <table:table-cell office:value-type="float" office:value="8640000" calcext:value-type="float">
            <text:p>8640000</text:p>
          </table:table-cell>
          <table:table-cell table:formula="of:=[.B138]/[.C138]" office:value-type="float" office:value="0.000158564814814815" calcext:value-type="float">
            <text:p>0,00015856481481481500</text:p>
          </table:table-cell>
          <table:table-cell table:formula="of:=[.D139]-[.D138]" office:value-type="float" office:value="0.00000115740740740743" calcext:value-type="float">
            <text:p>0,0000011574074074074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B138]+10" office:value-type="float" office:value="1380" calcext:value-type="float">
            <text:p>1380</text:p>
          </table:table-cell>
          <table:table-cell office:value-type="float" office:value="8640000" calcext:value-type="float">
            <text:p>8640000</text:p>
          </table:table-cell>
          <table:table-cell table:formula="of:=[.B139]/[.C139]" office:value-type="float" office:value="0.000159722222222222" calcext:value-type="float">
            <text:p>0,00015972222222222200</text:p>
          </table:table-cell>
          <table:table-cell table:formula="of:=[.D140]-[.D139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B139]+10" office:value-type="float" office:value="1390" calcext:value-type="float">
            <text:p>1390</text:p>
          </table:table-cell>
          <table:table-cell office:value-type="float" office:value="8640000" calcext:value-type="float">
            <text:p>8640000</text:p>
          </table:table-cell>
          <table:table-cell table:formula="of:=[.B140]/[.C140]" office:value-type="float" office:value="0.00016087962962963" calcext:value-type="float">
            <text:p>0,00016087962962963000</text:p>
          </table:table-cell>
          <table:table-cell table:formula="of:=[.D141]-[.D140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B140]+10" office:value-type="float" office:value="1400" calcext:value-type="float">
            <text:p>1400</text:p>
          </table:table-cell>
          <table:table-cell office:value-type="float" office:value="8640000" calcext:value-type="float">
            <text:p>8640000</text:p>
          </table:table-cell>
          <table:table-cell table:formula="of:=[.B141]/[.C141]" office:value-type="float" office:value="0.000162037037037037" calcext:value-type="float">
            <text:p>0,00016203703703703700</text:p>
          </table:table-cell>
          <table:table-cell table:formula="of:=[.D142]-[.D141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B141]+10" office:value-type="float" office:value="1410" calcext:value-type="float">
            <text:p>1410</text:p>
          </table:table-cell>
          <table:table-cell office:value-type="float" office:value="8640000" calcext:value-type="float">
            <text:p>8640000</text:p>
          </table:table-cell>
          <table:table-cell table:formula="of:=[.B142]/[.C142]" office:value-type="float" office:value="0.000163194444444444" calcext:value-type="float">
            <text:p>0,00016319444444444400</text:p>
          </table:table-cell>
          <table:table-cell table:formula="of:=[.D143]-[.D142]" office:value-type="float" office:value="0.00000115740740740743" calcext:value-type="float">
            <text:p>0,0000011574074074074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B142]+10" office:value-type="float" office:value="1420" calcext:value-type="float">
            <text:p>1420</text:p>
          </table:table-cell>
          <table:table-cell office:value-type="float" office:value="8640000" calcext:value-type="float">
            <text:p>8640000</text:p>
          </table:table-cell>
          <table:table-cell table:formula="of:=[.B143]/[.C143]" office:value-type="float" office:value="0.000164351851851852" calcext:value-type="float">
            <text:p>0,00016435185185185200</text:p>
          </table:table-cell>
          <table:table-cell table:formula="of:=[.D144]-[.D143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B143]+10" office:value-type="float" office:value="1430" calcext:value-type="float">
            <text:p>1430</text:p>
          </table:table-cell>
          <table:table-cell office:value-type="float" office:value="8640000" calcext:value-type="float">
            <text:p>8640000</text:p>
          </table:table-cell>
          <table:table-cell table:formula="of:=[.B144]/[.C144]" office:value-type="float" office:value="0.000165509259259259" calcext:value-type="float">
            <text:p>0,00016550925925925900</text:p>
          </table:table-cell>
          <table:table-cell table:formula="of:=[.D145]-[.D144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B144]+10" office:value-type="float" office:value="1440" calcext:value-type="float">
            <text:p>1440</text:p>
          </table:table-cell>
          <table:table-cell office:value-type="float" office:value="8640000" calcext:value-type="float">
            <text:p>8640000</text:p>
          </table:table-cell>
          <table:table-cell table:formula="of:=[.B145]/[.C145]" office:value-type="float" office:value="0.000166666666666667" calcext:value-type="float">
            <text:p>0,00016666666666666700</text:p>
          </table:table-cell>
          <table:table-cell table:formula="of:=[.D146]-[.D145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B145]+10" office:value-type="float" office:value="1450" calcext:value-type="float">
            <text:p>1450</text:p>
          </table:table-cell>
          <table:table-cell office:value-type="float" office:value="8640000" calcext:value-type="float">
            <text:p>8640000</text:p>
          </table:table-cell>
          <table:table-cell table:formula="of:=[.B146]/[.C146]" office:value-type="float" office:value="0.000167824074074074" calcext:value-type="float">
            <text:p>0,00016782407407407400</text:p>
          </table:table-cell>
          <table:table-cell table:formula="of:=[.D147]-[.D146]" office:value-type="float" office:value="0.00000115740740740743" calcext:value-type="float">
            <text:p>0,0000011574074074074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B146]+10" office:value-type="float" office:value="1460" calcext:value-type="float">
            <text:p>1460</text:p>
          </table:table-cell>
          <table:table-cell office:value-type="float" office:value="8640000" calcext:value-type="float">
            <text:p>8640000</text:p>
          </table:table-cell>
          <table:table-cell table:formula="of:=[.B147]/[.C147]" office:value-type="float" office:value="0.000168981481481482" calcext:value-type="float">
            <text:p>0,00016898148148148200</text:p>
          </table:table-cell>
          <table:table-cell table:formula="of:=[.D148]-[.D147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B147]+10" office:value-type="float" office:value="1470" calcext:value-type="float">
            <text:p>1470</text:p>
          </table:table-cell>
          <table:table-cell office:value-type="float" office:value="8640000" calcext:value-type="float">
            <text:p>8640000</text:p>
          </table:table-cell>
          <table:table-cell table:formula="of:=[.B148]/[.C148]" office:value-type="float" office:value="0.000170138888888889" calcext:value-type="float">
            <text:p>0,00017013888888888900</text:p>
          </table:table-cell>
          <table:table-cell table:formula="of:=[.D149]-[.D148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B148]+10" office:value-type="float" office:value="1480" calcext:value-type="float">
            <text:p>1480</text:p>
          </table:table-cell>
          <table:table-cell office:value-type="float" office:value="8640000" calcext:value-type="float">
            <text:p>8640000</text:p>
          </table:table-cell>
          <table:table-cell table:formula="of:=[.B149]/[.C149]" office:value-type="float" office:value="0.000171296296296296" calcext:value-type="float">
            <text:p>0,00017129629629629600</text:p>
          </table:table-cell>
          <table:table-cell table:formula="of:=[.D150]-[.D149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B149]+10" office:value-type="float" office:value="1490" calcext:value-type="float">
            <text:p>1490</text:p>
          </table:table-cell>
          <table:table-cell office:value-type="float" office:value="8640000" calcext:value-type="float">
            <text:p>8640000</text:p>
          </table:table-cell>
          <table:table-cell table:formula="of:=[.B150]/[.C150]" office:value-type="float" office:value="0.000172453703703704" calcext:value-type="float">
            <text:p>0,00017245370370370400</text:p>
          </table:table-cell>
          <table:table-cell table:formula="of:=[.D151]-[.D150]" office:value-type="float" office:value="0.00000115740740740743" calcext:value-type="float">
            <text:p>0,0000011574074074074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B150]+10" office:value-type="float" office:value="1500" calcext:value-type="float">
            <text:p>1500</text:p>
          </table:table-cell>
          <table:table-cell office:value-type="float" office:value="8640000" calcext:value-type="float">
            <text:p>8640000</text:p>
          </table:table-cell>
          <table:table-cell table:formula="of:=[.B151]/[.C151]" office:value-type="float" office:value="0.000173611111111111" calcext:value-type="float">
            <text:p>0,00017361111111111100</text:p>
          </table:table-cell>
          <table:table-cell table:formula="of:=[.D152]-[.D151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B151]+10" office:value-type="float" office:value="1510" calcext:value-type="float">
            <text:p>1510</text:p>
          </table:table-cell>
          <table:table-cell office:value-type="float" office:value="8640000" calcext:value-type="float">
            <text:p>8640000</text:p>
          </table:table-cell>
          <table:table-cell table:formula="of:=[.B152]/[.C152]" office:value-type="float" office:value="0.000174768518518519" calcext:value-type="float">
            <text:p>0,00017476851851851900</text:p>
          </table:table-cell>
          <table:table-cell table:formula="of:=[.D153]-[.D152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B152]+10" office:value-type="float" office:value="1520" calcext:value-type="float">
            <text:p>1520</text:p>
          </table:table-cell>
          <table:table-cell office:value-type="float" office:value="8640000" calcext:value-type="float">
            <text:p>8640000</text:p>
          </table:table-cell>
          <table:table-cell table:formula="of:=[.B153]/[.C153]" office:value-type="float" office:value="0.000175925925925926" calcext:value-type="float">
            <text:p>0,00017592592592592600</text:p>
          </table:table-cell>
          <table:table-cell table:formula="of:=[.D154]-[.D153]" office:value-type="float" office:value="0.00000115740740740743" calcext:value-type="float">
            <text:p>0,0000011574074074074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B153]+10" office:value-type="float" office:value="1530" calcext:value-type="float">
            <text:p>1530</text:p>
          </table:table-cell>
          <table:table-cell office:value-type="float" office:value="8640000" calcext:value-type="float">
            <text:p>8640000</text:p>
          </table:table-cell>
          <table:table-cell table:formula="of:=[.B154]/[.C154]" office:value-type="float" office:value="0.000177083333333333" calcext:value-type="float">
            <text:p>0,00017708333333333300</text:p>
          </table:table-cell>
          <table:table-cell table:formula="of:=[.D155]-[.D154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B154]+10" office:value-type="float" office:value="1540" calcext:value-type="float">
            <text:p>1540</text:p>
          </table:table-cell>
          <table:table-cell office:value-type="float" office:value="8640000" calcext:value-type="float">
            <text:p>8640000</text:p>
          </table:table-cell>
          <table:table-cell table:formula="of:=[.B155]/[.C155]" office:value-type="float" office:value="0.000178240740740741" calcext:value-type="float">
            <text:p>0,00017824074074074100</text:p>
          </table:table-cell>
          <table:table-cell table:formula="of:=[.D156]-[.D155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B155]+10" office:value-type="float" office:value="1550" calcext:value-type="float">
            <text:p>1550</text:p>
          </table:table-cell>
          <table:table-cell office:value-type="float" office:value="8640000" calcext:value-type="float">
            <text:p>8640000</text:p>
          </table:table-cell>
          <table:table-cell table:formula="of:=[.B156]/[.C156]" office:value-type="float" office:value="0.000179398148148148" calcext:value-type="float">
            <text:p>0,00017939814814814800</text:p>
          </table:table-cell>
          <table:table-cell table:formula="of:=[.D157]-[.D156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B156]+10" office:value-type="float" office:value="1560" calcext:value-type="float">
            <text:p>1560</text:p>
          </table:table-cell>
          <table:table-cell office:value-type="float" office:value="8640000" calcext:value-type="float">
            <text:p>8640000</text:p>
          </table:table-cell>
          <table:table-cell table:formula="of:=[.B157]/[.C157]" office:value-type="float" office:value="0.000180555555555556" calcext:value-type="float">
            <text:p>0,00018055555555555600</text:p>
          </table:table-cell>
          <table:table-cell table:formula="of:=[.D158]-[.D157]" office:value-type="float" office:value="0.00000115740740740743" calcext:value-type="float">
            <text:p>0,00000115740740740743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B157]+10" office:value-type="float" office:value="1570" calcext:value-type="float">
            <text:p>1570</text:p>
          </table:table-cell>
          <table:table-cell office:value-type="float" office:value="8640000" calcext:value-type="float">
            <text:p>8640000</text:p>
          </table:table-cell>
          <table:table-cell table:formula="of:=[.B158]/[.C158]" office:value-type="float" office:value="0.000181712962962963" calcext:value-type="float">
            <text:p>0,00018171296296296300</text:p>
          </table:table-cell>
          <table:table-cell table:formula="of:=[.D159]-[.D158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B158]+10" office:value-type="float" office:value="1580" calcext:value-type="float">
            <text:p>1580</text:p>
          </table:table-cell>
          <table:table-cell office:value-type="float" office:value="8640000" calcext:value-type="float">
            <text:p>8640000</text:p>
          </table:table-cell>
          <table:table-cell table:formula="of:=[.B159]/[.C159]" office:value-type="float" office:value="0.00018287037037037" calcext:value-type="float">
            <text:p>0,00018287037037037000</text:p>
          </table:table-cell>
          <table:table-cell table:formula="of:=[.D160]-[.D159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B159]+10" office:value-type="float" office:value="1590" calcext:value-type="float">
            <text:p>1590</text:p>
          </table:table-cell>
          <table:table-cell office:value-type="float" office:value="8640000" calcext:value-type="float">
            <text:p>8640000</text:p>
          </table:table-cell>
          <table:table-cell table:formula="of:=[.B160]/[.C160]" office:value-type="float" office:value="0.000184027777777778" calcext:value-type="float">
            <text:p>0,00018402777777777800</text:p>
          </table:table-cell>
          <table:table-cell table:formula="of:=[.D161]-[.D160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B160]+10" office:value-type="float" office:value="1600" calcext:value-type="float">
            <text:p>1600</text:p>
          </table:table-cell>
          <table:table-cell office:value-type="float" office:value="8640000" calcext:value-type="float">
            <text:p>8640000</text:p>
          </table:table-cell>
          <table:table-cell table:formula="of:=[.B161]/[.C161]" office:value-type="float" office:value="0.000185185185185185" calcext:value-type="float">
            <text:p>0,00018518518518518500</text:p>
          </table:table-cell>
          <table:table-cell table:formula="of:=[.D162]-[.D161]" office:value-type="float" office:value="0.00000115740740740743" calcext:value-type="float">
            <text:p>0,0000011574074074074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B161]+10" office:value-type="float" office:value="1610" calcext:value-type="float">
            <text:p>1610</text:p>
          </table:table-cell>
          <table:table-cell office:value-type="float" office:value="8640000" calcext:value-type="float">
            <text:p>8640000</text:p>
          </table:table-cell>
          <table:table-cell table:formula="of:=[.B162]/[.C162]" office:value-type="float" office:value="0.000186342592592593" calcext:value-type="float">
            <text:p>0,00018634259259259300</text:p>
          </table:table-cell>
          <table:table-cell table:formula="of:=[.D163]-[.D162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B162]+10" office:value-type="float" office:value="1620" calcext:value-type="float">
            <text:p>1620</text:p>
          </table:table-cell>
          <table:table-cell office:value-type="float" office:value="8640000" calcext:value-type="float">
            <text:p>8640000</text:p>
          </table:table-cell>
          <table:table-cell table:formula="of:=[.B163]/[.C163]" office:value-type="float" office:value="0.0001875" calcext:value-type="float">
            <text:p>0,00018750000000000000</text:p>
          </table:table-cell>
          <table:table-cell table:formula="of:=[.D164]-[.D163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B163]+10" office:value-type="float" office:value="1630" calcext:value-type="float">
            <text:p>1630</text:p>
          </table:table-cell>
          <table:table-cell office:value-type="float" office:value="8640000" calcext:value-type="float">
            <text:p>8640000</text:p>
          </table:table-cell>
          <table:table-cell table:formula="of:=[.B164]/[.C164]" office:value-type="float" office:value="0.000188657407407407" calcext:value-type="float">
            <text:p>0,00018865740740740700</text:p>
          </table:table-cell>
          <table:table-cell table:formula="of:=[.D165]-[.D164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B164]+10" office:value-type="float" office:value="1640" calcext:value-type="float">
            <text:p>1640</text:p>
          </table:table-cell>
          <table:table-cell office:value-type="float" office:value="8640000" calcext:value-type="float">
            <text:p>8640000</text:p>
          </table:table-cell>
          <table:table-cell table:formula="of:=[.B165]/[.C165]" office:value-type="float" office:value="0.000189814814814815" calcext:value-type="float">
            <text:p>0,00018981481481481500</text:p>
          </table:table-cell>
          <table:table-cell table:formula="of:=[.D166]-[.D165]" office:value-type="float" office:value="0.00000115740740740743" calcext:value-type="float">
            <text:p>0,0000011574074074074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B165]+10" office:value-type="float" office:value="1650" calcext:value-type="float">
            <text:p>1650</text:p>
          </table:table-cell>
          <table:table-cell office:value-type="float" office:value="8640000" calcext:value-type="float">
            <text:p>8640000</text:p>
          </table:table-cell>
          <table:table-cell table:formula="of:=[.B166]/[.C166]" office:value-type="float" office:value="0.000190972222222222" calcext:value-type="float">
            <text:p>0,00019097222222222200</text:p>
          </table:table-cell>
          <table:table-cell table:formula="of:=[.D167]-[.D166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B166]+10" office:value-type="float" office:value="1660" calcext:value-type="float">
            <text:p>1660</text:p>
          </table:table-cell>
          <table:table-cell office:value-type="float" office:value="8640000" calcext:value-type="float">
            <text:p>8640000</text:p>
          </table:table-cell>
          <table:table-cell table:formula="of:=[.B167]/[.C167]" office:value-type="float" office:value="0.00019212962962963" calcext:value-type="float">
            <text:p>0,00019212962962963000</text:p>
          </table:table-cell>
          <table:table-cell table:formula="of:=[.D168]-[.D167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B167]+10" office:value-type="float" office:value="1670" calcext:value-type="float">
            <text:p>1670</text:p>
          </table:table-cell>
          <table:table-cell office:value-type="float" office:value="8640000" calcext:value-type="float">
            <text:p>8640000</text:p>
          </table:table-cell>
          <table:table-cell table:formula="of:=[.B168]/[.C168]" office:value-type="float" office:value="0.000193287037037037" calcext:value-type="float">
            <text:p>0,00019328703703703700</text:p>
          </table:table-cell>
          <table:table-cell table:formula="of:=[.D169]-[.D168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B168]+10" office:value-type="float" office:value="1680" calcext:value-type="float">
            <text:p>1680</text:p>
          </table:table-cell>
          <table:table-cell office:value-type="float" office:value="8640000" calcext:value-type="float">
            <text:p>8640000</text:p>
          </table:table-cell>
          <table:table-cell table:formula="of:=[.B169]/[.C169]" office:value-type="float" office:value="0.000194444444444444" calcext:value-type="float">
            <text:p>0,00019444444444444400</text:p>
          </table:table-cell>
          <table:table-cell table:formula="of:=[.D170]-[.D169]" office:value-type="float" office:value="0.00000115740740740743" calcext:value-type="float">
            <text:p>0,0000011574074074074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B169]+10" office:value-type="float" office:value="1690" calcext:value-type="float">
            <text:p>1690</text:p>
          </table:table-cell>
          <table:table-cell office:value-type="float" office:value="8640000" calcext:value-type="float">
            <text:p>8640000</text:p>
          </table:table-cell>
          <table:table-cell table:formula="of:=[.B170]/[.C170]" office:value-type="float" office:value="0.000195601851851852" calcext:value-type="float">
            <text:p>0,00019560185185185200</text:p>
          </table:table-cell>
          <table:table-cell table:formula="of:=[.D171]-[.D170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B170]+10" office:value-type="float" office:value="1700" calcext:value-type="float">
            <text:p>1700</text:p>
          </table:table-cell>
          <table:table-cell office:value-type="float" office:value="8640000" calcext:value-type="float">
            <text:p>8640000</text:p>
          </table:table-cell>
          <table:table-cell table:formula="of:=[.B171]/[.C171]" office:value-type="float" office:value="0.000196759259259259" calcext:value-type="float">
            <text:p>0,00019675925925925900</text:p>
          </table:table-cell>
          <table:table-cell table:formula="of:=[.D172]-[.D171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B171]+10" office:value-type="float" office:value="1710" calcext:value-type="float">
            <text:p>1710</text:p>
          </table:table-cell>
          <table:table-cell office:value-type="float" office:value="8640000" calcext:value-type="float">
            <text:p>8640000</text:p>
          </table:table-cell>
          <table:table-cell table:formula="of:=[.B172]/[.C172]" office:value-type="float" office:value="0.000197916666666667" calcext:value-type="float">
            <text:p>0,00019791666666666700</text:p>
          </table:table-cell>
          <table:table-cell table:formula="of:=[.D173]-[.D172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B172]+10" office:value-type="float" office:value="1720" calcext:value-type="float">
            <text:p>1720</text:p>
          </table:table-cell>
          <table:table-cell office:value-type="float" office:value="8640000" calcext:value-type="float">
            <text:p>8640000</text:p>
          </table:table-cell>
          <table:table-cell table:formula="of:=[.B173]/[.C173]" office:value-type="float" office:value="0.000199074074074074" calcext:value-type="float">
            <text:p>0,00019907407407407400</text:p>
          </table:table-cell>
          <table:table-cell table:formula="of:=[.D174]-[.D173]" office:value-type="float" office:value="0.00000115740740740743" calcext:value-type="float">
            <text:p>0,00000115740740740743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B173]+10" office:value-type="float" office:value="1730" calcext:value-type="float">
            <text:p>1730</text:p>
          </table:table-cell>
          <table:table-cell office:value-type="float" office:value="8640000" calcext:value-type="float">
            <text:p>8640000</text:p>
          </table:table-cell>
          <table:table-cell table:formula="of:=[.B174]/[.C174]" office:value-type="float" office:value="0.000200231481481482" calcext:value-type="float">
            <text:p>0,00020023148148148200</text:p>
          </table:table-cell>
          <table:table-cell table:formula="of:=[.D175]-[.D174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B174]+10" office:value-type="float" office:value="1740" calcext:value-type="float">
            <text:p>1740</text:p>
          </table:table-cell>
          <table:table-cell office:value-type="float" office:value="8640000" calcext:value-type="float">
            <text:p>8640000</text:p>
          </table:table-cell>
          <table:table-cell table:formula="of:=[.B175]/[.C175]" office:value-type="float" office:value="0.000201388888888889" calcext:value-type="float">
            <text:p>0,00020138888888888900</text:p>
          </table:table-cell>
          <table:table-cell table:formula="of:=[.D176]-[.D175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B175]+10" office:value-type="float" office:value="1750" calcext:value-type="float">
            <text:p>1750</text:p>
          </table:table-cell>
          <table:table-cell office:value-type="float" office:value="8640000" calcext:value-type="float">
            <text:p>8640000</text:p>
          </table:table-cell>
          <table:table-cell table:formula="of:=[.B176]/[.C176]" office:value-type="float" office:value="0.000202546296296296" calcext:value-type="float">
            <text:p>0,00020254629629629600</text:p>
          </table:table-cell>
          <table:table-cell table:formula="of:=[.D177]-[.D176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B176]+10" office:value-type="float" office:value="1760" calcext:value-type="float">
            <text:p>1760</text:p>
          </table:table-cell>
          <table:table-cell office:value-type="float" office:value="8640000" calcext:value-type="float">
            <text:p>8640000</text:p>
          </table:table-cell>
          <table:table-cell table:formula="of:=[.B177]/[.C177]" office:value-type="float" office:value="0.000203703703703704" calcext:value-type="float">
            <text:p>0,00020370370370370400</text:p>
          </table:table-cell>
          <table:table-cell table:formula="of:=[.D178]-[.D177]" office:value-type="float" office:value="0.00000115740740740743" calcext:value-type="float">
            <text:p>0,0000011574074074074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B177]+10" office:value-type="float" office:value="1770" calcext:value-type="float">
            <text:p>1770</text:p>
          </table:table-cell>
          <table:table-cell office:value-type="float" office:value="8640000" calcext:value-type="float">
            <text:p>8640000</text:p>
          </table:table-cell>
          <table:table-cell table:formula="of:=[.B178]/[.C178]" office:value-type="float" office:value="0.000204861111111111" calcext:value-type="float">
            <text:p>0,00020486111111111100</text:p>
          </table:table-cell>
          <table:table-cell table:formula="of:=[.D179]-[.D178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B178]+10" office:value-type="float" office:value="1780" calcext:value-type="float">
            <text:p>1780</text:p>
          </table:table-cell>
          <table:table-cell office:value-type="float" office:value="8640000" calcext:value-type="float">
            <text:p>8640000</text:p>
          </table:table-cell>
          <table:table-cell table:formula="of:=[.B179]/[.C179]" office:value-type="float" office:value="0.000206018518518519" calcext:value-type="float">
            <text:p>0,00020601851851851900</text:p>
          </table:table-cell>
          <table:table-cell table:formula="of:=[.D180]-[.D179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B179]+10" office:value-type="float" office:value="1790" calcext:value-type="float">
            <text:p>1790</text:p>
          </table:table-cell>
          <table:table-cell office:value-type="float" office:value="8640000" calcext:value-type="float">
            <text:p>8640000</text:p>
          </table:table-cell>
          <table:table-cell table:formula="of:=[.B180]/[.C180]" office:value-type="float" office:value="0.000207175925925926" calcext:value-type="float">
            <text:p>0,00020717592592592600</text:p>
          </table:table-cell>
          <table:table-cell table:formula="of:=[.D181]-[.D180]" office:value-type="float" office:value="0.00000115740740740743" calcext:value-type="float">
            <text:p>0,0000011574074074074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B180]+10" office:value-type="float" office:value="1800" calcext:value-type="float">
            <text:p>1800</text:p>
          </table:table-cell>
          <table:table-cell office:value-type="float" office:value="8640000" calcext:value-type="float">
            <text:p>8640000</text:p>
          </table:table-cell>
          <table:table-cell table:formula="of:=[.B181]/[.C181]" office:value-type="float" office:value="0.000208333333333333" calcext:value-type="float">
            <text:p>0,00020833333333333300</text:p>
          </table:table-cell>
          <table:table-cell table:formula="of:=[.D182]-[.D181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B181]+10" office:value-type="float" office:value="1810" calcext:value-type="float">
            <text:p>1810</text:p>
          </table:table-cell>
          <table:table-cell office:value-type="float" office:value="8640000" calcext:value-type="float">
            <text:p>8640000</text:p>
          </table:table-cell>
          <table:table-cell table:formula="of:=[.B182]/[.C182]" office:value-type="float" office:value="0.000209490740740741" calcext:value-type="float">
            <text:p>0,00020949074074074100</text:p>
          </table:table-cell>
          <table:table-cell table:formula="of:=[.D183]-[.D182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B182]+10" office:value-type="float" office:value="1820" calcext:value-type="float">
            <text:p>1820</text:p>
          </table:table-cell>
          <table:table-cell office:value-type="float" office:value="8640000" calcext:value-type="float">
            <text:p>8640000</text:p>
          </table:table-cell>
          <table:table-cell table:formula="of:=[.B183]/[.C183]" office:value-type="float" office:value="0.000210648148148148" calcext:value-type="float">
            <text:p>0,00021064814814814800</text:p>
          </table:table-cell>
          <table:table-cell table:formula="of:=[.D184]-[.D183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B183]+10" office:value-type="float" office:value="1830" calcext:value-type="float">
            <text:p>1830</text:p>
          </table:table-cell>
          <table:table-cell office:value-type="float" office:value="8640000" calcext:value-type="float">
            <text:p>8640000</text:p>
          </table:table-cell>
          <table:table-cell table:formula="of:=[.B184]/[.C184]" office:value-type="float" office:value="0.000211805555555556" calcext:value-type="float">
            <text:p>0,00021180555555555600</text:p>
          </table:table-cell>
          <table:table-cell table:formula="of:=[.D185]-[.D184]" office:value-type="float" office:value="0.00000115740740740743" calcext:value-type="float">
            <text:p>0,0000011574074074074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B184]+10" office:value-type="float" office:value="1840" calcext:value-type="float">
            <text:p>1840</text:p>
          </table:table-cell>
          <table:table-cell office:value-type="float" office:value="8640000" calcext:value-type="float">
            <text:p>8640000</text:p>
          </table:table-cell>
          <table:table-cell table:formula="of:=[.B185]/[.C185]" office:value-type="float" office:value="0.000212962962962963" calcext:value-type="float">
            <text:p>0,00021296296296296300</text:p>
          </table:table-cell>
          <table:table-cell table:formula="of:=[.D186]-[.D185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B185]+10" office:value-type="float" office:value="1850" calcext:value-type="float">
            <text:p>1850</text:p>
          </table:table-cell>
          <table:table-cell office:value-type="float" office:value="8640000" calcext:value-type="float">
            <text:p>8640000</text:p>
          </table:table-cell>
          <table:table-cell table:formula="of:=[.B186]/[.C186]" office:value-type="float" office:value="0.00021412037037037" calcext:value-type="float">
            <text:p>0,00021412037037037000</text:p>
          </table:table-cell>
          <table:table-cell table:formula="of:=[.D187]-[.D186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B186]+10" office:value-type="float" office:value="1860" calcext:value-type="float">
            <text:p>1860</text:p>
          </table:table-cell>
          <table:table-cell office:value-type="float" office:value="8640000" calcext:value-type="float">
            <text:p>8640000</text:p>
          </table:table-cell>
          <table:table-cell table:formula="of:=[.B187]/[.C187]" office:value-type="float" office:value="0.000215277777777778" calcext:value-type="float">
            <text:p>0,00021527777777777800</text:p>
          </table:table-cell>
          <table:table-cell table:formula="of:=[.D188]-[.D187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B187]+10" office:value-type="float" office:value="1870" calcext:value-type="float">
            <text:p>1870</text:p>
          </table:table-cell>
          <table:table-cell office:value-type="float" office:value="8640000" calcext:value-type="float">
            <text:p>8640000</text:p>
          </table:table-cell>
          <table:table-cell table:formula="of:=[.B188]/[.C188]" office:value-type="float" office:value="0.000216435185185185" calcext:value-type="float">
            <text:p>0,00021643518518518500</text:p>
          </table:table-cell>
          <table:table-cell table:formula="of:=[.D189]-[.D188]" office:value-type="float" office:value="0.00000115740740740743" calcext:value-type="float">
            <text:p>0,0000011574074074074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B188]+10" office:value-type="float" office:value="1880" calcext:value-type="float">
            <text:p>1880</text:p>
          </table:table-cell>
          <table:table-cell office:value-type="float" office:value="8640000" calcext:value-type="float">
            <text:p>8640000</text:p>
          </table:table-cell>
          <table:table-cell table:formula="of:=[.B189]/[.C189]" office:value-type="float" office:value="0.000217592592592593" calcext:value-type="float">
            <text:p>0,00021759259259259300</text:p>
          </table:table-cell>
          <table:table-cell table:formula="of:=[.D190]-[.D189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B189]+10" office:value-type="float" office:value="1890" calcext:value-type="float">
            <text:p>1890</text:p>
          </table:table-cell>
          <table:table-cell office:value-type="float" office:value="8640000" calcext:value-type="float">
            <text:p>8640000</text:p>
          </table:table-cell>
          <table:table-cell table:formula="of:=[.B190]/[.C190]" office:value-type="float" office:value="0.00021875" calcext:value-type="float">
            <text:p>0,00021875000000000000</text:p>
          </table:table-cell>
          <table:table-cell table:formula="of:=[.D191]-[.D190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B190]+10" office:value-type="float" office:value="1900" calcext:value-type="float">
            <text:p>1900</text:p>
          </table:table-cell>
          <table:table-cell office:value-type="float" office:value="8640000" calcext:value-type="float">
            <text:p>8640000</text:p>
          </table:table-cell>
          <table:table-cell table:formula="of:=[.B191]/[.C191]" office:value-type="float" office:value="0.000219907407407407" calcext:value-type="float">
            <text:p>0,00021990740740740700</text:p>
          </table:table-cell>
          <table:table-cell table:formula="of:=[.D192]-[.D191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B191]+10" office:value-type="float" office:value="1910" calcext:value-type="float">
            <text:p>1910</text:p>
          </table:table-cell>
          <table:table-cell office:value-type="float" office:value="8640000" calcext:value-type="float">
            <text:p>8640000</text:p>
          </table:table-cell>
          <table:table-cell table:formula="of:=[.B192]/[.C192]" office:value-type="float" office:value="0.000221064814814815" calcext:value-type="float">
            <text:p>0,00022106481481481500</text:p>
          </table:table-cell>
          <table:table-cell table:formula="of:=[.D193]-[.D192]" office:value-type="float" office:value="0.00000115740740740743" calcext:value-type="float">
            <text:p>0,0000011574074074074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B192]+10" office:value-type="float" office:value="1920" calcext:value-type="float">
            <text:p>1920</text:p>
          </table:table-cell>
          <table:table-cell office:value-type="float" office:value="8640000" calcext:value-type="float">
            <text:p>8640000</text:p>
          </table:table-cell>
          <table:table-cell table:formula="of:=[.B193]/[.C193]" office:value-type="float" office:value="0.000222222222222222" calcext:value-type="float">
            <text:p>0,00022222222222222200</text:p>
          </table:table-cell>
          <table:table-cell table:formula="of:=[.D194]-[.D193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B193]+10" office:value-type="float" office:value="1930" calcext:value-type="float">
            <text:p>1930</text:p>
          </table:table-cell>
          <table:table-cell office:value-type="float" office:value="8640000" calcext:value-type="float">
            <text:p>8640000</text:p>
          </table:table-cell>
          <table:table-cell table:formula="of:=[.B194]/[.C194]" office:value-type="float" office:value="0.00022337962962963" calcext:value-type="float">
            <text:p>0,00022337962962963000</text:p>
          </table:table-cell>
          <table:table-cell table:formula="of:=[.D195]-[.D194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B194]+10" office:value-type="float" office:value="1940" calcext:value-type="float">
            <text:p>1940</text:p>
          </table:table-cell>
          <table:table-cell office:value-type="float" office:value="8640000" calcext:value-type="float">
            <text:p>8640000</text:p>
          </table:table-cell>
          <table:table-cell table:formula="of:=[.B195]/[.C195]" office:value-type="float" office:value="0.000224537037037037" calcext:value-type="float">
            <text:p>0,00022453703703703700</text:p>
          </table:table-cell>
          <table:table-cell table:formula="of:=[.D196]-[.D195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B195]+10" office:value-type="float" office:value="1950" calcext:value-type="float">
            <text:p>1950</text:p>
          </table:table-cell>
          <table:table-cell office:value-type="float" office:value="8640000" calcext:value-type="float">
            <text:p>8640000</text:p>
          </table:table-cell>
          <table:table-cell table:formula="of:=[.B196]/[.C196]" office:value-type="float" office:value="0.000225694444444444" calcext:value-type="float">
            <text:p>0,00022569444444444400</text:p>
          </table:table-cell>
          <table:table-cell table:formula="of:=[.D197]-[.D196]" office:value-type="float" office:value="0.00000115740740740743" calcext:value-type="float">
            <text:p>0,0000011574074074074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B196]+10" office:value-type="float" office:value="1960" calcext:value-type="float">
            <text:p>1960</text:p>
          </table:table-cell>
          <table:table-cell office:value-type="float" office:value="8640000" calcext:value-type="float">
            <text:p>8640000</text:p>
          </table:table-cell>
          <table:table-cell table:formula="of:=[.B197]/[.C197]" office:value-type="float" office:value="0.000226851851851852" calcext:value-type="float">
            <text:p>0,00022685185185185200</text:p>
          </table:table-cell>
          <table:table-cell table:formula="of:=[.D198]-[.D197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B197]+10" office:value-type="float" office:value="1970" calcext:value-type="float">
            <text:p>1970</text:p>
          </table:table-cell>
          <table:table-cell office:value-type="float" office:value="8640000" calcext:value-type="float">
            <text:p>8640000</text:p>
          </table:table-cell>
          <table:table-cell table:formula="of:=[.B198]/[.C198]" office:value-type="float" office:value="0.000228009259259259" calcext:value-type="float">
            <text:p>0,00022800925925925900</text:p>
          </table:table-cell>
          <table:table-cell table:formula="of:=[.D199]-[.D198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B198]+10" office:value-type="float" office:value="1980" calcext:value-type="float">
            <text:p>1980</text:p>
          </table:table-cell>
          <table:table-cell office:value-type="float" office:value="8640000" calcext:value-type="float">
            <text:p>8640000</text:p>
          </table:table-cell>
          <table:table-cell table:formula="of:=[.B199]/[.C199]" office:value-type="float" office:value="0.000229166666666667" calcext:value-type="float">
            <text:p>0,00022916666666666700</text:p>
          </table:table-cell>
          <table:table-cell table:formula="of:=[.D200]-[.D199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B199]+10" office:value-type="float" office:value="1990" calcext:value-type="float">
            <text:p>1990</text:p>
          </table:table-cell>
          <table:table-cell office:value-type="float" office:value="8640000" calcext:value-type="float">
            <text:p>8640000</text:p>
          </table:table-cell>
          <table:table-cell table:formula="of:=[.B200]/[.C200]" office:value-type="float" office:value="0.000230324074074074" calcext:value-type="float">
            <text:p>0,00023032407407407400</text:p>
          </table:table-cell>
          <table:table-cell table:formula="of:=[.D201]-[.D200]" office:value-type="float" office:value="0.00000115740740740743" calcext:value-type="float">
            <text:p>0,0000011574074074074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200]+10" office:value-type="float" office:value="2000" calcext:value-type="float">
            <text:p>2000</text:p>
          </table:table-cell>
          <table:table-cell office:value-type="float" office:value="8640000" calcext:value-type="float">
            <text:p>8640000</text:p>
          </table:table-cell>
          <table:table-cell table:formula="of:=[.B201]/[.C201]" office:value-type="float" office:value="0.000231481481481482" calcext:value-type="float">
            <text:p>0,00023148148148148200</text:p>
          </table:table-cell>
          <table:table-cell table:formula="of:=[.D202]-[.D201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B201]+10" office:value-type="float" office:value="2010" calcext:value-type="float">
            <text:p>2010</text:p>
          </table:table-cell>
          <table:table-cell office:value-type="float" office:value="8640000" calcext:value-type="float">
            <text:p>8640000</text:p>
          </table:table-cell>
          <table:table-cell table:formula="of:=[.B202]/[.C202]" office:value-type="float" office:value="0.000232638888888889" calcext:value-type="float">
            <text:p>0,00023263888888888900</text:p>
          </table:table-cell>
          <table:table-cell table:formula="of:=[.D203]-[.D202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B202]+10" office:value-type="float" office:value="2020" calcext:value-type="float">
            <text:p>2020</text:p>
          </table:table-cell>
          <table:table-cell office:value-type="float" office:value="8640000" calcext:value-type="float">
            <text:p>8640000</text:p>
          </table:table-cell>
          <table:table-cell table:formula="of:=[.B203]/[.C203]" office:value-type="float" office:value="0.000233796296296296" calcext:value-type="float">
            <text:p>0,00023379629629629600</text:p>
          </table:table-cell>
          <table:table-cell table:formula="of:=[.D204]-[.D203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B203]+10" office:value-type="float" office:value="2030" calcext:value-type="float">
            <text:p>2030</text:p>
          </table:table-cell>
          <table:table-cell office:value-type="float" office:value="8640000" calcext:value-type="float">
            <text:p>8640000</text:p>
          </table:table-cell>
          <table:table-cell table:formula="of:=[.B204]/[.C204]" office:value-type="float" office:value="0.000234953703703704" calcext:value-type="float">
            <text:p>0,00023495370370370400</text:p>
          </table:table-cell>
          <table:table-cell table:formula="of:=[.D205]-[.D204]" office:value-type="float" office:value="0.00000115740740740743" calcext:value-type="float">
            <text:p>0,00000115740740740743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B204]+10" office:value-type="float" office:value="2040" calcext:value-type="float">
            <text:p>2040</text:p>
          </table:table-cell>
          <table:table-cell office:value-type="float" office:value="8640000" calcext:value-type="float">
            <text:p>8640000</text:p>
          </table:table-cell>
          <table:table-cell table:formula="of:=[.B205]/[.C205]" office:value-type="float" office:value="0.000236111111111111" calcext:value-type="float">
            <text:p>0,00023611111111111100</text:p>
          </table:table-cell>
          <table:table-cell table:formula="of:=[.D206]-[.D205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B205]+10" office:value-type="float" office:value="2050" calcext:value-type="float">
            <text:p>2050</text:p>
          </table:table-cell>
          <table:table-cell office:value-type="float" office:value="8640000" calcext:value-type="float">
            <text:p>8640000</text:p>
          </table:table-cell>
          <table:table-cell table:formula="of:=[.B206]/[.C206]" office:value-type="float" office:value="0.000237268518518519" calcext:value-type="float">
            <text:p>0,00023726851851851900</text:p>
          </table:table-cell>
          <table:table-cell table:formula="of:=[.D207]-[.D206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B206]+10" office:value-type="float" office:value="2060" calcext:value-type="float">
            <text:p>2060</text:p>
          </table:table-cell>
          <table:table-cell office:value-type="float" office:value="8640000" calcext:value-type="float">
            <text:p>8640000</text:p>
          </table:table-cell>
          <table:table-cell table:formula="of:=[.B207]/[.C207]" office:value-type="float" office:value="0.000238425925925926" calcext:value-type="float">
            <text:p>0,00023842592592592600</text:p>
          </table:table-cell>
          <table:table-cell table:formula="of:=[.D208]-[.D207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B207]+10" office:value-type="float" office:value="2070" calcext:value-type="float">
            <text:p>2070</text:p>
          </table:table-cell>
          <table:table-cell office:value-type="float" office:value="8640000" calcext:value-type="float">
            <text:p>8640000</text:p>
          </table:table-cell>
          <table:table-cell table:formula="of:=[.B208]/[.C208]" office:value-type="float" office:value="0.000239583333333333" calcext:value-type="float">
            <text:p>0,00023958333333333300</text:p>
          </table:table-cell>
          <table:table-cell table:formula="of:=[.D209]-[.D208]" office:value-type="float" office:value="0.00000115740740740743" calcext:value-type="float">
            <text:p>0,00000115740740740743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B208]+10" office:value-type="float" office:value="2080" calcext:value-type="float">
            <text:p>2080</text:p>
          </table:table-cell>
          <table:table-cell office:value-type="float" office:value="8640000" calcext:value-type="float">
            <text:p>8640000</text:p>
          </table:table-cell>
          <table:table-cell table:formula="of:=[.B209]/[.C209]" office:value-type="float" office:value="0.000240740740740741" calcext:value-type="float">
            <text:p>0,00024074074074074100</text:p>
          </table:table-cell>
          <table:table-cell table:formula="of:=[.D210]-[.D209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B209]+10" office:value-type="float" office:value="2090" calcext:value-type="float">
            <text:p>2090</text:p>
          </table:table-cell>
          <table:table-cell office:value-type="float" office:value="8640000" calcext:value-type="float">
            <text:p>8640000</text:p>
          </table:table-cell>
          <table:table-cell table:formula="of:=[.B210]/[.C210]" office:value-type="float" office:value="0.000241898148148148" calcext:value-type="float">
            <text:p>0,00024189814814814800</text:p>
          </table:table-cell>
          <table:table-cell table:formula="of:=[.D211]-[.D210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B210]+10" office:value-type="float" office:value="2100" calcext:value-type="float">
            <text:p>2100</text:p>
          </table:table-cell>
          <table:table-cell office:value-type="float" office:value="8640000" calcext:value-type="float">
            <text:p>8640000</text:p>
          </table:table-cell>
          <table:table-cell table:formula="of:=[.B211]/[.C211]" office:value-type="float" office:value="0.000243055555555556" calcext:value-type="float">
            <text:p>0,00024305555555555600</text:p>
          </table:table-cell>
          <table:table-cell table:formula="of:=[.D212]-[.D211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B211]+10" office:value-type="float" office:value="2110" calcext:value-type="float">
            <text:p>2110</text:p>
          </table:table-cell>
          <table:table-cell office:value-type="float" office:value="8640000" calcext:value-type="float">
            <text:p>8640000</text:p>
          </table:table-cell>
          <table:table-cell table:formula="of:=[.B212]/[.C212]" office:value-type="float" office:value="0.000244212962962963" calcext:value-type="float">
            <text:p>0,00024421296296296300</text:p>
          </table:table-cell>
          <table:table-cell table:formula="of:=[.D213]-[.D212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B212]+10" office:value-type="float" office:value="2120" calcext:value-type="float">
            <text:p>2120</text:p>
          </table:table-cell>
          <table:table-cell office:value-type="float" office:value="8640000" calcext:value-type="float">
            <text:p>8640000</text:p>
          </table:table-cell>
          <table:table-cell table:formula="of:=[.B213]/[.C213]" office:value-type="float" office:value="0.00024537037037037" calcext:value-type="float">
            <text:p>0,00024537037037037000</text:p>
          </table:table-cell>
          <table:table-cell table:formula="of:=[.D214]-[.D213]" office:value-type="float" office:value="0.00000115740740740745" calcext:value-type="float">
            <text:p>0,00000115740740740745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B213]+10" office:value-type="float" office:value="2130" calcext:value-type="float">
            <text:p>2130</text:p>
          </table:table-cell>
          <table:table-cell office:value-type="float" office:value="8640000" calcext:value-type="float">
            <text:p>8640000</text:p>
          </table:table-cell>
          <table:table-cell table:formula="of:=[.B214]/[.C214]" office:value-type="float" office:value="0.000246527777777778" calcext:value-type="float">
            <text:p>0,00024652777777777800</text:p>
          </table:table-cell>
          <table:table-cell table:formula="of:=[.D215]-[.D214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B214]+10" office:value-type="float" office:value="2140" calcext:value-type="float">
            <text:p>2140</text:p>
          </table:table-cell>
          <table:table-cell office:value-type="float" office:value="8640000" calcext:value-type="float">
            <text:p>8640000</text:p>
          </table:table-cell>
          <table:table-cell table:formula="of:=[.B215]/[.C215]" office:value-type="float" office:value="0.000247685185185185" calcext:value-type="float">
            <text:p>0,00024768518518518500</text:p>
          </table:table-cell>
          <table:table-cell table:formula="of:=[.D216]-[.D215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B215]+10" office:value-type="float" office:value="2150" calcext:value-type="float">
            <text:p>2150</text:p>
          </table:table-cell>
          <table:table-cell office:value-type="float" office:value="8640000" calcext:value-type="float">
            <text:p>8640000</text:p>
          </table:table-cell>
          <table:table-cell table:formula="of:=[.B216]/[.C216]" office:value-type="float" office:value="0.000248842592592593" calcext:value-type="float">
            <text:p>0,00024884259259259300</text:p>
          </table:table-cell>
          <table:table-cell table:formula="of:=[.D217]-[.D216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B216]+10" office:value-type="float" office:value="2160" calcext:value-type="float">
            <text:p>2160</text:p>
          </table:table-cell>
          <table:table-cell office:value-type="float" office:value="8640000" calcext:value-type="float">
            <text:p>8640000</text:p>
          </table:table-cell>
          <table:table-cell table:formula="of:=[.B217]/[.C217]" office:value-type="float" office:value="0.00025" calcext:value-type="float">
            <text:p>0,00025000000000000000</text:p>
          </table:table-cell>
          <table:table-cell table:formula="of:=[.D218]-[.D217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B217]+10" office:value-type="float" office:value="2170" calcext:value-type="float">
            <text:p>2170</text:p>
          </table:table-cell>
          <table:table-cell office:value-type="float" office:value="8640000" calcext:value-type="float">
            <text:p>8640000</text:p>
          </table:table-cell>
          <table:table-cell table:formula="of:=[.B218]/[.C218]" office:value-type="float" office:value="0.000251157407407407" calcext:value-type="float">
            <text:p>0,00025115740740740700</text:p>
          </table:table-cell>
          <table:table-cell table:formula="of:=[.D219]-[.D218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B218]+10" office:value-type="float" office:value="2180" calcext:value-type="float">
            <text:p>2180</text:p>
          </table:table-cell>
          <table:table-cell office:value-type="float" office:value="8640000" calcext:value-type="float">
            <text:p>8640000</text:p>
          </table:table-cell>
          <table:table-cell table:formula="of:=[.B219]/[.C219]" office:value-type="float" office:value="0.000252314814814815" calcext:value-type="float">
            <text:p>0,00025231481481481500</text:p>
          </table:table-cell>
          <table:table-cell table:formula="of:=[.D220]-[.D219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B219]+10" office:value-type="float" office:value="2190" calcext:value-type="float">
            <text:p>2190</text:p>
          </table:table-cell>
          <table:table-cell office:value-type="float" office:value="8640000" calcext:value-type="float">
            <text:p>8640000</text:p>
          </table:table-cell>
          <table:table-cell table:formula="of:=[.B220]/[.C220]" office:value-type="float" office:value="0.000253472222222222" calcext:value-type="float">
            <text:p>0,00025347222222222200</text:p>
          </table:table-cell>
          <table:table-cell table:formula="of:=[.D221]-[.D220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B220]+10" office:value-type="float" office:value="2200" calcext:value-type="float">
            <text:p>2200</text:p>
          </table:table-cell>
          <table:table-cell office:value-type="float" office:value="8640000" calcext:value-type="float">
            <text:p>8640000</text:p>
          </table:table-cell>
          <table:table-cell table:formula="of:=[.B221]/[.C221]" office:value-type="float" office:value="0.00025462962962963" calcext:value-type="float">
            <text:p>0,00025462962962963000</text:p>
          </table:table-cell>
          <table:table-cell table:formula="of:=[.D222]-[.D221]" office:value-type="float" office:value="0.00000115740740740745" calcext:value-type="float">
            <text:p>0,0000011574074074074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B221]+10" office:value-type="float" office:value="2210" calcext:value-type="float">
            <text:p>2210</text:p>
          </table:table-cell>
          <table:table-cell office:value-type="float" office:value="8640000" calcext:value-type="float">
            <text:p>8640000</text:p>
          </table:table-cell>
          <table:table-cell table:formula="of:=[.B222]/[.C222]" office:value-type="float" office:value="0.000255787037037037" calcext:value-type="float">
            <text:p>0,00025578703703703700</text:p>
          </table:table-cell>
          <table:table-cell table:formula="of:=[.D223]-[.D222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B222]+10" office:value-type="float" office:value="2220" calcext:value-type="float">
            <text:p>2220</text:p>
          </table:table-cell>
          <table:table-cell office:value-type="float" office:value="8640000" calcext:value-type="float">
            <text:p>8640000</text:p>
          </table:table-cell>
          <table:table-cell table:formula="of:=[.B223]/[.C223]" office:value-type="float" office:value="0.000256944444444444" calcext:value-type="float">
            <text:p>0,00025694444444444400</text:p>
          </table:table-cell>
          <table:table-cell table:formula="of:=[.D224]-[.D223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B223]+10" office:value-type="float" office:value="2230" calcext:value-type="float">
            <text:p>2230</text:p>
          </table:table-cell>
          <table:table-cell office:value-type="float" office:value="8640000" calcext:value-type="float">
            <text:p>8640000</text:p>
          </table:table-cell>
          <table:table-cell table:formula="of:=[.B224]/[.C224]" office:value-type="float" office:value="0.000258101851851852" calcext:value-type="float">
            <text:p>0,00025810185185185200</text:p>
          </table:table-cell>
          <table:table-cell table:formula="of:=[.D225]-[.D224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B224]+10" office:value-type="float" office:value="2240" calcext:value-type="float">
            <text:p>2240</text:p>
          </table:table-cell>
          <table:table-cell office:value-type="float" office:value="8640000" calcext:value-type="float">
            <text:p>8640000</text:p>
          </table:table-cell>
          <table:table-cell table:formula="of:=[.B225]/[.C225]" office:value-type="float" office:value="0.000259259259259259" calcext:value-type="float">
            <text:p>0,00025925925925925900</text:p>
          </table:table-cell>
          <table:table-cell table:formula="of:=[.D226]-[.D225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B225]+10" office:value-type="float" office:value="2250" calcext:value-type="float">
            <text:p>2250</text:p>
          </table:table-cell>
          <table:table-cell office:value-type="float" office:value="8640000" calcext:value-type="float">
            <text:p>8640000</text:p>
          </table:table-cell>
          <table:table-cell table:formula="of:=[.B226]/[.C226]" office:value-type="float" office:value="0.000260416666666667" calcext:value-type="float">
            <text:p>0,00026041666666666700</text:p>
          </table:table-cell>
          <table:table-cell table:formula="of:=[.D227]-[.D226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B226]+10" office:value-type="float" office:value="2260" calcext:value-type="float">
            <text:p>2260</text:p>
          </table:table-cell>
          <table:table-cell office:value-type="float" office:value="8640000" calcext:value-type="float">
            <text:p>8640000</text:p>
          </table:table-cell>
          <table:table-cell table:formula="of:=[.B227]/[.C227]" office:value-type="float" office:value="0.000261574074074074" calcext:value-type="float">
            <text:p>0,00026157407407407400</text:p>
          </table:table-cell>
          <table:table-cell table:formula="of:=[.D228]-[.D227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B227]+10" office:value-type="float" office:value="2270" calcext:value-type="float">
            <text:p>2270</text:p>
          </table:table-cell>
          <table:table-cell office:value-type="float" office:value="8640000" calcext:value-type="float">
            <text:p>8640000</text:p>
          </table:table-cell>
          <table:table-cell table:formula="of:=[.B228]/[.C228]" office:value-type="float" office:value="0.000262731481481481" calcext:value-type="float">
            <text:p>0,00026273148148148100</text:p>
          </table:table-cell>
          <table:table-cell table:formula="of:=[.D229]-[.D228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B228]+10" office:value-type="float" office:value="2280" calcext:value-type="float">
            <text:p>2280</text:p>
          </table:table-cell>
          <table:table-cell office:value-type="float" office:value="8640000" calcext:value-type="float">
            <text:p>8640000</text:p>
          </table:table-cell>
          <table:table-cell table:formula="of:=[.B229]/[.C229]" office:value-type="float" office:value="0.000263888888888889" calcext:value-type="float">
            <text:p>0,00026388888888888900</text:p>
          </table:table-cell>
          <table:table-cell table:formula="of:=[.D230]-[.D229]" office:value-type="float" office:value="0.00000115740740740745" calcext:value-type="float">
            <text:p>0,00000115740740740745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B229]+10" office:value-type="float" office:value="2290" calcext:value-type="float">
            <text:p>2290</text:p>
          </table:table-cell>
          <table:table-cell office:value-type="float" office:value="8640000" calcext:value-type="float">
            <text:p>8640000</text:p>
          </table:table-cell>
          <table:table-cell table:formula="of:=[.B230]/[.C230]" office:value-type="float" office:value="0.000265046296296296" calcext:value-type="float">
            <text:p>0,00026504629629629600</text:p>
          </table:table-cell>
          <table:table-cell table:formula="of:=[.D231]-[.D230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B230]+10" office:value-type="float" office:value="2300" calcext:value-type="float">
            <text:p>2300</text:p>
          </table:table-cell>
          <table:table-cell office:value-type="float" office:value="8640000" calcext:value-type="float">
            <text:p>8640000</text:p>
          </table:table-cell>
          <table:table-cell table:formula="of:=[.B231]/[.C231]" office:value-type="float" office:value="0.000266203703703704" calcext:value-type="float">
            <text:p>0,00026620370370370400</text:p>
          </table:table-cell>
          <table:table-cell table:formula="of:=[.D232]-[.D231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B231]+10" office:value-type="float" office:value="2310" calcext:value-type="float">
            <text:p>2310</text:p>
          </table:table-cell>
          <table:table-cell office:value-type="float" office:value="8640000" calcext:value-type="float">
            <text:p>8640000</text:p>
          </table:table-cell>
          <table:table-cell table:formula="of:=[.B232]/[.C232]" office:value-type="float" office:value="0.000267361111111111" calcext:value-type="float">
            <text:p>0,00026736111111111100</text:p>
          </table:table-cell>
          <table:table-cell table:formula="of:=[.D233]-[.D232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B232]+10" office:value-type="float" office:value="2320" calcext:value-type="float">
            <text:p>2320</text:p>
          </table:table-cell>
          <table:table-cell office:value-type="float" office:value="8640000" calcext:value-type="float">
            <text:p>8640000</text:p>
          </table:table-cell>
          <table:table-cell table:formula="of:=[.B233]/[.C233]" office:value-type="float" office:value="0.000268518518518519" calcext:value-type="float">
            <text:p>0,00026851851851851900</text:p>
          </table:table-cell>
          <table:table-cell table:formula="of:=[.D234]-[.D233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B233]+10" office:value-type="float" office:value="2330" calcext:value-type="float">
            <text:p>2330</text:p>
          </table:table-cell>
          <table:table-cell office:value-type="float" office:value="8640000" calcext:value-type="float">
            <text:p>8640000</text:p>
          </table:table-cell>
          <table:table-cell table:formula="of:=[.B234]/[.C234]" office:value-type="float" office:value="0.000269675925925926" calcext:value-type="float">
            <text:p>0,00026967592592592600</text:p>
          </table:table-cell>
          <table:table-cell table:formula="of:=[.D235]-[.D234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B234]+10" office:value-type="float" office:value="2340" calcext:value-type="float">
            <text:p>2340</text:p>
          </table:table-cell>
          <table:table-cell office:value-type="float" office:value="8640000" calcext:value-type="float">
            <text:p>8640000</text:p>
          </table:table-cell>
          <table:table-cell table:formula="of:=[.B235]/[.C235]" office:value-type="float" office:value="0.000270833333333333" calcext:value-type="float">
            <text:p>0,00027083333333333300</text:p>
          </table:table-cell>
          <table:table-cell table:formula="of:=[.D236]-[.D235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B235]+10" office:value-type="float" office:value="2350" calcext:value-type="float">
            <text:p>2350</text:p>
          </table:table-cell>
          <table:table-cell office:value-type="float" office:value="8640000" calcext:value-type="float">
            <text:p>8640000</text:p>
          </table:table-cell>
          <table:table-cell table:formula="of:=[.B236]/[.C236]" office:value-type="float" office:value="0.000271990740740741" calcext:value-type="float">
            <text:p>0,00027199074074074100</text:p>
          </table:table-cell>
          <table:table-cell table:formula="of:=[.D237]-[.D236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B236]+10" office:value-type="float" office:value="2360" calcext:value-type="float">
            <text:p>2360</text:p>
          </table:table-cell>
          <table:table-cell office:value-type="float" office:value="8640000" calcext:value-type="float">
            <text:p>8640000</text:p>
          </table:table-cell>
          <table:table-cell table:formula="of:=[.B237]/[.C237]" office:value-type="float" office:value="0.000273148148148148" calcext:value-type="float">
            <text:p>0,00027314814814814800</text:p>
          </table:table-cell>
          <table:table-cell table:formula="of:=[.D238]-[.D237]" office:value-type="float" office:value="0.00000115740740740745" calcext:value-type="float">
            <text:p>0,00000115740740740745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B237]+10" office:value-type="float" office:value="2370" calcext:value-type="float">
            <text:p>2370</text:p>
          </table:table-cell>
          <table:table-cell office:value-type="float" office:value="8640000" calcext:value-type="float">
            <text:p>8640000</text:p>
          </table:table-cell>
          <table:table-cell table:formula="of:=[.B238]/[.C238]" office:value-type="float" office:value="0.000274305555555556" calcext:value-type="float">
            <text:p>0,00027430555555555600</text:p>
          </table:table-cell>
          <table:table-cell table:formula="of:=[.D239]-[.D238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B238]+10" office:value-type="float" office:value="2380" calcext:value-type="float">
            <text:p>2380</text:p>
          </table:table-cell>
          <table:table-cell office:value-type="float" office:value="8640000" calcext:value-type="float">
            <text:p>8640000</text:p>
          </table:table-cell>
          <table:table-cell table:formula="of:=[.B239]/[.C239]" office:value-type="float" office:value="0.000275462962962963" calcext:value-type="float">
            <text:p>0,00027546296296296300</text:p>
          </table:table-cell>
          <table:table-cell table:formula="of:=[.D240]-[.D239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B239]+10" office:value-type="float" office:value="2390" calcext:value-type="float">
            <text:p>2390</text:p>
          </table:table-cell>
          <table:table-cell office:value-type="float" office:value="8640000" calcext:value-type="float">
            <text:p>8640000</text:p>
          </table:table-cell>
          <table:table-cell table:formula="of:=[.B240]/[.C240]" office:value-type="float" office:value="0.00027662037037037" calcext:value-type="float">
            <text:p>0,00027662037037037000</text:p>
          </table:table-cell>
          <table:table-cell table:formula="of:=[.D241]-[.D240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B240]+10" office:value-type="float" office:value="2400" calcext:value-type="float">
            <text:p>2400</text:p>
          </table:table-cell>
          <table:table-cell office:value-type="float" office:value="8640000" calcext:value-type="float">
            <text:p>8640000</text:p>
          </table:table-cell>
          <table:table-cell table:formula="of:=[.B241]/[.C241]" office:value-type="float" office:value="0.000277777777777778" calcext:value-type="float">
            <text:p>0,00027777777777777800</text:p>
          </table:table-cell>
          <table:table-cell table:formula="of:=[.D242]-[.D241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B241]+10" office:value-type="float" office:value="2410" calcext:value-type="float">
            <text:p>2410</text:p>
          </table:table-cell>
          <table:table-cell office:value-type="float" office:value="8640000" calcext:value-type="float">
            <text:p>8640000</text:p>
          </table:table-cell>
          <table:table-cell table:formula="of:=[.B242]/[.C242]" office:value-type="float" office:value="0.000278935185185185" calcext:value-type="float">
            <text:p>0,00027893518518518500</text:p>
          </table:table-cell>
          <table:table-cell table:formula="of:=[.D243]-[.D242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B242]+10" office:value-type="float" office:value="2420" calcext:value-type="float">
            <text:p>2420</text:p>
          </table:table-cell>
          <table:table-cell office:value-type="float" office:value="8640000" calcext:value-type="float">
            <text:p>8640000</text:p>
          </table:table-cell>
          <table:table-cell table:formula="of:=[.B243]/[.C243]" office:value-type="float" office:value="0.000280092592592593" calcext:value-type="float">
            <text:p>0,00028009259259259300</text:p>
          </table:table-cell>
          <table:table-cell table:formula="of:=[.D244]-[.D243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B243]+10" office:value-type="float" office:value="2430" calcext:value-type="float">
            <text:p>2430</text:p>
          </table:table-cell>
          <table:table-cell office:value-type="float" office:value="8640000" calcext:value-type="float">
            <text:p>8640000</text:p>
          </table:table-cell>
          <table:table-cell table:formula="of:=[.B244]/[.C244]" office:value-type="float" office:value="0.00028125" calcext:value-type="float">
            <text:p>0,00028125000000000000</text:p>
          </table:table-cell>
          <table:table-cell table:formula="of:=[.D245]-[.D244]" office:value-type="float" office:value="0.00000115740740740745" calcext:value-type="float">
            <text:p>0,00000115740740740745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B244]+10" office:value-type="float" office:value="2440" calcext:value-type="float">
            <text:p>2440</text:p>
          </table:table-cell>
          <table:table-cell office:value-type="float" office:value="8640000" calcext:value-type="float">
            <text:p>8640000</text:p>
          </table:table-cell>
          <table:table-cell table:formula="of:=[.B245]/[.C245]" office:value-type="float" office:value="0.000282407407407407" calcext:value-type="float">
            <text:p>0,00028240740740740700</text:p>
          </table:table-cell>
          <table:table-cell table:formula="of:=[.D246]-[.D245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B245]+10" office:value-type="float" office:value="2450" calcext:value-type="float">
            <text:p>2450</text:p>
          </table:table-cell>
          <table:table-cell office:value-type="float" office:value="8640000" calcext:value-type="float">
            <text:p>8640000</text:p>
          </table:table-cell>
          <table:table-cell table:formula="of:=[.B246]/[.C246]" office:value-type="float" office:value="0.000283564814814815" calcext:value-type="float">
            <text:p>0,00028356481481481500</text:p>
          </table:table-cell>
          <table:table-cell table:formula="of:=[.D247]-[.D246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B246]+10" office:value-type="float" office:value="2460" calcext:value-type="float">
            <text:p>2460</text:p>
          </table:table-cell>
          <table:table-cell office:value-type="float" office:value="8640000" calcext:value-type="float">
            <text:p>8640000</text:p>
          </table:table-cell>
          <table:table-cell table:formula="of:=[.B247]/[.C247]" office:value-type="float" office:value="0.000284722222222222" calcext:value-type="float">
            <text:p>0,00028472222222222200</text:p>
          </table:table-cell>
          <table:table-cell table:formula="of:=[.D248]-[.D247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B247]+10" office:value-type="float" office:value="2470" calcext:value-type="float">
            <text:p>2470</text:p>
          </table:table-cell>
          <table:table-cell office:value-type="float" office:value="8640000" calcext:value-type="float">
            <text:p>8640000</text:p>
          </table:table-cell>
          <table:table-cell table:formula="of:=[.B248]/[.C248]" office:value-type="float" office:value="0.00028587962962963" calcext:value-type="float">
            <text:p>0,00028587962962963000</text:p>
          </table:table-cell>
          <table:table-cell table:formula="of:=[.D249]-[.D248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B248]+10" office:value-type="float" office:value="2480" calcext:value-type="float">
            <text:p>2480</text:p>
          </table:table-cell>
          <table:table-cell office:value-type="float" office:value="8640000" calcext:value-type="float">
            <text:p>8640000</text:p>
          </table:table-cell>
          <table:table-cell table:formula="of:=[.B249]/[.C249]" office:value-type="float" office:value="0.000287037037037037" calcext:value-type="float">
            <text:p>0,00028703703703703700</text:p>
          </table:table-cell>
          <table:table-cell table:formula="of:=[.D250]-[.D249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B249]+10" office:value-type="float" office:value="2490" calcext:value-type="float">
            <text:p>2490</text:p>
          </table:table-cell>
          <table:table-cell office:value-type="float" office:value="8640000" calcext:value-type="float">
            <text:p>8640000</text:p>
          </table:table-cell>
          <table:table-cell table:formula="of:=[.B250]/[.C250]" office:value-type="float" office:value="0.000288194444444444" calcext:value-type="float">
            <text:p>0,00028819444444444400</text:p>
          </table:table-cell>
          <table:table-cell table:formula="of:=[.D251]-[.D250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B250]+10" office:value-type="float" office:value="2500" calcext:value-type="float">
            <text:p>2500</text:p>
          </table:table-cell>
          <table:table-cell office:value-type="float" office:value="8640000" calcext:value-type="float">
            <text:p>8640000</text:p>
          </table:table-cell>
          <table:table-cell table:formula="of:=[.B251]/[.C251]" office:value-type="float" office:value="0.000289351851851852" calcext:value-type="float">
            <text:p>0,00028935185185185200</text:p>
          </table:table-cell>
          <table:table-cell table:formula="of:=[.D252]-[.D251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B251]+10" office:value-type="float" office:value="2510" calcext:value-type="float">
            <text:p>2510</text:p>
          </table:table-cell>
          <table:table-cell office:value-type="float" office:value="8640000" calcext:value-type="float">
            <text:p>8640000</text:p>
          </table:table-cell>
          <table:table-cell table:formula="of:=[.B252]/[.C252]" office:value-type="float" office:value="0.000290509259259259" calcext:value-type="float">
            <text:p>0,00029050925925925900</text:p>
          </table:table-cell>
          <table:table-cell table:formula="of:=[.D253]-[.D252]" office:value-type="float" office:value="0.00000115740740740745" calcext:value-type="float">
            <text:p>0,00000115740740740745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B252]+10" office:value-type="float" office:value="2520" calcext:value-type="float">
            <text:p>2520</text:p>
          </table:table-cell>
          <table:table-cell office:value-type="float" office:value="8640000" calcext:value-type="float">
            <text:p>8640000</text:p>
          </table:table-cell>
          <table:table-cell table:formula="of:=[.B253]/[.C253]" office:value-type="float" office:value="0.000291666666666667" calcext:value-type="float">
            <text:p>0,00029166666666666700</text:p>
          </table:table-cell>
          <table:table-cell table:formula="of:=[.D254]-[.D253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B253]+10" office:value-type="float" office:value="2530" calcext:value-type="float">
            <text:p>2530</text:p>
          </table:table-cell>
          <table:table-cell office:value-type="float" office:value="8640000" calcext:value-type="float">
            <text:p>8640000</text:p>
          </table:table-cell>
          <table:table-cell table:formula="of:=[.B254]/[.C254]" office:value-type="float" office:value="0.000292824074074074" calcext:value-type="float">
            <text:p>0,00029282407407407400</text:p>
          </table:table-cell>
          <table:table-cell table:formula="of:=[.D255]-[.D254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B254]+10" office:value-type="float" office:value="2540" calcext:value-type="float">
            <text:p>2540</text:p>
          </table:table-cell>
          <table:table-cell office:value-type="float" office:value="8640000" calcext:value-type="float">
            <text:p>8640000</text:p>
          </table:table-cell>
          <table:table-cell table:formula="of:=[.B255]/[.C255]" office:value-type="float" office:value="0.000293981481481482" calcext:value-type="float">
            <text:p>0,00029398148148148200</text:p>
          </table:table-cell>
          <table:table-cell table:formula="of:=[.D256]-[.D255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B255]+10" office:value-type="float" office:value="2550" calcext:value-type="float">
            <text:p>2550</text:p>
          </table:table-cell>
          <table:table-cell office:value-type="float" office:value="8640000" calcext:value-type="float">
            <text:p>8640000</text:p>
          </table:table-cell>
          <table:table-cell table:formula="of:=[.B256]/[.C256]" office:value-type="float" office:value="0.000295138888888889" calcext:value-type="float">
            <text:p>0,00029513888888888900</text:p>
          </table:table-cell>
          <table:table-cell table:formula="of:=[.D257]-[.D256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B256]+10" office:value-type="float" office:value="2560" calcext:value-type="float">
            <text:p>2560</text:p>
          </table:table-cell>
          <table:table-cell office:value-type="float" office:value="8640000" calcext:value-type="float">
            <text:p>8640000</text:p>
          </table:table-cell>
          <table:table-cell table:formula="of:=[.B257]/[.C257]" office:value-type="float" office:value="0.000296296296296296" calcext:value-type="float">
            <text:p>0,00029629629629629600</text:p>
          </table:table-cell>
          <table:table-cell table:formula="of:=[.D258]-[.D257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B257]+10" office:value-type="float" office:value="2570" calcext:value-type="float">
            <text:p>2570</text:p>
          </table:table-cell>
          <table:table-cell office:value-type="float" office:value="8640000" calcext:value-type="float">
            <text:p>8640000</text:p>
          </table:table-cell>
          <table:table-cell table:formula="of:=[.B258]/[.C258]" office:value-type="float" office:value="0.000297453703703704" calcext:value-type="float">
            <text:p>0,00029745370370370400</text:p>
          </table:table-cell>
          <table:table-cell table:formula="of:=[.D259]-[.D258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B258]+10" office:value-type="float" office:value="2580" calcext:value-type="float">
            <text:p>2580</text:p>
          </table:table-cell>
          <table:table-cell office:value-type="float" office:value="8640000" calcext:value-type="float">
            <text:p>8640000</text:p>
          </table:table-cell>
          <table:table-cell table:formula="of:=[.B259]/[.C259]" office:value-type="float" office:value="0.000298611111111111" calcext:value-type="float">
            <text:p>0,00029861111111111100</text:p>
          </table:table-cell>
          <table:table-cell table:formula="of:=[.D260]-[.D259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B259]+10" office:value-type="float" office:value="2590" calcext:value-type="float">
            <text:p>2590</text:p>
          </table:table-cell>
          <table:table-cell office:value-type="float" office:value="8640000" calcext:value-type="float">
            <text:p>8640000</text:p>
          </table:table-cell>
          <table:table-cell table:formula="of:=[.B260]/[.C260]" office:value-type="float" office:value="0.000299768518518519" calcext:value-type="float">
            <text:p>0,00029976851851851900</text:p>
          </table:table-cell>
          <table:table-cell table:formula="of:=[.D261]-[.D260]" office:value-type="float" office:value="0.00000115740740740745" calcext:value-type="float">
            <text:p>0,0000011574074074074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B260]+10" office:value-type="float" office:value="2600" calcext:value-type="float">
            <text:p>2600</text:p>
          </table:table-cell>
          <table:table-cell office:value-type="float" office:value="8640000" calcext:value-type="float">
            <text:p>8640000</text:p>
          </table:table-cell>
          <table:table-cell table:formula="of:=[.B261]/[.C261]" office:value-type="float" office:value="0.000300925925925926" calcext:value-type="float">
            <text:p>0,00030092592592592600</text:p>
          </table:table-cell>
          <table:table-cell table:formula="of:=[.D262]-[.D261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B261]+10" office:value-type="float" office:value="2610" calcext:value-type="float">
            <text:p>2610</text:p>
          </table:table-cell>
          <table:table-cell office:value-type="float" office:value="8640000" calcext:value-type="float">
            <text:p>8640000</text:p>
          </table:table-cell>
          <table:table-cell table:formula="of:=[.B262]/[.C262]" office:value-type="float" office:value="0.000302083333333333" calcext:value-type="float">
            <text:p>0,00030208333333333300</text:p>
          </table:table-cell>
          <table:table-cell table:formula="of:=[.D263]-[.D262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B262]+10" office:value-type="float" office:value="2620" calcext:value-type="float">
            <text:p>2620</text:p>
          </table:table-cell>
          <table:table-cell office:value-type="float" office:value="8640000" calcext:value-type="float">
            <text:p>8640000</text:p>
          </table:table-cell>
          <table:table-cell table:formula="of:=[.B263]/[.C263]" office:value-type="float" office:value="0.000303240740740741" calcext:value-type="float">
            <text:p>0,00030324074074074100</text:p>
          </table:table-cell>
          <table:table-cell table:formula="of:=[.D264]-[.D263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B263]+10" office:value-type="float" office:value="2630" calcext:value-type="float">
            <text:p>2630</text:p>
          </table:table-cell>
          <table:table-cell office:value-type="float" office:value="8640000" calcext:value-type="float">
            <text:p>8640000</text:p>
          </table:table-cell>
          <table:table-cell table:formula="of:=[.B264]/[.C264]" office:value-type="float" office:value="0.000304398148148148" calcext:value-type="float">
            <text:p>0,00030439814814814800</text:p>
          </table:table-cell>
          <table:table-cell table:formula="of:=[.D265]-[.D264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B264]+10" office:value-type="float" office:value="2640" calcext:value-type="float">
            <text:p>2640</text:p>
          </table:table-cell>
          <table:table-cell office:value-type="float" office:value="8640000" calcext:value-type="float">
            <text:p>8640000</text:p>
          </table:table-cell>
          <table:table-cell table:formula="of:=[.B265]/[.C265]" office:value-type="float" office:value="0.000305555555555556" calcext:value-type="float">
            <text:p>0,00030555555555555600</text:p>
          </table:table-cell>
          <table:table-cell table:formula="of:=[.D266]-[.D265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B265]+10" office:value-type="float" office:value="2650" calcext:value-type="float">
            <text:p>2650</text:p>
          </table:table-cell>
          <table:table-cell office:value-type="float" office:value="8640000" calcext:value-type="float">
            <text:p>8640000</text:p>
          </table:table-cell>
          <table:table-cell table:formula="of:=[.B266]/[.C266]" office:value-type="float" office:value="0.000306712962962963" calcext:value-type="float">
            <text:p>0,00030671296296296300</text:p>
          </table:table-cell>
          <table:table-cell table:formula="of:=[.D267]-[.D266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B266]+10" office:value-type="float" office:value="2660" calcext:value-type="float">
            <text:p>2660</text:p>
          </table:table-cell>
          <table:table-cell office:value-type="float" office:value="8640000" calcext:value-type="float">
            <text:p>8640000</text:p>
          </table:table-cell>
          <table:table-cell table:formula="of:=[.B267]/[.C267]" office:value-type="float" office:value="0.00030787037037037" calcext:value-type="float">
            <text:p>0,00030787037037037000</text:p>
          </table:table-cell>
          <table:table-cell table:formula="of:=[.D268]-[.D267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B267]+10" office:value-type="float" office:value="2670" calcext:value-type="float">
            <text:p>2670</text:p>
          </table:table-cell>
          <table:table-cell office:value-type="float" office:value="8640000" calcext:value-type="float">
            <text:p>8640000</text:p>
          </table:table-cell>
          <table:table-cell table:formula="of:=[.B268]/[.C268]" office:value-type="float" office:value="0.000309027777777778" calcext:value-type="float">
            <text:p>0,00030902777777777800</text:p>
          </table:table-cell>
          <table:table-cell table:formula="of:=[.D269]-[.D268]" office:value-type="float" office:value="0.00000115740740740745" calcext:value-type="float">
            <text:p>0,00000115740740740745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B268]+10" office:value-type="float" office:value="2680" calcext:value-type="float">
            <text:p>2680</text:p>
          </table:table-cell>
          <table:table-cell office:value-type="float" office:value="8640000" calcext:value-type="float">
            <text:p>8640000</text:p>
          </table:table-cell>
          <table:table-cell table:formula="of:=[.B269]/[.C269]" office:value-type="float" office:value="0.000310185185185185" calcext:value-type="float">
            <text:p>0,00031018518518518500</text:p>
          </table:table-cell>
          <table:table-cell table:formula="of:=[.D270]-[.D269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B269]+10" office:value-type="float" office:value="2690" calcext:value-type="float">
            <text:p>2690</text:p>
          </table:table-cell>
          <table:table-cell office:value-type="float" office:value="8640000" calcext:value-type="float">
            <text:p>8640000</text:p>
          </table:table-cell>
          <table:table-cell table:formula="of:=[.B270]/[.C270]" office:value-type="float" office:value="0.000311342592592593" calcext:value-type="float">
            <text:p>0,00031134259259259300</text:p>
          </table:table-cell>
          <table:table-cell table:formula="of:=[.D271]-[.D270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B270]+10" office:value-type="float" office:value="2700" calcext:value-type="float">
            <text:p>2700</text:p>
          </table:table-cell>
          <table:table-cell office:value-type="float" office:value="8640000" calcext:value-type="float">
            <text:p>8640000</text:p>
          </table:table-cell>
          <table:table-cell table:formula="of:=[.B271]/[.C271]" office:value-type="float" office:value="0.0003125" calcext:value-type="float">
            <text:p>0,00031250000000000000</text:p>
          </table:table-cell>
          <table:table-cell table:formula="of:=[.D272]-[.D271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B271]+10" office:value-type="float" office:value="2710" calcext:value-type="float">
            <text:p>2710</text:p>
          </table:table-cell>
          <table:table-cell office:value-type="float" office:value="8640000" calcext:value-type="float">
            <text:p>8640000</text:p>
          </table:table-cell>
          <table:table-cell table:formula="of:=[.B272]/[.C272]" office:value-type="float" office:value="0.000313657407407407" calcext:value-type="float">
            <text:p>0,00031365740740740700</text:p>
          </table:table-cell>
          <table:table-cell table:formula="of:=[.D273]-[.D272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B272]+10" office:value-type="float" office:value="2720" calcext:value-type="float">
            <text:p>2720</text:p>
          </table:table-cell>
          <table:table-cell office:value-type="float" office:value="8640000" calcext:value-type="float">
            <text:p>8640000</text:p>
          </table:table-cell>
          <table:table-cell table:formula="of:=[.B273]/[.C273]" office:value-type="float" office:value="0.000314814814814815" calcext:value-type="float">
            <text:p>0,00031481481481481500</text:p>
          </table:table-cell>
          <table:table-cell table:formula="of:=[.D274]-[.D273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B273]+10" office:value-type="float" office:value="2730" calcext:value-type="float">
            <text:p>2730</text:p>
          </table:table-cell>
          <table:table-cell office:value-type="float" office:value="8640000" calcext:value-type="float">
            <text:p>8640000</text:p>
          </table:table-cell>
          <table:table-cell table:formula="of:=[.B274]/[.C274]" office:value-type="float" office:value="0.000315972222222222" calcext:value-type="float">
            <text:p>0,00031597222222222200</text:p>
          </table:table-cell>
          <table:table-cell table:formula="of:=[.D275]-[.D274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B274]+10" office:value-type="float" office:value="2740" calcext:value-type="float">
            <text:p>2740</text:p>
          </table:table-cell>
          <table:table-cell office:value-type="float" office:value="8640000" calcext:value-type="float">
            <text:p>8640000</text:p>
          </table:table-cell>
          <table:table-cell table:formula="of:=[.B275]/[.C275]" office:value-type="float" office:value="0.00031712962962963" calcext:value-type="float">
            <text:p>0,00031712962962963000</text:p>
          </table:table-cell>
          <table:table-cell table:formula="of:=[.D276]-[.D275]" office:value-type="float" office:value="0.00000115740740740745" calcext:value-type="float">
            <text:p>0,0000011574074074074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B275]+10" office:value-type="float" office:value="2750" calcext:value-type="float">
            <text:p>2750</text:p>
          </table:table-cell>
          <table:table-cell office:value-type="float" office:value="8640000" calcext:value-type="float">
            <text:p>8640000</text:p>
          </table:table-cell>
          <table:table-cell table:formula="of:=[.B276]/[.C276]" office:value-type="float" office:value="0.000318287037037037" calcext:value-type="float">
            <text:p>0,00031828703703703700</text:p>
          </table:table-cell>
          <table:table-cell table:formula="of:=[.D277]-[.D276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B276]+10" office:value-type="float" office:value="2760" calcext:value-type="float">
            <text:p>2760</text:p>
          </table:table-cell>
          <table:table-cell office:value-type="float" office:value="8640000" calcext:value-type="float">
            <text:p>8640000</text:p>
          </table:table-cell>
          <table:table-cell table:formula="of:=[.B277]/[.C277]" office:value-type="float" office:value="0.000319444444444444" calcext:value-type="float">
            <text:p>0,00031944444444444400</text:p>
          </table:table-cell>
          <table:table-cell table:formula="of:=[.D278]-[.D277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B277]+10" office:value-type="float" office:value="2770" calcext:value-type="float">
            <text:p>2770</text:p>
          </table:table-cell>
          <table:table-cell office:value-type="float" office:value="8640000" calcext:value-type="float">
            <text:p>8640000</text:p>
          </table:table-cell>
          <table:table-cell table:formula="of:=[.B278]/[.C278]" office:value-type="float" office:value="0.000320601851851852" calcext:value-type="float">
            <text:p>0,00032060185185185200</text:p>
          </table:table-cell>
          <table:table-cell table:formula="of:=[.D279]-[.D278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B278]+10" office:value-type="float" office:value="2780" calcext:value-type="float">
            <text:p>2780</text:p>
          </table:table-cell>
          <table:table-cell office:value-type="float" office:value="8640000" calcext:value-type="float">
            <text:p>8640000</text:p>
          </table:table-cell>
          <table:table-cell table:formula="of:=[.B279]/[.C279]" office:value-type="float" office:value="0.000321759259259259" calcext:value-type="float">
            <text:p>0,00032175925925925900</text:p>
          </table:table-cell>
          <table:table-cell table:formula="of:=[.D280]-[.D279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B279]+10" office:value-type="float" office:value="2790" calcext:value-type="float">
            <text:p>2790</text:p>
          </table:table-cell>
          <table:table-cell office:value-type="float" office:value="8640000" calcext:value-type="float">
            <text:p>8640000</text:p>
          </table:table-cell>
          <table:table-cell table:formula="of:=[.B280]/[.C280]" office:value-type="float" office:value="0.000322916666666667" calcext:value-type="float">
            <text:p>0,00032291666666666700</text:p>
          </table:table-cell>
          <table:table-cell table:formula="of:=[.D281]-[.D280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B280]+10" office:value-type="float" office:value="2800" calcext:value-type="float">
            <text:p>2800</text:p>
          </table:table-cell>
          <table:table-cell office:value-type="float" office:value="8640000" calcext:value-type="float">
            <text:p>8640000</text:p>
          </table:table-cell>
          <table:table-cell table:formula="of:=[.B281]/[.C281]" office:value-type="float" office:value="0.000324074074074074" calcext:value-type="float">
            <text:p>0,00032407407407407400</text:p>
          </table:table-cell>
          <table:table-cell table:formula="of:=[.D282]-[.D281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B281]+10" office:value-type="float" office:value="2810" calcext:value-type="float">
            <text:p>2810</text:p>
          </table:table-cell>
          <table:table-cell office:value-type="float" office:value="8640000" calcext:value-type="float">
            <text:p>8640000</text:p>
          </table:table-cell>
          <table:table-cell table:formula="of:=[.B282]/[.C282]" office:value-type="float" office:value="0.000325231481481481" calcext:value-type="float">
            <text:p>0,00032523148148148100</text:p>
          </table:table-cell>
          <table:table-cell table:formula="of:=[.D283]-[.D282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B282]+10" office:value-type="float" office:value="2820" calcext:value-type="float">
            <text:p>2820</text:p>
          </table:table-cell>
          <table:table-cell office:value-type="float" office:value="8640000" calcext:value-type="float">
            <text:p>8640000</text:p>
          </table:table-cell>
          <table:table-cell table:formula="of:=[.B283]/[.C283]" office:value-type="float" office:value="0.000326388888888889" calcext:value-type="float">
            <text:p>0,00032638888888888900</text:p>
          </table:table-cell>
          <table:table-cell table:formula="of:=[.D284]-[.D283]" office:value-type="float" office:value="0.00000115740740740745" calcext:value-type="float">
            <text:p>0,00000115740740740745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B283]+10" office:value-type="float" office:value="2830" calcext:value-type="float">
            <text:p>2830</text:p>
          </table:table-cell>
          <table:table-cell office:value-type="float" office:value="8640000" calcext:value-type="float">
            <text:p>8640000</text:p>
          </table:table-cell>
          <table:table-cell table:formula="of:=[.B284]/[.C284]" office:value-type="float" office:value="0.000327546296296296" calcext:value-type="float">
            <text:p>0,00032754629629629600</text:p>
          </table:table-cell>
          <table:table-cell table:formula="of:=[.D285]-[.D284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.B284]+10" office:value-type="float" office:value="2840" calcext:value-type="float">
            <text:p>2840</text:p>
          </table:table-cell>
          <table:table-cell office:value-type="float" office:value="8640000" calcext:value-type="float">
            <text:p>8640000</text:p>
          </table:table-cell>
          <table:table-cell table:formula="of:=[.B285]/[.C285]" office:value-type="float" office:value="0.000328703703703704" calcext:value-type="float">
            <text:p>0,00032870370370370400</text:p>
          </table:table-cell>
          <table:table-cell table:formula="of:=[.D286]-[.D285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B285]+10" office:value-type="float" office:value="2850" calcext:value-type="float">
            <text:p>2850</text:p>
          </table:table-cell>
          <table:table-cell office:value-type="float" office:value="8640000" calcext:value-type="float">
            <text:p>8640000</text:p>
          </table:table-cell>
          <table:table-cell table:formula="of:=[.B286]/[.C286]" office:value-type="float" office:value="0.000329861111111111" calcext:value-type="float">
            <text:p>0,00032986111111111100</text:p>
          </table:table-cell>
          <table:table-cell table:formula="of:=[.D287]-[.D286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B286]+10" office:value-type="float" office:value="2860" calcext:value-type="float">
            <text:p>2860</text:p>
          </table:table-cell>
          <table:table-cell office:value-type="float" office:value="8640000" calcext:value-type="float">
            <text:p>8640000</text:p>
          </table:table-cell>
          <table:table-cell table:formula="of:=[.B287]/[.C287]" office:value-type="float" office:value="0.000331018518518519" calcext:value-type="float">
            <text:p>0,00033101851851851900</text:p>
          </table:table-cell>
          <table:table-cell table:formula="of:=[.D288]-[.D287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B287]+10" office:value-type="float" office:value="2870" calcext:value-type="float">
            <text:p>2870</text:p>
          </table:table-cell>
          <table:table-cell office:value-type="float" office:value="8640000" calcext:value-type="float">
            <text:p>8640000</text:p>
          </table:table-cell>
          <table:table-cell table:formula="of:=[.B288]/[.C288]" office:value-type="float" office:value="0.000332175925925926" calcext:value-type="float">
            <text:p>0,00033217592592592600</text:p>
          </table:table-cell>
          <table:table-cell table:formula="of:=[.D289]-[.D288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B288]+10" office:value-type="float" office:value="2880" calcext:value-type="float">
            <text:p>2880</text:p>
          </table:table-cell>
          <table:table-cell office:value-type="float" office:value="8640000" calcext:value-type="float">
            <text:p>8640000</text:p>
          </table:table-cell>
          <table:table-cell table:formula="of:=[.B289]/[.C289]" office:value-type="float" office:value="0.000333333333333333" calcext:value-type="float">
            <text:p>0,00033333333333333300</text:p>
          </table:table-cell>
          <table:table-cell table:formula="of:=[.D290]-[.D289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B289]+10" office:value-type="float" office:value="2890" calcext:value-type="float">
            <text:p>2890</text:p>
          </table:table-cell>
          <table:table-cell office:value-type="float" office:value="8640000" calcext:value-type="float">
            <text:p>8640000</text:p>
          </table:table-cell>
          <table:table-cell table:formula="of:=[.B290]/[.C290]" office:value-type="float" office:value="0.000334490740740741" calcext:value-type="float">
            <text:p>0,00033449074074074100</text:p>
          </table:table-cell>
          <table:table-cell table:formula="of:=[.D291]-[.D290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B290]+10" office:value-type="float" office:value="2900" calcext:value-type="float">
            <text:p>2900</text:p>
          </table:table-cell>
          <table:table-cell office:value-type="float" office:value="8640000" calcext:value-type="float">
            <text:p>8640000</text:p>
          </table:table-cell>
          <table:table-cell table:formula="of:=[.B291]/[.C291]" office:value-type="float" office:value="0.000335648148148148" calcext:value-type="float">
            <text:p>0,00033564814814814800</text:p>
          </table:table-cell>
          <table:table-cell table:formula="of:=[.D292]-[.D291]" office:value-type="float" office:value="0.00000115740740740745" calcext:value-type="float">
            <text:p>0,00000115740740740745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B291]+10" office:value-type="float" office:value="2910" calcext:value-type="float">
            <text:p>2910</text:p>
          </table:table-cell>
          <table:table-cell office:value-type="float" office:value="8640000" calcext:value-type="float">
            <text:p>8640000</text:p>
          </table:table-cell>
          <table:table-cell table:formula="of:=[.B292]/[.C292]" office:value-type="float" office:value="0.000336805555555556" calcext:value-type="float">
            <text:p>0,00033680555555555600</text:p>
          </table:table-cell>
          <table:table-cell table:formula="of:=[.D293]-[.D292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B292]+10" office:value-type="float" office:value="2920" calcext:value-type="float">
            <text:p>2920</text:p>
          </table:table-cell>
          <table:table-cell office:value-type="float" office:value="8640000" calcext:value-type="float">
            <text:p>8640000</text:p>
          </table:table-cell>
          <table:table-cell table:formula="of:=[.B293]/[.C293]" office:value-type="float" office:value="0.000337962962962963" calcext:value-type="float">
            <text:p>0,00033796296296296300</text:p>
          </table:table-cell>
          <table:table-cell table:formula="of:=[.D294]-[.D293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B293]+10" office:value-type="float" office:value="2930" calcext:value-type="float">
            <text:p>2930</text:p>
          </table:table-cell>
          <table:table-cell office:value-type="float" office:value="8640000" calcext:value-type="float">
            <text:p>8640000</text:p>
          </table:table-cell>
          <table:table-cell table:formula="of:=[.B294]/[.C294]" office:value-type="float" office:value="0.00033912037037037" calcext:value-type="float">
            <text:p>0,00033912037037037000</text:p>
          </table:table-cell>
          <table:table-cell table:formula="of:=[.D295]-[.D294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B294]+10" office:value-type="float" office:value="2940" calcext:value-type="float">
            <text:p>2940</text:p>
          </table:table-cell>
          <table:table-cell office:value-type="float" office:value="8640000" calcext:value-type="float">
            <text:p>8640000</text:p>
          </table:table-cell>
          <table:table-cell table:formula="of:=[.B295]/[.C295]" office:value-type="float" office:value="0.000340277777777778" calcext:value-type="float">
            <text:p>0,00034027777777777800</text:p>
          </table:table-cell>
          <table:table-cell table:formula="of:=[.D296]-[.D295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B295]+10" office:value-type="float" office:value="2950" calcext:value-type="float">
            <text:p>2950</text:p>
          </table:table-cell>
          <table:table-cell office:value-type="float" office:value="8640000" calcext:value-type="float">
            <text:p>8640000</text:p>
          </table:table-cell>
          <table:table-cell table:formula="of:=[.B296]/[.C296]" office:value-type="float" office:value="0.000341435185185185" calcext:value-type="float">
            <text:p>0,00034143518518518500</text:p>
          </table:table-cell>
          <table:table-cell table:formula="of:=[.D297]-[.D296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B296]+10" office:value-type="float" office:value="2960" calcext:value-type="float">
            <text:p>2960</text:p>
          </table:table-cell>
          <table:table-cell office:value-type="float" office:value="8640000" calcext:value-type="float">
            <text:p>8640000</text:p>
          </table:table-cell>
          <table:table-cell table:formula="of:=[.B297]/[.C297]" office:value-type="float" office:value="0.000342592592592593" calcext:value-type="float">
            <text:p>0,00034259259259259300</text:p>
          </table:table-cell>
          <table:table-cell table:formula="of:=[.D298]-[.D297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B297]+10" office:value-type="float" office:value="2970" calcext:value-type="float">
            <text:p>2970</text:p>
          </table:table-cell>
          <table:table-cell office:value-type="float" office:value="8640000" calcext:value-type="float">
            <text:p>8640000</text:p>
          </table:table-cell>
          <table:table-cell table:formula="of:=[.B298]/[.C298]" office:value-type="float" office:value="0.00034375" calcext:value-type="float">
            <text:p>0,00034375000000000000</text:p>
          </table:table-cell>
          <table:table-cell table:formula="of:=[.D299]-[.D298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B298]+10" office:value-type="float" office:value="2980" calcext:value-type="float">
            <text:p>2980</text:p>
          </table:table-cell>
          <table:table-cell office:value-type="float" office:value="8640000" calcext:value-type="float">
            <text:p>8640000</text:p>
          </table:table-cell>
          <table:table-cell table:formula="of:=[.B299]/[.C299]" office:value-type="float" office:value="0.000344907407407407" calcext:value-type="float">
            <text:p>0,00034490740740740700</text:p>
          </table:table-cell>
          <table:table-cell table:formula="of:=[.D300]-[.D299]" office:value-type="float" office:value="0.00000115740740740745" calcext:value-type="float">
            <text:p>0,00000115740740740745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B299]+10" office:value-type="float" office:value="2990" calcext:value-type="float">
            <text:p>2990</text:p>
          </table:table-cell>
          <table:table-cell office:value-type="float" office:value="8640000" calcext:value-type="float">
            <text:p>8640000</text:p>
          </table:table-cell>
          <table:table-cell table:formula="of:=[.B300]/[.C300]" office:value-type="float" office:value="0.000346064814814815" calcext:value-type="float">
            <text:p>0,00034606481481481500</text:p>
          </table:table-cell>
          <table:table-cell table:formula="of:=[.D301]-[.D300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B300]+10" office:value-type="float" office:value="3000" calcext:value-type="float">
            <text:p>3000</text:p>
          </table:table-cell>
          <table:table-cell office:value-type="float" office:value="8640000" calcext:value-type="float">
            <text:p>8640000</text:p>
          </table:table-cell>
          <table:table-cell table:formula="of:=[.B301]/[.C301]" office:value-type="float" office:value="0.000347222222222222" calcext:value-type="float">
            <text:p>0,00034722222222222200</text:p>
          </table:table-cell>
          <table:table-cell table:formula="of:=[.D302]-[.D301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B301]+10" office:value-type="float" office:value="3010" calcext:value-type="float">
            <text:p>3010</text:p>
          </table:table-cell>
          <table:table-cell office:value-type="float" office:value="8640000" calcext:value-type="float">
            <text:p>8640000</text:p>
          </table:table-cell>
          <table:table-cell table:formula="of:=[.B302]/[.C302]" office:value-type="float" office:value="0.00034837962962963" calcext:value-type="float">
            <text:p>0,00034837962962963000</text:p>
          </table:table-cell>
          <table:table-cell table:formula="of:=[.D303]-[.D302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[.B302]+10" office:value-type="float" office:value="3020" calcext:value-type="float">
            <text:p>3020</text:p>
          </table:table-cell>
          <table:table-cell office:value-type="float" office:value="8640000" calcext:value-type="float">
            <text:p>8640000</text:p>
          </table:table-cell>
          <table:table-cell table:formula="of:=[.B303]/[.C303]" office:value-type="float" office:value="0.000349537037037037" calcext:value-type="float">
            <text:p>0,00034953703703703700</text:p>
          </table:table-cell>
          <table:table-cell table:formula="of:=[.D304]-[.D303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B303]+10" office:value-type="float" office:value="3030" calcext:value-type="float">
            <text:p>3030</text:p>
          </table:table-cell>
          <table:table-cell office:value-type="float" office:value="8640000" calcext:value-type="float">
            <text:p>8640000</text:p>
          </table:table-cell>
          <table:table-cell table:formula="of:=[.B304]/[.C304]" office:value-type="float" office:value="0.000350694444444444" calcext:value-type="float">
            <text:p>0,00035069444444444400</text:p>
          </table:table-cell>
          <table:table-cell table:formula="of:=[.D305]-[.D304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[.B304]+10" office:value-type="float" office:value="3040" calcext:value-type="float">
            <text:p>3040</text:p>
          </table:table-cell>
          <table:table-cell office:value-type="float" office:value="8640000" calcext:value-type="float">
            <text:p>8640000</text:p>
          </table:table-cell>
          <table:table-cell table:formula="of:=[.B305]/[.C305]" office:value-type="float" office:value="0.000351851851851852" calcext:value-type="float">
            <text:p>0,00035185185185185200</text:p>
          </table:table-cell>
          <table:table-cell table:formula="of:=[.D306]-[.D305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B305]+10" office:value-type="float" office:value="3050" calcext:value-type="float">
            <text:p>3050</text:p>
          </table:table-cell>
          <table:table-cell office:value-type="float" office:value="8640000" calcext:value-type="float">
            <text:p>8640000</text:p>
          </table:table-cell>
          <table:table-cell table:formula="of:=[.B306]/[.C306]" office:value-type="float" office:value="0.000353009259259259" calcext:value-type="float">
            <text:p>0,00035300925925925900</text:p>
          </table:table-cell>
          <table:table-cell table:formula="of:=[.D307]-[.D306]" office:value-type="float" office:value="0.00000115740740740745" calcext:value-type="float">
            <text:p>0,00000115740740740745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[.B306]+10" office:value-type="float" office:value="3060" calcext:value-type="float">
            <text:p>3060</text:p>
          </table:table-cell>
          <table:table-cell office:value-type="float" office:value="8640000" calcext:value-type="float">
            <text:p>8640000</text:p>
          </table:table-cell>
          <table:table-cell table:formula="of:=[.B307]/[.C307]" office:value-type="float" office:value="0.000354166666666667" calcext:value-type="float">
            <text:p>0,00035416666666666700</text:p>
          </table:table-cell>
          <table:table-cell table:formula="of:=[.D308]-[.D307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B307]+10" office:value-type="float" office:value="3070" calcext:value-type="float">
            <text:p>3070</text:p>
          </table:table-cell>
          <table:table-cell office:value-type="float" office:value="8640000" calcext:value-type="float">
            <text:p>8640000</text:p>
          </table:table-cell>
          <table:table-cell table:formula="of:=[.B308]/[.C308]" office:value-type="float" office:value="0.000355324074074074" calcext:value-type="float">
            <text:p>0,00035532407407407400</text:p>
          </table:table-cell>
          <table:table-cell table:formula="of:=[.D309]-[.D308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[.B308]+10" office:value-type="float" office:value="3080" calcext:value-type="float">
            <text:p>3080</text:p>
          </table:table-cell>
          <table:table-cell office:value-type="float" office:value="8640000" calcext:value-type="float">
            <text:p>8640000</text:p>
          </table:table-cell>
          <table:table-cell table:formula="of:=[.B309]/[.C309]" office:value-type="float" office:value="0.000356481481481482" calcext:value-type="float">
            <text:p>0,00035648148148148200</text:p>
          </table:table-cell>
          <table:table-cell table:formula="of:=[.D310]-[.D309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[.B309]+10" office:value-type="float" office:value="3090" calcext:value-type="float">
            <text:p>3090</text:p>
          </table:table-cell>
          <table:table-cell office:value-type="float" office:value="8640000" calcext:value-type="float">
            <text:p>8640000</text:p>
          </table:table-cell>
          <table:table-cell table:formula="of:=[.B310]/[.C310]" office:value-type="float" office:value="0.000357638888888889" calcext:value-type="float">
            <text:p>0,00035763888888888900</text:p>
          </table:table-cell>
          <table:table-cell table:formula="of:=[.D311]-[.D310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B310]+10" office:value-type="float" office:value="3100" calcext:value-type="float">
            <text:p>3100</text:p>
          </table:table-cell>
          <table:table-cell office:value-type="float" office:value="8640000" calcext:value-type="float">
            <text:p>8640000</text:p>
          </table:table-cell>
          <table:table-cell table:formula="of:=[.B311]/[.C311]" office:value-type="float" office:value="0.000358796296296296" calcext:value-type="float">
            <text:p>0,00035879629629629600</text:p>
          </table:table-cell>
          <table:table-cell table:formula="of:=[.D312]-[.D311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[.B311]+10" office:value-type="float" office:value="3110" calcext:value-type="float">
            <text:p>3110</text:p>
          </table:table-cell>
          <table:table-cell office:value-type="float" office:value="8640000" calcext:value-type="float">
            <text:p>8640000</text:p>
          </table:table-cell>
          <table:table-cell table:formula="of:=[.B312]/[.C312]" office:value-type="float" office:value="0.000359953703703704" calcext:value-type="float">
            <text:p>0,00035995370370370400</text:p>
          </table:table-cell>
          <table:table-cell table:formula="of:=[.D313]-[.D312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[.B312]+10" office:value-type="float" office:value="3120" calcext:value-type="float">
            <text:p>3120</text:p>
          </table:table-cell>
          <table:table-cell office:value-type="float" office:value="8640000" calcext:value-type="float">
            <text:p>8640000</text:p>
          </table:table-cell>
          <table:table-cell table:formula="of:=[.B313]/[.C313]" office:value-type="float" office:value="0.000361111111111111" calcext:value-type="float">
            <text:p>0,00036111111111111100</text:p>
          </table:table-cell>
          <table:table-cell table:formula="of:=[.D314]-[.D313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B313]+10" office:value-type="float" office:value="3130" calcext:value-type="float">
            <text:p>3130</text:p>
          </table:table-cell>
          <table:table-cell office:value-type="float" office:value="8640000" calcext:value-type="float">
            <text:p>8640000</text:p>
          </table:table-cell>
          <table:table-cell table:formula="of:=[.B314]/[.C314]" office:value-type="float" office:value="0.000362268518518519" calcext:value-type="float">
            <text:p>0,00036226851851851900</text:p>
          </table:table-cell>
          <table:table-cell table:formula="of:=[.D315]-[.D314]" office:value-type="float" office:value="0.00000115740740740745" calcext:value-type="float">
            <text:p>0,00000115740740740745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[.B314]+10" office:value-type="float" office:value="3140" calcext:value-type="float">
            <text:p>3140</text:p>
          </table:table-cell>
          <table:table-cell office:value-type="float" office:value="8640000" calcext:value-type="float">
            <text:p>8640000</text:p>
          </table:table-cell>
          <table:table-cell table:formula="of:=[.B315]/[.C315]" office:value-type="float" office:value="0.000363425925925926" calcext:value-type="float">
            <text:p>0,00036342592592592600</text:p>
          </table:table-cell>
          <table:table-cell table:formula="of:=[.D316]-[.D315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[.B315]+10" office:value-type="float" office:value="3150" calcext:value-type="float">
            <text:p>3150</text:p>
          </table:table-cell>
          <table:table-cell office:value-type="float" office:value="8640000" calcext:value-type="float">
            <text:p>8640000</text:p>
          </table:table-cell>
          <table:table-cell table:formula="of:=[.B316]/[.C316]" office:value-type="float" office:value="0.000364583333333333" calcext:value-type="float">
            <text:p>0,00036458333333333300</text:p>
          </table:table-cell>
          <table:table-cell table:formula="of:=[.D317]-[.D316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.B316]+10" office:value-type="float" office:value="3160" calcext:value-type="float">
            <text:p>3160</text:p>
          </table:table-cell>
          <table:table-cell office:value-type="float" office:value="8640000" calcext:value-type="float">
            <text:p>8640000</text:p>
          </table:table-cell>
          <table:table-cell table:formula="of:=[.B317]/[.C317]" office:value-type="float" office:value="0.000365740740740741" calcext:value-type="float">
            <text:p>0,00036574074074074100</text:p>
          </table:table-cell>
          <table:table-cell table:formula="of:=[.D318]-[.D317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[.B317]+10" office:value-type="float" office:value="3170" calcext:value-type="float">
            <text:p>3170</text:p>
          </table:table-cell>
          <table:table-cell office:value-type="float" office:value="8640000" calcext:value-type="float">
            <text:p>8640000</text:p>
          </table:table-cell>
          <table:table-cell table:formula="of:=[.B318]/[.C318]" office:value-type="float" office:value="0.000366898148148148" calcext:value-type="float">
            <text:p>0,00036689814814814800</text:p>
          </table:table-cell>
          <table:table-cell table:formula="of:=[.D319]-[.D318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[.B318]+10" office:value-type="float" office:value="3180" calcext:value-type="float">
            <text:p>3180</text:p>
          </table:table-cell>
          <table:table-cell office:value-type="float" office:value="8640000" calcext:value-type="float">
            <text:p>8640000</text:p>
          </table:table-cell>
          <table:table-cell table:formula="of:=[.B319]/[.C319]" office:value-type="float" office:value="0.000368055555555556" calcext:value-type="float">
            <text:p>0,00036805555555555600</text:p>
          </table:table-cell>
          <table:table-cell table:formula="of:=[.D320]-[.D319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[.B319]+10" office:value-type="float" office:value="3190" calcext:value-type="float">
            <text:p>3190</text:p>
          </table:table-cell>
          <table:table-cell office:value-type="float" office:value="8640000" calcext:value-type="float">
            <text:p>8640000</text:p>
          </table:table-cell>
          <table:table-cell table:formula="of:=[.B320]/[.C320]" office:value-type="float" office:value="0.000369212962962963" calcext:value-type="float">
            <text:p>0,00036921296296296300</text:p>
          </table:table-cell>
          <table:table-cell table:formula="of:=[.D321]-[.D320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B320]+10" office:value-type="float" office:value="3200" calcext:value-type="float">
            <text:p>3200</text:p>
          </table:table-cell>
          <table:table-cell office:value-type="float" office:value="8640000" calcext:value-type="float">
            <text:p>8640000</text:p>
          </table:table-cell>
          <table:table-cell table:formula="of:=[.B321]/[.C321]" office:value-type="float" office:value="0.00037037037037037" calcext:value-type="float">
            <text:p>0,00037037037037037000</text:p>
          </table:table-cell>
          <table:table-cell table:formula="of:=[.D322]-[.D321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[.B321]+10" office:value-type="float" office:value="3210" calcext:value-type="float">
            <text:p>3210</text:p>
          </table:table-cell>
          <table:table-cell office:value-type="float" office:value="8640000" calcext:value-type="float">
            <text:p>8640000</text:p>
          </table:table-cell>
          <table:table-cell table:formula="of:=[.B322]/[.C322]" office:value-type="float" office:value="0.000371527777777778" calcext:value-type="float">
            <text:p>0,00037152777777777800</text:p>
          </table:table-cell>
          <table:table-cell table:formula="of:=[.D323]-[.D322]" office:value-type="float" office:value="0.00000115740740740745" calcext:value-type="float">
            <text:p>0,00000115740740740745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[.B322]+10" office:value-type="float" office:value="3220" calcext:value-type="float">
            <text:p>3220</text:p>
          </table:table-cell>
          <table:table-cell office:value-type="float" office:value="8640000" calcext:value-type="float">
            <text:p>8640000</text:p>
          </table:table-cell>
          <table:table-cell table:formula="of:=[.B323]/[.C323]" office:value-type="float" office:value="0.000372685185185185" calcext:value-type="float">
            <text:p>0,00037268518518518500</text:p>
          </table:table-cell>
          <table:table-cell table:formula="of:=[.D324]-[.D323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[.B323]+10" office:value-type="float" office:value="3230" calcext:value-type="float">
            <text:p>3230</text:p>
          </table:table-cell>
          <table:table-cell office:value-type="float" office:value="8640000" calcext:value-type="float">
            <text:p>8640000</text:p>
          </table:table-cell>
          <table:table-cell table:formula="of:=[.B324]/[.C324]" office:value-type="float" office:value="0.000373842592592593" calcext:value-type="float">
            <text:p>0,00037384259259259300</text:p>
          </table:table-cell>
          <table:table-cell table:formula="of:=[.D325]-[.D324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[.B324]+10" office:value-type="float" office:value="3240" calcext:value-type="float">
            <text:p>3240</text:p>
          </table:table-cell>
          <table:table-cell office:value-type="float" office:value="8640000" calcext:value-type="float">
            <text:p>8640000</text:p>
          </table:table-cell>
          <table:table-cell table:formula="of:=[.B325]/[.C325]" office:value-type="float" office:value="0.000375" calcext:value-type="float">
            <text:p>0,00037500000000000000</text:p>
          </table:table-cell>
          <table:table-cell table:formula="of:=[.D326]-[.D325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.B325]+10" office:value-type="float" office:value="3250" calcext:value-type="float">
            <text:p>3250</text:p>
          </table:table-cell>
          <table:table-cell office:value-type="float" office:value="8640000" calcext:value-type="float">
            <text:p>8640000</text:p>
          </table:table-cell>
          <table:table-cell table:formula="of:=[.B326]/[.C326]" office:value-type="float" office:value="0.000376157407407407" calcext:value-type="float">
            <text:p>0,00037615740740740700</text:p>
          </table:table-cell>
          <table:table-cell table:formula="of:=[.D327]-[.D326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[.B326]+10" office:value-type="float" office:value="3260" calcext:value-type="float">
            <text:p>3260</text:p>
          </table:table-cell>
          <table:table-cell office:value-type="float" office:value="8640000" calcext:value-type="float">
            <text:p>8640000</text:p>
          </table:table-cell>
          <table:table-cell table:formula="of:=[.B327]/[.C327]" office:value-type="float" office:value="0.000377314814814815" calcext:value-type="float">
            <text:p>0,00037731481481481500</text:p>
          </table:table-cell>
          <table:table-cell table:formula="of:=[.D328]-[.D327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[.B327]+10" office:value-type="float" office:value="3270" calcext:value-type="float">
            <text:p>3270</text:p>
          </table:table-cell>
          <table:table-cell office:value-type="float" office:value="8640000" calcext:value-type="float">
            <text:p>8640000</text:p>
          </table:table-cell>
          <table:table-cell table:formula="of:=[.B328]/[.C328]" office:value-type="float" office:value="0.000378472222222222" calcext:value-type="float">
            <text:p>0,00037847222222222200</text:p>
          </table:table-cell>
          <table:table-cell table:formula="of:=[.D329]-[.D328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[.B328]+10" office:value-type="float" office:value="3280" calcext:value-type="float">
            <text:p>3280</text:p>
          </table:table-cell>
          <table:table-cell office:value-type="float" office:value="8640000" calcext:value-type="float">
            <text:p>8640000</text:p>
          </table:table-cell>
          <table:table-cell table:formula="of:=[.B329]/[.C329]" office:value-type="float" office:value="0.00037962962962963" calcext:value-type="float">
            <text:p>0,00037962962962963000</text:p>
          </table:table-cell>
          <table:table-cell table:formula="of:=[.D330]-[.D329]" office:value-type="float" office:value="0.00000115740740740745" calcext:value-type="float">
            <text:p>0,00000115740740740745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[.B329]+10" office:value-type="float" office:value="3290" calcext:value-type="float">
            <text:p>3290</text:p>
          </table:table-cell>
          <table:table-cell office:value-type="float" office:value="8640000" calcext:value-type="float">
            <text:p>8640000</text:p>
          </table:table-cell>
          <table:table-cell table:formula="of:=[.B330]/[.C330]" office:value-type="float" office:value="0.000380787037037037" calcext:value-type="float">
            <text:p>0,00038078703703703700</text:p>
          </table:table-cell>
          <table:table-cell table:formula="of:=[.D331]-[.D330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B330]+10" office:value-type="float" office:value="3300" calcext:value-type="float">
            <text:p>3300</text:p>
          </table:table-cell>
          <table:table-cell office:value-type="float" office:value="8640000" calcext:value-type="float">
            <text:p>8640000</text:p>
          </table:table-cell>
          <table:table-cell table:formula="of:=[.B331]/[.C331]" office:value-type="float" office:value="0.000381944444444444" calcext:value-type="float">
            <text:p>0,00038194444444444400</text:p>
          </table:table-cell>
          <table:table-cell table:formula="of:=[.D332]-[.D331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[.B331]+10" office:value-type="float" office:value="3310" calcext:value-type="float">
            <text:p>3310</text:p>
          </table:table-cell>
          <table:table-cell office:value-type="float" office:value="8640000" calcext:value-type="float">
            <text:p>8640000</text:p>
          </table:table-cell>
          <table:table-cell table:formula="of:=[.B332]/[.C332]" office:value-type="float" office:value="0.000383101851851852" calcext:value-type="float">
            <text:p>0,00038310185185185200</text:p>
          </table:table-cell>
          <table:table-cell table:formula="of:=[.D333]-[.D332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[.B332]+10" office:value-type="float" office:value="3320" calcext:value-type="float">
            <text:p>3320</text:p>
          </table:table-cell>
          <table:table-cell office:value-type="float" office:value="8640000" calcext:value-type="float">
            <text:p>8640000</text:p>
          </table:table-cell>
          <table:table-cell table:formula="of:=[.B333]/[.C333]" office:value-type="float" office:value="0.000384259259259259" calcext:value-type="float">
            <text:p>0,00038425925925925900</text:p>
          </table:table-cell>
          <table:table-cell table:formula="of:=[.D334]-[.D333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[.B333]+10" office:value-type="float" office:value="3330" calcext:value-type="float">
            <text:p>3330</text:p>
          </table:table-cell>
          <table:table-cell office:value-type="float" office:value="8640000" calcext:value-type="float">
            <text:p>8640000</text:p>
          </table:table-cell>
          <table:table-cell table:formula="of:=[.B334]/[.C334]" office:value-type="float" office:value="0.000385416666666667" calcext:value-type="float">
            <text:p>0,00038541666666666700</text:p>
          </table:table-cell>
          <table:table-cell table:formula="of:=[.D335]-[.D334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[.B334]+10" office:value-type="float" office:value="3340" calcext:value-type="float">
            <text:p>3340</text:p>
          </table:table-cell>
          <table:table-cell office:value-type="float" office:value="8640000" calcext:value-type="float">
            <text:p>8640000</text:p>
          </table:table-cell>
          <table:table-cell table:formula="of:=[.B335]/[.C335]" office:value-type="float" office:value="0.000386574074074074" calcext:value-type="float">
            <text:p>0,00038657407407407400</text:p>
          </table:table-cell>
          <table:table-cell table:formula="of:=[.D336]-[.D335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[.B335]+10" office:value-type="float" office:value="3350" calcext:value-type="float">
            <text:p>3350</text:p>
          </table:table-cell>
          <table:table-cell office:value-type="float" office:value="8640000" calcext:value-type="float">
            <text:p>8640000</text:p>
          </table:table-cell>
          <table:table-cell table:formula="of:=[.B336]/[.C336]" office:value-type="float" office:value="0.000387731481481481" calcext:value-type="float">
            <text:p>0,00038773148148148100</text:p>
          </table:table-cell>
          <table:table-cell table:formula="of:=[.D337]-[.D336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[.B336]+10" office:value-type="float" office:value="3360" calcext:value-type="float">
            <text:p>3360</text:p>
          </table:table-cell>
          <table:table-cell office:value-type="float" office:value="8640000" calcext:value-type="float">
            <text:p>8640000</text:p>
          </table:table-cell>
          <table:table-cell table:formula="of:=[.B337]/[.C337]" office:value-type="float" office:value="0.000388888888888889" calcext:value-type="float">
            <text:p>0,00038888888888888900</text:p>
          </table:table-cell>
          <table:table-cell table:formula="of:=[.D338]-[.D337]" office:value-type="float" office:value="0.00000115740740740745" calcext:value-type="float">
            <text:p>0,00000115740740740745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[.B337]+10" office:value-type="float" office:value="3370" calcext:value-type="float">
            <text:p>3370</text:p>
          </table:table-cell>
          <table:table-cell office:value-type="float" office:value="8640000" calcext:value-type="float">
            <text:p>8640000</text:p>
          </table:table-cell>
          <table:table-cell table:formula="of:=[.B338]/[.C338]" office:value-type="float" office:value="0.000390046296296296" calcext:value-type="float">
            <text:p>0,00039004629629629600</text:p>
          </table:table-cell>
          <table:table-cell table:formula="of:=[.D339]-[.D338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[.B338]+10" office:value-type="float" office:value="3380" calcext:value-type="float">
            <text:p>3380</text:p>
          </table:table-cell>
          <table:table-cell office:value-type="float" office:value="8640000" calcext:value-type="float">
            <text:p>8640000</text:p>
          </table:table-cell>
          <table:table-cell table:formula="of:=[.B339]/[.C339]" office:value-type="float" office:value="0.000391203703703704" calcext:value-type="float">
            <text:p>0,00039120370370370400</text:p>
          </table:table-cell>
          <table:table-cell table:formula="of:=[.D340]-[.D339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[.B339]+10" office:value-type="float" office:value="3390" calcext:value-type="float">
            <text:p>3390</text:p>
          </table:table-cell>
          <table:table-cell office:value-type="float" office:value="8640000" calcext:value-type="float">
            <text:p>8640000</text:p>
          </table:table-cell>
          <table:table-cell table:formula="of:=[.B340]/[.C340]" office:value-type="float" office:value="0.000392361111111111" calcext:value-type="float">
            <text:p>0,00039236111111111100</text:p>
          </table:table-cell>
          <table:table-cell table:formula="of:=[.D341]-[.D340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B340]+10" office:value-type="float" office:value="3400" calcext:value-type="float">
            <text:p>3400</text:p>
          </table:table-cell>
          <table:table-cell office:value-type="float" office:value="8640000" calcext:value-type="float">
            <text:p>8640000</text:p>
          </table:table-cell>
          <table:table-cell table:formula="of:=[.B341]/[.C341]" office:value-type="float" office:value="0.000393518518518519" calcext:value-type="float">
            <text:p>0,00039351851851851900</text:p>
          </table:table-cell>
          <table:table-cell table:formula="of:=[.D342]-[.D341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[.B341]+10" office:value-type="float" office:value="3410" calcext:value-type="float">
            <text:p>3410</text:p>
          </table:table-cell>
          <table:table-cell office:value-type="float" office:value="8640000" calcext:value-type="float">
            <text:p>8640000</text:p>
          </table:table-cell>
          <table:table-cell table:formula="of:=[.B342]/[.C342]" office:value-type="float" office:value="0.000394675925925926" calcext:value-type="float">
            <text:p>0,00039467592592592600</text:p>
          </table:table-cell>
          <table:table-cell table:formula="of:=[.D343]-[.D342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[.B342]+10" office:value-type="float" office:value="3420" calcext:value-type="float">
            <text:p>3420</text:p>
          </table:table-cell>
          <table:table-cell office:value-type="float" office:value="8640000" calcext:value-type="float">
            <text:p>8640000</text:p>
          </table:table-cell>
          <table:table-cell table:formula="of:=[.B343]/[.C343]" office:value-type="float" office:value="0.000395833333333333" calcext:value-type="float">
            <text:p>0,00039583333333333300</text:p>
          </table:table-cell>
          <table:table-cell table:formula="of:=[.D344]-[.D343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[.B343]+10" office:value-type="float" office:value="3430" calcext:value-type="float">
            <text:p>3430</text:p>
          </table:table-cell>
          <table:table-cell office:value-type="float" office:value="8640000" calcext:value-type="float">
            <text:p>8640000</text:p>
          </table:table-cell>
          <table:table-cell table:formula="of:=[.B344]/[.C344]" office:value-type="float" office:value="0.000396990740740741" calcext:value-type="float">
            <text:p>0,00039699074074074100</text:p>
          </table:table-cell>
          <table:table-cell table:formula="of:=[.D345]-[.D344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[.B344]+10" office:value-type="float" office:value="3440" calcext:value-type="float">
            <text:p>3440</text:p>
          </table:table-cell>
          <table:table-cell office:value-type="float" office:value="8640000" calcext:value-type="float">
            <text:p>8640000</text:p>
          </table:table-cell>
          <table:table-cell table:formula="of:=[.B345]/[.C345]" office:value-type="float" office:value="0.000398148148148148" calcext:value-type="float">
            <text:p>0,00039814814814814800</text:p>
          </table:table-cell>
          <table:table-cell table:formula="of:=[.D346]-[.D345]" office:value-type="float" office:value="0.00000115740740740745" calcext:value-type="float">
            <text:p>0,00000115740740740745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[.B345]+10" office:value-type="float" office:value="3450" calcext:value-type="float">
            <text:p>3450</text:p>
          </table:table-cell>
          <table:table-cell office:value-type="float" office:value="8640000" calcext:value-type="float">
            <text:p>8640000</text:p>
          </table:table-cell>
          <table:table-cell table:formula="of:=[.B346]/[.C346]" office:value-type="float" office:value="0.000399305555555556" calcext:value-type="float">
            <text:p>0,00039930555555555600</text:p>
          </table:table-cell>
          <table:table-cell table:formula="of:=[.D347]-[.D346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[.B346]+10" office:value-type="float" office:value="3460" calcext:value-type="float">
            <text:p>3460</text:p>
          </table:table-cell>
          <table:table-cell office:value-type="float" office:value="8640000" calcext:value-type="float">
            <text:p>8640000</text:p>
          </table:table-cell>
          <table:table-cell table:formula="of:=[.B347]/[.C347]" office:value-type="float" office:value="0.000400462962962963" calcext:value-type="float">
            <text:p>0,00040046296296296300</text:p>
          </table:table-cell>
          <table:table-cell table:formula="of:=[.D348]-[.D347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[.B347]+10" office:value-type="float" office:value="3470" calcext:value-type="float">
            <text:p>3470</text:p>
          </table:table-cell>
          <table:table-cell office:value-type="float" office:value="8640000" calcext:value-type="float">
            <text:p>8640000</text:p>
          </table:table-cell>
          <table:table-cell table:formula="of:=[.B348]/[.C348]" office:value-type="float" office:value="0.00040162037037037" calcext:value-type="float">
            <text:p>0,00040162037037037000</text:p>
          </table:table-cell>
          <table:table-cell table:formula="of:=[.D349]-[.D348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[.B348]+10" office:value-type="float" office:value="3480" calcext:value-type="float">
            <text:p>3480</text:p>
          </table:table-cell>
          <table:table-cell office:value-type="float" office:value="8640000" calcext:value-type="float">
            <text:p>8640000</text:p>
          </table:table-cell>
          <table:table-cell table:formula="of:=[.B349]/[.C349]" office:value-type="float" office:value="0.000402777777777778" calcext:value-type="float">
            <text:p>0,00040277777777777800</text:p>
          </table:table-cell>
          <table:table-cell table:formula="of:=[.D350]-[.D349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B349]+10" office:value-type="float" office:value="3490" calcext:value-type="float">
            <text:p>3490</text:p>
          </table:table-cell>
          <table:table-cell office:value-type="float" office:value="8640000" calcext:value-type="float">
            <text:p>8640000</text:p>
          </table:table-cell>
          <table:table-cell table:formula="of:=[.B350]/[.C350]" office:value-type="float" office:value="0.000403935185185185" calcext:value-type="float">
            <text:p>0,00040393518518518500</text:p>
          </table:table-cell>
          <table:table-cell table:formula="of:=[.D351]-[.D350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B350]+10" office:value-type="float" office:value="3500" calcext:value-type="float">
            <text:p>3500</text:p>
          </table:table-cell>
          <table:table-cell office:value-type="float" office:value="8640000" calcext:value-type="float">
            <text:p>8640000</text:p>
          </table:table-cell>
          <table:table-cell table:formula="of:=[.B351]/[.C351]" office:value-type="float" office:value="0.000405092592592593" calcext:value-type="float">
            <text:p>0,00040509259259259300</text:p>
          </table:table-cell>
          <table:table-cell table:formula="of:=[.D352]-[.D351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[.B351]+10" office:value-type="float" office:value="3510" calcext:value-type="float">
            <text:p>3510</text:p>
          </table:table-cell>
          <table:table-cell office:value-type="float" office:value="8640000" calcext:value-type="float">
            <text:p>8640000</text:p>
          </table:table-cell>
          <table:table-cell table:formula="of:=[.B352]/[.C352]" office:value-type="float" office:value="0.00040625" calcext:value-type="float">
            <text:p>0,00040625000000000000</text:p>
          </table:table-cell>
          <table:table-cell table:formula="of:=[.D353]-[.D352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[.B352]+10" office:value-type="float" office:value="3520" calcext:value-type="float">
            <text:p>3520</text:p>
          </table:table-cell>
          <table:table-cell office:value-type="float" office:value="8640000" calcext:value-type="float">
            <text:p>8640000</text:p>
          </table:table-cell>
          <table:table-cell table:formula="of:=[.B353]/[.C353]" office:value-type="float" office:value="0.000407407407407407" calcext:value-type="float">
            <text:p>0,00040740740740740700</text:p>
          </table:table-cell>
          <table:table-cell table:formula="of:=[.D354]-[.D353]" office:value-type="float" office:value="0.00000115740740740745" calcext:value-type="float">
            <text:p>0,00000115740740740745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[.B353]+10" office:value-type="float" office:value="3530" calcext:value-type="float">
            <text:p>3530</text:p>
          </table:table-cell>
          <table:table-cell office:value-type="float" office:value="8640000" calcext:value-type="float">
            <text:p>8640000</text:p>
          </table:table-cell>
          <table:table-cell table:formula="of:=[.B354]/[.C354]" office:value-type="float" office:value="0.000408564814814815" calcext:value-type="float">
            <text:p>0,00040856481481481500</text:p>
          </table:table-cell>
          <table:table-cell table:formula="of:=[.D355]-[.D354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[.B354]+10" office:value-type="float" office:value="3540" calcext:value-type="float">
            <text:p>3540</text:p>
          </table:table-cell>
          <table:table-cell office:value-type="float" office:value="8640000" calcext:value-type="float">
            <text:p>8640000</text:p>
          </table:table-cell>
          <table:table-cell table:formula="of:=[.B355]/[.C355]" office:value-type="float" office:value="0.000409722222222222" calcext:value-type="float">
            <text:p>0,00040972222222222200</text:p>
          </table:table-cell>
          <table:table-cell table:formula="of:=[.D356]-[.D355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[.B355]+10" office:value-type="float" office:value="3550" calcext:value-type="float">
            <text:p>3550</text:p>
          </table:table-cell>
          <table:table-cell office:value-type="float" office:value="8640000" calcext:value-type="float">
            <text:p>8640000</text:p>
          </table:table-cell>
          <table:table-cell table:formula="of:=[.B356]/[.C356]" office:value-type="float" office:value="0.00041087962962963" calcext:value-type="float">
            <text:p>0,00041087962962963000</text:p>
          </table:table-cell>
          <table:table-cell table:formula="of:=[.D357]-[.D356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[.B356]+10" office:value-type="float" office:value="3560" calcext:value-type="float">
            <text:p>3560</text:p>
          </table:table-cell>
          <table:table-cell office:value-type="float" office:value="8640000" calcext:value-type="float">
            <text:p>8640000</text:p>
          </table:table-cell>
          <table:table-cell table:formula="of:=[.B357]/[.C357]" office:value-type="float" office:value="0.000412037037037037" calcext:value-type="float">
            <text:p>0,00041203703703703700</text:p>
          </table:table-cell>
          <table:table-cell table:formula="of:=[.D358]-[.D357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[.B357]+10" office:value-type="float" office:value="3570" calcext:value-type="float">
            <text:p>3570</text:p>
          </table:table-cell>
          <table:table-cell office:value-type="float" office:value="8640000" calcext:value-type="float">
            <text:p>8640000</text:p>
          </table:table-cell>
          <table:table-cell table:formula="of:=[.B358]/[.C358]" office:value-type="float" office:value="0.000413194444444444" calcext:value-type="float">
            <text:p>0,00041319444444444400</text:p>
          </table:table-cell>
          <table:table-cell table:formula="of:=[.D359]-[.D358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[.B358]+10" office:value-type="float" office:value="3580" calcext:value-type="float">
            <text:p>3580</text:p>
          </table:table-cell>
          <table:table-cell office:value-type="float" office:value="8640000" calcext:value-type="float">
            <text:p>8640000</text:p>
          </table:table-cell>
          <table:table-cell table:formula="of:=[.B359]/[.C359]" office:value-type="float" office:value="0.000414351851851852" calcext:value-type="float">
            <text:p>0,00041435185185185200</text:p>
          </table:table-cell>
          <table:table-cell table:formula="of:=[.D360]-[.D359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[.B359]+10" office:value-type="float" office:value="3590" calcext:value-type="float">
            <text:p>3590</text:p>
          </table:table-cell>
          <table:table-cell office:value-type="float" office:value="8640000" calcext:value-type="float">
            <text:p>8640000</text:p>
          </table:table-cell>
          <table:table-cell table:formula="of:=[.B360]/[.C360]" office:value-type="float" office:value="0.000415509259259259" calcext:value-type="float">
            <text:p>0,00041550925925925900</text:p>
          </table:table-cell>
          <table:table-cell table:formula="of:=[.D361]-[.D360]" office:value-type="float" office:value="0.00000115740740740745" calcext:value-type="float">
            <text:p>0,0000011574074074074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B360]+10" office:value-type="float" office:value="3600" calcext:value-type="float">
            <text:p>3600</text:p>
          </table:table-cell>
          <table:table-cell office:value-type="float" office:value="8640000" calcext:value-type="float">
            <text:p>8640000</text:p>
          </table:table-cell>
          <table:table-cell table:formula="of:=[.B361]/[.C361]" office:value-type="float" office:value="0.000416666666666667" calcext:value-type="float">
            <text:p>0,00041666666666666700</text:p>
          </table:table-cell>
          <table:table-cell table:formula="of:=[.D362]-[.D361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[.B361]+10" office:value-type="float" office:value="3610" calcext:value-type="float">
            <text:p>3610</text:p>
          </table:table-cell>
          <table:table-cell office:value-type="float" office:value="8640000" calcext:value-type="float">
            <text:p>8640000</text:p>
          </table:table-cell>
          <table:table-cell table:formula="of:=[.B362]/[.C362]" office:value-type="float" office:value="0.000417824074074074" calcext:value-type="float">
            <text:p>0,00041782407407407400</text:p>
          </table:table-cell>
          <table:table-cell table:formula="of:=[.D363]-[.D362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[.B362]+10" office:value-type="float" office:value="3620" calcext:value-type="float">
            <text:p>3620</text:p>
          </table:table-cell>
          <table:table-cell office:value-type="float" office:value="8640000" calcext:value-type="float">
            <text:p>8640000</text:p>
          </table:table-cell>
          <table:table-cell table:formula="of:=[.B363]/[.C363]" office:value-type="float" office:value="0.000418981481481482" calcext:value-type="float">
            <text:p>0,00041898148148148200</text:p>
          </table:table-cell>
          <table:table-cell table:formula="of:=[.D364]-[.D363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[.B363]+10" office:value-type="float" office:value="3630" calcext:value-type="float">
            <text:p>3630</text:p>
          </table:table-cell>
          <table:table-cell office:value-type="float" office:value="8640000" calcext:value-type="float">
            <text:p>8640000</text:p>
          </table:table-cell>
          <table:table-cell table:formula="of:=[.B364]/[.C364]" office:value-type="float" office:value="0.000420138888888889" calcext:value-type="float">
            <text:p>0,00042013888888888900</text:p>
          </table:table-cell>
          <table:table-cell table:formula="of:=[.D365]-[.D364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[.B364]+10" office:value-type="float" office:value="3640" calcext:value-type="float">
            <text:p>3640</text:p>
          </table:table-cell>
          <table:table-cell office:value-type="float" office:value="8640000" calcext:value-type="float">
            <text:p>8640000</text:p>
          </table:table-cell>
          <table:table-cell table:formula="of:=[.B365]/[.C365]" office:value-type="float" office:value="0.000421296296296296" calcext:value-type="float">
            <text:p>0,00042129629629629600</text:p>
          </table:table-cell>
          <table:table-cell table:formula="of:=[.D366]-[.D365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[.B365]+10" office:value-type="float" office:value="3650" calcext:value-type="float">
            <text:p>3650</text:p>
          </table:table-cell>
          <table:table-cell office:value-type="float" office:value="8640000" calcext:value-type="float">
            <text:p>8640000</text:p>
          </table:table-cell>
          <table:table-cell table:formula="of:=[.B366]/[.C366]" office:value-type="float" office:value="0.000422453703703704" calcext:value-type="float">
            <text:p>0,00042245370370370400</text:p>
          </table:table-cell>
          <table:table-cell table:formula="of:=[.D367]-[.D366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[.B366]+10" office:value-type="float" office:value="3660" calcext:value-type="float">
            <text:p>3660</text:p>
          </table:table-cell>
          <table:table-cell office:value-type="float" office:value="8640000" calcext:value-type="float">
            <text:p>8640000</text:p>
          </table:table-cell>
          <table:table-cell table:formula="of:=[.B367]/[.C367]" office:value-type="float" office:value="0.000423611111111111" calcext:value-type="float">
            <text:p>0,00042361111111111100</text:p>
          </table:table-cell>
          <table:table-cell table:formula="of:=[.D368]-[.D367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[.B367]+10" office:value-type="float" office:value="3670" calcext:value-type="float">
            <text:p>3670</text:p>
          </table:table-cell>
          <table:table-cell office:value-type="float" office:value="8640000" calcext:value-type="float">
            <text:p>8640000</text:p>
          </table:table-cell>
          <table:table-cell table:formula="of:=[.B368]/[.C368]" office:value-type="float" office:value="0.000424768518518519" calcext:value-type="float">
            <text:p>0,00042476851851851900</text:p>
          </table:table-cell>
          <table:table-cell table:formula="of:=[.D369]-[.D368]" office:value-type="float" office:value="0.00000115740740740745" calcext:value-type="float">
            <text:p>0,0000011574074074074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[.B368]+10" office:value-type="float" office:value="3680" calcext:value-type="float">
            <text:p>3680</text:p>
          </table:table-cell>
          <table:table-cell office:value-type="float" office:value="8640000" calcext:value-type="float">
            <text:p>8640000</text:p>
          </table:table-cell>
          <table:table-cell table:formula="of:=[.B369]/[.C369]" office:value-type="float" office:value="0.000425925925925926" calcext:value-type="float">
            <text:p>0,00042592592592592600</text:p>
          </table:table-cell>
          <table:table-cell table:formula="of:=[.D370]-[.D369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[.B369]+10" office:value-type="float" office:value="3690" calcext:value-type="float">
            <text:p>3690</text:p>
          </table:table-cell>
          <table:table-cell office:value-type="float" office:value="8640000" calcext:value-type="float">
            <text:p>8640000</text:p>
          </table:table-cell>
          <table:table-cell table:formula="of:=[.B370]/[.C370]" office:value-type="float" office:value="0.000427083333333333" calcext:value-type="float">
            <text:p>0,00042708333333333300</text:p>
          </table:table-cell>
          <table:table-cell table:formula="of:=[.D371]-[.D370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[.B370]+10" office:value-type="float" office:value="3700" calcext:value-type="float">
            <text:p>3700</text:p>
          </table:table-cell>
          <table:table-cell office:value-type="float" office:value="8640000" calcext:value-type="float">
            <text:p>8640000</text:p>
          </table:table-cell>
          <table:table-cell table:formula="of:=[.B371]/[.C371]" office:value-type="float" office:value="0.000428240740740741" calcext:value-type="float">
            <text:p>0,00042824074074074100</text:p>
          </table:table-cell>
          <table:table-cell table:formula="of:=[.D372]-[.D371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[.B371]+10" office:value-type="float" office:value="3710" calcext:value-type="float">
            <text:p>3710</text:p>
          </table:table-cell>
          <table:table-cell office:value-type="float" office:value="8640000" calcext:value-type="float">
            <text:p>8640000</text:p>
          </table:table-cell>
          <table:table-cell table:formula="of:=[.B372]/[.C372]" office:value-type="float" office:value="0.000429398148148148" calcext:value-type="float">
            <text:p>0,00042939814814814800</text:p>
          </table:table-cell>
          <table:table-cell table:formula="of:=[.D373]-[.D372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[.B372]+10" office:value-type="float" office:value="3720" calcext:value-type="float">
            <text:p>3720</text:p>
          </table:table-cell>
          <table:table-cell office:value-type="float" office:value="8640000" calcext:value-type="float">
            <text:p>8640000</text:p>
          </table:table-cell>
          <table:table-cell table:formula="of:=[.B373]/[.C373]" office:value-type="float" office:value="0.000430555555555556" calcext:value-type="float">
            <text:p>0,00043055555555555600</text:p>
          </table:table-cell>
          <table:table-cell table:formula="of:=[.D374]-[.D373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[.B373]+10" office:value-type="float" office:value="3730" calcext:value-type="float">
            <text:p>3730</text:p>
          </table:table-cell>
          <table:table-cell office:value-type="float" office:value="8640000" calcext:value-type="float">
            <text:p>8640000</text:p>
          </table:table-cell>
          <table:table-cell table:formula="of:=[.B374]/[.C374]" office:value-type="float" office:value="0.000431712962962963" calcext:value-type="float">
            <text:p>0,00043171296296296300</text:p>
          </table:table-cell>
          <table:table-cell table:formula="of:=[.D375]-[.D374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[.B374]+10" office:value-type="float" office:value="3740" calcext:value-type="float">
            <text:p>3740</text:p>
          </table:table-cell>
          <table:table-cell office:value-type="float" office:value="8640000" calcext:value-type="float">
            <text:p>8640000</text:p>
          </table:table-cell>
          <table:table-cell table:formula="of:=[.B375]/[.C375]" office:value-type="float" office:value="0.00043287037037037" calcext:value-type="float">
            <text:p>0,00043287037037037000</text:p>
          </table:table-cell>
          <table:table-cell table:formula="of:=[.D376]-[.D375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[.B375]+10" office:value-type="float" office:value="3750" calcext:value-type="float">
            <text:p>3750</text:p>
          </table:table-cell>
          <table:table-cell office:value-type="float" office:value="8640000" calcext:value-type="float">
            <text:p>8640000</text:p>
          </table:table-cell>
          <table:table-cell table:formula="of:=[.B376]/[.C376]" office:value-type="float" office:value="0.000434027777777778" calcext:value-type="float">
            <text:p>0,00043402777777777800</text:p>
          </table:table-cell>
          <table:table-cell table:formula="of:=[.D377]-[.D376]" office:value-type="float" office:value="0.00000115740740740745" calcext:value-type="float">
            <text:p>0,00000115740740740745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[.B376]+10" office:value-type="float" office:value="3760" calcext:value-type="float">
            <text:p>3760</text:p>
          </table:table-cell>
          <table:table-cell office:value-type="float" office:value="8640000" calcext:value-type="float">
            <text:p>8640000</text:p>
          </table:table-cell>
          <table:table-cell table:formula="of:=[.B377]/[.C377]" office:value-type="float" office:value="0.000435185185185185" calcext:value-type="float">
            <text:p>0,00043518518518518500</text:p>
          </table:table-cell>
          <table:table-cell table:formula="of:=[.D378]-[.D377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[.B377]+10" office:value-type="float" office:value="3770" calcext:value-type="float">
            <text:p>3770</text:p>
          </table:table-cell>
          <table:table-cell office:value-type="float" office:value="8640000" calcext:value-type="float">
            <text:p>8640000</text:p>
          </table:table-cell>
          <table:table-cell table:formula="of:=[.B378]/[.C378]" office:value-type="float" office:value="0.000436342592592593" calcext:value-type="float">
            <text:p>0,00043634259259259300</text:p>
          </table:table-cell>
          <table:table-cell table:formula="of:=[.D379]-[.D378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[.B378]+10" office:value-type="float" office:value="3780" calcext:value-type="float">
            <text:p>3780</text:p>
          </table:table-cell>
          <table:table-cell office:value-type="float" office:value="8640000" calcext:value-type="float">
            <text:p>8640000</text:p>
          </table:table-cell>
          <table:table-cell table:formula="of:=[.B379]/[.C379]" office:value-type="float" office:value="0.0004375" calcext:value-type="float">
            <text:p>0,00043750000000000000</text:p>
          </table:table-cell>
          <table:table-cell table:formula="of:=[.D380]-[.D379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[.B379]+10" office:value-type="float" office:value="3790" calcext:value-type="float">
            <text:p>3790</text:p>
          </table:table-cell>
          <table:table-cell office:value-type="float" office:value="8640000" calcext:value-type="float">
            <text:p>8640000</text:p>
          </table:table-cell>
          <table:table-cell table:formula="of:=[.B380]/[.C380]" office:value-type="float" office:value="0.000438657407407407" calcext:value-type="float">
            <text:p>0,00043865740740740700</text:p>
          </table:table-cell>
          <table:table-cell table:formula="of:=[.D381]-[.D380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[.B380]+10" office:value-type="float" office:value="3800" calcext:value-type="float">
            <text:p>3800</text:p>
          </table:table-cell>
          <table:table-cell office:value-type="float" office:value="8640000" calcext:value-type="float">
            <text:p>8640000</text:p>
          </table:table-cell>
          <table:table-cell table:formula="of:=[.B381]/[.C381]" office:value-type="float" office:value="0.000439814814814815" calcext:value-type="float">
            <text:p>0,00043981481481481500</text:p>
          </table:table-cell>
          <table:table-cell table:formula="of:=[.D382]-[.D381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[.B381]+10" office:value-type="float" office:value="3810" calcext:value-type="float">
            <text:p>3810</text:p>
          </table:table-cell>
          <table:table-cell office:value-type="float" office:value="8640000" calcext:value-type="float">
            <text:p>8640000</text:p>
          </table:table-cell>
          <table:table-cell table:formula="of:=[.B382]/[.C382]" office:value-type="float" office:value="0.000440972222222222" calcext:value-type="float">
            <text:p>0,00044097222222222200</text:p>
          </table:table-cell>
          <table:table-cell table:formula="of:=[.D383]-[.D382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[.B382]+10" office:value-type="float" office:value="3820" calcext:value-type="float">
            <text:p>3820</text:p>
          </table:table-cell>
          <table:table-cell office:value-type="float" office:value="8640000" calcext:value-type="float">
            <text:p>8640000</text:p>
          </table:table-cell>
          <table:table-cell table:formula="of:=[.B383]/[.C383]" office:value-type="float" office:value="0.00044212962962963" calcext:value-type="float">
            <text:p>0,00044212962962963000</text:p>
          </table:table-cell>
          <table:table-cell table:formula="of:=[.D384]-[.D383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[.B383]+10" office:value-type="float" office:value="3830" calcext:value-type="float">
            <text:p>3830</text:p>
          </table:table-cell>
          <table:table-cell office:value-type="float" office:value="8640000" calcext:value-type="float">
            <text:p>8640000</text:p>
          </table:table-cell>
          <table:table-cell table:formula="of:=[.B384]/[.C384]" office:value-type="float" office:value="0.000443287037037037" calcext:value-type="float">
            <text:p>0,00044328703703703700</text:p>
          </table:table-cell>
          <table:table-cell table:formula="of:=[.D385]-[.D384]" office:value-type="float" office:value="0.00000115740740740745" calcext:value-type="float">
            <text:p>0,00000115740740740745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[.B384]+10" office:value-type="float" office:value="3840" calcext:value-type="float">
            <text:p>3840</text:p>
          </table:table-cell>
          <table:table-cell office:value-type="float" office:value="8640000" calcext:value-type="float">
            <text:p>8640000</text:p>
          </table:table-cell>
          <table:table-cell table:formula="of:=[.B385]/[.C385]" office:value-type="float" office:value="0.000444444444444444" calcext:value-type="float">
            <text:p>0,00044444444444444400</text:p>
          </table:table-cell>
          <table:table-cell table:formula="of:=[.D386]-[.D385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[.B385]+10" office:value-type="float" office:value="3850" calcext:value-type="float">
            <text:p>3850</text:p>
          </table:table-cell>
          <table:table-cell office:value-type="float" office:value="8640000" calcext:value-type="float">
            <text:p>8640000</text:p>
          </table:table-cell>
          <table:table-cell table:formula="of:=[.B386]/[.C386]" office:value-type="float" office:value="0.000445601851851852" calcext:value-type="float">
            <text:p>0,00044560185185185200</text:p>
          </table:table-cell>
          <table:table-cell table:formula="of:=[.D387]-[.D386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[.B386]+10" office:value-type="float" office:value="3860" calcext:value-type="float">
            <text:p>3860</text:p>
          </table:table-cell>
          <table:table-cell office:value-type="float" office:value="8640000" calcext:value-type="float">
            <text:p>8640000</text:p>
          </table:table-cell>
          <table:table-cell table:formula="of:=[.B387]/[.C387]" office:value-type="float" office:value="0.000446759259259259" calcext:value-type="float">
            <text:p>0,00044675925925925900</text:p>
          </table:table-cell>
          <table:table-cell table:formula="of:=[.D388]-[.D387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[.B387]+10" office:value-type="float" office:value="3870" calcext:value-type="float">
            <text:p>3870</text:p>
          </table:table-cell>
          <table:table-cell office:value-type="float" office:value="8640000" calcext:value-type="float">
            <text:p>8640000</text:p>
          </table:table-cell>
          <table:table-cell table:formula="of:=[.B388]/[.C388]" office:value-type="float" office:value="0.000447916666666667" calcext:value-type="float">
            <text:p>0,00044791666666666700</text:p>
          </table:table-cell>
          <table:table-cell table:formula="of:=[.D389]-[.D388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[.B388]+10" office:value-type="float" office:value="3880" calcext:value-type="float">
            <text:p>3880</text:p>
          </table:table-cell>
          <table:table-cell office:value-type="float" office:value="8640000" calcext:value-type="float">
            <text:p>8640000</text:p>
          </table:table-cell>
          <table:table-cell table:formula="of:=[.B389]/[.C389]" office:value-type="float" office:value="0.000449074074074074" calcext:value-type="float">
            <text:p>0,00044907407407407400</text:p>
          </table:table-cell>
          <table:table-cell table:formula="of:=[.D390]-[.D389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[.B389]+10" office:value-type="float" office:value="3890" calcext:value-type="float">
            <text:p>3890</text:p>
          </table:table-cell>
          <table:table-cell office:value-type="float" office:value="8640000" calcext:value-type="float">
            <text:p>8640000</text:p>
          </table:table-cell>
          <table:table-cell table:formula="of:=[.B390]/[.C390]" office:value-type="float" office:value="0.000450231481481481" calcext:value-type="float">
            <text:p>0,00045023148148148100</text:p>
          </table:table-cell>
          <table:table-cell table:formula="of:=[.D391]-[.D390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[.B390]+10" office:value-type="float" office:value="3900" calcext:value-type="float">
            <text:p>3900</text:p>
          </table:table-cell>
          <table:table-cell office:value-type="float" office:value="8640000" calcext:value-type="float">
            <text:p>8640000</text:p>
          </table:table-cell>
          <table:table-cell table:formula="of:=[.B391]/[.C391]" office:value-type="float" office:value="0.000451388888888889" calcext:value-type="float">
            <text:p>0,00045138888888888900</text:p>
          </table:table-cell>
          <table:table-cell table:formula="of:=[.D392]-[.D391]" office:value-type="float" office:value="0.00000115740740740745" calcext:value-type="float">
            <text:p>0,00000115740740740745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[.B391]+10" office:value-type="float" office:value="3910" calcext:value-type="float">
            <text:p>3910</text:p>
          </table:table-cell>
          <table:table-cell office:value-type="float" office:value="8640000" calcext:value-type="float">
            <text:p>8640000</text:p>
          </table:table-cell>
          <table:table-cell table:formula="of:=[.B392]/[.C392]" office:value-type="float" office:value="0.000452546296296296" calcext:value-type="float">
            <text:p>0,00045254629629629600</text:p>
          </table:table-cell>
          <table:table-cell table:formula="of:=[.D393]-[.D392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[.B392]+10" office:value-type="float" office:value="3920" calcext:value-type="float">
            <text:p>3920</text:p>
          </table:table-cell>
          <table:table-cell office:value-type="float" office:value="8640000" calcext:value-type="float">
            <text:p>8640000</text:p>
          </table:table-cell>
          <table:table-cell table:formula="of:=[.B393]/[.C393]" office:value-type="float" office:value="0.000453703703703704" calcext:value-type="float">
            <text:p>0,00045370370370370400</text:p>
          </table:table-cell>
          <table:table-cell table:formula="of:=[.D394]-[.D393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[.B393]+10" office:value-type="float" office:value="3930" calcext:value-type="float">
            <text:p>3930</text:p>
          </table:table-cell>
          <table:table-cell office:value-type="float" office:value="8640000" calcext:value-type="float">
            <text:p>8640000</text:p>
          </table:table-cell>
          <table:table-cell table:formula="of:=[.B394]/[.C394]" office:value-type="float" office:value="0.000454861111111111" calcext:value-type="float">
            <text:p>0,00045486111111111100</text:p>
          </table:table-cell>
          <table:table-cell table:formula="of:=[.D395]-[.D394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[.B394]+10" office:value-type="float" office:value="3940" calcext:value-type="float">
            <text:p>3940</text:p>
          </table:table-cell>
          <table:table-cell office:value-type="float" office:value="8640000" calcext:value-type="float">
            <text:p>8640000</text:p>
          </table:table-cell>
          <table:table-cell table:formula="of:=[.B395]/[.C395]" office:value-type="float" office:value="0.000456018518518519" calcext:value-type="float">
            <text:p>0,00045601851851851900</text:p>
          </table:table-cell>
          <table:table-cell table:formula="of:=[.D396]-[.D395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[.B395]+10" office:value-type="float" office:value="3950" calcext:value-type="float">
            <text:p>3950</text:p>
          </table:table-cell>
          <table:table-cell office:value-type="float" office:value="8640000" calcext:value-type="float">
            <text:p>8640000</text:p>
          </table:table-cell>
          <table:table-cell table:formula="of:=[.B396]/[.C396]" office:value-type="float" office:value="0.000457175925925926" calcext:value-type="float">
            <text:p>0,00045717592592592600</text:p>
          </table:table-cell>
          <table:table-cell table:formula="of:=[.D397]-[.D396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[.B396]+10" office:value-type="float" office:value="3960" calcext:value-type="float">
            <text:p>3960</text:p>
          </table:table-cell>
          <table:table-cell office:value-type="float" office:value="8640000" calcext:value-type="float">
            <text:p>8640000</text:p>
          </table:table-cell>
          <table:table-cell table:formula="of:=[.B397]/[.C397]" office:value-type="float" office:value="0.000458333333333333" calcext:value-type="float">
            <text:p>0,00045833333333333300</text:p>
          </table:table-cell>
          <table:table-cell table:formula="of:=[.D398]-[.D397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[.B397]+10" office:value-type="float" office:value="3970" calcext:value-type="float">
            <text:p>3970</text:p>
          </table:table-cell>
          <table:table-cell office:value-type="float" office:value="8640000" calcext:value-type="float">
            <text:p>8640000</text:p>
          </table:table-cell>
          <table:table-cell table:formula="of:=[.B398]/[.C398]" office:value-type="float" office:value="0.000459490740740741" calcext:value-type="float">
            <text:p>0,00045949074074074100</text:p>
          </table:table-cell>
          <table:table-cell table:formula="of:=[.D399]-[.D398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[.B398]+10" office:value-type="float" office:value="3980" calcext:value-type="float">
            <text:p>3980</text:p>
          </table:table-cell>
          <table:table-cell office:value-type="float" office:value="8640000" calcext:value-type="float">
            <text:p>8640000</text:p>
          </table:table-cell>
          <table:table-cell table:formula="of:=[.B399]/[.C399]" office:value-type="float" office:value="0.000460648148148148" calcext:value-type="float">
            <text:p>0,00046064814814814800</text:p>
          </table:table-cell>
          <table:table-cell table:formula="of:=[.D400]-[.D399]" office:value-type="float" office:value="0.00000115740740740745" calcext:value-type="float">
            <text:p>0,00000115740740740745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[.B399]+10" office:value-type="float" office:value="3990" calcext:value-type="float">
            <text:p>3990</text:p>
          </table:table-cell>
          <table:table-cell office:value-type="float" office:value="8640000" calcext:value-type="float">
            <text:p>8640000</text:p>
          </table:table-cell>
          <table:table-cell table:formula="of:=[.B400]/[.C400]" office:value-type="float" office:value="0.000461805555555556" calcext:value-type="float">
            <text:p>0,00046180555555555600</text:p>
          </table:table-cell>
          <table:table-cell table:formula="of:=[.D401]-[.D400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B400]+10" office:value-type="float" office:value="4000" calcext:value-type="float">
            <text:p>4000</text:p>
          </table:table-cell>
          <table:table-cell office:value-type="float" office:value="8640000" calcext:value-type="float">
            <text:p>8640000</text:p>
          </table:table-cell>
          <table:table-cell table:formula="of:=[.B401]/[.C401]" office:value-type="float" office:value="0.000462962962962963" calcext:value-type="float">
            <text:p>0,00046296296296296300</text:p>
          </table:table-cell>
          <table:table-cell table:formula="of:=[.D402]-[.D401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[.B401]+10" office:value-type="float" office:value="4010" calcext:value-type="float">
            <text:p>4010</text:p>
          </table:table-cell>
          <table:table-cell office:value-type="float" office:value="8640000" calcext:value-type="float">
            <text:p>8640000</text:p>
          </table:table-cell>
          <table:table-cell table:formula="of:=[.B402]/[.C402]" office:value-type="float" office:value="0.00046412037037037" calcext:value-type="float">
            <text:p>0,00046412037037037000</text:p>
          </table:table-cell>
          <table:table-cell table:formula="of:=[.D403]-[.D402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[.B402]+10" office:value-type="float" office:value="4020" calcext:value-type="float">
            <text:p>4020</text:p>
          </table:table-cell>
          <table:table-cell office:value-type="float" office:value="8640000" calcext:value-type="float">
            <text:p>8640000</text:p>
          </table:table-cell>
          <table:table-cell table:formula="of:=[.B403]/[.C403]" office:value-type="float" office:value="0.000465277777777778" calcext:value-type="float">
            <text:p>0,00046527777777777800</text:p>
          </table:table-cell>
          <table:table-cell table:formula="of:=[.D404]-[.D403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[.B403]+10" office:value-type="float" office:value="4030" calcext:value-type="float">
            <text:p>4030</text:p>
          </table:table-cell>
          <table:table-cell office:value-type="float" office:value="8640000" calcext:value-type="float">
            <text:p>8640000</text:p>
          </table:table-cell>
          <table:table-cell table:formula="of:=[.B404]/[.C404]" office:value-type="float" office:value="0.000466435185185185" calcext:value-type="float">
            <text:p>0,00046643518518518500</text:p>
          </table:table-cell>
          <table:table-cell table:formula="of:=[.D405]-[.D404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[.B404]+10" office:value-type="float" office:value="4040" calcext:value-type="float">
            <text:p>4040</text:p>
          </table:table-cell>
          <table:table-cell office:value-type="float" office:value="8640000" calcext:value-type="float">
            <text:p>8640000</text:p>
          </table:table-cell>
          <table:table-cell table:formula="of:=[.B405]/[.C405]" office:value-type="float" office:value="0.000467592592592593" calcext:value-type="float">
            <text:p>0,00046759259259259300</text:p>
          </table:table-cell>
          <table:table-cell table:formula="of:=[.D406]-[.D405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[.B405]+10" office:value-type="float" office:value="4050" calcext:value-type="float">
            <text:p>4050</text:p>
          </table:table-cell>
          <table:table-cell office:value-type="float" office:value="8640000" calcext:value-type="float">
            <text:p>8640000</text:p>
          </table:table-cell>
          <table:table-cell table:formula="of:=[.B406]/[.C406]" office:value-type="float" office:value="0.00046875" calcext:value-type="float">
            <text:p>0,00046875000000000000</text:p>
          </table:table-cell>
          <table:table-cell table:formula="of:=[.D407]-[.D406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[.B406]+10" office:value-type="float" office:value="4060" calcext:value-type="float">
            <text:p>4060</text:p>
          </table:table-cell>
          <table:table-cell office:value-type="float" office:value="8640000" calcext:value-type="float">
            <text:p>8640000</text:p>
          </table:table-cell>
          <table:table-cell table:formula="of:=[.B407]/[.C407]" office:value-type="float" office:value="0.000469907407407407" calcext:value-type="float">
            <text:p>0,00046990740740740700</text:p>
          </table:table-cell>
          <table:table-cell table:formula="of:=[.D408]-[.D407]" office:value-type="float" office:value="0.00000115740740740745" calcext:value-type="float">
            <text:p>0,00000115740740740745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[.B407]+10" office:value-type="float" office:value="4070" calcext:value-type="float">
            <text:p>4070</text:p>
          </table:table-cell>
          <table:table-cell office:value-type="float" office:value="8640000" calcext:value-type="float">
            <text:p>8640000</text:p>
          </table:table-cell>
          <table:table-cell table:formula="of:=[.B408]/[.C408]" office:value-type="float" office:value="0.000471064814814815" calcext:value-type="float">
            <text:p>0,00047106481481481500</text:p>
          </table:table-cell>
          <table:table-cell table:formula="of:=[.D409]-[.D408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[.B408]+10" office:value-type="float" office:value="4080" calcext:value-type="float">
            <text:p>4080</text:p>
          </table:table-cell>
          <table:table-cell office:value-type="float" office:value="8640000" calcext:value-type="float">
            <text:p>8640000</text:p>
          </table:table-cell>
          <table:table-cell table:formula="of:=[.B409]/[.C409]" office:value-type="float" office:value="0.000472222222222222" calcext:value-type="float">
            <text:p>0,00047222222222222200</text:p>
          </table:table-cell>
          <table:table-cell table:formula="of:=[.D410]-[.D409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[.B409]+10" office:value-type="float" office:value="4090" calcext:value-type="float">
            <text:p>4090</text:p>
          </table:table-cell>
          <table:table-cell office:value-type="float" office:value="8640000" calcext:value-type="float">
            <text:p>8640000</text:p>
          </table:table-cell>
          <table:table-cell table:formula="of:=[.B410]/[.C410]" office:value-type="float" office:value="0.00047337962962963" calcext:value-type="float">
            <text:p>0,00047337962962963000</text:p>
          </table:table-cell>
          <table:table-cell table:formula="of:=[.D411]-[.D410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[.B410]+10" office:value-type="float" office:value="4100" calcext:value-type="float">
            <text:p>4100</text:p>
          </table:table-cell>
          <table:table-cell office:value-type="float" office:value="8640000" calcext:value-type="float">
            <text:p>8640000</text:p>
          </table:table-cell>
          <table:table-cell table:formula="of:=[.B411]/[.C411]" office:value-type="float" office:value="0.000474537037037037" calcext:value-type="float">
            <text:p>0,00047453703703703700</text:p>
          </table:table-cell>
          <table:table-cell table:formula="of:=[.D412]-[.D411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[.B411]+10" office:value-type="float" office:value="4110" calcext:value-type="float">
            <text:p>4110</text:p>
          </table:table-cell>
          <table:table-cell office:value-type="float" office:value="8640000" calcext:value-type="float">
            <text:p>8640000</text:p>
          </table:table-cell>
          <table:table-cell table:formula="of:=[.B412]/[.C412]" office:value-type="float" office:value="0.000475694444444444" calcext:value-type="float">
            <text:p>0,00047569444444444400</text:p>
          </table:table-cell>
          <table:table-cell table:formula="of:=[.D413]-[.D412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[.B412]+10" office:value-type="float" office:value="4120" calcext:value-type="float">
            <text:p>4120</text:p>
          </table:table-cell>
          <table:table-cell office:value-type="float" office:value="8640000" calcext:value-type="float">
            <text:p>8640000</text:p>
          </table:table-cell>
          <table:table-cell table:formula="of:=[.B413]/[.C413]" office:value-type="float" office:value="0.000476851851851852" calcext:value-type="float">
            <text:p>0,00047685185185185200</text:p>
          </table:table-cell>
          <table:table-cell table:formula="of:=[.D414]-[.D413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[.B413]+10" office:value-type="float" office:value="4130" calcext:value-type="float">
            <text:p>4130</text:p>
          </table:table-cell>
          <table:table-cell office:value-type="float" office:value="8640000" calcext:value-type="float">
            <text:p>8640000</text:p>
          </table:table-cell>
          <table:table-cell table:formula="of:=[.B414]/[.C414]" office:value-type="float" office:value="0.000478009259259259" calcext:value-type="float">
            <text:p>0,00047800925925925900</text:p>
          </table:table-cell>
          <table:table-cell table:formula="of:=[.D415]-[.D414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[.B414]+10" office:value-type="float" office:value="4140" calcext:value-type="float">
            <text:p>4140</text:p>
          </table:table-cell>
          <table:table-cell office:value-type="float" office:value="8640000" calcext:value-type="float">
            <text:p>8640000</text:p>
          </table:table-cell>
          <table:table-cell table:formula="of:=[.B415]/[.C415]" office:value-type="float" office:value="0.000479166666666667" calcext:value-type="float">
            <text:p>0,00047916666666666700</text:p>
          </table:table-cell>
          <table:table-cell table:formula="of:=[.D416]-[.D415]" office:value-type="float" office:value="0.00000115740740740745" calcext:value-type="float">
            <text:p>0,00000115740740740745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[.B415]+10" office:value-type="float" office:value="4150" calcext:value-type="float">
            <text:p>4150</text:p>
          </table:table-cell>
          <table:table-cell office:value-type="float" office:value="8640000" calcext:value-type="float">
            <text:p>8640000</text:p>
          </table:table-cell>
          <table:table-cell table:formula="of:=[.B416]/[.C416]" office:value-type="float" office:value="0.000480324074074074" calcext:value-type="float">
            <text:p>0,00048032407407407400</text:p>
          </table:table-cell>
          <table:table-cell table:formula="of:=[.D417]-[.D416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[.B416]+10" office:value-type="float" office:value="4160" calcext:value-type="float">
            <text:p>4160</text:p>
          </table:table-cell>
          <table:table-cell office:value-type="float" office:value="8640000" calcext:value-type="float">
            <text:p>8640000</text:p>
          </table:table-cell>
          <table:table-cell table:formula="of:=[.B417]/[.C417]" office:value-type="float" office:value="0.000481481481481482" calcext:value-type="float">
            <text:p>0,00048148148148148200</text:p>
          </table:table-cell>
          <table:table-cell table:formula="of:=[.D418]-[.D417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[.B417]+10" office:value-type="float" office:value="4170" calcext:value-type="float">
            <text:p>4170</text:p>
          </table:table-cell>
          <table:table-cell office:value-type="float" office:value="8640000" calcext:value-type="float">
            <text:p>8640000</text:p>
          </table:table-cell>
          <table:table-cell table:formula="of:=[.B418]/[.C418]" office:value-type="float" office:value="0.000482638888888889" calcext:value-type="float">
            <text:p>0,00048263888888888900</text:p>
          </table:table-cell>
          <table:table-cell table:formula="of:=[.D419]-[.D418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[.B418]+10" office:value-type="float" office:value="4180" calcext:value-type="float">
            <text:p>4180</text:p>
          </table:table-cell>
          <table:table-cell office:value-type="float" office:value="8640000" calcext:value-type="float">
            <text:p>8640000</text:p>
          </table:table-cell>
          <table:table-cell table:formula="of:=[.B419]/[.C419]" office:value-type="float" office:value="0.000483796296296296" calcext:value-type="float">
            <text:p>0,00048379629629629600</text:p>
          </table:table-cell>
          <table:table-cell table:formula="of:=[.D420]-[.D419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[.B419]+10" office:value-type="float" office:value="4190" calcext:value-type="float">
            <text:p>4190</text:p>
          </table:table-cell>
          <table:table-cell office:value-type="float" office:value="8640000" calcext:value-type="float">
            <text:p>8640000</text:p>
          </table:table-cell>
          <table:table-cell table:formula="of:=[.B420]/[.C420]" office:value-type="float" office:value="0.000484953703703704" calcext:value-type="float">
            <text:p>0,00048495370370370400</text:p>
          </table:table-cell>
          <table:table-cell table:formula="of:=[.D421]-[.D420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[.B420]+10" office:value-type="float" office:value="4200" calcext:value-type="float">
            <text:p>4200</text:p>
          </table:table-cell>
          <table:table-cell office:value-type="float" office:value="8640000" calcext:value-type="float">
            <text:p>8640000</text:p>
          </table:table-cell>
          <table:table-cell table:formula="of:=[.B421]/[.C421]" office:value-type="float" office:value="0.000486111111111111" calcext:value-type="float">
            <text:p>0,00048611111111111100</text:p>
          </table:table-cell>
          <table:table-cell table:formula="of:=[.D422]-[.D421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[.B421]+10" office:value-type="float" office:value="4210" calcext:value-type="float">
            <text:p>4210</text:p>
          </table:table-cell>
          <table:table-cell office:value-type="float" office:value="8640000" calcext:value-type="float">
            <text:p>8640000</text:p>
          </table:table-cell>
          <table:table-cell table:formula="of:=[.B422]/[.C422]" office:value-type="float" office:value="0.000487268518518519" calcext:value-type="float">
            <text:p>0,00048726851851851900</text:p>
          </table:table-cell>
          <table:table-cell table:formula="of:=[.D423]-[.D422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[.B422]+10" office:value-type="float" office:value="4220" calcext:value-type="float">
            <text:p>4220</text:p>
          </table:table-cell>
          <table:table-cell office:value-type="float" office:value="8640000" calcext:value-type="float">
            <text:p>8640000</text:p>
          </table:table-cell>
          <table:table-cell table:formula="of:=[.B423]/[.C423]" office:value-type="float" office:value="0.000488425925925926" calcext:value-type="float">
            <text:p>0,00048842592592592600</text:p>
          </table:table-cell>
          <table:table-cell table:formula="of:=[.D424]-[.D423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[.B423]+10" office:value-type="float" office:value="4230" calcext:value-type="float">
            <text:p>4230</text:p>
          </table:table-cell>
          <table:table-cell office:value-type="float" office:value="8640000" calcext:value-type="float">
            <text:p>8640000</text:p>
          </table:table-cell>
          <table:table-cell table:formula="of:=[.B424]/[.C424]" office:value-type="float" office:value="0.000489583333333333" calcext:value-type="float">
            <text:p>0,00048958333333333300</text:p>
          </table:table-cell>
          <table:table-cell table:formula="of:=[.D425]-[.D424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[.B424]+10" office:value-type="float" office:value="4240" calcext:value-type="float">
            <text:p>4240</text:p>
          </table:table-cell>
          <table:table-cell office:value-type="float" office:value="8640000" calcext:value-type="float">
            <text:p>8640000</text:p>
          </table:table-cell>
          <table:table-cell table:formula="of:=[.B425]/[.C425]" office:value-type="float" office:value="0.000490740740740741" calcext:value-type="float">
            <text:p>0,00049074074074074100</text:p>
          </table:table-cell>
          <table:table-cell table:formula="of:=[.D426]-[.D425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[.B425]+10" office:value-type="float" office:value="4250" calcext:value-type="float">
            <text:p>4250</text:p>
          </table:table-cell>
          <table:table-cell office:value-type="float" office:value="8640000" calcext:value-type="float">
            <text:p>8640000</text:p>
          </table:table-cell>
          <table:table-cell table:formula="of:=[.B426]/[.C426]" office:value-type="float" office:value="0.000491898148148148" calcext:value-type="float">
            <text:p>0,00049189814814814800</text:p>
          </table:table-cell>
          <table:table-cell table:formula="of:=[.D427]-[.D426]" office:value-type="float" office:value="0.00000115740740740751" calcext:value-type="float">
            <text:p>0,00000115740740740751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[.B426]+10" office:value-type="float" office:value="4260" calcext:value-type="float">
            <text:p>4260</text:p>
          </table:table-cell>
          <table:table-cell office:value-type="float" office:value="8640000" calcext:value-type="float">
            <text:p>8640000</text:p>
          </table:table-cell>
          <table:table-cell table:formula="of:=[.B427]/[.C427]" office:value-type="float" office:value="0.000493055555555556" calcext:value-type="float">
            <text:p>0,00049305555555555600</text:p>
          </table:table-cell>
          <table:table-cell table:formula="of:=[.D428]-[.D427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[.B427]+10" office:value-type="float" office:value="4270" calcext:value-type="float">
            <text:p>4270</text:p>
          </table:table-cell>
          <table:table-cell office:value-type="float" office:value="8640000" calcext:value-type="float">
            <text:p>8640000</text:p>
          </table:table-cell>
          <table:table-cell table:formula="of:=[.B428]/[.C428]" office:value-type="float" office:value="0.000494212962962963" calcext:value-type="float">
            <text:p>0,00049421296296296300</text:p>
          </table:table-cell>
          <table:table-cell table:formula="of:=[.D429]-[.D428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[.B428]+10" office:value-type="float" office:value="4280" calcext:value-type="float">
            <text:p>4280</text:p>
          </table:table-cell>
          <table:table-cell office:value-type="float" office:value="8640000" calcext:value-type="float">
            <text:p>8640000</text:p>
          </table:table-cell>
          <table:table-cell table:formula="of:=[.B429]/[.C429]" office:value-type="float" office:value="0.00049537037037037" calcext:value-type="float">
            <text:p>0,00049537037037037000</text:p>
          </table:table-cell>
          <table:table-cell table:formula="of:=[.D430]-[.D429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[.B429]+10" office:value-type="float" office:value="4290" calcext:value-type="float">
            <text:p>4290</text:p>
          </table:table-cell>
          <table:table-cell office:value-type="float" office:value="8640000" calcext:value-type="float">
            <text:p>8640000</text:p>
          </table:table-cell>
          <table:table-cell table:formula="of:=[.B430]/[.C430]" office:value-type="float" office:value="0.000496527777777778" calcext:value-type="float">
            <text:p>0,00049652777777777800</text:p>
          </table:table-cell>
          <table:table-cell table:formula="of:=[.D431]-[.D430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[.B430]+10" office:value-type="float" office:value="4300" calcext:value-type="float">
            <text:p>4300</text:p>
          </table:table-cell>
          <table:table-cell office:value-type="float" office:value="8640000" calcext:value-type="float">
            <text:p>8640000</text:p>
          </table:table-cell>
          <table:table-cell table:formula="of:=[.B431]/[.C431]" office:value-type="float" office:value="0.000497685185185185" calcext:value-type="float">
            <text:p>0,00049768518518518500</text:p>
          </table:table-cell>
          <table:table-cell table:formula="of:=[.D432]-[.D431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[.B431]+10" office:value-type="float" office:value="4310" calcext:value-type="float">
            <text:p>4310</text:p>
          </table:table-cell>
          <table:table-cell office:value-type="float" office:value="8640000" calcext:value-type="float">
            <text:p>8640000</text:p>
          </table:table-cell>
          <table:table-cell table:formula="of:=[.B432]/[.C432]" office:value-type="float" office:value="0.000498842592592593" calcext:value-type="float">
            <text:p>0,00049884259259259300</text:p>
          </table:table-cell>
          <table:table-cell table:formula="of:=[.D433]-[.D432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[.B432]+10" office:value-type="float" office:value="4320" calcext:value-type="float">
            <text:p>4320</text:p>
          </table:table-cell>
          <table:table-cell office:value-type="float" office:value="8640000" calcext:value-type="float">
            <text:p>8640000</text:p>
          </table:table-cell>
          <table:table-cell table:formula="of:=[.B433]/[.C433]" office:value-type="float" office:value="0.0005" calcext:value-type="float">
            <text:p>0,00050000000000000000</text:p>
          </table:table-cell>
          <table:table-cell table:formula="of:=[.D434]-[.D433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[.B433]+10" office:value-type="float" office:value="4330" calcext:value-type="float">
            <text:p>4330</text:p>
          </table:table-cell>
          <table:table-cell office:value-type="float" office:value="8640000" calcext:value-type="float">
            <text:p>8640000</text:p>
          </table:table-cell>
          <table:table-cell table:formula="of:=[.B434]/[.C434]" office:value-type="float" office:value="0.000501157407407407" calcext:value-type="float">
            <text:p>0,00050115740740740700</text:p>
          </table:table-cell>
          <table:table-cell table:formula="of:=[.D435]-[.D434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[.B434]+10" office:value-type="float" office:value="4340" calcext:value-type="float">
            <text:p>4340</text:p>
          </table:table-cell>
          <table:table-cell office:value-type="float" office:value="8640000" calcext:value-type="float">
            <text:p>8640000</text:p>
          </table:table-cell>
          <table:table-cell table:formula="of:=[.B435]/[.C435]" office:value-type="float" office:value="0.000502314814814815" calcext:value-type="float">
            <text:p>0,00050231481481481500</text:p>
          </table:table-cell>
          <table:table-cell table:formula="of:=[.D436]-[.D435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[.B435]+10" office:value-type="float" office:value="4350" calcext:value-type="float">
            <text:p>4350</text:p>
          </table:table-cell>
          <table:table-cell office:value-type="float" office:value="8640000" calcext:value-type="float">
            <text:p>8640000</text:p>
          </table:table-cell>
          <table:table-cell table:formula="of:=[.B436]/[.C436]" office:value-type="float" office:value="0.000503472222222222" calcext:value-type="float">
            <text:p>0,00050347222222222200</text:p>
          </table:table-cell>
          <table:table-cell table:formula="of:=[.D437]-[.D436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[.B436]+10" office:value-type="float" office:value="4360" calcext:value-type="float">
            <text:p>4360</text:p>
          </table:table-cell>
          <table:table-cell office:value-type="float" office:value="8640000" calcext:value-type="float">
            <text:p>8640000</text:p>
          </table:table-cell>
          <table:table-cell table:formula="of:=[.B437]/[.C437]" office:value-type="float" office:value="0.00050462962962963" calcext:value-type="float">
            <text:p>0,00050462962962963000</text:p>
          </table:table-cell>
          <table:table-cell table:formula="of:=[.D438]-[.D437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[.B437]+10" office:value-type="float" office:value="4370" calcext:value-type="float">
            <text:p>4370</text:p>
          </table:table-cell>
          <table:table-cell office:value-type="float" office:value="8640000" calcext:value-type="float">
            <text:p>8640000</text:p>
          </table:table-cell>
          <table:table-cell table:formula="of:=[.B438]/[.C438]" office:value-type="float" office:value="0.000505787037037037" calcext:value-type="float">
            <text:p>0,00050578703703703700</text:p>
          </table:table-cell>
          <table:table-cell table:formula="of:=[.D439]-[.D438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[.B438]+10" office:value-type="float" office:value="4380" calcext:value-type="float">
            <text:p>4380</text:p>
          </table:table-cell>
          <table:table-cell office:value-type="float" office:value="8640000" calcext:value-type="float">
            <text:p>8640000</text:p>
          </table:table-cell>
          <table:table-cell table:formula="of:=[.B439]/[.C439]" office:value-type="float" office:value="0.000506944444444444" calcext:value-type="float">
            <text:p>0,00050694444444444400</text:p>
          </table:table-cell>
          <table:table-cell table:formula="of:=[.D440]-[.D439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[.B439]+10" office:value-type="float" office:value="4390" calcext:value-type="float">
            <text:p>4390</text:p>
          </table:table-cell>
          <table:table-cell office:value-type="float" office:value="8640000" calcext:value-type="float">
            <text:p>8640000</text:p>
          </table:table-cell>
          <table:table-cell table:formula="of:=[.B440]/[.C440]" office:value-type="float" office:value="0.000508101851851852" calcext:value-type="float">
            <text:p>0,00050810185185185200</text:p>
          </table:table-cell>
          <table:table-cell table:formula="of:=[.D441]-[.D440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[.B440]+10" office:value-type="float" office:value="4400" calcext:value-type="float">
            <text:p>4400</text:p>
          </table:table-cell>
          <table:table-cell office:value-type="float" office:value="8640000" calcext:value-type="float">
            <text:p>8640000</text:p>
          </table:table-cell>
          <table:table-cell table:formula="of:=[.B441]/[.C441]" office:value-type="float" office:value="0.000509259259259259" calcext:value-type="float">
            <text:p>0,00050925925925925900</text:p>
          </table:table-cell>
          <table:table-cell table:formula="of:=[.D442]-[.D441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[.B441]+10" office:value-type="float" office:value="4410" calcext:value-type="float">
            <text:p>4410</text:p>
          </table:table-cell>
          <table:table-cell office:value-type="float" office:value="8640000" calcext:value-type="float">
            <text:p>8640000</text:p>
          </table:table-cell>
          <table:table-cell table:formula="of:=[.B442]/[.C442]" office:value-type="float" office:value="0.000510416666666667" calcext:value-type="float">
            <text:p>0,00051041666666666700</text:p>
          </table:table-cell>
          <table:table-cell table:formula="of:=[.D443]-[.D442]" office:value-type="float" office:value="0.00000115740740740751" calcext:value-type="float">
            <text:p>0,00000115740740740751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[.B442]+10" office:value-type="float" office:value="4420" calcext:value-type="float">
            <text:p>4420</text:p>
          </table:table-cell>
          <table:table-cell office:value-type="float" office:value="8640000" calcext:value-type="float">
            <text:p>8640000</text:p>
          </table:table-cell>
          <table:table-cell table:formula="of:=[.B443]/[.C443]" office:value-type="float" office:value="0.000511574074074074" calcext:value-type="float">
            <text:p>0,00051157407407407400</text:p>
          </table:table-cell>
          <table:table-cell table:formula="of:=[.D444]-[.D443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[.B443]+10" office:value-type="float" office:value="4430" calcext:value-type="float">
            <text:p>4430</text:p>
          </table:table-cell>
          <table:table-cell office:value-type="float" office:value="8640000" calcext:value-type="float">
            <text:p>8640000</text:p>
          </table:table-cell>
          <table:table-cell table:formula="of:=[.B444]/[.C444]" office:value-type="float" office:value="0.000512731481481482" calcext:value-type="float">
            <text:p>0,00051273148148148200</text:p>
          </table:table-cell>
          <table:table-cell table:formula="of:=[.D445]-[.D444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[.B444]+10" office:value-type="float" office:value="4440" calcext:value-type="float">
            <text:p>4440</text:p>
          </table:table-cell>
          <table:table-cell office:value-type="float" office:value="8640000" calcext:value-type="float">
            <text:p>8640000</text:p>
          </table:table-cell>
          <table:table-cell table:formula="of:=[.B445]/[.C445]" office:value-type="float" office:value="0.000513888888888889" calcext:value-type="float">
            <text:p>0,00051388888888888900</text:p>
          </table:table-cell>
          <table:table-cell table:formula="of:=[.D446]-[.D445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[.B445]+10" office:value-type="float" office:value="4450" calcext:value-type="float">
            <text:p>4450</text:p>
          </table:table-cell>
          <table:table-cell office:value-type="float" office:value="8640000" calcext:value-type="float">
            <text:p>8640000</text:p>
          </table:table-cell>
          <table:table-cell table:formula="of:=[.B446]/[.C446]" office:value-type="float" office:value="0.000515046296296296" calcext:value-type="float">
            <text:p>0,00051504629629629600</text:p>
          </table:table-cell>
          <table:table-cell table:formula="of:=[.D447]-[.D446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[.B446]+10" office:value-type="float" office:value="4460" calcext:value-type="float">
            <text:p>4460</text:p>
          </table:table-cell>
          <table:table-cell office:value-type="float" office:value="8640000" calcext:value-type="float">
            <text:p>8640000</text:p>
          </table:table-cell>
          <table:table-cell table:formula="of:=[.B447]/[.C447]" office:value-type="float" office:value="0.000516203703703704" calcext:value-type="float">
            <text:p>0,00051620370370370400</text:p>
          </table:table-cell>
          <table:table-cell table:formula="of:=[.D448]-[.D447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[.B447]+10" office:value-type="float" office:value="4470" calcext:value-type="float">
            <text:p>4470</text:p>
          </table:table-cell>
          <table:table-cell office:value-type="float" office:value="8640000" calcext:value-type="float">
            <text:p>8640000</text:p>
          </table:table-cell>
          <table:table-cell table:formula="of:=[.B448]/[.C448]" office:value-type="float" office:value="0.000517361111111111" calcext:value-type="float">
            <text:p>0,00051736111111111100</text:p>
          </table:table-cell>
          <table:table-cell table:formula="of:=[.D449]-[.D448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[.B448]+10" office:value-type="float" office:value="4480" calcext:value-type="float">
            <text:p>4480</text:p>
          </table:table-cell>
          <table:table-cell office:value-type="float" office:value="8640000" calcext:value-type="float">
            <text:p>8640000</text:p>
          </table:table-cell>
          <table:table-cell table:formula="of:=[.B449]/[.C449]" office:value-type="float" office:value="0.000518518518518519" calcext:value-type="float">
            <text:p>0,00051851851851851900</text:p>
          </table:table-cell>
          <table:table-cell table:formula="of:=[.D450]-[.D449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[.B449]+10" office:value-type="float" office:value="4490" calcext:value-type="float">
            <text:p>4490</text:p>
          </table:table-cell>
          <table:table-cell office:value-type="float" office:value="8640000" calcext:value-type="float">
            <text:p>8640000</text:p>
          </table:table-cell>
          <table:table-cell table:formula="of:=[.B450]/[.C450]" office:value-type="float" office:value="0.000519675925925926" calcext:value-type="float">
            <text:p>0,00051967592592592600</text:p>
          </table:table-cell>
          <table:table-cell table:formula="of:=[.D451]-[.D450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[.B450]+10" office:value-type="float" office:value="4500" calcext:value-type="float">
            <text:p>4500</text:p>
          </table:table-cell>
          <table:table-cell office:value-type="float" office:value="8640000" calcext:value-type="float">
            <text:p>8640000</text:p>
          </table:table-cell>
          <table:table-cell table:formula="of:=[.B451]/[.C451]" office:value-type="float" office:value="0.000520833333333333" calcext:value-type="float">
            <text:p>0,00052083333333333300</text:p>
          </table:table-cell>
          <table:table-cell table:formula="of:=[.D452]-[.D451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[.B451]+10" office:value-type="float" office:value="4510" calcext:value-type="float">
            <text:p>4510</text:p>
          </table:table-cell>
          <table:table-cell office:value-type="float" office:value="8640000" calcext:value-type="float">
            <text:p>8640000</text:p>
          </table:table-cell>
          <table:table-cell table:formula="of:=[.B452]/[.C452]" office:value-type="float" office:value="0.000521990740740741" calcext:value-type="float">
            <text:p>0,00052199074074074100</text:p>
          </table:table-cell>
          <table:table-cell table:formula="of:=[.D453]-[.D452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[.B452]+10" office:value-type="float" office:value="4520" calcext:value-type="float">
            <text:p>4520</text:p>
          </table:table-cell>
          <table:table-cell office:value-type="float" office:value="8640000" calcext:value-type="float">
            <text:p>8640000</text:p>
          </table:table-cell>
          <table:table-cell table:formula="of:=[.B453]/[.C453]" office:value-type="float" office:value="0.000523148148148148" calcext:value-type="float">
            <text:p>0,00052314814814814800</text:p>
          </table:table-cell>
          <table:table-cell table:formula="of:=[.D454]-[.D453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[.B453]+10" office:value-type="float" office:value="4530" calcext:value-type="float">
            <text:p>4530</text:p>
          </table:table-cell>
          <table:table-cell office:value-type="float" office:value="8640000" calcext:value-type="float">
            <text:p>8640000</text:p>
          </table:table-cell>
          <table:table-cell table:formula="of:=[.B454]/[.C454]" office:value-type="float" office:value="0.000524305555555556" calcext:value-type="float">
            <text:p>0,00052430555555555600</text:p>
          </table:table-cell>
          <table:table-cell table:formula="of:=[.D455]-[.D454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[.B454]+10" office:value-type="float" office:value="4540" calcext:value-type="float">
            <text:p>4540</text:p>
          </table:table-cell>
          <table:table-cell office:value-type="float" office:value="8640000" calcext:value-type="float">
            <text:p>8640000</text:p>
          </table:table-cell>
          <table:table-cell table:formula="of:=[.B455]/[.C455]" office:value-type="float" office:value="0.000525462962962963" calcext:value-type="float">
            <text:p>0,00052546296296296300</text:p>
          </table:table-cell>
          <table:table-cell table:formula="of:=[.D456]-[.D455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[.B455]+10" office:value-type="float" office:value="4550" calcext:value-type="float">
            <text:p>4550</text:p>
          </table:table-cell>
          <table:table-cell office:value-type="float" office:value="8640000" calcext:value-type="float">
            <text:p>8640000</text:p>
          </table:table-cell>
          <table:table-cell table:formula="of:=[.B456]/[.C456]" office:value-type="float" office:value="0.00052662037037037" calcext:value-type="float">
            <text:p>0,00052662037037037000</text:p>
          </table:table-cell>
          <table:table-cell table:formula="of:=[.D457]-[.D456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[.B456]+10" office:value-type="float" office:value="4560" calcext:value-type="float">
            <text:p>4560</text:p>
          </table:table-cell>
          <table:table-cell office:value-type="float" office:value="8640000" calcext:value-type="float">
            <text:p>8640000</text:p>
          </table:table-cell>
          <table:table-cell table:formula="of:=[.B457]/[.C457]" office:value-type="float" office:value="0.000527777777777778" calcext:value-type="float">
            <text:p>0,00052777777777777800</text:p>
          </table:table-cell>
          <table:table-cell table:formula="of:=[.D458]-[.D457]" office:value-type="float" office:value="0.00000115740740740751" calcext:value-type="float">
            <text:p>0,00000115740740740751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[.B457]+10" office:value-type="float" office:value="4570" calcext:value-type="float">
            <text:p>4570</text:p>
          </table:table-cell>
          <table:table-cell office:value-type="float" office:value="8640000" calcext:value-type="float">
            <text:p>8640000</text:p>
          </table:table-cell>
          <table:table-cell table:formula="of:=[.B458]/[.C458]" office:value-type="float" office:value="0.000528935185185185" calcext:value-type="float">
            <text:p>0,00052893518518518500</text:p>
          </table:table-cell>
          <table:table-cell table:formula="of:=[.D459]-[.D458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[.B458]+10" office:value-type="float" office:value="4580" calcext:value-type="float">
            <text:p>4580</text:p>
          </table:table-cell>
          <table:table-cell office:value-type="float" office:value="8640000" calcext:value-type="float">
            <text:p>8640000</text:p>
          </table:table-cell>
          <table:table-cell table:formula="of:=[.B459]/[.C459]" office:value-type="float" office:value="0.000530092592592593" calcext:value-type="float">
            <text:p>0,00053009259259259300</text:p>
          </table:table-cell>
          <table:table-cell table:formula="of:=[.D460]-[.D459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[.B459]+10" office:value-type="float" office:value="4590" calcext:value-type="float">
            <text:p>4590</text:p>
          </table:table-cell>
          <table:table-cell office:value-type="float" office:value="8640000" calcext:value-type="float">
            <text:p>8640000</text:p>
          </table:table-cell>
          <table:table-cell table:formula="of:=[.B460]/[.C460]" office:value-type="float" office:value="0.00053125" calcext:value-type="float">
            <text:p>0,00053125000000000000</text:p>
          </table:table-cell>
          <table:table-cell table:formula="of:=[.D461]-[.D460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[.B460]+10" office:value-type="float" office:value="4600" calcext:value-type="float">
            <text:p>4600</text:p>
          </table:table-cell>
          <table:table-cell office:value-type="float" office:value="8640000" calcext:value-type="float">
            <text:p>8640000</text:p>
          </table:table-cell>
          <table:table-cell table:formula="of:=[.B461]/[.C461]" office:value-type="float" office:value="0.000532407407407407" calcext:value-type="float">
            <text:p>0,00053240740740740700</text:p>
          </table:table-cell>
          <table:table-cell table:formula="of:=[.D462]-[.D461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[.B461]+10" office:value-type="float" office:value="4610" calcext:value-type="float">
            <text:p>4610</text:p>
          </table:table-cell>
          <table:table-cell office:value-type="float" office:value="8640000" calcext:value-type="float">
            <text:p>8640000</text:p>
          </table:table-cell>
          <table:table-cell table:formula="of:=[.B462]/[.C462]" office:value-type="float" office:value="0.000533564814814815" calcext:value-type="float">
            <text:p>0,00053356481481481500</text:p>
          </table:table-cell>
          <table:table-cell table:formula="of:=[.D463]-[.D462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[.B462]+10" office:value-type="float" office:value="4620" calcext:value-type="float">
            <text:p>4620</text:p>
          </table:table-cell>
          <table:table-cell office:value-type="float" office:value="8640000" calcext:value-type="float">
            <text:p>8640000</text:p>
          </table:table-cell>
          <table:table-cell table:formula="of:=[.B463]/[.C463]" office:value-type="float" office:value="0.000534722222222222" calcext:value-type="float">
            <text:p>0,00053472222222222200</text:p>
          </table:table-cell>
          <table:table-cell table:formula="of:=[.D464]-[.D463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[.B463]+10" office:value-type="float" office:value="4630" calcext:value-type="float">
            <text:p>4630</text:p>
          </table:table-cell>
          <table:table-cell office:value-type="float" office:value="8640000" calcext:value-type="float">
            <text:p>8640000</text:p>
          </table:table-cell>
          <table:table-cell table:formula="of:=[.B464]/[.C464]" office:value-type="float" office:value="0.00053587962962963" calcext:value-type="float">
            <text:p>0,00053587962962963000</text:p>
          </table:table-cell>
          <table:table-cell table:formula="of:=[.D465]-[.D464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[.B464]+10" office:value-type="float" office:value="4640" calcext:value-type="float">
            <text:p>4640</text:p>
          </table:table-cell>
          <table:table-cell office:value-type="float" office:value="8640000" calcext:value-type="float">
            <text:p>8640000</text:p>
          </table:table-cell>
          <table:table-cell table:formula="of:=[.B465]/[.C465]" office:value-type="float" office:value="0.000537037037037037" calcext:value-type="float">
            <text:p>0,00053703703703703700</text:p>
          </table:table-cell>
          <table:table-cell table:formula="of:=[.D466]-[.D465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[.B465]+10" office:value-type="float" office:value="4650" calcext:value-type="float">
            <text:p>4650</text:p>
          </table:table-cell>
          <table:table-cell office:value-type="float" office:value="8640000" calcext:value-type="float">
            <text:p>8640000</text:p>
          </table:table-cell>
          <table:table-cell table:formula="of:=[.B466]/[.C466]" office:value-type="float" office:value="0.000538194444444444" calcext:value-type="float">
            <text:p>0,00053819444444444400</text:p>
          </table:table-cell>
          <table:table-cell table:formula="of:=[.D467]-[.D466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[.B466]+10" office:value-type="float" office:value="4660" calcext:value-type="float">
            <text:p>4660</text:p>
          </table:table-cell>
          <table:table-cell office:value-type="float" office:value="8640000" calcext:value-type="float">
            <text:p>8640000</text:p>
          </table:table-cell>
          <table:table-cell table:formula="of:=[.B467]/[.C467]" office:value-type="float" office:value="0.000539351851851852" calcext:value-type="float">
            <text:p>0,00053935185185185200</text:p>
          </table:table-cell>
          <table:table-cell table:formula="of:=[.D468]-[.D467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[.B467]+10" office:value-type="float" office:value="4670" calcext:value-type="float">
            <text:p>4670</text:p>
          </table:table-cell>
          <table:table-cell office:value-type="float" office:value="8640000" calcext:value-type="float">
            <text:p>8640000</text:p>
          </table:table-cell>
          <table:table-cell table:formula="of:=[.B468]/[.C468]" office:value-type="float" office:value="0.000540509259259259" calcext:value-type="float">
            <text:p>0,00054050925925925900</text:p>
          </table:table-cell>
          <table:table-cell table:formula="of:=[.D469]-[.D468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[.B468]+10" office:value-type="float" office:value="4680" calcext:value-type="float">
            <text:p>4680</text:p>
          </table:table-cell>
          <table:table-cell office:value-type="float" office:value="8640000" calcext:value-type="float">
            <text:p>8640000</text:p>
          </table:table-cell>
          <table:table-cell table:formula="of:=[.B469]/[.C469]" office:value-type="float" office:value="0.000541666666666667" calcext:value-type="float">
            <text:p>0,00054166666666666700</text:p>
          </table:table-cell>
          <table:table-cell table:formula="of:=[.D470]-[.D469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[.B469]+10" office:value-type="float" office:value="4690" calcext:value-type="float">
            <text:p>4690</text:p>
          </table:table-cell>
          <table:table-cell office:value-type="float" office:value="8640000" calcext:value-type="float">
            <text:p>8640000</text:p>
          </table:table-cell>
          <table:table-cell table:formula="of:=[.B470]/[.C470]" office:value-type="float" office:value="0.000542824074074074" calcext:value-type="float">
            <text:p>0,00054282407407407400</text:p>
          </table:table-cell>
          <table:table-cell table:formula="of:=[.D471]-[.D470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[.B470]+10" office:value-type="float" office:value="4700" calcext:value-type="float">
            <text:p>4700</text:p>
          </table:table-cell>
          <table:table-cell office:value-type="float" office:value="8640000" calcext:value-type="float">
            <text:p>8640000</text:p>
          </table:table-cell>
          <table:table-cell table:formula="of:=[.B471]/[.C471]" office:value-type="float" office:value="0.000543981481481481" calcext:value-type="float">
            <text:p>0,00054398148148148100</text:p>
          </table:table-cell>
          <table:table-cell table:formula="of:=[.D472]-[.D471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[.B471]+10" office:value-type="float" office:value="4710" calcext:value-type="float">
            <text:p>4710</text:p>
          </table:table-cell>
          <table:table-cell office:value-type="float" office:value="8640000" calcext:value-type="float">
            <text:p>8640000</text:p>
          </table:table-cell>
          <table:table-cell table:formula="of:=[.B472]/[.C472]" office:value-type="float" office:value="0.000545138888888889" calcext:value-type="float">
            <text:p>0,00054513888888888900</text:p>
          </table:table-cell>
          <table:table-cell table:formula="of:=[.D473]-[.D472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[.B472]+10" office:value-type="float" office:value="4720" calcext:value-type="float">
            <text:p>4720</text:p>
          </table:table-cell>
          <table:table-cell office:value-type="float" office:value="8640000" calcext:value-type="float">
            <text:p>8640000</text:p>
          </table:table-cell>
          <table:table-cell table:formula="of:=[.B473]/[.C473]" office:value-type="float" office:value="0.000546296296296296" calcext:value-type="float">
            <text:p>0,00054629629629629600</text:p>
          </table:table-cell>
          <table:table-cell table:formula="of:=[.D474]-[.D473]" office:value-type="float" office:value="0.00000115740740740751" calcext:value-type="float">
            <text:p>0,00000115740740740751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[.B473]+10" office:value-type="float" office:value="4730" calcext:value-type="float">
            <text:p>4730</text:p>
          </table:table-cell>
          <table:table-cell office:value-type="float" office:value="8640000" calcext:value-type="float">
            <text:p>8640000</text:p>
          </table:table-cell>
          <table:table-cell table:formula="of:=[.B474]/[.C474]" office:value-type="float" office:value="0.000547453703703704" calcext:value-type="float">
            <text:p>0,00054745370370370400</text:p>
          </table:table-cell>
          <table:table-cell table:formula="of:=[.D475]-[.D474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[.B474]+10" office:value-type="float" office:value="4740" calcext:value-type="float">
            <text:p>4740</text:p>
          </table:table-cell>
          <table:table-cell office:value-type="float" office:value="8640000" calcext:value-type="float">
            <text:p>8640000</text:p>
          </table:table-cell>
          <table:table-cell table:formula="of:=[.B475]/[.C475]" office:value-type="float" office:value="0.000548611111111111" calcext:value-type="float">
            <text:p>0,00054861111111111100</text:p>
          </table:table-cell>
          <table:table-cell table:formula="of:=[.D476]-[.D475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[.B475]+10" office:value-type="float" office:value="4750" calcext:value-type="float">
            <text:p>4750</text:p>
          </table:table-cell>
          <table:table-cell office:value-type="float" office:value="8640000" calcext:value-type="float">
            <text:p>8640000</text:p>
          </table:table-cell>
          <table:table-cell table:formula="of:=[.B476]/[.C476]" office:value-type="float" office:value="0.000549768518518519" calcext:value-type="float">
            <text:p>0,00054976851851851900</text:p>
          </table:table-cell>
          <table:table-cell table:formula="of:=[.D477]-[.D476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[.B476]+10" office:value-type="float" office:value="4760" calcext:value-type="float">
            <text:p>4760</text:p>
          </table:table-cell>
          <table:table-cell office:value-type="float" office:value="8640000" calcext:value-type="float">
            <text:p>8640000</text:p>
          </table:table-cell>
          <table:table-cell table:formula="of:=[.B477]/[.C477]" office:value-type="float" office:value="0.000550925925925926" calcext:value-type="float">
            <text:p>0,00055092592592592600</text:p>
          </table:table-cell>
          <table:table-cell table:formula="of:=[.D478]-[.D477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[.B477]+10" office:value-type="float" office:value="4770" calcext:value-type="float">
            <text:p>4770</text:p>
          </table:table-cell>
          <table:table-cell office:value-type="float" office:value="8640000" calcext:value-type="float">
            <text:p>8640000</text:p>
          </table:table-cell>
          <table:table-cell table:formula="of:=[.B478]/[.C478]" office:value-type="float" office:value="0.000552083333333333" calcext:value-type="float">
            <text:p>0,00055208333333333300</text:p>
          </table:table-cell>
          <table:table-cell table:formula="of:=[.D479]-[.D478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[.B478]+10" office:value-type="float" office:value="4780" calcext:value-type="float">
            <text:p>4780</text:p>
          </table:table-cell>
          <table:table-cell office:value-type="float" office:value="8640000" calcext:value-type="float">
            <text:p>8640000</text:p>
          </table:table-cell>
          <table:table-cell table:formula="of:=[.B479]/[.C479]" office:value-type="float" office:value="0.000553240740740741" calcext:value-type="float">
            <text:p>0,00055324074074074100</text:p>
          </table:table-cell>
          <table:table-cell table:formula="of:=[.D480]-[.D479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[.B479]+10" office:value-type="float" office:value="4790" calcext:value-type="float">
            <text:p>4790</text:p>
          </table:table-cell>
          <table:table-cell office:value-type="float" office:value="8640000" calcext:value-type="float">
            <text:p>8640000</text:p>
          </table:table-cell>
          <table:table-cell table:formula="of:=[.B480]/[.C480]" office:value-type="float" office:value="0.000554398148148148" calcext:value-type="float">
            <text:p>0,00055439814814814800</text:p>
          </table:table-cell>
          <table:table-cell table:formula="of:=[.D481]-[.D480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[.B480]+10" office:value-type="float" office:value="4800" calcext:value-type="float">
            <text:p>4800</text:p>
          </table:table-cell>
          <table:table-cell office:value-type="float" office:value="8640000" calcext:value-type="float">
            <text:p>8640000</text:p>
          </table:table-cell>
          <table:table-cell table:formula="of:=[.B481]/[.C481]" office:value-type="float" office:value="0.000555555555555556" calcext:value-type="float">
            <text:p>0,00055555555555555600</text:p>
          </table:table-cell>
          <table:table-cell table:formula="of:=[.D482]-[.D481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[.B481]+10" office:value-type="float" office:value="4810" calcext:value-type="float">
            <text:p>4810</text:p>
          </table:table-cell>
          <table:table-cell office:value-type="float" office:value="8640000" calcext:value-type="float">
            <text:p>8640000</text:p>
          </table:table-cell>
          <table:table-cell table:formula="of:=[.B482]/[.C482]" office:value-type="float" office:value="0.000556712962962963" calcext:value-type="float">
            <text:p>0,00055671296296296300</text:p>
          </table:table-cell>
          <table:table-cell table:formula="of:=[.D483]-[.D482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[.B482]+10" office:value-type="float" office:value="4820" calcext:value-type="float">
            <text:p>4820</text:p>
          </table:table-cell>
          <table:table-cell office:value-type="float" office:value="8640000" calcext:value-type="float">
            <text:p>8640000</text:p>
          </table:table-cell>
          <table:table-cell table:formula="of:=[.B483]/[.C483]" office:value-type="float" office:value="0.00055787037037037" calcext:value-type="float">
            <text:p>0,00055787037037037000</text:p>
          </table:table-cell>
          <table:table-cell table:formula="of:=[.D484]-[.D483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[.B483]+10" office:value-type="float" office:value="4830" calcext:value-type="float">
            <text:p>4830</text:p>
          </table:table-cell>
          <table:table-cell office:value-type="float" office:value="8640000" calcext:value-type="float">
            <text:p>8640000</text:p>
          </table:table-cell>
          <table:table-cell table:formula="of:=[.B484]/[.C484]" office:value-type="float" office:value="0.000559027777777778" calcext:value-type="float">
            <text:p>0,00055902777777777800</text:p>
          </table:table-cell>
          <table:table-cell table:formula="of:=[.D485]-[.D484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[.B484]+10" office:value-type="float" office:value="4840" calcext:value-type="float">
            <text:p>4840</text:p>
          </table:table-cell>
          <table:table-cell office:value-type="float" office:value="8640000" calcext:value-type="float">
            <text:p>8640000</text:p>
          </table:table-cell>
          <table:table-cell table:formula="of:=[.B485]/[.C485]" office:value-type="float" office:value="0.000560185185185185" calcext:value-type="float">
            <text:p>0,00056018518518518500</text:p>
          </table:table-cell>
          <table:table-cell table:formula="of:=[.D486]-[.D485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[.B485]+10" office:value-type="float" office:value="4850" calcext:value-type="float">
            <text:p>4850</text:p>
          </table:table-cell>
          <table:table-cell office:value-type="float" office:value="8640000" calcext:value-type="float">
            <text:p>8640000</text:p>
          </table:table-cell>
          <table:table-cell table:formula="of:=[.B486]/[.C486]" office:value-type="float" office:value="0.000561342592592593" calcext:value-type="float">
            <text:p>0,00056134259259259300</text:p>
          </table:table-cell>
          <table:table-cell table:formula="of:=[.D487]-[.D486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[.B486]+10" office:value-type="float" office:value="4860" calcext:value-type="float">
            <text:p>4860</text:p>
          </table:table-cell>
          <table:table-cell office:value-type="float" office:value="8640000" calcext:value-type="float">
            <text:p>8640000</text:p>
          </table:table-cell>
          <table:table-cell table:formula="of:=[.B487]/[.C487]" office:value-type="float" office:value="0.0005625" calcext:value-type="float">
            <text:p>0,00056250000000000000</text:p>
          </table:table-cell>
          <table:table-cell table:formula="of:=[.D488]-[.D487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[.B487]+10" office:value-type="float" office:value="4870" calcext:value-type="float">
            <text:p>4870</text:p>
          </table:table-cell>
          <table:table-cell office:value-type="float" office:value="8640000" calcext:value-type="float">
            <text:p>8640000</text:p>
          </table:table-cell>
          <table:table-cell table:formula="of:=[.B488]/[.C488]" office:value-type="float" office:value="0.000563657407407407" calcext:value-type="float">
            <text:p>0,00056365740740740700</text:p>
          </table:table-cell>
          <table:table-cell table:formula="of:=[.D489]-[.D488]" office:value-type="float" office:value="0.00000115740740740751" calcext:value-type="float">
            <text:p>0,00000115740740740751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[.B488]+10" office:value-type="float" office:value="4880" calcext:value-type="float">
            <text:p>4880</text:p>
          </table:table-cell>
          <table:table-cell office:value-type="float" office:value="8640000" calcext:value-type="float">
            <text:p>8640000</text:p>
          </table:table-cell>
          <table:table-cell table:formula="of:=[.B489]/[.C489]" office:value-type="float" office:value="0.000564814814814815" calcext:value-type="float">
            <text:p>0,00056481481481481500</text:p>
          </table:table-cell>
          <table:table-cell table:formula="of:=[.D490]-[.D489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[.B489]+10" office:value-type="float" office:value="4890" calcext:value-type="float">
            <text:p>4890</text:p>
          </table:table-cell>
          <table:table-cell office:value-type="float" office:value="8640000" calcext:value-type="float">
            <text:p>8640000</text:p>
          </table:table-cell>
          <table:table-cell table:formula="of:=[.B490]/[.C490]" office:value-type="float" office:value="0.000565972222222222" calcext:value-type="float">
            <text:p>0,00056597222222222200</text:p>
          </table:table-cell>
          <table:table-cell table:formula="of:=[.D491]-[.D490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[.B490]+10" office:value-type="float" office:value="4900" calcext:value-type="float">
            <text:p>4900</text:p>
          </table:table-cell>
          <table:table-cell office:value-type="float" office:value="8640000" calcext:value-type="float">
            <text:p>8640000</text:p>
          </table:table-cell>
          <table:table-cell table:formula="of:=[.B491]/[.C491]" office:value-type="float" office:value="0.00056712962962963" calcext:value-type="float">
            <text:p>0,00056712962962963000</text:p>
          </table:table-cell>
          <table:table-cell table:formula="of:=[.D492]-[.D491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[.B491]+10" office:value-type="float" office:value="4910" calcext:value-type="float">
            <text:p>4910</text:p>
          </table:table-cell>
          <table:table-cell office:value-type="float" office:value="8640000" calcext:value-type="float">
            <text:p>8640000</text:p>
          </table:table-cell>
          <table:table-cell table:formula="of:=[.B492]/[.C492]" office:value-type="float" office:value="0.000568287037037037" calcext:value-type="float">
            <text:p>0,00056828703703703700</text:p>
          </table:table-cell>
          <table:table-cell table:formula="of:=[.D493]-[.D492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[.B492]+10" office:value-type="float" office:value="4920" calcext:value-type="float">
            <text:p>4920</text:p>
          </table:table-cell>
          <table:table-cell office:value-type="float" office:value="8640000" calcext:value-type="float">
            <text:p>8640000</text:p>
          </table:table-cell>
          <table:table-cell table:formula="of:=[.B493]/[.C493]" office:value-type="float" office:value="0.000569444444444445" calcext:value-type="float">
            <text:p>0,00056944444444444500</text:p>
          </table:table-cell>
          <table:table-cell table:formula="of:=[.D494]-[.D493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[.B493]+10" office:value-type="float" office:value="4930" calcext:value-type="float">
            <text:p>4930</text:p>
          </table:table-cell>
          <table:table-cell office:value-type="float" office:value="8640000" calcext:value-type="float">
            <text:p>8640000</text:p>
          </table:table-cell>
          <table:table-cell table:formula="of:=[.B494]/[.C494]" office:value-type="float" office:value="0.000570601851851852" calcext:value-type="float">
            <text:p>0,00057060185185185200</text:p>
          </table:table-cell>
          <table:table-cell table:formula="of:=[.D495]-[.D494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[.B494]+10" office:value-type="float" office:value="4940" calcext:value-type="float">
            <text:p>4940</text:p>
          </table:table-cell>
          <table:table-cell office:value-type="float" office:value="8640000" calcext:value-type="float">
            <text:p>8640000</text:p>
          </table:table-cell>
          <table:table-cell table:formula="of:=[.B495]/[.C495]" office:value-type="float" office:value="0.000571759259259259" calcext:value-type="float">
            <text:p>0,00057175925925925900</text:p>
          </table:table-cell>
          <table:table-cell table:formula="of:=[.D496]-[.D495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[.B495]+10" office:value-type="float" office:value="4950" calcext:value-type="float">
            <text:p>4950</text:p>
          </table:table-cell>
          <table:table-cell office:value-type="float" office:value="8640000" calcext:value-type="float">
            <text:p>8640000</text:p>
          </table:table-cell>
          <table:table-cell table:formula="of:=[.B496]/[.C496]" office:value-type="float" office:value="0.000572916666666667" calcext:value-type="float">
            <text:p>0,00057291666666666700</text:p>
          </table:table-cell>
          <table:table-cell table:formula="of:=[.D497]-[.D496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[.B496]+10" office:value-type="float" office:value="4960" calcext:value-type="float">
            <text:p>4960</text:p>
          </table:table-cell>
          <table:table-cell office:value-type="float" office:value="8640000" calcext:value-type="float">
            <text:p>8640000</text:p>
          </table:table-cell>
          <table:table-cell table:formula="of:=[.B497]/[.C497]" office:value-type="float" office:value="0.000574074074074074" calcext:value-type="float">
            <text:p>0,00057407407407407400</text:p>
          </table:table-cell>
          <table:table-cell table:formula="of:=[.D498]-[.D497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[.B497]+10" office:value-type="float" office:value="4970" calcext:value-type="float">
            <text:p>4970</text:p>
          </table:table-cell>
          <table:table-cell office:value-type="float" office:value="8640000" calcext:value-type="float">
            <text:p>8640000</text:p>
          </table:table-cell>
          <table:table-cell table:formula="of:=[.B498]/[.C498]" office:value-type="float" office:value="0.000575231481481482" calcext:value-type="float">
            <text:p>0,00057523148148148200</text:p>
          </table:table-cell>
          <table:table-cell table:formula="of:=[.D499]-[.D498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[.B498]+10" office:value-type="float" office:value="4980" calcext:value-type="float">
            <text:p>4980</text:p>
          </table:table-cell>
          <table:table-cell office:value-type="float" office:value="8640000" calcext:value-type="float">
            <text:p>8640000</text:p>
          </table:table-cell>
          <table:table-cell table:formula="of:=[.B499]/[.C499]" office:value-type="float" office:value="0.000576388888888889" calcext:value-type="float">
            <text:p>0,00057638888888888900</text:p>
          </table:table-cell>
          <table:table-cell table:formula="of:=[.D500]-[.D499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[.B499]+10" office:value-type="float" office:value="4990" calcext:value-type="float">
            <text:p>4990</text:p>
          </table:table-cell>
          <table:table-cell office:value-type="float" office:value="8640000" calcext:value-type="float">
            <text:p>8640000</text:p>
          </table:table-cell>
          <table:table-cell table:formula="of:=[.B500]/[.C500]" office:value-type="float" office:value="0.000577546296296296" calcext:value-type="float">
            <text:p>0,00057754629629629600</text:p>
          </table:table-cell>
          <table:table-cell table:formula="of:=[.D501]-[.D500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B500]+10" office:value-type="float" office:value="5000" calcext:value-type="float">
            <text:p>5000</text:p>
          </table:table-cell>
          <table:table-cell office:value-type="float" office:value="8640000" calcext:value-type="float">
            <text:p>8640000</text:p>
          </table:table-cell>
          <table:table-cell table:formula="of:=[.B501]/[.C501]" office:value-type="float" office:value="0.000578703703703704" calcext:value-type="float">
            <text:p>0,00057870370370370400</text:p>
          </table:table-cell>
          <table:table-cell table:formula="of:=[.D502]-[.D501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[.B501]+10" office:value-type="float" office:value="5010" calcext:value-type="float">
            <text:p>5010</text:p>
          </table:table-cell>
          <table:table-cell office:value-type="float" office:value="8640000" calcext:value-type="float">
            <text:p>8640000</text:p>
          </table:table-cell>
          <table:table-cell table:formula="of:=[.B502]/[.C502]" office:value-type="float" office:value="0.000579861111111111" calcext:value-type="float">
            <text:p>0,00057986111111111100</text:p>
          </table:table-cell>
          <table:table-cell table:formula="of:=[.D503]-[.D502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[.B502]+10" office:value-type="float" office:value="5020" calcext:value-type="float">
            <text:p>5020</text:p>
          </table:table-cell>
          <table:table-cell office:value-type="float" office:value="8640000" calcext:value-type="float">
            <text:p>8640000</text:p>
          </table:table-cell>
          <table:table-cell table:formula="of:=[.B503]/[.C503]" office:value-type="float" office:value="0.000581018518518519" calcext:value-type="float">
            <text:p>0,00058101851851851900</text:p>
          </table:table-cell>
          <table:table-cell table:formula="of:=[.D504]-[.D503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[.B503]+10" office:value-type="float" office:value="5030" calcext:value-type="float">
            <text:p>5030</text:p>
          </table:table-cell>
          <table:table-cell office:value-type="float" office:value="8640000" calcext:value-type="float">
            <text:p>8640000</text:p>
          </table:table-cell>
          <table:table-cell table:formula="of:=[.B504]/[.C504]" office:value-type="float" office:value="0.000582175925925926" calcext:value-type="float">
            <text:p>0,00058217592592592600</text:p>
          </table:table-cell>
          <table:table-cell table:formula="of:=[.D505]-[.D504]" office:value-type="float" office:value="0.00000115740740740751" calcext:value-type="float">
            <text:p>0,00000115740740740751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[.B504]+10" office:value-type="float" office:value="5040" calcext:value-type="float">
            <text:p>5040</text:p>
          </table:table-cell>
          <table:table-cell office:value-type="float" office:value="8640000" calcext:value-type="float">
            <text:p>8640000</text:p>
          </table:table-cell>
          <table:table-cell table:formula="of:=[.B505]/[.C505]" office:value-type="float" office:value="0.000583333333333333" calcext:value-type="float">
            <text:p>0,00058333333333333300</text:p>
          </table:table-cell>
          <table:table-cell table:formula="of:=[.D506]-[.D505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[.B505]+10" office:value-type="float" office:value="5050" calcext:value-type="float">
            <text:p>5050</text:p>
          </table:table-cell>
          <table:table-cell office:value-type="float" office:value="8640000" calcext:value-type="float">
            <text:p>8640000</text:p>
          </table:table-cell>
          <table:table-cell table:formula="of:=[.B506]/[.C506]" office:value-type="float" office:value="0.000584490740740741" calcext:value-type="float">
            <text:p>0,00058449074074074100</text:p>
          </table:table-cell>
          <table:table-cell table:formula="of:=[.D507]-[.D506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[.B506]+10" office:value-type="float" office:value="5060" calcext:value-type="float">
            <text:p>5060</text:p>
          </table:table-cell>
          <table:table-cell office:value-type="float" office:value="8640000" calcext:value-type="float">
            <text:p>8640000</text:p>
          </table:table-cell>
          <table:table-cell table:formula="of:=[.B507]/[.C507]" office:value-type="float" office:value="0.000585648148148148" calcext:value-type="float">
            <text:p>0,00058564814814814800</text:p>
          </table:table-cell>
          <table:table-cell table:formula="of:=[.D508]-[.D507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[.B507]+10" office:value-type="float" office:value="5070" calcext:value-type="float">
            <text:p>5070</text:p>
          </table:table-cell>
          <table:table-cell office:value-type="float" office:value="8640000" calcext:value-type="float">
            <text:p>8640000</text:p>
          </table:table-cell>
          <table:table-cell table:formula="of:=[.B508]/[.C508]" office:value-type="float" office:value="0.000586805555555556" calcext:value-type="float">
            <text:p>0,00058680555555555600</text:p>
          </table:table-cell>
          <table:table-cell table:formula="of:=[.D509]-[.D508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[.B508]+10" office:value-type="float" office:value="5080" calcext:value-type="float">
            <text:p>5080</text:p>
          </table:table-cell>
          <table:table-cell office:value-type="float" office:value="8640000" calcext:value-type="float">
            <text:p>8640000</text:p>
          </table:table-cell>
          <table:table-cell table:formula="of:=[.B509]/[.C509]" office:value-type="float" office:value="0.000587962962962963" calcext:value-type="float">
            <text:p>0,00058796296296296300</text:p>
          </table:table-cell>
          <table:table-cell table:formula="of:=[.D510]-[.D509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[.B509]+10" office:value-type="float" office:value="5090" calcext:value-type="float">
            <text:p>5090</text:p>
          </table:table-cell>
          <table:table-cell office:value-type="float" office:value="8640000" calcext:value-type="float">
            <text:p>8640000</text:p>
          </table:table-cell>
          <table:table-cell table:formula="of:=[.B510]/[.C510]" office:value-type="float" office:value="0.00058912037037037" calcext:value-type="float">
            <text:p>0,00058912037037037000</text:p>
          </table:table-cell>
          <table:table-cell table:formula="of:=[.D511]-[.D510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[.B510]+10" office:value-type="float" office:value="5100" calcext:value-type="float">
            <text:p>5100</text:p>
          </table:table-cell>
          <table:table-cell office:value-type="float" office:value="8640000" calcext:value-type="float">
            <text:p>8640000</text:p>
          </table:table-cell>
          <table:table-cell table:formula="of:=[.B511]/[.C511]" office:value-type="float" office:value="0.000590277777777778" calcext:value-type="float">
            <text:p>0,00059027777777777800</text:p>
          </table:table-cell>
          <table:table-cell table:formula="of:=[.D512]-[.D511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[.B511]+10" office:value-type="float" office:value="5110" calcext:value-type="float">
            <text:p>5110</text:p>
          </table:table-cell>
          <table:table-cell office:value-type="float" office:value="8640000" calcext:value-type="float">
            <text:p>8640000</text:p>
          </table:table-cell>
          <table:table-cell table:formula="of:=[.B512]/[.C512]" office:value-type="float" office:value="0.000591435185185185" calcext:value-type="float">
            <text:p>0,00059143518518518500</text:p>
          </table:table-cell>
          <table:table-cell table:formula="of:=[.D513]-[.D512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.B512]+10" office:value-type="float" office:value="5120" calcext:value-type="float">
            <text:p>5120</text:p>
          </table:table-cell>
          <table:table-cell office:value-type="float" office:value="8640000" calcext:value-type="float">
            <text:p>8640000</text:p>
          </table:table-cell>
          <table:table-cell table:formula="of:=[.B513]/[.C513]" office:value-type="float" office:value="0.000592592592592593" calcext:value-type="float">
            <text:p>0,00059259259259259300</text:p>
          </table:table-cell>
          <table:table-cell table:formula="of:=[.D514]-[.D513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[.B513]+10" office:value-type="float" office:value="5130" calcext:value-type="float">
            <text:p>5130</text:p>
          </table:table-cell>
          <table:table-cell office:value-type="float" office:value="8640000" calcext:value-type="float">
            <text:p>8640000</text:p>
          </table:table-cell>
          <table:table-cell table:formula="of:=[.B514]/[.C514]" office:value-type="float" office:value="0.00059375" calcext:value-type="float">
            <text:p>0,00059375000000000000</text:p>
          </table:table-cell>
          <table:table-cell table:formula="of:=[.D515]-[.D514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[.B514]+10" office:value-type="float" office:value="5140" calcext:value-type="float">
            <text:p>5140</text:p>
          </table:table-cell>
          <table:table-cell office:value-type="float" office:value="8640000" calcext:value-type="float">
            <text:p>8640000</text:p>
          </table:table-cell>
          <table:table-cell table:formula="of:=[.B515]/[.C515]" office:value-type="float" office:value="0.000594907407407407" calcext:value-type="float">
            <text:p>0,00059490740740740700</text:p>
          </table:table-cell>
          <table:table-cell table:formula="of:=[.D516]-[.D515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[.B515]+10" office:value-type="float" office:value="5150" calcext:value-type="float">
            <text:p>5150</text:p>
          </table:table-cell>
          <table:table-cell office:value-type="float" office:value="8640000" calcext:value-type="float">
            <text:p>8640000</text:p>
          </table:table-cell>
          <table:table-cell table:formula="of:=[.B516]/[.C516]" office:value-type="float" office:value="0.000596064814814815" calcext:value-type="float">
            <text:p>0,00059606481481481500</text:p>
          </table:table-cell>
          <table:table-cell table:formula="of:=[.D517]-[.D516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[.B516]+10" office:value-type="float" office:value="5160" calcext:value-type="float">
            <text:p>5160</text:p>
          </table:table-cell>
          <table:table-cell office:value-type="float" office:value="8640000" calcext:value-type="float">
            <text:p>8640000</text:p>
          </table:table-cell>
          <table:table-cell table:formula="of:=[.B517]/[.C517]" office:value-type="float" office:value="0.000597222222222222" calcext:value-type="float">
            <text:p>0,00059722222222222200</text:p>
          </table:table-cell>
          <table:table-cell table:formula="of:=[.D518]-[.D517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[.B517]+10" office:value-type="float" office:value="5170" calcext:value-type="float">
            <text:p>5170</text:p>
          </table:table-cell>
          <table:table-cell office:value-type="float" office:value="8640000" calcext:value-type="float">
            <text:p>8640000</text:p>
          </table:table-cell>
          <table:table-cell table:formula="of:=[.B518]/[.C518]" office:value-type="float" office:value="0.00059837962962963" calcext:value-type="float">
            <text:p>0,00059837962962963000</text:p>
          </table:table-cell>
          <table:table-cell table:formula="of:=[.D519]-[.D518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[.B518]+10" office:value-type="float" office:value="5180" calcext:value-type="float">
            <text:p>5180</text:p>
          </table:table-cell>
          <table:table-cell office:value-type="float" office:value="8640000" calcext:value-type="float">
            <text:p>8640000</text:p>
          </table:table-cell>
          <table:table-cell table:formula="of:=[.B519]/[.C519]" office:value-type="float" office:value="0.000599537037037037" calcext:value-type="float">
            <text:p>0,00059953703703703700</text:p>
          </table:table-cell>
          <table:table-cell table:formula="of:=[.D520]-[.D519]" office:value-type="float" office:value="0.00000115740740740751" calcext:value-type="float">
            <text:p>0,00000115740740740751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[.B519]+10" office:value-type="float" office:value="5190" calcext:value-type="float">
            <text:p>5190</text:p>
          </table:table-cell>
          <table:table-cell office:value-type="float" office:value="8640000" calcext:value-type="float">
            <text:p>8640000</text:p>
          </table:table-cell>
          <table:table-cell table:formula="of:=[.B520]/[.C520]" office:value-type="float" office:value="0.000600694444444445" calcext:value-type="float">
            <text:p>0,00060069444444444500</text:p>
          </table:table-cell>
          <table:table-cell table:formula="of:=[.D521]-[.D520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[.B520]+10" office:value-type="float" office:value="5200" calcext:value-type="float">
            <text:p>5200</text:p>
          </table:table-cell>
          <table:table-cell office:value-type="float" office:value="8640000" calcext:value-type="float">
            <text:p>8640000</text:p>
          </table:table-cell>
          <table:table-cell table:formula="of:=[.B521]/[.C521]" office:value-type="float" office:value="0.000601851851851852" calcext:value-type="float">
            <text:p>0,00060185185185185200</text:p>
          </table:table-cell>
          <table:table-cell table:formula="of:=[.D522]-[.D521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[.B521]+10" office:value-type="float" office:value="5210" calcext:value-type="float">
            <text:p>5210</text:p>
          </table:table-cell>
          <table:table-cell office:value-type="float" office:value="8640000" calcext:value-type="float">
            <text:p>8640000</text:p>
          </table:table-cell>
          <table:table-cell table:formula="of:=[.B522]/[.C522]" office:value-type="float" office:value="0.000603009259259259" calcext:value-type="float">
            <text:p>0,00060300925925925900</text:p>
          </table:table-cell>
          <table:table-cell table:formula="of:=[.D523]-[.D522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[.B522]+10" office:value-type="float" office:value="5220" calcext:value-type="float">
            <text:p>5220</text:p>
          </table:table-cell>
          <table:table-cell office:value-type="float" office:value="8640000" calcext:value-type="float">
            <text:p>8640000</text:p>
          </table:table-cell>
          <table:table-cell table:formula="of:=[.B523]/[.C523]" office:value-type="float" office:value="0.000604166666666667" calcext:value-type="float">
            <text:p>0,00060416666666666700</text:p>
          </table:table-cell>
          <table:table-cell table:formula="of:=[.D524]-[.D523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[.B523]+10" office:value-type="float" office:value="5230" calcext:value-type="float">
            <text:p>5230</text:p>
          </table:table-cell>
          <table:table-cell office:value-type="float" office:value="8640000" calcext:value-type="float">
            <text:p>8640000</text:p>
          </table:table-cell>
          <table:table-cell table:formula="of:=[.B524]/[.C524]" office:value-type="float" office:value="0.000605324074074074" calcext:value-type="float">
            <text:p>0,00060532407407407400</text:p>
          </table:table-cell>
          <table:table-cell table:formula="of:=[.D525]-[.D524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[.B524]+10" office:value-type="float" office:value="5240" calcext:value-type="float">
            <text:p>5240</text:p>
          </table:table-cell>
          <table:table-cell office:value-type="float" office:value="8640000" calcext:value-type="float">
            <text:p>8640000</text:p>
          </table:table-cell>
          <table:table-cell table:formula="of:=[.B525]/[.C525]" office:value-type="float" office:value="0.000606481481481482" calcext:value-type="float">
            <text:p>0,00060648148148148200</text:p>
          </table:table-cell>
          <table:table-cell table:formula="of:=[.D526]-[.D525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[.B525]+10" office:value-type="float" office:value="5250" calcext:value-type="float">
            <text:p>5250</text:p>
          </table:table-cell>
          <table:table-cell office:value-type="float" office:value="8640000" calcext:value-type="float">
            <text:p>8640000</text:p>
          </table:table-cell>
          <table:table-cell table:formula="of:=[.B526]/[.C526]" office:value-type="float" office:value="0.000607638888888889" calcext:value-type="float">
            <text:p>0,00060763888888888900</text:p>
          </table:table-cell>
          <table:table-cell table:formula="of:=[.D527]-[.D526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[.B526]+10" office:value-type="float" office:value="5260" calcext:value-type="float">
            <text:p>5260</text:p>
          </table:table-cell>
          <table:table-cell office:value-type="float" office:value="8640000" calcext:value-type="float">
            <text:p>8640000</text:p>
          </table:table-cell>
          <table:table-cell table:formula="of:=[.B527]/[.C527]" office:value-type="float" office:value="0.000608796296296296" calcext:value-type="float">
            <text:p>0,00060879629629629600</text:p>
          </table:table-cell>
          <table:table-cell table:formula="of:=[.D528]-[.D527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[.B527]+10" office:value-type="float" office:value="5270" calcext:value-type="float">
            <text:p>5270</text:p>
          </table:table-cell>
          <table:table-cell office:value-type="float" office:value="8640000" calcext:value-type="float">
            <text:p>8640000</text:p>
          </table:table-cell>
          <table:table-cell table:formula="of:=[.B528]/[.C528]" office:value-type="float" office:value="0.000609953703703704" calcext:value-type="float">
            <text:p>0,00060995370370370400</text:p>
          </table:table-cell>
          <table:table-cell table:formula="of:=[.D529]-[.D528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[.B528]+10" office:value-type="float" office:value="5280" calcext:value-type="float">
            <text:p>5280</text:p>
          </table:table-cell>
          <table:table-cell office:value-type="float" office:value="8640000" calcext:value-type="float">
            <text:p>8640000</text:p>
          </table:table-cell>
          <table:table-cell table:formula="of:=[.B529]/[.C529]" office:value-type="float" office:value="0.000611111111111111" calcext:value-type="float">
            <text:p>0,00061111111111111100</text:p>
          </table:table-cell>
          <table:table-cell table:formula="of:=[.D530]-[.D529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[.B529]+10" office:value-type="float" office:value="5290" calcext:value-type="float">
            <text:p>5290</text:p>
          </table:table-cell>
          <table:table-cell office:value-type="float" office:value="8640000" calcext:value-type="float">
            <text:p>8640000</text:p>
          </table:table-cell>
          <table:table-cell table:formula="of:=[.B530]/[.C530]" office:value-type="float" office:value="0.000612268518518519" calcext:value-type="float">
            <text:p>0,00061226851851851900</text:p>
          </table:table-cell>
          <table:table-cell table:formula="of:=[.D531]-[.D530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[.B530]+10" office:value-type="float" office:value="5300" calcext:value-type="float">
            <text:p>5300</text:p>
          </table:table-cell>
          <table:table-cell office:value-type="float" office:value="8640000" calcext:value-type="float">
            <text:p>8640000</text:p>
          </table:table-cell>
          <table:table-cell table:formula="of:=[.B531]/[.C531]" office:value-type="float" office:value="0.000613425925925926" calcext:value-type="float">
            <text:p>0,00061342592592592600</text:p>
          </table:table-cell>
          <table:table-cell table:formula="of:=[.D532]-[.D531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[.B531]+10" office:value-type="float" office:value="5310" calcext:value-type="float">
            <text:p>5310</text:p>
          </table:table-cell>
          <table:table-cell office:value-type="float" office:value="8640000" calcext:value-type="float">
            <text:p>8640000</text:p>
          </table:table-cell>
          <table:table-cell table:formula="of:=[.B532]/[.C532]" office:value-type="float" office:value="0.000614583333333333" calcext:value-type="float">
            <text:p>0,00061458333333333300</text:p>
          </table:table-cell>
          <table:table-cell table:formula="of:=[.D533]-[.D532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[.B532]+10" office:value-type="float" office:value="5320" calcext:value-type="float">
            <text:p>5320</text:p>
          </table:table-cell>
          <table:table-cell office:value-type="float" office:value="8640000" calcext:value-type="float">
            <text:p>8640000</text:p>
          </table:table-cell>
          <table:table-cell table:formula="of:=[.B533]/[.C533]" office:value-type="float" office:value="0.000615740740740741" calcext:value-type="float">
            <text:p>0,00061574074074074100</text:p>
          </table:table-cell>
          <table:table-cell table:formula="of:=[.D534]-[.D533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[.B533]+10" office:value-type="float" office:value="5330" calcext:value-type="float">
            <text:p>5330</text:p>
          </table:table-cell>
          <table:table-cell office:value-type="float" office:value="8640000" calcext:value-type="float">
            <text:p>8640000</text:p>
          </table:table-cell>
          <table:table-cell table:formula="of:=[.B534]/[.C534]" office:value-type="float" office:value="0.000616898148148148" calcext:value-type="float">
            <text:p>0,00061689814814814800</text:p>
          </table:table-cell>
          <table:table-cell table:formula="of:=[.D535]-[.D534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[.B534]+10" office:value-type="float" office:value="5340" calcext:value-type="float">
            <text:p>5340</text:p>
          </table:table-cell>
          <table:table-cell office:value-type="float" office:value="8640000" calcext:value-type="float">
            <text:p>8640000</text:p>
          </table:table-cell>
          <table:table-cell table:formula="of:=[.B535]/[.C535]" office:value-type="float" office:value="0.000618055555555556" calcext:value-type="float">
            <text:p>0,00061805555555555600</text:p>
          </table:table-cell>
          <table:table-cell table:formula="of:=[.D536]-[.D535]" office:value-type="float" office:value="0.00000115740740740751" calcext:value-type="float">
            <text:p>0,00000115740740740751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[.B535]+10" office:value-type="float" office:value="5350" calcext:value-type="float">
            <text:p>5350</text:p>
          </table:table-cell>
          <table:table-cell office:value-type="float" office:value="8640000" calcext:value-type="float">
            <text:p>8640000</text:p>
          </table:table-cell>
          <table:table-cell table:formula="of:=[.B536]/[.C536]" office:value-type="float" office:value="0.000619212962962963" calcext:value-type="float">
            <text:p>0,00061921296296296300</text:p>
          </table:table-cell>
          <table:table-cell table:formula="of:=[.D537]-[.D536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[.B536]+10" office:value-type="float" office:value="5360" calcext:value-type="float">
            <text:p>5360</text:p>
          </table:table-cell>
          <table:table-cell office:value-type="float" office:value="8640000" calcext:value-type="float">
            <text:p>8640000</text:p>
          </table:table-cell>
          <table:table-cell table:formula="of:=[.B537]/[.C537]" office:value-type="float" office:value="0.00062037037037037" calcext:value-type="float">
            <text:p>0,00062037037037037000</text:p>
          </table:table-cell>
          <table:table-cell table:formula="of:=[.D538]-[.D537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[.B537]+10" office:value-type="float" office:value="5370" calcext:value-type="float">
            <text:p>5370</text:p>
          </table:table-cell>
          <table:table-cell office:value-type="float" office:value="8640000" calcext:value-type="float">
            <text:p>8640000</text:p>
          </table:table-cell>
          <table:table-cell table:formula="of:=[.B538]/[.C538]" office:value-type="float" office:value="0.000621527777777778" calcext:value-type="float">
            <text:p>0,00062152777777777800</text:p>
          </table:table-cell>
          <table:table-cell table:formula="of:=[.D539]-[.D538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[.B538]+10" office:value-type="float" office:value="5380" calcext:value-type="float">
            <text:p>5380</text:p>
          </table:table-cell>
          <table:table-cell office:value-type="float" office:value="8640000" calcext:value-type="float">
            <text:p>8640000</text:p>
          </table:table-cell>
          <table:table-cell table:formula="of:=[.B539]/[.C539]" office:value-type="float" office:value="0.000622685185185185" calcext:value-type="float">
            <text:p>0,00062268518518518500</text:p>
          </table:table-cell>
          <table:table-cell table:formula="of:=[.D540]-[.D539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[.B539]+10" office:value-type="float" office:value="5390" calcext:value-type="float">
            <text:p>5390</text:p>
          </table:table-cell>
          <table:table-cell office:value-type="float" office:value="8640000" calcext:value-type="float">
            <text:p>8640000</text:p>
          </table:table-cell>
          <table:table-cell table:formula="of:=[.B540]/[.C540]" office:value-type="float" office:value="0.000623842592592593" calcext:value-type="float">
            <text:p>0,00062384259259259300</text:p>
          </table:table-cell>
          <table:table-cell table:formula="of:=[.D541]-[.D540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[.B540]+10" office:value-type="float" office:value="5400" calcext:value-type="float">
            <text:p>5400</text:p>
          </table:table-cell>
          <table:table-cell office:value-type="float" office:value="8640000" calcext:value-type="float">
            <text:p>8640000</text:p>
          </table:table-cell>
          <table:table-cell table:formula="of:=[.B541]/[.C541]" office:value-type="float" office:value="0.000625" calcext:value-type="float">
            <text:p>0,00062500000000000000</text:p>
          </table:table-cell>
          <table:table-cell table:formula="of:=[.D542]-[.D541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[.B541]+10" office:value-type="float" office:value="5410" calcext:value-type="float">
            <text:p>5410</text:p>
          </table:table-cell>
          <table:table-cell office:value-type="float" office:value="8640000" calcext:value-type="float">
            <text:p>8640000</text:p>
          </table:table-cell>
          <table:table-cell table:formula="of:=[.B542]/[.C542]" office:value-type="float" office:value="0.000626157407407407" calcext:value-type="float">
            <text:p>0,00062615740740740700</text:p>
          </table:table-cell>
          <table:table-cell table:formula="of:=[.D543]-[.D542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[.B542]+10" office:value-type="float" office:value="5420" calcext:value-type="float">
            <text:p>5420</text:p>
          </table:table-cell>
          <table:table-cell office:value-type="float" office:value="8640000" calcext:value-type="float">
            <text:p>8640000</text:p>
          </table:table-cell>
          <table:table-cell table:formula="of:=[.B543]/[.C543]" office:value-type="float" office:value="0.000627314814814815" calcext:value-type="float">
            <text:p>0,00062731481481481500</text:p>
          </table:table-cell>
          <table:table-cell table:formula="of:=[.D544]-[.D543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[.B543]+10" office:value-type="float" office:value="5430" calcext:value-type="float">
            <text:p>5430</text:p>
          </table:table-cell>
          <table:table-cell office:value-type="float" office:value="8640000" calcext:value-type="float">
            <text:p>8640000</text:p>
          </table:table-cell>
          <table:table-cell table:formula="of:=[.B544]/[.C544]" office:value-type="float" office:value="0.000628472222222222" calcext:value-type="float">
            <text:p>0,00062847222222222200</text:p>
          </table:table-cell>
          <table:table-cell table:formula="of:=[.D545]-[.D544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[.B544]+10" office:value-type="float" office:value="5440" calcext:value-type="float">
            <text:p>5440</text:p>
          </table:table-cell>
          <table:table-cell office:value-type="float" office:value="8640000" calcext:value-type="float">
            <text:p>8640000</text:p>
          </table:table-cell>
          <table:table-cell table:formula="of:=[.B545]/[.C545]" office:value-type="float" office:value="0.00062962962962963" calcext:value-type="float">
            <text:p>0,00062962962962963000</text:p>
          </table:table-cell>
          <table:table-cell table:formula="of:=[.D546]-[.D545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[.B545]+10" office:value-type="float" office:value="5450" calcext:value-type="float">
            <text:p>5450</text:p>
          </table:table-cell>
          <table:table-cell office:value-type="float" office:value="8640000" calcext:value-type="float">
            <text:p>8640000</text:p>
          </table:table-cell>
          <table:table-cell table:formula="of:=[.B546]/[.C546]" office:value-type="float" office:value="0.000630787037037037" calcext:value-type="float">
            <text:p>0,00063078703703703700</text:p>
          </table:table-cell>
          <table:table-cell table:formula="of:=[.D547]-[.D546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[.B546]+10" office:value-type="float" office:value="5460" calcext:value-type="float">
            <text:p>5460</text:p>
          </table:table-cell>
          <table:table-cell office:value-type="float" office:value="8640000" calcext:value-type="float">
            <text:p>8640000</text:p>
          </table:table-cell>
          <table:table-cell table:formula="of:=[.B547]/[.C547]" office:value-type="float" office:value="0.000631944444444444" calcext:value-type="float">
            <text:p>0,00063194444444444400</text:p>
          </table:table-cell>
          <table:table-cell table:formula="of:=[.D548]-[.D547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[.B547]+10" office:value-type="float" office:value="5470" calcext:value-type="float">
            <text:p>5470</text:p>
          </table:table-cell>
          <table:table-cell office:value-type="float" office:value="8640000" calcext:value-type="float">
            <text:p>8640000</text:p>
          </table:table-cell>
          <table:table-cell table:formula="of:=[.B548]/[.C548]" office:value-type="float" office:value="0.000633101851851852" calcext:value-type="float">
            <text:p>0,00063310185185185200</text:p>
          </table:table-cell>
          <table:table-cell table:formula="of:=[.D549]-[.D548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[.B548]+10" office:value-type="float" office:value="5480" calcext:value-type="float">
            <text:p>5480</text:p>
          </table:table-cell>
          <table:table-cell office:value-type="float" office:value="8640000" calcext:value-type="float">
            <text:p>8640000</text:p>
          </table:table-cell>
          <table:table-cell table:formula="of:=[.B549]/[.C549]" office:value-type="float" office:value="0.000634259259259259" calcext:value-type="float">
            <text:p>0,00063425925925925900</text:p>
          </table:table-cell>
          <table:table-cell table:formula="of:=[.D550]-[.D549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[.B549]+10" office:value-type="float" office:value="5490" calcext:value-type="float">
            <text:p>5490</text:p>
          </table:table-cell>
          <table:table-cell office:value-type="float" office:value="8640000" calcext:value-type="float">
            <text:p>8640000</text:p>
          </table:table-cell>
          <table:table-cell table:formula="of:=[.B550]/[.C550]" office:value-type="float" office:value="0.000635416666666667" calcext:value-type="float">
            <text:p>0,00063541666666666700</text:p>
          </table:table-cell>
          <table:table-cell table:formula="of:=[.D551]-[.D550]" office:value-type="float" office:value="0.00000115740740740751" calcext:value-type="float">
            <text:p>0,00000115740740740751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[.B550]+10" office:value-type="float" office:value="5500" calcext:value-type="float">
            <text:p>5500</text:p>
          </table:table-cell>
          <table:table-cell office:value-type="float" office:value="8640000" calcext:value-type="float">
            <text:p>8640000</text:p>
          </table:table-cell>
          <table:table-cell table:formula="of:=[.B551]/[.C551]" office:value-type="float" office:value="0.000636574074074074" calcext:value-type="float">
            <text:p>0,00063657407407407400</text:p>
          </table:table-cell>
          <table:table-cell table:formula="of:=[.D552]-[.D551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[.B551]+10" office:value-type="float" office:value="5510" calcext:value-type="float">
            <text:p>5510</text:p>
          </table:table-cell>
          <table:table-cell office:value-type="float" office:value="8640000" calcext:value-type="float">
            <text:p>8640000</text:p>
          </table:table-cell>
          <table:table-cell table:formula="of:=[.B552]/[.C552]" office:value-type="float" office:value="0.000637731481481482" calcext:value-type="float">
            <text:p>0,00063773148148148200</text:p>
          </table:table-cell>
          <table:table-cell table:formula="of:=[.D553]-[.D552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[.B552]+10" office:value-type="float" office:value="5520" calcext:value-type="float">
            <text:p>5520</text:p>
          </table:table-cell>
          <table:table-cell office:value-type="float" office:value="8640000" calcext:value-type="float">
            <text:p>8640000</text:p>
          </table:table-cell>
          <table:table-cell table:formula="of:=[.B553]/[.C553]" office:value-type="float" office:value="0.000638888888888889" calcext:value-type="float">
            <text:p>0,00063888888888888900</text:p>
          </table:table-cell>
          <table:table-cell table:formula="of:=[.D554]-[.D553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[.B553]+10" office:value-type="float" office:value="5530" calcext:value-type="float">
            <text:p>5530</text:p>
          </table:table-cell>
          <table:table-cell office:value-type="float" office:value="8640000" calcext:value-type="float">
            <text:p>8640000</text:p>
          </table:table-cell>
          <table:table-cell table:formula="of:=[.B554]/[.C554]" office:value-type="float" office:value="0.000640046296296296" calcext:value-type="float">
            <text:p>0,00064004629629629600</text:p>
          </table:table-cell>
          <table:table-cell table:formula="of:=[.D555]-[.D554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[.B554]+10" office:value-type="float" office:value="5540" calcext:value-type="float">
            <text:p>5540</text:p>
          </table:table-cell>
          <table:table-cell office:value-type="float" office:value="8640000" calcext:value-type="float">
            <text:p>8640000</text:p>
          </table:table-cell>
          <table:table-cell table:formula="of:=[.B555]/[.C555]" office:value-type="float" office:value="0.000641203703703704" calcext:value-type="float">
            <text:p>0,00064120370370370400</text:p>
          </table:table-cell>
          <table:table-cell table:formula="of:=[.D556]-[.D555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[.B555]+10" office:value-type="float" office:value="5550" calcext:value-type="float">
            <text:p>5550</text:p>
          </table:table-cell>
          <table:table-cell office:value-type="float" office:value="8640000" calcext:value-type="float">
            <text:p>8640000</text:p>
          </table:table-cell>
          <table:table-cell table:formula="of:=[.B556]/[.C556]" office:value-type="float" office:value="0.000642361111111111" calcext:value-type="float">
            <text:p>0,00064236111111111100</text:p>
          </table:table-cell>
          <table:table-cell table:formula="of:=[.D557]-[.D556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[.B556]+10" office:value-type="float" office:value="5560" calcext:value-type="float">
            <text:p>5560</text:p>
          </table:table-cell>
          <table:table-cell office:value-type="float" office:value="8640000" calcext:value-type="float">
            <text:p>8640000</text:p>
          </table:table-cell>
          <table:table-cell table:formula="of:=[.B557]/[.C557]" office:value-type="float" office:value="0.000643518518518519" calcext:value-type="float">
            <text:p>0,00064351851851851900</text:p>
          </table:table-cell>
          <table:table-cell table:formula="of:=[.D558]-[.D557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[.B557]+10" office:value-type="float" office:value="5570" calcext:value-type="float">
            <text:p>5570</text:p>
          </table:table-cell>
          <table:table-cell office:value-type="float" office:value="8640000" calcext:value-type="float">
            <text:p>8640000</text:p>
          </table:table-cell>
          <table:table-cell table:formula="of:=[.B558]/[.C558]" office:value-type="float" office:value="0.000644675925925926" calcext:value-type="float">
            <text:p>0,00064467592592592600</text:p>
          </table:table-cell>
          <table:table-cell table:formula="of:=[.D559]-[.D558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[.B558]+10" office:value-type="float" office:value="5580" calcext:value-type="float">
            <text:p>5580</text:p>
          </table:table-cell>
          <table:table-cell office:value-type="float" office:value="8640000" calcext:value-type="float">
            <text:p>8640000</text:p>
          </table:table-cell>
          <table:table-cell table:formula="of:=[.B559]/[.C559]" office:value-type="float" office:value="0.000645833333333333" calcext:value-type="float">
            <text:p>0,00064583333333333300</text:p>
          </table:table-cell>
          <table:table-cell table:formula="of:=[.D560]-[.D559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[.B559]+10" office:value-type="float" office:value="5590" calcext:value-type="float">
            <text:p>5590</text:p>
          </table:table-cell>
          <table:table-cell office:value-type="float" office:value="8640000" calcext:value-type="float">
            <text:p>8640000</text:p>
          </table:table-cell>
          <table:table-cell table:formula="of:=[.B560]/[.C560]" office:value-type="float" office:value="0.000646990740740741" calcext:value-type="float">
            <text:p>0,00064699074074074100</text:p>
          </table:table-cell>
          <table:table-cell table:formula="of:=[.D561]-[.D560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[.B560]+10" office:value-type="float" office:value="5600" calcext:value-type="float">
            <text:p>5600</text:p>
          </table:table-cell>
          <table:table-cell office:value-type="float" office:value="8640000" calcext:value-type="float">
            <text:p>8640000</text:p>
          </table:table-cell>
          <table:table-cell table:formula="of:=[.B561]/[.C561]" office:value-type="float" office:value="0.000648148148148148" calcext:value-type="float">
            <text:p>0,00064814814814814800</text:p>
          </table:table-cell>
          <table:table-cell table:formula="of:=[.D562]-[.D561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[.B561]+10" office:value-type="float" office:value="5610" calcext:value-type="float">
            <text:p>5610</text:p>
          </table:table-cell>
          <table:table-cell office:value-type="float" office:value="8640000" calcext:value-type="float">
            <text:p>8640000</text:p>
          </table:table-cell>
          <table:table-cell table:formula="of:=[.B562]/[.C562]" office:value-type="float" office:value="0.000649305555555556" calcext:value-type="float">
            <text:p>0,00064930555555555600</text:p>
          </table:table-cell>
          <table:table-cell table:formula="of:=[.D563]-[.D562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[.B562]+10" office:value-type="float" office:value="5620" calcext:value-type="float">
            <text:p>5620</text:p>
          </table:table-cell>
          <table:table-cell office:value-type="float" office:value="8640000" calcext:value-type="float">
            <text:p>8640000</text:p>
          </table:table-cell>
          <table:table-cell table:formula="of:=[.B563]/[.C563]" office:value-type="float" office:value="0.000650462962962963" calcext:value-type="float">
            <text:p>0,00065046296296296300</text:p>
          </table:table-cell>
          <table:table-cell table:formula="of:=[.D564]-[.D563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[.B563]+10" office:value-type="float" office:value="5630" calcext:value-type="float">
            <text:p>5630</text:p>
          </table:table-cell>
          <table:table-cell office:value-type="float" office:value="8640000" calcext:value-type="float">
            <text:p>8640000</text:p>
          </table:table-cell>
          <table:table-cell table:formula="of:=[.B564]/[.C564]" office:value-type="float" office:value="0.00065162037037037" calcext:value-type="float">
            <text:p>0,00065162037037037000</text:p>
          </table:table-cell>
          <table:table-cell table:formula="of:=[.D565]-[.D564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[.B564]+10" office:value-type="float" office:value="5640" calcext:value-type="float">
            <text:p>5640</text:p>
          </table:table-cell>
          <table:table-cell office:value-type="float" office:value="8640000" calcext:value-type="float">
            <text:p>8640000</text:p>
          </table:table-cell>
          <table:table-cell table:formula="of:=[.B565]/[.C565]" office:value-type="float" office:value="0.000652777777777778" calcext:value-type="float">
            <text:p>0,00065277777777777800</text:p>
          </table:table-cell>
          <table:table-cell table:formula="of:=[.D566]-[.D565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[.B565]+10" office:value-type="float" office:value="5650" calcext:value-type="float">
            <text:p>5650</text:p>
          </table:table-cell>
          <table:table-cell office:value-type="float" office:value="8640000" calcext:value-type="float">
            <text:p>8640000</text:p>
          </table:table-cell>
          <table:table-cell table:formula="of:=[.B566]/[.C566]" office:value-type="float" office:value="0.000653935185185185" calcext:value-type="float">
            <text:p>0,00065393518518518500</text:p>
          </table:table-cell>
          <table:table-cell table:formula="of:=[.D567]-[.D566]" office:value-type="float" office:value="0.00000115740740740751" calcext:value-type="float">
            <text:p>0,00000115740740740751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[.B566]+10" office:value-type="float" office:value="5660" calcext:value-type="float">
            <text:p>5660</text:p>
          </table:table-cell>
          <table:table-cell office:value-type="float" office:value="8640000" calcext:value-type="float">
            <text:p>8640000</text:p>
          </table:table-cell>
          <table:table-cell table:formula="of:=[.B567]/[.C567]" office:value-type="float" office:value="0.000655092592592593" calcext:value-type="float">
            <text:p>0,00065509259259259300</text:p>
          </table:table-cell>
          <table:table-cell table:formula="of:=[.D568]-[.D567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[.B567]+10" office:value-type="float" office:value="5670" calcext:value-type="float">
            <text:p>5670</text:p>
          </table:table-cell>
          <table:table-cell office:value-type="float" office:value="8640000" calcext:value-type="float">
            <text:p>8640000</text:p>
          </table:table-cell>
          <table:table-cell table:formula="of:=[.B568]/[.C568]" office:value-type="float" office:value="0.00065625" calcext:value-type="float">
            <text:p>0,00065625000000000000</text:p>
          </table:table-cell>
          <table:table-cell table:formula="of:=[.D569]-[.D568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[.B568]+10" office:value-type="float" office:value="5680" calcext:value-type="float">
            <text:p>5680</text:p>
          </table:table-cell>
          <table:table-cell office:value-type="float" office:value="8640000" calcext:value-type="float">
            <text:p>8640000</text:p>
          </table:table-cell>
          <table:table-cell table:formula="of:=[.B569]/[.C569]" office:value-type="float" office:value="0.000657407407407407" calcext:value-type="float">
            <text:p>0,00065740740740740700</text:p>
          </table:table-cell>
          <table:table-cell table:formula="of:=[.D570]-[.D569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[.B569]+10" office:value-type="float" office:value="5690" calcext:value-type="float">
            <text:p>5690</text:p>
          </table:table-cell>
          <table:table-cell office:value-type="float" office:value="8640000" calcext:value-type="float">
            <text:p>8640000</text:p>
          </table:table-cell>
          <table:table-cell table:formula="of:=[.B570]/[.C570]" office:value-type="float" office:value="0.000658564814814815" calcext:value-type="float">
            <text:p>0,00065856481481481500</text:p>
          </table:table-cell>
          <table:table-cell table:formula="of:=[.D571]-[.D570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[.B570]+10" office:value-type="float" office:value="5700" calcext:value-type="float">
            <text:p>5700</text:p>
          </table:table-cell>
          <table:table-cell office:value-type="float" office:value="8640000" calcext:value-type="float">
            <text:p>8640000</text:p>
          </table:table-cell>
          <table:table-cell table:formula="of:=[.B571]/[.C571]" office:value-type="float" office:value="0.000659722222222222" calcext:value-type="float">
            <text:p>0,00065972222222222200</text:p>
          </table:table-cell>
          <table:table-cell table:formula="of:=[.D572]-[.D571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[.B571]+10" office:value-type="float" office:value="5710" calcext:value-type="float">
            <text:p>5710</text:p>
          </table:table-cell>
          <table:table-cell office:value-type="float" office:value="8640000" calcext:value-type="float">
            <text:p>8640000</text:p>
          </table:table-cell>
          <table:table-cell table:formula="of:=[.B572]/[.C572]" office:value-type="float" office:value="0.00066087962962963" calcext:value-type="float">
            <text:p>0,00066087962962963000</text:p>
          </table:table-cell>
          <table:table-cell table:formula="of:=[.D573]-[.D572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[.B572]+10" office:value-type="float" office:value="5720" calcext:value-type="float">
            <text:p>5720</text:p>
          </table:table-cell>
          <table:table-cell office:value-type="float" office:value="8640000" calcext:value-type="float">
            <text:p>8640000</text:p>
          </table:table-cell>
          <table:table-cell table:formula="of:=[.B573]/[.C573]" office:value-type="float" office:value="0.000662037037037037" calcext:value-type="float">
            <text:p>0,00066203703703703700</text:p>
          </table:table-cell>
          <table:table-cell table:formula="of:=[.D574]-[.D573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[.B573]+10" office:value-type="float" office:value="5730" calcext:value-type="float">
            <text:p>5730</text:p>
          </table:table-cell>
          <table:table-cell office:value-type="float" office:value="8640000" calcext:value-type="float">
            <text:p>8640000</text:p>
          </table:table-cell>
          <table:table-cell table:formula="of:=[.B574]/[.C574]" office:value-type="float" office:value="0.000663194444444444" calcext:value-type="float">
            <text:p>0,00066319444444444400</text:p>
          </table:table-cell>
          <table:table-cell table:formula="of:=[.D575]-[.D574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[.B574]+10" office:value-type="float" office:value="5740" calcext:value-type="float">
            <text:p>5740</text:p>
          </table:table-cell>
          <table:table-cell office:value-type="float" office:value="8640000" calcext:value-type="float">
            <text:p>8640000</text:p>
          </table:table-cell>
          <table:table-cell table:formula="of:=[.B575]/[.C575]" office:value-type="float" office:value="0.000664351851851852" calcext:value-type="float">
            <text:p>0,00066435185185185200</text:p>
          </table:table-cell>
          <table:table-cell table:formula="of:=[.D576]-[.D575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[.B575]+10" office:value-type="float" office:value="5750" calcext:value-type="float">
            <text:p>5750</text:p>
          </table:table-cell>
          <table:table-cell office:value-type="float" office:value="8640000" calcext:value-type="float">
            <text:p>8640000</text:p>
          </table:table-cell>
          <table:table-cell table:formula="of:=[.B576]/[.C576]" office:value-type="float" office:value="0.000665509259259259" calcext:value-type="float">
            <text:p>0,00066550925925925900</text:p>
          </table:table-cell>
          <table:table-cell table:formula="of:=[.D577]-[.D576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[.B576]+10" office:value-type="float" office:value="5760" calcext:value-type="float">
            <text:p>5760</text:p>
          </table:table-cell>
          <table:table-cell office:value-type="float" office:value="8640000" calcext:value-type="float">
            <text:p>8640000</text:p>
          </table:table-cell>
          <table:table-cell table:formula="of:=[.B577]/[.C577]" office:value-type="float" office:value="0.000666666666666667" calcext:value-type="float">
            <text:p>0,00066666666666666700</text:p>
          </table:table-cell>
          <table:table-cell table:formula="of:=[.D578]-[.D577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table:formula="of:=[.B577]+10" office:value-type="float" office:value="5770" calcext:value-type="float">
            <text:p>5770</text:p>
          </table:table-cell>
          <table:table-cell office:value-type="float" office:value="8640000" calcext:value-type="float">
            <text:p>8640000</text:p>
          </table:table-cell>
          <table:table-cell table:formula="of:=[.B578]/[.C578]" office:value-type="float" office:value="0.000667824074074074" calcext:value-type="float">
            <text:p>0,00066782407407407400</text:p>
          </table:table-cell>
          <table:table-cell table:formula="of:=[.D579]-[.D578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table:formula="of:=[.B578]+10" office:value-type="float" office:value="5780" calcext:value-type="float">
            <text:p>5780</text:p>
          </table:table-cell>
          <table:table-cell office:value-type="float" office:value="8640000" calcext:value-type="float">
            <text:p>8640000</text:p>
          </table:table-cell>
          <table:table-cell table:formula="of:=[.B579]/[.C579]" office:value-type="float" office:value="0.000668981481481481" calcext:value-type="float">
            <text:p>0,00066898148148148100</text:p>
          </table:table-cell>
          <table:table-cell table:formula="of:=[.D580]-[.D579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table:formula="of:=[.B579]+10" office:value-type="float" office:value="5790" calcext:value-type="float">
            <text:p>5790</text:p>
          </table:table-cell>
          <table:table-cell office:value-type="float" office:value="8640000" calcext:value-type="float">
            <text:p>8640000</text:p>
          </table:table-cell>
          <table:table-cell table:formula="of:=[.B580]/[.C580]" office:value-type="float" office:value="0.000670138888888889" calcext:value-type="float">
            <text:p>0,00067013888888888900</text:p>
          </table:table-cell>
          <table:table-cell table:formula="of:=[.D581]-[.D580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[.B580]+10" office:value-type="float" office:value="5800" calcext:value-type="float">
            <text:p>5800</text:p>
          </table:table-cell>
          <table:table-cell office:value-type="float" office:value="8640000" calcext:value-type="float">
            <text:p>8640000</text:p>
          </table:table-cell>
          <table:table-cell table:formula="of:=[.B581]/[.C581]" office:value-type="float" office:value="0.000671296296296296" calcext:value-type="float">
            <text:p>0,00067129629629629600</text:p>
          </table:table-cell>
          <table:table-cell table:formula="of:=[.D582]-[.D581]" office:value-type="float" office:value="0.00000115740740740751" calcext:value-type="float">
            <text:p>0,00000115740740740751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[.B581]+10" office:value-type="float" office:value="5810" calcext:value-type="float">
            <text:p>5810</text:p>
          </table:table-cell>
          <table:table-cell office:value-type="float" office:value="8640000" calcext:value-type="float">
            <text:p>8640000</text:p>
          </table:table-cell>
          <table:table-cell table:formula="of:=[.B582]/[.C582]" office:value-type="float" office:value="0.000672453703703704" calcext:value-type="float">
            <text:p>0,00067245370370370400</text:p>
          </table:table-cell>
          <table:table-cell table:formula="of:=[.D583]-[.D582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table:formula="of:=[.B582]+10" office:value-type="float" office:value="5820" calcext:value-type="float">
            <text:p>5820</text:p>
          </table:table-cell>
          <table:table-cell office:value-type="float" office:value="8640000" calcext:value-type="float">
            <text:p>8640000</text:p>
          </table:table-cell>
          <table:table-cell table:formula="of:=[.B583]/[.C583]" office:value-type="float" office:value="0.000673611111111111" calcext:value-type="float">
            <text:p>0,00067361111111111100</text:p>
          </table:table-cell>
          <table:table-cell table:formula="of:=[.D584]-[.D583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[.B583]+10" office:value-type="float" office:value="5830" calcext:value-type="float">
            <text:p>5830</text:p>
          </table:table-cell>
          <table:table-cell office:value-type="float" office:value="8640000" calcext:value-type="float">
            <text:p>8640000</text:p>
          </table:table-cell>
          <table:table-cell table:formula="of:=[.B584]/[.C584]" office:value-type="float" office:value="0.000674768518518519" calcext:value-type="float">
            <text:p>0,00067476851851851900</text:p>
          </table:table-cell>
          <table:table-cell table:formula="of:=[.D585]-[.D584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[.B584]+10" office:value-type="float" office:value="5840" calcext:value-type="float">
            <text:p>5840</text:p>
          </table:table-cell>
          <table:table-cell office:value-type="float" office:value="8640000" calcext:value-type="float">
            <text:p>8640000</text:p>
          </table:table-cell>
          <table:table-cell table:formula="of:=[.B585]/[.C585]" office:value-type="float" office:value="0.000675925925925926" calcext:value-type="float">
            <text:p>0,00067592592592592600</text:p>
          </table:table-cell>
          <table:table-cell table:formula="of:=[.D586]-[.D585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[.B585]+10" office:value-type="float" office:value="5850" calcext:value-type="float">
            <text:p>5850</text:p>
          </table:table-cell>
          <table:table-cell office:value-type="float" office:value="8640000" calcext:value-type="float">
            <text:p>8640000</text:p>
          </table:table-cell>
          <table:table-cell table:formula="of:=[.B586]/[.C586]" office:value-type="float" office:value="0.000677083333333333" calcext:value-type="float">
            <text:p>0,00067708333333333300</text:p>
          </table:table-cell>
          <table:table-cell table:formula="of:=[.D587]-[.D586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[.B586]+10" office:value-type="float" office:value="5860" calcext:value-type="float">
            <text:p>5860</text:p>
          </table:table-cell>
          <table:table-cell office:value-type="float" office:value="8640000" calcext:value-type="float">
            <text:p>8640000</text:p>
          </table:table-cell>
          <table:table-cell table:formula="of:=[.B587]/[.C587]" office:value-type="float" office:value="0.000678240740740741" calcext:value-type="float">
            <text:p>0,00067824074074074100</text:p>
          </table:table-cell>
          <table:table-cell table:formula="of:=[.D588]-[.D587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[.B587]+10" office:value-type="float" office:value="5870" calcext:value-type="float">
            <text:p>5870</text:p>
          </table:table-cell>
          <table:table-cell office:value-type="float" office:value="8640000" calcext:value-type="float">
            <text:p>8640000</text:p>
          </table:table-cell>
          <table:table-cell table:formula="of:=[.B588]/[.C588]" office:value-type="float" office:value="0.000679398148148148" calcext:value-type="float">
            <text:p>0,00067939814814814800</text:p>
          </table:table-cell>
          <table:table-cell table:formula="of:=[.D589]-[.D588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[.B588]+10" office:value-type="float" office:value="5880" calcext:value-type="float">
            <text:p>5880</text:p>
          </table:table-cell>
          <table:table-cell office:value-type="float" office:value="8640000" calcext:value-type="float">
            <text:p>8640000</text:p>
          </table:table-cell>
          <table:table-cell table:formula="of:=[.B589]/[.C589]" office:value-type="float" office:value="0.000680555555555556" calcext:value-type="float">
            <text:p>0,00068055555555555600</text:p>
          </table:table-cell>
          <table:table-cell table:formula="of:=[.D590]-[.D589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[.B589]+10" office:value-type="float" office:value="5890" calcext:value-type="float">
            <text:p>5890</text:p>
          </table:table-cell>
          <table:table-cell office:value-type="float" office:value="8640000" calcext:value-type="float">
            <text:p>8640000</text:p>
          </table:table-cell>
          <table:table-cell table:formula="of:=[.B590]/[.C590]" office:value-type="float" office:value="0.000681712962962963" calcext:value-type="float">
            <text:p>0,00068171296296296300</text:p>
          </table:table-cell>
          <table:table-cell table:formula="of:=[.D591]-[.D590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[.B590]+10" office:value-type="float" office:value="5900" calcext:value-type="float">
            <text:p>5900</text:p>
          </table:table-cell>
          <table:table-cell office:value-type="float" office:value="8640000" calcext:value-type="float">
            <text:p>8640000</text:p>
          </table:table-cell>
          <table:table-cell table:formula="of:=[.B591]/[.C591]" office:value-type="float" office:value="0.00068287037037037" calcext:value-type="float">
            <text:p>0,00068287037037037000</text:p>
          </table:table-cell>
          <table:table-cell table:formula="of:=[.D592]-[.D591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[.B591]+10" office:value-type="float" office:value="5910" calcext:value-type="float">
            <text:p>5910</text:p>
          </table:table-cell>
          <table:table-cell office:value-type="float" office:value="8640000" calcext:value-type="float">
            <text:p>8640000</text:p>
          </table:table-cell>
          <table:table-cell table:formula="of:=[.B592]/[.C592]" office:value-type="float" office:value="0.000684027777777778" calcext:value-type="float">
            <text:p>0,00068402777777777800</text:p>
          </table:table-cell>
          <table:table-cell table:formula="of:=[.D593]-[.D592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[.B592]+10" office:value-type="float" office:value="5920" calcext:value-type="float">
            <text:p>5920</text:p>
          </table:table-cell>
          <table:table-cell office:value-type="float" office:value="8640000" calcext:value-type="float">
            <text:p>8640000</text:p>
          </table:table-cell>
          <table:table-cell table:formula="of:=[.B593]/[.C593]" office:value-type="float" office:value="0.000685185185185185" calcext:value-type="float">
            <text:p>0,00068518518518518500</text:p>
          </table:table-cell>
          <table:table-cell table:formula="of:=[.D594]-[.D593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[.B593]+10" office:value-type="float" office:value="5930" calcext:value-type="float">
            <text:p>5930</text:p>
          </table:table-cell>
          <table:table-cell office:value-type="float" office:value="8640000" calcext:value-type="float">
            <text:p>8640000</text:p>
          </table:table-cell>
          <table:table-cell table:formula="of:=[.B594]/[.C594]" office:value-type="float" office:value="0.000686342592592593" calcext:value-type="float">
            <text:p>0,00068634259259259300</text:p>
          </table:table-cell>
          <table:table-cell table:formula="of:=[.D595]-[.D594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[.B594]+10" office:value-type="float" office:value="5940" calcext:value-type="float">
            <text:p>5940</text:p>
          </table:table-cell>
          <table:table-cell office:value-type="float" office:value="8640000" calcext:value-type="float">
            <text:p>8640000</text:p>
          </table:table-cell>
          <table:table-cell table:formula="of:=[.B595]/[.C595]" office:value-type="float" office:value="0.0006875" calcext:value-type="float">
            <text:p>0,00068750000000000000</text:p>
          </table:table-cell>
          <table:table-cell table:formula="of:=[.D596]-[.D595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[.B595]+10" office:value-type="float" office:value="5950" calcext:value-type="float">
            <text:p>5950</text:p>
          </table:table-cell>
          <table:table-cell office:value-type="float" office:value="8640000" calcext:value-type="float">
            <text:p>8640000</text:p>
          </table:table-cell>
          <table:table-cell table:formula="of:=[.B596]/[.C596]" office:value-type="float" office:value="0.000688657407407407" calcext:value-type="float">
            <text:p>0,00068865740740740700</text:p>
          </table:table-cell>
          <table:table-cell table:formula="of:=[.D597]-[.D596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[.B596]+10" office:value-type="float" office:value="5960" calcext:value-type="float">
            <text:p>5960</text:p>
          </table:table-cell>
          <table:table-cell office:value-type="float" office:value="8640000" calcext:value-type="float">
            <text:p>8640000</text:p>
          </table:table-cell>
          <table:table-cell table:formula="of:=[.B597]/[.C597]" office:value-type="float" office:value="0.000689814814814815" calcext:value-type="float">
            <text:p>0,00068981481481481500</text:p>
          </table:table-cell>
          <table:table-cell table:formula="of:=[.D598]-[.D597]" office:value-type="float" office:value="0.00000115740740740751" calcext:value-type="float">
            <text:p>0,00000115740740740751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[.B597]+10" office:value-type="float" office:value="5970" calcext:value-type="float">
            <text:p>5970</text:p>
          </table:table-cell>
          <table:table-cell office:value-type="float" office:value="8640000" calcext:value-type="float">
            <text:p>8640000</text:p>
          </table:table-cell>
          <table:table-cell table:formula="of:=[.B598]/[.C598]" office:value-type="float" office:value="0.000690972222222222" calcext:value-type="float">
            <text:p>0,00069097222222222200</text:p>
          </table:table-cell>
          <table:table-cell table:formula="of:=[.D599]-[.D598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[.B598]+10" office:value-type="float" office:value="5980" calcext:value-type="float">
            <text:p>5980</text:p>
          </table:table-cell>
          <table:table-cell office:value-type="float" office:value="8640000" calcext:value-type="float">
            <text:p>8640000</text:p>
          </table:table-cell>
          <table:table-cell table:formula="of:=[.B599]/[.C599]" office:value-type="float" office:value="0.00069212962962963" calcext:value-type="float">
            <text:p>0,00069212962962963000</text:p>
          </table:table-cell>
          <table:table-cell table:formula="of:=[.D600]-[.D599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[.B599]+10" office:value-type="float" office:value="5990" calcext:value-type="float">
            <text:p>5990</text:p>
          </table:table-cell>
          <table:table-cell office:value-type="float" office:value="8640000" calcext:value-type="float">
            <text:p>8640000</text:p>
          </table:table-cell>
          <table:table-cell table:formula="of:=[.B600]/[.C600]" office:value-type="float" office:value="0.000693287037037037" calcext:value-type="float">
            <text:p>0,00069328703703703700</text:p>
          </table:table-cell>
          <table:table-cell table:formula="of:=[.D601]-[.D600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[.B600]+10" office:value-type="float" office:value="6000" calcext:value-type="float">
            <text:p>6000</text:p>
          </table:table-cell>
          <table:table-cell office:value-type="float" office:value="8640000" calcext:value-type="float">
            <text:p>8640000</text:p>
          </table:table-cell>
          <table:table-cell table:formula="of:=[.B601]/[.C601]" office:value-type="float" office:value="0.000694444444444445" calcext:value-type="float">
            <text:p>0,00069444444444444500</text:p>
          </table:table-cell>
          <table:table-cell table:formula="of:=[.D602]-[.D601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table:formula="of:=[.B601]+10" office:value-type="float" office:value="6010" calcext:value-type="float">
            <text:p>6010</text:p>
          </table:table-cell>
          <table:table-cell office:value-type="float" office:value="8640000" calcext:value-type="float">
            <text:p>8640000</text:p>
          </table:table-cell>
          <table:table-cell table:formula="of:=[.B602]/[.C602]" office:value-type="float" office:value="0.000695601851851852" calcext:value-type="float">
            <text:p>0,00069560185185185200</text:p>
          </table:table-cell>
          <table:table-cell table:formula="of:=[.D603]-[.D602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table:formula="of:=[.B602]+10" office:value-type="float" office:value="6020" calcext:value-type="float">
            <text:p>6020</text:p>
          </table:table-cell>
          <table:table-cell office:value-type="float" office:value="8640000" calcext:value-type="float">
            <text:p>8640000</text:p>
          </table:table-cell>
          <table:table-cell table:formula="of:=[.B603]/[.C603]" office:value-type="float" office:value="0.000696759259259259" calcext:value-type="float">
            <text:p>0,00069675925925925900</text:p>
          </table:table-cell>
          <table:table-cell table:formula="of:=[.D604]-[.D603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[.B603]+10" office:value-type="float" office:value="6030" calcext:value-type="float">
            <text:p>6030</text:p>
          </table:table-cell>
          <table:table-cell office:value-type="float" office:value="8640000" calcext:value-type="float">
            <text:p>8640000</text:p>
          </table:table-cell>
          <table:table-cell table:formula="of:=[.B604]/[.C604]" office:value-type="float" office:value="0.000697916666666667" calcext:value-type="float">
            <text:p>0,00069791666666666700</text:p>
          </table:table-cell>
          <table:table-cell table:formula="of:=[.D605]-[.D604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[.B604]+10" office:value-type="float" office:value="6040" calcext:value-type="float">
            <text:p>6040</text:p>
          </table:table-cell>
          <table:table-cell office:value-type="float" office:value="8640000" calcext:value-type="float">
            <text:p>8640000</text:p>
          </table:table-cell>
          <table:table-cell table:formula="of:=[.B605]/[.C605]" office:value-type="float" office:value="0.000699074074074074" calcext:value-type="float">
            <text:p>0,00069907407407407400</text:p>
          </table:table-cell>
          <table:table-cell table:formula="of:=[.D606]-[.D605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[.B605]+10" office:value-type="float" office:value="6050" calcext:value-type="float">
            <text:p>6050</text:p>
          </table:table-cell>
          <table:table-cell office:value-type="float" office:value="8640000" calcext:value-type="float">
            <text:p>8640000</text:p>
          </table:table-cell>
          <table:table-cell table:formula="of:=[.B606]/[.C606]" office:value-type="float" office:value="0.000700231481481482" calcext:value-type="float">
            <text:p>0,00070023148148148200</text:p>
          </table:table-cell>
          <table:table-cell table:formula="of:=[.D607]-[.D606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[.B606]+10" office:value-type="float" office:value="6060" calcext:value-type="float">
            <text:p>6060</text:p>
          </table:table-cell>
          <table:table-cell office:value-type="float" office:value="8640000" calcext:value-type="float">
            <text:p>8640000</text:p>
          </table:table-cell>
          <table:table-cell table:formula="of:=[.B607]/[.C607]" office:value-type="float" office:value="0.000701388888888889" calcext:value-type="float">
            <text:p>0,00070138888888888900</text:p>
          </table:table-cell>
          <table:table-cell table:formula="of:=[.D608]-[.D607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table:formula="of:=[.B607]+10" office:value-type="float" office:value="6070" calcext:value-type="float">
            <text:p>6070</text:p>
          </table:table-cell>
          <table:table-cell office:value-type="float" office:value="8640000" calcext:value-type="float">
            <text:p>8640000</text:p>
          </table:table-cell>
          <table:table-cell table:formula="of:=[.B608]/[.C608]" office:value-type="float" office:value="0.000702546296296296" calcext:value-type="float">
            <text:p>0,00070254629629629600</text:p>
          </table:table-cell>
          <table:table-cell table:formula="of:=[.D609]-[.D608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[.B608]+10" office:value-type="float" office:value="6080" calcext:value-type="float">
            <text:p>6080</text:p>
          </table:table-cell>
          <table:table-cell office:value-type="float" office:value="8640000" calcext:value-type="float">
            <text:p>8640000</text:p>
          </table:table-cell>
          <table:table-cell table:formula="of:=[.B609]/[.C609]" office:value-type="float" office:value="0.000703703703703704" calcext:value-type="float">
            <text:p>0,00070370370370370400</text:p>
          </table:table-cell>
          <table:table-cell table:formula="of:=[.D610]-[.D609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[.B609]+10" office:value-type="float" office:value="6090" calcext:value-type="float">
            <text:p>6090</text:p>
          </table:table-cell>
          <table:table-cell office:value-type="float" office:value="8640000" calcext:value-type="float">
            <text:p>8640000</text:p>
          </table:table-cell>
          <table:table-cell table:formula="of:=[.B610]/[.C610]" office:value-type="float" office:value="0.000704861111111111" calcext:value-type="float">
            <text:p>0,00070486111111111100</text:p>
          </table:table-cell>
          <table:table-cell table:formula="of:=[.D611]-[.D610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[.B610]+10" office:value-type="float" office:value="6100" calcext:value-type="float">
            <text:p>6100</text:p>
          </table:table-cell>
          <table:table-cell office:value-type="float" office:value="8640000" calcext:value-type="float">
            <text:p>8640000</text:p>
          </table:table-cell>
          <table:table-cell table:formula="of:=[.B611]/[.C611]" office:value-type="float" office:value="0.000706018518518519" calcext:value-type="float">
            <text:p>0,00070601851851851900</text:p>
          </table:table-cell>
          <table:table-cell table:formula="of:=[.D612]-[.D611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[.B611]+10" office:value-type="float" office:value="6110" calcext:value-type="float">
            <text:p>6110</text:p>
          </table:table-cell>
          <table:table-cell office:value-type="float" office:value="8640000" calcext:value-type="float">
            <text:p>8640000</text:p>
          </table:table-cell>
          <table:table-cell table:formula="of:=[.B612]/[.C612]" office:value-type="float" office:value="0.000707175925925926" calcext:value-type="float">
            <text:p>0,00070717592592592600</text:p>
          </table:table-cell>
          <table:table-cell table:formula="of:=[.D613]-[.D612]" office:value-type="float" office:value="0.00000115740740740751" calcext:value-type="float">
            <text:p>0,00000115740740740751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[.B612]+10" office:value-type="float" office:value="6120" calcext:value-type="float">
            <text:p>6120</text:p>
          </table:table-cell>
          <table:table-cell office:value-type="float" office:value="8640000" calcext:value-type="float">
            <text:p>8640000</text:p>
          </table:table-cell>
          <table:table-cell table:formula="of:=[.B613]/[.C613]" office:value-type="float" office:value="0.000708333333333333" calcext:value-type="float">
            <text:p>0,00070833333333333300</text:p>
          </table:table-cell>
          <table:table-cell table:formula="of:=[.D614]-[.D613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table:formula="of:=[.B613]+10" office:value-type="float" office:value="6130" calcext:value-type="float">
            <text:p>6130</text:p>
          </table:table-cell>
          <table:table-cell office:value-type="float" office:value="8640000" calcext:value-type="float">
            <text:p>8640000</text:p>
          </table:table-cell>
          <table:table-cell table:formula="of:=[.B614]/[.C614]" office:value-type="float" office:value="0.000709490740740741" calcext:value-type="float">
            <text:p>0,00070949074074074100</text:p>
          </table:table-cell>
          <table:table-cell table:formula="of:=[.D615]-[.D614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table:formula="of:=[.B614]+10" office:value-type="float" office:value="6140" calcext:value-type="float">
            <text:p>6140</text:p>
          </table:table-cell>
          <table:table-cell office:value-type="float" office:value="8640000" calcext:value-type="float">
            <text:p>8640000</text:p>
          </table:table-cell>
          <table:table-cell table:formula="of:=[.B615]/[.C615]" office:value-type="float" office:value="0.000710648148148148" calcext:value-type="float">
            <text:p>0,00071064814814814800</text:p>
          </table:table-cell>
          <table:table-cell table:formula="of:=[.D616]-[.D615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[.B615]+10" office:value-type="float" office:value="6150" calcext:value-type="float">
            <text:p>6150</text:p>
          </table:table-cell>
          <table:table-cell office:value-type="float" office:value="8640000" calcext:value-type="float">
            <text:p>8640000</text:p>
          </table:table-cell>
          <table:table-cell table:formula="of:=[.B616]/[.C616]" office:value-type="float" office:value="0.000711805555555556" calcext:value-type="float">
            <text:p>0,00071180555555555600</text:p>
          </table:table-cell>
          <table:table-cell table:formula="of:=[.D617]-[.D616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[.B616]+10" office:value-type="float" office:value="6160" calcext:value-type="float">
            <text:p>6160</text:p>
          </table:table-cell>
          <table:table-cell office:value-type="float" office:value="8640000" calcext:value-type="float">
            <text:p>8640000</text:p>
          </table:table-cell>
          <table:table-cell table:formula="of:=[.B617]/[.C617]" office:value-type="float" office:value="0.000712962962962963" calcext:value-type="float">
            <text:p>0,00071296296296296300</text:p>
          </table:table-cell>
          <table:table-cell table:formula="of:=[.D618]-[.D617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table:formula="of:=[.B617]+10" office:value-type="float" office:value="6170" calcext:value-type="float">
            <text:p>6170</text:p>
          </table:table-cell>
          <table:table-cell office:value-type="float" office:value="8640000" calcext:value-type="float">
            <text:p>8640000</text:p>
          </table:table-cell>
          <table:table-cell table:formula="of:=[.B618]/[.C618]" office:value-type="float" office:value="0.00071412037037037" calcext:value-type="float">
            <text:p>0,00071412037037037000</text:p>
          </table:table-cell>
          <table:table-cell table:formula="of:=[.D619]-[.D618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[.B618]+10" office:value-type="float" office:value="6180" calcext:value-type="float">
            <text:p>6180</text:p>
          </table:table-cell>
          <table:table-cell office:value-type="float" office:value="8640000" calcext:value-type="float">
            <text:p>8640000</text:p>
          </table:table-cell>
          <table:table-cell table:formula="of:=[.B619]/[.C619]" office:value-type="float" office:value="0.000715277777777778" calcext:value-type="float">
            <text:p>0,00071527777777777800</text:p>
          </table:table-cell>
          <table:table-cell table:formula="of:=[.D620]-[.D619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table:formula="of:=[.B619]+10" office:value-type="float" office:value="6190" calcext:value-type="float">
            <text:p>6190</text:p>
          </table:table-cell>
          <table:table-cell office:value-type="float" office:value="8640000" calcext:value-type="float">
            <text:p>8640000</text:p>
          </table:table-cell>
          <table:table-cell table:formula="of:=[.B620]/[.C620]" office:value-type="float" office:value="0.000716435185185185" calcext:value-type="float">
            <text:p>0,00071643518518518500</text:p>
          </table:table-cell>
          <table:table-cell table:formula="of:=[.D621]-[.D620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[.B620]+10" office:value-type="float" office:value="6200" calcext:value-type="float">
            <text:p>6200</text:p>
          </table:table-cell>
          <table:table-cell office:value-type="float" office:value="8640000" calcext:value-type="float">
            <text:p>8640000</text:p>
          </table:table-cell>
          <table:table-cell table:formula="of:=[.B621]/[.C621]" office:value-type="float" office:value="0.000717592592592593" calcext:value-type="float">
            <text:p>0,00071759259259259300</text:p>
          </table:table-cell>
          <table:table-cell table:formula="of:=[.D622]-[.D621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[.B621]+10" office:value-type="float" office:value="6210" calcext:value-type="float">
            <text:p>6210</text:p>
          </table:table-cell>
          <table:table-cell office:value-type="float" office:value="8640000" calcext:value-type="float">
            <text:p>8640000</text:p>
          </table:table-cell>
          <table:table-cell table:formula="of:=[.B622]/[.C622]" office:value-type="float" office:value="0.00071875" calcext:value-type="float">
            <text:p>0,00071875000000000000</text:p>
          </table:table-cell>
          <table:table-cell table:formula="of:=[.D623]-[.D622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table:formula="of:=[.B622]+10" office:value-type="float" office:value="6220" calcext:value-type="float">
            <text:p>6220</text:p>
          </table:table-cell>
          <table:table-cell office:value-type="float" office:value="8640000" calcext:value-type="float">
            <text:p>8640000</text:p>
          </table:table-cell>
          <table:table-cell table:formula="of:=[.B623]/[.C623]" office:value-type="float" office:value="0.000719907407407407" calcext:value-type="float">
            <text:p>0,00071990740740740700</text:p>
          </table:table-cell>
          <table:table-cell table:formula="of:=[.D624]-[.D623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table:formula="of:=[.B623]+10" office:value-type="float" office:value="6230" calcext:value-type="float">
            <text:p>6230</text:p>
          </table:table-cell>
          <table:table-cell office:value-type="float" office:value="8640000" calcext:value-type="float">
            <text:p>8640000</text:p>
          </table:table-cell>
          <table:table-cell table:formula="of:=[.B624]/[.C624]" office:value-type="float" office:value="0.000721064814814815" calcext:value-type="float">
            <text:p>0,00072106481481481500</text:p>
          </table:table-cell>
          <table:table-cell table:formula="of:=[.D625]-[.D624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[.B624]+10" office:value-type="float" office:value="6240" calcext:value-type="float">
            <text:p>6240</text:p>
          </table:table-cell>
          <table:table-cell office:value-type="float" office:value="8640000" calcext:value-type="float">
            <text:p>8640000</text:p>
          </table:table-cell>
          <table:table-cell table:formula="of:=[.B625]/[.C625]" office:value-type="float" office:value="0.000722222222222222" calcext:value-type="float">
            <text:p>0,00072222222222222200</text:p>
          </table:table-cell>
          <table:table-cell table:formula="of:=[.D626]-[.D625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[.B625]+10" office:value-type="float" office:value="6250" calcext:value-type="float">
            <text:p>6250</text:p>
          </table:table-cell>
          <table:table-cell office:value-type="float" office:value="8640000" calcext:value-type="float">
            <text:p>8640000</text:p>
          </table:table-cell>
          <table:table-cell table:formula="of:=[.B626]/[.C626]" office:value-type="float" office:value="0.00072337962962963" calcext:value-type="float">
            <text:p>0,00072337962962963000</text:p>
          </table:table-cell>
          <table:table-cell table:formula="of:=[.D627]-[.D626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table:formula="of:=[.B626]+10" office:value-type="float" office:value="6260" calcext:value-type="float">
            <text:p>6260</text:p>
          </table:table-cell>
          <table:table-cell office:value-type="float" office:value="8640000" calcext:value-type="float">
            <text:p>8640000</text:p>
          </table:table-cell>
          <table:table-cell table:formula="of:=[.B627]/[.C627]" office:value-type="float" office:value="0.000724537037037037" calcext:value-type="float">
            <text:p>0,00072453703703703700</text:p>
          </table:table-cell>
          <table:table-cell table:formula="of:=[.D628]-[.D627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[.B627]+10" office:value-type="float" office:value="6270" calcext:value-type="float">
            <text:p>6270</text:p>
          </table:table-cell>
          <table:table-cell office:value-type="float" office:value="8640000" calcext:value-type="float">
            <text:p>8640000</text:p>
          </table:table-cell>
          <table:table-cell table:formula="of:=[.B628]/[.C628]" office:value-type="float" office:value="0.000725694444444444" calcext:value-type="float">
            <text:p>0,00072569444444444400</text:p>
          </table:table-cell>
          <table:table-cell table:formula="of:=[.D629]-[.D628]" office:value-type="float" office:value="0.00000115740740740751" calcext:value-type="float">
            <text:p>0,00000115740740740751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table:formula="of:=[.B628]+10" office:value-type="float" office:value="6280" calcext:value-type="float">
            <text:p>6280</text:p>
          </table:table-cell>
          <table:table-cell office:value-type="float" office:value="8640000" calcext:value-type="float">
            <text:p>8640000</text:p>
          </table:table-cell>
          <table:table-cell table:formula="of:=[.B629]/[.C629]" office:value-type="float" office:value="0.000726851851851852" calcext:value-type="float">
            <text:p>0,00072685185185185200</text:p>
          </table:table-cell>
          <table:table-cell table:formula="of:=[.D630]-[.D629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table:formula="of:=[.B629]+10" office:value-type="float" office:value="6290" calcext:value-type="float">
            <text:p>6290</text:p>
          </table:table-cell>
          <table:table-cell office:value-type="float" office:value="8640000" calcext:value-type="float">
            <text:p>8640000</text:p>
          </table:table-cell>
          <table:table-cell table:formula="of:=[.B630]/[.C630]" office:value-type="float" office:value="0.000728009259259259" calcext:value-type="float">
            <text:p>0,00072800925925925900</text:p>
          </table:table-cell>
          <table:table-cell table:formula="of:=[.D631]-[.D630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[.B630]+10" office:value-type="float" office:value="6300" calcext:value-type="float">
            <text:p>6300</text:p>
          </table:table-cell>
          <table:table-cell office:value-type="float" office:value="8640000" calcext:value-type="float">
            <text:p>8640000</text:p>
          </table:table-cell>
          <table:table-cell table:formula="of:=[.B631]/[.C631]" office:value-type="float" office:value="0.000729166666666667" calcext:value-type="float">
            <text:p>0,00072916666666666700</text:p>
          </table:table-cell>
          <table:table-cell table:formula="of:=[.D632]-[.D631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[.B631]+10" office:value-type="float" office:value="6310" calcext:value-type="float">
            <text:p>6310</text:p>
          </table:table-cell>
          <table:table-cell office:value-type="float" office:value="8640000" calcext:value-type="float">
            <text:p>8640000</text:p>
          </table:table-cell>
          <table:table-cell table:formula="of:=[.B632]/[.C632]" office:value-type="float" office:value="0.000730324074074074" calcext:value-type="float">
            <text:p>0,00073032407407407400</text:p>
          </table:table-cell>
          <table:table-cell table:formula="of:=[.D633]-[.D632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[.B632]+10" office:value-type="float" office:value="6320" calcext:value-type="float">
            <text:p>6320</text:p>
          </table:table-cell>
          <table:table-cell office:value-type="float" office:value="8640000" calcext:value-type="float">
            <text:p>8640000</text:p>
          </table:table-cell>
          <table:table-cell table:formula="of:=[.B633]/[.C633]" office:value-type="float" office:value="0.000731481481481482" calcext:value-type="float">
            <text:p>0,00073148148148148100</text:p>
          </table:table-cell>
          <table:table-cell table:formula="of:=[.D634]-[.D633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[.B633]+10" office:value-type="float" office:value="6330" calcext:value-type="float">
            <text:p>6330</text:p>
          </table:table-cell>
          <table:table-cell office:value-type="float" office:value="8640000" calcext:value-type="float">
            <text:p>8640000</text:p>
          </table:table-cell>
          <table:table-cell table:formula="of:=[.B634]/[.C634]" office:value-type="float" office:value="0.000732638888888889" calcext:value-type="float">
            <text:p>0,00073263888888888900</text:p>
          </table:table-cell>
          <table:table-cell table:formula="of:=[.D635]-[.D634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table:formula="of:=[.B634]+10" office:value-type="float" office:value="6340" calcext:value-type="float">
            <text:p>6340</text:p>
          </table:table-cell>
          <table:table-cell office:value-type="float" office:value="8640000" calcext:value-type="float">
            <text:p>8640000</text:p>
          </table:table-cell>
          <table:table-cell table:formula="of:=[.B635]/[.C635]" office:value-type="float" office:value="0.000733796296296296" calcext:value-type="float">
            <text:p>0,00073379629629629600</text:p>
          </table:table-cell>
          <table:table-cell table:formula="of:=[.D636]-[.D635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table:formula="of:=[.B635]+10" office:value-type="float" office:value="6350" calcext:value-type="float">
            <text:p>6350</text:p>
          </table:table-cell>
          <table:table-cell office:value-type="float" office:value="8640000" calcext:value-type="float">
            <text:p>8640000</text:p>
          </table:table-cell>
          <table:table-cell table:formula="of:=[.B636]/[.C636]" office:value-type="float" office:value="0.000734953703703704" calcext:value-type="float">
            <text:p>0,00073495370370370400</text:p>
          </table:table-cell>
          <table:table-cell table:formula="of:=[.D637]-[.D636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[.B636]+10" office:value-type="float" office:value="6360" calcext:value-type="float">
            <text:p>6360</text:p>
          </table:table-cell>
          <table:table-cell office:value-type="float" office:value="8640000" calcext:value-type="float">
            <text:p>8640000</text:p>
          </table:table-cell>
          <table:table-cell table:formula="of:=[.B637]/[.C637]" office:value-type="float" office:value="0.000736111111111111" calcext:value-type="float">
            <text:p>0,00073611111111111100</text:p>
          </table:table-cell>
          <table:table-cell table:formula="of:=[.D638]-[.D637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table:formula="of:=[.B637]+10" office:value-type="float" office:value="6370" calcext:value-type="float">
            <text:p>6370</text:p>
          </table:table-cell>
          <table:table-cell office:value-type="float" office:value="8640000" calcext:value-type="float">
            <text:p>8640000</text:p>
          </table:table-cell>
          <table:table-cell table:formula="of:=[.B638]/[.C638]" office:value-type="float" office:value="0.000737268518518519" calcext:value-type="float">
            <text:p>0,00073726851851851900</text:p>
          </table:table-cell>
          <table:table-cell table:formula="of:=[.D639]-[.D638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table:formula="of:=[.B638]+10" office:value-type="float" office:value="6380" calcext:value-type="float">
            <text:p>6380</text:p>
          </table:table-cell>
          <table:table-cell office:value-type="float" office:value="8640000" calcext:value-type="float">
            <text:p>8640000</text:p>
          </table:table-cell>
          <table:table-cell table:formula="of:=[.B639]/[.C639]" office:value-type="float" office:value="0.000738425925925926" calcext:value-type="float">
            <text:p>0,00073842592592592600</text:p>
          </table:table-cell>
          <table:table-cell table:formula="of:=[.D640]-[.D639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table:formula="of:=[.B639]+10" office:value-type="float" office:value="6390" calcext:value-type="float">
            <text:p>6390</text:p>
          </table:table-cell>
          <table:table-cell office:value-type="float" office:value="8640000" calcext:value-type="float">
            <text:p>8640000</text:p>
          </table:table-cell>
          <table:table-cell table:formula="of:=[.B640]/[.C640]" office:value-type="float" office:value="0.000739583333333333" calcext:value-type="float">
            <text:p>0,00073958333333333300</text:p>
          </table:table-cell>
          <table:table-cell table:formula="of:=[.D641]-[.D640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[.B640]+10" office:value-type="float" office:value="6400" calcext:value-type="float">
            <text:p>6400</text:p>
          </table:table-cell>
          <table:table-cell office:value-type="float" office:value="8640000" calcext:value-type="float">
            <text:p>8640000</text:p>
          </table:table-cell>
          <table:table-cell table:formula="of:=[.B641]/[.C641]" office:value-type="float" office:value="0.000740740740740741" calcext:value-type="float">
            <text:p>0,00074074074074074100</text:p>
          </table:table-cell>
          <table:table-cell table:formula="of:=[.D642]-[.D641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[.B641]+10" office:value-type="float" office:value="6410" calcext:value-type="float">
            <text:p>6410</text:p>
          </table:table-cell>
          <table:table-cell office:value-type="float" office:value="8640000" calcext:value-type="float">
            <text:p>8640000</text:p>
          </table:table-cell>
          <table:table-cell table:formula="of:=[.B642]/[.C642]" office:value-type="float" office:value="0.000741898148148148" calcext:value-type="float">
            <text:p>0,00074189814814814800</text:p>
          </table:table-cell>
          <table:table-cell table:formula="of:=[.D643]-[.D642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table:formula="of:=[.B642]+10" office:value-type="float" office:value="6420" calcext:value-type="float">
            <text:p>6420</text:p>
          </table:table-cell>
          <table:table-cell office:value-type="float" office:value="8640000" calcext:value-type="float">
            <text:p>8640000</text:p>
          </table:table-cell>
          <table:table-cell table:formula="of:=[.B643]/[.C643]" office:value-type="float" office:value="0.000743055555555556" calcext:value-type="float">
            <text:p>0,00074305555555555600</text:p>
          </table:table-cell>
          <table:table-cell table:formula="of:=[.D644]-[.D643]" office:value-type="float" office:value="0.00000115740740740751" calcext:value-type="float">
            <text:p>0,00000115740740740751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table:formula="of:=[.B643]+10" office:value-type="float" office:value="6430" calcext:value-type="float">
            <text:p>6430</text:p>
          </table:table-cell>
          <table:table-cell office:value-type="float" office:value="8640000" calcext:value-type="float">
            <text:p>8640000</text:p>
          </table:table-cell>
          <table:table-cell table:formula="of:=[.B644]/[.C644]" office:value-type="float" office:value="0.000744212962962963" calcext:value-type="float">
            <text:p>0,00074421296296296300</text:p>
          </table:table-cell>
          <table:table-cell table:formula="of:=[.D645]-[.D644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table:formula="of:=[.B644]+10" office:value-type="float" office:value="6440" calcext:value-type="float">
            <text:p>6440</text:p>
          </table:table-cell>
          <table:table-cell office:value-type="float" office:value="8640000" calcext:value-type="float">
            <text:p>8640000</text:p>
          </table:table-cell>
          <table:table-cell table:formula="of:=[.B645]/[.C645]" office:value-type="float" office:value="0.00074537037037037" calcext:value-type="float">
            <text:p>0,00074537037037037000</text:p>
          </table:table-cell>
          <table:table-cell table:formula="of:=[.D646]-[.D645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table:formula="of:=[.B645]+10" office:value-type="float" office:value="6450" calcext:value-type="float">
            <text:p>6450</text:p>
          </table:table-cell>
          <table:table-cell office:value-type="float" office:value="8640000" calcext:value-type="float">
            <text:p>8640000</text:p>
          </table:table-cell>
          <table:table-cell table:formula="of:=[.B646]/[.C646]" office:value-type="float" office:value="0.000746527777777778" calcext:value-type="float">
            <text:p>0,00074652777777777800</text:p>
          </table:table-cell>
          <table:table-cell table:formula="of:=[.D647]-[.D646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table:formula="of:=[.B646]+10" office:value-type="float" office:value="6460" calcext:value-type="float">
            <text:p>6460</text:p>
          </table:table-cell>
          <table:table-cell office:value-type="float" office:value="8640000" calcext:value-type="float">
            <text:p>8640000</text:p>
          </table:table-cell>
          <table:table-cell table:formula="of:=[.B647]/[.C647]" office:value-type="float" office:value="0.000747685185185185" calcext:value-type="float">
            <text:p>0,00074768518518518500</text:p>
          </table:table-cell>
          <table:table-cell table:formula="of:=[.D648]-[.D647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table:formula="of:=[.B647]+10" office:value-type="float" office:value="6470" calcext:value-type="float">
            <text:p>6470</text:p>
          </table:table-cell>
          <table:table-cell office:value-type="float" office:value="8640000" calcext:value-type="float">
            <text:p>8640000</text:p>
          </table:table-cell>
          <table:table-cell table:formula="of:=[.B648]/[.C648]" office:value-type="float" office:value="0.000748842592592593" calcext:value-type="float">
            <text:p>0,00074884259259259300</text:p>
          </table:table-cell>
          <table:table-cell table:formula="of:=[.D649]-[.D648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table:formula="of:=[.B648]+10" office:value-type="float" office:value="6480" calcext:value-type="float">
            <text:p>6480</text:p>
          </table:table-cell>
          <table:table-cell office:value-type="float" office:value="8640000" calcext:value-type="float">
            <text:p>8640000</text:p>
          </table:table-cell>
          <table:table-cell table:formula="of:=[.B649]/[.C649]" office:value-type="float" office:value="0.00075" calcext:value-type="float">
            <text:p>0,00075000000000000000</text:p>
          </table:table-cell>
          <table:table-cell table:formula="of:=[.D650]-[.D649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table:formula="of:=[.B649]+10" office:value-type="float" office:value="6490" calcext:value-type="float">
            <text:p>6490</text:p>
          </table:table-cell>
          <table:table-cell office:value-type="float" office:value="8640000" calcext:value-type="float">
            <text:p>8640000</text:p>
          </table:table-cell>
          <table:table-cell table:formula="of:=[.B650]/[.C650]" office:value-type="float" office:value="0.000751157407407407" calcext:value-type="float">
            <text:p>0,00075115740740740700</text:p>
          </table:table-cell>
          <table:table-cell table:formula="of:=[.D651]-[.D650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[.B650]+10" office:value-type="float" office:value="6500" calcext:value-type="float">
            <text:p>6500</text:p>
          </table:table-cell>
          <table:table-cell office:value-type="float" office:value="8640000" calcext:value-type="float">
            <text:p>8640000</text:p>
          </table:table-cell>
          <table:table-cell table:formula="of:=[.B651]/[.C651]" office:value-type="float" office:value="0.000752314814814815" calcext:value-type="float">
            <text:p>0,00075231481481481500</text:p>
          </table:table-cell>
          <table:table-cell table:formula="of:=[.D652]-[.D651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table:formula="of:=[.B651]+10" office:value-type="float" office:value="6510" calcext:value-type="float">
            <text:p>6510</text:p>
          </table:table-cell>
          <table:table-cell office:value-type="float" office:value="8640000" calcext:value-type="float">
            <text:p>8640000</text:p>
          </table:table-cell>
          <table:table-cell table:formula="of:=[.B652]/[.C652]" office:value-type="float" office:value="0.000753472222222222" calcext:value-type="float">
            <text:p>0,00075347222222222200</text:p>
          </table:table-cell>
          <table:table-cell table:formula="of:=[.D653]-[.D652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[.B652]+10" office:value-type="float" office:value="6520" calcext:value-type="float">
            <text:p>6520</text:p>
          </table:table-cell>
          <table:table-cell office:value-type="float" office:value="8640000" calcext:value-type="float">
            <text:p>8640000</text:p>
          </table:table-cell>
          <table:table-cell table:formula="of:=[.B653]/[.C653]" office:value-type="float" office:value="0.00075462962962963" calcext:value-type="float">
            <text:p>0,00075462962962963000</text:p>
          </table:table-cell>
          <table:table-cell table:formula="of:=[.D654]-[.D653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table:formula="of:=[.B653]+10" office:value-type="float" office:value="6530" calcext:value-type="float">
            <text:p>6530</text:p>
          </table:table-cell>
          <table:table-cell office:value-type="float" office:value="8640000" calcext:value-type="float">
            <text:p>8640000</text:p>
          </table:table-cell>
          <table:table-cell table:formula="of:=[.B654]/[.C654]" office:value-type="float" office:value="0.000755787037037037" calcext:value-type="float">
            <text:p>0,00075578703703703700</text:p>
          </table:table-cell>
          <table:table-cell table:formula="of:=[.D655]-[.D654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[.B654]+10" office:value-type="float" office:value="6540" calcext:value-type="float">
            <text:p>6540</text:p>
          </table:table-cell>
          <table:table-cell office:value-type="float" office:value="8640000" calcext:value-type="float">
            <text:p>8640000</text:p>
          </table:table-cell>
          <table:table-cell table:formula="of:=[.B655]/[.C655]" office:value-type="float" office:value="0.000756944444444444" calcext:value-type="float">
            <text:p>0,00075694444444444500</text:p>
          </table:table-cell>
          <table:table-cell table:formula="of:=[.D656]-[.D655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[.B655]+10" office:value-type="float" office:value="6550" calcext:value-type="float">
            <text:p>6550</text:p>
          </table:table-cell>
          <table:table-cell office:value-type="float" office:value="8640000" calcext:value-type="float">
            <text:p>8640000</text:p>
          </table:table-cell>
          <table:table-cell table:formula="of:=[.B656]/[.C656]" office:value-type="float" office:value="0.000758101851851852" calcext:value-type="float">
            <text:p>0,00075810185185185200</text:p>
          </table:table-cell>
          <table:table-cell table:formula="of:=[.D657]-[.D656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[.B656]+10" office:value-type="float" office:value="6560" calcext:value-type="float">
            <text:p>6560</text:p>
          </table:table-cell>
          <table:table-cell office:value-type="float" office:value="8640000" calcext:value-type="float">
            <text:p>8640000</text:p>
          </table:table-cell>
          <table:table-cell table:formula="of:=[.B657]/[.C657]" office:value-type="float" office:value="0.000759259259259259" calcext:value-type="float">
            <text:p>0,00075925925925925900</text:p>
          </table:table-cell>
          <table:table-cell table:formula="of:=[.D658]-[.D657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table:formula="of:=[.B657]+10" office:value-type="float" office:value="6570" calcext:value-type="float">
            <text:p>6570</text:p>
          </table:table-cell>
          <table:table-cell office:value-type="float" office:value="8640000" calcext:value-type="float">
            <text:p>8640000</text:p>
          </table:table-cell>
          <table:table-cell table:formula="of:=[.B658]/[.C658]" office:value-type="float" office:value="0.000760416666666667" calcext:value-type="float">
            <text:p>0,00076041666666666700</text:p>
          </table:table-cell>
          <table:table-cell table:formula="of:=[.D659]-[.D658]" office:value-type="float" office:value="0.00000115740740740751" calcext:value-type="float">
            <text:p>0,00000115740740740751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table:formula="of:=[.B658]+10" office:value-type="float" office:value="6580" calcext:value-type="float">
            <text:p>6580</text:p>
          </table:table-cell>
          <table:table-cell office:value-type="float" office:value="8640000" calcext:value-type="float">
            <text:p>8640000</text:p>
          </table:table-cell>
          <table:table-cell table:formula="of:=[.B659]/[.C659]" office:value-type="float" office:value="0.000761574074074074" calcext:value-type="float">
            <text:p>0,00076157407407407400</text:p>
          </table:table-cell>
          <table:table-cell table:formula="of:=[.D660]-[.D659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[.B659]+10" office:value-type="float" office:value="6590" calcext:value-type="float">
            <text:p>6590</text:p>
          </table:table-cell>
          <table:table-cell office:value-type="float" office:value="8640000" calcext:value-type="float">
            <text:p>8640000</text:p>
          </table:table-cell>
          <table:table-cell table:formula="of:=[.B660]/[.C660]" office:value-type="float" office:value="0.000762731481481482" calcext:value-type="float">
            <text:p>0,00076273148148148200</text:p>
          </table:table-cell>
          <table:table-cell table:formula="of:=[.D661]-[.D660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[.B660]+10" office:value-type="float" office:value="6600" calcext:value-type="float">
            <text:p>6600</text:p>
          </table:table-cell>
          <table:table-cell office:value-type="float" office:value="8640000" calcext:value-type="float">
            <text:p>8640000</text:p>
          </table:table-cell>
          <table:table-cell table:formula="of:=[.B661]/[.C661]" office:value-type="float" office:value="0.000763888888888889" calcext:value-type="float">
            <text:p>0,00076388888888888900</text:p>
          </table:table-cell>
          <table:table-cell table:formula="of:=[.D662]-[.D661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table:formula="of:=[.B661]+10" office:value-type="float" office:value="6610" calcext:value-type="float">
            <text:p>6610</text:p>
          </table:table-cell>
          <table:table-cell office:value-type="float" office:value="8640000" calcext:value-type="float">
            <text:p>8640000</text:p>
          </table:table-cell>
          <table:table-cell table:formula="of:=[.B662]/[.C662]" office:value-type="float" office:value="0.000765046296296296" calcext:value-type="float">
            <text:p>0,00076504629629629600</text:p>
          </table:table-cell>
          <table:table-cell table:formula="of:=[.D663]-[.D662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table:formula="of:=[.B662]+10" office:value-type="float" office:value="6620" calcext:value-type="float">
            <text:p>6620</text:p>
          </table:table-cell>
          <table:table-cell office:value-type="float" office:value="8640000" calcext:value-type="float">
            <text:p>8640000</text:p>
          </table:table-cell>
          <table:table-cell table:formula="of:=[.B663]/[.C663]" office:value-type="float" office:value="0.000766203703703704" calcext:value-type="float">
            <text:p>0,00076620370370370400</text:p>
          </table:table-cell>
          <table:table-cell table:formula="of:=[.D664]-[.D663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table:formula="of:=[.B663]+10" office:value-type="float" office:value="6630" calcext:value-type="float">
            <text:p>6630</text:p>
          </table:table-cell>
          <table:table-cell office:value-type="float" office:value="8640000" calcext:value-type="float">
            <text:p>8640000</text:p>
          </table:table-cell>
          <table:table-cell table:formula="of:=[.B664]/[.C664]" office:value-type="float" office:value="0.000767361111111111" calcext:value-type="float">
            <text:p>0,00076736111111111100</text:p>
          </table:table-cell>
          <table:table-cell table:formula="of:=[.D665]-[.D664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table:formula="of:=[.B664]+10" office:value-type="float" office:value="6640" calcext:value-type="float">
            <text:p>6640</text:p>
          </table:table-cell>
          <table:table-cell office:value-type="float" office:value="8640000" calcext:value-type="float">
            <text:p>8640000</text:p>
          </table:table-cell>
          <table:table-cell table:formula="of:=[.B665]/[.C665]" office:value-type="float" office:value="0.000768518518518519" calcext:value-type="float">
            <text:p>0,00076851851851851900</text:p>
          </table:table-cell>
          <table:table-cell table:formula="of:=[.D666]-[.D665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table:formula="of:=[.B665]+10" office:value-type="float" office:value="6650" calcext:value-type="float">
            <text:p>6650</text:p>
          </table:table-cell>
          <table:table-cell office:value-type="float" office:value="8640000" calcext:value-type="float">
            <text:p>8640000</text:p>
          </table:table-cell>
          <table:table-cell table:formula="of:=[.B666]/[.C666]" office:value-type="float" office:value="0.000769675925925926" calcext:value-type="float">
            <text:p>0,00076967592592592600</text:p>
          </table:table-cell>
          <table:table-cell table:formula="of:=[.D667]-[.D666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table:formula="of:=[.B666]+10" office:value-type="float" office:value="6660" calcext:value-type="float">
            <text:p>6660</text:p>
          </table:table-cell>
          <table:table-cell office:value-type="float" office:value="8640000" calcext:value-type="float">
            <text:p>8640000</text:p>
          </table:table-cell>
          <table:table-cell table:formula="of:=[.B667]/[.C667]" office:value-type="float" office:value="0.000770833333333333" calcext:value-type="float">
            <text:p>0,00077083333333333300</text:p>
          </table:table-cell>
          <table:table-cell table:formula="of:=[.D668]-[.D667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table:formula="of:=[.B667]+10" office:value-type="float" office:value="6670" calcext:value-type="float">
            <text:p>6670</text:p>
          </table:table-cell>
          <table:table-cell office:value-type="float" office:value="8640000" calcext:value-type="float">
            <text:p>8640000</text:p>
          </table:table-cell>
          <table:table-cell table:formula="of:=[.B668]/[.C668]" office:value-type="float" office:value="0.000771990740740741" calcext:value-type="float">
            <text:p>0,00077199074074074100</text:p>
          </table:table-cell>
          <table:table-cell table:formula="of:=[.D669]-[.D668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table:formula="of:=[.B668]+10" office:value-type="float" office:value="6680" calcext:value-type="float">
            <text:p>6680</text:p>
          </table:table-cell>
          <table:table-cell office:value-type="float" office:value="8640000" calcext:value-type="float">
            <text:p>8640000</text:p>
          </table:table-cell>
          <table:table-cell table:formula="of:=[.B669]/[.C669]" office:value-type="float" office:value="0.000773148148148148" calcext:value-type="float">
            <text:p>0,00077314814814814800</text:p>
          </table:table-cell>
          <table:table-cell table:formula="of:=[.D670]-[.D669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table:formula="of:=[.B669]+10" office:value-type="float" office:value="6690" calcext:value-type="float">
            <text:p>6690</text:p>
          </table:table-cell>
          <table:table-cell office:value-type="float" office:value="8640000" calcext:value-type="float">
            <text:p>8640000</text:p>
          </table:table-cell>
          <table:table-cell table:formula="of:=[.B670]/[.C670]" office:value-type="float" office:value="0.000774305555555556" calcext:value-type="float">
            <text:p>0,00077430555555555600</text:p>
          </table:table-cell>
          <table:table-cell table:formula="of:=[.D671]-[.D670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[.B670]+10" office:value-type="float" office:value="6700" calcext:value-type="float">
            <text:p>6700</text:p>
          </table:table-cell>
          <table:table-cell office:value-type="float" office:value="8640000" calcext:value-type="float">
            <text:p>8640000</text:p>
          </table:table-cell>
          <table:table-cell table:formula="of:=[.B671]/[.C671]" office:value-type="float" office:value="0.000775462962962963" calcext:value-type="float">
            <text:p>0,00077546296296296300</text:p>
          </table:table-cell>
          <table:table-cell table:formula="of:=[.D672]-[.D671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table:formula="of:=[.B671]+10" office:value-type="float" office:value="6710" calcext:value-type="float">
            <text:p>6710</text:p>
          </table:table-cell>
          <table:table-cell office:value-type="float" office:value="8640000" calcext:value-type="float">
            <text:p>8640000</text:p>
          </table:table-cell>
          <table:table-cell table:formula="of:=[.B672]/[.C672]" office:value-type="float" office:value="0.00077662037037037" calcext:value-type="float">
            <text:p>0,00077662037037037000</text:p>
          </table:table-cell>
          <table:table-cell table:formula="of:=[.D673]-[.D672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[.B672]+10" office:value-type="float" office:value="6720" calcext:value-type="float">
            <text:p>6720</text:p>
          </table:table-cell>
          <table:table-cell office:value-type="float" office:value="8640000" calcext:value-type="float">
            <text:p>8640000</text:p>
          </table:table-cell>
          <table:table-cell table:formula="of:=[.B673]/[.C673]" office:value-type="float" office:value="0.000777777777777778" calcext:value-type="float">
            <text:p>0,00077777777777777800</text:p>
          </table:table-cell>
          <table:table-cell table:formula="of:=[.D674]-[.D673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table:formula="of:=[.B673]+10" office:value-type="float" office:value="6730" calcext:value-type="float">
            <text:p>6730</text:p>
          </table:table-cell>
          <table:table-cell office:value-type="float" office:value="8640000" calcext:value-type="float">
            <text:p>8640000</text:p>
          </table:table-cell>
          <table:table-cell table:formula="of:=[.B674]/[.C674]" office:value-type="float" office:value="0.000778935185185185" calcext:value-type="float">
            <text:p>0,00077893518518518500</text:p>
          </table:table-cell>
          <table:table-cell table:formula="of:=[.D675]-[.D674]" office:value-type="float" office:value="0.00000115740740740751" calcext:value-type="float">
            <text:p>0,00000115740740740751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table:formula="of:=[.B674]+10" office:value-type="float" office:value="6740" calcext:value-type="float">
            <text:p>6740</text:p>
          </table:table-cell>
          <table:table-cell office:value-type="float" office:value="8640000" calcext:value-type="float">
            <text:p>8640000</text:p>
          </table:table-cell>
          <table:table-cell table:formula="of:=[.B675]/[.C675]" office:value-type="float" office:value="0.000780092592592593" calcext:value-type="float">
            <text:p>0,00078009259259259300</text:p>
          </table:table-cell>
          <table:table-cell table:formula="of:=[.D676]-[.D675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table:formula="of:=[.B675]+10" office:value-type="float" office:value="6750" calcext:value-type="float">
            <text:p>6750</text:p>
          </table:table-cell>
          <table:table-cell office:value-type="float" office:value="8640000" calcext:value-type="float">
            <text:p>8640000</text:p>
          </table:table-cell>
          <table:table-cell table:formula="of:=[.B676]/[.C676]" office:value-type="float" office:value="0.00078125" calcext:value-type="float">
            <text:p>0,00078125000000000000</text:p>
          </table:table-cell>
          <table:table-cell table:formula="of:=[.D677]-[.D676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table:formula="of:=[.B676]+10" office:value-type="float" office:value="6760" calcext:value-type="float">
            <text:p>6760</text:p>
          </table:table-cell>
          <table:table-cell office:value-type="float" office:value="8640000" calcext:value-type="float">
            <text:p>8640000</text:p>
          </table:table-cell>
          <table:table-cell table:formula="of:=[.B677]/[.C677]" office:value-type="float" office:value="0.000782407407407407" calcext:value-type="float">
            <text:p>0,00078240740740740800</text:p>
          </table:table-cell>
          <table:table-cell table:formula="of:=[.D678]-[.D677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table:formula="of:=[.B677]+10" office:value-type="float" office:value="6770" calcext:value-type="float">
            <text:p>6770</text:p>
          </table:table-cell>
          <table:table-cell office:value-type="float" office:value="8640000" calcext:value-type="float">
            <text:p>8640000</text:p>
          </table:table-cell>
          <table:table-cell table:formula="of:=[.B678]/[.C678]" office:value-type="float" office:value="0.000783564814814815" calcext:value-type="float">
            <text:p>0,00078356481481481500</text:p>
          </table:table-cell>
          <table:table-cell table:formula="of:=[.D679]-[.D678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table:formula="of:=[.B678]+10" office:value-type="float" office:value="6780" calcext:value-type="float">
            <text:p>6780</text:p>
          </table:table-cell>
          <table:table-cell office:value-type="float" office:value="8640000" calcext:value-type="float">
            <text:p>8640000</text:p>
          </table:table-cell>
          <table:table-cell table:formula="of:=[.B679]/[.C679]" office:value-type="float" office:value="0.000784722222222222" calcext:value-type="float">
            <text:p>0,00078472222222222200</text:p>
          </table:table-cell>
          <table:table-cell table:formula="of:=[.D680]-[.D679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table:formula="of:=[.B679]+10" office:value-type="float" office:value="6790" calcext:value-type="float">
            <text:p>6790</text:p>
          </table:table-cell>
          <table:table-cell office:value-type="float" office:value="8640000" calcext:value-type="float">
            <text:p>8640000</text:p>
          </table:table-cell>
          <table:table-cell table:formula="of:=[.B680]/[.C680]" office:value-type="float" office:value="0.00078587962962963" calcext:value-type="float">
            <text:p>0,00078587962962963000</text:p>
          </table:table-cell>
          <table:table-cell table:formula="of:=[.D681]-[.D680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[.B680]+10" office:value-type="float" office:value="6800" calcext:value-type="float">
            <text:p>6800</text:p>
          </table:table-cell>
          <table:table-cell office:value-type="float" office:value="8640000" calcext:value-type="float">
            <text:p>8640000</text:p>
          </table:table-cell>
          <table:table-cell table:formula="of:=[.B681]/[.C681]" office:value-type="float" office:value="0.000787037037037037" calcext:value-type="float">
            <text:p>0,00078703703703703700</text:p>
          </table:table-cell>
          <table:table-cell table:formula="of:=[.D682]-[.D681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table:formula="of:=[.B681]+10" office:value-type="float" office:value="6810" calcext:value-type="float">
            <text:p>6810</text:p>
          </table:table-cell>
          <table:table-cell office:value-type="float" office:value="8640000" calcext:value-type="float">
            <text:p>8640000</text:p>
          </table:table-cell>
          <table:table-cell table:formula="of:=[.B682]/[.C682]" office:value-type="float" office:value="0.000788194444444444" calcext:value-type="float">
            <text:p>0,00078819444444444400</text:p>
          </table:table-cell>
          <table:table-cell table:formula="of:=[.D683]-[.D682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table:formula="of:=[.B682]+10" office:value-type="float" office:value="6820" calcext:value-type="float">
            <text:p>6820</text:p>
          </table:table-cell>
          <table:table-cell office:value-type="float" office:value="8640000" calcext:value-type="float">
            <text:p>8640000</text:p>
          </table:table-cell>
          <table:table-cell table:formula="of:=[.B683]/[.C683]" office:value-type="float" office:value="0.000789351851851852" calcext:value-type="float">
            <text:p>0,00078935185185185200</text:p>
          </table:table-cell>
          <table:table-cell table:formula="of:=[.D684]-[.D683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table:formula="of:=[.B683]+10" office:value-type="float" office:value="6830" calcext:value-type="float">
            <text:p>6830</text:p>
          </table:table-cell>
          <table:table-cell office:value-type="float" office:value="8640000" calcext:value-type="float">
            <text:p>8640000</text:p>
          </table:table-cell>
          <table:table-cell table:formula="of:=[.B684]/[.C684]" office:value-type="float" office:value="0.000790509259259259" calcext:value-type="float">
            <text:p>0,00079050925925925900</text:p>
          </table:table-cell>
          <table:table-cell table:formula="of:=[.D685]-[.D684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table:formula="of:=[.B684]+10" office:value-type="float" office:value="6840" calcext:value-type="float">
            <text:p>6840</text:p>
          </table:table-cell>
          <table:table-cell office:value-type="float" office:value="8640000" calcext:value-type="float">
            <text:p>8640000</text:p>
          </table:table-cell>
          <table:table-cell table:formula="of:=[.B685]/[.C685]" office:value-type="float" office:value="0.000791666666666667" calcext:value-type="float">
            <text:p>0,00079166666666666700</text:p>
          </table:table-cell>
          <table:table-cell table:formula="of:=[.D686]-[.D685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table:formula="of:=[.B685]+10" office:value-type="float" office:value="6850" calcext:value-type="float">
            <text:p>6850</text:p>
          </table:table-cell>
          <table:table-cell office:value-type="float" office:value="8640000" calcext:value-type="float">
            <text:p>8640000</text:p>
          </table:table-cell>
          <table:table-cell table:formula="of:=[.B686]/[.C686]" office:value-type="float" office:value="0.000792824074074074" calcext:value-type="float">
            <text:p>0,00079282407407407400</text:p>
          </table:table-cell>
          <table:table-cell table:formula="of:=[.D687]-[.D686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table:formula="of:=[.B686]+10" office:value-type="float" office:value="6860" calcext:value-type="float">
            <text:p>6860</text:p>
          </table:table-cell>
          <table:table-cell office:value-type="float" office:value="8640000" calcext:value-type="float">
            <text:p>8640000</text:p>
          </table:table-cell>
          <table:table-cell table:formula="of:=[.B687]/[.C687]" office:value-type="float" office:value="0.000793981481481481" calcext:value-type="float">
            <text:p>0,00079398148148148100</text:p>
          </table:table-cell>
          <table:table-cell table:formula="of:=[.D688]-[.D687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table:formula="of:=[.B687]+10" office:value-type="float" office:value="6870" calcext:value-type="float">
            <text:p>6870</text:p>
          </table:table-cell>
          <table:table-cell office:value-type="float" office:value="8640000" calcext:value-type="float">
            <text:p>8640000</text:p>
          </table:table-cell>
          <table:table-cell table:formula="of:=[.B688]/[.C688]" office:value-type="float" office:value="0.000795138888888889" calcext:value-type="float">
            <text:p>0,00079513888888888900</text:p>
          </table:table-cell>
          <table:table-cell table:formula="of:=[.D689]-[.D688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table:formula="of:=[.B688]+10" office:value-type="float" office:value="6880" calcext:value-type="float">
            <text:p>6880</text:p>
          </table:table-cell>
          <table:table-cell office:value-type="float" office:value="8640000" calcext:value-type="float">
            <text:p>8640000</text:p>
          </table:table-cell>
          <table:table-cell table:formula="of:=[.B689]/[.C689]" office:value-type="float" office:value="0.000796296296296296" calcext:value-type="float">
            <text:p>0,00079629629629629600</text:p>
          </table:table-cell>
          <table:table-cell table:formula="of:=[.D690]-[.D689]" office:value-type="float" office:value="0.00000115740740740751" calcext:value-type="float">
            <text:p>0,00000115740740740751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table:formula="of:=[.B689]+10" office:value-type="float" office:value="6890" calcext:value-type="float">
            <text:p>6890</text:p>
          </table:table-cell>
          <table:table-cell office:value-type="float" office:value="8640000" calcext:value-type="float">
            <text:p>8640000</text:p>
          </table:table-cell>
          <table:table-cell table:formula="of:=[.B690]/[.C690]" office:value-type="float" office:value="0.000797453703703704" calcext:value-type="float">
            <text:p>0,00079745370370370400</text:p>
          </table:table-cell>
          <table:table-cell table:formula="of:=[.D691]-[.D690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[.B690]+10" office:value-type="float" office:value="6900" calcext:value-type="float">
            <text:p>6900</text:p>
          </table:table-cell>
          <table:table-cell office:value-type="float" office:value="8640000" calcext:value-type="float">
            <text:p>8640000</text:p>
          </table:table-cell>
          <table:table-cell table:formula="of:=[.B691]/[.C691]" office:value-type="float" office:value="0.000798611111111111" calcext:value-type="float">
            <text:p>0,00079861111111111100</text:p>
          </table:table-cell>
          <table:table-cell table:formula="of:=[.D692]-[.D691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table:formula="of:=[.B691]+10" office:value-type="float" office:value="6910" calcext:value-type="float">
            <text:p>6910</text:p>
          </table:table-cell>
          <table:table-cell office:value-type="float" office:value="8640000" calcext:value-type="float">
            <text:p>8640000</text:p>
          </table:table-cell>
          <table:table-cell table:formula="of:=[.B692]/[.C692]" office:value-type="float" office:value="0.000799768518518519" calcext:value-type="float">
            <text:p>0,00079976851851851900</text:p>
          </table:table-cell>
          <table:table-cell table:formula="of:=[.D693]-[.D692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table:formula="of:=[.B692]+10" office:value-type="float" office:value="6920" calcext:value-type="float">
            <text:p>6920</text:p>
          </table:table-cell>
          <table:table-cell office:value-type="float" office:value="8640000" calcext:value-type="float">
            <text:p>8640000</text:p>
          </table:table-cell>
          <table:table-cell table:formula="of:=[.B693]/[.C693]" office:value-type="float" office:value="0.000800925925925926" calcext:value-type="float">
            <text:p>0,00080092592592592600</text:p>
          </table:table-cell>
          <table:table-cell table:formula="of:=[.D694]-[.D693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table:formula="of:=[.B693]+10" office:value-type="float" office:value="6930" calcext:value-type="float">
            <text:p>6930</text:p>
          </table:table-cell>
          <table:table-cell office:value-type="float" office:value="8640000" calcext:value-type="float">
            <text:p>8640000</text:p>
          </table:table-cell>
          <table:table-cell table:formula="of:=[.B694]/[.C694]" office:value-type="float" office:value="0.000802083333333333" calcext:value-type="float">
            <text:p>0,00080208333333333300</text:p>
          </table:table-cell>
          <table:table-cell table:formula="of:=[.D695]-[.D694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table:formula="of:=[.B694]+10" office:value-type="float" office:value="6940" calcext:value-type="float">
            <text:p>6940</text:p>
          </table:table-cell>
          <table:table-cell office:value-type="float" office:value="8640000" calcext:value-type="float">
            <text:p>8640000</text:p>
          </table:table-cell>
          <table:table-cell table:formula="of:=[.B695]/[.C695]" office:value-type="float" office:value="0.000803240740740741" calcext:value-type="float">
            <text:p>0,00080324074074074100</text:p>
          </table:table-cell>
          <table:table-cell table:formula="of:=[.D696]-[.D695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table:formula="of:=[.B695]+10" office:value-type="float" office:value="6950" calcext:value-type="float">
            <text:p>6950</text:p>
          </table:table-cell>
          <table:table-cell office:value-type="float" office:value="8640000" calcext:value-type="float">
            <text:p>8640000</text:p>
          </table:table-cell>
          <table:table-cell table:formula="of:=[.B696]/[.C696]" office:value-type="float" office:value="0.000804398148148148" calcext:value-type="float">
            <text:p>0,00080439814814814800</text:p>
          </table:table-cell>
          <table:table-cell table:formula="of:=[.D697]-[.D696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table:formula="of:=[.B696]+10" office:value-type="float" office:value="6960" calcext:value-type="float">
            <text:p>6960</text:p>
          </table:table-cell>
          <table:table-cell office:value-type="float" office:value="8640000" calcext:value-type="float">
            <text:p>8640000</text:p>
          </table:table-cell>
          <table:table-cell table:formula="of:=[.B697]/[.C697]" office:value-type="float" office:value="0.000805555555555556" calcext:value-type="float">
            <text:p>0,00080555555555555600</text:p>
          </table:table-cell>
          <table:table-cell table:formula="of:=[.D698]-[.D697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table:formula="of:=[.B697]+10" office:value-type="float" office:value="6970" calcext:value-type="float">
            <text:p>6970</text:p>
          </table:table-cell>
          <table:table-cell office:value-type="float" office:value="8640000" calcext:value-type="float">
            <text:p>8640000</text:p>
          </table:table-cell>
          <table:table-cell table:formula="of:=[.B698]/[.C698]" office:value-type="float" office:value="0.000806712962962963" calcext:value-type="float">
            <text:p>0,00080671296296296300</text:p>
          </table:table-cell>
          <table:table-cell table:formula="of:=[.D699]-[.D698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table:formula="of:=[.B698]+10" office:value-type="float" office:value="6980" calcext:value-type="float">
            <text:p>6980</text:p>
          </table:table-cell>
          <table:table-cell office:value-type="float" office:value="8640000" calcext:value-type="float">
            <text:p>8640000</text:p>
          </table:table-cell>
          <table:table-cell table:formula="of:=[.B699]/[.C699]" office:value-type="float" office:value="0.00080787037037037" calcext:value-type="float">
            <text:p>0,00080787037037037000</text:p>
          </table:table-cell>
          <table:table-cell table:formula="of:=[.D700]-[.D699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table:formula="of:=[.B699]+10" office:value-type="float" office:value="6990" calcext:value-type="float">
            <text:p>6990</text:p>
          </table:table-cell>
          <table:table-cell office:value-type="float" office:value="8640000" calcext:value-type="float">
            <text:p>8640000</text:p>
          </table:table-cell>
          <table:table-cell table:formula="of:=[.B700]/[.C700]" office:value-type="float" office:value="0.000809027777777778" calcext:value-type="float">
            <text:p>0,00080902777777777800</text:p>
          </table:table-cell>
          <table:table-cell table:formula="of:=[.D701]-[.D700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[.B700]+10" office:value-type="float" office:value="7000" calcext:value-type="float">
            <text:p>7000</text:p>
          </table:table-cell>
          <table:table-cell office:value-type="float" office:value="8640000" calcext:value-type="float">
            <text:p>8640000</text:p>
          </table:table-cell>
          <table:table-cell table:formula="of:=[.B701]/[.C701]" office:value-type="float" office:value="0.000810185185185185" calcext:value-type="float">
            <text:p>0,00081018518518518500</text:p>
          </table:table-cell>
          <table:table-cell table:formula="of:=[.D702]-[.D701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table:formula="of:=[.B701]+10" office:value-type="float" office:value="7010" calcext:value-type="float">
            <text:p>7010</text:p>
          </table:table-cell>
          <table:table-cell office:value-type="float" office:value="8640000" calcext:value-type="float">
            <text:p>8640000</text:p>
          </table:table-cell>
          <table:table-cell table:formula="of:=[.B702]/[.C702]" office:value-type="float" office:value="0.000811342592592593" calcext:value-type="float">
            <text:p>0,00081134259259259300</text:p>
          </table:table-cell>
          <table:table-cell table:formula="of:=[.D703]-[.D702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table:formula="of:=[.B702]+10" office:value-type="float" office:value="7020" calcext:value-type="float">
            <text:p>7020</text:p>
          </table:table-cell>
          <table:table-cell office:value-type="float" office:value="8640000" calcext:value-type="float">
            <text:p>8640000</text:p>
          </table:table-cell>
          <table:table-cell table:formula="of:=[.B703]/[.C703]" office:value-type="float" office:value="0.0008125" calcext:value-type="float">
            <text:p>0,00081250000000000000</text:p>
          </table:table-cell>
          <table:table-cell table:formula="of:=[.D704]-[.D703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table:formula="of:=[.B703]+10" office:value-type="float" office:value="7030" calcext:value-type="float">
            <text:p>7030</text:p>
          </table:table-cell>
          <table:table-cell office:value-type="float" office:value="8640000" calcext:value-type="float">
            <text:p>8640000</text:p>
          </table:table-cell>
          <table:table-cell table:formula="of:=[.B704]/[.C704]" office:value-type="float" office:value="0.000813657407407407" calcext:value-type="float">
            <text:p>0,00081365740740740700</text:p>
          </table:table-cell>
          <table:table-cell table:formula="of:=[.D705]-[.D704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[.B704]+10" office:value-type="float" office:value="7040" calcext:value-type="float">
            <text:p>7040</text:p>
          </table:table-cell>
          <table:table-cell office:value-type="float" office:value="8640000" calcext:value-type="float">
            <text:p>8640000</text:p>
          </table:table-cell>
          <table:table-cell table:formula="of:=[.B705]/[.C705]" office:value-type="float" office:value="0.000814814814814815" calcext:value-type="float">
            <text:p>0,00081481481481481500</text:p>
          </table:table-cell>
          <table:table-cell table:formula="of:=[.D706]-[.D705]" office:value-type="float" office:value="0.00000115740740740751" calcext:value-type="float">
            <text:p>0,00000115740740740751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table:formula="of:=[.B705]+10" office:value-type="float" office:value="7050" calcext:value-type="float">
            <text:p>7050</text:p>
          </table:table-cell>
          <table:table-cell office:value-type="float" office:value="8640000" calcext:value-type="float">
            <text:p>8640000</text:p>
          </table:table-cell>
          <table:table-cell table:formula="of:=[.B706]/[.C706]" office:value-type="float" office:value="0.000815972222222222" calcext:value-type="float">
            <text:p>0,00081597222222222200</text:p>
          </table:table-cell>
          <table:table-cell table:formula="of:=[.D707]-[.D706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table:formula="of:=[.B706]+10" office:value-type="float" office:value="7060" calcext:value-type="float">
            <text:p>7060</text:p>
          </table:table-cell>
          <table:table-cell office:value-type="float" office:value="8640000" calcext:value-type="float">
            <text:p>8640000</text:p>
          </table:table-cell>
          <table:table-cell table:formula="of:=[.B707]/[.C707]" office:value-type="float" office:value="0.00081712962962963" calcext:value-type="float">
            <text:p>0,00081712962962963000</text:p>
          </table:table-cell>
          <table:table-cell table:formula="of:=[.D708]-[.D707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table:formula="of:=[.B707]+10" office:value-type="float" office:value="7070" calcext:value-type="float">
            <text:p>7070</text:p>
          </table:table-cell>
          <table:table-cell office:value-type="float" office:value="8640000" calcext:value-type="float">
            <text:p>8640000</text:p>
          </table:table-cell>
          <table:table-cell table:formula="of:=[.B708]/[.C708]" office:value-type="float" office:value="0.000818287037037037" calcext:value-type="float">
            <text:p>0,00081828703703703700</text:p>
          </table:table-cell>
          <table:table-cell table:formula="of:=[.D709]-[.D708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table:formula="of:=[.B708]+10" office:value-type="float" office:value="7080" calcext:value-type="float">
            <text:p>7080</text:p>
          </table:table-cell>
          <table:table-cell office:value-type="float" office:value="8640000" calcext:value-type="float">
            <text:p>8640000</text:p>
          </table:table-cell>
          <table:table-cell table:formula="of:=[.B709]/[.C709]" office:value-type="float" office:value="0.000819444444444445" calcext:value-type="float">
            <text:p>0,00081944444444444500</text:p>
          </table:table-cell>
          <table:table-cell table:formula="of:=[.D710]-[.D709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table:formula="of:=[.B709]+10" office:value-type="float" office:value="7090" calcext:value-type="float">
            <text:p>7090</text:p>
          </table:table-cell>
          <table:table-cell office:value-type="float" office:value="8640000" calcext:value-type="float">
            <text:p>8640000</text:p>
          </table:table-cell>
          <table:table-cell table:formula="of:=[.B710]/[.C710]" office:value-type="float" office:value="0.000820601851851852" calcext:value-type="float">
            <text:p>0,00082060185185185200</text:p>
          </table:table-cell>
          <table:table-cell table:formula="of:=[.D711]-[.D710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[.B710]+10" office:value-type="float" office:value="7100" calcext:value-type="float">
            <text:p>7100</text:p>
          </table:table-cell>
          <table:table-cell office:value-type="float" office:value="8640000" calcext:value-type="float">
            <text:p>8640000</text:p>
          </table:table-cell>
          <table:table-cell table:formula="of:=[.B711]/[.C711]" office:value-type="float" office:value="0.000821759259259259" calcext:value-type="float">
            <text:p>0,00082175925925925900</text:p>
          </table:table-cell>
          <table:table-cell table:formula="of:=[.D712]-[.D711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table:formula="of:=[.B711]+10" office:value-type="float" office:value="7110" calcext:value-type="float">
            <text:p>7110</text:p>
          </table:table-cell>
          <table:table-cell office:value-type="float" office:value="8640000" calcext:value-type="float">
            <text:p>8640000</text:p>
          </table:table-cell>
          <table:table-cell table:formula="of:=[.B712]/[.C712]" office:value-type="float" office:value="0.000822916666666667" calcext:value-type="float">
            <text:p>0,00082291666666666700</text:p>
          </table:table-cell>
          <table:table-cell table:formula="of:=[.D713]-[.D712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table:formula="of:=[.B712]+10" office:value-type="float" office:value="7120" calcext:value-type="float">
            <text:p>7120</text:p>
          </table:table-cell>
          <table:table-cell office:value-type="float" office:value="8640000" calcext:value-type="float">
            <text:p>8640000</text:p>
          </table:table-cell>
          <table:table-cell table:formula="of:=[.B713]/[.C713]" office:value-type="float" office:value="0.000824074074074074" calcext:value-type="float">
            <text:p>0,00082407407407407400</text:p>
          </table:table-cell>
          <table:table-cell table:formula="of:=[.D714]-[.D713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table:formula="of:=[.B713]+10" office:value-type="float" office:value="7130" calcext:value-type="float">
            <text:p>7130</text:p>
          </table:table-cell>
          <table:table-cell office:value-type="float" office:value="8640000" calcext:value-type="float">
            <text:p>8640000</text:p>
          </table:table-cell>
          <table:table-cell table:formula="of:=[.B714]/[.C714]" office:value-type="float" office:value="0.000825231481481482" calcext:value-type="float">
            <text:p>0,00082523148148148200</text:p>
          </table:table-cell>
          <table:table-cell table:formula="of:=[.D715]-[.D714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table:formula="of:=[.B714]+10" office:value-type="float" office:value="7140" calcext:value-type="float">
            <text:p>7140</text:p>
          </table:table-cell>
          <table:table-cell office:value-type="float" office:value="8640000" calcext:value-type="float">
            <text:p>8640000</text:p>
          </table:table-cell>
          <table:table-cell table:formula="of:=[.B715]/[.C715]" office:value-type="float" office:value="0.000826388888888889" calcext:value-type="float">
            <text:p>0,00082638888888888900</text:p>
          </table:table-cell>
          <table:table-cell table:formula="of:=[.D716]-[.D715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table:formula="of:=[.B715]+10" office:value-type="float" office:value="7150" calcext:value-type="float">
            <text:p>7150</text:p>
          </table:table-cell>
          <table:table-cell office:value-type="float" office:value="8640000" calcext:value-type="float">
            <text:p>8640000</text:p>
          </table:table-cell>
          <table:table-cell table:formula="of:=[.B716]/[.C716]" office:value-type="float" office:value="0.000827546296296296" calcext:value-type="float">
            <text:p>0,00082754629629629600</text:p>
          </table:table-cell>
          <table:table-cell table:formula="of:=[.D717]-[.D716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table:formula="of:=[.B716]+10" office:value-type="float" office:value="7160" calcext:value-type="float">
            <text:p>7160</text:p>
          </table:table-cell>
          <table:table-cell office:value-type="float" office:value="8640000" calcext:value-type="float">
            <text:p>8640000</text:p>
          </table:table-cell>
          <table:table-cell table:formula="of:=[.B717]/[.C717]" office:value-type="float" office:value="0.000828703703703704" calcext:value-type="float">
            <text:p>0,00082870370370370400</text:p>
          </table:table-cell>
          <table:table-cell table:formula="of:=[.D718]-[.D717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table:formula="of:=[.B717]+10" office:value-type="float" office:value="7170" calcext:value-type="float">
            <text:p>7170</text:p>
          </table:table-cell>
          <table:table-cell office:value-type="float" office:value="8640000" calcext:value-type="float">
            <text:p>8640000</text:p>
          </table:table-cell>
          <table:table-cell table:formula="of:=[.B718]/[.C718]" office:value-type="float" office:value="0.000829861111111111" calcext:value-type="float">
            <text:p>0,00082986111111111100</text:p>
          </table:table-cell>
          <table:table-cell table:formula="of:=[.D719]-[.D718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table:formula="of:=[.B718]+10" office:value-type="float" office:value="7180" calcext:value-type="float">
            <text:p>7180</text:p>
          </table:table-cell>
          <table:table-cell office:value-type="float" office:value="8640000" calcext:value-type="float">
            <text:p>8640000</text:p>
          </table:table-cell>
          <table:table-cell table:formula="of:=[.B719]/[.C719]" office:value-type="float" office:value="0.000831018518518519" calcext:value-type="float">
            <text:p>0,00083101851851851800</text:p>
          </table:table-cell>
          <table:table-cell table:formula="of:=[.D720]-[.D719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table:formula="of:=[.B719]+10" office:value-type="float" office:value="7190" calcext:value-type="float">
            <text:p>7190</text:p>
          </table:table-cell>
          <table:table-cell office:value-type="float" office:value="8640000" calcext:value-type="float">
            <text:p>8640000</text:p>
          </table:table-cell>
          <table:table-cell table:formula="of:=[.B720]/[.C720]" office:value-type="float" office:value="0.000832175925925926" calcext:value-type="float">
            <text:p>0,00083217592592592600</text:p>
          </table:table-cell>
          <table:table-cell table:formula="of:=[.D721]-[.D720]" office:value-type="float" office:value="0.00000115740740740751" calcext:value-type="float">
            <text:p>0,00000115740740740751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[.B720]+10" office:value-type="float" office:value="7200" calcext:value-type="float">
            <text:p>7200</text:p>
          </table:table-cell>
          <table:table-cell office:value-type="float" office:value="8640000" calcext:value-type="float">
            <text:p>8640000</text:p>
          </table:table-cell>
          <table:table-cell table:formula="of:=[.B721]/[.C721]" office:value-type="float" office:value="0.000833333333333333" calcext:value-type="float">
            <text:p>0,00083333333333333300</text:p>
          </table:table-cell>
          <table:table-cell table:formula="of:=[.D722]-[.D721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table:formula="of:=[.B721]+10" office:value-type="float" office:value="7210" calcext:value-type="float">
            <text:p>7210</text:p>
          </table:table-cell>
          <table:table-cell office:value-type="float" office:value="8640000" calcext:value-type="float">
            <text:p>8640000</text:p>
          </table:table-cell>
          <table:table-cell table:formula="of:=[.B722]/[.C722]" office:value-type="float" office:value="0.000834490740740741" calcext:value-type="float">
            <text:p>0,00083449074074074100</text:p>
          </table:table-cell>
          <table:table-cell table:formula="of:=[.D723]-[.D722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table:formula="of:=[.B722]+10" office:value-type="float" office:value="7220" calcext:value-type="float">
            <text:p>7220</text:p>
          </table:table-cell>
          <table:table-cell office:value-type="float" office:value="8640000" calcext:value-type="float">
            <text:p>8640000</text:p>
          </table:table-cell>
          <table:table-cell table:formula="of:=[.B723]/[.C723]" office:value-type="float" office:value="0.000835648148148148" calcext:value-type="float">
            <text:p>0,00083564814814814800</text:p>
          </table:table-cell>
          <table:table-cell table:formula="of:=[.D724]-[.D723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table:formula="of:=[.B723]+10" office:value-type="float" office:value="7230" calcext:value-type="float">
            <text:p>7230</text:p>
          </table:table-cell>
          <table:table-cell office:value-type="float" office:value="8640000" calcext:value-type="float">
            <text:p>8640000</text:p>
          </table:table-cell>
          <table:table-cell table:formula="of:=[.B724]/[.C724]" office:value-type="float" office:value="0.000836805555555556" calcext:value-type="float">
            <text:p>0,00083680555555555600</text:p>
          </table:table-cell>
          <table:table-cell table:formula="of:=[.D725]-[.D724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table:formula="of:=[.B724]+10" office:value-type="float" office:value="7240" calcext:value-type="float">
            <text:p>7240</text:p>
          </table:table-cell>
          <table:table-cell office:value-type="float" office:value="8640000" calcext:value-type="float">
            <text:p>8640000</text:p>
          </table:table-cell>
          <table:table-cell table:formula="of:=[.B725]/[.C725]" office:value-type="float" office:value="0.000837962962962963" calcext:value-type="float">
            <text:p>0,00083796296296296300</text:p>
          </table:table-cell>
          <table:table-cell table:formula="of:=[.D726]-[.D725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table:formula="of:=[.B725]+10" office:value-type="float" office:value="7250" calcext:value-type="float">
            <text:p>7250</text:p>
          </table:table-cell>
          <table:table-cell office:value-type="float" office:value="8640000" calcext:value-type="float">
            <text:p>8640000</text:p>
          </table:table-cell>
          <table:table-cell table:formula="of:=[.B726]/[.C726]" office:value-type="float" office:value="0.00083912037037037" calcext:value-type="float">
            <text:p>0,00083912037037037000</text:p>
          </table:table-cell>
          <table:table-cell table:formula="of:=[.D727]-[.D726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table:formula="of:=[.B726]+10" office:value-type="float" office:value="7260" calcext:value-type="float">
            <text:p>7260</text:p>
          </table:table-cell>
          <table:table-cell office:value-type="float" office:value="8640000" calcext:value-type="float">
            <text:p>8640000</text:p>
          </table:table-cell>
          <table:table-cell table:formula="of:=[.B727]/[.C727]" office:value-type="float" office:value="0.000840277777777778" calcext:value-type="float">
            <text:p>0,00084027777777777800</text:p>
          </table:table-cell>
          <table:table-cell table:formula="of:=[.D728]-[.D727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table:formula="of:=[.B727]+10" office:value-type="float" office:value="7270" calcext:value-type="float">
            <text:p>7270</text:p>
          </table:table-cell>
          <table:table-cell office:value-type="float" office:value="8640000" calcext:value-type="float">
            <text:p>8640000</text:p>
          </table:table-cell>
          <table:table-cell table:formula="of:=[.B728]/[.C728]" office:value-type="float" office:value="0.000841435185185185" calcext:value-type="float">
            <text:p>0,00084143518518518500</text:p>
          </table:table-cell>
          <table:table-cell table:formula="of:=[.D729]-[.D728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table:formula="of:=[.B728]+10" office:value-type="float" office:value="7280" calcext:value-type="float">
            <text:p>7280</text:p>
          </table:table-cell>
          <table:table-cell office:value-type="float" office:value="8640000" calcext:value-type="float">
            <text:p>8640000</text:p>
          </table:table-cell>
          <table:table-cell table:formula="of:=[.B729]/[.C729]" office:value-type="float" office:value="0.000842592592592593" calcext:value-type="float">
            <text:p>0,00084259259259259300</text:p>
          </table:table-cell>
          <table:table-cell table:formula="of:=[.D730]-[.D729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table:formula="of:=[.B729]+10" office:value-type="float" office:value="7290" calcext:value-type="float">
            <text:p>7290</text:p>
          </table:table-cell>
          <table:table-cell office:value-type="float" office:value="8640000" calcext:value-type="float">
            <text:p>8640000</text:p>
          </table:table-cell>
          <table:table-cell table:formula="of:=[.B730]/[.C730]" office:value-type="float" office:value="0.00084375" calcext:value-type="float">
            <text:p>0,00084375000000000000</text:p>
          </table:table-cell>
          <table:table-cell table:formula="of:=[.D731]-[.D730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[.B730]+10" office:value-type="float" office:value="7300" calcext:value-type="float">
            <text:p>7300</text:p>
          </table:table-cell>
          <table:table-cell office:value-type="float" office:value="8640000" calcext:value-type="float">
            <text:p>8640000</text:p>
          </table:table-cell>
          <table:table-cell table:formula="of:=[.B731]/[.C731]" office:value-type="float" office:value="0.000844907407407407" calcext:value-type="float">
            <text:p>0,00084490740740740700</text:p>
          </table:table-cell>
          <table:table-cell table:formula="of:=[.D732]-[.D731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table:formula="of:=[.B731]+10" office:value-type="float" office:value="7310" calcext:value-type="float">
            <text:p>7310</text:p>
          </table:table-cell>
          <table:table-cell office:value-type="float" office:value="8640000" calcext:value-type="float">
            <text:p>8640000</text:p>
          </table:table-cell>
          <table:table-cell table:formula="of:=[.B732]/[.C732]" office:value-type="float" office:value="0.000846064814814815" calcext:value-type="float">
            <text:p>0,00084606481481481500</text:p>
          </table:table-cell>
          <table:table-cell table:formula="of:=[.D733]-[.D732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table:formula="of:=[.B732]+10" office:value-type="float" office:value="7320" calcext:value-type="float">
            <text:p>7320</text:p>
          </table:table-cell>
          <table:table-cell office:value-type="float" office:value="8640000" calcext:value-type="float">
            <text:p>8640000</text:p>
          </table:table-cell>
          <table:table-cell table:formula="of:=[.B733]/[.C733]" office:value-type="float" office:value="0.000847222222222222" calcext:value-type="float">
            <text:p>0,00084722222222222200</text:p>
          </table:table-cell>
          <table:table-cell table:formula="of:=[.D734]-[.D733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table:formula="of:=[.B733]+10" office:value-type="float" office:value="7330" calcext:value-type="float">
            <text:p>7330</text:p>
          </table:table-cell>
          <table:table-cell office:value-type="float" office:value="8640000" calcext:value-type="float">
            <text:p>8640000</text:p>
          </table:table-cell>
          <table:table-cell table:formula="of:=[.B734]/[.C734]" office:value-type="float" office:value="0.00084837962962963" calcext:value-type="float">
            <text:p>0,00084837962962963000</text:p>
          </table:table-cell>
          <table:table-cell table:formula="of:=[.D735]-[.D734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table:formula="of:=[.B734]+10" office:value-type="float" office:value="7340" calcext:value-type="float">
            <text:p>7340</text:p>
          </table:table-cell>
          <table:table-cell office:value-type="float" office:value="8640000" calcext:value-type="float">
            <text:p>8640000</text:p>
          </table:table-cell>
          <table:table-cell table:formula="of:=[.B735]/[.C735]" office:value-type="float" office:value="0.000849537037037037" calcext:value-type="float">
            <text:p>0,00084953703703703700</text:p>
          </table:table-cell>
          <table:table-cell table:formula="of:=[.D736]-[.D735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table:formula="of:=[.B735]+10" office:value-type="float" office:value="7350" calcext:value-type="float">
            <text:p>7350</text:p>
          </table:table-cell>
          <table:table-cell office:value-type="float" office:value="8640000" calcext:value-type="float">
            <text:p>8640000</text:p>
          </table:table-cell>
          <table:table-cell table:formula="of:=[.B736]/[.C736]" office:value-type="float" office:value="0.000850694444444444" calcext:value-type="float">
            <text:p>0,00085069444444444400</text:p>
          </table:table-cell>
          <table:table-cell table:formula="of:=[.D737]-[.D736]" office:value-type="float" office:value="0.00000115740740740751" calcext:value-type="float">
            <text:p>0,00000115740740740751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table:formula="of:=[.B736]+10" office:value-type="float" office:value="7360" calcext:value-type="float">
            <text:p>7360</text:p>
          </table:table-cell>
          <table:table-cell office:value-type="float" office:value="8640000" calcext:value-type="float">
            <text:p>8640000</text:p>
          </table:table-cell>
          <table:table-cell table:formula="of:=[.B737]/[.C737]" office:value-type="float" office:value="0.000851851851851852" calcext:value-type="float">
            <text:p>0,00085185185185185200</text:p>
          </table:table-cell>
          <table:table-cell table:formula="of:=[.D738]-[.D737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table:formula="of:=[.B737]+10" office:value-type="float" office:value="7370" calcext:value-type="float">
            <text:p>7370</text:p>
          </table:table-cell>
          <table:table-cell office:value-type="float" office:value="8640000" calcext:value-type="float">
            <text:p>8640000</text:p>
          </table:table-cell>
          <table:table-cell table:formula="of:=[.B738]/[.C738]" office:value-type="float" office:value="0.000853009259259259" calcext:value-type="float">
            <text:p>0,00085300925925925900</text:p>
          </table:table-cell>
          <table:table-cell table:formula="of:=[.D739]-[.D738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table:formula="of:=[.B738]+10" office:value-type="float" office:value="7380" calcext:value-type="float">
            <text:p>7380</text:p>
          </table:table-cell>
          <table:table-cell office:value-type="float" office:value="8640000" calcext:value-type="float">
            <text:p>8640000</text:p>
          </table:table-cell>
          <table:table-cell table:formula="of:=[.B739]/[.C739]" office:value-type="float" office:value="0.000854166666666667" calcext:value-type="float">
            <text:p>0,00085416666666666700</text:p>
          </table:table-cell>
          <table:table-cell table:formula="of:=[.D740]-[.D739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table:formula="of:=[.B739]+10" office:value-type="float" office:value="7390" calcext:value-type="float">
            <text:p>7390</text:p>
          </table:table-cell>
          <table:table-cell office:value-type="float" office:value="8640000" calcext:value-type="float">
            <text:p>8640000</text:p>
          </table:table-cell>
          <table:table-cell table:formula="of:=[.B740]/[.C740]" office:value-type="float" office:value="0.000855324074074074" calcext:value-type="float">
            <text:p>0,00085532407407407400</text:p>
          </table:table-cell>
          <table:table-cell table:formula="of:=[.D741]-[.D740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[.B740]+10" office:value-type="float" office:value="7400" calcext:value-type="float">
            <text:p>7400</text:p>
          </table:table-cell>
          <table:table-cell office:value-type="float" office:value="8640000" calcext:value-type="float">
            <text:p>8640000</text:p>
          </table:table-cell>
          <table:table-cell table:formula="of:=[.B741]/[.C741]" office:value-type="float" office:value="0.000856481481481482" calcext:value-type="float">
            <text:p>0,00085648148148148100</text:p>
          </table:table-cell>
          <table:table-cell table:formula="of:=[.D742]-[.D741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table:formula="of:=[.B741]+10" office:value-type="float" office:value="7410" calcext:value-type="float">
            <text:p>7410</text:p>
          </table:table-cell>
          <table:table-cell office:value-type="float" office:value="8640000" calcext:value-type="float">
            <text:p>8640000</text:p>
          </table:table-cell>
          <table:table-cell table:formula="of:=[.B742]/[.C742]" office:value-type="float" office:value="0.000857638888888889" calcext:value-type="float">
            <text:p>0,00085763888888888900</text:p>
          </table:table-cell>
          <table:table-cell table:formula="of:=[.D743]-[.D742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table:formula="of:=[.B742]+10" office:value-type="float" office:value="7420" calcext:value-type="float">
            <text:p>7420</text:p>
          </table:table-cell>
          <table:table-cell office:value-type="float" office:value="8640000" calcext:value-type="float">
            <text:p>8640000</text:p>
          </table:table-cell>
          <table:table-cell table:formula="of:=[.B743]/[.C743]" office:value-type="float" office:value="0.000858796296296296" calcext:value-type="float">
            <text:p>0,00085879629629629600</text:p>
          </table:table-cell>
          <table:table-cell table:formula="of:=[.D744]-[.D743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table:formula="of:=[.B743]+10" office:value-type="float" office:value="7430" calcext:value-type="float">
            <text:p>7430</text:p>
          </table:table-cell>
          <table:table-cell office:value-type="float" office:value="8640000" calcext:value-type="float">
            <text:p>8640000</text:p>
          </table:table-cell>
          <table:table-cell table:formula="of:=[.B744]/[.C744]" office:value-type="float" office:value="0.000859953703703704" calcext:value-type="float">
            <text:p>0,00085995370370370400</text:p>
          </table:table-cell>
          <table:table-cell table:formula="of:=[.D745]-[.D744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table:formula="of:=[.B744]+10" office:value-type="float" office:value="7440" calcext:value-type="float">
            <text:p>7440</text:p>
          </table:table-cell>
          <table:table-cell office:value-type="float" office:value="8640000" calcext:value-type="float">
            <text:p>8640000</text:p>
          </table:table-cell>
          <table:table-cell table:formula="of:=[.B745]/[.C745]" office:value-type="float" office:value="0.000861111111111111" calcext:value-type="float">
            <text:p>0,00086111111111111100</text:p>
          </table:table-cell>
          <table:table-cell table:formula="of:=[.D746]-[.D745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table:formula="of:=[.B745]+10" office:value-type="float" office:value="7450" calcext:value-type="float">
            <text:p>7450</text:p>
          </table:table-cell>
          <table:table-cell office:value-type="float" office:value="8640000" calcext:value-type="float">
            <text:p>8640000</text:p>
          </table:table-cell>
          <table:table-cell table:formula="of:=[.B746]/[.C746]" office:value-type="float" office:value="0.000862268518518519" calcext:value-type="float">
            <text:p>0,00086226851851851900</text:p>
          </table:table-cell>
          <table:table-cell table:formula="of:=[.D747]-[.D746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table:formula="of:=[.B746]+10" office:value-type="float" office:value="7460" calcext:value-type="float">
            <text:p>7460</text:p>
          </table:table-cell>
          <table:table-cell office:value-type="float" office:value="8640000" calcext:value-type="float">
            <text:p>8640000</text:p>
          </table:table-cell>
          <table:table-cell table:formula="of:=[.B747]/[.C747]" office:value-type="float" office:value="0.000863425925925926" calcext:value-type="float">
            <text:p>0,00086342592592592600</text:p>
          </table:table-cell>
          <table:table-cell table:formula="of:=[.D748]-[.D747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table:formula="of:=[.B747]+10" office:value-type="float" office:value="7470" calcext:value-type="float">
            <text:p>7470</text:p>
          </table:table-cell>
          <table:table-cell office:value-type="float" office:value="8640000" calcext:value-type="float">
            <text:p>8640000</text:p>
          </table:table-cell>
          <table:table-cell table:formula="of:=[.B748]/[.C748]" office:value-type="float" office:value="0.000864583333333333" calcext:value-type="float">
            <text:p>0,00086458333333333300</text:p>
          </table:table-cell>
          <table:table-cell table:formula="of:=[.D749]-[.D748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table:formula="of:=[.B748]+10" office:value-type="float" office:value="7480" calcext:value-type="float">
            <text:p>7480</text:p>
          </table:table-cell>
          <table:table-cell office:value-type="float" office:value="8640000" calcext:value-type="float">
            <text:p>8640000</text:p>
          </table:table-cell>
          <table:table-cell table:formula="of:=[.B749]/[.C749]" office:value-type="float" office:value="0.000865740740740741" calcext:value-type="float">
            <text:p>0,00086574074074074100</text:p>
          </table:table-cell>
          <table:table-cell table:formula="of:=[.D750]-[.D749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table:formula="of:=[.B749]+10" office:value-type="float" office:value="7490" calcext:value-type="float">
            <text:p>7490</text:p>
          </table:table-cell>
          <table:table-cell office:value-type="float" office:value="8640000" calcext:value-type="float">
            <text:p>8640000</text:p>
          </table:table-cell>
          <table:table-cell table:formula="of:=[.B750]/[.C750]" office:value-type="float" office:value="0.000866898148148148" calcext:value-type="float">
            <text:p>0,00086689814814814800</text:p>
          </table:table-cell>
          <table:table-cell table:formula="of:=[.D751]-[.D750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[.B750]+10" office:value-type="float" office:value="7500" calcext:value-type="float">
            <text:p>7500</text:p>
          </table:table-cell>
          <table:table-cell office:value-type="float" office:value="8640000" calcext:value-type="float">
            <text:p>8640000</text:p>
          </table:table-cell>
          <table:table-cell table:formula="of:=[.B751]/[.C751]" office:value-type="float" office:value="0.000868055555555556" calcext:value-type="float">
            <text:p>0,00086805555555555600</text:p>
          </table:table-cell>
          <table:table-cell table:formula="of:=[.D752]-[.D751]" office:value-type="float" office:value="0.00000115740740740751" calcext:value-type="float">
            <text:p>0,00000115740740740751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table:formula="of:=[.B751]+10" office:value-type="float" office:value="7510" calcext:value-type="float">
            <text:p>7510</text:p>
          </table:table-cell>
          <table:table-cell office:value-type="float" office:value="8640000" calcext:value-type="float">
            <text:p>8640000</text:p>
          </table:table-cell>
          <table:table-cell table:formula="of:=[.B752]/[.C752]" office:value-type="float" office:value="0.000869212962962963" calcext:value-type="float">
            <text:p>0,00086921296296296300</text:p>
          </table:table-cell>
          <table:table-cell table:formula="of:=[.D753]-[.D752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table:formula="of:=[.B752]+10" office:value-type="float" office:value="7520" calcext:value-type="float">
            <text:p>7520</text:p>
          </table:table-cell>
          <table:table-cell office:value-type="float" office:value="8640000" calcext:value-type="float">
            <text:p>8640000</text:p>
          </table:table-cell>
          <table:table-cell table:formula="of:=[.B753]/[.C753]" office:value-type="float" office:value="0.00087037037037037" calcext:value-type="float">
            <text:p>0,00087037037037037000</text:p>
          </table:table-cell>
          <table:table-cell table:formula="of:=[.D754]-[.D753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table:formula="of:=[.B753]+10" office:value-type="float" office:value="7530" calcext:value-type="float">
            <text:p>7530</text:p>
          </table:table-cell>
          <table:table-cell office:value-type="float" office:value="8640000" calcext:value-type="float">
            <text:p>8640000</text:p>
          </table:table-cell>
          <table:table-cell table:formula="of:=[.B754]/[.C754]" office:value-type="float" office:value="0.000871527777777778" calcext:value-type="float">
            <text:p>0,00087152777777777800</text:p>
          </table:table-cell>
          <table:table-cell table:formula="of:=[.D755]-[.D754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table:formula="of:=[.B754]+10" office:value-type="float" office:value="7540" calcext:value-type="float">
            <text:p>7540</text:p>
          </table:table-cell>
          <table:table-cell office:value-type="float" office:value="8640000" calcext:value-type="float">
            <text:p>8640000</text:p>
          </table:table-cell>
          <table:table-cell table:formula="of:=[.B755]/[.C755]" office:value-type="float" office:value="0.000872685185185185" calcext:value-type="float">
            <text:p>0,00087268518518518500</text:p>
          </table:table-cell>
          <table:table-cell table:formula="of:=[.D756]-[.D755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table:formula="of:=[.B755]+10" office:value-type="float" office:value="7550" calcext:value-type="float">
            <text:p>7550</text:p>
          </table:table-cell>
          <table:table-cell office:value-type="float" office:value="8640000" calcext:value-type="float">
            <text:p>8640000</text:p>
          </table:table-cell>
          <table:table-cell table:formula="of:=[.B756]/[.C756]" office:value-type="float" office:value="0.000873842592592593" calcext:value-type="float">
            <text:p>0,00087384259259259300</text:p>
          </table:table-cell>
          <table:table-cell table:formula="of:=[.D757]-[.D756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table:formula="of:=[.B756]+10" office:value-type="float" office:value="7560" calcext:value-type="float">
            <text:p>7560</text:p>
          </table:table-cell>
          <table:table-cell office:value-type="float" office:value="8640000" calcext:value-type="float">
            <text:p>8640000</text:p>
          </table:table-cell>
          <table:table-cell table:formula="of:=[.B757]/[.C757]" office:value-type="float" office:value="0.000875" calcext:value-type="float">
            <text:p>0,00087500000000000000</text:p>
          </table:table-cell>
          <table:table-cell table:formula="of:=[.D758]-[.D757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table:formula="of:=[.B757]+10" office:value-type="float" office:value="7570" calcext:value-type="float">
            <text:p>7570</text:p>
          </table:table-cell>
          <table:table-cell office:value-type="float" office:value="8640000" calcext:value-type="float">
            <text:p>8640000</text:p>
          </table:table-cell>
          <table:table-cell table:formula="of:=[.B758]/[.C758]" office:value-type="float" office:value="0.000876157407407407" calcext:value-type="float">
            <text:p>0,00087615740740740700</text:p>
          </table:table-cell>
          <table:table-cell table:formula="of:=[.D759]-[.D758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table:formula="of:=[.B758]+10" office:value-type="float" office:value="7580" calcext:value-type="float">
            <text:p>7580</text:p>
          </table:table-cell>
          <table:table-cell office:value-type="float" office:value="8640000" calcext:value-type="float">
            <text:p>8640000</text:p>
          </table:table-cell>
          <table:table-cell table:formula="of:=[.B759]/[.C759]" office:value-type="float" office:value="0.000877314814814815" calcext:value-type="float">
            <text:p>0,00087731481481481500</text:p>
          </table:table-cell>
          <table:table-cell table:formula="of:=[.D760]-[.D759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table:formula="of:=[.B759]+10" office:value-type="float" office:value="7590" calcext:value-type="float">
            <text:p>7590</text:p>
          </table:table-cell>
          <table:table-cell office:value-type="float" office:value="8640000" calcext:value-type="float">
            <text:p>8640000</text:p>
          </table:table-cell>
          <table:table-cell table:formula="of:=[.B760]/[.C760]" office:value-type="float" office:value="0.000878472222222222" calcext:value-type="float">
            <text:p>0,00087847222222222200</text:p>
          </table:table-cell>
          <table:table-cell table:formula="of:=[.D761]-[.D760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table:formula="of:=[.B760]+10" office:value-type="float" office:value="7600" calcext:value-type="float">
            <text:p>7600</text:p>
          </table:table-cell>
          <table:table-cell office:value-type="float" office:value="8640000" calcext:value-type="float">
            <text:p>8640000</text:p>
          </table:table-cell>
          <table:table-cell table:formula="of:=[.B761]/[.C761]" office:value-type="float" office:value="0.00087962962962963" calcext:value-type="float">
            <text:p>0,00087962962962963000</text:p>
          </table:table-cell>
          <table:table-cell table:formula="of:=[.D762]-[.D761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table:formula="of:=[.B761]+10" office:value-type="float" office:value="7610" calcext:value-type="float">
            <text:p>7610</text:p>
          </table:table-cell>
          <table:table-cell office:value-type="float" office:value="8640000" calcext:value-type="float">
            <text:p>8640000</text:p>
          </table:table-cell>
          <table:table-cell table:formula="of:=[.B762]/[.C762]" office:value-type="float" office:value="0.000880787037037037" calcext:value-type="float">
            <text:p>0,00088078703703703700</text:p>
          </table:table-cell>
          <table:table-cell table:formula="of:=[.D763]-[.D762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table:formula="of:=[.B762]+10" office:value-type="float" office:value="7620" calcext:value-type="float">
            <text:p>7620</text:p>
          </table:table-cell>
          <table:table-cell office:value-type="float" office:value="8640000" calcext:value-type="float">
            <text:p>8640000</text:p>
          </table:table-cell>
          <table:table-cell table:formula="of:=[.B763]/[.C763]" office:value-type="float" office:value="0.000881944444444444" calcext:value-type="float">
            <text:p>0,00088194444444444500</text:p>
          </table:table-cell>
          <table:table-cell table:formula="of:=[.D764]-[.D763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table:formula="of:=[.B763]+10" office:value-type="float" office:value="7630" calcext:value-type="float">
            <text:p>7630</text:p>
          </table:table-cell>
          <table:table-cell office:value-type="float" office:value="8640000" calcext:value-type="float">
            <text:p>8640000</text:p>
          </table:table-cell>
          <table:table-cell table:formula="of:=[.B764]/[.C764]" office:value-type="float" office:value="0.000883101851851852" calcext:value-type="float">
            <text:p>0,00088310185185185200</text:p>
          </table:table-cell>
          <table:table-cell table:formula="of:=[.D765]-[.D764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table:formula="of:=[.B764]+10" office:value-type="float" office:value="7640" calcext:value-type="float">
            <text:p>7640</text:p>
          </table:table-cell>
          <table:table-cell office:value-type="float" office:value="8640000" calcext:value-type="float">
            <text:p>8640000</text:p>
          </table:table-cell>
          <table:table-cell table:formula="of:=[.B765]/[.C765]" office:value-type="float" office:value="0.000884259259259259" calcext:value-type="float">
            <text:p>0,00088425925925925900</text:p>
          </table:table-cell>
          <table:table-cell table:formula="of:=[.D766]-[.D765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table:formula="of:=[.B765]+10" office:value-type="float" office:value="7650" calcext:value-type="float">
            <text:p>7650</text:p>
          </table:table-cell>
          <table:table-cell office:value-type="float" office:value="8640000" calcext:value-type="float">
            <text:p>8640000</text:p>
          </table:table-cell>
          <table:table-cell table:formula="of:=[.B766]/[.C766]" office:value-type="float" office:value="0.000885416666666667" calcext:value-type="float">
            <text:p>0,00088541666666666700</text:p>
          </table:table-cell>
          <table:table-cell table:formula="of:=[.D767]-[.D766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table:formula="of:=[.B766]+10" office:value-type="float" office:value="7660" calcext:value-type="float">
            <text:p>7660</text:p>
          </table:table-cell>
          <table:table-cell office:value-type="float" office:value="8640000" calcext:value-type="float">
            <text:p>8640000</text:p>
          </table:table-cell>
          <table:table-cell table:formula="of:=[.B767]/[.C767]" office:value-type="float" office:value="0.000886574074074074" calcext:value-type="float">
            <text:p>0,00088657407407407400</text:p>
          </table:table-cell>
          <table:table-cell table:formula="of:=[.D768]-[.D767]" office:value-type="float" office:value="0.00000115740740740751" calcext:value-type="float">
            <text:p>0,00000115740740740751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table:formula="of:=[.B767]+10" office:value-type="float" office:value="7670" calcext:value-type="float">
            <text:p>7670</text:p>
          </table:table-cell>
          <table:table-cell office:value-type="float" office:value="8640000" calcext:value-type="float">
            <text:p>8640000</text:p>
          </table:table-cell>
          <table:table-cell table:formula="of:=[.B768]/[.C768]" office:value-type="float" office:value="0.000887731481481482" calcext:value-type="float">
            <text:p>0,00088773148148148200</text:p>
          </table:table-cell>
          <table:table-cell table:formula="of:=[.D769]-[.D768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table:formula="of:=[.B768]+10" office:value-type="float" office:value="7680" calcext:value-type="float">
            <text:p>7680</text:p>
          </table:table-cell>
          <table:table-cell office:value-type="float" office:value="8640000" calcext:value-type="float">
            <text:p>8640000</text:p>
          </table:table-cell>
          <table:table-cell table:formula="of:=[.B769]/[.C769]" office:value-type="float" office:value="0.000888888888888889" calcext:value-type="float">
            <text:p>0,00088888888888888900</text:p>
          </table:table-cell>
          <table:table-cell table:formula="of:=[.D770]-[.D769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table:formula="of:=[.B769]+10" office:value-type="float" office:value="7690" calcext:value-type="float">
            <text:p>7690</text:p>
          </table:table-cell>
          <table:table-cell office:value-type="float" office:value="8640000" calcext:value-type="float">
            <text:p>8640000</text:p>
          </table:table-cell>
          <table:table-cell table:formula="of:=[.B770]/[.C770]" office:value-type="float" office:value="0.000890046296296296" calcext:value-type="float">
            <text:p>0,00089004629629629600</text:p>
          </table:table-cell>
          <table:table-cell table:formula="of:=[.D771]-[.D770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[.B770]+10" office:value-type="float" office:value="7700" calcext:value-type="float">
            <text:p>7700</text:p>
          </table:table-cell>
          <table:table-cell office:value-type="float" office:value="8640000" calcext:value-type="float">
            <text:p>8640000</text:p>
          </table:table-cell>
          <table:table-cell table:formula="of:=[.B771]/[.C771]" office:value-type="float" office:value="0.000891203703703704" calcext:value-type="float">
            <text:p>0,00089120370370370400</text:p>
          </table:table-cell>
          <table:table-cell table:formula="of:=[.D772]-[.D771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table:formula="of:=[.B771]+10" office:value-type="float" office:value="7710" calcext:value-type="float">
            <text:p>7710</text:p>
          </table:table-cell>
          <table:table-cell office:value-type="float" office:value="8640000" calcext:value-type="float">
            <text:p>8640000</text:p>
          </table:table-cell>
          <table:table-cell table:formula="of:=[.B772]/[.C772]" office:value-type="float" office:value="0.000892361111111111" calcext:value-type="float">
            <text:p>0,00089236111111111100</text:p>
          </table:table-cell>
          <table:table-cell table:formula="of:=[.D773]-[.D772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table:formula="of:=[.B772]+10" office:value-type="float" office:value="7720" calcext:value-type="float">
            <text:p>7720</text:p>
          </table:table-cell>
          <table:table-cell office:value-type="float" office:value="8640000" calcext:value-type="float">
            <text:p>8640000</text:p>
          </table:table-cell>
          <table:table-cell table:formula="of:=[.B773]/[.C773]" office:value-type="float" office:value="0.000893518518518519" calcext:value-type="float">
            <text:p>0,00089351851851851900</text:p>
          </table:table-cell>
          <table:table-cell table:formula="of:=[.D774]-[.D773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table:formula="of:=[.B773]+10" office:value-type="float" office:value="7730" calcext:value-type="float">
            <text:p>7730</text:p>
          </table:table-cell>
          <table:table-cell office:value-type="float" office:value="8640000" calcext:value-type="float">
            <text:p>8640000</text:p>
          </table:table-cell>
          <table:table-cell table:formula="of:=[.B774]/[.C774]" office:value-type="float" office:value="0.000894675925925926" calcext:value-type="float">
            <text:p>0,00089467592592592600</text:p>
          </table:table-cell>
          <table:table-cell table:formula="of:=[.D775]-[.D774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table:formula="of:=[.B774]+10" office:value-type="float" office:value="7740" calcext:value-type="float">
            <text:p>7740</text:p>
          </table:table-cell>
          <table:table-cell office:value-type="float" office:value="8640000" calcext:value-type="float">
            <text:p>8640000</text:p>
          </table:table-cell>
          <table:table-cell table:formula="of:=[.B775]/[.C775]" office:value-type="float" office:value="0.000895833333333333" calcext:value-type="float">
            <text:p>0,00089583333333333300</text:p>
          </table:table-cell>
          <table:table-cell table:formula="of:=[.D776]-[.D775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table:formula="of:=[.B775]+10" office:value-type="float" office:value="7750" calcext:value-type="float">
            <text:p>7750</text:p>
          </table:table-cell>
          <table:table-cell office:value-type="float" office:value="8640000" calcext:value-type="float">
            <text:p>8640000</text:p>
          </table:table-cell>
          <table:table-cell table:formula="of:=[.B776]/[.C776]" office:value-type="float" office:value="0.000896990740740741" calcext:value-type="float">
            <text:p>0,00089699074074074100</text:p>
          </table:table-cell>
          <table:table-cell table:formula="of:=[.D777]-[.D776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table:formula="of:=[.B776]+10" office:value-type="float" office:value="7760" calcext:value-type="float">
            <text:p>7760</text:p>
          </table:table-cell>
          <table:table-cell office:value-type="float" office:value="8640000" calcext:value-type="float">
            <text:p>8640000</text:p>
          </table:table-cell>
          <table:table-cell table:formula="of:=[.B777]/[.C777]" office:value-type="float" office:value="0.000898148148148148" calcext:value-type="float">
            <text:p>0,00089814814814814800</text:p>
          </table:table-cell>
          <table:table-cell table:formula="of:=[.D778]-[.D777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table:formula="of:=[.B777]+10" office:value-type="float" office:value="7770" calcext:value-type="float">
            <text:p>7770</text:p>
          </table:table-cell>
          <table:table-cell office:value-type="float" office:value="8640000" calcext:value-type="float">
            <text:p>8640000</text:p>
          </table:table-cell>
          <table:table-cell table:formula="of:=[.B778]/[.C778]" office:value-type="float" office:value="0.000899305555555556" calcext:value-type="float">
            <text:p>0,00089930555555555600</text:p>
          </table:table-cell>
          <table:table-cell table:formula="of:=[.D779]-[.D778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table:formula="of:=[.B778]+10" office:value-type="float" office:value="7780" calcext:value-type="float">
            <text:p>7780</text:p>
          </table:table-cell>
          <table:table-cell office:value-type="float" office:value="8640000" calcext:value-type="float">
            <text:p>8640000</text:p>
          </table:table-cell>
          <table:table-cell table:formula="of:=[.B779]/[.C779]" office:value-type="float" office:value="0.000900462962962963" calcext:value-type="float">
            <text:p>0,00090046296296296300</text:p>
          </table:table-cell>
          <table:table-cell table:formula="of:=[.D780]-[.D779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table:formula="of:=[.B779]+10" office:value-type="float" office:value="7790" calcext:value-type="float">
            <text:p>7790</text:p>
          </table:table-cell>
          <table:table-cell office:value-type="float" office:value="8640000" calcext:value-type="float">
            <text:p>8640000</text:p>
          </table:table-cell>
          <table:table-cell table:formula="of:=[.B780]/[.C780]" office:value-type="float" office:value="0.00090162037037037" calcext:value-type="float">
            <text:p>0,00090162037037037000</text:p>
          </table:table-cell>
          <table:table-cell table:formula="of:=[.D781]-[.D780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table:formula="of:=[.B780]+10" office:value-type="float" office:value="7800" calcext:value-type="float">
            <text:p>7800</text:p>
          </table:table-cell>
          <table:table-cell office:value-type="float" office:value="8640000" calcext:value-type="float">
            <text:p>8640000</text:p>
          </table:table-cell>
          <table:table-cell table:formula="of:=[.B781]/[.C781]" office:value-type="float" office:value="0.000902777777777778" calcext:value-type="float">
            <text:p>0,00090277777777777800</text:p>
          </table:table-cell>
          <table:table-cell table:formula="of:=[.D782]-[.D781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table:formula="of:=[.B781]+10" office:value-type="float" office:value="7810" calcext:value-type="float">
            <text:p>7810</text:p>
          </table:table-cell>
          <table:table-cell office:value-type="float" office:value="8640000" calcext:value-type="float">
            <text:p>8640000</text:p>
          </table:table-cell>
          <table:table-cell table:formula="of:=[.B782]/[.C782]" office:value-type="float" office:value="0.000903935185185185" calcext:value-type="float">
            <text:p>0,00090393518518518500</text:p>
          </table:table-cell>
          <table:table-cell table:formula="of:=[.D783]-[.D782]" office:value-type="float" office:value="0.00000115740740740751" calcext:value-type="float">
            <text:p>0,00000115740740740751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table:formula="of:=[.B782]+10" office:value-type="float" office:value="7820" calcext:value-type="float">
            <text:p>7820</text:p>
          </table:table-cell>
          <table:table-cell office:value-type="float" office:value="8640000" calcext:value-type="float">
            <text:p>8640000</text:p>
          </table:table-cell>
          <table:table-cell table:formula="of:=[.B783]/[.C783]" office:value-type="float" office:value="0.000905092592592593" calcext:value-type="float">
            <text:p>0,00090509259259259300</text:p>
          </table:table-cell>
          <table:table-cell table:formula="of:=[.D784]-[.D783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table:formula="of:=[.B783]+10" office:value-type="float" office:value="7830" calcext:value-type="float">
            <text:p>7830</text:p>
          </table:table-cell>
          <table:table-cell office:value-type="float" office:value="8640000" calcext:value-type="float">
            <text:p>8640000</text:p>
          </table:table-cell>
          <table:table-cell table:formula="of:=[.B784]/[.C784]" office:value-type="float" office:value="0.00090625" calcext:value-type="float">
            <text:p>0,00090625000000000000</text:p>
          </table:table-cell>
          <table:table-cell table:formula="of:=[.D785]-[.D784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table:formula="of:=[.B784]+10" office:value-type="float" office:value="7840" calcext:value-type="float">
            <text:p>7840</text:p>
          </table:table-cell>
          <table:table-cell office:value-type="float" office:value="8640000" calcext:value-type="float">
            <text:p>8640000</text:p>
          </table:table-cell>
          <table:table-cell table:formula="of:=[.B785]/[.C785]" office:value-type="float" office:value="0.000907407407407407" calcext:value-type="float">
            <text:p>0,00090740740740740800</text:p>
          </table:table-cell>
          <table:table-cell table:formula="of:=[.D786]-[.D785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table:formula="of:=[.B785]+10" office:value-type="float" office:value="7850" calcext:value-type="float">
            <text:p>7850</text:p>
          </table:table-cell>
          <table:table-cell office:value-type="float" office:value="8640000" calcext:value-type="float">
            <text:p>8640000</text:p>
          </table:table-cell>
          <table:table-cell table:formula="of:=[.B786]/[.C786]" office:value-type="float" office:value="0.000908564814814815" calcext:value-type="float">
            <text:p>0,00090856481481481500</text:p>
          </table:table-cell>
          <table:table-cell table:formula="of:=[.D787]-[.D786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table:formula="of:=[.B786]+10" office:value-type="float" office:value="7860" calcext:value-type="float">
            <text:p>7860</text:p>
          </table:table-cell>
          <table:table-cell office:value-type="float" office:value="8640000" calcext:value-type="float">
            <text:p>8640000</text:p>
          </table:table-cell>
          <table:table-cell table:formula="of:=[.B787]/[.C787]" office:value-type="float" office:value="0.000909722222222222" calcext:value-type="float">
            <text:p>0,00090972222222222200</text:p>
          </table:table-cell>
          <table:table-cell table:formula="of:=[.D788]-[.D787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table:formula="of:=[.B787]+10" office:value-type="float" office:value="7870" calcext:value-type="float">
            <text:p>7870</text:p>
          </table:table-cell>
          <table:table-cell office:value-type="float" office:value="8640000" calcext:value-type="float">
            <text:p>8640000</text:p>
          </table:table-cell>
          <table:table-cell table:formula="of:=[.B788]/[.C788]" office:value-type="float" office:value="0.00091087962962963" calcext:value-type="float">
            <text:p>0,00091087962962963000</text:p>
          </table:table-cell>
          <table:table-cell table:formula="of:=[.D789]-[.D788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table:formula="of:=[.B788]+10" office:value-type="float" office:value="7880" calcext:value-type="float">
            <text:p>7880</text:p>
          </table:table-cell>
          <table:table-cell office:value-type="float" office:value="8640000" calcext:value-type="float">
            <text:p>8640000</text:p>
          </table:table-cell>
          <table:table-cell table:formula="of:=[.B789]/[.C789]" office:value-type="float" office:value="0.000912037037037037" calcext:value-type="float">
            <text:p>0,00091203703703703700</text:p>
          </table:table-cell>
          <table:table-cell table:formula="of:=[.D790]-[.D789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table:formula="of:=[.B789]+10" office:value-type="float" office:value="7890" calcext:value-type="float">
            <text:p>7890</text:p>
          </table:table-cell>
          <table:table-cell office:value-type="float" office:value="8640000" calcext:value-type="float">
            <text:p>8640000</text:p>
          </table:table-cell>
          <table:table-cell table:formula="of:=[.B790]/[.C790]" office:value-type="float" office:value="0.000913194444444444" calcext:value-type="float">
            <text:p>0,00091319444444444400</text:p>
          </table:table-cell>
          <table:table-cell table:formula="of:=[.D791]-[.D790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table:formula="of:=[.B790]+10" office:value-type="float" office:value="7900" calcext:value-type="float">
            <text:p>7900</text:p>
          </table:table-cell>
          <table:table-cell office:value-type="float" office:value="8640000" calcext:value-type="float">
            <text:p>8640000</text:p>
          </table:table-cell>
          <table:table-cell table:formula="of:=[.B791]/[.C791]" office:value-type="float" office:value="0.000914351851851852" calcext:value-type="float">
            <text:p>0,00091435185185185200</text:p>
          </table:table-cell>
          <table:table-cell table:formula="of:=[.D792]-[.D791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table:formula="of:=[.B791]+10" office:value-type="float" office:value="7910" calcext:value-type="float">
            <text:p>7910</text:p>
          </table:table-cell>
          <table:table-cell office:value-type="float" office:value="8640000" calcext:value-type="float">
            <text:p>8640000</text:p>
          </table:table-cell>
          <table:table-cell table:formula="of:=[.B792]/[.C792]" office:value-type="float" office:value="0.000915509259259259" calcext:value-type="float">
            <text:p>0,00091550925925925900</text:p>
          </table:table-cell>
          <table:table-cell table:formula="of:=[.D793]-[.D792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[.B792]+10" office:value-type="float" office:value="7920" calcext:value-type="float">
            <text:p>7920</text:p>
          </table:table-cell>
          <table:table-cell office:value-type="float" office:value="8640000" calcext:value-type="float">
            <text:p>8640000</text:p>
          </table:table-cell>
          <table:table-cell table:formula="of:=[.B793]/[.C793]" office:value-type="float" office:value="0.000916666666666667" calcext:value-type="float">
            <text:p>0,00091666666666666700</text:p>
          </table:table-cell>
          <table:table-cell table:formula="of:=[.D794]-[.D793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table:formula="of:=[.B793]+10" office:value-type="float" office:value="7930" calcext:value-type="float">
            <text:p>7930</text:p>
          </table:table-cell>
          <table:table-cell office:value-type="float" office:value="8640000" calcext:value-type="float">
            <text:p>8640000</text:p>
          </table:table-cell>
          <table:table-cell table:formula="of:=[.B794]/[.C794]" office:value-type="float" office:value="0.000917824074074074" calcext:value-type="float">
            <text:p>0,00091782407407407400</text:p>
          </table:table-cell>
          <table:table-cell table:formula="of:=[.D795]-[.D794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table:formula="of:=[.B794]+10" office:value-type="float" office:value="7940" calcext:value-type="float">
            <text:p>7940</text:p>
          </table:table-cell>
          <table:table-cell office:value-type="float" office:value="8640000" calcext:value-type="float">
            <text:p>8640000</text:p>
          </table:table-cell>
          <table:table-cell table:formula="of:=[.B795]/[.C795]" office:value-type="float" office:value="0.000918981481481482" calcext:value-type="float">
            <text:p>0,00091898148148148200</text:p>
          </table:table-cell>
          <table:table-cell table:formula="of:=[.D796]-[.D795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table:formula="of:=[.B795]+10" office:value-type="float" office:value="7950" calcext:value-type="float">
            <text:p>7950</text:p>
          </table:table-cell>
          <table:table-cell office:value-type="float" office:value="8640000" calcext:value-type="float">
            <text:p>8640000</text:p>
          </table:table-cell>
          <table:table-cell table:formula="of:=[.B796]/[.C796]" office:value-type="float" office:value="0.000920138888888889" calcext:value-type="float">
            <text:p>0,00092013888888888900</text:p>
          </table:table-cell>
          <table:table-cell table:formula="of:=[.D797]-[.D796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table:formula="of:=[.B796]+10" office:value-type="float" office:value="7960" calcext:value-type="float">
            <text:p>7960</text:p>
          </table:table-cell>
          <table:table-cell office:value-type="float" office:value="8640000" calcext:value-type="float">
            <text:p>8640000</text:p>
          </table:table-cell>
          <table:table-cell table:formula="of:=[.B797]/[.C797]" office:value-type="float" office:value="0.000921296296296296" calcext:value-type="float">
            <text:p>0,00092129629629629600</text:p>
          </table:table-cell>
          <table:table-cell table:formula="of:=[.D798]-[.D797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table:formula="of:=[.B797]+10" office:value-type="float" office:value="7970" calcext:value-type="float">
            <text:p>7970</text:p>
          </table:table-cell>
          <table:table-cell office:value-type="float" office:value="8640000" calcext:value-type="float">
            <text:p>8640000</text:p>
          </table:table-cell>
          <table:table-cell table:formula="of:=[.B798]/[.C798]" office:value-type="float" office:value="0.000922453703703704" calcext:value-type="float">
            <text:p>0,00092245370370370400</text:p>
          </table:table-cell>
          <table:table-cell table:formula="of:=[.D799]-[.D798]" office:value-type="float" office:value="0.00000115740740740751" calcext:value-type="float">
            <text:p>0,00000115740740740751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table:formula="of:=[.B798]+10" office:value-type="float" office:value="7980" calcext:value-type="float">
            <text:p>7980</text:p>
          </table:table-cell>
          <table:table-cell office:value-type="float" office:value="8640000" calcext:value-type="float">
            <text:p>8640000</text:p>
          </table:table-cell>
          <table:table-cell table:formula="of:=[.B799]/[.C799]" office:value-type="float" office:value="0.000923611111111111" calcext:value-type="float">
            <text:p>0,00092361111111111100</text:p>
          </table:table-cell>
          <table:table-cell table:formula="of:=[.D800]-[.D799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table:formula="of:=[.B799]+10" office:value-type="float" office:value="7990" calcext:value-type="float">
            <text:p>7990</text:p>
          </table:table-cell>
          <table:table-cell office:value-type="float" office:value="8640000" calcext:value-type="float">
            <text:p>8640000</text:p>
          </table:table-cell>
          <table:table-cell table:formula="of:=[.B800]/[.C800]" office:value-type="float" office:value="0.000924768518518519" calcext:value-type="float">
            <text:p>0,00092476851851851900</text:p>
          </table:table-cell>
          <table:table-cell table:formula="of:=[.D801]-[.D800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[.B800]+10" office:value-type="float" office:value="8000" calcext:value-type="float">
            <text:p>8000</text:p>
          </table:table-cell>
          <table:table-cell office:value-type="float" office:value="8640000" calcext:value-type="float">
            <text:p>8640000</text:p>
          </table:table-cell>
          <table:table-cell table:formula="of:=[.B801]/[.C801]" office:value-type="float" office:value="0.000925925925925926" calcext:value-type="float">
            <text:p>0,00092592592592592600</text:p>
          </table:table-cell>
          <table:table-cell table:formula="of:=[.D802]-[.D801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table:formula="of:=[.B801]+10" office:value-type="float" office:value="8010" calcext:value-type="float">
            <text:p>8010</text:p>
          </table:table-cell>
          <table:table-cell office:value-type="float" office:value="8640000" calcext:value-type="float">
            <text:p>8640000</text:p>
          </table:table-cell>
          <table:table-cell table:formula="of:=[.B802]/[.C802]" office:value-type="float" office:value="0.000927083333333333" calcext:value-type="float">
            <text:p>0,00092708333333333400</text:p>
          </table:table-cell>
          <table:table-cell table:formula="of:=[.D803]-[.D802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table:formula="of:=[.B802]+10" office:value-type="float" office:value="8020" calcext:value-type="float">
            <text:p>8020</text:p>
          </table:table-cell>
          <table:table-cell office:value-type="float" office:value="8640000" calcext:value-type="float">
            <text:p>8640000</text:p>
          </table:table-cell>
          <table:table-cell table:formula="of:=[.B803]/[.C803]" office:value-type="float" office:value="0.000928240740740741" calcext:value-type="float">
            <text:p>0,00092824074074074100</text:p>
          </table:table-cell>
          <table:table-cell table:formula="of:=[.D804]-[.D803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table:formula="of:=[.B803]+10" office:value-type="float" office:value="8030" calcext:value-type="float">
            <text:p>8030</text:p>
          </table:table-cell>
          <table:table-cell office:value-type="float" office:value="8640000" calcext:value-type="float">
            <text:p>8640000</text:p>
          </table:table-cell>
          <table:table-cell table:formula="of:=[.B804]/[.C804]" office:value-type="float" office:value="0.000929398148148148" calcext:value-type="float">
            <text:p>0,00092939814814814800</text:p>
          </table:table-cell>
          <table:table-cell table:formula="of:=[.D805]-[.D804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table:formula="of:=[.B804]+10" office:value-type="float" office:value="8040" calcext:value-type="float">
            <text:p>8040</text:p>
          </table:table-cell>
          <table:table-cell office:value-type="float" office:value="8640000" calcext:value-type="float">
            <text:p>8640000</text:p>
          </table:table-cell>
          <table:table-cell table:formula="of:=[.B805]/[.C805]" office:value-type="float" office:value="0.000930555555555556" calcext:value-type="float">
            <text:p>0,00093055555555555600</text:p>
          </table:table-cell>
          <table:table-cell table:formula="of:=[.D806]-[.D805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table:formula="of:=[.B805]+10" office:value-type="float" office:value="8050" calcext:value-type="float">
            <text:p>8050</text:p>
          </table:table-cell>
          <table:table-cell office:value-type="float" office:value="8640000" calcext:value-type="float">
            <text:p>8640000</text:p>
          </table:table-cell>
          <table:table-cell table:formula="of:=[.B806]/[.C806]" office:value-type="float" office:value="0.000931712962962963" calcext:value-type="float">
            <text:p>0,00093171296296296300</text:p>
          </table:table-cell>
          <table:table-cell table:formula="of:=[.D807]-[.D806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table:formula="of:=[.B806]+10" office:value-type="float" office:value="8060" calcext:value-type="float">
            <text:p>8060</text:p>
          </table:table-cell>
          <table:table-cell office:value-type="float" office:value="8640000" calcext:value-type="float">
            <text:p>8640000</text:p>
          </table:table-cell>
          <table:table-cell table:formula="of:=[.B807]/[.C807]" office:value-type="float" office:value="0.00093287037037037" calcext:value-type="float">
            <text:p>0,00093287037037037000</text:p>
          </table:table-cell>
          <table:table-cell table:formula="of:=[.D808]-[.D807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table:formula="of:=[.B807]+10" office:value-type="float" office:value="8070" calcext:value-type="float">
            <text:p>8070</text:p>
          </table:table-cell>
          <table:table-cell office:value-type="float" office:value="8640000" calcext:value-type="float">
            <text:p>8640000</text:p>
          </table:table-cell>
          <table:table-cell table:formula="of:=[.B808]/[.C808]" office:value-type="float" office:value="0.000934027777777778" calcext:value-type="float">
            <text:p>0,00093402777777777800</text:p>
          </table:table-cell>
          <table:table-cell table:formula="of:=[.D809]-[.D808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table:formula="of:=[.B808]+10" office:value-type="float" office:value="8080" calcext:value-type="float">
            <text:p>8080</text:p>
          </table:table-cell>
          <table:table-cell office:value-type="float" office:value="8640000" calcext:value-type="float">
            <text:p>8640000</text:p>
          </table:table-cell>
          <table:table-cell table:formula="of:=[.B809]/[.C809]" office:value-type="float" office:value="0.000935185185185185" calcext:value-type="float">
            <text:p>0,00093518518518518500</text:p>
          </table:table-cell>
          <table:table-cell table:formula="of:=[.D810]-[.D809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table:formula="of:=[.B809]+10" office:value-type="float" office:value="8090" calcext:value-type="float">
            <text:p>8090</text:p>
          </table:table-cell>
          <table:table-cell office:value-type="float" office:value="8640000" calcext:value-type="float">
            <text:p>8640000</text:p>
          </table:table-cell>
          <table:table-cell table:formula="of:=[.B810]/[.C810]" office:value-type="float" office:value="0.000936342592592593" calcext:value-type="float">
            <text:p>0,00093634259259259300</text:p>
          </table:table-cell>
          <table:table-cell table:formula="of:=[.D811]-[.D810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[.B810]+10" office:value-type="float" office:value="8100" calcext:value-type="float">
            <text:p>8100</text:p>
          </table:table-cell>
          <table:table-cell office:value-type="float" office:value="8640000" calcext:value-type="float">
            <text:p>8640000</text:p>
          </table:table-cell>
          <table:table-cell table:formula="of:=[.B811]/[.C811]" office:value-type="float" office:value="0.0009375" calcext:value-type="float">
            <text:p>0,00093750000000000000</text:p>
          </table:table-cell>
          <table:table-cell table:formula="of:=[.D812]-[.D811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table:formula="of:=[.B811]+10" office:value-type="float" office:value="8110" calcext:value-type="float">
            <text:p>8110</text:p>
          </table:table-cell>
          <table:table-cell office:value-type="float" office:value="8640000" calcext:value-type="float">
            <text:p>8640000</text:p>
          </table:table-cell>
          <table:table-cell table:formula="of:=[.B812]/[.C812]" office:value-type="float" office:value="0.000938657407407407" calcext:value-type="float">
            <text:p>0,00093865740740740700</text:p>
          </table:table-cell>
          <table:table-cell table:formula="of:=[.D813]-[.D812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table:formula="of:=[.B812]+10" office:value-type="float" office:value="8120" calcext:value-type="float">
            <text:p>8120</text:p>
          </table:table-cell>
          <table:table-cell office:value-type="float" office:value="8640000" calcext:value-type="float">
            <text:p>8640000</text:p>
          </table:table-cell>
          <table:table-cell table:formula="of:=[.B813]/[.C813]" office:value-type="float" office:value="0.000939814814814815" calcext:value-type="float">
            <text:p>0,00093981481481481500</text:p>
          </table:table-cell>
          <table:table-cell table:formula="of:=[.D814]-[.D813]" office:value-type="float" office:value="0.00000115740740740751" calcext:value-type="float">
            <text:p>0,00000115740740740751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table:formula="of:=[.B813]+10" office:value-type="float" office:value="8130" calcext:value-type="float">
            <text:p>8130</text:p>
          </table:table-cell>
          <table:table-cell office:value-type="float" office:value="8640000" calcext:value-type="float">
            <text:p>8640000</text:p>
          </table:table-cell>
          <table:table-cell table:formula="of:=[.B814]/[.C814]" office:value-type="float" office:value="0.000940972222222222" calcext:value-type="float">
            <text:p>0,00094097222222222200</text:p>
          </table:table-cell>
          <table:table-cell table:formula="of:=[.D815]-[.D814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table:formula="of:=[.B814]+10" office:value-type="float" office:value="8140" calcext:value-type="float">
            <text:p>8140</text:p>
          </table:table-cell>
          <table:table-cell office:value-type="float" office:value="8640000" calcext:value-type="float">
            <text:p>8640000</text:p>
          </table:table-cell>
          <table:table-cell table:formula="of:=[.B815]/[.C815]" office:value-type="float" office:value="0.00094212962962963" calcext:value-type="float">
            <text:p>0,00094212962962963000</text:p>
          </table:table-cell>
          <table:table-cell table:formula="of:=[.D816]-[.D815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table:formula="of:=[.B815]+10" office:value-type="float" office:value="8150" calcext:value-type="float">
            <text:p>8150</text:p>
          </table:table-cell>
          <table:table-cell office:value-type="float" office:value="8640000" calcext:value-type="float">
            <text:p>8640000</text:p>
          </table:table-cell>
          <table:table-cell table:formula="of:=[.B816]/[.C816]" office:value-type="float" office:value="0.000943287037037037" calcext:value-type="float">
            <text:p>0,00094328703703703700</text:p>
          </table:table-cell>
          <table:table-cell table:formula="of:=[.D817]-[.D816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table:formula="of:=[.B816]+10" office:value-type="float" office:value="8160" calcext:value-type="float">
            <text:p>8160</text:p>
          </table:table-cell>
          <table:table-cell office:value-type="float" office:value="8640000" calcext:value-type="float">
            <text:p>8640000</text:p>
          </table:table-cell>
          <table:table-cell table:formula="of:=[.B817]/[.C817]" office:value-type="float" office:value="0.000944444444444445" calcext:value-type="float">
            <text:p>0,00094444444444444500</text:p>
          </table:table-cell>
          <table:table-cell table:formula="of:=[.D818]-[.D817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table:formula="of:=[.B817]+10" office:value-type="float" office:value="8170" calcext:value-type="float">
            <text:p>8170</text:p>
          </table:table-cell>
          <table:table-cell office:value-type="float" office:value="8640000" calcext:value-type="float">
            <text:p>8640000</text:p>
          </table:table-cell>
          <table:table-cell table:formula="of:=[.B818]/[.C818]" office:value-type="float" office:value="0.000945601851851852" calcext:value-type="float">
            <text:p>0,00094560185185185200</text:p>
          </table:table-cell>
          <table:table-cell table:formula="of:=[.D819]-[.D818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table:formula="of:=[.B818]+10" office:value-type="float" office:value="8180" calcext:value-type="float">
            <text:p>8180</text:p>
          </table:table-cell>
          <table:table-cell office:value-type="float" office:value="8640000" calcext:value-type="float">
            <text:p>8640000</text:p>
          </table:table-cell>
          <table:table-cell table:formula="of:=[.B819]/[.C819]" office:value-type="float" office:value="0.000946759259259259" calcext:value-type="float">
            <text:p>0,00094675925925925900</text:p>
          </table:table-cell>
          <table:table-cell table:formula="of:=[.D820]-[.D819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table:formula="of:=[.B819]+10" office:value-type="float" office:value="8190" calcext:value-type="float">
            <text:p>8190</text:p>
          </table:table-cell>
          <table:table-cell office:value-type="float" office:value="8640000" calcext:value-type="float">
            <text:p>8640000</text:p>
          </table:table-cell>
          <table:table-cell table:formula="of:=[.B820]/[.C820]" office:value-type="float" office:value="0.000947916666666667" calcext:value-type="float">
            <text:p>0,00094791666666666700</text:p>
          </table:table-cell>
          <table:table-cell table:formula="of:=[.D821]-[.D820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[.B820]+10" office:value-type="float" office:value="8200" calcext:value-type="float">
            <text:p>8200</text:p>
          </table:table-cell>
          <table:table-cell office:value-type="float" office:value="8640000" calcext:value-type="float">
            <text:p>8640000</text:p>
          </table:table-cell>
          <table:table-cell table:formula="of:=[.B821]/[.C821]" office:value-type="float" office:value="0.000949074074074074" calcext:value-type="float">
            <text:p>0,00094907407407407400</text:p>
          </table:table-cell>
          <table:table-cell table:formula="of:=[.D822]-[.D821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table:formula="of:=[.B821]+10" office:value-type="float" office:value="8210" calcext:value-type="float">
            <text:p>8210</text:p>
          </table:table-cell>
          <table:table-cell office:value-type="float" office:value="8640000" calcext:value-type="float">
            <text:p>8640000</text:p>
          </table:table-cell>
          <table:table-cell table:formula="of:=[.B822]/[.C822]" office:value-type="float" office:value="0.000950231481481482" calcext:value-type="float">
            <text:p>0,00095023148148148200</text:p>
          </table:table-cell>
          <table:table-cell table:formula="of:=[.D823]-[.D822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table:formula="of:=[.B822]+10" office:value-type="float" office:value="8220" calcext:value-type="float">
            <text:p>8220</text:p>
          </table:table-cell>
          <table:table-cell office:value-type="float" office:value="8640000" calcext:value-type="float">
            <text:p>8640000</text:p>
          </table:table-cell>
          <table:table-cell table:formula="of:=[.B823]/[.C823]" office:value-type="float" office:value="0.000951388888888889" calcext:value-type="float">
            <text:p>0,00095138888888888900</text:p>
          </table:table-cell>
          <table:table-cell table:formula="of:=[.D824]-[.D823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table:formula="of:=[.B823]+10" office:value-type="float" office:value="8230" calcext:value-type="float">
            <text:p>8230</text:p>
          </table:table-cell>
          <table:table-cell office:value-type="float" office:value="8640000" calcext:value-type="float">
            <text:p>8640000</text:p>
          </table:table-cell>
          <table:table-cell table:formula="of:=[.B824]/[.C824]" office:value-type="float" office:value="0.000952546296296296" calcext:value-type="float">
            <text:p>0,00095254629629629600</text:p>
          </table:table-cell>
          <table:table-cell table:formula="of:=[.D825]-[.D824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table:formula="of:=[.B824]+10" office:value-type="float" office:value="8240" calcext:value-type="float">
            <text:p>8240</text:p>
          </table:table-cell>
          <table:table-cell office:value-type="float" office:value="8640000" calcext:value-type="float">
            <text:p>8640000</text:p>
          </table:table-cell>
          <table:table-cell table:formula="of:=[.B825]/[.C825]" office:value-type="float" office:value="0.000953703703703704" calcext:value-type="float">
            <text:p>0,00095370370370370400</text:p>
          </table:table-cell>
          <table:table-cell table:formula="of:=[.D826]-[.D825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table:formula="of:=[.B825]+10" office:value-type="float" office:value="8250" calcext:value-type="float">
            <text:p>8250</text:p>
          </table:table-cell>
          <table:table-cell office:value-type="float" office:value="8640000" calcext:value-type="float">
            <text:p>8640000</text:p>
          </table:table-cell>
          <table:table-cell table:formula="of:=[.B826]/[.C826]" office:value-type="float" office:value="0.000954861111111111" calcext:value-type="float">
            <text:p>0,00095486111111111100</text:p>
          </table:table-cell>
          <table:table-cell table:formula="of:=[.D827]-[.D826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table:formula="of:=[.B826]+10" office:value-type="float" office:value="8260" calcext:value-type="float">
            <text:p>8260</text:p>
          </table:table-cell>
          <table:table-cell office:value-type="float" office:value="8640000" calcext:value-type="float">
            <text:p>8640000</text:p>
          </table:table-cell>
          <table:table-cell table:formula="of:=[.B827]/[.C827]" office:value-type="float" office:value="0.000956018518518519" calcext:value-type="float">
            <text:p>0,00095601851851851900</text:p>
          </table:table-cell>
          <table:table-cell table:formula="of:=[.D828]-[.D827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table:formula="of:=[.B827]+10" office:value-type="float" office:value="8270" calcext:value-type="float">
            <text:p>8270</text:p>
          </table:table-cell>
          <table:table-cell office:value-type="float" office:value="8640000" calcext:value-type="float">
            <text:p>8640000</text:p>
          </table:table-cell>
          <table:table-cell table:formula="of:=[.B828]/[.C828]" office:value-type="float" office:value="0.000957175925925926" calcext:value-type="float">
            <text:p>0,00095717592592592600</text:p>
          </table:table-cell>
          <table:table-cell table:formula="of:=[.D829]-[.D828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table:formula="of:=[.B828]+10" office:value-type="float" office:value="8280" calcext:value-type="float">
            <text:p>8280</text:p>
          </table:table-cell>
          <table:table-cell office:value-type="float" office:value="8640000" calcext:value-type="float">
            <text:p>8640000</text:p>
          </table:table-cell>
          <table:table-cell table:formula="of:=[.B829]/[.C829]" office:value-type="float" office:value="0.000958333333333333" calcext:value-type="float">
            <text:p>0,00095833333333333300</text:p>
          </table:table-cell>
          <table:table-cell table:formula="of:=[.D830]-[.D829]" office:value-type="float" office:value="0.00000115740740740751" calcext:value-type="float">
            <text:p>0,00000115740740740751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table:formula="of:=[.B829]+10" office:value-type="float" office:value="8290" calcext:value-type="float">
            <text:p>8290</text:p>
          </table:table-cell>
          <table:table-cell office:value-type="float" office:value="8640000" calcext:value-type="float">
            <text:p>8640000</text:p>
          </table:table-cell>
          <table:table-cell table:formula="of:=[.B830]/[.C830]" office:value-type="float" office:value="0.000959490740740741" calcext:value-type="float">
            <text:p>0,00095949074074074100</text:p>
          </table:table-cell>
          <table:table-cell table:formula="of:=[.D831]-[.D830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table:formula="of:=[.B830]+10" office:value-type="float" office:value="8300" calcext:value-type="float">
            <text:p>8300</text:p>
          </table:table-cell>
          <table:table-cell office:value-type="float" office:value="8640000" calcext:value-type="float">
            <text:p>8640000</text:p>
          </table:table-cell>
          <table:table-cell table:formula="of:=[.B831]/[.C831]" office:value-type="float" office:value="0.000960648148148148" calcext:value-type="float">
            <text:p>0,00096064814814814800</text:p>
          </table:table-cell>
          <table:table-cell table:formula="of:=[.D832]-[.D831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table:formula="of:=[.B831]+10" office:value-type="float" office:value="8310" calcext:value-type="float">
            <text:p>8310</text:p>
          </table:table-cell>
          <table:table-cell office:value-type="float" office:value="8640000" calcext:value-type="float">
            <text:p>8640000</text:p>
          </table:table-cell>
          <table:table-cell table:formula="of:=[.B832]/[.C832]" office:value-type="float" office:value="0.000961805555555556" calcext:value-type="float">
            <text:p>0,00096180555555555600</text:p>
          </table:table-cell>
          <table:table-cell table:formula="of:=[.D833]-[.D832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table:formula="of:=[.B832]+10" office:value-type="float" office:value="8320" calcext:value-type="float">
            <text:p>8320</text:p>
          </table:table-cell>
          <table:table-cell office:value-type="float" office:value="8640000" calcext:value-type="float">
            <text:p>8640000</text:p>
          </table:table-cell>
          <table:table-cell table:formula="of:=[.B833]/[.C833]" office:value-type="float" office:value="0.000962962962962963" calcext:value-type="float">
            <text:p>0,00096296296296296300</text:p>
          </table:table-cell>
          <table:table-cell table:formula="of:=[.D834]-[.D833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table:formula="of:=[.B833]+10" office:value-type="float" office:value="8330" calcext:value-type="float">
            <text:p>8330</text:p>
          </table:table-cell>
          <table:table-cell office:value-type="float" office:value="8640000" calcext:value-type="float">
            <text:p>8640000</text:p>
          </table:table-cell>
          <table:table-cell table:formula="of:=[.B834]/[.C834]" office:value-type="float" office:value="0.00096412037037037" calcext:value-type="float">
            <text:p>0,00096412037037037000</text:p>
          </table:table-cell>
          <table:table-cell table:formula="of:=[.D835]-[.D834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table:formula="of:=[.B834]+10" office:value-type="float" office:value="8340" calcext:value-type="float">
            <text:p>8340</text:p>
          </table:table-cell>
          <table:table-cell office:value-type="float" office:value="8640000" calcext:value-type="float">
            <text:p>8640000</text:p>
          </table:table-cell>
          <table:table-cell table:formula="of:=[.B835]/[.C835]" office:value-type="float" office:value="0.000965277777777778" calcext:value-type="float">
            <text:p>0,00096527777777777800</text:p>
          </table:table-cell>
          <table:table-cell table:formula="of:=[.D836]-[.D835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table:formula="of:=[.B835]+10" office:value-type="float" office:value="8350" calcext:value-type="float">
            <text:p>8350</text:p>
          </table:table-cell>
          <table:table-cell office:value-type="float" office:value="8640000" calcext:value-type="float">
            <text:p>8640000</text:p>
          </table:table-cell>
          <table:table-cell table:formula="of:=[.B836]/[.C836]" office:value-type="float" office:value="0.000966435185185185" calcext:value-type="float">
            <text:p>0,00096643518518518500</text:p>
          </table:table-cell>
          <table:table-cell table:formula="of:=[.D837]-[.D836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table:formula="of:=[.B836]+10" office:value-type="float" office:value="8360" calcext:value-type="float">
            <text:p>8360</text:p>
          </table:table-cell>
          <table:table-cell office:value-type="float" office:value="8640000" calcext:value-type="float">
            <text:p>8640000</text:p>
          </table:table-cell>
          <table:table-cell table:formula="of:=[.B837]/[.C837]" office:value-type="float" office:value="0.000967592592592593" calcext:value-type="float">
            <text:p>0,00096759259259259300</text:p>
          </table:table-cell>
          <table:table-cell table:formula="of:=[.D838]-[.D837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table:formula="of:=[.B837]+10" office:value-type="float" office:value="8370" calcext:value-type="float">
            <text:p>8370</text:p>
          </table:table-cell>
          <table:table-cell office:value-type="float" office:value="8640000" calcext:value-type="float">
            <text:p>8640000</text:p>
          </table:table-cell>
          <table:table-cell table:formula="of:=[.B838]/[.C838]" office:value-type="float" office:value="0.00096875" calcext:value-type="float">
            <text:p>0,00096875000000000000</text:p>
          </table:table-cell>
          <table:table-cell table:formula="of:=[.D839]-[.D838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table:formula="of:=[.B838]+10" office:value-type="float" office:value="8380" calcext:value-type="float">
            <text:p>8380</text:p>
          </table:table-cell>
          <table:table-cell office:value-type="float" office:value="8640000" calcext:value-type="float">
            <text:p>8640000</text:p>
          </table:table-cell>
          <table:table-cell table:formula="of:=[.B839]/[.C839]" office:value-type="float" office:value="0.000969907407407407" calcext:value-type="float">
            <text:p>0,00096990740740740700</text:p>
          </table:table-cell>
          <table:table-cell table:formula="of:=[.D840]-[.D839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table:formula="of:=[.B839]+10" office:value-type="float" office:value="8390" calcext:value-type="float">
            <text:p>8390</text:p>
          </table:table-cell>
          <table:table-cell office:value-type="float" office:value="8640000" calcext:value-type="float">
            <text:p>8640000</text:p>
          </table:table-cell>
          <table:table-cell table:formula="of:=[.B840]/[.C840]" office:value-type="float" office:value="0.000971064814814815" calcext:value-type="float">
            <text:p>0,00097106481481481500</text:p>
          </table:table-cell>
          <table:table-cell table:formula="of:=[.D841]-[.D840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table:formula="of:=[.B840]+10" office:value-type="float" office:value="8400" calcext:value-type="float">
            <text:p>8400</text:p>
          </table:table-cell>
          <table:table-cell office:value-type="float" office:value="8640000" calcext:value-type="float">
            <text:p>8640000</text:p>
          </table:table-cell>
          <table:table-cell table:formula="of:=[.B841]/[.C841]" office:value-type="float" office:value="0.000972222222222222" calcext:value-type="float">
            <text:p>0,00097222222222222200</text:p>
          </table:table-cell>
          <table:table-cell table:formula="of:=[.D842]-[.D841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table:formula="of:=[.B841]+10" office:value-type="float" office:value="8410" calcext:value-type="float">
            <text:p>8410</text:p>
          </table:table-cell>
          <table:table-cell office:value-type="float" office:value="8640000" calcext:value-type="float">
            <text:p>8640000</text:p>
          </table:table-cell>
          <table:table-cell table:formula="of:=[.B842]/[.C842]" office:value-type="float" office:value="0.00097337962962963" calcext:value-type="float">
            <text:p>0,00097337962962963000</text:p>
          </table:table-cell>
          <table:table-cell table:formula="of:=[.D843]-[.D842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table:formula="of:=[.B842]+10" office:value-type="float" office:value="8420" calcext:value-type="float">
            <text:p>8420</text:p>
          </table:table-cell>
          <table:table-cell office:value-type="float" office:value="8640000" calcext:value-type="float">
            <text:p>8640000</text:p>
          </table:table-cell>
          <table:table-cell table:formula="of:=[.B843]/[.C843]" office:value-type="float" office:value="0.000974537037037037" calcext:value-type="float">
            <text:p>0,00097453703703703700</text:p>
          </table:table-cell>
          <table:table-cell table:formula="of:=[.D844]-[.D843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table:formula="of:=[.B843]+10" office:value-type="float" office:value="8430" calcext:value-type="float">
            <text:p>8430</text:p>
          </table:table-cell>
          <table:table-cell office:value-type="float" office:value="8640000" calcext:value-type="float">
            <text:p>8640000</text:p>
          </table:table-cell>
          <table:table-cell table:formula="of:=[.B844]/[.C844]" office:value-type="float" office:value="0.000975694444444444" calcext:value-type="float">
            <text:p>0,00097569444444444400</text:p>
          </table:table-cell>
          <table:table-cell table:formula="of:=[.D845]-[.D844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table:formula="of:=[.B844]+10" office:value-type="float" office:value="8440" calcext:value-type="float">
            <text:p>8440</text:p>
          </table:table-cell>
          <table:table-cell office:value-type="float" office:value="8640000" calcext:value-type="float">
            <text:p>8640000</text:p>
          </table:table-cell>
          <table:table-cell table:formula="of:=[.B845]/[.C845]" office:value-type="float" office:value="0.000976851851851852" calcext:value-type="float">
            <text:p>0,00097685185185185200</text:p>
          </table:table-cell>
          <table:table-cell table:formula="of:=[.D846]-[.D845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table:formula="of:=[.B845]+10" office:value-type="float" office:value="8450" calcext:value-type="float">
            <text:p>8450</text:p>
          </table:table-cell>
          <table:table-cell office:value-type="float" office:value="8640000" calcext:value-type="float">
            <text:p>8640000</text:p>
          </table:table-cell>
          <table:table-cell table:formula="of:=[.B846]/[.C846]" office:value-type="float" office:value="0.000978009259259259" calcext:value-type="float">
            <text:p>0,00097800925925925900</text:p>
          </table:table-cell>
          <table:table-cell table:formula="of:=[.D847]-[.D846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table:formula="of:=[.B846]+10" office:value-type="float" office:value="8460" calcext:value-type="float">
            <text:p>8460</text:p>
          </table:table-cell>
          <table:table-cell office:value-type="float" office:value="8640000" calcext:value-type="float">
            <text:p>8640000</text:p>
          </table:table-cell>
          <table:table-cell table:formula="of:=[.B847]/[.C847]" office:value-type="float" office:value="0.000979166666666667" calcext:value-type="float">
            <text:p>0,00097916666666666700</text:p>
          </table:table-cell>
          <table:table-cell table:formula="of:=[.D848]-[.D847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table:formula="of:=[.B847]+10" office:value-type="float" office:value="8470" calcext:value-type="float">
            <text:p>8470</text:p>
          </table:table-cell>
          <table:table-cell office:value-type="float" office:value="8640000" calcext:value-type="float">
            <text:p>8640000</text:p>
          </table:table-cell>
          <table:table-cell table:formula="of:=[.B848]/[.C848]" office:value-type="float" office:value="0.000980324074074074" calcext:value-type="float">
            <text:p>0,00098032407407407400</text:p>
          </table:table-cell>
          <table:table-cell table:formula="of:=[.D849]-[.D848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table:formula="of:=[.B848]+10" office:value-type="float" office:value="8480" calcext:value-type="float">
            <text:p>8480</text:p>
          </table:table-cell>
          <table:table-cell office:value-type="float" office:value="8640000" calcext:value-type="float">
            <text:p>8640000</text:p>
          </table:table-cell>
          <table:table-cell table:formula="of:=[.B849]/[.C849]" office:value-type="float" office:value="0.000981481481481481" calcext:value-type="float">
            <text:p>0,00098148148148148100</text:p>
          </table:table-cell>
          <table:table-cell table:formula="of:=[.D850]-[.D849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table:formula="of:=[.B849]+10" office:value-type="float" office:value="8490" calcext:value-type="float">
            <text:p>8490</text:p>
          </table:table-cell>
          <table:table-cell office:value-type="float" office:value="8640000" calcext:value-type="float">
            <text:p>8640000</text:p>
          </table:table-cell>
          <table:table-cell table:formula="of:=[.B850]/[.C850]" office:value-type="float" office:value="0.000982638888888889" calcext:value-type="float">
            <text:p>0,00098263888888888900</text:p>
          </table:table-cell>
          <table:table-cell table:formula="of:=[.D851]-[.D850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[.B850]+10" office:value-type="float" office:value="8500" calcext:value-type="float">
            <text:p>8500</text:p>
          </table:table-cell>
          <table:table-cell office:value-type="float" office:value="8640000" calcext:value-type="float">
            <text:p>8640000</text:p>
          </table:table-cell>
          <table:table-cell table:formula="of:=[.B851]/[.C851]" office:value-type="float" office:value="0.000983796296296296" calcext:value-type="float">
            <text:p>0,00098379629629629600</text:p>
          </table:table-cell>
          <table:table-cell table:formula="of:=[.D852]-[.D851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table:formula="of:=[.B851]+10" office:value-type="float" office:value="8510" calcext:value-type="float">
            <text:p>8510</text:p>
          </table:table-cell>
          <table:table-cell office:value-type="float" office:value="8640000" calcext:value-type="float">
            <text:p>8640000</text:p>
          </table:table-cell>
          <table:table-cell table:formula="of:=[.B852]/[.C852]" office:value-type="float" office:value="0.000984953703703704" calcext:value-type="float">
            <text:p>0,00098495370370370400</text:p>
          </table:table-cell>
          <table:table-cell table:formula="of:=[.D853]-[.D852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[.B852]+10" office:value-type="float" office:value="8520" calcext:value-type="float">
            <text:p>8520</text:p>
          </table:table-cell>
          <table:table-cell office:value-type="float" office:value="8640000" calcext:value-type="float">
            <text:p>8640000</text:p>
          </table:table-cell>
          <table:table-cell table:formula="of:=[.B853]/[.C853]" office:value-type="float" office:value="0.000986111111111111" calcext:value-type="float">
            <text:p>0,00098611111111111100</text:p>
          </table:table-cell>
          <table:table-cell table:formula="of:=[.D854]-[.D853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table:formula="of:=[.B853]+10" office:value-type="float" office:value="8530" calcext:value-type="float">
            <text:p>8530</text:p>
          </table:table-cell>
          <table:table-cell office:value-type="float" office:value="8640000" calcext:value-type="float">
            <text:p>8640000</text:p>
          </table:table-cell>
          <table:table-cell table:formula="of:=[.B854]/[.C854]" office:value-type="float" office:value="0.000987268518518519" calcext:value-type="float">
            <text:p>0,00098726851851851900</text:p>
          </table:table-cell>
          <table:table-cell table:formula="of:=[.D855]-[.D854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table:formula="of:=[.B854]+10" office:value-type="float" office:value="8540" calcext:value-type="float">
            <text:p>8540</text:p>
          </table:table-cell>
          <table:table-cell office:value-type="float" office:value="8640000" calcext:value-type="float">
            <text:p>8640000</text:p>
          </table:table-cell>
          <table:table-cell table:formula="of:=[.B855]/[.C855]" office:value-type="float" office:value="0.000988425925925926" calcext:value-type="float">
            <text:p>0,00098842592592592600</text:p>
          </table:table-cell>
          <table:table-cell table:formula="of:=[.D856]-[.D855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table:formula="of:=[.B855]+10" office:value-type="float" office:value="8550" calcext:value-type="float">
            <text:p>8550</text:p>
          </table:table-cell>
          <table:table-cell office:value-type="float" office:value="8640000" calcext:value-type="float">
            <text:p>8640000</text:p>
          </table:table-cell>
          <table:table-cell table:formula="of:=[.B856]/[.C856]" office:value-type="float" office:value="0.000989583333333333" calcext:value-type="float">
            <text:p>0,00098958333333333300</text:p>
          </table:table-cell>
          <table:table-cell table:formula="of:=[.D857]-[.D856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table:formula="of:=[.B856]+10" office:value-type="float" office:value="8560" calcext:value-type="float">
            <text:p>8560</text:p>
          </table:table-cell>
          <table:table-cell office:value-type="float" office:value="8640000" calcext:value-type="float">
            <text:p>8640000</text:p>
          </table:table-cell>
          <table:table-cell table:formula="of:=[.B857]/[.C857]" office:value-type="float" office:value="0.000990740740740741" calcext:value-type="float">
            <text:p>0,00099074074074074100</text:p>
          </table:table-cell>
          <table:table-cell table:formula="of:=[.D858]-[.D857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table:formula="of:=[.B857]+10" office:value-type="float" office:value="8570" calcext:value-type="float">
            <text:p>8570</text:p>
          </table:table-cell>
          <table:table-cell office:value-type="float" office:value="8640000" calcext:value-type="float">
            <text:p>8640000</text:p>
          </table:table-cell>
          <table:table-cell table:formula="of:=[.B858]/[.C858]" office:value-type="float" office:value="0.000991898148148148" calcext:value-type="float">
            <text:p>0,00099189814814814800</text:p>
          </table:table-cell>
          <table:table-cell table:formula="of:=[.D859]-[.D858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table:formula="of:=[.B858]+10" office:value-type="float" office:value="8580" calcext:value-type="float">
            <text:p>8580</text:p>
          </table:table-cell>
          <table:table-cell office:value-type="float" office:value="8640000" calcext:value-type="float">
            <text:p>8640000</text:p>
          </table:table-cell>
          <table:table-cell table:formula="of:=[.B859]/[.C859]" office:value-type="float" office:value="0.000993055555555556" calcext:value-type="float">
            <text:p>0,00099305555555555600</text:p>
          </table:table-cell>
          <table:table-cell table:formula="of:=[.D860]-[.D859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table:formula="of:=[.B859]+10" office:value-type="float" office:value="8590" calcext:value-type="float">
            <text:p>8590</text:p>
          </table:table-cell>
          <table:table-cell office:value-type="float" office:value="8640000" calcext:value-type="float">
            <text:p>8640000</text:p>
          </table:table-cell>
          <table:table-cell table:formula="of:=[.B860]/[.C860]" office:value-type="float" office:value="0.000994212962962963" calcext:value-type="float">
            <text:p>0,00099421296296296300</text:p>
          </table:table-cell>
          <table:table-cell table:formula="of:=[.D861]-[.D860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[.B860]+10" office:value-type="float" office:value="8600" calcext:value-type="float">
            <text:p>8600</text:p>
          </table:table-cell>
          <table:table-cell office:value-type="float" office:value="8640000" calcext:value-type="float">
            <text:p>8640000</text:p>
          </table:table-cell>
          <table:table-cell table:formula="of:=[.B861]/[.C861]" office:value-type="float" office:value="0.00099537037037037" calcext:value-type="float">
            <text:p>0,00099537037037037000</text:p>
          </table:table-cell>
          <table:table-cell table:formula="of:=[.D862]-[.D861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table:formula="of:=[.B861]+10" office:value-type="float" office:value="8610" calcext:value-type="float">
            <text:p>8610</text:p>
          </table:table-cell>
          <table:table-cell office:value-type="float" office:value="8640000" calcext:value-type="float">
            <text:p>8640000</text:p>
          </table:table-cell>
          <table:table-cell table:formula="of:=[.B862]/[.C862]" office:value-type="float" office:value="0.000996527777777778" calcext:value-type="float">
            <text:p>0,00099652777777777800</text:p>
          </table:table-cell>
          <table:table-cell table:formula="of:=[.D863]-[.D862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table:formula="of:=[.B862]+10" office:value-type="float" office:value="8620" calcext:value-type="float">
            <text:p>8620</text:p>
          </table:table-cell>
          <table:table-cell office:value-type="float" office:value="8640000" calcext:value-type="float">
            <text:p>8640000</text:p>
          </table:table-cell>
          <table:table-cell table:formula="of:=[.B863]/[.C863]" office:value-type="float" office:value="0.000997685185185185" calcext:value-type="float">
            <text:p>0,00099768518518518500</text:p>
          </table:table-cell>
          <table:table-cell table:formula="of:=[.D864]-[.D863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table:formula="of:=[.B863]+10" office:value-type="float" office:value="8630" calcext:value-type="float">
            <text:p>8630</text:p>
          </table:table-cell>
          <table:table-cell office:value-type="float" office:value="8640000" calcext:value-type="float">
            <text:p>8640000</text:p>
          </table:table-cell>
          <table:table-cell table:formula="of:=[.B864]/[.C864]" office:value-type="float" office:value="0.000998842592592593" calcext:value-type="float">
            <text:p>0,00099884259259259300</text:p>
          </table:table-cell>
          <table:table-cell table:formula="of:=[.D865]-[.D864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table:formula="of:=[.B864]+10" office:value-type="float" office:value="8640" calcext:value-type="float">
            <text:p>8640</text:p>
          </table:table-cell>
          <table:table-cell office:value-type="float" office:value="8640000" calcext:value-type="float">
            <text:p>8640000</text:p>
          </table:table-cell>
          <table:table-cell table:formula="of:=[.B865]/[.C865]" office:value-type="float" office:value="0.001" calcext:value-type="float">
            <text:p>0,00100000000000000000</text:p>
          </table:table-cell>
          <table:table-cell table:formula="of:=[.D866]-[.D865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table:formula="of:=[.B865]+10" office:value-type="float" office:value="8650" calcext:value-type="float">
            <text:p>8650</text:p>
          </table:table-cell>
          <table:table-cell office:value-type="float" office:value="8640000" calcext:value-type="float">
            <text:p>8640000</text:p>
          </table:table-cell>
          <table:table-cell table:formula="of:=[.B866]/[.C866]" office:value-type="float" office:value="0.00100115740740741" calcext:value-type="float">
            <text:p>0,00100115740740741000</text:p>
          </table:table-cell>
          <table:table-cell table:formula="of:=[.D867]-[.D866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table:formula="of:=[.B866]+10" office:value-type="float" office:value="8660" calcext:value-type="float">
            <text:p>8660</text:p>
          </table:table-cell>
          <table:table-cell office:value-type="float" office:value="8640000" calcext:value-type="float">
            <text:p>8640000</text:p>
          </table:table-cell>
          <table:table-cell table:formula="of:=[.B867]/[.C867]" office:value-type="float" office:value="0.00100231481481481" calcext:value-type="float">
            <text:p>0,00100231481481481000</text:p>
          </table:table-cell>
          <table:table-cell table:formula="of:=[.D868]-[.D867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table:formula="of:=[.B867]+10" office:value-type="float" office:value="8670" calcext:value-type="float">
            <text:p>8670</text:p>
          </table:table-cell>
          <table:table-cell office:value-type="float" office:value="8640000" calcext:value-type="float">
            <text:p>8640000</text:p>
          </table:table-cell>
          <table:table-cell table:formula="of:=[.B868]/[.C868]" office:value-type="float" office:value="0.00100347222222222" calcext:value-type="float">
            <text:p>0,00100347222222222000</text:p>
          </table:table-cell>
          <table:table-cell table:formula="of:=[.D869]-[.D868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table:formula="of:=[.B868]+10" office:value-type="float" office:value="8680" calcext:value-type="float">
            <text:p>8680</text:p>
          </table:table-cell>
          <table:table-cell office:value-type="float" office:value="8640000" calcext:value-type="float">
            <text:p>8640000</text:p>
          </table:table-cell>
          <table:table-cell table:formula="of:=[.B869]/[.C869]" office:value-type="float" office:value="0.00100462962962963" calcext:value-type="float">
            <text:p>0,00100462962962963000</text:p>
          </table:table-cell>
          <table:table-cell table:formula="of:=[.D870]-[.D869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table:formula="of:=[.B869]+10" office:value-type="float" office:value="8690" calcext:value-type="float">
            <text:p>8690</text:p>
          </table:table-cell>
          <table:table-cell office:value-type="float" office:value="8640000" calcext:value-type="float">
            <text:p>8640000</text:p>
          </table:table-cell>
          <table:table-cell table:formula="of:=[.B870]/[.C870]" office:value-type="float" office:value="0.00100578703703704" calcext:value-type="float">
            <text:p>0,00100578703703704000</text:p>
          </table:table-cell>
          <table:table-cell table:formula="of:=[.D871]-[.D870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table:formula="of:=[.B870]+10" office:value-type="float" office:value="8700" calcext:value-type="float">
            <text:p>8700</text:p>
          </table:table-cell>
          <table:table-cell office:value-type="float" office:value="8640000" calcext:value-type="float">
            <text:p>8640000</text:p>
          </table:table-cell>
          <table:table-cell table:formula="of:=[.B871]/[.C871]" office:value-type="float" office:value="0.00100694444444444" calcext:value-type="float">
            <text:p>0,00100694444444444000</text:p>
          </table:table-cell>
          <table:table-cell table:formula="of:=[.D872]-[.D871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table:formula="of:=[.B871]+10" office:value-type="float" office:value="8710" calcext:value-type="float">
            <text:p>8710</text:p>
          </table:table-cell>
          <table:table-cell office:value-type="float" office:value="8640000" calcext:value-type="float">
            <text:p>8640000</text:p>
          </table:table-cell>
          <table:table-cell table:formula="of:=[.B872]/[.C872]" office:value-type="float" office:value="0.00100810185185185" calcext:value-type="float">
            <text:p>0,00100810185185185000</text:p>
          </table:table-cell>
          <table:table-cell table:formula="of:=[.D873]-[.D872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table:formula="of:=[.B872]+10" office:value-type="float" office:value="8720" calcext:value-type="float">
            <text:p>8720</text:p>
          </table:table-cell>
          <table:table-cell office:value-type="float" office:value="8640000" calcext:value-type="float">
            <text:p>8640000</text:p>
          </table:table-cell>
          <table:table-cell table:formula="of:=[.B873]/[.C873]" office:value-type="float" office:value="0.00100925925925926" calcext:value-type="float">
            <text:p>0,00100925925925926000</text:p>
          </table:table-cell>
          <table:table-cell table:formula="of:=[.D874]-[.D873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table:formula="of:=[.B873]+10" office:value-type="float" office:value="8730" calcext:value-type="float">
            <text:p>8730</text:p>
          </table:table-cell>
          <table:table-cell office:value-type="float" office:value="8640000" calcext:value-type="float">
            <text:p>8640000</text:p>
          </table:table-cell>
          <table:table-cell table:formula="of:=[.B874]/[.C874]" office:value-type="float" office:value="0.00101041666666667" calcext:value-type="float">
            <text:p>0,00101041666666667000</text:p>
          </table:table-cell>
          <table:table-cell table:formula="of:=[.D875]-[.D874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table:formula="of:=[.B874]+10" office:value-type="float" office:value="8740" calcext:value-type="float">
            <text:p>8740</text:p>
          </table:table-cell>
          <table:table-cell office:value-type="float" office:value="8640000" calcext:value-type="float">
            <text:p>8640000</text:p>
          </table:table-cell>
          <table:table-cell table:formula="of:=[.B875]/[.C875]" office:value-type="float" office:value="0.00101157407407407" calcext:value-type="float">
            <text:p>0,00101157407407407000</text:p>
          </table:table-cell>
          <table:table-cell table:formula="of:=[.D876]-[.D875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table:formula="of:=[.B875]+10" office:value-type="float" office:value="8750" calcext:value-type="float">
            <text:p>8750</text:p>
          </table:table-cell>
          <table:table-cell office:value-type="float" office:value="8640000" calcext:value-type="float">
            <text:p>8640000</text:p>
          </table:table-cell>
          <table:table-cell table:formula="of:=[.B876]/[.C876]" office:value-type="float" office:value="0.00101273148148148" calcext:value-type="float">
            <text:p>0,00101273148148148000</text:p>
          </table:table-cell>
          <table:table-cell table:formula="of:=[.D877]-[.D876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table:formula="of:=[.B876]+10" office:value-type="float" office:value="8760" calcext:value-type="float">
            <text:p>8760</text:p>
          </table:table-cell>
          <table:table-cell office:value-type="float" office:value="8640000" calcext:value-type="float">
            <text:p>8640000</text:p>
          </table:table-cell>
          <table:table-cell table:formula="of:=[.B877]/[.C877]" office:value-type="float" office:value="0.00101388888888889" calcext:value-type="float">
            <text:p>0,00101388888888889000</text:p>
          </table:table-cell>
          <table:table-cell table:formula="of:=[.D878]-[.D877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table:formula="of:=[.B877]+10" office:value-type="float" office:value="8770" calcext:value-type="float">
            <text:p>8770</text:p>
          </table:table-cell>
          <table:table-cell office:value-type="float" office:value="8640000" calcext:value-type="float">
            <text:p>8640000</text:p>
          </table:table-cell>
          <table:table-cell table:formula="of:=[.B878]/[.C878]" office:value-type="float" office:value="0.0010150462962963" calcext:value-type="float">
            <text:p>0,00101504629629630000</text:p>
          </table:table-cell>
          <table:table-cell table:formula="of:=[.D879]-[.D878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table:formula="of:=[.B878]+10" office:value-type="float" office:value="8780" calcext:value-type="float">
            <text:p>8780</text:p>
          </table:table-cell>
          <table:table-cell office:value-type="float" office:value="8640000" calcext:value-type="float">
            <text:p>8640000</text:p>
          </table:table-cell>
          <table:table-cell table:formula="of:=[.B879]/[.C879]" office:value-type="float" office:value="0.0010162037037037" calcext:value-type="float">
            <text:p>0,00101620370370370000</text:p>
          </table:table-cell>
          <table:table-cell table:formula="of:=[.D880]-[.D879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table:formula="of:=[.B879]+10" office:value-type="float" office:value="8790" calcext:value-type="float">
            <text:p>8790</text:p>
          </table:table-cell>
          <table:table-cell office:value-type="float" office:value="8640000" calcext:value-type="float">
            <text:p>8640000</text:p>
          </table:table-cell>
          <table:table-cell table:formula="of:=[.B880]/[.C880]" office:value-type="float" office:value="0.00101736111111111" calcext:value-type="float">
            <text:p>0,00101736111111111000</text:p>
          </table:table-cell>
          <table:table-cell table:formula="of:=[.D881]-[.D880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table:formula="of:=[.B880]+10" office:value-type="float" office:value="8800" calcext:value-type="float">
            <text:p>8800</text:p>
          </table:table-cell>
          <table:table-cell office:value-type="float" office:value="8640000" calcext:value-type="float">
            <text:p>8640000</text:p>
          </table:table-cell>
          <table:table-cell table:formula="of:=[.B881]/[.C881]" office:value-type="float" office:value="0.00101851851851852" calcext:value-type="float">
            <text:p>0,00101851851851852000</text:p>
          </table:table-cell>
          <table:table-cell table:formula="of:=[.D882]-[.D881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table:formula="of:=[.B881]+10" office:value-type="float" office:value="8810" calcext:value-type="float">
            <text:p>8810</text:p>
          </table:table-cell>
          <table:table-cell office:value-type="float" office:value="8640000" calcext:value-type="float">
            <text:p>8640000</text:p>
          </table:table-cell>
          <table:table-cell table:formula="of:=[.B882]/[.C882]" office:value-type="float" office:value="0.00101967592592593" calcext:value-type="float">
            <text:p>0,00101967592592593000</text:p>
          </table:table-cell>
          <table:table-cell table:formula="of:=[.D883]-[.D882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table:formula="of:=[.B882]+10" office:value-type="float" office:value="8820" calcext:value-type="float">
            <text:p>8820</text:p>
          </table:table-cell>
          <table:table-cell office:value-type="float" office:value="8640000" calcext:value-type="float">
            <text:p>8640000</text:p>
          </table:table-cell>
          <table:table-cell table:formula="of:=[.B883]/[.C883]" office:value-type="float" office:value="0.00102083333333333" calcext:value-type="float">
            <text:p>0,00102083333333333000</text:p>
          </table:table-cell>
          <table:table-cell table:formula="of:=[.D884]-[.D883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table:formula="of:=[.B883]+10" office:value-type="float" office:value="8830" calcext:value-type="float">
            <text:p>8830</text:p>
          </table:table-cell>
          <table:table-cell office:value-type="float" office:value="8640000" calcext:value-type="float">
            <text:p>8640000</text:p>
          </table:table-cell>
          <table:table-cell table:formula="of:=[.B884]/[.C884]" office:value-type="float" office:value="0.00102199074074074" calcext:value-type="float">
            <text:p>0,00102199074074074000</text:p>
          </table:table-cell>
          <table:table-cell table:formula="of:=[.D885]-[.D884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table:formula="of:=[.B884]+10" office:value-type="float" office:value="8840" calcext:value-type="float">
            <text:p>8840</text:p>
          </table:table-cell>
          <table:table-cell office:value-type="float" office:value="8640000" calcext:value-type="float">
            <text:p>8640000</text:p>
          </table:table-cell>
          <table:table-cell table:formula="of:=[.B885]/[.C885]" office:value-type="float" office:value="0.00102314814814815" calcext:value-type="float">
            <text:p>0,00102314814814815000</text:p>
          </table:table-cell>
          <table:table-cell table:formula="of:=[.D886]-[.D885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table:formula="of:=[.B885]+10" office:value-type="float" office:value="8850" calcext:value-type="float">
            <text:p>8850</text:p>
          </table:table-cell>
          <table:table-cell office:value-type="float" office:value="8640000" calcext:value-type="float">
            <text:p>8640000</text:p>
          </table:table-cell>
          <table:table-cell table:formula="of:=[.B886]/[.C886]" office:value-type="float" office:value="0.00102430555555556" calcext:value-type="float">
            <text:p>0,00102430555555556000</text:p>
          </table:table-cell>
          <table:table-cell table:formula="of:=[.D887]-[.D886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table:formula="of:=[.B886]+10" office:value-type="float" office:value="8860" calcext:value-type="float">
            <text:p>8860</text:p>
          </table:table-cell>
          <table:table-cell office:value-type="float" office:value="8640000" calcext:value-type="float">
            <text:p>8640000</text:p>
          </table:table-cell>
          <table:table-cell table:formula="of:=[.B887]/[.C887]" office:value-type="float" office:value="0.00102546296296296" calcext:value-type="float">
            <text:p>0,00102546296296296000</text:p>
          </table:table-cell>
          <table:table-cell table:formula="of:=[.D888]-[.D887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table:formula="of:=[.B887]+10" office:value-type="float" office:value="8870" calcext:value-type="float">
            <text:p>8870</text:p>
          </table:table-cell>
          <table:table-cell office:value-type="float" office:value="8640000" calcext:value-type="float">
            <text:p>8640000</text:p>
          </table:table-cell>
          <table:table-cell table:formula="of:=[.B888]/[.C888]" office:value-type="float" office:value="0.00102662037037037" calcext:value-type="float">
            <text:p>0,00102662037037037000</text:p>
          </table:table-cell>
          <table:table-cell table:formula="of:=[.D889]-[.D888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table:formula="of:=[.B888]+10" office:value-type="float" office:value="8880" calcext:value-type="float">
            <text:p>8880</text:p>
          </table:table-cell>
          <table:table-cell office:value-type="float" office:value="8640000" calcext:value-type="float">
            <text:p>8640000</text:p>
          </table:table-cell>
          <table:table-cell table:formula="of:=[.B889]/[.C889]" office:value-type="float" office:value="0.00102777777777778" calcext:value-type="float">
            <text:p>0,00102777777777778000</text:p>
          </table:table-cell>
          <table:table-cell table:formula="of:=[.D890]-[.D889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table:formula="of:=[.B889]+10" office:value-type="float" office:value="8890" calcext:value-type="float">
            <text:p>8890</text:p>
          </table:table-cell>
          <table:table-cell office:value-type="float" office:value="8640000" calcext:value-type="float">
            <text:p>8640000</text:p>
          </table:table-cell>
          <table:table-cell table:formula="of:=[.B890]/[.C890]" office:value-type="float" office:value="0.00102893518518519" calcext:value-type="float">
            <text:p>0,00102893518518519000</text:p>
          </table:table-cell>
          <table:table-cell table:formula="of:=[.D891]-[.D890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table:formula="of:=[.B890]+10" office:value-type="float" office:value="8900" calcext:value-type="float">
            <text:p>8900</text:p>
          </table:table-cell>
          <table:table-cell office:value-type="float" office:value="8640000" calcext:value-type="float">
            <text:p>8640000</text:p>
          </table:table-cell>
          <table:table-cell table:formula="of:=[.B891]/[.C891]" office:value-type="float" office:value="0.00103009259259259" calcext:value-type="float">
            <text:p>0,00103009259259259000</text:p>
          </table:table-cell>
          <table:table-cell table:formula="of:=[.D892]-[.D891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table:formula="of:=[.B891]+10" office:value-type="float" office:value="8910" calcext:value-type="float">
            <text:p>8910</text:p>
          </table:table-cell>
          <table:table-cell office:value-type="float" office:value="8640000" calcext:value-type="float">
            <text:p>8640000</text:p>
          </table:table-cell>
          <table:table-cell table:formula="of:=[.B892]/[.C892]" office:value-type="float" office:value="0.00103125" calcext:value-type="float">
            <text:p>0,00103125000000000000</text:p>
          </table:table-cell>
          <table:table-cell table:formula="of:=[.D893]-[.D892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table:formula="of:=[.B892]+10" office:value-type="float" office:value="8920" calcext:value-type="float">
            <text:p>8920</text:p>
          </table:table-cell>
          <table:table-cell office:value-type="float" office:value="8640000" calcext:value-type="float">
            <text:p>8640000</text:p>
          </table:table-cell>
          <table:table-cell table:formula="of:=[.B893]/[.C893]" office:value-type="float" office:value="0.00103240740740741" calcext:value-type="float">
            <text:p>0,00103240740740741000</text:p>
          </table:table-cell>
          <table:table-cell table:formula="of:=[.D894]-[.D893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table:formula="of:=[.B893]+10" office:value-type="float" office:value="8930" calcext:value-type="float">
            <text:p>8930</text:p>
          </table:table-cell>
          <table:table-cell office:value-type="float" office:value="8640000" calcext:value-type="float">
            <text:p>8640000</text:p>
          </table:table-cell>
          <table:table-cell table:formula="of:=[.B894]/[.C894]" office:value-type="float" office:value="0.00103356481481481" calcext:value-type="float">
            <text:p>0,00103356481481481000</text:p>
          </table:table-cell>
          <table:table-cell table:formula="of:=[.D895]-[.D894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table:formula="of:=[.B894]+10" office:value-type="float" office:value="8940" calcext:value-type="float">
            <text:p>8940</text:p>
          </table:table-cell>
          <table:table-cell office:value-type="float" office:value="8640000" calcext:value-type="float">
            <text:p>8640000</text:p>
          </table:table-cell>
          <table:table-cell table:formula="of:=[.B895]/[.C895]" office:value-type="float" office:value="0.00103472222222222" calcext:value-type="float">
            <text:p>0,00103472222222222000</text:p>
          </table:table-cell>
          <table:table-cell table:formula="of:=[.D896]-[.D895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table:formula="of:=[.B895]+10" office:value-type="float" office:value="8950" calcext:value-type="float">
            <text:p>8950</text:p>
          </table:table-cell>
          <table:table-cell office:value-type="float" office:value="8640000" calcext:value-type="float">
            <text:p>8640000</text:p>
          </table:table-cell>
          <table:table-cell table:formula="of:=[.B896]/[.C896]" office:value-type="float" office:value="0.00103587962962963" calcext:value-type="float">
            <text:p>0,00103587962962963000</text:p>
          </table:table-cell>
          <table:table-cell table:formula="of:=[.D897]-[.D896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table:formula="of:=[.B896]+10" office:value-type="float" office:value="8960" calcext:value-type="float">
            <text:p>8960</text:p>
          </table:table-cell>
          <table:table-cell office:value-type="float" office:value="8640000" calcext:value-type="float">
            <text:p>8640000</text:p>
          </table:table-cell>
          <table:table-cell table:formula="of:=[.B897]/[.C897]" office:value-type="float" office:value="0.00103703703703704" calcext:value-type="float">
            <text:p>0,00103703703703704000</text:p>
          </table:table-cell>
          <table:table-cell table:formula="of:=[.D898]-[.D897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table:formula="of:=[.B897]+10" office:value-type="float" office:value="8970" calcext:value-type="float">
            <text:p>8970</text:p>
          </table:table-cell>
          <table:table-cell office:value-type="float" office:value="8640000" calcext:value-type="float">
            <text:p>8640000</text:p>
          </table:table-cell>
          <table:table-cell table:formula="of:=[.B898]/[.C898]" office:value-type="float" office:value="0.00103819444444444" calcext:value-type="float">
            <text:p>0,00103819444444444000</text:p>
          </table:table-cell>
          <table:table-cell table:formula="of:=[.D899]-[.D898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table:formula="of:=[.B898]+10" office:value-type="float" office:value="8980" calcext:value-type="float">
            <text:p>8980</text:p>
          </table:table-cell>
          <table:table-cell office:value-type="float" office:value="8640000" calcext:value-type="float">
            <text:p>8640000</text:p>
          </table:table-cell>
          <table:table-cell table:formula="of:=[.B899]/[.C899]" office:value-type="float" office:value="0.00103935185185185" calcext:value-type="float">
            <text:p>0,00103935185185185000</text:p>
          </table:table-cell>
          <table:table-cell table:formula="of:=[.D900]-[.D899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table:formula="of:=[.B899]+10" office:value-type="float" office:value="8990" calcext:value-type="float">
            <text:p>8990</text:p>
          </table:table-cell>
          <table:table-cell office:value-type="float" office:value="8640000" calcext:value-type="float">
            <text:p>8640000</text:p>
          </table:table-cell>
          <table:table-cell table:formula="of:=[.B900]/[.C900]" office:value-type="float" office:value="0.00104050925925926" calcext:value-type="float">
            <text:p>0,00104050925925926000</text:p>
          </table:table-cell>
          <table:table-cell table:formula="of:=[.D901]-[.D900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[.B900]+10" office:value-type="float" office:value="9000" calcext:value-type="float">
            <text:p>9000</text:p>
          </table:table-cell>
          <table:table-cell office:value-type="float" office:value="8640000" calcext:value-type="float">
            <text:p>8640000</text:p>
          </table:table-cell>
          <table:table-cell table:formula="of:=[.B901]/[.C901]" office:value-type="float" office:value="0.00104166666666667" calcext:value-type="float">
            <text:p>0,00104166666666667000</text:p>
          </table:table-cell>
          <table:table-cell table:formula="of:=[.D902]-[.D901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table:formula="of:=[.B901]+10" office:value-type="float" office:value="9010" calcext:value-type="float">
            <text:p>9010</text:p>
          </table:table-cell>
          <table:table-cell office:value-type="float" office:value="8640000" calcext:value-type="float">
            <text:p>8640000</text:p>
          </table:table-cell>
          <table:table-cell table:formula="of:=[.B902]/[.C902]" office:value-type="float" office:value="0.00104282407407407" calcext:value-type="float">
            <text:p>0,00104282407407407000</text:p>
          </table:table-cell>
          <table:table-cell table:formula="of:=[.D903]-[.D902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table:formula="of:=[.B902]+10" office:value-type="float" office:value="9020" calcext:value-type="float">
            <text:p>9020</text:p>
          </table:table-cell>
          <table:table-cell office:value-type="float" office:value="8640000" calcext:value-type="float">
            <text:p>8640000</text:p>
          </table:table-cell>
          <table:table-cell table:formula="of:=[.B903]/[.C903]" office:value-type="float" office:value="0.00104398148148148" calcext:value-type="float">
            <text:p>0,00104398148148148000</text:p>
          </table:table-cell>
          <table:table-cell table:formula="of:=[.D904]-[.D903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table:formula="of:=[.B903]+10" office:value-type="float" office:value="9030" calcext:value-type="float">
            <text:p>9030</text:p>
          </table:table-cell>
          <table:table-cell office:value-type="float" office:value="8640000" calcext:value-type="float">
            <text:p>8640000</text:p>
          </table:table-cell>
          <table:table-cell table:formula="of:=[.B904]/[.C904]" office:value-type="float" office:value="0.00104513888888889" calcext:value-type="float">
            <text:p>0,00104513888888889000</text:p>
          </table:table-cell>
          <table:table-cell table:formula="of:=[.D905]-[.D904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table:formula="of:=[.B904]+10" office:value-type="float" office:value="9040" calcext:value-type="float">
            <text:p>9040</text:p>
          </table:table-cell>
          <table:table-cell office:value-type="float" office:value="8640000" calcext:value-type="float">
            <text:p>8640000</text:p>
          </table:table-cell>
          <table:table-cell table:formula="of:=[.B905]/[.C905]" office:value-type="float" office:value="0.0010462962962963" calcext:value-type="float">
            <text:p>0,00104629629629630000</text:p>
          </table:table-cell>
          <table:table-cell table:formula="of:=[.D906]-[.D905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table:formula="of:=[.B905]+10" office:value-type="float" office:value="9050" calcext:value-type="float">
            <text:p>9050</text:p>
          </table:table-cell>
          <table:table-cell office:value-type="float" office:value="8640000" calcext:value-type="float">
            <text:p>8640000</text:p>
          </table:table-cell>
          <table:table-cell table:formula="of:=[.B906]/[.C906]" office:value-type="float" office:value="0.0010474537037037" calcext:value-type="float">
            <text:p>0,00104745370370370000</text:p>
          </table:table-cell>
          <table:table-cell table:formula="of:=[.D907]-[.D906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table:formula="of:=[.B906]+10" office:value-type="float" office:value="9060" calcext:value-type="float">
            <text:p>9060</text:p>
          </table:table-cell>
          <table:table-cell office:value-type="float" office:value="8640000" calcext:value-type="float">
            <text:p>8640000</text:p>
          </table:table-cell>
          <table:table-cell table:formula="of:=[.B907]/[.C907]" office:value-type="float" office:value="0.00104861111111111" calcext:value-type="float">
            <text:p>0,00104861111111111000</text:p>
          </table:table-cell>
          <table:table-cell table:formula="of:=[.D908]-[.D907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table:formula="of:=[.B907]+10" office:value-type="float" office:value="9070" calcext:value-type="float">
            <text:p>9070</text:p>
          </table:table-cell>
          <table:table-cell office:value-type="float" office:value="8640000" calcext:value-type="float">
            <text:p>8640000</text:p>
          </table:table-cell>
          <table:table-cell table:formula="of:=[.B908]/[.C908]" office:value-type="float" office:value="0.00104976851851852" calcext:value-type="float">
            <text:p>0,00104976851851852000</text:p>
          </table:table-cell>
          <table:table-cell table:formula="of:=[.D909]-[.D908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table:formula="of:=[.B908]+10" office:value-type="float" office:value="9080" calcext:value-type="float">
            <text:p>9080</text:p>
          </table:table-cell>
          <table:table-cell office:value-type="float" office:value="8640000" calcext:value-type="float">
            <text:p>8640000</text:p>
          </table:table-cell>
          <table:table-cell table:formula="of:=[.B909]/[.C909]" office:value-type="float" office:value="0.00105092592592593" calcext:value-type="float">
            <text:p>0,00105092592592593000</text:p>
          </table:table-cell>
          <table:table-cell table:formula="of:=[.D910]-[.D909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table:formula="of:=[.B909]+10" office:value-type="float" office:value="9090" calcext:value-type="float">
            <text:p>9090</text:p>
          </table:table-cell>
          <table:table-cell office:value-type="float" office:value="8640000" calcext:value-type="float">
            <text:p>8640000</text:p>
          </table:table-cell>
          <table:table-cell table:formula="of:=[.B910]/[.C910]" office:value-type="float" office:value="0.00105208333333333" calcext:value-type="float">
            <text:p>0,00105208333333333000</text:p>
          </table:table-cell>
          <table:table-cell table:formula="of:=[.D911]-[.D910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table:formula="of:=[.B910]+10" office:value-type="float" office:value="9100" calcext:value-type="float">
            <text:p>9100</text:p>
          </table:table-cell>
          <table:table-cell office:value-type="float" office:value="8640000" calcext:value-type="float">
            <text:p>8640000</text:p>
          </table:table-cell>
          <table:table-cell table:formula="of:=[.B911]/[.C911]" office:value-type="float" office:value="0.00105324074074074" calcext:value-type="float">
            <text:p>0,00105324074074074000</text:p>
          </table:table-cell>
          <table:table-cell table:formula="of:=[.D912]-[.D911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table:formula="of:=[.B911]+10" office:value-type="float" office:value="9110" calcext:value-type="float">
            <text:p>9110</text:p>
          </table:table-cell>
          <table:table-cell office:value-type="float" office:value="8640000" calcext:value-type="float">
            <text:p>8640000</text:p>
          </table:table-cell>
          <table:table-cell table:formula="of:=[.B912]/[.C912]" office:value-type="float" office:value="0.00105439814814815" calcext:value-type="float">
            <text:p>0,00105439814814815000</text:p>
          </table:table-cell>
          <table:table-cell table:formula="of:=[.D913]-[.D912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table:formula="of:=[.B912]+10" office:value-type="float" office:value="9120" calcext:value-type="float">
            <text:p>9120</text:p>
          </table:table-cell>
          <table:table-cell office:value-type="float" office:value="8640000" calcext:value-type="float">
            <text:p>8640000</text:p>
          </table:table-cell>
          <table:table-cell table:formula="of:=[.B913]/[.C913]" office:value-type="float" office:value="0.00105555555555556" calcext:value-type="float">
            <text:p>0,00105555555555556000</text:p>
          </table:table-cell>
          <table:table-cell table:formula="of:=[.D914]-[.D913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table:formula="of:=[.B913]+10" office:value-type="float" office:value="9130" calcext:value-type="float">
            <text:p>9130</text:p>
          </table:table-cell>
          <table:table-cell office:value-type="float" office:value="8640000" calcext:value-type="float">
            <text:p>8640000</text:p>
          </table:table-cell>
          <table:table-cell table:formula="of:=[.B914]/[.C914]" office:value-type="float" office:value="0.00105671296296296" calcext:value-type="float">
            <text:p>0,00105671296296296000</text:p>
          </table:table-cell>
          <table:table-cell table:formula="of:=[.D915]-[.D914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table:formula="of:=[.B914]+10" office:value-type="float" office:value="9140" calcext:value-type="float">
            <text:p>9140</text:p>
          </table:table-cell>
          <table:table-cell office:value-type="float" office:value="8640000" calcext:value-type="float">
            <text:p>8640000</text:p>
          </table:table-cell>
          <table:table-cell table:formula="of:=[.B915]/[.C915]" office:value-type="float" office:value="0.00105787037037037" calcext:value-type="float">
            <text:p>0,00105787037037037000</text:p>
          </table:table-cell>
          <table:table-cell table:formula="of:=[.D916]-[.D915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table:formula="of:=[.B915]+10" office:value-type="float" office:value="9150" calcext:value-type="float">
            <text:p>9150</text:p>
          </table:table-cell>
          <table:table-cell office:value-type="float" office:value="8640000" calcext:value-type="float">
            <text:p>8640000</text:p>
          </table:table-cell>
          <table:table-cell table:formula="of:=[.B916]/[.C916]" office:value-type="float" office:value="0.00105902777777778" calcext:value-type="float">
            <text:p>0,00105902777777778000</text:p>
          </table:table-cell>
          <table:table-cell table:formula="of:=[.D917]-[.D916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table:formula="of:=[.B916]+10" office:value-type="float" office:value="9160" calcext:value-type="float">
            <text:p>9160</text:p>
          </table:table-cell>
          <table:table-cell office:value-type="float" office:value="8640000" calcext:value-type="float">
            <text:p>8640000</text:p>
          </table:table-cell>
          <table:table-cell table:formula="of:=[.B917]/[.C917]" office:value-type="float" office:value="0.00106018518518519" calcext:value-type="float">
            <text:p>0,00106018518518519000</text:p>
          </table:table-cell>
          <table:table-cell table:formula="of:=[.D918]-[.D917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table:formula="of:=[.B917]+10" office:value-type="float" office:value="9170" calcext:value-type="float">
            <text:p>9170</text:p>
          </table:table-cell>
          <table:table-cell office:value-type="float" office:value="8640000" calcext:value-type="float">
            <text:p>8640000</text:p>
          </table:table-cell>
          <table:table-cell table:formula="of:=[.B918]/[.C918]" office:value-type="float" office:value="0.00106134259259259" calcext:value-type="float">
            <text:p>0,00106134259259259000</text:p>
          </table:table-cell>
          <table:table-cell table:formula="of:=[.D919]-[.D918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table:formula="of:=[.B918]+10" office:value-type="float" office:value="9180" calcext:value-type="float">
            <text:p>9180</text:p>
          </table:table-cell>
          <table:table-cell office:value-type="float" office:value="8640000" calcext:value-type="float">
            <text:p>8640000</text:p>
          </table:table-cell>
          <table:table-cell table:formula="of:=[.B919]/[.C919]" office:value-type="float" office:value="0.0010625" calcext:value-type="float">
            <text:p>0,00106250000000000000</text:p>
          </table:table-cell>
          <table:table-cell table:formula="of:=[.D920]-[.D919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table:formula="of:=[.B919]+10" office:value-type="float" office:value="9190" calcext:value-type="float">
            <text:p>9190</text:p>
          </table:table-cell>
          <table:table-cell office:value-type="float" office:value="8640000" calcext:value-type="float">
            <text:p>8640000</text:p>
          </table:table-cell>
          <table:table-cell table:formula="of:=[.B920]/[.C920]" office:value-type="float" office:value="0.00106365740740741" calcext:value-type="float">
            <text:p>0,00106365740740741000</text:p>
          </table:table-cell>
          <table:table-cell table:formula="of:=[.D921]-[.D920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table:formula="of:=[.B920]+10" office:value-type="float" office:value="9200" calcext:value-type="float">
            <text:p>9200</text:p>
          </table:table-cell>
          <table:table-cell office:value-type="float" office:value="8640000" calcext:value-type="float">
            <text:p>8640000</text:p>
          </table:table-cell>
          <table:table-cell table:formula="of:=[.B921]/[.C921]" office:value-type="float" office:value="0.00106481481481481" calcext:value-type="float">
            <text:p>0,00106481481481481000</text:p>
          </table:table-cell>
          <table:table-cell table:formula="of:=[.D922]-[.D921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table:formula="of:=[.B921]+10" office:value-type="float" office:value="9210" calcext:value-type="float">
            <text:p>9210</text:p>
          </table:table-cell>
          <table:table-cell office:value-type="float" office:value="8640000" calcext:value-type="float">
            <text:p>8640000</text:p>
          </table:table-cell>
          <table:table-cell table:formula="of:=[.B922]/[.C922]" office:value-type="float" office:value="0.00106597222222222" calcext:value-type="float">
            <text:p>0,00106597222222222000</text:p>
          </table:table-cell>
          <table:table-cell table:formula="of:=[.D923]-[.D922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table:formula="of:=[.B922]+10" office:value-type="float" office:value="9220" calcext:value-type="float">
            <text:p>9220</text:p>
          </table:table-cell>
          <table:table-cell office:value-type="float" office:value="8640000" calcext:value-type="float">
            <text:p>8640000</text:p>
          </table:table-cell>
          <table:table-cell table:formula="of:=[.B923]/[.C923]" office:value-type="float" office:value="0.00106712962962963" calcext:value-type="float">
            <text:p>0,00106712962962963000</text:p>
          </table:table-cell>
          <table:table-cell table:formula="of:=[.D924]-[.D923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table:formula="of:=[.B923]+10" office:value-type="float" office:value="9230" calcext:value-type="float">
            <text:p>9230</text:p>
          </table:table-cell>
          <table:table-cell office:value-type="float" office:value="8640000" calcext:value-type="float">
            <text:p>8640000</text:p>
          </table:table-cell>
          <table:table-cell table:formula="of:=[.B924]/[.C924]" office:value-type="float" office:value="0.00106828703703704" calcext:value-type="float">
            <text:p>0,00106828703703704000</text:p>
          </table:table-cell>
          <table:table-cell table:formula="of:=[.D925]-[.D924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table:formula="of:=[.B924]+10" office:value-type="float" office:value="9240" calcext:value-type="float">
            <text:p>9240</text:p>
          </table:table-cell>
          <table:table-cell office:value-type="float" office:value="8640000" calcext:value-type="float">
            <text:p>8640000</text:p>
          </table:table-cell>
          <table:table-cell table:formula="of:=[.B925]/[.C925]" office:value-type="float" office:value="0.00106944444444444" calcext:value-type="float">
            <text:p>0,00106944444444444000</text:p>
          </table:table-cell>
          <table:table-cell table:formula="of:=[.D926]-[.D925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table:formula="of:=[.B925]+10" office:value-type="float" office:value="9250" calcext:value-type="float">
            <text:p>9250</text:p>
          </table:table-cell>
          <table:table-cell office:value-type="float" office:value="8640000" calcext:value-type="float">
            <text:p>8640000</text:p>
          </table:table-cell>
          <table:table-cell table:formula="of:=[.B926]/[.C926]" office:value-type="float" office:value="0.00107060185185185" calcext:value-type="float">
            <text:p>0,00107060185185185000</text:p>
          </table:table-cell>
          <table:table-cell table:formula="of:=[.D927]-[.D926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table:formula="of:=[.B926]+10" office:value-type="float" office:value="9260" calcext:value-type="float">
            <text:p>9260</text:p>
          </table:table-cell>
          <table:table-cell office:value-type="float" office:value="8640000" calcext:value-type="float">
            <text:p>8640000</text:p>
          </table:table-cell>
          <table:table-cell table:formula="of:=[.B927]/[.C927]" office:value-type="float" office:value="0.00107175925925926" calcext:value-type="float">
            <text:p>0,00107175925925926000</text:p>
          </table:table-cell>
          <table:table-cell table:formula="of:=[.D928]-[.D927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table:formula="of:=[.B927]+10" office:value-type="float" office:value="9270" calcext:value-type="float">
            <text:p>9270</text:p>
          </table:table-cell>
          <table:table-cell office:value-type="float" office:value="8640000" calcext:value-type="float">
            <text:p>8640000</text:p>
          </table:table-cell>
          <table:table-cell table:formula="of:=[.B928]/[.C928]" office:value-type="float" office:value="0.00107291666666667" calcext:value-type="float">
            <text:p>0,00107291666666667000</text:p>
          </table:table-cell>
          <table:table-cell table:formula="of:=[.D929]-[.D928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table:formula="of:=[.B928]+10" office:value-type="float" office:value="9280" calcext:value-type="float">
            <text:p>9280</text:p>
          </table:table-cell>
          <table:table-cell office:value-type="float" office:value="8640000" calcext:value-type="float">
            <text:p>8640000</text:p>
          </table:table-cell>
          <table:table-cell table:formula="of:=[.B929]/[.C929]" office:value-type="float" office:value="0.00107407407407407" calcext:value-type="float">
            <text:p>0,00107407407407407000</text:p>
          </table:table-cell>
          <table:table-cell table:formula="of:=[.D930]-[.D929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table:formula="of:=[.B929]+10" office:value-type="float" office:value="9290" calcext:value-type="float">
            <text:p>9290</text:p>
          </table:table-cell>
          <table:table-cell office:value-type="float" office:value="8640000" calcext:value-type="float">
            <text:p>8640000</text:p>
          </table:table-cell>
          <table:table-cell table:formula="of:=[.B930]/[.C930]" office:value-type="float" office:value="0.00107523148148148" calcext:value-type="float">
            <text:p>0,00107523148148148000</text:p>
          </table:table-cell>
          <table:table-cell table:formula="of:=[.D931]-[.D930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table:formula="of:=[.B930]+10" office:value-type="float" office:value="9300" calcext:value-type="float">
            <text:p>9300</text:p>
          </table:table-cell>
          <table:table-cell office:value-type="float" office:value="8640000" calcext:value-type="float">
            <text:p>8640000</text:p>
          </table:table-cell>
          <table:table-cell table:formula="of:=[.B931]/[.C931]" office:value-type="float" office:value="0.00107638888888889" calcext:value-type="float">
            <text:p>0,00107638888888889000</text:p>
          </table:table-cell>
          <table:table-cell table:formula="of:=[.D932]-[.D931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table:formula="of:=[.B931]+10" office:value-type="float" office:value="9310" calcext:value-type="float">
            <text:p>9310</text:p>
          </table:table-cell>
          <table:table-cell office:value-type="float" office:value="8640000" calcext:value-type="float">
            <text:p>8640000</text:p>
          </table:table-cell>
          <table:table-cell table:formula="of:=[.B932]/[.C932]" office:value-type="float" office:value="0.0010775462962963" calcext:value-type="float">
            <text:p>0,00107754629629630000</text:p>
          </table:table-cell>
          <table:table-cell table:formula="of:=[.D933]-[.D932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table:formula="of:=[.B932]+10" office:value-type="float" office:value="9320" calcext:value-type="float">
            <text:p>9320</text:p>
          </table:table-cell>
          <table:table-cell office:value-type="float" office:value="8640000" calcext:value-type="float">
            <text:p>8640000</text:p>
          </table:table-cell>
          <table:table-cell table:formula="of:=[.B933]/[.C933]" office:value-type="float" office:value="0.0010787037037037" calcext:value-type="float">
            <text:p>0,00107870370370370000</text:p>
          </table:table-cell>
          <table:table-cell table:formula="of:=[.D934]-[.D933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table:formula="of:=[.B933]+10" office:value-type="float" office:value="9330" calcext:value-type="float">
            <text:p>9330</text:p>
          </table:table-cell>
          <table:table-cell office:value-type="float" office:value="8640000" calcext:value-type="float">
            <text:p>8640000</text:p>
          </table:table-cell>
          <table:table-cell table:formula="of:=[.B934]/[.C934]" office:value-type="float" office:value="0.00107986111111111" calcext:value-type="float">
            <text:p>0,00107986111111111000</text:p>
          </table:table-cell>
          <table:table-cell table:formula="of:=[.D935]-[.D934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table:formula="of:=[.B934]+10" office:value-type="float" office:value="9340" calcext:value-type="float">
            <text:p>9340</text:p>
          </table:table-cell>
          <table:table-cell office:value-type="float" office:value="8640000" calcext:value-type="float">
            <text:p>8640000</text:p>
          </table:table-cell>
          <table:table-cell table:formula="of:=[.B935]/[.C935]" office:value-type="float" office:value="0.00108101851851852" calcext:value-type="float">
            <text:p>0,00108101851851852000</text:p>
          </table:table-cell>
          <table:table-cell table:formula="of:=[.D936]-[.D935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table:formula="of:=[.B935]+10" office:value-type="float" office:value="9350" calcext:value-type="float">
            <text:p>9350</text:p>
          </table:table-cell>
          <table:table-cell office:value-type="float" office:value="8640000" calcext:value-type="float">
            <text:p>8640000</text:p>
          </table:table-cell>
          <table:table-cell table:formula="of:=[.B936]/[.C936]" office:value-type="float" office:value="0.00108217592592593" calcext:value-type="float">
            <text:p>0,00108217592592593000</text:p>
          </table:table-cell>
          <table:table-cell table:formula="of:=[.D937]-[.D936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table:formula="of:=[.B936]+10" office:value-type="float" office:value="9360" calcext:value-type="float">
            <text:p>9360</text:p>
          </table:table-cell>
          <table:table-cell office:value-type="float" office:value="8640000" calcext:value-type="float">
            <text:p>8640000</text:p>
          </table:table-cell>
          <table:table-cell table:formula="of:=[.B937]/[.C937]" office:value-type="float" office:value="0.00108333333333333" calcext:value-type="float">
            <text:p>0,00108333333333333000</text:p>
          </table:table-cell>
          <table:table-cell table:formula="of:=[.D938]-[.D937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table:formula="of:=[.B937]+10" office:value-type="float" office:value="9370" calcext:value-type="float">
            <text:p>9370</text:p>
          </table:table-cell>
          <table:table-cell office:value-type="float" office:value="8640000" calcext:value-type="float">
            <text:p>8640000</text:p>
          </table:table-cell>
          <table:table-cell table:formula="of:=[.B938]/[.C938]" office:value-type="float" office:value="0.00108449074074074" calcext:value-type="float">
            <text:p>0,00108449074074074000</text:p>
          </table:table-cell>
          <table:table-cell table:formula="of:=[.D939]-[.D938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table:formula="of:=[.B938]+10" office:value-type="float" office:value="9380" calcext:value-type="float">
            <text:p>9380</text:p>
          </table:table-cell>
          <table:table-cell office:value-type="float" office:value="8640000" calcext:value-type="float">
            <text:p>8640000</text:p>
          </table:table-cell>
          <table:table-cell table:formula="of:=[.B939]/[.C939]" office:value-type="float" office:value="0.00108564814814815" calcext:value-type="float">
            <text:p>0,00108564814814815000</text:p>
          </table:table-cell>
          <table:table-cell table:formula="of:=[.D940]-[.D939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table:formula="of:=[.B939]+10" office:value-type="float" office:value="9390" calcext:value-type="float">
            <text:p>9390</text:p>
          </table:table-cell>
          <table:table-cell office:value-type="float" office:value="8640000" calcext:value-type="float">
            <text:p>8640000</text:p>
          </table:table-cell>
          <table:table-cell table:formula="of:=[.B940]/[.C940]" office:value-type="float" office:value="0.00108680555555556" calcext:value-type="float">
            <text:p>0,00108680555555556000</text:p>
          </table:table-cell>
          <table:table-cell table:formula="of:=[.D941]-[.D940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table:formula="of:=[.B940]+10" office:value-type="float" office:value="9400" calcext:value-type="float">
            <text:p>9400</text:p>
          </table:table-cell>
          <table:table-cell office:value-type="float" office:value="8640000" calcext:value-type="float">
            <text:p>8640000</text:p>
          </table:table-cell>
          <table:table-cell table:formula="of:=[.B941]/[.C941]" office:value-type="float" office:value="0.00108796296296296" calcext:value-type="float">
            <text:p>0,00108796296296296000</text:p>
          </table:table-cell>
          <table:table-cell table:formula="of:=[.D942]-[.D941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table:formula="of:=[.B941]+10" office:value-type="float" office:value="9410" calcext:value-type="float">
            <text:p>9410</text:p>
          </table:table-cell>
          <table:table-cell office:value-type="float" office:value="8640000" calcext:value-type="float">
            <text:p>8640000</text:p>
          </table:table-cell>
          <table:table-cell table:formula="of:=[.B942]/[.C942]" office:value-type="float" office:value="0.00108912037037037" calcext:value-type="float">
            <text:p>0,00108912037037037000</text:p>
          </table:table-cell>
          <table:table-cell table:formula="of:=[.D943]-[.D942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table:formula="of:=[.B942]+10" office:value-type="float" office:value="9420" calcext:value-type="float">
            <text:p>9420</text:p>
          </table:table-cell>
          <table:table-cell office:value-type="float" office:value="8640000" calcext:value-type="float">
            <text:p>8640000</text:p>
          </table:table-cell>
          <table:table-cell table:formula="of:=[.B943]/[.C943]" office:value-type="float" office:value="0.00109027777777778" calcext:value-type="float">
            <text:p>0,00109027777777778000</text:p>
          </table:table-cell>
          <table:table-cell table:formula="of:=[.D944]-[.D943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table:formula="of:=[.B943]+10" office:value-type="float" office:value="9430" calcext:value-type="float">
            <text:p>9430</text:p>
          </table:table-cell>
          <table:table-cell office:value-type="float" office:value="8640000" calcext:value-type="float">
            <text:p>8640000</text:p>
          </table:table-cell>
          <table:table-cell table:formula="of:=[.B944]/[.C944]" office:value-type="float" office:value="0.00109143518518519" calcext:value-type="float">
            <text:p>0,00109143518518519000</text:p>
          </table:table-cell>
          <table:table-cell table:formula="of:=[.D945]-[.D944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table:formula="of:=[.B944]+10" office:value-type="float" office:value="9440" calcext:value-type="float">
            <text:p>9440</text:p>
          </table:table-cell>
          <table:table-cell office:value-type="float" office:value="8640000" calcext:value-type="float">
            <text:p>8640000</text:p>
          </table:table-cell>
          <table:table-cell table:formula="of:=[.B945]/[.C945]" office:value-type="float" office:value="0.00109259259259259" calcext:value-type="float">
            <text:p>0,00109259259259259000</text:p>
          </table:table-cell>
          <table:table-cell table:formula="of:=[.D946]-[.D945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table:formula="of:=[.B945]+10" office:value-type="float" office:value="9450" calcext:value-type="float">
            <text:p>9450</text:p>
          </table:table-cell>
          <table:table-cell office:value-type="float" office:value="8640000" calcext:value-type="float">
            <text:p>8640000</text:p>
          </table:table-cell>
          <table:table-cell table:formula="of:=[.B946]/[.C946]" office:value-type="float" office:value="0.00109375" calcext:value-type="float">
            <text:p>0,00109375000000000000</text:p>
          </table:table-cell>
          <table:table-cell table:formula="of:=[.D947]-[.D946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table:formula="of:=[.B946]+10" office:value-type="float" office:value="9460" calcext:value-type="float">
            <text:p>9460</text:p>
          </table:table-cell>
          <table:table-cell office:value-type="float" office:value="8640000" calcext:value-type="float">
            <text:p>8640000</text:p>
          </table:table-cell>
          <table:table-cell table:formula="of:=[.B947]/[.C947]" office:value-type="float" office:value="0.00109490740740741" calcext:value-type="float">
            <text:p>0,00109490740740741000</text:p>
          </table:table-cell>
          <table:table-cell table:formula="of:=[.D948]-[.D947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table:formula="of:=[.B947]+10" office:value-type="float" office:value="9470" calcext:value-type="float">
            <text:p>9470</text:p>
          </table:table-cell>
          <table:table-cell office:value-type="float" office:value="8640000" calcext:value-type="float">
            <text:p>8640000</text:p>
          </table:table-cell>
          <table:table-cell table:formula="of:=[.B948]/[.C948]" office:value-type="float" office:value="0.00109606481481482" calcext:value-type="float">
            <text:p>0,00109606481481482000</text:p>
          </table:table-cell>
          <table:table-cell table:formula="of:=[.D949]-[.D948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table:formula="of:=[.B948]+10" office:value-type="float" office:value="9480" calcext:value-type="float">
            <text:p>9480</text:p>
          </table:table-cell>
          <table:table-cell office:value-type="float" office:value="8640000" calcext:value-type="float">
            <text:p>8640000</text:p>
          </table:table-cell>
          <table:table-cell table:formula="of:=[.B949]/[.C949]" office:value-type="float" office:value="0.00109722222222222" calcext:value-type="float">
            <text:p>0,00109722222222222000</text:p>
          </table:table-cell>
          <table:table-cell table:formula="of:=[.D950]-[.D949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table:formula="of:=[.B949]+10" office:value-type="float" office:value="9490" calcext:value-type="float">
            <text:p>9490</text:p>
          </table:table-cell>
          <table:table-cell office:value-type="float" office:value="8640000" calcext:value-type="float">
            <text:p>8640000</text:p>
          </table:table-cell>
          <table:table-cell table:formula="of:=[.B950]/[.C950]" office:value-type="float" office:value="0.00109837962962963" calcext:value-type="float">
            <text:p>0,00109837962962963000</text:p>
          </table:table-cell>
          <table:table-cell table:formula="of:=[.D951]-[.D950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[.B950]+10" office:value-type="float" office:value="9500" calcext:value-type="float">
            <text:p>9500</text:p>
          </table:table-cell>
          <table:table-cell office:value-type="float" office:value="8640000" calcext:value-type="float">
            <text:p>8640000</text:p>
          </table:table-cell>
          <table:table-cell table:formula="of:=[.B951]/[.C951]" office:value-type="float" office:value="0.00109953703703704" calcext:value-type="float">
            <text:p>0,00109953703703704000</text:p>
          </table:table-cell>
          <table:table-cell table:formula="of:=[.D952]-[.D951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table:formula="of:=[.B951]+10" office:value-type="float" office:value="9510" calcext:value-type="float">
            <text:p>9510</text:p>
          </table:table-cell>
          <table:table-cell office:value-type="float" office:value="8640000" calcext:value-type="float">
            <text:p>8640000</text:p>
          </table:table-cell>
          <table:table-cell table:formula="of:=[.B952]/[.C952]" office:value-type="float" office:value="0.00110069444444444" calcext:value-type="float">
            <text:p>0,00110069444444444000</text:p>
          </table:table-cell>
          <table:table-cell table:formula="of:=[.D953]-[.D952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table:formula="of:=[.B952]+10" office:value-type="float" office:value="9520" calcext:value-type="float">
            <text:p>9520</text:p>
          </table:table-cell>
          <table:table-cell office:value-type="float" office:value="8640000" calcext:value-type="float">
            <text:p>8640000</text:p>
          </table:table-cell>
          <table:table-cell table:formula="of:=[.B953]/[.C953]" office:value-type="float" office:value="0.00110185185185185" calcext:value-type="float">
            <text:p>0,00110185185185185000</text:p>
          </table:table-cell>
          <table:table-cell table:formula="of:=[.D954]-[.D953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table:formula="of:=[.B953]+10" office:value-type="float" office:value="9530" calcext:value-type="float">
            <text:p>9530</text:p>
          </table:table-cell>
          <table:table-cell office:value-type="float" office:value="8640000" calcext:value-type="float">
            <text:p>8640000</text:p>
          </table:table-cell>
          <table:table-cell table:formula="of:=[.B954]/[.C954]" office:value-type="float" office:value="0.00110300925925926" calcext:value-type="float">
            <text:p>0,00110300925925926000</text:p>
          </table:table-cell>
          <table:table-cell table:formula="of:=[.D955]-[.D954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table:formula="of:=[.B954]+10" office:value-type="float" office:value="9540" calcext:value-type="float">
            <text:p>9540</text:p>
          </table:table-cell>
          <table:table-cell office:value-type="float" office:value="8640000" calcext:value-type="float">
            <text:p>8640000</text:p>
          </table:table-cell>
          <table:table-cell table:formula="of:=[.B955]/[.C955]" office:value-type="float" office:value="0.00110416666666667" calcext:value-type="float">
            <text:p>0,00110416666666667000</text:p>
          </table:table-cell>
          <table:table-cell table:formula="of:=[.D956]-[.D955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table:formula="of:=[.B955]+10" office:value-type="float" office:value="9550" calcext:value-type="float">
            <text:p>9550</text:p>
          </table:table-cell>
          <table:table-cell office:value-type="float" office:value="8640000" calcext:value-type="float">
            <text:p>8640000</text:p>
          </table:table-cell>
          <table:table-cell table:formula="of:=[.B956]/[.C956]" office:value-type="float" office:value="0.00110532407407407" calcext:value-type="float">
            <text:p>0,00110532407407407000</text:p>
          </table:table-cell>
          <table:table-cell table:formula="of:=[.D957]-[.D956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table:formula="of:=[.B956]+10" office:value-type="float" office:value="9560" calcext:value-type="float">
            <text:p>9560</text:p>
          </table:table-cell>
          <table:table-cell office:value-type="float" office:value="8640000" calcext:value-type="float">
            <text:p>8640000</text:p>
          </table:table-cell>
          <table:table-cell table:formula="of:=[.B957]/[.C957]" office:value-type="float" office:value="0.00110648148148148" calcext:value-type="float">
            <text:p>0,00110648148148148000</text:p>
          </table:table-cell>
          <table:table-cell table:formula="of:=[.D958]-[.D957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table:formula="of:=[.B957]+10" office:value-type="float" office:value="9570" calcext:value-type="float">
            <text:p>9570</text:p>
          </table:table-cell>
          <table:table-cell office:value-type="float" office:value="8640000" calcext:value-type="float">
            <text:p>8640000</text:p>
          </table:table-cell>
          <table:table-cell table:formula="of:=[.B958]/[.C958]" office:value-type="float" office:value="0.00110763888888889" calcext:value-type="float">
            <text:p>0,00110763888888889000</text:p>
          </table:table-cell>
          <table:table-cell table:formula="of:=[.D959]-[.D958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table:formula="of:=[.B958]+10" office:value-type="float" office:value="9580" calcext:value-type="float">
            <text:p>9580</text:p>
          </table:table-cell>
          <table:table-cell office:value-type="float" office:value="8640000" calcext:value-type="float">
            <text:p>8640000</text:p>
          </table:table-cell>
          <table:table-cell table:formula="of:=[.B959]/[.C959]" office:value-type="float" office:value="0.0011087962962963" calcext:value-type="float">
            <text:p>0,00110879629629630000</text:p>
          </table:table-cell>
          <table:table-cell table:formula="of:=[.D960]-[.D959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table:formula="of:=[.B959]+10" office:value-type="float" office:value="9590" calcext:value-type="float">
            <text:p>9590</text:p>
          </table:table-cell>
          <table:table-cell office:value-type="float" office:value="8640000" calcext:value-type="float">
            <text:p>8640000</text:p>
          </table:table-cell>
          <table:table-cell table:formula="of:=[.B960]/[.C960]" office:value-type="float" office:value="0.0011099537037037" calcext:value-type="float">
            <text:p>0,00110995370370370000</text:p>
          </table:table-cell>
          <table:table-cell table:formula="of:=[.D961]-[.D960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[.B960]+10" office:value-type="float" office:value="9600" calcext:value-type="float">
            <text:p>9600</text:p>
          </table:table-cell>
          <table:table-cell office:value-type="float" office:value="8640000" calcext:value-type="float">
            <text:p>8640000</text:p>
          </table:table-cell>
          <table:table-cell table:formula="of:=[.B961]/[.C961]" office:value-type="float" office:value="0.00111111111111111" calcext:value-type="float">
            <text:p>0,00111111111111111000</text:p>
          </table:table-cell>
          <table:table-cell table:formula="of:=[.D962]-[.D961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table:formula="of:=[.B961]+10" office:value-type="float" office:value="9610" calcext:value-type="float">
            <text:p>9610</text:p>
          </table:table-cell>
          <table:table-cell office:value-type="float" office:value="8640000" calcext:value-type="float">
            <text:p>8640000</text:p>
          </table:table-cell>
          <table:table-cell table:formula="of:=[.B962]/[.C962]" office:value-type="float" office:value="0.00111226851851852" calcext:value-type="float">
            <text:p>0,00111226851851852000</text:p>
          </table:table-cell>
          <table:table-cell table:formula="of:=[.D963]-[.D962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table:formula="of:=[.B962]+10" office:value-type="float" office:value="9620" calcext:value-type="float">
            <text:p>9620</text:p>
          </table:table-cell>
          <table:table-cell office:value-type="float" office:value="8640000" calcext:value-type="float">
            <text:p>8640000</text:p>
          </table:table-cell>
          <table:table-cell table:formula="of:=[.B963]/[.C963]" office:value-type="float" office:value="0.00111342592592593" calcext:value-type="float">
            <text:p>0,00111342592592593000</text:p>
          </table:table-cell>
          <table:table-cell table:formula="of:=[.D964]-[.D963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table:formula="of:=[.B963]+10" office:value-type="float" office:value="9630" calcext:value-type="float">
            <text:p>9630</text:p>
          </table:table-cell>
          <table:table-cell office:value-type="float" office:value="8640000" calcext:value-type="float">
            <text:p>8640000</text:p>
          </table:table-cell>
          <table:table-cell table:formula="of:=[.B964]/[.C964]" office:value-type="float" office:value="0.00111458333333333" calcext:value-type="float">
            <text:p>0,00111458333333333000</text:p>
          </table:table-cell>
          <table:table-cell table:formula="of:=[.D965]-[.D964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table:formula="of:=[.B964]+10" office:value-type="float" office:value="9640" calcext:value-type="float">
            <text:p>9640</text:p>
          </table:table-cell>
          <table:table-cell office:value-type="float" office:value="8640000" calcext:value-type="float">
            <text:p>8640000</text:p>
          </table:table-cell>
          <table:table-cell table:formula="of:=[.B965]/[.C965]" office:value-type="float" office:value="0.00111574074074074" calcext:value-type="float">
            <text:p>0,00111574074074074000</text:p>
          </table:table-cell>
          <table:table-cell table:formula="of:=[.D966]-[.D965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table:formula="of:=[.B965]+10" office:value-type="float" office:value="9650" calcext:value-type="float">
            <text:p>9650</text:p>
          </table:table-cell>
          <table:table-cell office:value-type="float" office:value="8640000" calcext:value-type="float">
            <text:p>8640000</text:p>
          </table:table-cell>
          <table:table-cell table:formula="of:=[.B966]/[.C966]" office:value-type="float" office:value="0.00111689814814815" calcext:value-type="float">
            <text:p>0,00111689814814815000</text:p>
          </table:table-cell>
          <table:table-cell table:formula="of:=[.D967]-[.D966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table:formula="of:=[.B966]+10" office:value-type="float" office:value="9660" calcext:value-type="float">
            <text:p>9660</text:p>
          </table:table-cell>
          <table:table-cell office:value-type="float" office:value="8640000" calcext:value-type="float">
            <text:p>8640000</text:p>
          </table:table-cell>
          <table:table-cell table:formula="of:=[.B967]/[.C967]" office:value-type="float" office:value="0.00111805555555556" calcext:value-type="float">
            <text:p>0,00111805555555556000</text:p>
          </table:table-cell>
          <table:table-cell table:formula="of:=[.D968]-[.D967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table:formula="of:=[.B967]+10" office:value-type="float" office:value="9670" calcext:value-type="float">
            <text:p>9670</text:p>
          </table:table-cell>
          <table:table-cell office:value-type="float" office:value="8640000" calcext:value-type="float">
            <text:p>8640000</text:p>
          </table:table-cell>
          <table:table-cell table:formula="of:=[.B968]/[.C968]" office:value-type="float" office:value="0.00111921296296296" calcext:value-type="float">
            <text:p>0,00111921296296296000</text:p>
          </table:table-cell>
          <table:table-cell table:formula="of:=[.D969]-[.D968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table:formula="of:=[.B968]+10" office:value-type="float" office:value="9680" calcext:value-type="float">
            <text:p>9680</text:p>
          </table:table-cell>
          <table:table-cell office:value-type="float" office:value="8640000" calcext:value-type="float">
            <text:p>8640000</text:p>
          </table:table-cell>
          <table:table-cell table:formula="of:=[.B969]/[.C969]" office:value-type="float" office:value="0.00112037037037037" calcext:value-type="float">
            <text:p>0,00112037037037037000</text:p>
          </table:table-cell>
          <table:table-cell table:formula="of:=[.D970]-[.D969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table:formula="of:=[.B969]+10" office:value-type="float" office:value="9690" calcext:value-type="float">
            <text:p>9690</text:p>
          </table:table-cell>
          <table:table-cell office:value-type="float" office:value="8640000" calcext:value-type="float">
            <text:p>8640000</text:p>
          </table:table-cell>
          <table:table-cell table:formula="of:=[.B970]/[.C970]" office:value-type="float" office:value="0.00112152777777778" calcext:value-type="float">
            <text:p>0,00112152777777778000</text:p>
          </table:table-cell>
          <table:table-cell table:formula="of:=[.D971]-[.D970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table:formula="of:=[.B970]+10" office:value-type="float" office:value="9700" calcext:value-type="float">
            <text:p>9700</text:p>
          </table:table-cell>
          <table:table-cell office:value-type="float" office:value="8640000" calcext:value-type="float">
            <text:p>8640000</text:p>
          </table:table-cell>
          <table:table-cell table:formula="of:=[.B971]/[.C971]" office:value-type="float" office:value="0.00112268518518519" calcext:value-type="float">
            <text:p>0,00112268518518519000</text:p>
          </table:table-cell>
          <table:table-cell table:formula="of:=[.D972]-[.D971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table:formula="of:=[.B971]+10" office:value-type="float" office:value="9710" calcext:value-type="float">
            <text:p>9710</text:p>
          </table:table-cell>
          <table:table-cell office:value-type="float" office:value="8640000" calcext:value-type="float">
            <text:p>8640000</text:p>
          </table:table-cell>
          <table:table-cell table:formula="of:=[.B972]/[.C972]" office:value-type="float" office:value="0.00112384259259259" calcext:value-type="float">
            <text:p>0,00112384259259259000</text:p>
          </table:table-cell>
          <table:table-cell table:formula="of:=[.D973]-[.D972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table:formula="of:=[.B972]+10" office:value-type="float" office:value="9720" calcext:value-type="float">
            <text:p>9720</text:p>
          </table:table-cell>
          <table:table-cell office:value-type="float" office:value="8640000" calcext:value-type="float">
            <text:p>8640000</text:p>
          </table:table-cell>
          <table:table-cell table:formula="of:=[.B973]/[.C973]" office:value-type="float" office:value="0.001125" calcext:value-type="float">
            <text:p>0,00112500000000000000</text:p>
          </table:table-cell>
          <table:table-cell table:formula="of:=[.D974]-[.D973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table:formula="of:=[.B973]+10" office:value-type="float" office:value="9730" calcext:value-type="float">
            <text:p>9730</text:p>
          </table:table-cell>
          <table:table-cell office:value-type="float" office:value="8640000" calcext:value-type="float">
            <text:p>8640000</text:p>
          </table:table-cell>
          <table:table-cell table:formula="of:=[.B974]/[.C974]" office:value-type="float" office:value="0.00112615740740741" calcext:value-type="float">
            <text:p>0,00112615740740741000</text:p>
          </table:table-cell>
          <table:table-cell table:formula="of:=[.D975]-[.D974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table:formula="of:=[.B974]+10" office:value-type="float" office:value="9740" calcext:value-type="float">
            <text:p>9740</text:p>
          </table:table-cell>
          <table:table-cell office:value-type="float" office:value="8640000" calcext:value-type="float">
            <text:p>8640000</text:p>
          </table:table-cell>
          <table:table-cell table:formula="of:=[.B975]/[.C975]" office:value-type="float" office:value="0.00112731481481481" calcext:value-type="float">
            <text:p>0,00112731481481481000</text:p>
          </table:table-cell>
          <table:table-cell table:formula="of:=[.D976]-[.D975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table:formula="of:=[.B975]+10" office:value-type="float" office:value="9750" calcext:value-type="float">
            <text:p>9750</text:p>
          </table:table-cell>
          <table:table-cell office:value-type="float" office:value="8640000" calcext:value-type="float">
            <text:p>8640000</text:p>
          </table:table-cell>
          <table:table-cell table:formula="of:=[.B976]/[.C976]" office:value-type="float" office:value="0.00112847222222222" calcext:value-type="float">
            <text:p>0,00112847222222222000</text:p>
          </table:table-cell>
          <table:table-cell table:formula="of:=[.D977]-[.D976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table:formula="of:=[.B976]+10" office:value-type="float" office:value="9760" calcext:value-type="float">
            <text:p>9760</text:p>
          </table:table-cell>
          <table:table-cell office:value-type="float" office:value="8640000" calcext:value-type="float">
            <text:p>8640000</text:p>
          </table:table-cell>
          <table:table-cell table:formula="of:=[.B977]/[.C977]" office:value-type="float" office:value="0.00112962962962963" calcext:value-type="float">
            <text:p>0,00112962962962963000</text:p>
          </table:table-cell>
          <table:table-cell table:formula="of:=[.D978]-[.D977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table:formula="of:=[.B977]+10" office:value-type="float" office:value="9770" calcext:value-type="float">
            <text:p>9770</text:p>
          </table:table-cell>
          <table:table-cell office:value-type="float" office:value="8640000" calcext:value-type="float">
            <text:p>8640000</text:p>
          </table:table-cell>
          <table:table-cell table:formula="of:=[.B978]/[.C978]" office:value-type="float" office:value="0.00113078703703704" calcext:value-type="float">
            <text:p>0,00113078703703704000</text:p>
          </table:table-cell>
          <table:table-cell table:formula="of:=[.D979]-[.D978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table:formula="of:=[.B978]+10" office:value-type="float" office:value="9780" calcext:value-type="float">
            <text:p>9780</text:p>
          </table:table-cell>
          <table:table-cell office:value-type="float" office:value="8640000" calcext:value-type="float">
            <text:p>8640000</text:p>
          </table:table-cell>
          <table:table-cell table:formula="of:=[.B979]/[.C979]" office:value-type="float" office:value="0.00113194444444444" calcext:value-type="float">
            <text:p>0,00113194444444444000</text:p>
          </table:table-cell>
          <table:table-cell table:formula="of:=[.D980]-[.D979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table:formula="of:=[.B979]+10" office:value-type="float" office:value="9790" calcext:value-type="float">
            <text:p>9790</text:p>
          </table:table-cell>
          <table:table-cell office:value-type="float" office:value="8640000" calcext:value-type="float">
            <text:p>8640000</text:p>
          </table:table-cell>
          <table:table-cell table:formula="of:=[.B980]/[.C980]" office:value-type="float" office:value="0.00113310185185185" calcext:value-type="float">
            <text:p>0,00113310185185185000</text:p>
          </table:table-cell>
          <table:table-cell table:formula="of:=[.D981]-[.D980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table:formula="of:=[.B980]+10" office:value-type="float" office:value="9800" calcext:value-type="float">
            <text:p>9800</text:p>
          </table:table-cell>
          <table:table-cell office:value-type="float" office:value="8640000" calcext:value-type="float">
            <text:p>8640000</text:p>
          </table:table-cell>
          <table:table-cell table:formula="of:=[.B981]/[.C981]" office:value-type="float" office:value="0.00113425925925926" calcext:value-type="float">
            <text:p>0,00113425925925926000</text:p>
          </table:table-cell>
          <table:table-cell table:formula="of:=[.D982]-[.D981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table:formula="of:=[.B981]+10" office:value-type="float" office:value="9810" calcext:value-type="float">
            <text:p>9810</text:p>
          </table:table-cell>
          <table:table-cell office:value-type="float" office:value="8640000" calcext:value-type="float">
            <text:p>8640000</text:p>
          </table:table-cell>
          <table:table-cell table:formula="of:=[.B982]/[.C982]" office:value-type="float" office:value="0.00113541666666667" calcext:value-type="float">
            <text:p>0,00113541666666667000</text:p>
          </table:table-cell>
          <table:table-cell table:formula="of:=[.D983]-[.D982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table:formula="of:=[.B982]+10" office:value-type="float" office:value="9820" calcext:value-type="float">
            <text:p>9820</text:p>
          </table:table-cell>
          <table:table-cell office:value-type="float" office:value="8640000" calcext:value-type="float">
            <text:p>8640000</text:p>
          </table:table-cell>
          <table:table-cell table:formula="of:=[.B983]/[.C983]" office:value-type="float" office:value="0.00113657407407407" calcext:value-type="float">
            <text:p>0,00113657407407407000</text:p>
          </table:table-cell>
          <table:table-cell table:formula="of:=[.D984]-[.D983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table:formula="of:=[.B983]+10" office:value-type="float" office:value="9830" calcext:value-type="float">
            <text:p>9830</text:p>
          </table:table-cell>
          <table:table-cell office:value-type="float" office:value="8640000" calcext:value-type="float">
            <text:p>8640000</text:p>
          </table:table-cell>
          <table:table-cell table:formula="of:=[.B984]/[.C984]" office:value-type="float" office:value="0.00113773148148148" calcext:value-type="float">
            <text:p>0,00113773148148148000</text:p>
          </table:table-cell>
          <table:table-cell table:formula="of:=[.D985]-[.D984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table:formula="of:=[.B984]+10" office:value-type="float" office:value="9840" calcext:value-type="float">
            <text:p>9840</text:p>
          </table:table-cell>
          <table:table-cell office:value-type="float" office:value="8640000" calcext:value-type="float">
            <text:p>8640000</text:p>
          </table:table-cell>
          <table:table-cell table:formula="of:=[.B985]/[.C985]" office:value-type="float" office:value="0.00113888888888889" calcext:value-type="float">
            <text:p>0,00113888888888889000</text:p>
          </table:table-cell>
          <table:table-cell table:formula="of:=[.D986]-[.D985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table:formula="of:=[.B985]+10" office:value-type="float" office:value="9850" calcext:value-type="float">
            <text:p>9850</text:p>
          </table:table-cell>
          <table:table-cell office:value-type="float" office:value="8640000" calcext:value-type="float">
            <text:p>8640000</text:p>
          </table:table-cell>
          <table:table-cell table:formula="of:=[.B986]/[.C986]" office:value-type="float" office:value="0.0011400462962963" calcext:value-type="float">
            <text:p>0,00114004629629630000</text:p>
          </table:table-cell>
          <table:table-cell table:formula="of:=[.D987]-[.D986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table:formula="of:=[.B986]+10" office:value-type="float" office:value="9860" calcext:value-type="float">
            <text:p>9860</text:p>
          </table:table-cell>
          <table:table-cell office:value-type="float" office:value="8640000" calcext:value-type="float">
            <text:p>8640000</text:p>
          </table:table-cell>
          <table:table-cell table:formula="of:=[.B987]/[.C987]" office:value-type="float" office:value="0.0011412037037037" calcext:value-type="float">
            <text:p>0,00114120370370370000</text:p>
          </table:table-cell>
          <table:table-cell table:formula="of:=[.D988]-[.D987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table:formula="of:=[.B987]+10" office:value-type="float" office:value="9870" calcext:value-type="float">
            <text:p>9870</text:p>
          </table:table-cell>
          <table:table-cell office:value-type="float" office:value="8640000" calcext:value-type="float">
            <text:p>8640000</text:p>
          </table:table-cell>
          <table:table-cell table:formula="of:=[.B988]/[.C988]" office:value-type="float" office:value="0.00114236111111111" calcext:value-type="float">
            <text:p>0,00114236111111111000</text:p>
          </table:table-cell>
          <table:table-cell table:formula="of:=[.D989]-[.D988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table:formula="of:=[.B988]+10" office:value-type="float" office:value="9880" calcext:value-type="float">
            <text:p>9880</text:p>
          </table:table-cell>
          <table:table-cell office:value-type="float" office:value="8640000" calcext:value-type="float">
            <text:p>8640000</text:p>
          </table:table-cell>
          <table:table-cell table:formula="of:=[.B989]/[.C989]" office:value-type="float" office:value="0.00114351851851852" calcext:value-type="float">
            <text:p>0,00114351851851852000</text:p>
          </table:table-cell>
          <table:table-cell table:formula="of:=[.D990]-[.D989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table:formula="of:=[.B989]+10" office:value-type="float" office:value="9890" calcext:value-type="float">
            <text:p>9890</text:p>
          </table:table-cell>
          <table:table-cell office:value-type="float" office:value="8640000" calcext:value-type="float">
            <text:p>8640000</text:p>
          </table:table-cell>
          <table:table-cell table:formula="of:=[.B990]/[.C990]" office:value-type="float" office:value="0.00114467592592593" calcext:value-type="float">
            <text:p>0,00114467592592593000</text:p>
          </table:table-cell>
          <table:table-cell table:formula="of:=[.D991]-[.D990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table:formula="of:=[.B990]+10" office:value-type="float" office:value="9900" calcext:value-type="float">
            <text:p>9900</text:p>
          </table:table-cell>
          <table:table-cell office:value-type="float" office:value="8640000" calcext:value-type="float">
            <text:p>8640000</text:p>
          </table:table-cell>
          <table:table-cell table:formula="of:=[.B991]/[.C991]" office:value-type="float" office:value="0.00114583333333333" calcext:value-type="float">
            <text:p>0,00114583333333333000</text:p>
          </table:table-cell>
          <table:table-cell table:formula="of:=[.D992]-[.D991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table:formula="of:=[.B991]+10" office:value-type="float" office:value="9910" calcext:value-type="float">
            <text:p>9910</text:p>
          </table:table-cell>
          <table:table-cell office:value-type="float" office:value="8640000" calcext:value-type="float">
            <text:p>8640000</text:p>
          </table:table-cell>
          <table:table-cell table:formula="of:=[.B992]/[.C992]" office:value-type="float" office:value="0.00114699074074074" calcext:value-type="float">
            <text:p>0,00114699074074074000</text:p>
          </table:table-cell>
          <table:table-cell table:formula="of:=[.D993]-[.D992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table:formula="of:=[.B992]+10" office:value-type="float" office:value="9920" calcext:value-type="float">
            <text:p>9920</text:p>
          </table:table-cell>
          <table:table-cell office:value-type="float" office:value="8640000" calcext:value-type="float">
            <text:p>8640000</text:p>
          </table:table-cell>
          <table:table-cell table:formula="of:=[.B993]/[.C993]" office:value-type="float" office:value="0.00114814814814815" calcext:value-type="float">
            <text:p>0,00114814814814815000</text:p>
          </table:table-cell>
          <table:table-cell table:formula="of:=[.D994]-[.D993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table:formula="of:=[.B993]+10" office:value-type="float" office:value="9930" calcext:value-type="float">
            <text:p>9930</text:p>
          </table:table-cell>
          <table:table-cell office:value-type="float" office:value="8640000" calcext:value-type="float">
            <text:p>8640000</text:p>
          </table:table-cell>
          <table:table-cell table:formula="of:=[.B994]/[.C994]" office:value-type="float" office:value="0.00114930555555556" calcext:value-type="float">
            <text:p>0,00114930555555556000</text:p>
          </table:table-cell>
          <table:table-cell table:formula="of:=[.D995]-[.D994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table:formula="of:=[.B994]+10" office:value-type="float" office:value="9940" calcext:value-type="float">
            <text:p>9940</text:p>
          </table:table-cell>
          <table:table-cell office:value-type="float" office:value="8640000" calcext:value-type="float">
            <text:p>8640000</text:p>
          </table:table-cell>
          <table:table-cell table:formula="of:=[.B995]/[.C995]" office:value-type="float" office:value="0.00115046296296296" calcext:value-type="float">
            <text:p>0,00115046296296296000</text:p>
          </table:table-cell>
          <table:table-cell table:formula="of:=[.D996]-[.D995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table:formula="of:=[.B995]+10" office:value-type="float" office:value="9950" calcext:value-type="float">
            <text:p>9950</text:p>
          </table:table-cell>
          <table:table-cell office:value-type="float" office:value="8640000" calcext:value-type="float">
            <text:p>8640000</text:p>
          </table:table-cell>
          <table:table-cell table:formula="of:=[.B996]/[.C996]" office:value-type="float" office:value="0.00115162037037037" calcext:value-type="float">
            <text:p>0,00115162037037037000</text:p>
          </table:table-cell>
          <table:table-cell table:formula="of:=[.D997]-[.D996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table:formula="of:=[.B996]+10" office:value-type="float" office:value="9960" calcext:value-type="float">
            <text:p>9960</text:p>
          </table:table-cell>
          <table:table-cell office:value-type="float" office:value="8640000" calcext:value-type="float">
            <text:p>8640000</text:p>
          </table:table-cell>
          <table:table-cell table:formula="of:=[.B997]/[.C997]" office:value-type="float" office:value="0.00115277777777778" calcext:value-type="float">
            <text:p>0,00115277777777778000</text:p>
          </table:table-cell>
          <table:table-cell table:formula="of:=[.D998]-[.D997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table:formula="of:=[.B997]+10" office:value-type="float" office:value="9970" calcext:value-type="float">
            <text:p>9970</text:p>
          </table:table-cell>
          <table:table-cell office:value-type="float" office:value="8640000" calcext:value-type="float">
            <text:p>8640000</text:p>
          </table:table-cell>
          <table:table-cell table:formula="of:=[.B998]/[.C998]" office:value-type="float" office:value="0.00115393518518519" calcext:value-type="float">
            <text:p>0,00115393518518519000</text:p>
          </table:table-cell>
          <table:table-cell table:formula="of:=[.D999]-[.D998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table:formula="of:=[.B998]+10" office:value-type="float" office:value="9980" calcext:value-type="float">
            <text:p>9980</text:p>
          </table:table-cell>
          <table:table-cell office:value-type="float" office:value="8640000" calcext:value-type="float">
            <text:p>8640000</text:p>
          </table:table-cell>
          <table:table-cell table:formula="of:=[.B999]/[.C999]" office:value-type="float" office:value="0.00115509259259259" calcext:value-type="float">
            <text:p>0,00115509259259259000</text:p>
          </table:table-cell>
          <table:table-cell table:formula="of:=[.D1000]-[.D999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table:formula="of:=[.B999]+10" office:value-type="float" office:value="9990" calcext:value-type="float">
            <text:p>9990</text:p>
          </table:table-cell>
          <table:table-cell office:value-type="float" office:value="8640000" calcext:value-type="float">
            <text:p>8640000</text:p>
          </table:table-cell>
          <table:table-cell table:formula="of:=[.B1000]/[.C1000]" office:value-type="float" office:value="0.00115625" calcext:value-type="float">
            <text:p>0,00115625000000000000</text:p>
          </table:table-cell>
          <table:table-cell table:formula="of:=[.D1001]-[.D1000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B1000]+10" office:value-type="float" office:value="10000" calcext:value-type="float">
            <text:p>10000</text:p>
          </table:table-cell>
          <table:table-cell office:value-type="float" office:value="8640000" calcext:value-type="float">
            <text:p>8640000</text:p>
          </table:table-cell>
          <table:table-cell table:formula="of:=[.B1001]/[.C1001]" office:value-type="float" office:value="0.00115740740740741" calcext:value-type="float">
            <text:p>0,00115740740740741000</text:p>
          </table:table-cell>
          <table:table-cell table:formula="of:=[.D1002]-[.D1001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table:formula="of:=[.B1001]+10" office:value-type="float" office:value="10010" calcext:value-type="float">
            <text:p>10010</text:p>
          </table:table-cell>
          <table:table-cell office:value-type="float" office:value="8640000" calcext:value-type="float">
            <text:p>8640000</text:p>
          </table:table-cell>
          <table:table-cell table:formula="of:=[.B1002]/[.C1002]" office:value-type="float" office:value="0.00115856481481481" calcext:value-type="float">
            <text:p>0,00115856481481481000</text:p>
          </table:table-cell>
          <table:table-cell table:formula="of:=[.D1003]-[.D1002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table:formula="of:=[.B1002]+10" office:value-type="float" office:value="10020" calcext:value-type="float">
            <text:p>10020</text:p>
          </table:table-cell>
          <table:table-cell office:value-type="float" office:value="8640000" calcext:value-type="float">
            <text:p>8640000</text:p>
          </table:table-cell>
          <table:table-cell table:formula="of:=[.B1003]/[.C1003]" office:value-type="float" office:value="0.00115972222222222" calcext:value-type="float">
            <text:p>0,00115972222222222000</text:p>
          </table:table-cell>
          <table:table-cell table:formula="of:=[.D1004]-[.D1003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table:formula="of:=[.B1003]+10" office:value-type="float" office:value="10030" calcext:value-type="float">
            <text:p>10030</text:p>
          </table:table-cell>
          <table:table-cell office:value-type="float" office:value="8640000" calcext:value-type="float">
            <text:p>8640000</text:p>
          </table:table-cell>
          <table:table-cell table:formula="of:=[.B1004]/[.C1004]" office:value-type="float" office:value="0.00116087962962963" calcext:value-type="float">
            <text:p>0,00116087962962963000</text:p>
          </table:table-cell>
          <table:table-cell table:formula="of:=[.D1005]-[.D1004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table:formula="of:=[.B1004]+10" office:value-type="float" office:value="10040" calcext:value-type="float">
            <text:p>10040</text:p>
          </table:table-cell>
          <table:table-cell office:value-type="float" office:value="8640000" calcext:value-type="float">
            <text:p>8640000</text:p>
          </table:table-cell>
          <table:table-cell table:formula="of:=[.B1005]/[.C1005]" office:value-type="float" office:value="0.00116203703703704" calcext:value-type="float">
            <text:p>0,00116203703703704000</text:p>
          </table:table-cell>
          <table:table-cell table:formula="of:=[.D1006]-[.D1005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table:formula="of:=[.B1005]+10" office:value-type="float" office:value="10050" calcext:value-type="float">
            <text:p>10050</text:p>
          </table:table-cell>
          <table:table-cell office:value-type="float" office:value="8640000" calcext:value-type="float">
            <text:p>8640000</text:p>
          </table:table-cell>
          <table:table-cell table:formula="of:=[.B1006]/[.C1006]" office:value-type="float" office:value="0.00116319444444444" calcext:value-type="float">
            <text:p>0,00116319444444444000</text:p>
          </table:table-cell>
          <table:table-cell table:formula="of:=[.D1007]-[.D1006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table:formula="of:=[.B1006]+10" office:value-type="float" office:value="10060" calcext:value-type="float">
            <text:p>10060</text:p>
          </table:table-cell>
          <table:table-cell office:value-type="float" office:value="8640000" calcext:value-type="float">
            <text:p>8640000</text:p>
          </table:table-cell>
          <table:table-cell table:formula="of:=[.B1007]/[.C1007]" office:value-type="float" office:value="0.00116435185185185" calcext:value-type="float">
            <text:p>0,00116435185185185000</text:p>
          </table:table-cell>
          <table:table-cell table:formula="of:=[.D1008]-[.D1007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table:formula="of:=[.B1007]+10" office:value-type="float" office:value="10070" calcext:value-type="float">
            <text:p>10070</text:p>
          </table:table-cell>
          <table:table-cell office:value-type="float" office:value="8640000" calcext:value-type="float">
            <text:p>8640000</text:p>
          </table:table-cell>
          <table:table-cell table:formula="of:=[.B1008]/[.C1008]" office:value-type="float" office:value="0.00116550925925926" calcext:value-type="float">
            <text:p>0,00116550925925926000</text:p>
          </table:table-cell>
          <table:table-cell table:formula="of:=[.D1009]-[.D1008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table:formula="of:=[.B1008]+10" office:value-type="float" office:value="10080" calcext:value-type="float">
            <text:p>10080</text:p>
          </table:table-cell>
          <table:table-cell office:value-type="float" office:value="8640000" calcext:value-type="float">
            <text:p>8640000</text:p>
          </table:table-cell>
          <table:table-cell table:formula="of:=[.B1009]/[.C1009]" office:value-type="float" office:value="0.00116666666666667" calcext:value-type="float">
            <text:p>0,00116666666666667000</text:p>
          </table:table-cell>
          <table:table-cell table:formula="of:=[.D1010]-[.D1009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table:formula="of:=[.B1009]+10" office:value-type="float" office:value="10090" calcext:value-type="float">
            <text:p>10090</text:p>
          </table:table-cell>
          <table:table-cell office:value-type="float" office:value="8640000" calcext:value-type="float">
            <text:p>8640000</text:p>
          </table:table-cell>
          <table:table-cell table:formula="of:=[.B1010]/[.C1010]" office:value-type="float" office:value="0.00116782407407407" calcext:value-type="float">
            <text:p>0,00116782407407407000</text:p>
          </table:table-cell>
          <table:table-cell table:formula="of:=[.D1011]-[.D1010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table:formula="of:=[.B1010]+10" office:value-type="float" office:value="10100" calcext:value-type="float">
            <text:p>10100</text:p>
          </table:table-cell>
          <table:table-cell office:value-type="float" office:value="8640000" calcext:value-type="float">
            <text:p>8640000</text:p>
          </table:table-cell>
          <table:table-cell table:formula="of:=[.B1011]/[.C1011]" office:value-type="float" office:value="0.00116898148148148" calcext:value-type="float">
            <text:p>0,00116898148148148000</text:p>
          </table:table-cell>
          <table:table-cell table:formula="of:=[.D1012]-[.D1011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table:formula="of:=[.B1011]+10" office:value-type="float" office:value="10110" calcext:value-type="float">
            <text:p>10110</text:p>
          </table:table-cell>
          <table:table-cell office:value-type="float" office:value="8640000" calcext:value-type="float">
            <text:p>8640000</text:p>
          </table:table-cell>
          <table:table-cell table:formula="of:=[.B1012]/[.C1012]" office:value-type="float" office:value="0.00117013888888889" calcext:value-type="float">
            <text:p>0,00117013888888889000</text:p>
          </table:table-cell>
          <table:table-cell table:formula="of:=[.D1013]-[.D1012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table:formula="of:=[.B1012]+10" office:value-type="float" office:value="10120" calcext:value-type="float">
            <text:p>10120</text:p>
          </table:table-cell>
          <table:table-cell office:value-type="float" office:value="8640000" calcext:value-type="float">
            <text:p>8640000</text:p>
          </table:table-cell>
          <table:table-cell table:formula="of:=[.B1013]/[.C1013]" office:value-type="float" office:value="0.0011712962962963" calcext:value-type="float">
            <text:p>0,00117129629629630000</text:p>
          </table:table-cell>
          <table:table-cell table:formula="of:=[.D1014]-[.D1013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table:formula="of:=[.B1013]+10" office:value-type="float" office:value="10130" calcext:value-type="float">
            <text:p>10130</text:p>
          </table:table-cell>
          <table:table-cell office:value-type="float" office:value="8640000" calcext:value-type="float">
            <text:p>8640000</text:p>
          </table:table-cell>
          <table:table-cell table:formula="of:=[.B1014]/[.C1014]" office:value-type="float" office:value="0.0011724537037037" calcext:value-type="float">
            <text:p>0,00117245370370370000</text:p>
          </table:table-cell>
          <table:table-cell table:formula="of:=[.D1015]-[.D1014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table:formula="of:=[.B1014]+10" office:value-type="float" office:value="10140" calcext:value-type="float">
            <text:p>10140</text:p>
          </table:table-cell>
          <table:table-cell office:value-type="float" office:value="8640000" calcext:value-type="float">
            <text:p>8640000</text:p>
          </table:table-cell>
          <table:table-cell table:formula="of:=[.B1015]/[.C1015]" office:value-type="float" office:value="0.00117361111111111" calcext:value-type="float">
            <text:p>0,00117361111111111000</text:p>
          </table:table-cell>
          <table:table-cell table:formula="of:=[.D1016]-[.D1015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table:formula="of:=[.B1015]+10" office:value-type="float" office:value="10150" calcext:value-type="float">
            <text:p>10150</text:p>
          </table:table-cell>
          <table:table-cell office:value-type="float" office:value="8640000" calcext:value-type="float">
            <text:p>8640000</text:p>
          </table:table-cell>
          <table:table-cell table:formula="of:=[.B1016]/[.C1016]" office:value-type="float" office:value="0.00117476851851852" calcext:value-type="float">
            <text:p>0,00117476851851852000</text:p>
          </table:table-cell>
          <table:table-cell table:formula="of:=[.D1017]-[.D1016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table:formula="of:=[.B1016]+10" office:value-type="float" office:value="10160" calcext:value-type="float">
            <text:p>10160</text:p>
          </table:table-cell>
          <table:table-cell office:value-type="float" office:value="8640000" calcext:value-type="float">
            <text:p>8640000</text:p>
          </table:table-cell>
          <table:table-cell table:formula="of:=[.B1017]/[.C1017]" office:value-type="float" office:value="0.00117592592592593" calcext:value-type="float">
            <text:p>0,00117592592592593000</text:p>
          </table:table-cell>
          <table:table-cell table:formula="of:=[.D1018]-[.D1017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table:formula="of:=[.B1017]+10" office:value-type="float" office:value="10170" calcext:value-type="float">
            <text:p>10170</text:p>
          </table:table-cell>
          <table:table-cell office:value-type="float" office:value="8640000" calcext:value-type="float">
            <text:p>8640000</text:p>
          </table:table-cell>
          <table:table-cell table:formula="of:=[.B1018]/[.C1018]" office:value-type="float" office:value="0.00117708333333333" calcext:value-type="float">
            <text:p>0,00117708333333333000</text:p>
          </table:table-cell>
          <table:table-cell table:formula="of:=[.D1019]-[.D1018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table:formula="of:=[.B1018]+10" office:value-type="float" office:value="10180" calcext:value-type="float">
            <text:p>10180</text:p>
          </table:table-cell>
          <table:table-cell office:value-type="float" office:value="8640000" calcext:value-type="float">
            <text:p>8640000</text:p>
          </table:table-cell>
          <table:table-cell table:formula="of:=[.B1019]/[.C1019]" office:value-type="float" office:value="0.00117824074074074" calcext:value-type="float">
            <text:p>0,00117824074074074000</text:p>
          </table:table-cell>
          <table:table-cell table:formula="of:=[.D1020]-[.D1019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table:formula="of:=[.B1019]+10" office:value-type="float" office:value="10190" calcext:value-type="float">
            <text:p>10190</text:p>
          </table:table-cell>
          <table:table-cell office:value-type="float" office:value="8640000" calcext:value-type="float">
            <text:p>8640000</text:p>
          </table:table-cell>
          <table:table-cell table:formula="of:=[.B1020]/[.C1020]" office:value-type="float" office:value="0.00117939814814815" calcext:value-type="float">
            <text:p>0,00117939814814815000</text:p>
          </table:table-cell>
          <table:table-cell table:formula="of:=[.D1021]-[.D1020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table:formula="of:=[.B1020]+10" office:value-type="float" office:value="10200" calcext:value-type="float">
            <text:p>10200</text:p>
          </table:table-cell>
          <table:table-cell office:value-type="float" office:value="8640000" calcext:value-type="float">
            <text:p>8640000</text:p>
          </table:table-cell>
          <table:table-cell table:formula="of:=[.B1021]/[.C1021]" office:value-type="float" office:value="0.00118055555555556" calcext:value-type="float">
            <text:p>0,00118055555555556000</text:p>
          </table:table-cell>
          <table:table-cell table:formula="of:=[.D1022]-[.D1021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table:formula="of:=[.B1021]+10" office:value-type="float" office:value="10210" calcext:value-type="float">
            <text:p>10210</text:p>
          </table:table-cell>
          <table:table-cell office:value-type="float" office:value="8640000" calcext:value-type="float">
            <text:p>8640000</text:p>
          </table:table-cell>
          <table:table-cell table:formula="of:=[.B1022]/[.C1022]" office:value-type="float" office:value="0.00118171296296296" calcext:value-type="float">
            <text:p>0,00118171296296296000</text:p>
          </table:table-cell>
          <table:table-cell table:formula="of:=[.D1023]-[.D1022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table:formula="of:=[.B1022]+10" office:value-type="float" office:value="10220" calcext:value-type="float">
            <text:p>10220</text:p>
          </table:table-cell>
          <table:table-cell office:value-type="float" office:value="8640000" calcext:value-type="float">
            <text:p>8640000</text:p>
          </table:table-cell>
          <table:table-cell table:formula="of:=[.B1023]/[.C1023]" office:value-type="float" office:value="0.00118287037037037" calcext:value-type="float">
            <text:p>0,00118287037037037000</text:p>
          </table:table-cell>
          <table:table-cell table:formula="of:=[.D1024]-[.D1023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table:formula="of:=[.B1023]+10" office:value-type="float" office:value="10230" calcext:value-type="float">
            <text:p>10230</text:p>
          </table:table-cell>
          <table:table-cell office:value-type="float" office:value="8640000" calcext:value-type="float">
            <text:p>8640000</text:p>
          </table:table-cell>
          <table:table-cell table:formula="of:=[.B1024]/[.C1024]" office:value-type="float" office:value="0.00118402777777778" calcext:value-type="float">
            <text:p>0,00118402777777778000</text:p>
          </table:table-cell>
          <table:table-cell table:formula="of:=[.D1025]-[.D1024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formula="of:=[.B1024]+10" office:value-type="float" office:value="10240" calcext:value-type="float">
            <text:p>10240</text:p>
          </table:table-cell>
          <table:table-cell office:value-type="float" office:value="8640000" calcext:value-type="float">
            <text:p>8640000</text:p>
          </table:table-cell>
          <table:table-cell table:formula="of:=[.B1025]/[.C1025]" office:value-type="float" office:value="0.00118518518518519" calcext:value-type="float">
            <text:p>0,00118518518518519000</text:p>
          </table:table-cell>
          <table:table-cell table:formula="of:=[.D1026]-[.D1025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table:formula="of:=[.B1025]+10" office:value-type="float" office:value="10250" calcext:value-type="float">
            <text:p>10250</text:p>
          </table:table-cell>
          <table:table-cell office:value-type="float" office:value="8640000" calcext:value-type="float">
            <text:p>8640000</text:p>
          </table:table-cell>
          <table:table-cell table:formula="of:=[.B1026]/[.C1026]" office:value-type="float" office:value="0.00118634259259259" calcext:value-type="float">
            <text:p>0,00118634259259259000</text:p>
          </table:table-cell>
          <table:table-cell table:formula="of:=[.D1027]-[.D1026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table:formula="of:=[.B1026]+10" office:value-type="float" office:value="10260" calcext:value-type="float">
            <text:p>10260</text:p>
          </table:table-cell>
          <table:table-cell office:value-type="float" office:value="8640000" calcext:value-type="float">
            <text:p>8640000</text:p>
          </table:table-cell>
          <table:table-cell table:formula="of:=[.B1027]/[.C1027]" office:value-type="float" office:value="0.0011875" calcext:value-type="float">
            <text:p>0,00118750000000000000</text:p>
          </table:table-cell>
          <table:table-cell table:formula="of:=[.D1028]-[.D1027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table:formula="of:=[.B1027]+10" office:value-type="float" office:value="10270" calcext:value-type="float">
            <text:p>10270</text:p>
          </table:table-cell>
          <table:table-cell office:value-type="float" office:value="8640000" calcext:value-type="float">
            <text:p>8640000</text:p>
          </table:table-cell>
          <table:table-cell table:formula="of:=[.B1028]/[.C1028]" office:value-type="float" office:value="0.00118865740740741" calcext:value-type="float">
            <text:p>0,00118865740740741000</text:p>
          </table:table-cell>
          <table:table-cell table:formula="of:=[.D1029]-[.D1028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table:formula="of:=[.B1028]+10" office:value-type="float" office:value="10280" calcext:value-type="float">
            <text:p>10280</text:p>
          </table:table-cell>
          <table:table-cell office:value-type="float" office:value="8640000" calcext:value-type="float">
            <text:p>8640000</text:p>
          </table:table-cell>
          <table:table-cell table:formula="of:=[.B1029]/[.C1029]" office:value-type="float" office:value="0.00118981481481481" calcext:value-type="float">
            <text:p>0,00118981481481481000</text:p>
          </table:table-cell>
          <table:table-cell table:formula="of:=[.D1030]-[.D1029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table:formula="of:=[.B1029]+10" office:value-type="float" office:value="10290" calcext:value-type="float">
            <text:p>10290</text:p>
          </table:table-cell>
          <table:table-cell office:value-type="float" office:value="8640000" calcext:value-type="float">
            <text:p>8640000</text:p>
          </table:table-cell>
          <table:table-cell table:formula="of:=[.B1030]/[.C1030]" office:value-type="float" office:value="0.00119097222222222" calcext:value-type="float">
            <text:p>0,00119097222222222000</text:p>
          </table:table-cell>
          <table:table-cell table:formula="of:=[.D1031]-[.D1030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table:formula="of:=[.B1030]+10" office:value-type="float" office:value="10300" calcext:value-type="float">
            <text:p>10300</text:p>
          </table:table-cell>
          <table:table-cell office:value-type="float" office:value="8640000" calcext:value-type="float">
            <text:p>8640000</text:p>
          </table:table-cell>
          <table:table-cell table:formula="of:=[.B1031]/[.C1031]" office:value-type="float" office:value="0.00119212962962963" calcext:value-type="float">
            <text:p>0,00119212962962963000</text:p>
          </table:table-cell>
          <table:table-cell table:formula="of:=[.D1032]-[.D1031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table:formula="of:=[.B1031]+10" office:value-type="float" office:value="10310" calcext:value-type="float">
            <text:p>10310</text:p>
          </table:table-cell>
          <table:table-cell office:value-type="float" office:value="8640000" calcext:value-type="float">
            <text:p>8640000</text:p>
          </table:table-cell>
          <table:table-cell table:formula="of:=[.B1032]/[.C1032]" office:value-type="float" office:value="0.00119328703703704" calcext:value-type="float">
            <text:p>0,00119328703703704000</text:p>
          </table:table-cell>
          <table:table-cell table:formula="of:=[.D1033]-[.D1032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table:formula="of:=[.B1032]+10" office:value-type="float" office:value="10320" calcext:value-type="float">
            <text:p>10320</text:p>
          </table:table-cell>
          <table:table-cell office:value-type="float" office:value="8640000" calcext:value-type="float">
            <text:p>8640000</text:p>
          </table:table-cell>
          <table:table-cell table:formula="of:=[.B1033]/[.C1033]" office:value-type="float" office:value="0.00119444444444444" calcext:value-type="float">
            <text:p>0,00119444444444444000</text:p>
          </table:table-cell>
          <table:table-cell table:formula="of:=[.D1034]-[.D1033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table:formula="of:=[.B1033]+10" office:value-type="float" office:value="10330" calcext:value-type="float">
            <text:p>10330</text:p>
          </table:table-cell>
          <table:table-cell office:value-type="float" office:value="8640000" calcext:value-type="float">
            <text:p>8640000</text:p>
          </table:table-cell>
          <table:table-cell table:formula="of:=[.B1034]/[.C1034]" office:value-type="float" office:value="0.00119560185185185" calcext:value-type="float">
            <text:p>0,00119560185185185000</text:p>
          </table:table-cell>
          <table:table-cell table:formula="of:=[.D1035]-[.D1034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table:formula="of:=[.B1034]+10" office:value-type="float" office:value="10340" calcext:value-type="float">
            <text:p>10340</text:p>
          </table:table-cell>
          <table:table-cell office:value-type="float" office:value="8640000" calcext:value-type="float">
            <text:p>8640000</text:p>
          </table:table-cell>
          <table:table-cell table:formula="of:=[.B1035]/[.C1035]" office:value-type="float" office:value="0.00119675925925926" calcext:value-type="float">
            <text:p>0,00119675925925926000</text:p>
          </table:table-cell>
          <table:table-cell table:formula="of:=[.D1036]-[.D1035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table:formula="of:=[.B1035]+10" office:value-type="float" office:value="10350" calcext:value-type="float">
            <text:p>10350</text:p>
          </table:table-cell>
          <table:table-cell office:value-type="float" office:value="8640000" calcext:value-type="float">
            <text:p>8640000</text:p>
          </table:table-cell>
          <table:table-cell table:formula="of:=[.B1036]/[.C1036]" office:value-type="float" office:value="0.00119791666666667" calcext:value-type="float">
            <text:p>0,00119791666666667000</text:p>
          </table:table-cell>
          <table:table-cell table:formula="of:=[.D1037]-[.D1036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table:formula="of:=[.B1036]+10" office:value-type="float" office:value="10360" calcext:value-type="float">
            <text:p>10360</text:p>
          </table:table-cell>
          <table:table-cell office:value-type="float" office:value="8640000" calcext:value-type="float">
            <text:p>8640000</text:p>
          </table:table-cell>
          <table:table-cell table:formula="of:=[.B1037]/[.C1037]" office:value-type="float" office:value="0.00119907407407407" calcext:value-type="float">
            <text:p>0,00119907407407407000</text:p>
          </table:table-cell>
          <table:table-cell table:formula="of:=[.D1038]-[.D1037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table:formula="of:=[.B1037]+10" office:value-type="float" office:value="10370" calcext:value-type="float">
            <text:p>10370</text:p>
          </table:table-cell>
          <table:table-cell office:value-type="float" office:value="8640000" calcext:value-type="float">
            <text:p>8640000</text:p>
          </table:table-cell>
          <table:table-cell table:formula="of:=[.B1038]/[.C1038]" office:value-type="float" office:value="0.00120023148148148" calcext:value-type="float">
            <text:p>0,00120023148148148000</text:p>
          </table:table-cell>
          <table:table-cell table:formula="of:=[.D1039]-[.D1038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table:formula="of:=[.B1038]+10" office:value-type="float" office:value="10380" calcext:value-type="float">
            <text:p>10380</text:p>
          </table:table-cell>
          <table:table-cell office:value-type="float" office:value="8640000" calcext:value-type="float">
            <text:p>8640000</text:p>
          </table:table-cell>
          <table:table-cell table:formula="of:=[.B1039]/[.C1039]" office:value-type="float" office:value="0.00120138888888889" calcext:value-type="float">
            <text:p>0,00120138888888889000</text:p>
          </table:table-cell>
          <table:table-cell table:formula="of:=[.D1040]-[.D1039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table:formula="of:=[.B1039]+10" office:value-type="float" office:value="10390" calcext:value-type="float">
            <text:p>10390</text:p>
          </table:table-cell>
          <table:table-cell office:value-type="float" office:value="8640000" calcext:value-type="float">
            <text:p>8640000</text:p>
          </table:table-cell>
          <table:table-cell table:formula="of:=[.B1040]/[.C1040]" office:value-type="float" office:value="0.0012025462962963" calcext:value-type="float">
            <text:p>0,00120254629629630000</text:p>
          </table:table-cell>
          <table:table-cell table:formula="of:=[.D1041]-[.D1040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table:formula="of:=[.B1040]+10" office:value-type="float" office:value="10400" calcext:value-type="float">
            <text:p>10400</text:p>
          </table:table-cell>
          <table:table-cell office:value-type="float" office:value="8640000" calcext:value-type="float">
            <text:p>8640000</text:p>
          </table:table-cell>
          <table:table-cell table:formula="of:=[.B1041]/[.C1041]" office:value-type="float" office:value="0.0012037037037037" calcext:value-type="float">
            <text:p>0,00120370370370370000</text:p>
          </table:table-cell>
          <table:table-cell table:formula="of:=[.D1042]-[.D1041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table:formula="of:=[.B1041]+10" office:value-type="float" office:value="10410" calcext:value-type="float">
            <text:p>10410</text:p>
          </table:table-cell>
          <table:table-cell office:value-type="float" office:value="8640000" calcext:value-type="float">
            <text:p>8640000</text:p>
          </table:table-cell>
          <table:table-cell table:formula="of:=[.B1042]/[.C1042]" office:value-type="float" office:value="0.00120486111111111" calcext:value-type="float">
            <text:p>0,00120486111111111000</text:p>
          </table:table-cell>
          <table:table-cell table:formula="of:=[.D1043]-[.D1042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table:formula="of:=[.B1042]+10" office:value-type="float" office:value="10420" calcext:value-type="float">
            <text:p>10420</text:p>
          </table:table-cell>
          <table:table-cell office:value-type="float" office:value="8640000" calcext:value-type="float">
            <text:p>8640000</text:p>
          </table:table-cell>
          <table:table-cell table:formula="of:=[.B1043]/[.C1043]" office:value-type="float" office:value="0.00120601851851852" calcext:value-type="float">
            <text:p>0,00120601851851852000</text:p>
          </table:table-cell>
          <table:table-cell table:formula="of:=[.D1044]-[.D1043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table:formula="of:=[.B1043]+10" office:value-type="float" office:value="10430" calcext:value-type="float">
            <text:p>10430</text:p>
          </table:table-cell>
          <table:table-cell office:value-type="float" office:value="8640000" calcext:value-type="float">
            <text:p>8640000</text:p>
          </table:table-cell>
          <table:table-cell table:formula="of:=[.B1044]/[.C1044]" office:value-type="float" office:value="0.00120717592592593" calcext:value-type="float">
            <text:p>0,00120717592592593000</text:p>
          </table:table-cell>
          <table:table-cell table:formula="of:=[.D1045]-[.D1044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table:formula="of:=[.B1044]+10" office:value-type="float" office:value="10440" calcext:value-type="float">
            <text:p>10440</text:p>
          </table:table-cell>
          <table:table-cell office:value-type="float" office:value="8640000" calcext:value-type="float">
            <text:p>8640000</text:p>
          </table:table-cell>
          <table:table-cell table:formula="of:=[.B1045]/[.C1045]" office:value-type="float" office:value="0.00120833333333333" calcext:value-type="float">
            <text:p>0,00120833333333333000</text:p>
          </table:table-cell>
          <table:table-cell table:formula="of:=[.D1046]-[.D1045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table:formula="of:=[.B1045]+10" office:value-type="float" office:value="10450" calcext:value-type="float">
            <text:p>10450</text:p>
          </table:table-cell>
          <table:table-cell office:value-type="float" office:value="8640000" calcext:value-type="float">
            <text:p>8640000</text:p>
          </table:table-cell>
          <table:table-cell table:formula="of:=[.B1046]/[.C1046]" office:value-type="float" office:value="0.00120949074074074" calcext:value-type="float">
            <text:p>0,00120949074074074000</text:p>
          </table:table-cell>
          <table:table-cell table:formula="of:=[.D1047]-[.D1046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table:formula="of:=[.B1046]+10" office:value-type="float" office:value="10460" calcext:value-type="float">
            <text:p>10460</text:p>
          </table:table-cell>
          <table:table-cell office:value-type="float" office:value="8640000" calcext:value-type="float">
            <text:p>8640000</text:p>
          </table:table-cell>
          <table:table-cell table:formula="of:=[.B1047]/[.C1047]" office:value-type="float" office:value="0.00121064814814815" calcext:value-type="float">
            <text:p>0,00121064814814815000</text:p>
          </table:table-cell>
          <table:table-cell table:formula="of:=[.D1048]-[.D1047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table:formula="of:=[.B1047]+10" office:value-type="float" office:value="10470" calcext:value-type="float">
            <text:p>10470</text:p>
          </table:table-cell>
          <table:table-cell office:value-type="float" office:value="8640000" calcext:value-type="float">
            <text:p>8640000</text:p>
          </table:table-cell>
          <table:table-cell table:formula="of:=[.B1048]/[.C1048]" office:value-type="float" office:value="0.00121180555555556" calcext:value-type="float">
            <text:p>0,00121180555555556000</text:p>
          </table:table-cell>
          <table:table-cell table:formula="of:=[.D1049]-[.D1048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table:formula="of:=[.B1048]+10" office:value-type="float" office:value="10480" calcext:value-type="float">
            <text:p>10480</text:p>
          </table:table-cell>
          <table:table-cell office:value-type="float" office:value="8640000" calcext:value-type="float">
            <text:p>8640000</text:p>
          </table:table-cell>
          <table:table-cell table:formula="of:=[.B1049]/[.C1049]" office:value-type="float" office:value="0.00121296296296296" calcext:value-type="float">
            <text:p>0,00121296296296296000</text:p>
          </table:table-cell>
          <table:table-cell table:formula="of:=[.D1050]-[.D1049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table:formula="of:=[.B1049]+10" office:value-type="float" office:value="10490" calcext:value-type="float">
            <text:p>10490</text:p>
          </table:table-cell>
          <table:table-cell office:value-type="float" office:value="8640000" calcext:value-type="float">
            <text:p>8640000</text:p>
          </table:table-cell>
          <table:table-cell table:formula="of:=[.B1050]/[.C1050]" office:value-type="float" office:value="0.00121412037037037" calcext:value-type="float">
            <text:p>0,00121412037037037000</text:p>
          </table:table-cell>
          <table:table-cell table:formula="of:=[.D1051]-[.D1050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table:formula="of:=[.B1050]+10" office:value-type="float" office:value="10500" calcext:value-type="float">
            <text:p>10500</text:p>
          </table:table-cell>
          <table:table-cell office:value-type="float" office:value="8640000" calcext:value-type="float">
            <text:p>8640000</text:p>
          </table:table-cell>
          <table:table-cell table:formula="of:=[.B1051]/[.C1051]" office:value-type="float" office:value="0.00121527777777778" calcext:value-type="float">
            <text:p>0,00121527777777778000</text:p>
          </table:table-cell>
          <table:table-cell table:formula="of:=[.D1052]-[.D1051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table:formula="of:=[.B1051]+10" office:value-type="float" office:value="10510" calcext:value-type="float">
            <text:p>10510</text:p>
          </table:table-cell>
          <table:table-cell office:value-type="float" office:value="8640000" calcext:value-type="float">
            <text:p>8640000</text:p>
          </table:table-cell>
          <table:table-cell table:formula="of:=[.B1052]/[.C1052]" office:value-type="float" office:value="0.00121643518518519" calcext:value-type="float">
            <text:p>0,00121643518518519000</text:p>
          </table:table-cell>
          <table:table-cell table:formula="of:=[.D1053]-[.D1052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table:formula="of:=[.B1052]+10" office:value-type="float" office:value="10520" calcext:value-type="float">
            <text:p>10520</text:p>
          </table:table-cell>
          <table:table-cell office:value-type="float" office:value="8640000" calcext:value-type="float">
            <text:p>8640000</text:p>
          </table:table-cell>
          <table:table-cell table:formula="of:=[.B1053]/[.C1053]" office:value-type="float" office:value="0.00121759259259259" calcext:value-type="float">
            <text:p>0,00121759259259259000</text:p>
          </table:table-cell>
          <table:table-cell table:formula="of:=[.D1054]-[.D1053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table:formula="of:=[.B1053]+10" office:value-type="float" office:value="10530" calcext:value-type="float">
            <text:p>10530</text:p>
          </table:table-cell>
          <table:table-cell office:value-type="float" office:value="8640000" calcext:value-type="float">
            <text:p>8640000</text:p>
          </table:table-cell>
          <table:table-cell table:formula="of:=[.B1054]/[.C1054]" office:value-type="float" office:value="0.00121875" calcext:value-type="float">
            <text:p>0,00121875000000000000</text:p>
          </table:table-cell>
          <table:table-cell table:formula="of:=[.D1055]-[.D1054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table:formula="of:=[.B1054]+10" office:value-type="float" office:value="10540" calcext:value-type="float">
            <text:p>10540</text:p>
          </table:table-cell>
          <table:table-cell office:value-type="float" office:value="8640000" calcext:value-type="float">
            <text:p>8640000</text:p>
          </table:table-cell>
          <table:table-cell table:formula="of:=[.B1055]/[.C1055]" office:value-type="float" office:value="0.00121990740740741" calcext:value-type="float">
            <text:p>0,00121990740740741000</text:p>
          </table:table-cell>
          <table:table-cell table:formula="of:=[.D1056]-[.D1055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table:formula="of:=[.B1055]+10" office:value-type="float" office:value="10550" calcext:value-type="float">
            <text:p>10550</text:p>
          </table:table-cell>
          <table:table-cell office:value-type="float" office:value="8640000" calcext:value-type="float">
            <text:p>8640000</text:p>
          </table:table-cell>
          <table:table-cell table:formula="of:=[.B1056]/[.C1056]" office:value-type="float" office:value="0.00122106481481481" calcext:value-type="float">
            <text:p>0,00122106481481481000</text:p>
          </table:table-cell>
          <table:table-cell table:formula="of:=[.D1057]-[.D1056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table:formula="of:=[.B1056]+10" office:value-type="float" office:value="10560" calcext:value-type="float">
            <text:p>10560</text:p>
          </table:table-cell>
          <table:table-cell office:value-type="float" office:value="8640000" calcext:value-type="float">
            <text:p>8640000</text:p>
          </table:table-cell>
          <table:table-cell table:formula="of:=[.B1057]/[.C1057]" office:value-type="float" office:value="0.00122222222222222" calcext:value-type="float">
            <text:p>0,00122222222222222000</text:p>
          </table:table-cell>
          <table:table-cell table:formula="of:=[.D1058]-[.D1057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table:formula="of:=[.B1057]+10" office:value-type="float" office:value="10570" calcext:value-type="float">
            <text:p>10570</text:p>
          </table:table-cell>
          <table:table-cell office:value-type="float" office:value="8640000" calcext:value-type="float">
            <text:p>8640000</text:p>
          </table:table-cell>
          <table:table-cell table:formula="of:=[.B1058]/[.C1058]" office:value-type="float" office:value="0.00122337962962963" calcext:value-type="float">
            <text:p>0,00122337962962963000</text:p>
          </table:table-cell>
          <table:table-cell table:formula="of:=[.D1059]-[.D1058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table:formula="of:=[.B1058]+10" office:value-type="float" office:value="10580" calcext:value-type="float">
            <text:p>10580</text:p>
          </table:table-cell>
          <table:table-cell office:value-type="float" office:value="8640000" calcext:value-type="float">
            <text:p>8640000</text:p>
          </table:table-cell>
          <table:table-cell table:formula="of:=[.B1059]/[.C1059]" office:value-type="float" office:value="0.00122453703703704" calcext:value-type="float">
            <text:p>0,00122453703703704000</text:p>
          </table:table-cell>
          <table:table-cell table:formula="of:=[.D1060]-[.D1059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table:formula="of:=[.B1059]+10" office:value-type="float" office:value="10590" calcext:value-type="float">
            <text:p>10590</text:p>
          </table:table-cell>
          <table:table-cell office:value-type="float" office:value="8640000" calcext:value-type="float">
            <text:p>8640000</text:p>
          </table:table-cell>
          <table:table-cell table:formula="of:=[.B1060]/[.C1060]" office:value-type="float" office:value="0.00122569444444444" calcext:value-type="float">
            <text:p>0,00122569444444444000</text:p>
          </table:table-cell>
          <table:table-cell table:formula="of:=[.D1061]-[.D1060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table:formula="of:=[.B1060]+10" office:value-type="float" office:value="10600" calcext:value-type="float">
            <text:p>10600</text:p>
          </table:table-cell>
          <table:table-cell office:value-type="float" office:value="8640000" calcext:value-type="float">
            <text:p>8640000</text:p>
          </table:table-cell>
          <table:table-cell table:formula="of:=[.B1061]/[.C1061]" office:value-type="float" office:value="0.00122685185185185" calcext:value-type="float">
            <text:p>0,00122685185185185000</text:p>
          </table:table-cell>
          <table:table-cell table:formula="of:=[.D1062]-[.D1061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table:formula="of:=[.B1061]+10" office:value-type="float" office:value="10610" calcext:value-type="float">
            <text:p>10610</text:p>
          </table:table-cell>
          <table:table-cell office:value-type="float" office:value="8640000" calcext:value-type="float">
            <text:p>8640000</text:p>
          </table:table-cell>
          <table:table-cell table:formula="of:=[.B1062]/[.C1062]" office:value-type="float" office:value="0.00122800925925926" calcext:value-type="float">
            <text:p>0,00122800925925926000</text:p>
          </table:table-cell>
          <table:table-cell table:formula="of:=[.D1063]-[.D1062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table:formula="of:=[.B1062]+10" office:value-type="float" office:value="10620" calcext:value-type="float">
            <text:p>10620</text:p>
          </table:table-cell>
          <table:table-cell office:value-type="float" office:value="8640000" calcext:value-type="float">
            <text:p>8640000</text:p>
          </table:table-cell>
          <table:table-cell table:formula="of:=[.B1063]/[.C1063]" office:value-type="float" office:value="0.00122916666666667" calcext:value-type="float">
            <text:p>0,00122916666666667000</text:p>
          </table:table-cell>
          <table:table-cell table:formula="of:=[.D1064]-[.D1063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table:formula="of:=[.B1063]+10" office:value-type="float" office:value="10630" calcext:value-type="float">
            <text:p>10630</text:p>
          </table:table-cell>
          <table:table-cell office:value-type="float" office:value="8640000" calcext:value-type="float">
            <text:p>8640000</text:p>
          </table:table-cell>
          <table:table-cell table:formula="of:=[.B1064]/[.C1064]" office:value-type="float" office:value="0.00123032407407407" calcext:value-type="float">
            <text:p>0,00123032407407407000</text:p>
          </table:table-cell>
          <table:table-cell table:formula="of:=[.D1065]-[.D1064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table:formula="of:=[.B1064]+10" office:value-type="float" office:value="10640" calcext:value-type="float">
            <text:p>10640</text:p>
          </table:table-cell>
          <table:table-cell office:value-type="float" office:value="8640000" calcext:value-type="float">
            <text:p>8640000</text:p>
          </table:table-cell>
          <table:table-cell table:formula="of:=[.B1065]/[.C1065]" office:value-type="float" office:value="0.00123148148148148" calcext:value-type="float">
            <text:p>0,00123148148148148000</text:p>
          </table:table-cell>
          <table:table-cell table:formula="of:=[.D1066]-[.D1065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table:formula="of:=[.B1065]+10" office:value-type="float" office:value="10650" calcext:value-type="float">
            <text:p>10650</text:p>
          </table:table-cell>
          <table:table-cell office:value-type="float" office:value="8640000" calcext:value-type="float">
            <text:p>8640000</text:p>
          </table:table-cell>
          <table:table-cell table:formula="of:=[.B1066]/[.C1066]" office:value-type="float" office:value="0.00123263888888889" calcext:value-type="float">
            <text:p>0,00123263888888889000</text:p>
          </table:table-cell>
          <table:table-cell table:formula="of:=[.D1067]-[.D1066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table:formula="of:=[.B1066]+10" office:value-type="float" office:value="10660" calcext:value-type="float">
            <text:p>10660</text:p>
          </table:table-cell>
          <table:table-cell office:value-type="float" office:value="8640000" calcext:value-type="float">
            <text:p>8640000</text:p>
          </table:table-cell>
          <table:table-cell table:formula="of:=[.B1067]/[.C1067]" office:value-type="float" office:value="0.0012337962962963" calcext:value-type="float">
            <text:p>0,00123379629629630000</text:p>
          </table:table-cell>
          <table:table-cell table:formula="of:=[.D1068]-[.D1067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table:formula="of:=[.B1067]+10" office:value-type="float" office:value="10670" calcext:value-type="float">
            <text:p>10670</text:p>
          </table:table-cell>
          <table:table-cell office:value-type="float" office:value="8640000" calcext:value-type="float">
            <text:p>8640000</text:p>
          </table:table-cell>
          <table:table-cell table:formula="of:=[.B1068]/[.C1068]" office:value-type="float" office:value="0.0012349537037037" calcext:value-type="float">
            <text:p>0,00123495370370370000</text:p>
          </table:table-cell>
          <table:table-cell table:formula="of:=[.D1069]-[.D1068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table:formula="of:=[.B1068]+10" office:value-type="float" office:value="10680" calcext:value-type="float">
            <text:p>10680</text:p>
          </table:table-cell>
          <table:table-cell office:value-type="float" office:value="8640000" calcext:value-type="float">
            <text:p>8640000</text:p>
          </table:table-cell>
          <table:table-cell table:formula="of:=[.B1069]/[.C1069]" office:value-type="float" office:value="0.00123611111111111" calcext:value-type="float">
            <text:p>0,00123611111111111000</text:p>
          </table:table-cell>
          <table:table-cell table:formula="of:=[.D1070]-[.D1069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table:formula="of:=[.B1069]+10" office:value-type="float" office:value="10690" calcext:value-type="float">
            <text:p>10690</text:p>
          </table:table-cell>
          <table:table-cell office:value-type="float" office:value="8640000" calcext:value-type="float">
            <text:p>8640000</text:p>
          </table:table-cell>
          <table:table-cell table:formula="of:=[.B1070]/[.C1070]" office:value-type="float" office:value="0.00123726851851852" calcext:value-type="float">
            <text:p>0,00123726851851852000</text:p>
          </table:table-cell>
          <table:table-cell table:formula="of:=[.D1071]-[.D1070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table:formula="of:=[.B1070]+10" office:value-type="float" office:value="10700" calcext:value-type="float">
            <text:p>10700</text:p>
          </table:table-cell>
          <table:table-cell office:value-type="float" office:value="8640000" calcext:value-type="float">
            <text:p>8640000</text:p>
          </table:table-cell>
          <table:table-cell table:formula="of:=[.B1071]/[.C1071]" office:value-type="float" office:value="0.00123842592592593" calcext:value-type="float">
            <text:p>0,00123842592592593000</text:p>
          </table:table-cell>
          <table:table-cell table:formula="of:=[.D1072]-[.D1071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table:formula="of:=[.B1071]+10" office:value-type="float" office:value="10710" calcext:value-type="float">
            <text:p>10710</text:p>
          </table:table-cell>
          <table:table-cell office:value-type="float" office:value="8640000" calcext:value-type="float">
            <text:p>8640000</text:p>
          </table:table-cell>
          <table:table-cell table:formula="of:=[.B1072]/[.C1072]" office:value-type="float" office:value="0.00123958333333333" calcext:value-type="float">
            <text:p>0,00123958333333333000</text:p>
          </table:table-cell>
          <table:table-cell table:formula="of:=[.D1073]-[.D1072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table:formula="of:=[.B1072]+10" office:value-type="float" office:value="10720" calcext:value-type="float">
            <text:p>10720</text:p>
          </table:table-cell>
          <table:table-cell office:value-type="float" office:value="8640000" calcext:value-type="float">
            <text:p>8640000</text:p>
          </table:table-cell>
          <table:table-cell table:formula="of:=[.B1073]/[.C1073]" office:value-type="float" office:value="0.00124074074074074" calcext:value-type="float">
            <text:p>0,00124074074074074000</text:p>
          </table:table-cell>
          <table:table-cell table:formula="of:=[.D1074]-[.D1073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table:formula="of:=[.B1073]+10" office:value-type="float" office:value="10730" calcext:value-type="float">
            <text:p>10730</text:p>
          </table:table-cell>
          <table:table-cell office:value-type="float" office:value="8640000" calcext:value-type="float">
            <text:p>8640000</text:p>
          </table:table-cell>
          <table:table-cell table:formula="of:=[.B1074]/[.C1074]" office:value-type="float" office:value="0.00124189814814815" calcext:value-type="float">
            <text:p>0,00124189814814815000</text:p>
          </table:table-cell>
          <table:table-cell table:formula="of:=[.D1075]-[.D1074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table:formula="of:=[.B1074]+10" office:value-type="float" office:value="10740" calcext:value-type="float">
            <text:p>10740</text:p>
          </table:table-cell>
          <table:table-cell office:value-type="float" office:value="8640000" calcext:value-type="float">
            <text:p>8640000</text:p>
          </table:table-cell>
          <table:table-cell table:formula="of:=[.B1075]/[.C1075]" office:value-type="float" office:value="0.00124305555555556" calcext:value-type="float">
            <text:p>0,00124305555555556000</text:p>
          </table:table-cell>
          <table:table-cell table:formula="of:=[.D1076]-[.D1075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table:formula="of:=[.B1075]+10" office:value-type="float" office:value="10750" calcext:value-type="float">
            <text:p>10750</text:p>
          </table:table-cell>
          <table:table-cell office:value-type="float" office:value="8640000" calcext:value-type="float">
            <text:p>8640000</text:p>
          </table:table-cell>
          <table:table-cell table:formula="of:=[.B1076]/[.C1076]" office:value-type="float" office:value="0.00124421296296296" calcext:value-type="float">
            <text:p>0,00124421296296296000</text:p>
          </table:table-cell>
          <table:table-cell table:formula="of:=[.D1077]-[.D1076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table:formula="of:=[.B1076]+10" office:value-type="float" office:value="10760" calcext:value-type="float">
            <text:p>10760</text:p>
          </table:table-cell>
          <table:table-cell office:value-type="float" office:value="8640000" calcext:value-type="float">
            <text:p>8640000</text:p>
          </table:table-cell>
          <table:table-cell table:formula="of:=[.B1077]/[.C1077]" office:value-type="float" office:value="0.00124537037037037" calcext:value-type="float">
            <text:p>0,00124537037037037000</text:p>
          </table:table-cell>
          <table:table-cell table:formula="of:=[.D1078]-[.D1077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table:formula="of:=[.B1077]+10" office:value-type="float" office:value="10770" calcext:value-type="float">
            <text:p>10770</text:p>
          </table:table-cell>
          <table:table-cell office:value-type="float" office:value="8640000" calcext:value-type="float">
            <text:p>8640000</text:p>
          </table:table-cell>
          <table:table-cell table:formula="of:=[.B1078]/[.C1078]" office:value-type="float" office:value="0.00124652777777778" calcext:value-type="float">
            <text:p>0,00124652777777778000</text:p>
          </table:table-cell>
          <table:table-cell table:formula="of:=[.D1079]-[.D1078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table:formula="of:=[.B1078]+10" office:value-type="float" office:value="10780" calcext:value-type="float">
            <text:p>10780</text:p>
          </table:table-cell>
          <table:table-cell office:value-type="float" office:value="8640000" calcext:value-type="float">
            <text:p>8640000</text:p>
          </table:table-cell>
          <table:table-cell table:formula="of:=[.B1079]/[.C1079]" office:value-type="float" office:value="0.00124768518518519" calcext:value-type="float">
            <text:p>0,00124768518518519000</text:p>
          </table:table-cell>
          <table:table-cell table:formula="of:=[.D1080]-[.D1079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table:formula="of:=[.B1079]+10" office:value-type="float" office:value="10790" calcext:value-type="float">
            <text:p>10790</text:p>
          </table:table-cell>
          <table:table-cell office:value-type="float" office:value="8640000" calcext:value-type="float">
            <text:p>8640000</text:p>
          </table:table-cell>
          <table:table-cell table:formula="of:=[.B1080]/[.C1080]" office:value-type="float" office:value="0.00124884259259259" calcext:value-type="float">
            <text:p>0,00124884259259259000</text:p>
          </table:table-cell>
          <table:table-cell table:formula="of:=[.D1081]-[.D1080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table:formula="of:=[.B1080]+10" office:value-type="float" office:value="10800" calcext:value-type="float">
            <text:p>10800</text:p>
          </table:table-cell>
          <table:table-cell office:value-type="float" office:value="8640000" calcext:value-type="float">
            <text:p>8640000</text:p>
          </table:table-cell>
          <table:table-cell table:formula="of:=[.B1081]/[.C1081]" office:value-type="float" office:value="0.00125" calcext:value-type="float">
            <text:p>0,00125000000000000000</text:p>
          </table:table-cell>
          <table:table-cell table:formula="of:=[.D1082]-[.D1081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table:formula="of:=[.B1081]+10" office:value-type="float" office:value="10810" calcext:value-type="float">
            <text:p>10810</text:p>
          </table:table-cell>
          <table:table-cell office:value-type="float" office:value="8640000" calcext:value-type="float">
            <text:p>8640000</text:p>
          </table:table-cell>
          <table:table-cell table:formula="of:=[.B1082]/[.C1082]" office:value-type="float" office:value="0.00125115740740741" calcext:value-type="float">
            <text:p>0,00125115740740741000</text:p>
          </table:table-cell>
          <table:table-cell table:formula="of:=[.D1083]-[.D1082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table:formula="of:=[.B1082]+10" office:value-type="float" office:value="10820" calcext:value-type="float">
            <text:p>10820</text:p>
          </table:table-cell>
          <table:table-cell office:value-type="float" office:value="8640000" calcext:value-type="float">
            <text:p>8640000</text:p>
          </table:table-cell>
          <table:table-cell table:formula="of:=[.B1083]/[.C1083]" office:value-type="float" office:value="0.00125231481481481" calcext:value-type="float">
            <text:p>0,00125231481481481000</text:p>
          </table:table-cell>
          <table:table-cell table:formula="of:=[.D1084]-[.D1083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table:formula="of:=[.B1083]+10" office:value-type="float" office:value="10830" calcext:value-type="float">
            <text:p>10830</text:p>
          </table:table-cell>
          <table:table-cell office:value-type="float" office:value="8640000" calcext:value-type="float">
            <text:p>8640000</text:p>
          </table:table-cell>
          <table:table-cell table:formula="of:=[.B1084]/[.C1084]" office:value-type="float" office:value="0.00125347222222222" calcext:value-type="float">
            <text:p>0,00125347222222222000</text:p>
          </table:table-cell>
          <table:table-cell table:formula="of:=[.D1085]-[.D1084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table:formula="of:=[.B1084]+10" office:value-type="float" office:value="10840" calcext:value-type="float">
            <text:p>10840</text:p>
          </table:table-cell>
          <table:table-cell office:value-type="float" office:value="8640000" calcext:value-type="float">
            <text:p>8640000</text:p>
          </table:table-cell>
          <table:table-cell table:formula="of:=[.B1085]/[.C1085]" office:value-type="float" office:value="0.00125462962962963" calcext:value-type="float">
            <text:p>0,00125462962962963000</text:p>
          </table:table-cell>
          <table:table-cell table:formula="of:=[.D1086]-[.D1085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table:formula="of:=[.B1085]+10" office:value-type="float" office:value="10850" calcext:value-type="float">
            <text:p>10850</text:p>
          </table:table-cell>
          <table:table-cell office:value-type="float" office:value="8640000" calcext:value-type="float">
            <text:p>8640000</text:p>
          </table:table-cell>
          <table:table-cell table:formula="of:=[.B1086]/[.C1086]" office:value-type="float" office:value="0.00125578703703704" calcext:value-type="float">
            <text:p>0,00125578703703704000</text:p>
          </table:table-cell>
          <table:table-cell table:formula="of:=[.D1087]-[.D1086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table:formula="of:=[.B1086]+10" office:value-type="float" office:value="10860" calcext:value-type="float">
            <text:p>10860</text:p>
          </table:table-cell>
          <table:table-cell office:value-type="float" office:value="8640000" calcext:value-type="float">
            <text:p>8640000</text:p>
          </table:table-cell>
          <table:table-cell table:formula="of:=[.B1087]/[.C1087]" office:value-type="float" office:value="0.00125694444444444" calcext:value-type="float">
            <text:p>0,00125694444444444000</text:p>
          </table:table-cell>
          <table:table-cell table:formula="of:=[.D1088]-[.D1087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table:formula="of:=[.B1087]+10" office:value-type="float" office:value="10870" calcext:value-type="float">
            <text:p>10870</text:p>
          </table:table-cell>
          <table:table-cell office:value-type="float" office:value="8640000" calcext:value-type="float">
            <text:p>8640000</text:p>
          </table:table-cell>
          <table:table-cell table:formula="of:=[.B1088]/[.C1088]" office:value-type="float" office:value="0.00125810185185185" calcext:value-type="float">
            <text:p>0,00125810185185185000</text:p>
          </table:table-cell>
          <table:table-cell table:formula="of:=[.D1089]-[.D1088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table:formula="of:=[.B1088]+10" office:value-type="float" office:value="10880" calcext:value-type="float">
            <text:p>10880</text:p>
          </table:table-cell>
          <table:table-cell office:value-type="float" office:value="8640000" calcext:value-type="float">
            <text:p>8640000</text:p>
          </table:table-cell>
          <table:table-cell table:formula="of:=[.B1089]/[.C1089]" office:value-type="float" office:value="0.00125925925925926" calcext:value-type="float">
            <text:p>0,00125925925925926000</text:p>
          </table:table-cell>
          <table:table-cell table:formula="of:=[.D1090]-[.D1089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table:formula="of:=[.B1089]+10" office:value-type="float" office:value="10890" calcext:value-type="float">
            <text:p>10890</text:p>
          </table:table-cell>
          <table:table-cell office:value-type="float" office:value="8640000" calcext:value-type="float">
            <text:p>8640000</text:p>
          </table:table-cell>
          <table:table-cell table:formula="of:=[.B1090]/[.C1090]" office:value-type="float" office:value="0.00126041666666667" calcext:value-type="float">
            <text:p>0,00126041666666667000</text:p>
          </table:table-cell>
          <table:table-cell table:formula="of:=[.D1091]-[.D1090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table:formula="of:=[.B1090]+10" office:value-type="float" office:value="10900" calcext:value-type="float">
            <text:p>10900</text:p>
          </table:table-cell>
          <table:table-cell office:value-type="float" office:value="8640000" calcext:value-type="float">
            <text:p>8640000</text:p>
          </table:table-cell>
          <table:table-cell table:formula="of:=[.B1091]/[.C1091]" office:value-type="float" office:value="0.00126157407407407" calcext:value-type="float">
            <text:p>0,00126157407407407000</text:p>
          </table:table-cell>
          <table:table-cell table:formula="of:=[.D1092]-[.D1091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table:formula="of:=[.B1091]+10" office:value-type="float" office:value="10910" calcext:value-type="float">
            <text:p>10910</text:p>
          </table:table-cell>
          <table:table-cell office:value-type="float" office:value="8640000" calcext:value-type="float">
            <text:p>8640000</text:p>
          </table:table-cell>
          <table:table-cell table:formula="of:=[.B1092]/[.C1092]" office:value-type="float" office:value="0.00126273148148148" calcext:value-type="float">
            <text:p>0,00126273148148148000</text:p>
          </table:table-cell>
          <table:table-cell table:formula="of:=[.D1093]-[.D1092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table:formula="of:=[.B1092]+10" office:value-type="float" office:value="10920" calcext:value-type="float">
            <text:p>10920</text:p>
          </table:table-cell>
          <table:table-cell office:value-type="float" office:value="8640000" calcext:value-type="float">
            <text:p>8640000</text:p>
          </table:table-cell>
          <table:table-cell table:formula="of:=[.B1093]/[.C1093]" office:value-type="float" office:value="0.00126388888888889" calcext:value-type="float">
            <text:p>0,00126388888888889000</text:p>
          </table:table-cell>
          <table:table-cell table:formula="of:=[.D1094]-[.D1093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table:formula="of:=[.B1093]+10" office:value-type="float" office:value="10930" calcext:value-type="float">
            <text:p>10930</text:p>
          </table:table-cell>
          <table:table-cell office:value-type="float" office:value="8640000" calcext:value-type="float">
            <text:p>8640000</text:p>
          </table:table-cell>
          <table:table-cell table:formula="of:=[.B1094]/[.C1094]" office:value-type="float" office:value="0.0012650462962963" calcext:value-type="float">
            <text:p>0,00126504629629630000</text:p>
          </table:table-cell>
          <table:table-cell table:formula="of:=[.D1095]-[.D1094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table:formula="of:=[.B1094]+10" office:value-type="float" office:value="10940" calcext:value-type="float">
            <text:p>10940</text:p>
          </table:table-cell>
          <table:table-cell office:value-type="float" office:value="8640000" calcext:value-type="float">
            <text:p>8640000</text:p>
          </table:table-cell>
          <table:table-cell table:formula="of:=[.B1095]/[.C1095]" office:value-type="float" office:value="0.0012662037037037" calcext:value-type="float">
            <text:p>0,00126620370370370000</text:p>
          </table:table-cell>
          <table:table-cell table:formula="of:=[.D1096]-[.D1095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table:formula="of:=[.B1095]+10" office:value-type="float" office:value="10950" calcext:value-type="float">
            <text:p>10950</text:p>
          </table:table-cell>
          <table:table-cell office:value-type="float" office:value="8640000" calcext:value-type="float">
            <text:p>8640000</text:p>
          </table:table-cell>
          <table:table-cell table:formula="of:=[.B1096]/[.C1096]" office:value-type="float" office:value="0.00126736111111111" calcext:value-type="float">
            <text:p>0,00126736111111111000</text:p>
          </table:table-cell>
          <table:table-cell table:formula="of:=[.D1097]-[.D1096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table:formula="of:=[.B1096]+10" office:value-type="float" office:value="10960" calcext:value-type="float">
            <text:p>10960</text:p>
          </table:table-cell>
          <table:table-cell office:value-type="float" office:value="8640000" calcext:value-type="float">
            <text:p>8640000</text:p>
          </table:table-cell>
          <table:table-cell table:formula="of:=[.B1097]/[.C1097]" office:value-type="float" office:value="0.00126851851851852" calcext:value-type="float">
            <text:p>0,00126851851851852000</text:p>
          </table:table-cell>
          <table:table-cell table:formula="of:=[.D1098]-[.D1097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table:formula="of:=[.B1097]+10" office:value-type="float" office:value="10970" calcext:value-type="float">
            <text:p>10970</text:p>
          </table:table-cell>
          <table:table-cell office:value-type="float" office:value="8640000" calcext:value-type="float">
            <text:p>8640000</text:p>
          </table:table-cell>
          <table:table-cell table:formula="of:=[.B1098]/[.C1098]" office:value-type="float" office:value="0.00126967592592593" calcext:value-type="float">
            <text:p>0,00126967592592593000</text:p>
          </table:table-cell>
          <table:table-cell table:formula="of:=[.D1099]-[.D1098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table:formula="of:=[.B1098]+10" office:value-type="float" office:value="10980" calcext:value-type="float">
            <text:p>10980</text:p>
          </table:table-cell>
          <table:table-cell office:value-type="float" office:value="8640000" calcext:value-type="float">
            <text:p>8640000</text:p>
          </table:table-cell>
          <table:table-cell table:formula="of:=[.B1099]/[.C1099]" office:value-type="float" office:value="0.00127083333333333" calcext:value-type="float">
            <text:p>0,00127083333333333000</text:p>
          </table:table-cell>
          <table:table-cell table:formula="of:=[.D1100]-[.D1099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table:formula="of:=[.B1099]+10" office:value-type="float" office:value="10990" calcext:value-type="float">
            <text:p>10990</text:p>
          </table:table-cell>
          <table:table-cell office:value-type="float" office:value="8640000" calcext:value-type="float">
            <text:p>8640000</text:p>
          </table:table-cell>
          <table:table-cell table:formula="of:=[.B1100]/[.C1100]" office:value-type="float" office:value="0.00127199074074074" calcext:value-type="float">
            <text:p>0,00127199074074074000</text:p>
          </table:table-cell>
          <table:table-cell table:formula="of:=[.D1101]-[.D1100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table:formula="of:=[.B1100]+10" office:value-type="float" office:value="11000" calcext:value-type="float">
            <text:p>11000</text:p>
          </table:table-cell>
          <table:table-cell office:value-type="float" office:value="8640000" calcext:value-type="float">
            <text:p>8640000</text:p>
          </table:table-cell>
          <table:table-cell table:formula="of:=[.B1101]/[.C1101]" office:value-type="float" office:value="0.00127314814814815" calcext:value-type="float">
            <text:p>0,00127314814814815000</text:p>
          </table:table-cell>
          <table:table-cell table:formula="of:=[.D1102]-[.D1101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table:formula="of:=[.B1101]+10" office:value-type="float" office:value="11010" calcext:value-type="float">
            <text:p>11010</text:p>
          </table:table-cell>
          <table:table-cell office:value-type="float" office:value="8640000" calcext:value-type="float">
            <text:p>8640000</text:p>
          </table:table-cell>
          <table:table-cell table:formula="of:=[.B1102]/[.C1102]" office:value-type="float" office:value="0.00127430555555556" calcext:value-type="float">
            <text:p>0,00127430555555556000</text:p>
          </table:table-cell>
          <table:table-cell table:formula="of:=[.D1103]-[.D1102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table:formula="of:=[.B1102]+10" office:value-type="float" office:value="11020" calcext:value-type="float">
            <text:p>11020</text:p>
          </table:table-cell>
          <table:table-cell office:value-type="float" office:value="8640000" calcext:value-type="float">
            <text:p>8640000</text:p>
          </table:table-cell>
          <table:table-cell table:formula="of:=[.B1103]/[.C1103]" office:value-type="float" office:value="0.00127546296296296" calcext:value-type="float">
            <text:p>0,00127546296296296000</text:p>
          </table:table-cell>
          <table:table-cell table:formula="of:=[.D1104]-[.D1103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table:formula="of:=[.B1103]+10" office:value-type="float" office:value="11030" calcext:value-type="float">
            <text:p>11030</text:p>
          </table:table-cell>
          <table:table-cell office:value-type="float" office:value="8640000" calcext:value-type="float">
            <text:p>8640000</text:p>
          </table:table-cell>
          <table:table-cell table:formula="of:=[.B1104]/[.C1104]" office:value-type="float" office:value="0.00127662037037037" calcext:value-type="float">
            <text:p>0,00127662037037037000</text:p>
          </table:table-cell>
          <table:table-cell table:formula="of:=[.D1105]-[.D1104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table:formula="of:=[.B1104]+10" office:value-type="float" office:value="11040" calcext:value-type="float">
            <text:p>11040</text:p>
          </table:table-cell>
          <table:table-cell office:value-type="float" office:value="8640000" calcext:value-type="float">
            <text:p>8640000</text:p>
          </table:table-cell>
          <table:table-cell table:formula="of:=[.B1105]/[.C1105]" office:value-type="float" office:value="0.00127777777777778" calcext:value-type="float">
            <text:p>0,00127777777777778000</text:p>
          </table:table-cell>
          <table:table-cell table:formula="of:=[.D1106]-[.D1105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table:formula="of:=[.B1105]+10" office:value-type="float" office:value="11050" calcext:value-type="float">
            <text:p>11050</text:p>
          </table:table-cell>
          <table:table-cell office:value-type="float" office:value="8640000" calcext:value-type="float">
            <text:p>8640000</text:p>
          </table:table-cell>
          <table:table-cell table:formula="of:=[.B1106]/[.C1106]" office:value-type="float" office:value="0.00127893518518519" calcext:value-type="float">
            <text:p>0,00127893518518519000</text:p>
          </table:table-cell>
          <table:table-cell table:formula="of:=[.D1107]-[.D1106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table:formula="of:=[.B1106]+10" office:value-type="float" office:value="11060" calcext:value-type="float">
            <text:p>11060</text:p>
          </table:table-cell>
          <table:table-cell office:value-type="float" office:value="8640000" calcext:value-type="float">
            <text:p>8640000</text:p>
          </table:table-cell>
          <table:table-cell table:formula="of:=[.B1107]/[.C1107]" office:value-type="float" office:value="0.00128009259259259" calcext:value-type="float">
            <text:p>0,00128009259259259000</text:p>
          </table:table-cell>
          <table:table-cell table:formula="of:=[.D1108]-[.D1107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table:formula="of:=[.B1107]+10" office:value-type="float" office:value="11070" calcext:value-type="float">
            <text:p>11070</text:p>
          </table:table-cell>
          <table:table-cell office:value-type="float" office:value="8640000" calcext:value-type="float">
            <text:p>8640000</text:p>
          </table:table-cell>
          <table:table-cell table:formula="of:=[.B1108]/[.C1108]" office:value-type="float" office:value="0.00128125" calcext:value-type="float">
            <text:p>0,00128125000000000000</text:p>
          </table:table-cell>
          <table:table-cell table:formula="of:=[.D1109]-[.D1108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table:formula="of:=[.B1108]+10" office:value-type="float" office:value="11080" calcext:value-type="float">
            <text:p>11080</text:p>
          </table:table-cell>
          <table:table-cell office:value-type="float" office:value="8640000" calcext:value-type="float">
            <text:p>8640000</text:p>
          </table:table-cell>
          <table:table-cell table:formula="of:=[.B1109]/[.C1109]" office:value-type="float" office:value="0.00128240740740741" calcext:value-type="float">
            <text:p>0,00128240740740741000</text:p>
          </table:table-cell>
          <table:table-cell table:formula="of:=[.D1110]-[.D1109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table:formula="of:=[.B1109]+10" office:value-type="float" office:value="11090" calcext:value-type="float">
            <text:p>11090</text:p>
          </table:table-cell>
          <table:table-cell office:value-type="float" office:value="8640000" calcext:value-type="float">
            <text:p>8640000</text:p>
          </table:table-cell>
          <table:table-cell table:formula="of:=[.B1110]/[.C1110]" office:value-type="float" office:value="0.00128356481481481" calcext:value-type="float">
            <text:p>0,00128356481481481000</text:p>
          </table:table-cell>
          <table:table-cell table:formula="of:=[.D1111]-[.D1110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table:formula="of:=[.B1110]+10" office:value-type="float" office:value="11100" calcext:value-type="float">
            <text:p>11100</text:p>
          </table:table-cell>
          <table:table-cell office:value-type="float" office:value="8640000" calcext:value-type="float">
            <text:p>8640000</text:p>
          </table:table-cell>
          <table:table-cell table:formula="of:=[.B1111]/[.C1111]" office:value-type="float" office:value="0.00128472222222222" calcext:value-type="float">
            <text:p>0,00128472222222222000</text:p>
          </table:table-cell>
          <table:table-cell table:formula="of:=[.D1112]-[.D1111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table:formula="of:=[.B1111]+10" office:value-type="float" office:value="11110" calcext:value-type="float">
            <text:p>11110</text:p>
          </table:table-cell>
          <table:table-cell office:value-type="float" office:value="8640000" calcext:value-type="float">
            <text:p>8640000</text:p>
          </table:table-cell>
          <table:table-cell table:formula="of:=[.B1112]/[.C1112]" office:value-type="float" office:value="0.00128587962962963" calcext:value-type="float">
            <text:p>0,00128587962962963000</text:p>
          </table:table-cell>
          <table:table-cell table:formula="of:=[.D1113]-[.D1112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table:formula="of:=[.B1112]+10" office:value-type="float" office:value="11120" calcext:value-type="float">
            <text:p>11120</text:p>
          </table:table-cell>
          <table:table-cell office:value-type="float" office:value="8640000" calcext:value-type="float">
            <text:p>8640000</text:p>
          </table:table-cell>
          <table:table-cell table:formula="of:=[.B1113]/[.C1113]" office:value-type="float" office:value="0.00128703703703704" calcext:value-type="float">
            <text:p>0,00128703703703704000</text:p>
          </table:table-cell>
          <table:table-cell table:formula="of:=[.D1114]-[.D1113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table:formula="of:=[.B1113]+10" office:value-type="float" office:value="11130" calcext:value-type="float">
            <text:p>11130</text:p>
          </table:table-cell>
          <table:table-cell office:value-type="float" office:value="8640000" calcext:value-type="float">
            <text:p>8640000</text:p>
          </table:table-cell>
          <table:table-cell table:formula="of:=[.B1114]/[.C1114]" office:value-type="float" office:value="0.00128819444444444" calcext:value-type="float">
            <text:p>0,00128819444444444000</text:p>
          </table:table-cell>
          <table:table-cell table:formula="of:=[.D1115]-[.D1114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table:formula="of:=[.B1114]+10" office:value-type="float" office:value="11140" calcext:value-type="float">
            <text:p>11140</text:p>
          </table:table-cell>
          <table:table-cell office:value-type="float" office:value="8640000" calcext:value-type="float">
            <text:p>8640000</text:p>
          </table:table-cell>
          <table:table-cell table:formula="of:=[.B1115]/[.C1115]" office:value-type="float" office:value="0.00128935185185185" calcext:value-type="float">
            <text:p>0,00128935185185185000</text:p>
          </table:table-cell>
          <table:table-cell table:formula="of:=[.D1116]-[.D1115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table:formula="of:=[.B1115]+10" office:value-type="float" office:value="11150" calcext:value-type="float">
            <text:p>11150</text:p>
          </table:table-cell>
          <table:table-cell office:value-type="float" office:value="8640000" calcext:value-type="float">
            <text:p>8640000</text:p>
          </table:table-cell>
          <table:table-cell table:formula="of:=[.B1116]/[.C1116]" office:value-type="float" office:value="0.00129050925925926" calcext:value-type="float">
            <text:p>0,00129050925925926000</text:p>
          </table:table-cell>
          <table:table-cell table:formula="of:=[.D1117]-[.D1116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table:formula="of:=[.B1116]+10" office:value-type="float" office:value="11160" calcext:value-type="float">
            <text:p>11160</text:p>
          </table:table-cell>
          <table:table-cell office:value-type="float" office:value="8640000" calcext:value-type="float">
            <text:p>8640000</text:p>
          </table:table-cell>
          <table:table-cell table:formula="of:=[.B1117]/[.C1117]" office:value-type="float" office:value="0.00129166666666667" calcext:value-type="float">
            <text:p>0,00129166666666667000</text:p>
          </table:table-cell>
          <table:table-cell table:formula="of:=[.D1118]-[.D1117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table:formula="of:=[.B1117]+10" office:value-type="float" office:value="11170" calcext:value-type="float">
            <text:p>11170</text:p>
          </table:table-cell>
          <table:table-cell office:value-type="float" office:value="8640000" calcext:value-type="float">
            <text:p>8640000</text:p>
          </table:table-cell>
          <table:table-cell table:formula="of:=[.B1118]/[.C1118]" office:value-type="float" office:value="0.00129282407407407" calcext:value-type="float">
            <text:p>0,00129282407407407000</text:p>
          </table:table-cell>
          <table:table-cell table:formula="of:=[.D1119]-[.D1118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table:formula="of:=[.B1118]+10" office:value-type="float" office:value="11180" calcext:value-type="float">
            <text:p>11180</text:p>
          </table:table-cell>
          <table:table-cell office:value-type="float" office:value="8640000" calcext:value-type="float">
            <text:p>8640000</text:p>
          </table:table-cell>
          <table:table-cell table:formula="of:=[.B1119]/[.C1119]" office:value-type="float" office:value="0.00129398148148148" calcext:value-type="float">
            <text:p>0,00129398148148148000</text:p>
          </table:table-cell>
          <table:table-cell table:formula="of:=[.D1120]-[.D1119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table:formula="of:=[.B1119]+10" office:value-type="float" office:value="11190" calcext:value-type="float">
            <text:p>11190</text:p>
          </table:table-cell>
          <table:table-cell office:value-type="float" office:value="8640000" calcext:value-type="float">
            <text:p>8640000</text:p>
          </table:table-cell>
          <table:table-cell table:formula="of:=[.B1120]/[.C1120]" office:value-type="float" office:value="0.00129513888888889" calcext:value-type="float">
            <text:p>0,00129513888888889000</text:p>
          </table:table-cell>
          <table:table-cell table:formula="of:=[.D1121]-[.D1120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table:formula="of:=[.B1120]+10" office:value-type="float" office:value="11200" calcext:value-type="float">
            <text:p>11200</text:p>
          </table:table-cell>
          <table:table-cell office:value-type="float" office:value="8640000" calcext:value-type="float">
            <text:p>8640000</text:p>
          </table:table-cell>
          <table:table-cell table:formula="of:=[.B1121]/[.C1121]" office:value-type="float" office:value="0.0012962962962963" calcext:value-type="float">
            <text:p>0,00129629629629630000</text:p>
          </table:table-cell>
          <table:table-cell table:formula="of:=[.D1122]-[.D1121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table:formula="of:=[.B1121]+10" office:value-type="float" office:value="11210" calcext:value-type="float">
            <text:p>11210</text:p>
          </table:table-cell>
          <table:table-cell office:value-type="float" office:value="8640000" calcext:value-type="float">
            <text:p>8640000</text:p>
          </table:table-cell>
          <table:table-cell table:formula="of:=[.B1122]/[.C1122]" office:value-type="float" office:value="0.0012974537037037" calcext:value-type="float">
            <text:p>0,00129745370370370000</text:p>
          </table:table-cell>
          <table:table-cell table:formula="of:=[.D1123]-[.D1122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table:formula="of:=[.B1122]+10" office:value-type="float" office:value="11220" calcext:value-type="float">
            <text:p>11220</text:p>
          </table:table-cell>
          <table:table-cell office:value-type="float" office:value="8640000" calcext:value-type="float">
            <text:p>8640000</text:p>
          </table:table-cell>
          <table:table-cell table:formula="of:=[.B1123]/[.C1123]" office:value-type="float" office:value="0.00129861111111111" calcext:value-type="float">
            <text:p>0,00129861111111111000</text:p>
          </table:table-cell>
          <table:table-cell table:formula="of:=[.D1124]-[.D1123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table:formula="of:=[.B1123]+10" office:value-type="float" office:value="11230" calcext:value-type="float">
            <text:p>11230</text:p>
          </table:table-cell>
          <table:table-cell office:value-type="float" office:value="8640000" calcext:value-type="float">
            <text:p>8640000</text:p>
          </table:table-cell>
          <table:table-cell table:formula="of:=[.B1124]/[.C1124]" office:value-type="float" office:value="0.00129976851851852" calcext:value-type="float">
            <text:p>0,00129976851851852000</text:p>
          </table:table-cell>
          <table:table-cell table:formula="of:=[.D1125]-[.D1124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table:formula="of:=[.B1124]+10" office:value-type="float" office:value="11240" calcext:value-type="float">
            <text:p>11240</text:p>
          </table:table-cell>
          <table:table-cell office:value-type="float" office:value="8640000" calcext:value-type="float">
            <text:p>8640000</text:p>
          </table:table-cell>
          <table:table-cell table:formula="of:=[.B1125]/[.C1125]" office:value-type="float" office:value="0.00130092592592593" calcext:value-type="float">
            <text:p>0,00130092592592593000</text:p>
          </table:table-cell>
          <table:table-cell table:formula="of:=[.D1126]-[.D1125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table:formula="of:=[.B1125]+10" office:value-type="float" office:value="11250" calcext:value-type="float">
            <text:p>11250</text:p>
          </table:table-cell>
          <table:table-cell office:value-type="float" office:value="8640000" calcext:value-type="float">
            <text:p>8640000</text:p>
          </table:table-cell>
          <table:table-cell table:formula="of:=[.B1126]/[.C1126]" office:value-type="float" office:value="0.00130208333333333" calcext:value-type="float">
            <text:p>0,00130208333333333000</text:p>
          </table:table-cell>
          <table:table-cell table:formula="of:=[.D1127]-[.D1126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table:formula="of:=[.B1126]+10" office:value-type="float" office:value="11260" calcext:value-type="float">
            <text:p>11260</text:p>
          </table:table-cell>
          <table:table-cell office:value-type="float" office:value="8640000" calcext:value-type="float">
            <text:p>8640000</text:p>
          </table:table-cell>
          <table:table-cell table:formula="of:=[.B1127]/[.C1127]" office:value-type="float" office:value="0.00130324074074074" calcext:value-type="float">
            <text:p>0,00130324074074074000</text:p>
          </table:table-cell>
          <table:table-cell table:formula="of:=[.D1128]-[.D1127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table:formula="of:=[.B1127]+10" office:value-type="float" office:value="11270" calcext:value-type="float">
            <text:p>11270</text:p>
          </table:table-cell>
          <table:table-cell office:value-type="float" office:value="8640000" calcext:value-type="float">
            <text:p>8640000</text:p>
          </table:table-cell>
          <table:table-cell table:formula="of:=[.B1128]/[.C1128]" office:value-type="float" office:value="0.00130439814814815" calcext:value-type="float">
            <text:p>0,00130439814814815000</text:p>
          </table:table-cell>
          <table:table-cell table:formula="of:=[.D1129]-[.D1128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table:formula="of:=[.B1128]+10" office:value-type="float" office:value="11280" calcext:value-type="float">
            <text:p>11280</text:p>
          </table:table-cell>
          <table:table-cell office:value-type="float" office:value="8640000" calcext:value-type="float">
            <text:p>8640000</text:p>
          </table:table-cell>
          <table:table-cell table:formula="of:=[.B1129]/[.C1129]" office:value-type="float" office:value="0.00130555555555556" calcext:value-type="float">
            <text:p>0,00130555555555556000</text:p>
          </table:table-cell>
          <table:table-cell table:formula="of:=[.D1130]-[.D1129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table:formula="of:=[.B1129]+10" office:value-type="float" office:value="11290" calcext:value-type="float">
            <text:p>11290</text:p>
          </table:table-cell>
          <table:table-cell office:value-type="float" office:value="8640000" calcext:value-type="float">
            <text:p>8640000</text:p>
          </table:table-cell>
          <table:table-cell table:formula="of:=[.B1130]/[.C1130]" office:value-type="float" office:value="0.00130671296296296" calcext:value-type="float">
            <text:p>0,00130671296296296000</text:p>
          </table:table-cell>
          <table:table-cell table:formula="of:=[.D1131]-[.D1130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table:formula="of:=[.B1130]+10" office:value-type="float" office:value="11300" calcext:value-type="float">
            <text:p>11300</text:p>
          </table:table-cell>
          <table:table-cell office:value-type="float" office:value="8640000" calcext:value-type="float">
            <text:p>8640000</text:p>
          </table:table-cell>
          <table:table-cell table:formula="of:=[.B1131]/[.C1131]" office:value-type="float" office:value="0.00130787037037037" calcext:value-type="float">
            <text:p>0,00130787037037037000</text:p>
          </table:table-cell>
          <table:table-cell table:formula="of:=[.D1132]-[.D1131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table:formula="of:=[.B1131]+10" office:value-type="float" office:value="11310" calcext:value-type="float">
            <text:p>11310</text:p>
          </table:table-cell>
          <table:table-cell office:value-type="float" office:value="8640000" calcext:value-type="float">
            <text:p>8640000</text:p>
          </table:table-cell>
          <table:table-cell table:formula="of:=[.B1132]/[.C1132]" office:value-type="float" office:value="0.00130902777777778" calcext:value-type="float">
            <text:p>0,00130902777777778000</text:p>
          </table:table-cell>
          <table:table-cell table:formula="of:=[.D1133]-[.D1132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table:formula="of:=[.B1132]+10" office:value-type="float" office:value="11320" calcext:value-type="float">
            <text:p>11320</text:p>
          </table:table-cell>
          <table:table-cell office:value-type="float" office:value="8640000" calcext:value-type="float">
            <text:p>8640000</text:p>
          </table:table-cell>
          <table:table-cell table:formula="of:=[.B1133]/[.C1133]" office:value-type="float" office:value="0.00131018518518519" calcext:value-type="float">
            <text:p>0,00131018518518519000</text:p>
          </table:table-cell>
          <table:table-cell table:formula="of:=[.D1134]-[.D1133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table:formula="of:=[.B1133]+10" office:value-type="float" office:value="11330" calcext:value-type="float">
            <text:p>11330</text:p>
          </table:table-cell>
          <table:table-cell office:value-type="float" office:value="8640000" calcext:value-type="float">
            <text:p>8640000</text:p>
          </table:table-cell>
          <table:table-cell table:formula="of:=[.B1134]/[.C1134]" office:value-type="float" office:value="0.00131134259259259" calcext:value-type="float">
            <text:p>0,00131134259259259000</text:p>
          </table:table-cell>
          <table:table-cell table:formula="of:=[.D1135]-[.D1134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table:formula="of:=[.B1134]+10" office:value-type="float" office:value="11340" calcext:value-type="float">
            <text:p>11340</text:p>
          </table:table-cell>
          <table:table-cell office:value-type="float" office:value="8640000" calcext:value-type="float">
            <text:p>8640000</text:p>
          </table:table-cell>
          <table:table-cell table:formula="of:=[.B1135]/[.C1135]" office:value-type="float" office:value="0.0013125" calcext:value-type="float">
            <text:p>0,00131250000000000000</text:p>
          </table:table-cell>
          <table:table-cell table:formula="of:=[.D1136]-[.D1135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table:formula="of:=[.B1135]+10" office:value-type="float" office:value="11350" calcext:value-type="float">
            <text:p>11350</text:p>
          </table:table-cell>
          <table:table-cell office:value-type="float" office:value="8640000" calcext:value-type="float">
            <text:p>8640000</text:p>
          </table:table-cell>
          <table:table-cell table:formula="of:=[.B1136]/[.C1136]" office:value-type="float" office:value="0.00131365740740741" calcext:value-type="float">
            <text:p>0,00131365740740741000</text:p>
          </table:table-cell>
          <table:table-cell table:formula="of:=[.D1137]-[.D1136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table:formula="of:=[.B1136]+10" office:value-type="float" office:value="11360" calcext:value-type="float">
            <text:p>11360</text:p>
          </table:table-cell>
          <table:table-cell office:value-type="float" office:value="8640000" calcext:value-type="float">
            <text:p>8640000</text:p>
          </table:table-cell>
          <table:table-cell table:formula="of:=[.B1137]/[.C1137]" office:value-type="float" office:value="0.00131481481481481" calcext:value-type="float">
            <text:p>0,00131481481481481000</text:p>
          </table:table-cell>
          <table:table-cell table:formula="of:=[.D1138]-[.D1137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table:formula="of:=[.B1137]+10" office:value-type="float" office:value="11370" calcext:value-type="float">
            <text:p>11370</text:p>
          </table:table-cell>
          <table:table-cell office:value-type="float" office:value="8640000" calcext:value-type="float">
            <text:p>8640000</text:p>
          </table:table-cell>
          <table:table-cell table:formula="of:=[.B1138]/[.C1138]" office:value-type="float" office:value="0.00131597222222222" calcext:value-type="float">
            <text:p>0,00131597222222222000</text:p>
          </table:table-cell>
          <table:table-cell table:formula="of:=[.D1139]-[.D1138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table:formula="of:=[.B1138]+10" office:value-type="float" office:value="11380" calcext:value-type="float">
            <text:p>11380</text:p>
          </table:table-cell>
          <table:table-cell office:value-type="float" office:value="8640000" calcext:value-type="float">
            <text:p>8640000</text:p>
          </table:table-cell>
          <table:table-cell table:formula="of:=[.B1139]/[.C1139]" office:value-type="float" office:value="0.00131712962962963" calcext:value-type="float">
            <text:p>0,00131712962962963000</text:p>
          </table:table-cell>
          <table:table-cell table:formula="of:=[.D1140]-[.D1139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table:formula="of:=[.B1139]+10" office:value-type="float" office:value="11390" calcext:value-type="float">
            <text:p>11390</text:p>
          </table:table-cell>
          <table:table-cell office:value-type="float" office:value="8640000" calcext:value-type="float">
            <text:p>8640000</text:p>
          </table:table-cell>
          <table:table-cell table:formula="of:=[.B1140]/[.C1140]" office:value-type="float" office:value="0.00131828703703704" calcext:value-type="float">
            <text:p>0,00131828703703704000</text:p>
          </table:table-cell>
          <table:table-cell table:formula="of:=[.D1141]-[.D1140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table:formula="of:=[.B1140]+10" office:value-type="float" office:value="11400" calcext:value-type="float">
            <text:p>11400</text:p>
          </table:table-cell>
          <table:table-cell office:value-type="float" office:value="8640000" calcext:value-type="float">
            <text:p>8640000</text:p>
          </table:table-cell>
          <table:table-cell table:formula="of:=[.B1141]/[.C1141]" office:value-type="float" office:value="0.00131944444444444" calcext:value-type="float">
            <text:p>0,00131944444444444000</text:p>
          </table:table-cell>
          <table:table-cell table:formula="of:=[.D1142]-[.D1141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table:formula="of:=[.B1141]+10" office:value-type="float" office:value="11410" calcext:value-type="float">
            <text:p>11410</text:p>
          </table:table-cell>
          <table:table-cell office:value-type="float" office:value="8640000" calcext:value-type="float">
            <text:p>8640000</text:p>
          </table:table-cell>
          <table:table-cell table:formula="of:=[.B1142]/[.C1142]" office:value-type="float" office:value="0.00132060185185185" calcext:value-type="float">
            <text:p>0,00132060185185185000</text:p>
          </table:table-cell>
          <table:table-cell table:formula="of:=[.D1143]-[.D1142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table:formula="of:=[.B1142]+10" office:value-type="float" office:value="11420" calcext:value-type="float">
            <text:p>11420</text:p>
          </table:table-cell>
          <table:table-cell office:value-type="float" office:value="8640000" calcext:value-type="float">
            <text:p>8640000</text:p>
          </table:table-cell>
          <table:table-cell table:formula="of:=[.B1143]/[.C1143]" office:value-type="float" office:value="0.00132175925925926" calcext:value-type="float">
            <text:p>0,00132175925925926000</text:p>
          </table:table-cell>
          <table:table-cell table:formula="of:=[.D1144]-[.D1143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table:formula="of:=[.B1143]+10" office:value-type="float" office:value="11430" calcext:value-type="float">
            <text:p>11430</text:p>
          </table:table-cell>
          <table:table-cell office:value-type="float" office:value="8640000" calcext:value-type="float">
            <text:p>8640000</text:p>
          </table:table-cell>
          <table:table-cell table:formula="of:=[.B1144]/[.C1144]" office:value-type="float" office:value="0.00132291666666667" calcext:value-type="float">
            <text:p>0,00132291666666667000</text:p>
          </table:table-cell>
          <table:table-cell table:formula="of:=[.D1145]-[.D1144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table:formula="of:=[.B1144]+10" office:value-type="float" office:value="11440" calcext:value-type="float">
            <text:p>11440</text:p>
          </table:table-cell>
          <table:table-cell office:value-type="float" office:value="8640000" calcext:value-type="float">
            <text:p>8640000</text:p>
          </table:table-cell>
          <table:table-cell table:formula="of:=[.B1145]/[.C1145]" office:value-type="float" office:value="0.00132407407407407" calcext:value-type="float">
            <text:p>0,00132407407407407000</text:p>
          </table:table-cell>
          <table:table-cell table:formula="of:=[.D1146]-[.D1145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table:formula="of:=[.B1145]+10" office:value-type="float" office:value="11450" calcext:value-type="float">
            <text:p>11450</text:p>
          </table:table-cell>
          <table:table-cell office:value-type="float" office:value="8640000" calcext:value-type="float">
            <text:p>8640000</text:p>
          </table:table-cell>
          <table:table-cell table:formula="of:=[.B1146]/[.C1146]" office:value-type="float" office:value="0.00132523148148148" calcext:value-type="float">
            <text:p>0,00132523148148148000</text:p>
          </table:table-cell>
          <table:table-cell table:formula="of:=[.D1147]-[.D1146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table:formula="of:=[.B1146]+10" office:value-type="float" office:value="11460" calcext:value-type="float">
            <text:p>11460</text:p>
          </table:table-cell>
          <table:table-cell office:value-type="float" office:value="8640000" calcext:value-type="float">
            <text:p>8640000</text:p>
          </table:table-cell>
          <table:table-cell table:formula="of:=[.B1147]/[.C1147]" office:value-type="float" office:value="0.00132638888888889" calcext:value-type="float">
            <text:p>0,00132638888888889000</text:p>
          </table:table-cell>
          <table:table-cell table:formula="of:=[.D1148]-[.D1147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table:formula="of:=[.B1147]+10" office:value-type="float" office:value="11470" calcext:value-type="float">
            <text:p>11470</text:p>
          </table:table-cell>
          <table:table-cell office:value-type="float" office:value="8640000" calcext:value-type="float">
            <text:p>8640000</text:p>
          </table:table-cell>
          <table:table-cell table:formula="of:=[.B1148]/[.C1148]" office:value-type="float" office:value="0.0013275462962963" calcext:value-type="float">
            <text:p>0,00132754629629630000</text:p>
          </table:table-cell>
          <table:table-cell table:formula="of:=[.D1149]-[.D1148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table:formula="of:=[.B1148]+10" office:value-type="float" office:value="11480" calcext:value-type="float">
            <text:p>11480</text:p>
          </table:table-cell>
          <table:table-cell office:value-type="float" office:value="8640000" calcext:value-type="float">
            <text:p>8640000</text:p>
          </table:table-cell>
          <table:table-cell table:formula="of:=[.B1149]/[.C1149]" office:value-type="float" office:value="0.0013287037037037" calcext:value-type="float">
            <text:p>0,00132870370370370000</text:p>
          </table:table-cell>
          <table:table-cell table:formula="of:=[.D1150]-[.D1149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table:formula="of:=[.B1149]+10" office:value-type="float" office:value="11490" calcext:value-type="float">
            <text:p>11490</text:p>
          </table:table-cell>
          <table:table-cell office:value-type="float" office:value="8640000" calcext:value-type="float">
            <text:p>8640000</text:p>
          </table:table-cell>
          <table:table-cell table:formula="of:=[.B1150]/[.C1150]" office:value-type="float" office:value="0.00132986111111111" calcext:value-type="float">
            <text:p>0,00132986111111111000</text:p>
          </table:table-cell>
          <table:table-cell table:formula="of:=[.D1151]-[.D1150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table:formula="of:=[.B1150]+10" office:value-type="float" office:value="11500" calcext:value-type="float">
            <text:p>11500</text:p>
          </table:table-cell>
          <table:table-cell office:value-type="float" office:value="8640000" calcext:value-type="float">
            <text:p>8640000</text:p>
          </table:table-cell>
          <table:table-cell table:formula="of:=[.B1151]/[.C1151]" office:value-type="float" office:value="0.00133101851851852" calcext:value-type="float">
            <text:p>0,00133101851851852000</text:p>
          </table:table-cell>
          <table:table-cell table:formula="of:=[.D1152]-[.D1151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table:formula="of:=[.B1151]+10" office:value-type="float" office:value="11510" calcext:value-type="float">
            <text:p>11510</text:p>
          </table:table-cell>
          <table:table-cell office:value-type="float" office:value="8640000" calcext:value-type="float">
            <text:p>8640000</text:p>
          </table:table-cell>
          <table:table-cell table:formula="of:=[.B1152]/[.C1152]" office:value-type="float" office:value="0.00133217592592593" calcext:value-type="float">
            <text:p>0,00133217592592593000</text:p>
          </table:table-cell>
          <table:table-cell table:formula="of:=[.D1153]-[.D1152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table:formula="of:=[.B1152]+10" office:value-type="float" office:value="11520" calcext:value-type="float">
            <text:p>11520</text:p>
          </table:table-cell>
          <table:table-cell office:value-type="float" office:value="8640000" calcext:value-type="float">
            <text:p>8640000</text:p>
          </table:table-cell>
          <table:table-cell table:formula="of:=[.B1153]/[.C1153]" office:value-type="float" office:value="0.00133333333333333" calcext:value-type="float">
            <text:p>0,00133333333333333000</text:p>
          </table:table-cell>
          <table:table-cell table:formula="of:=[.D1154]-[.D1153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table:formula="of:=[.B1153]+10" office:value-type="float" office:value="11530" calcext:value-type="float">
            <text:p>11530</text:p>
          </table:table-cell>
          <table:table-cell office:value-type="float" office:value="8640000" calcext:value-type="float">
            <text:p>8640000</text:p>
          </table:table-cell>
          <table:table-cell table:formula="of:=[.B1154]/[.C1154]" office:value-type="float" office:value="0.00133449074074074" calcext:value-type="float">
            <text:p>0,00133449074074074000</text:p>
          </table:table-cell>
          <table:table-cell table:formula="of:=[.D1155]-[.D1154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table:formula="of:=[.B1154]+10" office:value-type="float" office:value="11540" calcext:value-type="float">
            <text:p>11540</text:p>
          </table:table-cell>
          <table:table-cell office:value-type="float" office:value="8640000" calcext:value-type="float">
            <text:p>8640000</text:p>
          </table:table-cell>
          <table:table-cell table:formula="of:=[.B1155]/[.C1155]" office:value-type="float" office:value="0.00133564814814815" calcext:value-type="float">
            <text:p>0,00133564814814815000</text:p>
          </table:table-cell>
          <table:table-cell table:formula="of:=[.D1156]-[.D1155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table:formula="of:=[.B1155]+10" office:value-type="float" office:value="11550" calcext:value-type="float">
            <text:p>11550</text:p>
          </table:table-cell>
          <table:table-cell office:value-type="float" office:value="8640000" calcext:value-type="float">
            <text:p>8640000</text:p>
          </table:table-cell>
          <table:table-cell table:formula="of:=[.B1156]/[.C1156]" office:value-type="float" office:value="0.00133680555555556" calcext:value-type="float">
            <text:p>0,00133680555555556000</text:p>
          </table:table-cell>
          <table:table-cell table:formula="of:=[.D1157]-[.D1156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table:formula="of:=[.B1156]+10" office:value-type="float" office:value="11560" calcext:value-type="float">
            <text:p>11560</text:p>
          </table:table-cell>
          <table:table-cell office:value-type="float" office:value="8640000" calcext:value-type="float">
            <text:p>8640000</text:p>
          </table:table-cell>
          <table:table-cell table:formula="of:=[.B1157]/[.C1157]" office:value-type="float" office:value="0.00133796296296296" calcext:value-type="float">
            <text:p>0,00133796296296296000</text:p>
          </table:table-cell>
          <table:table-cell table:formula="of:=[.D1158]-[.D1157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table:formula="of:=[.B1157]+10" office:value-type="float" office:value="11570" calcext:value-type="float">
            <text:p>11570</text:p>
          </table:table-cell>
          <table:table-cell office:value-type="float" office:value="8640000" calcext:value-type="float">
            <text:p>8640000</text:p>
          </table:table-cell>
          <table:table-cell table:formula="of:=[.B1158]/[.C1158]" office:value-type="float" office:value="0.00133912037037037" calcext:value-type="float">
            <text:p>0,00133912037037037000</text:p>
          </table:table-cell>
          <table:table-cell table:formula="of:=[.D1159]-[.D1158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table:formula="of:=[.B1158]+10" office:value-type="float" office:value="11580" calcext:value-type="float">
            <text:p>11580</text:p>
          </table:table-cell>
          <table:table-cell office:value-type="float" office:value="8640000" calcext:value-type="float">
            <text:p>8640000</text:p>
          </table:table-cell>
          <table:table-cell table:formula="of:=[.B1159]/[.C1159]" office:value-type="float" office:value="0.00134027777777778" calcext:value-type="float">
            <text:p>0,00134027777777778000</text:p>
          </table:table-cell>
          <table:table-cell table:formula="of:=[.D1160]-[.D1159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table:formula="of:=[.B1159]+10" office:value-type="float" office:value="11590" calcext:value-type="float">
            <text:p>11590</text:p>
          </table:table-cell>
          <table:table-cell office:value-type="float" office:value="8640000" calcext:value-type="float">
            <text:p>8640000</text:p>
          </table:table-cell>
          <table:table-cell table:formula="of:=[.B1160]/[.C1160]" office:value-type="float" office:value="0.00134143518518519" calcext:value-type="float">
            <text:p>0,00134143518518519000</text:p>
          </table:table-cell>
          <table:table-cell table:formula="of:=[.D1161]-[.D1160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table:formula="of:=[.B1160]+10" office:value-type="float" office:value="11600" calcext:value-type="float">
            <text:p>11600</text:p>
          </table:table-cell>
          <table:table-cell office:value-type="float" office:value="8640000" calcext:value-type="float">
            <text:p>8640000</text:p>
          </table:table-cell>
          <table:table-cell table:formula="of:=[.B1161]/[.C1161]" office:value-type="float" office:value="0.00134259259259259" calcext:value-type="float">
            <text:p>0,00134259259259259000</text:p>
          </table:table-cell>
          <table:table-cell table:formula="of:=[.D1162]-[.D1161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table:formula="of:=[.B1161]+10" office:value-type="float" office:value="11610" calcext:value-type="float">
            <text:p>11610</text:p>
          </table:table-cell>
          <table:table-cell office:value-type="float" office:value="8640000" calcext:value-type="float">
            <text:p>8640000</text:p>
          </table:table-cell>
          <table:table-cell table:formula="of:=[.B1162]/[.C1162]" office:value-type="float" office:value="0.00134375" calcext:value-type="float">
            <text:p>0,00134375000000000000</text:p>
          </table:table-cell>
          <table:table-cell table:formula="of:=[.D1163]-[.D1162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table:formula="of:=[.B1162]+10" office:value-type="float" office:value="11620" calcext:value-type="float">
            <text:p>11620</text:p>
          </table:table-cell>
          <table:table-cell office:value-type="float" office:value="8640000" calcext:value-type="float">
            <text:p>8640000</text:p>
          </table:table-cell>
          <table:table-cell table:formula="of:=[.B1163]/[.C1163]" office:value-type="float" office:value="0.00134490740740741" calcext:value-type="float">
            <text:p>0,00134490740740741000</text:p>
          </table:table-cell>
          <table:table-cell table:formula="of:=[.D1164]-[.D1163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table:formula="of:=[.B1163]+10" office:value-type="float" office:value="11630" calcext:value-type="float">
            <text:p>11630</text:p>
          </table:table-cell>
          <table:table-cell office:value-type="float" office:value="8640000" calcext:value-type="float">
            <text:p>8640000</text:p>
          </table:table-cell>
          <table:table-cell table:formula="of:=[.B1164]/[.C1164]" office:value-type="float" office:value="0.00134606481481482" calcext:value-type="float">
            <text:p>0,00134606481481482000</text:p>
          </table:table-cell>
          <table:table-cell table:formula="of:=[.D1165]-[.D1164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table:formula="of:=[.B1164]+10" office:value-type="float" office:value="11640" calcext:value-type="float">
            <text:p>11640</text:p>
          </table:table-cell>
          <table:table-cell office:value-type="float" office:value="8640000" calcext:value-type="float">
            <text:p>8640000</text:p>
          </table:table-cell>
          <table:table-cell table:formula="of:=[.B1165]/[.C1165]" office:value-type="float" office:value="0.00134722222222222" calcext:value-type="float">
            <text:p>0,00134722222222222000</text:p>
          </table:table-cell>
          <table:table-cell table:formula="of:=[.D1166]-[.D1165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table:formula="of:=[.B1165]+10" office:value-type="float" office:value="11650" calcext:value-type="float">
            <text:p>11650</text:p>
          </table:table-cell>
          <table:table-cell office:value-type="float" office:value="8640000" calcext:value-type="float">
            <text:p>8640000</text:p>
          </table:table-cell>
          <table:table-cell table:formula="of:=[.B1166]/[.C1166]" office:value-type="float" office:value="0.00134837962962963" calcext:value-type="float">
            <text:p>0,00134837962962963000</text:p>
          </table:table-cell>
          <table:table-cell table:formula="of:=[.D1167]-[.D1166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table:formula="of:=[.B1166]+10" office:value-type="float" office:value="11660" calcext:value-type="float">
            <text:p>11660</text:p>
          </table:table-cell>
          <table:table-cell office:value-type="float" office:value="8640000" calcext:value-type="float">
            <text:p>8640000</text:p>
          </table:table-cell>
          <table:table-cell table:formula="of:=[.B1167]/[.C1167]" office:value-type="float" office:value="0.00134953703703704" calcext:value-type="float">
            <text:p>0,00134953703703704000</text:p>
          </table:table-cell>
          <table:table-cell table:formula="of:=[.D1168]-[.D1167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table:formula="of:=[.B1167]+10" office:value-type="float" office:value="11670" calcext:value-type="float">
            <text:p>11670</text:p>
          </table:table-cell>
          <table:table-cell office:value-type="float" office:value="8640000" calcext:value-type="float">
            <text:p>8640000</text:p>
          </table:table-cell>
          <table:table-cell table:formula="of:=[.B1168]/[.C1168]" office:value-type="float" office:value="0.00135069444444444" calcext:value-type="float">
            <text:p>0,00135069444444444000</text:p>
          </table:table-cell>
          <table:table-cell table:formula="of:=[.D1169]-[.D1168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table:formula="of:=[.B1168]+10" office:value-type="float" office:value="11680" calcext:value-type="float">
            <text:p>11680</text:p>
          </table:table-cell>
          <table:table-cell office:value-type="float" office:value="8640000" calcext:value-type="float">
            <text:p>8640000</text:p>
          </table:table-cell>
          <table:table-cell table:formula="of:=[.B1169]/[.C1169]" office:value-type="float" office:value="0.00135185185185185" calcext:value-type="float">
            <text:p>0,00135185185185185000</text:p>
          </table:table-cell>
          <table:table-cell table:formula="of:=[.D1170]-[.D1169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table:formula="of:=[.B1169]+10" office:value-type="float" office:value="11690" calcext:value-type="float">
            <text:p>11690</text:p>
          </table:table-cell>
          <table:table-cell office:value-type="float" office:value="8640000" calcext:value-type="float">
            <text:p>8640000</text:p>
          </table:table-cell>
          <table:table-cell table:formula="of:=[.B1170]/[.C1170]" office:value-type="float" office:value="0.00135300925925926" calcext:value-type="float">
            <text:p>0,00135300925925926000</text:p>
          </table:table-cell>
          <table:table-cell table:formula="of:=[.D1171]-[.D1170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table:formula="of:=[.B1170]+10" office:value-type="float" office:value="11700" calcext:value-type="float">
            <text:p>11700</text:p>
          </table:table-cell>
          <table:table-cell office:value-type="float" office:value="8640000" calcext:value-type="float">
            <text:p>8640000</text:p>
          </table:table-cell>
          <table:table-cell table:formula="of:=[.B1171]/[.C1171]" office:value-type="float" office:value="0.00135416666666667" calcext:value-type="float">
            <text:p>0,00135416666666667000</text:p>
          </table:table-cell>
          <table:table-cell table:formula="of:=[.D1172]-[.D1171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table:formula="of:=[.B1171]+10" office:value-type="float" office:value="11710" calcext:value-type="float">
            <text:p>11710</text:p>
          </table:table-cell>
          <table:table-cell office:value-type="float" office:value="8640000" calcext:value-type="float">
            <text:p>8640000</text:p>
          </table:table-cell>
          <table:table-cell table:formula="of:=[.B1172]/[.C1172]" office:value-type="float" office:value="0.00135532407407407" calcext:value-type="float">
            <text:p>0,00135532407407407000</text:p>
          </table:table-cell>
          <table:table-cell table:formula="of:=[.D1173]-[.D1172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table:formula="of:=[.B1172]+10" office:value-type="float" office:value="11720" calcext:value-type="float">
            <text:p>11720</text:p>
          </table:table-cell>
          <table:table-cell office:value-type="float" office:value="8640000" calcext:value-type="float">
            <text:p>8640000</text:p>
          </table:table-cell>
          <table:table-cell table:formula="of:=[.B1173]/[.C1173]" office:value-type="float" office:value="0.00135648148148148" calcext:value-type="float">
            <text:p>0,00135648148148148000</text:p>
          </table:table-cell>
          <table:table-cell table:formula="of:=[.D1174]-[.D1173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table:formula="of:=[.B1173]+10" office:value-type="float" office:value="11730" calcext:value-type="float">
            <text:p>11730</text:p>
          </table:table-cell>
          <table:table-cell office:value-type="float" office:value="8640000" calcext:value-type="float">
            <text:p>8640000</text:p>
          </table:table-cell>
          <table:table-cell table:formula="of:=[.B1174]/[.C1174]" office:value-type="float" office:value="0.00135763888888889" calcext:value-type="float">
            <text:p>0,00135763888888889000</text:p>
          </table:table-cell>
          <table:table-cell table:formula="of:=[.D1175]-[.D1174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table:formula="of:=[.B1174]+10" office:value-type="float" office:value="11740" calcext:value-type="float">
            <text:p>11740</text:p>
          </table:table-cell>
          <table:table-cell office:value-type="float" office:value="8640000" calcext:value-type="float">
            <text:p>8640000</text:p>
          </table:table-cell>
          <table:table-cell table:formula="of:=[.B1175]/[.C1175]" office:value-type="float" office:value="0.0013587962962963" calcext:value-type="float">
            <text:p>0,00135879629629630000</text:p>
          </table:table-cell>
          <table:table-cell table:formula="of:=[.D1176]-[.D1175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table:formula="of:=[.B1175]+10" office:value-type="float" office:value="11750" calcext:value-type="float">
            <text:p>11750</text:p>
          </table:table-cell>
          <table:table-cell office:value-type="float" office:value="8640000" calcext:value-type="float">
            <text:p>8640000</text:p>
          </table:table-cell>
          <table:table-cell table:formula="of:=[.B1176]/[.C1176]" office:value-type="float" office:value="0.0013599537037037" calcext:value-type="float">
            <text:p>0,00135995370370370000</text:p>
          </table:table-cell>
          <table:table-cell table:formula="of:=[.D1177]-[.D1176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table:formula="of:=[.B1176]+10" office:value-type="float" office:value="11760" calcext:value-type="float">
            <text:p>11760</text:p>
          </table:table-cell>
          <table:table-cell office:value-type="float" office:value="8640000" calcext:value-type="float">
            <text:p>8640000</text:p>
          </table:table-cell>
          <table:table-cell table:formula="of:=[.B1177]/[.C1177]" office:value-type="float" office:value="0.00136111111111111" calcext:value-type="float">
            <text:p>0,00136111111111111000</text:p>
          </table:table-cell>
          <table:table-cell table:formula="of:=[.D1178]-[.D1177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table:formula="of:=[.B1177]+10" office:value-type="float" office:value="11770" calcext:value-type="float">
            <text:p>11770</text:p>
          </table:table-cell>
          <table:table-cell office:value-type="float" office:value="8640000" calcext:value-type="float">
            <text:p>8640000</text:p>
          </table:table-cell>
          <table:table-cell table:formula="of:=[.B1178]/[.C1178]" office:value-type="float" office:value="0.00136226851851852" calcext:value-type="float">
            <text:p>0,00136226851851852000</text:p>
          </table:table-cell>
          <table:table-cell table:formula="of:=[.D1179]-[.D1178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table:formula="of:=[.B1178]+10" office:value-type="float" office:value="11780" calcext:value-type="float">
            <text:p>11780</text:p>
          </table:table-cell>
          <table:table-cell office:value-type="float" office:value="8640000" calcext:value-type="float">
            <text:p>8640000</text:p>
          </table:table-cell>
          <table:table-cell table:formula="of:=[.B1179]/[.C1179]" office:value-type="float" office:value="0.00136342592592593" calcext:value-type="float">
            <text:p>0,00136342592592593000</text:p>
          </table:table-cell>
          <table:table-cell table:formula="of:=[.D1180]-[.D1179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table:formula="of:=[.B1179]+10" office:value-type="float" office:value="11790" calcext:value-type="float">
            <text:p>11790</text:p>
          </table:table-cell>
          <table:table-cell office:value-type="float" office:value="8640000" calcext:value-type="float">
            <text:p>8640000</text:p>
          </table:table-cell>
          <table:table-cell table:formula="of:=[.B1180]/[.C1180]" office:value-type="float" office:value="0.00136458333333333" calcext:value-type="float">
            <text:p>0,00136458333333333000</text:p>
          </table:table-cell>
          <table:table-cell table:formula="of:=[.D1181]-[.D1180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table:formula="of:=[.B1180]+10" office:value-type="float" office:value="11800" calcext:value-type="float">
            <text:p>11800</text:p>
          </table:table-cell>
          <table:table-cell office:value-type="float" office:value="8640000" calcext:value-type="float">
            <text:p>8640000</text:p>
          </table:table-cell>
          <table:table-cell table:formula="of:=[.B1181]/[.C1181]" office:value-type="float" office:value="0.00136574074074074" calcext:value-type="float">
            <text:p>0,00136574074074074000</text:p>
          </table:table-cell>
          <table:table-cell table:formula="of:=[.D1182]-[.D1181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table:formula="of:=[.B1181]+10" office:value-type="float" office:value="11810" calcext:value-type="float">
            <text:p>11810</text:p>
          </table:table-cell>
          <table:table-cell office:value-type="float" office:value="8640000" calcext:value-type="float">
            <text:p>8640000</text:p>
          </table:table-cell>
          <table:table-cell table:formula="of:=[.B1182]/[.C1182]" office:value-type="float" office:value="0.00136689814814815" calcext:value-type="float">
            <text:p>0,00136689814814815000</text:p>
          </table:table-cell>
          <table:table-cell table:formula="of:=[.D1183]-[.D1182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table:formula="of:=[.B1182]+10" office:value-type="float" office:value="11820" calcext:value-type="float">
            <text:p>11820</text:p>
          </table:table-cell>
          <table:table-cell office:value-type="float" office:value="8640000" calcext:value-type="float">
            <text:p>8640000</text:p>
          </table:table-cell>
          <table:table-cell table:formula="of:=[.B1183]/[.C1183]" office:value-type="float" office:value="0.00136805555555556" calcext:value-type="float">
            <text:p>0,00136805555555556000</text:p>
          </table:table-cell>
          <table:table-cell table:formula="of:=[.D1184]-[.D1183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table:formula="of:=[.B1183]+10" office:value-type="float" office:value="11830" calcext:value-type="float">
            <text:p>11830</text:p>
          </table:table-cell>
          <table:table-cell office:value-type="float" office:value="8640000" calcext:value-type="float">
            <text:p>8640000</text:p>
          </table:table-cell>
          <table:table-cell table:formula="of:=[.B1184]/[.C1184]" office:value-type="float" office:value="0.00136921296296296" calcext:value-type="float">
            <text:p>0,00136921296296296000</text:p>
          </table:table-cell>
          <table:table-cell table:formula="of:=[.D1185]-[.D1184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table:formula="of:=[.B1184]+10" office:value-type="float" office:value="11840" calcext:value-type="float">
            <text:p>11840</text:p>
          </table:table-cell>
          <table:table-cell office:value-type="float" office:value="8640000" calcext:value-type="float">
            <text:p>8640000</text:p>
          </table:table-cell>
          <table:table-cell table:formula="of:=[.B1185]/[.C1185]" office:value-type="float" office:value="0.00137037037037037" calcext:value-type="float">
            <text:p>0,00137037037037037000</text:p>
          </table:table-cell>
          <table:table-cell table:formula="of:=[.D1186]-[.D1185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table:formula="of:=[.B1185]+10" office:value-type="float" office:value="11850" calcext:value-type="float">
            <text:p>11850</text:p>
          </table:table-cell>
          <table:table-cell office:value-type="float" office:value="8640000" calcext:value-type="float">
            <text:p>8640000</text:p>
          </table:table-cell>
          <table:table-cell table:formula="of:=[.B1186]/[.C1186]" office:value-type="float" office:value="0.00137152777777778" calcext:value-type="float">
            <text:p>0,00137152777777778000</text:p>
          </table:table-cell>
          <table:table-cell table:formula="of:=[.D1187]-[.D1186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table:formula="of:=[.B1186]+10" office:value-type="float" office:value="11860" calcext:value-type="float">
            <text:p>11860</text:p>
          </table:table-cell>
          <table:table-cell office:value-type="float" office:value="8640000" calcext:value-type="float">
            <text:p>8640000</text:p>
          </table:table-cell>
          <table:table-cell table:formula="of:=[.B1187]/[.C1187]" office:value-type="float" office:value="0.00137268518518519" calcext:value-type="float">
            <text:p>0,00137268518518519000</text:p>
          </table:table-cell>
          <table:table-cell table:formula="of:=[.D1188]-[.D1187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table:formula="of:=[.B1187]+10" office:value-type="float" office:value="11870" calcext:value-type="float">
            <text:p>11870</text:p>
          </table:table-cell>
          <table:table-cell office:value-type="float" office:value="8640000" calcext:value-type="float">
            <text:p>8640000</text:p>
          </table:table-cell>
          <table:table-cell table:formula="of:=[.B1188]/[.C1188]" office:value-type="float" office:value="0.00137384259259259" calcext:value-type="float">
            <text:p>0,00137384259259259000</text:p>
          </table:table-cell>
          <table:table-cell table:formula="of:=[.D1189]-[.D1188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table:formula="of:=[.B1188]+10" office:value-type="float" office:value="11880" calcext:value-type="float">
            <text:p>11880</text:p>
          </table:table-cell>
          <table:table-cell office:value-type="float" office:value="8640000" calcext:value-type="float">
            <text:p>8640000</text:p>
          </table:table-cell>
          <table:table-cell table:formula="of:=[.B1189]/[.C1189]" office:value-type="float" office:value="0.001375" calcext:value-type="float">
            <text:p>0,00137500000000000000</text:p>
          </table:table-cell>
          <table:table-cell table:formula="of:=[.D1190]-[.D1189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table:formula="of:=[.B1189]+10" office:value-type="float" office:value="11890" calcext:value-type="float">
            <text:p>11890</text:p>
          </table:table-cell>
          <table:table-cell office:value-type="float" office:value="8640000" calcext:value-type="float">
            <text:p>8640000</text:p>
          </table:table-cell>
          <table:table-cell table:formula="of:=[.B1190]/[.C1190]" office:value-type="float" office:value="0.00137615740740741" calcext:value-type="float">
            <text:p>0,00137615740740741000</text:p>
          </table:table-cell>
          <table:table-cell table:formula="of:=[.D1191]-[.D1190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table:formula="of:=[.B1190]+10" office:value-type="float" office:value="11900" calcext:value-type="float">
            <text:p>11900</text:p>
          </table:table-cell>
          <table:table-cell office:value-type="float" office:value="8640000" calcext:value-type="float">
            <text:p>8640000</text:p>
          </table:table-cell>
          <table:table-cell table:formula="of:=[.B1191]/[.C1191]" office:value-type="float" office:value="0.00137731481481481" calcext:value-type="float">
            <text:p>0,00137731481481481000</text:p>
          </table:table-cell>
          <table:table-cell table:formula="of:=[.D1192]-[.D1191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table:formula="of:=[.B1191]+10" office:value-type="float" office:value="11910" calcext:value-type="float">
            <text:p>11910</text:p>
          </table:table-cell>
          <table:table-cell office:value-type="float" office:value="8640000" calcext:value-type="float">
            <text:p>8640000</text:p>
          </table:table-cell>
          <table:table-cell table:formula="of:=[.B1192]/[.C1192]" office:value-type="float" office:value="0.00137847222222222" calcext:value-type="float">
            <text:p>0,00137847222222222000</text:p>
          </table:table-cell>
          <table:table-cell table:formula="of:=[.D1193]-[.D1192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table:formula="of:=[.B1192]+10" office:value-type="float" office:value="11920" calcext:value-type="float">
            <text:p>11920</text:p>
          </table:table-cell>
          <table:table-cell office:value-type="float" office:value="8640000" calcext:value-type="float">
            <text:p>8640000</text:p>
          </table:table-cell>
          <table:table-cell table:formula="of:=[.B1193]/[.C1193]" office:value-type="float" office:value="0.00137962962962963" calcext:value-type="float">
            <text:p>0,00137962962962963000</text:p>
          </table:table-cell>
          <table:table-cell table:formula="of:=[.D1194]-[.D1193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table:formula="of:=[.B1193]+10" office:value-type="float" office:value="11930" calcext:value-type="float">
            <text:p>11930</text:p>
          </table:table-cell>
          <table:table-cell office:value-type="float" office:value="8640000" calcext:value-type="float">
            <text:p>8640000</text:p>
          </table:table-cell>
          <table:table-cell table:formula="of:=[.B1194]/[.C1194]" office:value-type="float" office:value="0.00138078703703704" calcext:value-type="float">
            <text:p>0,00138078703703704000</text:p>
          </table:table-cell>
          <table:table-cell table:formula="of:=[.D1195]-[.D1194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table:formula="of:=[.B1194]+10" office:value-type="float" office:value="11940" calcext:value-type="float">
            <text:p>11940</text:p>
          </table:table-cell>
          <table:table-cell office:value-type="float" office:value="8640000" calcext:value-type="float">
            <text:p>8640000</text:p>
          </table:table-cell>
          <table:table-cell table:formula="of:=[.B1195]/[.C1195]" office:value-type="float" office:value="0.00138194444444444" calcext:value-type="float">
            <text:p>0,00138194444444444000</text:p>
          </table:table-cell>
          <table:table-cell table:formula="of:=[.D1196]-[.D1195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table:formula="of:=[.B1195]+10" office:value-type="float" office:value="11950" calcext:value-type="float">
            <text:p>11950</text:p>
          </table:table-cell>
          <table:table-cell office:value-type="float" office:value="8640000" calcext:value-type="float">
            <text:p>8640000</text:p>
          </table:table-cell>
          <table:table-cell table:formula="of:=[.B1196]/[.C1196]" office:value-type="float" office:value="0.00138310185185185" calcext:value-type="float">
            <text:p>0,00138310185185185000</text:p>
          </table:table-cell>
          <table:table-cell table:formula="of:=[.D1197]-[.D1196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table:formula="of:=[.B1196]+10" office:value-type="float" office:value="11960" calcext:value-type="float">
            <text:p>11960</text:p>
          </table:table-cell>
          <table:table-cell office:value-type="float" office:value="8640000" calcext:value-type="float">
            <text:p>8640000</text:p>
          </table:table-cell>
          <table:table-cell table:formula="of:=[.B1197]/[.C1197]" office:value-type="float" office:value="0.00138425925925926" calcext:value-type="float">
            <text:p>0,00138425925925926000</text:p>
          </table:table-cell>
          <table:table-cell table:formula="of:=[.D1198]-[.D1197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table:formula="of:=[.B1197]+10" office:value-type="float" office:value="11970" calcext:value-type="float">
            <text:p>11970</text:p>
          </table:table-cell>
          <table:table-cell office:value-type="float" office:value="8640000" calcext:value-type="float">
            <text:p>8640000</text:p>
          </table:table-cell>
          <table:table-cell table:formula="of:=[.B1198]/[.C1198]" office:value-type="float" office:value="0.00138541666666667" calcext:value-type="float">
            <text:p>0,00138541666666667000</text:p>
          </table:table-cell>
          <table:table-cell table:formula="of:=[.D1199]-[.D1198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table:formula="of:=[.B1198]+10" office:value-type="float" office:value="11980" calcext:value-type="float">
            <text:p>11980</text:p>
          </table:table-cell>
          <table:table-cell office:value-type="float" office:value="8640000" calcext:value-type="float">
            <text:p>8640000</text:p>
          </table:table-cell>
          <table:table-cell table:formula="of:=[.B1199]/[.C1199]" office:value-type="float" office:value="0.00138657407407407" calcext:value-type="float">
            <text:p>0,00138657407407407000</text:p>
          </table:table-cell>
          <table:table-cell table:formula="of:=[.D1200]-[.D1199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table:formula="of:=[.B1199]+10" office:value-type="float" office:value="11990" calcext:value-type="float">
            <text:p>11990</text:p>
          </table:table-cell>
          <table:table-cell office:value-type="float" office:value="8640000" calcext:value-type="float">
            <text:p>8640000</text:p>
          </table:table-cell>
          <table:table-cell table:formula="of:=[.B1200]/[.C1200]" office:value-type="float" office:value="0.00138773148148148" calcext:value-type="float">
            <text:p>0,00138773148148148000</text:p>
          </table:table-cell>
          <table:table-cell table:formula="of:=[.D1201]-[.D1200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table:formula="of:=[.B1200]+10" office:value-type="float" office:value="12000" calcext:value-type="float">
            <text:p>12000</text:p>
          </table:table-cell>
          <table:table-cell office:value-type="float" office:value="8640000" calcext:value-type="float">
            <text:p>8640000</text:p>
          </table:table-cell>
          <table:table-cell table:formula="of:=[.B1201]/[.C1201]" office:value-type="float" office:value="0.00138888888888889" calcext:value-type="float">
            <text:p>0,00138888888888889000</text:p>
          </table:table-cell>
          <table:table-cell table:formula="of:=[.D1202]-[.D1201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table:formula="of:=[.B1201]+10" office:value-type="float" office:value="12010" calcext:value-type="float">
            <text:p>12010</text:p>
          </table:table-cell>
          <table:table-cell office:value-type="float" office:value="8640000" calcext:value-type="float">
            <text:p>8640000</text:p>
          </table:table-cell>
          <table:table-cell table:formula="of:=[.B1202]/[.C1202]" office:value-type="float" office:value="0.0013900462962963" calcext:value-type="float">
            <text:p>0,00139004629629630000</text:p>
          </table:table-cell>
          <table:table-cell table:formula="of:=[.D1203]-[.D1202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table:formula="of:=[.B1202]+10" office:value-type="float" office:value="12020" calcext:value-type="float">
            <text:p>12020</text:p>
          </table:table-cell>
          <table:table-cell office:value-type="float" office:value="8640000" calcext:value-type="float">
            <text:p>8640000</text:p>
          </table:table-cell>
          <table:table-cell table:formula="of:=[.B1203]/[.C1203]" office:value-type="float" office:value="0.0013912037037037" calcext:value-type="float">
            <text:p>0,00139120370370370000</text:p>
          </table:table-cell>
          <table:table-cell table:formula="of:=[.D1204]-[.D1203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table:formula="of:=[.B1203]+10" office:value-type="float" office:value="12030" calcext:value-type="float">
            <text:p>12030</text:p>
          </table:table-cell>
          <table:table-cell office:value-type="float" office:value="8640000" calcext:value-type="float">
            <text:p>8640000</text:p>
          </table:table-cell>
          <table:table-cell table:formula="of:=[.B1204]/[.C1204]" office:value-type="float" office:value="0.00139236111111111" calcext:value-type="float">
            <text:p>0,00139236111111111000</text:p>
          </table:table-cell>
          <table:table-cell table:formula="of:=[.D1205]-[.D1204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table:formula="of:=[.B1204]+10" office:value-type="float" office:value="12040" calcext:value-type="float">
            <text:p>12040</text:p>
          </table:table-cell>
          <table:table-cell office:value-type="float" office:value="8640000" calcext:value-type="float">
            <text:p>8640000</text:p>
          </table:table-cell>
          <table:table-cell table:formula="of:=[.B1205]/[.C1205]" office:value-type="float" office:value="0.00139351851851852" calcext:value-type="float">
            <text:p>0,00139351851851852000</text:p>
          </table:table-cell>
          <table:table-cell table:formula="of:=[.D1206]-[.D1205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table:formula="of:=[.B1205]+10" office:value-type="float" office:value="12050" calcext:value-type="float">
            <text:p>12050</text:p>
          </table:table-cell>
          <table:table-cell office:value-type="float" office:value="8640000" calcext:value-type="float">
            <text:p>8640000</text:p>
          </table:table-cell>
          <table:table-cell table:formula="of:=[.B1206]/[.C1206]" office:value-type="float" office:value="0.00139467592592593" calcext:value-type="float">
            <text:p>0,00139467592592593000</text:p>
          </table:table-cell>
          <table:table-cell table:formula="of:=[.D1207]-[.D1206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table:formula="of:=[.B1206]+10" office:value-type="float" office:value="12060" calcext:value-type="float">
            <text:p>12060</text:p>
          </table:table-cell>
          <table:table-cell office:value-type="float" office:value="8640000" calcext:value-type="float">
            <text:p>8640000</text:p>
          </table:table-cell>
          <table:table-cell table:formula="of:=[.B1207]/[.C1207]" office:value-type="float" office:value="0.00139583333333333" calcext:value-type="float">
            <text:p>0,00139583333333333000</text:p>
          </table:table-cell>
          <table:table-cell table:formula="of:=[.D1208]-[.D1207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table:formula="of:=[.B1207]+10" office:value-type="float" office:value="12070" calcext:value-type="float">
            <text:p>12070</text:p>
          </table:table-cell>
          <table:table-cell office:value-type="float" office:value="8640000" calcext:value-type="float">
            <text:p>8640000</text:p>
          </table:table-cell>
          <table:table-cell table:formula="of:=[.B1208]/[.C1208]" office:value-type="float" office:value="0.00139699074074074" calcext:value-type="float">
            <text:p>0,00139699074074074000</text:p>
          </table:table-cell>
          <table:table-cell table:formula="of:=[.D1209]-[.D1208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table:formula="of:=[.B1208]+10" office:value-type="float" office:value="12080" calcext:value-type="float">
            <text:p>12080</text:p>
          </table:table-cell>
          <table:table-cell office:value-type="float" office:value="8640000" calcext:value-type="float">
            <text:p>8640000</text:p>
          </table:table-cell>
          <table:table-cell table:formula="of:=[.B1209]/[.C1209]" office:value-type="float" office:value="0.00139814814814815" calcext:value-type="float">
            <text:p>0,00139814814814815000</text:p>
          </table:table-cell>
          <table:table-cell table:formula="of:=[.D1210]-[.D1209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table:formula="of:=[.B1209]+10" office:value-type="float" office:value="12090" calcext:value-type="float">
            <text:p>12090</text:p>
          </table:table-cell>
          <table:table-cell office:value-type="float" office:value="8640000" calcext:value-type="float">
            <text:p>8640000</text:p>
          </table:table-cell>
          <table:table-cell table:formula="of:=[.B1210]/[.C1210]" office:value-type="float" office:value="0.00139930555555556" calcext:value-type="float">
            <text:p>0,00139930555555556000</text:p>
          </table:table-cell>
          <table:table-cell table:formula="of:=[.D1211]-[.D1210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table:formula="of:=[.B1210]+10" office:value-type="float" office:value="12100" calcext:value-type="float">
            <text:p>12100</text:p>
          </table:table-cell>
          <table:table-cell office:value-type="float" office:value="8640000" calcext:value-type="float">
            <text:p>8640000</text:p>
          </table:table-cell>
          <table:table-cell table:formula="of:=[.B1211]/[.C1211]" office:value-type="float" office:value="0.00140046296296296" calcext:value-type="float">
            <text:p>0,00140046296296296000</text:p>
          </table:table-cell>
          <table:table-cell table:formula="of:=[.D1212]-[.D1211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table:formula="of:=[.B1211]+10" office:value-type="float" office:value="12110" calcext:value-type="float">
            <text:p>12110</text:p>
          </table:table-cell>
          <table:table-cell office:value-type="float" office:value="8640000" calcext:value-type="float">
            <text:p>8640000</text:p>
          </table:table-cell>
          <table:table-cell table:formula="of:=[.B1212]/[.C1212]" office:value-type="float" office:value="0.00140162037037037" calcext:value-type="float">
            <text:p>0,00140162037037037000</text:p>
          </table:table-cell>
          <table:table-cell table:formula="of:=[.D1213]-[.D1212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table:formula="of:=[.B1212]+10" office:value-type="float" office:value="12120" calcext:value-type="float">
            <text:p>12120</text:p>
          </table:table-cell>
          <table:table-cell office:value-type="float" office:value="8640000" calcext:value-type="float">
            <text:p>8640000</text:p>
          </table:table-cell>
          <table:table-cell table:formula="of:=[.B1213]/[.C1213]" office:value-type="float" office:value="0.00140277777777778" calcext:value-type="float">
            <text:p>0,00140277777777778000</text:p>
          </table:table-cell>
          <table:table-cell table:formula="of:=[.D1214]-[.D1213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table:formula="of:=[.B1213]+10" office:value-type="float" office:value="12130" calcext:value-type="float">
            <text:p>12130</text:p>
          </table:table-cell>
          <table:table-cell office:value-type="float" office:value="8640000" calcext:value-type="float">
            <text:p>8640000</text:p>
          </table:table-cell>
          <table:table-cell table:formula="of:=[.B1214]/[.C1214]" office:value-type="float" office:value="0.00140393518518519" calcext:value-type="float">
            <text:p>0,00140393518518519000</text:p>
          </table:table-cell>
          <table:table-cell table:formula="of:=[.D1215]-[.D1214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table:formula="of:=[.B1214]+10" office:value-type="float" office:value="12140" calcext:value-type="float">
            <text:p>12140</text:p>
          </table:table-cell>
          <table:table-cell office:value-type="float" office:value="8640000" calcext:value-type="float">
            <text:p>8640000</text:p>
          </table:table-cell>
          <table:table-cell table:formula="of:=[.B1215]/[.C1215]" office:value-type="float" office:value="0.00140509259259259" calcext:value-type="float">
            <text:p>0,00140509259259259000</text:p>
          </table:table-cell>
          <table:table-cell table:formula="of:=[.D1216]-[.D1215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table:formula="of:=[.B1215]+10" office:value-type="float" office:value="12150" calcext:value-type="float">
            <text:p>12150</text:p>
          </table:table-cell>
          <table:table-cell office:value-type="float" office:value="8640000" calcext:value-type="float">
            <text:p>8640000</text:p>
          </table:table-cell>
          <table:table-cell table:formula="of:=[.B1216]/[.C1216]" office:value-type="float" office:value="0.00140625" calcext:value-type="float">
            <text:p>0,00140625000000000000</text:p>
          </table:table-cell>
          <table:table-cell table:formula="of:=[.D1217]-[.D1216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table:formula="of:=[.B1216]+10" office:value-type="float" office:value="12160" calcext:value-type="float">
            <text:p>12160</text:p>
          </table:table-cell>
          <table:table-cell office:value-type="float" office:value="8640000" calcext:value-type="float">
            <text:p>8640000</text:p>
          </table:table-cell>
          <table:table-cell table:formula="of:=[.B1217]/[.C1217]" office:value-type="float" office:value="0.00140740740740741" calcext:value-type="float">
            <text:p>0,00140740740740741000</text:p>
          </table:table-cell>
          <table:table-cell table:formula="of:=[.D1218]-[.D1217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table:formula="of:=[.B1217]+10" office:value-type="float" office:value="12170" calcext:value-type="float">
            <text:p>12170</text:p>
          </table:table-cell>
          <table:table-cell office:value-type="float" office:value="8640000" calcext:value-type="float">
            <text:p>8640000</text:p>
          </table:table-cell>
          <table:table-cell table:formula="of:=[.B1218]/[.C1218]" office:value-type="float" office:value="0.00140856481481481" calcext:value-type="float">
            <text:p>0,00140856481481481000</text:p>
          </table:table-cell>
          <table:table-cell table:formula="of:=[.D1219]-[.D1218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table:formula="of:=[.B1218]+10" office:value-type="float" office:value="12180" calcext:value-type="float">
            <text:p>12180</text:p>
          </table:table-cell>
          <table:table-cell office:value-type="float" office:value="8640000" calcext:value-type="float">
            <text:p>8640000</text:p>
          </table:table-cell>
          <table:table-cell table:formula="of:=[.B1219]/[.C1219]" office:value-type="float" office:value="0.00140972222222222" calcext:value-type="float">
            <text:p>0,00140972222222222000</text:p>
          </table:table-cell>
          <table:table-cell table:formula="of:=[.D1220]-[.D1219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table:formula="of:=[.B1219]+10" office:value-type="float" office:value="12190" calcext:value-type="float">
            <text:p>12190</text:p>
          </table:table-cell>
          <table:table-cell office:value-type="float" office:value="8640000" calcext:value-type="float">
            <text:p>8640000</text:p>
          </table:table-cell>
          <table:table-cell table:formula="of:=[.B1220]/[.C1220]" office:value-type="float" office:value="0.00141087962962963" calcext:value-type="float">
            <text:p>0,00141087962962963000</text:p>
          </table:table-cell>
          <table:table-cell table:formula="of:=[.D1221]-[.D1220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table:formula="of:=[.B1220]+10" office:value-type="float" office:value="12200" calcext:value-type="float">
            <text:p>12200</text:p>
          </table:table-cell>
          <table:table-cell office:value-type="float" office:value="8640000" calcext:value-type="float">
            <text:p>8640000</text:p>
          </table:table-cell>
          <table:table-cell table:formula="of:=[.B1221]/[.C1221]" office:value-type="float" office:value="0.00141203703703704" calcext:value-type="float">
            <text:p>0,00141203703703704000</text:p>
          </table:table-cell>
          <table:table-cell table:formula="of:=[.D1222]-[.D1221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table:formula="of:=[.B1221]+10" office:value-type="float" office:value="12210" calcext:value-type="float">
            <text:p>12210</text:p>
          </table:table-cell>
          <table:table-cell office:value-type="float" office:value="8640000" calcext:value-type="float">
            <text:p>8640000</text:p>
          </table:table-cell>
          <table:table-cell table:formula="of:=[.B1222]/[.C1222]" office:value-type="float" office:value="0.00141319444444444" calcext:value-type="float">
            <text:p>0,00141319444444444000</text:p>
          </table:table-cell>
          <table:table-cell table:formula="of:=[.D1223]-[.D1222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table:formula="of:=[.B1222]+10" office:value-type="float" office:value="12220" calcext:value-type="float">
            <text:p>12220</text:p>
          </table:table-cell>
          <table:table-cell office:value-type="float" office:value="8640000" calcext:value-type="float">
            <text:p>8640000</text:p>
          </table:table-cell>
          <table:table-cell table:formula="of:=[.B1223]/[.C1223]" office:value-type="float" office:value="0.00141435185185185" calcext:value-type="float">
            <text:p>0,00141435185185185000</text:p>
          </table:table-cell>
          <table:table-cell table:formula="of:=[.D1224]-[.D1223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table:formula="of:=[.B1223]+10" office:value-type="float" office:value="12230" calcext:value-type="float">
            <text:p>12230</text:p>
          </table:table-cell>
          <table:table-cell office:value-type="float" office:value="8640000" calcext:value-type="float">
            <text:p>8640000</text:p>
          </table:table-cell>
          <table:table-cell table:formula="of:=[.B1224]/[.C1224]" office:value-type="float" office:value="0.00141550925925926" calcext:value-type="float">
            <text:p>0,00141550925925926000</text:p>
          </table:table-cell>
          <table:table-cell table:formula="of:=[.D1225]-[.D1224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table:formula="of:=[.B1224]+10" office:value-type="float" office:value="12240" calcext:value-type="float">
            <text:p>12240</text:p>
          </table:table-cell>
          <table:table-cell office:value-type="float" office:value="8640000" calcext:value-type="float">
            <text:p>8640000</text:p>
          </table:table-cell>
          <table:table-cell table:formula="of:=[.B1225]/[.C1225]" office:value-type="float" office:value="0.00141666666666667" calcext:value-type="float">
            <text:p>0,00141666666666667000</text:p>
          </table:table-cell>
          <table:table-cell table:formula="of:=[.D1226]-[.D1225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table:formula="of:=[.B1225]+10" office:value-type="float" office:value="12250" calcext:value-type="float">
            <text:p>12250</text:p>
          </table:table-cell>
          <table:table-cell office:value-type="float" office:value="8640000" calcext:value-type="float">
            <text:p>8640000</text:p>
          </table:table-cell>
          <table:table-cell table:formula="of:=[.B1226]/[.C1226]" office:value-type="float" office:value="0.00141782407407407" calcext:value-type="float">
            <text:p>0,00141782407407407000</text:p>
          </table:table-cell>
          <table:table-cell table:formula="of:=[.D1227]-[.D1226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table:formula="of:=[.B1226]+10" office:value-type="float" office:value="12260" calcext:value-type="float">
            <text:p>12260</text:p>
          </table:table-cell>
          <table:table-cell office:value-type="float" office:value="8640000" calcext:value-type="float">
            <text:p>8640000</text:p>
          </table:table-cell>
          <table:table-cell table:formula="of:=[.B1227]/[.C1227]" office:value-type="float" office:value="0.00141898148148148" calcext:value-type="float">
            <text:p>0,00141898148148148000</text:p>
          </table:table-cell>
          <table:table-cell table:formula="of:=[.D1228]-[.D1227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table:formula="of:=[.B1227]+10" office:value-type="float" office:value="12270" calcext:value-type="float">
            <text:p>12270</text:p>
          </table:table-cell>
          <table:table-cell office:value-type="float" office:value="8640000" calcext:value-type="float">
            <text:p>8640000</text:p>
          </table:table-cell>
          <table:table-cell table:formula="of:=[.B1228]/[.C1228]" office:value-type="float" office:value="0.00142013888888889" calcext:value-type="float">
            <text:p>0,00142013888888889000</text:p>
          </table:table-cell>
          <table:table-cell table:formula="of:=[.D1229]-[.D1228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table:formula="of:=[.B1228]+10" office:value-type="float" office:value="12280" calcext:value-type="float">
            <text:p>12280</text:p>
          </table:table-cell>
          <table:table-cell office:value-type="float" office:value="8640000" calcext:value-type="float">
            <text:p>8640000</text:p>
          </table:table-cell>
          <table:table-cell table:formula="of:=[.B1229]/[.C1229]" office:value-type="float" office:value="0.0014212962962963" calcext:value-type="float">
            <text:p>0,00142129629629630000</text:p>
          </table:table-cell>
          <table:table-cell table:formula="of:=[.D1230]-[.D1229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table:formula="of:=[.B1229]+10" office:value-type="float" office:value="12290" calcext:value-type="float">
            <text:p>12290</text:p>
          </table:table-cell>
          <table:table-cell office:value-type="float" office:value="8640000" calcext:value-type="float">
            <text:p>8640000</text:p>
          </table:table-cell>
          <table:table-cell table:formula="of:=[.B1230]/[.C1230]" office:value-type="float" office:value="0.0014224537037037" calcext:value-type="float">
            <text:p>0,00142245370370370000</text:p>
          </table:table-cell>
          <table:table-cell table:formula="of:=[.D1231]-[.D1230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table:formula="of:=[.B1230]+10" office:value-type="float" office:value="12300" calcext:value-type="float">
            <text:p>12300</text:p>
          </table:table-cell>
          <table:table-cell office:value-type="float" office:value="8640000" calcext:value-type="float">
            <text:p>8640000</text:p>
          </table:table-cell>
          <table:table-cell table:formula="of:=[.B1231]/[.C1231]" office:value-type="float" office:value="0.00142361111111111" calcext:value-type="float">
            <text:p>0,00142361111111111000</text:p>
          </table:table-cell>
          <table:table-cell table:formula="of:=[.D1232]-[.D1231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table:formula="of:=[.B1231]+10" office:value-type="float" office:value="12310" calcext:value-type="float">
            <text:p>12310</text:p>
          </table:table-cell>
          <table:table-cell office:value-type="float" office:value="8640000" calcext:value-type="float">
            <text:p>8640000</text:p>
          </table:table-cell>
          <table:table-cell table:formula="of:=[.B1232]/[.C1232]" office:value-type="float" office:value="0.00142476851851852" calcext:value-type="float">
            <text:p>0,00142476851851852000</text:p>
          </table:table-cell>
          <table:table-cell table:formula="of:=[.D1233]-[.D1232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table:formula="of:=[.B1232]+10" office:value-type="float" office:value="12320" calcext:value-type="float">
            <text:p>12320</text:p>
          </table:table-cell>
          <table:table-cell office:value-type="float" office:value="8640000" calcext:value-type="float">
            <text:p>8640000</text:p>
          </table:table-cell>
          <table:table-cell table:formula="of:=[.B1233]/[.C1233]" office:value-type="float" office:value="0.00142592592592593" calcext:value-type="float">
            <text:p>0,00142592592592593000</text:p>
          </table:table-cell>
          <table:table-cell table:formula="of:=[.D1234]-[.D1233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table:formula="of:=[.B1233]+10" office:value-type="float" office:value="12330" calcext:value-type="float">
            <text:p>12330</text:p>
          </table:table-cell>
          <table:table-cell office:value-type="float" office:value="8640000" calcext:value-type="float">
            <text:p>8640000</text:p>
          </table:table-cell>
          <table:table-cell table:formula="of:=[.B1234]/[.C1234]" office:value-type="float" office:value="0.00142708333333333" calcext:value-type="float">
            <text:p>0,00142708333333333000</text:p>
          </table:table-cell>
          <table:table-cell table:formula="of:=[.D1235]-[.D1234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table:formula="of:=[.B1234]+10" office:value-type="float" office:value="12340" calcext:value-type="float">
            <text:p>12340</text:p>
          </table:table-cell>
          <table:table-cell office:value-type="float" office:value="8640000" calcext:value-type="float">
            <text:p>8640000</text:p>
          </table:table-cell>
          <table:table-cell table:formula="of:=[.B1235]/[.C1235]" office:value-type="float" office:value="0.00142824074074074" calcext:value-type="float">
            <text:p>0,00142824074074074000</text:p>
          </table:table-cell>
          <table:table-cell table:formula="of:=[.D1236]-[.D1235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table:formula="of:=[.B1235]+10" office:value-type="float" office:value="12350" calcext:value-type="float">
            <text:p>12350</text:p>
          </table:table-cell>
          <table:table-cell office:value-type="float" office:value="8640000" calcext:value-type="float">
            <text:p>8640000</text:p>
          </table:table-cell>
          <table:table-cell table:formula="of:=[.B1236]/[.C1236]" office:value-type="float" office:value="0.00142939814814815" calcext:value-type="float">
            <text:p>0,00142939814814815000</text:p>
          </table:table-cell>
          <table:table-cell table:formula="of:=[.D1237]-[.D1236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table:formula="of:=[.B1236]+10" office:value-type="float" office:value="12360" calcext:value-type="float">
            <text:p>12360</text:p>
          </table:table-cell>
          <table:table-cell office:value-type="float" office:value="8640000" calcext:value-type="float">
            <text:p>8640000</text:p>
          </table:table-cell>
          <table:table-cell table:formula="of:=[.B1237]/[.C1237]" office:value-type="float" office:value="0.00143055555555556" calcext:value-type="float">
            <text:p>0,00143055555555556000</text:p>
          </table:table-cell>
          <table:table-cell table:formula="of:=[.D1238]-[.D1237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table:formula="of:=[.B1237]+10" office:value-type="float" office:value="12370" calcext:value-type="float">
            <text:p>12370</text:p>
          </table:table-cell>
          <table:table-cell office:value-type="float" office:value="8640000" calcext:value-type="float">
            <text:p>8640000</text:p>
          </table:table-cell>
          <table:table-cell table:formula="of:=[.B1238]/[.C1238]" office:value-type="float" office:value="0.00143171296296296" calcext:value-type="float">
            <text:p>0,00143171296296296000</text:p>
          </table:table-cell>
          <table:table-cell table:formula="of:=[.D1239]-[.D1238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table:formula="of:=[.B1238]+10" office:value-type="float" office:value="12380" calcext:value-type="float">
            <text:p>12380</text:p>
          </table:table-cell>
          <table:table-cell office:value-type="float" office:value="8640000" calcext:value-type="float">
            <text:p>8640000</text:p>
          </table:table-cell>
          <table:table-cell table:formula="of:=[.B1239]/[.C1239]" office:value-type="float" office:value="0.00143287037037037" calcext:value-type="float">
            <text:p>0,00143287037037037000</text:p>
          </table:table-cell>
          <table:table-cell table:formula="of:=[.D1240]-[.D1239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table:formula="of:=[.B1239]+10" office:value-type="float" office:value="12390" calcext:value-type="float">
            <text:p>12390</text:p>
          </table:table-cell>
          <table:table-cell office:value-type="float" office:value="8640000" calcext:value-type="float">
            <text:p>8640000</text:p>
          </table:table-cell>
          <table:table-cell table:formula="of:=[.B1240]/[.C1240]" office:value-type="float" office:value="0.00143402777777778" calcext:value-type="float">
            <text:p>0,00143402777777778000</text:p>
          </table:table-cell>
          <table:table-cell table:formula="of:=[.D1241]-[.D1240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table:formula="of:=[.B1240]+10" office:value-type="float" office:value="12400" calcext:value-type="float">
            <text:p>12400</text:p>
          </table:table-cell>
          <table:table-cell office:value-type="float" office:value="8640000" calcext:value-type="float">
            <text:p>8640000</text:p>
          </table:table-cell>
          <table:table-cell table:formula="of:=[.B1241]/[.C1241]" office:value-type="float" office:value="0.00143518518518519" calcext:value-type="float">
            <text:p>0,00143518518518519000</text:p>
          </table:table-cell>
          <table:table-cell table:formula="of:=[.D1242]-[.D1241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table:formula="of:=[.B1241]+10" office:value-type="float" office:value="12410" calcext:value-type="float">
            <text:p>12410</text:p>
          </table:table-cell>
          <table:table-cell office:value-type="float" office:value="8640000" calcext:value-type="float">
            <text:p>8640000</text:p>
          </table:table-cell>
          <table:table-cell table:formula="of:=[.B1242]/[.C1242]" office:value-type="float" office:value="0.00143634259259259" calcext:value-type="float">
            <text:p>0,00143634259259259000</text:p>
          </table:table-cell>
          <table:table-cell table:formula="of:=[.D1243]-[.D1242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table:formula="of:=[.B1242]+10" office:value-type="float" office:value="12420" calcext:value-type="float">
            <text:p>12420</text:p>
          </table:table-cell>
          <table:table-cell office:value-type="float" office:value="8640000" calcext:value-type="float">
            <text:p>8640000</text:p>
          </table:table-cell>
          <table:table-cell table:formula="of:=[.B1243]/[.C1243]" office:value-type="float" office:value="0.0014375" calcext:value-type="float">
            <text:p>0,00143750000000000000</text:p>
          </table:table-cell>
          <table:table-cell table:formula="of:=[.D1244]-[.D1243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table:formula="of:=[.B1243]+10" office:value-type="float" office:value="12430" calcext:value-type="float">
            <text:p>12430</text:p>
          </table:table-cell>
          <table:table-cell office:value-type="float" office:value="8640000" calcext:value-type="float">
            <text:p>8640000</text:p>
          </table:table-cell>
          <table:table-cell table:formula="of:=[.B1244]/[.C1244]" office:value-type="float" office:value="0.00143865740740741" calcext:value-type="float">
            <text:p>0,00143865740740741000</text:p>
          </table:table-cell>
          <table:table-cell table:formula="of:=[.D1245]-[.D1244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table:formula="of:=[.B1244]+10" office:value-type="float" office:value="12440" calcext:value-type="float">
            <text:p>12440</text:p>
          </table:table-cell>
          <table:table-cell office:value-type="float" office:value="8640000" calcext:value-type="float">
            <text:p>8640000</text:p>
          </table:table-cell>
          <table:table-cell table:formula="of:=[.B1245]/[.C1245]" office:value-type="float" office:value="0.00143981481481481" calcext:value-type="float">
            <text:p>0,00143981481481481000</text:p>
          </table:table-cell>
          <table:table-cell table:formula="of:=[.D1246]-[.D1245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table:formula="of:=[.B1245]+10" office:value-type="float" office:value="12450" calcext:value-type="float">
            <text:p>12450</text:p>
          </table:table-cell>
          <table:table-cell office:value-type="float" office:value="8640000" calcext:value-type="float">
            <text:p>8640000</text:p>
          </table:table-cell>
          <table:table-cell table:formula="of:=[.B1246]/[.C1246]" office:value-type="float" office:value="0.00144097222222222" calcext:value-type="float">
            <text:p>0,00144097222222222000</text:p>
          </table:table-cell>
          <table:table-cell table:formula="of:=[.D1247]-[.D1246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table:formula="of:=[.B1246]+10" office:value-type="float" office:value="12460" calcext:value-type="float">
            <text:p>12460</text:p>
          </table:table-cell>
          <table:table-cell office:value-type="float" office:value="8640000" calcext:value-type="float">
            <text:p>8640000</text:p>
          </table:table-cell>
          <table:table-cell table:formula="of:=[.B1247]/[.C1247]" office:value-type="float" office:value="0.00144212962962963" calcext:value-type="float">
            <text:p>0,00144212962962963000</text:p>
          </table:table-cell>
          <table:table-cell table:formula="of:=[.D1248]-[.D1247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table:formula="of:=[.B1247]+10" office:value-type="float" office:value="12470" calcext:value-type="float">
            <text:p>12470</text:p>
          </table:table-cell>
          <table:table-cell office:value-type="float" office:value="8640000" calcext:value-type="float">
            <text:p>8640000</text:p>
          </table:table-cell>
          <table:table-cell table:formula="of:=[.B1248]/[.C1248]" office:value-type="float" office:value="0.00144328703703704" calcext:value-type="float">
            <text:p>0,00144328703703704000</text:p>
          </table:table-cell>
          <table:table-cell table:formula="of:=[.D1249]-[.D1248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table:formula="of:=[.B1248]+10" office:value-type="float" office:value="12480" calcext:value-type="float">
            <text:p>12480</text:p>
          </table:table-cell>
          <table:table-cell office:value-type="float" office:value="8640000" calcext:value-type="float">
            <text:p>8640000</text:p>
          </table:table-cell>
          <table:table-cell table:formula="of:=[.B1249]/[.C1249]" office:value-type="float" office:value="0.00144444444444444" calcext:value-type="float">
            <text:p>0,00144444444444444000</text:p>
          </table:table-cell>
          <table:table-cell table:formula="of:=[.D1250]-[.D1249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table:formula="of:=[.B1249]+10" office:value-type="float" office:value="12490" calcext:value-type="float">
            <text:p>12490</text:p>
          </table:table-cell>
          <table:table-cell office:value-type="float" office:value="8640000" calcext:value-type="float">
            <text:p>8640000</text:p>
          </table:table-cell>
          <table:table-cell table:formula="of:=[.B1250]/[.C1250]" office:value-type="float" office:value="0.00144560185185185" calcext:value-type="float">
            <text:p>0,00144560185185185000</text:p>
          </table:table-cell>
          <table:table-cell table:formula="of:=[.D1251]-[.D1250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table:formula="of:=[.B1250]+10" office:value-type="float" office:value="12500" calcext:value-type="float">
            <text:p>12500</text:p>
          </table:table-cell>
          <table:table-cell office:value-type="float" office:value="8640000" calcext:value-type="float">
            <text:p>8640000</text:p>
          </table:table-cell>
          <table:table-cell table:formula="of:=[.B1251]/[.C1251]" office:value-type="float" office:value="0.00144675925925926" calcext:value-type="float">
            <text:p>0,00144675925925926000</text:p>
          </table:table-cell>
          <table:table-cell table:formula="of:=[.D1252]-[.D1251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table:formula="of:=[.B1251]+10" office:value-type="float" office:value="12510" calcext:value-type="float">
            <text:p>12510</text:p>
          </table:table-cell>
          <table:table-cell office:value-type="float" office:value="8640000" calcext:value-type="float">
            <text:p>8640000</text:p>
          </table:table-cell>
          <table:table-cell table:formula="of:=[.B1252]/[.C1252]" office:value-type="float" office:value="0.00144791666666667" calcext:value-type="float">
            <text:p>0,00144791666666667000</text:p>
          </table:table-cell>
          <table:table-cell table:formula="of:=[.D1253]-[.D1252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table:formula="of:=[.B1252]+10" office:value-type="float" office:value="12520" calcext:value-type="float">
            <text:p>12520</text:p>
          </table:table-cell>
          <table:table-cell office:value-type="float" office:value="8640000" calcext:value-type="float">
            <text:p>8640000</text:p>
          </table:table-cell>
          <table:table-cell table:formula="of:=[.B1253]/[.C1253]" office:value-type="float" office:value="0.00144907407407407" calcext:value-type="float">
            <text:p>0,00144907407407407000</text:p>
          </table:table-cell>
          <table:table-cell table:formula="of:=[.D1254]-[.D1253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table:formula="of:=[.B1253]+10" office:value-type="float" office:value="12530" calcext:value-type="float">
            <text:p>12530</text:p>
          </table:table-cell>
          <table:table-cell office:value-type="float" office:value="8640000" calcext:value-type="float">
            <text:p>8640000</text:p>
          </table:table-cell>
          <table:table-cell table:formula="of:=[.B1254]/[.C1254]" office:value-type="float" office:value="0.00145023148148148" calcext:value-type="float">
            <text:p>0,00145023148148148000</text:p>
          </table:table-cell>
          <table:table-cell table:formula="of:=[.D1255]-[.D1254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table:formula="of:=[.B1254]+10" office:value-type="float" office:value="12540" calcext:value-type="float">
            <text:p>12540</text:p>
          </table:table-cell>
          <table:table-cell office:value-type="float" office:value="8640000" calcext:value-type="float">
            <text:p>8640000</text:p>
          </table:table-cell>
          <table:table-cell table:formula="of:=[.B1255]/[.C1255]" office:value-type="float" office:value="0.00145138888888889" calcext:value-type="float">
            <text:p>0,00145138888888889000</text:p>
          </table:table-cell>
          <table:table-cell table:formula="of:=[.D1256]-[.D1255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table:formula="of:=[.B1255]+10" office:value-type="float" office:value="12550" calcext:value-type="float">
            <text:p>12550</text:p>
          </table:table-cell>
          <table:table-cell office:value-type="float" office:value="8640000" calcext:value-type="float">
            <text:p>8640000</text:p>
          </table:table-cell>
          <table:table-cell table:formula="of:=[.B1256]/[.C1256]" office:value-type="float" office:value="0.0014525462962963" calcext:value-type="float">
            <text:p>0,00145254629629630000</text:p>
          </table:table-cell>
          <table:table-cell table:formula="of:=[.D1257]-[.D1256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table:formula="of:=[.B1256]+10" office:value-type="float" office:value="12560" calcext:value-type="float">
            <text:p>12560</text:p>
          </table:table-cell>
          <table:table-cell office:value-type="float" office:value="8640000" calcext:value-type="float">
            <text:p>8640000</text:p>
          </table:table-cell>
          <table:table-cell table:formula="of:=[.B1257]/[.C1257]" office:value-type="float" office:value="0.0014537037037037" calcext:value-type="float">
            <text:p>0,00145370370370370000</text:p>
          </table:table-cell>
          <table:table-cell table:formula="of:=[.D1258]-[.D1257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table:formula="of:=[.B1257]+10" office:value-type="float" office:value="12570" calcext:value-type="float">
            <text:p>12570</text:p>
          </table:table-cell>
          <table:table-cell office:value-type="float" office:value="8640000" calcext:value-type="float">
            <text:p>8640000</text:p>
          </table:table-cell>
          <table:table-cell table:formula="of:=[.B1258]/[.C1258]" office:value-type="float" office:value="0.00145486111111111" calcext:value-type="float">
            <text:p>0,00145486111111111000</text:p>
          </table:table-cell>
          <table:table-cell table:formula="of:=[.D1259]-[.D1258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table:formula="of:=[.B1258]+10" office:value-type="float" office:value="12580" calcext:value-type="float">
            <text:p>12580</text:p>
          </table:table-cell>
          <table:table-cell office:value-type="float" office:value="8640000" calcext:value-type="float">
            <text:p>8640000</text:p>
          </table:table-cell>
          <table:table-cell table:formula="of:=[.B1259]/[.C1259]" office:value-type="float" office:value="0.00145601851851852" calcext:value-type="float">
            <text:p>0,00145601851851852000</text:p>
          </table:table-cell>
          <table:table-cell table:formula="of:=[.D1260]-[.D1259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table:formula="of:=[.B1259]+10" office:value-type="float" office:value="12590" calcext:value-type="float">
            <text:p>12590</text:p>
          </table:table-cell>
          <table:table-cell office:value-type="float" office:value="8640000" calcext:value-type="float">
            <text:p>8640000</text:p>
          </table:table-cell>
          <table:table-cell table:formula="of:=[.B1260]/[.C1260]" office:value-type="float" office:value="0.00145717592592593" calcext:value-type="float">
            <text:p>0,00145717592592593000</text:p>
          </table:table-cell>
          <table:table-cell table:formula="of:=[.D1261]-[.D1260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table:formula="of:=[.B1260]+10" office:value-type="float" office:value="12600" calcext:value-type="float">
            <text:p>12600</text:p>
          </table:table-cell>
          <table:table-cell office:value-type="float" office:value="8640000" calcext:value-type="float">
            <text:p>8640000</text:p>
          </table:table-cell>
          <table:table-cell table:formula="of:=[.B1261]/[.C1261]" office:value-type="float" office:value="0.00145833333333333" calcext:value-type="float">
            <text:p>0,00145833333333333000</text:p>
          </table:table-cell>
          <table:table-cell table:formula="of:=[.D1262]-[.D1261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table:formula="of:=[.B1261]+10" office:value-type="float" office:value="12610" calcext:value-type="float">
            <text:p>12610</text:p>
          </table:table-cell>
          <table:table-cell office:value-type="float" office:value="8640000" calcext:value-type="float">
            <text:p>8640000</text:p>
          </table:table-cell>
          <table:table-cell table:formula="of:=[.B1262]/[.C1262]" office:value-type="float" office:value="0.00145949074074074" calcext:value-type="float">
            <text:p>0,00145949074074074000</text:p>
          </table:table-cell>
          <table:table-cell table:formula="of:=[.D1263]-[.D1262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table:formula="of:=[.B1262]+10" office:value-type="float" office:value="12620" calcext:value-type="float">
            <text:p>12620</text:p>
          </table:table-cell>
          <table:table-cell office:value-type="float" office:value="8640000" calcext:value-type="float">
            <text:p>8640000</text:p>
          </table:table-cell>
          <table:table-cell table:formula="of:=[.B1263]/[.C1263]" office:value-type="float" office:value="0.00146064814814815" calcext:value-type="float">
            <text:p>0,00146064814814815000</text:p>
          </table:table-cell>
          <table:table-cell table:formula="of:=[.D1264]-[.D1263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table:formula="of:=[.B1263]+10" office:value-type="float" office:value="12630" calcext:value-type="float">
            <text:p>12630</text:p>
          </table:table-cell>
          <table:table-cell office:value-type="float" office:value="8640000" calcext:value-type="float">
            <text:p>8640000</text:p>
          </table:table-cell>
          <table:table-cell table:formula="of:=[.B1264]/[.C1264]" office:value-type="float" office:value="0.00146180555555556" calcext:value-type="float">
            <text:p>0,00146180555555556000</text:p>
          </table:table-cell>
          <table:table-cell table:formula="of:=[.D1265]-[.D1264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table:formula="of:=[.B1264]+10" office:value-type="float" office:value="12640" calcext:value-type="float">
            <text:p>12640</text:p>
          </table:table-cell>
          <table:table-cell office:value-type="float" office:value="8640000" calcext:value-type="float">
            <text:p>8640000</text:p>
          </table:table-cell>
          <table:table-cell table:formula="of:=[.B1265]/[.C1265]" office:value-type="float" office:value="0.00146296296296296" calcext:value-type="float">
            <text:p>0,00146296296296296000</text:p>
          </table:table-cell>
          <table:table-cell table:formula="of:=[.D1266]-[.D1265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table:formula="of:=[.B1265]+10" office:value-type="float" office:value="12650" calcext:value-type="float">
            <text:p>12650</text:p>
          </table:table-cell>
          <table:table-cell office:value-type="float" office:value="8640000" calcext:value-type="float">
            <text:p>8640000</text:p>
          </table:table-cell>
          <table:table-cell table:formula="of:=[.B1266]/[.C1266]" office:value-type="float" office:value="0.00146412037037037" calcext:value-type="float">
            <text:p>0,00146412037037037000</text:p>
          </table:table-cell>
          <table:table-cell table:formula="of:=[.D1267]-[.D1266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table:formula="of:=[.B1266]+10" office:value-type="float" office:value="12660" calcext:value-type="float">
            <text:p>12660</text:p>
          </table:table-cell>
          <table:table-cell office:value-type="float" office:value="8640000" calcext:value-type="float">
            <text:p>8640000</text:p>
          </table:table-cell>
          <table:table-cell table:formula="of:=[.B1267]/[.C1267]" office:value-type="float" office:value="0.00146527777777778" calcext:value-type="float">
            <text:p>0,00146527777777778000</text:p>
          </table:table-cell>
          <table:table-cell table:formula="of:=[.D1268]-[.D1267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table:formula="of:=[.B1267]+10" office:value-type="float" office:value="12670" calcext:value-type="float">
            <text:p>12670</text:p>
          </table:table-cell>
          <table:table-cell office:value-type="float" office:value="8640000" calcext:value-type="float">
            <text:p>8640000</text:p>
          </table:table-cell>
          <table:table-cell table:formula="of:=[.B1268]/[.C1268]" office:value-type="float" office:value="0.00146643518518519" calcext:value-type="float">
            <text:p>0,00146643518518519000</text:p>
          </table:table-cell>
          <table:table-cell table:formula="of:=[.D1269]-[.D1268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table:formula="of:=[.B1268]+10" office:value-type="float" office:value="12680" calcext:value-type="float">
            <text:p>12680</text:p>
          </table:table-cell>
          <table:table-cell office:value-type="float" office:value="8640000" calcext:value-type="float">
            <text:p>8640000</text:p>
          </table:table-cell>
          <table:table-cell table:formula="of:=[.B1269]/[.C1269]" office:value-type="float" office:value="0.00146759259259259" calcext:value-type="float">
            <text:p>0,00146759259259259000</text:p>
          </table:table-cell>
          <table:table-cell table:formula="of:=[.D1270]-[.D1269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table:formula="of:=[.B1269]+10" office:value-type="float" office:value="12690" calcext:value-type="float">
            <text:p>12690</text:p>
          </table:table-cell>
          <table:table-cell office:value-type="float" office:value="8640000" calcext:value-type="float">
            <text:p>8640000</text:p>
          </table:table-cell>
          <table:table-cell table:formula="of:=[.B1270]/[.C1270]" office:value-type="float" office:value="0.00146875" calcext:value-type="float">
            <text:p>0,00146875000000000000</text:p>
          </table:table-cell>
          <table:table-cell table:formula="of:=[.D1271]-[.D1270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table:formula="of:=[.B1270]+10" office:value-type="float" office:value="12700" calcext:value-type="float">
            <text:p>12700</text:p>
          </table:table-cell>
          <table:table-cell office:value-type="float" office:value="8640000" calcext:value-type="float">
            <text:p>8640000</text:p>
          </table:table-cell>
          <table:table-cell table:formula="of:=[.B1271]/[.C1271]" office:value-type="float" office:value="0.00146990740740741" calcext:value-type="float">
            <text:p>0,00146990740740741000</text:p>
          </table:table-cell>
          <table:table-cell table:formula="of:=[.D1272]-[.D1271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table:formula="of:=[.B1271]+10" office:value-type="float" office:value="12710" calcext:value-type="float">
            <text:p>12710</text:p>
          </table:table-cell>
          <table:table-cell office:value-type="float" office:value="8640000" calcext:value-type="float">
            <text:p>8640000</text:p>
          </table:table-cell>
          <table:table-cell table:formula="of:=[.B1272]/[.C1272]" office:value-type="float" office:value="0.00147106481481481" calcext:value-type="float">
            <text:p>0,00147106481481481000</text:p>
          </table:table-cell>
          <table:table-cell table:formula="of:=[.D1273]-[.D1272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table:formula="of:=[.B1272]+10" office:value-type="float" office:value="12720" calcext:value-type="float">
            <text:p>12720</text:p>
          </table:table-cell>
          <table:table-cell office:value-type="float" office:value="8640000" calcext:value-type="float">
            <text:p>8640000</text:p>
          </table:table-cell>
          <table:table-cell table:formula="of:=[.B1273]/[.C1273]" office:value-type="float" office:value="0.00147222222222222" calcext:value-type="float">
            <text:p>0,00147222222222222000</text:p>
          </table:table-cell>
          <table:table-cell table:formula="of:=[.D1274]-[.D1273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table:formula="of:=[.B1273]+10" office:value-type="float" office:value="12730" calcext:value-type="float">
            <text:p>12730</text:p>
          </table:table-cell>
          <table:table-cell office:value-type="float" office:value="8640000" calcext:value-type="float">
            <text:p>8640000</text:p>
          </table:table-cell>
          <table:table-cell table:formula="of:=[.B1274]/[.C1274]" office:value-type="float" office:value="0.00147337962962963" calcext:value-type="float">
            <text:p>0,00147337962962963000</text:p>
          </table:table-cell>
          <table:table-cell table:formula="of:=[.D1275]-[.D1274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table:formula="of:=[.B1274]+10" office:value-type="float" office:value="12740" calcext:value-type="float">
            <text:p>12740</text:p>
          </table:table-cell>
          <table:table-cell office:value-type="float" office:value="8640000" calcext:value-type="float">
            <text:p>8640000</text:p>
          </table:table-cell>
          <table:table-cell table:formula="of:=[.B1275]/[.C1275]" office:value-type="float" office:value="0.00147453703703704" calcext:value-type="float">
            <text:p>0,00147453703703704000</text:p>
          </table:table-cell>
          <table:table-cell table:formula="of:=[.D1276]-[.D1275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table:formula="of:=[.B1275]+10" office:value-type="float" office:value="12750" calcext:value-type="float">
            <text:p>12750</text:p>
          </table:table-cell>
          <table:table-cell office:value-type="float" office:value="8640000" calcext:value-type="float">
            <text:p>8640000</text:p>
          </table:table-cell>
          <table:table-cell table:formula="of:=[.B1276]/[.C1276]" office:value-type="float" office:value="0.00147569444444444" calcext:value-type="float">
            <text:p>0,00147569444444444000</text:p>
          </table:table-cell>
          <table:table-cell table:formula="of:=[.D1277]-[.D1276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table:formula="of:=[.B1276]+10" office:value-type="float" office:value="12760" calcext:value-type="float">
            <text:p>12760</text:p>
          </table:table-cell>
          <table:table-cell office:value-type="float" office:value="8640000" calcext:value-type="float">
            <text:p>8640000</text:p>
          </table:table-cell>
          <table:table-cell table:formula="of:=[.B1277]/[.C1277]" office:value-type="float" office:value="0.00147685185185185" calcext:value-type="float">
            <text:p>0,00147685185185185000</text:p>
          </table:table-cell>
          <table:table-cell table:formula="of:=[.D1278]-[.D1277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table:formula="of:=[.B1277]+10" office:value-type="float" office:value="12770" calcext:value-type="float">
            <text:p>12770</text:p>
          </table:table-cell>
          <table:table-cell office:value-type="float" office:value="8640000" calcext:value-type="float">
            <text:p>8640000</text:p>
          </table:table-cell>
          <table:table-cell table:formula="of:=[.B1278]/[.C1278]" office:value-type="float" office:value="0.00147800925925926" calcext:value-type="float">
            <text:p>0,00147800925925926000</text:p>
          </table:table-cell>
          <table:table-cell table:formula="of:=[.D1279]-[.D1278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formula="of:=[.B1278]+10" office:value-type="float" office:value="12780" calcext:value-type="float">
            <text:p>12780</text:p>
          </table:table-cell>
          <table:table-cell office:value-type="float" office:value="8640000" calcext:value-type="float">
            <text:p>8640000</text:p>
          </table:table-cell>
          <table:table-cell table:formula="of:=[.B1279]/[.C1279]" office:value-type="float" office:value="0.00147916666666667" calcext:value-type="float">
            <text:p>0,00147916666666667000</text:p>
          </table:table-cell>
          <table:table-cell table:formula="of:=[.D1280]-[.D1279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table:formula="of:=[.B1279]+10" office:value-type="float" office:value="12790" calcext:value-type="float">
            <text:p>12790</text:p>
          </table:table-cell>
          <table:table-cell office:value-type="float" office:value="8640000" calcext:value-type="float">
            <text:p>8640000</text:p>
          </table:table-cell>
          <table:table-cell table:formula="of:=[.B1280]/[.C1280]" office:value-type="float" office:value="0.00148032407407407" calcext:value-type="float">
            <text:p>0,00148032407407407000</text:p>
          </table:table-cell>
          <table:table-cell table:formula="of:=[.D1281]-[.D1280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table:formula="of:=[.B1280]+10" office:value-type="float" office:value="12800" calcext:value-type="float">
            <text:p>12800</text:p>
          </table:table-cell>
          <table:table-cell office:value-type="float" office:value="8640000" calcext:value-type="float">
            <text:p>8640000</text:p>
          </table:table-cell>
          <table:table-cell table:formula="of:=[.B1281]/[.C1281]" office:value-type="float" office:value="0.00148148148148148" calcext:value-type="float">
            <text:p>0,00148148148148148000</text:p>
          </table:table-cell>
          <table:table-cell table:formula="of:=[.D1282]-[.D1281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table:formula="of:=[.B1281]+10" office:value-type="float" office:value="12810" calcext:value-type="float">
            <text:p>12810</text:p>
          </table:table-cell>
          <table:table-cell office:value-type="float" office:value="8640000" calcext:value-type="float">
            <text:p>8640000</text:p>
          </table:table-cell>
          <table:table-cell table:formula="of:=[.B1282]/[.C1282]" office:value-type="float" office:value="0.00148263888888889" calcext:value-type="float">
            <text:p>0,00148263888888889000</text:p>
          </table:table-cell>
          <table:table-cell table:formula="of:=[.D1283]-[.D1282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table:formula="of:=[.B1282]+10" office:value-type="float" office:value="12820" calcext:value-type="float">
            <text:p>12820</text:p>
          </table:table-cell>
          <table:table-cell office:value-type="float" office:value="8640000" calcext:value-type="float">
            <text:p>8640000</text:p>
          </table:table-cell>
          <table:table-cell table:formula="of:=[.B1283]/[.C1283]" office:value-type="float" office:value="0.0014837962962963" calcext:value-type="float">
            <text:p>0,00148379629629630000</text:p>
          </table:table-cell>
          <table:table-cell table:formula="of:=[.D1284]-[.D1283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table:formula="of:=[.B1283]+10" office:value-type="float" office:value="12830" calcext:value-type="float">
            <text:p>12830</text:p>
          </table:table-cell>
          <table:table-cell office:value-type="float" office:value="8640000" calcext:value-type="float">
            <text:p>8640000</text:p>
          </table:table-cell>
          <table:table-cell table:formula="of:=[.B1284]/[.C1284]" office:value-type="float" office:value="0.0014849537037037" calcext:value-type="float">
            <text:p>0,00148495370370370000</text:p>
          </table:table-cell>
          <table:table-cell table:formula="of:=[.D1285]-[.D1284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table:formula="of:=[.B1284]+10" office:value-type="float" office:value="12840" calcext:value-type="float">
            <text:p>12840</text:p>
          </table:table-cell>
          <table:table-cell office:value-type="float" office:value="8640000" calcext:value-type="float">
            <text:p>8640000</text:p>
          </table:table-cell>
          <table:table-cell table:formula="of:=[.B1285]/[.C1285]" office:value-type="float" office:value="0.00148611111111111" calcext:value-type="float">
            <text:p>0,00148611111111111000</text:p>
          </table:table-cell>
          <table:table-cell table:formula="of:=[.D1286]-[.D1285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table:formula="of:=[.B1285]+10" office:value-type="float" office:value="12850" calcext:value-type="float">
            <text:p>12850</text:p>
          </table:table-cell>
          <table:table-cell office:value-type="float" office:value="8640000" calcext:value-type="float">
            <text:p>8640000</text:p>
          </table:table-cell>
          <table:table-cell table:formula="of:=[.B1286]/[.C1286]" office:value-type="float" office:value="0.00148726851851852" calcext:value-type="float">
            <text:p>0,00148726851851852000</text:p>
          </table:table-cell>
          <table:table-cell table:formula="of:=[.D1287]-[.D1286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table:formula="of:=[.B1286]+10" office:value-type="float" office:value="12860" calcext:value-type="float">
            <text:p>12860</text:p>
          </table:table-cell>
          <table:table-cell office:value-type="float" office:value="8640000" calcext:value-type="float">
            <text:p>8640000</text:p>
          </table:table-cell>
          <table:table-cell table:formula="of:=[.B1287]/[.C1287]" office:value-type="float" office:value="0.00148842592592593" calcext:value-type="float">
            <text:p>0,00148842592592593000</text:p>
          </table:table-cell>
          <table:table-cell table:formula="of:=[.D1288]-[.D1287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table:formula="of:=[.B1287]+10" office:value-type="float" office:value="12870" calcext:value-type="float">
            <text:p>12870</text:p>
          </table:table-cell>
          <table:table-cell office:value-type="float" office:value="8640000" calcext:value-type="float">
            <text:p>8640000</text:p>
          </table:table-cell>
          <table:table-cell table:formula="of:=[.B1288]/[.C1288]" office:value-type="float" office:value="0.00148958333333333" calcext:value-type="float">
            <text:p>0,00148958333333333000</text:p>
          </table:table-cell>
          <table:table-cell table:formula="of:=[.D1289]-[.D1288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table:formula="of:=[.B1288]+10" office:value-type="float" office:value="12880" calcext:value-type="float">
            <text:p>12880</text:p>
          </table:table-cell>
          <table:table-cell office:value-type="float" office:value="8640000" calcext:value-type="float">
            <text:p>8640000</text:p>
          </table:table-cell>
          <table:table-cell table:formula="of:=[.B1289]/[.C1289]" office:value-type="float" office:value="0.00149074074074074" calcext:value-type="float">
            <text:p>0,00149074074074074000</text:p>
          </table:table-cell>
          <table:table-cell table:formula="of:=[.D1290]-[.D1289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table:formula="of:=[.B1289]+10" office:value-type="float" office:value="12890" calcext:value-type="float">
            <text:p>12890</text:p>
          </table:table-cell>
          <table:table-cell office:value-type="float" office:value="8640000" calcext:value-type="float">
            <text:p>8640000</text:p>
          </table:table-cell>
          <table:table-cell table:formula="of:=[.B1290]/[.C1290]" office:value-type="float" office:value="0.00149189814814815" calcext:value-type="float">
            <text:p>0,00149189814814815000</text:p>
          </table:table-cell>
          <table:table-cell table:formula="of:=[.D1291]-[.D1290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table:formula="of:=[.B1290]+10" office:value-type="float" office:value="12900" calcext:value-type="float">
            <text:p>12900</text:p>
          </table:table-cell>
          <table:table-cell office:value-type="float" office:value="8640000" calcext:value-type="float">
            <text:p>8640000</text:p>
          </table:table-cell>
          <table:table-cell table:formula="of:=[.B1291]/[.C1291]" office:value-type="float" office:value="0.00149305555555556" calcext:value-type="float">
            <text:p>0,00149305555555556000</text:p>
          </table:table-cell>
          <table:table-cell table:formula="of:=[.D1292]-[.D1291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table:formula="of:=[.B1291]+10" office:value-type="float" office:value="12910" calcext:value-type="float">
            <text:p>12910</text:p>
          </table:table-cell>
          <table:table-cell office:value-type="float" office:value="8640000" calcext:value-type="float">
            <text:p>8640000</text:p>
          </table:table-cell>
          <table:table-cell table:formula="of:=[.B1292]/[.C1292]" office:value-type="float" office:value="0.00149421296296296" calcext:value-type="float">
            <text:p>0,00149421296296296000</text:p>
          </table:table-cell>
          <table:table-cell table:formula="of:=[.D1293]-[.D1292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table:formula="of:=[.B1292]+10" office:value-type="float" office:value="12920" calcext:value-type="float">
            <text:p>12920</text:p>
          </table:table-cell>
          <table:table-cell office:value-type="float" office:value="8640000" calcext:value-type="float">
            <text:p>8640000</text:p>
          </table:table-cell>
          <table:table-cell table:formula="of:=[.B1293]/[.C1293]" office:value-type="float" office:value="0.00149537037037037" calcext:value-type="float">
            <text:p>0,00149537037037037000</text:p>
          </table:table-cell>
          <table:table-cell table:formula="of:=[.D1294]-[.D1293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table:formula="of:=[.B1293]+10" office:value-type="float" office:value="12930" calcext:value-type="float">
            <text:p>12930</text:p>
          </table:table-cell>
          <table:table-cell office:value-type="float" office:value="8640000" calcext:value-type="float">
            <text:p>8640000</text:p>
          </table:table-cell>
          <table:table-cell table:formula="of:=[.B1294]/[.C1294]" office:value-type="float" office:value="0.00149652777777778" calcext:value-type="float">
            <text:p>0,00149652777777778000</text:p>
          </table:table-cell>
          <table:table-cell table:formula="of:=[.D1295]-[.D1294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table:formula="of:=[.B1294]+10" office:value-type="float" office:value="12940" calcext:value-type="float">
            <text:p>12940</text:p>
          </table:table-cell>
          <table:table-cell office:value-type="float" office:value="8640000" calcext:value-type="float">
            <text:p>8640000</text:p>
          </table:table-cell>
          <table:table-cell table:formula="of:=[.B1295]/[.C1295]" office:value-type="float" office:value="0.00149768518518519" calcext:value-type="float">
            <text:p>0,00149768518518519000</text:p>
          </table:table-cell>
          <table:table-cell table:formula="of:=[.D1296]-[.D1295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table:formula="of:=[.B1295]+10" office:value-type="float" office:value="12950" calcext:value-type="float">
            <text:p>12950</text:p>
          </table:table-cell>
          <table:table-cell office:value-type="float" office:value="8640000" calcext:value-type="float">
            <text:p>8640000</text:p>
          </table:table-cell>
          <table:table-cell table:formula="of:=[.B1296]/[.C1296]" office:value-type="float" office:value="0.00149884259259259" calcext:value-type="float">
            <text:p>0,00149884259259259000</text:p>
          </table:table-cell>
          <table:table-cell table:formula="of:=[.D1297]-[.D1296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table:formula="of:=[.B1296]+10" office:value-type="float" office:value="12960" calcext:value-type="float">
            <text:p>12960</text:p>
          </table:table-cell>
          <table:table-cell office:value-type="float" office:value="8640000" calcext:value-type="float">
            <text:p>8640000</text:p>
          </table:table-cell>
          <table:table-cell table:formula="of:=[.B1297]/[.C1297]" office:value-type="float" office:value="0.0015" calcext:value-type="float">
            <text:p>0,00150000000000000000</text:p>
          </table:table-cell>
          <table:table-cell table:formula="of:=[.D1298]-[.D1297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table:formula="of:=[.B1297]+10" office:value-type="float" office:value="12970" calcext:value-type="float">
            <text:p>12970</text:p>
          </table:table-cell>
          <table:table-cell office:value-type="float" office:value="8640000" calcext:value-type="float">
            <text:p>8640000</text:p>
          </table:table-cell>
          <table:table-cell table:formula="of:=[.B1298]/[.C1298]" office:value-type="float" office:value="0.00150115740740741" calcext:value-type="float">
            <text:p>0,00150115740740741000</text:p>
          </table:table-cell>
          <table:table-cell table:formula="of:=[.D1299]-[.D1298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table:formula="of:=[.B1298]+10" office:value-type="float" office:value="12980" calcext:value-type="float">
            <text:p>12980</text:p>
          </table:table-cell>
          <table:table-cell office:value-type="float" office:value="8640000" calcext:value-type="float">
            <text:p>8640000</text:p>
          </table:table-cell>
          <table:table-cell table:formula="of:=[.B1299]/[.C1299]" office:value-type="float" office:value="0.00150231481481481" calcext:value-type="float">
            <text:p>0,00150231481481481000</text:p>
          </table:table-cell>
          <table:table-cell table:formula="of:=[.D1300]-[.D1299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table:formula="of:=[.B1299]+10" office:value-type="float" office:value="12990" calcext:value-type="float">
            <text:p>12990</text:p>
          </table:table-cell>
          <table:table-cell office:value-type="float" office:value="8640000" calcext:value-type="float">
            <text:p>8640000</text:p>
          </table:table-cell>
          <table:table-cell table:formula="of:=[.B1300]/[.C1300]" office:value-type="float" office:value="0.00150347222222222" calcext:value-type="float">
            <text:p>0,00150347222222222000</text:p>
          </table:table-cell>
          <table:table-cell table:formula="of:=[.D1301]-[.D1300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table:formula="of:=[.B1300]+10" office:value-type="float" office:value="13000" calcext:value-type="float">
            <text:p>13000</text:p>
          </table:table-cell>
          <table:table-cell office:value-type="float" office:value="8640000" calcext:value-type="float">
            <text:p>8640000</text:p>
          </table:table-cell>
          <table:table-cell table:formula="of:=[.B1301]/[.C1301]" office:value-type="float" office:value="0.00150462962962963" calcext:value-type="float">
            <text:p>0,00150462962962963000</text:p>
          </table:table-cell>
          <table:table-cell table:formula="of:=[.D1302]-[.D1301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table:formula="of:=[.B1301]+10" office:value-type="float" office:value="13010" calcext:value-type="float">
            <text:p>13010</text:p>
          </table:table-cell>
          <table:table-cell office:value-type="float" office:value="8640000" calcext:value-type="float">
            <text:p>8640000</text:p>
          </table:table-cell>
          <table:table-cell table:formula="of:=[.B1302]/[.C1302]" office:value-type="float" office:value="0.00150578703703704" calcext:value-type="float">
            <text:p>0,00150578703703704000</text:p>
          </table:table-cell>
          <table:table-cell table:formula="of:=[.D1303]-[.D1302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table:formula="of:=[.B1302]+10" office:value-type="float" office:value="13020" calcext:value-type="float">
            <text:p>13020</text:p>
          </table:table-cell>
          <table:table-cell office:value-type="float" office:value="8640000" calcext:value-type="float">
            <text:p>8640000</text:p>
          </table:table-cell>
          <table:table-cell table:formula="of:=[.B1303]/[.C1303]" office:value-type="float" office:value="0.00150694444444444" calcext:value-type="float">
            <text:p>0,00150694444444444000</text:p>
          </table:table-cell>
          <table:table-cell table:formula="of:=[.D1304]-[.D1303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table:formula="of:=[.B1303]+10" office:value-type="float" office:value="13030" calcext:value-type="float">
            <text:p>13030</text:p>
          </table:table-cell>
          <table:table-cell office:value-type="float" office:value="8640000" calcext:value-type="float">
            <text:p>8640000</text:p>
          </table:table-cell>
          <table:table-cell table:formula="of:=[.B1304]/[.C1304]" office:value-type="float" office:value="0.00150810185185185" calcext:value-type="float">
            <text:p>0,00150810185185185000</text:p>
          </table:table-cell>
          <table:table-cell table:formula="of:=[.D1305]-[.D1304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table:formula="of:=[.B1304]+10" office:value-type="float" office:value="13040" calcext:value-type="float">
            <text:p>13040</text:p>
          </table:table-cell>
          <table:table-cell office:value-type="float" office:value="8640000" calcext:value-type="float">
            <text:p>8640000</text:p>
          </table:table-cell>
          <table:table-cell table:formula="of:=[.B1305]/[.C1305]" office:value-type="float" office:value="0.00150925925925926" calcext:value-type="float">
            <text:p>0,00150925925925926000</text:p>
          </table:table-cell>
          <table:table-cell table:formula="of:=[.D1306]-[.D1305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table:formula="of:=[.B1305]+10" office:value-type="float" office:value="13050" calcext:value-type="float">
            <text:p>13050</text:p>
          </table:table-cell>
          <table:table-cell office:value-type="float" office:value="8640000" calcext:value-type="float">
            <text:p>8640000</text:p>
          </table:table-cell>
          <table:table-cell table:formula="of:=[.B1306]/[.C1306]" office:value-type="float" office:value="0.00151041666666667" calcext:value-type="float">
            <text:p>0,00151041666666667000</text:p>
          </table:table-cell>
          <table:table-cell table:formula="of:=[.D1307]-[.D1306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table:formula="of:=[.B1306]+10" office:value-type="float" office:value="13060" calcext:value-type="float">
            <text:p>13060</text:p>
          </table:table-cell>
          <table:table-cell office:value-type="float" office:value="8640000" calcext:value-type="float">
            <text:p>8640000</text:p>
          </table:table-cell>
          <table:table-cell table:formula="of:=[.B1307]/[.C1307]" office:value-type="float" office:value="0.00151157407407407" calcext:value-type="float">
            <text:p>0,00151157407407407000</text:p>
          </table:table-cell>
          <table:table-cell table:formula="of:=[.D1308]-[.D1307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table:formula="of:=[.B1307]+10" office:value-type="float" office:value="13070" calcext:value-type="float">
            <text:p>13070</text:p>
          </table:table-cell>
          <table:table-cell office:value-type="float" office:value="8640000" calcext:value-type="float">
            <text:p>8640000</text:p>
          </table:table-cell>
          <table:table-cell table:formula="of:=[.B1308]/[.C1308]" office:value-type="float" office:value="0.00151273148148148" calcext:value-type="float">
            <text:p>0,00151273148148148000</text:p>
          </table:table-cell>
          <table:table-cell table:formula="of:=[.D1309]-[.D1308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table:formula="of:=[.B1308]+10" office:value-type="float" office:value="13080" calcext:value-type="float">
            <text:p>13080</text:p>
          </table:table-cell>
          <table:table-cell office:value-type="float" office:value="8640000" calcext:value-type="float">
            <text:p>8640000</text:p>
          </table:table-cell>
          <table:table-cell table:formula="of:=[.B1309]/[.C1309]" office:value-type="float" office:value="0.00151388888888889" calcext:value-type="float">
            <text:p>0,00151388888888889000</text:p>
          </table:table-cell>
          <table:table-cell table:formula="of:=[.D1310]-[.D1309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table:formula="of:=[.B1309]+10" office:value-type="float" office:value="13090" calcext:value-type="float">
            <text:p>13090</text:p>
          </table:table-cell>
          <table:table-cell office:value-type="float" office:value="8640000" calcext:value-type="float">
            <text:p>8640000</text:p>
          </table:table-cell>
          <table:table-cell table:formula="of:=[.B1310]/[.C1310]" office:value-type="float" office:value="0.0015150462962963" calcext:value-type="float">
            <text:p>0,00151504629629630000</text:p>
          </table:table-cell>
          <table:table-cell table:formula="of:=[.D1311]-[.D1310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table:formula="of:=[.B1310]+10" office:value-type="float" office:value="13100" calcext:value-type="float">
            <text:p>13100</text:p>
          </table:table-cell>
          <table:table-cell office:value-type="float" office:value="8640000" calcext:value-type="float">
            <text:p>8640000</text:p>
          </table:table-cell>
          <table:table-cell table:formula="of:=[.B1311]/[.C1311]" office:value-type="float" office:value="0.0015162037037037" calcext:value-type="float">
            <text:p>0,00151620370370370000</text:p>
          </table:table-cell>
          <table:table-cell table:formula="of:=[.D1312]-[.D1311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table:formula="of:=[.B1311]+10" office:value-type="float" office:value="13110" calcext:value-type="float">
            <text:p>13110</text:p>
          </table:table-cell>
          <table:table-cell office:value-type="float" office:value="8640000" calcext:value-type="float">
            <text:p>8640000</text:p>
          </table:table-cell>
          <table:table-cell table:formula="of:=[.B1312]/[.C1312]" office:value-type="float" office:value="0.00151736111111111" calcext:value-type="float">
            <text:p>0,00151736111111111000</text:p>
          </table:table-cell>
          <table:table-cell table:formula="of:=[.D1313]-[.D1312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table:formula="of:=[.B1312]+10" office:value-type="float" office:value="13120" calcext:value-type="float">
            <text:p>13120</text:p>
          </table:table-cell>
          <table:table-cell office:value-type="float" office:value="8640000" calcext:value-type="float">
            <text:p>8640000</text:p>
          </table:table-cell>
          <table:table-cell table:formula="of:=[.B1313]/[.C1313]" office:value-type="float" office:value="0.00151851851851852" calcext:value-type="float">
            <text:p>0,00151851851851852000</text:p>
          </table:table-cell>
          <table:table-cell table:formula="of:=[.D1314]-[.D1313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table:formula="of:=[.B1313]+10" office:value-type="float" office:value="13130" calcext:value-type="float">
            <text:p>13130</text:p>
          </table:table-cell>
          <table:table-cell office:value-type="float" office:value="8640000" calcext:value-type="float">
            <text:p>8640000</text:p>
          </table:table-cell>
          <table:table-cell table:formula="of:=[.B1314]/[.C1314]" office:value-type="float" office:value="0.00151967592592593" calcext:value-type="float">
            <text:p>0,00151967592592593000</text:p>
          </table:table-cell>
          <table:table-cell table:formula="of:=[.D1315]-[.D1314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table:formula="of:=[.B1314]+10" office:value-type="float" office:value="13140" calcext:value-type="float">
            <text:p>13140</text:p>
          </table:table-cell>
          <table:table-cell office:value-type="float" office:value="8640000" calcext:value-type="float">
            <text:p>8640000</text:p>
          </table:table-cell>
          <table:table-cell table:formula="of:=[.B1315]/[.C1315]" office:value-type="float" office:value="0.00152083333333333" calcext:value-type="float">
            <text:p>0,00152083333333333000</text:p>
          </table:table-cell>
          <table:table-cell table:formula="of:=[.D1316]-[.D1315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table:formula="of:=[.B1315]+10" office:value-type="float" office:value="13150" calcext:value-type="float">
            <text:p>13150</text:p>
          </table:table-cell>
          <table:table-cell office:value-type="float" office:value="8640000" calcext:value-type="float">
            <text:p>8640000</text:p>
          </table:table-cell>
          <table:table-cell table:formula="of:=[.B1316]/[.C1316]" office:value-type="float" office:value="0.00152199074074074" calcext:value-type="float">
            <text:p>0,00152199074074074000</text:p>
          </table:table-cell>
          <table:table-cell table:formula="of:=[.D1317]-[.D1316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table:formula="of:=[.B1316]+10" office:value-type="float" office:value="13160" calcext:value-type="float">
            <text:p>13160</text:p>
          </table:table-cell>
          <table:table-cell office:value-type="float" office:value="8640000" calcext:value-type="float">
            <text:p>8640000</text:p>
          </table:table-cell>
          <table:table-cell table:formula="of:=[.B1317]/[.C1317]" office:value-type="float" office:value="0.00152314814814815" calcext:value-type="float">
            <text:p>0,00152314814814815000</text:p>
          </table:table-cell>
          <table:table-cell table:formula="of:=[.D1318]-[.D1317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table:formula="of:=[.B1317]+10" office:value-type="float" office:value="13170" calcext:value-type="float">
            <text:p>13170</text:p>
          </table:table-cell>
          <table:table-cell office:value-type="float" office:value="8640000" calcext:value-type="float">
            <text:p>8640000</text:p>
          </table:table-cell>
          <table:table-cell table:formula="of:=[.B1318]/[.C1318]" office:value-type="float" office:value="0.00152430555555556" calcext:value-type="float">
            <text:p>0,00152430555555556000</text:p>
          </table:table-cell>
          <table:table-cell table:formula="of:=[.D1319]-[.D1318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table:formula="of:=[.B1318]+10" office:value-type="float" office:value="13180" calcext:value-type="float">
            <text:p>13180</text:p>
          </table:table-cell>
          <table:table-cell office:value-type="float" office:value="8640000" calcext:value-type="float">
            <text:p>8640000</text:p>
          </table:table-cell>
          <table:table-cell table:formula="of:=[.B1319]/[.C1319]" office:value-type="float" office:value="0.00152546296296296" calcext:value-type="float">
            <text:p>0,00152546296296296000</text:p>
          </table:table-cell>
          <table:table-cell table:formula="of:=[.D1320]-[.D1319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table:formula="of:=[.B1319]+10" office:value-type="float" office:value="13190" calcext:value-type="float">
            <text:p>13190</text:p>
          </table:table-cell>
          <table:table-cell office:value-type="float" office:value="8640000" calcext:value-type="float">
            <text:p>8640000</text:p>
          </table:table-cell>
          <table:table-cell table:formula="of:=[.B1320]/[.C1320]" office:value-type="float" office:value="0.00152662037037037" calcext:value-type="float">
            <text:p>0,00152662037037037000</text:p>
          </table:table-cell>
          <table:table-cell table:formula="of:=[.D1321]-[.D1320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table:formula="of:=[.B1320]+10" office:value-type="float" office:value="13200" calcext:value-type="float">
            <text:p>13200</text:p>
          </table:table-cell>
          <table:table-cell office:value-type="float" office:value="8640000" calcext:value-type="float">
            <text:p>8640000</text:p>
          </table:table-cell>
          <table:table-cell table:formula="of:=[.B1321]/[.C1321]" office:value-type="float" office:value="0.00152777777777778" calcext:value-type="float">
            <text:p>0,00152777777777778000</text:p>
          </table:table-cell>
          <table:table-cell table:formula="of:=[.D1322]-[.D1321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table:formula="of:=[.B1321]+10" office:value-type="float" office:value="13210" calcext:value-type="float">
            <text:p>13210</text:p>
          </table:table-cell>
          <table:table-cell office:value-type="float" office:value="8640000" calcext:value-type="float">
            <text:p>8640000</text:p>
          </table:table-cell>
          <table:table-cell table:formula="of:=[.B1322]/[.C1322]" office:value-type="float" office:value="0.00152893518518519" calcext:value-type="float">
            <text:p>0,00152893518518519000</text:p>
          </table:table-cell>
          <table:table-cell table:formula="of:=[.D1323]-[.D1322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table:formula="of:=[.B1322]+10" office:value-type="float" office:value="13220" calcext:value-type="float">
            <text:p>13220</text:p>
          </table:table-cell>
          <table:table-cell office:value-type="float" office:value="8640000" calcext:value-type="float">
            <text:p>8640000</text:p>
          </table:table-cell>
          <table:table-cell table:formula="of:=[.B1323]/[.C1323]" office:value-type="float" office:value="0.00153009259259259" calcext:value-type="float">
            <text:p>0,00153009259259259000</text:p>
          </table:table-cell>
          <table:table-cell table:formula="of:=[.D1324]-[.D1323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table:formula="of:=[.B1323]+10" office:value-type="float" office:value="13230" calcext:value-type="float">
            <text:p>13230</text:p>
          </table:table-cell>
          <table:table-cell office:value-type="float" office:value="8640000" calcext:value-type="float">
            <text:p>8640000</text:p>
          </table:table-cell>
          <table:table-cell table:formula="of:=[.B1324]/[.C1324]" office:value-type="float" office:value="0.00153125" calcext:value-type="float">
            <text:p>0,00153125000000000000</text:p>
          </table:table-cell>
          <table:table-cell table:formula="of:=[.D1325]-[.D1324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table:formula="of:=[.B1324]+10" office:value-type="float" office:value="13240" calcext:value-type="float">
            <text:p>13240</text:p>
          </table:table-cell>
          <table:table-cell office:value-type="float" office:value="8640000" calcext:value-type="float">
            <text:p>8640000</text:p>
          </table:table-cell>
          <table:table-cell table:formula="of:=[.B1325]/[.C1325]" office:value-type="float" office:value="0.00153240740740741" calcext:value-type="float">
            <text:p>0,00153240740740741000</text:p>
          </table:table-cell>
          <table:table-cell table:formula="of:=[.D1326]-[.D1325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table:formula="of:=[.B1325]+10" office:value-type="float" office:value="13250" calcext:value-type="float">
            <text:p>13250</text:p>
          </table:table-cell>
          <table:table-cell office:value-type="float" office:value="8640000" calcext:value-type="float">
            <text:p>8640000</text:p>
          </table:table-cell>
          <table:table-cell table:formula="of:=[.B1326]/[.C1326]" office:value-type="float" office:value="0.00153356481481481" calcext:value-type="float">
            <text:p>0,00153356481481481000</text:p>
          </table:table-cell>
          <table:table-cell table:formula="of:=[.D1327]-[.D1326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table:formula="of:=[.B1326]+10" office:value-type="float" office:value="13260" calcext:value-type="float">
            <text:p>13260</text:p>
          </table:table-cell>
          <table:table-cell office:value-type="float" office:value="8640000" calcext:value-type="float">
            <text:p>8640000</text:p>
          </table:table-cell>
          <table:table-cell table:formula="of:=[.B1327]/[.C1327]" office:value-type="float" office:value="0.00153472222222222" calcext:value-type="float">
            <text:p>0,00153472222222222000</text:p>
          </table:table-cell>
          <table:table-cell table:formula="of:=[.D1328]-[.D1327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table:formula="of:=[.B1327]+10" office:value-type="float" office:value="13270" calcext:value-type="float">
            <text:p>13270</text:p>
          </table:table-cell>
          <table:table-cell office:value-type="float" office:value="8640000" calcext:value-type="float">
            <text:p>8640000</text:p>
          </table:table-cell>
          <table:table-cell table:formula="of:=[.B1328]/[.C1328]" office:value-type="float" office:value="0.00153587962962963" calcext:value-type="float">
            <text:p>0,00153587962962963000</text:p>
          </table:table-cell>
          <table:table-cell table:formula="of:=[.D1329]-[.D1328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table:formula="of:=[.B1328]+10" office:value-type="float" office:value="13280" calcext:value-type="float">
            <text:p>13280</text:p>
          </table:table-cell>
          <table:table-cell office:value-type="float" office:value="8640000" calcext:value-type="float">
            <text:p>8640000</text:p>
          </table:table-cell>
          <table:table-cell table:formula="of:=[.B1329]/[.C1329]" office:value-type="float" office:value="0.00153703703703704" calcext:value-type="float">
            <text:p>0,00153703703703704000</text:p>
          </table:table-cell>
          <table:table-cell table:formula="of:=[.D1330]-[.D1329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table:formula="of:=[.B1329]+10" office:value-type="float" office:value="13290" calcext:value-type="float">
            <text:p>13290</text:p>
          </table:table-cell>
          <table:table-cell office:value-type="float" office:value="8640000" calcext:value-type="float">
            <text:p>8640000</text:p>
          </table:table-cell>
          <table:table-cell table:formula="of:=[.B1330]/[.C1330]" office:value-type="float" office:value="0.00153819444444444" calcext:value-type="float">
            <text:p>0,00153819444444444000</text:p>
          </table:table-cell>
          <table:table-cell table:formula="of:=[.D1331]-[.D1330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table:formula="of:=[.B1330]+10" office:value-type="float" office:value="13300" calcext:value-type="float">
            <text:p>13300</text:p>
          </table:table-cell>
          <table:table-cell office:value-type="float" office:value="8640000" calcext:value-type="float">
            <text:p>8640000</text:p>
          </table:table-cell>
          <table:table-cell table:formula="of:=[.B1331]/[.C1331]" office:value-type="float" office:value="0.00153935185185185" calcext:value-type="float">
            <text:p>0,00153935185185185000</text:p>
          </table:table-cell>
          <table:table-cell table:formula="of:=[.D1332]-[.D1331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table:formula="of:=[.B1331]+10" office:value-type="float" office:value="13310" calcext:value-type="float">
            <text:p>13310</text:p>
          </table:table-cell>
          <table:table-cell office:value-type="float" office:value="8640000" calcext:value-type="float">
            <text:p>8640000</text:p>
          </table:table-cell>
          <table:table-cell table:formula="of:=[.B1332]/[.C1332]" office:value-type="float" office:value="0.00154050925925926" calcext:value-type="float">
            <text:p>0,00154050925925926000</text:p>
          </table:table-cell>
          <table:table-cell table:formula="of:=[.D1333]-[.D1332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table:formula="of:=[.B1332]+10" office:value-type="float" office:value="13320" calcext:value-type="float">
            <text:p>13320</text:p>
          </table:table-cell>
          <table:table-cell office:value-type="float" office:value="8640000" calcext:value-type="float">
            <text:p>8640000</text:p>
          </table:table-cell>
          <table:table-cell table:formula="of:=[.B1333]/[.C1333]" office:value-type="float" office:value="0.00154166666666667" calcext:value-type="float">
            <text:p>0,00154166666666667000</text:p>
          </table:table-cell>
          <table:table-cell table:formula="of:=[.D1334]-[.D1333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table:formula="of:=[.B1333]+10" office:value-type="float" office:value="13330" calcext:value-type="float">
            <text:p>13330</text:p>
          </table:table-cell>
          <table:table-cell office:value-type="float" office:value="8640000" calcext:value-type="float">
            <text:p>8640000</text:p>
          </table:table-cell>
          <table:table-cell table:formula="of:=[.B1334]/[.C1334]" office:value-type="float" office:value="0.00154282407407407" calcext:value-type="float">
            <text:p>0,00154282407407407000</text:p>
          </table:table-cell>
          <table:table-cell table:formula="of:=[.D1335]-[.D1334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table:formula="of:=[.B1334]+10" office:value-type="float" office:value="13340" calcext:value-type="float">
            <text:p>13340</text:p>
          </table:table-cell>
          <table:table-cell office:value-type="float" office:value="8640000" calcext:value-type="float">
            <text:p>8640000</text:p>
          </table:table-cell>
          <table:table-cell table:formula="of:=[.B1335]/[.C1335]" office:value-type="float" office:value="0.00154398148148148" calcext:value-type="float">
            <text:p>0,00154398148148148000</text:p>
          </table:table-cell>
          <table:table-cell table:formula="of:=[.D1336]-[.D1335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table:formula="of:=[.B1335]+10" office:value-type="float" office:value="13350" calcext:value-type="float">
            <text:p>13350</text:p>
          </table:table-cell>
          <table:table-cell office:value-type="float" office:value="8640000" calcext:value-type="float">
            <text:p>8640000</text:p>
          </table:table-cell>
          <table:table-cell table:formula="of:=[.B1336]/[.C1336]" office:value-type="float" office:value="0.00154513888888889" calcext:value-type="float">
            <text:p>0,00154513888888889000</text:p>
          </table:table-cell>
          <table:table-cell table:formula="of:=[.D1337]-[.D1336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table:formula="of:=[.B1336]+10" office:value-type="float" office:value="13360" calcext:value-type="float">
            <text:p>13360</text:p>
          </table:table-cell>
          <table:table-cell office:value-type="float" office:value="8640000" calcext:value-type="float">
            <text:p>8640000</text:p>
          </table:table-cell>
          <table:table-cell table:formula="of:=[.B1337]/[.C1337]" office:value-type="float" office:value="0.0015462962962963" calcext:value-type="float">
            <text:p>0,00154629629629630000</text:p>
          </table:table-cell>
          <table:table-cell table:formula="of:=[.D1338]-[.D1337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table:formula="of:=[.B1337]+10" office:value-type="float" office:value="13370" calcext:value-type="float">
            <text:p>13370</text:p>
          </table:table-cell>
          <table:table-cell office:value-type="float" office:value="8640000" calcext:value-type="float">
            <text:p>8640000</text:p>
          </table:table-cell>
          <table:table-cell table:formula="of:=[.B1338]/[.C1338]" office:value-type="float" office:value="0.0015474537037037" calcext:value-type="float">
            <text:p>0,00154745370370370000</text:p>
          </table:table-cell>
          <table:table-cell table:formula="of:=[.D1339]-[.D1338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table:formula="of:=[.B1338]+10" office:value-type="float" office:value="13380" calcext:value-type="float">
            <text:p>13380</text:p>
          </table:table-cell>
          <table:table-cell office:value-type="float" office:value="8640000" calcext:value-type="float">
            <text:p>8640000</text:p>
          </table:table-cell>
          <table:table-cell table:formula="of:=[.B1339]/[.C1339]" office:value-type="float" office:value="0.00154861111111111" calcext:value-type="float">
            <text:p>0,00154861111111111000</text:p>
          </table:table-cell>
          <table:table-cell table:formula="of:=[.D1340]-[.D1339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table:formula="of:=[.B1339]+10" office:value-type="float" office:value="13390" calcext:value-type="float">
            <text:p>13390</text:p>
          </table:table-cell>
          <table:table-cell office:value-type="float" office:value="8640000" calcext:value-type="float">
            <text:p>8640000</text:p>
          </table:table-cell>
          <table:table-cell table:formula="of:=[.B1340]/[.C1340]" office:value-type="float" office:value="0.00154976851851852" calcext:value-type="float">
            <text:p>0,00154976851851852000</text:p>
          </table:table-cell>
          <table:table-cell table:formula="of:=[.D1341]-[.D1340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table:formula="of:=[.B1340]+10" office:value-type="float" office:value="13400" calcext:value-type="float">
            <text:p>13400</text:p>
          </table:table-cell>
          <table:table-cell office:value-type="float" office:value="8640000" calcext:value-type="float">
            <text:p>8640000</text:p>
          </table:table-cell>
          <table:table-cell table:formula="of:=[.B1341]/[.C1341]" office:value-type="float" office:value="0.00155092592592593" calcext:value-type="float">
            <text:p>0,00155092592592593000</text:p>
          </table:table-cell>
          <table:table-cell table:formula="of:=[.D1342]-[.D1341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table:formula="of:=[.B1341]+10" office:value-type="float" office:value="13410" calcext:value-type="float">
            <text:p>13410</text:p>
          </table:table-cell>
          <table:table-cell office:value-type="float" office:value="8640000" calcext:value-type="float">
            <text:p>8640000</text:p>
          </table:table-cell>
          <table:table-cell table:formula="of:=[.B1342]/[.C1342]" office:value-type="float" office:value="0.00155208333333333" calcext:value-type="float">
            <text:p>0,00155208333333333000</text:p>
          </table:table-cell>
          <table:table-cell table:formula="of:=[.D1343]-[.D1342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table:formula="of:=[.B1342]+10" office:value-type="float" office:value="13420" calcext:value-type="float">
            <text:p>13420</text:p>
          </table:table-cell>
          <table:table-cell office:value-type="float" office:value="8640000" calcext:value-type="float">
            <text:p>8640000</text:p>
          </table:table-cell>
          <table:table-cell table:formula="of:=[.B1343]/[.C1343]" office:value-type="float" office:value="0.00155324074074074" calcext:value-type="float">
            <text:p>0,00155324074074074000</text:p>
          </table:table-cell>
          <table:table-cell table:formula="of:=[.D1344]-[.D1343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table:formula="of:=[.B1343]+10" office:value-type="float" office:value="13430" calcext:value-type="float">
            <text:p>13430</text:p>
          </table:table-cell>
          <table:table-cell office:value-type="float" office:value="8640000" calcext:value-type="float">
            <text:p>8640000</text:p>
          </table:table-cell>
          <table:table-cell table:formula="of:=[.B1344]/[.C1344]" office:value-type="float" office:value="0.00155439814814815" calcext:value-type="float">
            <text:p>0,00155439814814815000</text:p>
          </table:table-cell>
          <table:table-cell table:formula="of:=[.D1345]-[.D1344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table:formula="of:=[.B1344]+10" office:value-type="float" office:value="13440" calcext:value-type="float">
            <text:p>13440</text:p>
          </table:table-cell>
          <table:table-cell office:value-type="float" office:value="8640000" calcext:value-type="float">
            <text:p>8640000</text:p>
          </table:table-cell>
          <table:table-cell table:formula="of:=[.B1345]/[.C1345]" office:value-type="float" office:value="0.00155555555555556" calcext:value-type="float">
            <text:p>0,00155555555555556000</text:p>
          </table:table-cell>
          <table:table-cell table:formula="of:=[.D1346]-[.D1345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table:formula="of:=[.B1345]+10" office:value-type="float" office:value="13450" calcext:value-type="float">
            <text:p>13450</text:p>
          </table:table-cell>
          <table:table-cell office:value-type="float" office:value="8640000" calcext:value-type="float">
            <text:p>8640000</text:p>
          </table:table-cell>
          <table:table-cell table:formula="of:=[.B1346]/[.C1346]" office:value-type="float" office:value="0.00155671296296296" calcext:value-type="float">
            <text:p>0,00155671296296296000</text:p>
          </table:table-cell>
          <table:table-cell table:formula="of:=[.D1347]-[.D1346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table:formula="of:=[.B1346]+10" office:value-type="float" office:value="13460" calcext:value-type="float">
            <text:p>13460</text:p>
          </table:table-cell>
          <table:table-cell office:value-type="float" office:value="8640000" calcext:value-type="float">
            <text:p>8640000</text:p>
          </table:table-cell>
          <table:table-cell table:formula="of:=[.B1347]/[.C1347]" office:value-type="float" office:value="0.00155787037037037" calcext:value-type="float">
            <text:p>0,00155787037037037000</text:p>
          </table:table-cell>
          <table:table-cell table:formula="of:=[.D1348]-[.D1347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table:formula="of:=[.B1347]+10" office:value-type="float" office:value="13470" calcext:value-type="float">
            <text:p>13470</text:p>
          </table:table-cell>
          <table:table-cell office:value-type="float" office:value="8640000" calcext:value-type="float">
            <text:p>8640000</text:p>
          </table:table-cell>
          <table:table-cell table:formula="of:=[.B1348]/[.C1348]" office:value-type="float" office:value="0.00155902777777778" calcext:value-type="float">
            <text:p>0,00155902777777778000</text:p>
          </table:table-cell>
          <table:table-cell table:formula="of:=[.D1349]-[.D1348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table:formula="of:=[.B1348]+10" office:value-type="float" office:value="13480" calcext:value-type="float">
            <text:p>13480</text:p>
          </table:table-cell>
          <table:table-cell office:value-type="float" office:value="8640000" calcext:value-type="float">
            <text:p>8640000</text:p>
          </table:table-cell>
          <table:table-cell table:formula="of:=[.B1349]/[.C1349]" office:value-type="float" office:value="0.00156018518518519" calcext:value-type="float">
            <text:p>0,00156018518518519000</text:p>
          </table:table-cell>
          <table:table-cell table:formula="of:=[.D1350]-[.D1349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table:formula="of:=[.B1349]+10" office:value-type="float" office:value="13490" calcext:value-type="float">
            <text:p>13490</text:p>
          </table:table-cell>
          <table:table-cell office:value-type="float" office:value="8640000" calcext:value-type="float">
            <text:p>8640000</text:p>
          </table:table-cell>
          <table:table-cell table:formula="of:=[.B1350]/[.C1350]" office:value-type="float" office:value="0.00156134259259259" calcext:value-type="float">
            <text:p>0,00156134259259259000</text:p>
          </table:table-cell>
          <table:table-cell table:formula="of:=[.D1351]-[.D1350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table:formula="of:=[.B1350]+10" office:value-type="float" office:value="13500" calcext:value-type="float">
            <text:p>13500</text:p>
          </table:table-cell>
          <table:table-cell office:value-type="float" office:value="8640000" calcext:value-type="float">
            <text:p>8640000</text:p>
          </table:table-cell>
          <table:table-cell table:formula="of:=[.B1351]/[.C1351]" office:value-type="float" office:value="0.0015625" calcext:value-type="float">
            <text:p>0,00156250000000000000</text:p>
          </table:table-cell>
          <table:table-cell table:formula="of:=[.D1352]-[.D1351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table:formula="of:=[.B1351]+10" office:value-type="float" office:value="13510" calcext:value-type="float">
            <text:p>13510</text:p>
          </table:table-cell>
          <table:table-cell office:value-type="float" office:value="8640000" calcext:value-type="float">
            <text:p>8640000</text:p>
          </table:table-cell>
          <table:table-cell table:formula="of:=[.B1352]/[.C1352]" office:value-type="float" office:value="0.00156365740740741" calcext:value-type="float">
            <text:p>0,00156365740740741000</text:p>
          </table:table-cell>
          <table:table-cell table:formula="of:=[.D1353]-[.D1352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table:formula="of:=[.B1352]+10" office:value-type="float" office:value="13520" calcext:value-type="float">
            <text:p>13520</text:p>
          </table:table-cell>
          <table:table-cell office:value-type="float" office:value="8640000" calcext:value-type="float">
            <text:p>8640000</text:p>
          </table:table-cell>
          <table:table-cell table:formula="of:=[.B1353]/[.C1353]" office:value-type="float" office:value="0.00156481481481481" calcext:value-type="float">
            <text:p>0,00156481481481482000</text:p>
          </table:table-cell>
          <table:table-cell table:formula="of:=[.D1354]-[.D1353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table:formula="of:=[.B1353]+10" office:value-type="float" office:value="13530" calcext:value-type="float">
            <text:p>13530</text:p>
          </table:table-cell>
          <table:table-cell office:value-type="float" office:value="8640000" calcext:value-type="float">
            <text:p>8640000</text:p>
          </table:table-cell>
          <table:table-cell table:formula="of:=[.B1354]/[.C1354]" office:value-type="float" office:value="0.00156597222222222" calcext:value-type="float">
            <text:p>0,00156597222222222000</text:p>
          </table:table-cell>
          <table:table-cell table:formula="of:=[.D1355]-[.D1354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table:formula="of:=[.B1354]+10" office:value-type="float" office:value="13540" calcext:value-type="float">
            <text:p>13540</text:p>
          </table:table-cell>
          <table:table-cell office:value-type="float" office:value="8640000" calcext:value-type="float">
            <text:p>8640000</text:p>
          </table:table-cell>
          <table:table-cell table:formula="of:=[.B1355]/[.C1355]" office:value-type="float" office:value="0.00156712962962963" calcext:value-type="float">
            <text:p>0,00156712962962963000</text:p>
          </table:table-cell>
          <table:table-cell table:formula="of:=[.D1356]-[.D1355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table:formula="of:=[.B1355]+10" office:value-type="float" office:value="13550" calcext:value-type="float">
            <text:p>13550</text:p>
          </table:table-cell>
          <table:table-cell office:value-type="float" office:value="8640000" calcext:value-type="float">
            <text:p>8640000</text:p>
          </table:table-cell>
          <table:table-cell table:formula="of:=[.B1356]/[.C1356]" office:value-type="float" office:value="0.00156828703703704" calcext:value-type="float">
            <text:p>0,00156828703703704000</text:p>
          </table:table-cell>
          <table:table-cell table:formula="of:=[.D1357]-[.D1356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table:formula="of:=[.B1356]+10" office:value-type="float" office:value="13560" calcext:value-type="float">
            <text:p>13560</text:p>
          </table:table-cell>
          <table:table-cell office:value-type="float" office:value="8640000" calcext:value-type="float">
            <text:p>8640000</text:p>
          </table:table-cell>
          <table:table-cell table:formula="of:=[.B1357]/[.C1357]" office:value-type="float" office:value="0.00156944444444444" calcext:value-type="float">
            <text:p>0,00156944444444444000</text:p>
          </table:table-cell>
          <table:table-cell table:formula="of:=[.D1358]-[.D1357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table:formula="of:=[.B1357]+10" office:value-type="float" office:value="13570" calcext:value-type="float">
            <text:p>13570</text:p>
          </table:table-cell>
          <table:table-cell office:value-type="float" office:value="8640000" calcext:value-type="float">
            <text:p>8640000</text:p>
          </table:table-cell>
          <table:table-cell table:formula="of:=[.B1358]/[.C1358]" office:value-type="float" office:value="0.00157060185185185" calcext:value-type="float">
            <text:p>0,00157060185185185000</text:p>
          </table:table-cell>
          <table:table-cell table:formula="of:=[.D1359]-[.D1358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table:formula="of:=[.B1358]+10" office:value-type="float" office:value="13580" calcext:value-type="float">
            <text:p>13580</text:p>
          </table:table-cell>
          <table:table-cell office:value-type="float" office:value="8640000" calcext:value-type="float">
            <text:p>8640000</text:p>
          </table:table-cell>
          <table:table-cell table:formula="of:=[.B1359]/[.C1359]" office:value-type="float" office:value="0.00157175925925926" calcext:value-type="float">
            <text:p>0,00157175925925926000</text:p>
          </table:table-cell>
          <table:table-cell table:formula="of:=[.D1360]-[.D1359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table:formula="of:=[.B1359]+10" office:value-type="float" office:value="13590" calcext:value-type="float">
            <text:p>13590</text:p>
          </table:table-cell>
          <table:table-cell office:value-type="float" office:value="8640000" calcext:value-type="float">
            <text:p>8640000</text:p>
          </table:table-cell>
          <table:table-cell table:formula="of:=[.B1360]/[.C1360]" office:value-type="float" office:value="0.00157291666666667" calcext:value-type="float">
            <text:p>0,00157291666666667000</text:p>
          </table:table-cell>
          <table:table-cell table:formula="of:=[.D1361]-[.D1360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table:formula="of:=[.B1360]+10" office:value-type="float" office:value="13600" calcext:value-type="float">
            <text:p>13600</text:p>
          </table:table-cell>
          <table:table-cell office:value-type="float" office:value="8640000" calcext:value-type="float">
            <text:p>8640000</text:p>
          </table:table-cell>
          <table:table-cell table:formula="of:=[.B1361]/[.C1361]" office:value-type="float" office:value="0.00157407407407407" calcext:value-type="float">
            <text:p>0,00157407407407407000</text:p>
          </table:table-cell>
          <table:table-cell table:formula="of:=[.D1362]-[.D1361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table:formula="of:=[.B1361]+10" office:value-type="float" office:value="13610" calcext:value-type="float">
            <text:p>13610</text:p>
          </table:table-cell>
          <table:table-cell office:value-type="float" office:value="8640000" calcext:value-type="float">
            <text:p>8640000</text:p>
          </table:table-cell>
          <table:table-cell table:formula="of:=[.B1362]/[.C1362]" office:value-type="float" office:value="0.00157523148148148" calcext:value-type="float">
            <text:p>0,00157523148148148000</text:p>
          </table:table-cell>
          <table:table-cell table:formula="of:=[.D1363]-[.D1362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table:formula="of:=[.B1362]+10" office:value-type="float" office:value="13620" calcext:value-type="float">
            <text:p>13620</text:p>
          </table:table-cell>
          <table:table-cell office:value-type="float" office:value="8640000" calcext:value-type="float">
            <text:p>8640000</text:p>
          </table:table-cell>
          <table:table-cell table:formula="of:=[.B1363]/[.C1363]" office:value-type="float" office:value="0.00157638888888889" calcext:value-type="float">
            <text:p>0,00157638888888889000</text:p>
          </table:table-cell>
          <table:table-cell table:formula="of:=[.D1364]-[.D1363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table:formula="of:=[.B1363]+10" office:value-type="float" office:value="13630" calcext:value-type="float">
            <text:p>13630</text:p>
          </table:table-cell>
          <table:table-cell office:value-type="float" office:value="8640000" calcext:value-type="float">
            <text:p>8640000</text:p>
          </table:table-cell>
          <table:table-cell table:formula="of:=[.B1364]/[.C1364]" office:value-type="float" office:value="0.0015775462962963" calcext:value-type="float">
            <text:p>0,00157754629629630000</text:p>
          </table:table-cell>
          <table:table-cell table:formula="of:=[.D1365]-[.D1364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table:formula="of:=[.B1364]+10" office:value-type="float" office:value="13640" calcext:value-type="float">
            <text:p>13640</text:p>
          </table:table-cell>
          <table:table-cell office:value-type="float" office:value="8640000" calcext:value-type="float">
            <text:p>8640000</text:p>
          </table:table-cell>
          <table:table-cell table:formula="of:=[.B1365]/[.C1365]" office:value-type="float" office:value="0.0015787037037037" calcext:value-type="float">
            <text:p>0,00157870370370370000</text:p>
          </table:table-cell>
          <table:table-cell table:formula="of:=[.D1366]-[.D1365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table:formula="of:=[.B1365]+10" office:value-type="float" office:value="13650" calcext:value-type="float">
            <text:p>13650</text:p>
          </table:table-cell>
          <table:table-cell office:value-type="float" office:value="8640000" calcext:value-type="float">
            <text:p>8640000</text:p>
          </table:table-cell>
          <table:table-cell table:formula="of:=[.B1366]/[.C1366]" office:value-type="float" office:value="0.00157986111111111" calcext:value-type="float">
            <text:p>0,00157986111111111000</text:p>
          </table:table-cell>
          <table:table-cell table:formula="of:=[.D1367]-[.D1366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table:formula="of:=[.B1366]+10" office:value-type="float" office:value="13660" calcext:value-type="float">
            <text:p>13660</text:p>
          </table:table-cell>
          <table:table-cell office:value-type="float" office:value="8640000" calcext:value-type="float">
            <text:p>8640000</text:p>
          </table:table-cell>
          <table:table-cell table:formula="of:=[.B1367]/[.C1367]" office:value-type="float" office:value="0.00158101851851852" calcext:value-type="float">
            <text:p>0,00158101851851852000</text:p>
          </table:table-cell>
          <table:table-cell table:formula="of:=[.D1368]-[.D1367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table:formula="of:=[.B1367]+10" office:value-type="float" office:value="13670" calcext:value-type="float">
            <text:p>13670</text:p>
          </table:table-cell>
          <table:table-cell office:value-type="float" office:value="8640000" calcext:value-type="float">
            <text:p>8640000</text:p>
          </table:table-cell>
          <table:table-cell table:formula="of:=[.B1368]/[.C1368]" office:value-type="float" office:value="0.00158217592592593" calcext:value-type="float">
            <text:p>0,00158217592592593000</text:p>
          </table:table-cell>
          <table:table-cell table:formula="of:=[.D1369]-[.D1368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table:formula="of:=[.B1368]+10" office:value-type="float" office:value="13680" calcext:value-type="float">
            <text:p>13680</text:p>
          </table:table-cell>
          <table:table-cell office:value-type="float" office:value="8640000" calcext:value-type="float">
            <text:p>8640000</text:p>
          </table:table-cell>
          <table:table-cell table:formula="of:=[.B1369]/[.C1369]" office:value-type="float" office:value="0.00158333333333333" calcext:value-type="float">
            <text:p>0,00158333333333333000</text:p>
          </table:table-cell>
          <table:table-cell table:formula="of:=[.D1370]-[.D1369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table:formula="of:=[.B1369]+10" office:value-type="float" office:value="13690" calcext:value-type="float">
            <text:p>13690</text:p>
          </table:table-cell>
          <table:table-cell office:value-type="float" office:value="8640000" calcext:value-type="float">
            <text:p>8640000</text:p>
          </table:table-cell>
          <table:table-cell table:formula="of:=[.B1370]/[.C1370]" office:value-type="float" office:value="0.00158449074074074" calcext:value-type="float">
            <text:p>0,00158449074074074000</text:p>
          </table:table-cell>
          <table:table-cell table:formula="of:=[.D1371]-[.D1370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table:formula="of:=[.B1370]+10" office:value-type="float" office:value="13700" calcext:value-type="float">
            <text:p>13700</text:p>
          </table:table-cell>
          <table:table-cell office:value-type="float" office:value="8640000" calcext:value-type="float">
            <text:p>8640000</text:p>
          </table:table-cell>
          <table:table-cell table:formula="of:=[.B1371]/[.C1371]" office:value-type="float" office:value="0.00158564814814815" calcext:value-type="float">
            <text:p>0,00158564814814815000</text:p>
          </table:table-cell>
          <table:table-cell table:formula="of:=[.D1372]-[.D1371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table:formula="of:=[.B1371]+10" office:value-type="float" office:value="13710" calcext:value-type="float">
            <text:p>13710</text:p>
          </table:table-cell>
          <table:table-cell office:value-type="float" office:value="8640000" calcext:value-type="float">
            <text:p>8640000</text:p>
          </table:table-cell>
          <table:table-cell table:formula="of:=[.B1372]/[.C1372]" office:value-type="float" office:value="0.00158680555555556" calcext:value-type="float">
            <text:p>0,00158680555555556000</text:p>
          </table:table-cell>
          <table:table-cell table:formula="of:=[.D1373]-[.D1372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table:formula="of:=[.B1372]+10" office:value-type="float" office:value="13720" calcext:value-type="float">
            <text:p>13720</text:p>
          </table:table-cell>
          <table:table-cell office:value-type="float" office:value="8640000" calcext:value-type="float">
            <text:p>8640000</text:p>
          </table:table-cell>
          <table:table-cell table:formula="of:=[.B1373]/[.C1373]" office:value-type="float" office:value="0.00158796296296296" calcext:value-type="float">
            <text:p>0,00158796296296296000</text:p>
          </table:table-cell>
          <table:table-cell table:formula="of:=[.D1374]-[.D1373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table:formula="of:=[.B1373]+10" office:value-type="float" office:value="13730" calcext:value-type="float">
            <text:p>13730</text:p>
          </table:table-cell>
          <table:table-cell office:value-type="float" office:value="8640000" calcext:value-type="float">
            <text:p>8640000</text:p>
          </table:table-cell>
          <table:table-cell table:formula="of:=[.B1374]/[.C1374]" office:value-type="float" office:value="0.00158912037037037" calcext:value-type="float">
            <text:p>0,00158912037037037000</text:p>
          </table:table-cell>
          <table:table-cell table:formula="of:=[.D1375]-[.D1374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table:formula="of:=[.B1374]+10" office:value-type="float" office:value="13740" calcext:value-type="float">
            <text:p>13740</text:p>
          </table:table-cell>
          <table:table-cell office:value-type="float" office:value="8640000" calcext:value-type="float">
            <text:p>8640000</text:p>
          </table:table-cell>
          <table:table-cell table:formula="of:=[.B1375]/[.C1375]" office:value-type="float" office:value="0.00159027777777778" calcext:value-type="float">
            <text:p>0,00159027777777778000</text:p>
          </table:table-cell>
          <table:table-cell table:formula="of:=[.D1376]-[.D1375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table:formula="of:=[.B1375]+10" office:value-type="float" office:value="13750" calcext:value-type="float">
            <text:p>13750</text:p>
          </table:table-cell>
          <table:table-cell office:value-type="float" office:value="8640000" calcext:value-type="float">
            <text:p>8640000</text:p>
          </table:table-cell>
          <table:table-cell table:formula="of:=[.B1376]/[.C1376]" office:value-type="float" office:value="0.00159143518518519" calcext:value-type="float">
            <text:p>0,00159143518518518000</text:p>
          </table:table-cell>
          <table:table-cell table:formula="of:=[.D1377]-[.D1376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table:formula="of:=[.B1376]+10" office:value-type="float" office:value="13760" calcext:value-type="float">
            <text:p>13760</text:p>
          </table:table-cell>
          <table:table-cell office:value-type="float" office:value="8640000" calcext:value-type="float">
            <text:p>8640000</text:p>
          </table:table-cell>
          <table:table-cell table:formula="of:=[.B1377]/[.C1377]" office:value-type="float" office:value="0.00159259259259259" calcext:value-type="float">
            <text:p>0,00159259259259259000</text:p>
          </table:table-cell>
          <table:table-cell table:formula="of:=[.D1378]-[.D1377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table:formula="of:=[.B1377]+10" office:value-type="float" office:value="13770" calcext:value-type="float">
            <text:p>13770</text:p>
          </table:table-cell>
          <table:table-cell office:value-type="float" office:value="8640000" calcext:value-type="float">
            <text:p>8640000</text:p>
          </table:table-cell>
          <table:table-cell table:formula="of:=[.B1378]/[.C1378]" office:value-type="float" office:value="0.00159375" calcext:value-type="float">
            <text:p>0,00159375000000000000</text:p>
          </table:table-cell>
          <table:table-cell table:formula="of:=[.D1379]-[.D1378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table:formula="of:=[.B1378]+10" office:value-type="float" office:value="13780" calcext:value-type="float">
            <text:p>13780</text:p>
          </table:table-cell>
          <table:table-cell office:value-type="float" office:value="8640000" calcext:value-type="float">
            <text:p>8640000</text:p>
          </table:table-cell>
          <table:table-cell table:formula="of:=[.B1379]/[.C1379]" office:value-type="float" office:value="0.00159490740740741" calcext:value-type="float">
            <text:p>0,00159490740740741000</text:p>
          </table:table-cell>
          <table:table-cell table:formula="of:=[.D1380]-[.D1379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table:formula="of:=[.B1379]+10" office:value-type="float" office:value="13790" calcext:value-type="float">
            <text:p>13790</text:p>
          </table:table-cell>
          <table:table-cell office:value-type="float" office:value="8640000" calcext:value-type="float">
            <text:p>8640000</text:p>
          </table:table-cell>
          <table:table-cell table:formula="of:=[.B1380]/[.C1380]" office:value-type="float" office:value="0.00159606481481482" calcext:value-type="float">
            <text:p>0,00159606481481482000</text:p>
          </table:table-cell>
          <table:table-cell table:formula="of:=[.D1381]-[.D1380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table:formula="of:=[.B1380]+10" office:value-type="float" office:value="13800" calcext:value-type="float">
            <text:p>13800</text:p>
          </table:table-cell>
          <table:table-cell office:value-type="float" office:value="8640000" calcext:value-type="float">
            <text:p>8640000</text:p>
          </table:table-cell>
          <table:table-cell table:formula="of:=[.B1381]/[.C1381]" office:value-type="float" office:value="0.00159722222222222" calcext:value-type="float">
            <text:p>0,00159722222222222000</text:p>
          </table:table-cell>
          <table:table-cell table:formula="of:=[.D1382]-[.D1381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table:formula="of:=[.B1381]+10" office:value-type="float" office:value="13810" calcext:value-type="float">
            <text:p>13810</text:p>
          </table:table-cell>
          <table:table-cell office:value-type="float" office:value="8640000" calcext:value-type="float">
            <text:p>8640000</text:p>
          </table:table-cell>
          <table:table-cell table:formula="of:=[.B1382]/[.C1382]" office:value-type="float" office:value="0.00159837962962963" calcext:value-type="float">
            <text:p>0,00159837962962963000</text:p>
          </table:table-cell>
          <table:table-cell table:formula="of:=[.D1383]-[.D1382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table:formula="of:=[.B1382]+10" office:value-type="float" office:value="13820" calcext:value-type="float">
            <text:p>13820</text:p>
          </table:table-cell>
          <table:table-cell office:value-type="float" office:value="8640000" calcext:value-type="float">
            <text:p>8640000</text:p>
          </table:table-cell>
          <table:table-cell table:formula="of:=[.B1383]/[.C1383]" office:value-type="float" office:value="0.00159953703703704" calcext:value-type="float">
            <text:p>0,00159953703703704000</text:p>
          </table:table-cell>
          <table:table-cell table:formula="of:=[.D1384]-[.D1383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table:formula="of:=[.B1383]+10" office:value-type="float" office:value="13830" calcext:value-type="float">
            <text:p>13830</text:p>
          </table:table-cell>
          <table:table-cell office:value-type="float" office:value="8640000" calcext:value-type="float">
            <text:p>8640000</text:p>
          </table:table-cell>
          <table:table-cell table:formula="of:=[.B1384]/[.C1384]" office:value-type="float" office:value="0.00160069444444444" calcext:value-type="float">
            <text:p>0,00160069444444444000</text:p>
          </table:table-cell>
          <table:table-cell table:formula="of:=[.D1385]-[.D1384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table:formula="of:=[.B1384]+10" office:value-type="float" office:value="13840" calcext:value-type="float">
            <text:p>13840</text:p>
          </table:table-cell>
          <table:table-cell office:value-type="float" office:value="8640000" calcext:value-type="float">
            <text:p>8640000</text:p>
          </table:table-cell>
          <table:table-cell table:formula="of:=[.B1385]/[.C1385]" office:value-type="float" office:value="0.00160185185185185" calcext:value-type="float">
            <text:p>0,00160185185185185000</text:p>
          </table:table-cell>
          <table:table-cell table:formula="of:=[.D1386]-[.D1385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table:formula="of:=[.B1385]+10" office:value-type="float" office:value="13850" calcext:value-type="float">
            <text:p>13850</text:p>
          </table:table-cell>
          <table:table-cell office:value-type="float" office:value="8640000" calcext:value-type="float">
            <text:p>8640000</text:p>
          </table:table-cell>
          <table:table-cell table:formula="of:=[.B1386]/[.C1386]" office:value-type="float" office:value="0.00160300925925926" calcext:value-type="float">
            <text:p>0,00160300925925926000</text:p>
          </table:table-cell>
          <table:table-cell table:formula="of:=[.D1387]-[.D1386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table:formula="of:=[.B1386]+10" office:value-type="float" office:value="13860" calcext:value-type="float">
            <text:p>13860</text:p>
          </table:table-cell>
          <table:table-cell office:value-type="float" office:value="8640000" calcext:value-type="float">
            <text:p>8640000</text:p>
          </table:table-cell>
          <table:table-cell table:formula="of:=[.B1387]/[.C1387]" office:value-type="float" office:value="0.00160416666666667" calcext:value-type="float">
            <text:p>0,00160416666666667000</text:p>
          </table:table-cell>
          <table:table-cell table:formula="of:=[.D1388]-[.D1387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table:formula="of:=[.B1387]+10" office:value-type="float" office:value="13870" calcext:value-type="float">
            <text:p>13870</text:p>
          </table:table-cell>
          <table:table-cell office:value-type="float" office:value="8640000" calcext:value-type="float">
            <text:p>8640000</text:p>
          </table:table-cell>
          <table:table-cell table:formula="of:=[.B1388]/[.C1388]" office:value-type="float" office:value="0.00160532407407407" calcext:value-type="float">
            <text:p>0,00160532407407407000</text:p>
          </table:table-cell>
          <table:table-cell table:formula="of:=[.D1389]-[.D1388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table:formula="of:=[.B1388]+10" office:value-type="float" office:value="13880" calcext:value-type="float">
            <text:p>13880</text:p>
          </table:table-cell>
          <table:table-cell office:value-type="float" office:value="8640000" calcext:value-type="float">
            <text:p>8640000</text:p>
          </table:table-cell>
          <table:table-cell table:formula="of:=[.B1389]/[.C1389]" office:value-type="float" office:value="0.00160648148148148" calcext:value-type="float">
            <text:p>0,00160648148148148000</text:p>
          </table:table-cell>
          <table:table-cell table:formula="of:=[.D1390]-[.D1389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table:formula="of:=[.B1389]+10" office:value-type="float" office:value="13890" calcext:value-type="float">
            <text:p>13890</text:p>
          </table:table-cell>
          <table:table-cell office:value-type="float" office:value="8640000" calcext:value-type="float">
            <text:p>8640000</text:p>
          </table:table-cell>
          <table:table-cell table:formula="of:=[.B1390]/[.C1390]" office:value-type="float" office:value="0.00160763888888889" calcext:value-type="float">
            <text:p>0,00160763888888889000</text:p>
          </table:table-cell>
          <table:table-cell table:formula="of:=[.D1391]-[.D1390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table:formula="of:=[.B1390]+10" office:value-type="float" office:value="13900" calcext:value-type="float">
            <text:p>13900</text:p>
          </table:table-cell>
          <table:table-cell office:value-type="float" office:value="8640000" calcext:value-type="float">
            <text:p>8640000</text:p>
          </table:table-cell>
          <table:table-cell table:formula="of:=[.B1391]/[.C1391]" office:value-type="float" office:value="0.0016087962962963" calcext:value-type="float">
            <text:p>0,00160879629629630000</text:p>
          </table:table-cell>
          <table:table-cell table:formula="of:=[.D1392]-[.D1391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table:formula="of:=[.B1391]+10" office:value-type="float" office:value="13910" calcext:value-type="float">
            <text:p>13910</text:p>
          </table:table-cell>
          <table:table-cell office:value-type="float" office:value="8640000" calcext:value-type="float">
            <text:p>8640000</text:p>
          </table:table-cell>
          <table:table-cell table:formula="of:=[.B1392]/[.C1392]" office:value-type="float" office:value="0.0016099537037037" calcext:value-type="float">
            <text:p>0,00160995370370370000</text:p>
          </table:table-cell>
          <table:table-cell table:formula="of:=[.D1393]-[.D1392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table:formula="of:=[.B1392]+10" office:value-type="float" office:value="13920" calcext:value-type="float">
            <text:p>13920</text:p>
          </table:table-cell>
          <table:table-cell office:value-type="float" office:value="8640000" calcext:value-type="float">
            <text:p>8640000</text:p>
          </table:table-cell>
          <table:table-cell table:formula="of:=[.B1393]/[.C1393]" office:value-type="float" office:value="0.00161111111111111" calcext:value-type="float">
            <text:p>0,00161111111111111000</text:p>
          </table:table-cell>
          <table:table-cell table:formula="of:=[.D1394]-[.D1393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table:formula="of:=[.B1393]+10" office:value-type="float" office:value="13930" calcext:value-type="float">
            <text:p>13930</text:p>
          </table:table-cell>
          <table:table-cell office:value-type="float" office:value="8640000" calcext:value-type="float">
            <text:p>8640000</text:p>
          </table:table-cell>
          <table:table-cell table:formula="of:=[.B1394]/[.C1394]" office:value-type="float" office:value="0.00161226851851852" calcext:value-type="float">
            <text:p>0,00161226851851852000</text:p>
          </table:table-cell>
          <table:table-cell table:formula="of:=[.D1395]-[.D1394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table:formula="of:=[.B1394]+10" office:value-type="float" office:value="13940" calcext:value-type="float">
            <text:p>13940</text:p>
          </table:table-cell>
          <table:table-cell office:value-type="float" office:value="8640000" calcext:value-type="float">
            <text:p>8640000</text:p>
          </table:table-cell>
          <table:table-cell table:formula="of:=[.B1395]/[.C1395]" office:value-type="float" office:value="0.00161342592592593" calcext:value-type="float">
            <text:p>0,00161342592592593000</text:p>
          </table:table-cell>
          <table:table-cell table:formula="of:=[.D1396]-[.D1395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table:formula="of:=[.B1395]+10" office:value-type="float" office:value="13950" calcext:value-type="float">
            <text:p>13950</text:p>
          </table:table-cell>
          <table:table-cell office:value-type="float" office:value="8640000" calcext:value-type="float">
            <text:p>8640000</text:p>
          </table:table-cell>
          <table:table-cell table:formula="of:=[.B1396]/[.C1396]" office:value-type="float" office:value="0.00161458333333333" calcext:value-type="float">
            <text:p>0,00161458333333333000</text:p>
          </table:table-cell>
          <table:table-cell table:formula="of:=[.D1397]-[.D1396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table:formula="of:=[.B1396]+10" office:value-type="float" office:value="13960" calcext:value-type="float">
            <text:p>13960</text:p>
          </table:table-cell>
          <table:table-cell office:value-type="float" office:value="8640000" calcext:value-type="float">
            <text:p>8640000</text:p>
          </table:table-cell>
          <table:table-cell table:formula="of:=[.B1397]/[.C1397]" office:value-type="float" office:value="0.00161574074074074" calcext:value-type="float">
            <text:p>0,00161574074074074000</text:p>
          </table:table-cell>
          <table:table-cell table:formula="of:=[.D1398]-[.D1397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table:formula="of:=[.B1397]+10" office:value-type="float" office:value="13970" calcext:value-type="float">
            <text:p>13970</text:p>
          </table:table-cell>
          <table:table-cell office:value-type="float" office:value="8640000" calcext:value-type="float">
            <text:p>8640000</text:p>
          </table:table-cell>
          <table:table-cell table:formula="of:=[.B1398]/[.C1398]" office:value-type="float" office:value="0.00161689814814815" calcext:value-type="float">
            <text:p>0,00161689814814815000</text:p>
          </table:table-cell>
          <table:table-cell table:formula="of:=[.D1399]-[.D1398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table:formula="of:=[.B1398]+10" office:value-type="float" office:value="13980" calcext:value-type="float">
            <text:p>13980</text:p>
          </table:table-cell>
          <table:table-cell office:value-type="float" office:value="8640000" calcext:value-type="float">
            <text:p>8640000</text:p>
          </table:table-cell>
          <table:table-cell table:formula="of:=[.B1399]/[.C1399]" office:value-type="float" office:value="0.00161805555555556" calcext:value-type="float">
            <text:p>0,00161805555555556000</text:p>
          </table:table-cell>
          <table:table-cell table:formula="of:=[.D1400]-[.D1399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table:formula="of:=[.B1399]+10" office:value-type="float" office:value="13990" calcext:value-type="float">
            <text:p>13990</text:p>
          </table:table-cell>
          <table:table-cell office:value-type="float" office:value="8640000" calcext:value-type="float">
            <text:p>8640000</text:p>
          </table:table-cell>
          <table:table-cell table:formula="of:=[.B1400]/[.C1400]" office:value-type="float" office:value="0.00161921296296296" calcext:value-type="float">
            <text:p>0,00161921296296296000</text:p>
          </table:table-cell>
          <table:table-cell table:formula="of:=[.D1401]-[.D1400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table:formula="of:=[.B1400]+10" office:value-type="float" office:value="14000" calcext:value-type="float">
            <text:p>14000</text:p>
          </table:table-cell>
          <table:table-cell office:value-type="float" office:value="8640000" calcext:value-type="float">
            <text:p>8640000</text:p>
          </table:table-cell>
          <table:table-cell table:formula="of:=[.B1401]/[.C1401]" office:value-type="float" office:value="0.00162037037037037" calcext:value-type="float">
            <text:p>0,00162037037037037000</text:p>
          </table:table-cell>
          <table:table-cell table:formula="of:=[.D1402]-[.D1401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table:formula="of:=[.B1401]+10" office:value-type="float" office:value="14010" calcext:value-type="float">
            <text:p>14010</text:p>
          </table:table-cell>
          <table:table-cell office:value-type="float" office:value="8640000" calcext:value-type="float">
            <text:p>8640000</text:p>
          </table:table-cell>
          <table:table-cell table:formula="of:=[.B1402]/[.C1402]" office:value-type="float" office:value="0.00162152777777778" calcext:value-type="float">
            <text:p>0,00162152777777778000</text:p>
          </table:table-cell>
          <table:table-cell table:formula="of:=[.D1403]-[.D1402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table:formula="of:=[.B1402]+10" office:value-type="float" office:value="14020" calcext:value-type="float">
            <text:p>14020</text:p>
          </table:table-cell>
          <table:table-cell office:value-type="float" office:value="8640000" calcext:value-type="float">
            <text:p>8640000</text:p>
          </table:table-cell>
          <table:table-cell table:formula="of:=[.B1403]/[.C1403]" office:value-type="float" office:value="0.00162268518518519" calcext:value-type="float">
            <text:p>0,00162268518518519000</text:p>
          </table:table-cell>
          <table:table-cell table:formula="of:=[.D1404]-[.D1403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table:formula="of:=[.B1403]+10" office:value-type="float" office:value="14030" calcext:value-type="float">
            <text:p>14030</text:p>
          </table:table-cell>
          <table:table-cell office:value-type="float" office:value="8640000" calcext:value-type="float">
            <text:p>8640000</text:p>
          </table:table-cell>
          <table:table-cell table:formula="of:=[.B1404]/[.C1404]" office:value-type="float" office:value="0.00162384259259259" calcext:value-type="float">
            <text:p>0,00162384259259259000</text:p>
          </table:table-cell>
          <table:table-cell table:formula="of:=[.D1405]-[.D1404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table:formula="of:=[.B1404]+10" office:value-type="float" office:value="14040" calcext:value-type="float">
            <text:p>14040</text:p>
          </table:table-cell>
          <table:table-cell office:value-type="float" office:value="8640000" calcext:value-type="float">
            <text:p>8640000</text:p>
          </table:table-cell>
          <table:table-cell table:formula="of:=[.B1405]/[.C1405]" office:value-type="float" office:value="0.001625" calcext:value-type="float">
            <text:p>0,00162500000000000000</text:p>
          </table:table-cell>
          <table:table-cell table:formula="of:=[.D1406]-[.D1405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table:formula="of:=[.B1405]+10" office:value-type="float" office:value="14050" calcext:value-type="float">
            <text:p>14050</text:p>
          </table:table-cell>
          <table:table-cell office:value-type="float" office:value="8640000" calcext:value-type="float">
            <text:p>8640000</text:p>
          </table:table-cell>
          <table:table-cell table:formula="of:=[.B1406]/[.C1406]" office:value-type="float" office:value="0.00162615740740741" calcext:value-type="float">
            <text:p>0,00162615740740741000</text:p>
          </table:table-cell>
          <table:table-cell table:formula="of:=[.D1407]-[.D1406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table:formula="of:=[.B1406]+10" office:value-type="float" office:value="14060" calcext:value-type="float">
            <text:p>14060</text:p>
          </table:table-cell>
          <table:table-cell office:value-type="float" office:value="8640000" calcext:value-type="float">
            <text:p>8640000</text:p>
          </table:table-cell>
          <table:table-cell table:formula="of:=[.B1407]/[.C1407]" office:value-type="float" office:value="0.00162731481481481" calcext:value-type="float">
            <text:p>0,00162731481481481000</text:p>
          </table:table-cell>
          <table:table-cell table:formula="of:=[.D1408]-[.D1407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table:formula="of:=[.B1407]+10" office:value-type="float" office:value="14070" calcext:value-type="float">
            <text:p>14070</text:p>
          </table:table-cell>
          <table:table-cell office:value-type="float" office:value="8640000" calcext:value-type="float">
            <text:p>8640000</text:p>
          </table:table-cell>
          <table:table-cell table:formula="of:=[.B1408]/[.C1408]" office:value-type="float" office:value="0.00162847222222222" calcext:value-type="float">
            <text:p>0,00162847222222222000</text:p>
          </table:table-cell>
          <table:table-cell table:formula="of:=[.D1409]-[.D1408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table:formula="of:=[.B1408]+10" office:value-type="float" office:value="14080" calcext:value-type="float">
            <text:p>14080</text:p>
          </table:table-cell>
          <table:table-cell office:value-type="float" office:value="8640000" calcext:value-type="float">
            <text:p>8640000</text:p>
          </table:table-cell>
          <table:table-cell table:formula="of:=[.B1409]/[.C1409]" office:value-type="float" office:value="0.00162962962962963" calcext:value-type="float">
            <text:p>0,00162962962962963000</text:p>
          </table:table-cell>
          <table:table-cell table:formula="of:=[.D1410]-[.D1409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table:formula="of:=[.B1409]+10" office:value-type="float" office:value="14090" calcext:value-type="float">
            <text:p>14090</text:p>
          </table:table-cell>
          <table:table-cell office:value-type="float" office:value="8640000" calcext:value-type="float">
            <text:p>8640000</text:p>
          </table:table-cell>
          <table:table-cell table:formula="of:=[.B1410]/[.C1410]" office:value-type="float" office:value="0.00163078703703704" calcext:value-type="float">
            <text:p>0,00163078703703704000</text:p>
          </table:table-cell>
          <table:table-cell table:formula="of:=[.D1411]-[.D1410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table:formula="of:=[.B1410]+10" office:value-type="float" office:value="14100" calcext:value-type="float">
            <text:p>14100</text:p>
          </table:table-cell>
          <table:table-cell office:value-type="float" office:value="8640000" calcext:value-type="float">
            <text:p>8640000</text:p>
          </table:table-cell>
          <table:table-cell table:formula="of:=[.B1411]/[.C1411]" office:value-type="float" office:value="0.00163194444444444" calcext:value-type="float">
            <text:p>0,00163194444444444000</text:p>
          </table:table-cell>
          <table:table-cell table:formula="of:=[.D1412]-[.D1411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table:formula="of:=[.B1411]+10" office:value-type="float" office:value="14110" calcext:value-type="float">
            <text:p>14110</text:p>
          </table:table-cell>
          <table:table-cell office:value-type="float" office:value="8640000" calcext:value-type="float">
            <text:p>8640000</text:p>
          </table:table-cell>
          <table:table-cell table:formula="of:=[.B1412]/[.C1412]" office:value-type="float" office:value="0.00163310185185185" calcext:value-type="float">
            <text:p>0,00163310185185185000</text:p>
          </table:table-cell>
          <table:table-cell table:formula="of:=[.D1413]-[.D1412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table:formula="of:=[.B1412]+10" office:value-type="float" office:value="14120" calcext:value-type="float">
            <text:p>14120</text:p>
          </table:table-cell>
          <table:table-cell office:value-type="float" office:value="8640000" calcext:value-type="float">
            <text:p>8640000</text:p>
          </table:table-cell>
          <table:table-cell table:formula="of:=[.B1413]/[.C1413]" office:value-type="float" office:value="0.00163425925925926" calcext:value-type="float">
            <text:p>0,00163425925925926000</text:p>
          </table:table-cell>
          <table:table-cell table:formula="of:=[.D1414]-[.D1413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table:formula="of:=[.B1413]+10" office:value-type="float" office:value="14130" calcext:value-type="float">
            <text:p>14130</text:p>
          </table:table-cell>
          <table:table-cell office:value-type="float" office:value="8640000" calcext:value-type="float">
            <text:p>8640000</text:p>
          </table:table-cell>
          <table:table-cell table:formula="of:=[.B1414]/[.C1414]" office:value-type="float" office:value="0.00163541666666667" calcext:value-type="float">
            <text:p>0,00163541666666667000</text:p>
          </table:table-cell>
          <table:table-cell table:formula="of:=[.D1415]-[.D1414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table:formula="of:=[.B1414]+10" office:value-type="float" office:value="14140" calcext:value-type="float">
            <text:p>14140</text:p>
          </table:table-cell>
          <table:table-cell office:value-type="float" office:value="8640000" calcext:value-type="float">
            <text:p>8640000</text:p>
          </table:table-cell>
          <table:table-cell table:formula="of:=[.B1415]/[.C1415]" office:value-type="float" office:value="0.00163657407407407" calcext:value-type="float">
            <text:p>0,00163657407407407000</text:p>
          </table:table-cell>
          <table:table-cell table:formula="of:=[.D1416]-[.D1415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table:formula="of:=[.B1415]+10" office:value-type="float" office:value="14150" calcext:value-type="float">
            <text:p>14150</text:p>
          </table:table-cell>
          <table:table-cell office:value-type="float" office:value="8640000" calcext:value-type="float">
            <text:p>8640000</text:p>
          </table:table-cell>
          <table:table-cell table:formula="of:=[.B1416]/[.C1416]" office:value-type="float" office:value="0.00163773148148148" calcext:value-type="float">
            <text:p>0,00163773148148148000</text:p>
          </table:table-cell>
          <table:table-cell table:formula="of:=[.D1417]-[.D1416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table:formula="of:=[.B1416]+10" office:value-type="float" office:value="14160" calcext:value-type="float">
            <text:p>14160</text:p>
          </table:table-cell>
          <table:table-cell office:value-type="float" office:value="8640000" calcext:value-type="float">
            <text:p>8640000</text:p>
          </table:table-cell>
          <table:table-cell table:formula="of:=[.B1417]/[.C1417]" office:value-type="float" office:value="0.00163888888888889" calcext:value-type="float">
            <text:p>0,00163888888888889000</text:p>
          </table:table-cell>
          <table:table-cell table:formula="of:=[.D1418]-[.D1417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table:formula="of:=[.B1417]+10" office:value-type="float" office:value="14170" calcext:value-type="float">
            <text:p>14170</text:p>
          </table:table-cell>
          <table:table-cell office:value-type="float" office:value="8640000" calcext:value-type="float">
            <text:p>8640000</text:p>
          </table:table-cell>
          <table:table-cell table:formula="of:=[.B1418]/[.C1418]" office:value-type="float" office:value="0.0016400462962963" calcext:value-type="float">
            <text:p>0,00164004629629630000</text:p>
          </table:table-cell>
          <table:table-cell table:formula="of:=[.D1419]-[.D1418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table:formula="of:=[.B1418]+10" office:value-type="float" office:value="14180" calcext:value-type="float">
            <text:p>14180</text:p>
          </table:table-cell>
          <table:table-cell office:value-type="float" office:value="8640000" calcext:value-type="float">
            <text:p>8640000</text:p>
          </table:table-cell>
          <table:table-cell table:formula="of:=[.B1419]/[.C1419]" office:value-type="float" office:value="0.0016412037037037" calcext:value-type="float">
            <text:p>0,00164120370370370000</text:p>
          </table:table-cell>
          <table:table-cell table:formula="of:=[.D1420]-[.D1419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table:formula="of:=[.B1419]+10" office:value-type="float" office:value="14190" calcext:value-type="float">
            <text:p>14190</text:p>
          </table:table-cell>
          <table:table-cell office:value-type="float" office:value="8640000" calcext:value-type="float">
            <text:p>8640000</text:p>
          </table:table-cell>
          <table:table-cell table:formula="of:=[.B1420]/[.C1420]" office:value-type="float" office:value="0.00164236111111111" calcext:value-type="float">
            <text:p>0,00164236111111111000</text:p>
          </table:table-cell>
          <table:table-cell table:formula="of:=[.D1421]-[.D1420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table:formula="of:=[.B1420]+10" office:value-type="float" office:value="14200" calcext:value-type="float">
            <text:p>14200</text:p>
          </table:table-cell>
          <table:table-cell office:value-type="float" office:value="8640000" calcext:value-type="float">
            <text:p>8640000</text:p>
          </table:table-cell>
          <table:table-cell table:formula="of:=[.B1421]/[.C1421]" office:value-type="float" office:value="0.00164351851851852" calcext:value-type="float">
            <text:p>0,00164351851851852000</text:p>
          </table:table-cell>
          <table:table-cell table:formula="of:=[.D1422]-[.D1421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table:formula="of:=[.B1421]+10" office:value-type="float" office:value="14210" calcext:value-type="float">
            <text:p>14210</text:p>
          </table:table-cell>
          <table:table-cell office:value-type="float" office:value="8640000" calcext:value-type="float">
            <text:p>8640000</text:p>
          </table:table-cell>
          <table:table-cell table:formula="of:=[.B1422]/[.C1422]" office:value-type="float" office:value="0.00164467592592593" calcext:value-type="float">
            <text:p>0,00164467592592593000</text:p>
          </table:table-cell>
          <table:table-cell table:formula="of:=[.D1423]-[.D1422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table:formula="of:=[.B1422]+10" office:value-type="float" office:value="14220" calcext:value-type="float">
            <text:p>14220</text:p>
          </table:table-cell>
          <table:table-cell office:value-type="float" office:value="8640000" calcext:value-type="float">
            <text:p>8640000</text:p>
          </table:table-cell>
          <table:table-cell table:formula="of:=[.B1423]/[.C1423]" office:value-type="float" office:value="0.00164583333333333" calcext:value-type="float">
            <text:p>0,00164583333333333000</text:p>
          </table:table-cell>
          <table:table-cell table:formula="of:=[.D1424]-[.D1423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table:formula="of:=[.B1423]+10" office:value-type="float" office:value="14230" calcext:value-type="float">
            <text:p>14230</text:p>
          </table:table-cell>
          <table:table-cell office:value-type="float" office:value="8640000" calcext:value-type="float">
            <text:p>8640000</text:p>
          </table:table-cell>
          <table:table-cell table:formula="of:=[.B1424]/[.C1424]" office:value-type="float" office:value="0.00164699074074074" calcext:value-type="float">
            <text:p>0,00164699074074074000</text:p>
          </table:table-cell>
          <table:table-cell table:formula="of:=[.D1425]-[.D1424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 table:formula="of:=[.B1424]+10" office:value-type="float" office:value="14240" calcext:value-type="float">
            <text:p>14240</text:p>
          </table:table-cell>
          <table:table-cell office:value-type="float" office:value="8640000" calcext:value-type="float">
            <text:p>8640000</text:p>
          </table:table-cell>
          <table:table-cell table:formula="of:=[.B1425]/[.C1425]" office:value-type="float" office:value="0.00164814814814815" calcext:value-type="float">
            <text:p>0,00164814814814815000</text:p>
          </table:table-cell>
          <table:table-cell table:formula="of:=[.D1426]-[.D1425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table:formula="of:=[.B1425]+10" office:value-type="float" office:value="14250" calcext:value-type="float">
            <text:p>14250</text:p>
          </table:table-cell>
          <table:table-cell office:value-type="float" office:value="8640000" calcext:value-type="float">
            <text:p>8640000</text:p>
          </table:table-cell>
          <table:table-cell table:formula="of:=[.B1426]/[.C1426]" office:value-type="float" office:value="0.00164930555555556" calcext:value-type="float">
            <text:p>0,00164930555555556000</text:p>
          </table:table-cell>
          <table:table-cell table:formula="of:=[.D1427]-[.D1426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table:formula="of:=[.B1426]+10" office:value-type="float" office:value="14260" calcext:value-type="float">
            <text:p>14260</text:p>
          </table:table-cell>
          <table:table-cell office:value-type="float" office:value="8640000" calcext:value-type="float">
            <text:p>8640000</text:p>
          </table:table-cell>
          <table:table-cell table:formula="of:=[.B1427]/[.C1427]" office:value-type="float" office:value="0.00165046296296296" calcext:value-type="float">
            <text:p>0,00165046296296296000</text:p>
          </table:table-cell>
          <table:table-cell table:formula="of:=[.D1428]-[.D1427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table:formula="of:=[.B1427]+10" office:value-type="float" office:value="14270" calcext:value-type="float">
            <text:p>14270</text:p>
          </table:table-cell>
          <table:table-cell office:value-type="float" office:value="8640000" calcext:value-type="float">
            <text:p>8640000</text:p>
          </table:table-cell>
          <table:table-cell table:formula="of:=[.B1428]/[.C1428]" office:value-type="float" office:value="0.00165162037037037" calcext:value-type="float">
            <text:p>0,00165162037037037000</text:p>
          </table:table-cell>
          <table:table-cell table:formula="of:=[.D1429]-[.D1428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table:formula="of:=[.B1428]+10" office:value-type="float" office:value="14280" calcext:value-type="float">
            <text:p>14280</text:p>
          </table:table-cell>
          <table:table-cell office:value-type="float" office:value="8640000" calcext:value-type="float">
            <text:p>8640000</text:p>
          </table:table-cell>
          <table:table-cell table:formula="of:=[.B1429]/[.C1429]" office:value-type="float" office:value="0.00165277777777778" calcext:value-type="float">
            <text:p>0,00165277777777778000</text:p>
          </table:table-cell>
          <table:table-cell table:formula="of:=[.D1430]-[.D1429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table:formula="of:=[.B1429]+10" office:value-type="float" office:value="14290" calcext:value-type="float">
            <text:p>14290</text:p>
          </table:table-cell>
          <table:table-cell office:value-type="float" office:value="8640000" calcext:value-type="float">
            <text:p>8640000</text:p>
          </table:table-cell>
          <table:table-cell table:formula="of:=[.B1430]/[.C1430]" office:value-type="float" office:value="0.00165393518518519" calcext:value-type="float">
            <text:p>0,00165393518518519000</text:p>
          </table:table-cell>
          <table:table-cell table:formula="of:=[.D1431]-[.D1430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table:formula="of:=[.B1430]+10" office:value-type="float" office:value="14300" calcext:value-type="float">
            <text:p>14300</text:p>
          </table:table-cell>
          <table:table-cell office:value-type="float" office:value="8640000" calcext:value-type="float">
            <text:p>8640000</text:p>
          </table:table-cell>
          <table:table-cell table:formula="of:=[.B1431]/[.C1431]" office:value-type="float" office:value="0.00165509259259259" calcext:value-type="float">
            <text:p>0,00165509259259259000</text:p>
          </table:table-cell>
          <table:table-cell table:formula="of:=[.D1432]-[.D1431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table:formula="of:=[.B1431]+10" office:value-type="float" office:value="14310" calcext:value-type="float">
            <text:p>14310</text:p>
          </table:table-cell>
          <table:table-cell office:value-type="float" office:value="8640000" calcext:value-type="float">
            <text:p>8640000</text:p>
          </table:table-cell>
          <table:table-cell table:formula="of:=[.B1432]/[.C1432]" office:value-type="float" office:value="0.00165625" calcext:value-type="float">
            <text:p>0,00165625000000000000</text:p>
          </table:table-cell>
          <table:table-cell table:formula="of:=[.D1433]-[.D1432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table:formula="of:=[.B1432]+10" office:value-type="float" office:value="14320" calcext:value-type="float">
            <text:p>14320</text:p>
          </table:table-cell>
          <table:table-cell office:value-type="float" office:value="8640000" calcext:value-type="float">
            <text:p>8640000</text:p>
          </table:table-cell>
          <table:table-cell table:formula="of:=[.B1433]/[.C1433]" office:value-type="float" office:value="0.00165740740740741" calcext:value-type="float">
            <text:p>0,00165740740740741000</text:p>
          </table:table-cell>
          <table:table-cell table:formula="of:=[.D1434]-[.D1433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table:formula="of:=[.B1433]+10" office:value-type="float" office:value="14330" calcext:value-type="float">
            <text:p>14330</text:p>
          </table:table-cell>
          <table:table-cell office:value-type="float" office:value="8640000" calcext:value-type="float">
            <text:p>8640000</text:p>
          </table:table-cell>
          <table:table-cell table:formula="of:=[.B1434]/[.C1434]" office:value-type="float" office:value="0.00165856481481481" calcext:value-type="float">
            <text:p>0,00165856481481481000</text:p>
          </table:table-cell>
          <table:table-cell table:formula="of:=[.D1435]-[.D1434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table:formula="of:=[.B1434]+10" office:value-type="float" office:value="14340" calcext:value-type="float">
            <text:p>14340</text:p>
          </table:table-cell>
          <table:table-cell office:value-type="float" office:value="8640000" calcext:value-type="float">
            <text:p>8640000</text:p>
          </table:table-cell>
          <table:table-cell table:formula="of:=[.B1435]/[.C1435]" office:value-type="float" office:value="0.00165972222222222" calcext:value-type="float">
            <text:p>0,00165972222222222000</text:p>
          </table:table-cell>
          <table:table-cell table:formula="of:=[.D1436]-[.D1435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table:formula="of:=[.B1435]+10" office:value-type="float" office:value="14350" calcext:value-type="float">
            <text:p>14350</text:p>
          </table:table-cell>
          <table:table-cell office:value-type="float" office:value="8640000" calcext:value-type="float">
            <text:p>8640000</text:p>
          </table:table-cell>
          <table:table-cell table:formula="of:=[.B1436]/[.C1436]" office:value-type="float" office:value="0.00166087962962963" calcext:value-type="float">
            <text:p>0,00166087962962963000</text:p>
          </table:table-cell>
          <table:table-cell table:formula="of:=[.D1437]-[.D1436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table:formula="of:=[.B1436]+10" office:value-type="float" office:value="14360" calcext:value-type="float">
            <text:p>14360</text:p>
          </table:table-cell>
          <table:table-cell office:value-type="float" office:value="8640000" calcext:value-type="float">
            <text:p>8640000</text:p>
          </table:table-cell>
          <table:table-cell table:formula="of:=[.B1437]/[.C1437]" office:value-type="float" office:value="0.00166203703703704" calcext:value-type="float">
            <text:p>0,00166203703703704000</text:p>
          </table:table-cell>
          <table:table-cell table:formula="of:=[.D1438]-[.D1437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table:formula="of:=[.B1437]+10" office:value-type="float" office:value="14370" calcext:value-type="float">
            <text:p>14370</text:p>
          </table:table-cell>
          <table:table-cell office:value-type="float" office:value="8640000" calcext:value-type="float">
            <text:p>8640000</text:p>
          </table:table-cell>
          <table:table-cell table:formula="of:=[.B1438]/[.C1438]" office:value-type="float" office:value="0.00166319444444444" calcext:value-type="float">
            <text:p>0,00166319444444444000</text:p>
          </table:table-cell>
          <table:table-cell table:formula="of:=[.D1439]-[.D1438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table:formula="of:=[.B1438]+10" office:value-type="float" office:value="14380" calcext:value-type="float">
            <text:p>14380</text:p>
          </table:table-cell>
          <table:table-cell office:value-type="float" office:value="8640000" calcext:value-type="float">
            <text:p>8640000</text:p>
          </table:table-cell>
          <table:table-cell table:formula="of:=[.B1439]/[.C1439]" office:value-type="float" office:value="0.00166435185185185" calcext:value-type="float">
            <text:p>0,00166435185185185000</text:p>
          </table:table-cell>
          <table:table-cell table:formula="of:=[.D1440]-[.D1439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table:formula="of:=[.B1439]+10" office:value-type="float" office:value="14390" calcext:value-type="float">
            <text:p>14390</text:p>
          </table:table-cell>
          <table:table-cell office:value-type="float" office:value="8640000" calcext:value-type="float">
            <text:p>8640000</text:p>
          </table:table-cell>
          <table:table-cell table:formula="of:=[.B1440]/[.C1440]" office:value-type="float" office:value="0.00166550925925926" calcext:value-type="float">
            <text:p>0,00166550925925926000</text:p>
          </table:table-cell>
          <table:table-cell table:formula="of:=[.D1441]-[.D1440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table:formula="of:=[.B1440]+10" office:value-type="float" office:value="14400" calcext:value-type="float">
            <text:p>14400</text:p>
          </table:table-cell>
          <table:table-cell office:value-type="float" office:value="8640000" calcext:value-type="float">
            <text:p>8640000</text:p>
          </table:table-cell>
          <table:table-cell table:formula="of:=[.B1441]/[.C1441]" office:value-type="float" office:value="0.00166666666666667" calcext:value-type="float">
            <text:p>0,00166666666666667000</text:p>
          </table:table-cell>
          <table:table-cell table:formula="of:=[.D1442]-[.D1441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table:formula="of:=[.B1441]+10" office:value-type="float" office:value="14410" calcext:value-type="float">
            <text:p>14410</text:p>
          </table:table-cell>
          <table:table-cell office:value-type="float" office:value="8640000" calcext:value-type="float">
            <text:p>8640000</text:p>
          </table:table-cell>
          <table:table-cell table:formula="of:=[.B1442]/[.C1442]" office:value-type="float" office:value="0.00166782407407407" calcext:value-type="float">
            <text:p>0,00166782407407407000</text:p>
          </table:table-cell>
          <table:table-cell table:formula="of:=[.D1443]-[.D1442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table:formula="of:=[.B1442]+10" office:value-type="float" office:value="14420" calcext:value-type="float">
            <text:p>14420</text:p>
          </table:table-cell>
          <table:table-cell office:value-type="float" office:value="8640000" calcext:value-type="float">
            <text:p>8640000</text:p>
          </table:table-cell>
          <table:table-cell table:formula="of:=[.B1443]/[.C1443]" office:value-type="float" office:value="0.00166898148148148" calcext:value-type="float">
            <text:p>0,00166898148148148000</text:p>
          </table:table-cell>
          <table:table-cell table:formula="of:=[.D1444]-[.D1443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table:formula="of:=[.B1443]+10" office:value-type="float" office:value="14430" calcext:value-type="float">
            <text:p>14430</text:p>
          </table:table-cell>
          <table:table-cell office:value-type="float" office:value="8640000" calcext:value-type="float">
            <text:p>8640000</text:p>
          </table:table-cell>
          <table:table-cell table:formula="of:=[.B1444]/[.C1444]" office:value-type="float" office:value="0.00167013888888889" calcext:value-type="float">
            <text:p>0,00167013888888889000</text:p>
          </table:table-cell>
          <table:table-cell table:formula="of:=[.D1445]-[.D1444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table:formula="of:=[.B1444]+10" office:value-type="float" office:value="14440" calcext:value-type="float">
            <text:p>14440</text:p>
          </table:table-cell>
          <table:table-cell office:value-type="float" office:value="8640000" calcext:value-type="float">
            <text:p>8640000</text:p>
          </table:table-cell>
          <table:table-cell table:formula="of:=[.B1445]/[.C1445]" office:value-type="float" office:value="0.0016712962962963" calcext:value-type="float">
            <text:p>0,00167129629629630000</text:p>
          </table:table-cell>
          <table:table-cell table:formula="of:=[.D1446]-[.D1445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table:formula="of:=[.B1445]+10" office:value-type="float" office:value="14450" calcext:value-type="float">
            <text:p>14450</text:p>
          </table:table-cell>
          <table:table-cell office:value-type="float" office:value="8640000" calcext:value-type="float">
            <text:p>8640000</text:p>
          </table:table-cell>
          <table:table-cell table:formula="of:=[.B1446]/[.C1446]" office:value-type="float" office:value="0.0016724537037037" calcext:value-type="float">
            <text:p>0,00167245370370370000</text:p>
          </table:table-cell>
          <table:table-cell table:formula="of:=[.D1447]-[.D1446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table:formula="of:=[.B1446]+10" office:value-type="float" office:value="14460" calcext:value-type="float">
            <text:p>14460</text:p>
          </table:table-cell>
          <table:table-cell office:value-type="float" office:value="8640000" calcext:value-type="float">
            <text:p>8640000</text:p>
          </table:table-cell>
          <table:table-cell table:formula="of:=[.B1447]/[.C1447]" office:value-type="float" office:value="0.00167361111111111" calcext:value-type="float">
            <text:p>0,00167361111111111000</text:p>
          </table:table-cell>
          <table:table-cell table:formula="of:=[.D1448]-[.D1447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table:formula="of:=[.B1447]+10" office:value-type="float" office:value="14470" calcext:value-type="float">
            <text:p>14470</text:p>
          </table:table-cell>
          <table:table-cell office:value-type="float" office:value="8640000" calcext:value-type="float">
            <text:p>8640000</text:p>
          </table:table-cell>
          <table:table-cell table:formula="of:=[.B1448]/[.C1448]" office:value-type="float" office:value="0.00167476851851852" calcext:value-type="float">
            <text:p>0,00167476851851852000</text:p>
          </table:table-cell>
          <table:table-cell table:formula="of:=[.D1449]-[.D1448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table:formula="of:=[.B1448]+10" office:value-type="float" office:value="14480" calcext:value-type="float">
            <text:p>14480</text:p>
          </table:table-cell>
          <table:table-cell office:value-type="float" office:value="8640000" calcext:value-type="float">
            <text:p>8640000</text:p>
          </table:table-cell>
          <table:table-cell table:formula="of:=[.B1449]/[.C1449]" office:value-type="float" office:value="0.00167592592592593" calcext:value-type="float">
            <text:p>0,00167592592592593000</text:p>
          </table:table-cell>
          <table:table-cell table:formula="of:=[.D1450]-[.D1449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table:formula="of:=[.B1449]+10" office:value-type="float" office:value="14490" calcext:value-type="float">
            <text:p>14490</text:p>
          </table:table-cell>
          <table:table-cell office:value-type="float" office:value="8640000" calcext:value-type="float">
            <text:p>8640000</text:p>
          </table:table-cell>
          <table:table-cell table:formula="of:=[.B1450]/[.C1450]" office:value-type="float" office:value="0.00167708333333333" calcext:value-type="float">
            <text:p>0,00167708333333333000</text:p>
          </table:table-cell>
          <table:table-cell table:formula="of:=[.D1451]-[.D1450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table:formula="of:=[.B1450]+10" office:value-type="float" office:value="14500" calcext:value-type="float">
            <text:p>14500</text:p>
          </table:table-cell>
          <table:table-cell office:value-type="float" office:value="8640000" calcext:value-type="float">
            <text:p>8640000</text:p>
          </table:table-cell>
          <table:table-cell table:formula="of:=[.B1451]/[.C1451]" office:value-type="float" office:value="0.00167824074074074" calcext:value-type="float">
            <text:p>0,00167824074074074000</text:p>
          </table:table-cell>
          <table:table-cell table:formula="of:=[.D1452]-[.D1451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table:formula="of:=[.B1451]+10" office:value-type="float" office:value="14510" calcext:value-type="float">
            <text:p>14510</text:p>
          </table:table-cell>
          <table:table-cell office:value-type="float" office:value="8640000" calcext:value-type="float">
            <text:p>8640000</text:p>
          </table:table-cell>
          <table:table-cell table:formula="of:=[.B1452]/[.C1452]" office:value-type="float" office:value="0.00167939814814815" calcext:value-type="float">
            <text:p>0,00167939814814815000</text:p>
          </table:table-cell>
          <table:table-cell table:formula="of:=[.D1453]-[.D1452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table:formula="of:=[.B1452]+10" office:value-type="float" office:value="14520" calcext:value-type="float">
            <text:p>14520</text:p>
          </table:table-cell>
          <table:table-cell office:value-type="float" office:value="8640000" calcext:value-type="float">
            <text:p>8640000</text:p>
          </table:table-cell>
          <table:table-cell table:formula="of:=[.B1453]/[.C1453]" office:value-type="float" office:value="0.00168055555555556" calcext:value-type="float">
            <text:p>0,00168055555555556000</text:p>
          </table:table-cell>
          <table:table-cell table:formula="of:=[.D1454]-[.D1453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table:formula="of:=[.B1453]+10" office:value-type="float" office:value="14530" calcext:value-type="float">
            <text:p>14530</text:p>
          </table:table-cell>
          <table:table-cell office:value-type="float" office:value="8640000" calcext:value-type="float">
            <text:p>8640000</text:p>
          </table:table-cell>
          <table:table-cell table:formula="of:=[.B1454]/[.C1454]" office:value-type="float" office:value="0.00168171296296296" calcext:value-type="float">
            <text:p>0,00168171296296296000</text:p>
          </table:table-cell>
          <table:table-cell table:formula="of:=[.D1455]-[.D1454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table:formula="of:=[.B1454]+10" office:value-type="float" office:value="14540" calcext:value-type="float">
            <text:p>14540</text:p>
          </table:table-cell>
          <table:table-cell office:value-type="float" office:value="8640000" calcext:value-type="float">
            <text:p>8640000</text:p>
          </table:table-cell>
          <table:table-cell table:formula="of:=[.B1455]/[.C1455]" office:value-type="float" office:value="0.00168287037037037" calcext:value-type="float">
            <text:p>0,00168287037037037000</text:p>
          </table:table-cell>
          <table:table-cell table:formula="of:=[.D1456]-[.D1455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table:formula="of:=[.B1455]+10" office:value-type="float" office:value="14550" calcext:value-type="float">
            <text:p>14550</text:p>
          </table:table-cell>
          <table:table-cell office:value-type="float" office:value="8640000" calcext:value-type="float">
            <text:p>8640000</text:p>
          </table:table-cell>
          <table:table-cell table:formula="of:=[.B1456]/[.C1456]" office:value-type="float" office:value="0.00168402777777778" calcext:value-type="float">
            <text:p>0,00168402777777778000</text:p>
          </table:table-cell>
          <table:table-cell table:formula="of:=[.D1457]-[.D1456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table:formula="of:=[.B1456]+10" office:value-type="float" office:value="14560" calcext:value-type="float">
            <text:p>14560</text:p>
          </table:table-cell>
          <table:table-cell office:value-type="float" office:value="8640000" calcext:value-type="float">
            <text:p>8640000</text:p>
          </table:table-cell>
          <table:table-cell table:formula="of:=[.B1457]/[.C1457]" office:value-type="float" office:value="0.00168518518518519" calcext:value-type="float">
            <text:p>0,00168518518518519000</text:p>
          </table:table-cell>
          <table:table-cell table:formula="of:=[.D1458]-[.D1457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table:formula="of:=[.B1457]+10" office:value-type="float" office:value="14570" calcext:value-type="float">
            <text:p>14570</text:p>
          </table:table-cell>
          <table:table-cell office:value-type="float" office:value="8640000" calcext:value-type="float">
            <text:p>8640000</text:p>
          </table:table-cell>
          <table:table-cell table:formula="of:=[.B1458]/[.C1458]" office:value-type="float" office:value="0.00168634259259259" calcext:value-type="float">
            <text:p>0,00168634259259259000</text:p>
          </table:table-cell>
          <table:table-cell table:formula="of:=[.D1459]-[.D1458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table:formula="of:=[.B1458]+10" office:value-type="float" office:value="14580" calcext:value-type="float">
            <text:p>14580</text:p>
          </table:table-cell>
          <table:table-cell office:value-type="float" office:value="8640000" calcext:value-type="float">
            <text:p>8640000</text:p>
          </table:table-cell>
          <table:table-cell table:formula="of:=[.B1459]/[.C1459]" office:value-type="float" office:value="0.0016875" calcext:value-type="float">
            <text:p>0,00168750000000000000</text:p>
          </table:table-cell>
          <table:table-cell table:formula="of:=[.D1460]-[.D1459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table:formula="of:=[.B1459]+10" office:value-type="float" office:value="14590" calcext:value-type="float">
            <text:p>14590</text:p>
          </table:table-cell>
          <table:table-cell office:value-type="float" office:value="8640000" calcext:value-type="float">
            <text:p>8640000</text:p>
          </table:table-cell>
          <table:table-cell table:formula="of:=[.B1460]/[.C1460]" office:value-type="float" office:value="0.00168865740740741" calcext:value-type="float">
            <text:p>0,00168865740740741000</text:p>
          </table:table-cell>
          <table:table-cell table:formula="of:=[.D1461]-[.D1460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table:formula="of:=[.B1460]+10" office:value-type="float" office:value="14600" calcext:value-type="float">
            <text:p>14600</text:p>
          </table:table-cell>
          <table:table-cell office:value-type="float" office:value="8640000" calcext:value-type="float">
            <text:p>8640000</text:p>
          </table:table-cell>
          <table:table-cell table:formula="of:=[.B1461]/[.C1461]" office:value-type="float" office:value="0.00168981481481481" calcext:value-type="float">
            <text:p>0,00168981481481481000</text:p>
          </table:table-cell>
          <table:table-cell table:formula="of:=[.D1462]-[.D1461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table:formula="of:=[.B1461]+10" office:value-type="float" office:value="14610" calcext:value-type="float">
            <text:p>14610</text:p>
          </table:table-cell>
          <table:table-cell office:value-type="float" office:value="8640000" calcext:value-type="float">
            <text:p>8640000</text:p>
          </table:table-cell>
          <table:table-cell table:formula="of:=[.B1462]/[.C1462]" office:value-type="float" office:value="0.00169097222222222" calcext:value-type="float">
            <text:p>0,00169097222222222000</text:p>
          </table:table-cell>
          <table:table-cell table:formula="of:=[.D1463]-[.D1462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table:formula="of:=[.B1462]+10" office:value-type="float" office:value="14620" calcext:value-type="float">
            <text:p>14620</text:p>
          </table:table-cell>
          <table:table-cell office:value-type="float" office:value="8640000" calcext:value-type="float">
            <text:p>8640000</text:p>
          </table:table-cell>
          <table:table-cell table:formula="of:=[.B1463]/[.C1463]" office:value-type="float" office:value="0.00169212962962963" calcext:value-type="float">
            <text:p>0,00169212962962963000</text:p>
          </table:table-cell>
          <table:table-cell table:formula="of:=[.D1464]-[.D1463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table:formula="of:=[.B1463]+10" office:value-type="float" office:value="14630" calcext:value-type="float">
            <text:p>14630</text:p>
          </table:table-cell>
          <table:table-cell office:value-type="float" office:value="8640000" calcext:value-type="float">
            <text:p>8640000</text:p>
          </table:table-cell>
          <table:table-cell table:formula="of:=[.B1464]/[.C1464]" office:value-type="float" office:value="0.00169328703703704" calcext:value-type="float">
            <text:p>0,00169328703703704000</text:p>
          </table:table-cell>
          <table:table-cell table:formula="of:=[.D1465]-[.D1464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table:formula="of:=[.B1464]+10" office:value-type="float" office:value="14640" calcext:value-type="float">
            <text:p>14640</text:p>
          </table:table-cell>
          <table:table-cell office:value-type="float" office:value="8640000" calcext:value-type="float">
            <text:p>8640000</text:p>
          </table:table-cell>
          <table:table-cell table:formula="of:=[.B1465]/[.C1465]" office:value-type="float" office:value="0.00169444444444444" calcext:value-type="float">
            <text:p>0,00169444444444444000</text:p>
          </table:table-cell>
          <table:table-cell table:formula="of:=[.D1466]-[.D1465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table:formula="of:=[.B1465]+10" office:value-type="float" office:value="14650" calcext:value-type="float">
            <text:p>14650</text:p>
          </table:table-cell>
          <table:table-cell office:value-type="float" office:value="8640000" calcext:value-type="float">
            <text:p>8640000</text:p>
          </table:table-cell>
          <table:table-cell table:formula="of:=[.B1466]/[.C1466]" office:value-type="float" office:value="0.00169560185185185" calcext:value-type="float">
            <text:p>0,00169560185185185000</text:p>
          </table:table-cell>
          <table:table-cell table:formula="of:=[.D1467]-[.D1466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table:formula="of:=[.B1466]+10" office:value-type="float" office:value="14660" calcext:value-type="float">
            <text:p>14660</text:p>
          </table:table-cell>
          <table:table-cell office:value-type="float" office:value="8640000" calcext:value-type="float">
            <text:p>8640000</text:p>
          </table:table-cell>
          <table:table-cell table:formula="of:=[.B1467]/[.C1467]" office:value-type="float" office:value="0.00169675925925926" calcext:value-type="float">
            <text:p>0,00169675925925926000</text:p>
          </table:table-cell>
          <table:table-cell table:formula="of:=[.D1468]-[.D1467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table:formula="of:=[.B1467]+10" office:value-type="float" office:value="14670" calcext:value-type="float">
            <text:p>14670</text:p>
          </table:table-cell>
          <table:table-cell office:value-type="float" office:value="8640000" calcext:value-type="float">
            <text:p>8640000</text:p>
          </table:table-cell>
          <table:table-cell table:formula="of:=[.B1468]/[.C1468]" office:value-type="float" office:value="0.00169791666666667" calcext:value-type="float">
            <text:p>0,00169791666666667000</text:p>
          </table:table-cell>
          <table:table-cell table:formula="of:=[.D1469]-[.D1468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table:formula="of:=[.B1468]+10" office:value-type="float" office:value="14680" calcext:value-type="float">
            <text:p>14680</text:p>
          </table:table-cell>
          <table:table-cell office:value-type="float" office:value="8640000" calcext:value-type="float">
            <text:p>8640000</text:p>
          </table:table-cell>
          <table:table-cell table:formula="of:=[.B1469]/[.C1469]" office:value-type="float" office:value="0.00169907407407407" calcext:value-type="float">
            <text:p>0,00169907407407407000</text:p>
          </table:table-cell>
          <table:table-cell table:formula="of:=[.D1470]-[.D1469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table:formula="of:=[.B1469]+10" office:value-type="float" office:value="14690" calcext:value-type="float">
            <text:p>14690</text:p>
          </table:table-cell>
          <table:table-cell office:value-type="float" office:value="8640000" calcext:value-type="float">
            <text:p>8640000</text:p>
          </table:table-cell>
          <table:table-cell table:formula="of:=[.B1470]/[.C1470]" office:value-type="float" office:value="0.00170023148148148" calcext:value-type="float">
            <text:p>0,00170023148148148000</text:p>
          </table:table-cell>
          <table:table-cell table:formula="of:=[.D1471]-[.D1470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table:formula="of:=[.B1470]+10" office:value-type="float" office:value="14700" calcext:value-type="float">
            <text:p>14700</text:p>
          </table:table-cell>
          <table:table-cell office:value-type="float" office:value="8640000" calcext:value-type="float">
            <text:p>8640000</text:p>
          </table:table-cell>
          <table:table-cell table:formula="of:=[.B1471]/[.C1471]" office:value-type="float" office:value="0.00170138888888889" calcext:value-type="float">
            <text:p>0,00170138888888889000</text:p>
          </table:table-cell>
          <table:table-cell table:formula="of:=[.D1472]-[.D1471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table:formula="of:=[.B1471]+10" office:value-type="float" office:value="14710" calcext:value-type="float">
            <text:p>14710</text:p>
          </table:table-cell>
          <table:table-cell office:value-type="float" office:value="8640000" calcext:value-type="float">
            <text:p>8640000</text:p>
          </table:table-cell>
          <table:table-cell table:formula="of:=[.B1472]/[.C1472]" office:value-type="float" office:value="0.0017025462962963" calcext:value-type="float">
            <text:p>0,00170254629629630000</text:p>
          </table:table-cell>
          <table:table-cell table:formula="of:=[.D1473]-[.D1472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table:formula="of:=[.B1472]+10" office:value-type="float" office:value="14720" calcext:value-type="float">
            <text:p>14720</text:p>
          </table:table-cell>
          <table:table-cell office:value-type="float" office:value="8640000" calcext:value-type="float">
            <text:p>8640000</text:p>
          </table:table-cell>
          <table:table-cell table:formula="of:=[.B1473]/[.C1473]" office:value-type="float" office:value="0.0017037037037037" calcext:value-type="float">
            <text:p>0,00170370370370370000</text:p>
          </table:table-cell>
          <table:table-cell table:formula="of:=[.D1474]-[.D1473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table:formula="of:=[.B1473]+10" office:value-type="float" office:value="14730" calcext:value-type="float">
            <text:p>14730</text:p>
          </table:table-cell>
          <table:table-cell office:value-type="float" office:value="8640000" calcext:value-type="float">
            <text:p>8640000</text:p>
          </table:table-cell>
          <table:table-cell table:formula="of:=[.B1474]/[.C1474]" office:value-type="float" office:value="0.00170486111111111" calcext:value-type="float">
            <text:p>0,00170486111111111000</text:p>
          </table:table-cell>
          <table:table-cell table:formula="of:=[.D1475]-[.D1474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table:formula="of:=[.B1474]+10" office:value-type="float" office:value="14740" calcext:value-type="float">
            <text:p>14740</text:p>
          </table:table-cell>
          <table:table-cell office:value-type="float" office:value="8640000" calcext:value-type="float">
            <text:p>8640000</text:p>
          </table:table-cell>
          <table:table-cell table:formula="of:=[.B1475]/[.C1475]" office:value-type="float" office:value="0.00170601851851852" calcext:value-type="float">
            <text:p>0,00170601851851852000</text:p>
          </table:table-cell>
          <table:table-cell table:formula="of:=[.D1476]-[.D1475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table:formula="of:=[.B1475]+10" office:value-type="float" office:value="14750" calcext:value-type="float">
            <text:p>14750</text:p>
          </table:table-cell>
          <table:table-cell office:value-type="float" office:value="8640000" calcext:value-type="float">
            <text:p>8640000</text:p>
          </table:table-cell>
          <table:table-cell table:formula="of:=[.B1476]/[.C1476]" office:value-type="float" office:value="0.00170717592592593" calcext:value-type="float">
            <text:p>0,00170717592592593000</text:p>
          </table:table-cell>
          <table:table-cell table:formula="of:=[.D1477]-[.D1476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table:formula="of:=[.B1476]+10" office:value-type="float" office:value="14760" calcext:value-type="float">
            <text:p>14760</text:p>
          </table:table-cell>
          <table:table-cell office:value-type="float" office:value="8640000" calcext:value-type="float">
            <text:p>8640000</text:p>
          </table:table-cell>
          <table:table-cell table:formula="of:=[.B1477]/[.C1477]" office:value-type="float" office:value="0.00170833333333333" calcext:value-type="float">
            <text:p>0,00170833333333333000</text:p>
          </table:table-cell>
          <table:table-cell table:formula="of:=[.D1478]-[.D1477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table:formula="of:=[.B1477]+10" office:value-type="float" office:value="14770" calcext:value-type="float">
            <text:p>14770</text:p>
          </table:table-cell>
          <table:table-cell office:value-type="float" office:value="8640000" calcext:value-type="float">
            <text:p>8640000</text:p>
          </table:table-cell>
          <table:table-cell table:formula="of:=[.B1478]/[.C1478]" office:value-type="float" office:value="0.00170949074074074" calcext:value-type="float">
            <text:p>0,00170949074074074000</text:p>
          </table:table-cell>
          <table:table-cell table:formula="of:=[.D1479]-[.D1478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table:formula="of:=[.B1478]+10" office:value-type="float" office:value="14780" calcext:value-type="float">
            <text:p>14780</text:p>
          </table:table-cell>
          <table:table-cell office:value-type="float" office:value="8640000" calcext:value-type="float">
            <text:p>8640000</text:p>
          </table:table-cell>
          <table:table-cell table:formula="of:=[.B1479]/[.C1479]" office:value-type="float" office:value="0.00171064814814815" calcext:value-type="float">
            <text:p>0,00171064814814815000</text:p>
          </table:table-cell>
          <table:table-cell table:formula="of:=[.D1480]-[.D1479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table:formula="of:=[.B1479]+10" office:value-type="float" office:value="14790" calcext:value-type="float">
            <text:p>14790</text:p>
          </table:table-cell>
          <table:table-cell office:value-type="float" office:value="8640000" calcext:value-type="float">
            <text:p>8640000</text:p>
          </table:table-cell>
          <table:table-cell table:formula="of:=[.B1480]/[.C1480]" office:value-type="float" office:value="0.00171180555555556" calcext:value-type="float">
            <text:p>0,00171180555555556000</text:p>
          </table:table-cell>
          <table:table-cell table:formula="of:=[.D1481]-[.D1480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table:formula="of:=[.B1480]+10" office:value-type="float" office:value="14800" calcext:value-type="float">
            <text:p>14800</text:p>
          </table:table-cell>
          <table:table-cell office:value-type="float" office:value="8640000" calcext:value-type="float">
            <text:p>8640000</text:p>
          </table:table-cell>
          <table:table-cell table:formula="of:=[.B1481]/[.C1481]" office:value-type="float" office:value="0.00171296296296296" calcext:value-type="float">
            <text:p>0,00171296296296296000</text:p>
          </table:table-cell>
          <table:table-cell table:formula="of:=[.D1482]-[.D1481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table:formula="of:=[.B1481]+10" office:value-type="float" office:value="14810" calcext:value-type="float">
            <text:p>14810</text:p>
          </table:table-cell>
          <table:table-cell office:value-type="float" office:value="8640000" calcext:value-type="float">
            <text:p>8640000</text:p>
          </table:table-cell>
          <table:table-cell table:formula="of:=[.B1482]/[.C1482]" office:value-type="float" office:value="0.00171412037037037" calcext:value-type="float">
            <text:p>0,00171412037037037000</text:p>
          </table:table-cell>
          <table:table-cell table:formula="of:=[.D1483]-[.D1482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table:formula="of:=[.B1482]+10" office:value-type="float" office:value="14820" calcext:value-type="float">
            <text:p>14820</text:p>
          </table:table-cell>
          <table:table-cell office:value-type="float" office:value="8640000" calcext:value-type="float">
            <text:p>8640000</text:p>
          </table:table-cell>
          <table:table-cell table:formula="of:=[.B1483]/[.C1483]" office:value-type="float" office:value="0.00171527777777778" calcext:value-type="float">
            <text:p>0,00171527777777778000</text:p>
          </table:table-cell>
          <table:table-cell table:formula="of:=[.D1484]-[.D1483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table:formula="of:=[.B1483]+10" office:value-type="float" office:value="14830" calcext:value-type="float">
            <text:p>14830</text:p>
          </table:table-cell>
          <table:table-cell office:value-type="float" office:value="8640000" calcext:value-type="float">
            <text:p>8640000</text:p>
          </table:table-cell>
          <table:table-cell table:formula="of:=[.B1484]/[.C1484]" office:value-type="float" office:value="0.00171643518518519" calcext:value-type="float">
            <text:p>0,00171643518518519000</text:p>
          </table:table-cell>
          <table:table-cell table:formula="of:=[.D1485]-[.D1484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table:formula="of:=[.B1484]+10" office:value-type="float" office:value="14840" calcext:value-type="float">
            <text:p>14840</text:p>
          </table:table-cell>
          <table:table-cell office:value-type="float" office:value="8640000" calcext:value-type="float">
            <text:p>8640000</text:p>
          </table:table-cell>
          <table:table-cell table:formula="of:=[.B1485]/[.C1485]" office:value-type="float" office:value="0.00171759259259259" calcext:value-type="float">
            <text:p>0,00171759259259259000</text:p>
          </table:table-cell>
          <table:table-cell table:formula="of:=[.D1486]-[.D1485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table:formula="of:=[.B1485]+10" office:value-type="float" office:value="14850" calcext:value-type="float">
            <text:p>14850</text:p>
          </table:table-cell>
          <table:table-cell office:value-type="float" office:value="8640000" calcext:value-type="float">
            <text:p>8640000</text:p>
          </table:table-cell>
          <table:table-cell table:formula="of:=[.B1486]/[.C1486]" office:value-type="float" office:value="0.00171875" calcext:value-type="float">
            <text:p>0,00171875000000000000</text:p>
          </table:table-cell>
          <table:table-cell table:formula="of:=[.D1487]-[.D1486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table:formula="of:=[.B1486]+10" office:value-type="float" office:value="14860" calcext:value-type="float">
            <text:p>14860</text:p>
          </table:table-cell>
          <table:table-cell office:value-type="float" office:value="8640000" calcext:value-type="float">
            <text:p>8640000</text:p>
          </table:table-cell>
          <table:table-cell table:formula="of:=[.B1487]/[.C1487]" office:value-type="float" office:value="0.00171990740740741" calcext:value-type="float">
            <text:p>0,00171990740740741000</text:p>
          </table:table-cell>
          <table:table-cell table:formula="of:=[.D1488]-[.D1487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table:formula="of:=[.B1487]+10" office:value-type="float" office:value="14870" calcext:value-type="float">
            <text:p>14870</text:p>
          </table:table-cell>
          <table:table-cell office:value-type="float" office:value="8640000" calcext:value-type="float">
            <text:p>8640000</text:p>
          </table:table-cell>
          <table:table-cell table:formula="of:=[.B1488]/[.C1488]" office:value-type="float" office:value="0.00172106481481481" calcext:value-type="float">
            <text:p>0,00172106481481481000</text:p>
          </table:table-cell>
          <table:table-cell table:formula="of:=[.D1489]-[.D1488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table:formula="of:=[.B1488]+10" office:value-type="float" office:value="14880" calcext:value-type="float">
            <text:p>14880</text:p>
          </table:table-cell>
          <table:table-cell office:value-type="float" office:value="8640000" calcext:value-type="float">
            <text:p>8640000</text:p>
          </table:table-cell>
          <table:table-cell table:formula="of:=[.B1489]/[.C1489]" office:value-type="float" office:value="0.00172222222222222" calcext:value-type="float">
            <text:p>0,00172222222222222000</text:p>
          </table:table-cell>
          <table:table-cell table:formula="of:=[.D1490]-[.D1489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table:formula="of:=[.B1489]+10" office:value-type="float" office:value="14890" calcext:value-type="float">
            <text:p>14890</text:p>
          </table:table-cell>
          <table:table-cell office:value-type="float" office:value="8640000" calcext:value-type="float">
            <text:p>8640000</text:p>
          </table:table-cell>
          <table:table-cell table:formula="of:=[.B1490]/[.C1490]" office:value-type="float" office:value="0.00172337962962963" calcext:value-type="float">
            <text:p>0,00172337962962963000</text:p>
          </table:table-cell>
          <table:table-cell table:formula="of:=[.D1491]-[.D1490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table:formula="of:=[.B1490]+10" office:value-type="float" office:value="14900" calcext:value-type="float">
            <text:p>14900</text:p>
          </table:table-cell>
          <table:table-cell office:value-type="float" office:value="8640000" calcext:value-type="float">
            <text:p>8640000</text:p>
          </table:table-cell>
          <table:table-cell table:formula="of:=[.B1491]/[.C1491]" office:value-type="float" office:value="0.00172453703703704" calcext:value-type="float">
            <text:p>0,00172453703703704000</text:p>
          </table:table-cell>
          <table:table-cell table:formula="of:=[.D1492]-[.D1491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table:formula="of:=[.B1491]+10" office:value-type="float" office:value="14910" calcext:value-type="float">
            <text:p>14910</text:p>
          </table:table-cell>
          <table:table-cell office:value-type="float" office:value="8640000" calcext:value-type="float">
            <text:p>8640000</text:p>
          </table:table-cell>
          <table:table-cell table:formula="of:=[.B1492]/[.C1492]" office:value-type="float" office:value="0.00172569444444444" calcext:value-type="float">
            <text:p>0,00172569444444444000</text:p>
          </table:table-cell>
          <table:table-cell table:formula="of:=[.D1493]-[.D1492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 table:formula="of:=[.B1492]+10" office:value-type="float" office:value="14920" calcext:value-type="float">
            <text:p>14920</text:p>
          </table:table-cell>
          <table:table-cell office:value-type="float" office:value="8640000" calcext:value-type="float">
            <text:p>8640000</text:p>
          </table:table-cell>
          <table:table-cell table:formula="of:=[.B1493]/[.C1493]" office:value-type="float" office:value="0.00172685185185185" calcext:value-type="float">
            <text:p>0,00172685185185185000</text:p>
          </table:table-cell>
          <table:table-cell table:formula="of:=[.D1494]-[.D1493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table:formula="of:=[.B1493]+10" office:value-type="float" office:value="14930" calcext:value-type="float">
            <text:p>14930</text:p>
          </table:table-cell>
          <table:table-cell office:value-type="float" office:value="8640000" calcext:value-type="float">
            <text:p>8640000</text:p>
          </table:table-cell>
          <table:table-cell table:formula="of:=[.B1494]/[.C1494]" office:value-type="float" office:value="0.00172800925925926" calcext:value-type="float">
            <text:p>0,00172800925925926000</text:p>
          </table:table-cell>
          <table:table-cell table:formula="of:=[.D1495]-[.D1494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table:formula="of:=[.B1494]+10" office:value-type="float" office:value="14940" calcext:value-type="float">
            <text:p>14940</text:p>
          </table:table-cell>
          <table:table-cell office:value-type="float" office:value="8640000" calcext:value-type="float">
            <text:p>8640000</text:p>
          </table:table-cell>
          <table:table-cell table:formula="of:=[.B1495]/[.C1495]" office:value-type="float" office:value="0.00172916666666667" calcext:value-type="float">
            <text:p>0,00172916666666667000</text:p>
          </table:table-cell>
          <table:table-cell table:formula="of:=[.D1496]-[.D1495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table:formula="of:=[.B1495]+10" office:value-type="float" office:value="14950" calcext:value-type="float">
            <text:p>14950</text:p>
          </table:table-cell>
          <table:table-cell office:value-type="float" office:value="8640000" calcext:value-type="float">
            <text:p>8640000</text:p>
          </table:table-cell>
          <table:table-cell table:formula="of:=[.B1496]/[.C1496]" office:value-type="float" office:value="0.00173032407407407" calcext:value-type="float">
            <text:p>0,00173032407407407000</text:p>
          </table:table-cell>
          <table:table-cell table:formula="of:=[.D1497]-[.D1496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table:formula="of:=[.B1496]+10" office:value-type="float" office:value="14960" calcext:value-type="float">
            <text:p>14960</text:p>
          </table:table-cell>
          <table:table-cell office:value-type="float" office:value="8640000" calcext:value-type="float">
            <text:p>8640000</text:p>
          </table:table-cell>
          <table:table-cell table:formula="of:=[.B1497]/[.C1497]" office:value-type="float" office:value="0.00173148148148148" calcext:value-type="float">
            <text:p>0,00173148148148148000</text:p>
          </table:table-cell>
          <table:table-cell table:formula="of:=[.D1498]-[.D1497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table:formula="of:=[.B1497]+10" office:value-type="float" office:value="14970" calcext:value-type="float">
            <text:p>14970</text:p>
          </table:table-cell>
          <table:table-cell office:value-type="float" office:value="8640000" calcext:value-type="float">
            <text:p>8640000</text:p>
          </table:table-cell>
          <table:table-cell table:formula="of:=[.B1498]/[.C1498]" office:value-type="float" office:value="0.00173263888888889" calcext:value-type="float">
            <text:p>0,00173263888888889000</text:p>
          </table:table-cell>
          <table:table-cell table:formula="of:=[.D1499]-[.D1498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table:formula="of:=[.B1498]+10" office:value-type="float" office:value="14980" calcext:value-type="float">
            <text:p>14980</text:p>
          </table:table-cell>
          <table:table-cell office:value-type="float" office:value="8640000" calcext:value-type="float">
            <text:p>8640000</text:p>
          </table:table-cell>
          <table:table-cell table:formula="of:=[.B1499]/[.C1499]" office:value-type="float" office:value="0.0017337962962963" calcext:value-type="float">
            <text:p>0,00173379629629630000</text:p>
          </table:table-cell>
          <table:table-cell table:formula="of:=[.D1500]-[.D1499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table:formula="of:=[.B1499]+10" office:value-type="float" office:value="14990" calcext:value-type="float">
            <text:p>14990</text:p>
          </table:table-cell>
          <table:table-cell office:value-type="float" office:value="8640000" calcext:value-type="float">
            <text:p>8640000</text:p>
          </table:table-cell>
          <table:table-cell table:formula="of:=[.B1500]/[.C1500]" office:value-type="float" office:value="0.0017349537037037" calcext:value-type="float">
            <text:p>0,00173495370370370000</text:p>
          </table:table-cell>
          <table:table-cell table:formula="of:=[.D1501]-[.D1500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table:formula="of:=[.B1500]+10" office:value-type="float" office:value="15000" calcext:value-type="float">
            <text:p>15000</text:p>
          </table:table-cell>
          <table:table-cell office:value-type="float" office:value="8640000" calcext:value-type="float">
            <text:p>8640000</text:p>
          </table:table-cell>
          <table:table-cell table:formula="of:=[.B1501]/[.C1501]" office:value-type="float" office:value="0.00173611111111111" calcext:value-type="float">
            <text:p>0,00173611111111111000</text:p>
          </table:table-cell>
          <table:table-cell table:formula="of:=[.D1502]-[.D1501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table:formula="of:=[.B1501]+10" office:value-type="float" office:value="15010" calcext:value-type="float">
            <text:p>15010</text:p>
          </table:table-cell>
          <table:table-cell office:value-type="float" office:value="8640000" calcext:value-type="float">
            <text:p>8640000</text:p>
          </table:table-cell>
          <table:table-cell table:formula="of:=[.B1502]/[.C1502]" office:value-type="float" office:value="0.00173726851851852" calcext:value-type="float">
            <text:p>0,00173726851851852000</text:p>
          </table:table-cell>
          <table:table-cell table:formula="of:=[.D1503]-[.D1502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table:formula="of:=[.B1502]+10" office:value-type="float" office:value="15020" calcext:value-type="float">
            <text:p>15020</text:p>
          </table:table-cell>
          <table:table-cell office:value-type="float" office:value="8640000" calcext:value-type="float">
            <text:p>8640000</text:p>
          </table:table-cell>
          <table:table-cell table:formula="of:=[.B1503]/[.C1503]" office:value-type="float" office:value="0.00173842592592593" calcext:value-type="float">
            <text:p>0,00173842592592593000</text:p>
          </table:table-cell>
          <table:table-cell table:formula="of:=[.D1504]-[.D1503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table:formula="of:=[.B1503]+10" office:value-type="float" office:value="15030" calcext:value-type="float">
            <text:p>15030</text:p>
          </table:table-cell>
          <table:table-cell office:value-type="float" office:value="8640000" calcext:value-type="float">
            <text:p>8640000</text:p>
          </table:table-cell>
          <table:table-cell table:formula="of:=[.B1504]/[.C1504]" office:value-type="float" office:value="0.00173958333333333" calcext:value-type="float">
            <text:p>0,00173958333333333000</text:p>
          </table:table-cell>
          <table:table-cell table:formula="of:=[.D1505]-[.D1504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table:formula="of:=[.B1504]+10" office:value-type="float" office:value="15040" calcext:value-type="float">
            <text:p>15040</text:p>
          </table:table-cell>
          <table:table-cell office:value-type="float" office:value="8640000" calcext:value-type="float">
            <text:p>8640000</text:p>
          </table:table-cell>
          <table:table-cell table:formula="of:=[.B1505]/[.C1505]" office:value-type="float" office:value="0.00174074074074074" calcext:value-type="float">
            <text:p>0,00174074074074074000</text:p>
          </table:table-cell>
          <table:table-cell table:formula="of:=[.D1506]-[.D1505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table:formula="of:=[.B1505]+10" office:value-type="float" office:value="15050" calcext:value-type="float">
            <text:p>15050</text:p>
          </table:table-cell>
          <table:table-cell office:value-type="float" office:value="8640000" calcext:value-type="float">
            <text:p>8640000</text:p>
          </table:table-cell>
          <table:table-cell table:formula="of:=[.B1506]/[.C1506]" office:value-type="float" office:value="0.00174189814814815" calcext:value-type="float">
            <text:p>0,00174189814814815000</text:p>
          </table:table-cell>
          <table:table-cell table:formula="of:=[.D1507]-[.D1506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table:formula="of:=[.B1506]+10" office:value-type="float" office:value="15060" calcext:value-type="float">
            <text:p>15060</text:p>
          </table:table-cell>
          <table:table-cell office:value-type="float" office:value="8640000" calcext:value-type="float">
            <text:p>8640000</text:p>
          </table:table-cell>
          <table:table-cell table:formula="of:=[.B1507]/[.C1507]" office:value-type="float" office:value="0.00174305555555556" calcext:value-type="float">
            <text:p>0,00174305555555556000</text:p>
          </table:table-cell>
          <table:table-cell table:formula="of:=[.D1508]-[.D1507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table:formula="of:=[.B1507]+10" office:value-type="float" office:value="15070" calcext:value-type="float">
            <text:p>15070</text:p>
          </table:table-cell>
          <table:table-cell office:value-type="float" office:value="8640000" calcext:value-type="float">
            <text:p>8640000</text:p>
          </table:table-cell>
          <table:table-cell table:formula="of:=[.B1508]/[.C1508]" office:value-type="float" office:value="0.00174421296296296" calcext:value-type="float">
            <text:p>0,00174421296296296000</text:p>
          </table:table-cell>
          <table:table-cell table:formula="of:=[.D1509]-[.D1508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table:formula="of:=[.B1508]+10" office:value-type="float" office:value="15080" calcext:value-type="float">
            <text:p>15080</text:p>
          </table:table-cell>
          <table:table-cell office:value-type="float" office:value="8640000" calcext:value-type="float">
            <text:p>8640000</text:p>
          </table:table-cell>
          <table:table-cell table:formula="of:=[.B1509]/[.C1509]" office:value-type="float" office:value="0.00174537037037037" calcext:value-type="float">
            <text:p>0,00174537037037037000</text:p>
          </table:table-cell>
          <table:table-cell table:formula="of:=[.D1510]-[.D1509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table:formula="of:=[.B1509]+10" office:value-type="float" office:value="15090" calcext:value-type="float">
            <text:p>15090</text:p>
          </table:table-cell>
          <table:table-cell office:value-type="float" office:value="8640000" calcext:value-type="float">
            <text:p>8640000</text:p>
          </table:table-cell>
          <table:table-cell table:formula="of:=[.B1510]/[.C1510]" office:value-type="float" office:value="0.00174652777777778" calcext:value-type="float">
            <text:p>0,00174652777777778000</text:p>
          </table:table-cell>
          <table:table-cell table:formula="of:=[.D1511]-[.D1510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table:formula="of:=[.B1510]+10" office:value-type="float" office:value="15100" calcext:value-type="float">
            <text:p>15100</text:p>
          </table:table-cell>
          <table:table-cell office:value-type="float" office:value="8640000" calcext:value-type="float">
            <text:p>8640000</text:p>
          </table:table-cell>
          <table:table-cell table:formula="of:=[.B1511]/[.C1511]" office:value-type="float" office:value="0.00174768518518519" calcext:value-type="float">
            <text:p>0,00174768518518519000</text:p>
          </table:table-cell>
          <table:table-cell table:formula="of:=[.D1512]-[.D1511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table:formula="of:=[.B1511]+10" office:value-type="float" office:value="15110" calcext:value-type="float">
            <text:p>15110</text:p>
          </table:table-cell>
          <table:table-cell office:value-type="float" office:value="8640000" calcext:value-type="float">
            <text:p>8640000</text:p>
          </table:table-cell>
          <table:table-cell table:formula="of:=[.B1512]/[.C1512]" office:value-type="float" office:value="0.00174884259259259" calcext:value-type="float">
            <text:p>0,00174884259259259000</text:p>
          </table:table-cell>
          <table:table-cell table:formula="of:=[.D1513]-[.D1512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table:formula="of:=[.B1512]+10" office:value-type="float" office:value="15120" calcext:value-type="float">
            <text:p>15120</text:p>
          </table:table-cell>
          <table:table-cell office:value-type="float" office:value="8640000" calcext:value-type="float">
            <text:p>8640000</text:p>
          </table:table-cell>
          <table:table-cell table:formula="of:=[.B1513]/[.C1513]" office:value-type="float" office:value="0.00175" calcext:value-type="float">
            <text:p>0,00175000000000000000</text:p>
          </table:table-cell>
          <table:table-cell table:formula="of:=[.D1514]-[.D1513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table:formula="of:=[.B1513]+10" office:value-type="float" office:value="15130" calcext:value-type="float">
            <text:p>15130</text:p>
          </table:table-cell>
          <table:table-cell office:value-type="float" office:value="8640000" calcext:value-type="float">
            <text:p>8640000</text:p>
          </table:table-cell>
          <table:table-cell table:formula="of:=[.B1514]/[.C1514]" office:value-type="float" office:value="0.00175115740740741" calcext:value-type="float">
            <text:p>0,00175115740740741000</text:p>
          </table:table-cell>
          <table:table-cell table:formula="of:=[.D1515]-[.D1514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table:formula="of:=[.B1514]+10" office:value-type="float" office:value="15140" calcext:value-type="float">
            <text:p>15140</text:p>
          </table:table-cell>
          <table:table-cell office:value-type="float" office:value="8640000" calcext:value-type="float">
            <text:p>8640000</text:p>
          </table:table-cell>
          <table:table-cell table:formula="of:=[.B1515]/[.C1515]" office:value-type="float" office:value="0.00175231481481481" calcext:value-type="float">
            <text:p>0,00175231481481481000</text:p>
          </table:table-cell>
          <table:table-cell table:formula="of:=[.D1516]-[.D1515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table:formula="of:=[.B1515]+10" office:value-type="float" office:value="15150" calcext:value-type="float">
            <text:p>15150</text:p>
          </table:table-cell>
          <table:table-cell office:value-type="float" office:value="8640000" calcext:value-type="float">
            <text:p>8640000</text:p>
          </table:table-cell>
          <table:table-cell table:formula="of:=[.B1516]/[.C1516]" office:value-type="float" office:value="0.00175347222222222" calcext:value-type="float">
            <text:p>0,00175347222222222000</text:p>
          </table:table-cell>
          <table:table-cell table:formula="of:=[.D1517]-[.D1516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table:formula="of:=[.B1516]+10" office:value-type="float" office:value="15160" calcext:value-type="float">
            <text:p>15160</text:p>
          </table:table-cell>
          <table:table-cell office:value-type="float" office:value="8640000" calcext:value-type="float">
            <text:p>8640000</text:p>
          </table:table-cell>
          <table:table-cell table:formula="of:=[.B1517]/[.C1517]" office:value-type="float" office:value="0.00175462962962963" calcext:value-type="float">
            <text:p>0,00175462962962963000</text:p>
          </table:table-cell>
          <table:table-cell table:formula="of:=[.D1518]-[.D1517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table:formula="of:=[.B1517]+10" office:value-type="float" office:value="15170" calcext:value-type="float">
            <text:p>15170</text:p>
          </table:table-cell>
          <table:table-cell office:value-type="float" office:value="8640000" calcext:value-type="float">
            <text:p>8640000</text:p>
          </table:table-cell>
          <table:table-cell table:formula="of:=[.B1518]/[.C1518]" office:value-type="float" office:value="0.00175578703703704" calcext:value-type="float">
            <text:p>0,00175578703703704000</text:p>
          </table:table-cell>
          <table:table-cell table:formula="of:=[.D1519]-[.D1518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table:formula="of:=[.B1518]+10" office:value-type="float" office:value="15180" calcext:value-type="float">
            <text:p>15180</text:p>
          </table:table-cell>
          <table:table-cell office:value-type="float" office:value="8640000" calcext:value-type="float">
            <text:p>8640000</text:p>
          </table:table-cell>
          <table:table-cell table:formula="of:=[.B1519]/[.C1519]" office:value-type="float" office:value="0.00175694444444444" calcext:value-type="float">
            <text:p>0,00175694444444444000</text:p>
          </table:table-cell>
          <table:table-cell table:formula="of:=[.D1520]-[.D1519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table:formula="of:=[.B1519]+10" office:value-type="float" office:value="15190" calcext:value-type="float">
            <text:p>15190</text:p>
          </table:table-cell>
          <table:table-cell office:value-type="float" office:value="8640000" calcext:value-type="float">
            <text:p>8640000</text:p>
          </table:table-cell>
          <table:table-cell table:formula="of:=[.B1520]/[.C1520]" office:value-type="float" office:value="0.00175810185185185" calcext:value-type="float">
            <text:p>0,00175810185185185000</text:p>
          </table:table-cell>
          <table:table-cell table:formula="of:=[.D1521]-[.D1520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table:formula="of:=[.B1520]+10" office:value-type="float" office:value="15200" calcext:value-type="float">
            <text:p>15200</text:p>
          </table:table-cell>
          <table:table-cell office:value-type="float" office:value="8640000" calcext:value-type="float">
            <text:p>8640000</text:p>
          </table:table-cell>
          <table:table-cell table:formula="of:=[.B1521]/[.C1521]" office:value-type="float" office:value="0.00175925925925926" calcext:value-type="float">
            <text:p>0,00175925925925926000</text:p>
          </table:table-cell>
          <table:table-cell table:formula="of:=[.D1522]-[.D1521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table:formula="of:=[.B1521]+10" office:value-type="float" office:value="15210" calcext:value-type="float">
            <text:p>15210</text:p>
          </table:table-cell>
          <table:table-cell office:value-type="float" office:value="8640000" calcext:value-type="float">
            <text:p>8640000</text:p>
          </table:table-cell>
          <table:table-cell table:formula="of:=[.B1522]/[.C1522]" office:value-type="float" office:value="0.00176041666666667" calcext:value-type="float">
            <text:p>0,00176041666666667000</text:p>
          </table:table-cell>
          <table:table-cell table:formula="of:=[.D1523]-[.D1522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table:formula="of:=[.B1522]+10" office:value-type="float" office:value="15220" calcext:value-type="float">
            <text:p>15220</text:p>
          </table:table-cell>
          <table:table-cell office:value-type="float" office:value="8640000" calcext:value-type="float">
            <text:p>8640000</text:p>
          </table:table-cell>
          <table:table-cell table:formula="of:=[.B1523]/[.C1523]" office:value-type="float" office:value="0.00176157407407407" calcext:value-type="float">
            <text:p>0,00176157407407407000</text:p>
          </table:table-cell>
          <table:table-cell table:formula="of:=[.D1524]-[.D1523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table:formula="of:=[.B1523]+10" office:value-type="float" office:value="15230" calcext:value-type="float">
            <text:p>15230</text:p>
          </table:table-cell>
          <table:table-cell office:value-type="float" office:value="8640000" calcext:value-type="float">
            <text:p>8640000</text:p>
          </table:table-cell>
          <table:table-cell table:formula="of:=[.B1524]/[.C1524]" office:value-type="float" office:value="0.00176273148148148" calcext:value-type="float">
            <text:p>0,00176273148148148000</text:p>
          </table:table-cell>
          <table:table-cell table:formula="of:=[.D1525]-[.D1524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table:formula="of:=[.B1524]+10" office:value-type="float" office:value="15240" calcext:value-type="float">
            <text:p>15240</text:p>
          </table:table-cell>
          <table:table-cell office:value-type="float" office:value="8640000" calcext:value-type="float">
            <text:p>8640000</text:p>
          </table:table-cell>
          <table:table-cell table:formula="of:=[.B1525]/[.C1525]" office:value-type="float" office:value="0.00176388888888889" calcext:value-type="float">
            <text:p>0,00176388888888889000</text:p>
          </table:table-cell>
          <table:table-cell table:formula="of:=[.D1526]-[.D1525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table:formula="of:=[.B1525]+10" office:value-type="float" office:value="15250" calcext:value-type="float">
            <text:p>15250</text:p>
          </table:table-cell>
          <table:table-cell office:value-type="float" office:value="8640000" calcext:value-type="float">
            <text:p>8640000</text:p>
          </table:table-cell>
          <table:table-cell table:formula="of:=[.B1526]/[.C1526]" office:value-type="float" office:value="0.0017650462962963" calcext:value-type="float">
            <text:p>0,00176504629629630000</text:p>
          </table:table-cell>
          <table:table-cell table:formula="of:=[.D1527]-[.D1526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table:formula="of:=[.B1526]+10" office:value-type="float" office:value="15260" calcext:value-type="float">
            <text:p>15260</text:p>
          </table:table-cell>
          <table:table-cell office:value-type="float" office:value="8640000" calcext:value-type="float">
            <text:p>8640000</text:p>
          </table:table-cell>
          <table:table-cell table:formula="of:=[.B1527]/[.C1527]" office:value-type="float" office:value="0.0017662037037037" calcext:value-type="float">
            <text:p>0,00176620370370370000</text:p>
          </table:table-cell>
          <table:table-cell table:formula="of:=[.D1528]-[.D1527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table:formula="of:=[.B1527]+10" office:value-type="float" office:value="15270" calcext:value-type="float">
            <text:p>15270</text:p>
          </table:table-cell>
          <table:table-cell office:value-type="float" office:value="8640000" calcext:value-type="float">
            <text:p>8640000</text:p>
          </table:table-cell>
          <table:table-cell table:formula="of:=[.B1528]/[.C1528]" office:value-type="float" office:value="0.00176736111111111" calcext:value-type="float">
            <text:p>0,00176736111111111000</text:p>
          </table:table-cell>
          <table:table-cell table:formula="of:=[.D1529]-[.D1528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table:formula="of:=[.B1528]+10" office:value-type="float" office:value="15280" calcext:value-type="float">
            <text:p>15280</text:p>
          </table:table-cell>
          <table:table-cell office:value-type="float" office:value="8640000" calcext:value-type="float">
            <text:p>8640000</text:p>
          </table:table-cell>
          <table:table-cell table:formula="of:=[.B1529]/[.C1529]" office:value-type="float" office:value="0.00176851851851852" calcext:value-type="float">
            <text:p>0,00176851851851852000</text:p>
          </table:table-cell>
          <table:table-cell table:formula="of:=[.D1530]-[.D1529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table:formula="of:=[.B1529]+10" office:value-type="float" office:value="15290" calcext:value-type="float">
            <text:p>15290</text:p>
          </table:table-cell>
          <table:table-cell office:value-type="float" office:value="8640000" calcext:value-type="float">
            <text:p>8640000</text:p>
          </table:table-cell>
          <table:table-cell table:formula="of:=[.B1530]/[.C1530]" office:value-type="float" office:value="0.00176967592592593" calcext:value-type="float">
            <text:p>0,00176967592592593000</text:p>
          </table:table-cell>
          <table:table-cell table:formula="of:=[.D1531]-[.D1530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table:formula="of:=[.B1530]+10" office:value-type="float" office:value="15300" calcext:value-type="float">
            <text:p>15300</text:p>
          </table:table-cell>
          <table:table-cell office:value-type="float" office:value="8640000" calcext:value-type="float">
            <text:p>8640000</text:p>
          </table:table-cell>
          <table:table-cell table:formula="of:=[.B1531]/[.C1531]" office:value-type="float" office:value="0.00177083333333333" calcext:value-type="float">
            <text:p>0,00177083333333333000</text:p>
          </table:table-cell>
          <table:table-cell table:formula="of:=[.D1532]-[.D1531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table:formula="of:=[.B1531]+10" office:value-type="float" office:value="15310" calcext:value-type="float">
            <text:p>15310</text:p>
          </table:table-cell>
          <table:table-cell office:value-type="float" office:value="8640000" calcext:value-type="float">
            <text:p>8640000</text:p>
          </table:table-cell>
          <table:table-cell table:formula="of:=[.B1532]/[.C1532]" office:value-type="float" office:value="0.00177199074074074" calcext:value-type="float">
            <text:p>0,00177199074074074000</text:p>
          </table:table-cell>
          <table:table-cell table:formula="of:=[.D1533]-[.D1532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table:formula="of:=[.B1532]+10" office:value-type="float" office:value="15320" calcext:value-type="float">
            <text:p>15320</text:p>
          </table:table-cell>
          <table:table-cell office:value-type="float" office:value="8640000" calcext:value-type="float">
            <text:p>8640000</text:p>
          </table:table-cell>
          <table:table-cell table:formula="of:=[.B1533]/[.C1533]" office:value-type="float" office:value="0.00177314814814815" calcext:value-type="float">
            <text:p>0,00177314814814815000</text:p>
          </table:table-cell>
          <table:table-cell table:formula="of:=[.D1534]-[.D1533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table:formula="of:=[.B1533]+10" office:value-type="float" office:value="15330" calcext:value-type="float">
            <text:p>15330</text:p>
          </table:table-cell>
          <table:table-cell office:value-type="float" office:value="8640000" calcext:value-type="float">
            <text:p>8640000</text:p>
          </table:table-cell>
          <table:table-cell table:formula="of:=[.B1534]/[.C1534]" office:value-type="float" office:value="0.00177430555555556" calcext:value-type="float">
            <text:p>0,00177430555555556000</text:p>
          </table:table-cell>
          <table:table-cell table:formula="of:=[.D1535]-[.D1534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table:formula="of:=[.B1534]+10" office:value-type="float" office:value="15340" calcext:value-type="float">
            <text:p>15340</text:p>
          </table:table-cell>
          <table:table-cell office:value-type="float" office:value="8640000" calcext:value-type="float">
            <text:p>8640000</text:p>
          </table:table-cell>
          <table:table-cell table:formula="of:=[.B1535]/[.C1535]" office:value-type="float" office:value="0.00177546296296296" calcext:value-type="float">
            <text:p>0,00177546296296296000</text:p>
          </table:table-cell>
          <table:table-cell table:formula="of:=[.D1536]-[.D1535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table:formula="of:=[.B1535]+10" office:value-type="float" office:value="15350" calcext:value-type="float">
            <text:p>15350</text:p>
          </table:table-cell>
          <table:table-cell office:value-type="float" office:value="8640000" calcext:value-type="float">
            <text:p>8640000</text:p>
          </table:table-cell>
          <table:table-cell table:formula="of:=[.B1536]/[.C1536]" office:value-type="float" office:value="0.00177662037037037" calcext:value-type="float">
            <text:p>0,00177662037037037000</text:p>
          </table:table-cell>
          <table:table-cell table:formula="of:=[.D1537]-[.D1536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table:formula="of:=[.B1536]+10" office:value-type="float" office:value="15360" calcext:value-type="float">
            <text:p>15360</text:p>
          </table:table-cell>
          <table:table-cell office:value-type="float" office:value="8640000" calcext:value-type="float">
            <text:p>8640000</text:p>
          </table:table-cell>
          <table:table-cell table:formula="of:=[.B1537]/[.C1537]" office:value-type="float" office:value="0.00177777777777778" calcext:value-type="float">
            <text:p>0,00177777777777778000</text:p>
          </table:table-cell>
          <table:table-cell table:formula="of:=[.D1538]-[.D1537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table:formula="of:=[.B1537]+10" office:value-type="float" office:value="15370" calcext:value-type="float">
            <text:p>15370</text:p>
          </table:table-cell>
          <table:table-cell office:value-type="float" office:value="8640000" calcext:value-type="float">
            <text:p>8640000</text:p>
          </table:table-cell>
          <table:table-cell table:formula="of:=[.B1538]/[.C1538]" office:value-type="float" office:value="0.00177893518518519" calcext:value-type="float">
            <text:p>0,00177893518518519000</text:p>
          </table:table-cell>
          <table:table-cell table:formula="of:=[.D1539]-[.D1538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table:formula="of:=[.B1538]+10" office:value-type="float" office:value="15380" calcext:value-type="float">
            <text:p>15380</text:p>
          </table:table-cell>
          <table:table-cell office:value-type="float" office:value="8640000" calcext:value-type="float">
            <text:p>8640000</text:p>
          </table:table-cell>
          <table:table-cell table:formula="of:=[.B1539]/[.C1539]" office:value-type="float" office:value="0.00178009259259259" calcext:value-type="float">
            <text:p>0,00178009259259259000</text:p>
          </table:table-cell>
          <table:table-cell table:formula="of:=[.D1540]-[.D1539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table:formula="of:=[.B1539]+10" office:value-type="float" office:value="15390" calcext:value-type="float">
            <text:p>15390</text:p>
          </table:table-cell>
          <table:table-cell office:value-type="float" office:value="8640000" calcext:value-type="float">
            <text:p>8640000</text:p>
          </table:table-cell>
          <table:table-cell table:formula="of:=[.B1540]/[.C1540]" office:value-type="float" office:value="0.00178125" calcext:value-type="float">
            <text:p>0,00178125000000000000</text:p>
          </table:table-cell>
          <table:table-cell table:formula="of:=[.D1541]-[.D1540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table:formula="of:=[.B1540]+10" office:value-type="float" office:value="15400" calcext:value-type="float">
            <text:p>15400</text:p>
          </table:table-cell>
          <table:table-cell office:value-type="float" office:value="8640000" calcext:value-type="float">
            <text:p>8640000</text:p>
          </table:table-cell>
          <table:table-cell table:formula="of:=[.B1541]/[.C1541]" office:value-type="float" office:value="0.00178240740740741" calcext:value-type="float">
            <text:p>0,00178240740740741000</text:p>
          </table:table-cell>
          <table:table-cell table:formula="of:=[.D1542]-[.D1541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table:formula="of:=[.B1541]+10" office:value-type="float" office:value="15410" calcext:value-type="float">
            <text:p>15410</text:p>
          </table:table-cell>
          <table:table-cell office:value-type="float" office:value="8640000" calcext:value-type="float">
            <text:p>8640000</text:p>
          </table:table-cell>
          <table:table-cell table:formula="of:=[.B1542]/[.C1542]" office:value-type="float" office:value="0.00178356481481481" calcext:value-type="float">
            <text:p>0,00178356481481481000</text:p>
          </table:table-cell>
          <table:table-cell table:formula="of:=[.D1543]-[.D1542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 table:formula="of:=[.B1542]+10" office:value-type="float" office:value="15420" calcext:value-type="float">
            <text:p>15420</text:p>
          </table:table-cell>
          <table:table-cell office:value-type="float" office:value="8640000" calcext:value-type="float">
            <text:p>8640000</text:p>
          </table:table-cell>
          <table:table-cell table:formula="of:=[.B1543]/[.C1543]" office:value-type="float" office:value="0.00178472222222222" calcext:value-type="float">
            <text:p>0,00178472222222222000</text:p>
          </table:table-cell>
          <table:table-cell table:formula="of:=[.D1544]-[.D1543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table:formula="of:=[.B1543]+10" office:value-type="float" office:value="15430" calcext:value-type="float">
            <text:p>15430</text:p>
          </table:table-cell>
          <table:table-cell office:value-type="float" office:value="8640000" calcext:value-type="float">
            <text:p>8640000</text:p>
          </table:table-cell>
          <table:table-cell table:formula="of:=[.B1544]/[.C1544]" office:value-type="float" office:value="0.00178587962962963" calcext:value-type="float">
            <text:p>0,00178587962962963000</text:p>
          </table:table-cell>
          <table:table-cell table:formula="of:=[.D1545]-[.D1544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table:formula="of:=[.B1544]+10" office:value-type="float" office:value="15440" calcext:value-type="float">
            <text:p>15440</text:p>
          </table:table-cell>
          <table:table-cell office:value-type="float" office:value="8640000" calcext:value-type="float">
            <text:p>8640000</text:p>
          </table:table-cell>
          <table:table-cell table:formula="of:=[.B1545]/[.C1545]" office:value-type="float" office:value="0.00178703703703704" calcext:value-type="float">
            <text:p>0,00178703703703704000</text:p>
          </table:table-cell>
          <table:table-cell table:formula="of:=[.D1546]-[.D1545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table:formula="of:=[.B1545]+10" office:value-type="float" office:value="15450" calcext:value-type="float">
            <text:p>15450</text:p>
          </table:table-cell>
          <table:table-cell office:value-type="float" office:value="8640000" calcext:value-type="float">
            <text:p>8640000</text:p>
          </table:table-cell>
          <table:table-cell table:formula="of:=[.B1546]/[.C1546]" office:value-type="float" office:value="0.00178819444444444" calcext:value-type="float">
            <text:p>0,00178819444444444000</text:p>
          </table:table-cell>
          <table:table-cell table:formula="of:=[.D1547]-[.D1546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table:formula="of:=[.B1546]+10" office:value-type="float" office:value="15460" calcext:value-type="float">
            <text:p>15460</text:p>
          </table:table-cell>
          <table:table-cell office:value-type="float" office:value="8640000" calcext:value-type="float">
            <text:p>8640000</text:p>
          </table:table-cell>
          <table:table-cell table:formula="of:=[.B1547]/[.C1547]" office:value-type="float" office:value="0.00178935185185185" calcext:value-type="float">
            <text:p>0,00178935185185185000</text:p>
          </table:table-cell>
          <table:table-cell table:formula="of:=[.D1548]-[.D1547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table:formula="of:=[.B1547]+10" office:value-type="float" office:value="15470" calcext:value-type="float">
            <text:p>15470</text:p>
          </table:table-cell>
          <table:table-cell office:value-type="float" office:value="8640000" calcext:value-type="float">
            <text:p>8640000</text:p>
          </table:table-cell>
          <table:table-cell table:formula="of:=[.B1548]/[.C1548]" office:value-type="float" office:value="0.00179050925925926" calcext:value-type="float">
            <text:p>0,00179050925925926000</text:p>
          </table:table-cell>
          <table:table-cell table:formula="of:=[.D1549]-[.D1548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table:formula="of:=[.B1548]+10" office:value-type="float" office:value="15480" calcext:value-type="float">
            <text:p>15480</text:p>
          </table:table-cell>
          <table:table-cell office:value-type="float" office:value="8640000" calcext:value-type="float">
            <text:p>8640000</text:p>
          </table:table-cell>
          <table:table-cell table:formula="of:=[.B1549]/[.C1549]" office:value-type="float" office:value="0.00179166666666667" calcext:value-type="float">
            <text:p>0,00179166666666667000</text:p>
          </table:table-cell>
          <table:table-cell table:formula="of:=[.D1550]-[.D1549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table:formula="of:=[.B1549]+10" office:value-type="float" office:value="15490" calcext:value-type="float">
            <text:p>15490</text:p>
          </table:table-cell>
          <table:table-cell office:value-type="float" office:value="8640000" calcext:value-type="float">
            <text:p>8640000</text:p>
          </table:table-cell>
          <table:table-cell table:formula="of:=[.B1550]/[.C1550]" office:value-type="float" office:value="0.00179282407407407" calcext:value-type="float">
            <text:p>0,00179282407407407000</text:p>
          </table:table-cell>
          <table:table-cell table:formula="of:=[.D1551]-[.D1550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table:formula="of:=[.B1550]+10" office:value-type="float" office:value="15500" calcext:value-type="float">
            <text:p>15500</text:p>
          </table:table-cell>
          <table:table-cell office:value-type="float" office:value="8640000" calcext:value-type="float">
            <text:p>8640000</text:p>
          </table:table-cell>
          <table:table-cell table:formula="of:=[.B1551]/[.C1551]" office:value-type="float" office:value="0.00179398148148148" calcext:value-type="float">
            <text:p>0,00179398148148148000</text:p>
          </table:table-cell>
          <table:table-cell table:formula="of:=[.D1552]-[.D1551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table:formula="of:=[.B1551]+10" office:value-type="float" office:value="15510" calcext:value-type="float">
            <text:p>15510</text:p>
          </table:table-cell>
          <table:table-cell office:value-type="float" office:value="8640000" calcext:value-type="float">
            <text:p>8640000</text:p>
          </table:table-cell>
          <table:table-cell table:formula="of:=[.B1552]/[.C1552]" office:value-type="float" office:value="0.00179513888888889" calcext:value-type="float">
            <text:p>0,00179513888888889000</text:p>
          </table:table-cell>
          <table:table-cell table:formula="of:=[.D1553]-[.D1552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552" calcext:value-type="float">
            <text:p>1552</text:p>
          </table:table-cell>
          <table:table-cell table:formula="of:=[.B1552]+10" office:value-type="float" office:value="15520" calcext:value-type="float">
            <text:p>15520</text:p>
          </table:table-cell>
          <table:table-cell office:value-type="float" office:value="8640000" calcext:value-type="float">
            <text:p>8640000</text:p>
          </table:table-cell>
          <table:table-cell table:formula="of:=[.B1553]/[.C1553]" office:value-type="float" office:value="0.0017962962962963" calcext:value-type="float">
            <text:p>0,00179629629629630000</text:p>
          </table:table-cell>
          <table:table-cell table:formula="of:=[.D1554]-[.D1553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table:formula="of:=[.B1553]+10" office:value-type="float" office:value="15530" calcext:value-type="float">
            <text:p>15530</text:p>
          </table:table-cell>
          <table:table-cell office:value-type="float" office:value="8640000" calcext:value-type="float">
            <text:p>8640000</text:p>
          </table:table-cell>
          <table:table-cell table:formula="of:=[.B1554]/[.C1554]" office:value-type="float" office:value="0.0017974537037037" calcext:value-type="float">
            <text:p>0,00179745370370370000</text:p>
          </table:table-cell>
          <table:table-cell table:formula="of:=[.D1555]-[.D1554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554" calcext:value-type="float">
            <text:p>1554</text:p>
          </table:table-cell>
          <table:table-cell table:formula="of:=[.B1554]+10" office:value-type="float" office:value="15540" calcext:value-type="float">
            <text:p>15540</text:p>
          </table:table-cell>
          <table:table-cell office:value-type="float" office:value="8640000" calcext:value-type="float">
            <text:p>8640000</text:p>
          </table:table-cell>
          <table:table-cell table:formula="of:=[.B1555]/[.C1555]" office:value-type="float" office:value="0.00179861111111111" calcext:value-type="float">
            <text:p>0,00179861111111111000</text:p>
          </table:table-cell>
          <table:table-cell table:formula="of:=[.D1556]-[.D1555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table:formula="of:=[.B1555]+10" office:value-type="float" office:value="15550" calcext:value-type="float">
            <text:p>15550</text:p>
          </table:table-cell>
          <table:table-cell office:value-type="float" office:value="8640000" calcext:value-type="float">
            <text:p>8640000</text:p>
          </table:table-cell>
          <table:table-cell table:formula="of:=[.B1556]/[.C1556]" office:value-type="float" office:value="0.00179976851851852" calcext:value-type="float">
            <text:p>0,00179976851851852000</text:p>
          </table:table-cell>
          <table:table-cell table:formula="of:=[.D1557]-[.D1556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556" calcext:value-type="float">
            <text:p>1556</text:p>
          </table:table-cell>
          <table:table-cell table:formula="of:=[.B1556]+10" office:value-type="float" office:value="15560" calcext:value-type="float">
            <text:p>15560</text:p>
          </table:table-cell>
          <table:table-cell office:value-type="float" office:value="8640000" calcext:value-type="float">
            <text:p>8640000</text:p>
          </table:table-cell>
          <table:table-cell table:formula="of:=[.B1557]/[.C1557]" office:value-type="float" office:value="0.00180092592592593" calcext:value-type="float">
            <text:p>0,00180092592592593000</text:p>
          </table:table-cell>
          <table:table-cell table:formula="of:=[.D1558]-[.D1557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table:formula="of:=[.B1557]+10" office:value-type="float" office:value="15570" calcext:value-type="float">
            <text:p>15570</text:p>
          </table:table-cell>
          <table:table-cell office:value-type="float" office:value="8640000" calcext:value-type="float">
            <text:p>8640000</text:p>
          </table:table-cell>
          <table:table-cell table:formula="of:=[.B1558]/[.C1558]" office:value-type="float" office:value="0.00180208333333333" calcext:value-type="float">
            <text:p>0,00180208333333333000</text:p>
          </table:table-cell>
          <table:table-cell table:formula="of:=[.D1559]-[.D1558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558" calcext:value-type="float">
            <text:p>1558</text:p>
          </table:table-cell>
          <table:table-cell table:formula="of:=[.B1558]+10" office:value-type="float" office:value="15580" calcext:value-type="float">
            <text:p>15580</text:p>
          </table:table-cell>
          <table:table-cell office:value-type="float" office:value="8640000" calcext:value-type="float">
            <text:p>8640000</text:p>
          </table:table-cell>
          <table:table-cell table:formula="of:=[.B1559]/[.C1559]" office:value-type="float" office:value="0.00180324074074074" calcext:value-type="float">
            <text:p>0,00180324074074074000</text:p>
          </table:table-cell>
          <table:table-cell table:formula="of:=[.D1560]-[.D1559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table:formula="of:=[.B1559]+10" office:value-type="float" office:value="15590" calcext:value-type="float">
            <text:p>15590</text:p>
          </table:table-cell>
          <table:table-cell office:value-type="float" office:value="8640000" calcext:value-type="float">
            <text:p>8640000</text:p>
          </table:table-cell>
          <table:table-cell table:formula="of:=[.B1560]/[.C1560]" office:value-type="float" office:value="0.00180439814814815" calcext:value-type="float">
            <text:p>0,00180439814814815000</text:p>
          </table:table-cell>
          <table:table-cell table:formula="of:=[.D1561]-[.D1560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table:formula="of:=[.B1560]+10" office:value-type="float" office:value="15600" calcext:value-type="float">
            <text:p>15600</text:p>
          </table:table-cell>
          <table:table-cell office:value-type="float" office:value="8640000" calcext:value-type="float">
            <text:p>8640000</text:p>
          </table:table-cell>
          <table:table-cell table:formula="of:=[.B1561]/[.C1561]" office:value-type="float" office:value="0.00180555555555556" calcext:value-type="float">
            <text:p>0,00180555555555556000</text:p>
          </table:table-cell>
          <table:table-cell table:formula="of:=[.D1562]-[.D1561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table:formula="of:=[.B1561]+10" office:value-type="float" office:value="15610" calcext:value-type="float">
            <text:p>15610</text:p>
          </table:table-cell>
          <table:table-cell office:value-type="float" office:value="8640000" calcext:value-type="float">
            <text:p>8640000</text:p>
          </table:table-cell>
          <table:table-cell table:formula="of:=[.B1562]/[.C1562]" office:value-type="float" office:value="0.00180671296296296" calcext:value-type="float">
            <text:p>0,00180671296296296000</text:p>
          </table:table-cell>
          <table:table-cell table:formula="of:=[.D1563]-[.D1562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562" calcext:value-type="float">
            <text:p>1562</text:p>
          </table:table-cell>
          <table:table-cell table:formula="of:=[.B1562]+10" office:value-type="float" office:value="15620" calcext:value-type="float">
            <text:p>15620</text:p>
          </table:table-cell>
          <table:table-cell office:value-type="float" office:value="8640000" calcext:value-type="float">
            <text:p>8640000</text:p>
          </table:table-cell>
          <table:table-cell table:formula="of:=[.B1563]/[.C1563]" office:value-type="float" office:value="0.00180787037037037" calcext:value-type="float">
            <text:p>0,00180787037037037000</text:p>
          </table:table-cell>
          <table:table-cell table:formula="of:=[.D1564]-[.D1563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table:formula="of:=[.B1563]+10" office:value-type="float" office:value="15630" calcext:value-type="float">
            <text:p>15630</text:p>
          </table:table-cell>
          <table:table-cell office:value-type="float" office:value="8640000" calcext:value-type="float">
            <text:p>8640000</text:p>
          </table:table-cell>
          <table:table-cell table:formula="of:=[.B1564]/[.C1564]" office:value-type="float" office:value="0.00180902777777778" calcext:value-type="float">
            <text:p>0,00180902777777778000</text:p>
          </table:table-cell>
          <table:table-cell table:formula="of:=[.D1565]-[.D1564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 table:formula="of:=[.B1564]+10" office:value-type="float" office:value="15640" calcext:value-type="float">
            <text:p>15640</text:p>
          </table:table-cell>
          <table:table-cell office:value-type="float" office:value="8640000" calcext:value-type="float">
            <text:p>8640000</text:p>
          </table:table-cell>
          <table:table-cell table:formula="of:=[.B1565]/[.C1565]" office:value-type="float" office:value="0.00181018518518519" calcext:value-type="float">
            <text:p>0,00181018518518519000</text:p>
          </table:table-cell>
          <table:table-cell table:formula="of:=[.D1566]-[.D1565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table:formula="of:=[.B1565]+10" office:value-type="float" office:value="15650" calcext:value-type="float">
            <text:p>15650</text:p>
          </table:table-cell>
          <table:table-cell office:value-type="float" office:value="8640000" calcext:value-type="float">
            <text:p>8640000</text:p>
          </table:table-cell>
          <table:table-cell table:formula="of:=[.B1566]/[.C1566]" office:value-type="float" office:value="0.00181134259259259" calcext:value-type="float">
            <text:p>0,00181134259259259000</text:p>
          </table:table-cell>
          <table:table-cell table:formula="of:=[.D1567]-[.D1566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566" calcext:value-type="float">
            <text:p>1566</text:p>
          </table:table-cell>
          <table:table-cell table:formula="of:=[.B1566]+10" office:value-type="float" office:value="15660" calcext:value-type="float">
            <text:p>15660</text:p>
          </table:table-cell>
          <table:table-cell office:value-type="float" office:value="8640000" calcext:value-type="float">
            <text:p>8640000</text:p>
          </table:table-cell>
          <table:table-cell table:formula="of:=[.B1567]/[.C1567]" office:value-type="float" office:value="0.0018125" calcext:value-type="float">
            <text:p>0,00181250000000000000</text:p>
          </table:table-cell>
          <table:table-cell table:formula="of:=[.D1568]-[.D1567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table:formula="of:=[.B1567]+10" office:value-type="float" office:value="15670" calcext:value-type="float">
            <text:p>15670</text:p>
          </table:table-cell>
          <table:table-cell office:value-type="float" office:value="8640000" calcext:value-type="float">
            <text:p>8640000</text:p>
          </table:table-cell>
          <table:table-cell table:formula="of:=[.B1568]/[.C1568]" office:value-type="float" office:value="0.00181365740740741" calcext:value-type="float">
            <text:p>0,00181365740740741000</text:p>
          </table:table-cell>
          <table:table-cell table:formula="of:=[.D1569]-[.D1568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table:formula="of:=[.B1568]+10" office:value-type="float" office:value="15680" calcext:value-type="float">
            <text:p>15680</text:p>
          </table:table-cell>
          <table:table-cell office:value-type="float" office:value="8640000" calcext:value-type="float">
            <text:p>8640000</text:p>
          </table:table-cell>
          <table:table-cell table:formula="of:=[.B1569]/[.C1569]" office:value-type="float" office:value="0.00181481481481482" calcext:value-type="float">
            <text:p>0,00181481481481482000</text:p>
          </table:table-cell>
          <table:table-cell table:formula="of:=[.D1570]-[.D1569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table:formula="of:=[.B1569]+10" office:value-type="float" office:value="15690" calcext:value-type="float">
            <text:p>15690</text:p>
          </table:table-cell>
          <table:table-cell office:value-type="float" office:value="8640000" calcext:value-type="float">
            <text:p>8640000</text:p>
          </table:table-cell>
          <table:table-cell table:formula="of:=[.B1570]/[.C1570]" office:value-type="float" office:value="0.00181597222222222" calcext:value-type="float">
            <text:p>0,00181597222222222000</text:p>
          </table:table-cell>
          <table:table-cell table:formula="of:=[.D1571]-[.D1570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table:formula="of:=[.B1570]+10" office:value-type="float" office:value="15700" calcext:value-type="float">
            <text:p>15700</text:p>
          </table:table-cell>
          <table:table-cell office:value-type="float" office:value="8640000" calcext:value-type="float">
            <text:p>8640000</text:p>
          </table:table-cell>
          <table:table-cell table:formula="of:=[.B1571]/[.C1571]" office:value-type="float" office:value="0.00181712962962963" calcext:value-type="float">
            <text:p>0,00181712962962963000</text:p>
          </table:table-cell>
          <table:table-cell table:formula="of:=[.D1572]-[.D1571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table:formula="of:=[.B1571]+10" office:value-type="float" office:value="15710" calcext:value-type="float">
            <text:p>15710</text:p>
          </table:table-cell>
          <table:table-cell office:value-type="float" office:value="8640000" calcext:value-type="float">
            <text:p>8640000</text:p>
          </table:table-cell>
          <table:table-cell table:formula="of:=[.B1572]/[.C1572]" office:value-type="float" office:value="0.00181828703703704" calcext:value-type="float">
            <text:p>0,00181828703703704000</text:p>
          </table:table-cell>
          <table:table-cell table:formula="of:=[.D1573]-[.D1572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572" calcext:value-type="float">
            <text:p>1572</text:p>
          </table:table-cell>
          <table:table-cell table:formula="of:=[.B1572]+10" office:value-type="float" office:value="15720" calcext:value-type="float">
            <text:p>15720</text:p>
          </table:table-cell>
          <table:table-cell office:value-type="float" office:value="8640000" calcext:value-type="float">
            <text:p>8640000</text:p>
          </table:table-cell>
          <table:table-cell table:formula="of:=[.B1573]/[.C1573]" office:value-type="float" office:value="0.00181944444444444" calcext:value-type="float">
            <text:p>0,00181944444444444000</text:p>
          </table:table-cell>
          <table:table-cell table:formula="of:=[.D1574]-[.D1573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table:formula="of:=[.B1573]+10" office:value-type="float" office:value="15730" calcext:value-type="float">
            <text:p>15730</text:p>
          </table:table-cell>
          <table:table-cell office:value-type="float" office:value="8640000" calcext:value-type="float">
            <text:p>8640000</text:p>
          </table:table-cell>
          <table:table-cell table:formula="of:=[.B1574]/[.C1574]" office:value-type="float" office:value="0.00182060185185185" calcext:value-type="float">
            <text:p>0,00182060185185185000</text:p>
          </table:table-cell>
          <table:table-cell table:formula="of:=[.D1575]-[.D1574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574" calcext:value-type="float">
            <text:p>1574</text:p>
          </table:table-cell>
          <table:table-cell table:formula="of:=[.B1574]+10" office:value-type="float" office:value="15740" calcext:value-type="float">
            <text:p>15740</text:p>
          </table:table-cell>
          <table:table-cell office:value-type="float" office:value="8640000" calcext:value-type="float">
            <text:p>8640000</text:p>
          </table:table-cell>
          <table:table-cell table:formula="of:=[.B1575]/[.C1575]" office:value-type="float" office:value="0.00182175925925926" calcext:value-type="float">
            <text:p>0,00182175925925926000</text:p>
          </table:table-cell>
          <table:table-cell table:formula="of:=[.D1576]-[.D1575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table:formula="of:=[.B1575]+10" office:value-type="float" office:value="15750" calcext:value-type="float">
            <text:p>15750</text:p>
          </table:table-cell>
          <table:table-cell office:value-type="float" office:value="8640000" calcext:value-type="float">
            <text:p>8640000</text:p>
          </table:table-cell>
          <table:table-cell table:formula="of:=[.B1576]/[.C1576]" office:value-type="float" office:value="0.00182291666666667" calcext:value-type="float">
            <text:p>0,00182291666666667000</text:p>
          </table:table-cell>
          <table:table-cell table:formula="of:=[.D1577]-[.D1576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 table:formula="of:=[.B1576]+10" office:value-type="float" office:value="15760" calcext:value-type="float">
            <text:p>15760</text:p>
          </table:table-cell>
          <table:table-cell office:value-type="float" office:value="8640000" calcext:value-type="float">
            <text:p>8640000</text:p>
          </table:table-cell>
          <table:table-cell table:formula="of:=[.B1577]/[.C1577]" office:value-type="float" office:value="0.00182407407407407" calcext:value-type="float">
            <text:p>0,00182407407407407000</text:p>
          </table:table-cell>
          <table:table-cell table:formula="of:=[.D1578]-[.D1577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table:formula="of:=[.B1577]+10" office:value-type="float" office:value="15770" calcext:value-type="float">
            <text:p>15770</text:p>
          </table:table-cell>
          <table:table-cell office:value-type="float" office:value="8640000" calcext:value-type="float">
            <text:p>8640000</text:p>
          </table:table-cell>
          <table:table-cell table:formula="of:=[.B1578]/[.C1578]" office:value-type="float" office:value="0.00182523148148148" calcext:value-type="float">
            <text:p>0,00182523148148148000</text:p>
          </table:table-cell>
          <table:table-cell table:formula="of:=[.D1579]-[.D1578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578" calcext:value-type="float">
            <text:p>1578</text:p>
          </table:table-cell>
          <table:table-cell table:formula="of:=[.B1578]+10" office:value-type="float" office:value="15780" calcext:value-type="float">
            <text:p>15780</text:p>
          </table:table-cell>
          <table:table-cell office:value-type="float" office:value="8640000" calcext:value-type="float">
            <text:p>8640000</text:p>
          </table:table-cell>
          <table:table-cell table:formula="of:=[.B1579]/[.C1579]" office:value-type="float" office:value="0.00182638888888889" calcext:value-type="float">
            <text:p>0,00182638888888889000</text:p>
          </table:table-cell>
          <table:table-cell table:formula="of:=[.D1580]-[.D1579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 table:formula="of:=[.B1579]+10" office:value-type="float" office:value="15790" calcext:value-type="float">
            <text:p>15790</text:p>
          </table:table-cell>
          <table:table-cell office:value-type="float" office:value="8640000" calcext:value-type="float">
            <text:p>8640000</text:p>
          </table:table-cell>
          <table:table-cell table:formula="of:=[.B1580]/[.C1580]" office:value-type="float" office:value="0.0018275462962963" calcext:value-type="float">
            <text:p>0,00182754629629630000</text:p>
          </table:table-cell>
          <table:table-cell table:formula="of:=[.D1581]-[.D1580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table:formula="of:=[.B1580]+10" office:value-type="float" office:value="15800" calcext:value-type="float">
            <text:p>15800</text:p>
          </table:table-cell>
          <table:table-cell office:value-type="float" office:value="8640000" calcext:value-type="float">
            <text:p>8640000</text:p>
          </table:table-cell>
          <table:table-cell table:formula="of:=[.B1581]/[.C1581]" office:value-type="float" office:value="0.0018287037037037" calcext:value-type="float">
            <text:p>0,00182870370370370000</text:p>
          </table:table-cell>
          <table:table-cell table:formula="of:=[.D1582]-[.D1581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table:formula="of:=[.B1581]+10" office:value-type="float" office:value="15810" calcext:value-type="float">
            <text:p>15810</text:p>
          </table:table-cell>
          <table:table-cell office:value-type="float" office:value="8640000" calcext:value-type="float">
            <text:p>8640000</text:p>
          </table:table-cell>
          <table:table-cell table:formula="of:=[.B1582]/[.C1582]" office:value-type="float" office:value="0.00182986111111111" calcext:value-type="float">
            <text:p>0,00182986111111111000</text:p>
          </table:table-cell>
          <table:table-cell table:formula="of:=[.D1583]-[.D1582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582" calcext:value-type="float">
            <text:p>1582</text:p>
          </table:table-cell>
          <table:table-cell table:formula="of:=[.B1582]+10" office:value-type="float" office:value="15820" calcext:value-type="float">
            <text:p>15820</text:p>
          </table:table-cell>
          <table:table-cell office:value-type="float" office:value="8640000" calcext:value-type="float">
            <text:p>8640000</text:p>
          </table:table-cell>
          <table:table-cell table:formula="of:=[.B1583]/[.C1583]" office:value-type="float" office:value="0.00183101851851852" calcext:value-type="float">
            <text:p>0,00183101851851852000</text:p>
          </table:table-cell>
          <table:table-cell table:formula="of:=[.D1584]-[.D1583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table:formula="of:=[.B1583]+10" office:value-type="float" office:value="15830" calcext:value-type="float">
            <text:p>15830</text:p>
          </table:table-cell>
          <table:table-cell office:value-type="float" office:value="8640000" calcext:value-type="float">
            <text:p>8640000</text:p>
          </table:table-cell>
          <table:table-cell table:formula="of:=[.B1584]/[.C1584]" office:value-type="float" office:value="0.00183217592592593" calcext:value-type="float">
            <text:p>0,00183217592592593000</text:p>
          </table:table-cell>
          <table:table-cell table:formula="of:=[.D1585]-[.D1584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584" calcext:value-type="float">
            <text:p>1584</text:p>
          </table:table-cell>
          <table:table-cell table:formula="of:=[.B1584]+10" office:value-type="float" office:value="15840" calcext:value-type="float">
            <text:p>15840</text:p>
          </table:table-cell>
          <table:table-cell office:value-type="float" office:value="8640000" calcext:value-type="float">
            <text:p>8640000</text:p>
          </table:table-cell>
          <table:table-cell table:formula="of:=[.B1585]/[.C1585]" office:value-type="float" office:value="0.00183333333333333" calcext:value-type="float">
            <text:p>0,00183333333333333000</text:p>
          </table:table-cell>
          <table:table-cell table:formula="of:=[.D1586]-[.D1585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table:formula="of:=[.B1585]+10" office:value-type="float" office:value="15850" calcext:value-type="float">
            <text:p>15850</text:p>
          </table:table-cell>
          <table:table-cell office:value-type="float" office:value="8640000" calcext:value-type="float">
            <text:p>8640000</text:p>
          </table:table-cell>
          <table:table-cell table:formula="of:=[.B1586]/[.C1586]" office:value-type="float" office:value="0.00183449074074074" calcext:value-type="float">
            <text:p>0,00183449074074074000</text:p>
          </table:table-cell>
          <table:table-cell table:formula="of:=[.D1587]-[.D1586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586" calcext:value-type="float">
            <text:p>1586</text:p>
          </table:table-cell>
          <table:table-cell table:formula="of:=[.B1586]+10" office:value-type="float" office:value="15860" calcext:value-type="float">
            <text:p>15860</text:p>
          </table:table-cell>
          <table:table-cell office:value-type="float" office:value="8640000" calcext:value-type="float">
            <text:p>8640000</text:p>
          </table:table-cell>
          <table:table-cell table:formula="of:=[.B1587]/[.C1587]" office:value-type="float" office:value="0.00183564814814815" calcext:value-type="float">
            <text:p>0,00183564814814815000</text:p>
          </table:table-cell>
          <table:table-cell table:formula="of:=[.D1588]-[.D1587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587" calcext:value-type="float">
            <text:p>1587</text:p>
          </table:table-cell>
          <table:table-cell table:formula="of:=[.B1587]+10" office:value-type="float" office:value="15870" calcext:value-type="float">
            <text:p>15870</text:p>
          </table:table-cell>
          <table:table-cell office:value-type="float" office:value="8640000" calcext:value-type="float">
            <text:p>8640000</text:p>
          </table:table-cell>
          <table:table-cell table:formula="of:=[.B1588]/[.C1588]" office:value-type="float" office:value="0.00183680555555556" calcext:value-type="float">
            <text:p>0,00183680555555556000</text:p>
          </table:table-cell>
          <table:table-cell table:formula="of:=[.D1589]-[.D1588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588" calcext:value-type="float">
            <text:p>1588</text:p>
          </table:table-cell>
          <table:table-cell table:formula="of:=[.B1588]+10" office:value-type="float" office:value="15880" calcext:value-type="float">
            <text:p>15880</text:p>
          </table:table-cell>
          <table:table-cell office:value-type="float" office:value="8640000" calcext:value-type="float">
            <text:p>8640000</text:p>
          </table:table-cell>
          <table:table-cell table:formula="of:=[.B1589]/[.C1589]" office:value-type="float" office:value="0.00183796296296296" calcext:value-type="float">
            <text:p>0,00183796296296296000</text:p>
          </table:table-cell>
          <table:table-cell table:formula="of:=[.D1590]-[.D1589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589" calcext:value-type="float">
            <text:p>1589</text:p>
          </table:table-cell>
          <table:table-cell table:formula="of:=[.B1589]+10" office:value-type="float" office:value="15890" calcext:value-type="float">
            <text:p>15890</text:p>
          </table:table-cell>
          <table:table-cell office:value-type="float" office:value="8640000" calcext:value-type="float">
            <text:p>8640000</text:p>
          </table:table-cell>
          <table:table-cell table:formula="of:=[.B1590]/[.C1590]" office:value-type="float" office:value="0.00183912037037037" calcext:value-type="float">
            <text:p>0,00183912037037037000</text:p>
          </table:table-cell>
          <table:table-cell table:formula="of:=[.D1591]-[.D1590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table:formula="of:=[.B1590]+10" office:value-type="float" office:value="15900" calcext:value-type="float">
            <text:p>15900</text:p>
          </table:table-cell>
          <table:table-cell office:value-type="float" office:value="8640000" calcext:value-type="float">
            <text:p>8640000</text:p>
          </table:table-cell>
          <table:table-cell table:formula="of:=[.B1591]/[.C1591]" office:value-type="float" office:value="0.00184027777777778" calcext:value-type="float">
            <text:p>0,00184027777777778000</text:p>
          </table:table-cell>
          <table:table-cell table:formula="of:=[.D1592]-[.D1591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 table:formula="of:=[.B1591]+10" office:value-type="float" office:value="15910" calcext:value-type="float">
            <text:p>15910</text:p>
          </table:table-cell>
          <table:table-cell office:value-type="float" office:value="8640000" calcext:value-type="float">
            <text:p>8640000</text:p>
          </table:table-cell>
          <table:table-cell table:formula="of:=[.B1592]/[.C1592]" office:value-type="float" office:value="0.00184143518518519" calcext:value-type="float">
            <text:p>0,00184143518518518000</text:p>
          </table:table-cell>
          <table:table-cell table:formula="of:=[.D1593]-[.D1592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592" calcext:value-type="float">
            <text:p>1592</text:p>
          </table:table-cell>
          <table:table-cell table:formula="of:=[.B1592]+10" office:value-type="float" office:value="15920" calcext:value-type="float">
            <text:p>15920</text:p>
          </table:table-cell>
          <table:table-cell office:value-type="float" office:value="8640000" calcext:value-type="float">
            <text:p>8640000</text:p>
          </table:table-cell>
          <table:table-cell table:formula="of:=[.B1593]/[.C1593]" office:value-type="float" office:value="0.00184259259259259" calcext:value-type="float">
            <text:p>0,00184259259259259000</text:p>
          </table:table-cell>
          <table:table-cell table:formula="of:=[.D1594]-[.D1593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593" calcext:value-type="float">
            <text:p>1593</text:p>
          </table:table-cell>
          <table:table-cell table:formula="of:=[.B1593]+10" office:value-type="float" office:value="15930" calcext:value-type="float">
            <text:p>15930</text:p>
          </table:table-cell>
          <table:table-cell office:value-type="float" office:value="8640000" calcext:value-type="float">
            <text:p>8640000</text:p>
          </table:table-cell>
          <table:table-cell table:formula="of:=[.B1594]/[.C1594]" office:value-type="float" office:value="0.00184375" calcext:value-type="float">
            <text:p>0,00184375000000000000</text:p>
          </table:table-cell>
          <table:table-cell table:formula="of:=[.D1595]-[.D1594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594" calcext:value-type="float">
            <text:p>1594</text:p>
          </table:table-cell>
          <table:table-cell table:formula="of:=[.B1594]+10" office:value-type="float" office:value="15940" calcext:value-type="float">
            <text:p>15940</text:p>
          </table:table-cell>
          <table:table-cell office:value-type="float" office:value="8640000" calcext:value-type="float">
            <text:p>8640000</text:p>
          </table:table-cell>
          <table:table-cell table:formula="of:=[.B1595]/[.C1595]" office:value-type="float" office:value="0.00184490740740741" calcext:value-type="float">
            <text:p>0,00184490740740741000</text:p>
          </table:table-cell>
          <table:table-cell table:formula="of:=[.D1596]-[.D1595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table:formula="of:=[.B1595]+10" office:value-type="float" office:value="15950" calcext:value-type="float">
            <text:p>15950</text:p>
          </table:table-cell>
          <table:table-cell office:value-type="float" office:value="8640000" calcext:value-type="float">
            <text:p>8640000</text:p>
          </table:table-cell>
          <table:table-cell table:formula="of:=[.B1596]/[.C1596]" office:value-type="float" office:value="0.00184606481481482" calcext:value-type="float">
            <text:p>0,00184606481481482000</text:p>
          </table:table-cell>
          <table:table-cell table:formula="of:=[.D1597]-[.D1596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596" calcext:value-type="float">
            <text:p>1596</text:p>
          </table:table-cell>
          <table:table-cell table:formula="of:=[.B1596]+10" office:value-type="float" office:value="15960" calcext:value-type="float">
            <text:p>15960</text:p>
          </table:table-cell>
          <table:table-cell office:value-type="float" office:value="8640000" calcext:value-type="float">
            <text:p>8640000</text:p>
          </table:table-cell>
          <table:table-cell table:formula="of:=[.B1597]/[.C1597]" office:value-type="float" office:value="0.00184722222222222" calcext:value-type="float">
            <text:p>0,00184722222222222000</text:p>
          </table:table-cell>
          <table:table-cell table:formula="of:=[.D1598]-[.D1597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table:formula="of:=[.B1597]+10" office:value-type="float" office:value="15970" calcext:value-type="float">
            <text:p>15970</text:p>
          </table:table-cell>
          <table:table-cell office:value-type="float" office:value="8640000" calcext:value-type="float">
            <text:p>8640000</text:p>
          </table:table-cell>
          <table:table-cell table:formula="of:=[.B1598]/[.C1598]" office:value-type="float" office:value="0.00184837962962963" calcext:value-type="float">
            <text:p>0,00184837962962963000</text:p>
          </table:table-cell>
          <table:table-cell table:formula="of:=[.D1599]-[.D1598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598" calcext:value-type="float">
            <text:p>1598</text:p>
          </table:table-cell>
          <table:table-cell table:formula="of:=[.B1598]+10" office:value-type="float" office:value="15980" calcext:value-type="float">
            <text:p>15980</text:p>
          </table:table-cell>
          <table:table-cell office:value-type="float" office:value="8640000" calcext:value-type="float">
            <text:p>8640000</text:p>
          </table:table-cell>
          <table:table-cell table:formula="of:=[.B1599]/[.C1599]" office:value-type="float" office:value="0.00184953703703704" calcext:value-type="float">
            <text:p>0,00184953703703704000</text:p>
          </table:table-cell>
          <table:table-cell table:formula="of:=[.D1600]-[.D1599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 table:formula="of:=[.B1599]+10" office:value-type="float" office:value="15990" calcext:value-type="float">
            <text:p>15990</text:p>
          </table:table-cell>
          <table:table-cell office:value-type="float" office:value="8640000" calcext:value-type="float">
            <text:p>8640000</text:p>
          </table:table-cell>
          <table:table-cell table:formula="of:=[.B1600]/[.C1600]" office:value-type="float" office:value="0.00185069444444444" calcext:value-type="float">
            <text:p>0,00185069444444444000</text:p>
          </table:table-cell>
          <table:table-cell table:formula="of:=[.D1601]-[.D1600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table:formula="of:=[.B1600]+10" office:value-type="float" office:value="16000" calcext:value-type="float">
            <text:p>16000</text:p>
          </table:table-cell>
          <table:table-cell office:value-type="float" office:value="8640000" calcext:value-type="float">
            <text:p>8640000</text:p>
          </table:table-cell>
          <table:table-cell table:formula="of:=[.B1601]/[.C1601]" office:value-type="float" office:value="0.00185185185185185" calcext:value-type="float">
            <text:p>0,00185185185185185000</text:p>
          </table:table-cell>
          <table:table-cell table:formula="of:=[.D1602]-[.D1601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table:formula="of:=[.B1601]+10" office:value-type="float" office:value="16010" calcext:value-type="float">
            <text:p>16010</text:p>
          </table:table-cell>
          <table:table-cell office:value-type="float" office:value="8640000" calcext:value-type="float">
            <text:p>8640000</text:p>
          </table:table-cell>
          <table:table-cell table:formula="of:=[.B1602]/[.C1602]" office:value-type="float" office:value="0.00185300925925926" calcext:value-type="float">
            <text:p>0,00185300925925926000</text:p>
          </table:table-cell>
          <table:table-cell table:formula="of:=[.D1603]-[.D1602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602" calcext:value-type="float">
            <text:p>1602</text:p>
          </table:table-cell>
          <table:table-cell table:formula="of:=[.B1602]+10" office:value-type="float" office:value="16020" calcext:value-type="float">
            <text:p>16020</text:p>
          </table:table-cell>
          <table:table-cell office:value-type="float" office:value="8640000" calcext:value-type="float">
            <text:p>8640000</text:p>
          </table:table-cell>
          <table:table-cell table:formula="of:=[.B1603]/[.C1603]" office:value-type="float" office:value="0.00185416666666667" calcext:value-type="float">
            <text:p>0,00185416666666667000</text:p>
          </table:table-cell>
          <table:table-cell table:formula="of:=[.D1604]-[.D1603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  <table:table-cell table:formula="of:=[.B1603]+10" office:value-type="float" office:value="16030" calcext:value-type="float">
            <text:p>16030</text:p>
          </table:table-cell>
          <table:table-cell office:value-type="float" office:value="8640000" calcext:value-type="float">
            <text:p>8640000</text:p>
          </table:table-cell>
          <table:table-cell table:formula="of:=[.B1604]/[.C1604]" office:value-type="float" office:value="0.00185532407407407" calcext:value-type="float">
            <text:p>0,00185532407407407000</text:p>
          </table:table-cell>
          <table:table-cell table:formula="of:=[.D1605]-[.D1604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604" calcext:value-type="float">
            <text:p>1604</text:p>
          </table:table-cell>
          <table:table-cell table:formula="of:=[.B1604]+10" office:value-type="float" office:value="16040" calcext:value-type="float">
            <text:p>16040</text:p>
          </table:table-cell>
          <table:table-cell office:value-type="float" office:value="8640000" calcext:value-type="float">
            <text:p>8640000</text:p>
          </table:table-cell>
          <table:table-cell table:formula="of:=[.B1605]/[.C1605]" office:value-type="float" office:value="0.00185648148148148" calcext:value-type="float">
            <text:p>0,00185648148148148000</text:p>
          </table:table-cell>
          <table:table-cell table:formula="of:=[.D1606]-[.D1605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table:formula="of:=[.B1605]+10" office:value-type="float" office:value="16050" calcext:value-type="float">
            <text:p>16050</text:p>
          </table:table-cell>
          <table:table-cell office:value-type="float" office:value="8640000" calcext:value-type="float">
            <text:p>8640000</text:p>
          </table:table-cell>
          <table:table-cell table:formula="of:=[.B1606]/[.C1606]" office:value-type="float" office:value="0.00185763888888889" calcext:value-type="float">
            <text:p>0,00185763888888889000</text:p>
          </table:table-cell>
          <table:table-cell table:formula="of:=[.D1607]-[.D1606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606" calcext:value-type="float">
            <text:p>1606</text:p>
          </table:table-cell>
          <table:table-cell table:formula="of:=[.B1606]+10" office:value-type="float" office:value="16060" calcext:value-type="float">
            <text:p>16060</text:p>
          </table:table-cell>
          <table:table-cell office:value-type="float" office:value="8640000" calcext:value-type="float">
            <text:p>8640000</text:p>
          </table:table-cell>
          <table:table-cell table:formula="of:=[.B1607]/[.C1607]" office:value-type="float" office:value="0.0018587962962963" calcext:value-type="float">
            <text:p>0,00185879629629630000</text:p>
          </table:table-cell>
          <table:table-cell table:formula="of:=[.D1608]-[.D1607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table:formula="of:=[.B1607]+10" office:value-type="float" office:value="16070" calcext:value-type="float">
            <text:p>16070</text:p>
          </table:table-cell>
          <table:table-cell office:value-type="float" office:value="8640000" calcext:value-type="float">
            <text:p>8640000</text:p>
          </table:table-cell>
          <table:table-cell table:formula="of:=[.B1608]/[.C1608]" office:value-type="float" office:value="0.0018599537037037" calcext:value-type="float">
            <text:p>0,00185995370370370000</text:p>
          </table:table-cell>
          <table:table-cell table:formula="of:=[.D1609]-[.D1608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table:formula="of:=[.B1608]+10" office:value-type="float" office:value="16080" calcext:value-type="float">
            <text:p>16080</text:p>
          </table:table-cell>
          <table:table-cell office:value-type="float" office:value="8640000" calcext:value-type="float">
            <text:p>8640000</text:p>
          </table:table-cell>
          <table:table-cell table:formula="of:=[.B1609]/[.C1609]" office:value-type="float" office:value="0.00186111111111111" calcext:value-type="float">
            <text:p>0,00186111111111111000</text:p>
          </table:table-cell>
          <table:table-cell table:formula="of:=[.D1610]-[.D1609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table:formula="of:=[.B1609]+10" office:value-type="float" office:value="16090" calcext:value-type="float">
            <text:p>16090</text:p>
          </table:table-cell>
          <table:table-cell office:value-type="float" office:value="8640000" calcext:value-type="float">
            <text:p>8640000</text:p>
          </table:table-cell>
          <table:table-cell table:formula="of:=[.B1610]/[.C1610]" office:value-type="float" office:value="0.00186226851851852" calcext:value-type="float">
            <text:p>0,00186226851851852000</text:p>
          </table:table-cell>
          <table:table-cell table:formula="of:=[.D1611]-[.D1610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table:formula="of:=[.B1610]+10" office:value-type="float" office:value="16100" calcext:value-type="float">
            <text:p>16100</text:p>
          </table:table-cell>
          <table:table-cell office:value-type="float" office:value="8640000" calcext:value-type="float">
            <text:p>8640000</text:p>
          </table:table-cell>
          <table:table-cell table:formula="of:=[.B1611]/[.C1611]" office:value-type="float" office:value="0.00186342592592593" calcext:value-type="float">
            <text:p>0,00186342592592593000</text:p>
          </table:table-cell>
          <table:table-cell table:formula="of:=[.D1612]-[.D1611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  <table:table-cell table:formula="of:=[.B1611]+10" office:value-type="float" office:value="16110" calcext:value-type="float">
            <text:p>16110</text:p>
          </table:table-cell>
          <table:table-cell office:value-type="float" office:value="8640000" calcext:value-type="float">
            <text:p>8640000</text:p>
          </table:table-cell>
          <table:table-cell table:formula="of:=[.B1612]/[.C1612]" office:value-type="float" office:value="0.00186458333333333" calcext:value-type="float">
            <text:p>0,00186458333333333000</text:p>
          </table:table-cell>
          <table:table-cell table:formula="of:=[.D1613]-[.D1612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612" calcext:value-type="float">
            <text:p>1612</text:p>
          </table:table-cell>
          <table:table-cell table:formula="of:=[.B1612]+10" office:value-type="float" office:value="16120" calcext:value-type="float">
            <text:p>16120</text:p>
          </table:table-cell>
          <table:table-cell office:value-type="float" office:value="8640000" calcext:value-type="float">
            <text:p>8640000</text:p>
          </table:table-cell>
          <table:table-cell table:formula="of:=[.B1613]/[.C1613]" office:value-type="float" office:value="0.00186574074074074" calcext:value-type="float">
            <text:p>0,00186574074074074000</text:p>
          </table:table-cell>
          <table:table-cell table:formula="of:=[.D1614]-[.D1613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table:formula="of:=[.B1613]+10" office:value-type="float" office:value="16130" calcext:value-type="float">
            <text:p>16130</text:p>
          </table:table-cell>
          <table:table-cell office:value-type="float" office:value="8640000" calcext:value-type="float">
            <text:p>8640000</text:p>
          </table:table-cell>
          <table:table-cell table:formula="of:=[.B1614]/[.C1614]" office:value-type="float" office:value="0.00186689814814815" calcext:value-type="float">
            <text:p>0,00186689814814815000</text:p>
          </table:table-cell>
          <table:table-cell table:formula="of:=[.D1615]-[.D1614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614" calcext:value-type="float">
            <text:p>1614</text:p>
          </table:table-cell>
          <table:table-cell table:formula="of:=[.B1614]+10" office:value-type="float" office:value="16140" calcext:value-type="float">
            <text:p>16140</text:p>
          </table:table-cell>
          <table:table-cell office:value-type="float" office:value="8640000" calcext:value-type="float">
            <text:p>8640000</text:p>
          </table:table-cell>
          <table:table-cell table:formula="of:=[.B1615]/[.C1615]" office:value-type="float" office:value="0.00186805555555556" calcext:value-type="float">
            <text:p>0,00186805555555556000</text:p>
          </table:table-cell>
          <table:table-cell table:formula="of:=[.D1616]-[.D1615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table:formula="of:=[.B1615]+10" office:value-type="float" office:value="16150" calcext:value-type="float">
            <text:p>16150</text:p>
          </table:table-cell>
          <table:table-cell office:value-type="float" office:value="8640000" calcext:value-type="float">
            <text:p>8640000</text:p>
          </table:table-cell>
          <table:table-cell table:formula="of:=[.B1616]/[.C1616]" office:value-type="float" office:value="0.00186921296296296" calcext:value-type="float">
            <text:p>0,00186921296296296000</text:p>
          </table:table-cell>
          <table:table-cell table:formula="of:=[.D1617]-[.D1616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616" calcext:value-type="float">
            <text:p>1616</text:p>
          </table:table-cell>
          <table:table-cell table:formula="of:=[.B1616]+10" office:value-type="float" office:value="16160" calcext:value-type="float">
            <text:p>16160</text:p>
          </table:table-cell>
          <table:table-cell office:value-type="float" office:value="8640000" calcext:value-type="float">
            <text:p>8640000</text:p>
          </table:table-cell>
          <table:table-cell table:formula="of:=[.B1617]/[.C1617]" office:value-type="float" office:value="0.00187037037037037" calcext:value-type="float">
            <text:p>0,00187037037037037000</text:p>
          </table:table-cell>
          <table:table-cell table:formula="of:=[.D1618]-[.D1617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617" calcext:value-type="float">
            <text:p>1617</text:p>
          </table:table-cell>
          <table:table-cell table:formula="of:=[.B1617]+10" office:value-type="float" office:value="16170" calcext:value-type="float">
            <text:p>16170</text:p>
          </table:table-cell>
          <table:table-cell office:value-type="float" office:value="8640000" calcext:value-type="float">
            <text:p>8640000</text:p>
          </table:table-cell>
          <table:table-cell table:formula="of:=[.B1618]/[.C1618]" office:value-type="float" office:value="0.00187152777777778" calcext:value-type="float">
            <text:p>0,00187152777777778000</text:p>
          </table:table-cell>
          <table:table-cell table:formula="of:=[.D1619]-[.D1618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618" calcext:value-type="float">
            <text:p>1618</text:p>
          </table:table-cell>
          <table:table-cell table:formula="of:=[.B1618]+10" office:value-type="float" office:value="16180" calcext:value-type="float">
            <text:p>16180</text:p>
          </table:table-cell>
          <table:table-cell office:value-type="float" office:value="8640000" calcext:value-type="float">
            <text:p>8640000</text:p>
          </table:table-cell>
          <table:table-cell table:formula="of:=[.B1619]/[.C1619]" office:value-type="float" office:value="0.00187268518518519" calcext:value-type="float">
            <text:p>0,00187268518518519000</text:p>
          </table:table-cell>
          <table:table-cell table:formula="of:=[.D1620]-[.D1619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 table:formula="of:=[.B1619]+10" office:value-type="float" office:value="16190" calcext:value-type="float">
            <text:p>16190</text:p>
          </table:table-cell>
          <table:table-cell office:value-type="float" office:value="8640000" calcext:value-type="float">
            <text:p>8640000</text:p>
          </table:table-cell>
          <table:table-cell table:formula="of:=[.B1620]/[.C1620]" office:value-type="float" office:value="0.00187384259259259" calcext:value-type="float">
            <text:p>0,00187384259259259000</text:p>
          </table:table-cell>
          <table:table-cell table:formula="of:=[.D1621]-[.D1620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table:formula="of:=[.B1620]+10" office:value-type="float" office:value="16200" calcext:value-type="float">
            <text:p>16200</text:p>
          </table:table-cell>
          <table:table-cell office:value-type="float" office:value="8640000" calcext:value-type="float">
            <text:p>8640000</text:p>
          </table:table-cell>
          <table:table-cell table:formula="of:=[.B1621]/[.C1621]" office:value-type="float" office:value="0.001875" calcext:value-type="float">
            <text:p>0,00187500000000000000</text:p>
          </table:table-cell>
          <table:table-cell table:formula="of:=[.D1622]-[.D1621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table:formula="of:=[.B1621]+10" office:value-type="float" office:value="16210" calcext:value-type="float">
            <text:p>16210</text:p>
          </table:table-cell>
          <table:table-cell office:value-type="float" office:value="8640000" calcext:value-type="float">
            <text:p>8640000</text:p>
          </table:table-cell>
          <table:table-cell table:formula="of:=[.B1622]/[.C1622]" office:value-type="float" office:value="0.00187615740740741" calcext:value-type="float">
            <text:p>0,00187615740740741000</text:p>
          </table:table-cell>
          <table:table-cell table:formula="of:=[.D1623]-[.D1622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622" calcext:value-type="float">
            <text:p>1622</text:p>
          </table:table-cell>
          <table:table-cell table:formula="of:=[.B1622]+10" office:value-type="float" office:value="16220" calcext:value-type="float">
            <text:p>16220</text:p>
          </table:table-cell>
          <table:table-cell office:value-type="float" office:value="8640000" calcext:value-type="float">
            <text:p>8640000</text:p>
          </table:table-cell>
          <table:table-cell table:formula="of:=[.B1623]/[.C1623]" office:value-type="float" office:value="0.00187731481481481" calcext:value-type="float">
            <text:p>0,00187731481481481000</text:p>
          </table:table-cell>
          <table:table-cell table:formula="of:=[.D1624]-[.D1623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623" calcext:value-type="float">
            <text:p>1623</text:p>
          </table:table-cell>
          <table:table-cell table:formula="of:=[.B1623]+10" office:value-type="float" office:value="16230" calcext:value-type="float">
            <text:p>16230</text:p>
          </table:table-cell>
          <table:table-cell office:value-type="float" office:value="8640000" calcext:value-type="float">
            <text:p>8640000</text:p>
          </table:table-cell>
          <table:table-cell table:formula="of:=[.B1624]/[.C1624]" office:value-type="float" office:value="0.00187847222222222" calcext:value-type="float">
            <text:p>0,00187847222222222000</text:p>
          </table:table-cell>
          <table:table-cell table:formula="of:=[.D1625]-[.D1624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624" calcext:value-type="float">
            <text:p>1624</text:p>
          </table:table-cell>
          <table:table-cell table:formula="of:=[.B1624]+10" office:value-type="float" office:value="16240" calcext:value-type="float">
            <text:p>16240</text:p>
          </table:table-cell>
          <table:table-cell office:value-type="float" office:value="8640000" calcext:value-type="float">
            <text:p>8640000</text:p>
          </table:table-cell>
          <table:table-cell table:formula="of:=[.B1625]/[.C1625]" office:value-type="float" office:value="0.00187962962962963" calcext:value-type="float">
            <text:p>0,00187962962962963000</text:p>
          </table:table-cell>
          <table:table-cell table:formula="of:=[.D1626]-[.D1625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table:formula="of:=[.B1625]+10" office:value-type="float" office:value="16250" calcext:value-type="float">
            <text:p>16250</text:p>
          </table:table-cell>
          <table:table-cell office:value-type="float" office:value="8640000" calcext:value-type="float">
            <text:p>8640000</text:p>
          </table:table-cell>
          <table:table-cell table:formula="of:=[.B1626]/[.C1626]" office:value-type="float" office:value="0.00188078703703704" calcext:value-type="float">
            <text:p>0,00188078703703704000</text:p>
          </table:table-cell>
          <table:table-cell table:formula="of:=[.D1627]-[.D1626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626" calcext:value-type="float">
            <text:p>1626</text:p>
          </table:table-cell>
          <table:table-cell table:formula="of:=[.B1626]+10" office:value-type="float" office:value="16260" calcext:value-type="float">
            <text:p>16260</text:p>
          </table:table-cell>
          <table:table-cell office:value-type="float" office:value="8640000" calcext:value-type="float">
            <text:p>8640000</text:p>
          </table:table-cell>
          <table:table-cell table:formula="of:=[.B1627]/[.C1627]" office:value-type="float" office:value="0.00188194444444444" calcext:value-type="float">
            <text:p>0,00188194444444444000</text:p>
          </table:table-cell>
          <table:table-cell table:formula="of:=[.D1628]-[.D1627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627" calcext:value-type="float">
            <text:p>1627</text:p>
          </table:table-cell>
          <table:table-cell table:formula="of:=[.B1627]+10" office:value-type="float" office:value="16270" calcext:value-type="float">
            <text:p>16270</text:p>
          </table:table-cell>
          <table:table-cell office:value-type="float" office:value="8640000" calcext:value-type="float">
            <text:p>8640000</text:p>
          </table:table-cell>
          <table:table-cell table:formula="of:=[.B1628]/[.C1628]" office:value-type="float" office:value="0.00188310185185185" calcext:value-type="float">
            <text:p>0,00188310185185185000</text:p>
          </table:table-cell>
          <table:table-cell table:formula="of:=[.D1629]-[.D1628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628" calcext:value-type="float">
            <text:p>1628</text:p>
          </table:table-cell>
          <table:table-cell table:formula="of:=[.B1628]+10" office:value-type="float" office:value="16280" calcext:value-type="float">
            <text:p>16280</text:p>
          </table:table-cell>
          <table:table-cell office:value-type="float" office:value="8640000" calcext:value-type="float">
            <text:p>8640000</text:p>
          </table:table-cell>
          <table:table-cell table:formula="of:=[.B1629]/[.C1629]" office:value-type="float" office:value="0.00188425925925926" calcext:value-type="float">
            <text:p>0,00188425925925926000</text:p>
          </table:table-cell>
          <table:table-cell table:formula="of:=[.D1630]-[.D1629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629" calcext:value-type="float">
            <text:p>1629</text:p>
          </table:table-cell>
          <table:table-cell table:formula="of:=[.B1629]+10" office:value-type="float" office:value="16290" calcext:value-type="float">
            <text:p>16290</text:p>
          </table:table-cell>
          <table:table-cell office:value-type="float" office:value="8640000" calcext:value-type="float">
            <text:p>8640000</text:p>
          </table:table-cell>
          <table:table-cell table:formula="of:=[.B1630]/[.C1630]" office:value-type="float" office:value="0.00188541666666667" calcext:value-type="float">
            <text:p>0,00188541666666667000</text:p>
          </table:table-cell>
          <table:table-cell table:formula="of:=[.D1631]-[.D1630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table:formula="of:=[.B1630]+10" office:value-type="float" office:value="16300" calcext:value-type="float">
            <text:p>16300</text:p>
          </table:table-cell>
          <table:table-cell office:value-type="float" office:value="8640000" calcext:value-type="float">
            <text:p>8640000</text:p>
          </table:table-cell>
          <table:table-cell table:formula="of:=[.B1631]/[.C1631]" office:value-type="float" office:value="0.00188657407407407" calcext:value-type="float">
            <text:p>0,00188657407407407000</text:p>
          </table:table-cell>
          <table:table-cell table:formula="of:=[.D1632]-[.D1631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631" calcext:value-type="float">
            <text:p>1631</text:p>
          </table:table-cell>
          <table:table-cell table:formula="of:=[.B1631]+10" office:value-type="float" office:value="16310" calcext:value-type="float">
            <text:p>16310</text:p>
          </table:table-cell>
          <table:table-cell office:value-type="float" office:value="8640000" calcext:value-type="float">
            <text:p>8640000</text:p>
          </table:table-cell>
          <table:table-cell table:formula="of:=[.B1632]/[.C1632]" office:value-type="float" office:value="0.00188773148148148" calcext:value-type="float">
            <text:p>0,00188773148148148000</text:p>
          </table:table-cell>
          <table:table-cell table:formula="of:=[.D1633]-[.D1632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632" calcext:value-type="float">
            <text:p>1632</text:p>
          </table:table-cell>
          <table:table-cell table:formula="of:=[.B1632]+10" office:value-type="float" office:value="16320" calcext:value-type="float">
            <text:p>16320</text:p>
          </table:table-cell>
          <table:table-cell office:value-type="float" office:value="8640000" calcext:value-type="float">
            <text:p>8640000</text:p>
          </table:table-cell>
          <table:table-cell table:formula="of:=[.B1633]/[.C1633]" office:value-type="float" office:value="0.00188888888888889" calcext:value-type="float">
            <text:p>0,00188888888888889000</text:p>
          </table:table-cell>
          <table:table-cell table:formula="of:=[.D1634]-[.D1633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633" calcext:value-type="float">
            <text:p>1633</text:p>
          </table:table-cell>
          <table:table-cell table:formula="of:=[.B1633]+10" office:value-type="float" office:value="16330" calcext:value-type="float">
            <text:p>16330</text:p>
          </table:table-cell>
          <table:table-cell office:value-type="float" office:value="8640000" calcext:value-type="float">
            <text:p>8640000</text:p>
          </table:table-cell>
          <table:table-cell table:formula="of:=[.B1634]/[.C1634]" office:value-type="float" office:value="0.0018900462962963" calcext:value-type="float">
            <text:p>0,00189004629629630000</text:p>
          </table:table-cell>
          <table:table-cell table:formula="of:=[.D1635]-[.D1634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634" calcext:value-type="float">
            <text:p>1634</text:p>
          </table:table-cell>
          <table:table-cell table:formula="of:=[.B1634]+10" office:value-type="float" office:value="16340" calcext:value-type="float">
            <text:p>16340</text:p>
          </table:table-cell>
          <table:table-cell office:value-type="float" office:value="8640000" calcext:value-type="float">
            <text:p>8640000</text:p>
          </table:table-cell>
          <table:table-cell table:formula="of:=[.B1635]/[.C1635]" office:value-type="float" office:value="0.0018912037037037" calcext:value-type="float">
            <text:p>0,00189120370370370000</text:p>
          </table:table-cell>
          <table:table-cell table:formula="of:=[.D1636]-[.D1635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table:formula="of:=[.B1635]+10" office:value-type="float" office:value="16350" calcext:value-type="float">
            <text:p>16350</text:p>
          </table:table-cell>
          <table:table-cell office:value-type="float" office:value="8640000" calcext:value-type="float">
            <text:p>8640000</text:p>
          </table:table-cell>
          <table:table-cell table:formula="of:=[.B1636]/[.C1636]" office:value-type="float" office:value="0.00189236111111111" calcext:value-type="float">
            <text:p>0,00189236111111111000</text:p>
          </table:table-cell>
          <table:table-cell table:formula="of:=[.D1637]-[.D1636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636" calcext:value-type="float">
            <text:p>1636</text:p>
          </table:table-cell>
          <table:table-cell table:formula="of:=[.B1636]+10" office:value-type="float" office:value="16360" calcext:value-type="float">
            <text:p>16360</text:p>
          </table:table-cell>
          <table:table-cell office:value-type="float" office:value="8640000" calcext:value-type="float">
            <text:p>8640000</text:p>
          </table:table-cell>
          <table:table-cell table:formula="of:=[.B1637]/[.C1637]" office:value-type="float" office:value="0.00189351851851852" calcext:value-type="float">
            <text:p>0,00189351851851852000</text:p>
          </table:table-cell>
          <table:table-cell table:formula="of:=[.D1638]-[.D1637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637" calcext:value-type="float">
            <text:p>1637</text:p>
          </table:table-cell>
          <table:table-cell table:formula="of:=[.B1637]+10" office:value-type="float" office:value="16370" calcext:value-type="float">
            <text:p>16370</text:p>
          </table:table-cell>
          <table:table-cell office:value-type="float" office:value="8640000" calcext:value-type="float">
            <text:p>8640000</text:p>
          </table:table-cell>
          <table:table-cell table:formula="of:=[.B1638]/[.C1638]" office:value-type="float" office:value="0.00189467592592593" calcext:value-type="float">
            <text:p>0,00189467592592593000</text:p>
          </table:table-cell>
          <table:table-cell table:formula="of:=[.D1639]-[.D1638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638" calcext:value-type="float">
            <text:p>1638</text:p>
          </table:table-cell>
          <table:table-cell table:formula="of:=[.B1638]+10" office:value-type="float" office:value="16380" calcext:value-type="float">
            <text:p>16380</text:p>
          </table:table-cell>
          <table:table-cell office:value-type="float" office:value="8640000" calcext:value-type="float">
            <text:p>8640000</text:p>
          </table:table-cell>
          <table:table-cell table:formula="of:=[.B1639]/[.C1639]" office:value-type="float" office:value="0.00189583333333333" calcext:value-type="float">
            <text:p>0,00189583333333333000</text:p>
          </table:table-cell>
          <table:table-cell table:formula="of:=[.D1640]-[.D1639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639" calcext:value-type="float">
            <text:p>1639</text:p>
          </table:table-cell>
          <table:table-cell table:formula="of:=[.B1639]+10" office:value-type="float" office:value="16390" calcext:value-type="float">
            <text:p>16390</text:p>
          </table:table-cell>
          <table:table-cell office:value-type="float" office:value="8640000" calcext:value-type="float">
            <text:p>8640000</text:p>
          </table:table-cell>
          <table:table-cell table:formula="of:=[.B1640]/[.C1640]" office:value-type="float" office:value="0.00189699074074074" calcext:value-type="float">
            <text:p>0,00189699074074074000</text:p>
          </table:table-cell>
          <table:table-cell table:formula="of:=[.D1641]-[.D1640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table:formula="of:=[.B1640]+10" office:value-type="float" office:value="16400" calcext:value-type="float">
            <text:p>16400</text:p>
          </table:table-cell>
          <table:table-cell office:value-type="float" office:value="8640000" calcext:value-type="float">
            <text:p>8640000</text:p>
          </table:table-cell>
          <table:table-cell table:formula="of:=[.B1641]/[.C1641]" office:value-type="float" office:value="0.00189814814814815" calcext:value-type="float">
            <text:p>0,00189814814814815000</text:p>
          </table:table-cell>
          <table:table-cell table:formula="of:=[.D1642]-[.D1641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  <table:table-cell table:formula="of:=[.B1641]+10" office:value-type="float" office:value="16410" calcext:value-type="float">
            <text:p>16410</text:p>
          </table:table-cell>
          <table:table-cell office:value-type="float" office:value="8640000" calcext:value-type="float">
            <text:p>8640000</text:p>
          </table:table-cell>
          <table:table-cell table:formula="of:=[.B1642]/[.C1642]" office:value-type="float" office:value="0.00189930555555556" calcext:value-type="float">
            <text:p>0,00189930555555556000</text:p>
          </table:table-cell>
          <table:table-cell table:formula="of:=[.D1643]-[.D1642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642" calcext:value-type="float">
            <text:p>1642</text:p>
          </table:table-cell>
          <table:table-cell table:formula="of:=[.B1642]+10" office:value-type="float" office:value="16420" calcext:value-type="float">
            <text:p>16420</text:p>
          </table:table-cell>
          <table:table-cell office:value-type="float" office:value="8640000" calcext:value-type="float">
            <text:p>8640000</text:p>
          </table:table-cell>
          <table:table-cell table:formula="of:=[.B1643]/[.C1643]" office:value-type="float" office:value="0.00190046296296296" calcext:value-type="float">
            <text:p>0,00190046296296296000</text:p>
          </table:table-cell>
          <table:table-cell table:formula="of:=[.D1644]-[.D1643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643" calcext:value-type="float">
            <text:p>1643</text:p>
          </table:table-cell>
          <table:table-cell table:formula="of:=[.B1643]+10" office:value-type="float" office:value="16430" calcext:value-type="float">
            <text:p>16430</text:p>
          </table:table-cell>
          <table:table-cell office:value-type="float" office:value="8640000" calcext:value-type="float">
            <text:p>8640000</text:p>
          </table:table-cell>
          <table:table-cell table:formula="of:=[.B1644]/[.C1644]" office:value-type="float" office:value="0.00190162037037037" calcext:value-type="float">
            <text:p>0,00190162037037037000</text:p>
          </table:table-cell>
          <table:table-cell table:formula="of:=[.D1645]-[.D1644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644" calcext:value-type="float">
            <text:p>1644</text:p>
          </table:table-cell>
          <table:table-cell table:formula="of:=[.B1644]+10" office:value-type="float" office:value="16440" calcext:value-type="float">
            <text:p>16440</text:p>
          </table:table-cell>
          <table:table-cell office:value-type="float" office:value="8640000" calcext:value-type="float">
            <text:p>8640000</text:p>
          </table:table-cell>
          <table:table-cell table:formula="of:=[.B1645]/[.C1645]" office:value-type="float" office:value="0.00190277777777778" calcext:value-type="float">
            <text:p>0,00190277777777778000</text:p>
          </table:table-cell>
          <table:table-cell table:formula="of:=[.D1646]-[.D1645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645" calcext:value-type="float">
            <text:p>1645</text:p>
          </table:table-cell>
          <table:table-cell table:formula="of:=[.B1645]+10" office:value-type="float" office:value="16450" calcext:value-type="float">
            <text:p>16450</text:p>
          </table:table-cell>
          <table:table-cell office:value-type="float" office:value="8640000" calcext:value-type="float">
            <text:p>8640000</text:p>
          </table:table-cell>
          <table:table-cell table:formula="of:=[.B1646]/[.C1646]" office:value-type="float" office:value="0.00190393518518519" calcext:value-type="float">
            <text:p>0,00190393518518519000</text:p>
          </table:table-cell>
          <table:table-cell table:formula="of:=[.D1647]-[.D1646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646" calcext:value-type="float">
            <text:p>1646</text:p>
          </table:table-cell>
          <table:table-cell table:formula="of:=[.B1646]+10" office:value-type="float" office:value="16460" calcext:value-type="float">
            <text:p>16460</text:p>
          </table:table-cell>
          <table:table-cell office:value-type="float" office:value="8640000" calcext:value-type="float">
            <text:p>8640000</text:p>
          </table:table-cell>
          <table:table-cell table:formula="of:=[.B1647]/[.C1647]" office:value-type="float" office:value="0.00190509259259259" calcext:value-type="float">
            <text:p>0,00190509259259259000</text:p>
          </table:table-cell>
          <table:table-cell table:formula="of:=[.D1648]-[.D1647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647" calcext:value-type="float">
            <text:p>1647</text:p>
          </table:table-cell>
          <table:table-cell table:formula="of:=[.B1647]+10" office:value-type="float" office:value="16470" calcext:value-type="float">
            <text:p>16470</text:p>
          </table:table-cell>
          <table:table-cell office:value-type="float" office:value="8640000" calcext:value-type="float">
            <text:p>8640000</text:p>
          </table:table-cell>
          <table:table-cell table:formula="of:=[.B1648]/[.C1648]" office:value-type="float" office:value="0.00190625" calcext:value-type="float">
            <text:p>0,00190625000000000000</text:p>
          </table:table-cell>
          <table:table-cell table:formula="of:=[.D1649]-[.D1648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648" calcext:value-type="float">
            <text:p>1648</text:p>
          </table:table-cell>
          <table:table-cell table:formula="of:=[.B1648]+10" office:value-type="float" office:value="16480" calcext:value-type="float">
            <text:p>16480</text:p>
          </table:table-cell>
          <table:table-cell office:value-type="float" office:value="8640000" calcext:value-type="float">
            <text:p>8640000</text:p>
          </table:table-cell>
          <table:table-cell table:formula="of:=[.B1649]/[.C1649]" office:value-type="float" office:value="0.00190740740740741" calcext:value-type="float">
            <text:p>0,00190740740740741000</text:p>
          </table:table-cell>
          <table:table-cell table:formula="of:=[.D1650]-[.D1649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  <table:table-cell table:formula="of:=[.B1649]+10" office:value-type="float" office:value="16490" calcext:value-type="float">
            <text:p>16490</text:p>
          </table:table-cell>
          <table:table-cell office:value-type="float" office:value="8640000" calcext:value-type="float">
            <text:p>8640000</text:p>
          </table:table-cell>
          <table:table-cell table:formula="of:=[.B1650]/[.C1650]" office:value-type="float" office:value="0.00190856481481481" calcext:value-type="float">
            <text:p>0,00190856481481481000</text:p>
          </table:table-cell>
          <table:table-cell table:formula="of:=[.D1651]-[.D1650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table:formula="of:=[.B1650]+10" office:value-type="float" office:value="16500" calcext:value-type="float">
            <text:p>16500</text:p>
          </table:table-cell>
          <table:table-cell office:value-type="float" office:value="8640000" calcext:value-type="float">
            <text:p>8640000</text:p>
          </table:table-cell>
          <table:table-cell table:formula="of:=[.B1651]/[.C1651]" office:value-type="float" office:value="0.00190972222222222" calcext:value-type="float">
            <text:p>0,00190972222222222000</text:p>
          </table:table-cell>
          <table:table-cell table:formula="of:=[.D1652]-[.D1651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  <table:table-cell table:formula="of:=[.B1651]+10" office:value-type="float" office:value="16510" calcext:value-type="float">
            <text:p>16510</text:p>
          </table:table-cell>
          <table:table-cell office:value-type="float" office:value="8640000" calcext:value-type="float">
            <text:p>8640000</text:p>
          </table:table-cell>
          <table:table-cell table:formula="of:=[.B1652]/[.C1652]" office:value-type="float" office:value="0.00191087962962963" calcext:value-type="float">
            <text:p>0,00191087962962963000</text:p>
          </table:table-cell>
          <table:table-cell table:formula="of:=[.D1653]-[.D1652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652" calcext:value-type="float">
            <text:p>1652</text:p>
          </table:table-cell>
          <table:table-cell table:formula="of:=[.B1652]+10" office:value-type="float" office:value="16520" calcext:value-type="float">
            <text:p>16520</text:p>
          </table:table-cell>
          <table:table-cell office:value-type="float" office:value="8640000" calcext:value-type="float">
            <text:p>8640000</text:p>
          </table:table-cell>
          <table:table-cell table:formula="of:=[.B1653]/[.C1653]" office:value-type="float" office:value="0.00191203703703704" calcext:value-type="float">
            <text:p>0,00191203703703704000</text:p>
          </table:table-cell>
          <table:table-cell table:formula="of:=[.D1654]-[.D1653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653" calcext:value-type="float">
            <text:p>1653</text:p>
          </table:table-cell>
          <table:table-cell table:formula="of:=[.B1653]+10" office:value-type="float" office:value="16530" calcext:value-type="float">
            <text:p>16530</text:p>
          </table:table-cell>
          <table:table-cell office:value-type="float" office:value="8640000" calcext:value-type="float">
            <text:p>8640000</text:p>
          </table:table-cell>
          <table:table-cell table:formula="of:=[.B1654]/[.C1654]" office:value-type="float" office:value="0.00191319444444444" calcext:value-type="float">
            <text:p>0,00191319444444444000</text:p>
          </table:table-cell>
          <table:table-cell table:formula="of:=[.D1655]-[.D1654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654" calcext:value-type="float">
            <text:p>1654</text:p>
          </table:table-cell>
          <table:table-cell table:formula="of:=[.B1654]+10" office:value-type="float" office:value="16540" calcext:value-type="float">
            <text:p>16540</text:p>
          </table:table-cell>
          <table:table-cell office:value-type="float" office:value="8640000" calcext:value-type="float">
            <text:p>8640000</text:p>
          </table:table-cell>
          <table:table-cell table:formula="of:=[.B1655]/[.C1655]" office:value-type="float" office:value="0.00191435185185185" calcext:value-type="float">
            <text:p>0,00191435185185185000</text:p>
          </table:table-cell>
          <table:table-cell table:formula="of:=[.D1656]-[.D1655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655" calcext:value-type="float">
            <text:p>1655</text:p>
          </table:table-cell>
          <table:table-cell table:formula="of:=[.B1655]+10" office:value-type="float" office:value="16550" calcext:value-type="float">
            <text:p>16550</text:p>
          </table:table-cell>
          <table:table-cell office:value-type="float" office:value="8640000" calcext:value-type="float">
            <text:p>8640000</text:p>
          </table:table-cell>
          <table:table-cell table:formula="of:=[.B1656]/[.C1656]" office:value-type="float" office:value="0.00191550925925926" calcext:value-type="float">
            <text:p>0,00191550925925926000</text:p>
          </table:table-cell>
          <table:table-cell table:formula="of:=[.D1657]-[.D1656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656" calcext:value-type="float">
            <text:p>1656</text:p>
          </table:table-cell>
          <table:table-cell table:formula="of:=[.B1656]+10" office:value-type="float" office:value="16560" calcext:value-type="float">
            <text:p>16560</text:p>
          </table:table-cell>
          <table:table-cell office:value-type="float" office:value="8640000" calcext:value-type="float">
            <text:p>8640000</text:p>
          </table:table-cell>
          <table:table-cell table:formula="of:=[.B1657]/[.C1657]" office:value-type="float" office:value="0.00191666666666667" calcext:value-type="float">
            <text:p>0,00191666666666667000</text:p>
          </table:table-cell>
          <table:table-cell table:formula="of:=[.D1658]-[.D1657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 table:formula="of:=[.B1657]+10" office:value-type="float" office:value="16570" calcext:value-type="float">
            <text:p>16570</text:p>
          </table:table-cell>
          <table:table-cell office:value-type="float" office:value="8640000" calcext:value-type="float">
            <text:p>8640000</text:p>
          </table:table-cell>
          <table:table-cell table:formula="of:=[.B1658]/[.C1658]" office:value-type="float" office:value="0.00191782407407407" calcext:value-type="float">
            <text:p>0,00191782407407407000</text:p>
          </table:table-cell>
          <table:table-cell table:formula="of:=[.D1659]-[.D1658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658" calcext:value-type="float">
            <text:p>1658</text:p>
          </table:table-cell>
          <table:table-cell table:formula="of:=[.B1658]+10" office:value-type="float" office:value="16580" calcext:value-type="float">
            <text:p>16580</text:p>
          </table:table-cell>
          <table:table-cell office:value-type="float" office:value="8640000" calcext:value-type="float">
            <text:p>8640000</text:p>
          </table:table-cell>
          <table:table-cell table:formula="of:=[.B1659]/[.C1659]" office:value-type="float" office:value="0.00191898148148148" calcext:value-type="float">
            <text:p>0,00191898148148148000</text:p>
          </table:table-cell>
          <table:table-cell table:formula="of:=[.D1660]-[.D1659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659" calcext:value-type="float">
            <text:p>1659</text:p>
          </table:table-cell>
          <table:table-cell table:formula="of:=[.B1659]+10" office:value-type="float" office:value="16590" calcext:value-type="float">
            <text:p>16590</text:p>
          </table:table-cell>
          <table:table-cell office:value-type="float" office:value="8640000" calcext:value-type="float">
            <text:p>8640000</text:p>
          </table:table-cell>
          <table:table-cell table:formula="of:=[.B1660]/[.C1660]" office:value-type="float" office:value="0.00192013888888889" calcext:value-type="float">
            <text:p>0,00192013888888889000</text:p>
          </table:table-cell>
          <table:table-cell table:formula="of:=[.D1661]-[.D1660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table:formula="of:=[.B1660]+10" office:value-type="float" office:value="16600" calcext:value-type="float">
            <text:p>16600</text:p>
          </table:table-cell>
          <table:table-cell office:value-type="float" office:value="8640000" calcext:value-type="float">
            <text:p>8640000</text:p>
          </table:table-cell>
          <table:table-cell table:formula="of:=[.B1661]/[.C1661]" office:value-type="float" office:value="0.0019212962962963" calcext:value-type="float">
            <text:p>0,00192129629629630000</text:p>
          </table:table-cell>
          <table:table-cell table:formula="of:=[.D1662]-[.D1661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661" calcext:value-type="float">
            <text:p>1661</text:p>
          </table:table-cell>
          <table:table-cell table:formula="of:=[.B1661]+10" office:value-type="float" office:value="16610" calcext:value-type="float">
            <text:p>16610</text:p>
          </table:table-cell>
          <table:table-cell office:value-type="float" office:value="8640000" calcext:value-type="float">
            <text:p>8640000</text:p>
          </table:table-cell>
          <table:table-cell table:formula="of:=[.B1662]/[.C1662]" office:value-type="float" office:value="0.0019224537037037" calcext:value-type="float">
            <text:p>0,00192245370370370000</text:p>
          </table:table-cell>
          <table:table-cell table:formula="of:=[.D1663]-[.D1662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662" calcext:value-type="float">
            <text:p>1662</text:p>
          </table:table-cell>
          <table:table-cell table:formula="of:=[.B1662]+10" office:value-type="float" office:value="16620" calcext:value-type="float">
            <text:p>16620</text:p>
          </table:table-cell>
          <table:table-cell office:value-type="float" office:value="8640000" calcext:value-type="float">
            <text:p>8640000</text:p>
          </table:table-cell>
          <table:table-cell table:formula="of:=[.B1663]/[.C1663]" office:value-type="float" office:value="0.00192361111111111" calcext:value-type="float">
            <text:p>0,00192361111111111000</text:p>
          </table:table-cell>
          <table:table-cell table:formula="of:=[.D1664]-[.D1663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663" calcext:value-type="float">
            <text:p>1663</text:p>
          </table:table-cell>
          <table:table-cell table:formula="of:=[.B1663]+10" office:value-type="float" office:value="16630" calcext:value-type="float">
            <text:p>16630</text:p>
          </table:table-cell>
          <table:table-cell office:value-type="float" office:value="8640000" calcext:value-type="float">
            <text:p>8640000</text:p>
          </table:table-cell>
          <table:table-cell table:formula="of:=[.B1664]/[.C1664]" office:value-type="float" office:value="0.00192476851851852" calcext:value-type="float">
            <text:p>0,00192476851851852000</text:p>
          </table:table-cell>
          <table:table-cell table:formula="of:=[.D1665]-[.D1664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664" calcext:value-type="float">
            <text:p>1664</text:p>
          </table:table-cell>
          <table:table-cell table:formula="of:=[.B1664]+10" office:value-type="float" office:value="16640" calcext:value-type="float">
            <text:p>16640</text:p>
          </table:table-cell>
          <table:table-cell office:value-type="float" office:value="8640000" calcext:value-type="float">
            <text:p>8640000</text:p>
          </table:table-cell>
          <table:table-cell table:formula="of:=[.B1665]/[.C1665]" office:value-type="float" office:value="0.00192592592592593" calcext:value-type="float">
            <text:p>0,00192592592592593000</text:p>
          </table:table-cell>
          <table:table-cell table:formula="of:=[.D1666]-[.D1665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665" calcext:value-type="float">
            <text:p>1665</text:p>
          </table:table-cell>
          <table:table-cell table:formula="of:=[.B1665]+10" office:value-type="float" office:value="16650" calcext:value-type="float">
            <text:p>16650</text:p>
          </table:table-cell>
          <table:table-cell office:value-type="float" office:value="8640000" calcext:value-type="float">
            <text:p>8640000</text:p>
          </table:table-cell>
          <table:table-cell table:formula="of:=[.B1666]/[.C1666]" office:value-type="float" office:value="0.00192708333333333" calcext:value-type="float">
            <text:p>0,00192708333333333000</text:p>
          </table:table-cell>
          <table:table-cell table:formula="of:=[.D1667]-[.D1666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666" calcext:value-type="float">
            <text:p>1666</text:p>
          </table:table-cell>
          <table:table-cell table:formula="of:=[.B1666]+10" office:value-type="float" office:value="16660" calcext:value-type="float">
            <text:p>16660</text:p>
          </table:table-cell>
          <table:table-cell office:value-type="float" office:value="8640000" calcext:value-type="float">
            <text:p>8640000</text:p>
          </table:table-cell>
          <table:table-cell table:formula="of:=[.B1667]/[.C1667]" office:value-type="float" office:value="0.00192824074074074" calcext:value-type="float">
            <text:p>0,00192824074074074000</text:p>
          </table:table-cell>
          <table:table-cell table:formula="of:=[.D1668]-[.D1667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  <table:table-cell table:formula="of:=[.B1667]+10" office:value-type="float" office:value="16670" calcext:value-type="float">
            <text:p>16670</text:p>
          </table:table-cell>
          <table:table-cell office:value-type="float" office:value="8640000" calcext:value-type="float">
            <text:p>8640000</text:p>
          </table:table-cell>
          <table:table-cell table:formula="of:=[.B1668]/[.C1668]" office:value-type="float" office:value="0.00192939814814815" calcext:value-type="float">
            <text:p>0,00192939814814815000</text:p>
          </table:table-cell>
          <table:table-cell table:formula="of:=[.D1669]-[.D1668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 table:formula="of:=[.B1668]+10" office:value-type="float" office:value="16680" calcext:value-type="float">
            <text:p>16680</text:p>
          </table:table-cell>
          <table:table-cell office:value-type="float" office:value="8640000" calcext:value-type="float">
            <text:p>8640000</text:p>
          </table:table-cell>
          <table:table-cell table:formula="of:=[.B1669]/[.C1669]" office:value-type="float" office:value="0.00193055555555556" calcext:value-type="float">
            <text:p>0,00193055555555556000</text:p>
          </table:table-cell>
          <table:table-cell table:formula="of:=[.D1670]-[.D1669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669" calcext:value-type="float">
            <text:p>1669</text:p>
          </table:table-cell>
          <table:table-cell table:formula="of:=[.B1669]+10" office:value-type="float" office:value="16690" calcext:value-type="float">
            <text:p>16690</text:p>
          </table:table-cell>
          <table:table-cell office:value-type="float" office:value="8640000" calcext:value-type="float">
            <text:p>8640000</text:p>
          </table:table-cell>
          <table:table-cell table:formula="of:=[.B1670]/[.C1670]" office:value-type="float" office:value="0.00193171296296296" calcext:value-type="float">
            <text:p>0,00193171296296296000</text:p>
          </table:table-cell>
          <table:table-cell table:formula="of:=[.D1671]-[.D1670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table:formula="of:=[.B1670]+10" office:value-type="float" office:value="16700" calcext:value-type="float">
            <text:p>16700</text:p>
          </table:table-cell>
          <table:table-cell office:value-type="float" office:value="8640000" calcext:value-type="float">
            <text:p>8640000</text:p>
          </table:table-cell>
          <table:table-cell table:formula="of:=[.B1671]/[.C1671]" office:value-type="float" office:value="0.00193287037037037" calcext:value-type="float">
            <text:p>0,00193287037037037000</text:p>
          </table:table-cell>
          <table:table-cell table:formula="of:=[.D1672]-[.D1671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671" calcext:value-type="float">
            <text:p>1671</text:p>
          </table:table-cell>
          <table:table-cell table:formula="of:=[.B1671]+10" office:value-type="float" office:value="16710" calcext:value-type="float">
            <text:p>16710</text:p>
          </table:table-cell>
          <table:table-cell office:value-type="float" office:value="8640000" calcext:value-type="float">
            <text:p>8640000</text:p>
          </table:table-cell>
          <table:table-cell table:formula="of:=[.B1672]/[.C1672]" office:value-type="float" office:value="0.00193402777777778" calcext:value-type="float">
            <text:p>0,00193402777777778000</text:p>
          </table:table-cell>
          <table:table-cell table:formula="of:=[.D1673]-[.D1672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672" calcext:value-type="float">
            <text:p>1672</text:p>
          </table:table-cell>
          <table:table-cell table:formula="of:=[.B1672]+10" office:value-type="float" office:value="16720" calcext:value-type="float">
            <text:p>16720</text:p>
          </table:table-cell>
          <table:table-cell office:value-type="float" office:value="8640000" calcext:value-type="float">
            <text:p>8640000</text:p>
          </table:table-cell>
          <table:table-cell table:formula="of:=[.B1673]/[.C1673]" office:value-type="float" office:value="0.00193518518518519" calcext:value-type="float">
            <text:p>0,00193518518518519000</text:p>
          </table:table-cell>
          <table:table-cell table:formula="of:=[.D1674]-[.D1673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673" calcext:value-type="float">
            <text:p>1673</text:p>
          </table:table-cell>
          <table:table-cell table:formula="of:=[.B1673]+10" office:value-type="float" office:value="16730" calcext:value-type="float">
            <text:p>16730</text:p>
          </table:table-cell>
          <table:table-cell office:value-type="float" office:value="8640000" calcext:value-type="float">
            <text:p>8640000</text:p>
          </table:table-cell>
          <table:table-cell table:formula="of:=[.B1674]/[.C1674]" office:value-type="float" office:value="0.00193634259259259" calcext:value-type="float">
            <text:p>0,00193634259259259000</text:p>
          </table:table-cell>
          <table:table-cell table:formula="of:=[.D1675]-[.D1674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674" calcext:value-type="float">
            <text:p>1674</text:p>
          </table:table-cell>
          <table:table-cell table:formula="of:=[.B1674]+10" office:value-type="float" office:value="16740" calcext:value-type="float">
            <text:p>16740</text:p>
          </table:table-cell>
          <table:table-cell office:value-type="float" office:value="8640000" calcext:value-type="float">
            <text:p>8640000</text:p>
          </table:table-cell>
          <table:table-cell table:formula="of:=[.B1675]/[.C1675]" office:value-type="float" office:value="0.0019375" calcext:value-type="float">
            <text:p>0,00193750000000000000</text:p>
          </table:table-cell>
          <table:table-cell table:formula="of:=[.D1676]-[.D1675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675" calcext:value-type="float">
            <text:p>1675</text:p>
          </table:table-cell>
          <table:table-cell table:formula="of:=[.B1675]+10" office:value-type="float" office:value="16750" calcext:value-type="float">
            <text:p>16750</text:p>
          </table:table-cell>
          <table:table-cell office:value-type="float" office:value="8640000" calcext:value-type="float">
            <text:p>8640000</text:p>
          </table:table-cell>
          <table:table-cell table:formula="of:=[.B1676]/[.C1676]" office:value-type="float" office:value="0.00193865740740741" calcext:value-type="float">
            <text:p>0,00193865740740741000</text:p>
          </table:table-cell>
          <table:table-cell table:formula="of:=[.D1677]-[.D1676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676" calcext:value-type="float">
            <text:p>1676</text:p>
          </table:table-cell>
          <table:table-cell table:formula="of:=[.B1676]+10" office:value-type="float" office:value="16760" calcext:value-type="float">
            <text:p>16760</text:p>
          </table:table-cell>
          <table:table-cell office:value-type="float" office:value="8640000" calcext:value-type="float">
            <text:p>8640000</text:p>
          </table:table-cell>
          <table:table-cell table:formula="of:=[.B1677]/[.C1677]" office:value-type="float" office:value="0.00193981481481481" calcext:value-type="float">
            <text:p>0,00193981481481481000</text:p>
          </table:table-cell>
          <table:table-cell table:formula="of:=[.D1678]-[.D1677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677" calcext:value-type="float">
            <text:p>1677</text:p>
          </table:table-cell>
          <table:table-cell table:formula="of:=[.B1677]+10" office:value-type="float" office:value="16770" calcext:value-type="float">
            <text:p>16770</text:p>
          </table:table-cell>
          <table:table-cell office:value-type="float" office:value="8640000" calcext:value-type="float">
            <text:p>8640000</text:p>
          </table:table-cell>
          <table:table-cell table:formula="of:=[.B1678]/[.C1678]" office:value-type="float" office:value="0.00194097222222222" calcext:value-type="float">
            <text:p>0,00194097222222222000</text:p>
          </table:table-cell>
          <table:table-cell table:formula="of:=[.D1679]-[.D1678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678" calcext:value-type="float">
            <text:p>1678</text:p>
          </table:table-cell>
          <table:table-cell table:formula="of:=[.B1678]+10" office:value-type="float" office:value="16780" calcext:value-type="float">
            <text:p>16780</text:p>
          </table:table-cell>
          <table:table-cell office:value-type="float" office:value="8640000" calcext:value-type="float">
            <text:p>8640000</text:p>
          </table:table-cell>
          <table:table-cell table:formula="of:=[.B1679]/[.C1679]" office:value-type="float" office:value="0.00194212962962963" calcext:value-type="float">
            <text:p>0,00194212962962963000</text:p>
          </table:table-cell>
          <table:table-cell table:formula="of:=[.D1680]-[.D1679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  <table:table-cell table:formula="of:=[.B1679]+10" office:value-type="float" office:value="16790" calcext:value-type="float">
            <text:p>16790</text:p>
          </table:table-cell>
          <table:table-cell office:value-type="float" office:value="8640000" calcext:value-type="float">
            <text:p>8640000</text:p>
          </table:table-cell>
          <table:table-cell table:formula="of:=[.B1680]/[.C1680]" office:value-type="float" office:value="0.00194328703703704" calcext:value-type="float">
            <text:p>0,00194328703703704000</text:p>
          </table:table-cell>
          <table:table-cell table:formula="of:=[.D1681]-[.D1680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table:formula="of:=[.B1680]+10" office:value-type="float" office:value="16800" calcext:value-type="float">
            <text:p>16800</text:p>
          </table:table-cell>
          <table:table-cell office:value-type="float" office:value="8640000" calcext:value-type="float">
            <text:p>8640000</text:p>
          </table:table-cell>
          <table:table-cell table:formula="of:=[.B1681]/[.C1681]" office:value-type="float" office:value="0.00194444444444444" calcext:value-type="float">
            <text:p>0,00194444444444444000</text:p>
          </table:table-cell>
          <table:table-cell table:formula="of:=[.D1682]-[.D1681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table:formula="of:=[.B1681]+10" office:value-type="float" office:value="16810" calcext:value-type="float">
            <text:p>16810</text:p>
          </table:table-cell>
          <table:table-cell office:value-type="float" office:value="8640000" calcext:value-type="float">
            <text:p>8640000</text:p>
          </table:table-cell>
          <table:table-cell table:formula="of:=[.B1682]/[.C1682]" office:value-type="float" office:value="0.00194560185185185" calcext:value-type="float">
            <text:p>0,00194560185185185000</text:p>
          </table:table-cell>
          <table:table-cell table:formula="of:=[.D1683]-[.D1682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682" calcext:value-type="float">
            <text:p>1682</text:p>
          </table:table-cell>
          <table:table-cell table:formula="of:=[.B1682]+10" office:value-type="float" office:value="16820" calcext:value-type="float">
            <text:p>16820</text:p>
          </table:table-cell>
          <table:table-cell office:value-type="float" office:value="8640000" calcext:value-type="float">
            <text:p>8640000</text:p>
          </table:table-cell>
          <table:table-cell table:formula="of:=[.B1683]/[.C1683]" office:value-type="float" office:value="0.00194675925925926" calcext:value-type="float">
            <text:p>0,00194675925925926000</text:p>
          </table:table-cell>
          <table:table-cell table:formula="of:=[.D1684]-[.D1683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683" calcext:value-type="float">
            <text:p>1683</text:p>
          </table:table-cell>
          <table:table-cell table:formula="of:=[.B1683]+10" office:value-type="float" office:value="16830" calcext:value-type="float">
            <text:p>16830</text:p>
          </table:table-cell>
          <table:table-cell office:value-type="float" office:value="8640000" calcext:value-type="float">
            <text:p>8640000</text:p>
          </table:table-cell>
          <table:table-cell table:formula="of:=[.B1684]/[.C1684]" office:value-type="float" office:value="0.00194791666666667" calcext:value-type="float">
            <text:p>0,00194791666666667000</text:p>
          </table:table-cell>
          <table:table-cell table:formula="of:=[.D1685]-[.D1684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684" calcext:value-type="float">
            <text:p>1684</text:p>
          </table:table-cell>
          <table:table-cell table:formula="of:=[.B1684]+10" office:value-type="float" office:value="16840" calcext:value-type="float">
            <text:p>16840</text:p>
          </table:table-cell>
          <table:table-cell office:value-type="float" office:value="8640000" calcext:value-type="float">
            <text:p>8640000</text:p>
          </table:table-cell>
          <table:table-cell table:formula="of:=[.B1685]/[.C1685]" office:value-type="float" office:value="0.00194907407407407" calcext:value-type="float">
            <text:p>0,00194907407407407000</text:p>
          </table:table-cell>
          <table:table-cell table:formula="of:=[.D1686]-[.D1685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685" calcext:value-type="float">
            <text:p>1685</text:p>
          </table:table-cell>
          <table:table-cell table:formula="of:=[.B1685]+10" office:value-type="float" office:value="16850" calcext:value-type="float">
            <text:p>16850</text:p>
          </table:table-cell>
          <table:table-cell office:value-type="float" office:value="8640000" calcext:value-type="float">
            <text:p>8640000</text:p>
          </table:table-cell>
          <table:table-cell table:formula="of:=[.B1686]/[.C1686]" office:value-type="float" office:value="0.00195023148148148" calcext:value-type="float">
            <text:p>0,00195023148148148000</text:p>
          </table:table-cell>
          <table:table-cell table:formula="of:=[.D1687]-[.D1686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686" calcext:value-type="float">
            <text:p>1686</text:p>
          </table:table-cell>
          <table:table-cell table:formula="of:=[.B1686]+10" office:value-type="float" office:value="16860" calcext:value-type="float">
            <text:p>16860</text:p>
          </table:table-cell>
          <table:table-cell office:value-type="float" office:value="8640000" calcext:value-type="float">
            <text:p>8640000</text:p>
          </table:table-cell>
          <table:table-cell table:formula="of:=[.B1687]/[.C1687]" office:value-type="float" office:value="0.00195138888888889" calcext:value-type="float">
            <text:p>0,00195138888888889000</text:p>
          </table:table-cell>
          <table:table-cell table:formula="of:=[.D1688]-[.D1687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687" calcext:value-type="float">
            <text:p>1687</text:p>
          </table:table-cell>
          <table:table-cell table:formula="of:=[.B1687]+10" office:value-type="float" office:value="16870" calcext:value-type="float">
            <text:p>16870</text:p>
          </table:table-cell>
          <table:table-cell office:value-type="float" office:value="8640000" calcext:value-type="float">
            <text:p>8640000</text:p>
          </table:table-cell>
          <table:table-cell table:formula="of:=[.B1688]/[.C1688]" office:value-type="float" office:value="0.0019525462962963" calcext:value-type="float">
            <text:p>0,00195254629629630000</text:p>
          </table:table-cell>
          <table:table-cell table:formula="of:=[.D1689]-[.D1688]" office:value-type="float" office:value="0.0000011574074074074" calcext:value-type="float">
            <text:p>0,00000115740740740740</text:p>
          </table:table-cell>
        </table:table-row>
        <table:table-row table:style-name="ro1">
          <table:table-cell office:value-type="float" office:value="1688" calcext:value-type="float">
            <text:p>1688</text:p>
          </table:table-cell>
          <table:table-cell table:formula="of:=[.B1688]+10" office:value-type="float" office:value="16880" calcext:value-type="float">
            <text:p>16880</text:p>
          </table:table-cell>
          <table:table-cell office:value-type="float" office:value="8640000" calcext:value-type="float">
            <text:p>8640000</text:p>
          </table:table-cell>
          <table:table-cell table:formula="of:=[.B1689]/[.C1689]" office:value-type="float" office:value="0.0019537037037037" calcext:value-type="float">
            <text:p>0,00195370370370370000</text:p>
          </table:table-cell>
          <table:table-cell table:formula="of:=[.D1690]-[.D1689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689" calcext:value-type="float">
            <text:p>1689</text:p>
          </table:table-cell>
          <table:table-cell table:formula="of:=[.B1689]+10" office:value-type="float" office:value="16890" calcext:value-type="float">
            <text:p>16890</text:p>
          </table:table-cell>
          <table:table-cell office:value-type="float" office:value="8640000" calcext:value-type="float">
            <text:p>8640000</text:p>
          </table:table-cell>
          <table:table-cell table:formula="of:=[.B1690]/[.C1690]" office:value-type="float" office:value="0.00195486111111111" calcext:value-type="float">
            <text:p>0,00195486111111111000</text:p>
          </table:table-cell>
          <table:table-cell table:formula="of:=[.D1691]-[.D1690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table:formula="of:=[.B1690]+10" office:value-type="float" office:value="16900" calcext:value-type="float">
            <text:p>16900</text:p>
          </table:table-cell>
          <table:table-cell office:value-type="float" office:value="8640000" calcext:value-type="float">
            <text:p>8640000</text:p>
          </table:table-cell>
          <table:table-cell table:formula="of:=[.B1691]/[.C1691]" office:value-type="float" office:value="0.00195601851851852" calcext:value-type="float">
            <text:p>0,00195601851851852000</text:p>
          </table:table-cell>
          <table:table-cell table:formula="of:=[.D1692]-[.D1691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691" calcext:value-type="float">
            <text:p>1691</text:p>
          </table:table-cell>
          <table:table-cell table:formula="of:=[.B1691]+10" office:value-type="float" office:value="16910" calcext:value-type="float">
            <text:p>16910</text:p>
          </table:table-cell>
          <table:table-cell office:value-type="float" office:value="8640000" calcext:value-type="float">
            <text:p>8640000</text:p>
          </table:table-cell>
          <table:table-cell table:formula="of:=[.B1692]/[.C1692]" office:value-type="float" office:value="0.00195717592592593" calcext:value-type="float">
            <text:p>0,00195717592592593000</text:p>
          </table:table-cell>
          <table:table-cell table:formula="of:=[.D1693]-[.D1692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1692" calcext:value-type="float">
            <text:p>1692</text:p>
          </table:table-cell>
          <table:table-cell table:formula="of:=[.B1692]+10" office:value-type="float" office:value="16920" calcext:value-type="float">
            <text:p>16920</text:p>
          </table:table-cell>
          <table:table-cell office:value-type="float" office:value="8640000" calcext:value-type="float">
            <text:p>8640000</text:p>
          </table:table-cell>
          <table:table-cell table:formula="of:=[.B1693]/[.C1693]" office:value-type="float" office:value="0.00195833333333333" calcext:value-type="float">
            <text:p>0,00195833333333333000</text:p>
          </table:table-cell>
          <table:table-cell table:formula="of:=[.D1694]-[.D1693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693" calcext:value-type="float">
            <text:p>1693</text:p>
          </table:table-cell>
          <table:table-cell table:formula="of:=[.B1693]+10" office:value-type="float" office:value="16930" calcext:value-type="float">
            <text:p>16930</text:p>
          </table:table-cell>
          <table:table-cell office:value-type="float" office:value="8640000" calcext:value-type="float">
            <text:p>8640000</text:p>
          </table:table-cell>
          <table:table-cell table:formula="of:=[.B1694]/[.C1694]" office:value-type="float" office:value="0.00195949074074074" calcext:value-type="float">
            <text:p>0,00195949074074074000</text:p>
          </table:table-cell>
          <table:table-cell table:formula="of:=[.D1695]-[.D1694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1694" calcext:value-type="float">
            <text:p>1694</text:p>
          </table:table-cell>
          <table:table-cell table:formula="of:=[.B1694]+10" office:value-type="float" office:value="16940" calcext:value-type="float">
            <text:p>16940</text:p>
          </table:table-cell>
          <table:table-cell office:value-type="float" office:value="8640000" calcext:value-type="float">
            <text:p>8640000</text:p>
          </table:table-cell>
          <table:table-cell table:formula="of:=[.B1695]/[.C1695]" office:value-type="float" office:value="0.00196064814814815" calcext:value-type="float">
            <text:p>0,00196064814814815000</text:p>
          </table:table-cell>
          <table:table-cell table:formula="of:=[.D1696]-[.D1695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 table:formula="of:=[.B1695]+10" office:value-type="float" office:value="16950" calcext:value-type="float">
            <text:p>16950</text:p>
          </table:table-cell>
          <table:table-cell office:value-type="float" office:value="8640000" calcext:value-type="float">
            <text:p>8640000</text:p>
          </table:table-cell>
          <table:table-cell table:formula="of:=[.B1696]/[.C1696]" office:value-type="float" office:value="0.00196180555555556" calcext:value-type="float">
            <text:p>0,00196180555555556000</text:p>
          </table:table-cell>
          <table:table-cell table:formula="of:=[.D1697]-[.D1696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1696" calcext:value-type="float">
            <text:p>1696</text:p>
          </table:table-cell>
          <table:table-cell table:formula="of:=[.B1696]+10" office:value-type="float" office:value="16960" calcext:value-type="float">
            <text:p>16960</text:p>
          </table:table-cell>
          <table:table-cell office:value-type="float" office:value="8640000" calcext:value-type="float">
            <text:p>8640000</text:p>
          </table:table-cell>
          <table:table-cell table:formula="of:=[.B1697]/[.C1697]" office:value-type="float" office:value="0.00196296296296296" calcext:value-type="float">
            <text:p>0,00196296296296296000</text:p>
          </table:table-cell>
          <table:table-cell table:formula="of:=[.D1698]-[.D1697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697" calcext:value-type="float">
            <text:p>1697</text:p>
          </table:table-cell>
          <table:table-cell table:formula="of:=[.B1697]+10" office:value-type="float" office:value="16970" calcext:value-type="float">
            <text:p>16970</text:p>
          </table:table-cell>
          <table:table-cell office:value-type="float" office:value="8640000" calcext:value-type="float">
            <text:p>8640000</text:p>
          </table:table-cell>
          <table:table-cell table:formula="of:=[.B1698]/[.C1698]" office:value-type="float" office:value="0.00196412037037037" calcext:value-type="float">
            <text:p>0,00196412037037037000</text:p>
          </table:table-cell>
          <table:table-cell table:formula="of:=[.D1699]-[.D1698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1698" calcext:value-type="float">
            <text:p>1698</text:p>
          </table:table-cell>
          <table:table-cell table:formula="of:=[.B1698]+10" office:value-type="float" office:value="16980" calcext:value-type="float">
            <text:p>16980</text:p>
          </table:table-cell>
          <table:table-cell office:value-type="float" office:value="8640000" calcext:value-type="float">
            <text:p>8640000</text:p>
          </table:table-cell>
          <table:table-cell table:formula="of:=[.B1699]/[.C1699]" office:value-type="float" office:value="0.00196527777777778" calcext:value-type="float">
            <text:p>0,00196527777777778000</text:p>
          </table:table-cell>
          <table:table-cell table:formula="of:=[.D1700]-[.D1699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699" calcext:value-type="float">
            <text:p>1699</text:p>
          </table:table-cell>
          <table:table-cell table:formula="of:=[.B1699]+10" office:value-type="float" office:value="16990" calcext:value-type="float">
            <text:p>16990</text:p>
          </table:table-cell>
          <table:table-cell office:value-type="float" office:value="8640000" calcext:value-type="float">
            <text:p>8640000</text:p>
          </table:table-cell>
          <table:table-cell table:formula="of:=[.B1700]/[.C1700]" office:value-type="float" office:value="0.00196643518518519" calcext:value-type="float">
            <text:p>0,00196643518518519000</text:p>
          </table:table-cell>
          <table:table-cell table:formula="of:=[.D1701]-[.D1700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table:formula="of:=[.B1700]+10" office:value-type="float" office:value="17000" calcext:value-type="float">
            <text:p>17000</text:p>
          </table:table-cell>
          <table:table-cell office:value-type="float" office:value="8640000" calcext:value-type="float">
            <text:p>8640000</text:p>
          </table:table-cell>
          <table:table-cell table:formula="of:=[.B1701]/[.C1701]" office:value-type="float" office:value="0.00196759259259259" calcext:value-type="float">
            <text:p>0,00196759259259259000</text:p>
          </table:table-cell>
          <table:table-cell table:formula="of:=[.D1702]-[.D1701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table:formula="of:=[.B1701]+10" office:value-type="float" office:value="17010" calcext:value-type="float">
            <text:p>17010</text:p>
          </table:table-cell>
          <table:table-cell office:value-type="float" office:value="8640000" calcext:value-type="float">
            <text:p>8640000</text:p>
          </table:table-cell>
          <table:table-cell table:formula="of:=[.B1702]/[.C1702]" office:value-type="float" office:value="0.00196875" calcext:value-type="float">
            <text:p>0,00196875000000000000</text:p>
          </table:table-cell>
          <table:table-cell table:formula="of:=[.D1703]-[.D1702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1702" calcext:value-type="float">
            <text:p>1702</text:p>
          </table:table-cell>
          <table:table-cell table:formula="of:=[.B1702]+10" office:value-type="float" office:value="17020" calcext:value-type="float">
            <text:p>17020</text:p>
          </table:table-cell>
          <table:table-cell office:value-type="float" office:value="8640000" calcext:value-type="float">
            <text:p>8640000</text:p>
          </table:table-cell>
          <table:table-cell table:formula="of:=[.B1703]/[.C1703]" office:value-type="float" office:value="0.00196990740740741" calcext:value-type="float">
            <text:p>0,00196990740740741000</text:p>
          </table:table-cell>
          <table:table-cell table:formula="of:=[.D1704]-[.D1703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703" calcext:value-type="float">
            <text:p>1703</text:p>
          </table:table-cell>
          <table:table-cell table:formula="of:=[.B1703]+10" office:value-type="float" office:value="17030" calcext:value-type="float">
            <text:p>17030</text:p>
          </table:table-cell>
          <table:table-cell office:value-type="float" office:value="8640000" calcext:value-type="float">
            <text:p>8640000</text:p>
          </table:table-cell>
          <table:table-cell table:formula="of:=[.B1704]/[.C1704]" office:value-type="float" office:value="0.00197106481481482" calcext:value-type="float">
            <text:p>0,00197106481481482000</text:p>
          </table:table-cell>
          <table:table-cell table:formula="of:=[.D1705]-[.D1704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704" calcext:value-type="float">
            <text:p>1704</text:p>
          </table:table-cell>
          <table:table-cell table:formula="of:=[.B1704]+10" office:value-type="float" office:value="17040" calcext:value-type="float">
            <text:p>17040</text:p>
          </table:table-cell>
          <table:table-cell office:value-type="float" office:value="8640000" calcext:value-type="float">
            <text:p>8640000</text:p>
          </table:table-cell>
          <table:table-cell table:formula="of:=[.B1705]/[.C1705]" office:value-type="float" office:value="0.00197222222222222" calcext:value-type="float">
            <text:p>0,00197222222222222000</text:p>
          </table:table-cell>
          <table:table-cell table:formula="of:=[.D1706]-[.D1705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1705" calcext:value-type="float">
            <text:p>1705</text:p>
          </table:table-cell>
          <table:table-cell table:formula="of:=[.B1705]+10" office:value-type="float" office:value="17050" calcext:value-type="float">
            <text:p>17050</text:p>
          </table:table-cell>
          <table:table-cell office:value-type="float" office:value="8640000" calcext:value-type="float">
            <text:p>8640000</text:p>
          </table:table-cell>
          <table:table-cell table:formula="of:=[.B1706]/[.C1706]" office:value-type="float" office:value="0.00197337962962963" calcext:value-type="float">
            <text:p>0,00197337962962963000</text:p>
          </table:table-cell>
          <table:table-cell table:formula="of:=[.D1707]-[.D1706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706" calcext:value-type="float">
            <text:p>1706</text:p>
          </table:table-cell>
          <table:table-cell table:formula="of:=[.B1706]+10" office:value-type="float" office:value="17060" calcext:value-type="float">
            <text:p>17060</text:p>
          </table:table-cell>
          <table:table-cell office:value-type="float" office:value="8640000" calcext:value-type="float">
            <text:p>8640000</text:p>
          </table:table-cell>
          <table:table-cell table:formula="of:=[.B1707]/[.C1707]" office:value-type="float" office:value="0.00197453703703704" calcext:value-type="float">
            <text:p>0,00197453703703704000</text:p>
          </table:table-cell>
          <table:table-cell table:formula="of:=[.D1708]-[.D1707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1707" calcext:value-type="float">
            <text:p>1707</text:p>
          </table:table-cell>
          <table:table-cell table:formula="of:=[.B1707]+10" office:value-type="float" office:value="17070" calcext:value-type="float">
            <text:p>17070</text:p>
          </table:table-cell>
          <table:table-cell office:value-type="float" office:value="8640000" calcext:value-type="float">
            <text:p>8640000</text:p>
          </table:table-cell>
          <table:table-cell table:formula="of:=[.B1708]/[.C1708]" office:value-type="float" office:value="0.00197569444444444" calcext:value-type="float">
            <text:p>0,00197569444444444000</text:p>
          </table:table-cell>
          <table:table-cell table:formula="of:=[.D1709]-[.D1708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708" calcext:value-type="float">
            <text:p>1708</text:p>
          </table:table-cell>
          <table:table-cell table:formula="of:=[.B1708]+10" office:value-type="float" office:value="17080" calcext:value-type="float">
            <text:p>17080</text:p>
          </table:table-cell>
          <table:table-cell office:value-type="float" office:value="8640000" calcext:value-type="float">
            <text:p>8640000</text:p>
          </table:table-cell>
          <table:table-cell table:formula="of:=[.B1709]/[.C1709]" office:value-type="float" office:value="0.00197685185185185" calcext:value-type="float">
            <text:p>0,00197685185185185000</text:p>
          </table:table-cell>
          <table:table-cell table:formula="of:=[.D1710]-[.D1709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1709" calcext:value-type="float">
            <text:p>1709</text:p>
          </table:table-cell>
          <table:table-cell table:formula="of:=[.B1709]+10" office:value-type="float" office:value="17090" calcext:value-type="float">
            <text:p>17090</text:p>
          </table:table-cell>
          <table:table-cell office:value-type="float" office:value="8640000" calcext:value-type="float">
            <text:p>8640000</text:p>
          </table:table-cell>
          <table:table-cell table:formula="of:=[.B1710]/[.C1710]" office:value-type="float" office:value="0.00197800925925926" calcext:value-type="float">
            <text:p>0,00197800925925926000</text:p>
          </table:table-cell>
          <table:table-cell table:formula="of:=[.D1711]-[.D1710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table:formula="of:=[.B1710]+10" office:value-type="float" office:value="17100" calcext:value-type="float">
            <text:p>17100</text:p>
          </table:table-cell>
          <table:table-cell office:value-type="float" office:value="8640000" calcext:value-type="float">
            <text:p>8640000</text:p>
          </table:table-cell>
          <table:table-cell table:formula="of:=[.B1711]/[.C1711]" office:value-type="float" office:value="0.00197916666666667" calcext:value-type="float">
            <text:p>0,00197916666666667000</text:p>
          </table:table-cell>
          <table:table-cell table:formula="of:=[.D1712]-[.D1711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table:formula="of:=[.B1711]+10" office:value-type="float" office:value="17110" calcext:value-type="float">
            <text:p>17110</text:p>
          </table:table-cell>
          <table:table-cell office:value-type="float" office:value="8640000" calcext:value-type="float">
            <text:p>8640000</text:p>
          </table:table-cell>
          <table:table-cell table:formula="of:=[.B1712]/[.C1712]" office:value-type="float" office:value="0.00198032407407407" calcext:value-type="float">
            <text:p>0,00198032407407407000</text:p>
          </table:table-cell>
          <table:table-cell table:formula="of:=[.D1713]-[.D1712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712" calcext:value-type="float">
            <text:p>1712</text:p>
          </table:table-cell>
          <table:table-cell table:formula="of:=[.B1712]+10" office:value-type="float" office:value="17120" calcext:value-type="float">
            <text:p>17120</text:p>
          </table:table-cell>
          <table:table-cell office:value-type="float" office:value="8640000" calcext:value-type="float">
            <text:p>8640000</text:p>
          </table:table-cell>
          <table:table-cell table:formula="of:=[.B1713]/[.C1713]" office:value-type="float" office:value="0.00198148148148148" calcext:value-type="float">
            <text:p>0,00198148148148148000</text:p>
          </table:table-cell>
          <table:table-cell table:formula="of:=[.D1714]-[.D1713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1713" calcext:value-type="float">
            <text:p>1713</text:p>
          </table:table-cell>
          <table:table-cell table:formula="of:=[.B1713]+10" office:value-type="float" office:value="17130" calcext:value-type="float">
            <text:p>17130</text:p>
          </table:table-cell>
          <table:table-cell office:value-type="float" office:value="8640000" calcext:value-type="float">
            <text:p>8640000</text:p>
          </table:table-cell>
          <table:table-cell table:formula="of:=[.B1714]/[.C1714]" office:value-type="float" office:value="0.00198263888888889" calcext:value-type="float">
            <text:p>0,00198263888888889000</text:p>
          </table:table-cell>
          <table:table-cell table:formula="of:=[.D1715]-[.D1714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714" calcext:value-type="float">
            <text:p>1714</text:p>
          </table:table-cell>
          <table:table-cell table:formula="of:=[.B1714]+10" office:value-type="float" office:value="17140" calcext:value-type="float">
            <text:p>17140</text:p>
          </table:table-cell>
          <table:table-cell office:value-type="float" office:value="8640000" calcext:value-type="float">
            <text:p>8640000</text:p>
          </table:table-cell>
          <table:table-cell table:formula="of:=[.B1715]/[.C1715]" office:value-type="float" office:value="0.0019837962962963" calcext:value-type="float">
            <text:p>0,00198379629629630000</text:p>
          </table:table-cell>
          <table:table-cell table:formula="of:=[.D1716]-[.D1715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  <table:table-cell table:formula="of:=[.B1715]+10" office:value-type="float" office:value="17150" calcext:value-type="float">
            <text:p>17150</text:p>
          </table:table-cell>
          <table:table-cell office:value-type="float" office:value="8640000" calcext:value-type="float">
            <text:p>8640000</text:p>
          </table:table-cell>
          <table:table-cell table:formula="of:=[.B1716]/[.C1716]" office:value-type="float" office:value="0.0019849537037037" calcext:value-type="float">
            <text:p>0,00198495370370370000</text:p>
          </table:table-cell>
          <table:table-cell table:formula="of:=[.D1717]-[.D1716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716" calcext:value-type="float">
            <text:p>1716</text:p>
          </table:table-cell>
          <table:table-cell table:formula="of:=[.B1716]+10" office:value-type="float" office:value="17160" calcext:value-type="float">
            <text:p>17160</text:p>
          </table:table-cell>
          <table:table-cell office:value-type="float" office:value="8640000" calcext:value-type="float">
            <text:p>8640000</text:p>
          </table:table-cell>
          <table:table-cell table:formula="of:=[.B1717]/[.C1717]" office:value-type="float" office:value="0.00198611111111111" calcext:value-type="float">
            <text:p>0,00198611111111111000</text:p>
          </table:table-cell>
          <table:table-cell table:formula="of:=[.D1718]-[.D1717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  <table:table-cell table:formula="of:=[.B1717]+10" office:value-type="float" office:value="17170" calcext:value-type="float">
            <text:p>17170</text:p>
          </table:table-cell>
          <table:table-cell office:value-type="float" office:value="8640000" calcext:value-type="float">
            <text:p>8640000</text:p>
          </table:table-cell>
          <table:table-cell table:formula="of:=[.B1718]/[.C1718]" office:value-type="float" office:value="0.00198726851851852" calcext:value-type="float">
            <text:p>0,00198726851851852000</text:p>
          </table:table-cell>
          <table:table-cell table:formula="of:=[.D1719]-[.D1718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718" calcext:value-type="float">
            <text:p>1718</text:p>
          </table:table-cell>
          <table:table-cell table:formula="of:=[.B1718]+10" office:value-type="float" office:value="17180" calcext:value-type="float">
            <text:p>17180</text:p>
          </table:table-cell>
          <table:table-cell office:value-type="float" office:value="8640000" calcext:value-type="float">
            <text:p>8640000</text:p>
          </table:table-cell>
          <table:table-cell table:formula="of:=[.B1719]/[.C1719]" office:value-type="float" office:value="0.00198842592592593" calcext:value-type="float">
            <text:p>0,00198842592592593000</text:p>
          </table:table-cell>
          <table:table-cell table:formula="of:=[.D1720]-[.D1719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1719" calcext:value-type="float">
            <text:p>1719</text:p>
          </table:table-cell>
          <table:table-cell table:formula="of:=[.B1719]+10" office:value-type="float" office:value="17190" calcext:value-type="float">
            <text:p>17190</text:p>
          </table:table-cell>
          <table:table-cell office:value-type="float" office:value="8640000" calcext:value-type="float">
            <text:p>8640000</text:p>
          </table:table-cell>
          <table:table-cell table:formula="of:=[.B1720]/[.C1720]" office:value-type="float" office:value="0.00198958333333333" calcext:value-type="float">
            <text:p>0,00198958333333333000</text:p>
          </table:table-cell>
          <table:table-cell table:formula="of:=[.D1721]-[.D1720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table:formula="of:=[.B1720]+10" office:value-type="float" office:value="17200" calcext:value-type="float">
            <text:p>17200</text:p>
          </table:table-cell>
          <table:table-cell office:value-type="float" office:value="8640000" calcext:value-type="float">
            <text:p>8640000</text:p>
          </table:table-cell>
          <table:table-cell table:formula="of:=[.B1721]/[.C1721]" office:value-type="float" office:value="0.00199074074074074" calcext:value-type="float">
            <text:p>0,00199074074074074000</text:p>
          </table:table-cell>
          <table:table-cell table:formula="of:=[.D1722]-[.D1721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table:formula="of:=[.B1721]+10" office:value-type="float" office:value="17210" calcext:value-type="float">
            <text:p>17210</text:p>
          </table:table-cell>
          <table:table-cell office:value-type="float" office:value="8640000" calcext:value-type="float">
            <text:p>8640000</text:p>
          </table:table-cell>
          <table:table-cell table:formula="of:=[.B1722]/[.C1722]" office:value-type="float" office:value="0.00199189814814815" calcext:value-type="float">
            <text:p>0,00199189814814815000</text:p>
          </table:table-cell>
          <table:table-cell table:formula="of:=[.D1723]-[.D1722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722" calcext:value-type="float">
            <text:p>1722</text:p>
          </table:table-cell>
          <table:table-cell table:formula="of:=[.B1722]+10" office:value-type="float" office:value="17220" calcext:value-type="float">
            <text:p>17220</text:p>
          </table:table-cell>
          <table:table-cell office:value-type="float" office:value="8640000" calcext:value-type="float">
            <text:p>8640000</text:p>
          </table:table-cell>
          <table:table-cell table:formula="of:=[.B1723]/[.C1723]" office:value-type="float" office:value="0.00199305555555556" calcext:value-type="float">
            <text:p>0,00199305555555556000</text:p>
          </table:table-cell>
          <table:table-cell table:formula="of:=[.D1724]-[.D1723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table:formula="of:=[.B1723]+10" office:value-type="float" office:value="17230" calcext:value-type="float">
            <text:p>17230</text:p>
          </table:table-cell>
          <table:table-cell office:value-type="float" office:value="8640000" calcext:value-type="float">
            <text:p>8640000</text:p>
          </table:table-cell>
          <table:table-cell table:formula="of:=[.B1724]/[.C1724]" office:value-type="float" office:value="0.00199421296296296" calcext:value-type="float">
            <text:p>0,00199421296296296000</text:p>
          </table:table-cell>
          <table:table-cell table:formula="of:=[.D1725]-[.D1724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724" calcext:value-type="float">
            <text:p>1724</text:p>
          </table:table-cell>
          <table:table-cell table:formula="of:=[.B1724]+10" office:value-type="float" office:value="17240" calcext:value-type="float">
            <text:p>17240</text:p>
          </table:table-cell>
          <table:table-cell office:value-type="float" office:value="8640000" calcext:value-type="float">
            <text:p>8640000</text:p>
          </table:table-cell>
          <table:table-cell table:formula="of:=[.B1725]/[.C1725]" office:value-type="float" office:value="0.00199537037037037" calcext:value-type="float">
            <text:p>0,00199537037037037000</text:p>
          </table:table-cell>
          <table:table-cell table:formula="of:=[.D1726]-[.D1725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 table:formula="of:=[.B1725]+10" office:value-type="float" office:value="17250" calcext:value-type="float">
            <text:p>17250</text:p>
          </table:table-cell>
          <table:table-cell office:value-type="float" office:value="8640000" calcext:value-type="float">
            <text:p>8640000</text:p>
          </table:table-cell>
          <table:table-cell table:formula="of:=[.B1726]/[.C1726]" office:value-type="float" office:value="0.00199652777777778" calcext:value-type="float">
            <text:p>0,00199652777777778000</text:p>
          </table:table-cell>
          <table:table-cell table:formula="of:=[.D1727]-[.D1726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726" calcext:value-type="float">
            <text:p>1726</text:p>
          </table:table-cell>
          <table:table-cell table:formula="of:=[.B1726]+10" office:value-type="float" office:value="17260" calcext:value-type="float">
            <text:p>17260</text:p>
          </table:table-cell>
          <table:table-cell office:value-type="float" office:value="8640000" calcext:value-type="float">
            <text:p>8640000</text:p>
          </table:table-cell>
          <table:table-cell table:formula="of:=[.B1727]/[.C1727]" office:value-type="float" office:value="0.00199768518518519" calcext:value-type="float">
            <text:p>0,00199768518518519000</text:p>
          </table:table-cell>
          <table:table-cell table:formula="of:=[.D1728]-[.D1727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1727" calcext:value-type="float">
            <text:p>1727</text:p>
          </table:table-cell>
          <table:table-cell table:formula="of:=[.B1727]+10" office:value-type="float" office:value="17270" calcext:value-type="float">
            <text:p>17270</text:p>
          </table:table-cell>
          <table:table-cell office:value-type="float" office:value="8640000" calcext:value-type="float">
            <text:p>8640000</text:p>
          </table:table-cell>
          <table:table-cell table:formula="of:=[.B1728]/[.C1728]" office:value-type="float" office:value="0.00199884259259259" calcext:value-type="float">
            <text:p>0,00199884259259259000</text:p>
          </table:table-cell>
          <table:table-cell table:formula="of:=[.D1729]-[.D1728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  <table:table-cell table:formula="of:=[.B1728]+10" office:value-type="float" office:value="17280" calcext:value-type="float">
            <text:p>17280</text:p>
          </table:table-cell>
          <table:table-cell office:value-type="float" office:value="8640000" calcext:value-type="float">
            <text:p>8640000</text:p>
          </table:table-cell>
          <table:table-cell table:formula="of:=[.B1729]/[.C1729]" office:value-type="float" office:value="0.002" calcext:value-type="float">
            <text:p>0,00200000000000000000</text:p>
          </table:table-cell>
          <table:table-cell table:formula="of:=[.D1730]-[.D1729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 table:formula="of:=[.B1729]+10" office:value-type="float" office:value="17290" calcext:value-type="float">
            <text:p>17290</text:p>
          </table:table-cell>
          <table:table-cell office:value-type="float" office:value="8640000" calcext:value-type="float">
            <text:p>8640000</text:p>
          </table:table-cell>
          <table:table-cell table:formula="of:=[.B1730]/[.C1730]" office:value-type="float" office:value="0.00200115740740741" calcext:value-type="float">
            <text:p>0,00200115740740741000</text:p>
          </table:table-cell>
          <table:table-cell table:formula="of:=[.D1731]-[.D1730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table:formula="of:=[.B1730]+10" office:value-type="float" office:value="17300" calcext:value-type="float">
            <text:p>17300</text:p>
          </table:table-cell>
          <table:table-cell office:value-type="float" office:value="8640000" calcext:value-type="float">
            <text:p>8640000</text:p>
          </table:table-cell>
          <table:table-cell table:formula="of:=[.B1731]/[.C1731]" office:value-type="float" office:value="0.00200231481481482" calcext:value-type="float">
            <text:p>0,00200231481481482000</text:p>
          </table:table-cell>
          <table:table-cell table:formula="of:=[.D1732]-[.D1731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1731" calcext:value-type="float">
            <text:p>1731</text:p>
          </table:table-cell>
          <table:table-cell table:formula="of:=[.B1731]+10" office:value-type="float" office:value="17310" calcext:value-type="float">
            <text:p>17310</text:p>
          </table:table-cell>
          <table:table-cell office:value-type="float" office:value="8640000" calcext:value-type="float">
            <text:p>8640000</text:p>
          </table:table-cell>
          <table:table-cell table:formula="of:=[.B1732]/[.C1732]" office:value-type="float" office:value="0.00200347222222222" calcext:value-type="float">
            <text:p>0,00200347222222222000</text:p>
          </table:table-cell>
          <table:table-cell table:formula="of:=[.D1733]-[.D1732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732" calcext:value-type="float">
            <text:p>1732</text:p>
          </table:table-cell>
          <table:table-cell table:formula="of:=[.B1732]+10" office:value-type="float" office:value="17320" calcext:value-type="float">
            <text:p>17320</text:p>
          </table:table-cell>
          <table:table-cell office:value-type="float" office:value="8640000" calcext:value-type="float">
            <text:p>8640000</text:p>
          </table:table-cell>
          <table:table-cell table:formula="of:=[.B1733]/[.C1733]" office:value-type="float" office:value="0.00200462962962963" calcext:value-type="float">
            <text:p>0,00200462962962963000</text:p>
          </table:table-cell>
          <table:table-cell table:formula="of:=[.D1734]-[.D1733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table:formula="of:=[.B1733]+10" office:value-type="float" office:value="17330" calcext:value-type="float">
            <text:p>17330</text:p>
          </table:table-cell>
          <table:table-cell office:value-type="float" office:value="8640000" calcext:value-type="float">
            <text:p>8640000</text:p>
          </table:table-cell>
          <table:table-cell table:formula="of:=[.B1734]/[.C1734]" office:value-type="float" office:value="0.00200578703703704" calcext:value-type="float">
            <text:p>0,00200578703703704000</text:p>
          </table:table-cell>
          <table:table-cell table:formula="of:=[.D1735]-[.D1734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734" calcext:value-type="float">
            <text:p>1734</text:p>
          </table:table-cell>
          <table:table-cell table:formula="of:=[.B1734]+10" office:value-type="float" office:value="17340" calcext:value-type="float">
            <text:p>17340</text:p>
          </table:table-cell>
          <table:table-cell office:value-type="float" office:value="8640000" calcext:value-type="float">
            <text:p>8640000</text:p>
          </table:table-cell>
          <table:table-cell table:formula="of:=[.B1735]/[.C1735]" office:value-type="float" office:value="0.00200694444444444" calcext:value-type="float">
            <text:p>0,00200694444444444000</text:p>
          </table:table-cell>
          <table:table-cell table:formula="of:=[.D1736]-[.D1735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table:formula="of:=[.B1735]+10" office:value-type="float" office:value="17350" calcext:value-type="float">
            <text:p>17350</text:p>
          </table:table-cell>
          <table:table-cell office:value-type="float" office:value="8640000" calcext:value-type="float">
            <text:p>8640000</text:p>
          </table:table-cell>
          <table:table-cell table:formula="of:=[.B1736]/[.C1736]" office:value-type="float" office:value="0.00200810185185185" calcext:value-type="float">
            <text:p>0,00200810185185185000</text:p>
          </table:table-cell>
          <table:table-cell table:formula="of:=[.D1737]-[.D1736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1736" calcext:value-type="float">
            <text:p>1736</text:p>
          </table:table-cell>
          <table:table-cell table:formula="of:=[.B1736]+10" office:value-type="float" office:value="17360" calcext:value-type="float">
            <text:p>17360</text:p>
          </table:table-cell>
          <table:table-cell office:value-type="float" office:value="8640000" calcext:value-type="float">
            <text:p>8640000</text:p>
          </table:table-cell>
          <table:table-cell table:formula="of:=[.B1737]/[.C1737]" office:value-type="float" office:value="0.00200925925925926" calcext:value-type="float">
            <text:p>0,00200925925925926000</text:p>
          </table:table-cell>
          <table:table-cell table:formula="of:=[.D1738]-[.D1737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  <table:table-cell table:formula="of:=[.B1737]+10" office:value-type="float" office:value="17370" calcext:value-type="float">
            <text:p>17370</text:p>
          </table:table-cell>
          <table:table-cell office:value-type="float" office:value="8640000" calcext:value-type="float">
            <text:p>8640000</text:p>
          </table:table-cell>
          <table:table-cell table:formula="of:=[.B1738]/[.C1738]" office:value-type="float" office:value="0.00201041666666667" calcext:value-type="float">
            <text:p>0,00201041666666667000</text:p>
          </table:table-cell>
          <table:table-cell table:formula="of:=[.D1739]-[.D1738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1738" calcext:value-type="float">
            <text:p>1738</text:p>
          </table:table-cell>
          <table:table-cell table:formula="of:=[.B1738]+10" office:value-type="float" office:value="17380" calcext:value-type="float">
            <text:p>17380</text:p>
          </table:table-cell>
          <table:table-cell office:value-type="float" office:value="8640000" calcext:value-type="float">
            <text:p>8640000</text:p>
          </table:table-cell>
          <table:table-cell table:formula="of:=[.B1739]/[.C1739]" office:value-type="float" office:value="0.00201157407407407" calcext:value-type="float">
            <text:p>0,00201157407407407000</text:p>
          </table:table-cell>
          <table:table-cell table:formula="of:=[.D1740]-[.D1739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739" calcext:value-type="float">
            <text:p>1739</text:p>
          </table:table-cell>
          <table:table-cell table:formula="of:=[.B1739]+10" office:value-type="float" office:value="17390" calcext:value-type="float">
            <text:p>17390</text:p>
          </table:table-cell>
          <table:table-cell office:value-type="float" office:value="8640000" calcext:value-type="float">
            <text:p>8640000</text:p>
          </table:table-cell>
          <table:table-cell table:formula="of:=[.B1740]/[.C1740]" office:value-type="float" office:value="0.00201273148148148" calcext:value-type="float">
            <text:p>0,00201273148148148000</text:p>
          </table:table-cell>
          <table:table-cell table:formula="of:=[.D1741]-[.D1740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table:formula="of:=[.B1740]+10" office:value-type="float" office:value="17400" calcext:value-type="float">
            <text:p>17400</text:p>
          </table:table-cell>
          <table:table-cell office:value-type="float" office:value="8640000" calcext:value-type="float">
            <text:p>8640000</text:p>
          </table:table-cell>
          <table:table-cell table:formula="of:=[.B1741]/[.C1741]" office:value-type="float" office:value="0.00201388888888889" calcext:value-type="float">
            <text:p>0,00201388888888889000</text:p>
          </table:table-cell>
          <table:table-cell table:formula="of:=[.D1742]-[.D1741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table:formula="of:=[.B1741]+10" office:value-type="float" office:value="17410" calcext:value-type="float">
            <text:p>17410</text:p>
          </table:table-cell>
          <table:table-cell office:value-type="float" office:value="8640000" calcext:value-type="float">
            <text:p>8640000</text:p>
          </table:table-cell>
          <table:table-cell table:formula="of:=[.B1742]/[.C1742]" office:value-type="float" office:value="0.0020150462962963" calcext:value-type="float">
            <text:p>0,00201504629629630000</text:p>
          </table:table-cell>
          <table:table-cell table:formula="of:=[.D1743]-[.D1742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1742" calcext:value-type="float">
            <text:p>1742</text:p>
          </table:table-cell>
          <table:table-cell table:formula="of:=[.B1742]+10" office:value-type="float" office:value="17420" calcext:value-type="float">
            <text:p>17420</text:p>
          </table:table-cell>
          <table:table-cell office:value-type="float" office:value="8640000" calcext:value-type="float">
            <text:p>8640000</text:p>
          </table:table-cell>
          <table:table-cell table:formula="of:=[.B1743]/[.C1743]" office:value-type="float" office:value="0.0020162037037037" calcext:value-type="float">
            <text:p>0,00201620370370370000</text:p>
          </table:table-cell>
          <table:table-cell table:formula="of:=[.D1744]-[.D1743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743" calcext:value-type="float">
            <text:p>1743</text:p>
          </table:table-cell>
          <table:table-cell table:formula="of:=[.B1743]+10" office:value-type="float" office:value="17430" calcext:value-type="float">
            <text:p>17430</text:p>
          </table:table-cell>
          <table:table-cell office:value-type="float" office:value="8640000" calcext:value-type="float">
            <text:p>8640000</text:p>
          </table:table-cell>
          <table:table-cell table:formula="of:=[.B1744]/[.C1744]" office:value-type="float" office:value="0.00201736111111111" calcext:value-type="float">
            <text:p>0,00201736111111111000</text:p>
          </table:table-cell>
          <table:table-cell table:formula="of:=[.D1745]-[.D1744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1744" calcext:value-type="float">
            <text:p>1744</text:p>
          </table:table-cell>
          <table:table-cell table:formula="of:=[.B1744]+10" office:value-type="float" office:value="17440" calcext:value-type="float">
            <text:p>17440</text:p>
          </table:table-cell>
          <table:table-cell office:value-type="float" office:value="8640000" calcext:value-type="float">
            <text:p>8640000</text:p>
          </table:table-cell>
          <table:table-cell table:formula="of:=[.B1745]/[.C1745]" office:value-type="float" office:value="0.00201851851851852" calcext:value-type="float">
            <text:p>0,00201851851851852000</text:p>
          </table:table-cell>
          <table:table-cell table:formula="of:=[.D1746]-[.D1745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745" calcext:value-type="float">
            <text:p>1745</text:p>
          </table:table-cell>
          <table:table-cell table:formula="of:=[.B1745]+10" office:value-type="float" office:value="17450" calcext:value-type="float">
            <text:p>17450</text:p>
          </table:table-cell>
          <table:table-cell office:value-type="float" office:value="8640000" calcext:value-type="float">
            <text:p>8640000</text:p>
          </table:table-cell>
          <table:table-cell table:formula="of:=[.B1746]/[.C1746]" office:value-type="float" office:value="0.00201967592592593" calcext:value-type="float">
            <text:p>0,00201967592592593000</text:p>
          </table:table-cell>
          <table:table-cell table:formula="of:=[.D1747]-[.D1746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1746" calcext:value-type="float">
            <text:p>1746</text:p>
          </table:table-cell>
          <table:table-cell table:formula="of:=[.B1746]+10" office:value-type="float" office:value="17460" calcext:value-type="float">
            <text:p>17460</text:p>
          </table:table-cell>
          <table:table-cell office:value-type="float" office:value="8640000" calcext:value-type="float">
            <text:p>8640000</text:p>
          </table:table-cell>
          <table:table-cell table:formula="of:=[.B1747]/[.C1747]" office:value-type="float" office:value="0.00202083333333333" calcext:value-type="float">
            <text:p>0,00202083333333333000</text:p>
          </table:table-cell>
          <table:table-cell table:formula="of:=[.D1748]-[.D1747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747" calcext:value-type="float">
            <text:p>1747</text:p>
          </table:table-cell>
          <table:table-cell table:formula="of:=[.B1747]+10" office:value-type="float" office:value="17470" calcext:value-type="float">
            <text:p>17470</text:p>
          </table:table-cell>
          <table:table-cell office:value-type="float" office:value="8640000" calcext:value-type="float">
            <text:p>8640000</text:p>
          </table:table-cell>
          <table:table-cell table:formula="of:=[.B1748]/[.C1748]" office:value-type="float" office:value="0.00202199074074074" calcext:value-type="float">
            <text:p>0,00202199074074074000</text:p>
          </table:table-cell>
          <table:table-cell table:formula="of:=[.D1749]-[.D1748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table:formula="of:=[.B1748]+10" office:value-type="float" office:value="17480" calcext:value-type="float">
            <text:p>17480</text:p>
          </table:table-cell>
          <table:table-cell office:value-type="float" office:value="8640000" calcext:value-type="float">
            <text:p>8640000</text:p>
          </table:table-cell>
          <table:table-cell table:formula="of:=[.B1749]/[.C1749]" office:value-type="float" office:value="0.00202314814814815" calcext:value-type="float">
            <text:p>0,00202314814814815000</text:p>
          </table:table-cell>
          <table:table-cell table:formula="of:=[.D1750]-[.D1749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749" calcext:value-type="float">
            <text:p>1749</text:p>
          </table:table-cell>
          <table:table-cell table:formula="of:=[.B1749]+10" office:value-type="float" office:value="17490" calcext:value-type="float">
            <text:p>17490</text:p>
          </table:table-cell>
          <table:table-cell office:value-type="float" office:value="8640000" calcext:value-type="float">
            <text:p>8640000</text:p>
          </table:table-cell>
          <table:table-cell table:formula="of:=[.B1750]/[.C1750]" office:value-type="float" office:value="0.00202430555555556" calcext:value-type="float">
            <text:p>0,00202430555555556000</text:p>
          </table:table-cell>
          <table:table-cell table:formula="of:=[.D1751]-[.D1750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table:formula="of:=[.B1750]+10" office:value-type="float" office:value="17500" calcext:value-type="float">
            <text:p>17500</text:p>
          </table:table-cell>
          <table:table-cell office:value-type="float" office:value="8640000" calcext:value-type="float">
            <text:p>8640000</text:p>
          </table:table-cell>
          <table:table-cell table:formula="of:=[.B1751]/[.C1751]" office:value-type="float" office:value="0.00202546296296296" calcext:value-type="float">
            <text:p>0,00202546296296296000</text:p>
          </table:table-cell>
          <table:table-cell table:formula="of:=[.D1752]-[.D1751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table:formula="of:=[.B1751]+10" office:value-type="float" office:value="17510" calcext:value-type="float">
            <text:p>17510</text:p>
          </table:table-cell>
          <table:table-cell office:value-type="float" office:value="8640000" calcext:value-type="float">
            <text:p>8640000</text:p>
          </table:table-cell>
          <table:table-cell table:formula="of:=[.B1752]/[.C1752]" office:value-type="float" office:value="0.00202662037037037" calcext:value-type="float">
            <text:p>0,00202662037037037000</text:p>
          </table:table-cell>
          <table:table-cell table:formula="of:=[.D1753]-[.D1752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1752" calcext:value-type="float">
            <text:p>1752</text:p>
          </table:table-cell>
          <table:table-cell table:formula="of:=[.B1752]+10" office:value-type="float" office:value="17520" calcext:value-type="float">
            <text:p>17520</text:p>
          </table:table-cell>
          <table:table-cell office:value-type="float" office:value="8640000" calcext:value-type="float">
            <text:p>8640000</text:p>
          </table:table-cell>
          <table:table-cell table:formula="of:=[.B1753]/[.C1753]" office:value-type="float" office:value="0.00202777777777778" calcext:value-type="float">
            <text:p>0,00202777777777778000</text:p>
          </table:table-cell>
          <table:table-cell table:formula="of:=[.D1754]-[.D1753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table:formula="of:=[.B1753]+10" office:value-type="float" office:value="17530" calcext:value-type="float">
            <text:p>17530</text:p>
          </table:table-cell>
          <table:table-cell office:value-type="float" office:value="8640000" calcext:value-type="float">
            <text:p>8640000</text:p>
          </table:table-cell>
          <table:table-cell table:formula="of:=[.B1754]/[.C1754]" office:value-type="float" office:value="0.00202893518518519" calcext:value-type="float">
            <text:p>0,00202893518518519000</text:p>
          </table:table-cell>
          <table:table-cell table:formula="of:=[.D1755]-[.D1754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1754" calcext:value-type="float">
            <text:p>1754</text:p>
          </table:table-cell>
          <table:table-cell table:formula="of:=[.B1754]+10" office:value-type="float" office:value="17540" calcext:value-type="float">
            <text:p>17540</text:p>
          </table:table-cell>
          <table:table-cell office:value-type="float" office:value="8640000" calcext:value-type="float">
            <text:p>8640000</text:p>
          </table:table-cell>
          <table:table-cell table:formula="of:=[.B1755]/[.C1755]" office:value-type="float" office:value="0.00203009259259259" calcext:value-type="float">
            <text:p>0,00203009259259259000</text:p>
          </table:table-cell>
          <table:table-cell table:formula="of:=[.D1756]-[.D1755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 table:formula="of:=[.B1755]+10" office:value-type="float" office:value="17550" calcext:value-type="float">
            <text:p>17550</text:p>
          </table:table-cell>
          <table:table-cell office:value-type="float" office:value="8640000" calcext:value-type="float">
            <text:p>8640000</text:p>
          </table:table-cell>
          <table:table-cell table:formula="of:=[.B1756]/[.C1756]" office:value-type="float" office:value="0.00203125" calcext:value-type="float">
            <text:p>0,00203125000000000000</text:p>
          </table:table-cell>
          <table:table-cell table:formula="of:=[.D1757]-[.D1756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1756" calcext:value-type="float">
            <text:p>1756</text:p>
          </table:table-cell>
          <table:table-cell table:formula="of:=[.B1756]+10" office:value-type="float" office:value="17560" calcext:value-type="float">
            <text:p>17560</text:p>
          </table:table-cell>
          <table:table-cell office:value-type="float" office:value="8640000" calcext:value-type="float">
            <text:p>8640000</text:p>
          </table:table-cell>
          <table:table-cell table:formula="of:=[.B1757]/[.C1757]" office:value-type="float" office:value="0.00203240740740741" calcext:value-type="float">
            <text:p>0,00203240740740741000</text:p>
          </table:table-cell>
          <table:table-cell table:formula="of:=[.D1758]-[.D1757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 table:formula="of:=[.B1757]+10" office:value-type="float" office:value="17570" calcext:value-type="float">
            <text:p>17570</text:p>
          </table:table-cell>
          <table:table-cell office:value-type="float" office:value="8640000" calcext:value-type="float">
            <text:p>8640000</text:p>
          </table:table-cell>
          <table:table-cell table:formula="of:=[.B1758]/[.C1758]" office:value-type="float" office:value="0.00203356481481482" calcext:value-type="float">
            <text:p>0,00203356481481482000</text:p>
          </table:table-cell>
          <table:table-cell table:formula="of:=[.D1759]-[.D1758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1758" calcext:value-type="float">
            <text:p>1758</text:p>
          </table:table-cell>
          <table:table-cell table:formula="of:=[.B1758]+10" office:value-type="float" office:value="17580" calcext:value-type="float">
            <text:p>17580</text:p>
          </table:table-cell>
          <table:table-cell office:value-type="float" office:value="8640000" calcext:value-type="float">
            <text:p>8640000</text:p>
          </table:table-cell>
          <table:table-cell table:formula="of:=[.B1759]/[.C1759]" office:value-type="float" office:value="0.00203472222222222" calcext:value-type="float">
            <text:p>0,00203472222222222000</text:p>
          </table:table-cell>
          <table:table-cell table:formula="of:=[.D1760]-[.D1759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  <table:table-cell table:formula="of:=[.B1759]+10" office:value-type="float" office:value="17590" calcext:value-type="float">
            <text:p>17590</text:p>
          </table:table-cell>
          <table:table-cell office:value-type="float" office:value="8640000" calcext:value-type="float">
            <text:p>8640000</text:p>
          </table:table-cell>
          <table:table-cell table:formula="of:=[.B1760]/[.C1760]" office:value-type="float" office:value="0.00203587962962963" calcext:value-type="float">
            <text:p>0,00203587962962963000</text:p>
          </table:table-cell>
          <table:table-cell table:formula="of:=[.D1761]-[.D1760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table:formula="of:=[.B1760]+10" office:value-type="float" office:value="17600" calcext:value-type="float">
            <text:p>17600</text:p>
          </table:table-cell>
          <table:table-cell office:value-type="float" office:value="8640000" calcext:value-type="float">
            <text:p>8640000</text:p>
          </table:table-cell>
          <table:table-cell table:formula="of:=[.B1761]/[.C1761]" office:value-type="float" office:value="0.00203703703703704" calcext:value-type="float">
            <text:p>0,00203703703703704000</text:p>
          </table:table-cell>
          <table:table-cell table:formula="of:=[.D1762]-[.D1761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 table:formula="of:=[.B1761]+10" office:value-type="float" office:value="17610" calcext:value-type="float">
            <text:p>17610</text:p>
          </table:table-cell>
          <table:table-cell office:value-type="float" office:value="8640000" calcext:value-type="float">
            <text:p>8640000</text:p>
          </table:table-cell>
          <table:table-cell table:formula="of:=[.B1762]/[.C1762]" office:value-type="float" office:value="0.00203819444444444" calcext:value-type="float">
            <text:p>0,00203819444444444000</text:p>
          </table:table-cell>
          <table:table-cell table:formula="of:=[.D1763]-[.D1762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1762" calcext:value-type="float">
            <text:p>1762</text:p>
          </table:table-cell>
          <table:table-cell table:formula="of:=[.B1762]+10" office:value-type="float" office:value="17620" calcext:value-type="float">
            <text:p>17620</text:p>
          </table:table-cell>
          <table:table-cell office:value-type="float" office:value="8640000" calcext:value-type="float">
            <text:p>8640000</text:p>
          </table:table-cell>
          <table:table-cell table:formula="of:=[.B1763]/[.C1763]" office:value-type="float" office:value="0.00203935185185185" calcext:value-type="float">
            <text:p>0,00203935185185185000</text:p>
          </table:table-cell>
          <table:table-cell table:formula="of:=[.D1764]-[.D1763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763" calcext:value-type="float">
            <text:p>1763</text:p>
          </table:table-cell>
          <table:table-cell table:formula="of:=[.B1763]+10" office:value-type="float" office:value="17630" calcext:value-type="float">
            <text:p>17630</text:p>
          </table:table-cell>
          <table:table-cell office:value-type="float" office:value="8640000" calcext:value-type="float">
            <text:p>8640000</text:p>
          </table:table-cell>
          <table:table-cell table:formula="of:=[.B1764]/[.C1764]" office:value-type="float" office:value="0.00204050925925926" calcext:value-type="float">
            <text:p>0,00204050925925926000</text:p>
          </table:table-cell>
          <table:table-cell table:formula="of:=[.D1765]-[.D1764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1764" calcext:value-type="float">
            <text:p>1764</text:p>
          </table:table-cell>
          <table:table-cell table:formula="of:=[.B1764]+10" office:value-type="float" office:value="17640" calcext:value-type="float">
            <text:p>17640</text:p>
          </table:table-cell>
          <table:table-cell office:value-type="float" office:value="8640000" calcext:value-type="float">
            <text:p>8640000</text:p>
          </table:table-cell>
          <table:table-cell table:formula="of:=[.B1765]/[.C1765]" office:value-type="float" office:value="0.00204166666666667" calcext:value-type="float">
            <text:p>0,00204166666666667000</text:p>
          </table:table-cell>
          <table:table-cell table:formula="of:=[.D1766]-[.D1765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table:formula="of:=[.B1765]+10" office:value-type="float" office:value="17650" calcext:value-type="float">
            <text:p>17650</text:p>
          </table:table-cell>
          <table:table-cell office:value-type="float" office:value="8640000" calcext:value-type="float">
            <text:p>8640000</text:p>
          </table:table-cell>
          <table:table-cell table:formula="of:=[.B1766]/[.C1766]" office:value-type="float" office:value="0.00204282407407407" calcext:value-type="float">
            <text:p>0,00204282407407407000</text:p>
          </table:table-cell>
          <table:table-cell table:formula="of:=[.D1767]-[.D1766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766" calcext:value-type="float">
            <text:p>1766</text:p>
          </table:table-cell>
          <table:table-cell table:formula="of:=[.B1766]+10" office:value-type="float" office:value="17660" calcext:value-type="float">
            <text:p>17660</text:p>
          </table:table-cell>
          <table:table-cell office:value-type="float" office:value="8640000" calcext:value-type="float">
            <text:p>8640000</text:p>
          </table:table-cell>
          <table:table-cell table:formula="of:=[.B1767]/[.C1767]" office:value-type="float" office:value="0.00204398148148148" calcext:value-type="float">
            <text:p>0,00204398148148148000</text:p>
          </table:table-cell>
          <table:table-cell table:formula="of:=[.D1768]-[.D1767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1767" calcext:value-type="float">
            <text:p>1767</text:p>
          </table:table-cell>
          <table:table-cell table:formula="of:=[.B1767]+10" office:value-type="float" office:value="17670" calcext:value-type="float">
            <text:p>17670</text:p>
          </table:table-cell>
          <table:table-cell office:value-type="float" office:value="8640000" calcext:value-type="float">
            <text:p>8640000</text:p>
          </table:table-cell>
          <table:table-cell table:formula="of:=[.B1768]/[.C1768]" office:value-type="float" office:value="0.00204513888888889" calcext:value-type="float">
            <text:p>0,00204513888888889000</text:p>
          </table:table-cell>
          <table:table-cell table:formula="of:=[.D1769]-[.D1768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768" calcext:value-type="float">
            <text:p>1768</text:p>
          </table:table-cell>
          <table:table-cell table:formula="of:=[.B1768]+10" office:value-type="float" office:value="17680" calcext:value-type="float">
            <text:p>17680</text:p>
          </table:table-cell>
          <table:table-cell office:value-type="float" office:value="8640000" calcext:value-type="float">
            <text:p>8640000</text:p>
          </table:table-cell>
          <table:table-cell table:formula="of:=[.B1769]/[.C1769]" office:value-type="float" office:value="0.0020462962962963" calcext:value-type="float">
            <text:p>0,00204629629629630000</text:p>
          </table:table-cell>
          <table:table-cell table:formula="of:=[.D1770]-[.D1769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  <table:table-cell table:formula="of:=[.B1769]+10" office:value-type="float" office:value="17690" calcext:value-type="float">
            <text:p>17690</text:p>
          </table:table-cell>
          <table:table-cell office:value-type="float" office:value="8640000" calcext:value-type="float">
            <text:p>8640000</text:p>
          </table:table-cell>
          <table:table-cell table:formula="of:=[.B1770]/[.C1770]" office:value-type="float" office:value="0.0020474537037037" calcext:value-type="float">
            <text:p>0,00204745370370370000</text:p>
          </table:table-cell>
          <table:table-cell table:formula="of:=[.D1771]-[.D1770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table:formula="of:=[.B1770]+10" office:value-type="float" office:value="17700" calcext:value-type="float">
            <text:p>17700</text:p>
          </table:table-cell>
          <table:table-cell office:value-type="float" office:value="8640000" calcext:value-type="float">
            <text:p>8640000</text:p>
          </table:table-cell>
          <table:table-cell table:formula="of:=[.B1771]/[.C1771]" office:value-type="float" office:value="0.00204861111111111" calcext:value-type="float">
            <text:p>0,00204861111111111000</text:p>
          </table:table-cell>
          <table:table-cell table:formula="of:=[.D1772]-[.D1771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 table:formula="of:=[.B1771]+10" office:value-type="float" office:value="17710" calcext:value-type="float">
            <text:p>17710</text:p>
          </table:table-cell>
          <table:table-cell office:value-type="float" office:value="8640000" calcext:value-type="float">
            <text:p>8640000</text:p>
          </table:table-cell>
          <table:table-cell table:formula="of:=[.B1772]/[.C1772]" office:value-type="float" office:value="0.00204976851851852" calcext:value-type="float">
            <text:p>0,00204976851851852000</text:p>
          </table:table-cell>
          <table:table-cell table:formula="of:=[.D1773]-[.D1772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772" calcext:value-type="float">
            <text:p>1772</text:p>
          </table:table-cell>
          <table:table-cell table:formula="of:=[.B1772]+10" office:value-type="float" office:value="17720" calcext:value-type="float">
            <text:p>17720</text:p>
          </table:table-cell>
          <table:table-cell office:value-type="float" office:value="8640000" calcext:value-type="float">
            <text:p>8640000</text:p>
          </table:table-cell>
          <table:table-cell table:formula="of:=[.B1773]/[.C1773]" office:value-type="float" office:value="0.00205092592592593" calcext:value-type="float">
            <text:p>0,00205092592592593000</text:p>
          </table:table-cell>
          <table:table-cell table:formula="of:=[.D1774]-[.D1773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1773" calcext:value-type="float">
            <text:p>1773</text:p>
          </table:table-cell>
          <table:table-cell table:formula="of:=[.B1773]+10" office:value-type="float" office:value="17730" calcext:value-type="float">
            <text:p>17730</text:p>
          </table:table-cell>
          <table:table-cell office:value-type="float" office:value="8640000" calcext:value-type="float">
            <text:p>8640000</text:p>
          </table:table-cell>
          <table:table-cell table:formula="of:=[.B1774]/[.C1774]" office:value-type="float" office:value="0.00205208333333333" calcext:value-type="float">
            <text:p>0,00205208333333333000</text:p>
          </table:table-cell>
          <table:table-cell table:formula="of:=[.D1775]-[.D1774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774" calcext:value-type="float">
            <text:p>1774</text:p>
          </table:table-cell>
          <table:table-cell table:formula="of:=[.B1774]+10" office:value-type="float" office:value="17740" calcext:value-type="float">
            <text:p>17740</text:p>
          </table:table-cell>
          <table:table-cell office:value-type="float" office:value="8640000" calcext:value-type="float">
            <text:p>8640000</text:p>
          </table:table-cell>
          <table:table-cell table:formula="of:=[.B1775]/[.C1775]" office:value-type="float" office:value="0.00205324074074074" calcext:value-type="float">
            <text:p>0,00205324074074074000</text:p>
          </table:table-cell>
          <table:table-cell table:formula="of:=[.D1776]-[.D1775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 table:formula="of:=[.B1775]+10" office:value-type="float" office:value="17750" calcext:value-type="float">
            <text:p>17750</text:p>
          </table:table-cell>
          <table:table-cell office:value-type="float" office:value="8640000" calcext:value-type="float">
            <text:p>8640000</text:p>
          </table:table-cell>
          <table:table-cell table:formula="of:=[.B1776]/[.C1776]" office:value-type="float" office:value="0.00205439814814815" calcext:value-type="float">
            <text:p>0,00205439814814815000</text:p>
          </table:table-cell>
          <table:table-cell table:formula="of:=[.D1777]-[.D1776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776" calcext:value-type="float">
            <text:p>1776</text:p>
          </table:table-cell>
          <table:table-cell table:formula="of:=[.B1776]+10" office:value-type="float" office:value="17760" calcext:value-type="float">
            <text:p>17760</text:p>
          </table:table-cell>
          <table:table-cell office:value-type="float" office:value="8640000" calcext:value-type="float">
            <text:p>8640000</text:p>
          </table:table-cell>
          <table:table-cell table:formula="of:=[.B1777]/[.C1777]" office:value-type="float" office:value="0.00205555555555556" calcext:value-type="float">
            <text:p>0,00205555555555556000</text:p>
          </table:table-cell>
          <table:table-cell table:formula="of:=[.D1778]-[.D1777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1777" calcext:value-type="float">
            <text:p>1777</text:p>
          </table:table-cell>
          <table:table-cell table:formula="of:=[.B1777]+10" office:value-type="float" office:value="17770" calcext:value-type="float">
            <text:p>17770</text:p>
          </table:table-cell>
          <table:table-cell office:value-type="float" office:value="8640000" calcext:value-type="float">
            <text:p>8640000</text:p>
          </table:table-cell>
          <table:table-cell table:formula="of:=[.B1778]/[.C1778]" office:value-type="float" office:value="0.00205671296296296" calcext:value-type="float">
            <text:p>0,00205671296296296000</text:p>
          </table:table-cell>
          <table:table-cell table:formula="of:=[.D1779]-[.D1778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778" calcext:value-type="float">
            <text:p>1778</text:p>
          </table:table-cell>
          <table:table-cell table:formula="of:=[.B1778]+10" office:value-type="float" office:value="17780" calcext:value-type="float">
            <text:p>17780</text:p>
          </table:table-cell>
          <table:table-cell office:value-type="float" office:value="8640000" calcext:value-type="float">
            <text:p>8640000</text:p>
          </table:table-cell>
          <table:table-cell table:formula="of:=[.B1779]/[.C1779]" office:value-type="float" office:value="0.00205787037037037" calcext:value-type="float">
            <text:p>0,00205787037037037000</text:p>
          </table:table-cell>
          <table:table-cell table:formula="of:=[.D1780]-[.D1779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1779" calcext:value-type="float">
            <text:p>1779</text:p>
          </table:table-cell>
          <table:table-cell table:formula="of:=[.B1779]+10" office:value-type="float" office:value="17790" calcext:value-type="float">
            <text:p>17790</text:p>
          </table:table-cell>
          <table:table-cell office:value-type="float" office:value="8640000" calcext:value-type="float">
            <text:p>8640000</text:p>
          </table:table-cell>
          <table:table-cell table:formula="of:=[.B1780]/[.C1780]" office:value-type="float" office:value="0.00205902777777778" calcext:value-type="float">
            <text:p>0,00205902777777778000</text:p>
          </table:table-cell>
          <table:table-cell table:formula="of:=[.D1781]-[.D1780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table:formula="of:=[.B1780]+10" office:value-type="float" office:value="17800" calcext:value-type="float">
            <text:p>17800</text:p>
          </table:table-cell>
          <table:table-cell office:value-type="float" office:value="8640000" calcext:value-type="float">
            <text:p>8640000</text:p>
          </table:table-cell>
          <table:table-cell table:formula="of:=[.B1781]/[.C1781]" office:value-type="float" office:value="0.00206018518518519" calcext:value-type="float">
            <text:p>0,00206018518518519000</text:p>
          </table:table-cell>
          <table:table-cell table:formula="of:=[.D1782]-[.D1781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table:formula="of:=[.B1781]+10" office:value-type="float" office:value="17810" calcext:value-type="float">
            <text:p>17810</text:p>
          </table:table-cell>
          <table:table-cell office:value-type="float" office:value="8640000" calcext:value-type="float">
            <text:p>8640000</text:p>
          </table:table-cell>
          <table:table-cell table:formula="of:=[.B1782]/[.C1782]" office:value-type="float" office:value="0.00206134259259259" calcext:value-type="float">
            <text:p>0,00206134259259259000</text:p>
          </table:table-cell>
          <table:table-cell table:formula="of:=[.D1783]-[.D1782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782" calcext:value-type="float">
            <text:p>1782</text:p>
          </table:table-cell>
          <table:table-cell table:formula="of:=[.B1782]+10" office:value-type="float" office:value="17820" calcext:value-type="float">
            <text:p>17820</text:p>
          </table:table-cell>
          <table:table-cell office:value-type="float" office:value="8640000" calcext:value-type="float">
            <text:p>8640000</text:p>
          </table:table-cell>
          <table:table-cell table:formula="of:=[.B1783]/[.C1783]" office:value-type="float" office:value="0.0020625" calcext:value-type="float">
            <text:p>0,00206250000000000000</text:p>
          </table:table-cell>
          <table:table-cell table:formula="of:=[.D1784]-[.D1783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1783" calcext:value-type="float">
            <text:p>1783</text:p>
          </table:table-cell>
          <table:table-cell table:formula="of:=[.B1783]+10" office:value-type="float" office:value="17830" calcext:value-type="float">
            <text:p>17830</text:p>
          </table:table-cell>
          <table:table-cell office:value-type="float" office:value="8640000" calcext:value-type="float">
            <text:p>8640000</text:p>
          </table:table-cell>
          <table:table-cell table:formula="of:=[.B1784]/[.C1784]" office:value-type="float" office:value="0.00206365740740741" calcext:value-type="float">
            <text:p>0,00206365740740741000</text:p>
          </table:table-cell>
          <table:table-cell table:formula="of:=[.D1785]-[.D1784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784" calcext:value-type="float">
            <text:p>1784</text:p>
          </table:table-cell>
          <table:table-cell table:formula="of:=[.B1784]+10" office:value-type="float" office:value="17840" calcext:value-type="float">
            <text:p>17840</text:p>
          </table:table-cell>
          <table:table-cell office:value-type="float" office:value="8640000" calcext:value-type="float">
            <text:p>8640000</text:p>
          </table:table-cell>
          <table:table-cell table:formula="of:=[.B1785]/[.C1785]" office:value-type="float" office:value="0.00206481481481482" calcext:value-type="float">
            <text:p>0,00206481481481482000</text:p>
          </table:table-cell>
          <table:table-cell table:formula="of:=[.D1786]-[.D1785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 table:formula="of:=[.B1785]+10" office:value-type="float" office:value="17850" calcext:value-type="float">
            <text:p>17850</text:p>
          </table:table-cell>
          <table:table-cell office:value-type="float" office:value="8640000" calcext:value-type="float">
            <text:p>8640000</text:p>
          </table:table-cell>
          <table:table-cell table:formula="of:=[.B1786]/[.C1786]" office:value-type="float" office:value="0.00206597222222222" calcext:value-type="float">
            <text:p>0,00206597222222222000</text:p>
          </table:table-cell>
          <table:table-cell table:formula="of:=[.D1787]-[.D1786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786" calcext:value-type="float">
            <text:p>1786</text:p>
          </table:table-cell>
          <table:table-cell table:formula="of:=[.B1786]+10" office:value-type="float" office:value="17860" calcext:value-type="float">
            <text:p>17860</text:p>
          </table:table-cell>
          <table:table-cell office:value-type="float" office:value="8640000" calcext:value-type="float">
            <text:p>8640000</text:p>
          </table:table-cell>
          <table:table-cell table:formula="of:=[.B1787]/[.C1787]" office:value-type="float" office:value="0.00206712962962963" calcext:value-type="float">
            <text:p>0,00206712962962963000</text:p>
          </table:table-cell>
          <table:table-cell table:formula="of:=[.D1788]-[.D1787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  <table:table-cell table:formula="of:=[.B1787]+10" office:value-type="float" office:value="17870" calcext:value-type="float">
            <text:p>17870</text:p>
          </table:table-cell>
          <table:table-cell office:value-type="float" office:value="8640000" calcext:value-type="float">
            <text:p>8640000</text:p>
          </table:table-cell>
          <table:table-cell table:formula="of:=[.B1788]/[.C1788]" office:value-type="float" office:value="0.00206828703703704" calcext:value-type="float">
            <text:p>0,00206828703703704000</text:p>
          </table:table-cell>
          <table:table-cell table:formula="of:=[.D1789]-[.D1788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788" calcext:value-type="float">
            <text:p>1788</text:p>
          </table:table-cell>
          <table:table-cell table:formula="of:=[.B1788]+10" office:value-type="float" office:value="17880" calcext:value-type="float">
            <text:p>17880</text:p>
          </table:table-cell>
          <table:table-cell office:value-type="float" office:value="8640000" calcext:value-type="float">
            <text:p>8640000</text:p>
          </table:table-cell>
          <table:table-cell table:formula="of:=[.B1789]/[.C1789]" office:value-type="float" office:value="0.00206944444444444" calcext:value-type="float">
            <text:p>0,00206944444444444000</text:p>
          </table:table-cell>
          <table:table-cell table:formula="of:=[.D1790]-[.D1789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table:formula="of:=[.B1789]+10" office:value-type="float" office:value="17890" calcext:value-type="float">
            <text:p>17890</text:p>
          </table:table-cell>
          <table:table-cell office:value-type="float" office:value="8640000" calcext:value-type="float">
            <text:p>8640000</text:p>
          </table:table-cell>
          <table:table-cell table:formula="of:=[.B1790]/[.C1790]" office:value-type="float" office:value="0.00207060185185185" calcext:value-type="float">
            <text:p>0,00207060185185185000</text:p>
          </table:table-cell>
          <table:table-cell table:formula="of:=[.D1791]-[.D1790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table:formula="of:=[.B1790]+10" office:value-type="float" office:value="17900" calcext:value-type="float">
            <text:p>17900</text:p>
          </table:table-cell>
          <table:table-cell office:value-type="float" office:value="8640000" calcext:value-type="float">
            <text:p>8640000</text:p>
          </table:table-cell>
          <table:table-cell table:formula="of:=[.B1791]/[.C1791]" office:value-type="float" office:value="0.00207175925925926" calcext:value-type="float">
            <text:p>0,00207175925925926000</text:p>
          </table:table-cell>
          <table:table-cell table:formula="of:=[.D1792]-[.D1791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1791" calcext:value-type="float">
            <text:p>1791</text:p>
          </table:table-cell>
          <table:table-cell table:formula="of:=[.B1791]+10" office:value-type="float" office:value="17910" calcext:value-type="float">
            <text:p>17910</text:p>
          </table:table-cell>
          <table:table-cell office:value-type="float" office:value="8640000" calcext:value-type="float">
            <text:p>8640000</text:p>
          </table:table-cell>
          <table:table-cell table:formula="of:=[.B1792]/[.C1792]" office:value-type="float" office:value="0.00207291666666667" calcext:value-type="float">
            <text:p>0,00207291666666667000</text:p>
          </table:table-cell>
          <table:table-cell table:formula="of:=[.D1793]-[.D1792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table:formula="of:=[.B1792]+10" office:value-type="float" office:value="17920" calcext:value-type="float">
            <text:p>17920</text:p>
          </table:table-cell>
          <table:table-cell office:value-type="float" office:value="8640000" calcext:value-type="float">
            <text:p>8640000</text:p>
          </table:table-cell>
          <table:table-cell table:formula="of:=[.B1793]/[.C1793]" office:value-type="float" office:value="0.00207407407407407" calcext:value-type="float">
            <text:p>0,00207407407407407000</text:p>
          </table:table-cell>
          <table:table-cell table:formula="of:=[.D1794]-[.D1793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1793" calcext:value-type="float">
            <text:p>1793</text:p>
          </table:table-cell>
          <table:table-cell table:formula="of:=[.B1793]+10" office:value-type="float" office:value="17930" calcext:value-type="float">
            <text:p>17930</text:p>
          </table:table-cell>
          <table:table-cell office:value-type="float" office:value="8640000" calcext:value-type="float">
            <text:p>8640000</text:p>
          </table:table-cell>
          <table:table-cell table:formula="of:=[.B1794]/[.C1794]" office:value-type="float" office:value="0.00207523148148148" calcext:value-type="float">
            <text:p>0,00207523148148148000</text:p>
          </table:table-cell>
          <table:table-cell table:formula="of:=[.D1795]-[.D1794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794" calcext:value-type="float">
            <text:p>1794</text:p>
          </table:table-cell>
          <table:table-cell table:formula="of:=[.B1794]+10" office:value-type="float" office:value="17940" calcext:value-type="float">
            <text:p>17940</text:p>
          </table:table-cell>
          <table:table-cell office:value-type="float" office:value="8640000" calcext:value-type="float">
            <text:p>8640000</text:p>
          </table:table-cell>
          <table:table-cell table:formula="of:=[.B1795]/[.C1795]" office:value-type="float" office:value="0.00207638888888889" calcext:value-type="float">
            <text:p>0,00207638888888889000</text:p>
          </table:table-cell>
          <table:table-cell table:formula="of:=[.D1796]-[.D1795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 table:formula="of:=[.B1795]+10" office:value-type="float" office:value="17950" calcext:value-type="float">
            <text:p>17950</text:p>
          </table:table-cell>
          <table:table-cell office:value-type="float" office:value="8640000" calcext:value-type="float">
            <text:p>8640000</text:p>
          </table:table-cell>
          <table:table-cell table:formula="of:=[.B1796]/[.C1796]" office:value-type="float" office:value="0.0020775462962963" calcext:value-type="float">
            <text:p>0,00207754629629630000</text:p>
          </table:table-cell>
          <table:table-cell table:formula="of:=[.D1797]-[.D1796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796" calcext:value-type="float">
            <text:p>1796</text:p>
          </table:table-cell>
          <table:table-cell table:formula="of:=[.B1796]+10" office:value-type="float" office:value="17960" calcext:value-type="float">
            <text:p>17960</text:p>
          </table:table-cell>
          <table:table-cell office:value-type="float" office:value="8640000" calcext:value-type="float">
            <text:p>8640000</text:p>
          </table:table-cell>
          <table:table-cell table:formula="of:=[.B1797]/[.C1797]" office:value-type="float" office:value="0.0020787037037037" calcext:value-type="float">
            <text:p>0,00207870370370370000</text:p>
          </table:table-cell>
          <table:table-cell table:formula="of:=[.D1798]-[.D1797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table:formula="of:=[.B1797]+10" office:value-type="float" office:value="17970" calcext:value-type="float">
            <text:p>17970</text:p>
          </table:table-cell>
          <table:table-cell office:value-type="float" office:value="8640000" calcext:value-type="float">
            <text:p>8640000</text:p>
          </table:table-cell>
          <table:table-cell table:formula="of:=[.B1798]/[.C1798]" office:value-type="float" office:value="0.00207986111111111" calcext:value-type="float">
            <text:p>0,00207986111111111000</text:p>
          </table:table-cell>
          <table:table-cell table:formula="of:=[.D1799]-[.D1798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table:formula="of:=[.B1798]+10" office:value-type="float" office:value="17980" calcext:value-type="float">
            <text:p>17980</text:p>
          </table:table-cell>
          <table:table-cell office:value-type="float" office:value="8640000" calcext:value-type="float">
            <text:p>8640000</text:p>
          </table:table-cell>
          <table:table-cell table:formula="of:=[.B1799]/[.C1799]" office:value-type="float" office:value="0.00208101851851852" calcext:value-type="float">
            <text:p>0,00208101851851852000</text:p>
          </table:table-cell>
          <table:table-cell table:formula="of:=[.D1800]-[.D1799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  <table:table-cell table:formula="of:=[.B1799]+10" office:value-type="float" office:value="17990" calcext:value-type="float">
            <text:p>17990</text:p>
          </table:table-cell>
          <table:table-cell office:value-type="float" office:value="8640000" calcext:value-type="float">
            <text:p>8640000</text:p>
          </table:table-cell>
          <table:table-cell table:formula="of:=[.B1800]/[.C1800]" office:value-type="float" office:value="0.00208217592592593" calcext:value-type="float">
            <text:p>0,00208217592592593000</text:p>
          </table:table-cell>
          <table:table-cell table:formula="of:=[.D1801]-[.D1800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table:formula="of:=[.B1800]+10" office:value-type="float" office:value="18000" calcext:value-type="float">
            <text:p>18000</text:p>
          </table:table-cell>
          <table:table-cell office:value-type="float" office:value="8640000" calcext:value-type="float">
            <text:p>8640000</text:p>
          </table:table-cell>
          <table:table-cell table:formula="of:=[.B1801]/[.C1801]" office:value-type="float" office:value="0.00208333333333333" calcext:value-type="float">
            <text:p>0,00208333333333333000</text:p>
          </table:table-cell>
          <table:table-cell table:formula="of:=[.D1802]-[.D1801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table:formula="of:=[.B1801]+10" office:value-type="float" office:value="18010" calcext:value-type="float">
            <text:p>18010</text:p>
          </table:table-cell>
          <table:table-cell office:value-type="float" office:value="8640000" calcext:value-type="float">
            <text:p>8640000</text:p>
          </table:table-cell>
          <table:table-cell table:formula="of:=[.B1802]/[.C1802]" office:value-type="float" office:value="0.00208449074074074" calcext:value-type="float">
            <text:p>0,00208449074074074000</text:p>
          </table:table-cell>
          <table:table-cell table:formula="of:=[.D1803]-[.D1802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1802" calcext:value-type="float">
            <text:p>1802</text:p>
          </table:table-cell>
          <table:table-cell table:formula="of:=[.B1802]+10" office:value-type="float" office:value="18020" calcext:value-type="float">
            <text:p>18020</text:p>
          </table:table-cell>
          <table:table-cell office:value-type="float" office:value="8640000" calcext:value-type="float">
            <text:p>8640000</text:p>
          </table:table-cell>
          <table:table-cell table:formula="of:=[.B1803]/[.C1803]" office:value-type="float" office:value="0.00208564814814815" calcext:value-type="float">
            <text:p>0,00208564814814815000</text:p>
          </table:table-cell>
          <table:table-cell table:formula="of:=[.D1804]-[.D1803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table:formula="of:=[.B1803]+10" office:value-type="float" office:value="18030" calcext:value-type="float">
            <text:p>18030</text:p>
          </table:table-cell>
          <table:table-cell office:value-type="float" office:value="8640000" calcext:value-type="float">
            <text:p>8640000</text:p>
          </table:table-cell>
          <table:table-cell table:formula="of:=[.B1804]/[.C1804]" office:value-type="float" office:value="0.00208680555555556" calcext:value-type="float">
            <text:p>0,00208680555555556000</text:p>
          </table:table-cell>
          <table:table-cell table:formula="of:=[.D1805]-[.D1804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1804" calcext:value-type="float">
            <text:p>1804</text:p>
          </table:table-cell>
          <table:table-cell table:formula="of:=[.B1804]+10" office:value-type="float" office:value="18040" calcext:value-type="float">
            <text:p>18040</text:p>
          </table:table-cell>
          <table:table-cell office:value-type="float" office:value="8640000" calcext:value-type="float">
            <text:p>8640000</text:p>
          </table:table-cell>
          <table:table-cell table:formula="of:=[.B1805]/[.C1805]" office:value-type="float" office:value="0.00208796296296296" calcext:value-type="float">
            <text:p>0,00208796296296296000</text:p>
          </table:table-cell>
          <table:table-cell table:formula="of:=[.D1806]-[.D1805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 table:formula="of:=[.B1805]+10" office:value-type="float" office:value="18050" calcext:value-type="float">
            <text:p>18050</text:p>
          </table:table-cell>
          <table:table-cell office:value-type="float" office:value="8640000" calcext:value-type="float">
            <text:p>8640000</text:p>
          </table:table-cell>
          <table:table-cell table:formula="of:=[.B1806]/[.C1806]" office:value-type="float" office:value="0.00208912037037037" calcext:value-type="float">
            <text:p>0,00208912037037037000</text:p>
          </table:table-cell>
          <table:table-cell table:formula="of:=[.D1807]-[.D1806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1806" calcext:value-type="float">
            <text:p>1806</text:p>
          </table:table-cell>
          <table:table-cell table:formula="of:=[.B1806]+10" office:value-type="float" office:value="18060" calcext:value-type="float">
            <text:p>18060</text:p>
          </table:table-cell>
          <table:table-cell office:value-type="float" office:value="8640000" calcext:value-type="float">
            <text:p>8640000</text:p>
          </table:table-cell>
          <table:table-cell table:formula="of:=[.B1807]/[.C1807]" office:value-type="float" office:value="0.00209027777777778" calcext:value-type="float">
            <text:p>0,00209027777777778000</text:p>
          </table:table-cell>
          <table:table-cell table:formula="of:=[.D1808]-[.D1807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807" calcext:value-type="float">
            <text:p>1807</text:p>
          </table:table-cell>
          <table:table-cell table:formula="of:=[.B1807]+10" office:value-type="float" office:value="18070" calcext:value-type="float">
            <text:p>18070</text:p>
          </table:table-cell>
          <table:table-cell office:value-type="float" office:value="8640000" calcext:value-type="float">
            <text:p>8640000</text:p>
          </table:table-cell>
          <table:table-cell table:formula="of:=[.B1808]/[.C1808]" office:value-type="float" office:value="0.00209143518518519" calcext:value-type="float">
            <text:p>0,00209143518518519000</text:p>
          </table:table-cell>
          <table:table-cell table:formula="of:=[.D1809]-[.D1808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1808" calcext:value-type="float">
            <text:p>1808</text:p>
          </table:table-cell>
          <table:table-cell table:formula="of:=[.B1808]+10" office:value-type="float" office:value="18080" calcext:value-type="float">
            <text:p>18080</text:p>
          </table:table-cell>
          <table:table-cell office:value-type="float" office:value="8640000" calcext:value-type="float">
            <text:p>8640000</text:p>
          </table:table-cell>
          <table:table-cell table:formula="of:=[.B1809]/[.C1809]" office:value-type="float" office:value="0.00209259259259259" calcext:value-type="float">
            <text:p>0,00209259259259259000</text:p>
          </table:table-cell>
          <table:table-cell table:formula="of:=[.D1810]-[.D1809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  <table:table-cell table:formula="of:=[.B1809]+10" office:value-type="float" office:value="18090" calcext:value-type="float">
            <text:p>18090</text:p>
          </table:table-cell>
          <table:table-cell office:value-type="float" office:value="8640000" calcext:value-type="float">
            <text:p>8640000</text:p>
          </table:table-cell>
          <table:table-cell table:formula="of:=[.B1810]/[.C1810]" office:value-type="float" office:value="0.00209375" calcext:value-type="float">
            <text:p>0,00209375000000000000</text:p>
          </table:table-cell>
          <table:table-cell table:formula="of:=[.D1811]-[.D1810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table:formula="of:=[.B1810]+10" office:value-type="float" office:value="18100" calcext:value-type="float">
            <text:p>18100</text:p>
          </table:table-cell>
          <table:table-cell office:value-type="float" office:value="8640000" calcext:value-type="float">
            <text:p>8640000</text:p>
          </table:table-cell>
          <table:table-cell table:formula="of:=[.B1811]/[.C1811]" office:value-type="float" office:value="0.00209490740740741" calcext:value-type="float">
            <text:p>0,00209490740740741000</text:p>
          </table:table-cell>
          <table:table-cell table:formula="of:=[.D1812]-[.D1811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811" calcext:value-type="float">
            <text:p>1811</text:p>
          </table:table-cell>
          <table:table-cell table:formula="of:=[.B1811]+10" office:value-type="float" office:value="18110" calcext:value-type="float">
            <text:p>18110</text:p>
          </table:table-cell>
          <table:table-cell office:value-type="float" office:value="8640000" calcext:value-type="float">
            <text:p>8640000</text:p>
          </table:table-cell>
          <table:table-cell table:formula="of:=[.B1812]/[.C1812]" office:value-type="float" office:value="0.00209606481481482" calcext:value-type="float">
            <text:p>0,00209606481481482000</text:p>
          </table:table-cell>
          <table:table-cell table:formula="of:=[.D1813]-[.D1812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1812" calcext:value-type="float">
            <text:p>1812</text:p>
          </table:table-cell>
          <table:table-cell table:formula="of:=[.B1812]+10" office:value-type="float" office:value="18120" calcext:value-type="float">
            <text:p>18120</text:p>
          </table:table-cell>
          <table:table-cell office:value-type="float" office:value="8640000" calcext:value-type="float">
            <text:p>8640000</text:p>
          </table:table-cell>
          <table:table-cell table:formula="of:=[.B1813]/[.C1813]" office:value-type="float" office:value="0.00209722222222222" calcext:value-type="float">
            <text:p>0,00209722222222222000</text:p>
          </table:table-cell>
          <table:table-cell table:formula="of:=[.D1814]-[.D1813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table:formula="of:=[.B1813]+10" office:value-type="float" office:value="18130" calcext:value-type="float">
            <text:p>18130</text:p>
          </table:table-cell>
          <table:table-cell office:value-type="float" office:value="8640000" calcext:value-type="float">
            <text:p>8640000</text:p>
          </table:table-cell>
          <table:table-cell table:formula="of:=[.B1814]/[.C1814]" office:value-type="float" office:value="0.00209837962962963" calcext:value-type="float">
            <text:p>0,00209837962962963000</text:p>
          </table:table-cell>
          <table:table-cell table:formula="of:=[.D1815]-[.D1814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1814" calcext:value-type="float">
            <text:p>1814</text:p>
          </table:table-cell>
          <table:table-cell table:formula="of:=[.B1814]+10" office:value-type="float" office:value="18140" calcext:value-type="float">
            <text:p>18140</text:p>
          </table:table-cell>
          <table:table-cell office:value-type="float" office:value="8640000" calcext:value-type="float">
            <text:p>8640000</text:p>
          </table:table-cell>
          <table:table-cell table:formula="of:=[.B1815]/[.C1815]" office:value-type="float" office:value="0.00209953703703704" calcext:value-type="float">
            <text:p>0,00209953703703704000</text:p>
          </table:table-cell>
          <table:table-cell table:formula="of:=[.D1816]-[.D1815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 table:formula="of:=[.B1815]+10" office:value-type="float" office:value="18150" calcext:value-type="float">
            <text:p>18150</text:p>
          </table:table-cell>
          <table:table-cell office:value-type="float" office:value="8640000" calcext:value-type="float">
            <text:p>8640000</text:p>
          </table:table-cell>
          <table:table-cell table:formula="of:=[.B1816]/[.C1816]" office:value-type="float" office:value="0.00210069444444444" calcext:value-type="float">
            <text:p>0,00210069444444444000</text:p>
          </table:table-cell>
          <table:table-cell table:formula="of:=[.D1817]-[.D1816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1816" calcext:value-type="float">
            <text:p>1816</text:p>
          </table:table-cell>
          <table:table-cell table:formula="of:=[.B1816]+10" office:value-type="float" office:value="18160" calcext:value-type="float">
            <text:p>18160</text:p>
          </table:table-cell>
          <table:table-cell office:value-type="float" office:value="8640000" calcext:value-type="float">
            <text:p>8640000</text:p>
          </table:table-cell>
          <table:table-cell table:formula="of:=[.B1817]/[.C1817]" office:value-type="float" office:value="0.00210185185185185" calcext:value-type="float">
            <text:p>0,00210185185185185000</text:p>
          </table:table-cell>
          <table:table-cell table:formula="of:=[.D1818]-[.D1817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  <table:table-cell table:formula="of:=[.B1817]+10" office:value-type="float" office:value="18170" calcext:value-type="float">
            <text:p>18170</text:p>
          </table:table-cell>
          <table:table-cell office:value-type="float" office:value="8640000" calcext:value-type="float">
            <text:p>8640000</text:p>
          </table:table-cell>
          <table:table-cell table:formula="of:=[.B1818]/[.C1818]" office:value-type="float" office:value="0.00210300925925926" calcext:value-type="float">
            <text:p>0,00210300925925926000</text:p>
          </table:table-cell>
          <table:table-cell table:formula="of:=[.D1819]-[.D1818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1818" calcext:value-type="float">
            <text:p>1818</text:p>
          </table:table-cell>
          <table:table-cell table:formula="of:=[.B1818]+10" office:value-type="float" office:value="18180" calcext:value-type="float">
            <text:p>18180</text:p>
          </table:table-cell>
          <table:table-cell office:value-type="float" office:value="8640000" calcext:value-type="float">
            <text:p>8640000</text:p>
          </table:table-cell>
          <table:table-cell table:formula="of:=[.B1819]/[.C1819]" office:value-type="float" office:value="0.00210416666666667" calcext:value-type="float">
            <text:p>0,00210416666666667000</text:p>
          </table:table-cell>
          <table:table-cell table:formula="of:=[.D1820]-[.D1819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819" calcext:value-type="float">
            <text:p>1819</text:p>
          </table:table-cell>
          <table:table-cell table:formula="of:=[.B1819]+10" office:value-type="float" office:value="18190" calcext:value-type="float">
            <text:p>18190</text:p>
          </table:table-cell>
          <table:table-cell office:value-type="float" office:value="8640000" calcext:value-type="float">
            <text:p>8640000</text:p>
          </table:table-cell>
          <table:table-cell table:formula="of:=[.B1820]/[.C1820]" office:value-type="float" office:value="0.00210532407407407" calcext:value-type="float">
            <text:p>0,00210532407407407000</text:p>
          </table:table-cell>
          <table:table-cell table:formula="of:=[.D1821]-[.D1820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table:formula="of:=[.B1820]+10" office:value-type="float" office:value="18200" calcext:value-type="float">
            <text:p>18200</text:p>
          </table:table-cell>
          <table:table-cell office:value-type="float" office:value="8640000" calcext:value-type="float">
            <text:p>8640000</text:p>
          </table:table-cell>
          <table:table-cell table:formula="of:=[.B1821]/[.C1821]" office:value-type="float" office:value="0.00210648148148148" calcext:value-type="float">
            <text:p>0,00210648148148148000</text:p>
          </table:table-cell>
          <table:table-cell table:formula="of:=[.D1822]-[.D1821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table:formula="of:=[.B1821]+10" office:value-type="float" office:value="18210" calcext:value-type="float">
            <text:p>18210</text:p>
          </table:table-cell>
          <table:table-cell office:value-type="float" office:value="8640000" calcext:value-type="float">
            <text:p>8640000</text:p>
          </table:table-cell>
          <table:table-cell table:formula="of:=[.B1822]/[.C1822]" office:value-type="float" office:value="0.00210763888888889" calcext:value-type="float">
            <text:p>0,00210763888888889000</text:p>
          </table:table-cell>
          <table:table-cell table:formula="of:=[.D1823]-[.D1822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1822" calcext:value-type="float">
            <text:p>1822</text:p>
          </table:table-cell>
          <table:table-cell table:formula="of:=[.B1822]+10" office:value-type="float" office:value="18220" calcext:value-type="float">
            <text:p>18220</text:p>
          </table:table-cell>
          <table:table-cell office:value-type="float" office:value="8640000" calcext:value-type="float">
            <text:p>8640000</text:p>
          </table:table-cell>
          <table:table-cell table:formula="of:=[.B1823]/[.C1823]" office:value-type="float" office:value="0.0021087962962963" calcext:value-type="float">
            <text:p>0,00210879629629630000</text:p>
          </table:table-cell>
          <table:table-cell table:formula="of:=[.D1824]-[.D1823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  <table:table-cell table:formula="of:=[.B1823]+10" office:value-type="float" office:value="18230" calcext:value-type="float">
            <text:p>18230</text:p>
          </table:table-cell>
          <table:table-cell office:value-type="float" office:value="8640000" calcext:value-type="float">
            <text:p>8640000</text:p>
          </table:table-cell>
          <table:table-cell table:formula="of:=[.B1824]/[.C1824]" office:value-type="float" office:value="0.0021099537037037" calcext:value-type="float">
            <text:p>0,00210995370370370000</text:p>
          </table:table-cell>
          <table:table-cell table:formula="of:=[.D1825]-[.D1824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1824" calcext:value-type="float">
            <text:p>1824</text:p>
          </table:table-cell>
          <table:table-cell table:formula="of:=[.B1824]+10" office:value-type="float" office:value="18240" calcext:value-type="float">
            <text:p>18240</text:p>
          </table:table-cell>
          <table:table-cell office:value-type="float" office:value="8640000" calcext:value-type="float">
            <text:p>8640000</text:p>
          </table:table-cell>
          <table:table-cell table:formula="of:=[.B1825]/[.C1825]" office:value-type="float" office:value="0.00211111111111111" calcext:value-type="float">
            <text:p>0,00211111111111111000</text:p>
          </table:table-cell>
          <table:table-cell table:formula="of:=[.D1826]-[.D1825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table:formula="of:=[.B1825]+10" office:value-type="float" office:value="18250" calcext:value-type="float">
            <text:p>18250</text:p>
          </table:table-cell>
          <table:table-cell office:value-type="float" office:value="8640000" calcext:value-type="float">
            <text:p>8640000</text:p>
          </table:table-cell>
          <table:table-cell table:formula="of:=[.B1826]/[.C1826]" office:value-type="float" office:value="0.00211226851851852" calcext:value-type="float">
            <text:p>0,00211226851851852000</text:p>
          </table:table-cell>
          <table:table-cell table:formula="of:=[.D1827]-[.D1826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1826" calcext:value-type="float">
            <text:p>1826</text:p>
          </table:table-cell>
          <table:table-cell table:formula="of:=[.B1826]+10" office:value-type="float" office:value="18260" calcext:value-type="float">
            <text:p>18260</text:p>
          </table:table-cell>
          <table:table-cell office:value-type="float" office:value="8640000" calcext:value-type="float">
            <text:p>8640000</text:p>
          </table:table-cell>
          <table:table-cell table:formula="of:=[.B1827]/[.C1827]" office:value-type="float" office:value="0.00211342592592593" calcext:value-type="float">
            <text:p>0,00211342592592593000</text:p>
          </table:table-cell>
          <table:table-cell table:formula="of:=[.D1828]-[.D1827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827" calcext:value-type="float">
            <text:p>1827</text:p>
          </table:table-cell>
          <table:table-cell table:formula="of:=[.B1827]+10" office:value-type="float" office:value="18270" calcext:value-type="float">
            <text:p>18270</text:p>
          </table:table-cell>
          <table:table-cell office:value-type="float" office:value="8640000" calcext:value-type="float">
            <text:p>8640000</text:p>
          </table:table-cell>
          <table:table-cell table:formula="of:=[.B1828]/[.C1828]" office:value-type="float" office:value="0.00211458333333333" calcext:value-type="float">
            <text:p>0,00211458333333333000</text:p>
          </table:table-cell>
          <table:table-cell table:formula="of:=[.D1829]-[.D1828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828" calcext:value-type="float">
            <text:p>1828</text:p>
          </table:table-cell>
          <table:table-cell table:formula="of:=[.B1828]+10" office:value-type="float" office:value="18280" calcext:value-type="float">
            <text:p>18280</text:p>
          </table:table-cell>
          <table:table-cell office:value-type="float" office:value="8640000" calcext:value-type="float">
            <text:p>8640000</text:p>
          </table:table-cell>
          <table:table-cell table:formula="of:=[.B1829]/[.C1829]" office:value-type="float" office:value="0.00211574074074074" calcext:value-type="float">
            <text:p>0,00211574074074074000</text:p>
          </table:table-cell>
          <table:table-cell table:formula="of:=[.D1830]-[.D1829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1829" calcext:value-type="float">
            <text:p>1829</text:p>
          </table:table-cell>
          <table:table-cell table:formula="of:=[.B1829]+10" office:value-type="float" office:value="18290" calcext:value-type="float">
            <text:p>18290</text:p>
          </table:table-cell>
          <table:table-cell office:value-type="float" office:value="8640000" calcext:value-type="float">
            <text:p>8640000</text:p>
          </table:table-cell>
          <table:table-cell table:formula="of:=[.B1830]/[.C1830]" office:value-type="float" office:value="0.00211689814814815" calcext:value-type="float">
            <text:p>0,00211689814814815000</text:p>
          </table:table-cell>
          <table:table-cell table:formula="of:=[.D1831]-[.D1830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table:formula="of:=[.B1830]+10" office:value-type="float" office:value="18300" calcext:value-type="float">
            <text:p>18300</text:p>
          </table:table-cell>
          <table:table-cell office:value-type="float" office:value="8640000" calcext:value-type="float">
            <text:p>8640000</text:p>
          </table:table-cell>
          <table:table-cell table:formula="of:=[.B1831]/[.C1831]" office:value-type="float" office:value="0.00211805555555556" calcext:value-type="float">
            <text:p>0,00211805555555556000</text:p>
          </table:table-cell>
          <table:table-cell table:formula="of:=[.D1832]-[.D1831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  <table:table-cell table:formula="of:=[.B1831]+10" office:value-type="float" office:value="18310" calcext:value-type="float">
            <text:p>18310</text:p>
          </table:table-cell>
          <table:table-cell office:value-type="float" office:value="8640000" calcext:value-type="float">
            <text:p>8640000</text:p>
          </table:table-cell>
          <table:table-cell table:formula="of:=[.B1832]/[.C1832]" office:value-type="float" office:value="0.00211921296296296" calcext:value-type="float">
            <text:p>0,00211921296296296000</text:p>
          </table:table-cell>
          <table:table-cell table:formula="of:=[.D1833]-[.D1832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832" calcext:value-type="float">
            <text:p>1832</text:p>
          </table:table-cell>
          <table:table-cell table:formula="of:=[.B1832]+10" office:value-type="float" office:value="18320" calcext:value-type="float">
            <text:p>18320</text:p>
          </table:table-cell>
          <table:table-cell office:value-type="float" office:value="8640000" calcext:value-type="float">
            <text:p>8640000</text:p>
          </table:table-cell>
          <table:table-cell table:formula="of:=[.B1833]/[.C1833]" office:value-type="float" office:value="0.00212037037037037" calcext:value-type="float">
            <text:p>0,00212037037037037000</text:p>
          </table:table-cell>
          <table:table-cell table:formula="of:=[.D1834]-[.D1833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1833" calcext:value-type="float">
            <text:p>1833</text:p>
          </table:table-cell>
          <table:table-cell table:formula="of:=[.B1833]+10" office:value-type="float" office:value="18330" calcext:value-type="float">
            <text:p>18330</text:p>
          </table:table-cell>
          <table:table-cell office:value-type="float" office:value="8640000" calcext:value-type="float">
            <text:p>8640000</text:p>
          </table:table-cell>
          <table:table-cell table:formula="of:=[.B1834]/[.C1834]" office:value-type="float" office:value="0.00212152777777778" calcext:value-type="float">
            <text:p>0,00212152777777778000</text:p>
          </table:table-cell>
          <table:table-cell table:formula="of:=[.D1835]-[.D1834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834" calcext:value-type="float">
            <text:p>1834</text:p>
          </table:table-cell>
          <table:table-cell table:formula="of:=[.B1834]+10" office:value-type="float" office:value="18340" calcext:value-type="float">
            <text:p>18340</text:p>
          </table:table-cell>
          <table:table-cell office:value-type="float" office:value="8640000" calcext:value-type="float">
            <text:p>8640000</text:p>
          </table:table-cell>
          <table:table-cell table:formula="of:=[.B1835]/[.C1835]" office:value-type="float" office:value="0.00212268518518519" calcext:value-type="float">
            <text:p>0,00212268518518519000</text:p>
          </table:table-cell>
          <table:table-cell table:formula="of:=[.D1836]-[.D1835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 table:formula="of:=[.B1835]+10" office:value-type="float" office:value="18350" calcext:value-type="float">
            <text:p>18350</text:p>
          </table:table-cell>
          <table:table-cell office:value-type="float" office:value="8640000" calcext:value-type="float">
            <text:p>8640000</text:p>
          </table:table-cell>
          <table:table-cell table:formula="of:=[.B1836]/[.C1836]" office:value-type="float" office:value="0.00212384259259259" calcext:value-type="float">
            <text:p>0,00212384259259259000</text:p>
          </table:table-cell>
          <table:table-cell table:formula="of:=[.D1837]-[.D1836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836" calcext:value-type="float">
            <text:p>1836</text:p>
          </table:table-cell>
          <table:table-cell table:formula="of:=[.B1836]+10" office:value-type="float" office:value="18360" calcext:value-type="float">
            <text:p>18360</text:p>
          </table:table-cell>
          <table:table-cell office:value-type="float" office:value="8640000" calcext:value-type="float">
            <text:p>8640000</text:p>
          </table:table-cell>
          <table:table-cell table:formula="of:=[.B1837]/[.C1837]" office:value-type="float" office:value="0.002125" calcext:value-type="float">
            <text:p>0,00212500000000000000</text:p>
          </table:table-cell>
          <table:table-cell table:formula="of:=[.D1838]-[.D1837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1837" calcext:value-type="float">
            <text:p>1837</text:p>
          </table:table-cell>
          <table:table-cell table:formula="of:=[.B1837]+10" office:value-type="float" office:value="18370" calcext:value-type="float">
            <text:p>18370</text:p>
          </table:table-cell>
          <table:table-cell office:value-type="float" office:value="8640000" calcext:value-type="float">
            <text:p>8640000</text:p>
          </table:table-cell>
          <table:table-cell table:formula="of:=[.B1838]/[.C1838]" office:value-type="float" office:value="0.00212615740740741" calcext:value-type="float">
            <text:p>0,00212615740740741000</text:p>
          </table:table-cell>
          <table:table-cell table:formula="of:=[.D1839]-[.D1838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838" calcext:value-type="float">
            <text:p>1838</text:p>
          </table:table-cell>
          <table:table-cell table:formula="of:=[.B1838]+10" office:value-type="float" office:value="18380" calcext:value-type="float">
            <text:p>18380</text:p>
          </table:table-cell>
          <table:table-cell office:value-type="float" office:value="8640000" calcext:value-type="float">
            <text:p>8640000</text:p>
          </table:table-cell>
          <table:table-cell table:formula="of:=[.B1839]/[.C1839]" office:value-type="float" office:value="0.00212731481481482" calcext:value-type="float">
            <text:p>0,00212731481481482000</text:p>
          </table:table-cell>
          <table:table-cell table:formula="of:=[.D1840]-[.D1839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1839" calcext:value-type="float">
            <text:p>1839</text:p>
          </table:table-cell>
          <table:table-cell table:formula="of:=[.B1839]+10" office:value-type="float" office:value="18390" calcext:value-type="float">
            <text:p>18390</text:p>
          </table:table-cell>
          <table:table-cell office:value-type="float" office:value="8640000" calcext:value-type="float">
            <text:p>8640000</text:p>
          </table:table-cell>
          <table:table-cell table:formula="of:=[.B1840]/[.C1840]" office:value-type="float" office:value="0.00212847222222222" calcext:value-type="float">
            <text:p>0,00212847222222222000</text:p>
          </table:table-cell>
          <table:table-cell table:formula="of:=[.D1841]-[.D1840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table:formula="of:=[.B1840]+10" office:value-type="float" office:value="18400" calcext:value-type="float">
            <text:p>18400</text:p>
          </table:table-cell>
          <table:table-cell office:value-type="float" office:value="8640000" calcext:value-type="float">
            <text:p>8640000</text:p>
          </table:table-cell>
          <table:table-cell table:formula="of:=[.B1841]/[.C1841]" office:value-type="float" office:value="0.00212962962962963" calcext:value-type="float">
            <text:p>0,00212962962962963000</text:p>
          </table:table-cell>
          <table:table-cell table:formula="of:=[.D1842]-[.D1841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1841" calcext:value-type="float">
            <text:p>1841</text:p>
          </table:table-cell>
          <table:table-cell table:formula="of:=[.B1841]+10" office:value-type="float" office:value="18410" calcext:value-type="float">
            <text:p>18410</text:p>
          </table:table-cell>
          <table:table-cell office:value-type="float" office:value="8640000" calcext:value-type="float">
            <text:p>8640000</text:p>
          </table:table-cell>
          <table:table-cell table:formula="of:=[.B1842]/[.C1842]" office:value-type="float" office:value="0.00213078703703704" calcext:value-type="float">
            <text:p>0,00213078703703704000</text:p>
          </table:table-cell>
          <table:table-cell table:formula="of:=[.D1843]-[.D1842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842" calcext:value-type="float">
            <text:p>1842</text:p>
          </table:table-cell>
          <table:table-cell table:formula="of:=[.B1842]+10" office:value-type="float" office:value="18420" calcext:value-type="float">
            <text:p>18420</text:p>
          </table:table-cell>
          <table:table-cell office:value-type="float" office:value="8640000" calcext:value-type="float">
            <text:p>8640000</text:p>
          </table:table-cell>
          <table:table-cell table:formula="of:=[.B1843]/[.C1843]" office:value-type="float" office:value="0.00213194444444444" calcext:value-type="float">
            <text:p>0,00213194444444444000</text:p>
          </table:table-cell>
          <table:table-cell table:formula="of:=[.D1844]-[.D1843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1843" calcext:value-type="float">
            <text:p>1843</text:p>
          </table:table-cell>
          <table:table-cell table:formula="of:=[.B1843]+10" office:value-type="float" office:value="18430" calcext:value-type="float">
            <text:p>18430</text:p>
          </table:table-cell>
          <table:table-cell office:value-type="float" office:value="8640000" calcext:value-type="float">
            <text:p>8640000</text:p>
          </table:table-cell>
          <table:table-cell table:formula="of:=[.B1844]/[.C1844]" office:value-type="float" office:value="0.00213310185185185" calcext:value-type="float">
            <text:p>0,00213310185185185000</text:p>
          </table:table-cell>
          <table:table-cell table:formula="of:=[.D1845]-[.D1844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844" calcext:value-type="float">
            <text:p>1844</text:p>
          </table:table-cell>
          <table:table-cell table:formula="of:=[.B1844]+10" office:value-type="float" office:value="18440" calcext:value-type="float">
            <text:p>18440</text:p>
          </table:table-cell>
          <table:table-cell office:value-type="float" office:value="8640000" calcext:value-type="float">
            <text:p>8640000</text:p>
          </table:table-cell>
          <table:table-cell table:formula="of:=[.B1845]/[.C1845]" office:value-type="float" office:value="0.00213425925925926" calcext:value-type="float">
            <text:p>0,00213425925925926000</text:p>
          </table:table-cell>
          <table:table-cell table:formula="of:=[.D1846]-[.D1845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table:formula="of:=[.B1845]+10" office:value-type="float" office:value="18450" calcext:value-type="float">
            <text:p>18450</text:p>
          </table:table-cell>
          <table:table-cell office:value-type="float" office:value="8640000" calcext:value-type="float">
            <text:p>8640000</text:p>
          </table:table-cell>
          <table:table-cell table:formula="of:=[.B1846]/[.C1846]" office:value-type="float" office:value="0.00213541666666667" calcext:value-type="float">
            <text:p>0,00213541666666667000</text:p>
          </table:table-cell>
          <table:table-cell table:formula="of:=[.D1847]-[.D1846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846" calcext:value-type="float">
            <text:p>1846</text:p>
          </table:table-cell>
          <table:table-cell table:formula="of:=[.B1846]+10" office:value-type="float" office:value="18460" calcext:value-type="float">
            <text:p>18460</text:p>
          </table:table-cell>
          <table:table-cell office:value-type="float" office:value="8640000" calcext:value-type="float">
            <text:p>8640000</text:p>
          </table:table-cell>
          <table:table-cell table:formula="of:=[.B1847]/[.C1847]" office:value-type="float" office:value="0.00213657407407407" calcext:value-type="float">
            <text:p>0,00213657407407407000</text:p>
          </table:table-cell>
          <table:table-cell table:formula="of:=[.D1848]-[.D1847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1847" calcext:value-type="float">
            <text:p>1847</text:p>
          </table:table-cell>
          <table:table-cell table:formula="of:=[.B1847]+10" office:value-type="float" office:value="18470" calcext:value-type="float">
            <text:p>18470</text:p>
          </table:table-cell>
          <table:table-cell office:value-type="float" office:value="8640000" calcext:value-type="float">
            <text:p>8640000</text:p>
          </table:table-cell>
          <table:table-cell table:formula="of:=[.B1848]/[.C1848]" office:value-type="float" office:value="0.00213773148148148" calcext:value-type="float">
            <text:p>0,00213773148148148000</text:p>
          </table:table-cell>
          <table:table-cell table:formula="of:=[.D1849]-[.D1848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848" calcext:value-type="float">
            <text:p>1848</text:p>
          </table:table-cell>
          <table:table-cell table:formula="of:=[.B1848]+10" office:value-type="float" office:value="18480" calcext:value-type="float">
            <text:p>18480</text:p>
          </table:table-cell>
          <table:table-cell office:value-type="float" office:value="8640000" calcext:value-type="float">
            <text:p>8640000</text:p>
          </table:table-cell>
          <table:table-cell table:formula="of:=[.B1849]/[.C1849]" office:value-type="float" office:value="0.00213888888888889" calcext:value-type="float">
            <text:p>0,00213888888888889000</text:p>
          </table:table-cell>
          <table:table-cell table:formula="of:=[.D1850]-[.D1849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1849" calcext:value-type="float">
            <text:p>1849</text:p>
          </table:table-cell>
          <table:table-cell table:formula="of:=[.B1849]+10" office:value-type="float" office:value="18490" calcext:value-type="float">
            <text:p>18490</text:p>
          </table:table-cell>
          <table:table-cell office:value-type="float" office:value="8640000" calcext:value-type="float">
            <text:p>8640000</text:p>
          </table:table-cell>
          <table:table-cell table:formula="of:=[.B1850]/[.C1850]" office:value-type="float" office:value="0.0021400462962963" calcext:value-type="float">
            <text:p>0,00214004629629630000</text:p>
          </table:table-cell>
          <table:table-cell table:formula="of:=[.D1851]-[.D1850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table:formula="of:=[.B1850]+10" office:value-type="float" office:value="18500" calcext:value-type="float">
            <text:p>18500</text:p>
          </table:table-cell>
          <table:table-cell office:value-type="float" office:value="8640000" calcext:value-type="float">
            <text:p>8640000</text:p>
          </table:table-cell>
          <table:table-cell table:formula="of:=[.B1851]/[.C1851]" office:value-type="float" office:value="0.0021412037037037" calcext:value-type="float">
            <text:p>0,00214120370370370000</text:p>
          </table:table-cell>
          <table:table-cell table:formula="of:=[.D1852]-[.D1851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1851" calcext:value-type="float">
            <text:p>1851</text:p>
          </table:table-cell>
          <table:table-cell table:formula="of:=[.B1851]+10" office:value-type="float" office:value="18510" calcext:value-type="float">
            <text:p>18510</text:p>
          </table:table-cell>
          <table:table-cell office:value-type="float" office:value="8640000" calcext:value-type="float">
            <text:p>8640000</text:p>
          </table:table-cell>
          <table:table-cell table:formula="of:=[.B1852]/[.C1852]" office:value-type="float" office:value="0.00214236111111111" calcext:value-type="float">
            <text:p>0,00214236111111111000</text:p>
          </table:table-cell>
          <table:table-cell table:formula="of:=[.D1853]-[.D1852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852" calcext:value-type="float">
            <text:p>1852</text:p>
          </table:table-cell>
          <table:table-cell table:formula="of:=[.B1852]+10" office:value-type="float" office:value="18520" calcext:value-type="float">
            <text:p>18520</text:p>
          </table:table-cell>
          <table:table-cell office:value-type="float" office:value="8640000" calcext:value-type="float">
            <text:p>8640000</text:p>
          </table:table-cell>
          <table:table-cell table:formula="of:=[.B1853]/[.C1853]" office:value-type="float" office:value="0.00214351851851852" calcext:value-type="float">
            <text:p>0,00214351851851852000</text:p>
          </table:table-cell>
          <table:table-cell table:formula="of:=[.D1854]-[.D1853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1853" calcext:value-type="float">
            <text:p>1853</text:p>
          </table:table-cell>
          <table:table-cell table:formula="of:=[.B1853]+10" office:value-type="float" office:value="18530" calcext:value-type="float">
            <text:p>18530</text:p>
          </table:table-cell>
          <table:table-cell office:value-type="float" office:value="8640000" calcext:value-type="float">
            <text:p>8640000</text:p>
          </table:table-cell>
          <table:table-cell table:formula="of:=[.B1854]/[.C1854]" office:value-type="float" office:value="0.00214467592592593" calcext:value-type="float">
            <text:p>0,00214467592592593000</text:p>
          </table:table-cell>
          <table:table-cell table:formula="of:=[.D1855]-[.D1854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854" calcext:value-type="float">
            <text:p>1854</text:p>
          </table:table-cell>
          <table:table-cell table:formula="of:=[.B1854]+10" office:value-type="float" office:value="18540" calcext:value-type="float">
            <text:p>18540</text:p>
          </table:table-cell>
          <table:table-cell office:value-type="float" office:value="8640000" calcext:value-type="float">
            <text:p>8640000</text:p>
          </table:table-cell>
          <table:table-cell table:formula="of:=[.B1855]/[.C1855]" office:value-type="float" office:value="0.00214583333333333" calcext:value-type="float">
            <text:p>0,00214583333333333000</text:p>
          </table:table-cell>
          <table:table-cell table:formula="of:=[.D1856]-[.D1855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1855" calcext:value-type="float">
            <text:p>1855</text:p>
          </table:table-cell>
          <table:table-cell table:formula="of:=[.B1855]+10" office:value-type="float" office:value="18550" calcext:value-type="float">
            <text:p>18550</text:p>
          </table:table-cell>
          <table:table-cell office:value-type="float" office:value="8640000" calcext:value-type="float">
            <text:p>8640000</text:p>
          </table:table-cell>
          <table:table-cell table:formula="of:=[.B1856]/[.C1856]" office:value-type="float" office:value="0.00214699074074074" calcext:value-type="float">
            <text:p>0,00214699074074074000</text:p>
          </table:table-cell>
          <table:table-cell table:formula="of:=[.D1857]-[.D1856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856" calcext:value-type="float">
            <text:p>1856</text:p>
          </table:table-cell>
          <table:table-cell table:formula="of:=[.B1856]+10" office:value-type="float" office:value="18560" calcext:value-type="float">
            <text:p>18560</text:p>
          </table:table-cell>
          <table:table-cell office:value-type="float" office:value="8640000" calcext:value-type="float">
            <text:p>8640000</text:p>
          </table:table-cell>
          <table:table-cell table:formula="of:=[.B1857]/[.C1857]" office:value-type="float" office:value="0.00214814814814815" calcext:value-type="float">
            <text:p>0,00214814814814815000</text:p>
          </table:table-cell>
          <table:table-cell table:formula="of:=[.D1858]-[.D1857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1857" calcext:value-type="float">
            <text:p>1857</text:p>
          </table:table-cell>
          <table:table-cell table:formula="of:=[.B1857]+10" office:value-type="float" office:value="18570" calcext:value-type="float">
            <text:p>18570</text:p>
          </table:table-cell>
          <table:table-cell office:value-type="float" office:value="8640000" calcext:value-type="float">
            <text:p>8640000</text:p>
          </table:table-cell>
          <table:table-cell table:formula="of:=[.B1858]/[.C1858]" office:value-type="float" office:value="0.00214930555555556" calcext:value-type="float">
            <text:p>0,00214930555555556000</text:p>
          </table:table-cell>
          <table:table-cell table:formula="of:=[.D1859]-[.D1858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858" calcext:value-type="float">
            <text:p>1858</text:p>
          </table:table-cell>
          <table:table-cell table:formula="of:=[.B1858]+10" office:value-type="float" office:value="18580" calcext:value-type="float">
            <text:p>18580</text:p>
          </table:table-cell>
          <table:table-cell office:value-type="float" office:value="8640000" calcext:value-type="float">
            <text:p>8640000</text:p>
          </table:table-cell>
          <table:table-cell table:formula="of:=[.B1859]/[.C1859]" office:value-type="float" office:value="0.00215046296296296" calcext:value-type="float">
            <text:p>0,00215046296296296000</text:p>
          </table:table-cell>
          <table:table-cell table:formula="of:=[.D1860]-[.D1859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859" calcext:value-type="float">
            <text:p>1859</text:p>
          </table:table-cell>
          <table:table-cell table:formula="of:=[.B1859]+10" office:value-type="float" office:value="18590" calcext:value-type="float">
            <text:p>18590</text:p>
          </table:table-cell>
          <table:table-cell office:value-type="float" office:value="8640000" calcext:value-type="float">
            <text:p>8640000</text:p>
          </table:table-cell>
          <table:table-cell table:formula="of:=[.B1860]/[.C1860]" office:value-type="float" office:value="0.00215162037037037" calcext:value-type="float">
            <text:p>0,00215162037037037000</text:p>
          </table:table-cell>
          <table:table-cell table:formula="of:=[.D1861]-[.D1860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table:formula="of:=[.B1860]+10" office:value-type="float" office:value="18600" calcext:value-type="float">
            <text:p>18600</text:p>
          </table:table-cell>
          <table:table-cell office:value-type="float" office:value="8640000" calcext:value-type="float">
            <text:p>8640000</text:p>
          </table:table-cell>
          <table:table-cell table:formula="of:=[.B1861]/[.C1861]" office:value-type="float" office:value="0.00215277777777778" calcext:value-type="float">
            <text:p>0,00215277777777778000</text:p>
          </table:table-cell>
          <table:table-cell table:formula="of:=[.D1862]-[.D1861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861" calcext:value-type="float">
            <text:p>1861</text:p>
          </table:table-cell>
          <table:table-cell table:formula="of:=[.B1861]+10" office:value-type="float" office:value="18610" calcext:value-type="float">
            <text:p>18610</text:p>
          </table:table-cell>
          <table:table-cell office:value-type="float" office:value="8640000" calcext:value-type="float">
            <text:p>8640000</text:p>
          </table:table-cell>
          <table:table-cell table:formula="of:=[.B1862]/[.C1862]" office:value-type="float" office:value="0.00215393518518519" calcext:value-type="float">
            <text:p>0,00215393518518519000</text:p>
          </table:table-cell>
          <table:table-cell table:formula="of:=[.D1863]-[.D1862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1862" calcext:value-type="float">
            <text:p>1862</text:p>
          </table:table-cell>
          <table:table-cell table:formula="of:=[.B1862]+10" office:value-type="float" office:value="18620" calcext:value-type="float">
            <text:p>18620</text:p>
          </table:table-cell>
          <table:table-cell office:value-type="float" office:value="8640000" calcext:value-type="float">
            <text:p>8640000</text:p>
          </table:table-cell>
          <table:table-cell table:formula="of:=[.B1863]/[.C1863]" office:value-type="float" office:value="0.00215509259259259" calcext:value-type="float">
            <text:p>0,00215509259259259000</text:p>
          </table:table-cell>
          <table:table-cell table:formula="of:=[.D1864]-[.D1863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table:formula="of:=[.B1863]+10" office:value-type="float" office:value="18630" calcext:value-type="float">
            <text:p>18630</text:p>
          </table:table-cell>
          <table:table-cell office:value-type="float" office:value="8640000" calcext:value-type="float">
            <text:p>8640000</text:p>
          </table:table-cell>
          <table:table-cell table:formula="of:=[.B1864]/[.C1864]" office:value-type="float" office:value="0.00215625" calcext:value-type="float">
            <text:p>0,00215625000000000000</text:p>
          </table:table-cell>
          <table:table-cell table:formula="of:=[.D1865]-[.D1864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1864" calcext:value-type="float">
            <text:p>1864</text:p>
          </table:table-cell>
          <table:table-cell table:formula="of:=[.B1864]+10" office:value-type="float" office:value="18640" calcext:value-type="float">
            <text:p>18640</text:p>
          </table:table-cell>
          <table:table-cell office:value-type="float" office:value="8640000" calcext:value-type="float">
            <text:p>8640000</text:p>
          </table:table-cell>
          <table:table-cell table:formula="of:=[.B1865]/[.C1865]" office:value-type="float" office:value="0.00215740740740741" calcext:value-type="float">
            <text:p>0,00215740740740741000</text:p>
          </table:table-cell>
          <table:table-cell table:formula="of:=[.D1866]-[.D1865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865" calcext:value-type="float">
            <text:p>1865</text:p>
          </table:table-cell>
          <table:table-cell table:formula="of:=[.B1865]+10" office:value-type="float" office:value="18650" calcext:value-type="float">
            <text:p>18650</text:p>
          </table:table-cell>
          <table:table-cell office:value-type="float" office:value="8640000" calcext:value-type="float">
            <text:p>8640000</text:p>
          </table:table-cell>
          <table:table-cell table:formula="of:=[.B1866]/[.C1866]" office:value-type="float" office:value="0.00215856481481482" calcext:value-type="float">
            <text:p>0,00215856481481482000</text:p>
          </table:table-cell>
          <table:table-cell table:formula="of:=[.D1867]-[.D1866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1866" calcext:value-type="float">
            <text:p>1866</text:p>
          </table:table-cell>
          <table:table-cell table:formula="of:=[.B1866]+10" office:value-type="float" office:value="18660" calcext:value-type="float">
            <text:p>18660</text:p>
          </table:table-cell>
          <table:table-cell office:value-type="float" office:value="8640000" calcext:value-type="float">
            <text:p>8640000</text:p>
          </table:table-cell>
          <table:table-cell table:formula="of:=[.B1867]/[.C1867]" office:value-type="float" office:value="0.00215972222222222" calcext:value-type="float">
            <text:p>0,00215972222222222000</text:p>
          </table:table-cell>
          <table:table-cell table:formula="of:=[.D1868]-[.D1867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table:formula="of:=[.B1867]+10" office:value-type="float" office:value="18670" calcext:value-type="float">
            <text:p>18670</text:p>
          </table:table-cell>
          <table:table-cell office:value-type="float" office:value="8640000" calcext:value-type="float">
            <text:p>8640000</text:p>
          </table:table-cell>
          <table:table-cell table:formula="of:=[.B1868]/[.C1868]" office:value-type="float" office:value="0.00216087962962963" calcext:value-type="float">
            <text:p>0,00216087962962963000</text:p>
          </table:table-cell>
          <table:table-cell table:formula="of:=[.D1869]-[.D1868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1868" calcext:value-type="float">
            <text:p>1868</text:p>
          </table:table-cell>
          <table:table-cell table:formula="of:=[.B1868]+10" office:value-type="float" office:value="18680" calcext:value-type="float">
            <text:p>18680</text:p>
          </table:table-cell>
          <table:table-cell office:value-type="float" office:value="8640000" calcext:value-type="float">
            <text:p>8640000</text:p>
          </table:table-cell>
          <table:table-cell table:formula="of:=[.B1869]/[.C1869]" office:value-type="float" office:value="0.00216203703703704" calcext:value-type="float">
            <text:p>0,00216203703703704000</text:p>
          </table:table-cell>
          <table:table-cell table:formula="of:=[.D1870]-[.D1869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869" calcext:value-type="float">
            <text:p>1869</text:p>
          </table:table-cell>
          <table:table-cell table:formula="of:=[.B1869]+10" office:value-type="float" office:value="18690" calcext:value-type="float">
            <text:p>18690</text:p>
          </table:table-cell>
          <table:table-cell office:value-type="float" office:value="8640000" calcext:value-type="float">
            <text:p>8640000</text:p>
          </table:table-cell>
          <table:table-cell table:formula="of:=[.B1870]/[.C1870]" office:value-type="float" office:value="0.00216319444444444" calcext:value-type="float">
            <text:p>0,00216319444444444000</text:p>
          </table:table-cell>
          <table:table-cell table:formula="of:=[.D1871]-[.D1870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table:formula="of:=[.B1870]+10" office:value-type="float" office:value="18700" calcext:value-type="float">
            <text:p>18700</text:p>
          </table:table-cell>
          <table:table-cell office:value-type="float" office:value="8640000" calcext:value-type="float">
            <text:p>8640000</text:p>
          </table:table-cell>
          <table:table-cell table:formula="of:=[.B1871]/[.C1871]" office:value-type="float" office:value="0.00216435185185185" calcext:value-type="float">
            <text:p>0,00216435185185185000</text:p>
          </table:table-cell>
          <table:table-cell table:formula="of:=[.D1872]-[.D1871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871" calcext:value-type="float">
            <text:p>1871</text:p>
          </table:table-cell>
          <table:table-cell table:formula="of:=[.B1871]+10" office:value-type="float" office:value="18710" calcext:value-type="float">
            <text:p>18710</text:p>
          </table:table-cell>
          <table:table-cell office:value-type="float" office:value="8640000" calcext:value-type="float">
            <text:p>8640000</text:p>
          </table:table-cell>
          <table:table-cell table:formula="of:=[.B1872]/[.C1872]" office:value-type="float" office:value="0.00216550925925926" calcext:value-type="float">
            <text:p>0,00216550925925926000</text:p>
          </table:table-cell>
          <table:table-cell table:formula="of:=[.D1873]-[.D1872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1872" calcext:value-type="float">
            <text:p>1872</text:p>
          </table:table-cell>
          <table:table-cell table:formula="of:=[.B1872]+10" office:value-type="float" office:value="18720" calcext:value-type="float">
            <text:p>18720</text:p>
          </table:table-cell>
          <table:table-cell office:value-type="float" office:value="8640000" calcext:value-type="float">
            <text:p>8640000</text:p>
          </table:table-cell>
          <table:table-cell table:formula="of:=[.B1873]/[.C1873]" office:value-type="float" office:value="0.00216666666666667" calcext:value-type="float">
            <text:p>0,00216666666666667000</text:p>
          </table:table-cell>
          <table:table-cell table:formula="of:=[.D1874]-[.D1873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873" calcext:value-type="float">
            <text:p>1873</text:p>
          </table:table-cell>
          <table:table-cell table:formula="of:=[.B1873]+10" office:value-type="float" office:value="18730" calcext:value-type="float">
            <text:p>18730</text:p>
          </table:table-cell>
          <table:table-cell office:value-type="float" office:value="8640000" calcext:value-type="float">
            <text:p>8640000</text:p>
          </table:table-cell>
          <table:table-cell table:formula="of:=[.B1874]/[.C1874]" office:value-type="float" office:value="0.00216782407407407" calcext:value-type="float">
            <text:p>0,00216782407407407000</text:p>
          </table:table-cell>
          <table:table-cell table:formula="of:=[.D1875]-[.D1874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1874" calcext:value-type="float">
            <text:p>1874</text:p>
          </table:table-cell>
          <table:table-cell table:formula="of:=[.B1874]+10" office:value-type="float" office:value="18740" calcext:value-type="float">
            <text:p>18740</text:p>
          </table:table-cell>
          <table:table-cell office:value-type="float" office:value="8640000" calcext:value-type="float">
            <text:p>8640000</text:p>
          </table:table-cell>
          <table:table-cell table:formula="of:=[.B1875]/[.C1875]" office:value-type="float" office:value="0.00216898148148148" calcext:value-type="float">
            <text:p>0,00216898148148148000</text:p>
          </table:table-cell>
          <table:table-cell table:formula="of:=[.D1876]-[.D1875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 table:formula="of:=[.B1875]+10" office:value-type="float" office:value="18750" calcext:value-type="float">
            <text:p>18750</text:p>
          </table:table-cell>
          <table:table-cell office:value-type="float" office:value="8640000" calcext:value-type="float">
            <text:p>8640000</text:p>
          </table:table-cell>
          <table:table-cell table:formula="of:=[.B1876]/[.C1876]" office:value-type="float" office:value="0.00217013888888889" calcext:value-type="float">
            <text:p>0,00217013888888889000</text:p>
          </table:table-cell>
          <table:table-cell table:formula="of:=[.D1877]-[.D1876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1876" calcext:value-type="float">
            <text:p>1876</text:p>
          </table:table-cell>
          <table:table-cell table:formula="of:=[.B1876]+10" office:value-type="float" office:value="18760" calcext:value-type="float">
            <text:p>18760</text:p>
          </table:table-cell>
          <table:table-cell office:value-type="float" office:value="8640000" calcext:value-type="float">
            <text:p>8640000</text:p>
          </table:table-cell>
          <table:table-cell table:formula="of:=[.B1877]/[.C1877]" office:value-type="float" office:value="0.0021712962962963" calcext:value-type="float">
            <text:p>0,00217129629629630000</text:p>
          </table:table-cell>
          <table:table-cell table:formula="of:=[.D1878]-[.D1877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877" calcext:value-type="float">
            <text:p>1877</text:p>
          </table:table-cell>
          <table:table-cell table:formula="of:=[.B1877]+10" office:value-type="float" office:value="18770" calcext:value-type="float">
            <text:p>18770</text:p>
          </table:table-cell>
          <table:table-cell office:value-type="float" office:value="8640000" calcext:value-type="float">
            <text:p>8640000</text:p>
          </table:table-cell>
          <table:table-cell table:formula="of:=[.B1878]/[.C1878]" office:value-type="float" office:value="0.0021724537037037" calcext:value-type="float">
            <text:p>0,00217245370370370000</text:p>
          </table:table-cell>
          <table:table-cell table:formula="of:=[.D1879]-[.D1878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1878" calcext:value-type="float">
            <text:p>1878</text:p>
          </table:table-cell>
          <table:table-cell table:formula="of:=[.B1878]+10" office:value-type="float" office:value="18780" calcext:value-type="float">
            <text:p>18780</text:p>
          </table:table-cell>
          <table:table-cell office:value-type="float" office:value="8640000" calcext:value-type="float">
            <text:p>8640000</text:p>
          </table:table-cell>
          <table:table-cell table:formula="of:=[.B1879]/[.C1879]" office:value-type="float" office:value="0.00217361111111111" calcext:value-type="float">
            <text:p>0,00217361111111111000</text:p>
          </table:table-cell>
          <table:table-cell table:formula="of:=[.D1880]-[.D1879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879" calcext:value-type="float">
            <text:p>1879</text:p>
          </table:table-cell>
          <table:table-cell table:formula="of:=[.B1879]+10" office:value-type="float" office:value="18790" calcext:value-type="float">
            <text:p>18790</text:p>
          </table:table-cell>
          <table:table-cell office:value-type="float" office:value="8640000" calcext:value-type="float">
            <text:p>8640000</text:p>
          </table:table-cell>
          <table:table-cell table:formula="of:=[.B1880]/[.C1880]" office:value-type="float" office:value="0.00217476851851852" calcext:value-type="float">
            <text:p>0,00217476851851852000</text:p>
          </table:table-cell>
          <table:table-cell table:formula="of:=[.D1881]-[.D1880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table:formula="of:=[.B1880]+10" office:value-type="float" office:value="18800" calcext:value-type="float">
            <text:p>18800</text:p>
          </table:table-cell>
          <table:table-cell office:value-type="float" office:value="8640000" calcext:value-type="float">
            <text:p>8640000</text:p>
          </table:table-cell>
          <table:table-cell table:formula="of:=[.B1881]/[.C1881]" office:value-type="float" office:value="0.00217592592592593" calcext:value-type="float">
            <text:p>0,00217592592592593000</text:p>
          </table:table-cell>
          <table:table-cell table:formula="of:=[.D1882]-[.D1881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table:formula="of:=[.B1881]+10" office:value-type="float" office:value="18810" calcext:value-type="float">
            <text:p>18810</text:p>
          </table:table-cell>
          <table:table-cell office:value-type="float" office:value="8640000" calcext:value-type="float">
            <text:p>8640000</text:p>
          </table:table-cell>
          <table:table-cell table:formula="of:=[.B1882]/[.C1882]" office:value-type="float" office:value="0.00217708333333333" calcext:value-type="float">
            <text:p>0,00217708333333333000</text:p>
          </table:table-cell>
          <table:table-cell table:formula="of:=[.D1883]-[.D1882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1882" calcext:value-type="float">
            <text:p>1882</text:p>
          </table:table-cell>
          <table:table-cell table:formula="of:=[.B1882]+10" office:value-type="float" office:value="18820" calcext:value-type="float">
            <text:p>18820</text:p>
          </table:table-cell>
          <table:table-cell office:value-type="float" office:value="8640000" calcext:value-type="float">
            <text:p>8640000</text:p>
          </table:table-cell>
          <table:table-cell table:formula="of:=[.B1883]/[.C1883]" office:value-type="float" office:value="0.00217824074074074" calcext:value-type="float">
            <text:p>0,00217824074074074000</text:p>
          </table:table-cell>
          <table:table-cell table:formula="of:=[.D1884]-[.D1883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883" calcext:value-type="float">
            <text:p>1883</text:p>
          </table:table-cell>
          <table:table-cell table:formula="of:=[.B1883]+10" office:value-type="float" office:value="18830" calcext:value-type="float">
            <text:p>18830</text:p>
          </table:table-cell>
          <table:table-cell office:value-type="float" office:value="8640000" calcext:value-type="float">
            <text:p>8640000</text:p>
          </table:table-cell>
          <table:table-cell table:formula="of:=[.B1884]/[.C1884]" office:value-type="float" office:value="0.00217939814814815" calcext:value-type="float">
            <text:p>0,00217939814814815000</text:p>
          </table:table-cell>
          <table:table-cell table:formula="of:=[.D1885]-[.D1884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1884" calcext:value-type="float">
            <text:p>1884</text:p>
          </table:table-cell>
          <table:table-cell table:formula="of:=[.B1884]+10" office:value-type="float" office:value="18840" calcext:value-type="float">
            <text:p>18840</text:p>
          </table:table-cell>
          <table:table-cell office:value-type="float" office:value="8640000" calcext:value-type="float">
            <text:p>8640000</text:p>
          </table:table-cell>
          <table:table-cell table:formula="of:=[.B1885]/[.C1885]" office:value-type="float" office:value="0.00218055555555556" calcext:value-type="float">
            <text:p>0,00218055555555556000</text:p>
          </table:table-cell>
          <table:table-cell table:formula="of:=[.D1886]-[.D1885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table:formula="of:=[.B1885]+10" office:value-type="float" office:value="18850" calcext:value-type="float">
            <text:p>18850</text:p>
          </table:table-cell>
          <table:table-cell office:value-type="float" office:value="8640000" calcext:value-type="float">
            <text:p>8640000</text:p>
          </table:table-cell>
          <table:table-cell table:formula="of:=[.B1886]/[.C1886]" office:value-type="float" office:value="0.00218171296296296" calcext:value-type="float">
            <text:p>0,00218171296296296000</text:p>
          </table:table-cell>
          <table:table-cell table:formula="of:=[.D1887]-[.D1886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1886" calcext:value-type="float">
            <text:p>1886</text:p>
          </table:table-cell>
          <table:table-cell table:formula="of:=[.B1886]+10" office:value-type="float" office:value="18860" calcext:value-type="float">
            <text:p>18860</text:p>
          </table:table-cell>
          <table:table-cell office:value-type="float" office:value="8640000" calcext:value-type="float">
            <text:p>8640000</text:p>
          </table:table-cell>
          <table:table-cell table:formula="of:=[.B1887]/[.C1887]" office:value-type="float" office:value="0.00218287037037037" calcext:value-type="float">
            <text:p>0,00218287037037037000</text:p>
          </table:table-cell>
          <table:table-cell table:formula="of:=[.D1888]-[.D1887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  <table:table-cell table:formula="of:=[.B1887]+10" office:value-type="float" office:value="18870" calcext:value-type="float">
            <text:p>18870</text:p>
          </table:table-cell>
          <table:table-cell office:value-type="float" office:value="8640000" calcext:value-type="float">
            <text:p>8640000</text:p>
          </table:table-cell>
          <table:table-cell table:formula="of:=[.B1888]/[.C1888]" office:value-type="float" office:value="0.00218402777777778" calcext:value-type="float">
            <text:p>0,00218402777777778000</text:p>
          </table:table-cell>
          <table:table-cell table:formula="of:=[.D1889]-[.D1888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1888" calcext:value-type="float">
            <text:p>1888</text:p>
          </table:table-cell>
          <table:table-cell table:formula="of:=[.B1888]+10" office:value-type="float" office:value="18880" calcext:value-type="float">
            <text:p>18880</text:p>
          </table:table-cell>
          <table:table-cell office:value-type="float" office:value="8640000" calcext:value-type="float">
            <text:p>8640000</text:p>
          </table:table-cell>
          <table:table-cell table:formula="of:=[.B1889]/[.C1889]" office:value-type="float" office:value="0.00218518518518519" calcext:value-type="float">
            <text:p>0,00218518518518519000</text:p>
          </table:table-cell>
          <table:table-cell table:formula="of:=[.D1890]-[.D1889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table:formula="of:=[.B1889]+10" office:value-type="float" office:value="18890" calcext:value-type="float">
            <text:p>18890</text:p>
          </table:table-cell>
          <table:table-cell office:value-type="float" office:value="8640000" calcext:value-type="float">
            <text:p>8640000</text:p>
          </table:table-cell>
          <table:table-cell table:formula="of:=[.B1890]/[.C1890]" office:value-type="float" office:value="0.00218634259259259" calcext:value-type="float">
            <text:p>0,00218634259259259000</text:p>
          </table:table-cell>
          <table:table-cell table:formula="of:=[.D1891]-[.D1890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table:formula="of:=[.B1890]+10" office:value-type="float" office:value="18900" calcext:value-type="float">
            <text:p>18900</text:p>
          </table:table-cell>
          <table:table-cell office:value-type="float" office:value="8640000" calcext:value-type="float">
            <text:p>8640000</text:p>
          </table:table-cell>
          <table:table-cell table:formula="of:=[.B1891]/[.C1891]" office:value-type="float" office:value="0.0021875" calcext:value-type="float">
            <text:p>0,00218750000000000000</text:p>
          </table:table-cell>
          <table:table-cell table:formula="of:=[.D1892]-[.D1891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1891" calcext:value-type="float">
            <text:p>1891</text:p>
          </table:table-cell>
          <table:table-cell table:formula="of:=[.B1891]+10" office:value-type="float" office:value="18910" calcext:value-type="float">
            <text:p>18910</text:p>
          </table:table-cell>
          <table:table-cell office:value-type="float" office:value="8640000" calcext:value-type="float">
            <text:p>8640000</text:p>
          </table:table-cell>
          <table:table-cell table:formula="of:=[.B1892]/[.C1892]" office:value-type="float" office:value="0.00218865740740741" calcext:value-type="float">
            <text:p>0,00218865740740741000</text:p>
          </table:table-cell>
          <table:table-cell table:formula="of:=[.D1893]-[.D1892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892" calcext:value-type="float">
            <text:p>1892</text:p>
          </table:table-cell>
          <table:table-cell table:formula="of:=[.B1892]+10" office:value-type="float" office:value="18920" calcext:value-type="float">
            <text:p>18920</text:p>
          </table:table-cell>
          <table:table-cell office:value-type="float" office:value="8640000" calcext:value-type="float">
            <text:p>8640000</text:p>
          </table:table-cell>
          <table:table-cell table:formula="of:=[.B1893]/[.C1893]" office:value-type="float" office:value="0.00218981481481482" calcext:value-type="float">
            <text:p>0,00218981481481482000</text:p>
          </table:table-cell>
          <table:table-cell table:formula="of:=[.D1894]-[.D1893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1893" calcext:value-type="float">
            <text:p>1893</text:p>
          </table:table-cell>
          <table:table-cell table:formula="of:=[.B1893]+10" office:value-type="float" office:value="18930" calcext:value-type="float">
            <text:p>18930</text:p>
          </table:table-cell>
          <table:table-cell office:value-type="float" office:value="8640000" calcext:value-type="float">
            <text:p>8640000</text:p>
          </table:table-cell>
          <table:table-cell table:formula="of:=[.B1894]/[.C1894]" office:value-type="float" office:value="0.00219097222222222" calcext:value-type="float">
            <text:p>0,00219097222222222000</text:p>
          </table:table-cell>
          <table:table-cell table:formula="of:=[.D1895]-[.D1894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894" calcext:value-type="float">
            <text:p>1894</text:p>
          </table:table-cell>
          <table:table-cell table:formula="of:=[.B1894]+10" office:value-type="float" office:value="18940" calcext:value-type="float">
            <text:p>18940</text:p>
          </table:table-cell>
          <table:table-cell office:value-type="float" office:value="8640000" calcext:value-type="float">
            <text:p>8640000</text:p>
          </table:table-cell>
          <table:table-cell table:formula="of:=[.B1895]/[.C1895]" office:value-type="float" office:value="0.00219212962962963" calcext:value-type="float">
            <text:p>0,00219212962962963000</text:p>
          </table:table-cell>
          <table:table-cell table:formula="of:=[.D1896]-[.D1895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  <table:table-cell table:formula="of:=[.B1895]+10" office:value-type="float" office:value="18950" calcext:value-type="float">
            <text:p>18950</text:p>
          </table:table-cell>
          <table:table-cell office:value-type="float" office:value="8640000" calcext:value-type="float">
            <text:p>8640000</text:p>
          </table:table-cell>
          <table:table-cell table:formula="of:=[.B1896]/[.C1896]" office:value-type="float" office:value="0.00219328703703704" calcext:value-type="float">
            <text:p>0,00219328703703704000</text:p>
          </table:table-cell>
          <table:table-cell table:formula="of:=[.D1897]-[.D1896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896" calcext:value-type="float">
            <text:p>1896</text:p>
          </table:table-cell>
          <table:table-cell table:formula="of:=[.B1896]+10" office:value-type="float" office:value="18960" calcext:value-type="float">
            <text:p>18960</text:p>
          </table:table-cell>
          <table:table-cell office:value-type="float" office:value="8640000" calcext:value-type="float">
            <text:p>8640000</text:p>
          </table:table-cell>
          <table:table-cell table:formula="of:=[.B1897]/[.C1897]" office:value-type="float" office:value="0.00219444444444444" calcext:value-type="float">
            <text:p>0,00219444444444444000</text:p>
          </table:table-cell>
          <table:table-cell table:formula="of:=[.D1898]-[.D1897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  <table:table-cell table:formula="of:=[.B1897]+10" office:value-type="float" office:value="18970" calcext:value-type="float">
            <text:p>18970</text:p>
          </table:table-cell>
          <table:table-cell office:value-type="float" office:value="8640000" calcext:value-type="float">
            <text:p>8640000</text:p>
          </table:table-cell>
          <table:table-cell table:formula="of:=[.B1898]/[.C1898]" office:value-type="float" office:value="0.00219560185185185" calcext:value-type="float">
            <text:p>0,00219560185185185000</text:p>
          </table:table-cell>
          <table:table-cell table:formula="of:=[.D1899]-[.D1898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898" calcext:value-type="float">
            <text:p>1898</text:p>
          </table:table-cell>
          <table:table-cell table:formula="of:=[.B1898]+10" office:value-type="float" office:value="18980" calcext:value-type="float">
            <text:p>18980</text:p>
          </table:table-cell>
          <table:table-cell office:value-type="float" office:value="8640000" calcext:value-type="float">
            <text:p>8640000</text:p>
          </table:table-cell>
          <table:table-cell table:formula="of:=[.B1899]/[.C1899]" office:value-type="float" office:value="0.00219675925925926" calcext:value-type="float">
            <text:p>0,00219675925925926000</text:p>
          </table:table-cell>
          <table:table-cell table:formula="of:=[.D1900]-[.D1899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1899" calcext:value-type="float">
            <text:p>1899</text:p>
          </table:table-cell>
          <table:table-cell table:formula="of:=[.B1899]+10" office:value-type="float" office:value="18990" calcext:value-type="float">
            <text:p>18990</text:p>
          </table:table-cell>
          <table:table-cell office:value-type="float" office:value="8640000" calcext:value-type="float">
            <text:p>8640000</text:p>
          </table:table-cell>
          <table:table-cell table:formula="of:=[.B1900]/[.C1900]" office:value-type="float" office:value="0.00219791666666667" calcext:value-type="float">
            <text:p>0,00219791666666667000</text:p>
          </table:table-cell>
          <table:table-cell table:formula="of:=[.D1901]-[.D1900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table:formula="of:=[.B1900]+10" office:value-type="float" office:value="19000" calcext:value-type="float">
            <text:p>19000</text:p>
          </table:table-cell>
          <table:table-cell office:value-type="float" office:value="8640000" calcext:value-type="float">
            <text:p>8640000</text:p>
          </table:table-cell>
          <table:table-cell table:formula="of:=[.B1901]/[.C1901]" office:value-type="float" office:value="0.00219907407407407" calcext:value-type="float">
            <text:p>0,00219907407407407000</text:p>
          </table:table-cell>
          <table:table-cell table:formula="of:=[.D1902]-[.D1901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table:formula="of:=[.B1901]+10" office:value-type="float" office:value="19010" calcext:value-type="float">
            <text:p>19010</text:p>
          </table:table-cell>
          <table:table-cell office:value-type="float" office:value="8640000" calcext:value-type="float">
            <text:p>8640000</text:p>
          </table:table-cell>
          <table:table-cell table:formula="of:=[.B1902]/[.C1902]" office:value-type="float" office:value="0.00220023148148148" calcext:value-type="float">
            <text:p>0,00220023148148148000</text:p>
          </table:table-cell>
          <table:table-cell table:formula="of:=[.D1903]-[.D1902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table:formula="of:=[.B1902]+10" office:value-type="float" office:value="19020" calcext:value-type="float">
            <text:p>19020</text:p>
          </table:table-cell>
          <table:table-cell office:value-type="float" office:value="8640000" calcext:value-type="float">
            <text:p>8640000</text:p>
          </table:table-cell>
          <table:table-cell table:formula="of:=[.B1903]/[.C1903]" office:value-type="float" office:value="0.00220138888888889" calcext:value-type="float">
            <text:p>0,00220138888888889000</text:p>
          </table:table-cell>
          <table:table-cell table:formula="of:=[.D1904]-[.D1903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table:formula="of:=[.B1903]+10" office:value-type="float" office:value="19030" calcext:value-type="float">
            <text:p>19030</text:p>
          </table:table-cell>
          <table:table-cell office:value-type="float" office:value="8640000" calcext:value-type="float">
            <text:p>8640000</text:p>
          </table:table-cell>
          <table:table-cell table:formula="of:=[.B1904]/[.C1904]" office:value-type="float" office:value="0.0022025462962963" calcext:value-type="float">
            <text:p>0,00220254629629630000</text:p>
          </table:table-cell>
          <table:table-cell table:formula="of:=[.D1905]-[.D1904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904" calcext:value-type="float">
            <text:p>1904</text:p>
          </table:table-cell>
          <table:table-cell table:formula="of:=[.B1904]+10" office:value-type="float" office:value="19040" calcext:value-type="float">
            <text:p>19040</text:p>
          </table:table-cell>
          <table:table-cell office:value-type="float" office:value="8640000" calcext:value-type="float">
            <text:p>8640000</text:p>
          </table:table-cell>
          <table:table-cell table:formula="of:=[.B1905]/[.C1905]" office:value-type="float" office:value="0.0022037037037037" calcext:value-type="float">
            <text:p>0,00220370370370370000</text:p>
          </table:table-cell>
          <table:table-cell table:formula="of:=[.D1906]-[.D1905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table:formula="of:=[.B1905]+10" office:value-type="float" office:value="19050" calcext:value-type="float">
            <text:p>19050</text:p>
          </table:table-cell>
          <table:table-cell office:value-type="float" office:value="8640000" calcext:value-type="float">
            <text:p>8640000</text:p>
          </table:table-cell>
          <table:table-cell table:formula="of:=[.B1906]/[.C1906]" office:value-type="float" office:value="0.00220486111111111" calcext:value-type="float">
            <text:p>0,00220486111111111000</text:p>
          </table:table-cell>
          <table:table-cell table:formula="of:=[.D1907]-[.D1906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906" calcext:value-type="float">
            <text:p>1906</text:p>
          </table:table-cell>
          <table:table-cell table:formula="of:=[.B1906]+10" office:value-type="float" office:value="19060" calcext:value-type="float">
            <text:p>19060</text:p>
          </table:table-cell>
          <table:table-cell office:value-type="float" office:value="8640000" calcext:value-type="float">
            <text:p>8640000</text:p>
          </table:table-cell>
          <table:table-cell table:formula="of:=[.B1907]/[.C1907]" office:value-type="float" office:value="0.00220601851851852" calcext:value-type="float">
            <text:p>0,00220601851851852000</text:p>
          </table:table-cell>
          <table:table-cell table:formula="of:=[.D1908]-[.D1907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table:formula="of:=[.B1907]+10" office:value-type="float" office:value="19070" calcext:value-type="float">
            <text:p>19070</text:p>
          </table:table-cell>
          <table:table-cell office:value-type="float" office:value="8640000" calcext:value-type="float">
            <text:p>8640000</text:p>
          </table:table-cell>
          <table:table-cell table:formula="of:=[.B1908]/[.C1908]" office:value-type="float" office:value="0.00220717592592593" calcext:value-type="float">
            <text:p>0,00220717592592593000</text:p>
          </table:table-cell>
          <table:table-cell table:formula="of:=[.D1909]-[.D1908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  <table:table-cell table:formula="of:=[.B1908]+10" office:value-type="float" office:value="19080" calcext:value-type="float">
            <text:p>19080</text:p>
          </table:table-cell>
          <table:table-cell office:value-type="float" office:value="8640000" calcext:value-type="float">
            <text:p>8640000</text:p>
          </table:table-cell>
          <table:table-cell table:formula="of:=[.B1909]/[.C1909]" office:value-type="float" office:value="0.00220833333333333" calcext:value-type="float">
            <text:p>0,00220833333333333000</text:p>
          </table:table-cell>
          <table:table-cell table:formula="of:=[.D1910]-[.D1909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 table:formula="of:=[.B1909]+10" office:value-type="float" office:value="19090" calcext:value-type="float">
            <text:p>19090</text:p>
          </table:table-cell>
          <table:table-cell office:value-type="float" office:value="8640000" calcext:value-type="float">
            <text:p>8640000</text:p>
          </table:table-cell>
          <table:table-cell table:formula="of:=[.B1910]/[.C1910]" office:value-type="float" office:value="0.00220949074074074" calcext:value-type="float">
            <text:p>0,00220949074074074000</text:p>
          </table:table-cell>
          <table:table-cell table:formula="of:=[.D1911]-[.D1910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table:formula="of:=[.B1910]+10" office:value-type="float" office:value="19100" calcext:value-type="float">
            <text:p>19100</text:p>
          </table:table-cell>
          <table:table-cell office:value-type="float" office:value="8640000" calcext:value-type="float">
            <text:p>8640000</text:p>
          </table:table-cell>
          <table:table-cell table:formula="of:=[.B1911]/[.C1911]" office:value-type="float" office:value="0.00221064814814815" calcext:value-type="float">
            <text:p>0,00221064814814815000</text:p>
          </table:table-cell>
          <table:table-cell table:formula="of:=[.D1912]-[.D1911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table:formula="of:=[.B1911]+10" office:value-type="float" office:value="19110" calcext:value-type="float">
            <text:p>19110</text:p>
          </table:table-cell>
          <table:table-cell office:value-type="float" office:value="8640000" calcext:value-type="float">
            <text:p>8640000</text:p>
          </table:table-cell>
          <table:table-cell table:formula="of:=[.B1912]/[.C1912]" office:value-type="float" office:value="0.00221180555555556" calcext:value-type="float">
            <text:p>0,00221180555555556000</text:p>
          </table:table-cell>
          <table:table-cell table:formula="of:=[.D1913]-[.D1912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  <table:table-cell table:formula="of:=[.B1912]+10" office:value-type="float" office:value="19120" calcext:value-type="float">
            <text:p>19120</text:p>
          </table:table-cell>
          <table:table-cell office:value-type="float" office:value="8640000" calcext:value-type="float">
            <text:p>8640000</text:p>
          </table:table-cell>
          <table:table-cell table:formula="of:=[.B1913]/[.C1913]" office:value-type="float" office:value="0.00221296296296296" calcext:value-type="float">
            <text:p>0,00221296296296296000</text:p>
          </table:table-cell>
          <table:table-cell table:formula="of:=[.D1914]-[.D1913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 table:formula="of:=[.B1913]+10" office:value-type="float" office:value="19130" calcext:value-type="float">
            <text:p>19130</text:p>
          </table:table-cell>
          <table:table-cell office:value-type="float" office:value="8640000" calcext:value-type="float">
            <text:p>8640000</text:p>
          </table:table-cell>
          <table:table-cell table:formula="of:=[.B1914]/[.C1914]" office:value-type="float" office:value="0.00221412037037037" calcext:value-type="float">
            <text:p>0,00221412037037037000</text:p>
          </table:table-cell>
          <table:table-cell table:formula="of:=[.D1915]-[.D1914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  <table:table-cell table:formula="of:=[.B1914]+10" office:value-type="float" office:value="19140" calcext:value-type="float">
            <text:p>19140</text:p>
          </table:table-cell>
          <table:table-cell office:value-type="float" office:value="8640000" calcext:value-type="float">
            <text:p>8640000</text:p>
          </table:table-cell>
          <table:table-cell table:formula="of:=[.B1915]/[.C1915]" office:value-type="float" office:value="0.00221527777777778" calcext:value-type="float">
            <text:p>0,00221527777777778000</text:p>
          </table:table-cell>
          <table:table-cell table:formula="of:=[.D1916]-[.D1915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table:formula="of:=[.B1915]+10" office:value-type="float" office:value="19150" calcext:value-type="float">
            <text:p>19150</text:p>
          </table:table-cell>
          <table:table-cell office:value-type="float" office:value="8640000" calcext:value-type="float">
            <text:p>8640000</text:p>
          </table:table-cell>
          <table:table-cell table:formula="of:=[.B1916]/[.C1916]" office:value-type="float" office:value="0.00221643518518519" calcext:value-type="float">
            <text:p>0,00221643518518519000</text:p>
          </table:table-cell>
          <table:table-cell table:formula="of:=[.D1917]-[.D1916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table:formula="of:=[.B1916]+10" office:value-type="float" office:value="19160" calcext:value-type="float">
            <text:p>19160</text:p>
          </table:table-cell>
          <table:table-cell office:value-type="float" office:value="8640000" calcext:value-type="float">
            <text:p>8640000</text:p>
          </table:table-cell>
          <table:table-cell table:formula="of:=[.B1917]/[.C1917]" office:value-type="float" office:value="0.00221759259259259" calcext:value-type="float">
            <text:p>0,00221759259259259000</text:p>
          </table:table-cell>
          <table:table-cell table:formula="of:=[.D1918]-[.D1917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table:formula="of:=[.B1917]+10" office:value-type="float" office:value="19170" calcext:value-type="float">
            <text:p>19170</text:p>
          </table:table-cell>
          <table:table-cell office:value-type="float" office:value="8640000" calcext:value-type="float">
            <text:p>8640000</text:p>
          </table:table-cell>
          <table:table-cell table:formula="of:=[.B1918]/[.C1918]" office:value-type="float" office:value="0.00221875" calcext:value-type="float">
            <text:p>0,00221875000000000000</text:p>
          </table:table-cell>
          <table:table-cell table:formula="of:=[.D1919]-[.D1918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918" calcext:value-type="float">
            <text:p>1918</text:p>
          </table:table-cell>
          <table:table-cell table:formula="of:=[.B1918]+10" office:value-type="float" office:value="19180" calcext:value-type="float">
            <text:p>19180</text:p>
          </table:table-cell>
          <table:table-cell office:value-type="float" office:value="8640000" calcext:value-type="float">
            <text:p>8640000</text:p>
          </table:table-cell>
          <table:table-cell table:formula="of:=[.B1919]/[.C1919]" office:value-type="float" office:value="0.00221990740740741" calcext:value-type="float">
            <text:p>0,00221990740740741000</text:p>
          </table:table-cell>
          <table:table-cell table:formula="of:=[.D1920]-[.D1919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table:formula="of:=[.B1919]+10" office:value-type="float" office:value="19190" calcext:value-type="float">
            <text:p>19190</text:p>
          </table:table-cell>
          <table:table-cell office:value-type="float" office:value="8640000" calcext:value-type="float">
            <text:p>8640000</text:p>
          </table:table-cell>
          <table:table-cell table:formula="of:=[.B1920]/[.C1920]" office:value-type="float" office:value="0.00222106481481481" calcext:value-type="float">
            <text:p>0,00222106481481481000</text:p>
          </table:table-cell>
          <table:table-cell table:formula="of:=[.D1921]-[.D1920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table:formula="of:=[.B1920]+10" office:value-type="float" office:value="19200" calcext:value-type="float">
            <text:p>19200</text:p>
          </table:table-cell>
          <table:table-cell office:value-type="float" office:value="8640000" calcext:value-type="float">
            <text:p>8640000</text:p>
          </table:table-cell>
          <table:table-cell table:formula="of:=[.B1921]/[.C1921]" office:value-type="float" office:value="0.00222222222222222" calcext:value-type="float">
            <text:p>0,00222222222222222000</text:p>
          </table:table-cell>
          <table:table-cell table:formula="of:=[.D1922]-[.D1921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table:formula="of:=[.B1921]+10" office:value-type="float" office:value="19210" calcext:value-type="float">
            <text:p>19210</text:p>
          </table:table-cell>
          <table:table-cell office:value-type="float" office:value="8640000" calcext:value-type="float">
            <text:p>8640000</text:p>
          </table:table-cell>
          <table:table-cell table:formula="of:=[.B1922]/[.C1922]" office:value-type="float" office:value="0.00222337962962963" calcext:value-type="float">
            <text:p>0,00222337962962963000</text:p>
          </table:table-cell>
          <table:table-cell table:formula="of:=[.D1923]-[.D1922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1922" calcext:value-type="float">
            <text:p>1922</text:p>
          </table:table-cell>
          <table:table-cell table:formula="of:=[.B1922]+10" office:value-type="float" office:value="19220" calcext:value-type="float">
            <text:p>19220</text:p>
          </table:table-cell>
          <table:table-cell office:value-type="float" office:value="8640000" calcext:value-type="float">
            <text:p>8640000</text:p>
          </table:table-cell>
          <table:table-cell table:formula="of:=[.B1923]/[.C1923]" office:value-type="float" office:value="0.00222453703703704" calcext:value-type="float">
            <text:p>0,00222453703703704000</text:p>
          </table:table-cell>
          <table:table-cell table:formula="of:=[.D1924]-[.D1923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 table:formula="of:=[.B1923]+10" office:value-type="float" office:value="19230" calcext:value-type="float">
            <text:p>19230</text:p>
          </table:table-cell>
          <table:table-cell office:value-type="float" office:value="8640000" calcext:value-type="float">
            <text:p>8640000</text:p>
          </table:table-cell>
          <table:table-cell table:formula="of:=[.B1924]/[.C1924]" office:value-type="float" office:value="0.00222569444444444" calcext:value-type="float">
            <text:p>0,00222569444444444000</text:p>
          </table:table-cell>
          <table:table-cell table:formula="of:=[.D1925]-[.D1924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 table:formula="of:=[.B1924]+10" office:value-type="float" office:value="19240" calcext:value-type="float">
            <text:p>19240</text:p>
          </table:table-cell>
          <table:table-cell office:value-type="float" office:value="8640000" calcext:value-type="float">
            <text:p>8640000</text:p>
          </table:table-cell>
          <table:table-cell table:formula="of:=[.B1925]/[.C1925]" office:value-type="float" office:value="0.00222685185185185" calcext:value-type="float">
            <text:p>0,00222685185185185000</text:p>
          </table:table-cell>
          <table:table-cell table:formula="of:=[.D1926]-[.D1925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table:formula="of:=[.B1925]+10" office:value-type="float" office:value="19250" calcext:value-type="float">
            <text:p>19250</text:p>
          </table:table-cell>
          <table:table-cell office:value-type="float" office:value="8640000" calcext:value-type="float">
            <text:p>8640000</text:p>
          </table:table-cell>
          <table:table-cell table:formula="of:=[.B1926]/[.C1926]" office:value-type="float" office:value="0.00222800925925926" calcext:value-type="float">
            <text:p>0,00222800925925926000</text:p>
          </table:table-cell>
          <table:table-cell table:formula="of:=[.D1927]-[.D1926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table:formula="of:=[.B1926]+10" office:value-type="float" office:value="19260" calcext:value-type="float">
            <text:p>19260</text:p>
          </table:table-cell>
          <table:table-cell office:value-type="float" office:value="8640000" calcext:value-type="float">
            <text:p>8640000</text:p>
          </table:table-cell>
          <table:table-cell table:formula="of:=[.B1927]/[.C1927]" office:value-type="float" office:value="0.00222916666666667" calcext:value-type="float">
            <text:p>0,00222916666666667000</text:p>
          </table:table-cell>
          <table:table-cell table:formula="of:=[.D1928]-[.D1927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table:formula="of:=[.B1927]+10" office:value-type="float" office:value="19270" calcext:value-type="float">
            <text:p>19270</text:p>
          </table:table-cell>
          <table:table-cell office:value-type="float" office:value="8640000" calcext:value-type="float">
            <text:p>8640000</text:p>
          </table:table-cell>
          <table:table-cell table:formula="of:=[.B1928]/[.C1928]" office:value-type="float" office:value="0.00223032407407407" calcext:value-type="float">
            <text:p>0,00223032407407407000</text:p>
          </table:table-cell>
          <table:table-cell table:formula="of:=[.D1929]-[.D1928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table:formula="of:=[.B1928]+10" office:value-type="float" office:value="19280" calcext:value-type="float">
            <text:p>19280</text:p>
          </table:table-cell>
          <table:table-cell office:value-type="float" office:value="8640000" calcext:value-type="float">
            <text:p>8640000</text:p>
          </table:table-cell>
          <table:table-cell table:formula="of:=[.B1929]/[.C1929]" office:value-type="float" office:value="0.00223148148148148" calcext:value-type="float">
            <text:p>0,00223148148148148000</text:p>
          </table:table-cell>
          <table:table-cell table:formula="of:=[.D1930]-[.D1929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table:formula="of:=[.B1929]+10" office:value-type="float" office:value="19290" calcext:value-type="float">
            <text:p>19290</text:p>
          </table:table-cell>
          <table:table-cell office:value-type="float" office:value="8640000" calcext:value-type="float">
            <text:p>8640000</text:p>
          </table:table-cell>
          <table:table-cell table:formula="of:=[.B1930]/[.C1930]" office:value-type="float" office:value="0.00223263888888889" calcext:value-type="float">
            <text:p>0,00223263888888889000</text:p>
          </table:table-cell>
          <table:table-cell table:formula="of:=[.D1931]-[.D1930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table:formula="of:=[.B1930]+10" office:value-type="float" office:value="19300" calcext:value-type="float">
            <text:p>19300</text:p>
          </table:table-cell>
          <table:table-cell office:value-type="float" office:value="8640000" calcext:value-type="float">
            <text:p>8640000</text:p>
          </table:table-cell>
          <table:table-cell table:formula="of:=[.B1931]/[.C1931]" office:value-type="float" office:value="0.0022337962962963" calcext:value-type="float">
            <text:p>0,00223379629629630000</text:p>
          </table:table-cell>
          <table:table-cell table:formula="of:=[.D1932]-[.D1931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table:formula="of:=[.B1931]+10" office:value-type="float" office:value="19310" calcext:value-type="float">
            <text:p>19310</text:p>
          </table:table-cell>
          <table:table-cell office:value-type="float" office:value="8640000" calcext:value-type="float">
            <text:p>8640000</text:p>
          </table:table-cell>
          <table:table-cell table:formula="of:=[.B1932]/[.C1932]" office:value-type="float" office:value="0.0022349537037037" calcext:value-type="float">
            <text:p>0,00223495370370370000</text:p>
          </table:table-cell>
          <table:table-cell table:formula="of:=[.D1933]-[.D1932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1932" calcext:value-type="float">
            <text:p>1932</text:p>
          </table:table-cell>
          <table:table-cell table:formula="of:=[.B1932]+10" office:value-type="float" office:value="19320" calcext:value-type="float">
            <text:p>19320</text:p>
          </table:table-cell>
          <table:table-cell office:value-type="float" office:value="8640000" calcext:value-type="float">
            <text:p>8640000</text:p>
          </table:table-cell>
          <table:table-cell table:formula="of:=[.B1933]/[.C1933]" office:value-type="float" office:value="0.00223611111111111" calcext:value-type="float">
            <text:p>0,00223611111111111000</text:p>
          </table:table-cell>
          <table:table-cell table:formula="of:=[.D1934]-[.D1933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table:formula="of:=[.B1933]+10" office:value-type="float" office:value="19330" calcext:value-type="float">
            <text:p>19330</text:p>
          </table:table-cell>
          <table:table-cell office:value-type="float" office:value="8640000" calcext:value-type="float">
            <text:p>8640000</text:p>
          </table:table-cell>
          <table:table-cell table:formula="of:=[.B1934]/[.C1934]" office:value-type="float" office:value="0.00223726851851852" calcext:value-type="float">
            <text:p>0,00223726851851852000</text:p>
          </table:table-cell>
          <table:table-cell table:formula="of:=[.D1935]-[.D1934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1934" calcext:value-type="float">
            <text:p>1934</text:p>
          </table:table-cell>
          <table:table-cell table:formula="of:=[.B1934]+10" office:value-type="float" office:value="19340" calcext:value-type="float">
            <text:p>19340</text:p>
          </table:table-cell>
          <table:table-cell office:value-type="float" office:value="8640000" calcext:value-type="float">
            <text:p>8640000</text:p>
          </table:table-cell>
          <table:table-cell table:formula="of:=[.B1935]/[.C1935]" office:value-type="float" office:value="0.00223842592592593" calcext:value-type="float">
            <text:p>0,00223842592592593000</text:p>
          </table:table-cell>
          <table:table-cell table:formula="of:=[.D1936]-[.D1935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table:formula="of:=[.B1935]+10" office:value-type="float" office:value="19350" calcext:value-type="float">
            <text:p>19350</text:p>
          </table:table-cell>
          <table:table-cell office:value-type="float" office:value="8640000" calcext:value-type="float">
            <text:p>8640000</text:p>
          </table:table-cell>
          <table:table-cell table:formula="of:=[.B1936]/[.C1936]" office:value-type="float" office:value="0.00223958333333333" calcext:value-type="float">
            <text:p>0,00223958333333333000</text:p>
          </table:table-cell>
          <table:table-cell table:formula="of:=[.D1937]-[.D1936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table:formula="of:=[.B1936]+10" office:value-type="float" office:value="19360" calcext:value-type="float">
            <text:p>19360</text:p>
          </table:table-cell>
          <table:table-cell office:value-type="float" office:value="8640000" calcext:value-type="float">
            <text:p>8640000</text:p>
          </table:table-cell>
          <table:table-cell table:formula="of:=[.B1937]/[.C1937]" office:value-type="float" office:value="0.00224074074074074" calcext:value-type="float">
            <text:p>0,00224074074074074000</text:p>
          </table:table-cell>
          <table:table-cell table:formula="of:=[.D1938]-[.D1937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table:formula="of:=[.B1937]+10" office:value-type="float" office:value="19370" calcext:value-type="float">
            <text:p>19370</text:p>
          </table:table-cell>
          <table:table-cell office:value-type="float" office:value="8640000" calcext:value-type="float">
            <text:p>8640000</text:p>
          </table:table-cell>
          <table:table-cell table:formula="of:=[.B1938]/[.C1938]" office:value-type="float" office:value="0.00224189814814815" calcext:value-type="float">
            <text:p>0,00224189814814815000</text:p>
          </table:table-cell>
          <table:table-cell table:formula="of:=[.D1939]-[.D1938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table:formula="of:=[.B1938]+10" office:value-type="float" office:value="19380" calcext:value-type="float">
            <text:p>19380</text:p>
          </table:table-cell>
          <table:table-cell office:value-type="float" office:value="8640000" calcext:value-type="float">
            <text:p>8640000</text:p>
          </table:table-cell>
          <table:table-cell table:formula="of:=[.B1939]/[.C1939]" office:value-type="float" office:value="0.00224305555555556" calcext:value-type="float">
            <text:p>0,00224305555555556000</text:p>
          </table:table-cell>
          <table:table-cell table:formula="of:=[.D1940]-[.D1939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table:formula="of:=[.B1939]+10" office:value-type="float" office:value="19390" calcext:value-type="float">
            <text:p>19390</text:p>
          </table:table-cell>
          <table:table-cell office:value-type="float" office:value="8640000" calcext:value-type="float">
            <text:p>8640000</text:p>
          </table:table-cell>
          <table:table-cell table:formula="of:=[.B1940]/[.C1940]" office:value-type="float" office:value="0.00224421296296296" calcext:value-type="float">
            <text:p>0,00224421296296296000</text:p>
          </table:table-cell>
          <table:table-cell table:formula="of:=[.D1941]-[.D1940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table:formula="of:=[.B1940]+10" office:value-type="float" office:value="19400" calcext:value-type="float">
            <text:p>19400</text:p>
          </table:table-cell>
          <table:table-cell office:value-type="float" office:value="8640000" calcext:value-type="float">
            <text:p>8640000</text:p>
          </table:table-cell>
          <table:table-cell table:formula="of:=[.B1941]/[.C1941]" office:value-type="float" office:value="0.00224537037037037" calcext:value-type="float">
            <text:p>0,00224537037037037000</text:p>
          </table:table-cell>
          <table:table-cell table:formula="of:=[.D1942]-[.D1941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table:formula="of:=[.B1941]+10" office:value-type="float" office:value="19410" calcext:value-type="float">
            <text:p>19410</text:p>
          </table:table-cell>
          <table:table-cell office:value-type="float" office:value="8640000" calcext:value-type="float">
            <text:p>8640000</text:p>
          </table:table-cell>
          <table:table-cell table:formula="of:=[.B1942]/[.C1942]" office:value-type="float" office:value="0.00224652777777778" calcext:value-type="float">
            <text:p>0,00224652777777778000</text:p>
          </table:table-cell>
          <table:table-cell table:formula="of:=[.D1943]-[.D1942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 table:formula="of:=[.B1942]+10" office:value-type="float" office:value="19420" calcext:value-type="float">
            <text:p>19420</text:p>
          </table:table-cell>
          <table:table-cell office:value-type="float" office:value="8640000" calcext:value-type="float">
            <text:p>8640000</text:p>
          </table:table-cell>
          <table:table-cell table:formula="of:=[.B1943]/[.C1943]" office:value-type="float" office:value="0.00224768518518519" calcext:value-type="float">
            <text:p>0,00224768518518519000</text:p>
          </table:table-cell>
          <table:table-cell table:formula="of:=[.D1944]-[.D1943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table:formula="of:=[.B1943]+10" office:value-type="float" office:value="19430" calcext:value-type="float">
            <text:p>19430</text:p>
          </table:table-cell>
          <table:table-cell office:value-type="float" office:value="8640000" calcext:value-type="float">
            <text:p>8640000</text:p>
          </table:table-cell>
          <table:table-cell table:formula="of:=[.B1944]/[.C1944]" office:value-type="float" office:value="0.00224884259259259" calcext:value-type="float">
            <text:p>0,00224884259259259000</text:p>
          </table:table-cell>
          <table:table-cell table:formula="of:=[.D1945]-[.D1944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 table:formula="of:=[.B1944]+10" office:value-type="float" office:value="19440" calcext:value-type="float">
            <text:p>19440</text:p>
          </table:table-cell>
          <table:table-cell office:value-type="float" office:value="8640000" calcext:value-type="float">
            <text:p>8640000</text:p>
          </table:table-cell>
          <table:table-cell table:formula="of:=[.B1945]/[.C1945]" office:value-type="float" office:value="0.00225" calcext:value-type="float">
            <text:p>0,00225000000000000000</text:p>
          </table:table-cell>
          <table:table-cell table:formula="of:=[.D1946]-[.D1945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table:formula="of:=[.B1945]+10" office:value-type="float" office:value="19450" calcext:value-type="float">
            <text:p>19450</text:p>
          </table:table-cell>
          <table:table-cell office:value-type="float" office:value="8640000" calcext:value-type="float">
            <text:p>8640000</text:p>
          </table:table-cell>
          <table:table-cell table:formula="of:=[.B1946]/[.C1946]" office:value-type="float" office:value="0.00225115740740741" calcext:value-type="float">
            <text:p>0,00225115740740741000</text:p>
          </table:table-cell>
          <table:table-cell table:formula="of:=[.D1947]-[.D1946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1946" calcext:value-type="float">
            <text:p>1946</text:p>
          </table:table-cell>
          <table:table-cell table:formula="of:=[.B1946]+10" office:value-type="float" office:value="19460" calcext:value-type="float">
            <text:p>19460</text:p>
          </table:table-cell>
          <table:table-cell office:value-type="float" office:value="8640000" calcext:value-type="float">
            <text:p>8640000</text:p>
          </table:table-cell>
          <table:table-cell table:formula="of:=[.B1947]/[.C1947]" office:value-type="float" office:value="0.00225231481481481" calcext:value-type="float">
            <text:p>0,00225231481481481000</text:p>
          </table:table-cell>
          <table:table-cell table:formula="of:=[.D1948]-[.D1947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table:formula="of:=[.B1947]+10" office:value-type="float" office:value="19470" calcext:value-type="float">
            <text:p>19470</text:p>
          </table:table-cell>
          <table:table-cell office:value-type="float" office:value="8640000" calcext:value-type="float">
            <text:p>8640000</text:p>
          </table:table-cell>
          <table:table-cell table:formula="of:=[.B1948]/[.C1948]" office:value-type="float" office:value="0.00225347222222222" calcext:value-type="float">
            <text:p>0,00225347222222222000</text:p>
          </table:table-cell>
          <table:table-cell table:formula="of:=[.D1949]-[.D1948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 table:formula="of:=[.B1948]+10" office:value-type="float" office:value="19480" calcext:value-type="float">
            <text:p>19480</text:p>
          </table:table-cell>
          <table:table-cell office:value-type="float" office:value="8640000" calcext:value-type="float">
            <text:p>8640000</text:p>
          </table:table-cell>
          <table:table-cell table:formula="of:=[.B1949]/[.C1949]" office:value-type="float" office:value="0.00225462962962963" calcext:value-type="float">
            <text:p>0,00225462962962963000</text:p>
          </table:table-cell>
          <table:table-cell table:formula="of:=[.D1950]-[.D1949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table:formula="of:=[.B1949]+10" office:value-type="float" office:value="19490" calcext:value-type="float">
            <text:p>19490</text:p>
          </table:table-cell>
          <table:table-cell office:value-type="float" office:value="8640000" calcext:value-type="float">
            <text:p>8640000</text:p>
          </table:table-cell>
          <table:table-cell table:formula="of:=[.B1950]/[.C1950]" office:value-type="float" office:value="0.00225578703703704" calcext:value-type="float">
            <text:p>0,00225578703703704000</text:p>
          </table:table-cell>
          <table:table-cell table:formula="of:=[.D1951]-[.D1950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table:formula="of:=[.B1950]+10" office:value-type="float" office:value="19500" calcext:value-type="float">
            <text:p>19500</text:p>
          </table:table-cell>
          <table:table-cell office:value-type="float" office:value="8640000" calcext:value-type="float">
            <text:p>8640000</text:p>
          </table:table-cell>
          <table:table-cell table:formula="of:=[.B1951]/[.C1951]" office:value-type="float" office:value="0.00225694444444444" calcext:value-type="float">
            <text:p>0,00225694444444444000</text:p>
          </table:table-cell>
          <table:table-cell table:formula="of:=[.D1952]-[.D1951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table:formula="of:=[.B1951]+10" office:value-type="float" office:value="19510" calcext:value-type="float">
            <text:p>19510</text:p>
          </table:table-cell>
          <table:table-cell office:value-type="float" office:value="8640000" calcext:value-type="float">
            <text:p>8640000</text:p>
          </table:table-cell>
          <table:table-cell table:formula="of:=[.B1952]/[.C1952]" office:value-type="float" office:value="0.00225810185185185" calcext:value-type="float">
            <text:p>0,00225810185185185000</text:p>
          </table:table-cell>
          <table:table-cell table:formula="of:=[.D1953]-[.D1952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table:formula="of:=[.B1952]+10" office:value-type="float" office:value="19520" calcext:value-type="float">
            <text:p>19520</text:p>
          </table:table-cell>
          <table:table-cell office:value-type="float" office:value="8640000" calcext:value-type="float">
            <text:p>8640000</text:p>
          </table:table-cell>
          <table:table-cell table:formula="of:=[.B1953]/[.C1953]" office:value-type="float" office:value="0.00225925925925926" calcext:value-type="float">
            <text:p>0,00225925925925926000</text:p>
          </table:table-cell>
          <table:table-cell table:formula="of:=[.D1954]-[.D1953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table:formula="of:=[.B1953]+10" office:value-type="float" office:value="19530" calcext:value-type="float">
            <text:p>19530</text:p>
          </table:table-cell>
          <table:table-cell office:value-type="float" office:value="8640000" calcext:value-type="float">
            <text:p>8640000</text:p>
          </table:table-cell>
          <table:table-cell table:formula="of:=[.B1954]/[.C1954]" office:value-type="float" office:value="0.00226041666666667" calcext:value-type="float">
            <text:p>0,00226041666666667000</text:p>
          </table:table-cell>
          <table:table-cell table:formula="of:=[.D1955]-[.D1954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table:formula="of:=[.B1954]+10" office:value-type="float" office:value="19540" calcext:value-type="float">
            <text:p>19540</text:p>
          </table:table-cell>
          <table:table-cell office:value-type="float" office:value="8640000" calcext:value-type="float">
            <text:p>8640000</text:p>
          </table:table-cell>
          <table:table-cell table:formula="of:=[.B1955]/[.C1955]" office:value-type="float" office:value="0.00226157407407407" calcext:value-type="float">
            <text:p>0,00226157407407407000</text:p>
          </table:table-cell>
          <table:table-cell table:formula="of:=[.D1956]-[.D1955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table:formula="of:=[.B1955]+10" office:value-type="float" office:value="19550" calcext:value-type="float">
            <text:p>19550</text:p>
          </table:table-cell>
          <table:table-cell office:value-type="float" office:value="8640000" calcext:value-type="float">
            <text:p>8640000</text:p>
          </table:table-cell>
          <table:table-cell table:formula="of:=[.B1956]/[.C1956]" office:value-type="float" office:value="0.00226273148148148" calcext:value-type="float">
            <text:p>0,00226273148148148000</text:p>
          </table:table-cell>
          <table:table-cell table:formula="of:=[.D1957]-[.D1956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table:formula="of:=[.B1956]+10" office:value-type="float" office:value="19560" calcext:value-type="float">
            <text:p>19560</text:p>
          </table:table-cell>
          <table:table-cell office:value-type="float" office:value="8640000" calcext:value-type="float">
            <text:p>8640000</text:p>
          </table:table-cell>
          <table:table-cell table:formula="of:=[.B1957]/[.C1957]" office:value-type="float" office:value="0.00226388888888889" calcext:value-type="float">
            <text:p>0,00226388888888889000</text:p>
          </table:table-cell>
          <table:table-cell table:formula="of:=[.D1958]-[.D1957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table:formula="of:=[.B1957]+10" office:value-type="float" office:value="19570" calcext:value-type="float">
            <text:p>19570</text:p>
          </table:table-cell>
          <table:table-cell office:value-type="float" office:value="8640000" calcext:value-type="float">
            <text:p>8640000</text:p>
          </table:table-cell>
          <table:table-cell table:formula="of:=[.B1958]/[.C1958]" office:value-type="float" office:value="0.0022650462962963" calcext:value-type="float">
            <text:p>0,00226504629629630000</text:p>
          </table:table-cell>
          <table:table-cell table:formula="of:=[.D1959]-[.D1958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table:formula="of:=[.B1958]+10" office:value-type="float" office:value="19580" calcext:value-type="float">
            <text:p>19580</text:p>
          </table:table-cell>
          <table:table-cell office:value-type="float" office:value="8640000" calcext:value-type="float">
            <text:p>8640000</text:p>
          </table:table-cell>
          <table:table-cell table:formula="of:=[.B1959]/[.C1959]" office:value-type="float" office:value="0.0022662037037037" calcext:value-type="float">
            <text:p>0,00226620370370370000</text:p>
          </table:table-cell>
          <table:table-cell table:formula="of:=[.D1960]-[.D1959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table:formula="of:=[.B1959]+10" office:value-type="float" office:value="19590" calcext:value-type="float">
            <text:p>19590</text:p>
          </table:table-cell>
          <table:table-cell office:value-type="float" office:value="8640000" calcext:value-type="float">
            <text:p>8640000</text:p>
          </table:table-cell>
          <table:table-cell table:formula="of:=[.B1960]/[.C1960]" office:value-type="float" office:value="0.00226736111111111" calcext:value-type="float">
            <text:p>0,00226736111111111000</text:p>
          </table:table-cell>
          <table:table-cell table:formula="of:=[.D1961]-[.D1960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table:formula="of:=[.B1960]+10" office:value-type="float" office:value="19600" calcext:value-type="float">
            <text:p>19600</text:p>
          </table:table-cell>
          <table:table-cell office:value-type="float" office:value="8640000" calcext:value-type="float">
            <text:p>8640000</text:p>
          </table:table-cell>
          <table:table-cell table:formula="of:=[.B1961]/[.C1961]" office:value-type="float" office:value="0.00226851851851852" calcext:value-type="float">
            <text:p>0,00226851851851852000</text:p>
          </table:table-cell>
          <table:table-cell table:formula="of:=[.D1962]-[.D1961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table:formula="of:=[.B1961]+10" office:value-type="float" office:value="19610" calcext:value-type="float">
            <text:p>19610</text:p>
          </table:table-cell>
          <table:table-cell office:value-type="float" office:value="8640000" calcext:value-type="float">
            <text:p>8640000</text:p>
          </table:table-cell>
          <table:table-cell table:formula="of:=[.B1962]/[.C1962]" office:value-type="float" office:value="0.00226967592592593" calcext:value-type="float">
            <text:p>0,00226967592592593000</text:p>
          </table:table-cell>
          <table:table-cell table:formula="of:=[.D1963]-[.D1962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table:formula="of:=[.B1962]+10" office:value-type="float" office:value="19620" calcext:value-type="float">
            <text:p>19620</text:p>
          </table:table-cell>
          <table:table-cell office:value-type="float" office:value="8640000" calcext:value-type="float">
            <text:p>8640000</text:p>
          </table:table-cell>
          <table:table-cell table:formula="of:=[.B1963]/[.C1963]" office:value-type="float" office:value="0.00227083333333333" calcext:value-type="float">
            <text:p>0,00227083333333333000</text:p>
          </table:table-cell>
          <table:table-cell table:formula="of:=[.D1964]-[.D1963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table:formula="of:=[.B1963]+10" office:value-type="float" office:value="19630" calcext:value-type="float">
            <text:p>19630</text:p>
          </table:table-cell>
          <table:table-cell office:value-type="float" office:value="8640000" calcext:value-type="float">
            <text:p>8640000</text:p>
          </table:table-cell>
          <table:table-cell table:formula="of:=[.B1964]/[.C1964]" office:value-type="float" office:value="0.00227199074074074" calcext:value-type="float">
            <text:p>0,00227199074074074000</text:p>
          </table:table-cell>
          <table:table-cell table:formula="of:=[.D1965]-[.D1964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table:formula="of:=[.B1964]+10" office:value-type="float" office:value="19640" calcext:value-type="float">
            <text:p>19640</text:p>
          </table:table-cell>
          <table:table-cell office:value-type="float" office:value="8640000" calcext:value-type="float">
            <text:p>8640000</text:p>
          </table:table-cell>
          <table:table-cell table:formula="of:=[.B1965]/[.C1965]" office:value-type="float" office:value="0.00227314814814815" calcext:value-type="float">
            <text:p>0,00227314814814815000</text:p>
          </table:table-cell>
          <table:table-cell table:formula="of:=[.D1966]-[.D1965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table:formula="of:=[.B1965]+10" office:value-type="float" office:value="19650" calcext:value-type="float">
            <text:p>19650</text:p>
          </table:table-cell>
          <table:table-cell office:value-type="float" office:value="8640000" calcext:value-type="float">
            <text:p>8640000</text:p>
          </table:table-cell>
          <table:table-cell table:formula="of:=[.B1966]/[.C1966]" office:value-type="float" office:value="0.00227430555555556" calcext:value-type="float">
            <text:p>0,00227430555555556000</text:p>
          </table:table-cell>
          <table:table-cell table:formula="of:=[.D1967]-[.D1966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table:formula="of:=[.B1966]+10" office:value-type="float" office:value="19660" calcext:value-type="float">
            <text:p>19660</text:p>
          </table:table-cell>
          <table:table-cell office:value-type="float" office:value="8640000" calcext:value-type="float">
            <text:p>8640000</text:p>
          </table:table-cell>
          <table:table-cell table:formula="of:=[.B1967]/[.C1967]" office:value-type="float" office:value="0.00227546296296296" calcext:value-type="float">
            <text:p>0,00227546296296296000</text:p>
          </table:table-cell>
          <table:table-cell table:formula="of:=[.D1968]-[.D1967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table:formula="of:=[.B1967]+10" office:value-type="float" office:value="19670" calcext:value-type="float">
            <text:p>19670</text:p>
          </table:table-cell>
          <table:table-cell office:value-type="float" office:value="8640000" calcext:value-type="float">
            <text:p>8640000</text:p>
          </table:table-cell>
          <table:table-cell table:formula="of:=[.B1968]/[.C1968]" office:value-type="float" office:value="0.00227662037037037" calcext:value-type="float">
            <text:p>0,00227662037037037000</text:p>
          </table:table-cell>
          <table:table-cell table:formula="of:=[.D1969]-[.D1968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table:formula="of:=[.B1968]+10" office:value-type="float" office:value="19680" calcext:value-type="float">
            <text:p>19680</text:p>
          </table:table-cell>
          <table:table-cell office:value-type="float" office:value="8640000" calcext:value-type="float">
            <text:p>8640000</text:p>
          </table:table-cell>
          <table:table-cell table:formula="of:=[.B1969]/[.C1969]" office:value-type="float" office:value="0.00227777777777778" calcext:value-type="float">
            <text:p>0,00227777777777778000</text:p>
          </table:table-cell>
          <table:table-cell table:formula="of:=[.D1970]-[.D1969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table:formula="of:=[.B1969]+10" office:value-type="float" office:value="19690" calcext:value-type="float">
            <text:p>19690</text:p>
          </table:table-cell>
          <table:table-cell office:value-type="float" office:value="8640000" calcext:value-type="float">
            <text:p>8640000</text:p>
          </table:table-cell>
          <table:table-cell table:formula="of:=[.B1970]/[.C1970]" office:value-type="float" office:value="0.00227893518518519" calcext:value-type="float">
            <text:p>0,00227893518518519000</text:p>
          </table:table-cell>
          <table:table-cell table:formula="of:=[.D1971]-[.D1970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table:formula="of:=[.B1970]+10" office:value-type="float" office:value="19700" calcext:value-type="float">
            <text:p>19700</text:p>
          </table:table-cell>
          <table:table-cell office:value-type="float" office:value="8640000" calcext:value-type="float">
            <text:p>8640000</text:p>
          </table:table-cell>
          <table:table-cell table:formula="of:=[.B1971]/[.C1971]" office:value-type="float" office:value="0.00228009259259259" calcext:value-type="float">
            <text:p>0,00228009259259259000</text:p>
          </table:table-cell>
          <table:table-cell table:formula="of:=[.D1972]-[.D1971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table:formula="of:=[.B1971]+10" office:value-type="float" office:value="19710" calcext:value-type="float">
            <text:p>19710</text:p>
          </table:table-cell>
          <table:table-cell office:value-type="float" office:value="8640000" calcext:value-type="float">
            <text:p>8640000</text:p>
          </table:table-cell>
          <table:table-cell table:formula="of:=[.B1972]/[.C1972]" office:value-type="float" office:value="0.00228125" calcext:value-type="float">
            <text:p>0,00228125000000000000</text:p>
          </table:table-cell>
          <table:table-cell table:formula="of:=[.D1973]-[.D1972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table:formula="of:=[.B1972]+10" office:value-type="float" office:value="19720" calcext:value-type="float">
            <text:p>19720</text:p>
          </table:table-cell>
          <table:table-cell office:value-type="float" office:value="8640000" calcext:value-type="float">
            <text:p>8640000</text:p>
          </table:table-cell>
          <table:table-cell table:formula="of:=[.B1973]/[.C1973]" office:value-type="float" office:value="0.00228240740740741" calcext:value-type="float">
            <text:p>0,00228240740740741000</text:p>
          </table:table-cell>
          <table:table-cell table:formula="of:=[.D1974]-[.D1973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table:formula="of:=[.B1973]+10" office:value-type="float" office:value="19730" calcext:value-type="float">
            <text:p>19730</text:p>
          </table:table-cell>
          <table:table-cell office:value-type="float" office:value="8640000" calcext:value-type="float">
            <text:p>8640000</text:p>
          </table:table-cell>
          <table:table-cell table:formula="of:=[.B1974]/[.C1974]" office:value-type="float" office:value="0.00228356481481481" calcext:value-type="float">
            <text:p>0,00228356481481481000</text:p>
          </table:table-cell>
          <table:table-cell table:formula="of:=[.D1975]-[.D1974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table:formula="of:=[.B1974]+10" office:value-type="float" office:value="19740" calcext:value-type="float">
            <text:p>19740</text:p>
          </table:table-cell>
          <table:table-cell office:value-type="float" office:value="8640000" calcext:value-type="float">
            <text:p>8640000</text:p>
          </table:table-cell>
          <table:table-cell table:formula="of:=[.B1975]/[.C1975]" office:value-type="float" office:value="0.00228472222222222" calcext:value-type="float">
            <text:p>0,00228472222222222000</text:p>
          </table:table-cell>
          <table:table-cell table:formula="of:=[.D1976]-[.D1975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table:formula="of:=[.B1975]+10" office:value-type="float" office:value="19750" calcext:value-type="float">
            <text:p>19750</text:p>
          </table:table-cell>
          <table:table-cell office:value-type="float" office:value="8640000" calcext:value-type="float">
            <text:p>8640000</text:p>
          </table:table-cell>
          <table:table-cell table:formula="of:=[.B1976]/[.C1976]" office:value-type="float" office:value="0.00228587962962963" calcext:value-type="float">
            <text:p>0,00228587962962963000</text:p>
          </table:table-cell>
          <table:table-cell table:formula="of:=[.D1977]-[.D1976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table:formula="of:=[.B1976]+10" office:value-type="float" office:value="19760" calcext:value-type="float">
            <text:p>19760</text:p>
          </table:table-cell>
          <table:table-cell office:value-type="float" office:value="8640000" calcext:value-type="float">
            <text:p>8640000</text:p>
          </table:table-cell>
          <table:table-cell table:formula="of:=[.B1977]/[.C1977]" office:value-type="float" office:value="0.00228703703703704" calcext:value-type="float">
            <text:p>0,00228703703703704000</text:p>
          </table:table-cell>
          <table:table-cell table:formula="of:=[.D1978]-[.D1977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table:formula="of:=[.B1977]+10" office:value-type="float" office:value="19770" calcext:value-type="float">
            <text:p>19770</text:p>
          </table:table-cell>
          <table:table-cell office:value-type="float" office:value="8640000" calcext:value-type="float">
            <text:p>8640000</text:p>
          </table:table-cell>
          <table:table-cell table:formula="of:=[.B1978]/[.C1978]" office:value-type="float" office:value="0.00228819444444444" calcext:value-type="float">
            <text:p>0,00228819444444444000</text:p>
          </table:table-cell>
          <table:table-cell table:formula="of:=[.D1979]-[.D1978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table:formula="of:=[.B1978]+10" office:value-type="float" office:value="19780" calcext:value-type="float">
            <text:p>19780</text:p>
          </table:table-cell>
          <table:table-cell office:value-type="float" office:value="8640000" calcext:value-type="float">
            <text:p>8640000</text:p>
          </table:table-cell>
          <table:table-cell table:formula="of:=[.B1979]/[.C1979]" office:value-type="float" office:value="0.00228935185185185" calcext:value-type="float">
            <text:p>0,00228935185185185000</text:p>
          </table:table-cell>
          <table:table-cell table:formula="of:=[.D1980]-[.D1979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table:formula="of:=[.B1979]+10" office:value-type="float" office:value="19790" calcext:value-type="float">
            <text:p>19790</text:p>
          </table:table-cell>
          <table:table-cell office:value-type="float" office:value="8640000" calcext:value-type="float">
            <text:p>8640000</text:p>
          </table:table-cell>
          <table:table-cell table:formula="of:=[.B1980]/[.C1980]" office:value-type="float" office:value="0.00229050925925926" calcext:value-type="float">
            <text:p>0,00229050925925926000</text:p>
          </table:table-cell>
          <table:table-cell table:formula="of:=[.D1981]-[.D1980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table:formula="of:=[.B1980]+10" office:value-type="float" office:value="19800" calcext:value-type="float">
            <text:p>19800</text:p>
          </table:table-cell>
          <table:table-cell office:value-type="float" office:value="8640000" calcext:value-type="float">
            <text:p>8640000</text:p>
          </table:table-cell>
          <table:table-cell table:formula="of:=[.B1981]/[.C1981]" office:value-type="float" office:value="0.00229166666666667" calcext:value-type="float">
            <text:p>0,00229166666666667000</text:p>
          </table:table-cell>
          <table:table-cell table:formula="of:=[.D1982]-[.D1981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table:formula="of:=[.B1981]+10" office:value-type="float" office:value="19810" calcext:value-type="float">
            <text:p>19810</text:p>
          </table:table-cell>
          <table:table-cell office:value-type="float" office:value="8640000" calcext:value-type="float">
            <text:p>8640000</text:p>
          </table:table-cell>
          <table:table-cell table:formula="of:=[.B1982]/[.C1982]" office:value-type="float" office:value="0.00229282407407407" calcext:value-type="float">
            <text:p>0,00229282407407407000</text:p>
          </table:table-cell>
          <table:table-cell table:formula="of:=[.D1983]-[.D1982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table:formula="of:=[.B1982]+10" office:value-type="float" office:value="19820" calcext:value-type="float">
            <text:p>19820</text:p>
          </table:table-cell>
          <table:table-cell office:value-type="float" office:value="8640000" calcext:value-type="float">
            <text:p>8640000</text:p>
          </table:table-cell>
          <table:table-cell table:formula="of:=[.B1983]/[.C1983]" office:value-type="float" office:value="0.00229398148148148" calcext:value-type="float">
            <text:p>0,00229398148148148000</text:p>
          </table:table-cell>
          <table:table-cell table:formula="of:=[.D1984]-[.D1983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table:formula="of:=[.B1983]+10" office:value-type="float" office:value="19830" calcext:value-type="float">
            <text:p>19830</text:p>
          </table:table-cell>
          <table:table-cell office:value-type="float" office:value="8640000" calcext:value-type="float">
            <text:p>8640000</text:p>
          </table:table-cell>
          <table:table-cell table:formula="of:=[.B1984]/[.C1984]" office:value-type="float" office:value="0.00229513888888889" calcext:value-type="float">
            <text:p>0,00229513888888889000</text:p>
          </table:table-cell>
          <table:table-cell table:formula="of:=[.D1985]-[.D1984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table:formula="of:=[.B1984]+10" office:value-type="float" office:value="19840" calcext:value-type="float">
            <text:p>19840</text:p>
          </table:table-cell>
          <table:table-cell office:value-type="float" office:value="8640000" calcext:value-type="float">
            <text:p>8640000</text:p>
          </table:table-cell>
          <table:table-cell table:formula="of:=[.B1985]/[.C1985]" office:value-type="float" office:value="0.0022962962962963" calcext:value-type="float">
            <text:p>0,00229629629629630000</text:p>
          </table:table-cell>
          <table:table-cell table:formula="of:=[.D1986]-[.D1985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table:formula="of:=[.B1985]+10" office:value-type="float" office:value="19850" calcext:value-type="float">
            <text:p>19850</text:p>
          </table:table-cell>
          <table:table-cell office:value-type="float" office:value="8640000" calcext:value-type="float">
            <text:p>8640000</text:p>
          </table:table-cell>
          <table:table-cell table:formula="of:=[.B1986]/[.C1986]" office:value-type="float" office:value="0.0022974537037037" calcext:value-type="float">
            <text:p>0,00229745370370370000</text:p>
          </table:table-cell>
          <table:table-cell table:formula="of:=[.D1987]-[.D1986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table:formula="of:=[.B1986]+10" office:value-type="float" office:value="19860" calcext:value-type="float">
            <text:p>19860</text:p>
          </table:table-cell>
          <table:table-cell office:value-type="float" office:value="8640000" calcext:value-type="float">
            <text:p>8640000</text:p>
          </table:table-cell>
          <table:table-cell table:formula="of:=[.B1987]/[.C1987]" office:value-type="float" office:value="0.00229861111111111" calcext:value-type="float">
            <text:p>0,00229861111111111000</text:p>
          </table:table-cell>
          <table:table-cell table:formula="of:=[.D1988]-[.D1987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table:formula="of:=[.B1987]+10" office:value-type="float" office:value="19870" calcext:value-type="float">
            <text:p>19870</text:p>
          </table:table-cell>
          <table:table-cell office:value-type="float" office:value="8640000" calcext:value-type="float">
            <text:p>8640000</text:p>
          </table:table-cell>
          <table:table-cell table:formula="of:=[.B1988]/[.C1988]" office:value-type="float" office:value="0.00229976851851852" calcext:value-type="float">
            <text:p>0,00229976851851852000</text:p>
          </table:table-cell>
          <table:table-cell table:formula="of:=[.D1989]-[.D1988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table:formula="of:=[.B1988]+10" office:value-type="float" office:value="19880" calcext:value-type="float">
            <text:p>19880</text:p>
          </table:table-cell>
          <table:table-cell office:value-type="float" office:value="8640000" calcext:value-type="float">
            <text:p>8640000</text:p>
          </table:table-cell>
          <table:table-cell table:formula="of:=[.B1989]/[.C1989]" office:value-type="float" office:value="0.00230092592592593" calcext:value-type="float">
            <text:p>0,00230092592592593000</text:p>
          </table:table-cell>
          <table:table-cell table:formula="of:=[.D1990]-[.D1989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table:formula="of:=[.B1989]+10" office:value-type="float" office:value="19890" calcext:value-type="float">
            <text:p>19890</text:p>
          </table:table-cell>
          <table:table-cell office:value-type="float" office:value="8640000" calcext:value-type="float">
            <text:p>8640000</text:p>
          </table:table-cell>
          <table:table-cell table:formula="of:=[.B1990]/[.C1990]" office:value-type="float" office:value="0.00230208333333333" calcext:value-type="float">
            <text:p>0,00230208333333333000</text:p>
          </table:table-cell>
          <table:table-cell table:formula="of:=[.D1991]-[.D1990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table:formula="of:=[.B1990]+10" office:value-type="float" office:value="19900" calcext:value-type="float">
            <text:p>19900</text:p>
          </table:table-cell>
          <table:table-cell office:value-type="float" office:value="8640000" calcext:value-type="float">
            <text:p>8640000</text:p>
          </table:table-cell>
          <table:table-cell table:formula="of:=[.B1991]/[.C1991]" office:value-type="float" office:value="0.00230324074074074" calcext:value-type="float">
            <text:p>0,00230324074074074000</text:p>
          </table:table-cell>
          <table:table-cell table:formula="of:=[.D1992]-[.D1991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table:formula="of:=[.B1991]+10" office:value-type="float" office:value="19910" calcext:value-type="float">
            <text:p>19910</text:p>
          </table:table-cell>
          <table:table-cell office:value-type="float" office:value="8640000" calcext:value-type="float">
            <text:p>8640000</text:p>
          </table:table-cell>
          <table:table-cell table:formula="of:=[.B1992]/[.C1992]" office:value-type="float" office:value="0.00230439814814815" calcext:value-type="float">
            <text:p>0,00230439814814815000</text:p>
          </table:table-cell>
          <table:table-cell table:formula="of:=[.D1993]-[.D1992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table:formula="of:=[.B1992]+10" office:value-type="float" office:value="19920" calcext:value-type="float">
            <text:p>19920</text:p>
          </table:table-cell>
          <table:table-cell office:value-type="float" office:value="8640000" calcext:value-type="float">
            <text:p>8640000</text:p>
          </table:table-cell>
          <table:table-cell table:formula="of:=[.B1993]/[.C1993]" office:value-type="float" office:value="0.00230555555555556" calcext:value-type="float">
            <text:p>0,00230555555555556000</text:p>
          </table:table-cell>
          <table:table-cell table:formula="of:=[.D1994]-[.D1993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table:formula="of:=[.B1993]+10" office:value-type="float" office:value="19930" calcext:value-type="float">
            <text:p>19930</text:p>
          </table:table-cell>
          <table:table-cell office:value-type="float" office:value="8640000" calcext:value-type="float">
            <text:p>8640000</text:p>
          </table:table-cell>
          <table:table-cell table:formula="of:=[.B1994]/[.C1994]" office:value-type="float" office:value="0.00230671296296296" calcext:value-type="float">
            <text:p>0,00230671296296296000</text:p>
          </table:table-cell>
          <table:table-cell table:formula="of:=[.D1995]-[.D1994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table:formula="of:=[.B1994]+10" office:value-type="float" office:value="19940" calcext:value-type="float">
            <text:p>19940</text:p>
          </table:table-cell>
          <table:table-cell office:value-type="float" office:value="8640000" calcext:value-type="float">
            <text:p>8640000</text:p>
          </table:table-cell>
          <table:table-cell table:formula="of:=[.B1995]/[.C1995]" office:value-type="float" office:value="0.00230787037037037" calcext:value-type="float">
            <text:p>0,00230787037037037000</text:p>
          </table:table-cell>
          <table:table-cell table:formula="of:=[.D1996]-[.D1995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table:formula="of:=[.B1995]+10" office:value-type="float" office:value="19950" calcext:value-type="float">
            <text:p>19950</text:p>
          </table:table-cell>
          <table:table-cell office:value-type="float" office:value="8640000" calcext:value-type="float">
            <text:p>8640000</text:p>
          </table:table-cell>
          <table:table-cell table:formula="of:=[.B1996]/[.C1996]" office:value-type="float" office:value="0.00230902777777778" calcext:value-type="float">
            <text:p>0,00230902777777778000</text:p>
          </table:table-cell>
          <table:table-cell table:formula="of:=[.D1997]-[.D1996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table:formula="of:=[.B1996]+10" office:value-type="float" office:value="19960" calcext:value-type="float">
            <text:p>19960</text:p>
          </table:table-cell>
          <table:table-cell office:value-type="float" office:value="8640000" calcext:value-type="float">
            <text:p>8640000</text:p>
          </table:table-cell>
          <table:table-cell table:formula="of:=[.B1997]/[.C1997]" office:value-type="float" office:value="0.00231018518518519" calcext:value-type="float">
            <text:p>0,00231018518518519000</text:p>
          </table:table-cell>
          <table:table-cell table:formula="of:=[.D1998]-[.D1997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table:formula="of:=[.B1997]+10" office:value-type="float" office:value="19970" calcext:value-type="float">
            <text:p>19970</text:p>
          </table:table-cell>
          <table:table-cell office:value-type="float" office:value="8640000" calcext:value-type="float">
            <text:p>8640000</text:p>
          </table:table-cell>
          <table:table-cell table:formula="of:=[.B1998]/[.C1998]" office:value-type="float" office:value="0.00231134259259259" calcext:value-type="float">
            <text:p>0,00231134259259259000</text:p>
          </table:table-cell>
          <table:table-cell table:formula="of:=[.D1999]-[.D1998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table:formula="of:=[.B1998]+10" office:value-type="float" office:value="19980" calcext:value-type="float">
            <text:p>19980</text:p>
          </table:table-cell>
          <table:table-cell office:value-type="float" office:value="8640000" calcext:value-type="float">
            <text:p>8640000</text:p>
          </table:table-cell>
          <table:table-cell table:formula="of:=[.B1999]/[.C1999]" office:value-type="float" office:value="0.0023125" calcext:value-type="float">
            <text:p>0,00231250000000000000</text:p>
          </table:table-cell>
          <table:table-cell table:formula="of:=[.D2000]-[.D1999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table:formula="of:=[.B1999]+10" office:value-type="float" office:value="19990" calcext:value-type="float">
            <text:p>19990</text:p>
          </table:table-cell>
          <table:table-cell office:value-type="float" office:value="8640000" calcext:value-type="float">
            <text:p>8640000</text:p>
          </table:table-cell>
          <table:table-cell table:formula="of:=[.B2000]/[.C2000]" office:value-type="float" office:value="0.00231365740740741" calcext:value-type="float">
            <text:p>0,00231365740740741000</text:p>
          </table:table-cell>
          <table:table-cell table:formula="of:=[.D2001]-[.D2000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.B2000]+10" office:value-type="float" office:value="20000" calcext:value-type="float">
            <text:p>20000</text:p>
          </table:table-cell>
          <table:table-cell office:value-type="float" office:value="8640000" calcext:value-type="float">
            <text:p>8640000</text:p>
          </table:table-cell>
          <table:table-cell table:formula="of:=[.B2001]/[.C2001]" office:value-type="float" office:value="0.00231481481481481" calcext:value-type="float">
            <text:p>0,00231481481481481000</text:p>
          </table:table-cell>
          <table:table-cell table:formula="of:=[.D2002]-[.D2001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table:formula="of:=[.B2001]+10" office:value-type="float" office:value="20010" calcext:value-type="float">
            <text:p>20010</text:p>
          </table:table-cell>
          <table:table-cell office:value-type="float" office:value="8640000" calcext:value-type="float">
            <text:p>8640000</text:p>
          </table:table-cell>
          <table:table-cell table:formula="of:=[.B2002]/[.C2002]" office:value-type="float" office:value="0.00231597222222222" calcext:value-type="float">
            <text:p>0,00231597222222222000</text:p>
          </table:table-cell>
          <table:table-cell table:formula="of:=[.D2003]-[.D2002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table:formula="of:=[.B2002]+10" office:value-type="float" office:value="20020" calcext:value-type="float">
            <text:p>20020</text:p>
          </table:table-cell>
          <table:table-cell office:value-type="float" office:value="8640000" calcext:value-type="float">
            <text:p>8640000</text:p>
          </table:table-cell>
          <table:table-cell table:formula="of:=[.B2003]/[.C2003]" office:value-type="float" office:value="0.00231712962962963" calcext:value-type="float">
            <text:p>0,00231712962962963000</text:p>
          </table:table-cell>
          <table:table-cell table:formula="of:=[.D2004]-[.D2003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table:formula="of:=[.B2003]+10" office:value-type="float" office:value="20030" calcext:value-type="float">
            <text:p>20030</text:p>
          </table:table-cell>
          <table:table-cell office:value-type="float" office:value="8640000" calcext:value-type="float">
            <text:p>8640000</text:p>
          </table:table-cell>
          <table:table-cell table:formula="of:=[.B2004]/[.C2004]" office:value-type="float" office:value="0.00231828703703704" calcext:value-type="float">
            <text:p>0,00231828703703704000</text:p>
          </table:table-cell>
          <table:table-cell table:formula="of:=[.D2005]-[.D2004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table:formula="of:=[.B2004]+10" office:value-type="float" office:value="20040" calcext:value-type="float">
            <text:p>20040</text:p>
          </table:table-cell>
          <table:table-cell office:value-type="float" office:value="8640000" calcext:value-type="float">
            <text:p>8640000</text:p>
          </table:table-cell>
          <table:table-cell table:formula="of:=[.B2005]/[.C2005]" office:value-type="float" office:value="0.00231944444444444" calcext:value-type="float">
            <text:p>0,00231944444444444000</text:p>
          </table:table-cell>
          <table:table-cell table:formula="of:=[.D2006]-[.D2005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table:formula="of:=[.B2005]+10" office:value-type="float" office:value="20050" calcext:value-type="float">
            <text:p>20050</text:p>
          </table:table-cell>
          <table:table-cell office:value-type="float" office:value="8640000" calcext:value-type="float">
            <text:p>8640000</text:p>
          </table:table-cell>
          <table:table-cell table:formula="of:=[.B2006]/[.C2006]" office:value-type="float" office:value="0.00232060185185185" calcext:value-type="float">
            <text:p>0,00232060185185185000</text:p>
          </table:table-cell>
          <table:table-cell table:formula="of:=[.D2007]-[.D2006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table:formula="of:=[.B2006]+10" office:value-type="float" office:value="20060" calcext:value-type="float">
            <text:p>20060</text:p>
          </table:table-cell>
          <table:table-cell office:value-type="float" office:value="8640000" calcext:value-type="float">
            <text:p>8640000</text:p>
          </table:table-cell>
          <table:table-cell table:formula="of:=[.B2007]/[.C2007]" office:value-type="float" office:value="0.00232175925925926" calcext:value-type="float">
            <text:p>0,00232175925925926000</text:p>
          </table:table-cell>
          <table:table-cell table:formula="of:=[.D2008]-[.D2007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table:formula="of:=[.B2007]+10" office:value-type="float" office:value="20070" calcext:value-type="float">
            <text:p>20070</text:p>
          </table:table-cell>
          <table:table-cell office:value-type="float" office:value="8640000" calcext:value-type="float">
            <text:p>8640000</text:p>
          </table:table-cell>
          <table:table-cell table:formula="of:=[.B2008]/[.C2008]" office:value-type="float" office:value="0.00232291666666667" calcext:value-type="float">
            <text:p>0,00232291666666667000</text:p>
          </table:table-cell>
          <table:table-cell table:formula="of:=[.D2009]-[.D2008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table:formula="of:=[.B2008]+10" office:value-type="float" office:value="20080" calcext:value-type="float">
            <text:p>20080</text:p>
          </table:table-cell>
          <table:table-cell office:value-type="float" office:value="8640000" calcext:value-type="float">
            <text:p>8640000</text:p>
          </table:table-cell>
          <table:table-cell table:formula="of:=[.B2009]/[.C2009]" office:value-type="float" office:value="0.00232407407407407" calcext:value-type="float">
            <text:p>0,00232407407407407000</text:p>
          </table:table-cell>
          <table:table-cell table:formula="of:=[.D2010]-[.D2009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table:formula="of:=[.B2009]+10" office:value-type="float" office:value="20090" calcext:value-type="float">
            <text:p>20090</text:p>
          </table:table-cell>
          <table:table-cell office:value-type="float" office:value="8640000" calcext:value-type="float">
            <text:p>8640000</text:p>
          </table:table-cell>
          <table:table-cell table:formula="of:=[.B2010]/[.C2010]" office:value-type="float" office:value="0.00232523148148148" calcext:value-type="float">
            <text:p>0,00232523148148148000</text:p>
          </table:table-cell>
          <table:table-cell table:formula="of:=[.D2011]-[.D2010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table:formula="of:=[.B2010]+10" office:value-type="float" office:value="20100" calcext:value-type="float">
            <text:p>20100</text:p>
          </table:table-cell>
          <table:table-cell office:value-type="float" office:value="8640000" calcext:value-type="float">
            <text:p>8640000</text:p>
          </table:table-cell>
          <table:table-cell table:formula="of:=[.B2011]/[.C2011]" office:value-type="float" office:value="0.00232638888888889" calcext:value-type="float">
            <text:p>0,00232638888888889000</text:p>
          </table:table-cell>
          <table:table-cell table:formula="of:=[.D2012]-[.D2011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table:formula="of:=[.B2011]+10" office:value-type="float" office:value="20110" calcext:value-type="float">
            <text:p>20110</text:p>
          </table:table-cell>
          <table:table-cell office:value-type="float" office:value="8640000" calcext:value-type="float">
            <text:p>8640000</text:p>
          </table:table-cell>
          <table:table-cell table:formula="of:=[.B2012]/[.C2012]" office:value-type="float" office:value="0.0023275462962963" calcext:value-type="float">
            <text:p>0,00232754629629630000</text:p>
          </table:table-cell>
          <table:table-cell table:formula="of:=[.D2013]-[.D2012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table:formula="of:=[.B2012]+10" office:value-type="float" office:value="20120" calcext:value-type="float">
            <text:p>20120</text:p>
          </table:table-cell>
          <table:table-cell office:value-type="float" office:value="8640000" calcext:value-type="float">
            <text:p>8640000</text:p>
          </table:table-cell>
          <table:table-cell table:formula="of:=[.B2013]/[.C2013]" office:value-type="float" office:value="0.0023287037037037" calcext:value-type="float">
            <text:p>0,00232870370370370000</text:p>
          </table:table-cell>
          <table:table-cell table:formula="of:=[.D2014]-[.D2013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table:formula="of:=[.B2013]+10" office:value-type="float" office:value="20130" calcext:value-type="float">
            <text:p>20130</text:p>
          </table:table-cell>
          <table:table-cell office:value-type="float" office:value="8640000" calcext:value-type="float">
            <text:p>8640000</text:p>
          </table:table-cell>
          <table:table-cell table:formula="of:=[.B2014]/[.C2014]" office:value-type="float" office:value="0.00232986111111111" calcext:value-type="float">
            <text:p>0,00232986111111111000</text:p>
          </table:table-cell>
          <table:table-cell table:formula="of:=[.D2015]-[.D2014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table:formula="of:=[.B2014]+10" office:value-type="float" office:value="20140" calcext:value-type="float">
            <text:p>20140</text:p>
          </table:table-cell>
          <table:table-cell office:value-type="float" office:value="8640000" calcext:value-type="float">
            <text:p>8640000</text:p>
          </table:table-cell>
          <table:table-cell table:formula="of:=[.B2015]/[.C2015]" office:value-type="float" office:value="0.00233101851851852" calcext:value-type="float">
            <text:p>0,00233101851851852000</text:p>
          </table:table-cell>
          <table:table-cell table:formula="of:=[.D2016]-[.D2015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table:formula="of:=[.B2015]+10" office:value-type="float" office:value="20150" calcext:value-type="float">
            <text:p>20150</text:p>
          </table:table-cell>
          <table:table-cell office:value-type="float" office:value="8640000" calcext:value-type="float">
            <text:p>8640000</text:p>
          </table:table-cell>
          <table:table-cell table:formula="of:=[.B2016]/[.C2016]" office:value-type="float" office:value="0.00233217592592593" calcext:value-type="float">
            <text:p>0,00233217592592593000</text:p>
          </table:table-cell>
          <table:table-cell table:formula="of:=[.D2017]-[.D2016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formula="of:=[.B2016]+10" office:value-type="float" office:value="20160" calcext:value-type="float">
            <text:p>20160</text:p>
          </table:table-cell>
          <table:table-cell office:value-type="float" office:value="8640000" calcext:value-type="float">
            <text:p>8640000</text:p>
          </table:table-cell>
          <table:table-cell table:formula="of:=[.B2017]/[.C2017]" office:value-type="float" office:value="0.00233333333333333" calcext:value-type="float">
            <text:p>0,00233333333333333000</text:p>
          </table:table-cell>
          <table:table-cell table:formula="of:=[.D2018]-[.D2017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table:formula="of:=[.B2017]+10" office:value-type="float" office:value="20170" calcext:value-type="float">
            <text:p>20170</text:p>
          </table:table-cell>
          <table:table-cell office:value-type="float" office:value="8640000" calcext:value-type="float">
            <text:p>8640000</text:p>
          </table:table-cell>
          <table:table-cell table:formula="of:=[.B2018]/[.C2018]" office:value-type="float" office:value="0.00233449074074074" calcext:value-type="float">
            <text:p>0,00233449074074074000</text:p>
          </table:table-cell>
          <table:table-cell table:formula="of:=[.D2019]-[.D2018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table:formula="of:=[.B2018]+10" office:value-type="float" office:value="20180" calcext:value-type="float">
            <text:p>20180</text:p>
          </table:table-cell>
          <table:table-cell office:value-type="float" office:value="8640000" calcext:value-type="float">
            <text:p>8640000</text:p>
          </table:table-cell>
          <table:table-cell table:formula="of:=[.B2019]/[.C2019]" office:value-type="float" office:value="0.00233564814814815" calcext:value-type="float">
            <text:p>0,00233564814814815000</text:p>
          </table:table-cell>
          <table:table-cell table:formula="of:=[.D2020]-[.D2019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table:formula="of:=[.B2019]+10" office:value-type="float" office:value="20190" calcext:value-type="float">
            <text:p>20190</text:p>
          </table:table-cell>
          <table:table-cell office:value-type="float" office:value="8640000" calcext:value-type="float">
            <text:p>8640000</text:p>
          </table:table-cell>
          <table:table-cell table:formula="of:=[.B2020]/[.C2020]" office:value-type="float" office:value="0.00233680555555556" calcext:value-type="float">
            <text:p>0,00233680555555556000</text:p>
          </table:table-cell>
          <table:table-cell table:formula="of:=[.D2021]-[.D2020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table:formula="of:=[.B2020]+10" office:value-type="float" office:value="20200" calcext:value-type="float">
            <text:p>20200</text:p>
          </table:table-cell>
          <table:table-cell office:value-type="float" office:value="8640000" calcext:value-type="float">
            <text:p>8640000</text:p>
          </table:table-cell>
          <table:table-cell table:formula="of:=[.B2021]/[.C2021]" office:value-type="float" office:value="0.00233796296296296" calcext:value-type="float">
            <text:p>0,00233796296296296000</text:p>
          </table:table-cell>
          <table:table-cell table:formula="of:=[.D2022]-[.D2021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formula="of:=[.B2021]+10" office:value-type="float" office:value="20210" calcext:value-type="float">
            <text:p>20210</text:p>
          </table:table-cell>
          <table:table-cell office:value-type="float" office:value="8640000" calcext:value-type="float">
            <text:p>8640000</text:p>
          </table:table-cell>
          <table:table-cell table:formula="of:=[.B2022]/[.C2022]" office:value-type="float" office:value="0.00233912037037037" calcext:value-type="float">
            <text:p>0,00233912037037037000</text:p>
          </table:table-cell>
          <table:table-cell table:formula="of:=[.D2023]-[.D2022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table:formula="of:=[.B2022]+10" office:value-type="float" office:value="20220" calcext:value-type="float">
            <text:p>20220</text:p>
          </table:table-cell>
          <table:table-cell office:value-type="float" office:value="8640000" calcext:value-type="float">
            <text:p>8640000</text:p>
          </table:table-cell>
          <table:table-cell table:formula="of:=[.B2023]/[.C2023]" office:value-type="float" office:value="0.00234027777777778" calcext:value-type="float">
            <text:p>0,00234027777777778000</text:p>
          </table:table-cell>
          <table:table-cell table:formula="of:=[.D2024]-[.D2023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table:formula="of:=[.B2023]+10" office:value-type="float" office:value="20230" calcext:value-type="float">
            <text:p>20230</text:p>
          </table:table-cell>
          <table:table-cell office:value-type="float" office:value="8640000" calcext:value-type="float">
            <text:p>8640000</text:p>
          </table:table-cell>
          <table:table-cell table:formula="of:=[.B2024]/[.C2024]" office:value-type="float" office:value="0.00234143518518519" calcext:value-type="float">
            <text:p>0,00234143518518519000</text:p>
          </table:table-cell>
          <table:table-cell table:formula="of:=[.D2025]-[.D2024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table:formula="of:=[.B2024]+10" office:value-type="float" office:value="20240" calcext:value-type="float">
            <text:p>20240</text:p>
          </table:table-cell>
          <table:table-cell office:value-type="float" office:value="8640000" calcext:value-type="float">
            <text:p>8640000</text:p>
          </table:table-cell>
          <table:table-cell table:formula="of:=[.B2025]/[.C2025]" office:value-type="float" office:value="0.00234259259259259" calcext:value-type="float">
            <text:p>0,00234259259259259000</text:p>
          </table:table-cell>
          <table:table-cell table:formula="of:=[.D2026]-[.D2025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table:formula="of:=[.B2025]+10" office:value-type="float" office:value="20250" calcext:value-type="float">
            <text:p>20250</text:p>
          </table:table-cell>
          <table:table-cell office:value-type="float" office:value="8640000" calcext:value-type="float">
            <text:p>8640000</text:p>
          </table:table-cell>
          <table:table-cell table:formula="of:=[.B2026]/[.C2026]" office:value-type="float" office:value="0.00234375" calcext:value-type="float">
            <text:p>0,00234375000000000000</text:p>
          </table:table-cell>
          <table:table-cell table:formula="of:=[.D2027]-[.D2026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026" calcext:value-type="float">
            <text:p>2026</text:p>
          </table:table-cell>
          <table:table-cell table:formula="of:=[.B2026]+10" office:value-type="float" office:value="20260" calcext:value-type="float">
            <text:p>20260</text:p>
          </table:table-cell>
          <table:table-cell office:value-type="float" office:value="8640000" calcext:value-type="float">
            <text:p>8640000</text:p>
          </table:table-cell>
          <table:table-cell table:formula="of:=[.B2027]/[.C2027]" office:value-type="float" office:value="0.00234490740740741" calcext:value-type="float">
            <text:p>0,00234490740740741000</text:p>
          </table:table-cell>
          <table:table-cell table:formula="of:=[.D2028]-[.D2027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027" calcext:value-type="float">
            <text:p>2027</text:p>
          </table:table-cell>
          <table:table-cell table:formula="of:=[.B2027]+10" office:value-type="float" office:value="20270" calcext:value-type="float">
            <text:p>20270</text:p>
          </table:table-cell>
          <table:table-cell office:value-type="float" office:value="8640000" calcext:value-type="float">
            <text:p>8640000</text:p>
          </table:table-cell>
          <table:table-cell table:formula="of:=[.B2028]/[.C2028]" office:value-type="float" office:value="0.00234606481481481" calcext:value-type="float">
            <text:p>0,00234606481481481000</text:p>
          </table:table-cell>
          <table:table-cell table:formula="of:=[.D2029]-[.D2028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028" calcext:value-type="float">
            <text:p>2028</text:p>
          </table:table-cell>
          <table:table-cell table:formula="of:=[.B2028]+10" office:value-type="float" office:value="20280" calcext:value-type="float">
            <text:p>20280</text:p>
          </table:table-cell>
          <table:table-cell office:value-type="float" office:value="8640000" calcext:value-type="float">
            <text:p>8640000</text:p>
          </table:table-cell>
          <table:table-cell table:formula="of:=[.B2029]/[.C2029]" office:value-type="float" office:value="0.00234722222222222" calcext:value-type="float">
            <text:p>0,00234722222222222000</text:p>
          </table:table-cell>
          <table:table-cell table:formula="of:=[.D2030]-[.D2029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029" calcext:value-type="float">
            <text:p>2029</text:p>
          </table:table-cell>
          <table:table-cell table:formula="of:=[.B2029]+10" office:value-type="float" office:value="20290" calcext:value-type="float">
            <text:p>20290</text:p>
          </table:table-cell>
          <table:table-cell office:value-type="float" office:value="8640000" calcext:value-type="float">
            <text:p>8640000</text:p>
          </table:table-cell>
          <table:table-cell table:formula="of:=[.B2030]/[.C2030]" office:value-type="float" office:value="0.00234837962962963" calcext:value-type="float">
            <text:p>0,00234837962962963000</text:p>
          </table:table-cell>
          <table:table-cell table:formula="of:=[.D2031]-[.D2030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table:formula="of:=[.B2030]+10" office:value-type="float" office:value="20300" calcext:value-type="float">
            <text:p>20300</text:p>
          </table:table-cell>
          <table:table-cell office:value-type="float" office:value="8640000" calcext:value-type="float">
            <text:p>8640000</text:p>
          </table:table-cell>
          <table:table-cell table:formula="of:=[.B2031]/[.C2031]" office:value-type="float" office:value="0.00234953703703704" calcext:value-type="float">
            <text:p>0,00234953703703704000</text:p>
          </table:table-cell>
          <table:table-cell table:formula="of:=[.D2032]-[.D2031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031" calcext:value-type="float">
            <text:p>2031</text:p>
          </table:table-cell>
          <table:table-cell table:formula="of:=[.B2031]+10" office:value-type="float" office:value="20310" calcext:value-type="float">
            <text:p>20310</text:p>
          </table:table-cell>
          <table:table-cell office:value-type="float" office:value="8640000" calcext:value-type="float">
            <text:p>8640000</text:p>
          </table:table-cell>
          <table:table-cell table:formula="of:=[.B2032]/[.C2032]" office:value-type="float" office:value="0.00235069444444444" calcext:value-type="float">
            <text:p>0,00235069444444444000</text:p>
          </table:table-cell>
          <table:table-cell table:formula="of:=[.D2033]-[.D2032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032" calcext:value-type="float">
            <text:p>2032</text:p>
          </table:table-cell>
          <table:table-cell table:formula="of:=[.B2032]+10" office:value-type="float" office:value="20320" calcext:value-type="float">
            <text:p>20320</text:p>
          </table:table-cell>
          <table:table-cell office:value-type="float" office:value="8640000" calcext:value-type="float">
            <text:p>8640000</text:p>
          </table:table-cell>
          <table:table-cell table:formula="of:=[.B2033]/[.C2033]" office:value-type="float" office:value="0.00235185185185185" calcext:value-type="float">
            <text:p>0,00235185185185185000</text:p>
          </table:table-cell>
          <table:table-cell table:formula="of:=[.D2034]-[.D2033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033" calcext:value-type="float">
            <text:p>2033</text:p>
          </table:table-cell>
          <table:table-cell table:formula="of:=[.B2033]+10" office:value-type="float" office:value="20330" calcext:value-type="float">
            <text:p>20330</text:p>
          </table:table-cell>
          <table:table-cell office:value-type="float" office:value="8640000" calcext:value-type="float">
            <text:p>8640000</text:p>
          </table:table-cell>
          <table:table-cell table:formula="of:=[.B2034]/[.C2034]" office:value-type="float" office:value="0.00235300925925926" calcext:value-type="float">
            <text:p>0,00235300925925926000</text:p>
          </table:table-cell>
          <table:table-cell table:formula="of:=[.D2035]-[.D2034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034" calcext:value-type="float">
            <text:p>2034</text:p>
          </table:table-cell>
          <table:table-cell table:formula="of:=[.B2034]+10" office:value-type="float" office:value="20340" calcext:value-type="float">
            <text:p>20340</text:p>
          </table:table-cell>
          <table:table-cell office:value-type="float" office:value="8640000" calcext:value-type="float">
            <text:p>8640000</text:p>
          </table:table-cell>
          <table:table-cell table:formula="of:=[.B2035]/[.C2035]" office:value-type="float" office:value="0.00235416666666667" calcext:value-type="float">
            <text:p>0,00235416666666667000</text:p>
          </table:table-cell>
          <table:table-cell table:formula="of:=[.D2036]-[.D2035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035" calcext:value-type="float">
            <text:p>2035</text:p>
          </table:table-cell>
          <table:table-cell table:formula="of:=[.B2035]+10" office:value-type="float" office:value="20350" calcext:value-type="float">
            <text:p>20350</text:p>
          </table:table-cell>
          <table:table-cell office:value-type="float" office:value="8640000" calcext:value-type="float">
            <text:p>8640000</text:p>
          </table:table-cell>
          <table:table-cell table:formula="of:=[.B2036]/[.C2036]" office:value-type="float" office:value="0.00235532407407407" calcext:value-type="float">
            <text:p>0,00235532407407407000</text:p>
          </table:table-cell>
          <table:table-cell table:formula="of:=[.D2037]-[.D2036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036" calcext:value-type="float">
            <text:p>2036</text:p>
          </table:table-cell>
          <table:table-cell table:formula="of:=[.B2036]+10" office:value-type="float" office:value="20360" calcext:value-type="float">
            <text:p>20360</text:p>
          </table:table-cell>
          <table:table-cell office:value-type="float" office:value="8640000" calcext:value-type="float">
            <text:p>8640000</text:p>
          </table:table-cell>
          <table:table-cell table:formula="of:=[.B2037]/[.C2037]" office:value-type="float" office:value="0.00235648148148148" calcext:value-type="float">
            <text:p>0,00235648148148148000</text:p>
          </table:table-cell>
          <table:table-cell table:formula="of:=[.D2038]-[.D2037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037" calcext:value-type="float">
            <text:p>2037</text:p>
          </table:table-cell>
          <table:table-cell table:formula="of:=[.B2037]+10" office:value-type="float" office:value="20370" calcext:value-type="float">
            <text:p>20370</text:p>
          </table:table-cell>
          <table:table-cell office:value-type="float" office:value="8640000" calcext:value-type="float">
            <text:p>8640000</text:p>
          </table:table-cell>
          <table:table-cell table:formula="of:=[.B2038]/[.C2038]" office:value-type="float" office:value="0.00235763888888889" calcext:value-type="float">
            <text:p>0,00235763888888889000</text:p>
          </table:table-cell>
          <table:table-cell table:formula="of:=[.D2039]-[.D2038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038" calcext:value-type="float">
            <text:p>2038</text:p>
          </table:table-cell>
          <table:table-cell table:formula="of:=[.B2038]+10" office:value-type="float" office:value="20380" calcext:value-type="float">
            <text:p>20380</text:p>
          </table:table-cell>
          <table:table-cell office:value-type="float" office:value="8640000" calcext:value-type="float">
            <text:p>8640000</text:p>
          </table:table-cell>
          <table:table-cell table:formula="of:=[.B2039]/[.C2039]" office:value-type="float" office:value="0.0023587962962963" calcext:value-type="float">
            <text:p>0,00235879629629630000</text:p>
          </table:table-cell>
          <table:table-cell table:formula="of:=[.D2040]-[.D2039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039" calcext:value-type="float">
            <text:p>2039</text:p>
          </table:table-cell>
          <table:table-cell table:formula="of:=[.B2039]+10" office:value-type="float" office:value="20390" calcext:value-type="float">
            <text:p>20390</text:p>
          </table:table-cell>
          <table:table-cell office:value-type="float" office:value="8640000" calcext:value-type="float">
            <text:p>8640000</text:p>
          </table:table-cell>
          <table:table-cell table:formula="of:=[.B2040]/[.C2040]" office:value-type="float" office:value="0.0023599537037037" calcext:value-type="float">
            <text:p>0,00235995370370370000</text:p>
          </table:table-cell>
          <table:table-cell table:formula="of:=[.D2041]-[.D2040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table:formula="of:=[.B2040]+10" office:value-type="float" office:value="20400" calcext:value-type="float">
            <text:p>20400</text:p>
          </table:table-cell>
          <table:table-cell office:value-type="float" office:value="8640000" calcext:value-type="float">
            <text:p>8640000</text:p>
          </table:table-cell>
          <table:table-cell table:formula="of:=[.B2041]/[.C2041]" office:value-type="float" office:value="0.00236111111111111" calcext:value-type="float">
            <text:p>0,00236111111111111000</text:p>
          </table:table-cell>
          <table:table-cell table:formula="of:=[.D2042]-[.D2041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041" calcext:value-type="float">
            <text:p>2041</text:p>
          </table:table-cell>
          <table:table-cell table:formula="of:=[.B2041]+10" office:value-type="float" office:value="20410" calcext:value-type="float">
            <text:p>20410</text:p>
          </table:table-cell>
          <table:table-cell office:value-type="float" office:value="8640000" calcext:value-type="float">
            <text:p>8640000</text:p>
          </table:table-cell>
          <table:table-cell table:formula="of:=[.B2042]/[.C2042]" office:value-type="float" office:value="0.00236226851851852" calcext:value-type="float">
            <text:p>0,00236226851851852000</text:p>
          </table:table-cell>
          <table:table-cell table:formula="of:=[.D2043]-[.D2042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042" calcext:value-type="float">
            <text:p>2042</text:p>
          </table:table-cell>
          <table:table-cell table:formula="of:=[.B2042]+10" office:value-type="float" office:value="20420" calcext:value-type="float">
            <text:p>20420</text:p>
          </table:table-cell>
          <table:table-cell office:value-type="float" office:value="8640000" calcext:value-type="float">
            <text:p>8640000</text:p>
          </table:table-cell>
          <table:table-cell table:formula="of:=[.B2043]/[.C2043]" office:value-type="float" office:value="0.00236342592592593" calcext:value-type="float">
            <text:p>0,00236342592592593000</text:p>
          </table:table-cell>
          <table:table-cell table:formula="of:=[.D2044]-[.D2043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043" calcext:value-type="float">
            <text:p>2043</text:p>
          </table:table-cell>
          <table:table-cell table:formula="of:=[.B2043]+10" office:value-type="float" office:value="20430" calcext:value-type="float">
            <text:p>20430</text:p>
          </table:table-cell>
          <table:table-cell office:value-type="float" office:value="8640000" calcext:value-type="float">
            <text:p>8640000</text:p>
          </table:table-cell>
          <table:table-cell table:formula="of:=[.B2044]/[.C2044]" office:value-type="float" office:value="0.00236458333333333" calcext:value-type="float">
            <text:p>0,00236458333333333000</text:p>
          </table:table-cell>
          <table:table-cell table:formula="of:=[.D2045]-[.D2044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044" calcext:value-type="float">
            <text:p>2044</text:p>
          </table:table-cell>
          <table:table-cell table:formula="of:=[.B2044]+10" office:value-type="float" office:value="20440" calcext:value-type="float">
            <text:p>20440</text:p>
          </table:table-cell>
          <table:table-cell office:value-type="float" office:value="8640000" calcext:value-type="float">
            <text:p>8640000</text:p>
          </table:table-cell>
          <table:table-cell table:formula="of:=[.B2045]/[.C2045]" office:value-type="float" office:value="0.00236574074074074" calcext:value-type="float">
            <text:p>0,00236574074074074000</text:p>
          </table:table-cell>
          <table:table-cell table:formula="of:=[.D2046]-[.D2045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045" calcext:value-type="float">
            <text:p>2045</text:p>
          </table:table-cell>
          <table:table-cell table:formula="of:=[.B2045]+10" office:value-type="float" office:value="20450" calcext:value-type="float">
            <text:p>20450</text:p>
          </table:table-cell>
          <table:table-cell office:value-type="float" office:value="8640000" calcext:value-type="float">
            <text:p>8640000</text:p>
          </table:table-cell>
          <table:table-cell table:formula="of:=[.B2046]/[.C2046]" office:value-type="float" office:value="0.00236689814814815" calcext:value-type="float">
            <text:p>0,00236689814814815000</text:p>
          </table:table-cell>
          <table:table-cell table:formula="of:=[.D2047]-[.D2046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046" calcext:value-type="float">
            <text:p>2046</text:p>
          </table:table-cell>
          <table:table-cell table:formula="of:=[.B2046]+10" office:value-type="float" office:value="20460" calcext:value-type="float">
            <text:p>20460</text:p>
          </table:table-cell>
          <table:table-cell office:value-type="float" office:value="8640000" calcext:value-type="float">
            <text:p>8640000</text:p>
          </table:table-cell>
          <table:table-cell table:formula="of:=[.B2047]/[.C2047]" office:value-type="float" office:value="0.00236805555555556" calcext:value-type="float">
            <text:p>0,00236805555555556000</text:p>
          </table:table-cell>
          <table:table-cell table:formula="of:=[.D2048]-[.D2047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table:formula="of:=[.B2047]+10" office:value-type="float" office:value="20470" calcext:value-type="float">
            <text:p>20470</text:p>
          </table:table-cell>
          <table:table-cell office:value-type="float" office:value="8640000" calcext:value-type="float">
            <text:p>8640000</text:p>
          </table:table-cell>
          <table:table-cell table:formula="of:=[.B2048]/[.C2048]" office:value-type="float" office:value="0.00236921296296296" calcext:value-type="float">
            <text:p>0,00236921296296296000</text:p>
          </table:table-cell>
          <table:table-cell table:formula="of:=[.D2049]-[.D2048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formula="of:=[.B2048]+10" office:value-type="float" office:value="20480" calcext:value-type="float">
            <text:p>20480</text:p>
          </table:table-cell>
          <table:table-cell office:value-type="float" office:value="8640000" calcext:value-type="float">
            <text:p>8640000</text:p>
          </table:table-cell>
          <table:table-cell table:formula="of:=[.B2049]/[.C2049]" office:value-type="float" office:value="0.00237037037037037" calcext:value-type="float">
            <text:p>0,00237037037037037000</text:p>
          </table:table-cell>
          <table:table-cell table:formula="of:=[.D2050]-[.D2049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049" calcext:value-type="float">
            <text:p>2049</text:p>
          </table:table-cell>
          <table:table-cell table:formula="of:=[.B2049]+10" office:value-type="float" office:value="20490" calcext:value-type="float">
            <text:p>20490</text:p>
          </table:table-cell>
          <table:table-cell office:value-type="float" office:value="8640000" calcext:value-type="float">
            <text:p>8640000</text:p>
          </table:table-cell>
          <table:table-cell table:formula="of:=[.B2050]/[.C2050]" office:value-type="float" office:value="0.00237152777777778" calcext:value-type="float">
            <text:p>0,00237152777777778000</text:p>
          </table:table-cell>
          <table:table-cell table:formula="of:=[.D2051]-[.D2050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table:formula="of:=[.B2050]+10" office:value-type="float" office:value="20500" calcext:value-type="float">
            <text:p>20500</text:p>
          </table:table-cell>
          <table:table-cell office:value-type="float" office:value="8640000" calcext:value-type="float">
            <text:p>8640000</text:p>
          </table:table-cell>
          <table:table-cell table:formula="of:=[.B2051]/[.C2051]" office:value-type="float" office:value="0.00237268518518519" calcext:value-type="float">
            <text:p>0,00237268518518519000</text:p>
          </table:table-cell>
          <table:table-cell table:formula="of:=[.D2052]-[.D2051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051" calcext:value-type="float">
            <text:p>2051</text:p>
          </table:table-cell>
          <table:table-cell table:formula="of:=[.B2051]+10" office:value-type="float" office:value="20510" calcext:value-type="float">
            <text:p>20510</text:p>
          </table:table-cell>
          <table:table-cell office:value-type="float" office:value="8640000" calcext:value-type="float">
            <text:p>8640000</text:p>
          </table:table-cell>
          <table:table-cell table:formula="of:=[.B2052]/[.C2052]" office:value-type="float" office:value="0.00237384259259259" calcext:value-type="float">
            <text:p>0,00237384259259259000</text:p>
          </table:table-cell>
          <table:table-cell table:formula="of:=[.D2053]-[.D2052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052" calcext:value-type="float">
            <text:p>2052</text:p>
          </table:table-cell>
          <table:table-cell table:formula="of:=[.B2052]+10" office:value-type="float" office:value="20520" calcext:value-type="float">
            <text:p>20520</text:p>
          </table:table-cell>
          <table:table-cell office:value-type="float" office:value="8640000" calcext:value-type="float">
            <text:p>8640000</text:p>
          </table:table-cell>
          <table:table-cell table:formula="of:=[.B2053]/[.C2053]" office:value-type="float" office:value="0.002375" calcext:value-type="float">
            <text:p>0,00237500000000000000</text:p>
          </table:table-cell>
          <table:table-cell table:formula="of:=[.D2054]-[.D2053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053" calcext:value-type="float">
            <text:p>2053</text:p>
          </table:table-cell>
          <table:table-cell table:formula="of:=[.B2053]+10" office:value-type="float" office:value="20530" calcext:value-type="float">
            <text:p>20530</text:p>
          </table:table-cell>
          <table:table-cell office:value-type="float" office:value="8640000" calcext:value-type="float">
            <text:p>8640000</text:p>
          </table:table-cell>
          <table:table-cell table:formula="of:=[.B2054]/[.C2054]" office:value-type="float" office:value="0.00237615740740741" calcext:value-type="float">
            <text:p>0,00237615740740741000</text:p>
          </table:table-cell>
          <table:table-cell table:formula="of:=[.D2055]-[.D2054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054" calcext:value-type="float">
            <text:p>2054</text:p>
          </table:table-cell>
          <table:table-cell table:formula="of:=[.B2054]+10" office:value-type="float" office:value="20540" calcext:value-type="float">
            <text:p>20540</text:p>
          </table:table-cell>
          <table:table-cell office:value-type="float" office:value="8640000" calcext:value-type="float">
            <text:p>8640000</text:p>
          </table:table-cell>
          <table:table-cell table:formula="of:=[.B2055]/[.C2055]" office:value-type="float" office:value="0.00237731481481481" calcext:value-type="float">
            <text:p>0,00237731481481481000</text:p>
          </table:table-cell>
          <table:table-cell table:formula="of:=[.D2056]-[.D2055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055" calcext:value-type="float">
            <text:p>2055</text:p>
          </table:table-cell>
          <table:table-cell table:formula="of:=[.B2055]+10" office:value-type="float" office:value="20550" calcext:value-type="float">
            <text:p>20550</text:p>
          </table:table-cell>
          <table:table-cell office:value-type="float" office:value="8640000" calcext:value-type="float">
            <text:p>8640000</text:p>
          </table:table-cell>
          <table:table-cell table:formula="of:=[.B2056]/[.C2056]" office:value-type="float" office:value="0.00237847222222222" calcext:value-type="float">
            <text:p>0,00237847222222222000</text:p>
          </table:table-cell>
          <table:table-cell table:formula="of:=[.D2057]-[.D2056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056" calcext:value-type="float">
            <text:p>2056</text:p>
          </table:table-cell>
          <table:table-cell table:formula="of:=[.B2056]+10" office:value-type="float" office:value="20560" calcext:value-type="float">
            <text:p>20560</text:p>
          </table:table-cell>
          <table:table-cell office:value-type="float" office:value="8640000" calcext:value-type="float">
            <text:p>8640000</text:p>
          </table:table-cell>
          <table:table-cell table:formula="of:=[.B2057]/[.C2057]" office:value-type="float" office:value="0.00237962962962963" calcext:value-type="float">
            <text:p>0,00237962962962963000</text:p>
          </table:table-cell>
          <table:table-cell table:formula="of:=[.D2058]-[.D2057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057" calcext:value-type="float">
            <text:p>2057</text:p>
          </table:table-cell>
          <table:table-cell table:formula="of:=[.B2057]+10" office:value-type="float" office:value="20570" calcext:value-type="float">
            <text:p>20570</text:p>
          </table:table-cell>
          <table:table-cell office:value-type="float" office:value="8640000" calcext:value-type="float">
            <text:p>8640000</text:p>
          </table:table-cell>
          <table:table-cell table:formula="of:=[.B2058]/[.C2058]" office:value-type="float" office:value="0.00238078703703704" calcext:value-type="float">
            <text:p>0,00238078703703704000</text:p>
          </table:table-cell>
          <table:table-cell table:formula="of:=[.D2059]-[.D2058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058" calcext:value-type="float">
            <text:p>2058</text:p>
          </table:table-cell>
          <table:table-cell table:formula="of:=[.B2058]+10" office:value-type="float" office:value="20580" calcext:value-type="float">
            <text:p>20580</text:p>
          </table:table-cell>
          <table:table-cell office:value-type="float" office:value="8640000" calcext:value-type="float">
            <text:p>8640000</text:p>
          </table:table-cell>
          <table:table-cell table:formula="of:=[.B2059]/[.C2059]" office:value-type="float" office:value="0.00238194444444444" calcext:value-type="float">
            <text:p>0,00238194444444444000</text:p>
          </table:table-cell>
          <table:table-cell table:formula="of:=[.D2060]-[.D2059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059" calcext:value-type="float">
            <text:p>2059</text:p>
          </table:table-cell>
          <table:table-cell table:formula="of:=[.B2059]+10" office:value-type="float" office:value="20590" calcext:value-type="float">
            <text:p>20590</text:p>
          </table:table-cell>
          <table:table-cell office:value-type="float" office:value="8640000" calcext:value-type="float">
            <text:p>8640000</text:p>
          </table:table-cell>
          <table:table-cell table:formula="of:=[.B2060]/[.C2060]" office:value-type="float" office:value="0.00238310185185185" calcext:value-type="float">
            <text:p>0,00238310185185185000</text:p>
          </table:table-cell>
          <table:table-cell table:formula="of:=[.D2061]-[.D2060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060" calcext:value-type="float">
            <text:p>2060</text:p>
          </table:table-cell>
          <table:table-cell table:formula="of:=[.B2060]+10" office:value-type="float" office:value="20600" calcext:value-type="float">
            <text:p>20600</text:p>
          </table:table-cell>
          <table:table-cell office:value-type="float" office:value="8640000" calcext:value-type="float">
            <text:p>8640000</text:p>
          </table:table-cell>
          <table:table-cell table:formula="of:=[.B2061]/[.C2061]" office:value-type="float" office:value="0.00238425925925926" calcext:value-type="float">
            <text:p>0,00238425925925926000</text:p>
          </table:table-cell>
          <table:table-cell table:formula="of:=[.D2062]-[.D2061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061" calcext:value-type="float">
            <text:p>2061</text:p>
          </table:table-cell>
          <table:table-cell table:formula="of:=[.B2061]+10" office:value-type="float" office:value="20610" calcext:value-type="float">
            <text:p>20610</text:p>
          </table:table-cell>
          <table:table-cell office:value-type="float" office:value="8640000" calcext:value-type="float">
            <text:p>8640000</text:p>
          </table:table-cell>
          <table:table-cell table:formula="of:=[.B2062]/[.C2062]" office:value-type="float" office:value="0.00238541666666667" calcext:value-type="float">
            <text:p>0,00238541666666667000</text:p>
          </table:table-cell>
          <table:table-cell table:formula="of:=[.D2063]-[.D2062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062" calcext:value-type="float">
            <text:p>2062</text:p>
          </table:table-cell>
          <table:table-cell table:formula="of:=[.B2062]+10" office:value-type="float" office:value="20620" calcext:value-type="float">
            <text:p>20620</text:p>
          </table:table-cell>
          <table:table-cell office:value-type="float" office:value="8640000" calcext:value-type="float">
            <text:p>8640000</text:p>
          </table:table-cell>
          <table:table-cell table:formula="of:=[.B2063]/[.C2063]" office:value-type="float" office:value="0.00238657407407407" calcext:value-type="float">
            <text:p>0,00238657407407407000</text:p>
          </table:table-cell>
          <table:table-cell table:formula="of:=[.D2064]-[.D2063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063" calcext:value-type="float">
            <text:p>2063</text:p>
          </table:table-cell>
          <table:table-cell table:formula="of:=[.B2063]+10" office:value-type="float" office:value="20630" calcext:value-type="float">
            <text:p>20630</text:p>
          </table:table-cell>
          <table:table-cell office:value-type="float" office:value="8640000" calcext:value-type="float">
            <text:p>8640000</text:p>
          </table:table-cell>
          <table:table-cell table:formula="of:=[.B2064]/[.C2064]" office:value-type="float" office:value="0.00238773148148148" calcext:value-type="float">
            <text:p>0,00238773148148148000</text:p>
          </table:table-cell>
          <table:table-cell table:formula="of:=[.D2065]-[.D2064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064" calcext:value-type="float">
            <text:p>2064</text:p>
          </table:table-cell>
          <table:table-cell table:formula="of:=[.B2064]+10" office:value-type="float" office:value="20640" calcext:value-type="float">
            <text:p>20640</text:p>
          </table:table-cell>
          <table:table-cell office:value-type="float" office:value="8640000" calcext:value-type="float">
            <text:p>8640000</text:p>
          </table:table-cell>
          <table:table-cell table:formula="of:=[.B2065]/[.C2065]" office:value-type="float" office:value="0.00238888888888889" calcext:value-type="float">
            <text:p>0,00238888888888889000</text:p>
          </table:table-cell>
          <table:table-cell table:formula="of:=[.D2066]-[.D2065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065" calcext:value-type="float">
            <text:p>2065</text:p>
          </table:table-cell>
          <table:table-cell table:formula="of:=[.B2065]+10" office:value-type="float" office:value="20650" calcext:value-type="float">
            <text:p>20650</text:p>
          </table:table-cell>
          <table:table-cell office:value-type="float" office:value="8640000" calcext:value-type="float">
            <text:p>8640000</text:p>
          </table:table-cell>
          <table:table-cell table:formula="of:=[.B2066]/[.C2066]" office:value-type="float" office:value="0.0023900462962963" calcext:value-type="float">
            <text:p>0,00239004629629630000</text:p>
          </table:table-cell>
          <table:table-cell table:formula="of:=[.D2067]-[.D2066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066" calcext:value-type="float">
            <text:p>2066</text:p>
          </table:table-cell>
          <table:table-cell table:formula="of:=[.B2066]+10" office:value-type="float" office:value="20660" calcext:value-type="float">
            <text:p>20660</text:p>
          </table:table-cell>
          <table:table-cell office:value-type="float" office:value="8640000" calcext:value-type="float">
            <text:p>8640000</text:p>
          </table:table-cell>
          <table:table-cell table:formula="of:=[.B2067]/[.C2067]" office:value-type="float" office:value="0.0023912037037037" calcext:value-type="float">
            <text:p>0,00239120370370370000</text:p>
          </table:table-cell>
          <table:table-cell table:formula="of:=[.D2068]-[.D2067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067" calcext:value-type="float">
            <text:p>2067</text:p>
          </table:table-cell>
          <table:table-cell table:formula="of:=[.B2067]+10" office:value-type="float" office:value="20670" calcext:value-type="float">
            <text:p>20670</text:p>
          </table:table-cell>
          <table:table-cell office:value-type="float" office:value="8640000" calcext:value-type="float">
            <text:p>8640000</text:p>
          </table:table-cell>
          <table:table-cell table:formula="of:=[.B2068]/[.C2068]" office:value-type="float" office:value="0.00239236111111111" calcext:value-type="float">
            <text:p>0,00239236111111111000</text:p>
          </table:table-cell>
          <table:table-cell table:formula="of:=[.D2069]-[.D2068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068" calcext:value-type="float">
            <text:p>2068</text:p>
          </table:table-cell>
          <table:table-cell table:formula="of:=[.B2068]+10" office:value-type="float" office:value="20680" calcext:value-type="float">
            <text:p>20680</text:p>
          </table:table-cell>
          <table:table-cell office:value-type="float" office:value="8640000" calcext:value-type="float">
            <text:p>8640000</text:p>
          </table:table-cell>
          <table:table-cell table:formula="of:=[.B2069]/[.C2069]" office:value-type="float" office:value="0.00239351851851852" calcext:value-type="float">
            <text:p>0,00239351851851852000</text:p>
          </table:table-cell>
          <table:table-cell table:formula="of:=[.D2070]-[.D2069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069" calcext:value-type="float">
            <text:p>2069</text:p>
          </table:table-cell>
          <table:table-cell table:formula="of:=[.B2069]+10" office:value-type="float" office:value="20690" calcext:value-type="float">
            <text:p>20690</text:p>
          </table:table-cell>
          <table:table-cell office:value-type="float" office:value="8640000" calcext:value-type="float">
            <text:p>8640000</text:p>
          </table:table-cell>
          <table:table-cell table:formula="of:=[.B2070]/[.C2070]" office:value-type="float" office:value="0.00239467592592593" calcext:value-type="float">
            <text:p>0,00239467592592593000</text:p>
          </table:table-cell>
          <table:table-cell table:formula="of:=[.D2071]-[.D2070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B2070]+10" office:value-type="float" office:value="20700" calcext:value-type="float">
            <text:p>20700</text:p>
          </table:table-cell>
          <table:table-cell office:value-type="float" office:value="8640000" calcext:value-type="float">
            <text:p>8640000</text:p>
          </table:table-cell>
          <table:table-cell table:formula="of:=[.B2071]/[.C2071]" office:value-type="float" office:value="0.00239583333333333" calcext:value-type="float">
            <text:p>0,00239583333333333000</text:p>
          </table:table-cell>
          <table:table-cell table:formula="of:=[.D2072]-[.D2071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B2071]+10" office:value-type="float" office:value="20710" calcext:value-type="float">
            <text:p>20710</text:p>
          </table:table-cell>
          <table:table-cell office:value-type="float" office:value="8640000" calcext:value-type="float">
            <text:p>8640000</text:p>
          </table:table-cell>
          <table:table-cell table:formula="of:=[.B2072]/[.C2072]" office:value-type="float" office:value="0.00239699074074074" calcext:value-type="float">
            <text:p>0,00239699074074074000</text:p>
          </table:table-cell>
          <table:table-cell table:formula="of:=[.D2073]-[.D2072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B2072]+10" office:value-type="float" office:value="20720" calcext:value-type="float">
            <text:p>20720</text:p>
          </table:table-cell>
          <table:table-cell office:value-type="float" office:value="8640000" calcext:value-type="float">
            <text:p>8640000</text:p>
          </table:table-cell>
          <table:table-cell table:formula="of:=[.B2073]/[.C2073]" office:value-type="float" office:value="0.00239814814814815" calcext:value-type="float">
            <text:p>0,00239814814814815000</text:p>
          </table:table-cell>
          <table:table-cell table:formula="of:=[.D2074]-[.D2073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073" calcext:value-type="float">
            <text:p>2073</text:p>
          </table:table-cell>
          <table:table-cell table:formula="of:=[.B2073]+10" office:value-type="float" office:value="20730" calcext:value-type="float">
            <text:p>20730</text:p>
          </table:table-cell>
          <table:table-cell office:value-type="float" office:value="8640000" calcext:value-type="float">
            <text:p>8640000</text:p>
          </table:table-cell>
          <table:table-cell table:formula="of:=[.B2074]/[.C2074]" office:value-type="float" office:value="0.00239930555555556" calcext:value-type="float">
            <text:p>0,00239930555555556000</text:p>
          </table:table-cell>
          <table:table-cell table:formula="of:=[.D2075]-[.D2074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074" calcext:value-type="float">
            <text:p>2074</text:p>
          </table:table-cell>
          <table:table-cell table:formula="of:=[.B2074]+10" office:value-type="float" office:value="20740" calcext:value-type="float">
            <text:p>20740</text:p>
          </table:table-cell>
          <table:table-cell office:value-type="float" office:value="8640000" calcext:value-type="float">
            <text:p>8640000</text:p>
          </table:table-cell>
          <table:table-cell table:formula="of:=[.B2075]/[.C2075]" office:value-type="float" office:value="0.00240046296296296" calcext:value-type="float">
            <text:p>0,00240046296296296000</text:p>
          </table:table-cell>
          <table:table-cell table:formula="of:=[.D2076]-[.D2075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075" calcext:value-type="float">
            <text:p>2075</text:p>
          </table:table-cell>
          <table:table-cell table:formula="of:=[.B2075]+10" office:value-type="float" office:value="20750" calcext:value-type="float">
            <text:p>20750</text:p>
          </table:table-cell>
          <table:table-cell office:value-type="float" office:value="8640000" calcext:value-type="float">
            <text:p>8640000</text:p>
          </table:table-cell>
          <table:table-cell table:formula="of:=[.B2076]/[.C2076]" office:value-type="float" office:value="0.00240162037037037" calcext:value-type="float">
            <text:p>0,00240162037037037000</text:p>
          </table:table-cell>
          <table:table-cell table:formula="of:=[.D2077]-[.D2076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076" calcext:value-type="float">
            <text:p>2076</text:p>
          </table:table-cell>
          <table:table-cell table:formula="of:=[.B2076]+10" office:value-type="float" office:value="20760" calcext:value-type="float">
            <text:p>20760</text:p>
          </table:table-cell>
          <table:table-cell office:value-type="float" office:value="8640000" calcext:value-type="float">
            <text:p>8640000</text:p>
          </table:table-cell>
          <table:table-cell table:formula="of:=[.B2077]/[.C2077]" office:value-type="float" office:value="0.00240277777777778" calcext:value-type="float">
            <text:p>0,00240277777777778000</text:p>
          </table:table-cell>
          <table:table-cell table:formula="of:=[.D2078]-[.D2077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077" calcext:value-type="float">
            <text:p>2077</text:p>
          </table:table-cell>
          <table:table-cell table:formula="of:=[.B2077]+10" office:value-type="float" office:value="20770" calcext:value-type="float">
            <text:p>20770</text:p>
          </table:table-cell>
          <table:table-cell office:value-type="float" office:value="8640000" calcext:value-type="float">
            <text:p>8640000</text:p>
          </table:table-cell>
          <table:table-cell table:formula="of:=[.B2078]/[.C2078]" office:value-type="float" office:value="0.00240393518518519" calcext:value-type="float">
            <text:p>0,00240393518518519000</text:p>
          </table:table-cell>
          <table:table-cell table:formula="of:=[.D2079]-[.D2078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078" calcext:value-type="float">
            <text:p>2078</text:p>
          </table:table-cell>
          <table:table-cell table:formula="of:=[.B2078]+10" office:value-type="float" office:value="20780" calcext:value-type="float">
            <text:p>20780</text:p>
          </table:table-cell>
          <table:table-cell office:value-type="float" office:value="8640000" calcext:value-type="float">
            <text:p>8640000</text:p>
          </table:table-cell>
          <table:table-cell table:formula="of:=[.B2079]/[.C2079]" office:value-type="float" office:value="0.00240509259259259" calcext:value-type="float">
            <text:p>0,00240509259259259000</text:p>
          </table:table-cell>
          <table:table-cell table:formula="of:=[.D2080]-[.D2079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079" calcext:value-type="float">
            <text:p>2079</text:p>
          </table:table-cell>
          <table:table-cell table:formula="of:=[.B2079]+10" office:value-type="float" office:value="20790" calcext:value-type="float">
            <text:p>20790</text:p>
          </table:table-cell>
          <table:table-cell office:value-type="float" office:value="8640000" calcext:value-type="float">
            <text:p>8640000</text:p>
          </table:table-cell>
          <table:table-cell table:formula="of:=[.B2080]/[.C2080]" office:value-type="float" office:value="0.00240625" calcext:value-type="float">
            <text:p>0,00240625000000000000</text:p>
          </table:table-cell>
          <table:table-cell table:formula="of:=[.D2081]-[.D2080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 table:formula="of:=[.B2080]+10" office:value-type="float" office:value="20800" calcext:value-type="float">
            <text:p>20800</text:p>
          </table:table-cell>
          <table:table-cell office:value-type="float" office:value="8640000" calcext:value-type="float">
            <text:p>8640000</text:p>
          </table:table-cell>
          <table:table-cell table:formula="of:=[.B2081]/[.C2081]" office:value-type="float" office:value="0.00240740740740741" calcext:value-type="float">
            <text:p>0,00240740740740741000</text:p>
          </table:table-cell>
          <table:table-cell table:formula="of:=[.D2082]-[.D2081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081" calcext:value-type="float">
            <text:p>2081</text:p>
          </table:table-cell>
          <table:table-cell table:formula="of:=[.B2081]+10" office:value-type="float" office:value="20810" calcext:value-type="float">
            <text:p>20810</text:p>
          </table:table-cell>
          <table:table-cell office:value-type="float" office:value="8640000" calcext:value-type="float">
            <text:p>8640000</text:p>
          </table:table-cell>
          <table:table-cell table:formula="of:=[.B2082]/[.C2082]" office:value-type="float" office:value="0.00240856481481481" calcext:value-type="float">
            <text:p>0,00240856481481481000</text:p>
          </table:table-cell>
          <table:table-cell table:formula="of:=[.D2083]-[.D2082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082" calcext:value-type="float">
            <text:p>2082</text:p>
          </table:table-cell>
          <table:table-cell table:formula="of:=[.B2082]+10" office:value-type="float" office:value="20820" calcext:value-type="float">
            <text:p>20820</text:p>
          </table:table-cell>
          <table:table-cell office:value-type="float" office:value="8640000" calcext:value-type="float">
            <text:p>8640000</text:p>
          </table:table-cell>
          <table:table-cell table:formula="of:=[.B2083]/[.C2083]" office:value-type="float" office:value="0.00240972222222222" calcext:value-type="float">
            <text:p>0,00240972222222222000</text:p>
          </table:table-cell>
          <table:table-cell table:formula="of:=[.D2084]-[.D2083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083" calcext:value-type="float">
            <text:p>2083</text:p>
          </table:table-cell>
          <table:table-cell table:formula="of:=[.B2083]+10" office:value-type="float" office:value="20830" calcext:value-type="float">
            <text:p>20830</text:p>
          </table:table-cell>
          <table:table-cell office:value-type="float" office:value="8640000" calcext:value-type="float">
            <text:p>8640000</text:p>
          </table:table-cell>
          <table:table-cell table:formula="of:=[.B2084]/[.C2084]" office:value-type="float" office:value="0.00241087962962963" calcext:value-type="float">
            <text:p>0,00241087962962963000</text:p>
          </table:table-cell>
          <table:table-cell table:formula="of:=[.D2085]-[.D2084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084" calcext:value-type="float">
            <text:p>2084</text:p>
          </table:table-cell>
          <table:table-cell table:formula="of:=[.B2084]+10" office:value-type="float" office:value="20840" calcext:value-type="float">
            <text:p>20840</text:p>
          </table:table-cell>
          <table:table-cell office:value-type="float" office:value="8640000" calcext:value-type="float">
            <text:p>8640000</text:p>
          </table:table-cell>
          <table:table-cell table:formula="of:=[.B2085]/[.C2085]" office:value-type="float" office:value="0.00241203703703704" calcext:value-type="float">
            <text:p>0,00241203703703704000</text:p>
          </table:table-cell>
          <table:table-cell table:formula="of:=[.D2086]-[.D2085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085" calcext:value-type="float">
            <text:p>2085</text:p>
          </table:table-cell>
          <table:table-cell table:formula="of:=[.B2085]+10" office:value-type="float" office:value="20850" calcext:value-type="float">
            <text:p>20850</text:p>
          </table:table-cell>
          <table:table-cell office:value-type="float" office:value="8640000" calcext:value-type="float">
            <text:p>8640000</text:p>
          </table:table-cell>
          <table:table-cell table:formula="of:=[.B2086]/[.C2086]" office:value-type="float" office:value="0.00241319444444444" calcext:value-type="float">
            <text:p>0,00241319444444444000</text:p>
          </table:table-cell>
          <table:table-cell table:formula="of:=[.D2087]-[.D2086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086" calcext:value-type="float">
            <text:p>2086</text:p>
          </table:table-cell>
          <table:table-cell table:formula="of:=[.B2086]+10" office:value-type="float" office:value="20860" calcext:value-type="float">
            <text:p>20860</text:p>
          </table:table-cell>
          <table:table-cell office:value-type="float" office:value="8640000" calcext:value-type="float">
            <text:p>8640000</text:p>
          </table:table-cell>
          <table:table-cell table:formula="of:=[.B2087]/[.C2087]" office:value-type="float" office:value="0.00241435185185185" calcext:value-type="float">
            <text:p>0,00241435185185185000</text:p>
          </table:table-cell>
          <table:table-cell table:formula="of:=[.D2088]-[.D2087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087" calcext:value-type="float">
            <text:p>2087</text:p>
          </table:table-cell>
          <table:table-cell table:formula="of:=[.B2087]+10" office:value-type="float" office:value="20870" calcext:value-type="float">
            <text:p>20870</text:p>
          </table:table-cell>
          <table:table-cell office:value-type="float" office:value="8640000" calcext:value-type="float">
            <text:p>8640000</text:p>
          </table:table-cell>
          <table:table-cell table:formula="of:=[.B2088]/[.C2088]" office:value-type="float" office:value="0.00241550925925926" calcext:value-type="float">
            <text:p>0,00241550925925926000</text:p>
          </table:table-cell>
          <table:table-cell table:formula="of:=[.D2089]-[.D2088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088" calcext:value-type="float">
            <text:p>2088</text:p>
          </table:table-cell>
          <table:table-cell table:formula="of:=[.B2088]+10" office:value-type="float" office:value="20880" calcext:value-type="float">
            <text:p>20880</text:p>
          </table:table-cell>
          <table:table-cell office:value-type="float" office:value="8640000" calcext:value-type="float">
            <text:p>8640000</text:p>
          </table:table-cell>
          <table:table-cell table:formula="of:=[.B2089]/[.C2089]" office:value-type="float" office:value="0.00241666666666667" calcext:value-type="float">
            <text:p>0,00241666666666667000</text:p>
          </table:table-cell>
          <table:table-cell table:formula="of:=[.D2090]-[.D2089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089" calcext:value-type="float">
            <text:p>2089</text:p>
          </table:table-cell>
          <table:table-cell table:formula="of:=[.B2089]+10" office:value-type="float" office:value="20890" calcext:value-type="float">
            <text:p>20890</text:p>
          </table:table-cell>
          <table:table-cell office:value-type="float" office:value="8640000" calcext:value-type="float">
            <text:p>8640000</text:p>
          </table:table-cell>
          <table:table-cell table:formula="of:=[.B2090]/[.C2090]" office:value-type="float" office:value="0.00241782407407407" calcext:value-type="float">
            <text:p>0,00241782407407407000</text:p>
          </table:table-cell>
          <table:table-cell table:formula="of:=[.D2091]-[.D2090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090" calcext:value-type="float">
            <text:p>2090</text:p>
          </table:table-cell>
          <table:table-cell table:formula="of:=[.B2090]+10" office:value-type="float" office:value="20900" calcext:value-type="float">
            <text:p>20900</text:p>
          </table:table-cell>
          <table:table-cell office:value-type="float" office:value="8640000" calcext:value-type="float">
            <text:p>8640000</text:p>
          </table:table-cell>
          <table:table-cell table:formula="of:=[.B2091]/[.C2091]" office:value-type="float" office:value="0.00241898148148148" calcext:value-type="float">
            <text:p>0,00241898148148148000</text:p>
          </table:table-cell>
          <table:table-cell table:formula="of:=[.D2092]-[.D2091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091" calcext:value-type="float">
            <text:p>2091</text:p>
          </table:table-cell>
          <table:table-cell table:formula="of:=[.B2091]+10" office:value-type="float" office:value="20910" calcext:value-type="float">
            <text:p>20910</text:p>
          </table:table-cell>
          <table:table-cell office:value-type="float" office:value="8640000" calcext:value-type="float">
            <text:p>8640000</text:p>
          </table:table-cell>
          <table:table-cell table:formula="of:=[.B2092]/[.C2092]" office:value-type="float" office:value="0.00242013888888889" calcext:value-type="float">
            <text:p>0,00242013888888889000</text:p>
          </table:table-cell>
          <table:table-cell table:formula="of:=[.D2093]-[.D2092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092" calcext:value-type="float">
            <text:p>2092</text:p>
          </table:table-cell>
          <table:table-cell table:formula="of:=[.B2092]+10" office:value-type="float" office:value="20920" calcext:value-type="float">
            <text:p>20920</text:p>
          </table:table-cell>
          <table:table-cell office:value-type="float" office:value="8640000" calcext:value-type="float">
            <text:p>8640000</text:p>
          </table:table-cell>
          <table:table-cell table:formula="of:=[.B2093]/[.C2093]" office:value-type="float" office:value="0.0024212962962963" calcext:value-type="float">
            <text:p>0,00242129629629630000</text:p>
          </table:table-cell>
          <table:table-cell table:formula="of:=[.D2094]-[.D2093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093" calcext:value-type="float">
            <text:p>2093</text:p>
          </table:table-cell>
          <table:table-cell table:formula="of:=[.B2093]+10" office:value-type="float" office:value="20930" calcext:value-type="float">
            <text:p>20930</text:p>
          </table:table-cell>
          <table:table-cell office:value-type="float" office:value="8640000" calcext:value-type="float">
            <text:p>8640000</text:p>
          </table:table-cell>
          <table:table-cell table:formula="of:=[.B2094]/[.C2094]" office:value-type="float" office:value="0.0024224537037037" calcext:value-type="float">
            <text:p>0,00242245370370370000</text:p>
          </table:table-cell>
          <table:table-cell table:formula="of:=[.D2095]-[.D2094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094" calcext:value-type="float">
            <text:p>2094</text:p>
          </table:table-cell>
          <table:table-cell table:formula="of:=[.B2094]+10" office:value-type="float" office:value="20940" calcext:value-type="float">
            <text:p>20940</text:p>
          </table:table-cell>
          <table:table-cell office:value-type="float" office:value="8640000" calcext:value-type="float">
            <text:p>8640000</text:p>
          </table:table-cell>
          <table:table-cell table:formula="of:=[.B2095]/[.C2095]" office:value-type="float" office:value="0.00242361111111111" calcext:value-type="float">
            <text:p>0,00242361111111111000</text:p>
          </table:table-cell>
          <table:table-cell table:formula="of:=[.D2096]-[.D2095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095" calcext:value-type="float">
            <text:p>2095</text:p>
          </table:table-cell>
          <table:table-cell table:formula="of:=[.B2095]+10" office:value-type="float" office:value="20950" calcext:value-type="float">
            <text:p>20950</text:p>
          </table:table-cell>
          <table:table-cell office:value-type="float" office:value="8640000" calcext:value-type="float">
            <text:p>8640000</text:p>
          </table:table-cell>
          <table:table-cell table:formula="of:=[.B2096]/[.C2096]" office:value-type="float" office:value="0.00242476851851852" calcext:value-type="float">
            <text:p>0,00242476851851852000</text:p>
          </table:table-cell>
          <table:table-cell table:formula="of:=[.D2097]-[.D2096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096" calcext:value-type="float">
            <text:p>2096</text:p>
          </table:table-cell>
          <table:table-cell table:formula="of:=[.B2096]+10" office:value-type="float" office:value="20960" calcext:value-type="float">
            <text:p>20960</text:p>
          </table:table-cell>
          <table:table-cell office:value-type="float" office:value="8640000" calcext:value-type="float">
            <text:p>8640000</text:p>
          </table:table-cell>
          <table:table-cell table:formula="of:=[.B2097]/[.C2097]" office:value-type="float" office:value="0.00242592592592593" calcext:value-type="float">
            <text:p>0,00242592592592593000</text:p>
          </table:table-cell>
          <table:table-cell table:formula="of:=[.D2098]-[.D2097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097" calcext:value-type="float">
            <text:p>2097</text:p>
          </table:table-cell>
          <table:table-cell table:formula="of:=[.B2097]+10" office:value-type="float" office:value="20970" calcext:value-type="float">
            <text:p>20970</text:p>
          </table:table-cell>
          <table:table-cell office:value-type="float" office:value="8640000" calcext:value-type="float">
            <text:p>8640000</text:p>
          </table:table-cell>
          <table:table-cell table:formula="of:=[.B2098]/[.C2098]" office:value-type="float" office:value="0.00242708333333333" calcext:value-type="float">
            <text:p>0,00242708333333333000</text:p>
          </table:table-cell>
          <table:table-cell table:formula="of:=[.D2099]-[.D2098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098" calcext:value-type="float">
            <text:p>2098</text:p>
          </table:table-cell>
          <table:table-cell table:formula="of:=[.B2098]+10" office:value-type="float" office:value="20980" calcext:value-type="float">
            <text:p>20980</text:p>
          </table:table-cell>
          <table:table-cell office:value-type="float" office:value="8640000" calcext:value-type="float">
            <text:p>8640000</text:p>
          </table:table-cell>
          <table:table-cell table:formula="of:=[.B2099]/[.C2099]" office:value-type="float" office:value="0.00242824074074074" calcext:value-type="float">
            <text:p>0,00242824074074074000</text:p>
          </table:table-cell>
          <table:table-cell table:formula="of:=[.D2100]-[.D2099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099" calcext:value-type="float">
            <text:p>2099</text:p>
          </table:table-cell>
          <table:table-cell table:formula="of:=[.B2099]+10" office:value-type="float" office:value="20990" calcext:value-type="float">
            <text:p>20990</text:p>
          </table:table-cell>
          <table:table-cell office:value-type="float" office:value="8640000" calcext:value-type="float">
            <text:p>8640000</text:p>
          </table:table-cell>
          <table:table-cell table:formula="of:=[.B2100]/[.C2100]" office:value-type="float" office:value="0.00242939814814815" calcext:value-type="float">
            <text:p>0,00242939814814815000</text:p>
          </table:table-cell>
          <table:table-cell table:formula="of:=[.D2101]-[.D2100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table:formula="of:=[.B2100]+10" office:value-type="float" office:value="21000" calcext:value-type="float">
            <text:p>21000</text:p>
          </table:table-cell>
          <table:table-cell office:value-type="float" office:value="8640000" calcext:value-type="float">
            <text:p>8640000</text:p>
          </table:table-cell>
          <table:table-cell table:formula="of:=[.B2101]/[.C2101]" office:value-type="float" office:value="0.00243055555555556" calcext:value-type="float">
            <text:p>0,00243055555555556000</text:p>
          </table:table-cell>
          <table:table-cell table:formula="of:=[.D2102]-[.D2101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101" calcext:value-type="float">
            <text:p>2101</text:p>
          </table:table-cell>
          <table:table-cell table:formula="of:=[.B2101]+10" office:value-type="float" office:value="21010" calcext:value-type="float">
            <text:p>21010</text:p>
          </table:table-cell>
          <table:table-cell office:value-type="float" office:value="8640000" calcext:value-type="float">
            <text:p>8640000</text:p>
          </table:table-cell>
          <table:table-cell table:formula="of:=[.B2102]/[.C2102]" office:value-type="float" office:value="0.00243171296296296" calcext:value-type="float">
            <text:p>0,00243171296296296000</text:p>
          </table:table-cell>
          <table:table-cell table:formula="of:=[.D2103]-[.D2102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102" calcext:value-type="float">
            <text:p>2102</text:p>
          </table:table-cell>
          <table:table-cell table:formula="of:=[.B2102]+10" office:value-type="float" office:value="21020" calcext:value-type="float">
            <text:p>21020</text:p>
          </table:table-cell>
          <table:table-cell office:value-type="float" office:value="8640000" calcext:value-type="float">
            <text:p>8640000</text:p>
          </table:table-cell>
          <table:table-cell table:formula="of:=[.B2103]/[.C2103]" office:value-type="float" office:value="0.00243287037037037" calcext:value-type="float">
            <text:p>0,00243287037037037000</text:p>
          </table:table-cell>
          <table:table-cell table:formula="of:=[.D2104]-[.D2103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103" calcext:value-type="float">
            <text:p>2103</text:p>
          </table:table-cell>
          <table:table-cell table:formula="of:=[.B2103]+10" office:value-type="float" office:value="21030" calcext:value-type="float">
            <text:p>21030</text:p>
          </table:table-cell>
          <table:table-cell office:value-type="float" office:value="8640000" calcext:value-type="float">
            <text:p>8640000</text:p>
          </table:table-cell>
          <table:table-cell table:formula="of:=[.B2104]/[.C2104]" office:value-type="float" office:value="0.00243402777777778" calcext:value-type="float">
            <text:p>0,00243402777777778000</text:p>
          </table:table-cell>
          <table:table-cell table:formula="of:=[.D2105]-[.D2104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104" calcext:value-type="float">
            <text:p>2104</text:p>
          </table:table-cell>
          <table:table-cell table:formula="of:=[.B2104]+10" office:value-type="float" office:value="21040" calcext:value-type="float">
            <text:p>21040</text:p>
          </table:table-cell>
          <table:table-cell office:value-type="float" office:value="8640000" calcext:value-type="float">
            <text:p>8640000</text:p>
          </table:table-cell>
          <table:table-cell table:formula="of:=[.B2105]/[.C2105]" office:value-type="float" office:value="0.00243518518518519" calcext:value-type="float">
            <text:p>0,00243518518518519000</text:p>
          </table:table-cell>
          <table:table-cell table:formula="of:=[.D2106]-[.D2105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105" calcext:value-type="float">
            <text:p>2105</text:p>
          </table:table-cell>
          <table:table-cell table:formula="of:=[.B2105]+10" office:value-type="float" office:value="21050" calcext:value-type="float">
            <text:p>21050</text:p>
          </table:table-cell>
          <table:table-cell office:value-type="float" office:value="8640000" calcext:value-type="float">
            <text:p>8640000</text:p>
          </table:table-cell>
          <table:table-cell table:formula="of:=[.B2106]/[.C2106]" office:value-type="float" office:value="0.00243634259259259" calcext:value-type="float">
            <text:p>0,00243634259259259000</text:p>
          </table:table-cell>
          <table:table-cell table:formula="of:=[.D2107]-[.D2106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106" calcext:value-type="float">
            <text:p>2106</text:p>
          </table:table-cell>
          <table:table-cell table:formula="of:=[.B2106]+10" office:value-type="float" office:value="21060" calcext:value-type="float">
            <text:p>21060</text:p>
          </table:table-cell>
          <table:table-cell office:value-type="float" office:value="8640000" calcext:value-type="float">
            <text:p>8640000</text:p>
          </table:table-cell>
          <table:table-cell table:formula="of:=[.B2107]/[.C2107]" office:value-type="float" office:value="0.0024375" calcext:value-type="float">
            <text:p>0,00243750000000000000</text:p>
          </table:table-cell>
          <table:table-cell table:formula="of:=[.D2108]-[.D2107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107" calcext:value-type="float">
            <text:p>2107</text:p>
          </table:table-cell>
          <table:table-cell table:formula="of:=[.B2107]+10" office:value-type="float" office:value="21070" calcext:value-type="float">
            <text:p>21070</text:p>
          </table:table-cell>
          <table:table-cell office:value-type="float" office:value="8640000" calcext:value-type="float">
            <text:p>8640000</text:p>
          </table:table-cell>
          <table:table-cell table:formula="of:=[.B2108]/[.C2108]" office:value-type="float" office:value="0.00243865740740741" calcext:value-type="float">
            <text:p>0,00243865740740741000</text:p>
          </table:table-cell>
          <table:table-cell table:formula="of:=[.D2109]-[.D2108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108" calcext:value-type="float">
            <text:p>2108</text:p>
          </table:table-cell>
          <table:table-cell table:formula="of:=[.B2108]+10" office:value-type="float" office:value="21080" calcext:value-type="float">
            <text:p>21080</text:p>
          </table:table-cell>
          <table:table-cell office:value-type="float" office:value="8640000" calcext:value-type="float">
            <text:p>8640000</text:p>
          </table:table-cell>
          <table:table-cell table:formula="of:=[.B2109]/[.C2109]" office:value-type="float" office:value="0.00243981481481482" calcext:value-type="float">
            <text:p>0,00243981481481482000</text:p>
          </table:table-cell>
          <table:table-cell table:formula="of:=[.D2110]-[.D2109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109" calcext:value-type="float">
            <text:p>2109</text:p>
          </table:table-cell>
          <table:table-cell table:formula="of:=[.B2109]+10" office:value-type="float" office:value="21090" calcext:value-type="float">
            <text:p>21090</text:p>
          </table:table-cell>
          <table:table-cell office:value-type="float" office:value="8640000" calcext:value-type="float">
            <text:p>8640000</text:p>
          </table:table-cell>
          <table:table-cell table:formula="of:=[.B2110]/[.C2110]" office:value-type="float" office:value="0.00244097222222222" calcext:value-type="float">
            <text:p>0,00244097222222222000</text:p>
          </table:table-cell>
          <table:table-cell table:formula="of:=[.D2111]-[.D2110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110" calcext:value-type="float">
            <text:p>2110</text:p>
          </table:table-cell>
          <table:table-cell table:formula="of:=[.B2110]+10" office:value-type="float" office:value="21100" calcext:value-type="float">
            <text:p>21100</text:p>
          </table:table-cell>
          <table:table-cell office:value-type="float" office:value="8640000" calcext:value-type="float">
            <text:p>8640000</text:p>
          </table:table-cell>
          <table:table-cell table:formula="of:=[.B2111]/[.C2111]" office:value-type="float" office:value="0.00244212962962963" calcext:value-type="float">
            <text:p>0,00244212962962963000</text:p>
          </table:table-cell>
          <table:table-cell table:formula="of:=[.D2112]-[.D2111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111" calcext:value-type="float">
            <text:p>2111</text:p>
          </table:table-cell>
          <table:table-cell table:formula="of:=[.B2111]+10" office:value-type="float" office:value="21110" calcext:value-type="float">
            <text:p>21110</text:p>
          </table:table-cell>
          <table:table-cell office:value-type="float" office:value="8640000" calcext:value-type="float">
            <text:p>8640000</text:p>
          </table:table-cell>
          <table:table-cell table:formula="of:=[.B2112]/[.C2112]" office:value-type="float" office:value="0.00244328703703704" calcext:value-type="float">
            <text:p>0,00244328703703704000</text:p>
          </table:table-cell>
          <table:table-cell table:formula="of:=[.D2113]-[.D2112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112" calcext:value-type="float">
            <text:p>2112</text:p>
          </table:table-cell>
          <table:table-cell table:formula="of:=[.B2112]+10" office:value-type="float" office:value="21120" calcext:value-type="float">
            <text:p>21120</text:p>
          </table:table-cell>
          <table:table-cell office:value-type="float" office:value="8640000" calcext:value-type="float">
            <text:p>8640000</text:p>
          </table:table-cell>
          <table:table-cell table:formula="of:=[.B2113]/[.C2113]" office:value-type="float" office:value="0.00244444444444444" calcext:value-type="float">
            <text:p>0,00244444444444444000</text:p>
          </table:table-cell>
          <table:table-cell table:formula="of:=[.D2114]-[.D2113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113" calcext:value-type="float">
            <text:p>2113</text:p>
          </table:table-cell>
          <table:table-cell table:formula="of:=[.B2113]+10" office:value-type="float" office:value="21130" calcext:value-type="float">
            <text:p>21130</text:p>
          </table:table-cell>
          <table:table-cell office:value-type="float" office:value="8640000" calcext:value-type="float">
            <text:p>8640000</text:p>
          </table:table-cell>
          <table:table-cell table:formula="of:=[.B2114]/[.C2114]" office:value-type="float" office:value="0.00244560185185185" calcext:value-type="float">
            <text:p>0,00244560185185185000</text:p>
          </table:table-cell>
          <table:table-cell table:formula="of:=[.D2115]-[.D2114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114" calcext:value-type="float">
            <text:p>2114</text:p>
          </table:table-cell>
          <table:table-cell table:formula="of:=[.B2114]+10" office:value-type="float" office:value="21140" calcext:value-type="float">
            <text:p>21140</text:p>
          </table:table-cell>
          <table:table-cell office:value-type="float" office:value="8640000" calcext:value-type="float">
            <text:p>8640000</text:p>
          </table:table-cell>
          <table:table-cell table:formula="of:=[.B2115]/[.C2115]" office:value-type="float" office:value="0.00244675925925926" calcext:value-type="float">
            <text:p>0,00244675925925926000</text:p>
          </table:table-cell>
          <table:table-cell table:formula="of:=[.D2116]-[.D2115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115" calcext:value-type="float">
            <text:p>2115</text:p>
          </table:table-cell>
          <table:table-cell table:formula="of:=[.B2115]+10" office:value-type="float" office:value="21150" calcext:value-type="float">
            <text:p>21150</text:p>
          </table:table-cell>
          <table:table-cell office:value-type="float" office:value="8640000" calcext:value-type="float">
            <text:p>8640000</text:p>
          </table:table-cell>
          <table:table-cell table:formula="of:=[.B2116]/[.C2116]" office:value-type="float" office:value="0.00244791666666667" calcext:value-type="float">
            <text:p>0,00244791666666667000</text:p>
          </table:table-cell>
          <table:table-cell table:formula="of:=[.D2117]-[.D2116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116" calcext:value-type="float">
            <text:p>2116</text:p>
          </table:table-cell>
          <table:table-cell table:formula="of:=[.B2116]+10" office:value-type="float" office:value="21160" calcext:value-type="float">
            <text:p>21160</text:p>
          </table:table-cell>
          <table:table-cell office:value-type="float" office:value="8640000" calcext:value-type="float">
            <text:p>8640000</text:p>
          </table:table-cell>
          <table:table-cell table:formula="of:=[.B2117]/[.C2117]" office:value-type="float" office:value="0.00244907407407407" calcext:value-type="float">
            <text:p>0,00244907407407407000</text:p>
          </table:table-cell>
          <table:table-cell table:formula="of:=[.D2118]-[.D2117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117" calcext:value-type="float">
            <text:p>2117</text:p>
          </table:table-cell>
          <table:table-cell table:formula="of:=[.B2117]+10" office:value-type="float" office:value="21170" calcext:value-type="float">
            <text:p>21170</text:p>
          </table:table-cell>
          <table:table-cell office:value-type="float" office:value="8640000" calcext:value-type="float">
            <text:p>8640000</text:p>
          </table:table-cell>
          <table:table-cell table:formula="of:=[.B2118]/[.C2118]" office:value-type="float" office:value="0.00245023148148148" calcext:value-type="float">
            <text:p>0,00245023148148148000</text:p>
          </table:table-cell>
          <table:table-cell table:formula="of:=[.D2119]-[.D2118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118" calcext:value-type="float">
            <text:p>2118</text:p>
          </table:table-cell>
          <table:table-cell table:formula="of:=[.B2118]+10" office:value-type="float" office:value="21180" calcext:value-type="float">
            <text:p>21180</text:p>
          </table:table-cell>
          <table:table-cell office:value-type="float" office:value="8640000" calcext:value-type="float">
            <text:p>8640000</text:p>
          </table:table-cell>
          <table:table-cell table:formula="of:=[.B2119]/[.C2119]" office:value-type="float" office:value="0.00245138888888889" calcext:value-type="float">
            <text:p>0,00245138888888889000</text:p>
          </table:table-cell>
          <table:table-cell table:formula="of:=[.D2120]-[.D2119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119" calcext:value-type="float">
            <text:p>2119</text:p>
          </table:table-cell>
          <table:table-cell table:formula="of:=[.B2119]+10" office:value-type="float" office:value="21190" calcext:value-type="float">
            <text:p>21190</text:p>
          </table:table-cell>
          <table:table-cell office:value-type="float" office:value="8640000" calcext:value-type="float">
            <text:p>8640000</text:p>
          </table:table-cell>
          <table:table-cell table:formula="of:=[.B2120]/[.C2120]" office:value-type="float" office:value="0.0024525462962963" calcext:value-type="float">
            <text:p>0,00245254629629630000</text:p>
          </table:table-cell>
          <table:table-cell table:formula="of:=[.D2121]-[.D2120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120" calcext:value-type="float">
            <text:p>2120</text:p>
          </table:table-cell>
          <table:table-cell table:formula="of:=[.B2120]+10" office:value-type="float" office:value="21200" calcext:value-type="float">
            <text:p>21200</text:p>
          </table:table-cell>
          <table:table-cell office:value-type="float" office:value="8640000" calcext:value-type="float">
            <text:p>8640000</text:p>
          </table:table-cell>
          <table:table-cell table:formula="of:=[.B2121]/[.C2121]" office:value-type="float" office:value="0.0024537037037037" calcext:value-type="float">
            <text:p>0,00245370370370370000</text:p>
          </table:table-cell>
          <table:table-cell table:formula="of:=[.D2122]-[.D2121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121" calcext:value-type="float">
            <text:p>2121</text:p>
          </table:table-cell>
          <table:table-cell table:formula="of:=[.B2121]+10" office:value-type="float" office:value="21210" calcext:value-type="float">
            <text:p>21210</text:p>
          </table:table-cell>
          <table:table-cell office:value-type="float" office:value="8640000" calcext:value-type="float">
            <text:p>8640000</text:p>
          </table:table-cell>
          <table:table-cell table:formula="of:=[.B2122]/[.C2122]" office:value-type="float" office:value="0.00245486111111111" calcext:value-type="float">
            <text:p>0,00245486111111111000</text:p>
          </table:table-cell>
          <table:table-cell table:formula="of:=[.D2123]-[.D2122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122" calcext:value-type="float">
            <text:p>2122</text:p>
          </table:table-cell>
          <table:table-cell table:formula="of:=[.B2122]+10" office:value-type="float" office:value="21220" calcext:value-type="float">
            <text:p>21220</text:p>
          </table:table-cell>
          <table:table-cell office:value-type="float" office:value="8640000" calcext:value-type="float">
            <text:p>8640000</text:p>
          </table:table-cell>
          <table:table-cell table:formula="of:=[.B2123]/[.C2123]" office:value-type="float" office:value="0.00245601851851852" calcext:value-type="float">
            <text:p>0,00245601851851852000</text:p>
          </table:table-cell>
          <table:table-cell table:formula="of:=[.D2124]-[.D2123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123" calcext:value-type="float">
            <text:p>2123</text:p>
          </table:table-cell>
          <table:table-cell table:formula="of:=[.B2123]+10" office:value-type="float" office:value="21230" calcext:value-type="float">
            <text:p>21230</text:p>
          </table:table-cell>
          <table:table-cell office:value-type="float" office:value="8640000" calcext:value-type="float">
            <text:p>8640000</text:p>
          </table:table-cell>
          <table:table-cell table:formula="of:=[.B2124]/[.C2124]" office:value-type="float" office:value="0.00245717592592593" calcext:value-type="float">
            <text:p>0,00245717592592593000</text:p>
          </table:table-cell>
          <table:table-cell table:formula="of:=[.D2125]-[.D2124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124" calcext:value-type="float">
            <text:p>2124</text:p>
          </table:table-cell>
          <table:table-cell table:formula="of:=[.B2124]+10" office:value-type="float" office:value="21240" calcext:value-type="float">
            <text:p>21240</text:p>
          </table:table-cell>
          <table:table-cell office:value-type="float" office:value="8640000" calcext:value-type="float">
            <text:p>8640000</text:p>
          </table:table-cell>
          <table:table-cell table:formula="of:=[.B2125]/[.C2125]" office:value-type="float" office:value="0.00245833333333333" calcext:value-type="float">
            <text:p>0,00245833333333333000</text:p>
          </table:table-cell>
          <table:table-cell table:formula="of:=[.D2126]-[.D2125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125" calcext:value-type="float">
            <text:p>2125</text:p>
          </table:table-cell>
          <table:table-cell table:formula="of:=[.B2125]+10" office:value-type="float" office:value="21250" calcext:value-type="float">
            <text:p>21250</text:p>
          </table:table-cell>
          <table:table-cell office:value-type="float" office:value="8640000" calcext:value-type="float">
            <text:p>8640000</text:p>
          </table:table-cell>
          <table:table-cell table:formula="of:=[.B2126]/[.C2126]" office:value-type="float" office:value="0.00245949074074074" calcext:value-type="float">
            <text:p>0,00245949074074074000</text:p>
          </table:table-cell>
          <table:table-cell table:formula="of:=[.D2127]-[.D2126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126" calcext:value-type="float">
            <text:p>2126</text:p>
          </table:table-cell>
          <table:table-cell table:formula="of:=[.B2126]+10" office:value-type="float" office:value="21260" calcext:value-type="float">
            <text:p>21260</text:p>
          </table:table-cell>
          <table:table-cell office:value-type="float" office:value="8640000" calcext:value-type="float">
            <text:p>8640000</text:p>
          </table:table-cell>
          <table:table-cell table:formula="of:=[.B2127]/[.C2127]" office:value-type="float" office:value="0.00246064814814815" calcext:value-type="float">
            <text:p>0,00246064814814815000</text:p>
          </table:table-cell>
          <table:table-cell table:formula="of:=[.D2128]-[.D2127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127" calcext:value-type="float">
            <text:p>2127</text:p>
          </table:table-cell>
          <table:table-cell table:formula="of:=[.B2127]+10" office:value-type="float" office:value="21270" calcext:value-type="float">
            <text:p>21270</text:p>
          </table:table-cell>
          <table:table-cell office:value-type="float" office:value="8640000" calcext:value-type="float">
            <text:p>8640000</text:p>
          </table:table-cell>
          <table:table-cell table:formula="of:=[.B2128]/[.C2128]" office:value-type="float" office:value="0.00246180555555556" calcext:value-type="float">
            <text:p>0,00246180555555556000</text:p>
          </table:table-cell>
          <table:table-cell table:formula="of:=[.D2129]-[.D2128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128" calcext:value-type="float">
            <text:p>2128</text:p>
          </table:table-cell>
          <table:table-cell table:formula="of:=[.B2128]+10" office:value-type="float" office:value="21280" calcext:value-type="float">
            <text:p>21280</text:p>
          </table:table-cell>
          <table:table-cell office:value-type="float" office:value="8640000" calcext:value-type="float">
            <text:p>8640000</text:p>
          </table:table-cell>
          <table:table-cell table:formula="of:=[.B2129]/[.C2129]" office:value-type="float" office:value="0.00246296296296296" calcext:value-type="float">
            <text:p>0,00246296296296296000</text:p>
          </table:table-cell>
          <table:table-cell table:formula="of:=[.D2130]-[.D2129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129" calcext:value-type="float">
            <text:p>2129</text:p>
          </table:table-cell>
          <table:table-cell table:formula="of:=[.B2129]+10" office:value-type="float" office:value="21290" calcext:value-type="float">
            <text:p>21290</text:p>
          </table:table-cell>
          <table:table-cell office:value-type="float" office:value="8640000" calcext:value-type="float">
            <text:p>8640000</text:p>
          </table:table-cell>
          <table:table-cell table:formula="of:=[.B2130]/[.C2130]" office:value-type="float" office:value="0.00246412037037037" calcext:value-type="float">
            <text:p>0,00246412037037037000</text:p>
          </table:table-cell>
          <table:table-cell table:formula="of:=[.D2131]-[.D2130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130" calcext:value-type="float">
            <text:p>2130</text:p>
          </table:table-cell>
          <table:table-cell table:formula="of:=[.B2130]+10" office:value-type="float" office:value="21300" calcext:value-type="float">
            <text:p>21300</text:p>
          </table:table-cell>
          <table:table-cell office:value-type="float" office:value="8640000" calcext:value-type="float">
            <text:p>8640000</text:p>
          </table:table-cell>
          <table:table-cell table:formula="of:=[.B2131]/[.C2131]" office:value-type="float" office:value="0.00246527777777778" calcext:value-type="float">
            <text:p>0,00246527777777778000</text:p>
          </table:table-cell>
          <table:table-cell table:formula="of:=[.D2132]-[.D2131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131" calcext:value-type="float">
            <text:p>2131</text:p>
          </table:table-cell>
          <table:table-cell table:formula="of:=[.B2131]+10" office:value-type="float" office:value="21310" calcext:value-type="float">
            <text:p>21310</text:p>
          </table:table-cell>
          <table:table-cell office:value-type="float" office:value="8640000" calcext:value-type="float">
            <text:p>8640000</text:p>
          </table:table-cell>
          <table:table-cell table:formula="of:=[.B2132]/[.C2132]" office:value-type="float" office:value="0.00246643518518519" calcext:value-type="float">
            <text:p>0,00246643518518519000</text:p>
          </table:table-cell>
          <table:table-cell table:formula="of:=[.D2133]-[.D2132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132" calcext:value-type="float">
            <text:p>2132</text:p>
          </table:table-cell>
          <table:table-cell table:formula="of:=[.B2132]+10" office:value-type="float" office:value="21320" calcext:value-type="float">
            <text:p>21320</text:p>
          </table:table-cell>
          <table:table-cell office:value-type="float" office:value="8640000" calcext:value-type="float">
            <text:p>8640000</text:p>
          </table:table-cell>
          <table:table-cell table:formula="of:=[.B2133]/[.C2133]" office:value-type="float" office:value="0.00246759259259259" calcext:value-type="float">
            <text:p>0,00246759259259259000</text:p>
          </table:table-cell>
          <table:table-cell table:formula="of:=[.D2134]-[.D2133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133" calcext:value-type="float">
            <text:p>2133</text:p>
          </table:table-cell>
          <table:table-cell table:formula="of:=[.B2133]+10" office:value-type="float" office:value="21330" calcext:value-type="float">
            <text:p>21330</text:p>
          </table:table-cell>
          <table:table-cell office:value-type="float" office:value="8640000" calcext:value-type="float">
            <text:p>8640000</text:p>
          </table:table-cell>
          <table:table-cell table:formula="of:=[.B2134]/[.C2134]" office:value-type="float" office:value="0.00246875" calcext:value-type="float">
            <text:p>0,00246875000000000000</text:p>
          </table:table-cell>
          <table:table-cell table:formula="of:=[.D2135]-[.D2134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134" calcext:value-type="float">
            <text:p>2134</text:p>
          </table:table-cell>
          <table:table-cell table:formula="of:=[.B2134]+10" office:value-type="float" office:value="21340" calcext:value-type="float">
            <text:p>21340</text:p>
          </table:table-cell>
          <table:table-cell office:value-type="float" office:value="8640000" calcext:value-type="float">
            <text:p>8640000</text:p>
          </table:table-cell>
          <table:table-cell table:formula="of:=[.B2135]/[.C2135]" office:value-type="float" office:value="0.00246990740740741" calcext:value-type="float">
            <text:p>0,00246990740740741000</text:p>
          </table:table-cell>
          <table:table-cell table:formula="of:=[.D2136]-[.D2135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135" calcext:value-type="float">
            <text:p>2135</text:p>
          </table:table-cell>
          <table:table-cell table:formula="of:=[.B2135]+10" office:value-type="float" office:value="21350" calcext:value-type="float">
            <text:p>21350</text:p>
          </table:table-cell>
          <table:table-cell office:value-type="float" office:value="8640000" calcext:value-type="float">
            <text:p>8640000</text:p>
          </table:table-cell>
          <table:table-cell table:formula="of:=[.B2136]/[.C2136]" office:value-type="float" office:value="0.00247106481481482" calcext:value-type="float">
            <text:p>0,00247106481481482000</text:p>
          </table:table-cell>
          <table:table-cell table:formula="of:=[.D2137]-[.D2136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136" calcext:value-type="float">
            <text:p>2136</text:p>
          </table:table-cell>
          <table:table-cell table:formula="of:=[.B2136]+10" office:value-type="float" office:value="21360" calcext:value-type="float">
            <text:p>21360</text:p>
          </table:table-cell>
          <table:table-cell office:value-type="float" office:value="8640000" calcext:value-type="float">
            <text:p>8640000</text:p>
          </table:table-cell>
          <table:table-cell table:formula="of:=[.B2137]/[.C2137]" office:value-type="float" office:value="0.00247222222222222" calcext:value-type="float">
            <text:p>0,00247222222222222000</text:p>
          </table:table-cell>
          <table:table-cell table:formula="of:=[.D2138]-[.D2137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137" calcext:value-type="float">
            <text:p>2137</text:p>
          </table:table-cell>
          <table:table-cell table:formula="of:=[.B2137]+10" office:value-type="float" office:value="21370" calcext:value-type="float">
            <text:p>21370</text:p>
          </table:table-cell>
          <table:table-cell office:value-type="float" office:value="8640000" calcext:value-type="float">
            <text:p>8640000</text:p>
          </table:table-cell>
          <table:table-cell table:formula="of:=[.B2138]/[.C2138]" office:value-type="float" office:value="0.00247337962962963" calcext:value-type="float">
            <text:p>0,00247337962962963000</text:p>
          </table:table-cell>
          <table:table-cell table:formula="of:=[.D2139]-[.D2138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138" calcext:value-type="float">
            <text:p>2138</text:p>
          </table:table-cell>
          <table:table-cell table:formula="of:=[.B2138]+10" office:value-type="float" office:value="21380" calcext:value-type="float">
            <text:p>21380</text:p>
          </table:table-cell>
          <table:table-cell office:value-type="float" office:value="8640000" calcext:value-type="float">
            <text:p>8640000</text:p>
          </table:table-cell>
          <table:table-cell table:formula="of:=[.B2139]/[.C2139]" office:value-type="float" office:value="0.00247453703703704" calcext:value-type="float">
            <text:p>0,00247453703703704000</text:p>
          </table:table-cell>
          <table:table-cell table:formula="of:=[.D2140]-[.D2139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139" calcext:value-type="float">
            <text:p>2139</text:p>
          </table:table-cell>
          <table:table-cell table:formula="of:=[.B2139]+10" office:value-type="float" office:value="21390" calcext:value-type="float">
            <text:p>21390</text:p>
          </table:table-cell>
          <table:table-cell office:value-type="float" office:value="8640000" calcext:value-type="float">
            <text:p>8640000</text:p>
          </table:table-cell>
          <table:table-cell table:formula="of:=[.B2140]/[.C2140]" office:value-type="float" office:value="0.00247569444444444" calcext:value-type="float">
            <text:p>0,00247569444444444000</text:p>
          </table:table-cell>
          <table:table-cell table:formula="of:=[.D2141]-[.D2140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140" calcext:value-type="float">
            <text:p>2140</text:p>
          </table:table-cell>
          <table:table-cell table:formula="of:=[.B2140]+10" office:value-type="float" office:value="21400" calcext:value-type="float">
            <text:p>21400</text:p>
          </table:table-cell>
          <table:table-cell office:value-type="float" office:value="8640000" calcext:value-type="float">
            <text:p>8640000</text:p>
          </table:table-cell>
          <table:table-cell table:formula="of:=[.B2141]/[.C2141]" office:value-type="float" office:value="0.00247685185185185" calcext:value-type="float">
            <text:p>0,00247685185185185000</text:p>
          </table:table-cell>
          <table:table-cell table:formula="of:=[.D2142]-[.D2141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141" calcext:value-type="float">
            <text:p>2141</text:p>
          </table:table-cell>
          <table:table-cell table:formula="of:=[.B2141]+10" office:value-type="float" office:value="21410" calcext:value-type="float">
            <text:p>21410</text:p>
          </table:table-cell>
          <table:table-cell office:value-type="float" office:value="8640000" calcext:value-type="float">
            <text:p>8640000</text:p>
          </table:table-cell>
          <table:table-cell table:formula="of:=[.B2142]/[.C2142]" office:value-type="float" office:value="0.00247800925925926" calcext:value-type="float">
            <text:p>0,00247800925925926000</text:p>
          </table:table-cell>
          <table:table-cell table:formula="of:=[.D2143]-[.D2142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142" calcext:value-type="float">
            <text:p>2142</text:p>
          </table:table-cell>
          <table:table-cell table:formula="of:=[.B2142]+10" office:value-type="float" office:value="21420" calcext:value-type="float">
            <text:p>21420</text:p>
          </table:table-cell>
          <table:table-cell office:value-type="float" office:value="8640000" calcext:value-type="float">
            <text:p>8640000</text:p>
          </table:table-cell>
          <table:table-cell table:formula="of:=[.B2143]/[.C2143]" office:value-type="float" office:value="0.00247916666666667" calcext:value-type="float">
            <text:p>0,00247916666666667000</text:p>
          </table:table-cell>
          <table:table-cell table:formula="of:=[.D2144]-[.D2143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143" calcext:value-type="float">
            <text:p>2143</text:p>
          </table:table-cell>
          <table:table-cell table:formula="of:=[.B2143]+10" office:value-type="float" office:value="21430" calcext:value-type="float">
            <text:p>21430</text:p>
          </table:table-cell>
          <table:table-cell office:value-type="float" office:value="8640000" calcext:value-type="float">
            <text:p>8640000</text:p>
          </table:table-cell>
          <table:table-cell table:formula="of:=[.B2144]/[.C2144]" office:value-type="float" office:value="0.00248032407407407" calcext:value-type="float">
            <text:p>0,00248032407407407000</text:p>
          </table:table-cell>
          <table:table-cell table:formula="of:=[.D2145]-[.D2144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144" calcext:value-type="float">
            <text:p>2144</text:p>
          </table:table-cell>
          <table:table-cell table:formula="of:=[.B2144]+10" office:value-type="float" office:value="21440" calcext:value-type="float">
            <text:p>21440</text:p>
          </table:table-cell>
          <table:table-cell office:value-type="float" office:value="8640000" calcext:value-type="float">
            <text:p>8640000</text:p>
          </table:table-cell>
          <table:table-cell table:formula="of:=[.B2145]/[.C2145]" office:value-type="float" office:value="0.00248148148148148" calcext:value-type="float">
            <text:p>0,00248148148148148000</text:p>
          </table:table-cell>
          <table:table-cell table:formula="of:=[.D2146]-[.D2145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145" calcext:value-type="float">
            <text:p>2145</text:p>
          </table:table-cell>
          <table:table-cell table:formula="of:=[.B2145]+10" office:value-type="float" office:value="21450" calcext:value-type="float">
            <text:p>21450</text:p>
          </table:table-cell>
          <table:table-cell office:value-type="float" office:value="8640000" calcext:value-type="float">
            <text:p>8640000</text:p>
          </table:table-cell>
          <table:table-cell table:formula="of:=[.B2146]/[.C2146]" office:value-type="float" office:value="0.00248263888888889" calcext:value-type="float">
            <text:p>0,00248263888888889000</text:p>
          </table:table-cell>
          <table:table-cell table:formula="of:=[.D2147]-[.D2146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146" calcext:value-type="float">
            <text:p>2146</text:p>
          </table:table-cell>
          <table:table-cell table:formula="of:=[.B2146]+10" office:value-type="float" office:value="21460" calcext:value-type="float">
            <text:p>21460</text:p>
          </table:table-cell>
          <table:table-cell office:value-type="float" office:value="8640000" calcext:value-type="float">
            <text:p>8640000</text:p>
          </table:table-cell>
          <table:table-cell table:formula="of:=[.B2147]/[.C2147]" office:value-type="float" office:value="0.0024837962962963" calcext:value-type="float">
            <text:p>0,00248379629629630000</text:p>
          </table:table-cell>
          <table:table-cell table:formula="of:=[.D2148]-[.D2147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147" calcext:value-type="float">
            <text:p>2147</text:p>
          </table:table-cell>
          <table:table-cell table:formula="of:=[.B2147]+10" office:value-type="float" office:value="21470" calcext:value-type="float">
            <text:p>21470</text:p>
          </table:table-cell>
          <table:table-cell office:value-type="float" office:value="8640000" calcext:value-type="float">
            <text:p>8640000</text:p>
          </table:table-cell>
          <table:table-cell table:formula="of:=[.B2148]/[.C2148]" office:value-type="float" office:value="0.0024849537037037" calcext:value-type="float">
            <text:p>0,00248495370370370000</text:p>
          </table:table-cell>
          <table:table-cell table:formula="of:=[.D2149]-[.D2148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148" calcext:value-type="float">
            <text:p>2148</text:p>
          </table:table-cell>
          <table:table-cell table:formula="of:=[.B2148]+10" office:value-type="float" office:value="21480" calcext:value-type="float">
            <text:p>21480</text:p>
          </table:table-cell>
          <table:table-cell office:value-type="float" office:value="8640000" calcext:value-type="float">
            <text:p>8640000</text:p>
          </table:table-cell>
          <table:table-cell table:formula="of:=[.B2149]/[.C2149]" office:value-type="float" office:value="0.00248611111111111" calcext:value-type="float">
            <text:p>0,00248611111111111000</text:p>
          </table:table-cell>
          <table:table-cell table:formula="of:=[.D2150]-[.D2149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149" calcext:value-type="float">
            <text:p>2149</text:p>
          </table:table-cell>
          <table:table-cell table:formula="of:=[.B2149]+10" office:value-type="float" office:value="21490" calcext:value-type="float">
            <text:p>21490</text:p>
          </table:table-cell>
          <table:table-cell office:value-type="float" office:value="8640000" calcext:value-type="float">
            <text:p>8640000</text:p>
          </table:table-cell>
          <table:table-cell table:formula="of:=[.B2150]/[.C2150]" office:value-type="float" office:value="0.00248726851851852" calcext:value-type="float">
            <text:p>0,00248726851851852000</text:p>
          </table:table-cell>
          <table:table-cell table:formula="of:=[.D2151]-[.D2150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table:formula="of:=[.B2150]+10" office:value-type="float" office:value="21500" calcext:value-type="float">
            <text:p>21500</text:p>
          </table:table-cell>
          <table:table-cell office:value-type="float" office:value="8640000" calcext:value-type="float">
            <text:p>8640000</text:p>
          </table:table-cell>
          <table:table-cell table:formula="of:=[.B2151]/[.C2151]" office:value-type="float" office:value="0.00248842592592593" calcext:value-type="float">
            <text:p>0,00248842592592593000</text:p>
          </table:table-cell>
          <table:table-cell table:formula="of:=[.D2152]-[.D2151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151" calcext:value-type="float">
            <text:p>2151</text:p>
          </table:table-cell>
          <table:table-cell table:formula="of:=[.B2151]+10" office:value-type="float" office:value="21510" calcext:value-type="float">
            <text:p>21510</text:p>
          </table:table-cell>
          <table:table-cell office:value-type="float" office:value="8640000" calcext:value-type="float">
            <text:p>8640000</text:p>
          </table:table-cell>
          <table:table-cell table:formula="of:=[.B2152]/[.C2152]" office:value-type="float" office:value="0.00248958333333333" calcext:value-type="float">
            <text:p>0,00248958333333333000</text:p>
          </table:table-cell>
          <table:table-cell table:formula="of:=[.D2153]-[.D2152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152" calcext:value-type="float">
            <text:p>2152</text:p>
          </table:table-cell>
          <table:table-cell table:formula="of:=[.B2152]+10" office:value-type="float" office:value="21520" calcext:value-type="float">
            <text:p>21520</text:p>
          </table:table-cell>
          <table:table-cell office:value-type="float" office:value="8640000" calcext:value-type="float">
            <text:p>8640000</text:p>
          </table:table-cell>
          <table:table-cell table:formula="of:=[.B2153]/[.C2153]" office:value-type="float" office:value="0.00249074074074074" calcext:value-type="float">
            <text:p>0,00249074074074074000</text:p>
          </table:table-cell>
          <table:table-cell table:formula="of:=[.D2154]-[.D2153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153" calcext:value-type="float">
            <text:p>2153</text:p>
          </table:table-cell>
          <table:table-cell table:formula="of:=[.B2153]+10" office:value-type="float" office:value="21530" calcext:value-type="float">
            <text:p>21530</text:p>
          </table:table-cell>
          <table:table-cell office:value-type="float" office:value="8640000" calcext:value-type="float">
            <text:p>8640000</text:p>
          </table:table-cell>
          <table:table-cell table:formula="of:=[.B2154]/[.C2154]" office:value-type="float" office:value="0.00249189814814815" calcext:value-type="float">
            <text:p>0,00249189814814815000</text:p>
          </table:table-cell>
          <table:table-cell table:formula="of:=[.D2155]-[.D2154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154" calcext:value-type="float">
            <text:p>2154</text:p>
          </table:table-cell>
          <table:table-cell table:formula="of:=[.B2154]+10" office:value-type="float" office:value="21540" calcext:value-type="float">
            <text:p>21540</text:p>
          </table:table-cell>
          <table:table-cell office:value-type="float" office:value="8640000" calcext:value-type="float">
            <text:p>8640000</text:p>
          </table:table-cell>
          <table:table-cell table:formula="of:=[.B2155]/[.C2155]" office:value-type="float" office:value="0.00249305555555556" calcext:value-type="float">
            <text:p>0,00249305555555556000</text:p>
          </table:table-cell>
          <table:table-cell table:formula="of:=[.D2156]-[.D2155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155" calcext:value-type="float">
            <text:p>2155</text:p>
          </table:table-cell>
          <table:table-cell table:formula="of:=[.B2155]+10" office:value-type="float" office:value="21550" calcext:value-type="float">
            <text:p>21550</text:p>
          </table:table-cell>
          <table:table-cell office:value-type="float" office:value="8640000" calcext:value-type="float">
            <text:p>8640000</text:p>
          </table:table-cell>
          <table:table-cell table:formula="of:=[.B2156]/[.C2156]" office:value-type="float" office:value="0.00249421296296296" calcext:value-type="float">
            <text:p>0,00249421296296296000</text:p>
          </table:table-cell>
          <table:table-cell table:formula="of:=[.D2157]-[.D2156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156" calcext:value-type="float">
            <text:p>2156</text:p>
          </table:table-cell>
          <table:table-cell table:formula="of:=[.B2156]+10" office:value-type="float" office:value="21560" calcext:value-type="float">
            <text:p>21560</text:p>
          </table:table-cell>
          <table:table-cell office:value-type="float" office:value="8640000" calcext:value-type="float">
            <text:p>8640000</text:p>
          </table:table-cell>
          <table:table-cell table:formula="of:=[.B2157]/[.C2157]" office:value-type="float" office:value="0.00249537037037037" calcext:value-type="float">
            <text:p>0,00249537037037037000</text:p>
          </table:table-cell>
          <table:table-cell table:formula="of:=[.D2158]-[.D2157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157" calcext:value-type="float">
            <text:p>2157</text:p>
          </table:table-cell>
          <table:table-cell table:formula="of:=[.B2157]+10" office:value-type="float" office:value="21570" calcext:value-type="float">
            <text:p>21570</text:p>
          </table:table-cell>
          <table:table-cell office:value-type="float" office:value="8640000" calcext:value-type="float">
            <text:p>8640000</text:p>
          </table:table-cell>
          <table:table-cell table:formula="of:=[.B2158]/[.C2158]" office:value-type="float" office:value="0.00249652777777778" calcext:value-type="float">
            <text:p>0,00249652777777778000</text:p>
          </table:table-cell>
          <table:table-cell table:formula="of:=[.D2159]-[.D2158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158" calcext:value-type="float">
            <text:p>2158</text:p>
          </table:table-cell>
          <table:table-cell table:formula="of:=[.B2158]+10" office:value-type="float" office:value="21580" calcext:value-type="float">
            <text:p>21580</text:p>
          </table:table-cell>
          <table:table-cell office:value-type="float" office:value="8640000" calcext:value-type="float">
            <text:p>8640000</text:p>
          </table:table-cell>
          <table:table-cell table:formula="of:=[.B2159]/[.C2159]" office:value-type="float" office:value="0.00249768518518519" calcext:value-type="float">
            <text:p>0,00249768518518519000</text:p>
          </table:table-cell>
          <table:table-cell table:formula="of:=[.D2160]-[.D2159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159" calcext:value-type="float">
            <text:p>2159</text:p>
          </table:table-cell>
          <table:table-cell table:formula="of:=[.B2159]+10" office:value-type="float" office:value="21590" calcext:value-type="float">
            <text:p>21590</text:p>
          </table:table-cell>
          <table:table-cell office:value-type="float" office:value="8640000" calcext:value-type="float">
            <text:p>8640000</text:p>
          </table:table-cell>
          <table:table-cell table:formula="of:=[.B2160]/[.C2160]" office:value-type="float" office:value="0.00249884259259259" calcext:value-type="float">
            <text:p>0,00249884259259259000</text:p>
          </table:table-cell>
          <table:table-cell table:formula="of:=[.D2161]-[.D2160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160" calcext:value-type="float">
            <text:p>2160</text:p>
          </table:table-cell>
          <table:table-cell table:formula="of:=[.B2160]+10" office:value-type="float" office:value="21600" calcext:value-type="float">
            <text:p>21600</text:p>
          </table:table-cell>
          <table:table-cell office:value-type="float" office:value="8640000" calcext:value-type="float">
            <text:p>8640000</text:p>
          </table:table-cell>
          <table:table-cell table:formula="of:=[.B2161]/[.C2161]" office:value-type="float" office:value="0.0025" calcext:value-type="float">
            <text:p>0,00250000000000000000</text:p>
          </table:table-cell>
          <table:table-cell table:formula="of:=[.D2162]-[.D2161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161" calcext:value-type="float">
            <text:p>2161</text:p>
          </table:table-cell>
          <table:table-cell table:formula="of:=[.B2161]+10" office:value-type="float" office:value="21610" calcext:value-type="float">
            <text:p>21610</text:p>
          </table:table-cell>
          <table:table-cell office:value-type="float" office:value="8640000" calcext:value-type="float">
            <text:p>8640000</text:p>
          </table:table-cell>
          <table:table-cell table:formula="of:=[.B2162]/[.C2162]" office:value-type="float" office:value="0.00250115740740741" calcext:value-type="float">
            <text:p>0,00250115740740741000</text:p>
          </table:table-cell>
          <table:table-cell table:formula="of:=[.D2163]-[.D2162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162" calcext:value-type="float">
            <text:p>2162</text:p>
          </table:table-cell>
          <table:table-cell table:formula="of:=[.B2162]+10" office:value-type="float" office:value="21620" calcext:value-type="float">
            <text:p>21620</text:p>
          </table:table-cell>
          <table:table-cell office:value-type="float" office:value="8640000" calcext:value-type="float">
            <text:p>8640000</text:p>
          </table:table-cell>
          <table:table-cell table:formula="of:=[.B2163]/[.C2163]" office:value-type="float" office:value="0.00250231481481482" calcext:value-type="float">
            <text:p>0,00250231481481482000</text:p>
          </table:table-cell>
          <table:table-cell table:formula="of:=[.D2164]-[.D2163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163" calcext:value-type="float">
            <text:p>2163</text:p>
          </table:table-cell>
          <table:table-cell table:formula="of:=[.B2163]+10" office:value-type="float" office:value="21630" calcext:value-type="float">
            <text:p>21630</text:p>
          </table:table-cell>
          <table:table-cell office:value-type="float" office:value="8640000" calcext:value-type="float">
            <text:p>8640000</text:p>
          </table:table-cell>
          <table:table-cell table:formula="of:=[.B2164]/[.C2164]" office:value-type="float" office:value="0.00250347222222222" calcext:value-type="float">
            <text:p>0,00250347222222222000</text:p>
          </table:table-cell>
          <table:table-cell table:formula="of:=[.D2165]-[.D2164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164" calcext:value-type="float">
            <text:p>2164</text:p>
          </table:table-cell>
          <table:table-cell table:formula="of:=[.B2164]+10" office:value-type="float" office:value="21640" calcext:value-type="float">
            <text:p>21640</text:p>
          </table:table-cell>
          <table:table-cell office:value-type="float" office:value="8640000" calcext:value-type="float">
            <text:p>8640000</text:p>
          </table:table-cell>
          <table:table-cell table:formula="of:=[.B2165]/[.C2165]" office:value-type="float" office:value="0.00250462962962963" calcext:value-type="float">
            <text:p>0,00250462962962963000</text:p>
          </table:table-cell>
          <table:table-cell table:formula="of:=[.D2166]-[.D2165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165" calcext:value-type="float">
            <text:p>2165</text:p>
          </table:table-cell>
          <table:table-cell table:formula="of:=[.B2165]+10" office:value-type="float" office:value="21650" calcext:value-type="float">
            <text:p>21650</text:p>
          </table:table-cell>
          <table:table-cell office:value-type="float" office:value="8640000" calcext:value-type="float">
            <text:p>8640000</text:p>
          </table:table-cell>
          <table:table-cell table:formula="of:=[.B2166]/[.C2166]" office:value-type="float" office:value="0.00250578703703704" calcext:value-type="float">
            <text:p>0,00250578703703704000</text:p>
          </table:table-cell>
          <table:table-cell table:formula="of:=[.D2167]-[.D2166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166" calcext:value-type="float">
            <text:p>2166</text:p>
          </table:table-cell>
          <table:table-cell table:formula="of:=[.B2166]+10" office:value-type="float" office:value="21660" calcext:value-type="float">
            <text:p>21660</text:p>
          </table:table-cell>
          <table:table-cell office:value-type="float" office:value="8640000" calcext:value-type="float">
            <text:p>8640000</text:p>
          </table:table-cell>
          <table:table-cell table:formula="of:=[.B2167]/[.C2167]" office:value-type="float" office:value="0.00250694444444444" calcext:value-type="float">
            <text:p>0,00250694444444444000</text:p>
          </table:table-cell>
          <table:table-cell table:formula="of:=[.D2168]-[.D2167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167" calcext:value-type="float">
            <text:p>2167</text:p>
          </table:table-cell>
          <table:table-cell table:formula="of:=[.B2167]+10" office:value-type="float" office:value="21670" calcext:value-type="float">
            <text:p>21670</text:p>
          </table:table-cell>
          <table:table-cell office:value-type="float" office:value="8640000" calcext:value-type="float">
            <text:p>8640000</text:p>
          </table:table-cell>
          <table:table-cell table:formula="of:=[.B2168]/[.C2168]" office:value-type="float" office:value="0.00250810185185185" calcext:value-type="float">
            <text:p>0,00250810185185185000</text:p>
          </table:table-cell>
          <table:table-cell table:formula="of:=[.D2169]-[.D2168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168" calcext:value-type="float">
            <text:p>2168</text:p>
          </table:table-cell>
          <table:table-cell table:formula="of:=[.B2168]+10" office:value-type="float" office:value="21680" calcext:value-type="float">
            <text:p>21680</text:p>
          </table:table-cell>
          <table:table-cell office:value-type="float" office:value="8640000" calcext:value-type="float">
            <text:p>8640000</text:p>
          </table:table-cell>
          <table:table-cell table:formula="of:=[.B2169]/[.C2169]" office:value-type="float" office:value="0.00250925925925926" calcext:value-type="float">
            <text:p>0,00250925925925926000</text:p>
          </table:table-cell>
          <table:table-cell table:formula="of:=[.D2170]-[.D2169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169" calcext:value-type="float">
            <text:p>2169</text:p>
          </table:table-cell>
          <table:table-cell table:formula="of:=[.B2169]+10" office:value-type="float" office:value="21690" calcext:value-type="float">
            <text:p>21690</text:p>
          </table:table-cell>
          <table:table-cell office:value-type="float" office:value="8640000" calcext:value-type="float">
            <text:p>8640000</text:p>
          </table:table-cell>
          <table:table-cell table:formula="of:=[.B2170]/[.C2170]" office:value-type="float" office:value="0.00251041666666667" calcext:value-type="float">
            <text:p>0,00251041666666667000</text:p>
          </table:table-cell>
          <table:table-cell table:formula="of:=[.D2171]-[.D2170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170" calcext:value-type="float">
            <text:p>2170</text:p>
          </table:table-cell>
          <table:table-cell table:formula="of:=[.B2170]+10" office:value-type="float" office:value="21700" calcext:value-type="float">
            <text:p>21700</text:p>
          </table:table-cell>
          <table:table-cell office:value-type="float" office:value="8640000" calcext:value-type="float">
            <text:p>8640000</text:p>
          </table:table-cell>
          <table:table-cell table:formula="of:=[.B2171]/[.C2171]" office:value-type="float" office:value="0.00251157407407407" calcext:value-type="float">
            <text:p>0,00251157407407407000</text:p>
          </table:table-cell>
          <table:table-cell table:formula="of:=[.D2172]-[.D2171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171" calcext:value-type="float">
            <text:p>2171</text:p>
          </table:table-cell>
          <table:table-cell table:formula="of:=[.B2171]+10" office:value-type="float" office:value="21710" calcext:value-type="float">
            <text:p>21710</text:p>
          </table:table-cell>
          <table:table-cell office:value-type="float" office:value="8640000" calcext:value-type="float">
            <text:p>8640000</text:p>
          </table:table-cell>
          <table:table-cell table:formula="of:=[.B2172]/[.C2172]" office:value-type="float" office:value="0.00251273148148148" calcext:value-type="float">
            <text:p>0,00251273148148148000</text:p>
          </table:table-cell>
          <table:table-cell table:formula="of:=[.D2173]-[.D2172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172" calcext:value-type="float">
            <text:p>2172</text:p>
          </table:table-cell>
          <table:table-cell table:formula="of:=[.B2172]+10" office:value-type="float" office:value="21720" calcext:value-type="float">
            <text:p>21720</text:p>
          </table:table-cell>
          <table:table-cell office:value-type="float" office:value="8640000" calcext:value-type="float">
            <text:p>8640000</text:p>
          </table:table-cell>
          <table:table-cell table:formula="of:=[.B2173]/[.C2173]" office:value-type="float" office:value="0.00251388888888889" calcext:value-type="float">
            <text:p>0,00251388888888889000</text:p>
          </table:table-cell>
          <table:table-cell table:formula="of:=[.D2174]-[.D2173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173" calcext:value-type="float">
            <text:p>2173</text:p>
          </table:table-cell>
          <table:table-cell table:formula="of:=[.B2173]+10" office:value-type="float" office:value="21730" calcext:value-type="float">
            <text:p>21730</text:p>
          </table:table-cell>
          <table:table-cell office:value-type="float" office:value="8640000" calcext:value-type="float">
            <text:p>8640000</text:p>
          </table:table-cell>
          <table:table-cell table:formula="of:=[.B2174]/[.C2174]" office:value-type="float" office:value="0.0025150462962963" calcext:value-type="float">
            <text:p>0,00251504629629630000</text:p>
          </table:table-cell>
          <table:table-cell table:formula="of:=[.D2175]-[.D2174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174" calcext:value-type="float">
            <text:p>2174</text:p>
          </table:table-cell>
          <table:table-cell table:formula="of:=[.B2174]+10" office:value-type="float" office:value="21740" calcext:value-type="float">
            <text:p>21740</text:p>
          </table:table-cell>
          <table:table-cell office:value-type="float" office:value="8640000" calcext:value-type="float">
            <text:p>8640000</text:p>
          </table:table-cell>
          <table:table-cell table:formula="of:=[.B2175]/[.C2175]" office:value-type="float" office:value="0.0025162037037037" calcext:value-type="float">
            <text:p>0,00251620370370370000</text:p>
          </table:table-cell>
          <table:table-cell table:formula="of:=[.D2176]-[.D2175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175" calcext:value-type="float">
            <text:p>2175</text:p>
          </table:table-cell>
          <table:table-cell table:formula="of:=[.B2175]+10" office:value-type="float" office:value="21750" calcext:value-type="float">
            <text:p>21750</text:p>
          </table:table-cell>
          <table:table-cell office:value-type="float" office:value="8640000" calcext:value-type="float">
            <text:p>8640000</text:p>
          </table:table-cell>
          <table:table-cell table:formula="of:=[.B2176]/[.C2176]" office:value-type="float" office:value="0.00251736111111111" calcext:value-type="float">
            <text:p>0,00251736111111111000</text:p>
          </table:table-cell>
          <table:table-cell table:formula="of:=[.D2177]-[.D2176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176" calcext:value-type="float">
            <text:p>2176</text:p>
          </table:table-cell>
          <table:table-cell table:formula="of:=[.B2176]+10" office:value-type="float" office:value="21760" calcext:value-type="float">
            <text:p>21760</text:p>
          </table:table-cell>
          <table:table-cell office:value-type="float" office:value="8640000" calcext:value-type="float">
            <text:p>8640000</text:p>
          </table:table-cell>
          <table:table-cell table:formula="of:=[.B2177]/[.C2177]" office:value-type="float" office:value="0.00251851851851852" calcext:value-type="float">
            <text:p>0,00251851851851852000</text:p>
          </table:table-cell>
          <table:table-cell table:formula="of:=[.D2178]-[.D2177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177" calcext:value-type="float">
            <text:p>2177</text:p>
          </table:table-cell>
          <table:table-cell table:formula="of:=[.B2177]+10" office:value-type="float" office:value="21770" calcext:value-type="float">
            <text:p>21770</text:p>
          </table:table-cell>
          <table:table-cell office:value-type="float" office:value="8640000" calcext:value-type="float">
            <text:p>8640000</text:p>
          </table:table-cell>
          <table:table-cell table:formula="of:=[.B2178]/[.C2178]" office:value-type="float" office:value="0.00251967592592593" calcext:value-type="float">
            <text:p>0,00251967592592593000</text:p>
          </table:table-cell>
          <table:table-cell table:formula="of:=[.D2179]-[.D2178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178" calcext:value-type="float">
            <text:p>2178</text:p>
          </table:table-cell>
          <table:table-cell table:formula="of:=[.B2178]+10" office:value-type="float" office:value="21780" calcext:value-type="float">
            <text:p>21780</text:p>
          </table:table-cell>
          <table:table-cell office:value-type="float" office:value="8640000" calcext:value-type="float">
            <text:p>8640000</text:p>
          </table:table-cell>
          <table:table-cell table:formula="of:=[.B2179]/[.C2179]" office:value-type="float" office:value="0.00252083333333333" calcext:value-type="float">
            <text:p>0,00252083333333333000</text:p>
          </table:table-cell>
          <table:table-cell table:formula="of:=[.D2180]-[.D2179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179" calcext:value-type="float">
            <text:p>2179</text:p>
          </table:table-cell>
          <table:table-cell table:formula="of:=[.B2179]+10" office:value-type="float" office:value="21790" calcext:value-type="float">
            <text:p>21790</text:p>
          </table:table-cell>
          <table:table-cell office:value-type="float" office:value="8640000" calcext:value-type="float">
            <text:p>8640000</text:p>
          </table:table-cell>
          <table:table-cell table:formula="of:=[.B2180]/[.C2180]" office:value-type="float" office:value="0.00252199074074074" calcext:value-type="float">
            <text:p>0,00252199074074074000</text:p>
          </table:table-cell>
          <table:table-cell table:formula="of:=[.D2181]-[.D2180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180" calcext:value-type="float">
            <text:p>2180</text:p>
          </table:table-cell>
          <table:table-cell table:formula="of:=[.B2180]+10" office:value-type="float" office:value="21800" calcext:value-type="float">
            <text:p>21800</text:p>
          </table:table-cell>
          <table:table-cell office:value-type="float" office:value="8640000" calcext:value-type="float">
            <text:p>8640000</text:p>
          </table:table-cell>
          <table:table-cell table:formula="of:=[.B2181]/[.C2181]" office:value-type="float" office:value="0.00252314814814815" calcext:value-type="float">
            <text:p>0,00252314814814815000</text:p>
          </table:table-cell>
          <table:table-cell table:formula="of:=[.D2182]-[.D2181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181" calcext:value-type="float">
            <text:p>2181</text:p>
          </table:table-cell>
          <table:table-cell table:formula="of:=[.B2181]+10" office:value-type="float" office:value="21810" calcext:value-type="float">
            <text:p>21810</text:p>
          </table:table-cell>
          <table:table-cell office:value-type="float" office:value="8640000" calcext:value-type="float">
            <text:p>8640000</text:p>
          </table:table-cell>
          <table:table-cell table:formula="of:=[.B2182]/[.C2182]" office:value-type="float" office:value="0.00252430555555556" calcext:value-type="float">
            <text:p>0,00252430555555556000</text:p>
          </table:table-cell>
          <table:table-cell table:formula="of:=[.D2183]-[.D2182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182" calcext:value-type="float">
            <text:p>2182</text:p>
          </table:table-cell>
          <table:table-cell table:formula="of:=[.B2182]+10" office:value-type="float" office:value="21820" calcext:value-type="float">
            <text:p>21820</text:p>
          </table:table-cell>
          <table:table-cell office:value-type="float" office:value="8640000" calcext:value-type="float">
            <text:p>8640000</text:p>
          </table:table-cell>
          <table:table-cell table:formula="of:=[.B2183]/[.C2183]" office:value-type="float" office:value="0.00252546296296296" calcext:value-type="float">
            <text:p>0,00252546296296296000</text:p>
          </table:table-cell>
          <table:table-cell table:formula="of:=[.D2184]-[.D2183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183" calcext:value-type="float">
            <text:p>2183</text:p>
          </table:table-cell>
          <table:table-cell table:formula="of:=[.B2183]+10" office:value-type="float" office:value="21830" calcext:value-type="float">
            <text:p>21830</text:p>
          </table:table-cell>
          <table:table-cell office:value-type="float" office:value="8640000" calcext:value-type="float">
            <text:p>8640000</text:p>
          </table:table-cell>
          <table:table-cell table:formula="of:=[.B2184]/[.C2184]" office:value-type="float" office:value="0.00252662037037037" calcext:value-type="float">
            <text:p>0,00252662037037037000</text:p>
          </table:table-cell>
          <table:table-cell table:formula="of:=[.D2185]-[.D2184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184" calcext:value-type="float">
            <text:p>2184</text:p>
          </table:table-cell>
          <table:table-cell table:formula="of:=[.B2184]+10" office:value-type="float" office:value="21840" calcext:value-type="float">
            <text:p>21840</text:p>
          </table:table-cell>
          <table:table-cell office:value-type="float" office:value="8640000" calcext:value-type="float">
            <text:p>8640000</text:p>
          </table:table-cell>
          <table:table-cell table:formula="of:=[.B2185]/[.C2185]" office:value-type="float" office:value="0.00252777777777778" calcext:value-type="float">
            <text:p>0,00252777777777778000</text:p>
          </table:table-cell>
          <table:table-cell table:formula="of:=[.D2186]-[.D2185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185" calcext:value-type="float">
            <text:p>2185</text:p>
          </table:table-cell>
          <table:table-cell table:formula="of:=[.B2185]+10" office:value-type="float" office:value="21850" calcext:value-type="float">
            <text:p>21850</text:p>
          </table:table-cell>
          <table:table-cell office:value-type="float" office:value="8640000" calcext:value-type="float">
            <text:p>8640000</text:p>
          </table:table-cell>
          <table:table-cell table:formula="of:=[.B2186]/[.C2186]" office:value-type="float" office:value="0.00252893518518519" calcext:value-type="float">
            <text:p>0,00252893518518519000</text:p>
          </table:table-cell>
          <table:table-cell table:formula="of:=[.D2187]-[.D2186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186" calcext:value-type="float">
            <text:p>2186</text:p>
          </table:table-cell>
          <table:table-cell table:formula="of:=[.B2186]+10" office:value-type="float" office:value="21860" calcext:value-type="float">
            <text:p>21860</text:p>
          </table:table-cell>
          <table:table-cell office:value-type="float" office:value="8640000" calcext:value-type="float">
            <text:p>8640000</text:p>
          </table:table-cell>
          <table:table-cell table:formula="of:=[.B2187]/[.C2187]" office:value-type="float" office:value="0.00253009259259259" calcext:value-type="float">
            <text:p>0,00253009259259259000</text:p>
          </table:table-cell>
          <table:table-cell table:formula="of:=[.D2188]-[.D2187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187" calcext:value-type="float">
            <text:p>2187</text:p>
          </table:table-cell>
          <table:table-cell table:formula="of:=[.B2187]+10" office:value-type="float" office:value="21870" calcext:value-type="float">
            <text:p>21870</text:p>
          </table:table-cell>
          <table:table-cell office:value-type="float" office:value="8640000" calcext:value-type="float">
            <text:p>8640000</text:p>
          </table:table-cell>
          <table:table-cell table:formula="of:=[.B2188]/[.C2188]" office:value-type="float" office:value="0.00253125" calcext:value-type="float">
            <text:p>0,00253125000000000000</text:p>
          </table:table-cell>
          <table:table-cell table:formula="of:=[.D2189]-[.D2188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188" calcext:value-type="float">
            <text:p>2188</text:p>
          </table:table-cell>
          <table:table-cell table:formula="of:=[.B2188]+10" office:value-type="float" office:value="21880" calcext:value-type="float">
            <text:p>21880</text:p>
          </table:table-cell>
          <table:table-cell office:value-type="float" office:value="8640000" calcext:value-type="float">
            <text:p>8640000</text:p>
          </table:table-cell>
          <table:table-cell table:formula="of:=[.B2189]/[.C2189]" office:value-type="float" office:value="0.00253240740740741" calcext:value-type="float">
            <text:p>0,00253240740740741000</text:p>
          </table:table-cell>
          <table:table-cell table:formula="of:=[.D2190]-[.D2189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189" calcext:value-type="float">
            <text:p>2189</text:p>
          </table:table-cell>
          <table:table-cell table:formula="of:=[.B2189]+10" office:value-type="float" office:value="21890" calcext:value-type="float">
            <text:p>21890</text:p>
          </table:table-cell>
          <table:table-cell office:value-type="float" office:value="8640000" calcext:value-type="float">
            <text:p>8640000</text:p>
          </table:table-cell>
          <table:table-cell table:formula="of:=[.B2190]/[.C2190]" office:value-type="float" office:value="0.00253356481481482" calcext:value-type="float">
            <text:p>0,00253356481481482000</text:p>
          </table:table-cell>
          <table:table-cell table:formula="of:=[.D2191]-[.D2190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190" calcext:value-type="float">
            <text:p>2190</text:p>
          </table:table-cell>
          <table:table-cell table:formula="of:=[.B2190]+10" office:value-type="float" office:value="21900" calcext:value-type="float">
            <text:p>21900</text:p>
          </table:table-cell>
          <table:table-cell office:value-type="float" office:value="8640000" calcext:value-type="float">
            <text:p>8640000</text:p>
          </table:table-cell>
          <table:table-cell table:formula="of:=[.B2191]/[.C2191]" office:value-type="float" office:value="0.00253472222222222" calcext:value-type="float">
            <text:p>0,00253472222222222000</text:p>
          </table:table-cell>
          <table:table-cell table:formula="of:=[.D2192]-[.D2191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191" calcext:value-type="float">
            <text:p>2191</text:p>
          </table:table-cell>
          <table:table-cell table:formula="of:=[.B2191]+10" office:value-type="float" office:value="21910" calcext:value-type="float">
            <text:p>21910</text:p>
          </table:table-cell>
          <table:table-cell office:value-type="float" office:value="8640000" calcext:value-type="float">
            <text:p>8640000</text:p>
          </table:table-cell>
          <table:table-cell table:formula="of:=[.B2192]/[.C2192]" office:value-type="float" office:value="0.00253587962962963" calcext:value-type="float">
            <text:p>0,00253587962962963000</text:p>
          </table:table-cell>
          <table:table-cell table:formula="of:=[.D2193]-[.D2192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192" calcext:value-type="float">
            <text:p>2192</text:p>
          </table:table-cell>
          <table:table-cell table:formula="of:=[.B2192]+10" office:value-type="float" office:value="21920" calcext:value-type="float">
            <text:p>21920</text:p>
          </table:table-cell>
          <table:table-cell office:value-type="float" office:value="8640000" calcext:value-type="float">
            <text:p>8640000</text:p>
          </table:table-cell>
          <table:table-cell table:formula="of:=[.B2193]/[.C2193]" office:value-type="float" office:value="0.00253703703703704" calcext:value-type="float">
            <text:p>0,00253703703703704000</text:p>
          </table:table-cell>
          <table:table-cell table:formula="of:=[.D2194]-[.D2193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193" calcext:value-type="float">
            <text:p>2193</text:p>
          </table:table-cell>
          <table:table-cell table:formula="of:=[.B2193]+10" office:value-type="float" office:value="21930" calcext:value-type="float">
            <text:p>21930</text:p>
          </table:table-cell>
          <table:table-cell office:value-type="float" office:value="8640000" calcext:value-type="float">
            <text:p>8640000</text:p>
          </table:table-cell>
          <table:table-cell table:formula="of:=[.B2194]/[.C2194]" office:value-type="float" office:value="0.00253819444444444" calcext:value-type="float">
            <text:p>0,00253819444444444000</text:p>
          </table:table-cell>
          <table:table-cell table:formula="of:=[.D2195]-[.D2194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194" calcext:value-type="float">
            <text:p>2194</text:p>
          </table:table-cell>
          <table:table-cell table:formula="of:=[.B2194]+10" office:value-type="float" office:value="21940" calcext:value-type="float">
            <text:p>21940</text:p>
          </table:table-cell>
          <table:table-cell office:value-type="float" office:value="8640000" calcext:value-type="float">
            <text:p>8640000</text:p>
          </table:table-cell>
          <table:table-cell table:formula="of:=[.B2195]/[.C2195]" office:value-type="float" office:value="0.00253935185185185" calcext:value-type="float">
            <text:p>0,00253935185185185000</text:p>
          </table:table-cell>
          <table:table-cell table:formula="of:=[.D2196]-[.D2195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195" calcext:value-type="float">
            <text:p>2195</text:p>
          </table:table-cell>
          <table:table-cell table:formula="of:=[.B2195]+10" office:value-type="float" office:value="21950" calcext:value-type="float">
            <text:p>21950</text:p>
          </table:table-cell>
          <table:table-cell office:value-type="float" office:value="8640000" calcext:value-type="float">
            <text:p>8640000</text:p>
          </table:table-cell>
          <table:table-cell table:formula="of:=[.B2196]/[.C2196]" office:value-type="float" office:value="0.00254050925925926" calcext:value-type="float">
            <text:p>0,00254050925925926000</text:p>
          </table:table-cell>
          <table:table-cell table:formula="of:=[.D2197]-[.D2196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196" calcext:value-type="float">
            <text:p>2196</text:p>
          </table:table-cell>
          <table:table-cell table:formula="of:=[.B2196]+10" office:value-type="float" office:value="21960" calcext:value-type="float">
            <text:p>21960</text:p>
          </table:table-cell>
          <table:table-cell office:value-type="float" office:value="8640000" calcext:value-type="float">
            <text:p>8640000</text:p>
          </table:table-cell>
          <table:table-cell table:formula="of:=[.B2197]/[.C2197]" office:value-type="float" office:value="0.00254166666666667" calcext:value-type="float">
            <text:p>0,00254166666666667000</text:p>
          </table:table-cell>
          <table:table-cell table:formula="of:=[.D2198]-[.D2197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197" calcext:value-type="float">
            <text:p>2197</text:p>
          </table:table-cell>
          <table:table-cell table:formula="of:=[.B2197]+10" office:value-type="float" office:value="21970" calcext:value-type="float">
            <text:p>21970</text:p>
          </table:table-cell>
          <table:table-cell office:value-type="float" office:value="8640000" calcext:value-type="float">
            <text:p>8640000</text:p>
          </table:table-cell>
          <table:table-cell table:formula="of:=[.B2198]/[.C2198]" office:value-type="float" office:value="0.00254282407407407" calcext:value-type="float">
            <text:p>0,00254282407407407000</text:p>
          </table:table-cell>
          <table:table-cell table:formula="of:=[.D2199]-[.D2198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198" calcext:value-type="float">
            <text:p>2198</text:p>
          </table:table-cell>
          <table:table-cell table:formula="of:=[.B2198]+10" office:value-type="float" office:value="21980" calcext:value-type="float">
            <text:p>21980</text:p>
          </table:table-cell>
          <table:table-cell office:value-type="float" office:value="8640000" calcext:value-type="float">
            <text:p>8640000</text:p>
          </table:table-cell>
          <table:table-cell table:formula="of:=[.B2199]/[.C2199]" office:value-type="float" office:value="0.00254398148148148" calcext:value-type="float">
            <text:p>0,00254398148148148000</text:p>
          </table:table-cell>
          <table:table-cell table:formula="of:=[.D2200]-[.D2199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199" calcext:value-type="float">
            <text:p>2199</text:p>
          </table:table-cell>
          <table:table-cell table:formula="of:=[.B2199]+10" office:value-type="float" office:value="21990" calcext:value-type="float">
            <text:p>21990</text:p>
          </table:table-cell>
          <table:table-cell office:value-type="float" office:value="8640000" calcext:value-type="float">
            <text:p>8640000</text:p>
          </table:table-cell>
          <table:table-cell table:formula="of:=[.B2200]/[.C2200]" office:value-type="float" office:value="0.00254513888888889" calcext:value-type="float">
            <text:p>0,00254513888888889000</text:p>
          </table:table-cell>
          <table:table-cell table:formula="of:=[.D2201]-[.D2200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table:formula="of:=[.B2200]+10" office:value-type="float" office:value="22000" calcext:value-type="float">
            <text:p>22000</text:p>
          </table:table-cell>
          <table:table-cell office:value-type="float" office:value="8640000" calcext:value-type="float">
            <text:p>8640000</text:p>
          </table:table-cell>
          <table:table-cell table:formula="of:=[.B2201]/[.C2201]" office:value-type="float" office:value="0.0025462962962963" calcext:value-type="float">
            <text:p>0,00254629629629630000</text:p>
          </table:table-cell>
          <table:table-cell table:formula="of:=[.D2202]-[.D2201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201" calcext:value-type="float">
            <text:p>2201</text:p>
          </table:table-cell>
          <table:table-cell table:formula="of:=[.B2201]+10" office:value-type="float" office:value="22010" calcext:value-type="float">
            <text:p>22010</text:p>
          </table:table-cell>
          <table:table-cell office:value-type="float" office:value="8640000" calcext:value-type="float">
            <text:p>8640000</text:p>
          </table:table-cell>
          <table:table-cell table:formula="of:=[.B2202]/[.C2202]" office:value-type="float" office:value="0.0025474537037037" calcext:value-type="float">
            <text:p>0,00254745370370370000</text:p>
          </table:table-cell>
          <table:table-cell table:formula="of:=[.D2203]-[.D2202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202" calcext:value-type="float">
            <text:p>2202</text:p>
          </table:table-cell>
          <table:table-cell table:formula="of:=[.B2202]+10" office:value-type="float" office:value="22020" calcext:value-type="float">
            <text:p>22020</text:p>
          </table:table-cell>
          <table:table-cell office:value-type="float" office:value="8640000" calcext:value-type="float">
            <text:p>8640000</text:p>
          </table:table-cell>
          <table:table-cell table:formula="of:=[.B2203]/[.C2203]" office:value-type="float" office:value="0.00254861111111111" calcext:value-type="float">
            <text:p>0,00254861111111111000</text:p>
          </table:table-cell>
          <table:table-cell table:formula="of:=[.D2204]-[.D2203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203" calcext:value-type="float">
            <text:p>2203</text:p>
          </table:table-cell>
          <table:table-cell table:formula="of:=[.B2203]+10" office:value-type="float" office:value="22030" calcext:value-type="float">
            <text:p>22030</text:p>
          </table:table-cell>
          <table:table-cell office:value-type="float" office:value="8640000" calcext:value-type="float">
            <text:p>8640000</text:p>
          </table:table-cell>
          <table:table-cell table:formula="of:=[.B2204]/[.C2204]" office:value-type="float" office:value="0.00254976851851852" calcext:value-type="float">
            <text:p>0,00254976851851852000</text:p>
          </table:table-cell>
          <table:table-cell table:formula="of:=[.D2205]-[.D2204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204" calcext:value-type="float">
            <text:p>2204</text:p>
          </table:table-cell>
          <table:table-cell table:formula="of:=[.B2204]+10" office:value-type="float" office:value="22040" calcext:value-type="float">
            <text:p>22040</text:p>
          </table:table-cell>
          <table:table-cell office:value-type="float" office:value="8640000" calcext:value-type="float">
            <text:p>8640000</text:p>
          </table:table-cell>
          <table:table-cell table:formula="of:=[.B2205]/[.C2205]" office:value-type="float" office:value="0.00255092592592593" calcext:value-type="float">
            <text:p>0,00255092592592593000</text:p>
          </table:table-cell>
          <table:table-cell table:formula="of:=[.D2206]-[.D2205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205" calcext:value-type="float">
            <text:p>2205</text:p>
          </table:table-cell>
          <table:table-cell table:formula="of:=[.B2205]+10" office:value-type="float" office:value="22050" calcext:value-type="float">
            <text:p>22050</text:p>
          </table:table-cell>
          <table:table-cell office:value-type="float" office:value="8640000" calcext:value-type="float">
            <text:p>8640000</text:p>
          </table:table-cell>
          <table:table-cell table:formula="of:=[.B2206]/[.C2206]" office:value-type="float" office:value="0.00255208333333333" calcext:value-type="float">
            <text:p>0,00255208333333333000</text:p>
          </table:table-cell>
          <table:table-cell table:formula="of:=[.D2207]-[.D2206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206" calcext:value-type="float">
            <text:p>2206</text:p>
          </table:table-cell>
          <table:table-cell table:formula="of:=[.B2206]+10" office:value-type="float" office:value="22060" calcext:value-type="float">
            <text:p>22060</text:p>
          </table:table-cell>
          <table:table-cell office:value-type="float" office:value="8640000" calcext:value-type="float">
            <text:p>8640000</text:p>
          </table:table-cell>
          <table:table-cell table:formula="of:=[.B2207]/[.C2207]" office:value-type="float" office:value="0.00255324074074074" calcext:value-type="float">
            <text:p>0,00255324074074074000</text:p>
          </table:table-cell>
          <table:table-cell table:formula="of:=[.D2208]-[.D2207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207" calcext:value-type="float">
            <text:p>2207</text:p>
          </table:table-cell>
          <table:table-cell table:formula="of:=[.B2207]+10" office:value-type="float" office:value="22070" calcext:value-type="float">
            <text:p>22070</text:p>
          </table:table-cell>
          <table:table-cell office:value-type="float" office:value="8640000" calcext:value-type="float">
            <text:p>8640000</text:p>
          </table:table-cell>
          <table:table-cell table:formula="of:=[.B2208]/[.C2208]" office:value-type="float" office:value="0.00255439814814815" calcext:value-type="float">
            <text:p>0,00255439814814815000</text:p>
          </table:table-cell>
          <table:table-cell table:formula="of:=[.D2209]-[.D2208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208" calcext:value-type="float">
            <text:p>2208</text:p>
          </table:table-cell>
          <table:table-cell table:formula="of:=[.B2208]+10" office:value-type="float" office:value="22080" calcext:value-type="float">
            <text:p>22080</text:p>
          </table:table-cell>
          <table:table-cell office:value-type="float" office:value="8640000" calcext:value-type="float">
            <text:p>8640000</text:p>
          </table:table-cell>
          <table:table-cell table:formula="of:=[.B2209]/[.C2209]" office:value-type="float" office:value="0.00255555555555556" calcext:value-type="float">
            <text:p>0,00255555555555556000</text:p>
          </table:table-cell>
          <table:table-cell table:formula="of:=[.D2210]-[.D2209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209" calcext:value-type="float">
            <text:p>2209</text:p>
          </table:table-cell>
          <table:table-cell table:formula="of:=[.B2209]+10" office:value-type="float" office:value="22090" calcext:value-type="float">
            <text:p>22090</text:p>
          </table:table-cell>
          <table:table-cell office:value-type="float" office:value="8640000" calcext:value-type="float">
            <text:p>8640000</text:p>
          </table:table-cell>
          <table:table-cell table:formula="of:=[.B2210]/[.C2210]" office:value-type="float" office:value="0.00255671296296296" calcext:value-type="float">
            <text:p>0,00255671296296296000</text:p>
          </table:table-cell>
          <table:table-cell table:formula="of:=[.D2211]-[.D2210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210" calcext:value-type="float">
            <text:p>2210</text:p>
          </table:table-cell>
          <table:table-cell table:formula="of:=[.B2210]+10" office:value-type="float" office:value="22100" calcext:value-type="float">
            <text:p>22100</text:p>
          </table:table-cell>
          <table:table-cell office:value-type="float" office:value="8640000" calcext:value-type="float">
            <text:p>8640000</text:p>
          </table:table-cell>
          <table:table-cell table:formula="of:=[.B2211]/[.C2211]" office:value-type="float" office:value="0.00255787037037037" calcext:value-type="float">
            <text:p>0,00255787037037037000</text:p>
          </table:table-cell>
          <table:table-cell table:formula="of:=[.D2212]-[.D2211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211" calcext:value-type="float">
            <text:p>2211</text:p>
          </table:table-cell>
          <table:table-cell table:formula="of:=[.B2211]+10" office:value-type="float" office:value="22110" calcext:value-type="float">
            <text:p>22110</text:p>
          </table:table-cell>
          <table:table-cell office:value-type="float" office:value="8640000" calcext:value-type="float">
            <text:p>8640000</text:p>
          </table:table-cell>
          <table:table-cell table:formula="of:=[.B2212]/[.C2212]" office:value-type="float" office:value="0.00255902777777778" calcext:value-type="float">
            <text:p>0,00255902777777778000</text:p>
          </table:table-cell>
          <table:table-cell table:formula="of:=[.D2213]-[.D2212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212" calcext:value-type="float">
            <text:p>2212</text:p>
          </table:table-cell>
          <table:table-cell table:formula="of:=[.B2212]+10" office:value-type="float" office:value="22120" calcext:value-type="float">
            <text:p>22120</text:p>
          </table:table-cell>
          <table:table-cell office:value-type="float" office:value="8640000" calcext:value-type="float">
            <text:p>8640000</text:p>
          </table:table-cell>
          <table:table-cell table:formula="of:=[.B2213]/[.C2213]" office:value-type="float" office:value="0.00256018518518519" calcext:value-type="float">
            <text:p>0,00256018518518519000</text:p>
          </table:table-cell>
          <table:table-cell table:formula="of:=[.D2214]-[.D2213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213" calcext:value-type="float">
            <text:p>2213</text:p>
          </table:table-cell>
          <table:table-cell table:formula="of:=[.B2213]+10" office:value-type="float" office:value="22130" calcext:value-type="float">
            <text:p>22130</text:p>
          </table:table-cell>
          <table:table-cell office:value-type="float" office:value="8640000" calcext:value-type="float">
            <text:p>8640000</text:p>
          </table:table-cell>
          <table:table-cell table:formula="of:=[.B2214]/[.C2214]" office:value-type="float" office:value="0.00256134259259259" calcext:value-type="float">
            <text:p>0,00256134259259259000</text:p>
          </table:table-cell>
          <table:table-cell table:formula="of:=[.D2215]-[.D2214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214" calcext:value-type="float">
            <text:p>2214</text:p>
          </table:table-cell>
          <table:table-cell table:formula="of:=[.B2214]+10" office:value-type="float" office:value="22140" calcext:value-type="float">
            <text:p>22140</text:p>
          </table:table-cell>
          <table:table-cell office:value-type="float" office:value="8640000" calcext:value-type="float">
            <text:p>8640000</text:p>
          </table:table-cell>
          <table:table-cell table:formula="of:=[.B2215]/[.C2215]" office:value-type="float" office:value="0.0025625" calcext:value-type="float">
            <text:p>0,00256250000000000000</text:p>
          </table:table-cell>
          <table:table-cell table:formula="of:=[.D2216]-[.D2215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215" calcext:value-type="float">
            <text:p>2215</text:p>
          </table:table-cell>
          <table:table-cell table:formula="of:=[.B2215]+10" office:value-type="float" office:value="22150" calcext:value-type="float">
            <text:p>22150</text:p>
          </table:table-cell>
          <table:table-cell office:value-type="float" office:value="8640000" calcext:value-type="float">
            <text:p>8640000</text:p>
          </table:table-cell>
          <table:table-cell table:formula="of:=[.B2216]/[.C2216]" office:value-type="float" office:value="0.00256365740740741" calcext:value-type="float">
            <text:p>0,00256365740740741000</text:p>
          </table:table-cell>
          <table:table-cell table:formula="of:=[.D2217]-[.D2216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216" calcext:value-type="float">
            <text:p>2216</text:p>
          </table:table-cell>
          <table:table-cell table:formula="of:=[.B2216]+10" office:value-type="float" office:value="22160" calcext:value-type="float">
            <text:p>22160</text:p>
          </table:table-cell>
          <table:table-cell office:value-type="float" office:value="8640000" calcext:value-type="float">
            <text:p>8640000</text:p>
          </table:table-cell>
          <table:table-cell table:formula="of:=[.B2217]/[.C2217]" office:value-type="float" office:value="0.00256481481481482" calcext:value-type="float">
            <text:p>0,00256481481481482000</text:p>
          </table:table-cell>
          <table:table-cell table:formula="of:=[.D2218]-[.D2217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217" calcext:value-type="float">
            <text:p>2217</text:p>
          </table:table-cell>
          <table:table-cell table:formula="of:=[.B2217]+10" office:value-type="float" office:value="22170" calcext:value-type="float">
            <text:p>22170</text:p>
          </table:table-cell>
          <table:table-cell office:value-type="float" office:value="8640000" calcext:value-type="float">
            <text:p>8640000</text:p>
          </table:table-cell>
          <table:table-cell table:formula="of:=[.B2218]/[.C2218]" office:value-type="float" office:value="0.00256597222222222" calcext:value-type="float">
            <text:p>0,00256597222222222000</text:p>
          </table:table-cell>
          <table:table-cell table:formula="of:=[.D2219]-[.D2218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218" calcext:value-type="float">
            <text:p>2218</text:p>
          </table:table-cell>
          <table:table-cell table:formula="of:=[.B2218]+10" office:value-type="float" office:value="22180" calcext:value-type="float">
            <text:p>22180</text:p>
          </table:table-cell>
          <table:table-cell office:value-type="float" office:value="8640000" calcext:value-type="float">
            <text:p>8640000</text:p>
          </table:table-cell>
          <table:table-cell table:formula="of:=[.B2219]/[.C2219]" office:value-type="float" office:value="0.00256712962962963" calcext:value-type="float">
            <text:p>0,00256712962962963000</text:p>
          </table:table-cell>
          <table:table-cell table:formula="of:=[.D2220]-[.D2219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219" calcext:value-type="float">
            <text:p>2219</text:p>
          </table:table-cell>
          <table:table-cell table:formula="of:=[.B2219]+10" office:value-type="float" office:value="22190" calcext:value-type="float">
            <text:p>22190</text:p>
          </table:table-cell>
          <table:table-cell office:value-type="float" office:value="8640000" calcext:value-type="float">
            <text:p>8640000</text:p>
          </table:table-cell>
          <table:table-cell table:formula="of:=[.B2220]/[.C2220]" office:value-type="float" office:value="0.00256828703703704" calcext:value-type="float">
            <text:p>0,00256828703703704000</text:p>
          </table:table-cell>
          <table:table-cell table:formula="of:=[.D2221]-[.D2220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220" calcext:value-type="float">
            <text:p>2220</text:p>
          </table:table-cell>
          <table:table-cell table:formula="of:=[.B2220]+10" office:value-type="float" office:value="22200" calcext:value-type="float">
            <text:p>22200</text:p>
          </table:table-cell>
          <table:table-cell office:value-type="float" office:value="8640000" calcext:value-type="float">
            <text:p>8640000</text:p>
          </table:table-cell>
          <table:table-cell table:formula="of:=[.B2221]/[.C2221]" office:value-type="float" office:value="0.00256944444444444" calcext:value-type="float">
            <text:p>0,00256944444444444000</text:p>
          </table:table-cell>
          <table:table-cell table:formula="of:=[.D2222]-[.D2221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221" calcext:value-type="float">
            <text:p>2221</text:p>
          </table:table-cell>
          <table:table-cell table:formula="of:=[.B2221]+10" office:value-type="float" office:value="22210" calcext:value-type="float">
            <text:p>22210</text:p>
          </table:table-cell>
          <table:table-cell office:value-type="float" office:value="8640000" calcext:value-type="float">
            <text:p>8640000</text:p>
          </table:table-cell>
          <table:table-cell table:formula="of:=[.B2222]/[.C2222]" office:value-type="float" office:value="0.00257060185185185" calcext:value-type="float">
            <text:p>0,00257060185185185000</text:p>
          </table:table-cell>
          <table:table-cell table:formula="of:=[.D2223]-[.D2222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222" calcext:value-type="float">
            <text:p>2222</text:p>
          </table:table-cell>
          <table:table-cell table:formula="of:=[.B2222]+10" office:value-type="float" office:value="22220" calcext:value-type="float">
            <text:p>22220</text:p>
          </table:table-cell>
          <table:table-cell office:value-type="float" office:value="8640000" calcext:value-type="float">
            <text:p>8640000</text:p>
          </table:table-cell>
          <table:table-cell table:formula="of:=[.B2223]/[.C2223]" office:value-type="float" office:value="0.00257175925925926" calcext:value-type="float">
            <text:p>0,00257175925925926000</text:p>
          </table:table-cell>
          <table:table-cell table:formula="of:=[.D2224]-[.D2223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223" calcext:value-type="float">
            <text:p>2223</text:p>
          </table:table-cell>
          <table:table-cell table:formula="of:=[.B2223]+10" office:value-type="float" office:value="22230" calcext:value-type="float">
            <text:p>22230</text:p>
          </table:table-cell>
          <table:table-cell office:value-type="float" office:value="8640000" calcext:value-type="float">
            <text:p>8640000</text:p>
          </table:table-cell>
          <table:table-cell table:formula="of:=[.B2224]/[.C2224]" office:value-type="float" office:value="0.00257291666666667" calcext:value-type="float">
            <text:p>0,00257291666666667000</text:p>
          </table:table-cell>
          <table:table-cell table:formula="of:=[.D2225]-[.D2224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224" calcext:value-type="float">
            <text:p>2224</text:p>
          </table:table-cell>
          <table:table-cell table:formula="of:=[.B2224]+10" office:value-type="float" office:value="22240" calcext:value-type="float">
            <text:p>22240</text:p>
          </table:table-cell>
          <table:table-cell office:value-type="float" office:value="8640000" calcext:value-type="float">
            <text:p>8640000</text:p>
          </table:table-cell>
          <table:table-cell table:formula="of:=[.B2225]/[.C2225]" office:value-type="float" office:value="0.00257407407407407" calcext:value-type="float">
            <text:p>0,00257407407407407000</text:p>
          </table:table-cell>
          <table:table-cell table:formula="of:=[.D2226]-[.D2225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225" calcext:value-type="float">
            <text:p>2225</text:p>
          </table:table-cell>
          <table:table-cell table:formula="of:=[.B2225]+10" office:value-type="float" office:value="22250" calcext:value-type="float">
            <text:p>22250</text:p>
          </table:table-cell>
          <table:table-cell office:value-type="float" office:value="8640000" calcext:value-type="float">
            <text:p>8640000</text:p>
          </table:table-cell>
          <table:table-cell table:formula="of:=[.B2226]/[.C2226]" office:value-type="float" office:value="0.00257523148148148" calcext:value-type="float">
            <text:p>0,00257523148148148000</text:p>
          </table:table-cell>
          <table:table-cell table:formula="of:=[.D2227]-[.D2226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226" calcext:value-type="float">
            <text:p>2226</text:p>
          </table:table-cell>
          <table:table-cell table:formula="of:=[.B2226]+10" office:value-type="float" office:value="22260" calcext:value-type="float">
            <text:p>22260</text:p>
          </table:table-cell>
          <table:table-cell office:value-type="float" office:value="8640000" calcext:value-type="float">
            <text:p>8640000</text:p>
          </table:table-cell>
          <table:table-cell table:formula="of:=[.B2227]/[.C2227]" office:value-type="float" office:value="0.00257638888888889" calcext:value-type="float">
            <text:p>0,00257638888888889000</text:p>
          </table:table-cell>
          <table:table-cell table:formula="of:=[.D2228]-[.D2227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227" calcext:value-type="float">
            <text:p>2227</text:p>
          </table:table-cell>
          <table:table-cell table:formula="of:=[.B2227]+10" office:value-type="float" office:value="22270" calcext:value-type="float">
            <text:p>22270</text:p>
          </table:table-cell>
          <table:table-cell office:value-type="float" office:value="8640000" calcext:value-type="float">
            <text:p>8640000</text:p>
          </table:table-cell>
          <table:table-cell table:formula="of:=[.B2228]/[.C2228]" office:value-type="float" office:value="0.0025775462962963" calcext:value-type="float">
            <text:p>0,00257754629629630000</text:p>
          </table:table-cell>
          <table:table-cell table:formula="of:=[.D2229]-[.D2228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228" calcext:value-type="float">
            <text:p>2228</text:p>
          </table:table-cell>
          <table:table-cell table:formula="of:=[.B2228]+10" office:value-type="float" office:value="22280" calcext:value-type="float">
            <text:p>22280</text:p>
          </table:table-cell>
          <table:table-cell office:value-type="float" office:value="8640000" calcext:value-type="float">
            <text:p>8640000</text:p>
          </table:table-cell>
          <table:table-cell table:formula="of:=[.B2229]/[.C2229]" office:value-type="float" office:value="0.0025787037037037" calcext:value-type="float">
            <text:p>0,00257870370370370000</text:p>
          </table:table-cell>
          <table:table-cell table:formula="of:=[.D2230]-[.D2229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229" calcext:value-type="float">
            <text:p>2229</text:p>
          </table:table-cell>
          <table:table-cell table:formula="of:=[.B2229]+10" office:value-type="float" office:value="22290" calcext:value-type="float">
            <text:p>22290</text:p>
          </table:table-cell>
          <table:table-cell office:value-type="float" office:value="8640000" calcext:value-type="float">
            <text:p>8640000</text:p>
          </table:table-cell>
          <table:table-cell table:formula="of:=[.B2230]/[.C2230]" office:value-type="float" office:value="0.00257986111111111" calcext:value-type="float">
            <text:p>0,00257986111111111000</text:p>
          </table:table-cell>
          <table:table-cell table:formula="of:=[.D2231]-[.D2230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230" calcext:value-type="float">
            <text:p>2230</text:p>
          </table:table-cell>
          <table:table-cell table:formula="of:=[.B2230]+10" office:value-type="float" office:value="22300" calcext:value-type="float">
            <text:p>22300</text:p>
          </table:table-cell>
          <table:table-cell office:value-type="float" office:value="8640000" calcext:value-type="float">
            <text:p>8640000</text:p>
          </table:table-cell>
          <table:table-cell table:formula="of:=[.B2231]/[.C2231]" office:value-type="float" office:value="0.00258101851851852" calcext:value-type="float">
            <text:p>0,00258101851851852000</text:p>
          </table:table-cell>
          <table:table-cell table:formula="of:=[.D2232]-[.D2231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231" calcext:value-type="float">
            <text:p>2231</text:p>
          </table:table-cell>
          <table:table-cell table:formula="of:=[.B2231]+10" office:value-type="float" office:value="22310" calcext:value-type="float">
            <text:p>22310</text:p>
          </table:table-cell>
          <table:table-cell office:value-type="float" office:value="8640000" calcext:value-type="float">
            <text:p>8640000</text:p>
          </table:table-cell>
          <table:table-cell table:formula="of:=[.B2232]/[.C2232]" office:value-type="float" office:value="0.00258217592592593" calcext:value-type="float">
            <text:p>0,00258217592592593000</text:p>
          </table:table-cell>
          <table:table-cell table:formula="of:=[.D2233]-[.D2232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232" calcext:value-type="float">
            <text:p>2232</text:p>
          </table:table-cell>
          <table:table-cell table:formula="of:=[.B2232]+10" office:value-type="float" office:value="22320" calcext:value-type="float">
            <text:p>22320</text:p>
          </table:table-cell>
          <table:table-cell office:value-type="float" office:value="8640000" calcext:value-type="float">
            <text:p>8640000</text:p>
          </table:table-cell>
          <table:table-cell table:formula="of:=[.B2233]/[.C2233]" office:value-type="float" office:value="0.00258333333333333" calcext:value-type="float">
            <text:p>0,00258333333333333000</text:p>
          </table:table-cell>
          <table:table-cell table:formula="of:=[.D2234]-[.D2233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233" calcext:value-type="float">
            <text:p>2233</text:p>
          </table:table-cell>
          <table:table-cell table:formula="of:=[.B2233]+10" office:value-type="float" office:value="22330" calcext:value-type="float">
            <text:p>22330</text:p>
          </table:table-cell>
          <table:table-cell office:value-type="float" office:value="8640000" calcext:value-type="float">
            <text:p>8640000</text:p>
          </table:table-cell>
          <table:table-cell table:formula="of:=[.B2234]/[.C2234]" office:value-type="float" office:value="0.00258449074074074" calcext:value-type="float">
            <text:p>0,00258449074074074000</text:p>
          </table:table-cell>
          <table:table-cell table:formula="of:=[.D2235]-[.D2234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234" calcext:value-type="float">
            <text:p>2234</text:p>
          </table:table-cell>
          <table:table-cell table:formula="of:=[.B2234]+10" office:value-type="float" office:value="22340" calcext:value-type="float">
            <text:p>22340</text:p>
          </table:table-cell>
          <table:table-cell office:value-type="float" office:value="8640000" calcext:value-type="float">
            <text:p>8640000</text:p>
          </table:table-cell>
          <table:table-cell table:formula="of:=[.B2235]/[.C2235]" office:value-type="float" office:value="0.00258564814814815" calcext:value-type="float">
            <text:p>0,00258564814814815000</text:p>
          </table:table-cell>
          <table:table-cell table:formula="of:=[.D2236]-[.D2235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235" calcext:value-type="float">
            <text:p>2235</text:p>
          </table:table-cell>
          <table:table-cell table:formula="of:=[.B2235]+10" office:value-type="float" office:value="22350" calcext:value-type="float">
            <text:p>22350</text:p>
          </table:table-cell>
          <table:table-cell office:value-type="float" office:value="8640000" calcext:value-type="float">
            <text:p>8640000</text:p>
          </table:table-cell>
          <table:table-cell table:formula="of:=[.B2236]/[.C2236]" office:value-type="float" office:value="0.00258680555555556" calcext:value-type="float">
            <text:p>0,00258680555555556000</text:p>
          </table:table-cell>
          <table:table-cell table:formula="of:=[.D2237]-[.D2236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236" calcext:value-type="float">
            <text:p>2236</text:p>
          </table:table-cell>
          <table:table-cell table:formula="of:=[.B2236]+10" office:value-type="float" office:value="22360" calcext:value-type="float">
            <text:p>22360</text:p>
          </table:table-cell>
          <table:table-cell office:value-type="float" office:value="8640000" calcext:value-type="float">
            <text:p>8640000</text:p>
          </table:table-cell>
          <table:table-cell table:formula="of:=[.B2237]/[.C2237]" office:value-type="float" office:value="0.00258796296296296" calcext:value-type="float">
            <text:p>0,00258796296296296000</text:p>
          </table:table-cell>
          <table:table-cell table:formula="of:=[.D2238]-[.D2237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237" calcext:value-type="float">
            <text:p>2237</text:p>
          </table:table-cell>
          <table:table-cell table:formula="of:=[.B2237]+10" office:value-type="float" office:value="22370" calcext:value-type="float">
            <text:p>22370</text:p>
          </table:table-cell>
          <table:table-cell office:value-type="float" office:value="8640000" calcext:value-type="float">
            <text:p>8640000</text:p>
          </table:table-cell>
          <table:table-cell table:formula="of:=[.B2238]/[.C2238]" office:value-type="float" office:value="0.00258912037037037" calcext:value-type="float">
            <text:p>0,00258912037037037000</text:p>
          </table:table-cell>
          <table:table-cell table:formula="of:=[.D2239]-[.D2238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238" calcext:value-type="float">
            <text:p>2238</text:p>
          </table:table-cell>
          <table:table-cell table:formula="of:=[.B2238]+10" office:value-type="float" office:value="22380" calcext:value-type="float">
            <text:p>22380</text:p>
          </table:table-cell>
          <table:table-cell office:value-type="float" office:value="8640000" calcext:value-type="float">
            <text:p>8640000</text:p>
          </table:table-cell>
          <table:table-cell table:formula="of:=[.B2239]/[.C2239]" office:value-type="float" office:value="0.00259027777777778" calcext:value-type="float">
            <text:p>0,00259027777777778000</text:p>
          </table:table-cell>
          <table:table-cell table:formula="of:=[.D2240]-[.D2239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239" calcext:value-type="float">
            <text:p>2239</text:p>
          </table:table-cell>
          <table:table-cell table:formula="of:=[.B2239]+10" office:value-type="float" office:value="22390" calcext:value-type="float">
            <text:p>22390</text:p>
          </table:table-cell>
          <table:table-cell office:value-type="float" office:value="8640000" calcext:value-type="float">
            <text:p>8640000</text:p>
          </table:table-cell>
          <table:table-cell table:formula="of:=[.B2240]/[.C2240]" office:value-type="float" office:value="0.00259143518518519" calcext:value-type="float">
            <text:p>0,00259143518518519000</text:p>
          </table:table-cell>
          <table:table-cell table:formula="of:=[.D2241]-[.D2240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240" calcext:value-type="float">
            <text:p>2240</text:p>
          </table:table-cell>
          <table:table-cell table:formula="of:=[.B2240]+10" office:value-type="float" office:value="22400" calcext:value-type="float">
            <text:p>22400</text:p>
          </table:table-cell>
          <table:table-cell office:value-type="float" office:value="8640000" calcext:value-type="float">
            <text:p>8640000</text:p>
          </table:table-cell>
          <table:table-cell table:formula="of:=[.B2241]/[.C2241]" office:value-type="float" office:value="0.00259259259259259" calcext:value-type="float">
            <text:p>0,00259259259259259000</text:p>
          </table:table-cell>
          <table:table-cell table:formula="of:=[.D2242]-[.D2241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241" calcext:value-type="float">
            <text:p>2241</text:p>
          </table:table-cell>
          <table:table-cell table:formula="of:=[.B2241]+10" office:value-type="float" office:value="22410" calcext:value-type="float">
            <text:p>22410</text:p>
          </table:table-cell>
          <table:table-cell office:value-type="float" office:value="8640000" calcext:value-type="float">
            <text:p>8640000</text:p>
          </table:table-cell>
          <table:table-cell table:formula="of:=[.B2242]/[.C2242]" office:value-type="float" office:value="0.00259375" calcext:value-type="float">
            <text:p>0,00259375000000000000</text:p>
          </table:table-cell>
          <table:table-cell table:formula="of:=[.D2243]-[.D2242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242" calcext:value-type="float">
            <text:p>2242</text:p>
          </table:table-cell>
          <table:table-cell table:formula="of:=[.B2242]+10" office:value-type="float" office:value="22420" calcext:value-type="float">
            <text:p>22420</text:p>
          </table:table-cell>
          <table:table-cell office:value-type="float" office:value="8640000" calcext:value-type="float">
            <text:p>8640000</text:p>
          </table:table-cell>
          <table:table-cell table:formula="of:=[.B2243]/[.C2243]" office:value-type="float" office:value="0.00259490740740741" calcext:value-type="float">
            <text:p>0,00259490740740741000</text:p>
          </table:table-cell>
          <table:table-cell table:formula="of:=[.D2244]-[.D2243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243" calcext:value-type="float">
            <text:p>2243</text:p>
          </table:table-cell>
          <table:table-cell table:formula="of:=[.B2243]+10" office:value-type="float" office:value="22430" calcext:value-type="float">
            <text:p>22430</text:p>
          </table:table-cell>
          <table:table-cell office:value-type="float" office:value="8640000" calcext:value-type="float">
            <text:p>8640000</text:p>
          </table:table-cell>
          <table:table-cell table:formula="of:=[.B2244]/[.C2244]" office:value-type="float" office:value="0.00259606481481482" calcext:value-type="float">
            <text:p>0,00259606481481482000</text:p>
          </table:table-cell>
          <table:table-cell table:formula="of:=[.D2245]-[.D2244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244" calcext:value-type="float">
            <text:p>2244</text:p>
          </table:table-cell>
          <table:table-cell table:formula="of:=[.B2244]+10" office:value-type="float" office:value="22440" calcext:value-type="float">
            <text:p>22440</text:p>
          </table:table-cell>
          <table:table-cell office:value-type="float" office:value="8640000" calcext:value-type="float">
            <text:p>8640000</text:p>
          </table:table-cell>
          <table:table-cell table:formula="of:=[.B2245]/[.C2245]" office:value-type="float" office:value="0.00259722222222222" calcext:value-type="float">
            <text:p>0,00259722222222222000</text:p>
          </table:table-cell>
          <table:table-cell table:formula="of:=[.D2246]-[.D2245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245" calcext:value-type="float">
            <text:p>2245</text:p>
          </table:table-cell>
          <table:table-cell table:formula="of:=[.B2245]+10" office:value-type="float" office:value="22450" calcext:value-type="float">
            <text:p>22450</text:p>
          </table:table-cell>
          <table:table-cell office:value-type="float" office:value="8640000" calcext:value-type="float">
            <text:p>8640000</text:p>
          </table:table-cell>
          <table:table-cell table:formula="of:=[.B2246]/[.C2246]" office:value-type="float" office:value="0.00259837962962963" calcext:value-type="float">
            <text:p>0,00259837962962963000</text:p>
          </table:table-cell>
          <table:table-cell table:formula="of:=[.D2247]-[.D2246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246" calcext:value-type="float">
            <text:p>2246</text:p>
          </table:table-cell>
          <table:table-cell table:formula="of:=[.B2246]+10" office:value-type="float" office:value="22460" calcext:value-type="float">
            <text:p>22460</text:p>
          </table:table-cell>
          <table:table-cell office:value-type="float" office:value="8640000" calcext:value-type="float">
            <text:p>8640000</text:p>
          </table:table-cell>
          <table:table-cell table:formula="of:=[.B2247]/[.C2247]" office:value-type="float" office:value="0.00259953703703704" calcext:value-type="float">
            <text:p>0,00259953703703704000</text:p>
          </table:table-cell>
          <table:table-cell table:formula="of:=[.D2248]-[.D2247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247" calcext:value-type="float">
            <text:p>2247</text:p>
          </table:table-cell>
          <table:table-cell table:formula="of:=[.B2247]+10" office:value-type="float" office:value="22470" calcext:value-type="float">
            <text:p>22470</text:p>
          </table:table-cell>
          <table:table-cell office:value-type="float" office:value="8640000" calcext:value-type="float">
            <text:p>8640000</text:p>
          </table:table-cell>
          <table:table-cell table:formula="of:=[.B2248]/[.C2248]" office:value-type="float" office:value="0.00260069444444444" calcext:value-type="float">
            <text:p>0,00260069444444444000</text:p>
          </table:table-cell>
          <table:table-cell table:formula="of:=[.D2249]-[.D2248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248" calcext:value-type="float">
            <text:p>2248</text:p>
          </table:table-cell>
          <table:table-cell table:formula="of:=[.B2248]+10" office:value-type="float" office:value="22480" calcext:value-type="float">
            <text:p>22480</text:p>
          </table:table-cell>
          <table:table-cell office:value-type="float" office:value="8640000" calcext:value-type="float">
            <text:p>8640000</text:p>
          </table:table-cell>
          <table:table-cell table:formula="of:=[.B2249]/[.C2249]" office:value-type="float" office:value="0.00260185185185185" calcext:value-type="float">
            <text:p>0,00260185185185185000</text:p>
          </table:table-cell>
          <table:table-cell table:formula="of:=[.D2250]-[.D2249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249" calcext:value-type="float">
            <text:p>2249</text:p>
          </table:table-cell>
          <table:table-cell table:formula="of:=[.B2249]+10" office:value-type="float" office:value="22490" calcext:value-type="float">
            <text:p>22490</text:p>
          </table:table-cell>
          <table:table-cell office:value-type="float" office:value="8640000" calcext:value-type="float">
            <text:p>8640000</text:p>
          </table:table-cell>
          <table:table-cell table:formula="of:=[.B2250]/[.C2250]" office:value-type="float" office:value="0.00260300925925926" calcext:value-type="float">
            <text:p>0,00260300925925926000</text:p>
          </table:table-cell>
          <table:table-cell table:formula="of:=[.D2251]-[.D2250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table:formula="of:=[.B2250]+10" office:value-type="float" office:value="22500" calcext:value-type="float">
            <text:p>22500</text:p>
          </table:table-cell>
          <table:table-cell office:value-type="float" office:value="8640000" calcext:value-type="float">
            <text:p>8640000</text:p>
          </table:table-cell>
          <table:table-cell table:formula="of:=[.B2251]/[.C2251]" office:value-type="float" office:value="0.00260416666666667" calcext:value-type="float">
            <text:p>0,00260416666666667000</text:p>
          </table:table-cell>
          <table:table-cell table:formula="of:=[.D2252]-[.D2251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251" calcext:value-type="float">
            <text:p>2251</text:p>
          </table:table-cell>
          <table:table-cell table:formula="of:=[.B2251]+10" office:value-type="float" office:value="22510" calcext:value-type="float">
            <text:p>22510</text:p>
          </table:table-cell>
          <table:table-cell office:value-type="float" office:value="8640000" calcext:value-type="float">
            <text:p>8640000</text:p>
          </table:table-cell>
          <table:table-cell table:formula="of:=[.B2252]/[.C2252]" office:value-type="float" office:value="0.00260532407407407" calcext:value-type="float">
            <text:p>0,00260532407407407000</text:p>
          </table:table-cell>
          <table:table-cell table:formula="of:=[.D2253]-[.D2252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252" calcext:value-type="float">
            <text:p>2252</text:p>
          </table:table-cell>
          <table:table-cell table:formula="of:=[.B2252]+10" office:value-type="float" office:value="22520" calcext:value-type="float">
            <text:p>22520</text:p>
          </table:table-cell>
          <table:table-cell office:value-type="float" office:value="8640000" calcext:value-type="float">
            <text:p>8640000</text:p>
          </table:table-cell>
          <table:table-cell table:formula="of:=[.B2253]/[.C2253]" office:value-type="float" office:value="0.00260648148148148" calcext:value-type="float">
            <text:p>0,00260648148148148000</text:p>
          </table:table-cell>
          <table:table-cell table:formula="of:=[.D2254]-[.D2253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253" calcext:value-type="float">
            <text:p>2253</text:p>
          </table:table-cell>
          <table:table-cell table:formula="of:=[.B2253]+10" office:value-type="float" office:value="22530" calcext:value-type="float">
            <text:p>22530</text:p>
          </table:table-cell>
          <table:table-cell office:value-type="float" office:value="8640000" calcext:value-type="float">
            <text:p>8640000</text:p>
          </table:table-cell>
          <table:table-cell table:formula="of:=[.B2254]/[.C2254]" office:value-type="float" office:value="0.00260763888888889" calcext:value-type="float">
            <text:p>0,00260763888888889000</text:p>
          </table:table-cell>
          <table:table-cell table:formula="of:=[.D2255]-[.D2254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254" calcext:value-type="float">
            <text:p>2254</text:p>
          </table:table-cell>
          <table:table-cell table:formula="of:=[.B2254]+10" office:value-type="float" office:value="22540" calcext:value-type="float">
            <text:p>22540</text:p>
          </table:table-cell>
          <table:table-cell office:value-type="float" office:value="8640000" calcext:value-type="float">
            <text:p>8640000</text:p>
          </table:table-cell>
          <table:table-cell table:formula="of:=[.B2255]/[.C2255]" office:value-type="float" office:value="0.0026087962962963" calcext:value-type="float">
            <text:p>0,00260879629629630000</text:p>
          </table:table-cell>
          <table:table-cell table:formula="of:=[.D2256]-[.D2255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255" calcext:value-type="float">
            <text:p>2255</text:p>
          </table:table-cell>
          <table:table-cell table:formula="of:=[.B2255]+10" office:value-type="float" office:value="22550" calcext:value-type="float">
            <text:p>22550</text:p>
          </table:table-cell>
          <table:table-cell office:value-type="float" office:value="8640000" calcext:value-type="float">
            <text:p>8640000</text:p>
          </table:table-cell>
          <table:table-cell table:formula="of:=[.B2256]/[.C2256]" office:value-type="float" office:value="0.0026099537037037" calcext:value-type="float">
            <text:p>0,00260995370370370000</text:p>
          </table:table-cell>
          <table:table-cell table:formula="of:=[.D2257]-[.D2256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256" calcext:value-type="float">
            <text:p>2256</text:p>
          </table:table-cell>
          <table:table-cell table:formula="of:=[.B2256]+10" office:value-type="float" office:value="22560" calcext:value-type="float">
            <text:p>22560</text:p>
          </table:table-cell>
          <table:table-cell office:value-type="float" office:value="8640000" calcext:value-type="float">
            <text:p>8640000</text:p>
          </table:table-cell>
          <table:table-cell table:formula="of:=[.B2257]/[.C2257]" office:value-type="float" office:value="0.00261111111111111" calcext:value-type="float">
            <text:p>0,00261111111111111000</text:p>
          </table:table-cell>
          <table:table-cell table:formula="of:=[.D2258]-[.D2257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257" calcext:value-type="float">
            <text:p>2257</text:p>
          </table:table-cell>
          <table:table-cell table:formula="of:=[.B2257]+10" office:value-type="float" office:value="22570" calcext:value-type="float">
            <text:p>22570</text:p>
          </table:table-cell>
          <table:table-cell office:value-type="float" office:value="8640000" calcext:value-type="float">
            <text:p>8640000</text:p>
          </table:table-cell>
          <table:table-cell table:formula="of:=[.B2258]/[.C2258]" office:value-type="float" office:value="0.00261226851851852" calcext:value-type="float">
            <text:p>0,00261226851851852000</text:p>
          </table:table-cell>
          <table:table-cell table:formula="of:=[.D2259]-[.D2258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258" calcext:value-type="float">
            <text:p>2258</text:p>
          </table:table-cell>
          <table:table-cell table:formula="of:=[.B2258]+10" office:value-type="float" office:value="22580" calcext:value-type="float">
            <text:p>22580</text:p>
          </table:table-cell>
          <table:table-cell office:value-type="float" office:value="8640000" calcext:value-type="float">
            <text:p>8640000</text:p>
          </table:table-cell>
          <table:table-cell table:formula="of:=[.B2259]/[.C2259]" office:value-type="float" office:value="0.00261342592592593" calcext:value-type="float">
            <text:p>0,00261342592592593000</text:p>
          </table:table-cell>
          <table:table-cell table:formula="of:=[.D2260]-[.D2259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259" calcext:value-type="float">
            <text:p>2259</text:p>
          </table:table-cell>
          <table:table-cell table:formula="of:=[.B2259]+10" office:value-type="float" office:value="22590" calcext:value-type="float">
            <text:p>22590</text:p>
          </table:table-cell>
          <table:table-cell office:value-type="float" office:value="8640000" calcext:value-type="float">
            <text:p>8640000</text:p>
          </table:table-cell>
          <table:table-cell table:formula="of:=[.B2260]/[.C2260]" office:value-type="float" office:value="0.00261458333333333" calcext:value-type="float">
            <text:p>0,00261458333333333000</text:p>
          </table:table-cell>
          <table:table-cell table:formula="of:=[.D2261]-[.D2260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260" calcext:value-type="float">
            <text:p>2260</text:p>
          </table:table-cell>
          <table:table-cell table:formula="of:=[.B2260]+10" office:value-type="float" office:value="22600" calcext:value-type="float">
            <text:p>22600</text:p>
          </table:table-cell>
          <table:table-cell office:value-type="float" office:value="8640000" calcext:value-type="float">
            <text:p>8640000</text:p>
          </table:table-cell>
          <table:table-cell table:formula="of:=[.B2261]/[.C2261]" office:value-type="float" office:value="0.00261574074074074" calcext:value-type="float">
            <text:p>0,00261574074074074000</text:p>
          </table:table-cell>
          <table:table-cell table:formula="of:=[.D2262]-[.D2261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261" calcext:value-type="float">
            <text:p>2261</text:p>
          </table:table-cell>
          <table:table-cell table:formula="of:=[.B2261]+10" office:value-type="float" office:value="22610" calcext:value-type="float">
            <text:p>22610</text:p>
          </table:table-cell>
          <table:table-cell office:value-type="float" office:value="8640000" calcext:value-type="float">
            <text:p>8640000</text:p>
          </table:table-cell>
          <table:table-cell table:formula="of:=[.B2262]/[.C2262]" office:value-type="float" office:value="0.00261689814814815" calcext:value-type="float">
            <text:p>0,00261689814814815000</text:p>
          </table:table-cell>
          <table:table-cell table:formula="of:=[.D2263]-[.D2262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262" calcext:value-type="float">
            <text:p>2262</text:p>
          </table:table-cell>
          <table:table-cell table:formula="of:=[.B2262]+10" office:value-type="float" office:value="22620" calcext:value-type="float">
            <text:p>22620</text:p>
          </table:table-cell>
          <table:table-cell office:value-type="float" office:value="8640000" calcext:value-type="float">
            <text:p>8640000</text:p>
          </table:table-cell>
          <table:table-cell table:formula="of:=[.B2263]/[.C2263]" office:value-type="float" office:value="0.00261805555555556" calcext:value-type="float">
            <text:p>0,00261805555555556000</text:p>
          </table:table-cell>
          <table:table-cell table:formula="of:=[.D2264]-[.D2263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263" calcext:value-type="float">
            <text:p>2263</text:p>
          </table:table-cell>
          <table:table-cell table:formula="of:=[.B2263]+10" office:value-type="float" office:value="22630" calcext:value-type="float">
            <text:p>22630</text:p>
          </table:table-cell>
          <table:table-cell office:value-type="float" office:value="8640000" calcext:value-type="float">
            <text:p>8640000</text:p>
          </table:table-cell>
          <table:table-cell table:formula="of:=[.B2264]/[.C2264]" office:value-type="float" office:value="0.00261921296296296" calcext:value-type="float">
            <text:p>0,00261921296296296000</text:p>
          </table:table-cell>
          <table:table-cell table:formula="of:=[.D2265]-[.D2264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264" calcext:value-type="float">
            <text:p>2264</text:p>
          </table:table-cell>
          <table:table-cell table:formula="of:=[.B2264]+10" office:value-type="float" office:value="22640" calcext:value-type="float">
            <text:p>22640</text:p>
          </table:table-cell>
          <table:table-cell office:value-type="float" office:value="8640000" calcext:value-type="float">
            <text:p>8640000</text:p>
          </table:table-cell>
          <table:table-cell table:formula="of:=[.B2265]/[.C2265]" office:value-type="float" office:value="0.00262037037037037" calcext:value-type="float">
            <text:p>0,00262037037037037000</text:p>
          </table:table-cell>
          <table:table-cell table:formula="of:=[.D2266]-[.D2265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265" calcext:value-type="float">
            <text:p>2265</text:p>
          </table:table-cell>
          <table:table-cell table:formula="of:=[.B2265]+10" office:value-type="float" office:value="22650" calcext:value-type="float">
            <text:p>22650</text:p>
          </table:table-cell>
          <table:table-cell office:value-type="float" office:value="8640000" calcext:value-type="float">
            <text:p>8640000</text:p>
          </table:table-cell>
          <table:table-cell table:formula="of:=[.B2266]/[.C2266]" office:value-type="float" office:value="0.00262152777777778" calcext:value-type="float">
            <text:p>0,00262152777777778000</text:p>
          </table:table-cell>
          <table:table-cell table:formula="of:=[.D2267]-[.D2266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266" calcext:value-type="float">
            <text:p>2266</text:p>
          </table:table-cell>
          <table:table-cell table:formula="of:=[.B2266]+10" office:value-type="float" office:value="22660" calcext:value-type="float">
            <text:p>22660</text:p>
          </table:table-cell>
          <table:table-cell office:value-type="float" office:value="8640000" calcext:value-type="float">
            <text:p>8640000</text:p>
          </table:table-cell>
          <table:table-cell table:formula="of:=[.B2267]/[.C2267]" office:value-type="float" office:value="0.00262268518518519" calcext:value-type="float">
            <text:p>0,00262268518518519000</text:p>
          </table:table-cell>
          <table:table-cell table:formula="of:=[.D2268]-[.D2267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267" calcext:value-type="float">
            <text:p>2267</text:p>
          </table:table-cell>
          <table:table-cell table:formula="of:=[.B2267]+10" office:value-type="float" office:value="22670" calcext:value-type="float">
            <text:p>22670</text:p>
          </table:table-cell>
          <table:table-cell office:value-type="float" office:value="8640000" calcext:value-type="float">
            <text:p>8640000</text:p>
          </table:table-cell>
          <table:table-cell table:formula="of:=[.B2268]/[.C2268]" office:value-type="float" office:value="0.00262384259259259" calcext:value-type="float">
            <text:p>0,00262384259259259000</text:p>
          </table:table-cell>
          <table:table-cell table:formula="of:=[.D2269]-[.D2268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268" calcext:value-type="float">
            <text:p>2268</text:p>
          </table:table-cell>
          <table:table-cell table:formula="of:=[.B2268]+10" office:value-type="float" office:value="22680" calcext:value-type="float">
            <text:p>22680</text:p>
          </table:table-cell>
          <table:table-cell office:value-type="float" office:value="8640000" calcext:value-type="float">
            <text:p>8640000</text:p>
          </table:table-cell>
          <table:table-cell table:formula="of:=[.B2269]/[.C2269]" office:value-type="float" office:value="0.002625" calcext:value-type="float">
            <text:p>0,00262500000000000000</text:p>
          </table:table-cell>
          <table:table-cell table:formula="of:=[.D2270]-[.D2269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269" calcext:value-type="float">
            <text:p>2269</text:p>
          </table:table-cell>
          <table:table-cell table:formula="of:=[.B2269]+10" office:value-type="float" office:value="22690" calcext:value-type="float">
            <text:p>22690</text:p>
          </table:table-cell>
          <table:table-cell office:value-type="float" office:value="8640000" calcext:value-type="float">
            <text:p>8640000</text:p>
          </table:table-cell>
          <table:table-cell table:formula="of:=[.B2270]/[.C2270]" office:value-type="float" office:value="0.00262615740740741" calcext:value-type="float">
            <text:p>0,00262615740740741000</text:p>
          </table:table-cell>
          <table:table-cell table:formula="of:=[.D2271]-[.D2270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270" calcext:value-type="float">
            <text:p>2270</text:p>
          </table:table-cell>
          <table:table-cell table:formula="of:=[.B2270]+10" office:value-type="float" office:value="22700" calcext:value-type="float">
            <text:p>22700</text:p>
          </table:table-cell>
          <table:table-cell office:value-type="float" office:value="8640000" calcext:value-type="float">
            <text:p>8640000</text:p>
          </table:table-cell>
          <table:table-cell table:formula="of:=[.B2271]/[.C2271]" office:value-type="float" office:value="0.00262731481481482" calcext:value-type="float">
            <text:p>0,00262731481481482000</text:p>
          </table:table-cell>
          <table:table-cell table:formula="of:=[.D2272]-[.D2271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271" calcext:value-type="float">
            <text:p>2271</text:p>
          </table:table-cell>
          <table:table-cell table:formula="of:=[.B2271]+10" office:value-type="float" office:value="22710" calcext:value-type="float">
            <text:p>22710</text:p>
          </table:table-cell>
          <table:table-cell office:value-type="float" office:value="8640000" calcext:value-type="float">
            <text:p>8640000</text:p>
          </table:table-cell>
          <table:table-cell table:formula="of:=[.B2272]/[.C2272]" office:value-type="float" office:value="0.00262847222222222" calcext:value-type="float">
            <text:p>0,00262847222222222000</text:p>
          </table:table-cell>
          <table:table-cell table:formula="of:=[.D2273]-[.D2272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272" calcext:value-type="float">
            <text:p>2272</text:p>
          </table:table-cell>
          <table:table-cell table:formula="of:=[.B2272]+10" office:value-type="float" office:value="22720" calcext:value-type="float">
            <text:p>22720</text:p>
          </table:table-cell>
          <table:table-cell office:value-type="float" office:value="8640000" calcext:value-type="float">
            <text:p>8640000</text:p>
          </table:table-cell>
          <table:table-cell table:formula="of:=[.B2273]/[.C2273]" office:value-type="float" office:value="0.00262962962962963" calcext:value-type="float">
            <text:p>0,00262962962962963000</text:p>
          </table:table-cell>
          <table:table-cell table:formula="of:=[.D2274]-[.D2273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273" calcext:value-type="float">
            <text:p>2273</text:p>
          </table:table-cell>
          <table:table-cell table:formula="of:=[.B2273]+10" office:value-type="float" office:value="22730" calcext:value-type="float">
            <text:p>22730</text:p>
          </table:table-cell>
          <table:table-cell office:value-type="float" office:value="8640000" calcext:value-type="float">
            <text:p>8640000</text:p>
          </table:table-cell>
          <table:table-cell table:formula="of:=[.B2274]/[.C2274]" office:value-type="float" office:value="0.00263078703703704" calcext:value-type="float">
            <text:p>0,00263078703703704000</text:p>
          </table:table-cell>
          <table:table-cell table:formula="of:=[.D2275]-[.D2274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274" calcext:value-type="float">
            <text:p>2274</text:p>
          </table:table-cell>
          <table:table-cell table:formula="of:=[.B2274]+10" office:value-type="float" office:value="22740" calcext:value-type="float">
            <text:p>22740</text:p>
          </table:table-cell>
          <table:table-cell office:value-type="float" office:value="8640000" calcext:value-type="float">
            <text:p>8640000</text:p>
          </table:table-cell>
          <table:table-cell table:formula="of:=[.B2275]/[.C2275]" office:value-type="float" office:value="0.00263194444444444" calcext:value-type="float">
            <text:p>0,00263194444444444000</text:p>
          </table:table-cell>
          <table:table-cell table:formula="of:=[.D2276]-[.D2275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275" calcext:value-type="float">
            <text:p>2275</text:p>
          </table:table-cell>
          <table:table-cell table:formula="of:=[.B2275]+10" office:value-type="float" office:value="22750" calcext:value-type="float">
            <text:p>22750</text:p>
          </table:table-cell>
          <table:table-cell office:value-type="float" office:value="8640000" calcext:value-type="float">
            <text:p>8640000</text:p>
          </table:table-cell>
          <table:table-cell table:formula="of:=[.B2276]/[.C2276]" office:value-type="float" office:value="0.00263310185185185" calcext:value-type="float">
            <text:p>0,00263310185185185000</text:p>
          </table:table-cell>
          <table:table-cell table:formula="of:=[.D2277]-[.D2276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276" calcext:value-type="float">
            <text:p>2276</text:p>
          </table:table-cell>
          <table:table-cell table:formula="of:=[.B2276]+10" office:value-type="float" office:value="22760" calcext:value-type="float">
            <text:p>22760</text:p>
          </table:table-cell>
          <table:table-cell office:value-type="float" office:value="8640000" calcext:value-type="float">
            <text:p>8640000</text:p>
          </table:table-cell>
          <table:table-cell table:formula="of:=[.B2277]/[.C2277]" office:value-type="float" office:value="0.00263425925925926" calcext:value-type="float">
            <text:p>0,00263425925925926000</text:p>
          </table:table-cell>
          <table:table-cell table:formula="of:=[.D2278]-[.D2277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277" calcext:value-type="float">
            <text:p>2277</text:p>
          </table:table-cell>
          <table:table-cell table:formula="of:=[.B2277]+10" office:value-type="float" office:value="22770" calcext:value-type="float">
            <text:p>22770</text:p>
          </table:table-cell>
          <table:table-cell office:value-type="float" office:value="8640000" calcext:value-type="float">
            <text:p>8640000</text:p>
          </table:table-cell>
          <table:table-cell table:formula="of:=[.B2278]/[.C2278]" office:value-type="float" office:value="0.00263541666666667" calcext:value-type="float">
            <text:p>0,00263541666666667000</text:p>
          </table:table-cell>
          <table:table-cell table:formula="of:=[.D2279]-[.D2278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278" calcext:value-type="float">
            <text:p>2278</text:p>
          </table:table-cell>
          <table:table-cell table:formula="of:=[.B2278]+10" office:value-type="float" office:value="22780" calcext:value-type="float">
            <text:p>22780</text:p>
          </table:table-cell>
          <table:table-cell office:value-type="float" office:value="8640000" calcext:value-type="float">
            <text:p>8640000</text:p>
          </table:table-cell>
          <table:table-cell table:formula="of:=[.B2279]/[.C2279]" office:value-type="float" office:value="0.00263657407407407" calcext:value-type="float">
            <text:p>0,00263657407407407000</text:p>
          </table:table-cell>
          <table:table-cell table:formula="of:=[.D2280]-[.D2279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279" calcext:value-type="float">
            <text:p>2279</text:p>
          </table:table-cell>
          <table:table-cell table:formula="of:=[.B2279]+10" office:value-type="float" office:value="22790" calcext:value-type="float">
            <text:p>22790</text:p>
          </table:table-cell>
          <table:table-cell office:value-type="float" office:value="8640000" calcext:value-type="float">
            <text:p>8640000</text:p>
          </table:table-cell>
          <table:table-cell table:formula="of:=[.B2280]/[.C2280]" office:value-type="float" office:value="0.00263773148148148" calcext:value-type="float">
            <text:p>0,00263773148148148000</text:p>
          </table:table-cell>
          <table:table-cell table:formula="of:=[.D2281]-[.D2280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280" calcext:value-type="float">
            <text:p>2280</text:p>
          </table:table-cell>
          <table:table-cell table:formula="of:=[.B2280]+10" office:value-type="float" office:value="22800" calcext:value-type="float">
            <text:p>22800</text:p>
          </table:table-cell>
          <table:table-cell office:value-type="float" office:value="8640000" calcext:value-type="float">
            <text:p>8640000</text:p>
          </table:table-cell>
          <table:table-cell table:formula="of:=[.B2281]/[.C2281]" office:value-type="float" office:value="0.00263888888888889" calcext:value-type="float">
            <text:p>0,00263888888888889000</text:p>
          </table:table-cell>
          <table:table-cell table:formula="of:=[.D2282]-[.D2281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281" calcext:value-type="float">
            <text:p>2281</text:p>
          </table:table-cell>
          <table:table-cell table:formula="of:=[.B2281]+10" office:value-type="float" office:value="22810" calcext:value-type="float">
            <text:p>22810</text:p>
          </table:table-cell>
          <table:table-cell office:value-type="float" office:value="8640000" calcext:value-type="float">
            <text:p>8640000</text:p>
          </table:table-cell>
          <table:table-cell table:formula="of:=[.B2282]/[.C2282]" office:value-type="float" office:value="0.0026400462962963" calcext:value-type="float">
            <text:p>0,00264004629629630000</text:p>
          </table:table-cell>
          <table:table-cell table:formula="of:=[.D2283]-[.D2282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282" calcext:value-type="float">
            <text:p>2282</text:p>
          </table:table-cell>
          <table:table-cell table:formula="of:=[.B2282]+10" office:value-type="float" office:value="22820" calcext:value-type="float">
            <text:p>22820</text:p>
          </table:table-cell>
          <table:table-cell office:value-type="float" office:value="8640000" calcext:value-type="float">
            <text:p>8640000</text:p>
          </table:table-cell>
          <table:table-cell table:formula="of:=[.B2283]/[.C2283]" office:value-type="float" office:value="0.0026412037037037" calcext:value-type="float">
            <text:p>0,00264120370370370000</text:p>
          </table:table-cell>
          <table:table-cell table:formula="of:=[.D2284]-[.D2283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283" calcext:value-type="float">
            <text:p>2283</text:p>
          </table:table-cell>
          <table:table-cell table:formula="of:=[.B2283]+10" office:value-type="float" office:value="22830" calcext:value-type="float">
            <text:p>22830</text:p>
          </table:table-cell>
          <table:table-cell office:value-type="float" office:value="8640000" calcext:value-type="float">
            <text:p>8640000</text:p>
          </table:table-cell>
          <table:table-cell table:formula="of:=[.B2284]/[.C2284]" office:value-type="float" office:value="0.00264236111111111" calcext:value-type="float">
            <text:p>0,00264236111111111000</text:p>
          </table:table-cell>
          <table:table-cell table:formula="of:=[.D2285]-[.D2284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284" calcext:value-type="float">
            <text:p>2284</text:p>
          </table:table-cell>
          <table:table-cell table:formula="of:=[.B2284]+10" office:value-type="float" office:value="22840" calcext:value-type="float">
            <text:p>22840</text:p>
          </table:table-cell>
          <table:table-cell office:value-type="float" office:value="8640000" calcext:value-type="float">
            <text:p>8640000</text:p>
          </table:table-cell>
          <table:table-cell table:formula="of:=[.B2285]/[.C2285]" office:value-type="float" office:value="0.00264351851851852" calcext:value-type="float">
            <text:p>0,00264351851851852000</text:p>
          </table:table-cell>
          <table:table-cell table:formula="of:=[.D2286]-[.D2285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285" calcext:value-type="float">
            <text:p>2285</text:p>
          </table:table-cell>
          <table:table-cell table:formula="of:=[.B2285]+10" office:value-type="float" office:value="22850" calcext:value-type="float">
            <text:p>22850</text:p>
          </table:table-cell>
          <table:table-cell office:value-type="float" office:value="8640000" calcext:value-type="float">
            <text:p>8640000</text:p>
          </table:table-cell>
          <table:table-cell table:formula="of:=[.B2286]/[.C2286]" office:value-type="float" office:value="0.00264467592592593" calcext:value-type="float">
            <text:p>0,00264467592592593000</text:p>
          </table:table-cell>
          <table:table-cell table:formula="of:=[.D2287]-[.D2286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286" calcext:value-type="float">
            <text:p>2286</text:p>
          </table:table-cell>
          <table:table-cell table:formula="of:=[.B2286]+10" office:value-type="float" office:value="22860" calcext:value-type="float">
            <text:p>22860</text:p>
          </table:table-cell>
          <table:table-cell office:value-type="float" office:value="8640000" calcext:value-type="float">
            <text:p>8640000</text:p>
          </table:table-cell>
          <table:table-cell table:formula="of:=[.B2287]/[.C2287]" office:value-type="float" office:value="0.00264583333333333" calcext:value-type="float">
            <text:p>0,00264583333333333000</text:p>
          </table:table-cell>
          <table:table-cell table:formula="of:=[.D2288]-[.D2287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287" calcext:value-type="float">
            <text:p>2287</text:p>
          </table:table-cell>
          <table:table-cell table:formula="of:=[.B2287]+10" office:value-type="float" office:value="22870" calcext:value-type="float">
            <text:p>22870</text:p>
          </table:table-cell>
          <table:table-cell office:value-type="float" office:value="8640000" calcext:value-type="float">
            <text:p>8640000</text:p>
          </table:table-cell>
          <table:table-cell table:formula="of:=[.B2288]/[.C2288]" office:value-type="float" office:value="0.00264699074074074" calcext:value-type="float">
            <text:p>0,00264699074074074000</text:p>
          </table:table-cell>
          <table:table-cell table:formula="of:=[.D2289]-[.D2288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288" calcext:value-type="float">
            <text:p>2288</text:p>
          </table:table-cell>
          <table:table-cell table:formula="of:=[.B2288]+10" office:value-type="float" office:value="22880" calcext:value-type="float">
            <text:p>22880</text:p>
          </table:table-cell>
          <table:table-cell office:value-type="float" office:value="8640000" calcext:value-type="float">
            <text:p>8640000</text:p>
          </table:table-cell>
          <table:table-cell table:formula="of:=[.B2289]/[.C2289]" office:value-type="float" office:value="0.00264814814814815" calcext:value-type="float">
            <text:p>0,00264814814814815000</text:p>
          </table:table-cell>
          <table:table-cell table:formula="of:=[.D2290]-[.D2289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289" calcext:value-type="float">
            <text:p>2289</text:p>
          </table:table-cell>
          <table:table-cell table:formula="of:=[.B2289]+10" office:value-type="float" office:value="22890" calcext:value-type="float">
            <text:p>22890</text:p>
          </table:table-cell>
          <table:table-cell office:value-type="float" office:value="8640000" calcext:value-type="float">
            <text:p>8640000</text:p>
          </table:table-cell>
          <table:table-cell table:formula="of:=[.B2290]/[.C2290]" office:value-type="float" office:value="0.00264930555555556" calcext:value-type="float">
            <text:p>0,00264930555555556000</text:p>
          </table:table-cell>
          <table:table-cell table:formula="of:=[.D2291]-[.D2290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290" calcext:value-type="float">
            <text:p>2290</text:p>
          </table:table-cell>
          <table:table-cell table:formula="of:=[.B2290]+10" office:value-type="float" office:value="22900" calcext:value-type="float">
            <text:p>22900</text:p>
          </table:table-cell>
          <table:table-cell office:value-type="float" office:value="8640000" calcext:value-type="float">
            <text:p>8640000</text:p>
          </table:table-cell>
          <table:table-cell table:formula="of:=[.B2291]/[.C2291]" office:value-type="float" office:value="0.00265046296296296" calcext:value-type="float">
            <text:p>0,00265046296296296000</text:p>
          </table:table-cell>
          <table:table-cell table:formula="of:=[.D2292]-[.D2291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291" calcext:value-type="float">
            <text:p>2291</text:p>
          </table:table-cell>
          <table:table-cell table:formula="of:=[.B2291]+10" office:value-type="float" office:value="22910" calcext:value-type="float">
            <text:p>22910</text:p>
          </table:table-cell>
          <table:table-cell office:value-type="float" office:value="8640000" calcext:value-type="float">
            <text:p>8640000</text:p>
          </table:table-cell>
          <table:table-cell table:formula="of:=[.B2292]/[.C2292]" office:value-type="float" office:value="0.00265162037037037" calcext:value-type="float">
            <text:p>0,00265162037037037000</text:p>
          </table:table-cell>
          <table:table-cell table:formula="of:=[.D2293]-[.D2292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292" calcext:value-type="float">
            <text:p>2292</text:p>
          </table:table-cell>
          <table:table-cell table:formula="of:=[.B2292]+10" office:value-type="float" office:value="22920" calcext:value-type="float">
            <text:p>22920</text:p>
          </table:table-cell>
          <table:table-cell office:value-type="float" office:value="8640000" calcext:value-type="float">
            <text:p>8640000</text:p>
          </table:table-cell>
          <table:table-cell table:formula="of:=[.B2293]/[.C2293]" office:value-type="float" office:value="0.00265277777777778" calcext:value-type="float">
            <text:p>0,00265277777777778000</text:p>
          </table:table-cell>
          <table:table-cell table:formula="of:=[.D2294]-[.D2293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293" calcext:value-type="float">
            <text:p>2293</text:p>
          </table:table-cell>
          <table:table-cell table:formula="of:=[.B2293]+10" office:value-type="float" office:value="22930" calcext:value-type="float">
            <text:p>22930</text:p>
          </table:table-cell>
          <table:table-cell office:value-type="float" office:value="8640000" calcext:value-type="float">
            <text:p>8640000</text:p>
          </table:table-cell>
          <table:table-cell table:formula="of:=[.B2294]/[.C2294]" office:value-type="float" office:value="0.00265393518518519" calcext:value-type="float">
            <text:p>0,00265393518518519000</text:p>
          </table:table-cell>
          <table:table-cell table:formula="of:=[.D2295]-[.D2294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294" calcext:value-type="float">
            <text:p>2294</text:p>
          </table:table-cell>
          <table:table-cell table:formula="of:=[.B2294]+10" office:value-type="float" office:value="22940" calcext:value-type="float">
            <text:p>22940</text:p>
          </table:table-cell>
          <table:table-cell office:value-type="float" office:value="8640000" calcext:value-type="float">
            <text:p>8640000</text:p>
          </table:table-cell>
          <table:table-cell table:formula="of:=[.B2295]/[.C2295]" office:value-type="float" office:value="0.00265509259259259" calcext:value-type="float">
            <text:p>0,00265509259259259000</text:p>
          </table:table-cell>
          <table:table-cell table:formula="of:=[.D2296]-[.D2295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295" calcext:value-type="float">
            <text:p>2295</text:p>
          </table:table-cell>
          <table:table-cell table:formula="of:=[.B2295]+10" office:value-type="float" office:value="22950" calcext:value-type="float">
            <text:p>22950</text:p>
          </table:table-cell>
          <table:table-cell office:value-type="float" office:value="8640000" calcext:value-type="float">
            <text:p>8640000</text:p>
          </table:table-cell>
          <table:table-cell table:formula="of:=[.B2296]/[.C2296]" office:value-type="float" office:value="0.00265625" calcext:value-type="float">
            <text:p>0,00265625000000000000</text:p>
          </table:table-cell>
          <table:table-cell table:formula="of:=[.D2297]-[.D2296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296" calcext:value-type="float">
            <text:p>2296</text:p>
          </table:table-cell>
          <table:table-cell table:formula="of:=[.B2296]+10" office:value-type="float" office:value="22960" calcext:value-type="float">
            <text:p>22960</text:p>
          </table:table-cell>
          <table:table-cell office:value-type="float" office:value="8640000" calcext:value-type="float">
            <text:p>8640000</text:p>
          </table:table-cell>
          <table:table-cell table:formula="of:=[.B2297]/[.C2297]" office:value-type="float" office:value="0.00265740740740741" calcext:value-type="float">
            <text:p>0,00265740740740741000</text:p>
          </table:table-cell>
          <table:table-cell table:formula="of:=[.D2298]-[.D2297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297" calcext:value-type="float">
            <text:p>2297</text:p>
          </table:table-cell>
          <table:table-cell table:formula="of:=[.B2297]+10" office:value-type="float" office:value="22970" calcext:value-type="float">
            <text:p>22970</text:p>
          </table:table-cell>
          <table:table-cell office:value-type="float" office:value="8640000" calcext:value-type="float">
            <text:p>8640000</text:p>
          </table:table-cell>
          <table:table-cell table:formula="of:=[.B2298]/[.C2298]" office:value-type="float" office:value="0.00265856481481482" calcext:value-type="float">
            <text:p>0,00265856481481482000</text:p>
          </table:table-cell>
          <table:table-cell table:formula="of:=[.D2299]-[.D2298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298" calcext:value-type="float">
            <text:p>2298</text:p>
          </table:table-cell>
          <table:table-cell table:formula="of:=[.B2298]+10" office:value-type="float" office:value="22980" calcext:value-type="float">
            <text:p>22980</text:p>
          </table:table-cell>
          <table:table-cell office:value-type="float" office:value="8640000" calcext:value-type="float">
            <text:p>8640000</text:p>
          </table:table-cell>
          <table:table-cell table:formula="of:=[.B2299]/[.C2299]" office:value-type="float" office:value="0.00265972222222222" calcext:value-type="float">
            <text:p>0,00265972222222222000</text:p>
          </table:table-cell>
          <table:table-cell table:formula="of:=[.D2300]-[.D2299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299" calcext:value-type="float">
            <text:p>2299</text:p>
          </table:table-cell>
          <table:table-cell table:formula="of:=[.B2299]+10" office:value-type="float" office:value="22990" calcext:value-type="float">
            <text:p>22990</text:p>
          </table:table-cell>
          <table:table-cell office:value-type="float" office:value="8640000" calcext:value-type="float">
            <text:p>8640000</text:p>
          </table:table-cell>
          <table:table-cell table:formula="of:=[.B2300]/[.C2300]" office:value-type="float" office:value="0.00266087962962963" calcext:value-type="float">
            <text:p>0,00266087962962963000</text:p>
          </table:table-cell>
          <table:table-cell table:formula="of:=[.D2301]-[.D2300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table:formula="of:=[.B2300]+10" office:value-type="float" office:value="23000" calcext:value-type="float">
            <text:p>23000</text:p>
          </table:table-cell>
          <table:table-cell office:value-type="float" office:value="8640000" calcext:value-type="float">
            <text:p>8640000</text:p>
          </table:table-cell>
          <table:table-cell table:formula="of:=[.B2301]/[.C2301]" office:value-type="float" office:value="0.00266203703703704" calcext:value-type="float">
            <text:p>0,00266203703703704000</text:p>
          </table:table-cell>
          <table:table-cell table:formula="of:=[.D2302]-[.D2301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301" calcext:value-type="float">
            <text:p>2301</text:p>
          </table:table-cell>
          <table:table-cell table:formula="of:=[.B2301]+10" office:value-type="float" office:value="23010" calcext:value-type="float">
            <text:p>23010</text:p>
          </table:table-cell>
          <table:table-cell office:value-type="float" office:value="8640000" calcext:value-type="float">
            <text:p>8640000</text:p>
          </table:table-cell>
          <table:table-cell table:formula="of:=[.B2302]/[.C2302]" office:value-type="float" office:value="0.00266319444444444" calcext:value-type="float">
            <text:p>0,00266319444444444000</text:p>
          </table:table-cell>
          <table:table-cell table:formula="of:=[.D2303]-[.D2302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302" calcext:value-type="float">
            <text:p>2302</text:p>
          </table:table-cell>
          <table:table-cell table:formula="of:=[.B2302]+10" office:value-type="float" office:value="23020" calcext:value-type="float">
            <text:p>23020</text:p>
          </table:table-cell>
          <table:table-cell office:value-type="float" office:value="8640000" calcext:value-type="float">
            <text:p>8640000</text:p>
          </table:table-cell>
          <table:table-cell table:formula="of:=[.B2303]/[.C2303]" office:value-type="float" office:value="0.00266435185185185" calcext:value-type="float">
            <text:p>0,00266435185185185000</text:p>
          </table:table-cell>
          <table:table-cell table:formula="of:=[.D2304]-[.D2303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303" calcext:value-type="float">
            <text:p>2303</text:p>
          </table:table-cell>
          <table:table-cell table:formula="of:=[.B2303]+10" office:value-type="float" office:value="23030" calcext:value-type="float">
            <text:p>23030</text:p>
          </table:table-cell>
          <table:table-cell office:value-type="float" office:value="8640000" calcext:value-type="float">
            <text:p>8640000</text:p>
          </table:table-cell>
          <table:table-cell table:formula="of:=[.B2304]/[.C2304]" office:value-type="float" office:value="0.00266550925925926" calcext:value-type="float">
            <text:p>0,00266550925925926000</text:p>
          </table:table-cell>
          <table:table-cell table:formula="of:=[.D2305]-[.D2304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304" calcext:value-type="float">
            <text:p>2304</text:p>
          </table:table-cell>
          <table:table-cell table:formula="of:=[.B2304]+10" office:value-type="float" office:value="23040" calcext:value-type="float">
            <text:p>23040</text:p>
          </table:table-cell>
          <table:table-cell office:value-type="float" office:value="8640000" calcext:value-type="float">
            <text:p>8640000</text:p>
          </table:table-cell>
          <table:table-cell table:formula="of:=[.B2305]/[.C2305]" office:value-type="float" office:value="0.00266666666666667" calcext:value-type="float">
            <text:p>0,00266666666666667000</text:p>
          </table:table-cell>
          <table:table-cell table:formula="of:=[.D2306]-[.D2305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305" calcext:value-type="float">
            <text:p>2305</text:p>
          </table:table-cell>
          <table:table-cell table:formula="of:=[.B2305]+10" office:value-type="float" office:value="23050" calcext:value-type="float">
            <text:p>23050</text:p>
          </table:table-cell>
          <table:table-cell office:value-type="float" office:value="8640000" calcext:value-type="float">
            <text:p>8640000</text:p>
          </table:table-cell>
          <table:table-cell table:formula="of:=[.B2306]/[.C2306]" office:value-type="float" office:value="0.00266782407407407" calcext:value-type="float">
            <text:p>0,00266782407407407000</text:p>
          </table:table-cell>
          <table:table-cell table:formula="of:=[.D2307]-[.D2306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306" calcext:value-type="float">
            <text:p>2306</text:p>
          </table:table-cell>
          <table:table-cell table:formula="of:=[.B2306]+10" office:value-type="float" office:value="23060" calcext:value-type="float">
            <text:p>23060</text:p>
          </table:table-cell>
          <table:table-cell office:value-type="float" office:value="8640000" calcext:value-type="float">
            <text:p>8640000</text:p>
          </table:table-cell>
          <table:table-cell table:formula="of:=[.B2307]/[.C2307]" office:value-type="float" office:value="0.00266898148148148" calcext:value-type="float">
            <text:p>0,00266898148148148000</text:p>
          </table:table-cell>
          <table:table-cell table:formula="of:=[.D2308]-[.D2307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307" calcext:value-type="float">
            <text:p>2307</text:p>
          </table:table-cell>
          <table:table-cell table:formula="of:=[.B2307]+10" office:value-type="float" office:value="23070" calcext:value-type="float">
            <text:p>23070</text:p>
          </table:table-cell>
          <table:table-cell office:value-type="float" office:value="8640000" calcext:value-type="float">
            <text:p>8640000</text:p>
          </table:table-cell>
          <table:table-cell table:formula="of:=[.B2308]/[.C2308]" office:value-type="float" office:value="0.00267013888888889" calcext:value-type="float">
            <text:p>0,00267013888888889000</text:p>
          </table:table-cell>
          <table:table-cell table:formula="of:=[.D2309]-[.D2308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308" calcext:value-type="float">
            <text:p>2308</text:p>
          </table:table-cell>
          <table:table-cell table:formula="of:=[.B2308]+10" office:value-type="float" office:value="23080" calcext:value-type="float">
            <text:p>23080</text:p>
          </table:table-cell>
          <table:table-cell office:value-type="float" office:value="8640000" calcext:value-type="float">
            <text:p>8640000</text:p>
          </table:table-cell>
          <table:table-cell table:formula="of:=[.B2309]/[.C2309]" office:value-type="float" office:value="0.0026712962962963" calcext:value-type="float">
            <text:p>0,00267129629629630000</text:p>
          </table:table-cell>
          <table:table-cell table:formula="of:=[.D2310]-[.D2309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309" calcext:value-type="float">
            <text:p>2309</text:p>
          </table:table-cell>
          <table:table-cell table:formula="of:=[.B2309]+10" office:value-type="float" office:value="23090" calcext:value-type="float">
            <text:p>23090</text:p>
          </table:table-cell>
          <table:table-cell office:value-type="float" office:value="8640000" calcext:value-type="float">
            <text:p>8640000</text:p>
          </table:table-cell>
          <table:table-cell table:formula="of:=[.B2310]/[.C2310]" office:value-type="float" office:value="0.0026724537037037" calcext:value-type="float">
            <text:p>0,00267245370370370000</text:p>
          </table:table-cell>
          <table:table-cell table:formula="of:=[.D2311]-[.D2310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310" calcext:value-type="float">
            <text:p>2310</text:p>
          </table:table-cell>
          <table:table-cell table:formula="of:=[.B2310]+10" office:value-type="float" office:value="23100" calcext:value-type="float">
            <text:p>23100</text:p>
          </table:table-cell>
          <table:table-cell office:value-type="float" office:value="8640000" calcext:value-type="float">
            <text:p>8640000</text:p>
          </table:table-cell>
          <table:table-cell table:formula="of:=[.B2311]/[.C2311]" office:value-type="float" office:value="0.00267361111111111" calcext:value-type="float">
            <text:p>0,00267361111111111000</text:p>
          </table:table-cell>
          <table:table-cell table:formula="of:=[.D2312]-[.D2311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311" calcext:value-type="float">
            <text:p>2311</text:p>
          </table:table-cell>
          <table:table-cell table:formula="of:=[.B2311]+10" office:value-type="float" office:value="23110" calcext:value-type="float">
            <text:p>23110</text:p>
          </table:table-cell>
          <table:table-cell office:value-type="float" office:value="8640000" calcext:value-type="float">
            <text:p>8640000</text:p>
          </table:table-cell>
          <table:table-cell table:formula="of:=[.B2312]/[.C2312]" office:value-type="float" office:value="0.00267476851851852" calcext:value-type="float">
            <text:p>0,00267476851851852000</text:p>
          </table:table-cell>
          <table:table-cell table:formula="of:=[.D2313]-[.D2312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312" calcext:value-type="float">
            <text:p>2312</text:p>
          </table:table-cell>
          <table:table-cell table:formula="of:=[.B2312]+10" office:value-type="float" office:value="23120" calcext:value-type="float">
            <text:p>23120</text:p>
          </table:table-cell>
          <table:table-cell office:value-type="float" office:value="8640000" calcext:value-type="float">
            <text:p>8640000</text:p>
          </table:table-cell>
          <table:table-cell table:formula="of:=[.B2313]/[.C2313]" office:value-type="float" office:value="0.00267592592592593" calcext:value-type="float">
            <text:p>0,00267592592592593000</text:p>
          </table:table-cell>
          <table:table-cell table:formula="of:=[.D2314]-[.D2313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313" calcext:value-type="float">
            <text:p>2313</text:p>
          </table:table-cell>
          <table:table-cell table:formula="of:=[.B2313]+10" office:value-type="float" office:value="23130" calcext:value-type="float">
            <text:p>23130</text:p>
          </table:table-cell>
          <table:table-cell office:value-type="float" office:value="8640000" calcext:value-type="float">
            <text:p>8640000</text:p>
          </table:table-cell>
          <table:table-cell table:formula="of:=[.B2314]/[.C2314]" office:value-type="float" office:value="0.00267708333333333" calcext:value-type="float">
            <text:p>0,00267708333333333000</text:p>
          </table:table-cell>
          <table:table-cell table:formula="of:=[.D2315]-[.D2314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314" calcext:value-type="float">
            <text:p>2314</text:p>
          </table:table-cell>
          <table:table-cell table:formula="of:=[.B2314]+10" office:value-type="float" office:value="23140" calcext:value-type="float">
            <text:p>23140</text:p>
          </table:table-cell>
          <table:table-cell office:value-type="float" office:value="8640000" calcext:value-type="float">
            <text:p>8640000</text:p>
          </table:table-cell>
          <table:table-cell table:formula="of:=[.B2315]/[.C2315]" office:value-type="float" office:value="0.00267824074074074" calcext:value-type="float">
            <text:p>0,00267824074074074000</text:p>
          </table:table-cell>
          <table:table-cell table:formula="of:=[.D2316]-[.D2315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315" calcext:value-type="float">
            <text:p>2315</text:p>
          </table:table-cell>
          <table:table-cell table:formula="of:=[.B2315]+10" office:value-type="float" office:value="23150" calcext:value-type="float">
            <text:p>23150</text:p>
          </table:table-cell>
          <table:table-cell office:value-type="float" office:value="8640000" calcext:value-type="float">
            <text:p>8640000</text:p>
          </table:table-cell>
          <table:table-cell table:formula="of:=[.B2316]/[.C2316]" office:value-type="float" office:value="0.00267939814814815" calcext:value-type="float">
            <text:p>0,00267939814814815000</text:p>
          </table:table-cell>
          <table:table-cell table:formula="of:=[.D2317]-[.D2316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316" calcext:value-type="float">
            <text:p>2316</text:p>
          </table:table-cell>
          <table:table-cell table:formula="of:=[.B2316]+10" office:value-type="float" office:value="23160" calcext:value-type="float">
            <text:p>23160</text:p>
          </table:table-cell>
          <table:table-cell office:value-type="float" office:value="8640000" calcext:value-type="float">
            <text:p>8640000</text:p>
          </table:table-cell>
          <table:table-cell table:formula="of:=[.B2317]/[.C2317]" office:value-type="float" office:value="0.00268055555555556" calcext:value-type="float">
            <text:p>0,00268055555555556000</text:p>
          </table:table-cell>
          <table:table-cell table:formula="of:=[.D2318]-[.D2317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317" calcext:value-type="float">
            <text:p>2317</text:p>
          </table:table-cell>
          <table:table-cell table:formula="of:=[.B2317]+10" office:value-type="float" office:value="23170" calcext:value-type="float">
            <text:p>23170</text:p>
          </table:table-cell>
          <table:table-cell office:value-type="float" office:value="8640000" calcext:value-type="float">
            <text:p>8640000</text:p>
          </table:table-cell>
          <table:table-cell table:formula="of:=[.B2318]/[.C2318]" office:value-type="float" office:value="0.00268171296296296" calcext:value-type="float">
            <text:p>0,00268171296296296000</text:p>
          </table:table-cell>
          <table:table-cell table:formula="of:=[.D2319]-[.D2318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318" calcext:value-type="float">
            <text:p>2318</text:p>
          </table:table-cell>
          <table:table-cell table:formula="of:=[.B2318]+10" office:value-type="float" office:value="23180" calcext:value-type="float">
            <text:p>23180</text:p>
          </table:table-cell>
          <table:table-cell office:value-type="float" office:value="8640000" calcext:value-type="float">
            <text:p>8640000</text:p>
          </table:table-cell>
          <table:table-cell table:formula="of:=[.B2319]/[.C2319]" office:value-type="float" office:value="0.00268287037037037" calcext:value-type="float">
            <text:p>0,00268287037037037000</text:p>
          </table:table-cell>
          <table:table-cell table:formula="of:=[.D2320]-[.D2319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319" calcext:value-type="float">
            <text:p>2319</text:p>
          </table:table-cell>
          <table:table-cell table:formula="of:=[.B2319]+10" office:value-type="float" office:value="23190" calcext:value-type="float">
            <text:p>23190</text:p>
          </table:table-cell>
          <table:table-cell office:value-type="float" office:value="8640000" calcext:value-type="float">
            <text:p>8640000</text:p>
          </table:table-cell>
          <table:table-cell table:formula="of:=[.B2320]/[.C2320]" office:value-type="float" office:value="0.00268402777777778" calcext:value-type="float">
            <text:p>0,00268402777777778000</text:p>
          </table:table-cell>
          <table:table-cell table:formula="of:=[.D2321]-[.D2320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320" calcext:value-type="float">
            <text:p>2320</text:p>
          </table:table-cell>
          <table:table-cell table:formula="of:=[.B2320]+10" office:value-type="float" office:value="23200" calcext:value-type="float">
            <text:p>23200</text:p>
          </table:table-cell>
          <table:table-cell office:value-type="float" office:value="8640000" calcext:value-type="float">
            <text:p>8640000</text:p>
          </table:table-cell>
          <table:table-cell table:formula="of:=[.B2321]/[.C2321]" office:value-type="float" office:value="0.00268518518518519" calcext:value-type="float">
            <text:p>0,00268518518518519000</text:p>
          </table:table-cell>
          <table:table-cell table:formula="of:=[.D2322]-[.D2321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321" calcext:value-type="float">
            <text:p>2321</text:p>
          </table:table-cell>
          <table:table-cell table:formula="of:=[.B2321]+10" office:value-type="float" office:value="23210" calcext:value-type="float">
            <text:p>23210</text:p>
          </table:table-cell>
          <table:table-cell office:value-type="float" office:value="8640000" calcext:value-type="float">
            <text:p>8640000</text:p>
          </table:table-cell>
          <table:table-cell table:formula="of:=[.B2322]/[.C2322]" office:value-type="float" office:value="0.00268634259259259" calcext:value-type="float">
            <text:p>0,00268634259259259000</text:p>
          </table:table-cell>
          <table:table-cell table:formula="of:=[.D2323]-[.D2322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322" calcext:value-type="float">
            <text:p>2322</text:p>
          </table:table-cell>
          <table:table-cell table:formula="of:=[.B2322]+10" office:value-type="float" office:value="23220" calcext:value-type="float">
            <text:p>23220</text:p>
          </table:table-cell>
          <table:table-cell office:value-type="float" office:value="8640000" calcext:value-type="float">
            <text:p>8640000</text:p>
          </table:table-cell>
          <table:table-cell table:formula="of:=[.B2323]/[.C2323]" office:value-type="float" office:value="0.0026875" calcext:value-type="float">
            <text:p>0,00268750000000000000</text:p>
          </table:table-cell>
          <table:table-cell table:formula="of:=[.D2324]-[.D2323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323" calcext:value-type="float">
            <text:p>2323</text:p>
          </table:table-cell>
          <table:table-cell table:formula="of:=[.B2323]+10" office:value-type="float" office:value="23230" calcext:value-type="float">
            <text:p>23230</text:p>
          </table:table-cell>
          <table:table-cell office:value-type="float" office:value="8640000" calcext:value-type="float">
            <text:p>8640000</text:p>
          </table:table-cell>
          <table:table-cell table:formula="of:=[.B2324]/[.C2324]" office:value-type="float" office:value="0.00268865740740741" calcext:value-type="float">
            <text:p>0,00268865740740741000</text:p>
          </table:table-cell>
          <table:table-cell table:formula="of:=[.D2325]-[.D2324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324" calcext:value-type="float">
            <text:p>2324</text:p>
          </table:table-cell>
          <table:table-cell table:formula="of:=[.B2324]+10" office:value-type="float" office:value="23240" calcext:value-type="float">
            <text:p>23240</text:p>
          </table:table-cell>
          <table:table-cell office:value-type="float" office:value="8640000" calcext:value-type="float">
            <text:p>8640000</text:p>
          </table:table-cell>
          <table:table-cell table:formula="of:=[.B2325]/[.C2325]" office:value-type="float" office:value="0.00268981481481482" calcext:value-type="float">
            <text:p>0,00268981481481482000</text:p>
          </table:table-cell>
          <table:table-cell table:formula="of:=[.D2326]-[.D2325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325" calcext:value-type="float">
            <text:p>2325</text:p>
          </table:table-cell>
          <table:table-cell table:formula="of:=[.B2325]+10" office:value-type="float" office:value="23250" calcext:value-type="float">
            <text:p>23250</text:p>
          </table:table-cell>
          <table:table-cell office:value-type="float" office:value="8640000" calcext:value-type="float">
            <text:p>8640000</text:p>
          </table:table-cell>
          <table:table-cell table:formula="of:=[.B2326]/[.C2326]" office:value-type="float" office:value="0.00269097222222222" calcext:value-type="float">
            <text:p>0,00269097222222222000</text:p>
          </table:table-cell>
          <table:table-cell table:formula="of:=[.D2327]-[.D2326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326" calcext:value-type="float">
            <text:p>2326</text:p>
          </table:table-cell>
          <table:table-cell table:formula="of:=[.B2326]+10" office:value-type="float" office:value="23260" calcext:value-type="float">
            <text:p>23260</text:p>
          </table:table-cell>
          <table:table-cell office:value-type="float" office:value="8640000" calcext:value-type="float">
            <text:p>8640000</text:p>
          </table:table-cell>
          <table:table-cell table:formula="of:=[.B2327]/[.C2327]" office:value-type="float" office:value="0.00269212962962963" calcext:value-type="float">
            <text:p>0,00269212962962963000</text:p>
          </table:table-cell>
          <table:table-cell table:formula="of:=[.D2328]-[.D2327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327" calcext:value-type="float">
            <text:p>2327</text:p>
          </table:table-cell>
          <table:table-cell table:formula="of:=[.B2327]+10" office:value-type="float" office:value="23270" calcext:value-type="float">
            <text:p>23270</text:p>
          </table:table-cell>
          <table:table-cell office:value-type="float" office:value="8640000" calcext:value-type="float">
            <text:p>8640000</text:p>
          </table:table-cell>
          <table:table-cell table:formula="of:=[.B2328]/[.C2328]" office:value-type="float" office:value="0.00269328703703704" calcext:value-type="float">
            <text:p>0,00269328703703704000</text:p>
          </table:table-cell>
          <table:table-cell table:formula="of:=[.D2329]-[.D2328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328" calcext:value-type="float">
            <text:p>2328</text:p>
          </table:table-cell>
          <table:table-cell table:formula="of:=[.B2328]+10" office:value-type="float" office:value="23280" calcext:value-type="float">
            <text:p>23280</text:p>
          </table:table-cell>
          <table:table-cell office:value-type="float" office:value="8640000" calcext:value-type="float">
            <text:p>8640000</text:p>
          </table:table-cell>
          <table:table-cell table:formula="of:=[.B2329]/[.C2329]" office:value-type="float" office:value="0.00269444444444444" calcext:value-type="float">
            <text:p>0,00269444444444444000</text:p>
          </table:table-cell>
          <table:table-cell table:formula="of:=[.D2330]-[.D2329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329" calcext:value-type="float">
            <text:p>2329</text:p>
          </table:table-cell>
          <table:table-cell table:formula="of:=[.B2329]+10" office:value-type="float" office:value="23290" calcext:value-type="float">
            <text:p>23290</text:p>
          </table:table-cell>
          <table:table-cell office:value-type="float" office:value="8640000" calcext:value-type="float">
            <text:p>8640000</text:p>
          </table:table-cell>
          <table:table-cell table:formula="of:=[.B2330]/[.C2330]" office:value-type="float" office:value="0.00269560185185185" calcext:value-type="float">
            <text:p>0,00269560185185185000</text:p>
          </table:table-cell>
          <table:table-cell table:formula="of:=[.D2331]-[.D2330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330" calcext:value-type="float">
            <text:p>2330</text:p>
          </table:table-cell>
          <table:table-cell table:formula="of:=[.B2330]+10" office:value-type="float" office:value="23300" calcext:value-type="float">
            <text:p>23300</text:p>
          </table:table-cell>
          <table:table-cell office:value-type="float" office:value="8640000" calcext:value-type="float">
            <text:p>8640000</text:p>
          </table:table-cell>
          <table:table-cell table:formula="of:=[.B2331]/[.C2331]" office:value-type="float" office:value="0.00269675925925926" calcext:value-type="float">
            <text:p>0,00269675925925926000</text:p>
          </table:table-cell>
          <table:table-cell table:formula="of:=[.D2332]-[.D2331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331" calcext:value-type="float">
            <text:p>2331</text:p>
          </table:table-cell>
          <table:table-cell table:formula="of:=[.B2331]+10" office:value-type="float" office:value="23310" calcext:value-type="float">
            <text:p>23310</text:p>
          </table:table-cell>
          <table:table-cell office:value-type="float" office:value="8640000" calcext:value-type="float">
            <text:p>8640000</text:p>
          </table:table-cell>
          <table:table-cell table:formula="of:=[.B2332]/[.C2332]" office:value-type="float" office:value="0.00269791666666667" calcext:value-type="float">
            <text:p>0,00269791666666667000</text:p>
          </table:table-cell>
          <table:table-cell table:formula="of:=[.D2333]-[.D2332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332" calcext:value-type="float">
            <text:p>2332</text:p>
          </table:table-cell>
          <table:table-cell table:formula="of:=[.B2332]+10" office:value-type="float" office:value="23320" calcext:value-type="float">
            <text:p>23320</text:p>
          </table:table-cell>
          <table:table-cell office:value-type="float" office:value="8640000" calcext:value-type="float">
            <text:p>8640000</text:p>
          </table:table-cell>
          <table:table-cell table:formula="of:=[.B2333]/[.C2333]" office:value-type="float" office:value="0.00269907407407407" calcext:value-type="float">
            <text:p>0,00269907407407407000</text:p>
          </table:table-cell>
          <table:table-cell table:formula="of:=[.D2334]-[.D2333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333" calcext:value-type="float">
            <text:p>2333</text:p>
          </table:table-cell>
          <table:table-cell table:formula="of:=[.B2333]+10" office:value-type="float" office:value="23330" calcext:value-type="float">
            <text:p>23330</text:p>
          </table:table-cell>
          <table:table-cell office:value-type="float" office:value="8640000" calcext:value-type="float">
            <text:p>8640000</text:p>
          </table:table-cell>
          <table:table-cell table:formula="of:=[.B2334]/[.C2334]" office:value-type="float" office:value="0.00270023148148148" calcext:value-type="float">
            <text:p>0,00270023148148148000</text:p>
          </table:table-cell>
          <table:table-cell table:formula="of:=[.D2335]-[.D2334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334" calcext:value-type="float">
            <text:p>2334</text:p>
          </table:table-cell>
          <table:table-cell table:formula="of:=[.B2334]+10" office:value-type="float" office:value="23340" calcext:value-type="float">
            <text:p>23340</text:p>
          </table:table-cell>
          <table:table-cell office:value-type="float" office:value="8640000" calcext:value-type="float">
            <text:p>8640000</text:p>
          </table:table-cell>
          <table:table-cell table:formula="of:=[.B2335]/[.C2335]" office:value-type="float" office:value="0.00270138888888889" calcext:value-type="float">
            <text:p>0,00270138888888889000</text:p>
          </table:table-cell>
          <table:table-cell table:formula="of:=[.D2336]-[.D2335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335" calcext:value-type="float">
            <text:p>2335</text:p>
          </table:table-cell>
          <table:table-cell table:formula="of:=[.B2335]+10" office:value-type="float" office:value="23350" calcext:value-type="float">
            <text:p>23350</text:p>
          </table:table-cell>
          <table:table-cell office:value-type="float" office:value="8640000" calcext:value-type="float">
            <text:p>8640000</text:p>
          </table:table-cell>
          <table:table-cell table:formula="of:=[.B2336]/[.C2336]" office:value-type="float" office:value="0.0027025462962963" calcext:value-type="float">
            <text:p>0,00270254629629630000</text:p>
          </table:table-cell>
          <table:table-cell table:formula="of:=[.D2337]-[.D2336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336" calcext:value-type="float">
            <text:p>2336</text:p>
          </table:table-cell>
          <table:table-cell table:formula="of:=[.B2336]+10" office:value-type="float" office:value="23360" calcext:value-type="float">
            <text:p>23360</text:p>
          </table:table-cell>
          <table:table-cell office:value-type="float" office:value="8640000" calcext:value-type="float">
            <text:p>8640000</text:p>
          </table:table-cell>
          <table:table-cell table:formula="of:=[.B2337]/[.C2337]" office:value-type="float" office:value="0.0027037037037037" calcext:value-type="float">
            <text:p>0,00270370370370370000</text:p>
          </table:table-cell>
          <table:table-cell table:formula="of:=[.D2338]-[.D2337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337" calcext:value-type="float">
            <text:p>2337</text:p>
          </table:table-cell>
          <table:table-cell table:formula="of:=[.B2337]+10" office:value-type="float" office:value="23370" calcext:value-type="float">
            <text:p>23370</text:p>
          </table:table-cell>
          <table:table-cell office:value-type="float" office:value="8640000" calcext:value-type="float">
            <text:p>8640000</text:p>
          </table:table-cell>
          <table:table-cell table:formula="of:=[.B2338]/[.C2338]" office:value-type="float" office:value="0.00270486111111111" calcext:value-type="float">
            <text:p>0,00270486111111111000</text:p>
          </table:table-cell>
          <table:table-cell table:formula="of:=[.D2339]-[.D2338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338" calcext:value-type="float">
            <text:p>2338</text:p>
          </table:table-cell>
          <table:table-cell table:formula="of:=[.B2338]+10" office:value-type="float" office:value="23380" calcext:value-type="float">
            <text:p>23380</text:p>
          </table:table-cell>
          <table:table-cell office:value-type="float" office:value="8640000" calcext:value-type="float">
            <text:p>8640000</text:p>
          </table:table-cell>
          <table:table-cell table:formula="of:=[.B2339]/[.C2339]" office:value-type="float" office:value="0.00270601851851852" calcext:value-type="float">
            <text:p>0,00270601851851852000</text:p>
          </table:table-cell>
          <table:table-cell table:formula="of:=[.D2340]-[.D2339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339" calcext:value-type="float">
            <text:p>2339</text:p>
          </table:table-cell>
          <table:table-cell table:formula="of:=[.B2339]+10" office:value-type="float" office:value="23390" calcext:value-type="float">
            <text:p>23390</text:p>
          </table:table-cell>
          <table:table-cell office:value-type="float" office:value="8640000" calcext:value-type="float">
            <text:p>8640000</text:p>
          </table:table-cell>
          <table:table-cell table:formula="of:=[.B2340]/[.C2340]" office:value-type="float" office:value="0.00270717592592593" calcext:value-type="float">
            <text:p>0,00270717592592593000</text:p>
          </table:table-cell>
          <table:table-cell table:formula="of:=[.D2341]-[.D2340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table:formula="of:=[.B2340]+10" office:value-type="float" office:value="23400" calcext:value-type="float">
            <text:p>23400</text:p>
          </table:table-cell>
          <table:table-cell office:value-type="float" office:value="8640000" calcext:value-type="float">
            <text:p>8640000</text:p>
          </table:table-cell>
          <table:table-cell table:formula="of:=[.B2341]/[.C2341]" office:value-type="float" office:value="0.00270833333333333" calcext:value-type="float">
            <text:p>0,00270833333333333000</text:p>
          </table:table-cell>
          <table:table-cell table:formula="of:=[.D2342]-[.D2341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341" calcext:value-type="float">
            <text:p>2341</text:p>
          </table:table-cell>
          <table:table-cell table:formula="of:=[.B2341]+10" office:value-type="float" office:value="23410" calcext:value-type="float">
            <text:p>23410</text:p>
          </table:table-cell>
          <table:table-cell office:value-type="float" office:value="8640000" calcext:value-type="float">
            <text:p>8640000</text:p>
          </table:table-cell>
          <table:table-cell table:formula="of:=[.B2342]/[.C2342]" office:value-type="float" office:value="0.00270949074074074" calcext:value-type="float">
            <text:p>0,00270949074074074000</text:p>
          </table:table-cell>
          <table:table-cell table:formula="of:=[.D2343]-[.D2342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342" calcext:value-type="float">
            <text:p>2342</text:p>
          </table:table-cell>
          <table:table-cell table:formula="of:=[.B2342]+10" office:value-type="float" office:value="23420" calcext:value-type="float">
            <text:p>23420</text:p>
          </table:table-cell>
          <table:table-cell office:value-type="float" office:value="8640000" calcext:value-type="float">
            <text:p>8640000</text:p>
          </table:table-cell>
          <table:table-cell table:formula="of:=[.B2343]/[.C2343]" office:value-type="float" office:value="0.00271064814814815" calcext:value-type="float">
            <text:p>0,00271064814814815000</text:p>
          </table:table-cell>
          <table:table-cell table:formula="of:=[.D2344]-[.D2343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343" calcext:value-type="float">
            <text:p>2343</text:p>
          </table:table-cell>
          <table:table-cell table:formula="of:=[.B2343]+10" office:value-type="float" office:value="23430" calcext:value-type="float">
            <text:p>23430</text:p>
          </table:table-cell>
          <table:table-cell office:value-type="float" office:value="8640000" calcext:value-type="float">
            <text:p>8640000</text:p>
          </table:table-cell>
          <table:table-cell table:formula="of:=[.B2344]/[.C2344]" office:value-type="float" office:value="0.00271180555555556" calcext:value-type="float">
            <text:p>0,00271180555555556000</text:p>
          </table:table-cell>
          <table:table-cell table:formula="of:=[.D2345]-[.D2344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344" calcext:value-type="float">
            <text:p>2344</text:p>
          </table:table-cell>
          <table:table-cell table:formula="of:=[.B2344]+10" office:value-type="float" office:value="23440" calcext:value-type="float">
            <text:p>23440</text:p>
          </table:table-cell>
          <table:table-cell office:value-type="float" office:value="8640000" calcext:value-type="float">
            <text:p>8640000</text:p>
          </table:table-cell>
          <table:table-cell table:formula="of:=[.B2345]/[.C2345]" office:value-type="float" office:value="0.00271296296296296" calcext:value-type="float">
            <text:p>0,00271296296296296000</text:p>
          </table:table-cell>
          <table:table-cell table:formula="of:=[.D2346]-[.D2345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345" calcext:value-type="float">
            <text:p>2345</text:p>
          </table:table-cell>
          <table:table-cell table:formula="of:=[.B2345]+10" office:value-type="float" office:value="23450" calcext:value-type="float">
            <text:p>23450</text:p>
          </table:table-cell>
          <table:table-cell office:value-type="float" office:value="8640000" calcext:value-type="float">
            <text:p>8640000</text:p>
          </table:table-cell>
          <table:table-cell table:formula="of:=[.B2346]/[.C2346]" office:value-type="float" office:value="0.00271412037037037" calcext:value-type="float">
            <text:p>0,00271412037037037000</text:p>
          </table:table-cell>
          <table:table-cell table:formula="of:=[.D2347]-[.D2346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346" calcext:value-type="float">
            <text:p>2346</text:p>
          </table:table-cell>
          <table:table-cell table:formula="of:=[.B2346]+10" office:value-type="float" office:value="23460" calcext:value-type="float">
            <text:p>23460</text:p>
          </table:table-cell>
          <table:table-cell office:value-type="float" office:value="8640000" calcext:value-type="float">
            <text:p>8640000</text:p>
          </table:table-cell>
          <table:table-cell table:formula="of:=[.B2347]/[.C2347]" office:value-type="float" office:value="0.00271527777777778" calcext:value-type="float">
            <text:p>0,00271527777777778000</text:p>
          </table:table-cell>
          <table:table-cell table:formula="of:=[.D2348]-[.D2347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347" calcext:value-type="float">
            <text:p>2347</text:p>
          </table:table-cell>
          <table:table-cell table:formula="of:=[.B2347]+10" office:value-type="float" office:value="23470" calcext:value-type="float">
            <text:p>23470</text:p>
          </table:table-cell>
          <table:table-cell office:value-type="float" office:value="8640000" calcext:value-type="float">
            <text:p>8640000</text:p>
          </table:table-cell>
          <table:table-cell table:formula="of:=[.B2348]/[.C2348]" office:value-type="float" office:value="0.00271643518518519" calcext:value-type="float">
            <text:p>0,00271643518518519000</text:p>
          </table:table-cell>
          <table:table-cell table:formula="of:=[.D2349]-[.D2348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348" calcext:value-type="float">
            <text:p>2348</text:p>
          </table:table-cell>
          <table:table-cell table:formula="of:=[.B2348]+10" office:value-type="float" office:value="23480" calcext:value-type="float">
            <text:p>23480</text:p>
          </table:table-cell>
          <table:table-cell office:value-type="float" office:value="8640000" calcext:value-type="float">
            <text:p>8640000</text:p>
          </table:table-cell>
          <table:table-cell table:formula="of:=[.B2349]/[.C2349]" office:value-type="float" office:value="0.00271759259259259" calcext:value-type="float">
            <text:p>0,00271759259259259000</text:p>
          </table:table-cell>
          <table:table-cell table:formula="of:=[.D2350]-[.D2349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349" calcext:value-type="float">
            <text:p>2349</text:p>
          </table:table-cell>
          <table:table-cell table:formula="of:=[.B2349]+10" office:value-type="float" office:value="23490" calcext:value-type="float">
            <text:p>23490</text:p>
          </table:table-cell>
          <table:table-cell office:value-type="float" office:value="8640000" calcext:value-type="float">
            <text:p>8640000</text:p>
          </table:table-cell>
          <table:table-cell table:formula="of:=[.B2350]/[.C2350]" office:value-type="float" office:value="0.00271875" calcext:value-type="float">
            <text:p>0,00271875000000000000</text:p>
          </table:table-cell>
          <table:table-cell table:formula="of:=[.D2351]-[.D2350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350" calcext:value-type="float">
            <text:p>2350</text:p>
          </table:table-cell>
          <table:table-cell table:formula="of:=[.B2350]+10" office:value-type="float" office:value="23500" calcext:value-type="float">
            <text:p>23500</text:p>
          </table:table-cell>
          <table:table-cell office:value-type="float" office:value="8640000" calcext:value-type="float">
            <text:p>8640000</text:p>
          </table:table-cell>
          <table:table-cell table:formula="of:=[.B2351]/[.C2351]" office:value-type="float" office:value="0.00271990740740741" calcext:value-type="float">
            <text:p>0,00271990740740741000</text:p>
          </table:table-cell>
          <table:table-cell table:formula="of:=[.D2352]-[.D2351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351" calcext:value-type="float">
            <text:p>2351</text:p>
          </table:table-cell>
          <table:table-cell table:formula="of:=[.B2351]+10" office:value-type="float" office:value="23510" calcext:value-type="float">
            <text:p>23510</text:p>
          </table:table-cell>
          <table:table-cell office:value-type="float" office:value="8640000" calcext:value-type="float">
            <text:p>8640000</text:p>
          </table:table-cell>
          <table:table-cell table:formula="of:=[.B2352]/[.C2352]" office:value-type="float" office:value="0.00272106481481481" calcext:value-type="float">
            <text:p>0,00272106481481481000</text:p>
          </table:table-cell>
          <table:table-cell table:formula="of:=[.D2353]-[.D2352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352" calcext:value-type="float">
            <text:p>2352</text:p>
          </table:table-cell>
          <table:table-cell table:formula="of:=[.B2352]+10" office:value-type="float" office:value="23520" calcext:value-type="float">
            <text:p>23520</text:p>
          </table:table-cell>
          <table:table-cell office:value-type="float" office:value="8640000" calcext:value-type="float">
            <text:p>8640000</text:p>
          </table:table-cell>
          <table:table-cell table:formula="of:=[.B2353]/[.C2353]" office:value-type="float" office:value="0.00272222222222222" calcext:value-type="float">
            <text:p>0,00272222222222222000</text:p>
          </table:table-cell>
          <table:table-cell table:formula="of:=[.D2354]-[.D2353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353" calcext:value-type="float">
            <text:p>2353</text:p>
          </table:table-cell>
          <table:table-cell table:formula="of:=[.B2353]+10" office:value-type="float" office:value="23530" calcext:value-type="float">
            <text:p>23530</text:p>
          </table:table-cell>
          <table:table-cell office:value-type="float" office:value="8640000" calcext:value-type="float">
            <text:p>8640000</text:p>
          </table:table-cell>
          <table:table-cell table:formula="of:=[.B2354]/[.C2354]" office:value-type="float" office:value="0.00272337962962963" calcext:value-type="float">
            <text:p>0,00272337962962963000</text:p>
          </table:table-cell>
          <table:table-cell table:formula="of:=[.D2355]-[.D2354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354" calcext:value-type="float">
            <text:p>2354</text:p>
          </table:table-cell>
          <table:table-cell table:formula="of:=[.B2354]+10" office:value-type="float" office:value="23540" calcext:value-type="float">
            <text:p>23540</text:p>
          </table:table-cell>
          <table:table-cell office:value-type="float" office:value="8640000" calcext:value-type="float">
            <text:p>8640000</text:p>
          </table:table-cell>
          <table:table-cell table:formula="of:=[.B2355]/[.C2355]" office:value-type="float" office:value="0.00272453703703704" calcext:value-type="float">
            <text:p>0,00272453703703704000</text:p>
          </table:table-cell>
          <table:table-cell table:formula="of:=[.D2356]-[.D2355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355" calcext:value-type="float">
            <text:p>2355</text:p>
          </table:table-cell>
          <table:table-cell table:formula="of:=[.B2355]+10" office:value-type="float" office:value="23550" calcext:value-type="float">
            <text:p>23550</text:p>
          </table:table-cell>
          <table:table-cell office:value-type="float" office:value="8640000" calcext:value-type="float">
            <text:p>8640000</text:p>
          </table:table-cell>
          <table:table-cell table:formula="of:=[.B2356]/[.C2356]" office:value-type="float" office:value="0.00272569444444444" calcext:value-type="float">
            <text:p>0,00272569444444444000</text:p>
          </table:table-cell>
          <table:table-cell table:formula="of:=[.D2357]-[.D2356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356" calcext:value-type="float">
            <text:p>2356</text:p>
          </table:table-cell>
          <table:table-cell table:formula="of:=[.B2356]+10" office:value-type="float" office:value="23560" calcext:value-type="float">
            <text:p>23560</text:p>
          </table:table-cell>
          <table:table-cell office:value-type="float" office:value="8640000" calcext:value-type="float">
            <text:p>8640000</text:p>
          </table:table-cell>
          <table:table-cell table:formula="of:=[.B2357]/[.C2357]" office:value-type="float" office:value="0.00272685185185185" calcext:value-type="float">
            <text:p>0,00272685185185185000</text:p>
          </table:table-cell>
          <table:table-cell table:formula="of:=[.D2358]-[.D2357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357" calcext:value-type="float">
            <text:p>2357</text:p>
          </table:table-cell>
          <table:table-cell table:formula="of:=[.B2357]+10" office:value-type="float" office:value="23570" calcext:value-type="float">
            <text:p>23570</text:p>
          </table:table-cell>
          <table:table-cell office:value-type="float" office:value="8640000" calcext:value-type="float">
            <text:p>8640000</text:p>
          </table:table-cell>
          <table:table-cell table:formula="of:=[.B2358]/[.C2358]" office:value-type="float" office:value="0.00272800925925926" calcext:value-type="float">
            <text:p>0,00272800925925926000</text:p>
          </table:table-cell>
          <table:table-cell table:formula="of:=[.D2359]-[.D2358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358" calcext:value-type="float">
            <text:p>2358</text:p>
          </table:table-cell>
          <table:table-cell table:formula="of:=[.B2358]+10" office:value-type="float" office:value="23580" calcext:value-type="float">
            <text:p>23580</text:p>
          </table:table-cell>
          <table:table-cell office:value-type="float" office:value="8640000" calcext:value-type="float">
            <text:p>8640000</text:p>
          </table:table-cell>
          <table:table-cell table:formula="of:=[.B2359]/[.C2359]" office:value-type="float" office:value="0.00272916666666667" calcext:value-type="float">
            <text:p>0,00272916666666667000</text:p>
          </table:table-cell>
          <table:table-cell table:formula="of:=[.D2360]-[.D2359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359" calcext:value-type="float">
            <text:p>2359</text:p>
          </table:table-cell>
          <table:table-cell table:formula="of:=[.B2359]+10" office:value-type="float" office:value="23590" calcext:value-type="float">
            <text:p>23590</text:p>
          </table:table-cell>
          <table:table-cell office:value-type="float" office:value="8640000" calcext:value-type="float">
            <text:p>8640000</text:p>
          </table:table-cell>
          <table:table-cell table:formula="of:=[.B2360]/[.C2360]" office:value-type="float" office:value="0.00273032407407407" calcext:value-type="float">
            <text:p>0,00273032407407407000</text:p>
          </table:table-cell>
          <table:table-cell table:formula="of:=[.D2361]-[.D2360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360" calcext:value-type="float">
            <text:p>2360</text:p>
          </table:table-cell>
          <table:table-cell table:formula="of:=[.B2360]+10" office:value-type="float" office:value="23600" calcext:value-type="float">
            <text:p>23600</text:p>
          </table:table-cell>
          <table:table-cell office:value-type="float" office:value="8640000" calcext:value-type="float">
            <text:p>8640000</text:p>
          </table:table-cell>
          <table:table-cell table:formula="of:=[.B2361]/[.C2361]" office:value-type="float" office:value="0.00273148148148148" calcext:value-type="float">
            <text:p>0,00273148148148148000</text:p>
          </table:table-cell>
          <table:table-cell table:formula="of:=[.D2362]-[.D2361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361" calcext:value-type="float">
            <text:p>2361</text:p>
          </table:table-cell>
          <table:table-cell table:formula="of:=[.B2361]+10" office:value-type="float" office:value="23610" calcext:value-type="float">
            <text:p>23610</text:p>
          </table:table-cell>
          <table:table-cell office:value-type="float" office:value="8640000" calcext:value-type="float">
            <text:p>8640000</text:p>
          </table:table-cell>
          <table:table-cell table:formula="of:=[.B2362]/[.C2362]" office:value-type="float" office:value="0.00273263888888889" calcext:value-type="float">
            <text:p>0,00273263888888889000</text:p>
          </table:table-cell>
          <table:table-cell table:formula="of:=[.D2363]-[.D2362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362" calcext:value-type="float">
            <text:p>2362</text:p>
          </table:table-cell>
          <table:table-cell table:formula="of:=[.B2362]+10" office:value-type="float" office:value="23620" calcext:value-type="float">
            <text:p>23620</text:p>
          </table:table-cell>
          <table:table-cell office:value-type="float" office:value="8640000" calcext:value-type="float">
            <text:p>8640000</text:p>
          </table:table-cell>
          <table:table-cell table:formula="of:=[.B2363]/[.C2363]" office:value-type="float" office:value="0.0027337962962963" calcext:value-type="float">
            <text:p>0,00273379629629630000</text:p>
          </table:table-cell>
          <table:table-cell table:formula="of:=[.D2364]-[.D2363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363" calcext:value-type="float">
            <text:p>2363</text:p>
          </table:table-cell>
          <table:table-cell table:formula="of:=[.B2363]+10" office:value-type="float" office:value="23630" calcext:value-type="float">
            <text:p>23630</text:p>
          </table:table-cell>
          <table:table-cell office:value-type="float" office:value="8640000" calcext:value-type="float">
            <text:p>8640000</text:p>
          </table:table-cell>
          <table:table-cell table:formula="of:=[.B2364]/[.C2364]" office:value-type="float" office:value="0.0027349537037037" calcext:value-type="float">
            <text:p>0,00273495370370370000</text:p>
          </table:table-cell>
          <table:table-cell table:formula="of:=[.D2365]-[.D2364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364" calcext:value-type="float">
            <text:p>2364</text:p>
          </table:table-cell>
          <table:table-cell table:formula="of:=[.B2364]+10" office:value-type="float" office:value="23640" calcext:value-type="float">
            <text:p>23640</text:p>
          </table:table-cell>
          <table:table-cell office:value-type="float" office:value="8640000" calcext:value-type="float">
            <text:p>8640000</text:p>
          </table:table-cell>
          <table:table-cell table:formula="of:=[.B2365]/[.C2365]" office:value-type="float" office:value="0.00273611111111111" calcext:value-type="float">
            <text:p>0,00273611111111111000</text:p>
          </table:table-cell>
          <table:table-cell table:formula="of:=[.D2366]-[.D2365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365" calcext:value-type="float">
            <text:p>2365</text:p>
          </table:table-cell>
          <table:table-cell table:formula="of:=[.B2365]+10" office:value-type="float" office:value="23650" calcext:value-type="float">
            <text:p>23650</text:p>
          </table:table-cell>
          <table:table-cell office:value-type="float" office:value="8640000" calcext:value-type="float">
            <text:p>8640000</text:p>
          </table:table-cell>
          <table:table-cell table:formula="of:=[.B2366]/[.C2366]" office:value-type="float" office:value="0.00273726851851852" calcext:value-type="float">
            <text:p>0,00273726851851852000</text:p>
          </table:table-cell>
          <table:table-cell table:formula="of:=[.D2367]-[.D2366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366" calcext:value-type="float">
            <text:p>2366</text:p>
          </table:table-cell>
          <table:table-cell table:formula="of:=[.B2366]+10" office:value-type="float" office:value="23660" calcext:value-type="float">
            <text:p>23660</text:p>
          </table:table-cell>
          <table:table-cell office:value-type="float" office:value="8640000" calcext:value-type="float">
            <text:p>8640000</text:p>
          </table:table-cell>
          <table:table-cell table:formula="of:=[.B2367]/[.C2367]" office:value-type="float" office:value="0.00273842592592593" calcext:value-type="float">
            <text:p>0,00273842592592593000</text:p>
          </table:table-cell>
          <table:table-cell table:formula="of:=[.D2368]-[.D2367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367" calcext:value-type="float">
            <text:p>2367</text:p>
          </table:table-cell>
          <table:table-cell table:formula="of:=[.B2367]+10" office:value-type="float" office:value="23670" calcext:value-type="float">
            <text:p>23670</text:p>
          </table:table-cell>
          <table:table-cell office:value-type="float" office:value="8640000" calcext:value-type="float">
            <text:p>8640000</text:p>
          </table:table-cell>
          <table:table-cell table:formula="of:=[.B2368]/[.C2368]" office:value-type="float" office:value="0.00273958333333333" calcext:value-type="float">
            <text:p>0,00273958333333333000</text:p>
          </table:table-cell>
          <table:table-cell table:formula="of:=[.D2369]-[.D2368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368" calcext:value-type="float">
            <text:p>2368</text:p>
          </table:table-cell>
          <table:table-cell table:formula="of:=[.B2368]+10" office:value-type="float" office:value="23680" calcext:value-type="float">
            <text:p>23680</text:p>
          </table:table-cell>
          <table:table-cell office:value-type="float" office:value="8640000" calcext:value-type="float">
            <text:p>8640000</text:p>
          </table:table-cell>
          <table:table-cell table:formula="of:=[.B2369]/[.C2369]" office:value-type="float" office:value="0.00274074074074074" calcext:value-type="float">
            <text:p>0,00274074074074074000</text:p>
          </table:table-cell>
          <table:table-cell table:formula="of:=[.D2370]-[.D2369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369" calcext:value-type="float">
            <text:p>2369</text:p>
          </table:table-cell>
          <table:table-cell table:formula="of:=[.B2369]+10" office:value-type="float" office:value="23690" calcext:value-type="float">
            <text:p>23690</text:p>
          </table:table-cell>
          <table:table-cell office:value-type="float" office:value="8640000" calcext:value-type="float">
            <text:p>8640000</text:p>
          </table:table-cell>
          <table:table-cell table:formula="of:=[.B2370]/[.C2370]" office:value-type="float" office:value="0.00274189814814815" calcext:value-type="float">
            <text:p>0,00274189814814815000</text:p>
          </table:table-cell>
          <table:table-cell table:formula="of:=[.D2371]-[.D2370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370" calcext:value-type="float">
            <text:p>2370</text:p>
          </table:table-cell>
          <table:table-cell table:formula="of:=[.B2370]+10" office:value-type="float" office:value="23700" calcext:value-type="float">
            <text:p>23700</text:p>
          </table:table-cell>
          <table:table-cell office:value-type="float" office:value="8640000" calcext:value-type="float">
            <text:p>8640000</text:p>
          </table:table-cell>
          <table:table-cell table:formula="of:=[.B2371]/[.C2371]" office:value-type="float" office:value="0.00274305555555556" calcext:value-type="float">
            <text:p>0,00274305555555556000</text:p>
          </table:table-cell>
          <table:table-cell table:formula="of:=[.D2372]-[.D2371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371" calcext:value-type="float">
            <text:p>2371</text:p>
          </table:table-cell>
          <table:table-cell table:formula="of:=[.B2371]+10" office:value-type="float" office:value="23710" calcext:value-type="float">
            <text:p>23710</text:p>
          </table:table-cell>
          <table:table-cell office:value-type="float" office:value="8640000" calcext:value-type="float">
            <text:p>8640000</text:p>
          </table:table-cell>
          <table:table-cell table:formula="of:=[.B2372]/[.C2372]" office:value-type="float" office:value="0.00274421296296296" calcext:value-type="float">
            <text:p>0,00274421296296296000</text:p>
          </table:table-cell>
          <table:table-cell table:formula="of:=[.D2373]-[.D2372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372" calcext:value-type="float">
            <text:p>2372</text:p>
          </table:table-cell>
          <table:table-cell table:formula="of:=[.B2372]+10" office:value-type="float" office:value="23720" calcext:value-type="float">
            <text:p>23720</text:p>
          </table:table-cell>
          <table:table-cell office:value-type="float" office:value="8640000" calcext:value-type="float">
            <text:p>8640000</text:p>
          </table:table-cell>
          <table:table-cell table:formula="of:=[.B2373]/[.C2373]" office:value-type="float" office:value="0.00274537037037037" calcext:value-type="float">
            <text:p>0,00274537037037037000</text:p>
          </table:table-cell>
          <table:table-cell table:formula="of:=[.D2374]-[.D2373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373" calcext:value-type="float">
            <text:p>2373</text:p>
          </table:table-cell>
          <table:table-cell table:formula="of:=[.B2373]+10" office:value-type="float" office:value="23730" calcext:value-type="float">
            <text:p>23730</text:p>
          </table:table-cell>
          <table:table-cell office:value-type="float" office:value="8640000" calcext:value-type="float">
            <text:p>8640000</text:p>
          </table:table-cell>
          <table:table-cell table:formula="of:=[.B2374]/[.C2374]" office:value-type="float" office:value="0.00274652777777778" calcext:value-type="float">
            <text:p>0,00274652777777778000</text:p>
          </table:table-cell>
          <table:table-cell table:formula="of:=[.D2375]-[.D2374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374" calcext:value-type="float">
            <text:p>2374</text:p>
          </table:table-cell>
          <table:table-cell table:formula="of:=[.B2374]+10" office:value-type="float" office:value="23740" calcext:value-type="float">
            <text:p>23740</text:p>
          </table:table-cell>
          <table:table-cell office:value-type="float" office:value="8640000" calcext:value-type="float">
            <text:p>8640000</text:p>
          </table:table-cell>
          <table:table-cell table:formula="of:=[.B2375]/[.C2375]" office:value-type="float" office:value="0.00274768518518519" calcext:value-type="float">
            <text:p>0,00274768518518519000</text:p>
          </table:table-cell>
          <table:table-cell table:formula="of:=[.D2376]-[.D2375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375" calcext:value-type="float">
            <text:p>2375</text:p>
          </table:table-cell>
          <table:table-cell table:formula="of:=[.B2375]+10" office:value-type="float" office:value="23750" calcext:value-type="float">
            <text:p>23750</text:p>
          </table:table-cell>
          <table:table-cell office:value-type="float" office:value="8640000" calcext:value-type="float">
            <text:p>8640000</text:p>
          </table:table-cell>
          <table:table-cell table:formula="of:=[.B2376]/[.C2376]" office:value-type="float" office:value="0.00274884259259259" calcext:value-type="float">
            <text:p>0,00274884259259259000</text:p>
          </table:table-cell>
          <table:table-cell table:formula="of:=[.D2377]-[.D2376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376" calcext:value-type="float">
            <text:p>2376</text:p>
          </table:table-cell>
          <table:table-cell table:formula="of:=[.B2376]+10" office:value-type="float" office:value="23760" calcext:value-type="float">
            <text:p>23760</text:p>
          </table:table-cell>
          <table:table-cell office:value-type="float" office:value="8640000" calcext:value-type="float">
            <text:p>8640000</text:p>
          </table:table-cell>
          <table:table-cell table:formula="of:=[.B2377]/[.C2377]" office:value-type="float" office:value="0.00275" calcext:value-type="float">
            <text:p>0,00275000000000000000</text:p>
          </table:table-cell>
          <table:table-cell table:formula="of:=[.D2378]-[.D2377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377" calcext:value-type="float">
            <text:p>2377</text:p>
          </table:table-cell>
          <table:table-cell table:formula="of:=[.B2377]+10" office:value-type="float" office:value="23770" calcext:value-type="float">
            <text:p>23770</text:p>
          </table:table-cell>
          <table:table-cell office:value-type="float" office:value="8640000" calcext:value-type="float">
            <text:p>8640000</text:p>
          </table:table-cell>
          <table:table-cell table:formula="of:=[.B2378]/[.C2378]" office:value-type="float" office:value="0.00275115740740741" calcext:value-type="float">
            <text:p>0,00275115740740741000</text:p>
          </table:table-cell>
          <table:table-cell table:formula="of:=[.D2379]-[.D2378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378" calcext:value-type="float">
            <text:p>2378</text:p>
          </table:table-cell>
          <table:table-cell table:formula="of:=[.B2378]+10" office:value-type="float" office:value="23780" calcext:value-type="float">
            <text:p>23780</text:p>
          </table:table-cell>
          <table:table-cell office:value-type="float" office:value="8640000" calcext:value-type="float">
            <text:p>8640000</text:p>
          </table:table-cell>
          <table:table-cell table:formula="of:=[.B2379]/[.C2379]" office:value-type="float" office:value="0.00275231481481481" calcext:value-type="float">
            <text:p>0,00275231481481481000</text:p>
          </table:table-cell>
          <table:table-cell table:formula="of:=[.D2380]-[.D2379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379" calcext:value-type="float">
            <text:p>2379</text:p>
          </table:table-cell>
          <table:table-cell table:formula="of:=[.B2379]+10" office:value-type="float" office:value="23790" calcext:value-type="float">
            <text:p>23790</text:p>
          </table:table-cell>
          <table:table-cell office:value-type="float" office:value="8640000" calcext:value-type="float">
            <text:p>8640000</text:p>
          </table:table-cell>
          <table:table-cell table:formula="of:=[.B2380]/[.C2380]" office:value-type="float" office:value="0.00275347222222222" calcext:value-type="float">
            <text:p>0,00275347222222222000</text:p>
          </table:table-cell>
          <table:table-cell table:formula="of:=[.D2381]-[.D2380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380" calcext:value-type="float">
            <text:p>2380</text:p>
          </table:table-cell>
          <table:table-cell table:formula="of:=[.B2380]+10" office:value-type="float" office:value="23800" calcext:value-type="float">
            <text:p>23800</text:p>
          </table:table-cell>
          <table:table-cell office:value-type="float" office:value="8640000" calcext:value-type="float">
            <text:p>8640000</text:p>
          </table:table-cell>
          <table:table-cell table:formula="of:=[.B2381]/[.C2381]" office:value-type="float" office:value="0.00275462962962963" calcext:value-type="float">
            <text:p>0,00275462962962963000</text:p>
          </table:table-cell>
          <table:table-cell table:formula="of:=[.D2382]-[.D2381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381" calcext:value-type="float">
            <text:p>2381</text:p>
          </table:table-cell>
          <table:table-cell table:formula="of:=[.B2381]+10" office:value-type="float" office:value="23810" calcext:value-type="float">
            <text:p>23810</text:p>
          </table:table-cell>
          <table:table-cell office:value-type="float" office:value="8640000" calcext:value-type="float">
            <text:p>8640000</text:p>
          </table:table-cell>
          <table:table-cell table:formula="of:=[.B2382]/[.C2382]" office:value-type="float" office:value="0.00275578703703704" calcext:value-type="float">
            <text:p>0,00275578703703704000</text:p>
          </table:table-cell>
          <table:table-cell table:formula="of:=[.D2383]-[.D2382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382" calcext:value-type="float">
            <text:p>2382</text:p>
          </table:table-cell>
          <table:table-cell table:formula="of:=[.B2382]+10" office:value-type="float" office:value="23820" calcext:value-type="float">
            <text:p>23820</text:p>
          </table:table-cell>
          <table:table-cell office:value-type="float" office:value="8640000" calcext:value-type="float">
            <text:p>8640000</text:p>
          </table:table-cell>
          <table:table-cell table:formula="of:=[.B2383]/[.C2383]" office:value-type="float" office:value="0.00275694444444444" calcext:value-type="float">
            <text:p>0,00275694444444444000</text:p>
          </table:table-cell>
          <table:table-cell table:formula="of:=[.D2384]-[.D2383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383" calcext:value-type="float">
            <text:p>2383</text:p>
          </table:table-cell>
          <table:table-cell table:formula="of:=[.B2383]+10" office:value-type="float" office:value="23830" calcext:value-type="float">
            <text:p>23830</text:p>
          </table:table-cell>
          <table:table-cell office:value-type="float" office:value="8640000" calcext:value-type="float">
            <text:p>8640000</text:p>
          </table:table-cell>
          <table:table-cell table:formula="of:=[.B2384]/[.C2384]" office:value-type="float" office:value="0.00275810185185185" calcext:value-type="float">
            <text:p>0,00275810185185185000</text:p>
          </table:table-cell>
          <table:table-cell table:formula="of:=[.D2385]-[.D2384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384" calcext:value-type="float">
            <text:p>2384</text:p>
          </table:table-cell>
          <table:table-cell table:formula="of:=[.B2384]+10" office:value-type="float" office:value="23840" calcext:value-type="float">
            <text:p>23840</text:p>
          </table:table-cell>
          <table:table-cell office:value-type="float" office:value="8640000" calcext:value-type="float">
            <text:p>8640000</text:p>
          </table:table-cell>
          <table:table-cell table:formula="of:=[.B2385]/[.C2385]" office:value-type="float" office:value="0.00275925925925926" calcext:value-type="float">
            <text:p>0,00275925925925926000</text:p>
          </table:table-cell>
          <table:table-cell table:formula="of:=[.D2386]-[.D2385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385" calcext:value-type="float">
            <text:p>2385</text:p>
          </table:table-cell>
          <table:table-cell table:formula="of:=[.B2385]+10" office:value-type="float" office:value="23850" calcext:value-type="float">
            <text:p>23850</text:p>
          </table:table-cell>
          <table:table-cell office:value-type="float" office:value="8640000" calcext:value-type="float">
            <text:p>8640000</text:p>
          </table:table-cell>
          <table:table-cell table:formula="of:=[.B2386]/[.C2386]" office:value-type="float" office:value="0.00276041666666667" calcext:value-type="float">
            <text:p>0,00276041666666667000</text:p>
          </table:table-cell>
          <table:table-cell table:formula="of:=[.D2387]-[.D2386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386" calcext:value-type="float">
            <text:p>2386</text:p>
          </table:table-cell>
          <table:table-cell table:formula="of:=[.B2386]+10" office:value-type="float" office:value="23860" calcext:value-type="float">
            <text:p>23860</text:p>
          </table:table-cell>
          <table:table-cell office:value-type="float" office:value="8640000" calcext:value-type="float">
            <text:p>8640000</text:p>
          </table:table-cell>
          <table:table-cell table:formula="of:=[.B2387]/[.C2387]" office:value-type="float" office:value="0.00276157407407407" calcext:value-type="float">
            <text:p>0,00276157407407407000</text:p>
          </table:table-cell>
          <table:table-cell table:formula="of:=[.D2388]-[.D2387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387" calcext:value-type="float">
            <text:p>2387</text:p>
          </table:table-cell>
          <table:table-cell table:formula="of:=[.B2387]+10" office:value-type="float" office:value="23870" calcext:value-type="float">
            <text:p>23870</text:p>
          </table:table-cell>
          <table:table-cell office:value-type="float" office:value="8640000" calcext:value-type="float">
            <text:p>8640000</text:p>
          </table:table-cell>
          <table:table-cell table:formula="of:=[.B2388]/[.C2388]" office:value-type="float" office:value="0.00276273148148148" calcext:value-type="float">
            <text:p>0,00276273148148148000</text:p>
          </table:table-cell>
          <table:table-cell table:formula="of:=[.D2389]-[.D2388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388" calcext:value-type="float">
            <text:p>2388</text:p>
          </table:table-cell>
          <table:table-cell table:formula="of:=[.B2388]+10" office:value-type="float" office:value="23880" calcext:value-type="float">
            <text:p>23880</text:p>
          </table:table-cell>
          <table:table-cell office:value-type="float" office:value="8640000" calcext:value-type="float">
            <text:p>8640000</text:p>
          </table:table-cell>
          <table:table-cell table:formula="of:=[.B2389]/[.C2389]" office:value-type="float" office:value="0.00276388888888889" calcext:value-type="float">
            <text:p>0,00276388888888889000</text:p>
          </table:table-cell>
          <table:table-cell table:formula="of:=[.D2390]-[.D2389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389" calcext:value-type="float">
            <text:p>2389</text:p>
          </table:table-cell>
          <table:table-cell table:formula="of:=[.B2389]+10" office:value-type="float" office:value="23890" calcext:value-type="float">
            <text:p>23890</text:p>
          </table:table-cell>
          <table:table-cell office:value-type="float" office:value="8640000" calcext:value-type="float">
            <text:p>8640000</text:p>
          </table:table-cell>
          <table:table-cell table:formula="of:=[.B2390]/[.C2390]" office:value-type="float" office:value="0.0027650462962963" calcext:value-type="float">
            <text:p>0,00276504629629630000</text:p>
          </table:table-cell>
          <table:table-cell table:formula="of:=[.D2391]-[.D2390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390" calcext:value-type="float">
            <text:p>2390</text:p>
          </table:table-cell>
          <table:table-cell table:formula="of:=[.B2390]+10" office:value-type="float" office:value="23900" calcext:value-type="float">
            <text:p>23900</text:p>
          </table:table-cell>
          <table:table-cell office:value-type="float" office:value="8640000" calcext:value-type="float">
            <text:p>8640000</text:p>
          </table:table-cell>
          <table:table-cell table:formula="of:=[.B2391]/[.C2391]" office:value-type="float" office:value="0.0027662037037037" calcext:value-type="float">
            <text:p>0,00276620370370370000</text:p>
          </table:table-cell>
          <table:table-cell table:formula="of:=[.D2392]-[.D2391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391" calcext:value-type="float">
            <text:p>2391</text:p>
          </table:table-cell>
          <table:table-cell table:formula="of:=[.B2391]+10" office:value-type="float" office:value="23910" calcext:value-type="float">
            <text:p>23910</text:p>
          </table:table-cell>
          <table:table-cell office:value-type="float" office:value="8640000" calcext:value-type="float">
            <text:p>8640000</text:p>
          </table:table-cell>
          <table:table-cell table:formula="of:=[.B2392]/[.C2392]" office:value-type="float" office:value="0.00276736111111111" calcext:value-type="float">
            <text:p>0,00276736111111111000</text:p>
          </table:table-cell>
          <table:table-cell table:formula="of:=[.D2393]-[.D2392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392" calcext:value-type="float">
            <text:p>2392</text:p>
          </table:table-cell>
          <table:table-cell table:formula="of:=[.B2392]+10" office:value-type="float" office:value="23920" calcext:value-type="float">
            <text:p>23920</text:p>
          </table:table-cell>
          <table:table-cell office:value-type="float" office:value="8640000" calcext:value-type="float">
            <text:p>8640000</text:p>
          </table:table-cell>
          <table:table-cell table:formula="of:=[.B2393]/[.C2393]" office:value-type="float" office:value="0.00276851851851852" calcext:value-type="float">
            <text:p>0,00276851851851852000</text:p>
          </table:table-cell>
          <table:table-cell table:formula="of:=[.D2394]-[.D2393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393" calcext:value-type="float">
            <text:p>2393</text:p>
          </table:table-cell>
          <table:table-cell table:formula="of:=[.B2393]+10" office:value-type="float" office:value="23930" calcext:value-type="float">
            <text:p>23930</text:p>
          </table:table-cell>
          <table:table-cell office:value-type="float" office:value="8640000" calcext:value-type="float">
            <text:p>8640000</text:p>
          </table:table-cell>
          <table:table-cell table:formula="of:=[.B2394]/[.C2394]" office:value-type="float" office:value="0.00276967592592593" calcext:value-type="float">
            <text:p>0,00276967592592593000</text:p>
          </table:table-cell>
          <table:table-cell table:formula="of:=[.D2395]-[.D2394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394" calcext:value-type="float">
            <text:p>2394</text:p>
          </table:table-cell>
          <table:table-cell table:formula="of:=[.B2394]+10" office:value-type="float" office:value="23940" calcext:value-type="float">
            <text:p>23940</text:p>
          </table:table-cell>
          <table:table-cell office:value-type="float" office:value="8640000" calcext:value-type="float">
            <text:p>8640000</text:p>
          </table:table-cell>
          <table:table-cell table:formula="of:=[.B2395]/[.C2395]" office:value-type="float" office:value="0.00277083333333333" calcext:value-type="float">
            <text:p>0,00277083333333333000</text:p>
          </table:table-cell>
          <table:table-cell table:formula="of:=[.D2396]-[.D2395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395" calcext:value-type="float">
            <text:p>2395</text:p>
          </table:table-cell>
          <table:table-cell table:formula="of:=[.B2395]+10" office:value-type="float" office:value="23950" calcext:value-type="float">
            <text:p>23950</text:p>
          </table:table-cell>
          <table:table-cell office:value-type="float" office:value="8640000" calcext:value-type="float">
            <text:p>8640000</text:p>
          </table:table-cell>
          <table:table-cell table:formula="of:=[.B2396]/[.C2396]" office:value-type="float" office:value="0.00277199074074074" calcext:value-type="float">
            <text:p>0,00277199074074074000</text:p>
          </table:table-cell>
          <table:table-cell table:formula="of:=[.D2397]-[.D2396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396" calcext:value-type="float">
            <text:p>2396</text:p>
          </table:table-cell>
          <table:table-cell table:formula="of:=[.B2396]+10" office:value-type="float" office:value="23960" calcext:value-type="float">
            <text:p>23960</text:p>
          </table:table-cell>
          <table:table-cell office:value-type="float" office:value="8640000" calcext:value-type="float">
            <text:p>8640000</text:p>
          </table:table-cell>
          <table:table-cell table:formula="of:=[.B2397]/[.C2397]" office:value-type="float" office:value="0.00277314814814815" calcext:value-type="float">
            <text:p>0,00277314814814815000</text:p>
          </table:table-cell>
          <table:table-cell table:formula="of:=[.D2398]-[.D2397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397" calcext:value-type="float">
            <text:p>2397</text:p>
          </table:table-cell>
          <table:table-cell table:formula="of:=[.B2397]+10" office:value-type="float" office:value="23970" calcext:value-type="float">
            <text:p>23970</text:p>
          </table:table-cell>
          <table:table-cell office:value-type="float" office:value="8640000" calcext:value-type="float">
            <text:p>8640000</text:p>
          </table:table-cell>
          <table:table-cell table:formula="of:=[.B2398]/[.C2398]" office:value-type="float" office:value="0.00277430555555556" calcext:value-type="float">
            <text:p>0,00277430555555556000</text:p>
          </table:table-cell>
          <table:table-cell table:formula="of:=[.D2399]-[.D2398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398" calcext:value-type="float">
            <text:p>2398</text:p>
          </table:table-cell>
          <table:table-cell table:formula="of:=[.B2398]+10" office:value-type="float" office:value="23980" calcext:value-type="float">
            <text:p>23980</text:p>
          </table:table-cell>
          <table:table-cell office:value-type="float" office:value="8640000" calcext:value-type="float">
            <text:p>8640000</text:p>
          </table:table-cell>
          <table:table-cell table:formula="of:=[.B2399]/[.C2399]" office:value-type="float" office:value="0.00277546296296296" calcext:value-type="float">
            <text:p>0,00277546296296296000</text:p>
          </table:table-cell>
          <table:table-cell table:formula="of:=[.D2400]-[.D2399]" office:value-type="float" office:value="0.00000115740740740718" calcext:value-type="float">
            <text:p>0,00000115740740740718</text:p>
          </table:table-cell>
        </table:table-row>
        <table:table-row table:style-name="ro1">
          <table:table-cell office:value-type="float" office:value="2399" calcext:value-type="float">
            <text:p>2399</text:p>
          </table:table-cell>
          <table:table-cell table:formula="of:=[.B2399]+10" office:value-type="float" office:value="23990" calcext:value-type="float">
            <text:p>23990</text:p>
          </table:table-cell>
          <table:table-cell office:value-type="float" office:value="8640000" calcext:value-type="float">
            <text:p>8640000</text:p>
          </table:table-cell>
          <table:table-cell table:formula="of:=[.B2400]/[.C2400]" office:value-type="float" office:value="0.00277662037037037" calcext:value-type="float">
            <text:p>0,00277662037037037000</text:p>
          </table:table-cell>
          <table:table-cell table:formula="of:=[.D2401]-[.D2400]" office:value-type="float" office:value="0.00000115740740740762" calcext:value-type="float">
            <text:p>0,00000115740740740762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table:formula="of:=[.B2400]+10" office:value-type="float" office:value="24000" calcext:value-type="float">
            <text:p>24000</text:p>
          </table:table-cell>
          <table:table-cell office:value-type="float" office:value="8640000" calcext:value-type="float">
            <text:p>8640000</text:p>
          </table:table-cell>
          <table:table-cell table:formula="of:=[.B2401]/[.C2401]" office:value-type="float" office:value="0.00277777777777778" calcext:value-type="float">
            <text:p>0,00277777777777778000</text:p>
          </table:table-cell>
          <table:table-cell table:formula="of:=#REF!-[.D2401]" office:value-type="string" office:string-value="" calcext:value-type="error">
            <text:p>#REF!</text:p>
          </table:table-cell>
        </table:table-row>
        <table:table-row table:style-name="ro1" table:number-rows-repeated="104617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15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16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17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18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19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0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1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2">
      <number:number number:decimal-places="4" number:min-decimal-places="4" number:min-integer-digits="1"/>
    </number:number-style>
    <number:number-style style:name="N123">
      <number:scientific-number number:decimal-places="14" number:min-decimal-places="14" number:min-integer-digits="1" number:min-exponent-digits="2" number:exponent-interval="1" number:forced-exponent-sign="true"/>
    </number:number-style>
    <number:number-style style:name="N124">
      <number:scientific-number number:decimal-places="16" number:min-decimal-places="16" number:min-integer-digits="1" number:min-exponent-digits="2" number:exponent-interval="1" number:forced-exponent-sign="true"/>
    </number:number-style>
    <number:number-style style:name="N125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26">
      <number:number number:decimal-places="17" number:min-decimal-places="17" number:min-integer-digits="1"/>
    </number:number-style>
    <number:number-style style:name="N127">
      <number:number number:decimal-places="3" number:min-decimal-places="3" number:min-integer-digits="1"/>
    </number:number-style>
    <number:number-style style:name="N128">
      <number:number number:decimal-places="1" number:min-decimal-places="1" number:min-integer-digits="1"/>
    </number:number-style>
    <number:number-style style:name="N129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30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31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32">
      <number:number number:decimal-places="12" number:min-decimal-places="12" number:min-integer-digits="1"/>
    </number:number-style>
    <number:number-style style:name="N133">
      <number:number number:decimal-places="18" number:min-decimal-places="18" number:min-integer-digits="1"/>
    </number:number-style>
    <number:number-style style:name="N134">
      <number:number number:decimal-places="19" number:min-decimal-places="19" number:min-integer-digits="1"/>
    </number:number-style>
    <number:number-style style:name="N135">
      <number:number number:decimal-places="20" number:min-decimal-places="20" number:min-integer-digits="1"/>
    </number:number-style>
    <number:number-style style:name="N136">
      <number:number number:decimal-places="16" number:min-decimal-places="16" number:min-integer-digits="1"/>
    </number:number-style>
    <number:number-style style:name="N137">
      <number:number number:decimal-places="15" number:min-decimal-places="15" number:min-integer-digits="1"/>
    </number:number-style>
    <number:number-style style:name="N138">
      <number:number number:decimal-places="14" number:min-decimal-places="14" number:min-integer-digits="1"/>
    </number:number-style>
    <number:number-style style:name="N139">
      <number:number number:decimal-places="5" number:min-decimal-places="5" number:min-integer-digits="1"/>
    </number:number-style>
    <number:number-style style:name="N140">
      <number:number number:decimal-places="6" number:min-decimal-places="6" number:min-integer-digits="1"/>
    </number:number-style>
    <number:number-style style:name="N141">
      <number:number number:decimal-places="7" number:min-decimal-places="7" number:min-integer-digits="1"/>
    </number:number-style>
    <number:number-style style:name="N142">
      <number:number number:decimal-places="8" number:min-decimal-places="8" number:min-integer-digits="1"/>
    </number:number-style>
    <number:number-style style:name="N143">
      <number:number number:decimal-places="9" number:min-decimal-places="9" number:min-integer-digits="1"/>
    </number:number-style>
    <number:number-style style:name="N144">
      <number:number number:decimal-places="10" number:min-decimal-places="10" number:min-integer-digits="1"/>
    </number:number-style>
    <number:number-style style:name="N145">
      <number:number number:decimal-places="11" number:min-decimal-places="11" number:min-integer-digits="1"/>
    </number:number-style>
    <number:number-style style:name="N146">
      <number:number number:decimal-places="4" number:min-decimal-places="4" number:min-integer-digits="1" number:grouping="true"/>
    </number:number-style>
    <number:number-style style:name="N147">
      <number:number number:decimal-places="1" number:min-decimal-places="1" number:min-integer-digits="1" number:grouping="true"/>
    </number:number-style>
    <number:number-style style:name="N148">
      <number:number number:decimal-places="3" number:min-decimal-places="3" number:min-integer-digits="1" number:grouping="true"/>
    </number:number-style>
    <number:number-style style:name="N149">
      <number:scientific-number number:decimal-places="18" number:min-decimal-places="18" number:min-integer-digits="1" number:min-exponent-digits="2" number:exponent-interval="1" number:forced-exponent-sign="true"/>
    </number:number-style>
    <number:number-style style:name="N150">
      <number:scientific-number number:decimal-places="17" number:min-decimal-places="17" number:min-integer-digits="1" number:min-exponent-digits="2" number:exponent-interval="1" number:forced-exponent-sign="true"/>
    </number:number-style>
    <number:number-style style:name="N151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7T15:32:27.550459631</meta:creation-date>
    <dc:date>2026-05-17T15:32:36.094448798</dc:date>
    <meta:editing-duration>PT10S</meta:editing-duration>
    <meta:editing-cycles>1</meta:editing-cycles>
    <meta:document-statistic meta:table-count="1" meta:cell-count="12005" meta:object-count="0"/>
    <meta:generator>LibreOffice/24.2.7.2$Linux_X86_64 LibreOffice_project/420$Build-2</meta:generator>
  </office:meta>
</office:document-meta>
</file>